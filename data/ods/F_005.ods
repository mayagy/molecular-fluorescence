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X [nm (air)]</text:p>
          </table:table-cell>
          <table:table-cell office:value-type="string">
            <text:p>Y [Intensity]</text:p>
          </table:table-cell>
          <table:table-cell table:number-columns-repeated="4"/>
        </table:table-row>
        <table:table-row table:style-name="ro1">
          <table:table-cell office:value-type="float" office:value="321.5908203125">
            <text:p>321.5908203125</text:p>
          </table:table-cell>
          <table:table-cell office:value-type="float" office:value="0.005492316">
            <text:p>0.005492316</text:p>
          </table:table-cell>
          <table:table-cell table:number-columns-repeated="4"/>
        </table:table-row>
        <table:table-row table:style-name="ro1">
          <table:table-cell office:value-type="float" office:value="321.698333740234">
            <text:p>321.6983337402</text:p>
          </table:table-cell>
          <table:table-cell office:value-type="float" office:value="0.001940254">
            <text:p>0.001940254</text:p>
          </table:table-cell>
          <table:table-cell table:number-columns-repeated="3"/>
          <table:table-cell>
            <draw:frame table:end-cell-address="Sheet1.M23" table:end-x="0.7083in" table:end-y="0.1417in" draw:z-index="0" draw:style-name="gr1" draw:text-style-name="P1" svg:width="6.2988in" svg:height="3.5429in" svg:x="0.6327in" svg:y="0.1547in">
              <draw:object draw:notify-on-update-of-ranges="Sheet1.A1:Sheet1.A1 Sheet1.A2:Sheet1.A3649 Sheet1.B1:Sheet1.B1 Sheet1.B2:Sheet1.B364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21.805877685547">
            <text:p>321.8058776855</text:p>
          </table:table-cell>
          <table:table-cell office:value-type="float" office:value="0.003696188">
            <text:p>0.003696188</text:p>
          </table:table-cell>
          <table:table-cell table:number-columns-repeated="4"/>
        </table:table-row>
        <table:table-row table:style-name="ro1">
          <table:table-cell office:value-type="float" office:value="321.913421630859">
            <text:p>321.9134216309</text:p>
          </table:table-cell>
          <table:table-cell office:value-type="float" office:value="0.01199537">
            <text:p>0.01199537</text:p>
          </table:table-cell>
          <table:table-cell table:number-columns-repeated="4"/>
        </table:table-row>
        <table:table-row table:style-name="ro1">
          <table:table-cell office:value-type="float" office:value="322.020965576172">
            <text:p>322.0209655762</text:p>
          </table:table-cell>
          <table:table-cell office:value-type="float" office:value="0.007912622">
            <text:p>0.007912622</text:p>
          </table:table-cell>
          <table:table-cell table:number-columns-repeated="4"/>
        </table:table-row>
        <table:table-row table:style-name="ro1">
          <table:table-cell office:value-type="float" office:value="322.128540039063">
            <text:p>322.1285400391</text:p>
          </table:table-cell>
          <table:table-cell office:value-type="float" office:value="0.005511125">
            <text:p>0.005511125</text:p>
          </table:table-cell>
          <table:table-cell table:number-columns-repeated="4"/>
        </table:table-row>
        <table:table-row table:style-name="ro1">
          <table:table-cell office:value-type="float" office:value="322.236083984375">
            <text:p>322.2360839844</text:p>
          </table:table-cell>
          <table:table-cell office:value-type="float" office:value="0.0169933">
            <text:p>0.0169933</text:p>
          </table:table-cell>
          <table:table-cell table:number-columns-repeated="4"/>
        </table:table-row>
        <table:table-row table:style-name="ro1">
          <table:table-cell office:value-type="float" office:value="322.343658447266">
            <text:p>322.3436584473</text:p>
          </table:table-cell>
          <table:table-cell office:value-type="float" office:value="-0.001002652">
            <text:p>-0.001002652</text:p>
          </table:table-cell>
          <table:table-cell table:number-columns-repeated="4"/>
        </table:table-row>
        <table:table-row table:style-name="ro1">
          <table:table-cell office:value-type="float" office:value="322.451232910156">
            <text:p>322.4512329102</text:p>
          </table:table-cell>
          <table:table-cell office:value-type="float" office:value="0.0002995229">
            <text:p>0.0002995229</text:p>
          </table:table-cell>
          <table:table-cell table:number-columns-repeated="4"/>
        </table:table-row>
        <table:table-row table:style-name="ro1">
          <table:table-cell office:value-type="float" office:value="322.558837890625">
            <text:p>322.5588378906</text:p>
          </table:table-cell>
          <table:table-cell office:value-type="float" office:value="0.007656425">
            <text:p>0.007656425</text:p>
          </table:table-cell>
          <table:table-cell table:number-columns-repeated="4"/>
        </table:table-row>
        <table:table-row table:style-name="ro1">
          <table:table-cell office:value-type="float" office:value="322.666412353516">
            <text:p>322.6664123535</text:p>
          </table:table-cell>
          <table:table-cell office:value-type="float" office:value="0.00986709">
            <text:p>0.00986709</text:p>
          </table:table-cell>
          <table:table-cell table:number-columns-repeated="4"/>
        </table:table-row>
        <table:table-row table:style-name="ro1">
          <table:table-cell office:value-type="float" office:value="322.774017333984">
            <text:p>322.774017334</text:p>
          </table:table-cell>
          <table:table-cell office:value-type="float" office:value="0.01133318">
            <text:p>0.01133318</text:p>
          </table:table-cell>
          <table:table-cell table:number-columns-repeated="4"/>
        </table:table-row>
        <table:table-row table:style-name="ro1">
          <table:table-cell office:value-type="float" office:value="322.881622314453">
            <text:p>322.8816223145</text:p>
          </table:table-cell>
          <table:table-cell office:value-type="float" office:value="-0.003090942">
            <text:p>-0.003090942</text:p>
          </table:table-cell>
          <table:table-cell table:number-columns-repeated="4"/>
        </table:table-row>
        <table:table-row table:style-name="ro1">
          <table:table-cell office:value-type="float" office:value="322.989227294922">
            <text:p>322.9892272949</text:p>
          </table:table-cell>
          <table:table-cell office:value-type="float" office:value="0.00306174">
            <text:p>0.00306174</text:p>
          </table:table-cell>
          <table:table-cell table:number-columns-repeated="4"/>
        </table:table-row>
        <table:table-row table:style-name="ro1">
          <table:table-cell office:value-type="float" office:value="323.096862792969">
            <text:p>323.096862793</text:p>
          </table:table-cell>
          <table:table-cell office:value-type="float" office:value="0.002008882">
            <text:p>0.002008882</text:p>
          </table:table-cell>
          <table:table-cell table:number-columns-repeated="4"/>
        </table:table-row>
        <table:table-row table:style-name="ro1">
          <table:table-cell office:value-type="float" office:value="323.204498291016">
            <text:p>323.204498291</text:p>
          </table:table-cell>
          <table:table-cell office:value-type="float" office:value="0.006225385">
            <text:p>0.006225385</text:p>
          </table:table-cell>
          <table:table-cell table:number-columns-repeated="4"/>
        </table:table-row>
        <table:table-row table:style-name="ro1">
          <table:table-cell office:value-type="float" office:value="323.312133789063">
            <text:p>323.3121337891</text:p>
          </table:table-cell>
          <table:table-cell office:value-type="float" office:value="-0.002015956">
            <text:p>-0.002015956</text:p>
          </table:table-cell>
          <table:table-cell table:number-columns-repeated="4"/>
        </table:table-row>
        <table:table-row table:style-name="ro1">
          <table:table-cell office:value-type="float" office:value="323.419769287109">
            <text:p>323.4197692871</text:p>
          </table:table-cell>
          <table:table-cell office:value-type="float" office:value="0.004147665">
            <text:p>0.004147665</text:p>
          </table:table-cell>
          <table:table-cell table:number-columns-repeated="4"/>
        </table:table-row>
        <table:table-row table:style-name="ro1">
          <table:table-cell office:value-type="float" office:value="323.527404785156">
            <text:p>323.5274047852</text:p>
          </table:table-cell>
          <table:table-cell office:value-type="float" office:value="0.03743783">
            <text:p>0.03743783</text:p>
          </table:table-cell>
          <table:table-cell table:number-columns-repeated="4"/>
        </table:table-row>
        <table:table-row table:style-name="ro1">
          <table:table-cell office:value-type="float" office:value="323.635070800781">
            <text:p>323.6350708008</text:p>
          </table:table-cell>
          <table:table-cell office:value-type="float" office:value="-0.006337866">
            <text:p>-0.006337866</text:p>
          </table:table-cell>
          <table:table-cell table:number-columns-repeated="4"/>
        </table:table-row>
        <table:table-row table:style-name="ro1">
          <table:table-cell office:value-type="float" office:value="323.742736816406">
            <text:p>323.7427368164</text:p>
          </table:table-cell>
          <table:table-cell office:value-type="float" office:value="-0.003572877">
            <text:p>-0.003572877</text:p>
          </table:table-cell>
          <table:table-cell table:number-columns-repeated="4"/>
        </table:table-row>
        <table:table-row table:style-name="ro1">
          <table:table-cell office:value-type="float" office:value="323.850402832031">
            <text:p>323.850402832</text:p>
          </table:table-cell>
          <table:table-cell office:value-type="float" office:value="0.01000245">
            <text:p>0.01000245</text:p>
          </table:table-cell>
          <table:table-cell table:number-columns-repeated="4"/>
        </table:table-row>
        <table:table-row table:style-name="ro1">
          <table:table-cell office:value-type="float" office:value="323.958068847656">
            <text:p>323.9580688477</text:p>
          </table:table-cell>
          <table:table-cell office:value-type="float" office:value="0.01768482">
            <text:p>0.01768482</text:p>
          </table:table-cell>
          <table:table-cell table:number-columns-repeated="4"/>
        </table:table-row>
        <table:table-row table:style-name="ro1">
          <table:table-cell office:value-type="float" office:value="324.065765380859">
            <text:p>324.0657653809</text:p>
          </table:table-cell>
          <table:table-cell office:value-type="float" office:value="-0.00143032">
            <text:p>-0.00143032</text:p>
          </table:table-cell>
          <table:table-cell table:number-columns-repeated="4"/>
        </table:table-row>
        <table:table-row table:style-name="ro1">
          <table:table-cell office:value-type="float" office:value="324.173461914063">
            <text:p>324.1734619141</text:p>
          </table:table-cell>
          <table:table-cell office:value-type="float" office:value="-0.004976941">
            <text:p>-0.004976941</text:p>
          </table:table-cell>
          <table:table-cell table:number-columns-repeated="4"/>
        </table:table-row>
        <table:table-row table:style-name="ro1">
          <table:table-cell office:value-type="float" office:value="324.281158447266">
            <text:p>324.2811584473</text:p>
          </table:table-cell>
          <table:table-cell office:value-type="float" office:value="0.00509495">
            <text:p>0.00509495</text:p>
          </table:table-cell>
          <table:table-cell table:number-columns-repeated="4"/>
        </table:table-row>
        <table:table-row table:style-name="ro1">
          <table:table-cell office:value-type="float" office:value="324.388854980469">
            <text:p>324.3888549805</text:p>
          </table:table-cell>
          <table:table-cell office:value-type="float" office:value="-0.001893452">
            <text:p>-0.001893452</text:p>
          </table:table-cell>
          <table:table-cell table:number-columns-repeated="4"/>
        </table:table-row>
        <table:table-row table:style-name="ro1">
          <table:table-cell office:value-type="float" office:value="324.496551513672">
            <text:p>324.4965515137</text:p>
          </table:table-cell>
          <table:table-cell office:value-type="float" office:value="0.003500549">
            <text:p>0.003500549</text:p>
          </table:table-cell>
          <table:table-cell table:number-columns-repeated="4"/>
        </table:table-row>
        <table:table-row table:style-name="ro1">
          <table:table-cell office:value-type="float" office:value="324.604278564453">
            <text:p>324.6042785645</text:p>
          </table:table-cell>
          <table:table-cell office:value-type="float" office:value="0.008880946">
            <text:p>0.008880946</text:p>
          </table:table-cell>
          <table:table-cell table:number-columns-repeated="4"/>
        </table:table-row>
        <table:table-row table:style-name="ro1">
          <table:table-cell office:value-type="float" office:value="324.712005615234">
            <text:p>324.7120056152</text:p>
          </table:table-cell>
          <table:table-cell office:value-type="float" office:value="0.00475488">
            <text:p>0.00475488</text:p>
          </table:table-cell>
          <table:table-cell table:number-columns-repeated="4"/>
        </table:table-row>
        <table:table-row table:style-name="ro1">
          <table:table-cell office:value-type="float" office:value="324.819732666016">
            <text:p>324.819732666</text:p>
          </table:table-cell>
          <table:table-cell office:value-type="float" office:value="0.002237271">
            <text:p>0.002237271</text:p>
          </table:table-cell>
          <table:table-cell table:number-columns-repeated="4"/>
        </table:table-row>
        <table:table-row table:style-name="ro1">
          <table:table-cell office:value-type="float" office:value="324.927490234375">
            <text:p>324.9274902344</text:p>
          </table:table-cell>
          <table:table-cell office:value-type="float" office:value="0.01637296">
            <text:p>0.01637296</text:p>
          </table:table-cell>
          <table:table-cell table:number-columns-repeated="4"/>
        </table:table-row>
        <table:table-row table:style-name="ro1">
          <table:table-cell office:value-type="float" office:value="325.035217285156">
            <text:p>325.0352172852</text:p>
          </table:table-cell>
          <table:table-cell office:value-type="float" office:value="-0.007413154">
            <text:p>-0.007413154</text:p>
          </table:table-cell>
          <table:table-cell table:number-columns-repeated="4"/>
        </table:table-row>
        <table:table-row table:style-name="ro1">
          <table:table-cell office:value-type="float" office:value="325.142974853516">
            <text:p>325.1429748535</text:p>
          </table:table-cell>
          <table:table-cell office:value-type="float" office:value="0.002081244">
            <text:p>0.002081244</text:p>
          </table:table-cell>
          <table:table-cell table:number-columns-repeated="4"/>
        </table:table-row>
        <table:table-row table:style-name="ro1">
          <table:table-cell office:value-type="float" office:value="325.250732421875">
            <text:p>325.2507324219</text:p>
          </table:table-cell>
          <table:table-cell office:value-type="float" office:value="0.0007048565">
            <text:p>0.0007048565</text:p>
          </table:table-cell>
          <table:table-cell table:number-columns-repeated="4"/>
        </table:table-row>
        <table:table-row table:style-name="ro1">
          <table:table-cell office:value-type="float" office:value="325.358489990234">
            <text:p>325.3584899902</text:p>
          </table:table-cell>
          <table:table-cell office:value-type="float" office:value="-0.003777897">
            <text:p>-0.003777897</text:p>
          </table:table-cell>
          <table:table-cell table:number-columns-repeated="4"/>
        </table:table-row>
        <table:table-row table:style-name="ro1">
          <table:table-cell office:value-type="float" office:value="325.466278076172">
            <text:p>325.4662780762</text:p>
          </table:table-cell>
          <table:table-cell office:value-type="float" office:value="0.002357268">
            <text:p>0.002357268</text:p>
          </table:table-cell>
          <table:table-cell table:number-columns-repeated="4"/>
        </table:table-row>
        <table:table-row table:style-name="ro1">
          <table:table-cell office:value-type="float" office:value="325.574066162109">
            <text:p>325.5740661621</text:p>
          </table:table-cell>
          <table:table-cell office:value-type="float" office:value="0.005006851">
            <text:p>0.005006851</text:p>
          </table:table-cell>
          <table:table-cell table:number-columns-repeated="4"/>
        </table:table-row>
        <table:table-row table:style-name="ro1">
          <table:table-cell office:value-type="float" office:value="325.681854248047">
            <text:p>325.681854248</text:p>
          </table:table-cell>
          <table:table-cell office:value-type="float" office:value="0.003745167">
            <text:p>0.003745167</text:p>
          </table:table-cell>
          <table:table-cell table:number-columns-repeated="4"/>
        </table:table-row>
        <table:table-row table:style-name="ro1">
          <table:table-cell office:value-type="float" office:value="325.789642333984">
            <text:p>325.789642334</text:p>
          </table:table-cell>
          <table:table-cell office:value-type="float" office:value="0.005883739">
            <text:p>0.005883739</text:p>
          </table:table-cell>
          <table:table-cell table:number-columns-repeated="4"/>
        </table:table-row>
        <table:table-row table:style-name="ro1">
          <table:table-cell office:value-type="float" office:value="325.897430419922">
            <text:p>325.8974304199</text:p>
          </table:table-cell>
          <table:table-cell office:value-type="float" office:value="0.002410229">
            <text:p>0.002410229</text:p>
          </table:table-cell>
          <table:table-cell table:number-columns-repeated="4"/>
        </table:table-row>
        <table:table-row table:style-name="ro1">
          <table:table-cell office:value-type="float" office:value="326.005249023438">
            <text:p>326.0052490234</text:p>
          </table:table-cell>
          <table:table-cell office:value-type="float" office:value="0.001750876">
            <text:p>0.001750876</text:p>
          </table:table-cell>
          <table:table-cell table:number-columns-repeated="4"/>
        </table:table-row>
        <table:table-row table:style-name="ro1">
          <table:table-cell office:value-type="float" office:value="326.113067626953">
            <text:p>326.113067627</text:p>
          </table:table-cell>
          <table:table-cell office:value-type="float" office:value="0.00844588">
            <text:p>0.00844588</text:p>
          </table:table-cell>
          <table:table-cell table:number-columns-repeated="4"/>
        </table:table-row>
        <table:table-row table:style-name="ro1">
          <table:table-cell office:value-type="float" office:value="326.220886230469">
            <text:p>326.2208862305</text:p>
          </table:table-cell>
          <table:table-cell office:value-type="float" office:value="0.01619323">
            <text:p>0.01619323</text:p>
          </table:table-cell>
          <table:table-cell table:number-columns-repeated="4"/>
        </table:table-row>
        <table:table-row table:style-name="ro1">
          <table:table-cell office:value-type="float" office:value="326.328704833984">
            <text:p>326.328704834</text:p>
          </table:table-cell>
          <table:table-cell office:value-type="float" office:value="-0.003408946">
            <text:p>-0.003408946</text:p>
          </table:table-cell>
          <table:table-cell table:number-columns-repeated="4"/>
        </table:table-row>
        <table:table-row table:style-name="ro1">
          <table:table-cell office:value-type="float" office:value="326.436553955078">
            <text:p>326.4365539551</text:p>
          </table:table-cell>
          <table:table-cell office:value-type="float" office:value="0.0101742">
            <text:p>0.0101742</text:p>
          </table:table-cell>
          <table:table-cell table:number-columns-repeated="4"/>
        </table:table-row>
        <table:table-row table:style-name="ro1">
          <table:table-cell office:value-type="float" office:value="326.544403076172">
            <text:p>326.5444030762</text:p>
          </table:table-cell>
          <table:table-cell office:value-type="float" office:value="0.02370792">
            <text:p>0.02370792</text:p>
          </table:table-cell>
          <table:table-cell table:number-columns-repeated="4"/>
        </table:table-row>
        <table:table-row table:style-name="ro1">
          <table:table-cell office:value-type="float" office:value="326.652252197266">
            <text:p>326.6522521973</text:p>
          </table:table-cell>
          <table:table-cell office:value-type="float" office:value="0.01736875">
            <text:p>0.01736875</text:p>
          </table:table-cell>
          <table:table-cell table:number-columns-repeated="4"/>
        </table:table-row>
        <table:table-row table:style-name="ro1">
          <table:table-cell office:value-type="float" office:value="326.760101318359">
            <text:p>326.7601013184</text:p>
          </table:table-cell>
          <table:table-cell office:value-type="float" office:value="0.005904746">
            <text:p>0.005904746</text:p>
          </table:table-cell>
          <table:table-cell table:number-columns-repeated="4"/>
        </table:table-row>
        <table:table-row table:style-name="ro1">
          <table:table-cell office:value-type="float" office:value="326.867950439453">
            <text:p>326.8679504395</text:p>
          </table:table-cell>
          <table:table-cell office:value-type="float" office:value="0.009909216">
            <text:p>0.009909216</text:p>
          </table:table-cell>
          <table:table-cell table:number-columns-repeated="4"/>
        </table:table-row>
        <table:table-row table:style-name="ro1">
          <table:table-cell office:value-type="float" office:value="326.975830078125">
            <text:p>326.9758300781</text:p>
          </table:table-cell>
          <table:table-cell office:value-type="float" office:value="0.004646156">
            <text:p>0.004646156</text:p>
          </table:table-cell>
          <table:table-cell table:number-columns-repeated="4"/>
        </table:table-row>
        <table:table-row table:style-name="ro1">
          <table:table-cell office:value-type="float" office:value="327.083709716797">
            <text:p>327.0837097168</text:p>
          </table:table-cell>
          <table:table-cell office:value-type="float" office:value="0.007259635">
            <text:p>0.007259635</text:p>
          </table:table-cell>
          <table:table-cell table:number-columns-repeated="4"/>
        </table:table-row>
        <table:table-row table:style-name="ro1">
          <table:table-cell office:value-type="float" office:value="327.191589355469">
            <text:p>327.1915893555</text:p>
          </table:table-cell>
          <table:table-cell office:value-type="float" office:value="-0.001886289">
            <text:p>-0.001886289</text:p>
          </table:table-cell>
          <table:table-cell table:number-columns-repeated="4"/>
        </table:table-row>
        <table:table-row table:style-name="ro1">
          <table:table-cell office:value-type="float" office:value="327.299499511719">
            <text:p>327.2994995117</text:p>
          </table:table-cell>
          <table:table-cell office:value-type="float" office:value="0.005195487">
            <text:p>0.005195487</text:p>
          </table:table-cell>
          <table:table-cell table:number-columns-repeated="4"/>
        </table:table-row>
        <table:table-row table:style-name="ro1">
          <table:table-cell office:value-type="float" office:value="327.407379150391">
            <text:p>327.4073791504</text:p>
          </table:table-cell>
          <table:table-cell office:value-type="float" office:value="0.017976">
            <text:p>0.017976</text:p>
          </table:table-cell>
          <table:table-cell table:number-columns-repeated="4"/>
        </table:table-row>
        <table:table-row table:style-name="ro1">
          <table:table-cell office:value-type="float" office:value="327.515289306641">
            <text:p>327.5152893066</text:p>
          </table:table-cell>
          <table:table-cell office:value-type="float" office:value="-0.002553209">
            <text:p>-0.002553209</text:p>
          </table:table-cell>
          <table:table-cell table:number-columns-repeated="4"/>
        </table:table-row>
        <table:table-row table:style-name="ro1">
          <table:table-cell office:value-type="float" office:value="327.623199462891">
            <text:p>327.6231994629</text:p>
          </table:table-cell>
          <table:table-cell office:value-type="float" office:value="0.008647474">
            <text:p>0.008647474</text:p>
          </table:table-cell>
          <table:table-cell table:number-columns-repeated="4"/>
        </table:table-row>
        <table:table-row table:style-name="ro1">
          <table:table-cell office:value-type="float" office:value="327.731109619141">
            <text:p>327.7311096191</text:p>
          </table:table-cell>
          <table:table-cell office:value-type="float" office:value="-0.002915232">
            <text:p>-0.002915232</text:p>
          </table:table-cell>
          <table:table-cell table:number-columns-repeated="4"/>
        </table:table-row>
        <table:table-row table:style-name="ro1">
          <table:table-cell office:value-type="float" office:value="327.839050292969">
            <text:p>327.839050293</text:p>
          </table:table-cell>
          <table:table-cell office:value-type="float" office:value="-0.005669306">
            <text:p>-0.005669306</text:p>
          </table:table-cell>
          <table:table-cell table:number-columns-repeated="4"/>
        </table:table-row>
        <table:table-row table:style-name="ro1">
          <table:table-cell office:value-type="float" office:value="327.946990966797">
            <text:p>327.9469909668</text:p>
          </table:table-cell>
          <table:table-cell office:value-type="float" office:value="-0.000749303">
            <text:p>-0.000749303</text:p>
          </table:table-cell>
          <table:table-cell table:number-columns-repeated="4"/>
        </table:table-row>
        <table:table-row table:style-name="ro1">
          <table:table-cell office:value-type="float" office:value="328.054931640625">
            <text:p>328.0549316406</text:p>
          </table:table-cell>
          <table:table-cell office:value-type="float" office:value="0.003805107">
            <text:p>0.003805107</text:p>
          </table:table-cell>
          <table:table-cell table:number-columns-repeated="4"/>
        </table:table-row>
        <table:table-row table:style-name="ro1">
          <table:table-cell office:value-type="float" office:value="328.162872314453">
            <text:p>328.1628723145</text:p>
          </table:table-cell>
          <table:table-cell office:value-type="float" office:value="0.007616142">
            <text:p>0.007616142</text:p>
          </table:table-cell>
          <table:table-cell table:number-columns-repeated="4"/>
        </table:table-row>
        <table:table-row table:style-name="ro1">
          <table:table-cell office:value-type="float" office:value="328.270812988281">
            <text:p>328.2708129883</text:p>
          </table:table-cell>
          <table:table-cell office:value-type="float" office:value="-0.002131219">
            <text:p>-0.002131219</text:p>
          </table:table-cell>
          <table:table-cell table:number-columns-repeated="4"/>
        </table:table-row>
        <table:table-row table:style-name="ro1">
          <table:table-cell office:value-type="float" office:value="328.378784179688">
            <text:p>328.3787841797</text:p>
          </table:table-cell>
          <table:table-cell office:value-type="float" office:value="-0.001261554">
            <text:p>-0.001261554</text:p>
          </table:table-cell>
          <table:table-cell table:number-columns-repeated="4"/>
        </table:table-row>
        <table:table-row table:style-name="ro1">
          <table:table-cell office:value-type="float" office:value="328.486755371094">
            <text:p>328.4867553711</text:p>
          </table:table-cell>
          <table:table-cell office:value-type="float" office:value="-0.008070176">
            <text:p>-0.008070176</text:p>
          </table:table-cell>
          <table:table-cell table:number-columns-repeated="4"/>
        </table:table-row>
        <table:table-row table:style-name="ro1">
          <table:table-cell office:value-type="float" office:value="328.5947265625">
            <text:p>328.5947265625</text:p>
          </table:table-cell>
          <table:table-cell office:value-type="float" office:value="0.003312527">
            <text:p>0.003312527</text:p>
          </table:table-cell>
          <table:table-cell table:number-columns-repeated="4"/>
        </table:table-row>
        <table:table-row table:style-name="ro1">
          <table:table-cell office:value-type="float" office:value="328.702697753906">
            <text:p>328.7026977539</text:p>
          </table:table-cell>
          <table:table-cell office:value-type="float" office:value="0.02240828">
            <text:p>0.02240828</text:p>
          </table:table-cell>
          <table:table-cell table:number-columns-repeated="4"/>
        </table:table-row>
        <table:table-row table:style-name="ro1">
          <table:table-cell office:value-type="float" office:value="328.810699462891">
            <text:p>328.8106994629</text:p>
          </table:table-cell>
          <table:table-cell office:value-type="float" office:value="0.002481088">
            <text:p>0.002481088</text:p>
          </table:table-cell>
          <table:table-cell table:number-columns-repeated="4"/>
        </table:table-row>
        <table:table-row table:style-name="ro1">
          <table:table-cell office:value-type="float" office:value="328.918670654297">
            <text:p>328.9186706543</text:p>
          </table:table-cell>
          <table:table-cell office:value-type="float" office:value="0.007485371">
            <text:p>0.007485371</text:p>
          </table:table-cell>
          <table:table-cell table:number-columns-repeated="4"/>
        </table:table-row>
        <table:table-row table:style-name="ro1">
          <table:table-cell office:value-type="float" office:value="329.026672363281">
            <text:p>329.0266723633</text:p>
          </table:table-cell>
          <table:table-cell office:value-type="float" office:value="0.009168755">
            <text:p>0.009168755</text:p>
          </table:table-cell>
          <table:table-cell table:number-columns-repeated="4"/>
        </table:table-row>
        <table:table-row table:style-name="ro1">
          <table:table-cell office:value-type="float" office:value="329.134704589844">
            <text:p>329.1347045898</text:p>
          </table:table-cell>
          <table:table-cell office:value-type="float" office:value="0.0166708">
            <text:p>0.0166708</text:p>
          </table:table-cell>
          <table:table-cell table:number-columns-repeated="4"/>
        </table:table-row>
        <table:table-row table:style-name="ro1">
          <table:table-cell office:value-type="float" office:value="329.242706298828">
            <text:p>329.2427062988</text:p>
          </table:table-cell>
          <table:table-cell office:value-type="float" office:value="-0.002681873">
            <text:p>-0.002681873</text:p>
          </table:table-cell>
          <table:table-cell table:number-columns-repeated="4"/>
        </table:table-row>
        <table:table-row table:style-name="ro1">
          <table:table-cell office:value-type="float" office:value="329.350738525391">
            <text:p>329.3507385254</text:p>
          </table:table-cell>
          <table:table-cell office:value-type="float" office:value="-0.003177324">
            <text:p>-0.003177324</text:p>
          </table:table-cell>
          <table:table-cell table:number-columns-repeated="4"/>
        </table:table-row>
        <table:table-row table:style-name="ro1">
          <table:table-cell office:value-type="float" office:value="329.458770751953">
            <text:p>329.458770752</text:p>
          </table:table-cell>
          <table:table-cell office:value-type="float" office:value="0.001676452">
            <text:p>0.001676452</text:p>
          </table:table-cell>
          <table:table-cell table:number-columns-repeated="4"/>
        </table:table-row>
        <table:table-row table:style-name="ro1">
          <table:table-cell office:value-type="float" office:value="329.566802978516">
            <text:p>329.5668029785</text:p>
          </table:table-cell>
          <table:table-cell office:value-type="float" office:value="0.003054053">
            <text:p>0.003054053</text:p>
          </table:table-cell>
          <table:table-cell table:number-columns-repeated="4"/>
        </table:table-row>
        <table:table-row table:style-name="ro1">
          <table:table-cell office:value-type="float" office:value="329.674835205078">
            <text:p>329.6748352051</text:p>
          </table:table-cell>
          <table:table-cell office:value-type="float" office:value="-0.002963745">
            <text:p>-0.002963745</text:p>
          </table:table-cell>
          <table:table-cell table:number-columns-repeated="4"/>
        </table:table-row>
        <table:table-row table:style-name="ro1">
          <table:table-cell office:value-type="float" office:value="329.782897949219">
            <text:p>329.7828979492</text:p>
          </table:table-cell>
          <table:table-cell office:value-type="float" office:value="0.007394746">
            <text:p>0.007394746</text:p>
          </table:table-cell>
          <table:table-cell table:number-columns-repeated="4"/>
        </table:table-row>
        <table:table-row table:style-name="ro1">
          <table:table-cell office:value-type="float" office:value="329.890960693359">
            <text:p>329.8909606934</text:p>
          </table:table-cell>
          <table:table-cell office:value-type="float" office:value="0.03863188">
            <text:p>0.03863188</text:p>
          </table:table-cell>
          <table:table-cell table:number-columns-repeated="4"/>
        </table:table-row>
        <table:table-row table:style-name="ro1">
          <table:table-cell office:value-type="float" office:value="329.9990234375">
            <text:p>329.9990234375</text:p>
          </table:table-cell>
          <table:table-cell office:value-type="float" office:value="0.002388127">
            <text:p>0.002388127</text:p>
          </table:table-cell>
          <table:table-cell table:number-columns-repeated="4"/>
        </table:table-row>
        <table:table-row table:style-name="ro1">
          <table:table-cell office:value-type="float" office:value="330.107086181641">
            <text:p>330.1070861816</text:p>
          </table:table-cell>
          <table:table-cell office:value-type="float" office:value="0.001624602">
            <text:p>0.001624602</text:p>
          </table:table-cell>
          <table:table-cell table:number-columns-repeated="4"/>
        </table:table-row>
        <table:table-row table:style-name="ro1">
          <table:table-cell office:value-type="float" office:value="330.215148925781">
            <text:p>330.2151489258</text:p>
          </table:table-cell>
          <table:table-cell office:value-type="float" office:value="-0.006441598">
            <text:p>-0.006441598</text:p>
          </table:table-cell>
          <table:table-cell table:number-columns-repeated="4"/>
        </table:table-row>
        <table:table-row table:style-name="ro1">
          <table:table-cell office:value-type="float" office:value="330.3232421875">
            <text:p>330.3232421875</text:p>
          </table:table-cell>
          <table:table-cell office:value-type="float" office:value="0.01649633">
            <text:p>0.01649633</text:p>
          </table:table-cell>
          <table:table-cell table:number-columns-repeated="4"/>
        </table:table-row>
        <table:table-row table:style-name="ro1">
          <table:table-cell office:value-type="float" office:value="330.431335449219">
            <text:p>330.4313354492</text:p>
          </table:table-cell>
          <table:table-cell office:value-type="float" office:value="0.009357913">
            <text:p>0.009357913</text:p>
          </table:table-cell>
          <table:table-cell table:number-columns-repeated="4"/>
        </table:table-row>
        <table:table-row table:style-name="ro1">
          <table:table-cell office:value-type="float" office:value="330.539428710938">
            <text:p>330.5394287109</text:p>
          </table:table-cell>
          <table:table-cell office:value-type="float" office:value="0.009077805">
            <text:p>0.009077805</text:p>
          </table:table-cell>
          <table:table-cell table:number-columns-repeated="4"/>
        </table:table-row>
        <table:table-row table:style-name="ro1">
          <table:table-cell office:value-type="float" office:value="330.647521972656">
            <text:p>330.6475219727</text:p>
          </table:table-cell>
          <table:table-cell office:value-type="float" office:value="-0.002990058">
            <text:p>-0.002990058</text:p>
          </table:table-cell>
          <table:table-cell table:number-columns-repeated="4"/>
        </table:table-row>
        <table:table-row table:style-name="ro1">
          <table:table-cell office:value-type="float" office:value="330.755645751953">
            <text:p>330.755645752</text:p>
          </table:table-cell>
          <table:table-cell office:value-type="float" office:value="0.006496351">
            <text:p>0.006496351</text:p>
          </table:table-cell>
          <table:table-cell table:number-columns-repeated="4"/>
        </table:table-row>
        <table:table-row table:style-name="ro1">
          <table:table-cell office:value-type="float" office:value="330.86376953125">
            <text:p>330.8637695313</text:p>
          </table:table-cell>
          <table:table-cell office:value-type="float" office:value="0.0164977">
            <text:p>0.0164977</text:p>
          </table:table-cell>
          <table:table-cell table:number-columns-repeated="4"/>
        </table:table-row>
        <table:table-row table:style-name="ro1">
          <table:table-cell office:value-type="float" office:value="330.971893310547">
            <text:p>330.9718933105</text:p>
          </table:table-cell>
          <table:table-cell office:value-type="float" office:value="0.01240882">
            <text:p>0.01240882</text:p>
          </table:table-cell>
          <table:table-cell table:number-columns-repeated="4"/>
        </table:table-row>
        <table:table-row table:style-name="ro1">
          <table:table-cell office:value-type="float" office:value="331.080017089844">
            <text:p>331.0800170898</text:p>
          </table:table-cell>
          <table:table-cell office:value-type="float" office:value="0.02772616">
            <text:p>0.02772616</text:p>
          </table:table-cell>
          <table:table-cell table:number-columns-repeated="4"/>
        </table:table-row>
        <table:table-row table:style-name="ro1">
          <table:table-cell office:value-type="float" office:value="331.188171386719">
            <text:p>331.1881713867</text:p>
          </table:table-cell>
          <table:table-cell office:value-type="float" office:value="0.01098724">
            <text:p>0.01098724</text:p>
          </table:table-cell>
          <table:table-cell table:number-columns-repeated="4"/>
        </table:table-row>
        <table:table-row table:style-name="ro1">
          <table:table-cell office:value-type="float" office:value="331.296295166016">
            <text:p>331.296295166</text:p>
          </table:table-cell>
          <table:table-cell office:value-type="float" office:value="0.01932791">
            <text:p>0.01932791</text:p>
          </table:table-cell>
          <table:table-cell table:number-columns-repeated="4"/>
        </table:table-row>
        <table:table-row table:style-name="ro1">
          <table:table-cell office:value-type="float" office:value="331.404449462891">
            <text:p>331.4044494629</text:p>
          </table:table-cell>
          <table:table-cell office:value-type="float" office:value="-0.003811379">
            <text:p>-0.003811379</text:p>
          </table:table-cell>
          <table:table-cell table:number-columns-repeated="4"/>
        </table:table-row>
        <table:table-row table:style-name="ro1">
          <table:table-cell office:value-type="float" office:value="331.512603759766">
            <text:p>331.5126037598</text:p>
          </table:table-cell>
          <table:table-cell office:value-type="float" office:value="-0.004058839">
            <text:p>-0.004058839</text:p>
          </table:table-cell>
          <table:table-cell table:number-columns-repeated="4"/>
        </table:table-row>
        <table:table-row table:style-name="ro1">
          <table:table-cell office:value-type="float" office:value="331.620788574219">
            <text:p>331.6207885742</text:p>
          </table:table-cell>
          <table:table-cell office:value-type="float" office:value="0.003118401">
            <text:p>0.003118401</text:p>
          </table:table-cell>
          <table:table-cell table:number-columns-repeated="4"/>
        </table:table-row>
        <table:table-row table:style-name="ro1">
          <table:table-cell office:value-type="float" office:value="331.728942871094">
            <text:p>331.7289428711</text:p>
          </table:table-cell>
          <table:table-cell office:value-type="float" office:value="0.008999163">
            <text:p>0.008999163</text:p>
          </table:table-cell>
          <table:table-cell table:number-columns-repeated="4"/>
        </table:table-row>
        <table:table-row table:style-name="ro1">
          <table:table-cell office:value-type="float" office:value="331.837127685547">
            <text:p>331.8371276855</text:p>
          </table:table-cell>
          <table:table-cell office:value-type="float" office:value="-0.001049264">
            <text:p>-0.001049264</text:p>
          </table:table-cell>
          <table:table-cell table:number-columns-repeated="4"/>
        </table:table-row>
        <table:table-row table:style-name="ro1">
          <table:table-cell office:value-type="float" office:value="331.9453125">
            <text:p>331.9453125</text:p>
          </table:table-cell>
          <table:table-cell office:value-type="float" office:value="-0.00362848">
            <text:p>-0.00362848</text:p>
          </table:table-cell>
          <table:table-cell table:number-columns-repeated="4"/>
        </table:table-row>
        <table:table-row table:style-name="ro1">
          <table:table-cell office:value-type="float" office:value="332.053527832031">
            <text:p>332.053527832</text:p>
          </table:table-cell>
          <table:table-cell office:value-type="float" office:value="0.006790213">
            <text:p>0.006790213</text:p>
          </table:table-cell>
          <table:table-cell table:number-columns-repeated="4"/>
        </table:table-row>
        <table:table-row table:style-name="ro1">
          <table:table-cell office:value-type="float" office:value="332.161712646484">
            <text:p>332.1617126465</text:p>
          </table:table-cell>
          <table:table-cell office:value-type="float" office:value="0.0003459259">
            <text:p>0.0003459259</text:p>
          </table:table-cell>
          <table:table-cell table:number-columns-repeated="4"/>
        </table:table-row>
        <table:table-row table:style-name="ro1">
          <table:table-cell office:value-type="float" office:value="332.269927978516">
            <text:p>332.2699279785</text:p>
          </table:table-cell>
          <table:table-cell office:value-type="float" office:value="-0.008173923">
            <text:p>-0.008173923</text:p>
          </table:table-cell>
          <table:table-cell table:number-columns-repeated="4"/>
        </table:table-row>
        <table:table-row table:style-name="ro1">
          <table:table-cell office:value-type="float" office:value="332.378143310547">
            <text:p>332.3781433105</text:p>
          </table:table-cell>
          <table:table-cell office:value-type="float" office:value="-0.003065282">
            <text:p>-0.003065282</text:p>
          </table:table-cell>
          <table:table-cell table:number-columns-repeated="4"/>
        </table:table-row>
        <table:table-row table:style-name="ro1">
          <table:table-cell office:value-type="float" office:value="332.486358642578">
            <text:p>332.4863586426</text:p>
          </table:table-cell>
          <table:table-cell office:value-type="float" office:value="0.01950448">
            <text:p>0.01950448</text:p>
          </table:table-cell>
          <table:table-cell table:number-columns-repeated="4"/>
        </table:table-row>
        <table:table-row table:style-name="ro1">
          <table:table-cell office:value-type="float" office:value="332.594573974609">
            <text:p>332.5945739746</text:p>
          </table:table-cell>
          <table:table-cell office:value-type="float" office:value="0.01214716">
            <text:p>0.01214716</text:p>
          </table:table-cell>
          <table:table-cell table:number-columns-repeated="4"/>
        </table:table-row>
        <table:table-row table:style-name="ro1">
          <table:table-cell office:value-type="float" office:value="332.702819824219">
            <text:p>332.7028198242</text:p>
          </table:table-cell>
          <table:table-cell office:value-type="float" office:value="0.003929395">
            <text:p>0.003929395</text:p>
          </table:table-cell>
          <table:table-cell table:number-columns-repeated="4"/>
        </table:table-row>
        <table:table-row table:style-name="ro1">
          <table:table-cell office:value-type="float" office:value="332.811065673828">
            <text:p>332.8110656738</text:p>
          </table:table-cell>
          <table:table-cell office:value-type="float" office:value="-0.006783134">
            <text:p>-0.006783134</text:p>
          </table:table-cell>
          <table:table-cell table:number-columns-repeated="4"/>
        </table:table-row>
        <table:table-row table:style-name="ro1">
          <table:table-cell office:value-type="float" office:value="332.919311523438">
            <text:p>332.9193115234</text:p>
          </table:table-cell>
          <table:table-cell office:value-type="float" office:value="0.001627296">
            <text:p>0.001627296</text:p>
          </table:table-cell>
          <table:table-cell table:number-columns-repeated="4"/>
        </table:table-row>
        <table:table-row table:style-name="ro1">
          <table:table-cell office:value-type="float" office:value="333.027557373047">
            <text:p>333.027557373</text:p>
          </table:table-cell>
          <table:table-cell office:value-type="float" office:value="0.00114188">
            <text:p>0.00114188</text:p>
          </table:table-cell>
          <table:table-cell table:number-columns-repeated="4"/>
        </table:table-row>
        <table:table-row table:style-name="ro1">
          <table:table-cell office:value-type="float" office:value="333.135833740234">
            <text:p>333.1358337402</text:p>
          </table:table-cell>
          <table:table-cell office:value-type="float" office:value="0.006002575">
            <text:p>0.006002575</text:p>
          </table:table-cell>
          <table:table-cell table:number-columns-repeated="4"/>
        </table:table-row>
        <table:table-row table:style-name="ro1">
          <table:table-cell office:value-type="float" office:value="333.244079589844">
            <text:p>333.2440795898</text:p>
          </table:table-cell>
          <table:table-cell office:value-type="float" office:value="0.04720763">
            <text:p>0.04720763</text:p>
          </table:table-cell>
          <table:table-cell table:number-columns-repeated="4"/>
        </table:table-row>
        <table:table-row table:style-name="ro1">
          <table:table-cell office:value-type="float" office:value="333.352355957031">
            <text:p>333.352355957</text:p>
          </table:table-cell>
          <table:table-cell office:value-type="float" office:value="-0.001139885">
            <text:p>-0.001139885</text:p>
          </table:table-cell>
          <table:table-cell table:number-columns-repeated="4"/>
        </table:table-row>
        <table:table-row table:style-name="ro1">
          <table:table-cell office:value-type="float" office:value="333.460662841797">
            <text:p>333.4606628418</text:p>
          </table:table-cell>
          <table:table-cell office:value-type="float" office:value="0.002316675">
            <text:p>0.002316675</text:p>
          </table:table-cell>
          <table:table-cell table:number-columns-repeated="4"/>
        </table:table-row>
        <table:table-row table:style-name="ro1">
          <table:table-cell office:value-type="float" office:value="333.568939208984">
            <text:p>333.568939209</text:p>
          </table:table-cell>
          <table:table-cell office:value-type="float" office:value="0.002030777">
            <text:p>0.002030777</text:p>
          </table:table-cell>
          <table:table-cell table:number-columns-repeated="4"/>
        </table:table-row>
        <table:table-row table:style-name="ro1">
          <table:table-cell office:value-type="float" office:value="333.67724609375">
            <text:p>333.6772460938</text:p>
          </table:table-cell>
          <table:table-cell office:value-type="float" office:value="-0.006495198">
            <text:p>-0.006495198</text:p>
          </table:table-cell>
          <table:table-cell table:number-columns-repeated="4"/>
        </table:table-row>
        <table:table-row table:style-name="ro1">
          <table:table-cell office:value-type="float" office:value="333.785552978516">
            <text:p>333.7855529785</text:p>
          </table:table-cell>
          <table:table-cell office:value-type="float" office:value="0.007772752">
            <text:p>0.007772752</text:p>
          </table:table-cell>
          <table:table-cell table:number-columns-repeated="4"/>
        </table:table-row>
        <table:table-row table:style-name="ro1">
          <table:table-cell office:value-type="float" office:value="333.893859863281">
            <text:p>333.8938598633</text:p>
          </table:table-cell>
          <table:table-cell office:value-type="float" office:value="0.003929907">
            <text:p>0.003929907</text:p>
          </table:table-cell>
          <table:table-cell table:number-columns-repeated="4"/>
        </table:table-row>
        <table:table-row table:style-name="ro1">
          <table:table-cell office:value-type="float" office:value="334.002166748047">
            <text:p>334.002166748</text:p>
          </table:table-cell>
          <table:table-cell office:value-type="float" office:value="-0.01036685">
            <text:p>-0.01036685</text:p>
          </table:table-cell>
          <table:table-cell table:number-columns-repeated="4"/>
        </table:table-row>
        <table:table-row table:style-name="ro1">
          <table:table-cell office:value-type="float" office:value="334.110473632813">
            <text:p>334.1104736328</text:p>
          </table:table-cell>
          <table:table-cell office:value-type="float" office:value="0.0003337189">
            <text:p>0.0003337189</text:p>
          </table:table-cell>
          <table:table-cell table:number-columns-repeated="4"/>
        </table:table-row>
        <table:table-row table:style-name="ro1">
          <table:table-cell office:value-type="float" office:value="334.218811035156">
            <text:p>334.2188110352</text:p>
          </table:table-cell>
          <table:table-cell office:value-type="float" office:value="0.004713952">
            <text:p>0.004713952</text:p>
          </table:table-cell>
          <table:table-cell table:number-columns-repeated="4"/>
        </table:table-row>
        <table:table-row table:style-name="ro1">
          <table:table-cell office:value-type="float" office:value="334.3271484375">
            <text:p>334.3271484375</text:p>
          </table:table-cell>
          <table:table-cell office:value-type="string">
            <text:p>-4.232605E-06</text:p>
          </table:table-cell>
          <table:table-cell table:number-columns-repeated="4"/>
        </table:table-row>
        <table:table-row table:style-name="ro1">
          <table:table-cell office:value-type="float" office:value="334.435485839844">
            <text:p>334.4354858398</text:p>
          </table:table-cell>
          <table:table-cell office:value-type="float" office:value="0.0008088505">
            <text:p>0.0008088505</text:p>
          </table:table-cell>
          <table:table-cell table:number-columns-repeated="4"/>
        </table:table-row>
        <table:table-row table:style-name="ro1">
          <table:table-cell office:value-type="float" office:value="334.543853759766">
            <text:p>334.5438537598</text:p>
          </table:table-cell>
          <table:table-cell office:value-type="float" office:value="-0.005463321">
            <text:p>-0.005463321</text:p>
          </table:table-cell>
          <table:table-cell table:number-columns-repeated="4"/>
        </table:table-row>
        <table:table-row table:style-name="ro1">
          <table:table-cell office:value-type="float" office:value="334.652191162109">
            <text:p>334.6521911621</text:p>
          </table:table-cell>
          <table:table-cell office:value-type="float" office:value="0.01751577">
            <text:p>0.01751577</text:p>
          </table:table-cell>
          <table:table-cell table:number-columns-repeated="4"/>
        </table:table-row>
        <table:table-row table:style-name="ro1">
          <table:table-cell office:value-type="float" office:value="334.760559082031">
            <text:p>334.760559082</text:p>
          </table:table-cell>
          <table:table-cell office:value-type="float" office:value="0.0003117029">
            <text:p>0.0003117029</text:p>
          </table:table-cell>
          <table:table-cell table:number-columns-repeated="4"/>
        </table:table-row>
        <table:table-row table:style-name="ro1">
          <table:table-cell office:value-type="float" office:value="334.868927001953">
            <text:p>334.868927002</text:p>
          </table:table-cell>
          <table:table-cell office:value-type="float" office:value="0.008829628">
            <text:p>0.008829628</text:p>
          </table:table-cell>
          <table:table-cell table:number-columns-repeated="4"/>
        </table:table-row>
        <table:table-row table:style-name="ro1">
          <table:table-cell office:value-type="float" office:value="334.977325439453">
            <text:p>334.9773254395</text:p>
          </table:table-cell>
          <table:table-cell office:value-type="float" office:value="0.007621932">
            <text:p>0.007621932</text:p>
          </table:table-cell>
          <table:table-cell table:number-columns-repeated="4"/>
        </table:table-row>
        <table:table-row table:style-name="ro1">
          <table:table-cell office:value-type="float" office:value="335.085693359375">
            <text:p>335.0856933594</text:p>
          </table:table-cell>
          <table:table-cell office:value-type="float" office:value="0.009846429">
            <text:p>0.009846429</text:p>
          </table:table-cell>
          <table:table-cell table:number-columns-repeated="4"/>
        </table:table-row>
        <table:table-row table:style-name="ro1">
          <table:table-cell office:value-type="float" office:value="335.194091796875">
            <text:p>335.1940917969</text:p>
          </table:table-cell>
          <table:table-cell office:value-type="float" office:value="0.00100935">
            <text:p>0.00100935</text:p>
          </table:table-cell>
          <table:table-cell table:number-columns-repeated="4"/>
        </table:table-row>
        <table:table-row table:style-name="ro1">
          <table:table-cell office:value-type="float" office:value="335.302490234375">
            <text:p>335.3024902344</text:p>
          </table:table-cell>
          <table:table-cell office:value-type="float" office:value="0.01034665">
            <text:p>0.01034665</text:p>
          </table:table-cell>
          <table:table-cell table:number-columns-repeated="4"/>
        </table:table-row>
        <table:table-row table:style-name="ro1">
          <table:table-cell office:value-type="float" office:value="335.410888671875">
            <text:p>335.4108886719</text:p>
          </table:table-cell>
          <table:table-cell office:value-type="float" office:value="0.006791352">
            <text:p>0.006791352</text:p>
          </table:table-cell>
          <table:table-cell table:number-columns-repeated="4"/>
        </table:table-row>
        <table:table-row table:style-name="ro1">
          <table:table-cell office:value-type="float" office:value="335.519287109375">
            <text:p>335.5192871094</text:p>
          </table:table-cell>
          <table:table-cell office:value-type="float" office:value="0.02998407">
            <text:p>0.02998407</text:p>
          </table:table-cell>
          <table:table-cell table:number-columns-repeated="4"/>
        </table:table-row>
        <table:table-row table:style-name="ro1">
          <table:table-cell office:value-type="float" office:value="335.627716064453">
            <text:p>335.6277160645</text:p>
          </table:table-cell>
          <table:table-cell office:value-type="float" office:value="0.009777281">
            <text:p>0.009777281</text:p>
          </table:table-cell>
          <table:table-cell table:number-columns-repeated="4"/>
        </table:table-row>
        <table:table-row table:style-name="ro1">
          <table:table-cell office:value-type="float" office:value="335.736145019531">
            <text:p>335.7361450195</text:p>
          </table:table-cell>
          <table:table-cell office:value-type="float" office:value="0.006613947">
            <text:p>0.006613947</text:p>
          </table:table-cell>
          <table:table-cell table:number-columns-repeated="4"/>
        </table:table-row>
        <table:table-row table:style-name="ro1">
          <table:table-cell office:value-type="float" office:value="335.844573974609">
            <text:p>335.8445739746</text:p>
          </table:table-cell>
          <table:table-cell office:value-type="float" office:value="-0.001462299">
            <text:p>-0.001462299</text:p>
          </table:table-cell>
          <table:table-cell table:number-columns-repeated="4"/>
        </table:table-row>
        <table:table-row table:style-name="ro1">
          <table:table-cell office:value-type="float" office:value="335.953002929688">
            <text:p>335.9530029297</text:p>
          </table:table-cell>
          <table:table-cell office:value-type="float" office:value="0.01033711">
            <text:p>0.01033711</text:p>
          </table:table-cell>
          <table:table-cell table:number-columns-repeated="4"/>
        </table:table-row>
        <table:table-row table:style-name="ro1">
          <table:table-cell office:value-type="float" office:value="336.061462402344">
            <text:p>336.0614624023</text:p>
          </table:table-cell>
          <table:table-cell office:value-type="float" office:value="0.02022225">
            <text:p>0.02022225</text:p>
          </table:table-cell>
          <table:table-cell table:number-columns-repeated="4"/>
        </table:table-row>
        <table:table-row table:style-name="ro1">
          <table:table-cell office:value-type="float" office:value="336.169891357422">
            <text:p>336.1698913574</text:p>
          </table:table-cell>
          <table:table-cell office:value-type="float" office:value="-0.005219649">
            <text:p>-0.005219649</text:p>
          </table:table-cell>
          <table:table-cell table:number-columns-repeated="4"/>
        </table:table-row>
        <table:table-row table:style-name="ro1">
          <table:table-cell office:value-type="float" office:value="336.278350830078">
            <text:p>336.2783508301</text:p>
          </table:table-cell>
          <table:table-cell office:value-type="float" office:value="0.002686453">
            <text:p>0.002686453</text:p>
          </table:table-cell>
          <table:table-cell table:number-columns-repeated="4"/>
        </table:table-row>
        <table:table-row table:style-name="ro1">
          <table:table-cell office:value-type="float" office:value="336.386840820313">
            <text:p>336.3868408203</text:p>
          </table:table-cell>
          <table:table-cell office:value-type="float" office:value="0.01752602">
            <text:p>0.01752602</text:p>
          </table:table-cell>
          <table:table-cell table:number-columns-repeated="4"/>
        </table:table-row>
        <table:table-row table:style-name="ro1">
          <table:table-cell office:value-type="float" office:value="336.495300292969">
            <text:p>336.495300293</text:p>
          </table:table-cell>
          <table:table-cell office:value-type="float" office:value="0.004997647">
            <text:p>0.004997647</text:p>
          </table:table-cell>
          <table:table-cell table:number-columns-repeated="4"/>
        </table:table-row>
        <table:table-row table:style-name="ro1">
          <table:table-cell office:value-type="float" office:value="336.603790283203">
            <text:p>336.6037902832</text:p>
          </table:table-cell>
          <table:table-cell office:value-type="float" office:value="-0.004072904">
            <text:p>-0.004072904</text:p>
          </table:table-cell>
          <table:table-cell table:number-columns-repeated="4"/>
        </table:table-row>
        <table:table-row table:style-name="ro1">
          <table:table-cell office:value-type="float" office:value="336.712249755859">
            <text:p>336.7122497559</text:p>
          </table:table-cell>
          <table:table-cell office:value-type="float" office:value="-0.001753882">
            <text:p>-0.001753882</text:p>
          </table:table-cell>
          <table:table-cell table:number-columns-repeated="4"/>
        </table:table-row>
        <table:table-row table:style-name="ro1">
          <table:table-cell office:value-type="float" office:value="336.820770263672">
            <text:p>336.8207702637</text:p>
          </table:table-cell>
          <table:table-cell office:value-type="float" office:value="0.0006048655">
            <text:p>0.0006048655</text:p>
          </table:table-cell>
          <table:table-cell table:number-columns-repeated="4"/>
        </table:table-row>
        <table:table-row table:style-name="ro1">
          <table:table-cell office:value-type="float" office:value="336.929260253906">
            <text:p>336.9292602539</text:p>
          </table:table-cell>
          <table:table-cell office:value-type="float" office:value="0.00332078">
            <text:p>0.00332078</text:p>
          </table:table-cell>
          <table:table-cell table:number-columns-repeated="4"/>
        </table:table-row>
        <table:table-row table:style-name="ro1">
          <table:table-cell office:value-type="float" office:value="337.037750244141">
            <text:p>337.0377502441</text:p>
          </table:table-cell>
          <table:table-cell office:value-type="float" office:value="-0.005145012">
            <text:p>-0.005145012</text:p>
          </table:table-cell>
          <table:table-cell table:number-columns-repeated="4"/>
        </table:table-row>
        <table:table-row table:style-name="ro1">
          <table:table-cell office:value-type="float" office:value="337.146270751953">
            <text:p>337.146270752</text:p>
          </table:table-cell>
          <table:table-cell office:value-type="float" office:value="-0.007696536">
            <text:p>-0.007696536</text:p>
          </table:table-cell>
          <table:table-cell table:number-columns-repeated="4"/>
        </table:table-row>
        <table:table-row table:style-name="ro1">
          <table:table-cell office:value-type="float" office:value="337.254791259766">
            <text:p>337.2547912598</text:p>
          </table:table-cell>
          <table:table-cell office:value-type="float" office:value="0.02434521">
            <text:p>0.02434521</text:p>
          </table:table-cell>
          <table:table-cell table:number-columns-repeated="4"/>
        </table:table-row>
        <table:table-row table:style-name="ro1">
          <table:table-cell office:value-type="float" office:value="337.363311767578">
            <text:p>337.3633117676</text:p>
          </table:table-cell>
          <table:table-cell office:value-type="float" office:value="0.001954746">
            <text:p>0.001954746</text:p>
          </table:table-cell>
          <table:table-cell table:number-columns-repeated="4"/>
        </table:table-row>
        <table:table-row table:style-name="ro1">
          <table:table-cell office:value-type="float" office:value="337.471862792969">
            <text:p>337.471862793</text:p>
          </table:table-cell>
          <table:table-cell office:value-type="float" office:value="0.003809442">
            <text:p>0.003809442</text:p>
          </table:table-cell>
          <table:table-cell table:number-columns-repeated="4"/>
        </table:table-row>
        <table:table-row table:style-name="ro1">
          <table:table-cell office:value-type="float" office:value="337.580383300781">
            <text:p>337.5803833008</text:p>
          </table:table-cell>
          <table:table-cell office:value-type="float" office:value="-0.003401636">
            <text:p>-0.003401636</text:p>
          </table:table-cell>
          <table:table-cell table:number-columns-repeated="4"/>
        </table:table-row>
        <table:table-row table:style-name="ro1">
          <table:table-cell office:value-type="float" office:value="337.688934326172">
            <text:p>337.6889343262</text:p>
          </table:table-cell>
          <table:table-cell office:value-type="float" office:value="-0.001432703">
            <text:p>-0.001432703</text:p>
          </table:table-cell>
          <table:table-cell table:number-columns-repeated="4"/>
        </table:table-row>
        <table:table-row table:style-name="ro1">
          <table:table-cell office:value-type="float" office:value="337.797485351563">
            <text:p>337.7974853516</text:p>
          </table:table-cell>
          <table:table-cell office:value-type="float" office:value="-0.002927952">
            <text:p>-0.002927952</text:p>
          </table:table-cell>
          <table:table-cell table:number-columns-repeated="4"/>
        </table:table-row>
        <table:table-row table:style-name="ro1">
          <table:table-cell office:value-type="float" office:value="337.906036376953">
            <text:p>337.906036377</text:p>
          </table:table-cell>
          <table:table-cell office:value-type="float" office:value="-0.003397182">
            <text:p>-0.003397182</text:p>
          </table:table-cell>
          <table:table-cell table:number-columns-repeated="4"/>
        </table:table-row>
        <table:table-row table:style-name="ro1">
          <table:table-cell office:value-type="float" office:value="338.014617919922">
            <text:p>338.0146179199</text:p>
          </table:table-cell>
          <table:table-cell office:value-type="float" office:value="-0.002545868">
            <text:p>-0.002545868</text:p>
          </table:table-cell>
          <table:table-cell table:number-columns-repeated="4"/>
        </table:table-row>
        <table:table-row table:style-name="ro1">
          <table:table-cell office:value-type="float" office:value="338.123168945313">
            <text:p>338.1231689453</text:p>
          </table:table-cell>
          <table:table-cell office:value-type="float" office:value="0.01201636">
            <text:p>0.01201636</text:p>
          </table:table-cell>
          <table:table-cell table:number-columns-repeated="4"/>
        </table:table-row>
        <table:table-row table:style-name="ro1">
          <table:table-cell office:value-type="float" office:value="338.231750488281">
            <text:p>338.2317504883</text:p>
          </table:table-cell>
          <table:table-cell office:value-type="float" office:value="0.01143628">
            <text:p>0.01143628</text:p>
          </table:table-cell>
          <table:table-cell table:number-columns-repeated="4"/>
        </table:table-row>
        <table:table-row table:style-name="ro1">
          <table:table-cell office:value-type="float" office:value="338.340362548828">
            <text:p>338.3403625488</text:p>
          </table:table-cell>
          <table:table-cell office:value-type="float" office:value="-0.002437856">
            <text:p>-0.002437856</text:p>
          </table:table-cell>
          <table:table-cell table:number-columns-repeated="4"/>
        </table:table-row>
        <table:table-row table:style-name="ro1">
          <table:table-cell office:value-type="float" office:value="338.448944091797">
            <text:p>338.4489440918</text:p>
          </table:table-cell>
          <table:table-cell office:value-type="float" office:value="0.02380724">
            <text:p>0.02380724</text:p>
          </table:table-cell>
          <table:table-cell table:number-columns-repeated="4"/>
        </table:table-row>
        <table:table-row table:style-name="ro1">
          <table:table-cell office:value-type="float" office:value="338.557525634766">
            <text:p>338.5575256348</text:p>
          </table:table-cell>
          <table:table-cell office:value-type="float" office:value="0.006480929">
            <text:p>0.006480929</text:p>
          </table:table-cell>
          <table:table-cell table:number-columns-repeated="4"/>
        </table:table-row>
        <table:table-row table:style-name="ro1">
          <table:table-cell office:value-type="float" office:value="338.666137695313">
            <text:p>338.6661376953</text:p>
          </table:table-cell>
          <table:table-cell office:value-type="float" office:value="0.01289556">
            <text:p>0.01289556</text:p>
          </table:table-cell>
          <table:table-cell table:number-columns-repeated="4"/>
        </table:table-row>
        <table:table-row table:style-name="ro1">
          <table:table-cell office:value-type="float" office:value="338.774749755859">
            <text:p>338.7747497559</text:p>
          </table:table-cell>
          <table:table-cell office:value-type="float" office:value="-0.003937461">
            <text:p>-0.003937461</text:p>
          </table:table-cell>
          <table:table-cell table:number-columns-repeated="4"/>
        </table:table-row>
        <table:table-row table:style-name="ro1">
          <table:table-cell office:value-type="float" office:value="338.883392333984">
            <text:p>338.883392334</text:p>
          </table:table-cell>
          <table:table-cell office:value-type="float" office:value="-0.002894801">
            <text:p>-0.002894801</text:p>
          </table:table-cell>
          <table:table-cell table:number-columns-repeated="4"/>
        </table:table-row>
        <table:table-row table:style-name="ro1">
          <table:table-cell office:value-type="float" office:value="338.992004394531">
            <text:p>338.9920043945</text:p>
          </table:table-cell>
          <table:table-cell office:value-type="float" office:value="0.003968291">
            <text:p>0.003968291</text:p>
          </table:table-cell>
          <table:table-cell table:number-columns-repeated="4"/>
        </table:table-row>
        <table:table-row table:style-name="ro1">
          <table:table-cell office:value-type="float" office:value="339.100646972656">
            <text:p>339.1006469727</text:p>
          </table:table-cell>
          <table:table-cell office:value-type="float" office:value="0.00969264">
            <text:p>0.00969264</text:p>
          </table:table-cell>
          <table:table-cell table:number-columns-repeated="4"/>
        </table:table-row>
        <table:table-row table:style-name="ro1">
          <table:table-cell office:value-type="float" office:value="339.209289550781">
            <text:p>339.2092895508</text:p>
          </table:table-cell>
          <table:table-cell office:value-type="float" office:value="-0.004226599">
            <text:p>-0.004226599</text:p>
          </table:table-cell>
          <table:table-cell table:number-columns-repeated="4"/>
        </table:table-row>
        <table:table-row table:style-name="ro1">
          <table:table-cell office:value-type="float" office:value="339.317932128906">
            <text:p>339.3179321289</text:p>
          </table:table-cell>
          <table:table-cell office:value-type="float" office:value="0.009322612">
            <text:p>0.009322612</text:p>
          </table:table-cell>
          <table:table-cell table:number-columns-repeated="4"/>
        </table:table-row>
        <table:table-row table:style-name="ro1">
          <table:table-cell office:value-type="float" office:value="339.426574707031">
            <text:p>339.426574707</text:p>
          </table:table-cell>
          <table:table-cell office:value-type="float" office:value="0.003249588">
            <text:p>0.003249588</text:p>
          </table:table-cell>
          <table:table-cell table:number-columns-repeated="4"/>
        </table:table-row>
        <table:table-row table:style-name="ro1">
          <table:table-cell office:value-type="float" office:value="339.535247802734">
            <text:p>339.5352478027</text:p>
          </table:table-cell>
          <table:table-cell office:value-type="float" office:value="0.01119028">
            <text:p>0.01119028</text:p>
          </table:table-cell>
          <table:table-cell table:number-columns-repeated="4"/>
        </table:table-row>
        <table:table-row table:style-name="ro1">
          <table:table-cell office:value-type="float" office:value="339.643890380859">
            <text:p>339.6438903809</text:p>
          </table:table-cell>
          <table:table-cell office:value-type="float" office:value="0.003308093">
            <text:p>0.003308093</text:p>
          </table:table-cell>
          <table:table-cell table:number-columns-repeated="4"/>
        </table:table-row>
        <table:table-row table:style-name="ro1">
          <table:table-cell office:value-type="float" office:value="339.752563476563">
            <text:p>339.7525634766</text:p>
          </table:table-cell>
          <table:table-cell office:value-type="float" office:value="0.004120397">
            <text:p>0.004120397</text:p>
          </table:table-cell>
          <table:table-cell table:number-columns-repeated="4"/>
        </table:table-row>
        <table:table-row table:style-name="ro1">
          <table:table-cell office:value-type="float" office:value="339.861267089844">
            <text:p>339.8612670898</text:p>
          </table:table-cell>
          <table:table-cell office:value-type="float" office:value="0.0007940951">
            <text:p>0.0007940951</text:p>
          </table:table-cell>
          <table:table-cell table:number-columns-repeated="4"/>
        </table:table-row>
        <table:table-row table:style-name="ro1">
          <table:table-cell office:value-type="float" office:value="339.969940185547">
            <text:p>339.9699401855</text:p>
          </table:table-cell>
          <table:table-cell office:value-type="float" office:value="0.01632829">
            <text:p>0.01632829</text:p>
          </table:table-cell>
          <table:table-cell table:number-columns-repeated="4"/>
        </table:table-row>
        <table:table-row table:style-name="ro1">
          <table:table-cell office:value-type="float" office:value="340.078643798828">
            <text:p>340.0786437988</text:p>
          </table:table-cell>
          <table:table-cell office:value-type="float" office:value="0.001939366">
            <text:p>0.001939366</text:p>
          </table:table-cell>
          <table:table-cell table:number-columns-repeated="4"/>
        </table:table-row>
        <table:table-row table:style-name="ro1">
          <table:table-cell office:value-type="float" office:value="340.187347412109">
            <text:p>340.1873474121</text:p>
          </table:table-cell>
          <table:table-cell office:value-type="float" office:value="0.01723809">
            <text:p>0.01723809</text:p>
          </table:table-cell>
          <table:table-cell table:number-columns-repeated="4"/>
        </table:table-row>
        <table:table-row table:style-name="ro1">
          <table:table-cell office:value-type="float" office:value="340.296051025391">
            <text:p>340.2960510254</text:p>
          </table:table-cell>
          <table:table-cell office:value-type="float" office:value="0.006970936">
            <text:p>0.006970936</text:p>
          </table:table-cell>
          <table:table-cell table:number-columns-repeated="4"/>
        </table:table-row>
        <table:table-row table:style-name="ro1">
          <table:table-cell office:value-type="float" office:value="340.404754638672">
            <text:p>340.4047546387</text:p>
          </table:table-cell>
          <table:table-cell office:value-type="float" office:value="0.008839948">
            <text:p>0.008839948</text:p>
          </table:table-cell>
          <table:table-cell table:number-columns-repeated="4"/>
        </table:table-row>
        <table:table-row table:style-name="ro1">
          <table:table-cell office:value-type="float" office:value="340.513488769531">
            <text:p>340.5134887695</text:p>
          </table:table-cell>
          <table:table-cell office:value-type="float" office:value="-0.007009918">
            <text:p>-0.007009918</text:p>
          </table:table-cell>
          <table:table-cell table:number-columns-repeated="4"/>
        </table:table-row>
        <table:table-row table:style-name="ro1">
          <table:table-cell office:value-type="float" office:value="340.622192382813">
            <text:p>340.6221923828</text:p>
          </table:table-cell>
          <table:table-cell office:value-type="float" office:value="0.01686344">
            <text:p>0.01686344</text:p>
          </table:table-cell>
          <table:table-cell table:number-columns-repeated="4"/>
        </table:table-row>
        <table:table-row table:style-name="ro1">
          <table:table-cell office:value-type="float" office:value="340.730926513672">
            <text:p>340.7309265137</text:p>
          </table:table-cell>
          <table:table-cell office:value-type="float" office:value="0.01657793">
            <text:p>0.01657793</text:p>
          </table:table-cell>
          <table:table-cell table:number-columns-repeated="4"/>
        </table:table-row>
        <table:table-row table:style-name="ro1">
          <table:table-cell office:value-type="float" office:value="340.839660644531">
            <text:p>340.8396606445</text:p>
          </table:table-cell>
          <table:table-cell office:value-type="float" office:value="0.01516216">
            <text:p>0.01516216</text:p>
          </table:table-cell>
          <table:table-cell table:number-columns-repeated="4"/>
        </table:table-row>
        <table:table-row table:style-name="ro1">
          <table:table-cell office:value-type="float" office:value="340.948425292969">
            <text:p>340.948425293</text:p>
          </table:table-cell>
          <table:table-cell office:value-type="float" office:value="-0.004019307">
            <text:p>-0.004019307</text:p>
          </table:table-cell>
          <table:table-cell table:number-columns-repeated="4"/>
        </table:table-row>
        <table:table-row table:style-name="ro1">
          <table:table-cell office:value-type="float" office:value="341.057159423828">
            <text:p>341.0571594238</text:p>
          </table:table-cell>
          <table:table-cell office:value-type="float" office:value="-0.000164913">
            <text:p>-0.000164913</text:p>
          </table:table-cell>
          <table:table-cell table:number-columns-repeated="4"/>
        </table:table-row>
        <table:table-row table:style-name="ro1">
          <table:table-cell office:value-type="float" office:value="341.165924072266">
            <text:p>341.1659240723</text:p>
          </table:table-cell>
          <table:table-cell office:value-type="float" office:value="-0.001353532">
            <text:p>-0.001353532</text:p>
          </table:table-cell>
          <table:table-cell table:number-columns-repeated="4"/>
        </table:table-row>
        <table:table-row table:style-name="ro1">
          <table:table-cell office:value-type="float" office:value="341.274688720703">
            <text:p>341.2746887207</text:p>
          </table:table-cell>
          <table:table-cell office:value-type="float" office:value="-0.002135306">
            <text:p>-0.002135306</text:p>
          </table:table-cell>
          <table:table-cell table:number-columns-repeated="4"/>
        </table:table-row>
        <table:table-row table:style-name="ro1">
          <table:table-cell office:value-type="float" office:value="341.383483886719">
            <text:p>341.3834838867</text:p>
          </table:table-cell>
          <table:table-cell office:value-type="float" office:value="0.01515408">
            <text:p>0.01515408</text:p>
          </table:table-cell>
          <table:table-cell table:number-columns-repeated="4"/>
        </table:table-row>
        <table:table-row table:style-name="ro1">
          <table:table-cell office:value-type="float" office:value="341.492248535156">
            <text:p>341.4922485352</text:p>
          </table:table-cell>
          <table:table-cell office:value-type="float" office:value="0.004616707">
            <text:p>0.004616707</text:p>
          </table:table-cell>
          <table:table-cell table:number-columns-repeated="4"/>
        </table:table-row>
        <table:table-row table:style-name="ro1">
          <table:table-cell office:value-type="float" office:value="341.601043701172">
            <text:p>341.6010437012</text:p>
          </table:table-cell>
          <table:table-cell office:value-type="float" office:value="0.0228178">
            <text:p>0.0228178</text:p>
          </table:table-cell>
          <table:table-cell table:number-columns-repeated="4"/>
        </table:table-row>
        <table:table-row table:style-name="ro1">
          <table:table-cell office:value-type="float" office:value="341.709838867188">
            <text:p>341.7098388672</text:p>
          </table:table-cell>
          <table:table-cell office:value-type="float" office:value="0.0194835">
            <text:p>0.0194835</text:p>
          </table:table-cell>
          <table:table-cell table:number-columns-repeated="4"/>
        </table:table-row>
        <table:table-row table:style-name="ro1">
          <table:table-cell office:value-type="float" office:value="341.818634033203">
            <text:p>341.8186340332</text:p>
          </table:table-cell>
          <table:table-cell office:value-type="float" office:value="0.0142981">
            <text:p>0.0142981</text:p>
          </table:table-cell>
          <table:table-cell table:number-columns-repeated="4"/>
        </table:table-row>
        <table:table-row table:style-name="ro1">
          <table:table-cell office:value-type="float" office:value="341.927429199219">
            <text:p>341.9274291992</text:p>
          </table:table-cell>
          <table:table-cell office:value-type="float" office:value="-0.001198113">
            <text:p>-0.001198113</text:p>
          </table:table-cell>
          <table:table-cell table:number-columns-repeated="4"/>
        </table:table-row>
        <table:table-row table:style-name="ro1">
          <table:table-cell office:value-type="float" office:value="342.036254882813">
            <text:p>342.0362548828</text:p>
          </table:table-cell>
          <table:table-cell office:value-type="float" office:value="-0.002057465">
            <text:p>-0.002057465</text:p>
          </table:table-cell>
          <table:table-cell table:number-columns-repeated="4"/>
        </table:table-row>
        <table:table-row table:style-name="ro1">
          <table:table-cell office:value-type="float" office:value="342.145080566406">
            <text:p>342.1450805664</text:p>
          </table:table-cell>
          <table:table-cell office:value-type="float" office:value="0.00111479">
            <text:p>0.00111479</text:p>
          </table:table-cell>
          <table:table-cell table:number-columns-repeated="4"/>
        </table:table-row>
        <table:table-row table:style-name="ro1">
          <table:table-cell office:value-type="float" office:value="342.25390625">
            <text:p>342.25390625</text:p>
          </table:table-cell>
          <table:table-cell office:value-type="float" office:value="0.01034453">
            <text:p>0.01034453</text:p>
          </table:table-cell>
          <table:table-cell table:number-columns-repeated="4"/>
        </table:table-row>
        <table:table-row table:style-name="ro1">
          <table:table-cell office:value-type="float" office:value="342.362731933594">
            <text:p>342.3627319336</text:p>
          </table:table-cell>
          <table:table-cell office:value-type="float" office:value="0.004834056">
            <text:p>0.004834056</text:p>
          </table:table-cell>
          <table:table-cell table:number-columns-repeated="4"/>
        </table:table-row>
        <table:table-row table:style-name="ro1">
          <table:table-cell office:value-type="float" office:value="342.471557617188">
            <text:p>342.4715576172</text:p>
          </table:table-cell>
          <table:table-cell office:value-type="float" office:value="-0.0003178921">
            <text:p>-0.0003178921</text:p>
          </table:table-cell>
          <table:table-cell table:number-columns-repeated="4"/>
        </table:table-row>
        <table:table-row table:style-name="ro1">
          <table:table-cell office:value-type="float" office:value="342.580413818359">
            <text:p>342.5804138184</text:p>
          </table:table-cell>
          <table:table-cell office:value-type="float" office:value="0.01132591">
            <text:p>0.01132591</text:p>
          </table:table-cell>
          <table:table-cell table:number-columns-repeated="4"/>
        </table:table-row>
        <table:table-row table:style-name="ro1">
          <table:table-cell office:value-type="float" office:value="342.689270019531">
            <text:p>342.6892700195</text:p>
          </table:table-cell>
          <table:table-cell office:value-type="float" office:value="-0.003432389">
            <text:p>-0.003432389</text:p>
          </table:table-cell>
          <table:table-cell table:number-columns-repeated="4"/>
        </table:table-row>
        <table:table-row table:style-name="ro1">
          <table:table-cell office:value-type="float" office:value="342.798126220703">
            <text:p>342.7981262207</text:p>
          </table:table-cell>
          <table:table-cell office:value-type="float" office:value="0.008116919">
            <text:p>0.008116919</text:p>
          </table:table-cell>
          <table:table-cell table:number-columns-repeated="4"/>
        </table:table-row>
        <table:table-row table:style-name="ro1">
          <table:table-cell office:value-type="float" office:value="342.906982421875">
            <text:p>342.9069824219</text:p>
          </table:table-cell>
          <table:table-cell office:value-type="float" office:value="0.01567647">
            <text:p>0.01567647</text:p>
          </table:table-cell>
          <table:table-cell table:number-columns-repeated="4"/>
        </table:table-row>
        <table:table-row table:style-name="ro1">
          <table:table-cell office:value-type="float" office:value="343.015869140625">
            <text:p>343.0158691406</text:p>
          </table:table-cell>
          <table:table-cell office:value-type="float" office:value="0.0132366">
            <text:p>0.0132366</text:p>
          </table:table-cell>
          <table:table-cell table:number-columns-repeated="4"/>
        </table:table-row>
        <table:table-row table:style-name="ro1">
          <table:table-cell office:value-type="float" office:value="343.124755859375">
            <text:p>343.1247558594</text:p>
          </table:table-cell>
          <table:table-cell office:value-type="float" office:value="-0.001559953">
            <text:p>-0.001559953</text:p>
          </table:table-cell>
          <table:table-cell table:number-columns-repeated="4"/>
        </table:table-row>
        <table:table-row table:style-name="ro1">
          <table:table-cell office:value-type="float" office:value="343.233642578125">
            <text:p>343.2336425781</text:p>
          </table:table-cell>
          <table:table-cell office:value-type="float" office:value="-0.006463302">
            <text:p>-0.006463302</text:p>
          </table:table-cell>
          <table:table-cell table:number-columns-repeated="4"/>
        </table:table-row>
        <table:table-row table:style-name="ro1">
          <table:table-cell office:value-type="float" office:value="343.342529296875">
            <text:p>343.3425292969</text:p>
          </table:table-cell>
          <table:table-cell office:value-type="float" office:value="0.009704994">
            <text:p>0.009704994</text:p>
          </table:table-cell>
          <table:table-cell table:number-columns-repeated="4"/>
        </table:table-row>
        <table:table-row table:style-name="ro1">
          <table:table-cell office:value-type="float" office:value="343.451416015625">
            <text:p>343.4514160156</text:p>
          </table:table-cell>
          <table:table-cell office:value-type="float" office:value="0.001606447">
            <text:p>0.001606447</text:p>
          </table:table-cell>
          <table:table-cell table:number-columns-repeated="4"/>
        </table:table-row>
        <table:table-row table:style-name="ro1">
          <table:table-cell office:value-type="float" office:value="343.560333251953">
            <text:p>343.560333252</text:p>
          </table:table-cell>
          <table:table-cell office:value-type="float" office:value="-0.002369837">
            <text:p>-0.002369837</text:p>
          </table:table-cell>
          <table:table-cell table:number-columns-repeated="4"/>
        </table:table-row>
        <table:table-row table:style-name="ro1">
          <table:table-cell office:value-type="float" office:value="343.669250488281">
            <text:p>343.6692504883</text:p>
          </table:table-cell>
          <table:table-cell office:value-type="float" office:value="-0.003793716">
            <text:p>-0.003793716</text:p>
          </table:table-cell>
          <table:table-cell table:number-columns-repeated="4"/>
        </table:table-row>
        <table:table-row table:style-name="ro1">
          <table:table-cell office:value-type="float" office:value="343.778167724609">
            <text:p>343.7781677246</text:p>
          </table:table-cell>
          <table:table-cell office:value-type="float" office:value="0.001270257">
            <text:p>0.001270257</text:p>
          </table:table-cell>
          <table:table-cell table:number-columns-repeated="4"/>
        </table:table-row>
        <table:table-row table:style-name="ro1">
          <table:table-cell office:value-type="float" office:value="343.887084960938">
            <text:p>343.8870849609</text:p>
          </table:table-cell>
          <table:table-cell office:value-type="float" office:value="0.003838046">
            <text:p>0.003838046</text:p>
          </table:table-cell>
          <table:table-cell table:number-columns-repeated="4"/>
        </table:table-row>
        <table:table-row table:style-name="ro1">
          <table:table-cell office:value-type="float" office:value="343.996032714844">
            <text:p>343.9960327148</text:p>
          </table:table-cell>
          <table:table-cell office:value-type="float" office:value="-0.007801319">
            <text:p>-0.007801319</text:p>
          </table:table-cell>
          <table:table-cell table:number-columns-repeated="4"/>
        </table:table-row>
        <table:table-row table:style-name="ro1">
          <table:table-cell office:value-type="float" office:value="344.104949951172">
            <text:p>344.1049499512</text:p>
          </table:table-cell>
          <table:table-cell office:value-type="float" office:value="0.009233293">
            <text:p>0.009233293</text:p>
          </table:table-cell>
          <table:table-cell table:number-columns-repeated="4"/>
        </table:table-row>
        <table:table-row table:style-name="ro1">
          <table:table-cell office:value-type="float" office:value="344.213897705078">
            <text:p>344.2138977051</text:p>
          </table:table-cell>
          <table:table-cell office:value-type="float" office:value="-0.002587184">
            <text:p>-0.002587184</text:p>
          </table:table-cell>
          <table:table-cell table:number-columns-repeated="4"/>
        </table:table-row>
        <table:table-row table:style-name="ro1">
          <table:table-cell office:value-type="float" office:value="344.322845458984">
            <text:p>344.322845459</text:p>
          </table:table-cell>
          <table:table-cell office:value-type="float" office:value="0.007675601">
            <text:p>0.007675601</text:p>
          </table:table-cell>
          <table:table-cell table:number-columns-repeated="4"/>
        </table:table-row>
        <table:table-row table:style-name="ro1">
          <table:table-cell office:value-type="float" office:value="344.431823730469">
            <text:p>344.4318237305</text:p>
          </table:table-cell>
          <table:table-cell office:value-type="float" office:value="-0.003016054">
            <text:p>-0.003016054</text:p>
          </table:table-cell>
          <table:table-cell table:number-columns-repeated="4"/>
        </table:table-row>
        <table:table-row table:style-name="ro1">
          <table:table-cell office:value-type="float" office:value="344.540771484375">
            <text:p>344.5407714844</text:p>
          </table:table-cell>
          <table:table-cell office:value-type="float" office:value="0.0002405356">
            <text:p>0.0002405356</text:p>
          </table:table-cell>
          <table:table-cell table:number-columns-repeated="4"/>
        </table:table-row>
        <table:table-row table:style-name="ro1">
          <table:table-cell office:value-type="float" office:value="344.649749755859">
            <text:p>344.6497497559</text:p>
          </table:table-cell>
          <table:table-cell office:value-type="float" office:value="0.0004335819">
            <text:p>0.0004335819</text:p>
          </table:table-cell>
          <table:table-cell table:number-columns-repeated="4"/>
        </table:table-row>
        <table:table-row table:style-name="ro1">
          <table:table-cell office:value-type="float" office:value="344.758728027344">
            <text:p>344.7587280273</text:p>
          </table:table-cell>
          <table:table-cell office:value-type="float" office:value="0.001593073">
            <text:p>0.001593073</text:p>
          </table:table-cell>
          <table:table-cell table:number-columns-repeated="4"/>
        </table:table-row>
        <table:table-row table:style-name="ro1">
          <table:table-cell office:value-type="float" office:value="344.867706298828">
            <text:p>344.8677062988</text:p>
          </table:table-cell>
          <table:table-cell office:value-type="float" office:value="0.006918984">
            <text:p>0.006918984</text:p>
          </table:table-cell>
          <table:table-cell table:number-columns-repeated="4"/>
        </table:table-row>
        <table:table-row table:style-name="ro1">
          <table:table-cell office:value-type="float" office:value="344.976715087891">
            <text:p>344.9767150879</text:p>
          </table:table-cell>
          <table:table-cell office:value-type="float" office:value="0.01063766">
            <text:p>0.01063766</text:p>
          </table:table-cell>
          <table:table-cell table:number-columns-repeated="4"/>
        </table:table-row>
        <table:table-row table:style-name="ro1">
          <table:table-cell office:value-type="float" office:value="345.085723876953">
            <text:p>345.085723877</text:p>
          </table:table-cell>
          <table:table-cell office:value-type="float" office:value="-0.0004702387">
            <text:p>-0.0004702387</text:p>
          </table:table-cell>
          <table:table-cell table:number-columns-repeated="4"/>
        </table:table-row>
        <table:table-row table:style-name="ro1">
          <table:table-cell office:value-type="float" office:value="345.194702148438">
            <text:p>345.1947021484</text:p>
          </table:table-cell>
          <table:table-cell office:value-type="float" office:value="0.002287803">
            <text:p>0.002287803</text:p>
          </table:table-cell>
          <table:table-cell table:number-columns-repeated="4"/>
        </table:table-row>
        <table:table-row table:style-name="ro1">
          <table:table-cell office:value-type="float" office:value="345.303741455078">
            <text:p>345.3037414551</text:p>
          </table:table-cell>
          <table:table-cell office:value-type="float" office:value="0.02386704">
            <text:p>0.02386704</text:p>
          </table:table-cell>
          <table:table-cell table:number-columns-repeated="4"/>
        </table:table-row>
        <table:table-row table:style-name="ro1">
          <table:table-cell office:value-type="float" office:value="345.412750244141">
            <text:p>345.4127502441</text:p>
          </table:table-cell>
          <table:table-cell office:value-type="float" office:value="-0.006047054">
            <text:p>-0.006047054</text:p>
          </table:table-cell>
          <table:table-cell table:number-columns-repeated="4"/>
        </table:table-row>
        <table:table-row table:style-name="ro1">
          <table:table-cell office:value-type="float" office:value="345.521759033203">
            <text:p>345.5217590332</text:p>
          </table:table-cell>
          <table:table-cell office:value-type="float" office:value="-0.004563135">
            <text:p>-0.004563135</text:p>
          </table:table-cell>
          <table:table-cell table:number-columns-repeated="4"/>
        </table:table-row>
        <table:table-row table:style-name="ro1">
          <table:table-cell office:value-type="float" office:value="345.630798339844">
            <text:p>345.6307983398</text:p>
          </table:table-cell>
          <table:table-cell office:value-type="float" office:value="0.003097747">
            <text:p>0.003097747</text:p>
          </table:table-cell>
          <table:table-cell table:number-columns-repeated="4"/>
        </table:table-row>
        <table:table-row table:style-name="ro1">
          <table:table-cell office:value-type="float" office:value="345.739837646484">
            <text:p>345.7398376465</text:p>
          </table:table-cell>
          <table:table-cell office:value-type="float" office:value="-0.001505177">
            <text:p>-0.001505177</text:p>
          </table:table-cell>
          <table:table-cell table:number-columns-repeated="4"/>
        </table:table-row>
        <table:table-row table:style-name="ro1">
          <table:table-cell office:value-type="float" office:value="345.848876953125">
            <text:p>345.8488769531</text:p>
          </table:table-cell>
          <table:table-cell office:value-type="float" office:value="0.01057686">
            <text:p>0.01057686</text:p>
          </table:table-cell>
          <table:table-cell table:number-columns-repeated="4"/>
        </table:table-row>
        <table:table-row table:style-name="ro1">
          <table:table-cell office:value-type="float" office:value="345.957946777344">
            <text:p>345.9579467773</text:p>
          </table:table-cell>
          <table:table-cell office:value-type="float" office:value="0.01161842">
            <text:p>0.01161842</text:p>
          </table:table-cell>
          <table:table-cell table:number-columns-repeated="4"/>
        </table:table-row>
        <table:table-row table:style-name="ro1">
          <table:table-cell office:value-type="float" office:value="346.066986083984">
            <text:p>346.066986084</text:p>
          </table:table-cell>
          <table:table-cell office:value-type="float" office:value="-0.001917333">
            <text:p>-0.001917333</text:p>
          </table:table-cell>
          <table:table-cell table:number-columns-repeated="4"/>
        </table:table-row>
        <table:table-row table:style-name="ro1">
          <table:table-cell office:value-type="float" office:value="346.176055908203">
            <text:p>346.1760559082</text:p>
          </table:table-cell>
          <table:table-cell office:value-type="float" office:value="-0.003698921">
            <text:p>-0.003698921</text:p>
          </table:table-cell>
          <table:table-cell table:number-columns-repeated="4"/>
        </table:table-row>
        <table:table-row table:style-name="ro1">
          <table:table-cell office:value-type="float" office:value="346.285125732422">
            <text:p>346.2851257324</text:p>
          </table:table-cell>
          <table:table-cell office:value-type="float" office:value="-0.004041631">
            <text:p>-0.004041631</text:p>
          </table:table-cell>
          <table:table-cell table:number-columns-repeated="4"/>
        </table:table-row>
        <table:table-row table:style-name="ro1">
          <table:table-cell office:value-type="float" office:value="346.394195556641">
            <text:p>346.3941955566</text:p>
          </table:table-cell>
          <table:table-cell office:value-type="float" office:value="0.002778787">
            <text:p>0.002778787</text:p>
          </table:table-cell>
          <table:table-cell table:number-columns-repeated="4"/>
        </table:table-row>
        <table:table-row table:style-name="ro1">
          <table:table-cell office:value-type="float" office:value="346.503295898438">
            <text:p>346.5032958984</text:p>
          </table:table-cell>
          <table:table-cell office:value-type="float" office:value="-0.001409972">
            <text:p>-0.001409972</text:p>
          </table:table-cell>
          <table:table-cell table:number-columns-repeated="4"/>
        </table:table-row>
        <table:table-row table:style-name="ro1">
          <table:table-cell office:value-type="float" office:value="346.612365722656">
            <text:p>346.6123657227</text:p>
          </table:table-cell>
          <table:table-cell office:value-type="float" office:value="-0.003942593">
            <text:p>-0.003942593</text:p>
          </table:table-cell>
          <table:table-cell table:number-columns-repeated="4"/>
        </table:table-row>
        <table:table-row table:style-name="ro1">
          <table:table-cell office:value-type="float" office:value="346.721466064453">
            <text:p>346.7214660645</text:p>
          </table:table-cell>
          <table:table-cell office:value-type="float" office:value="0.001208618">
            <text:p>0.001208618</text:p>
          </table:table-cell>
          <table:table-cell table:number-columns-repeated="4"/>
        </table:table-row>
        <table:table-row table:style-name="ro1">
          <table:table-cell office:value-type="float" office:value="346.83056640625">
            <text:p>346.8305664063</text:p>
          </table:table-cell>
          <table:table-cell office:value-type="float" office:value="0.01168033">
            <text:p>0.01168033</text:p>
          </table:table-cell>
          <table:table-cell table:number-columns-repeated="4"/>
        </table:table-row>
        <table:table-row table:style-name="ro1">
          <table:table-cell office:value-type="float" office:value="346.939697265625">
            <text:p>346.9396972656</text:p>
          </table:table-cell>
          <table:table-cell office:value-type="float" office:value="0.02850224">
            <text:p>0.02850224</text:p>
          </table:table-cell>
          <table:table-cell table:number-columns-repeated="4"/>
        </table:table-row>
        <table:table-row table:style-name="ro1">
          <table:table-cell office:value-type="float" office:value="347.048797607422">
            <text:p>347.0487976074</text:p>
          </table:table-cell>
          <table:table-cell office:value-type="float" office:value="-0.008358939">
            <text:p>-0.008358939</text:p>
          </table:table-cell>
          <table:table-cell table:number-columns-repeated="4"/>
        </table:table-row>
        <table:table-row table:style-name="ro1">
          <table:table-cell office:value-type="float" office:value="347.157928466797">
            <text:p>347.1579284668</text:p>
          </table:table-cell>
          <table:table-cell office:value-type="float" office:value="-0.007570902">
            <text:p>-0.007570902</text:p>
          </table:table-cell>
          <table:table-cell table:number-columns-repeated="4"/>
        </table:table-row>
        <table:table-row table:style-name="ro1">
          <table:table-cell office:value-type="float" office:value="347.267059326172">
            <text:p>347.2670593262</text:p>
          </table:table-cell>
          <table:table-cell office:value-type="float" office:value="0.004357897">
            <text:p>0.004357897</text:p>
          </table:table-cell>
          <table:table-cell table:number-columns-repeated="4"/>
        </table:table-row>
        <table:table-row table:style-name="ro1">
          <table:table-cell office:value-type="float" office:value="347.376190185547">
            <text:p>347.3761901855</text:p>
          </table:table-cell>
          <table:table-cell office:value-type="float" office:value="-0.001117492">
            <text:p>-0.001117492</text:p>
          </table:table-cell>
          <table:table-cell table:number-columns-repeated="4"/>
        </table:table-row>
        <table:table-row table:style-name="ro1">
          <table:table-cell office:value-type="float" office:value="347.4853515625">
            <text:p>347.4853515625</text:p>
          </table:table-cell>
          <table:table-cell office:value-type="float" office:value="0.005453211">
            <text:p>0.005453211</text:p>
          </table:table-cell>
          <table:table-cell table:number-columns-repeated="4"/>
        </table:table-row>
        <table:table-row table:style-name="ro1">
          <table:table-cell office:value-type="float" office:value="347.594482421875">
            <text:p>347.5944824219</text:p>
          </table:table-cell>
          <table:table-cell office:value-type="float" office:value="-0.01195789">
            <text:p>-0.01195789</text:p>
          </table:table-cell>
          <table:table-cell table:number-columns-repeated="4"/>
        </table:table-row>
        <table:table-row table:style-name="ro1">
          <table:table-cell office:value-type="float" office:value="347.703643798828">
            <text:p>347.7036437988</text:p>
          </table:table-cell>
          <table:table-cell office:value-type="float" office:value="0.003926257">
            <text:p>0.003926257</text:p>
          </table:table-cell>
          <table:table-cell table:number-columns-repeated="4"/>
        </table:table-row>
        <table:table-row table:style-name="ro1">
          <table:table-cell office:value-type="float" office:value="347.812805175781">
            <text:p>347.8128051758</text:p>
          </table:table-cell>
          <table:table-cell office:value-type="float" office:value="-0.001029174">
            <text:p>-0.001029174</text:p>
          </table:table-cell>
          <table:table-cell table:number-columns-repeated="4"/>
        </table:table-row>
        <table:table-row table:style-name="ro1">
          <table:table-cell office:value-type="float" office:value="347.921966552734">
            <text:p>347.9219665527</text:p>
          </table:table-cell>
          <table:table-cell office:value-type="float" office:value="0.002265968">
            <text:p>0.002265968</text:p>
          </table:table-cell>
          <table:table-cell table:number-columns-repeated="4"/>
        </table:table-row>
        <table:table-row table:style-name="ro1">
          <table:table-cell office:value-type="float" office:value="348.031158447266">
            <text:p>348.0311584473</text:p>
          </table:table-cell>
          <table:table-cell office:value-type="float" office:value="0.006554333">
            <text:p>0.006554333</text:p>
          </table:table-cell>
          <table:table-cell table:number-columns-repeated="4"/>
        </table:table-row>
        <table:table-row table:style-name="ro1">
          <table:table-cell office:value-type="float" office:value="348.140319824219">
            <text:p>348.1403198242</text:p>
          </table:table-cell>
          <table:table-cell office:value-type="float" office:value="0.001761336">
            <text:p>0.001761336</text:p>
          </table:table-cell>
          <table:table-cell table:number-columns-repeated="4"/>
        </table:table-row>
        <table:table-row table:style-name="ro1">
          <table:table-cell office:value-type="float" office:value="348.24951171875">
            <text:p>348.2495117188</text:p>
          </table:table-cell>
          <table:table-cell office:value-type="float" office:value="0.01243524">
            <text:p>0.01243524</text:p>
          </table:table-cell>
          <table:table-cell table:number-columns-repeated="4"/>
        </table:table-row>
        <table:table-row table:style-name="ro1">
          <table:table-cell office:value-type="float" office:value="348.358703613281">
            <text:p>348.3587036133</text:p>
          </table:table-cell>
          <table:table-cell office:value-type="float" office:value="-0.008404582">
            <text:p>-0.008404582</text:p>
          </table:table-cell>
          <table:table-cell table:number-columns-repeated="4"/>
        </table:table-row>
        <table:table-row table:style-name="ro1">
          <table:table-cell office:value-type="float" office:value="348.467926025391">
            <text:p>348.4679260254</text:p>
          </table:table-cell>
          <table:table-cell office:value-type="string">
            <text:p>-7.105869E-05</text:p>
          </table:table-cell>
          <table:table-cell table:number-columns-repeated="4"/>
        </table:table-row>
        <table:table-row table:style-name="ro1">
          <table:table-cell office:value-type="float" office:value="348.577117919922">
            <text:p>348.5771179199</text:p>
          </table:table-cell>
          <table:table-cell office:value-type="float" office:value="-0.001738508">
            <text:p>-0.001738508</text:p>
          </table:table-cell>
          <table:table-cell table:number-columns-repeated="4"/>
        </table:table-row>
        <table:table-row table:style-name="ro1">
          <table:table-cell office:value-type="float" office:value="348.686340332031">
            <text:p>348.686340332</text:p>
          </table:table-cell>
          <table:table-cell office:value-type="float" office:value="0.02023659">
            <text:p>0.02023659</text:p>
          </table:table-cell>
          <table:table-cell table:number-columns-repeated="4"/>
        </table:table-row>
        <table:table-row table:style-name="ro1">
          <table:table-cell office:value-type="float" office:value="348.795562744141">
            <text:p>348.7955627441</text:p>
          </table:table-cell>
          <table:table-cell office:value-type="float" office:value="-0.0002525243">
            <text:p>-0.0002525243</text:p>
          </table:table-cell>
          <table:table-cell table:number-columns-repeated="4"/>
        </table:table-row>
        <table:table-row table:style-name="ro1">
          <table:table-cell office:value-type="float" office:value="348.90478515625">
            <text:p>348.9047851563</text:p>
          </table:table-cell>
          <table:table-cell office:value-type="float" office:value="0.005396807">
            <text:p>0.005396807</text:p>
          </table:table-cell>
          <table:table-cell table:number-columns-repeated="4"/>
        </table:table-row>
        <table:table-row table:style-name="ro1">
          <table:table-cell office:value-type="float" office:value="349.014038085938">
            <text:p>349.0140380859</text:p>
          </table:table-cell>
          <table:table-cell office:value-type="float" office:value="0.002339902">
            <text:p>0.002339902</text:p>
          </table:table-cell>
          <table:table-cell table:number-columns-repeated="4"/>
        </table:table-row>
        <table:table-row table:style-name="ro1">
          <table:table-cell office:value-type="float" office:value="349.123260498047">
            <text:p>349.123260498</text:p>
          </table:table-cell>
          <table:table-cell office:value-type="float" office:value="0.01023666">
            <text:p>0.01023666</text:p>
          </table:table-cell>
          <table:table-cell table:number-columns-repeated="4"/>
        </table:table-row>
        <table:table-row table:style-name="ro1">
          <table:table-cell office:value-type="float" office:value="349.232513427734">
            <text:p>349.2325134277</text:p>
          </table:table-cell>
          <table:table-cell office:value-type="float" office:value="-0.006974045">
            <text:p>-0.006974045</text:p>
          </table:table-cell>
          <table:table-cell table:number-columns-repeated="4"/>
        </table:table-row>
        <table:table-row table:style-name="ro1">
          <table:table-cell office:value-type="float" office:value="349.341766357422">
            <text:p>349.3417663574</text:p>
          </table:table-cell>
          <table:table-cell office:value-type="float" office:value="-0.008981881">
            <text:p>-0.008981881</text:p>
          </table:table-cell>
          <table:table-cell table:number-columns-repeated="4"/>
        </table:table-row>
        <table:table-row table:style-name="ro1">
          <table:table-cell office:value-type="float" office:value="349.451019287109">
            <text:p>349.4510192871</text:p>
          </table:table-cell>
          <table:table-cell office:value-type="float" office:value="0.009050957">
            <text:p>0.009050957</text:p>
          </table:table-cell>
          <table:table-cell table:number-columns-repeated="4"/>
        </table:table-row>
        <table:table-row table:style-name="ro1">
          <table:table-cell office:value-type="float" office:value="349.560302734375">
            <text:p>349.5603027344</text:p>
          </table:table-cell>
          <table:table-cell office:value-type="float" office:value="0.003813215">
            <text:p>0.003813215</text:p>
          </table:table-cell>
          <table:table-cell table:number-columns-repeated="4"/>
        </table:table-row>
        <table:table-row table:style-name="ro1">
          <table:table-cell office:value-type="float" office:value="349.669586181641">
            <text:p>349.6695861816</text:p>
          </table:table-cell>
          <table:table-cell office:value-type="float" office:value="-0.006077709">
            <text:p>-0.006077709</text:p>
          </table:table-cell>
          <table:table-cell table:number-columns-repeated="4"/>
        </table:table-row>
        <table:table-row table:style-name="ro1">
          <table:table-cell office:value-type="float" office:value="349.778839111328">
            <text:p>349.7788391113</text:p>
          </table:table-cell>
          <table:table-cell office:value-type="float" office:value="-0.0040744">
            <text:p>-0.0040744</text:p>
          </table:table-cell>
          <table:table-cell table:number-columns-repeated="4"/>
        </table:table-row>
        <table:table-row table:style-name="ro1">
          <table:table-cell office:value-type="float" office:value="349.888153076172">
            <text:p>349.8881530762</text:p>
          </table:table-cell>
          <table:table-cell office:value-type="float" office:value="0.01358814">
            <text:p>0.01358814</text:p>
          </table:table-cell>
          <table:table-cell table:number-columns-repeated="4"/>
        </table:table-row>
        <table:table-row table:style-name="ro1">
          <table:table-cell office:value-type="float" office:value="349.997436523438">
            <text:p>349.9974365234</text:p>
          </table:table-cell>
          <table:table-cell office:value-type="float" office:value="0.01050475">
            <text:p>0.01050475</text:p>
          </table:table-cell>
          <table:table-cell table:number-columns-repeated="4"/>
        </table:table-row>
        <table:table-row table:style-name="ro1">
          <table:table-cell office:value-type="float" office:value="350.106719970703">
            <text:p>350.1067199707</text:p>
          </table:table-cell>
          <table:table-cell office:value-type="float" office:value="0.009838148">
            <text:p>0.009838148</text:p>
          </table:table-cell>
          <table:table-cell table:number-columns-repeated="4"/>
        </table:table-row>
        <table:table-row table:style-name="ro1">
          <table:table-cell office:value-type="float" office:value="350.216033935547">
            <text:p>350.2160339355</text:p>
          </table:table-cell>
          <table:table-cell office:value-type="float" office:value="-0.007203409">
            <text:p>-0.007203409</text:p>
          </table:table-cell>
          <table:table-cell table:number-columns-repeated="4"/>
        </table:table-row>
        <table:table-row table:style-name="ro1">
          <table:table-cell office:value-type="float" office:value="350.325347900391">
            <text:p>350.3253479004</text:p>
          </table:table-cell>
          <table:table-cell office:value-type="float" office:value="-0.0006589679">
            <text:p>-0.0006589679</text:p>
          </table:table-cell>
          <table:table-cell table:number-columns-repeated="4"/>
        </table:table-row>
        <table:table-row table:style-name="ro1">
          <table:table-cell office:value-type="float" office:value="350.434661865234">
            <text:p>350.4346618652</text:p>
          </table:table-cell>
          <table:table-cell office:value-type="float" office:value="0.005830516">
            <text:p>0.005830516</text:p>
          </table:table-cell>
          <table:table-cell table:number-columns-repeated="4"/>
        </table:table-row>
        <table:table-row table:style-name="ro1">
          <table:table-cell office:value-type="float" office:value="350.544006347656">
            <text:p>350.5440063477</text:p>
          </table:table-cell>
          <table:table-cell office:value-type="float" office:value="0.002918846">
            <text:p>0.002918846</text:p>
          </table:table-cell>
          <table:table-cell table:number-columns-repeated="4"/>
        </table:table-row>
        <table:table-row table:style-name="ro1">
          <table:table-cell office:value-type="float" office:value="350.6533203125">
            <text:p>350.6533203125</text:p>
          </table:table-cell>
          <table:table-cell office:value-type="float" office:value="0.005588378">
            <text:p>0.005588378</text:p>
          </table:table-cell>
          <table:table-cell table:number-columns-repeated="4"/>
        </table:table-row>
        <table:table-row table:style-name="ro1">
          <table:table-cell office:value-type="float" office:value="350.762664794922">
            <text:p>350.7626647949</text:p>
          </table:table-cell>
          <table:table-cell office:value-type="float" office:value="0.005123667">
            <text:p>0.005123667</text:p>
          </table:table-cell>
          <table:table-cell table:number-columns-repeated="4"/>
        </table:table-row>
        <table:table-row table:style-name="ro1">
          <table:table-cell office:value-type="float" office:value="350.872009277344">
            <text:p>350.8720092773</text:p>
          </table:table-cell>
          <table:table-cell office:value-type="float" office:value="0.01398182">
            <text:p>0.01398182</text:p>
          </table:table-cell>
          <table:table-cell table:number-columns-repeated="4"/>
        </table:table-row>
        <table:table-row table:style-name="ro1">
          <table:table-cell office:value-type="float" office:value="350.981353759766">
            <text:p>350.9813537598</text:p>
          </table:table-cell>
          <table:table-cell office:value-type="float" office:value="-0.009633945">
            <text:p>-0.009633945</text:p>
          </table:table-cell>
          <table:table-cell table:number-columns-repeated="4"/>
        </table:table-row>
        <table:table-row table:style-name="ro1">
          <table:table-cell office:value-type="float" office:value="351.090728759766">
            <text:p>351.0907287598</text:p>
          </table:table-cell>
          <table:table-cell office:value-type="float" office:value="0.003934877">
            <text:p>0.003934877</text:p>
          </table:table-cell>
          <table:table-cell table:number-columns-repeated="4"/>
        </table:table-row>
        <table:table-row table:style-name="ro1">
          <table:table-cell office:value-type="float" office:value="351.200073242188">
            <text:p>351.2000732422</text:p>
          </table:table-cell>
          <table:table-cell office:value-type="float" office:value="0.003054816">
            <text:p>0.003054816</text:p>
          </table:table-cell>
          <table:table-cell table:number-columns-repeated="4"/>
        </table:table-row>
        <table:table-row table:style-name="ro1">
          <table:table-cell office:value-type="float" office:value="351.309448242188">
            <text:p>351.3094482422</text:p>
          </table:table-cell>
          <table:table-cell office:value-type="float" office:value="0.01234884">
            <text:p>0.01234884</text:p>
          </table:table-cell>
          <table:table-cell table:number-columns-repeated="4"/>
        </table:table-row>
        <table:table-row table:style-name="ro1">
          <table:table-cell office:value-type="float" office:value="351.418823242188">
            <text:p>351.4188232422</text:p>
          </table:table-cell>
          <table:table-cell office:value-type="float" office:value="0.009634919">
            <text:p>0.009634919</text:p>
          </table:table-cell>
          <table:table-cell table:number-columns-repeated="4"/>
        </table:table-row>
        <table:table-row table:style-name="ro1">
          <table:table-cell office:value-type="float" office:value="351.528228759766">
            <text:p>351.5282287598</text:p>
          </table:table-cell>
          <table:table-cell office:value-type="float" office:value="-0.007856503">
            <text:p>-0.007856503</text:p>
          </table:table-cell>
          <table:table-cell table:number-columns-repeated="4"/>
        </table:table-row>
        <table:table-row table:style-name="ro1">
          <table:table-cell office:value-type="float" office:value="351.637603759766">
            <text:p>351.6376037598</text:p>
          </table:table-cell>
          <table:table-cell office:value-type="float" office:value="0.01055718">
            <text:p>0.01055718</text:p>
          </table:table-cell>
          <table:table-cell table:number-columns-repeated="4"/>
        </table:table-row>
        <table:table-row table:style-name="ro1">
          <table:table-cell office:value-type="float" office:value="351.747009277344">
            <text:p>351.7470092773</text:p>
          </table:table-cell>
          <table:table-cell office:value-type="float" office:value="0.002261838">
            <text:p>0.002261838</text:p>
          </table:table-cell>
          <table:table-cell table:number-columns-repeated="4"/>
        </table:table-row>
        <table:table-row table:style-name="ro1">
          <table:table-cell office:value-type="float" office:value="351.856414794922">
            <text:p>351.8564147949</text:p>
          </table:table-cell>
          <table:table-cell office:value-type="float" office:value="-0.007720296">
            <text:p>-0.007720296</text:p>
          </table:table-cell>
          <table:table-cell table:number-columns-repeated="4"/>
        </table:table-row>
        <table:table-row table:style-name="ro1">
          <table:table-cell office:value-type="float" office:value="351.9658203125">
            <text:p>351.9658203125</text:p>
          </table:table-cell>
          <table:table-cell office:value-type="float" office:value="0.001733748">
            <text:p>0.001733748</text:p>
          </table:table-cell>
          <table:table-cell table:number-columns-repeated="4"/>
        </table:table-row>
        <table:table-row table:style-name="ro1">
          <table:table-cell office:value-type="float" office:value="352.075225830078">
            <text:p>352.0752258301</text:p>
          </table:table-cell>
          <table:table-cell office:value-type="float" office:value="-0.0005956823">
            <text:p>-0.0005956823</text:p>
          </table:table-cell>
          <table:table-cell table:number-columns-repeated="4"/>
        </table:table-row>
        <table:table-row table:style-name="ro1">
          <table:table-cell office:value-type="float" office:value="352.184661865234">
            <text:p>352.1846618652</text:p>
          </table:table-cell>
          <table:table-cell office:value-type="float" office:value="0.002867287">
            <text:p>0.002867287</text:p>
          </table:table-cell>
          <table:table-cell table:number-columns-repeated="4"/>
        </table:table-row>
        <table:table-row table:style-name="ro1">
          <table:table-cell office:value-type="float" office:value="352.294097900391">
            <text:p>352.2940979004</text:p>
          </table:table-cell>
          <table:table-cell office:value-type="float" office:value="0.005161494">
            <text:p>0.005161494</text:p>
          </table:table-cell>
          <table:table-cell table:number-columns-repeated="4"/>
        </table:table-row>
        <table:table-row table:style-name="ro1">
          <table:table-cell office:value-type="float" office:value="352.403533935547">
            <text:p>352.4035339355</text:p>
          </table:table-cell>
          <table:table-cell office:value-type="float" office:value="-0.002339942">
            <text:p>-0.002339942</text:p>
          </table:table-cell>
          <table:table-cell table:number-columns-repeated="4"/>
        </table:table-row>
        <table:table-row table:style-name="ro1">
          <table:table-cell office:value-type="float" office:value="352.512969970703">
            <text:p>352.5129699707</text:p>
          </table:table-cell>
          <table:table-cell office:value-type="float" office:value="0.002245079">
            <text:p>0.002245079</text:p>
          </table:table-cell>
          <table:table-cell table:number-columns-repeated="4"/>
        </table:table-row>
        <table:table-row table:style-name="ro1">
          <table:table-cell office:value-type="float" office:value="352.622406005859">
            <text:p>352.6224060059</text:p>
          </table:table-cell>
          <table:table-cell office:value-type="float" office:value="0.01660137">
            <text:p>0.01660137</text:p>
          </table:table-cell>
          <table:table-cell table:number-columns-repeated="4"/>
        </table:table-row>
        <table:table-row table:style-name="ro1">
          <table:table-cell office:value-type="float" office:value="352.731872558594">
            <text:p>352.7318725586</text:p>
          </table:table-cell>
          <table:table-cell office:value-type="float" office:value="-0.004637186">
            <text:p>-0.004637186</text:p>
          </table:table-cell>
          <table:table-cell table:number-columns-repeated="4"/>
        </table:table-row>
        <table:table-row table:style-name="ro1">
          <table:table-cell office:value-type="float" office:value="352.841339111328">
            <text:p>352.8413391113</text:p>
          </table:table-cell>
          <table:table-cell office:value-type="float" office:value="-0.006365424">
            <text:p>-0.006365424</text:p>
          </table:table-cell>
          <table:table-cell table:number-columns-repeated="4"/>
        </table:table-row>
        <table:table-row table:style-name="ro1">
          <table:table-cell office:value-type="float" office:value="352.950805664063">
            <text:p>352.9508056641</text:p>
          </table:table-cell>
          <table:table-cell office:value-type="float" office:value="0.01563913">
            <text:p>0.01563913</text:p>
          </table:table-cell>
          <table:table-cell table:number-columns-repeated="4"/>
        </table:table-row>
        <table:table-row table:style-name="ro1">
          <table:table-cell office:value-type="float" office:value="353.060272216797">
            <text:p>353.0602722168</text:p>
          </table:table-cell>
          <table:table-cell office:value-type="float" office:value="0.01191157">
            <text:p>0.01191157</text:p>
          </table:table-cell>
          <table:table-cell table:number-columns-repeated="4"/>
        </table:table-row>
        <table:table-row table:style-name="ro1">
          <table:table-cell office:value-type="float" office:value="353.169738769531">
            <text:p>353.1697387695</text:p>
          </table:table-cell>
          <table:table-cell office:value-type="float" office:value="-0.000957872">
            <text:p>-0.000957872</text:p>
          </table:table-cell>
          <table:table-cell table:number-columns-repeated="4"/>
        </table:table-row>
        <table:table-row table:style-name="ro1">
          <table:table-cell office:value-type="float" office:value="353.279235839844">
            <text:p>353.2792358398</text:p>
          </table:table-cell>
          <table:table-cell office:value-type="float" office:value="-0.001410385">
            <text:p>-0.001410385</text:p>
          </table:table-cell>
          <table:table-cell table:number-columns-repeated="4"/>
        </table:table-row>
        <table:table-row table:style-name="ro1">
          <table:table-cell office:value-type="float" office:value="353.388732910156">
            <text:p>353.3887329102</text:p>
          </table:table-cell>
          <table:table-cell office:value-type="float" office:value="0.006196064">
            <text:p>0.006196064</text:p>
          </table:table-cell>
          <table:table-cell table:number-columns-repeated="4"/>
        </table:table-row>
        <table:table-row table:style-name="ro1">
          <table:table-cell office:value-type="float" office:value="353.498229980469">
            <text:p>353.4982299805</text:p>
          </table:table-cell>
          <table:table-cell office:value-type="float" office:value="0.005642487">
            <text:p>0.005642487</text:p>
          </table:table-cell>
          <table:table-cell table:number-columns-repeated="4"/>
        </table:table-row>
        <table:table-row table:style-name="ro1">
          <table:table-cell office:value-type="float" office:value="353.607727050781">
            <text:p>353.6077270508</text:p>
          </table:table-cell>
          <table:table-cell office:value-type="float" office:value="0.008827464">
            <text:p>0.008827464</text:p>
          </table:table-cell>
          <table:table-cell table:number-columns-repeated="4"/>
        </table:table-row>
        <table:table-row table:style-name="ro1">
          <table:table-cell office:value-type="float" office:value="353.717254638672">
            <text:p>353.7172546387</text:p>
          </table:table-cell>
          <table:table-cell office:value-type="float" office:value="-0.001252965">
            <text:p>-0.001252965</text:p>
          </table:table-cell>
          <table:table-cell table:number-columns-repeated="4"/>
        </table:table-row>
        <table:table-row table:style-name="ro1">
          <table:table-cell office:value-type="float" office:value="353.826782226563">
            <text:p>353.8267822266</text:p>
          </table:table-cell>
          <table:table-cell office:value-type="float" office:value="-0.003726219">
            <text:p>-0.003726219</text:p>
          </table:table-cell>
          <table:table-cell table:number-columns-repeated="4"/>
        </table:table-row>
        <table:table-row table:style-name="ro1">
          <table:table-cell office:value-type="float" office:value="353.936309814453">
            <text:p>353.9363098145</text:p>
          </table:table-cell>
          <table:table-cell office:value-type="float" office:value="0.01557768">
            <text:p>0.01557768</text:p>
          </table:table-cell>
          <table:table-cell table:number-columns-repeated="4"/>
        </table:table-row>
        <table:table-row table:style-name="ro1">
          <table:table-cell office:value-type="float" office:value="354.045837402344">
            <text:p>354.0458374023</text:p>
          </table:table-cell>
          <table:table-cell office:value-type="float" office:value="-0.004717426">
            <text:p>-0.004717426</text:p>
          </table:table-cell>
          <table:table-cell table:number-columns-repeated="4"/>
        </table:table-row>
        <table:table-row table:style-name="ro1">
          <table:table-cell office:value-type="float" office:value="354.155364990234">
            <text:p>354.1553649902</text:p>
          </table:table-cell>
          <table:table-cell office:value-type="float" office:value="0.00500087">
            <text:p>0.00500087</text:p>
          </table:table-cell>
          <table:table-cell table:number-columns-repeated="4"/>
        </table:table-row>
        <table:table-row table:style-name="ro1">
          <table:table-cell office:value-type="float" office:value="354.264923095703">
            <text:p>354.2649230957</text:p>
          </table:table-cell>
          <table:table-cell office:value-type="float" office:value="0.002564854">
            <text:p>0.002564854</text:p>
          </table:table-cell>
          <table:table-cell table:number-columns-repeated="4"/>
        </table:table-row>
        <table:table-row table:style-name="ro1">
          <table:table-cell office:value-type="float" office:value="354.374481201172">
            <text:p>354.3744812012</text:p>
          </table:table-cell>
          <table:table-cell office:value-type="float" office:value="0.0055727">
            <text:p>0.0055727</text:p>
          </table:table-cell>
          <table:table-cell table:number-columns-repeated="4"/>
        </table:table-row>
        <table:table-row table:style-name="ro1">
          <table:table-cell office:value-type="float" office:value="354.484039306641">
            <text:p>354.4840393066</text:p>
          </table:table-cell>
          <table:table-cell office:value-type="float" office:value="0.003945284">
            <text:p>0.003945284</text:p>
          </table:table-cell>
          <table:table-cell table:number-columns-repeated="4"/>
        </table:table-row>
        <table:table-row table:style-name="ro1">
          <table:table-cell office:value-type="float" office:value="354.593597412109">
            <text:p>354.5935974121</text:p>
          </table:table-cell>
          <table:table-cell office:value-type="float" office:value="0.003882356">
            <text:p>0.003882356</text:p>
          </table:table-cell>
          <table:table-cell table:number-columns-repeated="4"/>
        </table:table-row>
        <table:table-row table:style-name="ro1">
          <table:table-cell office:value-type="float" office:value="354.703155517578">
            <text:p>354.7031555176</text:p>
          </table:table-cell>
          <table:table-cell office:value-type="float" office:value="0.002265309">
            <text:p>0.002265309</text:p>
          </table:table-cell>
          <table:table-cell table:number-columns-repeated="4"/>
        </table:table-row>
        <table:table-row table:style-name="ro1">
          <table:table-cell office:value-type="float" office:value="354.812744140625">
            <text:p>354.8127441406</text:p>
          </table:table-cell>
          <table:table-cell office:value-type="float" office:value="0.01110046">
            <text:p>0.01110046</text:p>
          </table:table-cell>
          <table:table-cell table:number-columns-repeated="4"/>
        </table:table-row>
        <table:table-row table:style-name="ro1">
          <table:table-cell office:value-type="float" office:value="354.922332763672">
            <text:p>354.9223327637</text:p>
          </table:table-cell>
          <table:table-cell office:value-type="float" office:value="0.001428102">
            <text:p>0.001428102</text:p>
          </table:table-cell>
          <table:table-cell table:number-columns-repeated="4"/>
        </table:table-row>
        <table:table-row table:style-name="ro1">
          <table:table-cell office:value-type="float" office:value="355.031921386719">
            <text:p>355.0319213867</text:p>
          </table:table-cell>
          <table:table-cell office:value-type="float" office:value="0.007728355">
            <text:p>0.007728355</text:p>
          </table:table-cell>
          <table:table-cell table:number-columns-repeated="4"/>
        </table:table-row>
        <table:table-row table:style-name="ro1">
          <table:table-cell office:value-type="float" office:value="355.141510009766">
            <text:p>355.1415100098</text:p>
          </table:table-cell>
          <table:table-cell office:value-type="float" office:value="-0.001828647">
            <text:p>-0.001828647</text:p>
          </table:table-cell>
          <table:table-cell table:number-columns-repeated="4"/>
        </table:table-row>
        <table:table-row table:style-name="ro1">
          <table:table-cell office:value-type="float" office:value="355.251129150391">
            <text:p>355.2511291504</text:p>
          </table:table-cell>
          <table:table-cell office:value-type="float" office:value="0.00440996">
            <text:p>0.00440996</text:p>
          </table:table-cell>
          <table:table-cell table:number-columns-repeated="4"/>
        </table:table-row>
        <table:table-row table:style-name="ro1">
          <table:table-cell office:value-type="float" office:value="355.360717773438">
            <text:p>355.3607177734</text:p>
          </table:table-cell>
          <table:table-cell office:value-type="float" office:value="0.003900321">
            <text:p>0.003900321</text:p>
          </table:table-cell>
          <table:table-cell table:number-columns-repeated="4"/>
        </table:table-row>
        <table:table-row table:style-name="ro1">
          <table:table-cell office:value-type="float" office:value="355.470336914063">
            <text:p>355.4703369141</text:p>
          </table:table-cell>
          <table:table-cell office:value-type="float" office:value="0.001547846">
            <text:p>0.001547846</text:p>
          </table:table-cell>
          <table:table-cell table:number-columns-repeated="4"/>
        </table:table-row>
        <table:table-row table:style-name="ro1">
          <table:table-cell office:value-type="float" office:value="355.579956054688">
            <text:p>355.5799560547</text:p>
          </table:table-cell>
          <table:table-cell office:value-type="float" office:value="0.009873386">
            <text:p>0.009873386</text:p>
          </table:table-cell>
          <table:table-cell table:number-columns-repeated="4"/>
        </table:table-row>
        <table:table-row table:style-name="ro1">
          <table:table-cell office:value-type="float" office:value="355.689605712891">
            <text:p>355.6896057129</text:p>
          </table:table-cell>
          <table:table-cell office:value-type="float" office:value="0.01310886">
            <text:p>0.01310886</text:p>
          </table:table-cell>
          <table:table-cell table:number-columns-repeated="4"/>
        </table:table-row>
        <table:table-row table:style-name="ro1">
          <table:table-cell office:value-type="float" office:value="355.799224853516">
            <text:p>355.7992248535</text:p>
          </table:table-cell>
          <table:table-cell office:value-type="float" office:value="0.0140611">
            <text:p>0.0140611</text:p>
          </table:table-cell>
          <table:table-cell table:number-columns-repeated="4"/>
        </table:table-row>
        <table:table-row table:style-name="ro1">
          <table:table-cell office:value-type="float" office:value="355.908874511719">
            <text:p>355.9088745117</text:p>
          </table:table-cell>
          <table:table-cell office:value-type="float" office:value="-0.006094831">
            <text:p>-0.006094831</text:p>
          </table:table-cell>
          <table:table-cell table:number-columns-repeated="4"/>
        </table:table-row>
        <table:table-row table:style-name="ro1">
          <table:table-cell office:value-type="float" office:value="356.018524169922">
            <text:p>356.0185241699</text:p>
          </table:table-cell>
          <table:table-cell office:value-type="float" office:value="0.01008757">
            <text:p>0.01008757</text:p>
          </table:table-cell>
          <table:table-cell table:number-columns-repeated="4"/>
        </table:table-row>
        <table:table-row table:style-name="ro1">
          <table:table-cell office:value-type="float" office:value="356.128173828125">
            <text:p>356.1281738281</text:p>
          </table:table-cell>
          <table:table-cell office:value-type="float" office:value="-0.002525067">
            <text:p>-0.002525067</text:p>
          </table:table-cell>
          <table:table-cell table:number-columns-repeated="4"/>
        </table:table-row>
        <table:table-row table:style-name="ro1">
          <table:table-cell office:value-type="float" office:value="356.237823486328">
            <text:p>356.2378234863</text:p>
          </table:table-cell>
          <table:table-cell office:value-type="float" office:value="-0.005051448">
            <text:p>-0.005051448</text:p>
          </table:table-cell>
          <table:table-cell table:number-columns-repeated="4"/>
        </table:table-row>
        <table:table-row table:style-name="ro1">
          <table:table-cell office:value-type="float" office:value="356.347503662109">
            <text:p>356.3475036621</text:p>
          </table:table-cell>
          <table:table-cell office:value-type="float" office:value="0.003856611">
            <text:p>0.003856611</text:p>
          </table:table-cell>
          <table:table-cell table:number-columns-repeated="4"/>
        </table:table-row>
        <table:table-row table:style-name="ro1">
          <table:table-cell office:value-type="float" office:value="356.457183837891">
            <text:p>356.4571838379</text:p>
          </table:table-cell>
          <table:table-cell office:value-type="float" office:value="0.002951097">
            <text:p>0.002951097</text:p>
          </table:table-cell>
          <table:table-cell table:number-columns-repeated="4"/>
        </table:table-row>
        <table:table-row table:style-name="ro1">
          <table:table-cell office:value-type="float" office:value="356.566864013672">
            <text:p>356.5668640137</text:p>
          </table:table-cell>
          <table:table-cell office:value-type="float" office:value="0.0008024458">
            <text:p>0.0008024458</text:p>
          </table:table-cell>
          <table:table-cell table:number-columns-repeated="4"/>
        </table:table-row>
        <table:table-row table:style-name="ro1">
          <table:table-cell office:value-type="float" office:value="356.676544189453">
            <text:p>356.6765441895</text:p>
          </table:table-cell>
          <table:table-cell office:value-type="float" office:value="-0.005792874">
            <text:p>-0.005792874</text:p>
          </table:table-cell>
          <table:table-cell table:number-columns-repeated="4"/>
        </table:table-row>
        <table:table-row table:style-name="ro1">
          <table:table-cell office:value-type="float" office:value="356.786224365234">
            <text:p>356.7862243652</text:p>
          </table:table-cell>
          <table:table-cell office:value-type="float" office:value="-0.005938896">
            <text:p>-0.005938896</text:p>
          </table:table-cell>
          <table:table-cell table:number-columns-repeated="4"/>
        </table:table-row>
        <table:table-row table:style-name="ro1">
          <table:table-cell office:value-type="float" office:value="356.895935058594">
            <text:p>356.8959350586</text:p>
          </table:table-cell>
          <table:table-cell office:value-type="float" office:value="-0.006304849">
            <text:p>-0.006304849</text:p>
          </table:table-cell>
          <table:table-cell table:number-columns-repeated="4"/>
        </table:table-row>
        <table:table-row table:style-name="ro1">
          <table:table-cell office:value-type="float" office:value="357.005645751953">
            <text:p>357.005645752</text:p>
          </table:table-cell>
          <table:table-cell office:value-type="float" office:value="-0.007800184">
            <text:p>-0.007800184</text:p>
          </table:table-cell>
          <table:table-cell table:number-columns-repeated="4"/>
        </table:table-row>
        <table:table-row table:style-name="ro1">
          <table:table-cell office:value-type="float" office:value="357.115356445313">
            <text:p>357.1153564453</text:p>
          </table:table-cell>
          <table:table-cell office:value-type="float" office:value="0.0004575243">
            <text:p>0.0004575243</text:p>
          </table:table-cell>
          <table:table-cell table:number-columns-repeated="4"/>
        </table:table-row>
        <table:table-row table:style-name="ro1">
          <table:table-cell office:value-type="float" office:value="357.225067138672">
            <text:p>357.2250671387</text:p>
          </table:table-cell>
          <table:table-cell office:value-type="float" office:value="0.005663601">
            <text:p>0.005663601</text:p>
          </table:table-cell>
          <table:table-cell table:number-columns-repeated="4"/>
        </table:table-row>
        <table:table-row table:style-name="ro1">
          <table:table-cell office:value-type="float" office:value="357.334777832031">
            <text:p>357.334777832</text:p>
          </table:table-cell>
          <table:table-cell office:value-type="float" office:value="0.004533418">
            <text:p>0.004533418</text:p>
          </table:table-cell>
          <table:table-cell table:number-columns-repeated="4"/>
        </table:table-row>
        <table:table-row table:style-name="ro1">
          <table:table-cell office:value-type="float" office:value="357.444519042969">
            <text:p>357.444519043</text:p>
          </table:table-cell>
          <table:table-cell office:value-type="float" office:value="0.008494542">
            <text:p>0.008494542</text:p>
          </table:table-cell>
          <table:table-cell table:number-columns-repeated="4"/>
        </table:table-row>
        <table:table-row table:style-name="ro1">
          <table:table-cell office:value-type="float" office:value="357.554260253906">
            <text:p>357.5542602539</text:p>
          </table:table-cell>
          <table:table-cell office:value-type="float" office:value="-0.00253171">
            <text:p>-0.00253171</text:p>
          </table:table-cell>
          <table:table-cell table:number-columns-repeated="4"/>
        </table:table-row>
        <table:table-row table:style-name="ro1">
          <table:table-cell office:value-type="float" office:value="357.664001464844">
            <text:p>357.6640014648</text:p>
          </table:table-cell>
          <table:table-cell office:value-type="float" office:value="0.000318108">
            <text:p>0.000318108</text:p>
          </table:table-cell>
          <table:table-cell table:number-columns-repeated="4"/>
        </table:table-row>
        <table:table-row table:style-name="ro1">
          <table:table-cell office:value-type="float" office:value="357.773742675781">
            <text:p>357.7737426758</text:p>
          </table:table-cell>
          <table:table-cell office:value-type="float" office:value="0.01525704">
            <text:p>0.01525704</text:p>
          </table:table-cell>
          <table:table-cell table:number-columns-repeated="4"/>
        </table:table-row>
        <table:table-row table:style-name="ro1">
          <table:table-cell office:value-type="float" office:value="357.883514404297">
            <text:p>357.8835144043</text:p>
          </table:table-cell>
          <table:table-cell office:value-type="float" office:value="0.00155806">
            <text:p>0.00155806</text:p>
          </table:table-cell>
          <table:table-cell table:number-columns-repeated="4"/>
        </table:table-row>
        <table:table-row table:style-name="ro1">
          <table:table-cell office:value-type="float" office:value="357.993286132813">
            <text:p>357.9932861328</text:p>
          </table:table-cell>
          <table:table-cell office:value-type="float" office:value="-0.000897151">
            <text:p>-0.000897151</text:p>
          </table:table-cell>
          <table:table-cell table:number-columns-repeated="4"/>
        </table:table-row>
        <table:table-row table:style-name="ro1">
          <table:table-cell office:value-type="float" office:value="358.10302734375">
            <text:p>358.1030273438</text:p>
          </table:table-cell>
          <table:table-cell office:value-type="float" office:value="0.009784957">
            <text:p>0.009784957</text:p>
          </table:table-cell>
          <table:table-cell table:number-columns-repeated="4"/>
        </table:table-row>
        <table:table-row table:style-name="ro1">
          <table:table-cell office:value-type="float" office:value="358.212829589844">
            <text:p>358.2128295898</text:p>
          </table:table-cell>
          <table:table-cell office:value-type="float" office:value="0.01053559">
            <text:p>0.01053559</text:p>
          </table:table-cell>
          <table:table-cell table:number-columns-repeated="4"/>
        </table:table-row>
        <table:table-row table:style-name="ro1">
          <table:table-cell office:value-type="float" office:value="358.322601318359">
            <text:p>358.3226013184</text:p>
          </table:table-cell>
          <table:table-cell office:value-type="float" office:value="0.002225321">
            <text:p>0.002225321</text:p>
          </table:table-cell>
          <table:table-cell table:number-columns-repeated="4"/>
        </table:table-row>
        <table:table-row table:style-name="ro1">
          <table:table-cell office:value-type="float" office:value="358.432373046875">
            <text:p>358.4323730469</text:p>
          </table:table-cell>
          <table:table-cell office:value-type="float" office:value="0.007692491">
            <text:p>0.007692491</text:p>
          </table:table-cell>
          <table:table-cell table:number-columns-repeated="4"/>
        </table:table-row>
        <table:table-row table:style-name="ro1">
          <table:table-cell office:value-type="float" office:value="358.542175292969">
            <text:p>358.542175293</text:p>
          </table:table-cell>
          <table:table-cell office:value-type="float" office:value="-0.005529656">
            <text:p>-0.005529656</text:p>
          </table:table-cell>
          <table:table-cell table:number-columns-repeated="4"/>
        </table:table-row>
        <table:table-row table:style-name="ro1">
          <table:table-cell office:value-type="float" office:value="358.651977539063">
            <text:p>358.6519775391</text:p>
          </table:table-cell>
          <table:table-cell office:value-type="float" office:value="0.001869667">
            <text:p>0.001869667</text:p>
          </table:table-cell>
          <table:table-cell table:number-columns-repeated="4"/>
        </table:table-row>
        <table:table-row table:style-name="ro1">
          <table:table-cell office:value-type="float" office:value="358.761779785156">
            <text:p>358.7617797852</text:p>
          </table:table-cell>
          <table:table-cell office:value-type="float" office:value="0.009471922">
            <text:p>0.009471922</text:p>
          </table:table-cell>
          <table:table-cell table:number-columns-repeated="4"/>
        </table:table-row>
        <table:table-row table:style-name="ro1">
          <table:table-cell office:value-type="float" office:value="358.871612548828">
            <text:p>358.8716125488</text:p>
          </table:table-cell>
          <table:table-cell office:value-type="float" office:value="-0.004874605">
            <text:p>-0.004874605</text:p>
          </table:table-cell>
          <table:table-cell table:number-columns-repeated="4"/>
        </table:table-row>
        <table:table-row table:style-name="ro1">
          <table:table-cell office:value-type="float" office:value="358.981414794922">
            <text:p>358.9814147949</text:p>
          </table:table-cell>
          <table:table-cell office:value-type="float" office:value="0.003069639">
            <text:p>0.003069639</text:p>
          </table:table-cell>
          <table:table-cell table:number-columns-repeated="4"/>
        </table:table-row>
        <table:table-row table:style-name="ro1">
          <table:table-cell office:value-type="float" office:value="359.091247558594">
            <text:p>359.0912475586</text:p>
          </table:table-cell>
          <table:table-cell office:value-type="float" office:value="0.01551406">
            <text:p>0.01551406</text:p>
          </table:table-cell>
          <table:table-cell table:number-columns-repeated="4"/>
        </table:table-row>
        <table:table-row table:style-name="ro1">
          <table:table-cell office:value-type="float" office:value="359.201080322266">
            <text:p>359.2010803223</text:p>
          </table:table-cell>
          <table:table-cell office:value-type="float" office:value="0.005290224">
            <text:p>0.005290224</text:p>
          </table:table-cell>
          <table:table-cell table:number-columns-repeated="4"/>
        </table:table-row>
        <table:table-row table:style-name="ro1">
          <table:table-cell office:value-type="float" office:value="359.310913085938">
            <text:p>359.3109130859</text:p>
          </table:table-cell>
          <table:table-cell office:value-type="float" office:value="0.002313016">
            <text:p>0.002313016</text:p>
          </table:table-cell>
          <table:table-cell table:number-columns-repeated="4"/>
        </table:table-row>
        <table:table-row table:style-name="ro1">
          <table:table-cell office:value-type="float" office:value="359.420776367188">
            <text:p>359.4207763672</text:p>
          </table:table-cell>
          <table:table-cell office:value-type="float" office:value="-0.008637774">
            <text:p>-0.008637774</text:p>
          </table:table-cell>
          <table:table-cell table:number-columns-repeated="4"/>
        </table:table-row>
        <table:table-row table:style-name="ro1">
          <table:table-cell office:value-type="float" office:value="359.530609130859">
            <text:p>359.5306091309</text:p>
          </table:table-cell>
          <table:table-cell office:value-type="float" office:value="0.01273985">
            <text:p>0.01273985</text:p>
          </table:table-cell>
          <table:table-cell table:number-columns-repeated="4"/>
        </table:table-row>
        <table:table-row table:style-name="ro1">
          <table:table-cell office:value-type="float" office:value="359.640472412109">
            <text:p>359.6404724121</text:p>
          </table:table-cell>
          <table:table-cell office:value-type="float" office:value="0.0005972027">
            <text:p>0.0005972027</text:p>
          </table:table-cell>
          <table:table-cell table:number-columns-repeated="4"/>
        </table:table-row>
        <table:table-row table:style-name="ro1">
          <table:table-cell office:value-type="float" office:value="359.750335693359">
            <text:p>359.7503356934</text:p>
          </table:table-cell>
          <table:table-cell office:value-type="float" office:value="-0.0007424128">
            <text:p>-0.0007424128</text:p>
          </table:table-cell>
          <table:table-cell table:number-columns-repeated="4"/>
        </table:table-row>
        <table:table-row table:style-name="ro1">
          <table:table-cell office:value-type="float" office:value="359.860198974609">
            <text:p>359.8601989746</text:p>
          </table:table-cell>
          <table:table-cell office:value-type="float" office:value="0.00105421">
            <text:p>0.00105421</text:p>
          </table:table-cell>
          <table:table-cell table:number-columns-repeated="4"/>
        </table:table-row>
        <table:table-row table:style-name="ro1">
          <table:table-cell office:value-type="float" office:value="359.970092773438">
            <text:p>359.9700927734</text:p>
          </table:table-cell>
          <table:table-cell office:value-type="float" office:value="0.007062276">
            <text:p>0.007062276</text:p>
          </table:table-cell>
          <table:table-cell table:number-columns-repeated="4"/>
        </table:table-row>
        <table:table-row table:style-name="ro1">
          <table:table-cell office:value-type="float" office:value="360.079986572266">
            <text:p>360.0799865723</text:p>
          </table:table-cell>
          <table:table-cell office:value-type="float" office:value="-0.005037437">
            <text:p>-0.005037437</text:p>
          </table:table-cell>
          <table:table-cell table:number-columns-repeated="4"/>
        </table:table-row>
        <table:table-row table:style-name="ro1">
          <table:table-cell office:value-type="float" office:value="360.189849853516">
            <text:p>360.1898498535</text:p>
          </table:table-cell>
          <table:table-cell office:value-type="float" office:value="0.01274977">
            <text:p>0.01274977</text:p>
          </table:table-cell>
          <table:table-cell table:number-columns-repeated="4"/>
        </table:table-row>
        <table:table-row table:style-name="ro1">
          <table:table-cell office:value-type="float" office:value="360.299743652344">
            <text:p>360.2997436523</text:p>
          </table:table-cell>
          <table:table-cell office:value-type="float" office:value="0.01104363">
            <text:p>0.01104363</text:p>
          </table:table-cell>
          <table:table-cell table:number-columns-repeated="4"/>
        </table:table-row>
        <table:table-row table:style-name="ro1">
          <table:table-cell office:value-type="float" office:value="360.40966796875">
            <text:p>360.4096679688</text:p>
          </table:table-cell>
          <table:table-cell office:value-type="float" office:value="0.009075961">
            <text:p>0.009075961</text:p>
          </table:table-cell>
          <table:table-cell table:number-columns-repeated="4"/>
        </table:table-row>
        <table:table-row table:style-name="ro1">
          <table:table-cell office:value-type="float" office:value="360.519561767578">
            <text:p>360.5195617676</text:p>
          </table:table-cell>
          <table:table-cell office:value-type="float" office:value="0.003178399">
            <text:p>0.003178399</text:p>
          </table:table-cell>
          <table:table-cell table:number-columns-repeated="4"/>
        </table:table-row>
        <table:table-row table:style-name="ro1">
          <table:table-cell office:value-type="float" office:value="360.629486083984">
            <text:p>360.629486084</text:p>
          </table:table-cell>
          <table:table-cell office:value-type="float" office:value="0.002923231">
            <text:p>0.002923231</text:p>
          </table:table-cell>
          <table:table-cell table:number-columns-repeated="4"/>
        </table:table-row>
        <table:table-row table:style-name="ro1">
          <table:table-cell office:value-type="float" office:value="360.739410400391">
            <text:p>360.7394104004</text:p>
          </table:table-cell>
          <table:table-cell office:value-type="float" office:value="-0.003075695">
            <text:p>-0.003075695</text:p>
          </table:table-cell>
          <table:table-cell table:number-columns-repeated="4"/>
        </table:table-row>
        <table:table-row table:style-name="ro1">
          <table:table-cell office:value-type="float" office:value="360.849334716797">
            <text:p>360.8493347168</text:p>
          </table:table-cell>
          <table:table-cell office:value-type="float" office:value="0.00670083">
            <text:p>0.00670083</text:p>
          </table:table-cell>
          <table:table-cell table:number-columns-repeated="4"/>
        </table:table-row>
        <table:table-row table:style-name="ro1">
          <table:table-cell office:value-type="float" office:value="360.959259033203">
            <text:p>360.9592590332</text:p>
          </table:table-cell>
          <table:table-cell office:value-type="float" office:value="-0.007537764">
            <text:p>-0.007537764</text:p>
          </table:table-cell>
          <table:table-cell table:number-columns-repeated="4"/>
        </table:table-row>
        <table:table-row table:style-name="ro1">
          <table:table-cell office:value-type="float" office:value="361.069213867188">
            <text:p>361.0692138672</text:p>
          </table:table-cell>
          <table:table-cell office:value-type="float" office:value="-0.0006295093">
            <text:p>-0.0006295093</text:p>
          </table:table-cell>
          <table:table-cell table:number-columns-repeated="4"/>
        </table:table-row>
        <table:table-row table:style-name="ro1">
          <table:table-cell office:value-type="float" office:value="361.179168701172">
            <text:p>361.1791687012</text:p>
          </table:table-cell>
          <table:table-cell office:value-type="float" office:value="0.0002511376">
            <text:p>0.0002511376</text:p>
          </table:table-cell>
          <table:table-cell table:number-columns-repeated="4"/>
        </table:table-row>
        <table:table-row table:style-name="ro1">
          <table:table-cell office:value-type="float" office:value="361.289093017578">
            <text:p>361.2890930176</text:p>
          </table:table-cell>
          <table:table-cell office:value-type="float" office:value="0.002065818">
            <text:p>0.002065818</text:p>
          </table:table-cell>
          <table:table-cell table:number-columns-repeated="4"/>
        </table:table-row>
        <table:table-row table:style-name="ro1">
          <table:table-cell office:value-type="float" office:value="361.399078369141">
            <text:p>361.3990783691</text:p>
          </table:table-cell>
          <table:table-cell office:value-type="float" office:value="0.004637341">
            <text:p>0.004637341</text:p>
          </table:table-cell>
          <table:table-cell table:number-columns-repeated="4"/>
        </table:table-row>
        <table:table-row table:style-name="ro1">
          <table:table-cell office:value-type="float" office:value="361.509033203125">
            <text:p>361.5090332031</text:p>
          </table:table-cell>
          <table:table-cell office:value-type="float" office:value="-0.005579893">
            <text:p>-0.005579893</text:p>
          </table:table-cell>
          <table:table-cell table:number-columns-repeated="4"/>
        </table:table-row>
        <table:table-row table:style-name="ro1">
          <table:table-cell office:value-type="float" office:value="361.619018554688">
            <text:p>361.6190185547</text:p>
          </table:table-cell>
          <table:table-cell office:value-type="float" office:value="-0.004334997">
            <text:p>-0.004334997</text:p>
          </table:table-cell>
          <table:table-cell table:number-columns-repeated="4"/>
        </table:table-row>
        <table:table-row table:style-name="ro1">
          <table:table-cell office:value-type="float" office:value="361.728973388672">
            <text:p>361.7289733887</text:p>
          </table:table-cell>
          <table:table-cell office:value-type="float" office:value="0.008927229">
            <text:p>0.008927229</text:p>
          </table:table-cell>
          <table:table-cell table:number-columns-repeated="4"/>
        </table:table-row>
        <table:table-row table:style-name="ro1">
          <table:table-cell office:value-type="float" office:value="361.838958740234">
            <text:p>361.8389587402</text:p>
          </table:table-cell>
          <table:table-cell office:value-type="float" office:value="0.003404615">
            <text:p>0.003404615</text:p>
          </table:table-cell>
          <table:table-cell table:number-columns-repeated="4"/>
        </table:table-row>
        <table:table-row table:style-name="ro1">
          <table:table-cell office:value-type="float" office:value="361.948944091797">
            <text:p>361.9489440918</text:p>
          </table:table-cell>
          <table:table-cell office:value-type="float" office:value="0.0004285723">
            <text:p>0.0004285723</text:p>
          </table:table-cell>
          <table:table-cell table:number-columns-repeated="4"/>
        </table:table-row>
        <table:table-row table:style-name="ro1">
          <table:table-cell office:value-type="float" office:value="362.058959960938">
            <text:p>362.0589599609</text:p>
          </table:table-cell>
          <table:table-cell office:value-type="float" office:value="-0.000343826">
            <text:p>-0.000343826</text:p>
          </table:table-cell>
          <table:table-cell table:number-columns-repeated="4"/>
        </table:table-row>
        <table:table-row table:style-name="ro1">
          <table:table-cell office:value-type="float" office:value="362.1689453125">
            <text:p>362.1689453125</text:p>
          </table:table-cell>
          <table:table-cell office:value-type="float" office:value="0.003923807">
            <text:p>0.003923807</text:p>
          </table:table-cell>
          <table:table-cell table:number-columns-repeated="4"/>
        </table:table-row>
        <table:table-row table:style-name="ro1">
          <table:table-cell office:value-type="float" office:value="362.278961181641">
            <text:p>362.2789611816</text:p>
          </table:table-cell>
          <table:table-cell office:value-type="float" office:value="0.01712961">
            <text:p>0.01712961</text:p>
          </table:table-cell>
          <table:table-cell table:number-columns-repeated="4"/>
        </table:table-row>
        <table:table-row table:style-name="ro1">
          <table:table-cell office:value-type="float" office:value="362.388977050781">
            <text:p>362.3889770508</text:p>
          </table:table-cell>
          <table:table-cell office:value-type="float" office:value="0.01008911">
            <text:p>0.01008911</text:p>
          </table:table-cell>
          <table:table-cell table:number-columns-repeated="4"/>
        </table:table-row>
        <table:table-row table:style-name="ro1">
          <table:table-cell office:value-type="float" office:value="362.498992919922">
            <text:p>362.4989929199</text:p>
          </table:table-cell>
          <table:table-cell office:value-type="float" office:value="-0.0009704972">
            <text:p>-0.0009704972</text:p>
          </table:table-cell>
          <table:table-cell table:number-columns-repeated="4"/>
        </table:table-row>
        <table:table-row table:style-name="ro1">
          <table:table-cell office:value-type="float" office:value="362.609039306641">
            <text:p>362.6090393066</text:p>
          </table:table-cell>
          <table:table-cell office:value-type="float" office:value="-0.001038059">
            <text:p>-0.001038059</text:p>
          </table:table-cell>
          <table:table-cell table:number-columns-repeated="4"/>
        </table:table-row>
        <table:table-row table:style-name="ro1">
          <table:table-cell office:value-type="float" office:value="362.719055175781">
            <text:p>362.7190551758</text:p>
          </table:table-cell>
          <table:table-cell office:value-type="float" office:value="0.00816305">
            <text:p>0.00816305</text:p>
          </table:table-cell>
          <table:table-cell table:number-columns-repeated="4"/>
        </table:table-row>
        <table:table-row table:style-name="ro1">
          <table:table-cell office:value-type="float" office:value="362.8291015625">
            <text:p>362.8291015625</text:p>
          </table:table-cell>
          <table:table-cell office:value-type="float" office:value="0.01193168">
            <text:p>0.01193168</text:p>
          </table:table-cell>
          <table:table-cell table:number-columns-repeated="4"/>
        </table:table-row>
        <table:table-row table:style-name="ro1">
          <table:table-cell office:value-type="float" office:value="362.939147949219">
            <text:p>362.9391479492</text:p>
          </table:table-cell>
          <table:table-cell office:value-type="float" office:value="0.0008143734">
            <text:p>0.0008143734</text:p>
          </table:table-cell>
          <table:table-cell table:number-columns-repeated="4"/>
        </table:table-row>
        <table:table-row table:style-name="ro1">
          <table:table-cell office:value-type="float" office:value="363.049224853516">
            <text:p>363.0492248535</text:p>
          </table:table-cell>
          <table:table-cell office:value-type="string">
            <text:p>1.132062E-05</text:p>
          </table:table-cell>
          <table:table-cell table:number-columns-repeated="4"/>
        </table:table-row>
        <table:table-row table:style-name="ro1">
          <table:table-cell office:value-type="float" office:value="363.159271240234">
            <text:p>363.1592712402</text:p>
          </table:table-cell>
          <table:table-cell office:value-type="float" office:value="-0.0005264754">
            <text:p>-0.0005264754</text:p>
          </table:table-cell>
          <table:table-cell table:number-columns-repeated="4"/>
        </table:table-row>
        <table:table-row table:style-name="ro1">
          <table:table-cell office:value-type="float" office:value="363.269348144531">
            <text:p>363.2693481445</text:p>
          </table:table-cell>
          <table:table-cell office:value-type="float" office:value="0.006556598">
            <text:p>0.006556598</text:p>
          </table:table-cell>
          <table:table-cell table:number-columns-repeated="4"/>
        </table:table-row>
        <table:table-row table:style-name="ro1">
          <table:table-cell office:value-type="float" office:value="363.37939453125">
            <text:p>363.3793945313</text:p>
          </table:table-cell>
          <table:table-cell office:value-type="float" office:value="0.006048236">
            <text:p>0.006048236</text:p>
          </table:table-cell>
          <table:table-cell table:number-columns-repeated="4"/>
        </table:table-row>
        <table:table-row table:style-name="ro1">
          <table:table-cell office:value-type="float" office:value="363.489501953125">
            <text:p>363.4895019531</text:p>
          </table:table-cell>
          <table:table-cell office:value-type="float" office:value="-0.005680386">
            <text:p>-0.005680386</text:p>
          </table:table-cell>
          <table:table-cell table:number-columns-repeated="4"/>
        </table:table-row>
        <table:table-row table:style-name="ro1">
          <table:table-cell office:value-type="float" office:value="363.599578857422">
            <text:p>363.5995788574</text:p>
          </table:table-cell>
          <table:table-cell office:value-type="float" office:value="0.01377872">
            <text:p>0.01377872</text:p>
          </table:table-cell>
          <table:table-cell table:number-columns-repeated="4"/>
        </table:table-row>
        <table:table-row table:style-name="ro1">
          <table:table-cell office:value-type="float" office:value="363.709655761719">
            <text:p>363.7096557617</text:p>
          </table:table-cell>
          <table:table-cell office:value-type="float" office:value="0.00849454">
            <text:p>0.00849454</text:p>
          </table:table-cell>
          <table:table-cell table:number-columns-repeated="4"/>
        </table:table-row>
        <table:table-row table:style-name="ro1">
          <table:table-cell office:value-type="float" office:value="363.819763183594">
            <text:p>363.8197631836</text:p>
          </table:table-cell>
          <table:table-cell office:value-type="float" office:value="0.005888288">
            <text:p>0.005888288</text:p>
          </table:table-cell>
          <table:table-cell table:number-columns-repeated="4"/>
        </table:table-row>
        <table:table-row table:style-name="ro1">
          <table:table-cell office:value-type="float" office:value="363.929870605469">
            <text:p>363.9298706055</text:p>
          </table:table-cell>
          <table:table-cell office:value-type="float" office:value="-0.004548237">
            <text:p>-0.004548237</text:p>
          </table:table-cell>
          <table:table-cell table:number-columns-repeated="4"/>
        </table:table-row>
        <table:table-row table:style-name="ro1">
          <table:table-cell office:value-type="float" office:value="364.039978027344">
            <text:p>364.0399780273</text:p>
          </table:table-cell>
          <table:table-cell office:value-type="float" office:value="-0.005357035">
            <text:p>-0.005357035</text:p>
          </table:table-cell>
          <table:table-cell table:number-columns-repeated="4"/>
        </table:table-row>
        <table:table-row table:style-name="ro1">
          <table:table-cell office:value-type="float" office:value="364.150085449219">
            <text:p>364.1500854492</text:p>
          </table:table-cell>
          <table:table-cell office:value-type="float" office:value="-0.003625395">
            <text:p>-0.003625395</text:p>
          </table:table-cell>
          <table:table-cell table:number-columns-repeated="4"/>
        </table:table-row>
        <table:table-row table:style-name="ro1">
          <table:table-cell office:value-type="float" office:value="364.260223388672">
            <text:p>364.2602233887</text:p>
          </table:table-cell>
          <table:table-cell office:value-type="float" office:value="-0.001714478">
            <text:p>-0.001714478</text:p>
          </table:table-cell>
          <table:table-cell table:number-columns-repeated="4"/>
        </table:table-row>
        <table:table-row table:style-name="ro1">
          <table:table-cell office:value-type="float" office:value="364.370330810547">
            <text:p>364.3703308105</text:p>
          </table:table-cell>
          <table:table-cell office:value-type="float" office:value="-0.004912766">
            <text:p>-0.004912766</text:p>
          </table:table-cell>
          <table:table-cell table:number-columns-repeated="4"/>
        </table:table-row>
        <table:table-row table:style-name="ro1">
          <table:table-cell office:value-type="float" office:value="364.48046875">
            <text:p>364.48046875</text:p>
          </table:table-cell>
          <table:table-cell office:value-type="float" office:value="0.00733721">
            <text:p>0.00733721</text:p>
          </table:table-cell>
          <table:table-cell table:number-columns-repeated="4"/>
        </table:table-row>
        <table:table-row table:style-name="ro1">
          <table:table-cell office:value-type="float" office:value="364.590606689453">
            <text:p>364.5906066895</text:p>
          </table:table-cell>
          <table:table-cell office:value-type="float" office:value="0.009649307">
            <text:p>0.009649307</text:p>
          </table:table-cell>
          <table:table-cell table:number-columns-repeated="4"/>
        </table:table-row>
        <table:table-row table:style-name="ro1">
          <table:table-cell office:value-type="float" office:value="364.700775146484">
            <text:p>364.7007751465</text:p>
          </table:table-cell>
          <table:table-cell office:value-type="float" office:value="0.003422785">
            <text:p>0.003422785</text:p>
          </table:table-cell>
          <table:table-cell table:number-columns-repeated="4"/>
        </table:table-row>
        <table:table-row table:style-name="ro1">
          <table:table-cell office:value-type="float" office:value="364.810913085938">
            <text:p>364.8109130859</text:p>
          </table:table-cell>
          <table:table-cell office:value-type="float" office:value="0.01339269">
            <text:p>0.01339269</text:p>
          </table:table-cell>
          <table:table-cell table:number-columns-repeated="4"/>
        </table:table-row>
        <table:table-row table:style-name="ro1">
          <table:table-cell office:value-type="float" office:value="364.921081542969">
            <text:p>364.921081543</text:p>
          </table:table-cell>
          <table:table-cell office:value-type="float" office:value="-0.003567991">
            <text:p>-0.003567991</text:p>
          </table:table-cell>
          <table:table-cell table:number-columns-repeated="4"/>
        </table:table-row>
        <table:table-row table:style-name="ro1">
          <table:table-cell office:value-type="float" office:value="365.03125">
            <text:p>365.03125</text:p>
          </table:table-cell>
          <table:table-cell office:value-type="float" office:value="-0.006045075">
            <text:p>-0.006045075</text:p>
          </table:table-cell>
          <table:table-cell table:number-columns-repeated="4"/>
        </table:table-row>
        <table:table-row table:style-name="ro1">
          <table:table-cell office:value-type="float" office:value="365.141418457031">
            <text:p>365.141418457</text:p>
          </table:table-cell>
          <table:table-cell office:value-type="float" office:value="-0.008467493">
            <text:p>-0.008467493</text:p>
          </table:table-cell>
          <table:table-cell table:number-columns-repeated="4"/>
        </table:table-row>
        <table:table-row table:style-name="ro1">
          <table:table-cell office:value-type="float" office:value="365.251586914063">
            <text:p>365.2515869141</text:p>
          </table:table-cell>
          <table:table-cell office:value-type="float" office:value="0.009792005">
            <text:p>0.009792005</text:p>
          </table:table-cell>
          <table:table-cell table:number-columns-repeated="4"/>
        </table:table-row>
        <table:table-row table:style-name="ro1">
          <table:table-cell office:value-type="float" office:value="365.361785888672">
            <text:p>365.3617858887</text:p>
          </table:table-cell>
          <table:table-cell office:value-type="float" office:value="0.02712235">
            <text:p>0.02712235</text:p>
          </table:table-cell>
          <table:table-cell table:number-columns-repeated="4"/>
        </table:table-row>
        <table:table-row table:style-name="ro1">
          <table:table-cell office:value-type="float" office:value="365.471984863281">
            <text:p>365.4719848633</text:p>
          </table:table-cell>
          <table:table-cell office:value-type="float" office:value="0.004259901">
            <text:p>0.004259901</text:p>
          </table:table-cell>
          <table:table-cell table:number-columns-repeated="4"/>
        </table:table-row>
        <table:table-row table:style-name="ro1">
          <table:table-cell office:value-type="float" office:value="365.582183837891">
            <text:p>365.5821838379</text:p>
          </table:table-cell>
          <table:table-cell office:value-type="float" office:value="0.007950968">
            <text:p>0.007950968</text:p>
          </table:table-cell>
          <table:table-cell table:number-columns-repeated="4"/>
        </table:table-row>
        <table:table-row table:style-name="ro1">
          <table:table-cell office:value-type="float" office:value="365.6923828125">
            <text:p>365.6923828125</text:p>
          </table:table-cell>
          <table:table-cell office:value-type="float" office:value="0.00945958">
            <text:p>0.00945958</text:p>
          </table:table-cell>
          <table:table-cell table:number-columns-repeated="4"/>
        </table:table-row>
        <table:table-row table:style-name="ro1">
          <table:table-cell office:value-type="float" office:value="365.802581787109">
            <text:p>365.8025817871</text:p>
          </table:table-cell>
          <table:table-cell office:value-type="float" office:value="0.0002474745">
            <text:p>0.0002474745</text:p>
          </table:table-cell>
          <table:table-cell table:number-columns-repeated="4"/>
        </table:table-row>
        <table:table-row table:style-name="ro1">
          <table:table-cell office:value-type="float" office:value="365.912811279297">
            <text:p>365.9128112793</text:p>
          </table:table-cell>
          <table:table-cell office:value-type="float" office:value="0.009878839">
            <text:p>0.009878839</text:p>
          </table:table-cell>
          <table:table-cell table:number-columns-repeated="4"/>
        </table:table-row>
        <table:table-row table:style-name="ro1">
          <table:table-cell office:value-type="float" office:value="366.023010253906">
            <text:p>366.0230102539</text:p>
          </table:table-cell>
          <table:table-cell office:value-type="float" office:value="0.004317726">
            <text:p>0.004317726</text:p>
          </table:table-cell>
          <table:table-cell table:number-columns-repeated="4"/>
        </table:table-row>
        <table:table-row table:style-name="ro1">
          <table:table-cell office:value-type="float" office:value="366.133239746094">
            <text:p>366.1332397461</text:p>
          </table:table-cell>
          <table:table-cell office:value-type="float" office:value="0.005655117">
            <text:p>0.005655117</text:p>
          </table:table-cell>
          <table:table-cell table:number-columns-repeated="4"/>
        </table:table-row>
        <table:table-row table:style-name="ro1">
          <table:table-cell office:value-type="float" office:value="366.243499755859">
            <text:p>366.2434997559</text:p>
          </table:table-cell>
          <table:table-cell office:value-type="float" office:value="-0.001117239">
            <text:p>-0.001117239</text:p>
          </table:table-cell>
          <table:table-cell table:number-columns-repeated="4"/>
        </table:table-row>
        <table:table-row table:style-name="ro1">
          <table:table-cell office:value-type="float" office:value="366.353729248047">
            <text:p>366.353729248</text:p>
          </table:table-cell>
          <table:table-cell office:value-type="float" office:value="0.000990644">
            <text:p>0.000990644</text:p>
          </table:table-cell>
          <table:table-cell table:number-columns-repeated="4"/>
        </table:table-row>
        <table:table-row table:style-name="ro1">
          <table:table-cell office:value-type="float" office:value="366.463989257813">
            <text:p>366.4639892578</text:p>
          </table:table-cell>
          <table:table-cell office:value-type="float" office:value="-0.0002817525">
            <text:p>-0.0002817525</text:p>
          </table:table-cell>
          <table:table-cell table:number-columns-repeated="4"/>
        </table:table-row>
        <table:table-row table:style-name="ro1">
          <table:table-cell office:value-type="float" office:value="366.57421875">
            <text:p>366.57421875</text:p>
          </table:table-cell>
          <table:table-cell office:value-type="float" office:value="0.002384494">
            <text:p>0.002384494</text:p>
          </table:table-cell>
          <table:table-cell table:number-columns-repeated="4"/>
        </table:table-row>
        <table:table-row table:style-name="ro1">
          <table:table-cell office:value-type="float" office:value="366.684478759766">
            <text:p>366.6844787598</text:p>
          </table:table-cell>
          <table:table-cell office:value-type="float" office:value="-0.0007445444">
            <text:p>-0.0007445444</text:p>
          </table:table-cell>
          <table:table-cell table:number-columns-repeated="4"/>
        </table:table-row>
        <table:table-row table:style-name="ro1">
          <table:table-cell office:value-type="float" office:value="366.794738769531">
            <text:p>366.7947387695</text:p>
          </table:table-cell>
          <table:table-cell office:value-type="float" office:value="0.009767124">
            <text:p>0.009767124</text:p>
          </table:table-cell>
          <table:table-cell table:number-columns-repeated="4"/>
        </table:table-row>
        <table:table-row table:style-name="ro1">
          <table:table-cell office:value-type="float" office:value="366.905029296875">
            <text:p>366.9050292969</text:p>
          </table:table-cell>
          <table:table-cell office:value-type="float" office:value="-0.00285587">
            <text:p>-0.00285587</text:p>
          </table:table-cell>
          <table:table-cell table:number-columns-repeated="4"/>
        </table:table-row>
        <table:table-row table:style-name="ro1">
          <table:table-cell office:value-type="float" office:value="367.015289306641">
            <text:p>367.0152893066</text:p>
          </table:table-cell>
          <table:table-cell office:value-type="float" office:value="0.0008647979">
            <text:p>0.0008647979</text:p>
          </table:table-cell>
          <table:table-cell table:number-columns-repeated="4"/>
        </table:table-row>
        <table:table-row table:style-name="ro1">
          <table:table-cell office:value-type="float" office:value="367.125579833984">
            <text:p>367.125579834</text:p>
          </table:table-cell>
          <table:table-cell office:value-type="float" office:value="0.01144463">
            <text:p>0.01144463</text:p>
          </table:table-cell>
          <table:table-cell table:number-columns-repeated="4"/>
        </table:table-row>
        <table:table-row table:style-name="ro1">
          <table:table-cell office:value-type="float" office:value="367.235870361328">
            <text:p>367.2358703613</text:p>
          </table:table-cell>
          <table:table-cell office:value-type="float" office:value="0.01459686">
            <text:p>0.01459686</text:p>
          </table:table-cell>
          <table:table-cell table:number-columns-repeated="4"/>
        </table:table-row>
        <table:table-row table:style-name="ro1">
          <table:table-cell office:value-type="float" office:value="367.346160888672">
            <text:p>367.3461608887</text:p>
          </table:table-cell>
          <table:table-cell office:value-type="float" office:value="0.0181836">
            <text:p>0.0181836</text:p>
          </table:table-cell>
          <table:table-cell table:number-columns-repeated="4"/>
        </table:table-row>
        <table:table-row table:style-name="ro1">
          <table:table-cell office:value-type="float" office:value="367.456481933594">
            <text:p>367.4564819336</text:p>
          </table:table-cell>
          <table:table-cell office:value-type="float" office:value="0.01002458">
            <text:p>0.01002458</text:p>
          </table:table-cell>
          <table:table-cell table:number-columns-repeated="4"/>
        </table:table-row>
        <table:table-row table:style-name="ro1">
          <table:table-cell office:value-type="float" office:value="367.566772460938">
            <text:p>367.5667724609</text:p>
          </table:table-cell>
          <table:table-cell office:value-type="float" office:value="-0.004919867">
            <text:p>-0.004919867</text:p>
          </table:table-cell>
          <table:table-cell table:number-columns-repeated="4"/>
        </table:table-row>
        <table:table-row table:style-name="ro1">
          <table:table-cell office:value-type="float" office:value="367.677093505859">
            <text:p>367.6770935059</text:p>
          </table:table-cell>
          <table:table-cell office:value-type="float" office:value="-0.001323953">
            <text:p>-0.001323953</text:p>
          </table:table-cell>
          <table:table-cell table:number-columns-repeated="4"/>
        </table:table-row>
        <table:table-row table:style-name="ro1">
          <table:table-cell office:value-type="float" office:value="367.787414550781">
            <text:p>367.7874145508</text:p>
          </table:table-cell>
          <table:table-cell office:value-type="float" office:value="-0.006449461">
            <text:p>-0.006449461</text:p>
          </table:table-cell>
          <table:table-cell table:number-columns-repeated="4"/>
        </table:table-row>
        <table:table-row table:style-name="ro1">
          <table:table-cell office:value-type="float" office:value="367.897766113281">
            <text:p>367.8977661133</text:p>
          </table:table-cell>
          <table:table-cell office:value-type="float" office:value="-0.007589847">
            <text:p>-0.007589847</text:p>
          </table:table-cell>
          <table:table-cell table:number-columns-repeated="4"/>
        </table:table-row>
        <table:table-row table:style-name="ro1">
          <table:table-cell office:value-type="float" office:value="368.008087158203">
            <text:p>368.0080871582</text:p>
          </table:table-cell>
          <table:table-cell office:value-type="float" office:value="0.00122886">
            <text:p>0.00122886</text:p>
          </table:table-cell>
          <table:table-cell table:number-columns-repeated="4"/>
        </table:table-row>
        <table:table-row table:style-name="ro1">
          <table:table-cell office:value-type="float" office:value="368.118438720703">
            <text:p>368.1184387207</text:p>
          </table:table-cell>
          <table:table-cell office:value-type="float" office:value="-0.002142299">
            <text:p>-0.002142299</text:p>
          </table:table-cell>
          <table:table-cell table:number-columns-repeated="4"/>
        </table:table-row>
        <table:table-row table:style-name="ro1">
          <table:table-cell office:value-type="float" office:value="368.228759765625">
            <text:p>368.2287597656</text:p>
          </table:table-cell>
          <table:table-cell office:value-type="float" office:value="0.000529543">
            <text:p>0.000529543</text:p>
          </table:table-cell>
          <table:table-cell table:number-columns-repeated="4"/>
        </table:table-row>
        <table:table-row table:style-name="ro1">
          <table:table-cell office:value-type="float" office:value="368.339111328125">
            <text:p>368.3391113281</text:p>
          </table:table-cell>
          <table:table-cell office:value-type="float" office:value="-0.0006596706">
            <text:p>-0.0006596706</text:p>
          </table:table-cell>
          <table:table-cell table:number-columns-repeated="4"/>
        </table:table-row>
        <table:table-row table:style-name="ro1">
          <table:table-cell office:value-type="float" office:value="368.449493408203">
            <text:p>368.4494934082</text:p>
          </table:table-cell>
          <table:table-cell office:value-type="float" office:value="0.003317141">
            <text:p>0.003317141</text:p>
          </table:table-cell>
          <table:table-cell table:number-columns-repeated="4"/>
        </table:table-row>
        <table:table-row table:style-name="ro1">
          <table:table-cell office:value-type="float" office:value="368.559844970703">
            <text:p>368.5598449707</text:p>
          </table:table-cell>
          <table:table-cell office:value-type="float" office:value="0.008181071">
            <text:p>0.008181071</text:p>
          </table:table-cell>
          <table:table-cell table:number-columns-repeated="4"/>
        </table:table-row>
        <table:table-row table:style-name="ro1">
          <table:table-cell office:value-type="float" office:value="368.670227050781">
            <text:p>368.6702270508</text:p>
          </table:table-cell>
          <table:table-cell office:value-type="float" office:value="-0.006271926">
            <text:p>-0.006271926</text:p>
          </table:table-cell>
          <table:table-cell table:number-columns-repeated="4"/>
        </table:table-row>
        <table:table-row table:style-name="ro1">
          <table:table-cell office:value-type="float" office:value="368.780609130859">
            <text:p>368.7806091309</text:p>
          </table:table-cell>
          <table:table-cell office:value-type="float" office:value="-0.002591591">
            <text:p>-0.002591591</text:p>
          </table:table-cell>
          <table:table-cell table:number-columns-repeated="4"/>
        </table:table-row>
        <table:table-row table:style-name="ro1">
          <table:table-cell office:value-type="float" office:value="368.890991210938">
            <text:p>368.8909912109</text:p>
          </table:table-cell>
          <table:table-cell office:value-type="float" office:value="-0.009941499">
            <text:p>-0.009941499</text:p>
          </table:table-cell>
          <table:table-cell table:number-columns-repeated="4"/>
        </table:table-row>
        <table:table-row table:style-name="ro1">
          <table:table-cell office:value-type="float" office:value="369.001373291016">
            <text:p>369.001373291</text:p>
          </table:table-cell>
          <table:table-cell office:value-type="float" office:value="0.0007081014">
            <text:p>0.0007081014</text:p>
          </table:table-cell>
          <table:table-cell table:number-columns-repeated="4"/>
        </table:table-row>
        <table:table-row table:style-name="ro1">
          <table:table-cell office:value-type="float" office:value="369.111755371094">
            <text:p>369.1117553711</text:p>
          </table:table-cell>
          <table:table-cell office:value-type="float" office:value="-0.007994819">
            <text:p>-0.007994819</text:p>
          </table:table-cell>
          <table:table-cell table:number-columns-repeated="4"/>
        </table:table-row>
        <table:table-row table:style-name="ro1">
          <table:table-cell office:value-type="float" office:value="369.22216796875">
            <text:p>369.2221679688</text:p>
          </table:table-cell>
          <table:table-cell office:value-type="float" office:value="-0.007932254">
            <text:p>-0.007932254</text:p>
          </table:table-cell>
          <table:table-cell table:number-columns-repeated="4"/>
        </table:table-row>
        <table:table-row table:style-name="ro1">
          <table:table-cell office:value-type="float" office:value="369.332580566406">
            <text:p>369.3325805664</text:p>
          </table:table-cell>
          <table:table-cell office:value-type="float" office:value="-0.00768612">
            <text:p>-0.00768612</text:p>
          </table:table-cell>
          <table:table-cell table:number-columns-repeated="4"/>
        </table:table-row>
        <table:table-row table:style-name="ro1">
          <table:table-cell office:value-type="float" office:value="369.442993164063">
            <text:p>369.4429931641</text:p>
          </table:table-cell>
          <table:table-cell office:value-type="float" office:value="-0.0002427016">
            <text:p>-0.0002427016</text:p>
          </table:table-cell>
          <table:table-cell table:number-columns-repeated="4"/>
        </table:table-row>
        <table:table-row table:style-name="ro1">
          <table:table-cell office:value-type="float" office:value="369.553405761719">
            <text:p>369.5534057617</text:p>
          </table:table-cell>
          <table:table-cell office:value-type="float" office:value="0.003432789">
            <text:p>0.003432789</text:p>
          </table:table-cell>
          <table:table-cell table:number-columns-repeated="4"/>
        </table:table-row>
        <table:table-row table:style-name="ro1">
          <table:table-cell office:value-type="float" office:value="369.663848876953">
            <text:p>369.663848877</text:p>
          </table:table-cell>
          <table:table-cell office:value-type="float" office:value="0.006503903">
            <text:p>0.006503903</text:p>
          </table:table-cell>
          <table:table-cell table:number-columns-repeated="4"/>
        </table:table-row>
        <table:table-row table:style-name="ro1">
          <table:table-cell office:value-type="float" office:value="369.774261474609">
            <text:p>369.7742614746</text:p>
          </table:table-cell>
          <table:table-cell office:value-type="float" office:value="-0.0032749">
            <text:p>-0.0032749</text:p>
          </table:table-cell>
          <table:table-cell table:number-columns-repeated="4"/>
        </table:table-row>
        <table:table-row table:style-name="ro1">
          <table:table-cell office:value-type="float" office:value="369.884704589844">
            <text:p>369.8847045898</text:p>
          </table:table-cell>
          <table:table-cell office:value-type="float" office:value="0.003709417">
            <text:p>0.003709417</text:p>
          </table:table-cell>
          <table:table-cell table:number-columns-repeated="4"/>
        </table:table-row>
        <table:table-row table:style-name="ro1">
          <table:table-cell office:value-type="float" office:value="369.995147705078">
            <text:p>369.9951477051</text:p>
          </table:table-cell>
          <table:table-cell office:value-type="float" office:value="-0.005327848">
            <text:p>-0.005327848</text:p>
          </table:table-cell>
          <table:table-cell table:number-columns-repeated="4"/>
        </table:table-row>
        <table:table-row table:style-name="ro1">
          <table:table-cell office:value-type="float" office:value="370.105621337891">
            <text:p>370.1056213379</text:p>
          </table:table-cell>
          <table:table-cell office:value-type="float" office:value="0.01015899">
            <text:p>0.01015899</text:p>
          </table:table-cell>
          <table:table-cell table:number-columns-repeated="4"/>
        </table:table-row>
        <table:table-row table:style-name="ro1">
          <table:table-cell office:value-type="float" office:value="370.216064453125">
            <text:p>370.2160644531</text:p>
          </table:table-cell>
          <table:table-cell office:value-type="float" office:value="0.008252679">
            <text:p>0.008252679</text:p>
          </table:table-cell>
          <table:table-cell table:number-columns-repeated="4"/>
        </table:table-row>
        <table:table-row table:style-name="ro1">
          <table:table-cell office:value-type="float" office:value="370.326538085938">
            <text:p>370.3265380859</text:p>
          </table:table-cell>
          <table:table-cell office:value-type="float" office:value="0.01949603">
            <text:p>0.01949603</text:p>
          </table:table-cell>
          <table:table-cell table:number-columns-repeated="4"/>
        </table:table-row>
        <table:table-row table:style-name="ro1">
          <table:table-cell office:value-type="float" office:value="370.43701171875">
            <text:p>370.4370117188</text:p>
          </table:table-cell>
          <table:table-cell office:value-type="float" office:value="0.01178589">
            <text:p>0.01178589</text:p>
          </table:table-cell>
          <table:table-cell table:number-columns-repeated="4"/>
        </table:table-row>
        <table:table-row table:style-name="ro1">
          <table:table-cell office:value-type="float" office:value="370.547485351563">
            <text:p>370.5474853516</text:p>
          </table:table-cell>
          <table:table-cell office:value-type="float" office:value="0.00316433">
            <text:p>0.00316433</text:p>
          </table:table-cell>
          <table:table-cell table:number-columns-repeated="4"/>
        </table:table-row>
        <table:table-row table:style-name="ro1">
          <table:table-cell office:value-type="float" office:value="370.657958984375">
            <text:p>370.6579589844</text:p>
          </table:table-cell>
          <table:table-cell office:value-type="float" office:value="-0.004060582">
            <text:p>-0.004060582</text:p>
          </table:table-cell>
          <table:table-cell table:number-columns-repeated="4"/>
        </table:table-row>
        <table:table-row table:style-name="ro1">
          <table:table-cell office:value-type="float" office:value="370.768432617188">
            <text:p>370.7684326172</text:p>
          </table:table-cell>
          <table:table-cell office:value-type="float" office:value="-0.008303381">
            <text:p>-0.008303381</text:p>
          </table:table-cell>
          <table:table-cell table:number-columns-repeated="4"/>
        </table:table-row>
        <table:table-row table:style-name="ro1">
          <table:table-cell office:value-type="float" office:value="370.878936767578">
            <text:p>370.8789367676</text:p>
          </table:table-cell>
          <table:table-cell office:value-type="float" office:value="0.005685446">
            <text:p>0.005685446</text:p>
          </table:table-cell>
          <table:table-cell table:number-columns-repeated="4"/>
        </table:table-row>
        <table:table-row table:style-name="ro1">
          <table:table-cell office:value-type="float" office:value="370.989440917969">
            <text:p>370.989440918</text:p>
          </table:table-cell>
          <table:table-cell office:value-type="float" office:value="-0.005659539">
            <text:p>-0.005659539</text:p>
          </table:table-cell>
          <table:table-cell table:number-columns-repeated="4"/>
        </table:table-row>
        <table:table-row table:style-name="ro1">
          <table:table-cell office:value-type="float" office:value="371.099945068359">
            <text:p>371.0999450684</text:p>
          </table:table-cell>
          <table:table-cell office:value-type="float" office:value="0.004266073">
            <text:p>0.004266073</text:p>
          </table:table-cell>
          <table:table-cell table:number-columns-repeated="4"/>
        </table:table-row>
        <table:table-row table:style-name="ro1">
          <table:table-cell office:value-type="float" office:value="371.21044921875">
            <text:p>371.2104492188</text:p>
          </table:table-cell>
          <table:table-cell office:value-type="float" office:value="-0.00510477">
            <text:p>-0.00510477</text:p>
          </table:table-cell>
          <table:table-cell table:number-columns-repeated="4"/>
        </table:table-row>
        <table:table-row table:style-name="ro1">
          <table:table-cell office:value-type="float" office:value="371.320983886719">
            <text:p>371.3209838867</text:p>
          </table:table-cell>
          <table:table-cell office:value-type="float" office:value="-0.004126201">
            <text:p>-0.004126201</text:p>
          </table:table-cell>
          <table:table-cell table:number-columns-repeated="4"/>
        </table:table-row>
        <table:table-row table:style-name="ro1">
          <table:table-cell office:value-type="float" office:value="371.431488037109">
            <text:p>371.4314880371</text:p>
          </table:table-cell>
          <table:table-cell office:value-type="float" office:value="0.001603457">
            <text:p>0.001603457</text:p>
          </table:table-cell>
          <table:table-cell table:number-columns-repeated="4"/>
        </table:table-row>
        <table:table-row table:style-name="ro1">
          <table:table-cell office:value-type="float" office:value="371.542022705078">
            <text:p>371.5420227051</text:p>
          </table:table-cell>
          <table:table-cell office:value-type="float" office:value="0.01234295">
            <text:p>0.01234295</text:p>
          </table:table-cell>
          <table:table-cell table:number-columns-repeated="4"/>
        </table:table-row>
        <table:table-row table:style-name="ro1">
          <table:table-cell office:value-type="float" office:value="371.652557373047">
            <text:p>371.652557373</text:p>
          </table:table-cell>
          <table:table-cell office:value-type="float" office:value="-0.006708577">
            <text:p>-0.006708577</text:p>
          </table:table-cell>
          <table:table-cell table:number-columns-repeated="4"/>
        </table:table-row>
        <table:table-row table:style-name="ro1">
          <table:table-cell office:value-type="float" office:value="371.763122558594">
            <text:p>371.7631225586</text:p>
          </table:table-cell>
          <table:table-cell office:value-type="float" office:value="-0.003838435">
            <text:p>-0.003838435</text:p>
          </table:table-cell>
          <table:table-cell table:number-columns-repeated="4"/>
        </table:table-row>
        <table:table-row table:style-name="ro1">
          <table:table-cell office:value-type="float" office:value="371.873657226563">
            <text:p>371.8736572266</text:p>
          </table:table-cell>
          <table:table-cell office:value-type="float" office:value="-0.006601987">
            <text:p>-0.006601987</text:p>
          </table:table-cell>
          <table:table-cell table:number-columns-repeated="4"/>
        </table:table-row>
        <table:table-row table:style-name="ro1">
          <table:table-cell office:value-type="float" office:value="371.984222412109">
            <text:p>371.9842224121</text:p>
          </table:table-cell>
          <table:table-cell office:value-type="float" office:value="0.003875051">
            <text:p>0.003875051</text:p>
          </table:table-cell>
          <table:table-cell table:number-columns-repeated="4"/>
        </table:table-row>
        <table:table-row table:style-name="ro1">
          <table:table-cell office:value-type="float" office:value="372.094787597656">
            <text:p>372.0947875977</text:p>
          </table:table-cell>
          <table:table-cell office:value-type="float" office:value="-0.004379979">
            <text:p>-0.004379979</text:p>
          </table:table-cell>
          <table:table-cell table:number-columns-repeated="4"/>
        </table:table-row>
        <table:table-row table:style-name="ro1">
          <table:table-cell office:value-type="float" office:value="372.205352783203">
            <text:p>372.2053527832</text:p>
          </table:table-cell>
          <table:table-cell office:value-type="float" office:value="-0.004827522">
            <text:p>-0.004827522</text:p>
          </table:table-cell>
          <table:table-cell table:number-columns-repeated="4"/>
        </table:table-row>
        <table:table-row table:style-name="ro1">
          <table:table-cell office:value-type="float" office:value="372.31591796875">
            <text:p>372.3159179688</text:p>
          </table:table-cell>
          <table:table-cell office:value-type="float" office:value="-0.004840433">
            <text:p>-0.004840433</text:p>
          </table:table-cell>
          <table:table-cell table:number-columns-repeated="4"/>
        </table:table-row>
        <table:table-row table:style-name="ro1">
          <table:table-cell office:value-type="float" office:value="372.426513671875">
            <text:p>372.4265136719</text:p>
          </table:table-cell>
          <table:table-cell office:value-type="float" office:value="-0.0005085172">
            <text:p>-0.0005085172</text:p>
          </table:table-cell>
          <table:table-cell table:number-columns-repeated="4"/>
        </table:table-row>
        <table:table-row table:style-name="ro1">
          <table:table-cell office:value-type="float" office:value="372.537078857422">
            <text:p>372.5370788574</text:p>
          </table:table-cell>
          <table:table-cell office:value-type="float" office:value="0.00295158">
            <text:p>0.00295158</text:p>
          </table:table-cell>
          <table:table-cell table:number-columns-repeated="4"/>
        </table:table-row>
        <table:table-row table:style-name="ro1">
          <table:table-cell office:value-type="float" office:value="372.647674560547">
            <text:p>372.6476745605</text:p>
          </table:table-cell>
          <table:table-cell office:value-type="float" office:value="-0.009633902">
            <text:p>-0.009633902</text:p>
          </table:table-cell>
          <table:table-cell table:number-columns-repeated="4"/>
        </table:table-row>
        <table:table-row table:style-name="ro1">
          <table:table-cell office:value-type="float" office:value="372.758270263672">
            <text:p>372.7582702637</text:p>
          </table:table-cell>
          <table:table-cell office:value-type="string">
            <text:p>-4.451466E-06</text:p>
          </table:table-cell>
          <table:table-cell table:number-columns-repeated="4"/>
        </table:table-row>
        <table:table-row table:style-name="ro1">
          <table:table-cell office:value-type="float" office:value="372.868896484375">
            <text:p>372.8688964844</text:p>
          </table:table-cell>
          <table:table-cell office:value-type="float" office:value="0.00565043">
            <text:p>0.00565043</text:p>
          </table:table-cell>
          <table:table-cell table:number-columns-repeated="4"/>
        </table:table-row>
        <table:table-row table:style-name="ro1">
          <table:table-cell office:value-type="float" office:value="372.9794921875">
            <text:p>372.9794921875</text:p>
          </table:table-cell>
          <table:table-cell office:value-type="float" office:value="-0.009548182">
            <text:p>-0.009548182</text:p>
          </table:table-cell>
          <table:table-cell table:number-columns-repeated="4"/>
        </table:table-row>
        <table:table-row table:style-name="ro1">
          <table:table-cell office:value-type="float" office:value="373.090118408203">
            <text:p>373.0901184082</text:p>
          </table:table-cell>
          <table:table-cell office:value-type="float" office:value="-0.00131032">
            <text:p>-0.00131032</text:p>
          </table:table-cell>
          <table:table-cell table:number-columns-repeated="4"/>
        </table:table-row>
        <table:table-row table:style-name="ro1">
          <table:table-cell office:value-type="float" office:value="373.200744628906">
            <text:p>373.2007446289</text:p>
          </table:table-cell>
          <table:table-cell office:value-type="float" office:value="0.02870893">
            <text:p>0.02870893</text:p>
          </table:table-cell>
          <table:table-cell table:number-columns-repeated="4"/>
        </table:table-row>
        <table:table-row table:style-name="ro1">
          <table:table-cell office:value-type="float" office:value="373.311370849609">
            <text:p>373.3113708496</text:p>
          </table:table-cell>
          <table:table-cell office:value-type="float" office:value="-0.0007643011">
            <text:p>-0.0007643011</text:p>
          </table:table-cell>
          <table:table-cell table:number-columns-repeated="4"/>
        </table:table-row>
        <table:table-row table:style-name="ro1">
          <table:table-cell office:value-type="float" office:value="373.421997070313">
            <text:p>373.4219970703</text:p>
          </table:table-cell>
          <table:table-cell office:value-type="float" office:value="0.001032608">
            <text:p>0.001032608</text:p>
          </table:table-cell>
          <table:table-cell table:number-columns-repeated="4"/>
        </table:table-row>
        <table:table-row table:style-name="ro1">
          <table:table-cell office:value-type="float" office:value="373.532623291016">
            <text:p>373.532623291</text:p>
          </table:table-cell>
          <table:table-cell office:value-type="float" office:value="-0.006619519">
            <text:p>-0.006619519</text:p>
          </table:table-cell>
          <table:table-cell table:number-columns-repeated="4"/>
        </table:table-row>
        <table:table-row table:style-name="ro1">
          <table:table-cell office:value-type="float" office:value="373.643280029297">
            <text:p>373.6432800293</text:p>
          </table:table-cell>
          <table:table-cell office:value-type="float" office:value="0.01101484">
            <text:p>0.01101484</text:p>
          </table:table-cell>
          <table:table-cell table:number-columns-repeated="4"/>
        </table:table-row>
        <table:table-row table:style-name="ro1">
          <table:table-cell office:value-type="float" office:value="373.753936767578">
            <text:p>373.7539367676</text:p>
          </table:table-cell>
          <table:table-cell office:value-type="float" office:value="0.007883898">
            <text:p>0.007883898</text:p>
          </table:table-cell>
          <table:table-cell table:number-columns-repeated="4"/>
        </table:table-row>
        <table:table-row table:style-name="ro1">
          <table:table-cell office:value-type="float" office:value="373.864593505859">
            <text:p>373.8645935059</text:p>
          </table:table-cell>
          <table:table-cell office:value-type="float" office:value="-0.00436131">
            <text:p>-0.00436131</text:p>
          </table:table-cell>
          <table:table-cell table:number-columns-repeated="4"/>
        </table:table-row>
        <table:table-row table:style-name="ro1">
          <table:table-cell office:value-type="float" office:value="373.975250244141">
            <text:p>373.9752502441</text:p>
          </table:table-cell>
          <table:table-cell office:value-type="float" office:value="0.00101785">
            <text:p>0.00101785</text:p>
          </table:table-cell>
          <table:table-cell table:number-columns-repeated="4"/>
        </table:table-row>
        <table:table-row table:style-name="ro1">
          <table:table-cell office:value-type="float" office:value="374.0859375">
            <text:p>374.0859375</text:p>
          </table:table-cell>
          <table:table-cell office:value-type="float" office:value="-0.004224106">
            <text:p>-0.004224106</text:p>
          </table:table-cell>
          <table:table-cell table:number-columns-repeated="4"/>
        </table:table-row>
        <table:table-row table:style-name="ro1">
          <table:table-cell office:value-type="float" office:value="374.196624755859">
            <text:p>374.1966247559</text:p>
          </table:table-cell>
          <table:table-cell office:value-type="float" office:value="-0.007509917">
            <text:p>-0.007509917</text:p>
          </table:table-cell>
          <table:table-cell table:number-columns-repeated="4"/>
        </table:table-row>
        <table:table-row table:style-name="ro1">
          <table:table-cell office:value-type="float" office:value="374.307281494141">
            <text:p>374.3072814941</text:p>
          </table:table-cell>
          <table:table-cell office:value-type="float" office:value="-0.001845941">
            <text:p>-0.001845941</text:p>
          </table:table-cell>
          <table:table-cell table:number-columns-repeated="4"/>
        </table:table-row>
        <table:table-row table:style-name="ro1">
          <table:table-cell office:value-type="float" office:value="374.417999267578">
            <text:p>374.4179992676</text:p>
          </table:table-cell>
          <table:table-cell office:value-type="float" office:value="-0.004368927">
            <text:p>-0.004368927</text:p>
          </table:table-cell>
          <table:table-cell table:number-columns-repeated="4"/>
        </table:table-row>
        <table:table-row table:style-name="ro1">
          <table:table-cell office:value-type="float" office:value="374.528686523438">
            <text:p>374.5286865234</text:p>
          </table:table-cell>
          <table:table-cell office:value-type="float" office:value="0.006794676">
            <text:p>0.006794676</text:p>
          </table:table-cell>
          <table:table-cell table:number-columns-repeated="4"/>
        </table:table-row>
        <table:table-row table:style-name="ro1">
          <table:table-cell office:value-type="float" office:value="374.639373779297">
            <text:p>374.6393737793</text:p>
          </table:table-cell>
          <table:table-cell office:value-type="float" office:value="0.009464107">
            <text:p>0.009464107</text:p>
          </table:table-cell>
          <table:table-cell table:number-columns-repeated="4"/>
        </table:table-row>
        <table:table-row table:style-name="ro1">
          <table:table-cell office:value-type="float" office:value="374.750091552734">
            <text:p>374.7500915527</text:p>
          </table:table-cell>
          <table:table-cell office:value-type="float" office:value="-0.00366806">
            <text:p>-0.00366806</text:p>
          </table:table-cell>
          <table:table-cell table:number-columns-repeated="4"/>
        </table:table-row>
        <table:table-row table:style-name="ro1">
          <table:table-cell office:value-type="float" office:value="374.860809326172">
            <text:p>374.8608093262</text:p>
          </table:table-cell>
          <table:table-cell office:value-type="float" office:value="-0.00166556">
            <text:p>-0.00166556</text:p>
          </table:table-cell>
          <table:table-cell table:number-columns-repeated="4"/>
        </table:table-row>
        <table:table-row table:style-name="ro1">
          <table:table-cell office:value-type="float" office:value="374.971527099609">
            <text:p>374.9715270996</text:p>
          </table:table-cell>
          <table:table-cell office:value-type="float" office:value="0.0004209818">
            <text:p>0.0004209818</text:p>
          </table:table-cell>
          <table:table-cell table:number-columns-repeated="4"/>
        </table:table-row>
        <table:table-row table:style-name="ro1">
          <table:table-cell office:value-type="float" office:value="375.082244873047">
            <text:p>375.082244873</text:p>
          </table:table-cell>
          <table:table-cell office:value-type="float" office:value="-0.0004137044">
            <text:p>-0.0004137044</text:p>
          </table:table-cell>
          <table:table-cell table:number-columns-repeated="4"/>
        </table:table-row>
        <table:table-row table:style-name="ro1">
          <table:table-cell office:value-type="float" office:value="375.192993164063">
            <text:p>375.1929931641</text:p>
          </table:table-cell>
          <table:table-cell office:value-type="float" office:value="-0.003573486">
            <text:p>-0.003573486</text:p>
          </table:table-cell>
          <table:table-cell table:number-columns-repeated="4"/>
        </table:table-row>
        <table:table-row table:style-name="ro1">
          <table:table-cell office:value-type="float" office:value="375.3037109375">
            <text:p>375.3037109375</text:p>
          </table:table-cell>
          <table:table-cell office:value-type="float" office:value="-0.00795507">
            <text:p>-0.00795507</text:p>
          </table:table-cell>
          <table:table-cell table:number-columns-repeated="4"/>
        </table:table-row>
        <table:table-row table:style-name="ro1">
          <table:table-cell office:value-type="float" office:value="375.414459228516">
            <text:p>375.4144592285</text:p>
          </table:table-cell>
          <table:table-cell office:value-type="float" office:value="0.003233223">
            <text:p>0.003233223</text:p>
          </table:table-cell>
          <table:table-cell table:number-columns-repeated="4"/>
        </table:table-row>
        <table:table-row table:style-name="ro1">
          <table:table-cell office:value-type="float" office:value="375.525207519531">
            <text:p>375.5252075195</text:p>
          </table:table-cell>
          <table:table-cell office:value-type="float" office:value="-0.000775255">
            <text:p>-0.000775255</text:p>
          </table:table-cell>
          <table:table-cell table:number-columns-repeated="4"/>
        </table:table-row>
        <table:table-row table:style-name="ro1">
          <table:table-cell office:value-type="float" office:value="375.635986328125">
            <text:p>375.6359863281</text:p>
          </table:table-cell>
          <table:table-cell office:value-type="float" office:value="0.007281995">
            <text:p>0.007281995</text:p>
          </table:table-cell>
          <table:table-cell table:number-columns-repeated="4"/>
        </table:table-row>
        <table:table-row table:style-name="ro1">
          <table:table-cell office:value-type="float" office:value="375.746734619141">
            <text:p>375.7467346191</text:p>
          </table:table-cell>
          <table:table-cell office:value-type="float" office:value="-0.0003221153">
            <text:p>-0.0003221153</text:p>
          </table:table-cell>
          <table:table-cell table:number-columns-repeated="4"/>
        </table:table-row>
        <table:table-row table:style-name="ro1">
          <table:table-cell office:value-type="float" office:value="375.857513427734">
            <text:p>375.8575134277</text:p>
          </table:table-cell>
          <table:table-cell office:value-type="float" office:value="-0.002968635">
            <text:p>-0.002968635</text:p>
          </table:table-cell>
          <table:table-cell table:number-columns-repeated="4"/>
        </table:table-row>
        <table:table-row table:style-name="ro1">
          <table:table-cell office:value-type="float" office:value="375.968292236328">
            <text:p>375.9682922363</text:p>
          </table:table-cell>
          <table:table-cell office:value-type="float" office:value="-0.002039113">
            <text:p>-0.002039113</text:p>
          </table:table-cell>
          <table:table-cell table:number-columns-repeated="4"/>
        </table:table-row>
        <table:table-row table:style-name="ro1">
          <table:table-cell office:value-type="float" office:value="376.079071044922">
            <text:p>376.0790710449</text:p>
          </table:table-cell>
          <table:table-cell office:value-type="float" office:value="-0.005497966">
            <text:p>-0.005497966</text:p>
          </table:table-cell>
          <table:table-cell table:number-columns-repeated="4"/>
        </table:table-row>
        <table:table-row table:style-name="ro1">
          <table:table-cell office:value-type="float" office:value="376.189849853516">
            <text:p>376.1898498535</text:p>
          </table:table-cell>
          <table:table-cell office:value-type="float" office:value="0.001644838">
            <text:p>0.001644838</text:p>
          </table:table-cell>
          <table:table-cell table:number-columns-repeated="4"/>
        </table:table-row>
        <table:table-row table:style-name="ro1">
          <table:table-cell office:value-type="float" office:value="376.300628662109">
            <text:p>376.3006286621</text:p>
          </table:table-cell>
          <table:table-cell office:value-type="float" office:value="-0.001977131">
            <text:p>-0.001977131</text:p>
          </table:table-cell>
          <table:table-cell table:number-columns-repeated="4"/>
        </table:table-row>
        <table:table-row table:style-name="ro1">
          <table:table-cell office:value-type="float" office:value="376.411437988281">
            <text:p>376.4114379883</text:p>
          </table:table-cell>
          <table:table-cell office:value-type="float" office:value="-0.009500905">
            <text:p>-0.009500905</text:p>
          </table:table-cell>
          <table:table-cell table:number-columns-repeated="4"/>
        </table:table-row>
        <table:table-row table:style-name="ro1">
          <table:table-cell office:value-type="float" office:value="376.522247314453">
            <text:p>376.5222473145</text:p>
          </table:table-cell>
          <table:table-cell office:value-type="float" office:value="0.0006102982">
            <text:p>0.0006102982</text:p>
          </table:table-cell>
          <table:table-cell table:number-columns-repeated="4"/>
        </table:table-row>
        <table:table-row table:style-name="ro1">
          <table:table-cell office:value-type="float" office:value="376.633056640625">
            <text:p>376.6330566406</text:p>
          </table:table-cell>
          <table:table-cell office:value-type="float" office:value="-0.0008028664">
            <text:p>-0.0008028664</text:p>
          </table:table-cell>
          <table:table-cell table:number-columns-repeated="4"/>
        </table:table-row>
        <table:table-row table:style-name="ro1">
          <table:table-cell office:value-type="float" office:value="376.743865966797">
            <text:p>376.7438659668</text:p>
          </table:table-cell>
          <table:table-cell office:value-type="float" office:value="0.001811606">
            <text:p>0.001811606</text:p>
          </table:table-cell>
          <table:table-cell table:number-columns-repeated="4"/>
        </table:table-row>
        <table:table-row table:style-name="ro1">
          <table:table-cell office:value-type="float" office:value="376.854705810547">
            <text:p>376.8547058105</text:p>
          </table:table-cell>
          <table:table-cell office:value-type="float" office:value="0.01301398">
            <text:p>0.01301398</text:p>
          </table:table-cell>
          <table:table-cell table:number-columns-repeated="4"/>
        </table:table-row>
        <table:table-row table:style-name="ro1">
          <table:table-cell office:value-type="float" office:value="376.965515136719">
            <text:p>376.9655151367</text:p>
          </table:table-cell>
          <table:table-cell office:value-type="float" office:value="0.01439867">
            <text:p>0.01439867</text:p>
          </table:table-cell>
          <table:table-cell table:number-columns-repeated="4"/>
        </table:table-row>
        <table:table-row table:style-name="ro1">
          <table:table-cell office:value-type="float" office:value="377.076354980469">
            <text:p>377.0763549805</text:p>
          </table:table-cell>
          <table:table-cell office:value-type="float" office:value="-0.004660558">
            <text:p>-0.004660558</text:p>
          </table:table-cell>
          <table:table-cell table:number-columns-repeated="4"/>
        </table:table-row>
        <table:table-row table:style-name="ro1">
          <table:table-cell office:value-type="float" office:value="377.187194824219">
            <text:p>377.1871948242</text:p>
          </table:table-cell>
          <table:table-cell office:value-type="float" office:value="0.004685406">
            <text:p>0.004685406</text:p>
          </table:table-cell>
          <table:table-cell table:number-columns-repeated="4"/>
        </table:table-row>
        <table:table-row table:style-name="ro1">
          <table:table-cell office:value-type="float" office:value="377.298034667969">
            <text:p>377.298034668</text:p>
          </table:table-cell>
          <table:table-cell office:value-type="float" office:value="-0.006707689">
            <text:p>-0.006707689</text:p>
          </table:table-cell>
          <table:table-cell table:number-columns-repeated="4"/>
        </table:table-row>
        <table:table-row table:style-name="ro1">
          <table:table-cell office:value-type="float" office:value="377.408905029297">
            <text:p>377.4089050293</text:p>
          </table:table-cell>
          <table:table-cell office:value-type="float" office:value="0.007754537">
            <text:p>0.007754537</text:p>
          </table:table-cell>
          <table:table-cell table:number-columns-repeated="4"/>
        </table:table-row>
        <table:table-row table:style-name="ro1">
          <table:table-cell office:value-type="float" office:value="377.519744873047">
            <text:p>377.519744873</text:p>
          </table:table-cell>
          <table:table-cell office:value-type="float" office:value="-0.004532659">
            <text:p>-0.004532659</text:p>
          </table:table-cell>
          <table:table-cell table:number-columns-repeated="4"/>
        </table:table-row>
        <table:table-row table:style-name="ro1">
          <table:table-cell office:value-type="float" office:value="377.630615234375">
            <text:p>377.6306152344</text:p>
          </table:table-cell>
          <table:table-cell office:value-type="float" office:value="0.001860949">
            <text:p>0.001860949</text:p>
          </table:table-cell>
          <table:table-cell table:number-columns-repeated="4"/>
        </table:table-row>
        <table:table-row table:style-name="ro1">
          <table:table-cell office:value-type="float" office:value="377.741485595703">
            <text:p>377.7414855957</text:p>
          </table:table-cell>
          <table:table-cell office:value-type="float" office:value="-0.004139547">
            <text:p>-0.004139547</text:p>
          </table:table-cell>
          <table:table-cell table:number-columns-repeated="4"/>
        </table:table-row>
        <table:table-row table:style-name="ro1">
          <table:table-cell office:value-type="float" office:value="377.852355957031">
            <text:p>377.852355957</text:p>
          </table:table-cell>
          <table:table-cell office:value-type="float" office:value="-0.005464846">
            <text:p>-0.005464846</text:p>
          </table:table-cell>
          <table:table-cell table:number-columns-repeated="4"/>
        </table:table-row>
        <table:table-row table:style-name="ro1">
          <table:table-cell office:value-type="float" office:value="377.963256835938">
            <text:p>377.9632568359</text:p>
          </table:table-cell>
          <table:table-cell office:value-type="float" office:value="-0.002390416">
            <text:p>-0.002390416</text:p>
          </table:table-cell>
          <table:table-cell table:number-columns-repeated="4"/>
        </table:table-row>
        <table:table-row table:style-name="ro1">
          <table:table-cell office:value-type="float" office:value="378.074157714844">
            <text:p>378.0741577148</text:p>
          </table:table-cell>
          <table:table-cell office:value-type="float" office:value="0.01203729">
            <text:p>0.01203729</text:p>
          </table:table-cell>
          <table:table-cell table:number-columns-repeated="4"/>
        </table:table-row>
        <table:table-row table:style-name="ro1">
          <table:table-cell office:value-type="float" office:value="378.185028076172">
            <text:p>378.1850280762</text:p>
          </table:table-cell>
          <table:table-cell office:value-type="float" office:value="0.01021102">
            <text:p>0.01021102</text:p>
          </table:table-cell>
          <table:table-cell table:number-columns-repeated="4"/>
        </table:table-row>
        <table:table-row table:style-name="ro1">
          <table:table-cell office:value-type="float" office:value="378.295928955078">
            <text:p>378.2959289551</text:p>
          </table:table-cell>
          <table:table-cell office:value-type="float" office:value="-0.00644411">
            <text:p>-0.00644411</text:p>
          </table:table-cell>
          <table:table-cell table:number-columns-repeated="4"/>
        </table:table-row>
        <table:table-row table:style-name="ro1">
          <table:table-cell office:value-type="float" office:value="378.406860351563">
            <text:p>378.4068603516</text:p>
          </table:table-cell>
          <table:table-cell office:value-type="float" office:value="0.0004934812">
            <text:p>0.0004934812</text:p>
          </table:table-cell>
          <table:table-cell table:number-columns-repeated="4"/>
        </table:table-row>
        <table:table-row table:style-name="ro1">
          <table:table-cell office:value-type="float" office:value="378.517761230469">
            <text:p>378.5177612305</text:p>
          </table:table-cell>
          <table:table-cell office:value-type="float" office:value="0.004942137">
            <text:p>0.004942137</text:p>
          </table:table-cell>
          <table:table-cell table:number-columns-repeated="4"/>
        </table:table-row>
        <table:table-row table:style-name="ro1">
          <table:table-cell office:value-type="float" office:value="378.628692626953">
            <text:p>378.628692627</text:p>
          </table:table-cell>
          <table:table-cell office:value-type="float" office:value="0.001353854">
            <text:p>0.001353854</text:p>
          </table:table-cell>
          <table:table-cell table:number-columns-repeated="4"/>
        </table:table-row>
        <table:table-row table:style-name="ro1">
          <table:table-cell office:value-type="float" office:value="378.739593505859">
            <text:p>378.7395935059</text:p>
          </table:table-cell>
          <table:table-cell office:value-type="float" office:value="0.0016396">
            <text:p>0.0016396</text:p>
          </table:table-cell>
          <table:table-cell table:number-columns-repeated="4"/>
        </table:table-row>
        <table:table-row table:style-name="ro1">
          <table:table-cell office:value-type="float" office:value="378.850524902344">
            <text:p>378.8505249023</text:p>
          </table:table-cell>
          <table:table-cell office:value-type="float" office:value="0.003274119">
            <text:p>0.003274119</text:p>
          </table:table-cell>
          <table:table-cell table:number-columns-repeated="4"/>
        </table:table-row>
        <table:table-row table:style-name="ro1">
          <table:table-cell office:value-type="float" office:value="378.961486816406">
            <text:p>378.9614868164</text:p>
          </table:table-cell>
          <table:table-cell office:value-type="float" office:value="0.004471142">
            <text:p>0.004471142</text:p>
          </table:table-cell>
          <table:table-cell table:number-columns-repeated="4"/>
        </table:table-row>
        <table:table-row table:style-name="ro1">
          <table:table-cell office:value-type="float" office:value="379.072418212891">
            <text:p>379.0724182129</text:p>
          </table:table-cell>
          <table:table-cell office:value-type="float" office:value="0.009501534">
            <text:p>0.009501534</text:p>
          </table:table-cell>
          <table:table-cell table:number-columns-repeated="4"/>
        </table:table-row>
        <table:table-row table:style-name="ro1">
          <table:table-cell office:value-type="float" office:value="379.183380126953">
            <text:p>379.183380127</text:p>
          </table:table-cell>
          <table:table-cell office:value-type="float" office:value="-0.006644137">
            <text:p>-0.006644137</text:p>
          </table:table-cell>
          <table:table-cell table:number-columns-repeated="4"/>
        </table:table-row>
        <table:table-row table:style-name="ro1">
          <table:table-cell office:value-type="float" office:value="379.294311523438">
            <text:p>379.2943115234</text:p>
          </table:table-cell>
          <table:table-cell office:value-type="float" office:value="0.0056388">
            <text:p>0.0056388</text:p>
          </table:table-cell>
          <table:table-cell table:number-columns-repeated="4"/>
        </table:table-row>
        <table:table-row table:style-name="ro1">
          <table:table-cell office:value-type="float" office:value="379.4052734375">
            <text:p>379.4052734375</text:p>
          </table:table-cell>
          <table:table-cell office:value-type="float" office:value="-0.008857199">
            <text:p>-0.008857199</text:p>
          </table:table-cell>
          <table:table-cell table:number-columns-repeated="4"/>
        </table:table-row>
        <table:table-row table:style-name="ro1">
          <table:table-cell office:value-type="float" office:value="379.516235351563">
            <text:p>379.5162353516</text:p>
          </table:table-cell>
          <table:table-cell office:value-type="float" office:value="-0.006652327">
            <text:p>-0.006652327</text:p>
          </table:table-cell>
          <table:table-cell table:number-columns-repeated="4"/>
        </table:table-row>
        <table:table-row table:style-name="ro1">
          <table:table-cell office:value-type="float" office:value="379.627227783203">
            <text:p>379.6272277832</text:p>
          </table:table-cell>
          <table:table-cell office:value-type="float" office:value="-0.001612365">
            <text:p>-0.001612365</text:p>
          </table:table-cell>
          <table:table-cell table:number-columns-repeated="4"/>
        </table:table-row>
        <table:table-row table:style-name="ro1">
          <table:table-cell office:value-type="float" office:value="379.738189697266">
            <text:p>379.7381896973</text:p>
          </table:table-cell>
          <table:table-cell office:value-type="float" office:value="0.01092453">
            <text:p>0.01092453</text:p>
          </table:table-cell>
          <table:table-cell table:number-columns-repeated="4"/>
        </table:table-row>
        <table:table-row table:style-name="ro1">
          <table:table-cell office:value-type="float" office:value="379.849182128906">
            <text:p>379.8491821289</text:p>
          </table:table-cell>
          <table:table-cell office:value-type="float" office:value="-0.004203867">
            <text:p>-0.004203867</text:p>
          </table:table-cell>
          <table:table-cell table:number-columns-repeated="4"/>
        </table:table-row>
        <table:table-row table:style-name="ro1">
          <table:table-cell office:value-type="float" office:value="379.960174560547">
            <text:p>379.9601745605</text:p>
          </table:table-cell>
          <table:table-cell office:value-type="float" office:value="-0.001230558">
            <text:p>-0.001230558</text:p>
          </table:table-cell>
          <table:table-cell table:number-columns-repeated="4"/>
        </table:table-row>
        <table:table-row table:style-name="ro1">
          <table:table-cell office:value-type="float" office:value="380.071166992188">
            <text:p>380.0711669922</text:p>
          </table:table-cell>
          <table:table-cell office:value-type="float" office:value="-0.004220177">
            <text:p>-0.004220177</text:p>
          </table:table-cell>
          <table:table-cell table:number-columns-repeated="4"/>
        </table:table-row>
        <table:table-row table:style-name="ro1">
          <table:table-cell office:value-type="float" office:value="380.182189941406">
            <text:p>380.1821899414</text:p>
          </table:table-cell>
          <table:table-cell office:value-type="float" office:value="0.01136109">
            <text:p>0.01136109</text:p>
          </table:table-cell>
          <table:table-cell table:number-columns-repeated="4"/>
        </table:table-row>
        <table:table-row table:style-name="ro1">
          <table:table-cell office:value-type="float" office:value="380.293182373047">
            <text:p>380.293182373</text:p>
          </table:table-cell>
          <table:table-cell office:value-type="float" office:value="0.006464233">
            <text:p>0.006464233</text:p>
          </table:table-cell>
          <table:table-cell table:number-columns-repeated="4"/>
        </table:table-row>
        <table:table-row table:style-name="ro1">
          <table:table-cell office:value-type="float" office:value="380.404205322266">
            <text:p>380.4042053223</text:p>
          </table:table-cell>
          <table:table-cell office:value-type="float" office:value="-0.01041846">
            <text:p>-0.01041846</text:p>
          </table:table-cell>
          <table:table-cell table:number-columns-repeated="4"/>
        </table:table-row>
        <table:table-row table:style-name="ro1">
          <table:table-cell office:value-type="float" office:value="380.515228271484">
            <text:p>380.5152282715</text:p>
          </table:table-cell>
          <table:table-cell office:value-type="float" office:value="-0.006640207">
            <text:p>-0.006640207</text:p>
          </table:table-cell>
          <table:table-cell table:number-columns-repeated="4"/>
        </table:table-row>
        <table:table-row table:style-name="ro1">
          <table:table-cell office:value-type="float" office:value="380.626251220703">
            <text:p>380.6262512207</text:p>
          </table:table-cell>
          <table:table-cell office:value-type="float" office:value="-0.0001702199">
            <text:p>-0.0001702199</text:p>
          </table:table-cell>
          <table:table-cell table:number-columns-repeated="4"/>
        </table:table-row>
        <table:table-row table:style-name="ro1">
          <table:table-cell office:value-type="float" office:value="380.737274169922">
            <text:p>380.7372741699</text:p>
          </table:table-cell>
          <table:table-cell office:value-type="float" office:value="-0.008946376">
            <text:p>-0.008946376</text:p>
          </table:table-cell>
          <table:table-cell table:number-columns-repeated="4"/>
        </table:table-row>
        <table:table-row table:style-name="ro1">
          <table:table-cell office:value-type="float" office:value="380.848327636719">
            <text:p>380.8483276367</text:p>
          </table:table-cell>
          <table:table-cell office:value-type="float" office:value="0.01414554">
            <text:p>0.01414554</text:p>
          </table:table-cell>
          <table:table-cell table:number-columns-repeated="4"/>
        </table:table-row>
        <table:table-row table:style-name="ro1">
          <table:table-cell office:value-type="float" office:value="380.959381103516">
            <text:p>380.9593811035</text:p>
          </table:table-cell>
          <table:table-cell office:value-type="float" office:value="-0.0009802368">
            <text:p>-0.0009802368</text:p>
          </table:table-cell>
          <table:table-cell table:number-columns-repeated="4"/>
        </table:table-row>
        <table:table-row table:style-name="ro1">
          <table:table-cell office:value-type="float" office:value="381.070404052734">
            <text:p>381.0704040527</text:p>
          </table:table-cell>
          <table:table-cell office:value-type="float" office:value="-0.004651663">
            <text:p>-0.004651663</text:p>
          </table:table-cell>
          <table:table-cell table:number-columns-repeated="4"/>
        </table:table-row>
        <table:table-row table:style-name="ro1">
          <table:table-cell office:value-type="float" office:value="381.181488037109">
            <text:p>381.1814880371</text:p>
          </table:table-cell>
          <table:table-cell office:value-type="float" office:value="0.0006602422">
            <text:p>0.0006602422</text:p>
          </table:table-cell>
          <table:table-cell table:number-columns-repeated="4"/>
        </table:table-row>
        <table:table-row table:style-name="ro1">
          <table:table-cell office:value-type="float" office:value="381.292541503906">
            <text:p>381.2925415039</text:p>
          </table:table-cell>
          <table:table-cell office:value-type="float" office:value="-0.004091706">
            <text:p>-0.004091706</text:p>
          </table:table-cell>
          <table:table-cell table:number-columns-repeated="4"/>
        </table:table-row>
        <table:table-row table:style-name="ro1">
          <table:table-cell office:value-type="float" office:value="381.403594970703">
            <text:p>381.4035949707</text:p>
          </table:table-cell>
          <table:table-cell office:value-type="float" office:value="0.01111846">
            <text:p>0.01111846</text:p>
          </table:table-cell>
          <table:table-cell table:number-columns-repeated="4"/>
        </table:table-row>
        <table:table-row table:style-name="ro1">
          <table:table-cell office:value-type="float" office:value="381.514678955078">
            <text:p>381.5146789551</text:p>
          </table:table-cell>
          <table:table-cell office:value-type="float" office:value="0.01066826">
            <text:p>0.01066826</text:p>
          </table:table-cell>
          <table:table-cell table:number-columns-repeated="4"/>
        </table:table-row>
        <table:table-row table:style-name="ro1">
          <table:table-cell office:value-type="float" office:value="381.625762939453">
            <text:p>381.6257629395</text:p>
          </table:table-cell>
          <table:table-cell office:value-type="float" office:value="0.01164513">
            <text:p>0.01164513</text:p>
          </table:table-cell>
          <table:table-cell table:number-columns-repeated="4"/>
        </table:table-row>
        <table:table-row table:style-name="ro1">
          <table:table-cell office:value-type="float" office:value="381.736846923828">
            <text:p>381.7368469238</text:p>
          </table:table-cell>
          <table:table-cell office:value-type="float" office:value="0.008400283">
            <text:p>0.008400283</text:p>
          </table:table-cell>
          <table:table-cell table:number-columns-repeated="4"/>
        </table:table-row>
        <table:table-row table:style-name="ro1">
          <table:table-cell office:value-type="float" office:value="381.847930908203">
            <text:p>381.8479309082</text:p>
          </table:table-cell>
          <table:table-cell office:value-type="float" office:value="-0.005090719">
            <text:p>-0.005090719</text:p>
          </table:table-cell>
          <table:table-cell table:number-columns-repeated="4"/>
        </table:table-row>
        <table:table-row table:style-name="ro1">
          <table:table-cell office:value-type="float" office:value="381.959045410156">
            <text:p>381.9590454102</text:p>
          </table:table-cell>
          <table:table-cell office:value-type="float" office:value="0.008404244">
            <text:p>0.008404244</text:p>
          </table:table-cell>
          <table:table-cell table:number-columns-repeated="4"/>
        </table:table-row>
        <table:table-row table:style-name="ro1">
          <table:table-cell office:value-type="float" office:value="382.070129394531">
            <text:p>382.0701293945</text:p>
          </table:table-cell>
          <table:table-cell office:value-type="float" office:value="0.001657761">
            <text:p>0.001657761</text:p>
          </table:table-cell>
          <table:table-cell table:number-columns-repeated="4"/>
        </table:table-row>
        <table:table-row table:style-name="ro1">
          <table:table-cell office:value-type="float" office:value="382.181243896484">
            <text:p>382.1812438965</text:p>
          </table:table-cell>
          <table:table-cell office:value-type="float" office:value="0.005470787">
            <text:p>0.005470787</text:p>
          </table:table-cell>
          <table:table-cell table:number-columns-repeated="4"/>
        </table:table-row>
        <table:table-row table:style-name="ro1">
          <table:table-cell office:value-type="float" office:value="382.292358398438">
            <text:p>382.2923583984</text:p>
          </table:table-cell>
          <table:table-cell office:value-type="float" office:value="-0.003762692">
            <text:p>-0.003762692</text:p>
          </table:table-cell>
          <table:table-cell table:number-columns-repeated="4"/>
        </table:table-row>
        <table:table-row table:style-name="ro1">
          <table:table-cell office:value-type="float" office:value="382.403503417969">
            <text:p>382.403503418</text:p>
          </table:table-cell>
          <table:table-cell office:value-type="float" office:value="0.004727997">
            <text:p>0.004727997</text:p>
          </table:table-cell>
          <table:table-cell table:number-columns-repeated="4"/>
        </table:table-row>
        <table:table-row table:style-name="ro1">
          <table:table-cell office:value-type="float" office:value="382.514617919922">
            <text:p>382.5146179199</text:p>
          </table:table-cell>
          <table:table-cell office:value-type="float" office:value="0.01551527">
            <text:p>0.01551527</text:p>
          </table:table-cell>
          <table:table-cell table:number-columns-repeated="4"/>
        </table:table-row>
        <table:table-row table:style-name="ro1">
          <table:table-cell office:value-type="float" office:value="382.625762939453">
            <text:p>382.6257629395</text:p>
          </table:table-cell>
          <table:table-cell office:value-type="float" office:value="-0.001678094">
            <text:p>-0.001678094</text:p>
          </table:table-cell>
          <table:table-cell table:number-columns-repeated="4"/>
        </table:table-row>
        <table:table-row table:style-name="ro1">
          <table:table-cell office:value-type="float" office:value="382.736907958984">
            <text:p>382.736907959</text:p>
          </table:table-cell>
          <table:table-cell office:value-type="float" office:value="0.007771868">
            <text:p>0.007771868</text:p>
          </table:table-cell>
          <table:table-cell table:number-columns-repeated="4"/>
        </table:table-row>
        <table:table-row table:style-name="ro1">
          <table:table-cell office:value-type="float" office:value="382.848052978516">
            <text:p>382.8480529785</text:p>
          </table:table-cell>
          <table:table-cell office:value-type="float" office:value="0.00428222">
            <text:p>0.00428222</text:p>
          </table:table-cell>
          <table:table-cell table:number-columns-repeated="4"/>
        </table:table-row>
        <table:table-row table:style-name="ro1">
          <table:table-cell office:value-type="float" office:value="382.959197998047">
            <text:p>382.959197998</text:p>
          </table:table-cell>
          <table:table-cell office:value-type="float" office:value="0.008247799">
            <text:p>0.008247799</text:p>
          </table:table-cell>
          <table:table-cell table:number-columns-repeated="4"/>
        </table:table-row>
        <table:table-row table:style-name="ro1">
          <table:table-cell office:value-type="float" office:value="383.070343017578">
            <text:p>383.0703430176</text:p>
          </table:table-cell>
          <table:table-cell office:value-type="float" office:value="0.00381995">
            <text:p>0.00381995</text:p>
          </table:table-cell>
          <table:table-cell table:number-columns-repeated="4"/>
        </table:table-row>
        <table:table-row table:style-name="ro1">
          <table:table-cell office:value-type="float" office:value="383.181518554688">
            <text:p>383.1815185547</text:p>
          </table:table-cell>
          <table:table-cell office:value-type="float" office:value="0.01299822">
            <text:p>0.01299822</text:p>
          </table:table-cell>
          <table:table-cell table:number-columns-repeated="4"/>
        </table:table-row>
        <table:table-row table:style-name="ro1">
          <table:table-cell office:value-type="float" office:value="383.292694091797">
            <text:p>383.2926940918</text:p>
          </table:table-cell>
          <table:table-cell office:value-type="float" office:value="0.003172143">
            <text:p>0.003172143</text:p>
          </table:table-cell>
          <table:table-cell table:number-columns-repeated="4"/>
        </table:table-row>
        <table:table-row table:style-name="ro1">
          <table:table-cell office:value-type="float" office:value="383.403869628906">
            <text:p>383.4038696289</text:p>
          </table:table-cell>
          <table:table-cell office:value-type="float" office:value="-0.001612823">
            <text:p>-0.001612823</text:p>
          </table:table-cell>
          <table:table-cell table:number-columns-repeated="4"/>
        </table:table-row>
        <table:table-row table:style-name="ro1">
          <table:table-cell office:value-type="float" office:value="383.515045166016">
            <text:p>383.515045166</text:p>
          </table:table-cell>
          <table:table-cell office:value-type="float" office:value="-0.0007848414">
            <text:p>-0.0007848414</text:p>
          </table:table-cell>
          <table:table-cell table:number-columns-repeated="4"/>
        </table:table-row>
        <table:table-row table:style-name="ro1">
          <table:table-cell office:value-type="float" office:value="383.626220703125">
            <text:p>383.6262207031</text:p>
          </table:table-cell>
          <table:table-cell office:value-type="float" office:value="0.01106745">
            <text:p>0.01106745</text:p>
          </table:table-cell>
          <table:table-cell table:number-columns-repeated="4"/>
        </table:table-row>
        <table:table-row table:style-name="ro1">
          <table:table-cell office:value-type="float" office:value="383.737426757813">
            <text:p>383.7374267578</text:p>
          </table:table-cell>
          <table:table-cell office:value-type="float" office:value="0.0126594">
            <text:p>0.0126594</text:p>
          </table:table-cell>
          <table:table-cell table:number-columns-repeated="4"/>
        </table:table-row>
        <table:table-row table:style-name="ro1">
          <table:table-cell office:value-type="float" office:value="383.8486328125">
            <text:p>383.8486328125</text:p>
          </table:table-cell>
          <table:table-cell office:value-type="float" office:value="0.0006339179">
            <text:p>0.0006339179</text:p>
          </table:table-cell>
          <table:table-cell table:number-columns-repeated="4"/>
        </table:table-row>
        <table:table-row table:style-name="ro1">
          <table:table-cell office:value-type="float" office:value="383.959838867188">
            <text:p>383.9598388672</text:p>
          </table:table-cell>
          <table:table-cell office:value-type="float" office:value="-0.0006536826">
            <text:p>-0.0006536826</text:p>
          </table:table-cell>
          <table:table-cell table:number-columns-repeated="4"/>
        </table:table-row>
        <table:table-row table:style-name="ro1">
          <table:table-cell office:value-type="float" office:value="384.071044921875">
            <text:p>384.0710449219</text:p>
          </table:table-cell>
          <table:table-cell office:value-type="float" office:value="-0.00778888">
            <text:p>-0.00778888</text:p>
          </table:table-cell>
          <table:table-cell table:number-columns-repeated="4"/>
        </table:table-row>
        <table:table-row table:style-name="ro1">
          <table:table-cell office:value-type="float" office:value="384.182250976563">
            <text:p>384.1822509766</text:p>
          </table:table-cell>
          <table:table-cell office:value-type="float" office:value="0.01063763">
            <text:p>0.01063763</text:p>
          </table:table-cell>
          <table:table-cell table:number-columns-repeated="4"/>
        </table:table-row>
        <table:table-row table:style-name="ro1">
          <table:table-cell office:value-type="float" office:value="384.293487548828">
            <text:p>384.2934875488</text:p>
          </table:table-cell>
          <table:table-cell office:value-type="float" office:value="-0.006639367">
            <text:p>-0.006639367</text:p>
          </table:table-cell>
          <table:table-cell table:number-columns-repeated="4"/>
        </table:table-row>
        <table:table-row table:style-name="ro1">
          <table:table-cell office:value-type="float" office:value="384.404693603516">
            <text:p>384.4046936035</text:p>
          </table:table-cell>
          <table:table-cell office:value-type="float" office:value="0.01056444">
            <text:p>0.01056444</text:p>
          </table:table-cell>
          <table:table-cell table:number-columns-repeated="4"/>
        </table:table-row>
        <table:table-row table:style-name="ro1">
          <table:table-cell office:value-type="float" office:value="384.515930175781">
            <text:p>384.5159301758</text:p>
          </table:table-cell>
          <table:table-cell office:value-type="float" office:value="0.01152553">
            <text:p>0.01152553</text:p>
          </table:table-cell>
          <table:table-cell table:number-columns-repeated="4"/>
        </table:table-row>
        <table:table-row table:style-name="ro1">
          <table:table-cell office:value-type="float" office:value="384.627197265625">
            <text:p>384.6271972656</text:p>
          </table:table-cell>
          <table:table-cell office:value-type="float" office:value="-0.008143409">
            <text:p>-0.008143409</text:p>
          </table:table-cell>
          <table:table-cell table:number-columns-repeated="4"/>
        </table:table-row>
        <table:table-row table:style-name="ro1">
          <table:table-cell office:value-type="float" office:value="384.738433837891">
            <text:p>384.7384338379</text:p>
          </table:table-cell>
          <table:table-cell office:value-type="float" office:value="-0.002869905">
            <text:p>-0.002869905</text:p>
          </table:table-cell>
          <table:table-cell table:number-columns-repeated="4"/>
        </table:table-row>
        <table:table-row table:style-name="ro1">
          <table:table-cell office:value-type="float" office:value="384.849670410156">
            <text:p>384.8496704102</text:p>
          </table:table-cell>
          <table:table-cell office:value-type="float" office:value="0.01701411">
            <text:p>0.01701411</text:p>
          </table:table-cell>
          <table:table-cell table:number-columns-repeated="4"/>
        </table:table-row>
        <table:table-row table:style-name="ro1">
          <table:table-cell office:value-type="float" office:value="384.9609375">
            <text:p>384.9609375</text:p>
          </table:table-cell>
          <table:table-cell office:value-type="float" office:value="0.01361345">
            <text:p>0.01361345</text:p>
          </table:table-cell>
          <table:table-cell table:number-columns-repeated="4"/>
        </table:table-row>
        <table:table-row table:style-name="ro1">
          <table:table-cell office:value-type="float" office:value="385.072204589844">
            <text:p>385.0722045898</text:p>
          </table:table-cell>
          <table:table-cell office:value-type="float" office:value="-0.004245388">
            <text:p>-0.004245388</text:p>
          </table:table-cell>
          <table:table-cell table:number-columns-repeated="4"/>
        </table:table-row>
        <table:table-row table:style-name="ro1">
          <table:table-cell office:value-type="float" office:value="385.183471679688">
            <text:p>385.1834716797</text:p>
          </table:table-cell>
          <table:table-cell office:value-type="float" office:value="0.0137714">
            <text:p>0.0137714</text:p>
          </table:table-cell>
          <table:table-cell table:number-columns-repeated="4"/>
        </table:table-row>
        <table:table-row table:style-name="ro1">
          <table:table-cell office:value-type="float" office:value="385.294738769531">
            <text:p>385.2947387695</text:p>
          </table:table-cell>
          <table:table-cell office:value-type="float" office:value="0.007918123">
            <text:p>0.007918123</text:p>
          </table:table-cell>
          <table:table-cell table:number-columns-repeated="4"/>
        </table:table-row>
        <table:table-row table:style-name="ro1">
          <table:table-cell office:value-type="float" office:value="385.406036376953">
            <text:p>385.406036377</text:p>
          </table:table-cell>
          <table:table-cell office:value-type="float" office:value="-0.002588184">
            <text:p>-0.002588184</text:p>
          </table:table-cell>
          <table:table-cell table:number-columns-repeated="4"/>
        </table:table-row>
        <table:table-row table:style-name="ro1">
          <table:table-cell office:value-type="float" office:value="385.517333984375">
            <text:p>385.5173339844</text:p>
          </table:table-cell>
          <table:table-cell office:value-type="float" office:value="0.004722816">
            <text:p>0.004722816</text:p>
          </table:table-cell>
          <table:table-cell table:number-columns-repeated="4"/>
        </table:table-row>
        <table:table-row table:style-name="ro1">
          <table:table-cell office:value-type="float" office:value="385.628601074219">
            <text:p>385.6286010742</text:p>
          </table:table-cell>
          <table:table-cell office:value-type="float" office:value="-0.003989479">
            <text:p>-0.003989479</text:p>
          </table:table-cell>
          <table:table-cell table:number-columns-repeated="4"/>
        </table:table-row>
        <table:table-row table:style-name="ro1">
          <table:table-cell office:value-type="float" office:value="385.739898681641">
            <text:p>385.7398986816</text:p>
          </table:table-cell>
          <table:table-cell office:value-type="float" office:value="-0.006984522">
            <text:p>-0.006984522</text:p>
          </table:table-cell>
          <table:table-cell table:number-columns-repeated="4"/>
        </table:table-row>
        <table:table-row table:style-name="ro1">
          <table:table-cell office:value-type="float" office:value="385.851226806641">
            <text:p>385.8512268066</text:p>
          </table:table-cell>
          <table:table-cell office:value-type="float" office:value="0.01273999">
            <text:p>0.01273999</text:p>
          </table:table-cell>
          <table:table-cell table:number-columns-repeated="4"/>
        </table:table-row>
        <table:table-row table:style-name="ro1">
          <table:table-cell office:value-type="float" office:value="385.962524414063">
            <text:p>385.9625244141</text:p>
          </table:table-cell>
          <table:table-cell office:value-type="float" office:value="-0.003106803">
            <text:p>-0.003106803</text:p>
          </table:table-cell>
          <table:table-cell table:number-columns-repeated="4"/>
        </table:table-row>
        <table:table-row table:style-name="ro1">
          <table:table-cell office:value-type="float" office:value="386.073852539063">
            <text:p>386.0738525391</text:p>
          </table:table-cell>
          <table:table-cell office:value-type="float" office:value="0.01274884">
            <text:p>0.01274884</text:p>
          </table:table-cell>
          <table:table-cell table:number-columns-repeated="4"/>
        </table:table-row>
        <table:table-row table:style-name="ro1">
          <table:table-cell office:value-type="float" office:value="386.185180664063">
            <text:p>386.1851806641</text:p>
          </table:table-cell>
          <table:table-cell office:value-type="float" office:value="0.001009146">
            <text:p>0.001009146</text:p>
          </table:table-cell>
          <table:table-cell table:number-columns-repeated="4"/>
        </table:table-row>
        <table:table-row table:style-name="ro1">
          <table:table-cell office:value-type="float" office:value="386.296508789063">
            <text:p>386.2965087891</text:p>
          </table:table-cell>
          <table:table-cell office:value-type="float" office:value="0.006820864">
            <text:p>0.006820864</text:p>
          </table:table-cell>
          <table:table-cell table:number-columns-repeated="4"/>
        </table:table-row>
        <table:table-row table:style-name="ro1">
          <table:table-cell office:value-type="float" office:value="386.407836914063">
            <text:p>386.4078369141</text:p>
          </table:table-cell>
          <table:table-cell office:value-type="float" office:value="0.002572073">
            <text:p>0.002572073</text:p>
          </table:table-cell>
          <table:table-cell table:number-columns-repeated="4"/>
        </table:table-row>
        <table:table-row table:style-name="ro1">
          <table:table-cell office:value-type="float" office:value="386.519165039063">
            <text:p>386.5191650391</text:p>
          </table:table-cell>
          <table:table-cell office:value-type="float" office:value="0.0043497">
            <text:p>0.0043497</text:p>
          </table:table-cell>
          <table:table-cell table:number-columns-repeated="4"/>
        </table:table-row>
        <table:table-row table:style-name="ro1">
          <table:table-cell office:value-type="float" office:value="386.630523681641">
            <text:p>386.6305236816</text:p>
          </table:table-cell>
          <table:table-cell office:value-type="float" office:value="0.004273926">
            <text:p>0.004273926</text:p>
          </table:table-cell>
          <table:table-cell table:number-columns-repeated="4"/>
        </table:table-row>
        <table:table-row table:style-name="ro1">
          <table:table-cell office:value-type="float" office:value="386.741882324219">
            <text:p>386.7418823242</text:p>
          </table:table-cell>
          <table:table-cell office:value-type="float" office:value="0.001196592">
            <text:p>0.001196592</text:p>
          </table:table-cell>
          <table:table-cell table:number-columns-repeated="4"/>
        </table:table-row>
        <table:table-row table:style-name="ro1">
          <table:table-cell office:value-type="float" office:value="386.853240966797">
            <text:p>386.8532409668</text:p>
          </table:table-cell>
          <table:table-cell office:value-type="float" office:value="-0.002710294">
            <text:p>-0.002710294</text:p>
          </table:table-cell>
          <table:table-cell table:number-columns-repeated="4"/>
        </table:table-row>
        <table:table-row table:style-name="ro1">
          <table:table-cell office:value-type="float" office:value="386.964599609375">
            <text:p>386.9645996094</text:p>
          </table:table-cell>
          <table:table-cell office:value-type="float" office:value="-0.00399003">
            <text:p>-0.00399003</text:p>
          </table:table-cell>
          <table:table-cell table:number-columns-repeated="4"/>
        </table:table-row>
        <table:table-row table:style-name="ro1">
          <table:table-cell office:value-type="float" office:value="387.075958251953">
            <text:p>387.075958252</text:p>
          </table:table-cell>
          <table:table-cell office:value-type="float" office:value="0.007698169">
            <text:p>0.007698169</text:p>
          </table:table-cell>
          <table:table-cell table:number-columns-repeated="4"/>
        </table:table-row>
        <table:table-row table:style-name="ro1">
          <table:table-cell office:value-type="float" office:value="387.187347412109">
            <text:p>387.1873474121</text:p>
          </table:table-cell>
          <table:table-cell office:value-type="float" office:value="-0.004456688">
            <text:p>-0.004456688</text:p>
          </table:table-cell>
          <table:table-cell table:number-columns-repeated="4"/>
        </table:table-row>
        <table:table-row table:style-name="ro1">
          <table:table-cell office:value-type="float" office:value="387.298736572266">
            <text:p>387.2987365723</text:p>
          </table:table-cell>
          <table:table-cell office:value-type="float" office:value="0.01392458">
            <text:p>0.01392458</text:p>
          </table:table-cell>
          <table:table-cell table:number-columns-repeated="4"/>
        </table:table-row>
        <table:table-row table:style-name="ro1">
          <table:table-cell office:value-type="float" office:value="387.410095214844">
            <text:p>387.4100952148</text:p>
          </table:table-cell>
          <table:table-cell office:value-type="float" office:value="0.004124928">
            <text:p>0.004124928</text:p>
          </table:table-cell>
          <table:table-cell table:number-columns-repeated="4"/>
        </table:table-row>
        <table:table-row table:style-name="ro1">
          <table:table-cell office:value-type="float" office:value="387.521514892578">
            <text:p>387.5215148926</text:p>
          </table:table-cell>
          <table:table-cell office:value-type="string">
            <text:p>7.258458E-05</text:p>
          </table:table-cell>
          <table:table-cell table:number-columns-repeated="4"/>
        </table:table-row>
        <table:table-row table:style-name="ro1">
          <table:table-cell office:value-type="float" office:value="387.632904052734">
            <text:p>387.6329040527</text:p>
          </table:table-cell>
          <table:table-cell office:value-type="float" office:value="0.000887542">
            <text:p>0.000887542</text:p>
          </table:table-cell>
          <table:table-cell table:number-columns-repeated="4"/>
        </table:table-row>
        <table:table-row table:style-name="ro1">
          <table:table-cell office:value-type="float" office:value="387.744293212891">
            <text:p>387.7442932129</text:p>
          </table:table-cell>
          <table:table-cell office:value-type="float" office:value="0.01233042">
            <text:p>0.01233042</text:p>
          </table:table-cell>
          <table:table-cell table:number-columns-repeated="4"/>
        </table:table-row>
        <table:table-row table:style-name="ro1">
          <table:table-cell office:value-type="float" office:value="387.855712890625">
            <text:p>387.8557128906</text:p>
          </table:table-cell>
          <table:table-cell office:value-type="float" office:value="0.002948994">
            <text:p>0.002948994</text:p>
          </table:table-cell>
          <table:table-cell table:number-columns-repeated="4"/>
        </table:table-row>
        <table:table-row table:style-name="ro1">
          <table:table-cell office:value-type="float" office:value="387.967132568359">
            <text:p>387.9671325684</text:p>
          </table:table-cell>
          <table:table-cell office:value-type="float" office:value="0.004799407">
            <text:p>0.004799407</text:p>
          </table:table-cell>
          <table:table-cell table:number-columns-repeated="4"/>
        </table:table-row>
        <table:table-row table:style-name="ro1">
          <table:table-cell office:value-type="float" office:value="388.078552246094">
            <text:p>388.0785522461</text:p>
          </table:table-cell>
          <table:table-cell office:value-type="float" office:value="0.001995044">
            <text:p>0.001995044</text:p>
          </table:table-cell>
          <table:table-cell table:number-columns-repeated="4"/>
        </table:table-row>
        <table:table-row table:style-name="ro1">
          <table:table-cell office:value-type="float" office:value="388.189971923828">
            <text:p>388.1899719238</text:p>
          </table:table-cell>
          <table:table-cell office:value-type="float" office:value="0.001266051">
            <text:p>0.001266051</text:p>
          </table:table-cell>
          <table:table-cell table:number-columns-repeated="4"/>
        </table:table-row>
        <table:table-row table:style-name="ro1">
          <table:table-cell office:value-type="float" office:value="388.301422119141">
            <text:p>388.3014221191</text:p>
          </table:table-cell>
          <table:table-cell office:value-type="float" office:value="-0.004012488">
            <text:p>-0.004012488</text:p>
          </table:table-cell>
          <table:table-cell table:number-columns-repeated="4"/>
        </table:table-row>
        <table:table-row table:style-name="ro1">
          <table:table-cell office:value-type="float" office:value="388.412872314453">
            <text:p>388.4128723145</text:p>
          </table:table-cell>
          <table:table-cell office:value-type="float" office:value="-0.006598578">
            <text:p>-0.006598578</text:p>
          </table:table-cell>
          <table:table-cell table:number-columns-repeated="4"/>
        </table:table-row>
        <table:table-row table:style-name="ro1">
          <table:table-cell office:value-type="float" office:value="388.524291992188">
            <text:p>388.5242919922</text:p>
          </table:table-cell>
          <table:table-cell office:value-type="float" office:value="0.006031604">
            <text:p>0.006031604</text:p>
          </table:table-cell>
          <table:table-cell table:number-columns-repeated="4"/>
        </table:table-row>
        <table:table-row table:style-name="ro1">
          <table:table-cell office:value-type="float" office:value="388.635772705078">
            <text:p>388.6357727051</text:p>
          </table:table-cell>
          <table:table-cell office:value-type="float" office:value="0.005211913">
            <text:p>0.005211913</text:p>
          </table:table-cell>
          <table:table-cell table:number-columns-repeated="4"/>
        </table:table-row>
        <table:table-row table:style-name="ro1">
          <table:table-cell office:value-type="float" office:value="388.747222900391">
            <text:p>388.7472229004</text:p>
          </table:table-cell>
          <table:table-cell office:value-type="float" office:value="0.0005611104">
            <text:p>0.0005611104</text:p>
          </table:table-cell>
          <table:table-cell table:number-columns-repeated="4"/>
        </table:table-row>
        <table:table-row table:style-name="ro1">
          <table:table-cell office:value-type="float" office:value="388.858673095703">
            <text:p>388.8586730957</text:p>
          </table:table-cell>
          <table:table-cell office:value-type="float" office:value="-0.007232361">
            <text:p>-0.007232361</text:p>
          </table:table-cell>
          <table:table-cell table:number-columns-repeated="4"/>
        </table:table-row>
        <table:table-row table:style-name="ro1">
          <table:table-cell office:value-type="float" office:value="388.970153808594">
            <text:p>388.9701538086</text:p>
          </table:table-cell>
          <table:table-cell office:value-type="float" office:value="0.00282188">
            <text:p>0.00282188</text:p>
          </table:table-cell>
          <table:table-cell table:number-columns-repeated="4"/>
        </table:table-row>
        <table:table-row table:style-name="ro1">
          <table:table-cell office:value-type="float" office:value="389.081634521484">
            <text:p>389.0816345215</text:p>
          </table:table-cell>
          <table:table-cell office:value-type="float" office:value="-0.0009500805">
            <text:p>-0.0009500805</text:p>
          </table:table-cell>
          <table:table-cell table:number-columns-repeated="4"/>
        </table:table-row>
        <table:table-row table:style-name="ro1">
          <table:table-cell office:value-type="float" office:value="389.193115234375">
            <text:p>389.1931152344</text:p>
          </table:table-cell>
          <table:table-cell office:value-type="float" office:value="0.002669332">
            <text:p>0.002669332</text:p>
          </table:table-cell>
          <table:table-cell table:number-columns-repeated="4"/>
        </table:table-row>
        <table:table-row table:style-name="ro1">
          <table:table-cell office:value-type="float" office:value="389.304595947266">
            <text:p>389.3045959473</text:p>
          </table:table-cell>
          <table:table-cell office:value-type="float" office:value="-0.0009032548">
            <text:p>-0.0009032548</text:p>
          </table:table-cell>
          <table:table-cell table:number-columns-repeated="4"/>
        </table:table-row>
        <table:table-row table:style-name="ro1">
          <table:table-cell office:value-type="float" office:value="389.416076660156">
            <text:p>389.4160766602</text:p>
          </table:table-cell>
          <table:table-cell office:value-type="float" office:value="0.003557149">
            <text:p>0.003557149</text:p>
          </table:table-cell>
          <table:table-cell table:number-columns-repeated="4"/>
        </table:table-row>
        <table:table-row table:style-name="ro1">
          <table:table-cell office:value-type="float" office:value="389.527587890625">
            <text:p>389.5275878906</text:p>
          </table:table-cell>
          <table:table-cell office:value-type="float" office:value="-0.00230513">
            <text:p>-0.00230513</text:p>
          </table:table-cell>
          <table:table-cell table:number-columns-repeated="4"/>
        </table:table-row>
        <table:table-row table:style-name="ro1">
          <table:table-cell office:value-type="float" office:value="389.639099121094">
            <text:p>389.6390991211</text:p>
          </table:table-cell>
          <table:table-cell office:value-type="float" office:value="0.01345675">
            <text:p>0.01345675</text:p>
          </table:table-cell>
          <table:table-cell table:number-columns-repeated="4"/>
        </table:table-row>
        <table:table-row table:style-name="ro1">
          <table:table-cell office:value-type="float" office:value="389.750610351563">
            <text:p>389.7506103516</text:p>
          </table:table-cell>
          <table:table-cell office:value-type="float" office:value="-0.002652256">
            <text:p>-0.002652256</text:p>
          </table:table-cell>
          <table:table-cell table:number-columns-repeated="4"/>
        </table:table-row>
        <table:table-row table:style-name="ro1">
          <table:table-cell office:value-type="float" office:value="389.862121582031">
            <text:p>389.862121582</text:p>
          </table:table-cell>
          <table:table-cell office:value-type="float" office:value="-0.00379122">
            <text:p>-0.00379122</text:p>
          </table:table-cell>
          <table:table-cell table:number-columns-repeated="4"/>
        </table:table-row>
        <table:table-row table:style-name="ro1">
          <table:table-cell office:value-type="float" office:value="389.9736328125">
            <text:p>389.9736328125</text:p>
          </table:table-cell>
          <table:table-cell office:value-type="float" office:value="-0.0007704098">
            <text:p>-0.0007704098</text:p>
          </table:table-cell>
          <table:table-cell table:number-columns-repeated="4"/>
        </table:table-row>
        <table:table-row table:style-name="ro1">
          <table:table-cell office:value-type="float" office:value="390.085174560547">
            <text:p>390.0851745605</text:p>
          </table:table-cell>
          <table:table-cell office:value-type="float" office:value="-0.002792545">
            <text:p>-0.002792545</text:p>
          </table:table-cell>
          <table:table-cell table:number-columns-repeated="4"/>
        </table:table-row>
        <table:table-row table:style-name="ro1">
          <table:table-cell office:value-type="float" office:value="390.196685791016">
            <text:p>390.196685791</text:p>
          </table:table-cell>
          <table:table-cell office:value-type="float" office:value="0.01327085">
            <text:p>0.01327085</text:p>
          </table:table-cell>
          <table:table-cell table:number-columns-repeated="4"/>
        </table:table-row>
        <table:table-row table:style-name="ro1">
          <table:table-cell office:value-type="float" office:value="390.308227539063">
            <text:p>390.3082275391</text:p>
          </table:table-cell>
          <table:table-cell office:value-type="float" office:value="0.0008145887">
            <text:p>0.0008145887</text:p>
          </table:table-cell>
          <table:table-cell table:number-columns-repeated="4"/>
        </table:table-row>
        <table:table-row table:style-name="ro1">
          <table:table-cell office:value-type="float" office:value="390.419769287109">
            <text:p>390.4197692871</text:p>
          </table:table-cell>
          <table:table-cell office:value-type="float" office:value="0.001206536">
            <text:p>0.001206536</text:p>
          </table:table-cell>
          <table:table-cell table:number-columns-repeated="4"/>
        </table:table-row>
        <table:table-row table:style-name="ro1">
          <table:table-cell office:value-type="float" office:value="390.531341552734">
            <text:p>390.5313415527</text:p>
          </table:table-cell>
          <table:table-cell office:value-type="float" office:value="0.001695605">
            <text:p>0.001695605</text:p>
          </table:table-cell>
          <table:table-cell table:number-columns-repeated="4"/>
        </table:table-row>
        <table:table-row table:style-name="ro1">
          <table:table-cell office:value-type="float" office:value="390.642883300781">
            <text:p>390.6428833008</text:p>
          </table:table-cell>
          <table:table-cell office:value-type="float" office:value="-0.002570191">
            <text:p>-0.002570191</text:p>
          </table:table-cell>
          <table:table-cell table:number-columns-repeated="4"/>
        </table:table-row>
        <table:table-row table:style-name="ro1">
          <table:table-cell office:value-type="float" office:value="390.754455566406">
            <text:p>390.7544555664</text:p>
          </table:table-cell>
          <table:table-cell office:value-type="float" office:value="0.01447487">
            <text:p>0.01447487</text:p>
          </table:table-cell>
          <table:table-cell table:number-columns-repeated="4"/>
        </table:table-row>
        <table:table-row table:style-name="ro1">
          <table:table-cell office:value-type="float" office:value="390.866027832031">
            <text:p>390.866027832</text:p>
          </table:table-cell>
          <table:table-cell office:value-type="float" office:value="0.001459444">
            <text:p>0.001459444</text:p>
          </table:table-cell>
          <table:table-cell table:number-columns-repeated="4"/>
        </table:table-row>
        <table:table-row table:style-name="ro1">
          <table:table-cell office:value-type="float" office:value="390.977600097656">
            <text:p>390.9776000977</text:p>
          </table:table-cell>
          <table:table-cell office:value-type="float" office:value="0.001138808">
            <text:p>0.001138808</text:p>
          </table:table-cell>
          <table:table-cell table:number-columns-repeated="4"/>
        </table:table-row>
        <table:table-row table:style-name="ro1">
          <table:table-cell office:value-type="float" office:value="391.089172363281">
            <text:p>391.0891723633</text:p>
          </table:table-cell>
          <table:table-cell office:value-type="float" office:value="-0.005313666">
            <text:p>-0.005313666</text:p>
          </table:table-cell>
          <table:table-cell table:number-columns-repeated="4"/>
        </table:table-row>
        <table:table-row table:style-name="ro1">
          <table:table-cell office:value-type="float" office:value="391.200744628906">
            <text:p>391.2007446289</text:p>
          </table:table-cell>
          <table:table-cell office:value-type="float" office:value="0.01399027">
            <text:p>0.01399027</text:p>
          </table:table-cell>
          <table:table-cell table:number-columns-repeated="4"/>
        </table:table-row>
        <table:table-row table:style-name="ro1">
          <table:table-cell office:value-type="float" office:value="391.312347412109">
            <text:p>391.3123474121</text:p>
          </table:table-cell>
          <table:table-cell office:value-type="float" office:value="-0.0004933355">
            <text:p>-0.0004933355</text:p>
          </table:table-cell>
          <table:table-cell table:number-columns-repeated="4"/>
        </table:table-row>
        <table:table-row table:style-name="ro1">
          <table:table-cell office:value-type="float" office:value="391.423950195313">
            <text:p>391.4239501953</text:p>
          </table:table-cell>
          <table:table-cell office:value-type="float" office:value="0.01147935">
            <text:p>0.01147935</text:p>
          </table:table-cell>
          <table:table-cell table:number-columns-repeated="4"/>
        </table:table-row>
        <table:table-row table:style-name="ro1">
          <table:table-cell office:value-type="float" office:value="391.535552978516">
            <text:p>391.5355529785</text:p>
          </table:table-cell>
          <table:table-cell office:value-type="float" office:value="-0.008354053">
            <text:p>-0.008354053</text:p>
          </table:table-cell>
          <table:table-cell table:number-columns-repeated="4"/>
        </table:table-row>
        <table:table-row table:style-name="ro1">
          <table:table-cell office:value-type="float" office:value="391.647155761719">
            <text:p>391.6471557617</text:p>
          </table:table-cell>
          <table:table-cell office:value-type="float" office:value="0.004632961">
            <text:p>0.004632961</text:p>
          </table:table-cell>
          <table:table-cell table:number-columns-repeated="4"/>
        </table:table-row>
        <table:table-row table:style-name="ro1">
          <table:table-cell office:value-type="float" office:value="391.758758544922">
            <text:p>391.7587585449</text:p>
          </table:table-cell>
          <table:table-cell office:value-type="float" office:value="-0.008965471">
            <text:p>-0.008965471</text:p>
          </table:table-cell>
          <table:table-cell table:number-columns-repeated="4"/>
        </table:table-row>
        <table:table-row table:style-name="ro1">
          <table:table-cell office:value-type="float" office:value="391.870391845703">
            <text:p>391.8703918457</text:p>
          </table:table-cell>
          <table:table-cell office:value-type="float" office:value="0.01231676">
            <text:p>0.01231676</text:p>
          </table:table-cell>
          <table:table-cell table:number-columns-repeated="4"/>
        </table:table-row>
        <table:table-row table:style-name="ro1">
          <table:table-cell office:value-type="float" office:value="391.982025146484">
            <text:p>391.9820251465</text:p>
          </table:table-cell>
          <table:table-cell office:value-type="float" office:value="0.002173267">
            <text:p>0.002173267</text:p>
          </table:table-cell>
          <table:table-cell table:number-columns-repeated="4"/>
        </table:table-row>
        <table:table-row table:style-name="ro1">
          <table:table-cell office:value-type="float" office:value="392.093658447266">
            <text:p>392.0936584473</text:p>
          </table:table-cell>
          <table:table-cell office:value-type="float" office:value="-0.00717514">
            <text:p>-0.00717514</text:p>
          </table:table-cell>
          <table:table-cell table:number-columns-repeated="4"/>
        </table:table-row>
        <table:table-row table:style-name="ro1">
          <table:table-cell office:value-type="float" office:value="392.205291748047">
            <text:p>392.205291748</text:p>
          </table:table-cell>
          <table:table-cell office:value-type="float" office:value="0.0006356442">
            <text:p>0.0006356442</text:p>
          </table:table-cell>
          <table:table-cell table:number-columns-repeated="4"/>
        </table:table-row>
        <table:table-row table:style-name="ro1">
          <table:table-cell office:value-type="float" office:value="392.316925048828">
            <text:p>392.3169250488</text:p>
          </table:table-cell>
          <table:table-cell office:value-type="float" office:value="0.01520412">
            <text:p>0.01520412</text:p>
          </table:table-cell>
          <table:table-cell table:number-columns-repeated="4"/>
        </table:table-row>
        <table:table-row table:style-name="ro1">
          <table:table-cell office:value-type="float" office:value="392.428558349609">
            <text:p>392.4285583496</text:p>
          </table:table-cell>
          <table:table-cell office:value-type="float" office:value="0.01115149">
            <text:p>0.01115149</text:p>
          </table:table-cell>
          <table:table-cell table:number-columns-repeated="4"/>
        </table:table-row>
        <table:table-row table:style-name="ro1">
          <table:table-cell office:value-type="float" office:value="392.540222167969">
            <text:p>392.540222168</text:p>
          </table:table-cell>
          <table:table-cell office:value-type="float" office:value="-0.002908088">
            <text:p>-0.002908088</text:p>
          </table:table-cell>
          <table:table-cell table:number-columns-repeated="4"/>
        </table:table-row>
        <table:table-row table:style-name="ro1">
          <table:table-cell office:value-type="float" office:value="392.651885986328">
            <text:p>392.6518859863</text:p>
          </table:table-cell>
          <table:table-cell office:value-type="float" office:value="-0.006966528">
            <text:p>-0.006966528</text:p>
          </table:table-cell>
          <table:table-cell table:number-columns-repeated="4"/>
        </table:table-row>
        <table:table-row table:style-name="ro1">
          <table:table-cell office:value-type="float" office:value="392.763549804688">
            <text:p>392.7635498047</text:p>
          </table:table-cell>
          <table:table-cell office:value-type="float" office:value="-0.0001217179">
            <text:p>-0.0001217179</text:p>
          </table:table-cell>
          <table:table-cell table:number-columns-repeated="4"/>
        </table:table-row>
        <table:table-row table:style-name="ro1">
          <table:table-cell office:value-type="float" office:value="392.875213623047">
            <text:p>392.875213623</text:p>
          </table:table-cell>
          <table:table-cell office:value-type="float" office:value="0.0006309159">
            <text:p>0.0006309159</text:p>
          </table:table-cell>
          <table:table-cell table:number-columns-repeated="4"/>
        </table:table-row>
        <table:table-row table:style-name="ro1">
          <table:table-cell office:value-type="float" office:value="392.986907958984">
            <text:p>392.986907959</text:p>
          </table:table-cell>
          <table:table-cell office:value-type="float" office:value="0.004602819">
            <text:p>0.004602819</text:p>
          </table:table-cell>
          <table:table-cell table:number-columns-repeated="4"/>
        </table:table-row>
        <table:table-row table:style-name="ro1">
          <table:table-cell office:value-type="float" office:value="393.098602294922">
            <text:p>393.0986022949</text:p>
          </table:table-cell>
          <table:table-cell office:value-type="float" office:value="0.01348516">
            <text:p>0.01348516</text:p>
          </table:table-cell>
          <table:table-cell table:number-columns-repeated="4"/>
        </table:table-row>
        <table:table-row table:style-name="ro1">
          <table:table-cell office:value-type="float" office:value="393.210266113281">
            <text:p>393.2102661133</text:p>
          </table:table-cell>
          <table:table-cell office:value-type="float" office:value="-0.002557262">
            <text:p>-0.002557262</text:p>
          </table:table-cell>
          <table:table-cell table:number-columns-repeated="4"/>
        </table:table-row>
        <table:table-row table:style-name="ro1">
          <table:table-cell office:value-type="float" office:value="393.321960449219">
            <text:p>393.3219604492</text:p>
          </table:table-cell>
          <table:table-cell office:value-type="float" office:value="-0.000998088">
            <text:p>-0.000998088</text:p>
          </table:table-cell>
          <table:table-cell table:number-columns-repeated="4"/>
        </table:table-row>
        <table:table-row table:style-name="ro1">
          <table:table-cell office:value-type="float" office:value="393.433685302734">
            <text:p>393.4336853027</text:p>
          </table:table-cell>
          <table:table-cell office:value-type="float" office:value="-0.004139442">
            <text:p>-0.004139442</text:p>
          </table:table-cell>
          <table:table-cell table:number-columns-repeated="4"/>
        </table:table-row>
        <table:table-row table:style-name="ro1">
          <table:table-cell office:value-type="float" office:value="393.545379638672">
            <text:p>393.5453796387</text:p>
          </table:table-cell>
          <table:table-cell office:value-type="float" office:value="-0.009116253">
            <text:p>-0.009116253</text:p>
          </table:table-cell>
          <table:table-cell table:number-columns-repeated="4"/>
        </table:table-row>
        <table:table-row table:style-name="ro1">
          <table:table-cell office:value-type="float" office:value="393.657104492188">
            <text:p>393.6571044922</text:p>
          </table:table-cell>
          <table:table-cell office:value-type="float" office:value="0.0005625964">
            <text:p>0.0005625964</text:p>
          </table:table-cell>
          <table:table-cell table:number-columns-repeated="4"/>
        </table:table-row>
        <table:table-row table:style-name="ro1">
          <table:table-cell office:value-type="float" office:value="393.768798828125">
            <text:p>393.7687988281</text:p>
          </table:table-cell>
          <table:table-cell office:value-type="float" office:value="-0.005292573">
            <text:p>-0.005292573</text:p>
          </table:table-cell>
          <table:table-cell table:number-columns-repeated="4"/>
        </table:table-row>
        <table:table-row table:style-name="ro1">
          <table:table-cell office:value-type="float" office:value="393.880523681641">
            <text:p>393.8805236816</text:p>
          </table:table-cell>
          <table:table-cell office:value-type="float" office:value="0.01128847">
            <text:p>0.01128847</text:p>
          </table:table-cell>
          <table:table-cell table:number-columns-repeated="4"/>
        </table:table-row>
        <table:table-row table:style-name="ro1">
          <table:table-cell office:value-type="float" office:value="393.992248535156">
            <text:p>393.9922485352</text:p>
          </table:table-cell>
          <table:table-cell office:value-type="float" office:value="0.02030533">
            <text:p>0.02030533</text:p>
          </table:table-cell>
          <table:table-cell table:number-columns-repeated="4"/>
        </table:table-row>
        <table:table-row table:style-name="ro1">
          <table:table-cell office:value-type="float" office:value="394.10400390625">
            <text:p>394.1040039063</text:p>
          </table:table-cell>
          <table:table-cell office:value-type="float" office:value="-0.005408645">
            <text:p>-0.005408645</text:p>
          </table:table-cell>
          <table:table-cell table:number-columns-repeated="4"/>
        </table:table-row>
        <table:table-row table:style-name="ro1">
          <table:table-cell office:value-type="float" office:value="394.215728759766">
            <text:p>394.2157287598</text:p>
          </table:table-cell>
          <table:table-cell office:value-type="float" office:value="0.001798818">
            <text:p>0.001798818</text:p>
          </table:table-cell>
          <table:table-cell table:number-columns-repeated="4"/>
        </table:table-row>
        <table:table-row table:style-name="ro1">
          <table:table-cell office:value-type="float" office:value="394.327484130859">
            <text:p>394.3274841309</text:p>
          </table:table-cell>
          <table:table-cell office:value-type="float" office:value="0.006033415">
            <text:p>0.006033415</text:p>
          </table:table-cell>
          <table:table-cell table:number-columns-repeated="4"/>
        </table:table-row>
        <table:table-row table:style-name="ro1">
          <table:table-cell office:value-type="float" office:value="394.439239501953">
            <text:p>394.439239502</text:p>
          </table:table-cell>
          <table:table-cell office:value-type="float" office:value="-0.001334443">
            <text:p>-0.001334443</text:p>
          </table:table-cell>
          <table:table-cell table:number-columns-repeated="4"/>
        </table:table-row>
        <table:table-row table:style-name="ro1">
          <table:table-cell office:value-type="float" office:value="394.550994873047">
            <text:p>394.550994873</text:p>
          </table:table-cell>
          <table:table-cell office:value-type="float" office:value="-0.007315006">
            <text:p>-0.007315006</text:p>
          </table:table-cell>
          <table:table-cell table:number-columns-repeated="4"/>
        </table:table-row>
        <table:table-row table:style-name="ro1">
          <table:table-cell office:value-type="float" office:value="394.662750244141">
            <text:p>394.6627502441</text:p>
          </table:table-cell>
          <table:table-cell office:value-type="float" office:value="0.003643118">
            <text:p>0.003643118</text:p>
          </table:table-cell>
          <table:table-cell table:number-columns-repeated="4"/>
        </table:table-row>
        <table:table-row table:style-name="ro1">
          <table:table-cell office:value-type="float" office:value="394.774536132813">
            <text:p>394.7745361328</text:p>
          </table:table-cell>
          <table:table-cell office:value-type="float" office:value="-0.00195931">
            <text:p>-0.00195931</text:p>
          </table:table-cell>
          <table:table-cell table:number-columns-repeated="4"/>
        </table:table-row>
        <table:table-row table:style-name="ro1">
          <table:table-cell office:value-type="float" office:value="394.886291503906">
            <text:p>394.8862915039</text:p>
          </table:table-cell>
          <table:table-cell office:value-type="float" office:value="0.008163762">
            <text:p>0.008163762</text:p>
          </table:table-cell>
          <table:table-cell table:number-columns-repeated="4"/>
        </table:table-row>
        <table:table-row table:style-name="ro1">
          <table:table-cell office:value-type="float" office:value="394.998077392578">
            <text:p>394.9980773926</text:p>
          </table:table-cell>
          <table:table-cell office:value-type="float" office:value="-0.002075709">
            <text:p>-0.002075709</text:p>
          </table:table-cell>
          <table:table-cell table:number-columns-repeated="4"/>
        </table:table-row>
        <table:table-row table:style-name="ro1">
          <table:table-cell office:value-type="float" office:value="395.10986328125">
            <text:p>395.1098632813</text:p>
          </table:table-cell>
          <table:table-cell office:value-type="float" office:value="0.009103987">
            <text:p>0.009103987</text:p>
          </table:table-cell>
          <table:table-cell table:number-columns-repeated="4"/>
        </table:table-row>
        <table:table-row table:style-name="ro1">
          <table:table-cell office:value-type="float" office:value="395.221649169922">
            <text:p>395.2216491699</text:p>
          </table:table-cell>
          <table:table-cell office:value-type="float" office:value="-0.001740258">
            <text:p>-0.001740258</text:p>
          </table:table-cell>
          <table:table-cell table:number-columns-repeated="4"/>
        </table:table-row>
        <table:table-row table:style-name="ro1">
          <table:table-cell office:value-type="float" office:value="395.333465576172">
            <text:p>395.3334655762</text:p>
          </table:table-cell>
          <table:table-cell office:value-type="float" office:value="-0.007696766">
            <text:p>-0.007696766</text:p>
          </table:table-cell>
          <table:table-cell table:number-columns-repeated="4"/>
        </table:table-row>
        <table:table-row table:style-name="ro1">
          <table:table-cell office:value-type="float" office:value="395.445251464844">
            <text:p>395.4452514648</text:p>
          </table:table-cell>
          <table:table-cell office:value-type="float" office:value="-0.001918224">
            <text:p>-0.001918224</text:p>
          </table:table-cell>
          <table:table-cell table:number-columns-repeated="4"/>
        </table:table-row>
        <table:table-row table:style-name="ro1">
          <table:table-cell office:value-type="float" office:value="395.557067871094">
            <text:p>395.5570678711</text:p>
          </table:table-cell>
          <table:table-cell office:value-type="float" office:value="-0.005053193">
            <text:p>-0.005053193</text:p>
          </table:table-cell>
          <table:table-cell table:number-columns-repeated="4"/>
        </table:table-row>
        <table:table-row table:style-name="ro1">
          <table:table-cell office:value-type="float" office:value="395.668884277344">
            <text:p>395.6688842773</text:p>
          </table:table-cell>
          <table:table-cell office:value-type="float" office:value="0.04036934">
            <text:p>0.04036934</text:p>
          </table:table-cell>
          <table:table-cell table:number-columns-repeated="4"/>
        </table:table-row>
        <table:table-row table:style-name="ro1">
          <table:table-cell office:value-type="float" office:value="395.780700683594">
            <text:p>395.7807006836</text:p>
          </table:table-cell>
          <table:table-cell office:value-type="float" office:value="-0.002145667">
            <text:p>-0.002145667</text:p>
          </table:table-cell>
          <table:table-cell table:number-columns-repeated="4"/>
        </table:table-row>
        <table:table-row table:style-name="ro1">
          <table:table-cell office:value-type="float" office:value="395.892547607422">
            <text:p>395.8925476074</text:p>
          </table:table-cell>
          <table:table-cell office:value-type="float" office:value="0.003075006">
            <text:p>0.003075006</text:p>
          </table:table-cell>
          <table:table-cell table:number-columns-repeated="4"/>
        </table:table-row>
        <table:table-row table:style-name="ro1">
          <table:table-cell office:value-type="float" office:value="396.004364013672">
            <text:p>396.0043640137</text:p>
          </table:table-cell>
          <table:table-cell office:value-type="float" office:value="0.002738909">
            <text:p>0.002738909</text:p>
          </table:table-cell>
          <table:table-cell table:number-columns-repeated="4"/>
        </table:table-row>
        <table:table-row table:style-name="ro1">
          <table:table-cell office:value-type="float" office:value="396.1162109375">
            <text:p>396.1162109375</text:p>
          </table:table-cell>
          <table:table-cell office:value-type="float" office:value="0.0435134">
            <text:p>0.0435134</text:p>
          </table:table-cell>
          <table:table-cell table:number-columns-repeated="4"/>
        </table:table-row>
        <table:table-row table:style-name="ro1">
          <table:table-cell office:value-type="float" office:value="396.228057861328">
            <text:p>396.2280578613</text:p>
          </table:table-cell>
          <table:table-cell office:value-type="float" office:value="0.0003890638">
            <text:p>0.0003890638</text:p>
          </table:table-cell>
          <table:table-cell table:number-columns-repeated="4"/>
        </table:table-row>
        <table:table-row table:style-name="ro1">
          <table:table-cell office:value-type="float" office:value="396.339904785156">
            <text:p>396.3399047852</text:p>
          </table:table-cell>
          <table:table-cell office:value-type="float" office:value="-0.001848653">
            <text:p>-0.001848653</text:p>
          </table:table-cell>
          <table:table-cell table:number-columns-repeated="4"/>
        </table:table-row>
        <table:table-row table:style-name="ro1">
          <table:table-cell office:value-type="float" office:value="396.451751708984">
            <text:p>396.451751709</text:p>
          </table:table-cell>
          <table:table-cell office:value-type="float" office:value="-0.003930273">
            <text:p>-0.003930273</text:p>
          </table:table-cell>
          <table:table-cell table:number-columns-repeated="4"/>
        </table:table-row>
        <table:table-row table:style-name="ro1">
          <table:table-cell office:value-type="float" office:value="396.563629150391">
            <text:p>396.5636291504</text:p>
          </table:table-cell>
          <table:table-cell office:value-type="float" office:value="-0.006078608">
            <text:p>-0.006078608</text:p>
          </table:table-cell>
          <table:table-cell table:number-columns-repeated="4"/>
        </table:table-row>
        <table:table-row table:style-name="ro1">
          <table:table-cell office:value-type="float" office:value="396.675476074219">
            <text:p>396.6754760742</text:p>
          </table:table-cell>
          <table:table-cell office:value-type="float" office:value="-0.001936003">
            <text:p>-0.001936003</text:p>
          </table:table-cell>
          <table:table-cell table:number-columns-repeated="4"/>
        </table:table-row>
        <table:table-row table:style-name="ro1">
          <table:table-cell office:value-type="float" office:value="396.787353515625">
            <text:p>396.7873535156</text:p>
          </table:table-cell>
          <table:table-cell office:value-type="float" office:value="0.01139791">
            <text:p>0.01139791</text:p>
          </table:table-cell>
          <table:table-cell table:number-columns-repeated="4"/>
        </table:table-row>
        <table:table-row table:style-name="ro1">
          <table:table-cell office:value-type="float" office:value="396.899230957031">
            <text:p>396.899230957</text:p>
          </table:table-cell>
          <table:table-cell office:value-type="float" office:value="-0.003779194">
            <text:p>-0.003779194</text:p>
          </table:table-cell>
          <table:table-cell table:number-columns-repeated="4"/>
        </table:table-row>
        <table:table-row table:style-name="ro1">
          <table:table-cell office:value-type="float" office:value="397.011108398438">
            <text:p>397.0111083984</text:p>
          </table:table-cell>
          <table:table-cell office:value-type="float" office:value="0.002283692">
            <text:p>0.002283692</text:p>
          </table:table-cell>
          <table:table-cell table:number-columns-repeated="4"/>
        </table:table-row>
        <table:table-row table:style-name="ro1">
          <table:table-cell office:value-type="float" office:value="397.123016357422">
            <text:p>397.1230163574</text:p>
          </table:table-cell>
          <table:table-cell office:value-type="float" office:value="-0.003294682">
            <text:p>-0.003294682</text:p>
          </table:table-cell>
          <table:table-cell table:number-columns-repeated="4"/>
        </table:table-row>
        <table:table-row table:style-name="ro1">
          <table:table-cell office:value-type="float" office:value="397.234893798828">
            <text:p>397.2348937988</text:p>
          </table:table-cell>
          <table:table-cell office:value-type="float" office:value="0.006135957">
            <text:p>0.006135957</text:p>
          </table:table-cell>
          <table:table-cell table:number-columns-repeated="4"/>
        </table:table-row>
        <table:table-row table:style-name="ro1">
          <table:table-cell office:value-type="float" office:value="397.346801757813">
            <text:p>397.3468017578</text:p>
          </table:table-cell>
          <table:table-cell office:value-type="float" office:value="0.003290309">
            <text:p>0.003290309</text:p>
          </table:table-cell>
          <table:table-cell table:number-columns-repeated="4"/>
        </table:table-row>
        <table:table-row table:style-name="ro1">
          <table:table-cell office:value-type="float" office:value="397.458709716797">
            <text:p>397.4587097168</text:p>
          </table:table-cell>
          <table:table-cell office:value-type="float" office:value="-0.001577302">
            <text:p>-0.001577302</text:p>
          </table:table-cell>
          <table:table-cell table:number-columns-repeated="4"/>
        </table:table-row>
        <table:table-row table:style-name="ro1">
          <table:table-cell office:value-type="float" office:value="397.570617675781">
            <text:p>397.5706176758</text:p>
          </table:table-cell>
          <table:table-cell office:value-type="float" office:value="0.005552104">
            <text:p>0.005552104</text:p>
          </table:table-cell>
          <table:table-cell table:number-columns-repeated="4"/>
        </table:table-row>
        <table:table-row table:style-name="ro1">
          <table:table-cell office:value-type="float" office:value="397.682525634766">
            <text:p>397.6825256348</text:p>
          </table:table-cell>
          <table:table-cell office:value-type="float" office:value="-0.002269562">
            <text:p>-0.002269562</text:p>
          </table:table-cell>
          <table:table-cell table:number-columns-repeated="4"/>
        </table:table-row>
        <table:table-row table:style-name="ro1">
          <table:table-cell office:value-type="float" office:value="397.794464111328">
            <text:p>397.7944641113</text:p>
          </table:table-cell>
          <table:table-cell office:value-type="float" office:value="0.002598975">
            <text:p>0.002598975</text:p>
          </table:table-cell>
          <table:table-cell table:number-columns-repeated="4"/>
        </table:table-row>
        <table:table-row table:style-name="ro1">
          <table:table-cell office:value-type="float" office:value="397.906402587891">
            <text:p>397.9064025879</text:p>
          </table:table-cell>
          <table:table-cell office:value-type="float" office:value="0.0013291">
            <text:p>0.0013291</text:p>
          </table:table-cell>
          <table:table-cell table:number-columns-repeated="4"/>
        </table:table-row>
        <table:table-row table:style-name="ro1">
          <table:table-cell office:value-type="float" office:value="398.018310546875">
            <text:p>398.0183105469</text:p>
          </table:table-cell>
          <table:table-cell office:value-type="float" office:value="0.006593111">
            <text:p>0.006593111</text:p>
          </table:table-cell>
          <table:table-cell table:number-columns-repeated="4"/>
        </table:table-row>
        <table:table-row table:style-name="ro1">
          <table:table-cell office:value-type="float" office:value="398.130249023438">
            <text:p>398.1302490234</text:p>
          </table:table-cell>
          <table:table-cell office:value-type="float" office:value="-0.002812335">
            <text:p>-0.002812335</text:p>
          </table:table-cell>
          <table:table-cell table:number-columns-repeated="4"/>
        </table:table-row>
        <table:table-row table:style-name="ro1">
          <table:table-cell office:value-type="float" office:value="398.242218017578">
            <text:p>398.2422180176</text:p>
          </table:table-cell>
          <table:table-cell office:value-type="float" office:value="-0.0008176969">
            <text:p>-0.0008176969</text:p>
          </table:table-cell>
          <table:table-cell table:number-columns-repeated="4"/>
        </table:table-row>
        <table:table-row table:style-name="ro1">
          <table:table-cell office:value-type="float" office:value="398.354156494141">
            <text:p>398.3541564941</text:p>
          </table:table-cell>
          <table:table-cell office:value-type="float" office:value="-0.001756837">
            <text:p>-0.001756837</text:p>
          </table:table-cell>
          <table:table-cell table:number-columns-repeated="4"/>
        </table:table-row>
        <table:table-row table:style-name="ro1">
          <table:table-cell office:value-type="float" office:value="398.466125488281">
            <text:p>398.4661254883</text:p>
          </table:table-cell>
          <table:table-cell office:value-type="float" office:value="-0.001297164">
            <text:p>-0.001297164</text:p>
          </table:table-cell>
          <table:table-cell table:number-columns-repeated="4"/>
        </table:table-row>
        <table:table-row table:style-name="ro1">
          <table:table-cell office:value-type="float" office:value="398.578094482422">
            <text:p>398.5780944824</text:p>
          </table:table-cell>
          <table:table-cell office:value-type="float" office:value="-0.001029284">
            <text:p>-0.001029284</text:p>
          </table:table-cell>
          <table:table-cell table:number-columns-repeated="4"/>
        </table:table-row>
        <table:table-row table:style-name="ro1">
          <table:table-cell office:value-type="float" office:value="398.690063476563">
            <text:p>398.6900634766</text:p>
          </table:table-cell>
          <table:table-cell office:value-type="float" office:value="-0.004996883">
            <text:p>-0.004996883</text:p>
          </table:table-cell>
          <table:table-cell table:number-columns-repeated="4"/>
        </table:table-row>
        <table:table-row table:style-name="ro1">
          <table:table-cell office:value-type="float" office:value="398.802032470703">
            <text:p>398.8020324707</text:p>
          </table:table-cell>
          <table:table-cell office:value-type="float" office:value="-0.004803245">
            <text:p>-0.004803245</text:p>
          </table:table-cell>
          <table:table-cell table:number-columns-repeated="4"/>
        </table:table-row>
        <table:table-row table:style-name="ro1">
          <table:table-cell office:value-type="float" office:value="398.914001464844">
            <text:p>398.9140014648</text:p>
          </table:table-cell>
          <table:table-cell office:value-type="float" office:value="-0.003155308">
            <text:p>-0.003155308</text:p>
          </table:table-cell>
          <table:table-cell table:number-columns-repeated="4"/>
        </table:table-row>
        <table:table-row table:style-name="ro1">
          <table:table-cell office:value-type="float" office:value="399.026000976563">
            <text:p>399.0260009766</text:p>
          </table:table-cell>
          <table:table-cell office:value-type="float" office:value="0.02014644">
            <text:p>0.02014644</text:p>
          </table:table-cell>
          <table:table-cell table:number-columns-repeated="4"/>
        </table:table-row>
        <table:table-row table:style-name="ro1">
          <table:table-cell office:value-type="float" office:value="399.137969970703">
            <text:p>399.1379699707</text:p>
          </table:table-cell>
          <table:table-cell office:value-type="float" office:value="-0.001762063">
            <text:p>-0.001762063</text:p>
          </table:table-cell>
          <table:table-cell table:number-columns-repeated="4"/>
        </table:table-row>
        <table:table-row table:style-name="ro1">
          <table:table-cell office:value-type="float" office:value="399.249969482422">
            <text:p>399.2499694824</text:p>
          </table:table-cell>
          <table:table-cell office:value-type="float" office:value="0.0155235">
            <text:p>0.0155235</text:p>
          </table:table-cell>
          <table:table-cell table:number-columns-repeated="4"/>
        </table:table-row>
        <table:table-row table:style-name="ro1">
          <table:table-cell office:value-type="float" office:value="399.361968994141">
            <text:p>399.3619689941</text:p>
          </table:table-cell>
          <table:table-cell office:value-type="float" office:value="-0.002176882">
            <text:p>-0.002176882</text:p>
          </table:table-cell>
          <table:table-cell table:number-columns-repeated="4"/>
        </table:table-row>
        <table:table-row table:style-name="ro1">
          <table:table-cell office:value-type="float" office:value="399.473999023438">
            <text:p>399.4739990234</text:p>
          </table:table-cell>
          <table:table-cell office:value-type="float" office:value="0.008294315">
            <text:p>0.008294315</text:p>
          </table:table-cell>
          <table:table-cell table:number-columns-repeated="4"/>
        </table:table-row>
        <table:table-row table:style-name="ro1">
          <table:table-cell office:value-type="float" office:value="399.585998535156">
            <text:p>399.5859985352</text:p>
          </table:table-cell>
          <table:table-cell office:value-type="float" office:value="0.0003941474">
            <text:p>0.0003941474</text:p>
          </table:table-cell>
          <table:table-cell table:number-columns-repeated="4"/>
        </table:table-row>
        <table:table-row table:style-name="ro1">
          <table:table-cell office:value-type="float" office:value="399.698028564453">
            <text:p>399.6980285645</text:p>
          </table:table-cell>
          <table:table-cell office:value-type="float" office:value="-0.001848938">
            <text:p>-0.001848938</text:p>
          </table:table-cell>
          <table:table-cell table:number-columns-repeated="4"/>
        </table:table-row>
        <table:table-row table:style-name="ro1">
          <table:table-cell office:value-type="float" office:value="399.81005859375">
            <text:p>399.8100585938</text:p>
          </table:table-cell>
          <table:table-cell office:value-type="float" office:value="-0.00597561">
            <text:p>-0.00597561</text:p>
          </table:table-cell>
          <table:table-cell table:number-columns-repeated="4"/>
        </table:table-row>
        <table:table-row table:style-name="ro1">
          <table:table-cell office:value-type="float" office:value="399.922088623047">
            <text:p>399.922088623</text:p>
          </table:table-cell>
          <table:table-cell office:value-type="float" office:value="-0.002326224">
            <text:p>-0.002326224</text:p>
          </table:table-cell>
          <table:table-cell table:number-columns-repeated="4"/>
        </table:table-row>
        <table:table-row table:style-name="ro1">
          <table:table-cell office:value-type="float" office:value="400.034118652344">
            <text:p>400.0341186523</text:p>
          </table:table-cell>
          <table:table-cell office:value-type="float" office:value="-0.006681163">
            <text:p>-0.006681163</text:p>
          </table:table-cell>
          <table:table-cell table:number-columns-repeated="4"/>
        </table:table-row>
        <table:table-row table:style-name="ro1">
          <table:table-cell office:value-type="float" office:value="400.146148681641">
            <text:p>400.1461486816</text:p>
          </table:table-cell>
          <table:table-cell office:value-type="float" office:value="0.0003624281">
            <text:p>0.0003624281</text:p>
          </table:table-cell>
          <table:table-cell table:number-columns-repeated="4"/>
        </table:table-row>
        <table:table-row table:style-name="ro1">
          <table:table-cell office:value-type="float" office:value="400.258209228516">
            <text:p>400.2582092285</text:p>
          </table:table-cell>
          <table:table-cell office:value-type="float" office:value="-0.002330791">
            <text:p>-0.002330791</text:p>
          </table:table-cell>
          <table:table-cell table:number-columns-repeated="4"/>
        </table:table-row>
        <table:table-row table:style-name="ro1">
          <table:table-cell office:value-type="float" office:value="400.370269775391">
            <text:p>400.3702697754</text:p>
          </table:table-cell>
          <table:table-cell office:value-type="float" office:value="0.003563431">
            <text:p>0.003563431</text:p>
          </table:table-cell>
          <table:table-cell table:number-columns-repeated="4"/>
        </table:table-row>
        <table:table-row table:style-name="ro1">
          <table:table-cell office:value-type="float" office:value="400.482330322266">
            <text:p>400.4823303223</text:p>
          </table:table-cell>
          <table:table-cell office:value-type="float" office:value="-0.001438752">
            <text:p>-0.001438752</text:p>
          </table:table-cell>
          <table:table-cell table:number-columns-repeated="4"/>
        </table:table-row>
        <table:table-row table:style-name="ro1">
          <table:table-cell office:value-type="float" office:value="400.594390869141">
            <text:p>400.5943908691</text:p>
          </table:table-cell>
          <table:table-cell office:value-type="float" office:value="0.006885281">
            <text:p>0.006885281</text:p>
          </table:table-cell>
          <table:table-cell table:number-columns-repeated="4"/>
        </table:table-row>
        <table:table-row table:style-name="ro1">
          <table:table-cell office:value-type="float" office:value="400.706451416016">
            <text:p>400.706451416</text:p>
          </table:table-cell>
          <table:table-cell office:value-type="float" office:value="-0.003371377">
            <text:p>-0.003371377</text:p>
          </table:table-cell>
          <table:table-cell table:number-columns-repeated="4"/>
        </table:table-row>
        <table:table-row table:style-name="ro1">
          <table:table-cell office:value-type="float" office:value="400.818511962891">
            <text:p>400.8185119629</text:p>
          </table:table-cell>
          <table:table-cell office:value-type="float" office:value="0.006523484">
            <text:p>0.006523484</text:p>
          </table:table-cell>
          <table:table-cell table:number-columns-repeated="4"/>
        </table:table-row>
        <table:table-row table:style-name="ro1">
          <table:table-cell office:value-type="float" office:value="400.930603027344">
            <text:p>400.9306030273</text:p>
          </table:table-cell>
          <table:table-cell office:value-type="float" office:value="0.007037331">
            <text:p>0.007037331</text:p>
          </table:table-cell>
          <table:table-cell table:number-columns-repeated="4"/>
        </table:table-row>
        <table:table-row table:style-name="ro1">
          <table:table-cell office:value-type="float" office:value="401.042694091797">
            <text:p>401.0426940918</text:p>
          </table:table-cell>
          <table:table-cell office:value-type="float" office:value="0.0001951299">
            <text:p>0.0001951299</text:p>
          </table:table-cell>
          <table:table-cell table:number-columns-repeated="4"/>
        </table:table-row>
        <table:table-row table:style-name="ro1">
          <table:table-cell office:value-type="float" office:value="401.15478515625">
            <text:p>401.1547851563</text:p>
          </table:table-cell>
          <table:table-cell office:value-type="float" office:value="0.005975964">
            <text:p>0.005975964</text:p>
          </table:table-cell>
          <table:table-cell table:number-columns-repeated="4"/>
        </table:table-row>
        <table:table-row table:style-name="ro1">
          <table:table-cell office:value-type="float" office:value="401.266876220703">
            <text:p>401.2668762207</text:p>
          </table:table-cell>
          <table:table-cell office:value-type="float" office:value="0.00476803">
            <text:p>0.00476803</text:p>
          </table:table-cell>
          <table:table-cell table:number-columns-repeated="4"/>
        </table:table-row>
        <table:table-row table:style-name="ro1">
          <table:table-cell office:value-type="float" office:value="401.378997802734">
            <text:p>401.3789978027</text:p>
          </table:table-cell>
          <table:table-cell office:value-type="float" office:value="0.001357475">
            <text:p>0.001357475</text:p>
          </table:table-cell>
          <table:table-cell table:number-columns-repeated="4"/>
        </table:table-row>
        <table:table-row table:style-name="ro1">
          <table:table-cell office:value-type="float" office:value="401.491088867188">
            <text:p>401.4910888672</text:p>
          </table:table-cell>
          <table:table-cell office:value-type="float" office:value="-0.0003766951">
            <text:p>-0.0003766951</text:p>
          </table:table-cell>
          <table:table-cell table:number-columns-repeated="4"/>
        </table:table-row>
        <table:table-row table:style-name="ro1">
          <table:table-cell office:value-type="float" office:value="401.603210449219">
            <text:p>401.6032104492</text:p>
          </table:table-cell>
          <table:table-cell office:value-type="float" office:value="0.0003059199">
            <text:p>0.0003059199</text:p>
          </table:table-cell>
          <table:table-cell table:number-columns-repeated="4"/>
        </table:table-row>
        <table:table-row table:style-name="ro1">
          <table:table-cell office:value-type="float" office:value="401.71533203125">
            <text:p>401.7153320313</text:p>
          </table:table-cell>
          <table:table-cell office:value-type="float" office:value="-0.002652572">
            <text:p>-0.002652572</text:p>
          </table:table-cell>
          <table:table-cell table:number-columns-repeated="4"/>
        </table:table-row>
        <table:table-row table:style-name="ro1">
          <table:table-cell office:value-type="float" office:value="401.827453613281">
            <text:p>401.8274536133</text:p>
          </table:table-cell>
          <table:table-cell office:value-type="float" office:value="0.00100787">
            <text:p>0.00100787</text:p>
          </table:table-cell>
          <table:table-cell table:number-columns-repeated="4"/>
        </table:table-row>
        <table:table-row table:style-name="ro1">
          <table:table-cell office:value-type="float" office:value="401.939605712891">
            <text:p>401.9396057129</text:p>
          </table:table-cell>
          <table:table-cell office:value-type="float" office:value="0.002183547">
            <text:p>0.002183547</text:p>
          </table:table-cell>
          <table:table-cell table:number-columns-repeated="4"/>
        </table:table-row>
        <table:table-row table:style-name="ro1">
          <table:table-cell office:value-type="float" office:value="402.051727294922">
            <text:p>402.0517272949</text:p>
          </table:table-cell>
          <table:table-cell office:value-type="float" office:value="-0.005132418">
            <text:p>-0.005132418</text:p>
          </table:table-cell>
          <table:table-cell table:number-columns-repeated="4"/>
        </table:table-row>
        <table:table-row table:style-name="ro1">
          <table:table-cell office:value-type="float" office:value="402.163879394531">
            <text:p>402.1638793945</text:p>
          </table:table-cell>
          <table:table-cell office:value-type="float" office:value="0.009806376">
            <text:p>0.009806376</text:p>
          </table:table-cell>
          <table:table-cell table:number-columns-repeated="4"/>
        </table:table-row>
        <table:table-row table:style-name="ro1">
          <table:table-cell office:value-type="float" office:value="402.276031494141">
            <text:p>402.2760314941</text:p>
          </table:table-cell>
          <table:table-cell office:value-type="float" office:value="-0.001894814">
            <text:p>-0.001894814</text:p>
          </table:table-cell>
          <table:table-cell table:number-columns-repeated="4"/>
        </table:table-row>
        <table:table-row table:style-name="ro1">
          <table:table-cell office:value-type="float" office:value="402.38818359375">
            <text:p>402.3881835938</text:p>
          </table:table-cell>
          <table:table-cell office:value-type="float" office:value="-0.001491565">
            <text:p>-0.001491565</text:p>
          </table:table-cell>
          <table:table-cell table:number-columns-repeated="4"/>
        </table:table-row>
        <table:table-row table:style-name="ro1">
          <table:table-cell office:value-type="float" office:value="402.500335693359">
            <text:p>402.5003356934</text:p>
          </table:table-cell>
          <table:table-cell office:value-type="float" office:value="0.001100396">
            <text:p>0.001100396</text:p>
          </table:table-cell>
          <table:table-cell table:number-columns-repeated="4"/>
        </table:table-row>
        <table:table-row table:style-name="ro1">
          <table:table-cell office:value-type="float" office:value="402.612487792969">
            <text:p>402.612487793</text:p>
          </table:table-cell>
          <table:table-cell office:value-type="float" office:value="0.005693093">
            <text:p>0.005693093</text:p>
          </table:table-cell>
          <table:table-cell table:number-columns-repeated="4"/>
        </table:table-row>
        <table:table-row table:style-name="ro1">
          <table:table-cell office:value-type="float" office:value="402.724670410156">
            <text:p>402.7246704102</text:p>
          </table:table-cell>
          <table:table-cell office:value-type="float" office:value="0.005917368">
            <text:p>0.005917368</text:p>
          </table:table-cell>
          <table:table-cell table:number-columns-repeated="4"/>
        </table:table-row>
        <table:table-row table:style-name="ro1">
          <table:table-cell office:value-type="float" office:value="402.836853027344">
            <text:p>402.8368530273</text:p>
          </table:table-cell>
          <table:table-cell office:value-type="float" office:value="0.004529992">
            <text:p>0.004529992</text:p>
          </table:table-cell>
          <table:table-cell table:number-columns-repeated="4"/>
        </table:table-row>
        <table:table-row table:style-name="ro1">
          <table:table-cell office:value-type="float" office:value="402.949035644531">
            <text:p>402.9490356445</text:p>
          </table:table-cell>
          <table:table-cell office:value-type="float" office:value="0.01297886">
            <text:p>0.01297886</text:p>
          </table:table-cell>
          <table:table-cell table:number-columns-repeated="4"/>
        </table:table-row>
        <table:table-row table:style-name="ro1">
          <table:table-cell office:value-type="float" office:value="403.061218261719">
            <text:p>403.0612182617</text:p>
          </table:table-cell>
          <table:table-cell office:value-type="float" office:value="0.002612026">
            <text:p>0.002612026</text:p>
          </table:table-cell>
          <table:table-cell table:number-columns-repeated="4"/>
        </table:table-row>
        <table:table-row table:style-name="ro1">
          <table:table-cell office:value-type="float" office:value="403.173400878906">
            <text:p>403.1734008789</text:p>
          </table:table-cell>
          <table:table-cell office:value-type="float" office:value="0.0128755">
            <text:p>0.0128755</text:p>
          </table:table-cell>
          <table:table-cell table:number-columns-repeated="4"/>
        </table:table-row>
        <table:table-row table:style-name="ro1">
          <table:table-cell office:value-type="float" office:value="403.285614013672">
            <text:p>403.2856140137</text:p>
          </table:table-cell>
          <table:table-cell office:value-type="float" office:value="0.0006649108">
            <text:p>0.0006649108</text:p>
          </table:table-cell>
          <table:table-cell table:number-columns-repeated="4"/>
        </table:table-row>
        <table:table-row table:style-name="ro1">
          <table:table-cell office:value-type="float" office:value="403.397827148438">
            <text:p>403.3978271484</text:p>
          </table:table-cell>
          <table:table-cell office:value-type="float" office:value="-0.004759095">
            <text:p>-0.004759095</text:p>
          </table:table-cell>
          <table:table-cell table:number-columns-repeated="4"/>
        </table:table-row>
        <table:table-row table:style-name="ro1">
          <table:table-cell office:value-type="float" office:value="403.510040283203">
            <text:p>403.5100402832</text:p>
          </table:table-cell>
          <table:table-cell office:value-type="float" office:value="0.002971791">
            <text:p>0.002971791</text:p>
          </table:table-cell>
          <table:table-cell table:number-columns-repeated="4"/>
        </table:table-row>
        <table:table-row table:style-name="ro1">
          <table:table-cell office:value-type="float" office:value="403.622253417969">
            <text:p>403.622253418</text:p>
          </table:table-cell>
          <table:table-cell office:value-type="float" office:value="-0.00599859">
            <text:p>-0.00599859</text:p>
          </table:table-cell>
          <table:table-cell table:number-columns-repeated="4"/>
        </table:table-row>
        <table:table-row table:style-name="ro1">
          <table:table-cell office:value-type="float" office:value="403.734466552734">
            <text:p>403.7344665527</text:p>
          </table:table-cell>
          <table:table-cell office:value-type="float" office:value="0.002526789">
            <text:p>0.002526789</text:p>
          </table:table-cell>
          <table:table-cell table:number-columns-repeated="4"/>
        </table:table-row>
        <table:table-row table:style-name="ro1">
          <table:table-cell office:value-type="float" office:value="403.8466796875">
            <text:p>403.8466796875</text:p>
          </table:table-cell>
          <table:table-cell office:value-type="float" office:value="-0.001678218">
            <text:p>-0.001678218</text:p>
          </table:table-cell>
          <table:table-cell table:number-columns-repeated="4"/>
        </table:table-row>
        <table:table-row table:style-name="ro1">
          <table:table-cell office:value-type="float" office:value="403.958923339844">
            <text:p>403.9589233398</text:p>
          </table:table-cell>
          <table:table-cell office:value-type="float" office:value="-0.0007484231">
            <text:p>-0.0007484231</text:p>
          </table:table-cell>
          <table:table-cell table:number-columns-repeated="4"/>
        </table:table-row>
        <table:table-row table:style-name="ro1">
          <table:table-cell office:value-type="float" office:value="404.071166992188">
            <text:p>404.0711669922</text:p>
          </table:table-cell>
          <table:table-cell office:value-type="string">
            <text:p>-9.856427E-05</text:p>
          </table:table-cell>
          <table:table-cell table:number-columns-repeated="4"/>
        </table:table-row>
        <table:table-row table:style-name="ro1">
          <table:table-cell office:value-type="float" office:value="404.183410644531">
            <text:p>404.1834106445</text:p>
          </table:table-cell>
          <table:table-cell office:value-type="float" office:value="-0.008206162">
            <text:p>-0.008206162</text:p>
          </table:table-cell>
          <table:table-cell table:number-columns-repeated="4"/>
        </table:table-row>
        <table:table-row table:style-name="ro1">
          <table:table-cell office:value-type="float" office:value="404.295654296875">
            <text:p>404.2956542969</text:p>
          </table:table-cell>
          <table:table-cell office:value-type="float" office:value="0.009633272">
            <text:p>0.009633272</text:p>
          </table:table-cell>
          <table:table-cell table:number-columns-repeated="4"/>
        </table:table-row>
        <table:table-row table:style-name="ro1">
          <table:table-cell office:value-type="float" office:value="404.407897949219">
            <text:p>404.4078979492</text:p>
          </table:table-cell>
          <table:table-cell office:value-type="float" office:value="-0.007441116">
            <text:p>-0.007441116</text:p>
          </table:table-cell>
          <table:table-cell table:number-columns-repeated="4"/>
        </table:table-row>
        <table:table-row table:style-name="ro1">
          <table:table-cell office:value-type="float" office:value="404.520172119141">
            <text:p>404.5201721191</text:p>
          </table:table-cell>
          <table:table-cell office:value-type="float" office:value="0.00482646">
            <text:p>0.00482646</text:p>
          </table:table-cell>
          <table:table-cell table:number-columns-repeated="4"/>
        </table:table-row>
        <table:table-row table:style-name="ro1">
          <table:table-cell office:value-type="float" office:value="404.632446289063">
            <text:p>404.6324462891</text:p>
          </table:table-cell>
          <table:table-cell office:value-type="float" office:value="0.005841315">
            <text:p>0.005841315</text:p>
          </table:table-cell>
          <table:table-cell table:number-columns-repeated="4"/>
        </table:table-row>
        <table:table-row table:style-name="ro1">
          <table:table-cell office:value-type="float" office:value="404.744689941406">
            <text:p>404.7446899414</text:p>
          </table:table-cell>
          <table:table-cell office:value-type="float" office:value="0.0056572">
            <text:p>0.0056572</text:p>
          </table:table-cell>
          <table:table-cell table:number-columns-repeated="4"/>
        </table:table-row>
        <table:table-row table:style-name="ro1">
          <table:table-cell office:value-type="float" office:value="404.856994628906">
            <text:p>404.8569946289</text:p>
          </table:table-cell>
          <table:table-cell office:value-type="float" office:value="-0.008404738">
            <text:p>-0.008404738</text:p>
          </table:table-cell>
          <table:table-cell table:number-columns-repeated="4"/>
        </table:table-row>
        <table:table-row table:style-name="ro1">
          <table:table-cell office:value-type="float" office:value="404.969268798828">
            <text:p>404.9692687988</text:p>
          </table:table-cell>
          <table:table-cell office:value-type="float" office:value="0.003599154">
            <text:p>0.003599154</text:p>
          </table:table-cell>
          <table:table-cell table:number-columns-repeated="4"/>
        </table:table-row>
        <table:table-row table:style-name="ro1">
          <table:table-cell office:value-type="float" office:value="405.08154296875">
            <text:p>405.0815429688</text:p>
          </table:table-cell>
          <table:table-cell office:value-type="float" office:value="0.01342078">
            <text:p>0.01342078</text:p>
          </table:table-cell>
          <table:table-cell table:number-columns-repeated="4"/>
        </table:table-row>
        <table:table-row table:style-name="ro1">
          <table:table-cell office:value-type="float" office:value="405.19384765625">
            <text:p>405.1938476563</text:p>
          </table:table-cell>
          <table:table-cell office:value-type="float" office:value="-0.003207811">
            <text:p>-0.003207811</text:p>
          </table:table-cell>
          <table:table-cell table:number-columns-repeated="4"/>
        </table:table-row>
        <table:table-row table:style-name="ro1">
          <table:table-cell office:value-type="float" office:value="405.30615234375">
            <text:p>405.3061523438</text:p>
          </table:table-cell>
          <table:table-cell office:value-type="float" office:value="0.0008153284">
            <text:p>0.0008153284</text:p>
          </table:table-cell>
          <table:table-cell table:number-columns-repeated="4"/>
        </table:table-row>
        <table:table-row table:style-name="ro1">
          <table:table-cell office:value-type="float" office:value="405.41845703125">
            <text:p>405.4184570313</text:p>
          </table:table-cell>
          <table:table-cell office:value-type="float" office:value="0.0004738709">
            <text:p>0.0004738709</text:p>
          </table:table-cell>
          <table:table-cell table:number-columns-repeated="4"/>
        </table:table-row>
        <table:table-row table:style-name="ro1">
          <table:table-cell office:value-type="float" office:value="405.53076171875">
            <text:p>405.5307617188</text:p>
          </table:table-cell>
          <table:table-cell office:value-type="float" office:value="0.01013889">
            <text:p>0.01013889</text:p>
          </table:table-cell>
          <table:table-cell table:number-columns-repeated="4"/>
        </table:table-row>
        <table:table-row table:style-name="ro1">
          <table:table-cell office:value-type="float" office:value="405.64306640625">
            <text:p>405.6430664063</text:p>
          </table:table-cell>
          <table:table-cell office:value-type="float" office:value="-0.001561646">
            <text:p>-0.001561646</text:p>
          </table:table-cell>
          <table:table-cell table:number-columns-repeated="4"/>
        </table:table-row>
        <table:table-row table:style-name="ro1">
          <table:table-cell office:value-type="float" office:value="405.755401611328">
            <text:p>405.7554016113</text:p>
          </table:table-cell>
          <table:table-cell office:value-type="float" office:value="-0.0009822396">
            <text:p>-0.0009822396</text:p>
          </table:table-cell>
          <table:table-cell table:number-columns-repeated="4"/>
        </table:table-row>
        <table:table-row table:style-name="ro1">
          <table:table-cell office:value-type="float" office:value="405.867706298828">
            <text:p>405.8677062988</text:p>
          </table:table-cell>
          <table:table-cell office:value-type="float" office:value="-0.002347791">
            <text:p>-0.002347791</text:p>
          </table:table-cell>
          <table:table-cell table:number-columns-repeated="4"/>
        </table:table-row>
        <table:table-row table:style-name="ro1">
          <table:table-cell office:value-type="float" office:value="405.980041503906">
            <text:p>405.9800415039</text:p>
          </table:table-cell>
          <table:table-cell office:value-type="float" office:value="0.0165092">
            <text:p>0.0165092</text:p>
          </table:table-cell>
          <table:table-cell table:number-columns-repeated="4"/>
        </table:table-row>
        <table:table-row table:style-name="ro1">
          <table:table-cell office:value-type="float" office:value="406.092376708984">
            <text:p>406.092376709</text:p>
          </table:table-cell>
          <table:table-cell office:value-type="float" office:value="-0.007049186">
            <text:p>-0.007049186</text:p>
          </table:table-cell>
          <table:table-cell table:number-columns-repeated="4"/>
        </table:table-row>
        <table:table-row table:style-name="ro1">
          <table:table-cell office:value-type="float" office:value="406.204742431641">
            <text:p>406.2047424316</text:p>
          </table:table-cell>
          <table:table-cell office:value-type="float" office:value="0.006985019">
            <text:p>0.006985019</text:p>
          </table:table-cell>
          <table:table-cell table:number-columns-repeated="4"/>
        </table:table-row>
        <table:table-row table:style-name="ro1">
          <table:table-cell office:value-type="float" office:value="406.317077636719">
            <text:p>406.3170776367</text:p>
          </table:table-cell>
          <table:table-cell office:value-type="float" office:value="0.0004966295">
            <text:p>0.0004966295</text:p>
          </table:table-cell>
          <table:table-cell table:number-columns-repeated="4"/>
        </table:table-row>
        <table:table-row table:style-name="ro1">
          <table:table-cell office:value-type="float" office:value="406.429443359375">
            <text:p>406.4294433594</text:p>
          </table:table-cell>
          <table:table-cell office:value-type="float" office:value="-0.00653907">
            <text:p>-0.00653907</text:p>
          </table:table-cell>
          <table:table-cell table:number-columns-repeated="4"/>
        </table:table-row>
        <table:table-row table:style-name="ro1">
          <table:table-cell office:value-type="float" office:value="406.541809082031">
            <text:p>406.541809082</text:p>
          </table:table-cell>
          <table:table-cell office:value-type="float" office:value="0.001301944">
            <text:p>0.001301944</text:p>
          </table:table-cell>
          <table:table-cell table:number-columns-repeated="4"/>
        </table:table-row>
        <table:table-row table:style-name="ro1">
          <table:table-cell office:value-type="float" office:value="406.654174804688">
            <text:p>406.6541748047</text:p>
          </table:table-cell>
          <table:table-cell office:value-type="float" office:value="-0.005624813">
            <text:p>-0.005624813</text:p>
          </table:table-cell>
          <table:table-cell table:number-columns-repeated="4"/>
        </table:table-row>
        <table:table-row table:style-name="ro1">
          <table:table-cell office:value-type="float" office:value="406.766540527344">
            <text:p>406.7665405273</text:p>
          </table:table-cell>
          <table:table-cell office:value-type="float" office:value="-0.006669882">
            <text:p>-0.006669882</text:p>
          </table:table-cell>
          <table:table-cell table:number-columns-repeated="4"/>
        </table:table-row>
        <table:table-row table:style-name="ro1">
          <table:table-cell office:value-type="float" office:value="406.87890625">
            <text:p>406.87890625</text:p>
          </table:table-cell>
          <table:table-cell office:value-type="float" office:value="-0.00381844">
            <text:p>-0.00381844</text:p>
          </table:table-cell>
          <table:table-cell table:number-columns-repeated="4"/>
        </table:table-row>
        <table:table-row table:style-name="ro1">
          <table:table-cell office:value-type="float" office:value="406.991302490234">
            <text:p>406.9913024902</text:p>
          </table:table-cell>
          <table:table-cell office:value-type="float" office:value="0.001360473">
            <text:p>0.001360473</text:p>
          </table:table-cell>
          <table:table-cell table:number-columns-repeated="4"/>
        </table:table-row>
        <table:table-row table:style-name="ro1">
          <table:table-cell office:value-type="float" office:value="407.103668212891">
            <text:p>407.1036682129</text:p>
          </table:table-cell>
          <table:table-cell office:value-type="float" office:value="-0.004062534">
            <text:p>-0.004062534</text:p>
          </table:table-cell>
          <table:table-cell table:number-columns-repeated="4"/>
        </table:table-row>
        <table:table-row table:style-name="ro1">
          <table:table-cell office:value-type="float" office:value="407.216064453125">
            <text:p>407.2160644531</text:p>
          </table:table-cell>
          <table:table-cell office:value-type="float" office:value="0.01636557">
            <text:p>0.01636557</text:p>
          </table:table-cell>
          <table:table-cell table:number-columns-repeated="4"/>
        </table:table-row>
        <table:table-row table:style-name="ro1">
          <table:table-cell office:value-type="float" office:value="407.328460693359">
            <text:p>407.3284606934</text:p>
          </table:table-cell>
          <table:table-cell office:value-type="float" office:value="0.005068507">
            <text:p>0.005068507</text:p>
          </table:table-cell>
          <table:table-cell table:number-columns-repeated="4"/>
        </table:table-row>
        <table:table-row table:style-name="ro1">
          <table:table-cell office:value-type="float" office:value="407.440887451172">
            <text:p>407.4408874512</text:p>
          </table:table-cell>
          <table:table-cell office:value-type="float" office:value="-0.001184612">
            <text:p>-0.001184612</text:p>
          </table:table-cell>
          <table:table-cell table:number-columns-repeated="4"/>
        </table:table-row>
        <table:table-row table:style-name="ro1">
          <table:table-cell office:value-type="float" office:value="407.553283691406">
            <text:p>407.5532836914</text:p>
          </table:table-cell>
          <table:table-cell office:value-type="float" office:value="0.008715331">
            <text:p>0.008715331</text:p>
          </table:table-cell>
          <table:table-cell table:number-columns-repeated="4"/>
        </table:table-row>
        <table:table-row table:style-name="ro1">
          <table:table-cell office:value-type="float" office:value="407.665710449219">
            <text:p>407.6657104492</text:p>
          </table:table-cell>
          <table:table-cell office:value-type="float" office:value="-0.00306589">
            <text:p>-0.00306589</text:p>
          </table:table-cell>
          <table:table-cell table:number-columns-repeated="4"/>
        </table:table-row>
        <table:table-row table:style-name="ro1">
          <table:table-cell office:value-type="float" office:value="407.778106689453">
            <text:p>407.7781066895</text:p>
          </table:table-cell>
          <table:table-cell office:value-type="float" office:value="0.01320855">
            <text:p>0.01320855</text:p>
          </table:table-cell>
          <table:table-cell table:number-columns-repeated="4"/>
        </table:table-row>
        <table:table-row table:style-name="ro1">
          <table:table-cell office:value-type="float" office:value="407.890533447266">
            <text:p>407.8905334473</text:p>
          </table:table-cell>
          <table:table-cell office:value-type="float" office:value="0.006404526">
            <text:p>0.006404526</text:p>
          </table:table-cell>
          <table:table-cell table:number-columns-repeated="4"/>
        </table:table-row>
        <table:table-row table:style-name="ro1">
          <table:table-cell office:value-type="float" office:value="408.002990722656">
            <text:p>408.0029907227</text:p>
          </table:table-cell>
          <table:table-cell office:value-type="float" office:value="0.007773792">
            <text:p>0.007773792</text:p>
          </table:table-cell>
          <table:table-cell table:number-columns-repeated="4"/>
        </table:table-row>
        <table:table-row table:style-name="ro1">
          <table:table-cell office:value-type="float" office:value="408.115417480469">
            <text:p>408.1154174805</text:p>
          </table:table-cell>
          <table:table-cell office:value-type="float" office:value="0.003090006">
            <text:p>0.003090006</text:p>
          </table:table-cell>
          <table:table-cell table:number-columns-repeated="4"/>
        </table:table-row>
        <table:table-row table:style-name="ro1">
          <table:table-cell office:value-type="float" office:value="408.227844238281">
            <text:p>408.2278442383</text:p>
          </table:table-cell>
          <table:table-cell office:value-type="float" office:value="0.01905179">
            <text:p>0.01905179</text:p>
          </table:table-cell>
          <table:table-cell table:number-columns-repeated="4"/>
        </table:table-row>
        <table:table-row table:style-name="ro1">
          <table:table-cell office:value-type="float" office:value="408.340301513672">
            <text:p>408.3403015137</text:p>
          </table:table-cell>
          <table:table-cell office:value-type="float" office:value="-0.0101227">
            <text:p>-0.0101227</text:p>
          </table:table-cell>
          <table:table-cell table:number-columns-repeated="4"/>
        </table:table-row>
        <table:table-row table:style-name="ro1">
          <table:table-cell office:value-type="float" office:value="408.452758789063">
            <text:p>408.4527587891</text:p>
          </table:table-cell>
          <table:table-cell office:value-type="float" office:value="-0.002392106">
            <text:p>-0.002392106</text:p>
          </table:table-cell>
          <table:table-cell table:number-columns-repeated="4"/>
        </table:table-row>
        <table:table-row table:style-name="ro1">
          <table:table-cell office:value-type="float" office:value="408.565216064453">
            <text:p>408.5652160645</text:p>
          </table:table-cell>
          <table:table-cell office:value-type="float" office:value="-0.004435663">
            <text:p>-0.004435663</text:p>
          </table:table-cell>
          <table:table-cell table:number-columns-repeated="4"/>
        </table:table-row>
        <table:table-row table:style-name="ro1">
          <table:table-cell office:value-type="float" office:value="408.677673339844">
            <text:p>408.6776733398</text:p>
          </table:table-cell>
          <table:table-cell office:value-type="float" office:value="-0.0008829655">
            <text:p>-0.0008829655</text:p>
          </table:table-cell>
          <table:table-cell table:number-columns-repeated="4"/>
        </table:table-row>
        <table:table-row table:style-name="ro1">
          <table:table-cell office:value-type="float" office:value="408.790161132813">
            <text:p>408.7901611328</text:p>
          </table:table-cell>
          <table:table-cell office:value-type="float" office:value="-0.003348512">
            <text:p>-0.003348512</text:p>
          </table:table-cell>
          <table:table-cell table:number-columns-repeated="4"/>
        </table:table-row>
        <table:table-row table:style-name="ro1">
          <table:table-cell office:value-type="float" office:value="408.902618408203">
            <text:p>408.9026184082</text:p>
          </table:table-cell>
          <table:table-cell office:value-type="float" office:value="-0.001570776">
            <text:p>-0.001570776</text:p>
          </table:table-cell>
          <table:table-cell table:number-columns-repeated="4"/>
        </table:table-row>
        <table:table-row table:style-name="ro1">
          <table:table-cell office:value-type="float" office:value="409.015106201172">
            <text:p>409.0151062012</text:p>
          </table:table-cell>
          <table:table-cell office:value-type="float" office:value="-0.005551002">
            <text:p>-0.005551002</text:p>
          </table:table-cell>
          <table:table-cell table:number-columns-repeated="4"/>
        </table:table-row>
        <table:table-row table:style-name="ro1">
          <table:table-cell office:value-type="float" office:value="409.127593994141">
            <text:p>409.1275939941</text:p>
          </table:table-cell>
          <table:table-cell office:value-type="float" office:value="0.002709572">
            <text:p>0.002709572</text:p>
          </table:table-cell>
          <table:table-cell table:number-columns-repeated="4"/>
        </table:table-row>
        <table:table-row table:style-name="ro1">
          <table:table-cell office:value-type="float" office:value="409.240081787109">
            <text:p>409.2400817871</text:p>
          </table:table-cell>
          <table:table-cell office:value-type="float" office:value="0.002103085">
            <text:p>0.002103085</text:p>
          </table:table-cell>
          <table:table-cell table:number-columns-repeated="4"/>
        </table:table-row>
        <table:table-row table:style-name="ro1">
          <table:table-cell office:value-type="float" office:value="409.352569580078">
            <text:p>409.3525695801</text:p>
          </table:table-cell>
          <table:table-cell office:value-type="float" office:value="-0.007521844">
            <text:p>-0.007521844</text:p>
          </table:table-cell>
          <table:table-cell table:number-columns-repeated="4"/>
        </table:table-row>
        <table:table-row table:style-name="ro1">
          <table:table-cell office:value-type="float" office:value="409.465087890625">
            <text:p>409.4650878906</text:p>
          </table:table-cell>
          <table:table-cell office:value-type="float" office:value="-0.00179777">
            <text:p>-0.00179777</text:p>
          </table:table-cell>
          <table:table-cell table:number-columns-repeated="4"/>
        </table:table-row>
        <table:table-row table:style-name="ro1">
          <table:table-cell office:value-type="float" office:value="409.577606201172">
            <text:p>409.5776062012</text:p>
          </table:table-cell>
          <table:table-cell office:value-type="float" office:value="-0.005173662">
            <text:p>-0.005173662</text:p>
          </table:table-cell>
          <table:table-cell table:number-columns-repeated="4"/>
        </table:table-row>
        <table:table-row table:style-name="ro1">
          <table:table-cell office:value-type="float" office:value="409.690093994141">
            <text:p>409.6900939941</text:p>
          </table:table-cell>
          <table:table-cell office:value-type="float" office:value="0.00244211">
            <text:p>0.00244211</text:p>
          </table:table-cell>
          <table:table-cell table:number-columns-repeated="4"/>
        </table:table-row>
        <table:table-row table:style-name="ro1">
          <table:table-cell office:value-type="float" office:value="409.802612304688">
            <text:p>409.8026123047</text:p>
          </table:table-cell>
          <table:table-cell office:value-type="float" office:value="-0.0003721052">
            <text:p>-0.0003721052</text:p>
          </table:table-cell>
          <table:table-cell table:number-columns-repeated="4"/>
        </table:table-row>
        <table:table-row table:style-name="ro1">
          <table:table-cell office:value-type="float" office:value="409.915161132813">
            <text:p>409.9151611328</text:p>
          </table:table-cell>
          <table:table-cell office:value-type="float" office:value="0.001826723">
            <text:p>0.001826723</text:p>
          </table:table-cell>
          <table:table-cell table:number-columns-repeated="4"/>
        </table:table-row>
        <table:table-row table:style-name="ro1">
          <table:table-cell office:value-type="float" office:value="410.027679443359">
            <text:p>410.0276794434</text:p>
          </table:table-cell>
          <table:table-cell office:value-type="float" office:value="-0.0008380101">
            <text:p>-0.0008380101</text:p>
          </table:table-cell>
          <table:table-cell table:number-columns-repeated="4"/>
        </table:table-row>
        <table:table-row table:style-name="ro1">
          <table:table-cell office:value-type="float" office:value="410.140228271484">
            <text:p>410.1402282715</text:p>
          </table:table-cell>
          <table:table-cell office:value-type="float" office:value="0.003355578">
            <text:p>0.003355578</text:p>
          </table:table-cell>
          <table:table-cell table:number-columns-repeated="4"/>
        </table:table-row>
        <table:table-row table:style-name="ro1">
          <table:table-cell office:value-type="float" office:value="410.252746582031">
            <text:p>410.252746582</text:p>
          </table:table-cell>
          <table:table-cell office:value-type="float" office:value="0.00148224">
            <text:p>0.00148224</text:p>
          </table:table-cell>
          <table:table-cell table:number-columns-repeated="4"/>
        </table:table-row>
        <table:table-row table:style-name="ro1">
          <table:table-cell office:value-type="float" office:value="410.365295410156">
            <text:p>410.3652954102</text:p>
          </table:table-cell>
          <table:table-cell office:value-type="float" office:value="-0.001927886">
            <text:p>-0.001927886</text:p>
          </table:table-cell>
          <table:table-cell table:number-columns-repeated="4"/>
        </table:table-row>
        <table:table-row table:style-name="ro1">
          <table:table-cell office:value-type="float" office:value="410.477844238281">
            <text:p>410.4778442383</text:p>
          </table:table-cell>
          <table:table-cell office:value-type="float" office:value="0.01838304">
            <text:p>0.01838304</text:p>
          </table:table-cell>
          <table:table-cell table:number-columns-repeated="4"/>
        </table:table-row>
        <table:table-row table:style-name="ro1">
          <table:table-cell office:value-type="float" office:value="410.590423583984">
            <text:p>410.590423584</text:p>
          </table:table-cell>
          <table:table-cell office:value-type="float" office:value="0.007813673">
            <text:p>0.007813673</text:p>
          </table:table-cell>
          <table:table-cell table:number-columns-repeated="4"/>
        </table:table-row>
        <table:table-row table:style-name="ro1">
          <table:table-cell office:value-type="float" office:value="410.702972412109">
            <text:p>410.7029724121</text:p>
          </table:table-cell>
          <table:table-cell office:value-type="float" office:value="-0.004031833">
            <text:p>-0.004031833</text:p>
          </table:table-cell>
          <table:table-cell table:number-columns-repeated="4"/>
        </table:table-row>
        <table:table-row table:style-name="ro1">
          <table:table-cell office:value-type="float" office:value="410.815551757813">
            <text:p>410.8155517578</text:p>
          </table:table-cell>
          <table:table-cell office:value-type="float" office:value="0.002531883">
            <text:p>0.002531883</text:p>
          </table:table-cell>
          <table:table-cell table:number-columns-repeated="4"/>
        </table:table-row>
        <table:table-row table:style-name="ro1">
          <table:table-cell office:value-type="float" office:value="410.928131103516">
            <text:p>410.9281311035</text:p>
          </table:table-cell>
          <table:table-cell office:value-type="float" office:value="0.0263718">
            <text:p>0.0263718</text:p>
          </table:table-cell>
          <table:table-cell table:number-columns-repeated="4"/>
        </table:table-row>
        <table:table-row table:style-name="ro1">
          <table:table-cell office:value-type="float" office:value="411.040679931641">
            <text:p>411.0406799316</text:p>
          </table:table-cell>
          <table:table-cell office:value-type="float" office:value="0.007149112">
            <text:p>0.007149112</text:p>
          </table:table-cell>
          <table:table-cell table:number-columns-repeated="4"/>
        </table:table-row>
        <table:table-row table:style-name="ro1">
          <table:table-cell office:value-type="float" office:value="411.153289794922">
            <text:p>411.1532897949</text:p>
          </table:table-cell>
          <table:table-cell office:value-type="float" office:value="0.01356054">
            <text:p>0.01356054</text:p>
          </table:table-cell>
          <table:table-cell table:number-columns-repeated="4"/>
        </table:table-row>
        <table:table-row table:style-name="ro1">
          <table:table-cell office:value-type="float" office:value="411.265869140625">
            <text:p>411.2658691406</text:p>
          </table:table-cell>
          <table:table-cell office:value-type="float" office:value="0.006818383">
            <text:p>0.006818383</text:p>
          </table:table-cell>
          <table:table-cell table:number-columns-repeated="4"/>
        </table:table-row>
        <table:table-row table:style-name="ro1">
          <table:table-cell office:value-type="float" office:value="411.378479003906">
            <text:p>411.3784790039</text:p>
          </table:table-cell>
          <table:table-cell office:value-type="float" office:value="0.003471487">
            <text:p>0.003471487</text:p>
          </table:table-cell>
          <table:table-cell table:number-columns-repeated="4"/>
        </table:table-row>
        <table:table-row table:style-name="ro1">
          <table:table-cell office:value-type="float" office:value="411.491058349609">
            <text:p>411.4910583496</text:p>
          </table:table-cell>
          <table:table-cell office:value-type="float" office:value="0.0241332">
            <text:p>0.0241332</text:p>
          </table:table-cell>
          <table:table-cell table:number-columns-repeated="4"/>
        </table:table-row>
        <table:table-row table:style-name="ro1">
          <table:table-cell office:value-type="float" office:value="411.603668212891">
            <text:p>411.6036682129</text:p>
          </table:table-cell>
          <table:table-cell office:value-type="float" office:value="0.004175066">
            <text:p>0.004175066</text:p>
          </table:table-cell>
          <table:table-cell table:number-columns-repeated="4"/>
        </table:table-row>
        <table:table-row table:style-name="ro1">
          <table:table-cell office:value-type="float" office:value="411.716278076172">
            <text:p>411.7162780762</text:p>
          </table:table-cell>
          <table:table-cell office:value-type="float" office:value="0.02258655">
            <text:p>0.02258655</text:p>
          </table:table-cell>
          <table:table-cell table:number-columns-repeated="4"/>
        </table:table-row>
        <table:table-row table:style-name="ro1">
          <table:table-cell office:value-type="float" office:value="411.828887939453">
            <text:p>411.8288879395</text:p>
          </table:table-cell>
          <table:table-cell office:value-type="float" office:value="0.002156195">
            <text:p>0.002156195</text:p>
          </table:table-cell>
          <table:table-cell table:number-columns-repeated="4"/>
        </table:table-row>
        <table:table-row table:style-name="ro1">
          <table:table-cell office:value-type="float" office:value="411.941528320313">
            <text:p>411.9415283203</text:p>
          </table:table-cell>
          <table:table-cell office:value-type="float" office:value="0.00322678">
            <text:p>0.00322678</text:p>
          </table:table-cell>
          <table:table-cell table:number-columns-repeated="4"/>
        </table:table-row>
        <table:table-row table:style-name="ro1">
          <table:table-cell office:value-type="float" office:value="412.054138183594">
            <text:p>412.0541381836</text:p>
          </table:table-cell>
          <table:table-cell office:value-type="float" office:value="0.001170804">
            <text:p>0.001170804</text:p>
          </table:table-cell>
          <table:table-cell table:number-columns-repeated="4"/>
        </table:table-row>
        <table:table-row table:style-name="ro1">
          <table:table-cell office:value-type="float" office:value="412.166778564453">
            <text:p>412.1667785645</text:p>
          </table:table-cell>
          <table:table-cell office:value-type="float" office:value="-0.007434151">
            <text:p>-0.007434151</text:p>
          </table:table-cell>
          <table:table-cell table:number-columns-repeated="4"/>
        </table:table-row>
        <table:table-row table:style-name="ro1">
          <table:table-cell office:value-type="float" office:value="412.279418945313">
            <text:p>412.2794189453</text:p>
          </table:table-cell>
          <table:table-cell office:value-type="float" office:value="0.008832063">
            <text:p>0.008832063</text:p>
          </table:table-cell>
          <table:table-cell table:number-columns-repeated="4"/>
        </table:table-row>
        <table:table-row table:style-name="ro1">
          <table:table-cell office:value-type="float" office:value="412.392059326172">
            <text:p>412.3920593262</text:p>
          </table:table-cell>
          <table:table-cell office:value-type="float" office:value="0.002491735">
            <text:p>0.002491735</text:p>
          </table:table-cell>
          <table:table-cell table:number-columns-repeated="4"/>
        </table:table-row>
        <table:table-row table:style-name="ro1">
          <table:table-cell office:value-type="float" office:value="412.504730224609">
            <text:p>412.5047302246</text:p>
          </table:table-cell>
          <table:table-cell office:value-type="float" office:value="-0.008360661">
            <text:p>-0.008360661</text:p>
          </table:table-cell>
          <table:table-cell table:number-columns-repeated="4"/>
        </table:table-row>
        <table:table-row table:style-name="ro1">
          <table:table-cell office:value-type="float" office:value="412.617370605469">
            <text:p>412.6173706055</text:p>
          </table:table-cell>
          <table:table-cell office:value-type="float" office:value="-0.00287619">
            <text:p>-0.00287619</text:p>
          </table:table-cell>
          <table:table-cell table:number-columns-repeated="4"/>
        </table:table-row>
        <table:table-row table:style-name="ro1">
          <table:table-cell office:value-type="float" office:value="412.730041503906">
            <text:p>412.7300415039</text:p>
          </table:table-cell>
          <table:table-cell office:value-type="float" office:value="0.0003756502">
            <text:p>0.0003756502</text:p>
          </table:table-cell>
          <table:table-cell table:number-columns-repeated="4"/>
        </table:table-row>
        <table:table-row table:style-name="ro1">
          <table:table-cell office:value-type="float" office:value="412.842712402344">
            <text:p>412.8427124023</text:p>
          </table:table-cell>
          <table:table-cell office:value-type="float" office:value="-0.0004443129">
            <text:p>-0.0004443129</text:p>
          </table:table-cell>
          <table:table-cell table:number-columns-repeated="4"/>
        </table:table-row>
        <table:table-row table:style-name="ro1">
          <table:table-cell office:value-type="float" office:value="412.955383300781">
            <text:p>412.9553833008</text:p>
          </table:table-cell>
          <table:table-cell office:value-type="float" office:value="-0.007865198">
            <text:p>-0.007865198</text:p>
          </table:table-cell>
          <table:table-cell table:number-columns-repeated="4"/>
        </table:table-row>
        <table:table-row table:style-name="ro1">
          <table:table-cell office:value-type="float" office:value="413.068054199219">
            <text:p>413.0680541992</text:p>
          </table:table-cell>
          <table:table-cell office:value-type="float" office:value="-0.00503746">
            <text:p>-0.00503746</text:p>
          </table:table-cell>
          <table:table-cell table:number-columns-repeated="4"/>
        </table:table-row>
        <table:table-row table:style-name="ro1">
          <table:table-cell office:value-type="float" office:value="413.180725097656">
            <text:p>413.1807250977</text:p>
          </table:table-cell>
          <table:table-cell office:value-type="float" office:value="0.0006679512">
            <text:p>0.0006679512</text:p>
          </table:table-cell>
          <table:table-cell table:number-columns-repeated="4"/>
        </table:table-row>
        <table:table-row table:style-name="ro1">
          <table:table-cell office:value-type="float" office:value="413.293426513672">
            <text:p>413.2934265137</text:p>
          </table:table-cell>
          <table:table-cell office:value-type="float" office:value="0.0005685741">
            <text:p>0.0005685741</text:p>
          </table:table-cell>
          <table:table-cell table:number-columns-repeated="4"/>
        </table:table-row>
        <table:table-row table:style-name="ro1">
          <table:table-cell office:value-type="float" office:value="413.406097412109">
            <text:p>413.4060974121</text:p>
          </table:table-cell>
          <table:table-cell office:value-type="float" office:value="-0.002326988">
            <text:p>-0.002326988</text:p>
          </table:table-cell>
          <table:table-cell table:number-columns-repeated="4"/>
        </table:table-row>
        <table:table-row table:style-name="ro1">
          <table:table-cell office:value-type="float" office:value="413.518798828125">
            <text:p>413.5187988281</text:p>
          </table:table-cell>
          <table:table-cell office:value-type="float" office:value="-0.0004182817">
            <text:p>-0.0004182817</text:p>
          </table:table-cell>
          <table:table-cell table:number-columns-repeated="4"/>
        </table:table-row>
        <table:table-row table:style-name="ro1">
          <table:table-cell office:value-type="float" office:value="413.631500244141">
            <text:p>413.6315002441</text:p>
          </table:table-cell>
          <table:table-cell office:value-type="float" office:value="-0.0053443">
            <text:p>-0.0053443</text:p>
          </table:table-cell>
          <table:table-cell table:number-columns-repeated="4"/>
        </table:table-row>
        <table:table-row table:style-name="ro1">
          <table:table-cell office:value-type="float" office:value="413.744232177734">
            <text:p>413.7442321777</text:p>
          </table:table-cell>
          <table:table-cell office:value-type="float" office:value="0.002777788">
            <text:p>0.002777788</text:p>
          </table:table-cell>
          <table:table-cell table:number-columns-repeated="4"/>
        </table:table-row>
        <table:table-row table:style-name="ro1">
          <table:table-cell office:value-type="float" office:value="413.85693359375">
            <text:p>413.8569335938</text:p>
          </table:table-cell>
          <table:table-cell office:value-type="float" office:value="0.0033797">
            <text:p>0.0033797</text:p>
          </table:table-cell>
          <table:table-cell table:number-columns-repeated="4"/>
        </table:table-row>
        <table:table-row table:style-name="ro1">
          <table:table-cell office:value-type="float" office:value="413.969665527344">
            <text:p>413.9696655273</text:p>
          </table:table-cell>
          <table:table-cell office:value-type="float" office:value="-0.002581721">
            <text:p>-0.002581721</text:p>
          </table:table-cell>
          <table:table-cell table:number-columns-repeated="4"/>
        </table:table-row>
        <table:table-row table:style-name="ro1">
          <table:table-cell office:value-type="float" office:value="414.082366943359">
            <text:p>414.0823669434</text:p>
          </table:table-cell>
          <table:table-cell office:value-type="float" office:value="0.0122005">
            <text:p>0.0122005</text:p>
          </table:table-cell>
          <table:table-cell table:number-columns-repeated="4"/>
        </table:table-row>
        <table:table-row table:style-name="ro1">
          <table:table-cell office:value-type="float" office:value="414.195098876953">
            <text:p>414.195098877</text:p>
          </table:table-cell>
          <table:table-cell office:value-type="float" office:value="0.002006513">
            <text:p>0.002006513</text:p>
          </table:table-cell>
          <table:table-cell table:number-columns-repeated="4"/>
        </table:table-row>
        <table:table-row table:style-name="ro1">
          <table:table-cell office:value-type="float" office:value="414.307861328125">
            <text:p>414.3078613281</text:p>
          </table:table-cell>
          <table:table-cell office:value-type="float" office:value="0.008140838">
            <text:p>0.008140838</text:p>
          </table:table-cell>
          <table:table-cell table:number-columns-repeated="4"/>
        </table:table-row>
        <table:table-row table:style-name="ro1">
          <table:table-cell office:value-type="float" office:value="414.420593261719">
            <text:p>414.4205932617</text:p>
          </table:table-cell>
          <table:table-cell office:value-type="float" office:value="-0.008899037">
            <text:p>-0.008899037</text:p>
          </table:table-cell>
          <table:table-cell table:number-columns-repeated="4"/>
        </table:table-row>
        <table:table-row table:style-name="ro1">
          <table:table-cell office:value-type="float" office:value="414.533325195313">
            <text:p>414.5333251953</text:p>
          </table:table-cell>
          <table:table-cell office:value-type="float" office:value="0.006343454">
            <text:p>0.006343454</text:p>
          </table:table-cell>
          <table:table-cell table:number-columns-repeated="4"/>
        </table:table-row>
        <table:table-row table:style-name="ro1">
          <table:table-cell office:value-type="float" office:value="414.646087646484">
            <text:p>414.6460876465</text:p>
          </table:table-cell>
          <table:table-cell office:value-type="float" office:value="-0.003566598">
            <text:p>-0.003566598</text:p>
          </table:table-cell>
          <table:table-cell table:number-columns-repeated="4"/>
        </table:table-row>
        <table:table-row table:style-name="ro1">
          <table:table-cell office:value-type="float" office:value="414.758850097656">
            <text:p>414.7588500977</text:p>
          </table:table-cell>
          <table:table-cell office:value-type="float" office:value="-0.003086928">
            <text:p>-0.003086928</text:p>
          </table:table-cell>
          <table:table-cell table:number-columns-repeated="4"/>
        </table:table-row>
        <table:table-row table:style-name="ro1">
          <table:table-cell office:value-type="float" office:value="414.871612548828">
            <text:p>414.8716125488</text:p>
          </table:table-cell>
          <table:table-cell office:value-type="float" office:value="0.003666854">
            <text:p>0.003666854</text:p>
          </table:table-cell>
          <table:table-cell table:number-columns-repeated="4"/>
        </table:table-row>
        <table:table-row table:style-name="ro1">
          <table:table-cell office:value-type="float" office:value="414.984375">
            <text:p>414.984375</text:p>
          </table:table-cell>
          <table:table-cell office:value-type="float" office:value="0.003197273">
            <text:p>0.003197273</text:p>
          </table:table-cell>
          <table:table-cell table:number-columns-repeated="4"/>
        </table:table-row>
        <table:table-row table:style-name="ro1">
          <table:table-cell office:value-type="float" office:value="415.09716796875">
            <text:p>415.0971679688</text:p>
          </table:table-cell>
          <table:table-cell office:value-type="float" office:value="0.001426278">
            <text:p>0.001426278</text:p>
          </table:table-cell>
          <table:table-cell table:number-columns-repeated="4"/>
        </table:table-row>
        <table:table-row table:style-name="ro1">
          <table:table-cell office:value-type="float" office:value="415.209930419922">
            <text:p>415.2099304199</text:p>
          </table:table-cell>
          <table:table-cell office:value-type="float" office:value="-0.002722155">
            <text:p>-0.002722155</text:p>
          </table:table-cell>
          <table:table-cell table:number-columns-repeated="4"/>
        </table:table-row>
        <table:table-row table:style-name="ro1">
          <table:table-cell office:value-type="float" office:value="415.322723388672">
            <text:p>415.3227233887</text:p>
          </table:table-cell>
          <table:table-cell office:value-type="float" office:value="-0.002249407">
            <text:p>-0.002249407</text:p>
          </table:table-cell>
          <table:table-cell table:number-columns-repeated="4"/>
        </table:table-row>
        <table:table-row table:style-name="ro1">
          <table:table-cell office:value-type="float" office:value="415.435516357422">
            <text:p>415.4355163574</text:p>
          </table:table-cell>
          <table:table-cell office:value-type="float" office:value="-0.00290401">
            <text:p>-0.00290401</text:p>
          </table:table-cell>
          <table:table-cell table:number-columns-repeated="4"/>
        </table:table-row>
        <table:table-row table:style-name="ro1">
          <table:table-cell office:value-type="float" office:value="415.548309326172">
            <text:p>415.5483093262</text:p>
          </table:table-cell>
          <table:table-cell office:value-type="float" office:value="0.001417614">
            <text:p>0.001417614</text:p>
          </table:table-cell>
          <table:table-cell table:number-columns-repeated="4"/>
        </table:table-row>
        <table:table-row table:style-name="ro1">
          <table:table-cell office:value-type="float" office:value="415.661102294922">
            <text:p>415.6611022949</text:p>
          </table:table-cell>
          <table:table-cell office:value-type="float" office:value="-0.005726947">
            <text:p>-0.005726947</text:p>
          </table:table-cell>
          <table:table-cell table:number-columns-repeated="4"/>
        </table:table-row>
        <table:table-row table:style-name="ro1">
          <table:table-cell office:value-type="float" office:value="415.773895263672">
            <text:p>415.7738952637</text:p>
          </table:table-cell>
          <table:table-cell office:value-type="float" office:value="0.006382022">
            <text:p>0.006382022</text:p>
          </table:table-cell>
          <table:table-cell table:number-columns-repeated="4"/>
        </table:table-row>
        <table:table-row table:style-name="ro1">
          <table:table-cell office:value-type="float" office:value="415.88671875">
            <text:p>415.88671875</text:p>
          </table:table-cell>
          <table:table-cell office:value-type="float" office:value="-0.00359419">
            <text:p>-0.00359419</text:p>
          </table:table-cell>
          <table:table-cell table:number-columns-repeated="4"/>
        </table:table-row>
        <table:table-row table:style-name="ro1">
          <table:table-cell office:value-type="float" office:value="415.999542236328">
            <text:p>415.9995422363</text:p>
          </table:table-cell>
          <table:table-cell office:value-type="float" office:value="-0.007465038">
            <text:p>-0.007465038</text:p>
          </table:table-cell>
          <table:table-cell table:number-columns-repeated="4"/>
        </table:table-row>
        <table:table-row table:style-name="ro1">
          <table:table-cell office:value-type="float" office:value="416.112365722656">
            <text:p>416.1123657227</text:p>
          </table:table-cell>
          <table:table-cell office:value-type="float" office:value="-0.008327263">
            <text:p>-0.008327263</text:p>
          </table:table-cell>
          <table:table-cell table:number-columns-repeated="4"/>
        </table:table-row>
        <table:table-row table:style-name="ro1">
          <table:table-cell office:value-type="float" office:value="416.225189208984">
            <text:p>416.225189209</text:p>
          </table:table-cell>
          <table:table-cell office:value-type="float" office:value="-0.0006101676">
            <text:p>-0.0006101676</text:p>
          </table:table-cell>
          <table:table-cell table:number-columns-repeated="4"/>
        </table:table-row>
        <table:table-row table:style-name="ro1">
          <table:table-cell office:value-type="float" office:value="416.338012695313">
            <text:p>416.3380126953</text:p>
          </table:table-cell>
          <table:table-cell office:value-type="float" office:value="-0.002270299">
            <text:p>-0.002270299</text:p>
          </table:table-cell>
          <table:table-cell table:number-columns-repeated="4"/>
        </table:table-row>
        <table:table-row table:style-name="ro1">
          <table:table-cell office:value-type="float" office:value="416.450866699219">
            <text:p>416.4508666992</text:p>
          </table:table-cell>
          <table:table-cell office:value-type="float" office:value="0.0006763188">
            <text:p>0.0006763188</text:p>
          </table:table-cell>
          <table:table-cell table:number-columns-repeated="4"/>
        </table:table-row>
        <table:table-row table:style-name="ro1">
          <table:table-cell office:value-type="float" office:value="416.563690185547">
            <text:p>416.5636901855</text:p>
          </table:table-cell>
          <table:table-cell office:value-type="float" office:value="-0.003917527">
            <text:p>-0.003917527</text:p>
          </table:table-cell>
          <table:table-cell table:number-columns-repeated="4"/>
        </table:table-row>
        <table:table-row table:style-name="ro1">
          <table:table-cell office:value-type="float" office:value="416.676544189453">
            <text:p>416.6765441895</text:p>
          </table:table-cell>
          <table:table-cell office:value-type="float" office:value="-0.004539449">
            <text:p>-0.004539449</text:p>
          </table:table-cell>
          <table:table-cell table:number-columns-repeated="4"/>
        </table:table-row>
        <table:table-row table:style-name="ro1">
          <table:table-cell office:value-type="float" office:value="416.789398193359">
            <text:p>416.7893981934</text:p>
          </table:table-cell>
          <table:table-cell office:value-type="float" office:value="0.0005657839">
            <text:p>0.0005657839</text:p>
          </table:table-cell>
          <table:table-cell table:number-columns-repeated="4"/>
        </table:table-row>
        <table:table-row table:style-name="ro1">
          <table:table-cell office:value-type="float" office:value="416.902252197266">
            <text:p>416.9022521973</text:p>
          </table:table-cell>
          <table:table-cell office:value-type="float" office:value="-0.00279883">
            <text:p>-0.00279883</text:p>
          </table:table-cell>
          <table:table-cell table:number-columns-repeated="4"/>
        </table:table-row>
        <table:table-row table:style-name="ro1">
          <table:table-cell office:value-type="float" office:value="417.01513671875">
            <text:p>417.0151367188</text:p>
          </table:table-cell>
          <table:table-cell office:value-type="float" office:value="-0.001775087">
            <text:p>-0.001775087</text:p>
          </table:table-cell>
          <table:table-cell table:number-columns-repeated="4"/>
        </table:table-row>
        <table:table-row table:style-name="ro1">
          <table:table-cell office:value-type="float" office:value="417.127990722656">
            <text:p>417.1279907227</text:p>
          </table:table-cell>
          <table:table-cell office:value-type="float" office:value="0.01148004">
            <text:p>0.01148004</text:p>
          </table:table-cell>
          <table:table-cell table:number-columns-repeated="4"/>
        </table:table-row>
        <table:table-row table:style-name="ro1">
          <table:table-cell office:value-type="float" office:value="417.240875244141">
            <text:p>417.2408752441</text:p>
          </table:table-cell>
          <table:table-cell office:value-type="float" office:value="0.004499712">
            <text:p>0.004499712</text:p>
          </table:table-cell>
          <table:table-cell table:number-columns-repeated="4"/>
        </table:table-row>
        <table:table-row table:style-name="ro1">
          <table:table-cell office:value-type="float" office:value="417.353759765625">
            <text:p>417.3537597656</text:p>
          </table:table-cell>
          <table:table-cell office:value-type="float" office:value="0.01975076">
            <text:p>0.01975076</text:p>
          </table:table-cell>
          <table:table-cell table:number-columns-repeated="4"/>
        </table:table-row>
        <table:table-row table:style-name="ro1">
          <table:table-cell office:value-type="float" office:value="417.466644287109">
            <text:p>417.4666442871</text:p>
          </table:table-cell>
          <table:table-cell office:value-type="float" office:value="-0.008729651">
            <text:p>-0.008729651</text:p>
          </table:table-cell>
          <table:table-cell table:number-columns-repeated="4"/>
        </table:table-row>
        <table:table-row table:style-name="ro1">
          <table:table-cell office:value-type="float" office:value="417.579528808594">
            <text:p>417.5795288086</text:p>
          </table:table-cell>
          <table:table-cell office:value-type="float" office:value="-0.004755739">
            <text:p>-0.004755739</text:p>
          </table:table-cell>
          <table:table-cell table:number-columns-repeated="4"/>
        </table:table-row>
        <table:table-row table:style-name="ro1">
          <table:table-cell office:value-type="float" office:value="417.692443847656">
            <text:p>417.6924438477</text:p>
          </table:table-cell>
          <table:table-cell office:value-type="float" office:value="0.001712349">
            <text:p>0.001712349</text:p>
          </table:table-cell>
          <table:table-cell table:number-columns-repeated="4"/>
        </table:table-row>
        <table:table-row table:style-name="ro1">
          <table:table-cell office:value-type="float" office:value="417.805328369141">
            <text:p>417.8053283691</text:p>
          </table:table-cell>
          <table:table-cell office:value-type="float" office:value="0.004246619">
            <text:p>0.004246619</text:p>
          </table:table-cell>
          <table:table-cell table:number-columns-repeated="4"/>
        </table:table-row>
        <table:table-row table:style-name="ro1">
          <table:table-cell office:value-type="float" office:value="417.918243408203">
            <text:p>417.9182434082</text:p>
          </table:table-cell>
          <table:table-cell office:value-type="float" office:value="-0.01440763">
            <text:p>-0.01440763</text:p>
          </table:table-cell>
          <table:table-cell table:number-columns-repeated="4"/>
        </table:table-row>
        <table:table-row table:style-name="ro1">
          <table:table-cell office:value-type="float" office:value="418.031158447266">
            <text:p>418.0311584473</text:p>
          </table:table-cell>
          <table:table-cell office:value-type="float" office:value="-0.007414638">
            <text:p>-0.007414638</text:p>
          </table:table-cell>
          <table:table-cell table:number-columns-repeated="4"/>
        </table:table-row>
        <table:table-row table:style-name="ro1">
          <table:table-cell office:value-type="float" office:value="418.144073486328">
            <text:p>418.1440734863</text:p>
          </table:table-cell>
          <table:table-cell office:value-type="float" office:value="0.02965161">
            <text:p>0.02965161</text:p>
          </table:table-cell>
          <table:table-cell table:number-columns-repeated="4"/>
        </table:table-row>
        <table:table-row table:style-name="ro1">
          <table:table-cell office:value-type="float" office:value="418.256988525391">
            <text:p>418.2569885254</text:p>
          </table:table-cell>
          <table:table-cell office:value-type="float" office:value="0.01573648">
            <text:p>0.01573648</text:p>
          </table:table-cell>
          <table:table-cell table:number-columns-repeated="4"/>
        </table:table-row>
        <table:table-row table:style-name="ro1">
          <table:table-cell office:value-type="float" office:value="418.369934082031">
            <text:p>418.369934082</text:p>
          </table:table-cell>
          <table:table-cell office:value-type="float" office:value="0.005190836">
            <text:p>0.005190836</text:p>
          </table:table-cell>
          <table:table-cell table:number-columns-repeated="4"/>
        </table:table-row>
        <table:table-row table:style-name="ro1">
          <table:table-cell office:value-type="float" office:value="418.482849121094">
            <text:p>418.4828491211</text:p>
          </table:table-cell>
          <table:table-cell office:value-type="float" office:value="0.004727248">
            <text:p>0.004727248</text:p>
          </table:table-cell>
          <table:table-cell table:number-columns-repeated="4"/>
        </table:table-row>
        <table:table-row table:style-name="ro1">
          <table:table-cell office:value-type="float" office:value="418.595794677734">
            <text:p>418.5957946777</text:p>
          </table:table-cell>
          <table:table-cell office:value-type="float" office:value="0.000404143">
            <text:p>0.000404143</text:p>
          </table:table-cell>
          <table:table-cell table:number-columns-repeated="4"/>
        </table:table-row>
        <table:table-row table:style-name="ro1">
          <table:table-cell office:value-type="float" office:value="418.708740234375">
            <text:p>418.7087402344</text:p>
          </table:table-cell>
          <table:table-cell office:value-type="float" office:value="0.000688532">
            <text:p>0.000688532</text:p>
          </table:table-cell>
          <table:table-cell table:number-columns-repeated="4"/>
        </table:table-row>
        <table:table-row table:style-name="ro1">
          <table:table-cell office:value-type="float" office:value="418.821685791016">
            <text:p>418.821685791</text:p>
          </table:table-cell>
          <table:table-cell office:value-type="float" office:value="0.001633082">
            <text:p>0.001633082</text:p>
          </table:table-cell>
          <table:table-cell table:number-columns-repeated="4"/>
        </table:table-row>
        <table:table-row table:style-name="ro1">
          <table:table-cell office:value-type="float" office:value="418.934661865234">
            <text:p>418.9346618652</text:p>
          </table:table-cell>
          <table:table-cell office:value-type="float" office:value="0.004457053">
            <text:p>0.004457053</text:p>
          </table:table-cell>
          <table:table-cell table:number-columns-repeated="4"/>
        </table:table-row>
        <table:table-row table:style-name="ro1">
          <table:table-cell office:value-type="float" office:value="419.047607421875">
            <text:p>419.0476074219</text:p>
          </table:table-cell>
          <table:table-cell office:value-type="float" office:value="-0.003609305">
            <text:p>-0.003609305</text:p>
          </table:table-cell>
          <table:table-cell table:number-columns-repeated="4"/>
        </table:table-row>
        <table:table-row table:style-name="ro1">
          <table:table-cell office:value-type="float" office:value="419.160583496094">
            <text:p>419.1605834961</text:p>
          </table:table-cell>
          <table:table-cell office:value-type="float" office:value="-0.00779213">
            <text:p>-0.00779213</text:p>
          </table:table-cell>
          <table:table-cell table:number-columns-repeated="4"/>
        </table:table-row>
        <table:table-row table:style-name="ro1">
          <table:table-cell office:value-type="float" office:value="419.273559570313">
            <text:p>419.2735595703</text:p>
          </table:table-cell>
          <table:table-cell office:value-type="float" office:value="-0.00502857">
            <text:p>-0.00502857</text:p>
          </table:table-cell>
          <table:table-cell table:number-columns-repeated="4"/>
        </table:table-row>
        <table:table-row table:style-name="ro1">
          <table:table-cell office:value-type="float" office:value="419.386535644531">
            <text:p>419.3865356445</text:p>
          </table:table-cell>
          <table:table-cell office:value-type="float" office:value="0.000724571">
            <text:p>0.000724571</text:p>
          </table:table-cell>
          <table:table-cell table:number-columns-repeated="4"/>
        </table:table-row>
        <table:table-row table:style-name="ro1">
          <table:table-cell office:value-type="float" office:value="419.49951171875">
            <text:p>419.4995117188</text:p>
          </table:table-cell>
          <table:table-cell office:value-type="float" office:value="0.0106044">
            <text:p>0.0106044</text:p>
          </table:table-cell>
          <table:table-cell table:number-columns-repeated="4"/>
        </table:table-row>
        <table:table-row table:style-name="ro1">
          <table:table-cell office:value-type="float" office:value="419.612487792969">
            <text:p>419.612487793</text:p>
          </table:table-cell>
          <table:table-cell office:value-type="float" office:value="0.006728989">
            <text:p>0.006728989</text:p>
          </table:table-cell>
          <table:table-cell table:number-columns-repeated="4"/>
        </table:table-row>
        <table:table-row table:style-name="ro1">
          <table:table-cell office:value-type="float" office:value="419.725494384766">
            <text:p>419.7254943848</text:p>
          </table:table-cell>
          <table:table-cell office:value-type="float" office:value="0.009121153">
            <text:p>0.009121153</text:p>
          </table:table-cell>
          <table:table-cell table:number-columns-repeated="4"/>
        </table:table-row>
        <table:table-row table:style-name="ro1">
          <table:table-cell office:value-type="float" office:value="419.838470458984">
            <text:p>419.838470459</text:p>
          </table:table-cell>
          <table:table-cell office:value-type="float" office:value="0.002056826">
            <text:p>0.002056826</text:p>
          </table:table-cell>
          <table:table-cell table:number-columns-repeated="4"/>
        </table:table-row>
        <table:table-row table:style-name="ro1">
          <table:table-cell office:value-type="float" office:value="419.951477050781">
            <text:p>419.9514770508</text:p>
          </table:table-cell>
          <table:table-cell office:value-type="float" office:value="0.01272955">
            <text:p>0.01272955</text:p>
          </table:table-cell>
          <table:table-cell table:number-columns-repeated="4"/>
        </table:table-row>
        <table:table-row table:style-name="ro1">
          <table:table-cell office:value-type="float" office:value="420.064483642578">
            <text:p>420.0644836426</text:p>
          </table:table-cell>
          <table:table-cell office:value-type="float" office:value="-0.001583859">
            <text:p>-0.001583859</text:p>
          </table:table-cell>
          <table:table-cell table:number-columns-repeated="4"/>
        </table:table-row>
        <table:table-row table:style-name="ro1">
          <table:table-cell office:value-type="float" office:value="420.177520751953">
            <text:p>420.177520752</text:p>
          </table:table-cell>
          <table:table-cell office:value-type="float" office:value="0.0008507335">
            <text:p>0.0008507335</text:p>
          </table:table-cell>
          <table:table-cell table:number-columns-repeated="4"/>
        </table:table-row>
        <table:table-row table:style-name="ro1">
          <table:table-cell office:value-type="float" office:value="420.29052734375">
            <text:p>420.2905273438</text:p>
          </table:table-cell>
          <table:table-cell office:value-type="float" office:value="-0.005964324">
            <text:p>-0.005964324</text:p>
          </table:table-cell>
          <table:table-cell table:number-columns-repeated="4"/>
        </table:table-row>
        <table:table-row table:style-name="ro1">
          <table:table-cell office:value-type="float" office:value="420.403564453125">
            <text:p>420.4035644531</text:p>
          </table:table-cell>
          <table:table-cell office:value-type="float" office:value="-0.005263645">
            <text:p>-0.005263645</text:p>
          </table:table-cell>
          <table:table-cell table:number-columns-repeated="4"/>
        </table:table-row>
        <table:table-row table:style-name="ro1">
          <table:table-cell office:value-type="float" office:value="420.516571044922">
            <text:p>420.5165710449</text:p>
          </table:table-cell>
          <table:table-cell office:value-type="float" office:value="-0.003276937">
            <text:p>-0.003276937</text:p>
          </table:table-cell>
          <table:table-cell table:number-columns-repeated="4"/>
        </table:table-row>
        <table:table-row table:style-name="ro1">
          <table:table-cell office:value-type="float" office:value="420.629608154297">
            <text:p>420.6296081543</text:p>
          </table:table-cell>
          <table:table-cell office:value-type="float" office:value="0.00233047">
            <text:p>0.00233047</text:p>
          </table:table-cell>
          <table:table-cell table:number-columns-repeated="4"/>
        </table:table-row>
        <table:table-row table:style-name="ro1">
          <table:table-cell office:value-type="float" office:value="420.742645263672">
            <text:p>420.7426452637</text:p>
          </table:table-cell>
          <table:table-cell office:value-type="float" office:value="0.003813994">
            <text:p>0.003813994</text:p>
          </table:table-cell>
          <table:table-cell table:number-columns-repeated="4"/>
        </table:table-row>
        <table:table-row table:style-name="ro1">
          <table:table-cell office:value-type="float" office:value="420.855712890625">
            <text:p>420.8557128906</text:p>
          </table:table-cell>
          <table:table-cell office:value-type="float" office:value="0.004193345">
            <text:p>0.004193345</text:p>
          </table:table-cell>
          <table:table-cell table:number-columns-repeated="4"/>
        </table:table-row>
        <table:table-row table:style-name="ro1">
          <table:table-cell office:value-type="float" office:value="420.96875">
            <text:p>420.96875</text:p>
          </table:table-cell>
          <table:table-cell office:value-type="float" office:value="0.01380577">
            <text:p>0.01380577</text:p>
          </table:table-cell>
          <table:table-cell table:number-columns-repeated="4"/>
        </table:table-row>
        <table:table-row table:style-name="ro1">
          <table:table-cell office:value-type="float" office:value="421.081817626953">
            <text:p>421.081817627</text:p>
          </table:table-cell>
          <table:table-cell office:value-type="float" office:value="-0.002598281">
            <text:p>-0.002598281</text:p>
          </table:table-cell>
          <table:table-cell table:number-columns-repeated="4"/>
        </table:table-row>
        <table:table-row table:style-name="ro1">
          <table:table-cell office:value-type="float" office:value="421.194854736328">
            <text:p>421.1948547363</text:p>
          </table:table-cell>
          <table:table-cell office:value-type="float" office:value="-0.004640489">
            <text:p>-0.004640489</text:p>
          </table:table-cell>
          <table:table-cell table:number-columns-repeated="4"/>
        </table:table-row>
        <table:table-row table:style-name="ro1">
          <table:table-cell office:value-type="float" office:value="421.307922363281">
            <text:p>421.3079223633</text:p>
          </table:table-cell>
          <table:table-cell office:value-type="float" office:value="0.002330813">
            <text:p>0.002330813</text:p>
          </table:table-cell>
          <table:table-cell table:number-columns-repeated="4"/>
        </table:table-row>
        <table:table-row table:style-name="ro1">
          <table:table-cell office:value-type="float" office:value="421.421020507813">
            <text:p>421.4210205078</text:p>
          </table:table-cell>
          <table:table-cell office:value-type="float" office:value="0.01107043">
            <text:p>0.01107043</text:p>
          </table:table-cell>
          <table:table-cell table:number-columns-repeated="4"/>
        </table:table-row>
        <table:table-row table:style-name="ro1">
          <table:table-cell office:value-type="float" office:value="421.534088134766">
            <text:p>421.5340881348</text:p>
          </table:table-cell>
          <table:table-cell office:value-type="float" office:value="-0.007556981">
            <text:p>-0.007556981</text:p>
          </table:table-cell>
          <table:table-cell table:number-columns-repeated="4"/>
        </table:table-row>
        <table:table-row table:style-name="ro1">
          <table:table-cell office:value-type="float" office:value="421.647155761719">
            <text:p>421.6471557617</text:p>
          </table:table-cell>
          <table:table-cell office:value-type="float" office:value="0.004227053">
            <text:p>0.004227053</text:p>
          </table:table-cell>
          <table:table-cell table:number-columns-repeated="4"/>
        </table:table-row>
        <table:table-row table:style-name="ro1">
          <table:table-cell office:value-type="float" office:value="421.76025390625">
            <text:p>421.7602539063</text:p>
          </table:table-cell>
          <table:table-cell office:value-type="float" office:value="-0.001505454">
            <text:p>-0.001505454</text:p>
          </table:table-cell>
          <table:table-cell table:number-columns-repeated="4"/>
        </table:table-row>
        <table:table-row table:style-name="ro1">
          <table:table-cell office:value-type="float" office:value="421.873352050781">
            <text:p>421.8733520508</text:p>
          </table:table-cell>
          <table:table-cell office:value-type="float" office:value="0.008545299">
            <text:p>0.008545299</text:p>
          </table:table-cell>
          <table:table-cell table:number-columns-repeated="4"/>
        </table:table-row>
        <table:table-row table:style-name="ro1">
          <table:table-cell office:value-type="float" office:value="421.986450195313">
            <text:p>421.9864501953</text:p>
          </table:table-cell>
          <table:table-cell office:value-type="float" office:value="0.006114178">
            <text:p>0.006114178</text:p>
          </table:table-cell>
          <table:table-cell table:number-columns-repeated="4"/>
        </table:table-row>
        <table:table-row table:style-name="ro1">
          <table:table-cell office:value-type="float" office:value="422.099548339844">
            <text:p>422.0995483398</text:p>
          </table:table-cell>
          <table:table-cell office:value-type="float" office:value="-0.0007428529">
            <text:p>-0.0007428529</text:p>
          </table:table-cell>
          <table:table-cell table:number-columns-repeated="4"/>
        </table:table-row>
        <table:table-row table:style-name="ro1">
          <table:table-cell office:value-type="float" office:value="422.212646484375">
            <text:p>422.2126464844</text:p>
          </table:table-cell>
          <table:table-cell office:value-type="float" office:value="0.02106957">
            <text:p>0.02106957</text:p>
          </table:table-cell>
          <table:table-cell table:number-columns-repeated="4"/>
        </table:table-row>
        <table:table-row table:style-name="ro1">
          <table:table-cell office:value-type="float" office:value="422.325775146484">
            <text:p>422.3257751465</text:p>
          </table:table-cell>
          <table:table-cell office:value-type="float" office:value="-0.002124785">
            <text:p>-0.002124785</text:p>
          </table:table-cell>
          <table:table-cell table:number-columns-repeated="4"/>
        </table:table-row>
        <table:table-row table:style-name="ro1">
          <table:table-cell office:value-type="float" office:value="422.438903808594">
            <text:p>422.4389038086</text:p>
          </table:table-cell>
          <table:table-cell office:value-type="float" office:value="-0.007185654">
            <text:p>-0.007185654</text:p>
          </table:table-cell>
          <table:table-cell table:number-columns-repeated="4"/>
        </table:table-row>
        <table:table-row table:style-name="ro1">
          <table:table-cell office:value-type="float" office:value="422.552001953125">
            <text:p>422.5520019531</text:p>
          </table:table-cell>
          <table:table-cell office:value-type="float" office:value="-0.00708247">
            <text:p>-0.00708247</text:p>
          </table:table-cell>
          <table:table-cell table:number-columns-repeated="4"/>
        </table:table-row>
        <table:table-row table:style-name="ro1">
          <table:table-cell office:value-type="float" office:value="422.665130615234">
            <text:p>422.6651306152</text:p>
          </table:table-cell>
          <table:table-cell office:value-type="float" office:value="0.008977043">
            <text:p>0.008977043</text:p>
          </table:table-cell>
          <table:table-cell table:number-columns-repeated="4"/>
        </table:table-row>
        <table:table-row table:style-name="ro1">
          <table:table-cell office:value-type="float" office:value="422.778289794922">
            <text:p>422.7782897949</text:p>
          </table:table-cell>
          <table:table-cell office:value-type="float" office:value="-0.00487718">
            <text:p>-0.00487718</text:p>
          </table:table-cell>
          <table:table-cell table:number-columns-repeated="4"/>
        </table:table-row>
        <table:table-row table:style-name="ro1">
          <table:table-cell office:value-type="float" office:value="422.891418457031">
            <text:p>422.891418457</text:p>
          </table:table-cell>
          <table:table-cell office:value-type="float" office:value="0.01008716">
            <text:p>0.01008716</text:p>
          </table:table-cell>
          <table:table-cell table:number-columns-repeated="4"/>
        </table:table-row>
        <table:table-row table:style-name="ro1">
          <table:table-cell office:value-type="float" office:value="423.004577636719">
            <text:p>423.0045776367</text:p>
          </table:table-cell>
          <table:table-cell office:value-type="float" office:value="0.006513295">
            <text:p>0.006513295</text:p>
          </table:table-cell>
          <table:table-cell table:number-columns-repeated="4"/>
        </table:table-row>
        <table:table-row table:style-name="ro1">
          <table:table-cell office:value-type="float" office:value="423.117706298828">
            <text:p>423.1177062988</text:p>
          </table:table-cell>
          <table:table-cell office:value-type="float" office:value="-0.002127175">
            <text:p>-0.002127175</text:p>
          </table:table-cell>
          <table:table-cell table:number-columns-repeated="4"/>
        </table:table-row>
        <table:table-row table:style-name="ro1">
          <table:table-cell office:value-type="float" office:value="423.230865478516">
            <text:p>423.2308654785</text:p>
          </table:table-cell>
          <table:table-cell office:value-type="float" office:value="-0.003916656">
            <text:p>-0.003916656</text:p>
          </table:table-cell>
          <table:table-cell table:number-columns-repeated="4"/>
        </table:table-row>
        <table:table-row table:style-name="ro1">
          <table:table-cell office:value-type="float" office:value="423.344024658203">
            <text:p>423.3440246582</text:p>
          </table:table-cell>
          <table:table-cell office:value-type="float" office:value="0.002673917">
            <text:p>0.002673917</text:p>
          </table:table-cell>
          <table:table-cell table:number-columns-repeated="4"/>
        </table:table-row>
        <table:table-row table:style-name="ro1">
          <table:table-cell office:value-type="float" office:value="423.457183837891">
            <text:p>423.4571838379</text:p>
          </table:table-cell>
          <table:table-cell office:value-type="float" office:value="-0.008163352">
            <text:p>-0.008163352</text:p>
          </table:table-cell>
          <table:table-cell table:number-columns-repeated="4"/>
        </table:table-row>
        <table:table-row table:style-name="ro1">
          <table:table-cell office:value-type="float" office:value="423.570373535156">
            <text:p>423.5703735352</text:p>
          </table:table-cell>
          <table:table-cell office:value-type="float" office:value="0.01091556">
            <text:p>0.01091556</text:p>
          </table:table-cell>
          <table:table-cell table:number-columns-repeated="4"/>
        </table:table-row>
        <table:table-row table:style-name="ro1">
          <table:table-cell office:value-type="float" office:value="423.683532714844">
            <text:p>423.6835327148</text:p>
          </table:table-cell>
          <table:table-cell office:value-type="float" office:value="0.0008382864">
            <text:p>0.0008382864</text:p>
          </table:table-cell>
          <table:table-cell table:number-columns-repeated="4"/>
        </table:table-row>
        <table:table-row table:style-name="ro1">
          <table:table-cell office:value-type="float" office:value="423.796722412109">
            <text:p>423.7967224121</text:p>
          </table:table-cell>
          <table:table-cell office:value-type="float" office:value="-0.002831218">
            <text:p>-0.002831218</text:p>
          </table:table-cell>
          <table:table-cell table:number-columns-repeated="4"/>
        </table:table-row>
        <table:table-row table:style-name="ro1">
          <table:table-cell office:value-type="float" office:value="423.909912109375">
            <text:p>423.9099121094</text:p>
          </table:table-cell>
          <table:table-cell office:value-type="float" office:value="-0.009198085">
            <text:p>-0.009198085</text:p>
          </table:table-cell>
          <table:table-cell table:number-columns-repeated="4"/>
        </table:table-row>
        <table:table-row table:style-name="ro1">
          <table:table-cell office:value-type="float" office:value="424.023101806641">
            <text:p>424.0231018066</text:p>
          </table:table-cell>
          <table:table-cell office:value-type="float" office:value="0.005192237">
            <text:p>0.005192237</text:p>
          </table:table-cell>
          <table:table-cell table:number-columns-repeated="4"/>
        </table:table-row>
        <table:table-row table:style-name="ro1">
          <table:table-cell office:value-type="float" office:value="424.136291503906">
            <text:p>424.1362915039</text:p>
          </table:table-cell>
          <table:table-cell office:value-type="float" office:value="0.01084608">
            <text:p>0.01084608</text:p>
          </table:table-cell>
          <table:table-cell table:number-columns-repeated="4"/>
        </table:table-row>
        <table:table-row table:style-name="ro1">
          <table:table-cell office:value-type="float" office:value="424.24951171875">
            <text:p>424.2495117188</text:p>
          </table:table-cell>
          <table:table-cell office:value-type="float" office:value="0.00603798">
            <text:p>0.00603798</text:p>
          </table:table-cell>
          <table:table-cell table:number-columns-repeated="4"/>
        </table:table-row>
        <table:table-row table:style-name="ro1">
          <table:table-cell office:value-type="float" office:value="424.362701416016">
            <text:p>424.362701416</text:p>
          </table:table-cell>
          <table:table-cell office:value-type="float" office:value="-0.00332728">
            <text:p>-0.00332728</text:p>
          </table:table-cell>
          <table:table-cell table:number-columns-repeated="4"/>
        </table:table-row>
        <table:table-row table:style-name="ro1">
          <table:table-cell office:value-type="float" office:value="424.475921630859">
            <text:p>424.4759216309</text:p>
          </table:table-cell>
          <table:table-cell office:value-type="float" office:value="0.003471492">
            <text:p>0.003471492</text:p>
          </table:table-cell>
          <table:table-cell table:number-columns-repeated="4"/>
        </table:table-row>
        <table:table-row table:style-name="ro1">
          <table:table-cell office:value-type="float" office:value="424.589141845703">
            <text:p>424.5891418457</text:p>
          </table:table-cell>
          <table:table-cell office:value-type="float" office:value="-0.0005574659">
            <text:p>-0.0005574659</text:p>
          </table:table-cell>
          <table:table-cell table:number-columns-repeated="4"/>
        </table:table-row>
        <table:table-row table:style-name="ro1">
          <table:table-cell office:value-type="float" office:value="424.702362060547">
            <text:p>424.7023620605</text:p>
          </table:table-cell>
          <table:table-cell office:value-type="float" office:value="-0.006594896">
            <text:p>-0.006594896</text:p>
          </table:table-cell>
          <table:table-cell table:number-columns-repeated="4"/>
        </table:table-row>
        <table:table-row table:style-name="ro1">
          <table:table-cell office:value-type="float" office:value="424.815612792969">
            <text:p>424.815612793</text:p>
          </table:table-cell>
          <table:table-cell office:value-type="float" office:value="-0.002386301">
            <text:p>-0.002386301</text:p>
          </table:table-cell>
          <table:table-cell table:number-columns-repeated="4"/>
        </table:table-row>
        <table:table-row table:style-name="ro1">
          <table:table-cell office:value-type="float" office:value="424.928833007813">
            <text:p>424.9288330078</text:p>
          </table:table-cell>
          <table:table-cell office:value-type="float" office:value="0.01467533">
            <text:p>0.01467533</text:p>
          </table:table-cell>
          <table:table-cell table:number-columns-repeated="4"/>
        </table:table-row>
        <table:table-row table:style-name="ro1">
          <table:table-cell office:value-type="float" office:value="425.042083740234">
            <text:p>425.0420837402</text:p>
          </table:table-cell>
          <table:table-cell office:value-type="float" office:value="-0.004182646">
            <text:p>-0.004182646</text:p>
          </table:table-cell>
          <table:table-cell table:number-columns-repeated="4"/>
        </table:table-row>
        <table:table-row table:style-name="ro1">
          <table:table-cell office:value-type="float" office:value="425.155303955078">
            <text:p>425.1553039551</text:p>
          </table:table-cell>
          <table:table-cell office:value-type="float" office:value="-0.003136945">
            <text:p>-0.003136945</text:p>
          </table:table-cell>
          <table:table-cell table:number-columns-repeated="4"/>
        </table:table-row>
        <table:table-row table:style-name="ro1">
          <table:table-cell office:value-type="float" office:value="425.2685546875">
            <text:p>425.2685546875</text:p>
          </table:table-cell>
          <table:table-cell office:value-type="float" office:value="-0.01261619">
            <text:p>-0.01261619</text:p>
          </table:table-cell>
          <table:table-cell table:number-columns-repeated="4"/>
        </table:table-row>
        <table:table-row table:style-name="ro1">
          <table:table-cell office:value-type="float" office:value="425.3818359375">
            <text:p>425.3818359375</text:p>
          </table:table-cell>
          <table:table-cell office:value-type="float" office:value="-0.0008636731">
            <text:p>-0.0008636731</text:p>
          </table:table-cell>
          <table:table-cell table:number-columns-repeated="4"/>
        </table:table-row>
        <table:table-row table:style-name="ro1">
          <table:table-cell office:value-type="float" office:value="425.495086669922">
            <text:p>425.4950866699</text:p>
          </table:table-cell>
          <table:table-cell office:value-type="float" office:value="0.005293916">
            <text:p>0.005293916</text:p>
          </table:table-cell>
          <table:table-cell table:number-columns-repeated="4"/>
        </table:table-row>
        <table:table-row table:style-name="ro1">
          <table:table-cell office:value-type="float" office:value="425.608337402344">
            <text:p>425.6083374023</text:p>
          </table:table-cell>
          <table:table-cell office:value-type="float" office:value="0.005638307">
            <text:p>0.005638307</text:p>
          </table:table-cell>
          <table:table-cell table:number-columns-repeated="4"/>
        </table:table-row>
        <table:table-row table:style-name="ro1">
          <table:table-cell office:value-type="float" office:value="425.721618652344">
            <text:p>425.7216186523</text:p>
          </table:table-cell>
          <table:table-cell office:value-type="float" office:value="-0.004743944">
            <text:p>-0.004743944</text:p>
          </table:table-cell>
          <table:table-cell table:number-columns-repeated="4"/>
        </table:table-row>
        <table:table-row table:style-name="ro1">
          <table:table-cell office:value-type="float" office:value="425.834899902344">
            <text:p>425.8348999023</text:p>
          </table:table-cell>
          <table:table-cell office:value-type="float" office:value="-0.005578207">
            <text:p>-0.005578207</text:p>
          </table:table-cell>
          <table:table-cell table:number-columns-repeated="4"/>
        </table:table-row>
        <table:table-row table:style-name="ro1">
          <table:table-cell office:value-type="float" office:value="425.948181152344">
            <text:p>425.9481811523</text:p>
          </table:table-cell>
          <table:table-cell office:value-type="float" office:value="0.004357453">
            <text:p>0.004357453</text:p>
          </table:table-cell>
          <table:table-cell table:number-columns-repeated="4"/>
        </table:table-row>
        <table:table-row table:style-name="ro1">
          <table:table-cell office:value-type="float" office:value="426.061462402344">
            <text:p>426.0614624023</text:p>
          </table:table-cell>
          <table:table-cell office:value-type="float" office:value="0.0112373">
            <text:p>0.0112373</text:p>
          </table:table-cell>
          <table:table-cell table:number-columns-repeated="4"/>
        </table:table-row>
        <table:table-row table:style-name="ro1">
          <table:table-cell office:value-type="float" office:value="426.174743652344">
            <text:p>426.1747436523</text:p>
          </table:table-cell>
          <table:table-cell office:value-type="float" office:value="-0.003735317">
            <text:p>-0.003735317</text:p>
          </table:table-cell>
          <table:table-cell table:number-columns-repeated="4"/>
        </table:table-row>
        <table:table-row table:style-name="ro1">
          <table:table-cell office:value-type="float" office:value="426.288055419922">
            <text:p>426.2880554199</text:p>
          </table:table-cell>
          <table:table-cell office:value-type="float" office:value="0.01052263">
            <text:p>0.01052263</text:p>
          </table:table-cell>
          <table:table-cell table:number-columns-repeated="4"/>
        </table:table-row>
        <table:table-row table:style-name="ro1">
          <table:table-cell office:value-type="float" office:value="426.401336669922">
            <text:p>426.4013366699</text:p>
          </table:table-cell>
          <table:table-cell office:value-type="float" office:value="0.0005258866">
            <text:p>0.0005258866</text:p>
          </table:table-cell>
          <table:table-cell table:number-columns-repeated="4"/>
        </table:table-row>
        <table:table-row table:style-name="ro1">
          <table:table-cell office:value-type="float" office:value="426.5146484375">
            <text:p>426.5146484375</text:p>
          </table:table-cell>
          <table:table-cell office:value-type="float" office:value="-0.00173814">
            <text:p>-0.00173814</text:p>
          </table:table-cell>
          <table:table-cell table:number-columns-repeated="4"/>
        </table:table-row>
        <table:table-row table:style-name="ro1">
          <table:table-cell office:value-type="float" office:value="426.627960205078">
            <text:p>426.6279602051</text:p>
          </table:table-cell>
          <table:table-cell office:value-type="float" office:value="0.003333762">
            <text:p>0.003333762</text:p>
          </table:table-cell>
          <table:table-cell table:number-columns-repeated="4"/>
        </table:table-row>
        <table:table-row table:style-name="ro1">
          <table:table-cell office:value-type="float" office:value="426.741271972656">
            <text:p>426.7412719727</text:p>
          </table:table-cell>
          <table:table-cell office:value-type="float" office:value="0.009134651">
            <text:p>0.009134651</text:p>
          </table:table-cell>
          <table:table-cell table:number-columns-repeated="4"/>
        </table:table-row>
        <table:table-row table:style-name="ro1">
          <table:table-cell office:value-type="float" office:value="426.854614257813">
            <text:p>426.8546142578</text:p>
          </table:table-cell>
          <table:table-cell office:value-type="float" office:value="0.008173966">
            <text:p>0.008173966</text:p>
          </table:table-cell>
          <table:table-cell table:number-columns-repeated="4"/>
        </table:table-row>
        <table:table-row table:style-name="ro1">
          <table:table-cell office:value-type="float" office:value="426.967926025391">
            <text:p>426.9679260254</text:p>
          </table:table-cell>
          <table:table-cell office:value-type="float" office:value="-0.003407286">
            <text:p>-0.003407286</text:p>
          </table:table-cell>
          <table:table-cell table:number-columns-repeated="4"/>
        </table:table-row>
        <table:table-row table:style-name="ro1">
          <table:table-cell office:value-type="float" office:value="427.081268310547">
            <text:p>427.0812683105</text:p>
          </table:table-cell>
          <table:table-cell office:value-type="float" office:value="-0.004143139">
            <text:p>-0.004143139</text:p>
          </table:table-cell>
          <table:table-cell table:number-columns-repeated="4"/>
        </table:table-row>
        <table:table-row table:style-name="ro1">
          <table:table-cell office:value-type="float" office:value="427.194610595703">
            <text:p>427.1946105957</text:p>
          </table:table-cell>
          <table:table-cell office:value-type="float" office:value="0.003784782">
            <text:p>0.003784782</text:p>
          </table:table-cell>
          <table:table-cell table:number-columns-repeated="4"/>
        </table:table-row>
        <table:table-row table:style-name="ro1">
          <table:table-cell office:value-type="float" office:value="427.307952880859">
            <text:p>427.3079528809</text:p>
          </table:table-cell>
          <table:table-cell office:value-type="float" office:value="0.003217484">
            <text:p>0.003217484</text:p>
          </table:table-cell>
          <table:table-cell table:number-columns-repeated="4"/>
        </table:table-row>
        <table:table-row table:style-name="ro1">
          <table:table-cell office:value-type="float" office:value="427.421295166016">
            <text:p>427.421295166</text:p>
          </table:table-cell>
          <table:table-cell office:value-type="float" office:value="0.001293296">
            <text:p>0.001293296</text:p>
          </table:table-cell>
          <table:table-cell table:number-columns-repeated="4"/>
        </table:table-row>
        <table:table-row table:style-name="ro1">
          <table:table-cell office:value-type="float" office:value="427.534637451172">
            <text:p>427.5346374512</text:p>
          </table:table-cell>
          <table:table-cell office:value-type="float" office:value="-0.008873031">
            <text:p>-0.008873031</text:p>
          </table:table-cell>
          <table:table-cell table:number-columns-repeated="4"/>
        </table:table-row>
        <table:table-row table:style-name="ro1">
          <table:table-cell office:value-type="float" office:value="427.648010253906">
            <text:p>427.6480102539</text:p>
          </table:table-cell>
          <table:table-cell office:value-type="float" office:value="0.003192962">
            <text:p>0.003192962</text:p>
          </table:table-cell>
          <table:table-cell table:number-columns-repeated="4"/>
        </table:table-row>
        <table:table-row table:style-name="ro1">
          <table:table-cell office:value-type="float" office:value="427.761383056641">
            <text:p>427.7613830566</text:p>
          </table:table-cell>
          <table:table-cell office:value-type="float" office:value="0.005107174">
            <text:p>0.005107174</text:p>
          </table:table-cell>
          <table:table-cell table:number-columns-repeated="4"/>
        </table:table-row>
        <table:table-row table:style-name="ro1">
          <table:table-cell office:value-type="float" office:value="427.874755859375">
            <text:p>427.8747558594</text:p>
          </table:table-cell>
          <table:table-cell office:value-type="float" office:value="-0.006449669">
            <text:p>-0.006449669</text:p>
          </table:table-cell>
          <table:table-cell table:number-columns-repeated="4"/>
        </table:table-row>
        <table:table-row table:style-name="ro1">
          <table:table-cell office:value-type="float" office:value="427.988128662109">
            <text:p>427.9881286621</text:p>
          </table:table-cell>
          <table:table-cell office:value-type="float" office:value="-0.008692644">
            <text:p>-0.008692644</text:p>
          </table:table-cell>
          <table:table-cell table:number-columns-repeated="4"/>
        </table:table-row>
        <table:table-row table:style-name="ro1">
          <table:table-cell office:value-type="float" office:value="428.101501464844">
            <text:p>428.1015014648</text:p>
          </table:table-cell>
          <table:table-cell office:value-type="float" office:value="-0.0008675637">
            <text:p>-0.0008675637</text:p>
          </table:table-cell>
          <table:table-cell table:number-columns-repeated="4"/>
        </table:table-row>
        <table:table-row table:style-name="ro1">
          <table:table-cell office:value-type="float" office:value="428.214874267578">
            <text:p>428.2148742676</text:p>
          </table:table-cell>
          <table:table-cell office:value-type="float" office:value="0.008727925">
            <text:p>0.008727925</text:p>
          </table:table-cell>
          <table:table-cell table:number-columns-repeated="4"/>
        </table:table-row>
        <table:table-row table:style-name="ro1">
          <table:table-cell office:value-type="float" office:value="428.328277587891">
            <text:p>428.3282775879</text:p>
          </table:table-cell>
          <table:table-cell office:value-type="float" office:value="-0.001604172">
            <text:p>-0.001604172</text:p>
          </table:table-cell>
          <table:table-cell table:number-columns-repeated="4"/>
        </table:table-row>
        <table:table-row table:style-name="ro1">
          <table:table-cell office:value-type="float" office:value="428.441650390625">
            <text:p>428.4416503906</text:p>
          </table:table-cell>
          <table:table-cell office:value-type="float" office:value="-0.005399091">
            <text:p>-0.005399091</text:p>
          </table:table-cell>
          <table:table-cell table:number-columns-repeated="4"/>
        </table:table-row>
        <table:table-row table:style-name="ro1">
          <table:table-cell office:value-type="float" office:value="428.555053710938">
            <text:p>428.5550537109</text:p>
          </table:table-cell>
          <table:table-cell office:value-type="float" office:value="-0.003077286">
            <text:p>-0.003077286</text:p>
          </table:table-cell>
          <table:table-cell table:number-columns-repeated="4"/>
        </table:table-row>
        <table:table-row table:style-name="ro1">
          <table:table-cell office:value-type="float" office:value="428.66845703125">
            <text:p>428.6684570313</text:p>
          </table:table-cell>
          <table:table-cell office:value-type="float" office:value="0.003437435">
            <text:p>0.003437435</text:p>
          </table:table-cell>
          <table:table-cell table:number-columns-repeated="4"/>
        </table:table-row>
        <table:table-row table:style-name="ro1">
          <table:table-cell office:value-type="float" office:value="428.781890869141">
            <text:p>428.7818908691</text:p>
          </table:table-cell>
          <table:table-cell office:value-type="float" office:value="-0.000221074">
            <text:p>-0.000221074</text:p>
          </table:table-cell>
          <table:table-cell table:number-columns-repeated="4"/>
        </table:table-row>
        <table:table-row table:style-name="ro1">
          <table:table-cell office:value-type="float" office:value="428.895294189453">
            <text:p>428.8952941895</text:p>
          </table:table-cell>
          <table:table-cell office:value-type="float" office:value="0.007059935">
            <text:p>0.007059935</text:p>
          </table:table-cell>
          <table:table-cell table:number-columns-repeated="4"/>
        </table:table-row>
        <table:table-row table:style-name="ro1">
          <table:table-cell office:value-type="float" office:value="429.008728027344">
            <text:p>429.0087280273</text:p>
          </table:table-cell>
          <table:table-cell office:value-type="float" office:value="-0.006478569">
            <text:p>-0.006478569</text:p>
          </table:table-cell>
          <table:table-cell table:number-columns-repeated="4"/>
        </table:table-row>
        <table:table-row table:style-name="ro1">
          <table:table-cell office:value-type="float" office:value="429.122131347656">
            <text:p>429.1221313477</text:p>
          </table:table-cell>
          <table:table-cell office:value-type="float" office:value="-0.004039782">
            <text:p>-0.004039782</text:p>
          </table:table-cell>
          <table:table-cell table:number-columns-repeated="4"/>
        </table:table-row>
        <table:table-row table:style-name="ro1">
          <table:table-cell office:value-type="float" office:value="429.235565185547">
            <text:p>429.2355651855</text:p>
          </table:table-cell>
          <table:table-cell office:value-type="float" office:value="-0.004983236">
            <text:p>-0.004983236</text:p>
          </table:table-cell>
          <table:table-cell table:number-columns-repeated="4"/>
        </table:table-row>
        <table:table-row table:style-name="ro1">
          <table:table-cell office:value-type="float" office:value="429.348999023438">
            <text:p>429.3489990234</text:p>
          </table:table-cell>
          <table:table-cell office:value-type="float" office:value="0.01603059">
            <text:p>0.01603059</text:p>
          </table:table-cell>
          <table:table-cell table:number-columns-repeated="4"/>
        </table:table-row>
        <table:table-row table:style-name="ro1">
          <table:table-cell office:value-type="float" office:value="429.462432861328">
            <text:p>429.4624328613</text:p>
          </table:table-cell>
          <table:table-cell office:value-type="float" office:value="0.02414501">
            <text:p>0.02414501</text:p>
          </table:table-cell>
          <table:table-cell table:number-columns-repeated="4"/>
        </table:table-row>
        <table:table-row table:style-name="ro1">
          <table:table-cell office:value-type="float" office:value="429.575897216797">
            <text:p>429.5758972168</text:p>
          </table:table-cell>
          <table:table-cell office:value-type="float" office:value="-0.000147687">
            <text:p>-0.000147687</text:p>
          </table:table-cell>
          <table:table-cell table:number-columns-repeated="4"/>
        </table:table-row>
        <table:table-row table:style-name="ro1">
          <table:table-cell office:value-type="float" office:value="429.689331054688">
            <text:p>429.6893310547</text:p>
          </table:table-cell>
          <table:table-cell office:value-type="float" office:value="-0.004814073">
            <text:p>-0.004814073</text:p>
          </table:table-cell>
          <table:table-cell table:number-columns-repeated="4"/>
        </table:table-row>
        <table:table-row table:style-name="ro1">
          <table:table-cell office:value-type="float" office:value="429.802795410156">
            <text:p>429.8027954102</text:p>
          </table:table-cell>
          <table:table-cell office:value-type="float" office:value="0.007376812">
            <text:p>0.007376812</text:p>
          </table:table-cell>
          <table:table-cell table:number-columns-repeated="4"/>
        </table:table-row>
        <table:table-row table:style-name="ro1">
          <table:table-cell office:value-type="float" office:value="429.916259765625">
            <text:p>429.9162597656</text:p>
          </table:table-cell>
          <table:table-cell office:value-type="float" office:value="0.0004993241">
            <text:p>0.0004993241</text:p>
          </table:table-cell>
          <table:table-cell table:number-columns-repeated="4"/>
        </table:table-row>
        <table:table-row table:style-name="ro1">
          <table:table-cell office:value-type="float" office:value="430.029724121094">
            <text:p>430.0297241211</text:p>
          </table:table-cell>
          <table:table-cell office:value-type="float" office:value="0.007912259">
            <text:p>0.007912259</text:p>
          </table:table-cell>
          <table:table-cell table:number-columns-repeated="4"/>
        </table:table-row>
        <table:table-row table:style-name="ro1">
          <table:table-cell office:value-type="float" office:value="430.143188476563">
            <text:p>430.1431884766</text:p>
          </table:table-cell>
          <table:table-cell office:value-type="float" office:value="0.008257475">
            <text:p>0.008257475</text:p>
          </table:table-cell>
          <table:table-cell table:number-columns-repeated="4"/>
        </table:table-row>
        <table:table-row table:style-name="ro1">
          <table:table-cell office:value-type="float" office:value="430.256683349609">
            <text:p>430.2566833496</text:p>
          </table:table-cell>
          <table:table-cell office:value-type="float" office:value="-0.002634912">
            <text:p>-0.002634912</text:p>
          </table:table-cell>
          <table:table-cell table:number-columns-repeated="4"/>
        </table:table-row>
        <table:table-row table:style-name="ro1">
          <table:table-cell office:value-type="float" office:value="430.370147705078">
            <text:p>430.3701477051</text:p>
          </table:table-cell>
          <table:table-cell office:value-type="float" office:value="0.01144349">
            <text:p>0.01144349</text:p>
          </table:table-cell>
          <table:table-cell table:number-columns-repeated="4"/>
        </table:table-row>
        <table:table-row table:style-name="ro1">
          <table:table-cell office:value-type="float" office:value="430.483642578125">
            <text:p>430.4836425781</text:p>
          </table:table-cell>
          <table:table-cell office:value-type="float" office:value="-0.001195063">
            <text:p>-0.001195063</text:p>
          </table:table-cell>
          <table:table-cell table:number-columns-repeated="4"/>
        </table:table-row>
        <table:table-row table:style-name="ro1">
          <table:table-cell office:value-type="float" office:value="430.597137451172">
            <text:p>430.5971374512</text:p>
          </table:table-cell>
          <table:table-cell office:value-type="float" office:value="0.0002474726">
            <text:p>0.0002474726</text:p>
          </table:table-cell>
          <table:table-cell table:number-columns-repeated="4"/>
        </table:table-row>
        <table:table-row table:style-name="ro1">
          <table:table-cell office:value-type="float" office:value="430.710632324219">
            <text:p>430.7106323242</text:p>
          </table:table-cell>
          <table:table-cell office:value-type="float" office:value="-0.001939804">
            <text:p>-0.001939804</text:p>
          </table:table-cell>
          <table:table-cell table:number-columns-repeated="4"/>
        </table:table-row>
        <table:table-row table:style-name="ro1">
          <table:table-cell office:value-type="float" office:value="430.824127197266">
            <text:p>430.8241271973</text:p>
          </table:table-cell>
          <table:table-cell office:value-type="float" office:value="0.005826423">
            <text:p>0.005826423</text:p>
          </table:table-cell>
          <table:table-cell table:number-columns-repeated="4"/>
        </table:table-row>
        <table:table-row table:style-name="ro1">
          <table:table-cell office:value-type="float" office:value="430.937652587891">
            <text:p>430.9376525879</text:p>
          </table:table-cell>
          <table:table-cell office:value-type="float" office:value="-0.0008407977">
            <text:p>-0.0008407977</text:p>
          </table:table-cell>
          <table:table-cell table:number-columns-repeated="4"/>
        </table:table-row>
        <table:table-row table:style-name="ro1">
          <table:table-cell office:value-type="float" office:value="431.051147460938">
            <text:p>431.0511474609</text:p>
          </table:table-cell>
          <table:table-cell office:value-type="float" office:value="-0.003536709">
            <text:p>-0.003536709</text:p>
          </table:table-cell>
          <table:table-cell table:number-columns-repeated="4"/>
        </table:table-row>
        <table:table-row table:style-name="ro1">
          <table:table-cell office:value-type="float" office:value="431.164672851563">
            <text:p>431.1646728516</text:p>
          </table:table-cell>
          <table:table-cell office:value-type="float" office:value="-0.005501807">
            <text:p>-0.005501807</text:p>
          </table:table-cell>
          <table:table-cell table:number-columns-repeated="4"/>
        </table:table-row>
        <table:table-row table:style-name="ro1">
          <table:table-cell office:value-type="float" office:value="431.278198242188">
            <text:p>431.2781982422</text:p>
          </table:table-cell>
          <table:table-cell office:value-type="float" office:value="0.003920511">
            <text:p>0.003920511</text:p>
          </table:table-cell>
          <table:table-cell table:number-columns-repeated="4"/>
        </table:table-row>
        <table:table-row table:style-name="ro1">
          <table:table-cell office:value-type="float" office:value="431.391723632813">
            <text:p>431.3917236328</text:p>
          </table:table-cell>
          <table:table-cell office:value-type="float" office:value="-0.004078169">
            <text:p>-0.004078169</text:p>
          </table:table-cell>
          <table:table-cell table:number-columns-repeated="4"/>
        </table:table-row>
        <table:table-row table:style-name="ro1">
          <table:table-cell office:value-type="float" office:value="431.505249023438">
            <text:p>431.5052490234</text:p>
          </table:table-cell>
          <table:table-cell office:value-type="float" office:value="-0.001455517">
            <text:p>-0.001455517</text:p>
          </table:table-cell>
          <table:table-cell table:number-columns-repeated="4"/>
        </table:table-row>
        <table:table-row table:style-name="ro1">
          <table:table-cell office:value-type="float" office:value="431.618804931641">
            <text:p>431.6188049316</text:p>
          </table:table-cell>
          <table:table-cell office:value-type="float" office:value="-0.002566891">
            <text:p>-0.002566891</text:p>
          </table:table-cell>
          <table:table-cell table:number-columns-repeated="4"/>
        </table:table-row>
        <table:table-row table:style-name="ro1">
          <table:table-cell office:value-type="float" office:value="431.732330322266">
            <text:p>431.7323303223</text:p>
          </table:table-cell>
          <table:table-cell office:value-type="float" office:value="0.008773839">
            <text:p>0.008773839</text:p>
          </table:table-cell>
          <table:table-cell table:number-columns-repeated="4"/>
        </table:table-row>
        <table:table-row table:style-name="ro1">
          <table:table-cell office:value-type="float" office:value="431.845886230469">
            <text:p>431.8458862305</text:p>
          </table:table-cell>
          <table:table-cell office:value-type="float" office:value="0.01031145">
            <text:p>0.01031145</text:p>
          </table:table-cell>
          <table:table-cell table:number-columns-repeated="4"/>
        </table:table-row>
        <table:table-row table:style-name="ro1">
          <table:table-cell office:value-type="float" office:value="431.959442138672">
            <text:p>431.9594421387</text:p>
          </table:table-cell>
          <table:table-cell office:value-type="float" office:value="0.006391167">
            <text:p>0.006391167</text:p>
          </table:table-cell>
          <table:table-cell table:number-columns-repeated="4"/>
        </table:table-row>
        <table:table-row table:style-name="ro1">
          <table:table-cell office:value-type="float" office:value="432.072998046875">
            <text:p>432.0729980469</text:p>
          </table:table-cell>
          <table:table-cell office:value-type="float" office:value="0.01964427">
            <text:p>0.01964427</text:p>
          </table:table-cell>
          <table:table-cell table:number-columns-repeated="4"/>
        </table:table-row>
        <table:table-row table:style-name="ro1">
          <table:table-cell office:value-type="float" office:value="432.186553955078">
            <text:p>432.1865539551</text:p>
          </table:table-cell>
          <table:table-cell office:value-type="float" office:value="-0.005291439">
            <text:p>-0.005291439</text:p>
          </table:table-cell>
          <table:table-cell table:number-columns-repeated="4"/>
        </table:table-row>
        <table:table-row table:style-name="ro1">
          <table:table-cell office:value-type="float" office:value="432.300140380859">
            <text:p>432.3001403809</text:p>
          </table:table-cell>
          <table:table-cell office:value-type="float" office:value="-0.001762752">
            <text:p>-0.001762752</text:p>
          </table:table-cell>
          <table:table-cell table:number-columns-repeated="4"/>
        </table:table-row>
        <table:table-row table:style-name="ro1">
          <table:table-cell office:value-type="float" office:value="432.413696289063">
            <text:p>432.4136962891</text:p>
          </table:table-cell>
          <table:table-cell office:value-type="float" office:value="0.001088531">
            <text:p>0.001088531</text:p>
          </table:table-cell>
          <table:table-cell table:number-columns-repeated="4"/>
        </table:table-row>
        <table:table-row table:style-name="ro1">
          <table:table-cell office:value-type="float" office:value="432.527282714844">
            <text:p>432.5272827148</text:p>
          </table:table-cell>
          <table:table-cell office:value-type="float" office:value="0.003959746">
            <text:p>0.003959746</text:p>
          </table:table-cell>
          <table:table-cell table:number-columns-repeated="4"/>
        </table:table-row>
        <table:table-row table:style-name="ro1">
          <table:table-cell office:value-type="float" office:value="432.640869140625">
            <text:p>432.6408691406</text:p>
          </table:table-cell>
          <table:table-cell office:value-type="float" office:value="-0.002306917">
            <text:p>-0.002306917</text:p>
          </table:table-cell>
          <table:table-cell table:number-columns-repeated="4"/>
        </table:table-row>
        <table:table-row table:style-name="ro1">
          <table:table-cell office:value-type="float" office:value="432.754455566406">
            <text:p>432.7544555664</text:p>
          </table:table-cell>
          <table:table-cell office:value-type="float" office:value="0.01183687">
            <text:p>0.01183687</text:p>
          </table:table-cell>
          <table:table-cell table:number-columns-repeated="4"/>
        </table:table-row>
        <table:table-row table:style-name="ro1">
          <table:table-cell office:value-type="float" office:value="432.868041992188">
            <text:p>432.8680419922</text:p>
          </table:table-cell>
          <table:table-cell office:value-type="float" office:value="0.01583133">
            <text:p>0.01583133</text:p>
          </table:table-cell>
          <table:table-cell table:number-columns-repeated="4"/>
        </table:table-row>
        <table:table-row table:style-name="ro1">
          <table:table-cell office:value-type="float" office:value="432.981658935547">
            <text:p>432.9816589355</text:p>
          </table:table-cell>
          <table:table-cell office:value-type="float" office:value="0.008423">
            <text:p>0.008423</text:p>
          </table:table-cell>
          <table:table-cell table:number-columns-repeated="4"/>
        </table:table-row>
        <table:table-row table:style-name="ro1">
          <table:table-cell office:value-type="float" office:value="433.095245361328">
            <text:p>433.0952453613</text:p>
          </table:table-cell>
          <table:table-cell office:value-type="float" office:value="0.003362443">
            <text:p>0.003362443</text:p>
          </table:table-cell>
          <table:table-cell table:number-columns-repeated="4"/>
        </table:table-row>
        <table:table-row table:style-name="ro1">
          <table:table-cell office:value-type="float" office:value="433.208862304688">
            <text:p>433.2088623047</text:p>
          </table:table-cell>
          <table:table-cell office:value-type="float" office:value="0.003164419">
            <text:p>0.003164419</text:p>
          </table:table-cell>
          <table:table-cell table:number-columns-repeated="4"/>
        </table:table-row>
        <table:table-row table:style-name="ro1">
          <table:table-cell office:value-type="float" office:value="433.322479248047">
            <text:p>433.322479248</text:p>
          </table:table-cell>
          <table:table-cell office:value-type="float" office:value="-0.001922723">
            <text:p>-0.001922723</text:p>
          </table:table-cell>
          <table:table-cell table:number-columns-repeated="4"/>
        </table:table-row>
        <table:table-row table:style-name="ro1">
          <table:table-cell office:value-type="float" office:value="433.436096191406">
            <text:p>433.4360961914</text:p>
          </table:table-cell>
          <table:table-cell office:value-type="float" office:value="0.004738774">
            <text:p>0.004738774</text:p>
          </table:table-cell>
          <table:table-cell table:number-columns-repeated="4"/>
        </table:table-row>
        <table:table-row table:style-name="ro1">
          <table:table-cell office:value-type="float" office:value="433.549713134766">
            <text:p>433.5497131348</text:p>
          </table:table-cell>
          <table:table-cell office:value-type="float" office:value="-0.001956414">
            <text:p>-0.001956414</text:p>
          </table:table-cell>
          <table:table-cell table:number-columns-repeated="4"/>
        </table:table-row>
        <table:table-row table:style-name="ro1">
          <table:table-cell office:value-type="float" office:value="433.663330078125">
            <text:p>433.6633300781</text:p>
          </table:table-cell>
          <table:table-cell office:value-type="float" office:value="-0.003827952">
            <text:p>-0.003827952</text:p>
          </table:table-cell>
          <table:table-cell table:number-columns-repeated="4"/>
        </table:table-row>
        <table:table-row table:style-name="ro1">
          <table:table-cell office:value-type="float" office:value="433.776977539063">
            <text:p>433.7769775391</text:p>
          </table:table-cell>
          <table:table-cell office:value-type="float" office:value="-0.004304695">
            <text:p>-0.004304695</text:p>
          </table:table-cell>
          <table:table-cell table:number-columns-repeated="4"/>
        </table:table-row>
        <table:table-row table:style-name="ro1">
          <table:table-cell office:value-type="float" office:value="433.890625">
            <text:p>433.890625</text:p>
          </table:table-cell>
          <table:table-cell office:value-type="float" office:value="0.01438957">
            <text:p>0.01438957</text:p>
          </table:table-cell>
          <table:table-cell table:number-columns-repeated="4"/>
        </table:table-row>
        <table:table-row table:style-name="ro1">
          <table:table-cell office:value-type="float" office:value="434.004272460938">
            <text:p>434.0042724609</text:p>
          </table:table-cell>
          <table:table-cell office:value-type="float" office:value="-0.0002197881">
            <text:p>-0.0002197881</text:p>
          </table:table-cell>
          <table:table-cell table:number-columns-repeated="4"/>
        </table:table-row>
        <table:table-row table:style-name="ro1">
          <table:table-cell office:value-type="float" office:value="434.117919921875">
            <text:p>434.1179199219</text:p>
          </table:table-cell>
          <table:table-cell office:value-type="float" office:value="0.002854478">
            <text:p>0.002854478</text:p>
          </table:table-cell>
          <table:table-cell table:number-columns-repeated="4"/>
        </table:table-row>
        <table:table-row table:style-name="ro1">
          <table:table-cell office:value-type="float" office:value="434.231567382813">
            <text:p>434.2315673828</text:p>
          </table:table-cell>
          <table:table-cell office:value-type="float" office:value="-0.00746063">
            <text:p>-0.00746063</text:p>
          </table:table-cell>
          <table:table-cell table:number-columns-repeated="4"/>
        </table:table-row>
        <table:table-row table:style-name="ro1">
          <table:table-cell office:value-type="float" office:value="434.34521484375">
            <text:p>434.3452148438</text:p>
          </table:table-cell>
          <table:table-cell office:value-type="float" office:value="-0.004544168">
            <text:p>-0.004544168</text:p>
          </table:table-cell>
          <table:table-cell table:number-columns-repeated="4"/>
        </table:table-row>
        <table:table-row table:style-name="ro1">
          <table:table-cell office:value-type="float" office:value="434.458892822266">
            <text:p>434.4588928223</text:p>
          </table:table-cell>
          <table:table-cell office:value-type="float" office:value="0.01997759">
            <text:p>0.01997759</text:p>
          </table:table-cell>
          <table:table-cell table:number-columns-repeated="4"/>
        </table:table-row>
        <table:table-row table:style-name="ro1">
          <table:table-cell office:value-type="float" office:value="434.572570800781">
            <text:p>434.5725708008</text:p>
          </table:table-cell>
          <table:table-cell office:value-type="float" office:value="-0.003708348">
            <text:p>-0.003708348</text:p>
          </table:table-cell>
          <table:table-cell table:number-columns-repeated="4"/>
        </table:table-row>
        <table:table-row table:style-name="ro1">
          <table:table-cell office:value-type="float" office:value="434.686248779297">
            <text:p>434.6862487793</text:p>
          </table:table-cell>
          <table:table-cell office:value-type="float" office:value="-0.002328448">
            <text:p>-0.002328448</text:p>
          </table:table-cell>
          <table:table-cell table:number-columns-repeated="4"/>
        </table:table-row>
        <table:table-row table:style-name="ro1">
          <table:table-cell office:value-type="float" office:value="434.799926757813">
            <text:p>434.7999267578</text:p>
          </table:table-cell>
          <table:table-cell office:value-type="float" office:value="-0.003161275">
            <text:p>-0.003161275</text:p>
          </table:table-cell>
          <table:table-cell table:number-columns-repeated="4"/>
        </table:table-row>
        <table:table-row table:style-name="ro1">
          <table:table-cell office:value-type="float" office:value="434.913604736328">
            <text:p>434.9136047363</text:p>
          </table:table-cell>
          <table:table-cell office:value-type="float" office:value="0.002589616">
            <text:p>0.002589616</text:p>
          </table:table-cell>
          <table:table-cell table:number-columns-repeated="4"/>
        </table:table-row>
        <table:table-row table:style-name="ro1">
          <table:table-cell office:value-type="float" office:value="435.027282714844">
            <text:p>435.0272827148</text:p>
          </table:table-cell>
          <table:table-cell office:value-type="float" office:value="-0.00206648">
            <text:p>-0.00206648</text:p>
          </table:table-cell>
          <table:table-cell table:number-columns-repeated="4"/>
        </table:table-row>
        <table:table-row table:style-name="ro1">
          <table:table-cell office:value-type="float" office:value="435.140991210938">
            <text:p>435.1409912109</text:p>
          </table:table-cell>
          <table:table-cell office:value-type="float" office:value="-0.001162991">
            <text:p>-0.001162991</text:p>
          </table:table-cell>
          <table:table-cell table:number-columns-repeated="4"/>
        </table:table-row>
        <table:table-row table:style-name="ro1">
          <table:table-cell office:value-type="float" office:value="435.254669189453">
            <text:p>435.2546691895</text:p>
          </table:table-cell>
          <table:table-cell office:value-type="float" office:value="0.006183192">
            <text:p>0.006183192</text:p>
          </table:table-cell>
          <table:table-cell table:number-columns-repeated="4"/>
        </table:table-row>
        <table:table-row table:style-name="ro1">
          <table:table-cell office:value-type="float" office:value="435.368377685547">
            <text:p>435.3683776855</text:p>
          </table:table-cell>
          <table:table-cell office:value-type="float" office:value="-0.007750557">
            <text:p>-0.007750557</text:p>
          </table:table-cell>
          <table:table-cell table:number-columns-repeated="4"/>
        </table:table-row>
        <table:table-row table:style-name="ro1">
          <table:table-cell office:value-type="float" office:value="435.482086181641">
            <text:p>435.4820861816</text:p>
          </table:table-cell>
          <table:table-cell office:value-type="float" office:value="-0.007448931">
            <text:p>-0.007448931</text:p>
          </table:table-cell>
          <table:table-cell table:number-columns-repeated="4"/>
        </table:table-row>
        <table:table-row table:style-name="ro1">
          <table:table-cell office:value-type="float" office:value="435.595825195313">
            <text:p>435.5958251953</text:p>
          </table:table-cell>
          <table:table-cell office:value-type="float" office:value="-0.004259453">
            <text:p>-0.004259453</text:p>
          </table:table-cell>
          <table:table-cell table:number-columns-repeated="4"/>
        </table:table-row>
        <table:table-row table:style-name="ro1">
          <table:table-cell office:value-type="float" office:value="435.709533691406">
            <text:p>435.7095336914</text:p>
          </table:table-cell>
          <table:table-cell office:value-type="float" office:value="0.01154477">
            <text:p>0.01154477</text:p>
          </table:table-cell>
          <table:table-cell table:number-columns-repeated="4"/>
        </table:table-row>
        <table:table-row table:style-name="ro1">
          <table:table-cell office:value-type="float" office:value="435.823272705078">
            <text:p>435.8232727051</text:p>
          </table:table-cell>
          <table:table-cell office:value-type="float" office:value="0.003315735">
            <text:p>0.003315735</text:p>
          </table:table-cell>
          <table:table-cell table:number-columns-repeated="4"/>
        </table:table-row>
        <table:table-row table:style-name="ro1">
          <table:table-cell office:value-type="float" office:value="435.936981201172">
            <text:p>435.9369812012</text:p>
          </table:table-cell>
          <table:table-cell office:value-type="float" office:value="-0.008821798">
            <text:p>-0.008821798</text:p>
          </table:table-cell>
          <table:table-cell table:number-columns-repeated="4"/>
        </table:table-row>
        <table:table-row table:style-name="ro1">
          <table:table-cell office:value-type="float" office:value="436.050720214844">
            <text:p>436.0507202148</text:p>
          </table:table-cell>
          <table:table-cell office:value-type="float" office:value="0.003643899">
            <text:p>0.003643899</text:p>
          </table:table-cell>
          <table:table-cell table:number-columns-repeated="4"/>
        </table:table-row>
        <table:table-row table:style-name="ro1">
          <table:table-cell office:value-type="float" office:value="436.164459228516">
            <text:p>436.1644592285</text:p>
          </table:table-cell>
          <table:table-cell office:value-type="float" office:value="-0.001524564">
            <text:p>-0.001524564</text:p>
          </table:table-cell>
          <table:table-cell table:number-columns-repeated="4"/>
        </table:table-row>
        <table:table-row table:style-name="ro1">
          <table:table-cell office:value-type="float" office:value="436.278198242188">
            <text:p>436.2781982422</text:p>
          </table:table-cell>
          <table:table-cell office:value-type="float" office:value="0.02518572">
            <text:p>0.02518572</text:p>
          </table:table-cell>
          <table:table-cell table:number-columns-repeated="4"/>
        </table:table-row>
        <table:table-row table:style-name="ro1">
          <table:table-cell office:value-type="float" office:value="436.391967773438">
            <text:p>436.3919677734</text:p>
          </table:table-cell>
          <table:table-cell office:value-type="float" office:value="-0.0001280591">
            <text:p>-0.0001280591</text:p>
          </table:table-cell>
          <table:table-cell table:number-columns-repeated="4"/>
        </table:table-row>
        <table:table-row table:style-name="ro1">
          <table:table-cell office:value-type="float" office:value="436.505706787109">
            <text:p>436.5057067871</text:p>
          </table:table-cell>
          <table:table-cell office:value-type="float" office:value="-0.001102201">
            <text:p>-0.001102201</text:p>
          </table:table-cell>
          <table:table-cell table:number-columns-repeated="4"/>
        </table:table-row>
        <table:table-row table:style-name="ro1">
          <table:table-cell office:value-type="float" office:value="436.619476318359">
            <text:p>436.6194763184</text:p>
          </table:table-cell>
          <table:table-cell office:value-type="float" office:value="0.004727489">
            <text:p>0.004727489</text:p>
          </table:table-cell>
          <table:table-cell table:number-columns-repeated="4"/>
        </table:table-row>
        <table:table-row table:style-name="ro1">
          <table:table-cell office:value-type="float" office:value="436.733245849609">
            <text:p>436.7332458496</text:p>
          </table:table-cell>
          <table:table-cell office:value-type="float" office:value="0.003035412">
            <text:p>0.003035412</text:p>
          </table:table-cell>
          <table:table-cell table:number-columns-repeated="4"/>
        </table:table-row>
        <table:table-row table:style-name="ro1">
          <table:table-cell office:value-type="float" office:value="436.847015380859">
            <text:p>436.8470153809</text:p>
          </table:table-cell>
          <table:table-cell office:value-type="float" office:value="-0.008975377">
            <text:p>-0.008975377</text:p>
          </table:table-cell>
          <table:table-cell table:number-columns-repeated="4"/>
        </table:table-row>
        <table:table-row table:style-name="ro1">
          <table:table-cell office:value-type="float" office:value="436.960784912109">
            <text:p>436.9607849121</text:p>
          </table:table-cell>
          <table:table-cell office:value-type="float" office:value="0.005097736">
            <text:p>0.005097736</text:p>
          </table:table-cell>
          <table:table-cell table:number-columns-repeated="4"/>
        </table:table-row>
        <table:table-row table:style-name="ro1">
          <table:table-cell office:value-type="float" office:value="437.074554443359">
            <text:p>437.0745544434</text:p>
          </table:table-cell>
          <table:table-cell office:value-type="float" office:value="0.002508901">
            <text:p>0.002508901</text:p>
          </table:table-cell>
          <table:table-cell table:number-columns-repeated="4"/>
        </table:table-row>
        <table:table-row table:style-name="ro1">
          <table:table-cell office:value-type="float" office:value="437.188354492188">
            <text:p>437.1883544922</text:p>
          </table:table-cell>
          <table:table-cell office:value-type="float" office:value="-0.0006222586">
            <text:p>-0.0006222586</text:p>
          </table:table-cell>
          <table:table-cell table:number-columns-repeated="4"/>
        </table:table-row>
        <table:table-row table:style-name="ro1">
          <table:table-cell office:value-type="float" office:value="437.302154541016">
            <text:p>437.302154541</text:p>
          </table:table-cell>
          <table:table-cell office:value-type="float" office:value="0.002393884">
            <text:p>0.002393884</text:p>
          </table:table-cell>
          <table:table-cell table:number-columns-repeated="4"/>
        </table:table-row>
        <table:table-row table:style-name="ro1">
          <table:table-cell office:value-type="float" office:value="437.415924072266">
            <text:p>437.4159240723</text:p>
          </table:table-cell>
          <table:table-cell office:value-type="float" office:value="0.002586114">
            <text:p>0.002586114</text:p>
          </table:table-cell>
          <table:table-cell table:number-columns-repeated="4"/>
        </table:table-row>
        <table:table-row table:style-name="ro1">
          <table:table-cell office:value-type="float" office:value="437.529724121094">
            <text:p>437.5297241211</text:p>
          </table:table-cell>
          <table:table-cell office:value-type="float" office:value="0.0007367783">
            <text:p>0.0007367783</text:p>
          </table:table-cell>
          <table:table-cell table:number-columns-repeated="4"/>
        </table:table-row>
        <table:table-row table:style-name="ro1">
          <table:table-cell office:value-type="float" office:value="437.6435546875">
            <text:p>437.6435546875</text:p>
          </table:table-cell>
          <table:table-cell office:value-type="float" office:value="-0.0005122993">
            <text:p>-0.0005122993</text:p>
          </table:table-cell>
          <table:table-cell table:number-columns-repeated="4"/>
        </table:table-row>
        <table:table-row table:style-name="ro1">
          <table:table-cell office:value-type="float" office:value="437.757354736328">
            <text:p>437.7573547363</text:p>
          </table:table-cell>
          <table:table-cell office:value-type="float" office:value="0.003745429">
            <text:p>0.003745429</text:p>
          </table:table-cell>
          <table:table-cell table:number-columns-repeated="4"/>
        </table:table-row>
        <table:table-row table:style-name="ro1">
          <table:table-cell office:value-type="float" office:value="437.871154785156">
            <text:p>437.8711547852</text:p>
          </table:table-cell>
          <table:table-cell office:value-type="float" office:value="-0.003585732">
            <text:p>-0.003585732</text:p>
          </table:table-cell>
          <table:table-cell table:number-columns-repeated="4"/>
        </table:table-row>
        <table:table-row table:style-name="ro1">
          <table:table-cell office:value-type="float" office:value="437.984985351563">
            <text:p>437.9849853516</text:p>
          </table:table-cell>
          <table:table-cell office:value-type="float" office:value="0.01494151">
            <text:p>0.01494151</text:p>
          </table:table-cell>
          <table:table-cell table:number-columns-repeated="4"/>
        </table:table-row>
        <table:table-row table:style-name="ro1">
          <table:table-cell office:value-type="float" office:value="438.098815917969">
            <text:p>438.098815918</text:p>
          </table:table-cell>
          <table:table-cell office:value-type="float" office:value="0.00485595">
            <text:p>0.00485595</text:p>
          </table:table-cell>
          <table:table-cell table:number-columns-repeated="4"/>
        </table:table-row>
        <table:table-row table:style-name="ro1">
          <table:table-cell office:value-type="float" office:value="438.212646484375">
            <text:p>438.2126464844</text:p>
          </table:table-cell>
          <table:table-cell office:value-type="float" office:value="-0.006108441">
            <text:p>-0.006108441</text:p>
          </table:table-cell>
          <table:table-cell table:number-columns-repeated="4"/>
        </table:table-row>
        <table:table-row table:style-name="ro1">
          <table:table-cell office:value-type="float" office:value="438.326477050781">
            <text:p>438.3264770508</text:p>
          </table:table-cell>
          <table:table-cell office:value-type="float" office:value="-0.008708077">
            <text:p>-0.008708077</text:p>
          </table:table-cell>
          <table:table-cell table:number-columns-repeated="4"/>
        </table:table-row>
        <table:table-row table:style-name="ro1">
          <table:table-cell office:value-type="float" office:value="438.440307617188">
            <text:p>438.4403076172</text:p>
          </table:table-cell>
          <table:table-cell office:value-type="float" office:value="-0.0001481191">
            <text:p>-0.0001481191</text:p>
          </table:table-cell>
          <table:table-cell table:number-columns-repeated="4"/>
        </table:table-row>
        <table:table-row table:style-name="ro1">
          <table:table-cell office:value-type="float" office:value="438.554168701172">
            <text:p>438.5541687012</text:p>
          </table:table-cell>
          <table:table-cell office:value-type="float" office:value="0.007274394">
            <text:p>0.007274394</text:p>
          </table:table-cell>
          <table:table-cell table:number-columns-repeated="4"/>
        </table:table-row>
        <table:table-row table:style-name="ro1">
          <table:table-cell office:value-type="float" office:value="438.667999267578">
            <text:p>438.6679992676</text:p>
          </table:table-cell>
          <table:table-cell office:value-type="float" office:value="-0.007611673">
            <text:p>-0.007611673</text:p>
          </table:table-cell>
          <table:table-cell table:number-columns-repeated="4"/>
        </table:table-row>
        <table:table-row table:style-name="ro1">
          <table:table-cell office:value-type="float" office:value="438.781860351563">
            <text:p>438.7818603516</text:p>
          </table:table-cell>
          <table:table-cell office:value-type="float" office:value="-0.01154395">
            <text:p>-0.01154395</text:p>
          </table:table-cell>
          <table:table-cell table:number-columns-repeated="4"/>
        </table:table-row>
        <table:table-row table:style-name="ro1">
          <table:table-cell office:value-type="float" office:value="438.895721435547">
            <text:p>438.8957214355</text:p>
          </table:table-cell>
          <table:table-cell office:value-type="float" office:value="-0.002412214">
            <text:p>-0.002412214</text:p>
          </table:table-cell>
          <table:table-cell table:number-columns-repeated="4"/>
        </table:table-row>
        <table:table-row table:style-name="ro1">
          <table:table-cell office:value-type="float" office:value="439.009582519531">
            <text:p>439.0095825195</text:p>
          </table:table-cell>
          <table:table-cell office:value-type="float" office:value="0.002789866">
            <text:p>0.002789866</text:p>
          </table:table-cell>
          <table:table-cell table:number-columns-repeated="4"/>
        </table:table-row>
        <table:table-row table:style-name="ro1">
          <table:table-cell office:value-type="float" office:value="439.123474121094">
            <text:p>439.1234741211</text:p>
          </table:table-cell>
          <table:table-cell office:value-type="float" office:value="-0.008926511">
            <text:p>-0.008926511</text:p>
          </table:table-cell>
          <table:table-cell table:number-columns-repeated="4"/>
        </table:table-row>
        <table:table-row table:style-name="ro1">
          <table:table-cell office:value-type="float" office:value="439.237335205078">
            <text:p>439.2373352051</text:p>
          </table:table-cell>
          <table:table-cell office:value-type="float" office:value="-0.007345452">
            <text:p>-0.007345452</text:p>
          </table:table-cell>
          <table:table-cell table:number-columns-repeated="4"/>
        </table:table-row>
        <table:table-row table:style-name="ro1">
          <table:table-cell office:value-type="float" office:value="439.351226806641">
            <text:p>439.3512268066</text:p>
          </table:table-cell>
          <table:table-cell office:value-type="float" office:value="0.003496066">
            <text:p>0.003496066</text:p>
          </table:table-cell>
          <table:table-cell table:number-columns-repeated="4"/>
        </table:table-row>
        <table:table-row table:style-name="ro1">
          <table:table-cell office:value-type="float" office:value="439.465087890625">
            <text:p>439.4650878906</text:p>
          </table:table-cell>
          <table:table-cell office:value-type="float" office:value="0.01935758">
            <text:p>0.01935758</text:p>
          </table:table-cell>
          <table:table-cell table:number-columns-repeated="4"/>
        </table:table-row>
        <table:table-row table:style-name="ro1">
          <table:table-cell office:value-type="float" office:value="439.578979492188">
            <text:p>439.5789794922</text:p>
          </table:table-cell>
          <table:table-cell office:value-type="float" office:value="-0.005250941">
            <text:p>-0.005250941</text:p>
          </table:table-cell>
          <table:table-cell table:number-columns-repeated="4"/>
        </table:table-row>
        <table:table-row table:style-name="ro1">
          <table:table-cell office:value-type="float" office:value="439.69287109375">
            <text:p>439.6928710938</text:p>
          </table:table-cell>
          <table:table-cell office:value-type="float" office:value="-0.007991659">
            <text:p>-0.007991659</text:p>
          </table:table-cell>
          <table:table-cell table:number-columns-repeated="4"/>
        </table:table-row>
        <table:table-row table:style-name="ro1">
          <table:table-cell office:value-type="float" office:value="439.806793212891">
            <text:p>439.8067932129</text:p>
          </table:table-cell>
          <table:table-cell office:value-type="float" office:value="-0.006074095">
            <text:p>-0.006074095</text:p>
          </table:table-cell>
          <table:table-cell table:number-columns-repeated="4"/>
        </table:table-row>
        <table:table-row table:style-name="ro1">
          <table:table-cell office:value-type="float" office:value="439.920684814453">
            <text:p>439.9206848145</text:p>
          </table:table-cell>
          <table:table-cell office:value-type="float" office:value="0.05465851">
            <text:p>0.05465851</text:p>
          </table:table-cell>
          <table:table-cell table:number-columns-repeated="4"/>
        </table:table-row>
        <table:table-row table:style-name="ro1">
          <table:table-cell office:value-type="float" office:value="440.034606933594">
            <text:p>440.0346069336</text:p>
          </table:table-cell>
          <table:table-cell office:value-type="float" office:value="-0.0006205839">
            <text:p>-0.0006205839</text:p>
          </table:table-cell>
          <table:table-cell table:number-columns-repeated="4"/>
        </table:table-row>
        <table:table-row table:style-name="ro1">
          <table:table-cell office:value-type="float" office:value="440.148498535156">
            <text:p>440.1484985352</text:p>
          </table:table-cell>
          <table:table-cell office:value-type="float" office:value="-0.002761513">
            <text:p>-0.002761513</text:p>
          </table:table-cell>
          <table:table-cell table:number-columns-repeated="4"/>
        </table:table-row>
        <table:table-row table:style-name="ro1">
          <table:table-cell office:value-type="float" office:value="440.262420654297">
            <text:p>440.2624206543</text:p>
          </table:table-cell>
          <table:table-cell office:value-type="float" office:value="0.006879921">
            <text:p>0.006879921</text:p>
          </table:table-cell>
          <table:table-cell table:number-columns-repeated="4"/>
        </table:table-row>
        <table:table-row table:style-name="ro1">
          <table:table-cell office:value-type="float" office:value="440.376342773438">
            <text:p>440.3763427734</text:p>
          </table:table-cell>
          <table:table-cell office:value-type="float" office:value="0.02925914">
            <text:p>0.02925914</text:p>
          </table:table-cell>
          <table:table-cell table:number-columns-repeated="4"/>
        </table:table-row>
        <table:table-row table:style-name="ro1">
          <table:table-cell office:value-type="float" office:value="440.490295410156">
            <text:p>440.4902954102</text:p>
          </table:table-cell>
          <table:table-cell office:value-type="float" office:value="-0.0002067355">
            <text:p>-0.0002067355</text:p>
          </table:table-cell>
          <table:table-cell table:number-columns-repeated="4"/>
        </table:table-row>
        <table:table-row table:style-name="ro1">
          <table:table-cell office:value-type="float" office:value="440.604217529297">
            <text:p>440.6042175293</text:p>
          </table:table-cell>
          <table:table-cell office:value-type="float" office:value="-0.01544828">
            <text:p>-0.01544828</text:p>
          </table:table-cell>
          <table:table-cell table:number-columns-repeated="4"/>
        </table:table-row>
        <table:table-row table:style-name="ro1">
          <table:table-cell office:value-type="float" office:value="440.718170166016">
            <text:p>440.718170166</text:p>
          </table:table-cell>
          <table:table-cell office:value-type="float" office:value="0.01932318">
            <text:p>0.01932318</text:p>
          </table:table-cell>
          <table:table-cell table:number-columns-repeated="4"/>
        </table:table-row>
        <table:table-row table:style-name="ro1">
          <table:table-cell office:value-type="float" office:value="440.832092285156">
            <text:p>440.8320922852</text:p>
          </table:table-cell>
          <table:table-cell office:value-type="float" office:value="0.01024309">
            <text:p>0.01024309</text:p>
          </table:table-cell>
          <table:table-cell table:number-columns-repeated="4"/>
        </table:table-row>
        <table:table-row table:style-name="ro1">
          <table:table-cell office:value-type="float" office:value="440.946044921875">
            <text:p>440.9460449219</text:p>
          </table:table-cell>
          <table:table-cell office:value-type="float" office:value="-0.001769618">
            <text:p>-0.001769618</text:p>
          </table:table-cell>
          <table:table-cell table:number-columns-repeated="4"/>
        </table:table-row>
        <table:table-row table:style-name="ro1">
          <table:table-cell office:value-type="float" office:value="441.059997558594">
            <text:p>441.0599975586</text:p>
          </table:table-cell>
          <table:table-cell office:value-type="float" office:value="-0.001805326">
            <text:p>-0.001805326</text:p>
          </table:table-cell>
          <table:table-cell table:number-columns-repeated="4"/>
        </table:table-row>
        <table:table-row table:style-name="ro1">
          <table:table-cell office:value-type="float" office:value="441.173950195313">
            <text:p>441.1739501953</text:p>
          </table:table-cell>
          <table:table-cell office:value-type="float" office:value="0.005702023">
            <text:p>0.005702023</text:p>
          </table:table-cell>
          <table:table-cell table:number-columns-repeated="4"/>
        </table:table-row>
        <table:table-row table:style-name="ro1">
          <table:table-cell office:value-type="float" office:value="441.287933349609">
            <text:p>441.2879333496</text:p>
          </table:table-cell>
          <table:table-cell office:value-type="float" office:value="-0.0001612445">
            <text:p>-0.0001612445</text:p>
          </table:table-cell>
          <table:table-cell table:number-columns-repeated="4"/>
        </table:table-row>
        <table:table-row table:style-name="ro1">
          <table:table-cell office:value-type="float" office:value="441.401885986328">
            <text:p>441.4018859863</text:p>
          </table:table-cell>
          <table:table-cell office:value-type="float" office:value="-0.0007902816">
            <text:p>-0.0007902816</text:p>
          </table:table-cell>
          <table:table-cell table:number-columns-repeated="4"/>
        </table:table-row>
        <table:table-row table:style-name="ro1">
          <table:table-cell office:value-type="float" office:value="441.515869140625">
            <text:p>441.5158691406</text:p>
          </table:table-cell>
          <table:table-cell office:value-type="float" office:value="0.01320458">
            <text:p>0.01320458</text:p>
          </table:table-cell>
          <table:table-cell table:number-columns-repeated="4"/>
        </table:table-row>
        <table:table-row table:style-name="ro1">
          <table:table-cell office:value-type="float" office:value="441.629852294922">
            <text:p>441.6298522949</text:p>
          </table:table-cell>
          <table:table-cell office:value-type="float" office:value="0.001170602">
            <text:p>0.001170602</text:p>
          </table:table-cell>
          <table:table-cell table:number-columns-repeated="4"/>
        </table:table-row>
        <table:table-row table:style-name="ro1">
          <table:table-cell office:value-type="float" office:value="441.743835449219">
            <text:p>441.7438354492</text:p>
          </table:table-cell>
          <table:table-cell office:value-type="float" office:value="0.005507291">
            <text:p>0.005507291</text:p>
          </table:table-cell>
          <table:table-cell table:number-columns-repeated="4"/>
        </table:table-row>
        <table:table-row table:style-name="ro1">
          <table:table-cell office:value-type="float" office:value="441.857818603516">
            <text:p>441.8578186035</text:p>
          </table:table-cell>
          <table:table-cell office:value-type="float" office:value="-0.01063203">
            <text:p>-0.01063203</text:p>
          </table:table-cell>
          <table:table-cell table:number-columns-repeated="4"/>
        </table:table-row>
        <table:table-row table:style-name="ro1">
          <table:table-cell office:value-type="float" office:value="441.971801757813">
            <text:p>441.9718017578</text:p>
          </table:table-cell>
          <table:table-cell office:value-type="float" office:value="0.0003024628">
            <text:p>0.0003024628</text:p>
          </table:table-cell>
          <table:table-cell table:number-columns-repeated="4"/>
        </table:table-row>
        <table:table-row table:style-name="ro1">
          <table:table-cell office:value-type="float" office:value="442.085815429688">
            <text:p>442.0858154297</text:p>
          </table:table-cell>
          <table:table-cell office:value-type="float" office:value="0.008795439">
            <text:p>0.008795439</text:p>
          </table:table-cell>
          <table:table-cell table:number-columns-repeated="4"/>
        </table:table-row>
        <table:table-row table:style-name="ro1">
          <table:table-cell office:value-type="float" office:value="442.199829101563">
            <text:p>442.1998291016</text:p>
          </table:table-cell>
          <table:table-cell office:value-type="float" office:value="-0.00479074">
            <text:p>-0.00479074</text:p>
          </table:table-cell>
          <table:table-cell table:number-columns-repeated="4"/>
        </table:table-row>
        <table:table-row table:style-name="ro1">
          <table:table-cell office:value-type="float" office:value="442.313812255859">
            <text:p>442.3138122559</text:p>
          </table:table-cell>
          <table:table-cell office:value-type="float" office:value="-0.000282971">
            <text:p>-0.000282971</text:p>
          </table:table-cell>
          <table:table-cell table:number-columns-repeated="4"/>
        </table:table-row>
        <table:table-row table:style-name="ro1">
          <table:table-cell office:value-type="float" office:value="442.427825927734">
            <text:p>442.4278259277</text:p>
          </table:table-cell>
          <table:table-cell office:value-type="float" office:value="0.01837243">
            <text:p>0.01837243</text:p>
          </table:table-cell>
          <table:table-cell table:number-columns-repeated="4"/>
        </table:table-row>
        <table:table-row table:style-name="ro1">
          <table:table-cell office:value-type="float" office:value="442.541839599609">
            <text:p>442.5418395996</text:p>
          </table:table-cell>
          <table:table-cell office:value-type="float" office:value="0.002891971">
            <text:p>0.002891971</text:p>
          </table:table-cell>
          <table:table-cell table:number-columns-repeated="4"/>
        </table:table-row>
        <table:table-row table:style-name="ro1">
          <table:table-cell office:value-type="float" office:value="442.655883789063">
            <text:p>442.6558837891</text:p>
          </table:table-cell>
          <table:table-cell office:value-type="float" office:value="-0.001465071">
            <text:p>-0.001465071</text:p>
          </table:table-cell>
          <table:table-cell table:number-columns-repeated="4"/>
        </table:table-row>
        <table:table-row table:style-name="ro1">
          <table:table-cell office:value-type="float" office:value="442.769897460938">
            <text:p>442.7698974609</text:p>
          </table:table-cell>
          <table:table-cell office:value-type="float" office:value="-0.0001509031">
            <text:p>-0.0001509031</text:p>
          </table:table-cell>
          <table:table-cell table:number-columns-repeated="4"/>
        </table:table-row>
        <table:table-row table:style-name="ro1">
          <table:table-cell office:value-type="float" office:value="442.883941650391">
            <text:p>442.8839416504</text:p>
          </table:table-cell>
          <table:table-cell office:value-type="float" office:value="-0.002697202">
            <text:p>-0.002697202</text:p>
          </table:table-cell>
          <table:table-cell table:number-columns-repeated="4"/>
        </table:table-row>
        <table:table-row table:style-name="ro1">
          <table:table-cell office:value-type="float" office:value="442.997985839844">
            <text:p>442.9979858398</text:p>
          </table:table-cell>
          <table:table-cell office:value-type="float" office:value="0.008039827">
            <text:p>0.008039827</text:p>
          </table:table-cell>
          <table:table-cell table:number-columns-repeated="4"/>
        </table:table-row>
        <table:table-row table:style-name="ro1">
          <table:table-cell office:value-type="float" office:value="443.112030029297">
            <text:p>443.1120300293</text:p>
          </table:table-cell>
          <table:table-cell office:value-type="float" office:value="0.003411401">
            <text:p>0.003411401</text:p>
          </table:table-cell>
          <table:table-cell table:number-columns-repeated="4"/>
        </table:table-row>
        <table:table-row table:style-name="ro1">
          <table:table-cell office:value-type="float" office:value="443.22607421875">
            <text:p>443.2260742188</text:p>
          </table:table-cell>
          <table:table-cell office:value-type="float" office:value="-0.00528676">
            <text:p>-0.00528676</text:p>
          </table:table-cell>
          <table:table-cell table:number-columns-repeated="4"/>
        </table:table-row>
        <table:table-row table:style-name="ro1">
          <table:table-cell office:value-type="float" office:value="443.340118408203">
            <text:p>443.3401184082</text:p>
          </table:table-cell>
          <table:table-cell office:value-type="float" office:value="-0.0009615896">
            <text:p>-0.0009615896</text:p>
          </table:table-cell>
          <table:table-cell table:number-columns-repeated="4"/>
        </table:table-row>
        <table:table-row table:style-name="ro1">
          <table:table-cell office:value-type="float" office:value="443.454162597656">
            <text:p>443.4541625977</text:p>
          </table:table-cell>
          <table:table-cell office:value-type="float" office:value="0.002788405">
            <text:p>0.002788405</text:p>
          </table:table-cell>
          <table:table-cell table:number-columns-repeated="4"/>
        </table:table-row>
        <table:table-row table:style-name="ro1">
          <table:table-cell office:value-type="float" office:value="443.568237304688">
            <text:p>443.5682373047</text:p>
          </table:table-cell>
          <table:table-cell office:value-type="float" office:value="-0.006456979">
            <text:p>-0.006456979</text:p>
          </table:table-cell>
          <table:table-cell table:number-columns-repeated="4"/>
        </table:table-row>
        <table:table-row table:style-name="ro1">
          <table:table-cell office:value-type="float" office:value="443.682312011719">
            <text:p>443.6823120117</text:p>
          </table:table-cell>
          <table:table-cell office:value-type="float" office:value="-0.009810359">
            <text:p>-0.009810359</text:p>
          </table:table-cell>
          <table:table-cell table:number-columns-repeated="4"/>
        </table:table-row>
        <table:table-row table:style-name="ro1">
          <table:table-cell office:value-type="float" office:value="443.79638671875">
            <text:p>443.7963867188</text:p>
          </table:table-cell>
          <table:table-cell office:value-type="float" office:value="0.001041396">
            <text:p>0.001041396</text:p>
          </table:table-cell>
          <table:table-cell table:number-columns-repeated="4"/>
        </table:table-row>
        <table:table-row table:style-name="ro1">
          <table:table-cell office:value-type="float" office:value="443.910461425781">
            <text:p>443.9104614258</text:p>
          </table:table-cell>
          <table:table-cell office:value-type="float" office:value="-0.00378407">
            <text:p>-0.00378407</text:p>
          </table:table-cell>
          <table:table-cell table:number-columns-repeated="4"/>
        </table:table-row>
        <table:table-row table:style-name="ro1">
          <table:table-cell office:value-type="float" office:value="444.024536132813">
            <text:p>444.0245361328</text:p>
          </table:table-cell>
          <table:table-cell office:value-type="float" office:value="0.004068415">
            <text:p>0.004068415</text:p>
          </table:table-cell>
          <table:table-cell table:number-columns-repeated="4"/>
        </table:table-row>
        <table:table-row table:style-name="ro1">
          <table:table-cell office:value-type="float" office:value="444.138610839844">
            <text:p>444.1386108398</text:p>
          </table:table-cell>
          <table:table-cell office:value-type="float" office:value="0.02305081">
            <text:p>0.02305081</text:p>
          </table:table-cell>
          <table:table-cell table:number-columns-repeated="4"/>
        </table:table-row>
        <table:table-row table:style-name="ro1">
          <table:table-cell office:value-type="float" office:value="444.252716064453">
            <text:p>444.2527160645</text:p>
          </table:table-cell>
          <table:table-cell office:value-type="float" office:value="-0.004612212">
            <text:p>-0.004612212</text:p>
          </table:table-cell>
          <table:table-cell table:number-columns-repeated="4"/>
        </table:table-row>
        <table:table-row table:style-name="ro1">
          <table:table-cell office:value-type="float" office:value="444.366821289063">
            <text:p>444.3668212891</text:p>
          </table:table-cell>
          <table:table-cell office:value-type="float" office:value="-0.0005422477">
            <text:p>-0.0005422477</text:p>
          </table:table-cell>
          <table:table-cell table:number-columns-repeated="4"/>
        </table:table-row>
        <table:table-row table:style-name="ro1">
          <table:table-cell office:value-type="float" office:value="444.480895996094">
            <text:p>444.4808959961</text:p>
          </table:table-cell>
          <table:table-cell office:value-type="float" office:value="0.001907878">
            <text:p>0.001907878</text:p>
          </table:table-cell>
          <table:table-cell table:number-columns-repeated="4"/>
        </table:table-row>
        <table:table-row table:style-name="ro1">
          <table:table-cell office:value-type="float" office:value="444.595001220703">
            <text:p>444.5950012207</text:p>
          </table:table-cell>
          <table:table-cell office:value-type="float" office:value="-0.004606978">
            <text:p>-0.004606978</text:p>
          </table:table-cell>
          <table:table-cell table:number-columns-repeated="4"/>
        </table:table-row>
        <table:table-row table:style-name="ro1">
          <table:table-cell office:value-type="float" office:value="444.709136962891">
            <text:p>444.7091369629</text:p>
          </table:table-cell>
          <table:table-cell office:value-type="float" office:value="-0.002610884">
            <text:p>-0.002610884</text:p>
          </table:table-cell>
          <table:table-cell table:number-columns-repeated="4"/>
        </table:table-row>
        <table:table-row table:style-name="ro1">
          <table:table-cell office:value-type="float" office:value="444.8232421875">
            <text:p>444.8232421875</text:p>
          </table:table-cell>
          <table:table-cell office:value-type="float" office:value="0.004584168">
            <text:p>0.004584168</text:p>
          </table:table-cell>
          <table:table-cell table:number-columns-repeated="4"/>
        </table:table-row>
        <table:table-row table:style-name="ro1">
          <table:table-cell office:value-type="float" office:value="444.937347412109">
            <text:p>444.9373474121</text:p>
          </table:table-cell>
          <table:table-cell office:value-type="float" office:value="0.006635805">
            <text:p>0.006635805</text:p>
          </table:table-cell>
          <table:table-cell table:number-columns-repeated="4"/>
        </table:table-row>
        <table:table-row table:style-name="ro1">
          <table:table-cell office:value-type="float" office:value="445.051483154297">
            <text:p>445.0514831543</text:p>
          </table:table-cell>
          <table:table-cell office:value-type="float" office:value="-0.003086118">
            <text:p>-0.003086118</text:p>
          </table:table-cell>
          <table:table-cell table:number-columns-repeated="4"/>
        </table:table-row>
        <table:table-row table:style-name="ro1">
          <table:table-cell office:value-type="float" office:value="445.165618896484">
            <text:p>445.1656188965</text:p>
          </table:table-cell>
          <table:table-cell office:value-type="float" office:value="-0.009784395">
            <text:p>-0.009784395</text:p>
          </table:table-cell>
          <table:table-cell table:number-columns-repeated="4"/>
        </table:table-row>
        <table:table-row table:style-name="ro1">
          <table:table-cell office:value-type="float" office:value="445.279754638672">
            <text:p>445.2797546387</text:p>
          </table:table-cell>
          <table:table-cell office:value-type="float" office:value="0.005297241">
            <text:p>0.005297241</text:p>
          </table:table-cell>
          <table:table-cell table:number-columns-repeated="4"/>
        </table:table-row>
        <table:table-row table:style-name="ro1">
          <table:table-cell office:value-type="float" office:value="445.393890380859">
            <text:p>445.3938903809</text:p>
          </table:table-cell>
          <table:table-cell office:value-type="float" office:value="-0.001043868">
            <text:p>-0.001043868</text:p>
          </table:table-cell>
          <table:table-cell table:number-columns-repeated="4"/>
        </table:table-row>
        <table:table-row table:style-name="ro1">
          <table:table-cell office:value-type="float" office:value="445.508026123047">
            <text:p>445.508026123</text:p>
          </table:table-cell>
          <table:table-cell office:value-type="float" office:value="-0.005868977">
            <text:p>-0.005868977</text:p>
          </table:table-cell>
          <table:table-cell table:number-columns-repeated="4"/>
        </table:table-row>
        <table:table-row table:style-name="ro1">
          <table:table-cell office:value-type="float" office:value="445.622192382813">
            <text:p>445.6221923828</text:p>
          </table:table-cell>
          <table:table-cell office:value-type="float" office:value="-0.0003649254">
            <text:p>-0.0003649254</text:p>
          </table:table-cell>
          <table:table-cell table:number-columns-repeated="4"/>
        </table:table-row>
        <table:table-row table:style-name="ro1">
          <table:table-cell office:value-type="float" office:value="445.736328125">
            <text:p>445.736328125</text:p>
          </table:table-cell>
          <table:table-cell office:value-type="float" office:value="0.0009522107">
            <text:p>0.0009522107</text:p>
          </table:table-cell>
          <table:table-cell table:number-columns-repeated="4"/>
        </table:table-row>
        <table:table-row table:style-name="ro1">
          <table:table-cell office:value-type="float" office:value="445.850494384766">
            <text:p>445.8504943848</text:p>
          </table:table-cell>
          <table:table-cell office:value-type="float" office:value="0.00389165">
            <text:p>0.00389165</text:p>
          </table:table-cell>
          <table:table-cell table:number-columns-repeated="4"/>
        </table:table-row>
        <table:table-row table:style-name="ro1">
          <table:table-cell office:value-type="float" office:value="445.964660644531">
            <text:p>445.9646606445</text:p>
          </table:table-cell>
          <table:table-cell office:value-type="float" office:value="-0.005463441">
            <text:p>-0.005463441</text:p>
          </table:table-cell>
          <table:table-cell table:number-columns-repeated="4"/>
        </table:table-row>
        <table:table-row table:style-name="ro1">
          <table:table-cell office:value-type="float" office:value="446.078826904297">
            <text:p>446.0788269043</text:p>
          </table:table-cell>
          <table:table-cell office:value-type="float" office:value="-0.001717644">
            <text:p>-0.001717644</text:p>
          </table:table-cell>
          <table:table-cell table:number-columns-repeated="4"/>
        </table:table-row>
        <table:table-row table:style-name="ro1">
          <table:table-cell office:value-type="float" office:value="446.192993164063">
            <text:p>446.1929931641</text:p>
          </table:table-cell>
          <table:table-cell office:value-type="float" office:value="0.004020798">
            <text:p>0.004020798</text:p>
          </table:table-cell>
          <table:table-cell table:number-columns-repeated="4"/>
        </table:table-row>
        <table:table-row table:style-name="ro1">
          <table:table-cell office:value-type="float" office:value="446.307189941406">
            <text:p>446.3071899414</text:p>
          </table:table-cell>
          <table:table-cell office:value-type="float" office:value="0.003457204">
            <text:p>0.003457204</text:p>
          </table:table-cell>
          <table:table-cell table:number-columns-repeated="4"/>
        </table:table-row>
        <table:table-row table:style-name="ro1">
          <table:table-cell office:value-type="float" office:value="446.421356201172">
            <text:p>446.4213562012</text:p>
          </table:table-cell>
          <table:table-cell office:value-type="float" office:value="-0.004699244">
            <text:p>-0.004699244</text:p>
          </table:table-cell>
          <table:table-cell table:number-columns-repeated="4"/>
        </table:table-row>
        <table:table-row table:style-name="ro1">
          <table:table-cell office:value-type="float" office:value="446.535552978516">
            <text:p>446.5355529785</text:p>
          </table:table-cell>
          <table:table-cell office:value-type="float" office:value="0.0006087361">
            <text:p>0.0006087361</text:p>
          </table:table-cell>
          <table:table-cell table:number-columns-repeated="4"/>
        </table:table-row>
        <table:table-row table:style-name="ro1">
          <table:table-cell office:value-type="float" office:value="446.649749755859">
            <text:p>446.6497497559</text:p>
          </table:table-cell>
          <table:table-cell office:value-type="float" office:value="0.01235336">
            <text:p>0.01235336</text:p>
          </table:table-cell>
          <table:table-cell table:number-columns-repeated="4"/>
        </table:table-row>
        <table:table-row table:style-name="ro1">
          <table:table-cell office:value-type="float" office:value="446.763946533203">
            <text:p>446.7639465332</text:p>
          </table:table-cell>
          <table:table-cell office:value-type="float" office:value="-0.003216299">
            <text:p>-0.003216299</text:p>
          </table:table-cell>
          <table:table-cell table:number-columns-repeated="4"/>
        </table:table-row>
        <table:table-row table:style-name="ro1">
          <table:table-cell office:value-type="float" office:value="446.878143310547">
            <text:p>446.8781433105</text:p>
          </table:table-cell>
          <table:table-cell office:value-type="float" office:value="-0.001868852">
            <text:p>-0.001868852</text:p>
          </table:table-cell>
          <table:table-cell table:number-columns-repeated="4"/>
        </table:table-row>
        <table:table-row table:style-name="ro1">
          <table:table-cell office:value-type="float" office:value="446.992370605469">
            <text:p>446.9923706055</text:p>
          </table:table-cell>
          <table:table-cell office:value-type="float" office:value="-0.003275">
            <text:p>-0.003275</text:p>
          </table:table-cell>
          <table:table-cell table:number-columns-repeated="4"/>
        </table:table-row>
        <table:table-row table:style-name="ro1">
          <table:table-cell office:value-type="float" office:value="447.106567382813">
            <text:p>447.1065673828</text:p>
          </table:table-cell>
          <table:table-cell office:value-type="float" office:value="0.01417647">
            <text:p>0.01417647</text:p>
          </table:table-cell>
          <table:table-cell table:number-columns-repeated="4"/>
        </table:table-row>
        <table:table-row table:style-name="ro1">
          <table:table-cell office:value-type="float" office:value="447.220794677734">
            <text:p>447.2207946777</text:p>
          </table:table-cell>
          <table:table-cell office:value-type="float" office:value="0.001725976">
            <text:p>0.001725976</text:p>
          </table:table-cell>
          <table:table-cell table:number-columns-repeated="4"/>
        </table:table-row>
        <table:table-row table:style-name="ro1">
          <table:table-cell office:value-type="float" office:value="447.335021972656">
            <text:p>447.3350219727</text:p>
          </table:table-cell>
          <table:table-cell office:value-type="float" office:value="0.003488555">
            <text:p>0.003488555</text:p>
          </table:table-cell>
          <table:table-cell table:number-columns-repeated="4"/>
        </table:table-row>
        <table:table-row table:style-name="ro1">
          <table:table-cell office:value-type="float" office:value="447.449249267578">
            <text:p>447.4492492676</text:p>
          </table:table-cell>
          <table:table-cell office:value-type="float" office:value="0.007727896">
            <text:p>0.007727896</text:p>
          </table:table-cell>
          <table:table-cell table:number-columns-repeated="4"/>
        </table:table-row>
        <table:table-row table:style-name="ro1">
          <table:table-cell office:value-type="float" office:value="447.5634765625">
            <text:p>447.5634765625</text:p>
          </table:table-cell>
          <table:table-cell office:value-type="float" office:value="0.001202318">
            <text:p>0.001202318</text:p>
          </table:table-cell>
          <table:table-cell table:number-columns-repeated="4"/>
        </table:table-row>
        <table:table-row table:style-name="ro1">
          <table:table-cell office:value-type="float" office:value="447.677703857422">
            <text:p>447.6777038574</text:p>
          </table:table-cell>
          <table:table-cell office:value-type="float" office:value="0.00295301">
            <text:p>0.00295301</text:p>
          </table:table-cell>
          <table:table-cell table:number-columns-repeated="4"/>
        </table:table-row>
        <table:table-row table:style-name="ro1">
          <table:table-cell office:value-type="float" office:value="447.791961669922">
            <text:p>447.7919616699</text:p>
          </table:table-cell>
          <table:table-cell office:value-type="float" office:value="-0.006852461">
            <text:p>-0.006852461</text:p>
          </table:table-cell>
          <table:table-cell table:number-columns-repeated="4"/>
        </table:table-row>
        <table:table-row table:style-name="ro1">
          <table:table-cell office:value-type="float" office:value="447.906188964844">
            <text:p>447.9061889648</text:p>
          </table:table-cell>
          <table:table-cell office:value-type="float" office:value="-0.008971799">
            <text:p>-0.008971799</text:p>
          </table:table-cell>
          <table:table-cell table:number-columns-repeated="4"/>
        </table:table-row>
        <table:table-row table:style-name="ro1">
          <table:table-cell office:value-type="float" office:value="448.020446777344">
            <text:p>448.0204467773</text:p>
          </table:table-cell>
          <table:table-cell office:value-type="float" office:value="-0.006865475">
            <text:p>-0.006865475</text:p>
          </table:table-cell>
          <table:table-cell table:number-columns-repeated="4"/>
        </table:table-row>
        <table:table-row table:style-name="ro1">
          <table:table-cell office:value-type="float" office:value="448.134704589844">
            <text:p>448.1347045898</text:p>
          </table:table-cell>
          <table:table-cell office:value-type="float" office:value="0.01060609">
            <text:p>0.01060609</text:p>
          </table:table-cell>
          <table:table-cell table:number-columns-repeated="4"/>
        </table:table-row>
        <table:table-row table:style-name="ro1">
          <table:table-cell office:value-type="float" office:value="448.248962402344">
            <text:p>448.2489624023</text:p>
          </table:table-cell>
          <table:table-cell office:value-type="float" office:value="-0.008532668">
            <text:p>-0.008532668</text:p>
          </table:table-cell>
          <table:table-cell table:number-columns-repeated="4"/>
        </table:table-row>
        <table:table-row table:style-name="ro1">
          <table:table-cell office:value-type="float" office:value="448.363220214844">
            <text:p>448.3632202148</text:p>
          </table:table-cell>
          <table:table-cell office:value-type="float" office:value="-0.002781375">
            <text:p>-0.002781375</text:p>
          </table:table-cell>
          <table:table-cell table:number-columns-repeated="4"/>
        </table:table-row>
        <table:table-row table:style-name="ro1">
          <table:table-cell office:value-type="float" office:value="448.477508544922">
            <text:p>448.4775085449</text:p>
          </table:table-cell>
          <table:table-cell office:value-type="float" office:value="0.006938518">
            <text:p>0.006938518</text:p>
          </table:table-cell>
          <table:table-cell table:number-columns-repeated="4"/>
        </table:table-row>
        <table:table-row table:style-name="ro1">
          <table:table-cell office:value-type="float" office:value="448.591766357422">
            <text:p>448.5917663574</text:p>
          </table:table-cell>
          <table:table-cell office:value-type="float" office:value="0.009420912">
            <text:p>0.009420912</text:p>
          </table:table-cell>
          <table:table-cell table:number-columns-repeated="4"/>
        </table:table-row>
        <table:table-row table:style-name="ro1">
          <table:table-cell office:value-type="float" office:value="448.7060546875">
            <text:p>448.7060546875</text:p>
          </table:table-cell>
          <table:table-cell office:value-type="float" office:value="0.009545773">
            <text:p>0.009545773</text:p>
          </table:table-cell>
          <table:table-cell table:number-columns-repeated="4"/>
        </table:table-row>
        <table:table-row table:style-name="ro1">
          <table:table-cell office:value-type="float" office:value="448.820343017578">
            <text:p>448.8203430176</text:p>
          </table:table-cell>
          <table:table-cell office:value-type="float" office:value="-0.008618123">
            <text:p>-0.008618123</text:p>
          </table:table-cell>
          <table:table-cell table:number-columns-repeated="4"/>
        </table:table-row>
        <table:table-row table:style-name="ro1">
          <table:table-cell office:value-type="float" office:value="448.934631347656">
            <text:p>448.9346313477</text:p>
          </table:table-cell>
          <table:table-cell office:value-type="float" office:value="-0.0009745055">
            <text:p>-0.0009745055</text:p>
          </table:table-cell>
          <table:table-cell table:number-columns-repeated="4"/>
        </table:table-row>
        <table:table-row table:style-name="ro1">
          <table:table-cell office:value-type="float" office:value="449.048919677734">
            <text:p>449.0489196777</text:p>
          </table:table-cell>
          <table:table-cell office:value-type="float" office:value="-0.00196486">
            <text:p>-0.00196486</text:p>
          </table:table-cell>
          <table:table-cell table:number-columns-repeated="4"/>
        </table:table-row>
        <table:table-row table:style-name="ro1">
          <table:table-cell office:value-type="float" office:value="449.163238525391">
            <text:p>449.1632385254</text:p>
          </table:table-cell>
          <table:table-cell office:value-type="float" office:value="-0.01101243">
            <text:p>-0.01101243</text:p>
          </table:table-cell>
          <table:table-cell table:number-columns-repeated="4"/>
        </table:table-row>
        <table:table-row table:style-name="ro1">
          <table:table-cell office:value-type="float" office:value="449.277526855469">
            <text:p>449.2775268555</text:p>
          </table:table-cell>
          <table:table-cell office:value-type="string">
            <text:p>4.80276E-05</text:p>
          </table:table-cell>
          <table:table-cell table:number-columns-repeated="4"/>
        </table:table-row>
        <table:table-row table:style-name="ro1">
          <table:table-cell office:value-type="float" office:value="449.391845703125">
            <text:p>449.3918457031</text:p>
          </table:table-cell>
          <table:table-cell office:value-type="float" office:value="0.0133175">
            <text:p>0.0133175</text:p>
          </table:table-cell>
          <table:table-cell table:number-columns-repeated="4"/>
        </table:table-row>
        <table:table-row table:style-name="ro1">
          <table:table-cell office:value-type="float" office:value="449.506164550781">
            <text:p>449.5061645508</text:p>
          </table:table-cell>
          <table:table-cell office:value-type="float" office:value="0.0006319256">
            <text:p>0.0006319256</text:p>
          </table:table-cell>
          <table:table-cell table:number-columns-repeated="4"/>
        </table:table-row>
        <table:table-row table:style-name="ro1">
          <table:table-cell office:value-type="float" office:value="449.620483398438">
            <text:p>449.6204833984</text:p>
          </table:table-cell>
          <table:table-cell office:value-type="float" office:value="0.00809796">
            <text:p>0.00809796</text:p>
          </table:table-cell>
          <table:table-cell table:number-columns-repeated="4"/>
        </table:table-row>
        <table:table-row table:style-name="ro1">
          <table:table-cell office:value-type="float" office:value="449.734802246094">
            <text:p>449.7348022461</text:p>
          </table:table-cell>
          <table:table-cell office:value-type="float" office:value="-0.01055318">
            <text:p>-0.01055318</text:p>
          </table:table-cell>
          <table:table-cell table:number-columns-repeated="4"/>
        </table:table-row>
        <table:table-row table:style-name="ro1">
          <table:table-cell office:value-type="float" office:value="449.84912109375">
            <text:p>449.8491210938</text:p>
          </table:table-cell>
          <table:table-cell office:value-type="float" office:value="0.005508601">
            <text:p>0.005508601</text:p>
          </table:table-cell>
          <table:table-cell table:number-columns-repeated="4"/>
        </table:table-row>
        <table:table-row table:style-name="ro1">
          <table:table-cell office:value-type="float" office:value="449.963439941406">
            <text:p>449.9634399414</text:p>
          </table:table-cell>
          <table:table-cell office:value-type="float" office:value="-0.004458492">
            <text:p>-0.004458492</text:p>
          </table:table-cell>
          <table:table-cell table:number-columns-repeated="4"/>
        </table:table-row>
        <table:table-row table:style-name="ro1">
          <table:table-cell office:value-type="float" office:value="450.077789306641">
            <text:p>450.0777893066</text:p>
          </table:table-cell>
          <table:table-cell office:value-type="float" office:value="-0.003230833">
            <text:p>-0.003230833</text:p>
          </table:table-cell>
          <table:table-cell table:number-columns-repeated="4"/>
        </table:table-row>
        <table:table-row table:style-name="ro1">
          <table:table-cell office:value-type="float" office:value="450.192138671875">
            <text:p>450.1921386719</text:p>
          </table:table-cell>
          <table:table-cell office:value-type="float" office:value="-0.01360894">
            <text:p>-0.01360894</text:p>
          </table:table-cell>
          <table:table-cell table:number-columns-repeated="4"/>
        </table:table-row>
        <table:table-row table:style-name="ro1">
          <table:table-cell office:value-type="float" office:value="450.306488037109">
            <text:p>450.3064880371</text:p>
          </table:table-cell>
          <table:table-cell office:value-type="float" office:value="0.005483343">
            <text:p>0.005483343</text:p>
          </table:table-cell>
          <table:table-cell table:number-columns-repeated="4"/>
        </table:table-row>
        <table:table-row table:style-name="ro1">
          <table:table-cell office:value-type="float" office:value="450.420837402344">
            <text:p>450.4208374023</text:p>
          </table:table-cell>
          <table:table-cell office:value-type="float" office:value="0.00191024">
            <text:p>0.00191024</text:p>
          </table:table-cell>
          <table:table-cell table:number-columns-repeated="4"/>
        </table:table-row>
        <table:table-row table:style-name="ro1">
          <table:table-cell office:value-type="float" office:value="450.535186767578">
            <text:p>450.5351867676</text:p>
          </table:table-cell>
          <table:table-cell office:value-type="float" office:value="-0.0005234408">
            <text:p>-0.0005234408</text:p>
          </table:table-cell>
          <table:table-cell table:number-columns-repeated="4"/>
        </table:table-row>
        <table:table-row table:style-name="ro1">
          <table:table-cell office:value-type="float" office:value="450.649536132813">
            <text:p>450.6495361328</text:p>
          </table:table-cell>
          <table:table-cell office:value-type="float" office:value="-0.01297613">
            <text:p>-0.01297613</text:p>
          </table:table-cell>
          <table:table-cell table:number-columns-repeated="4"/>
        </table:table-row>
        <table:table-row table:style-name="ro1">
          <table:table-cell office:value-type="float" office:value="450.763916015625">
            <text:p>450.7639160156</text:p>
          </table:table-cell>
          <table:table-cell office:value-type="float" office:value="0.00793793">
            <text:p>0.00793793</text:p>
          </table:table-cell>
          <table:table-cell table:number-columns-repeated="4"/>
        </table:table-row>
        <table:table-row table:style-name="ro1">
          <table:table-cell office:value-type="float" office:value="450.878295898438">
            <text:p>450.8782958984</text:p>
          </table:table-cell>
          <table:table-cell office:value-type="float" office:value="-0.005864428">
            <text:p>-0.005864428</text:p>
          </table:table-cell>
          <table:table-cell table:number-columns-repeated="4"/>
        </table:table-row>
        <table:table-row table:style-name="ro1">
          <table:table-cell office:value-type="float" office:value="450.99267578125">
            <text:p>450.9926757813</text:p>
          </table:table-cell>
          <table:table-cell office:value-type="float" office:value="-0.001306144">
            <text:p>-0.001306144</text:p>
          </table:table-cell>
          <table:table-cell table:number-columns-repeated="4"/>
        </table:table-row>
        <table:table-row table:style-name="ro1">
          <table:table-cell office:value-type="float" office:value="451.107055664063">
            <text:p>451.1070556641</text:p>
          </table:table-cell>
          <table:table-cell office:value-type="float" office:value="-0.01339733">
            <text:p>-0.01339733</text:p>
          </table:table-cell>
          <table:table-cell table:number-columns-repeated="4"/>
        </table:table-row>
        <table:table-row table:style-name="ro1">
          <table:table-cell office:value-type="float" office:value="451.221435546875">
            <text:p>451.2214355469</text:p>
          </table:table-cell>
          <table:table-cell office:value-type="string">
            <text:p>7.273428E-05</text:p>
          </table:table-cell>
          <table:table-cell table:number-columns-repeated="4"/>
        </table:table-row>
        <table:table-row table:style-name="ro1">
          <table:table-cell office:value-type="float" office:value="451.335815429688">
            <text:p>451.3358154297</text:p>
          </table:table-cell>
          <table:table-cell office:value-type="float" office:value="0.0105277">
            <text:p>0.0105277</text:p>
          </table:table-cell>
          <table:table-cell table:number-columns-repeated="4"/>
        </table:table-row>
        <table:table-row table:style-name="ro1">
          <table:table-cell office:value-type="float" office:value="451.450225830078">
            <text:p>451.4502258301</text:p>
          </table:table-cell>
          <table:table-cell office:value-type="float" office:value="0.001525361">
            <text:p>0.001525361</text:p>
          </table:table-cell>
          <table:table-cell table:number-columns-repeated="4"/>
        </table:table-row>
        <table:table-row table:style-name="ro1">
          <table:table-cell office:value-type="float" office:value="451.564605712891">
            <text:p>451.5646057129</text:p>
          </table:table-cell>
          <table:table-cell office:value-type="float" office:value="-0.01274981">
            <text:p>-0.01274981</text:p>
          </table:table-cell>
          <table:table-cell table:number-columns-repeated="4"/>
        </table:table-row>
        <table:table-row table:style-name="ro1">
          <table:table-cell office:value-type="float" office:value="451.679016113281">
            <text:p>451.6790161133</text:p>
          </table:table-cell>
          <table:table-cell office:value-type="float" office:value="0.006725348">
            <text:p>0.006725348</text:p>
          </table:table-cell>
          <table:table-cell table:number-columns-repeated="4"/>
        </table:table-row>
        <table:table-row table:style-name="ro1">
          <table:table-cell office:value-type="float" office:value="451.793426513672">
            <text:p>451.7934265137</text:p>
          </table:table-cell>
          <table:table-cell office:value-type="float" office:value="0.009441743">
            <text:p>0.009441743</text:p>
          </table:table-cell>
          <table:table-cell table:number-columns-repeated="4"/>
        </table:table-row>
        <table:table-row table:style-name="ro1">
          <table:table-cell office:value-type="float" office:value="451.907836914063">
            <text:p>451.9078369141</text:p>
          </table:table-cell>
          <table:table-cell office:value-type="float" office:value="-0.007940503">
            <text:p>-0.007940503</text:p>
          </table:table-cell>
          <table:table-cell table:number-columns-repeated="4"/>
        </table:table-row>
        <table:table-row table:style-name="ro1">
          <table:table-cell office:value-type="float" office:value="452.022247314453">
            <text:p>452.0222473145</text:p>
          </table:table-cell>
          <table:table-cell office:value-type="float" office:value="-0.003944693">
            <text:p>-0.003944693</text:p>
          </table:table-cell>
          <table:table-cell table:number-columns-repeated="4"/>
        </table:table-row>
        <table:table-row table:style-name="ro1">
          <table:table-cell office:value-type="float" office:value="452.136688232422">
            <text:p>452.1366882324</text:p>
          </table:table-cell>
          <table:table-cell office:value-type="float" office:value="0.00184967">
            <text:p>0.00184967</text:p>
          </table:table-cell>
          <table:table-cell table:number-columns-repeated="4"/>
        </table:table-row>
        <table:table-row table:style-name="ro1">
          <table:table-cell office:value-type="float" office:value="452.251098632813">
            <text:p>452.2510986328</text:p>
          </table:table-cell>
          <table:table-cell office:value-type="float" office:value="0.006720328">
            <text:p>0.006720328</text:p>
          </table:table-cell>
          <table:table-cell table:number-columns-repeated="4"/>
        </table:table-row>
        <table:table-row table:style-name="ro1">
          <table:table-cell office:value-type="float" office:value="452.365539550781">
            <text:p>452.3655395508</text:p>
          </table:table-cell>
          <table:table-cell office:value-type="float" office:value="-0.01090081">
            <text:p>-0.01090081</text:p>
          </table:table-cell>
          <table:table-cell table:number-columns-repeated="4"/>
        </table:table-row>
        <table:table-row table:style-name="ro1">
          <table:table-cell office:value-type="float" office:value="452.47998046875">
            <text:p>452.4799804688</text:p>
          </table:table-cell>
          <table:table-cell office:value-type="float" office:value="0.001458571">
            <text:p>0.001458571</text:p>
          </table:table-cell>
          <table:table-cell table:number-columns-repeated="4"/>
        </table:table-row>
        <table:table-row table:style-name="ro1">
          <table:table-cell office:value-type="float" office:value="452.594421386719">
            <text:p>452.5944213867</text:p>
          </table:table-cell>
          <table:table-cell office:value-type="float" office:value="0.008113977">
            <text:p>0.008113977</text:p>
          </table:table-cell>
          <table:table-cell table:number-columns-repeated="4"/>
        </table:table-row>
        <table:table-row table:style-name="ro1">
          <table:table-cell office:value-type="float" office:value="452.708862304688">
            <text:p>452.7088623047</text:p>
          </table:table-cell>
          <table:table-cell office:value-type="float" office:value="0.004744197">
            <text:p>0.004744197</text:p>
          </table:table-cell>
          <table:table-cell table:number-columns-repeated="4"/>
        </table:table-row>
        <table:table-row table:style-name="ro1">
          <table:table-cell office:value-type="float" office:value="452.823333740234">
            <text:p>452.8233337402</text:p>
          </table:table-cell>
          <table:table-cell office:value-type="float" office:value="0.007742384">
            <text:p>0.007742384</text:p>
          </table:table-cell>
          <table:table-cell table:number-columns-repeated="4"/>
        </table:table-row>
        <table:table-row table:style-name="ro1">
          <table:table-cell office:value-type="float" office:value="452.937774658203">
            <text:p>452.9377746582</text:p>
          </table:table-cell>
          <table:table-cell office:value-type="float" office:value="-0.007484894">
            <text:p>-0.007484894</text:p>
          </table:table-cell>
          <table:table-cell table:number-columns-repeated="4"/>
        </table:table-row>
        <table:table-row table:style-name="ro1">
          <table:table-cell office:value-type="float" office:value="453.05224609375">
            <text:p>453.0522460938</text:p>
          </table:table-cell>
          <table:table-cell office:value-type="float" office:value="-0.002073216">
            <text:p>-0.002073216</text:p>
          </table:table-cell>
          <table:table-cell table:number-columns-repeated="4"/>
        </table:table-row>
        <table:table-row table:style-name="ro1">
          <table:table-cell office:value-type="float" office:value="453.166717529297">
            <text:p>453.1667175293</text:p>
          </table:table-cell>
          <table:table-cell office:value-type="float" office:value="0.005574669">
            <text:p>0.005574669</text:p>
          </table:table-cell>
          <table:table-cell table:number-columns-repeated="4"/>
        </table:table-row>
        <table:table-row table:style-name="ro1">
          <table:table-cell office:value-type="float" office:value="453.281188964844">
            <text:p>453.2811889648</text:p>
          </table:table-cell>
          <table:table-cell office:value-type="float" office:value="-0.01041136">
            <text:p>-0.01041136</text:p>
          </table:table-cell>
          <table:table-cell table:number-columns-repeated="4"/>
        </table:table-row>
        <table:table-row table:style-name="ro1">
          <table:table-cell office:value-type="float" office:value="453.395660400391">
            <text:p>453.3956604004</text:p>
          </table:table-cell>
          <table:table-cell office:value-type="float" office:value="-0.003408096">
            <text:p>-0.003408096</text:p>
          </table:table-cell>
          <table:table-cell table:number-columns-repeated="4"/>
        </table:table-row>
        <table:table-row table:style-name="ro1">
          <table:table-cell office:value-type="float" office:value="453.510131835938">
            <text:p>453.5101318359</text:p>
          </table:table-cell>
          <table:table-cell office:value-type="float" office:value="0.01565748">
            <text:p>0.01565748</text:p>
          </table:table-cell>
          <table:table-cell table:number-columns-repeated="4"/>
        </table:table-row>
        <table:table-row table:style-name="ro1">
          <table:table-cell office:value-type="float" office:value="453.624603271484">
            <text:p>453.6246032715</text:p>
          </table:table-cell>
          <table:table-cell office:value-type="float" office:value="-0.006357312">
            <text:p>-0.006357312</text:p>
          </table:table-cell>
          <table:table-cell table:number-columns-repeated="4"/>
        </table:table-row>
        <table:table-row table:style-name="ro1">
          <table:table-cell office:value-type="float" office:value="453.739105224609">
            <text:p>453.7391052246</text:p>
          </table:table-cell>
          <table:table-cell office:value-type="float" office:value="-0.004493312">
            <text:p>-0.004493312</text:p>
          </table:table-cell>
          <table:table-cell table:number-columns-repeated="4"/>
        </table:table-row>
        <table:table-row table:style-name="ro1">
          <table:table-cell office:value-type="float" office:value="453.853607177734">
            <text:p>453.8536071777</text:p>
          </table:table-cell>
          <table:table-cell office:value-type="float" office:value="-0.00407332">
            <text:p>-0.00407332</text:p>
          </table:table-cell>
          <table:table-cell table:number-columns-repeated="4"/>
        </table:table-row>
        <table:table-row table:style-name="ro1">
          <table:table-cell office:value-type="float" office:value="453.968109130859">
            <text:p>453.9681091309</text:p>
          </table:table-cell>
          <table:table-cell office:value-type="float" office:value="0.001397014">
            <text:p>0.001397014</text:p>
          </table:table-cell>
          <table:table-cell table:number-columns-repeated="4"/>
        </table:table-row>
        <table:table-row table:style-name="ro1">
          <table:table-cell office:value-type="float" office:value="454.082611083984">
            <text:p>454.082611084</text:p>
          </table:table-cell>
          <table:table-cell office:value-type="float" office:value="-0.002175326">
            <text:p>-0.002175326</text:p>
          </table:table-cell>
          <table:table-cell table:number-columns-repeated="4"/>
        </table:table-row>
        <table:table-row table:style-name="ro1">
          <table:table-cell office:value-type="float" office:value="454.197113037109">
            <text:p>454.1971130371</text:p>
          </table:table-cell>
          <table:table-cell office:value-type="float" office:value="-0.01165734">
            <text:p>-0.01165734</text:p>
          </table:table-cell>
          <table:table-cell table:number-columns-repeated="4"/>
        </table:table-row>
        <table:table-row table:style-name="ro1">
          <table:table-cell office:value-type="float" office:value="454.311614990234">
            <text:p>454.3116149902</text:p>
          </table:table-cell>
          <table:table-cell office:value-type="float" office:value="-0.01569928">
            <text:p>-0.01569928</text:p>
          </table:table-cell>
          <table:table-cell table:number-columns-repeated="4"/>
        </table:table-row>
        <table:table-row table:style-name="ro1">
          <table:table-cell office:value-type="float" office:value="454.426147460938">
            <text:p>454.4261474609</text:p>
          </table:table-cell>
          <table:table-cell office:value-type="float" office:value="0.00495114">
            <text:p>0.00495114</text:p>
          </table:table-cell>
          <table:table-cell table:number-columns-repeated="4"/>
        </table:table-row>
        <table:table-row table:style-name="ro1">
          <table:table-cell office:value-type="float" office:value="454.540649414063">
            <text:p>454.5406494141</text:p>
          </table:table-cell>
          <table:table-cell office:value-type="float" office:value="0.007939743">
            <text:p>0.007939743</text:p>
          </table:table-cell>
          <table:table-cell table:number-columns-repeated="4"/>
        </table:table-row>
        <table:table-row table:style-name="ro1">
          <table:table-cell office:value-type="float" office:value="454.655181884766">
            <text:p>454.6551818848</text:p>
          </table:table-cell>
          <table:table-cell office:value-type="float" office:value="-0.006401457">
            <text:p>-0.006401457</text:p>
          </table:table-cell>
          <table:table-cell table:number-columns-repeated="4"/>
        </table:table-row>
        <table:table-row table:style-name="ro1">
          <table:table-cell office:value-type="float" office:value="454.769714355469">
            <text:p>454.7697143555</text:p>
          </table:table-cell>
          <table:table-cell office:value-type="float" office:value="-0.003625714">
            <text:p>-0.003625714</text:p>
          </table:table-cell>
          <table:table-cell table:number-columns-repeated="4"/>
        </table:table-row>
        <table:table-row table:style-name="ro1">
          <table:table-cell office:value-type="float" office:value="454.884246826172">
            <text:p>454.8842468262</text:p>
          </table:table-cell>
          <table:table-cell office:value-type="float" office:value="0.00901326">
            <text:p>0.00901326</text:p>
          </table:table-cell>
          <table:table-cell table:number-columns-repeated="4"/>
        </table:table-row>
        <table:table-row table:style-name="ro1">
          <table:table-cell office:value-type="float" office:value="454.998809814453">
            <text:p>454.9988098145</text:p>
          </table:table-cell>
          <table:table-cell office:value-type="float" office:value="0.0109356">
            <text:p>0.0109356</text:p>
          </table:table-cell>
          <table:table-cell table:number-columns-repeated="4"/>
        </table:table-row>
        <table:table-row table:style-name="ro1">
          <table:table-cell office:value-type="float" office:value="455.113342285156">
            <text:p>455.1133422852</text:p>
          </table:table-cell>
          <table:table-cell office:value-type="float" office:value="-0.006632231">
            <text:p>-0.006632231</text:p>
          </table:table-cell>
          <table:table-cell table:number-columns-repeated="4"/>
        </table:table-row>
        <table:table-row table:style-name="ro1">
          <table:table-cell office:value-type="float" office:value="455.227905273438">
            <text:p>455.2279052734</text:p>
          </table:table-cell>
          <table:table-cell office:value-type="float" office:value="-0.005411291">
            <text:p>-0.005411291</text:p>
          </table:table-cell>
          <table:table-cell table:number-columns-repeated="4"/>
        </table:table-row>
        <table:table-row table:style-name="ro1">
          <table:table-cell office:value-type="float" office:value="455.342468261719">
            <text:p>455.3424682617</text:p>
          </table:table-cell>
          <table:table-cell office:value-type="float" office:value="0.007089373">
            <text:p>0.007089373</text:p>
          </table:table-cell>
          <table:table-cell table:number-columns-repeated="4"/>
        </table:table-row>
        <table:table-row table:style-name="ro1">
          <table:table-cell office:value-type="float" office:value="455.457000732422">
            <text:p>455.4570007324</text:p>
          </table:table-cell>
          <table:table-cell office:value-type="float" office:value="0.007871384">
            <text:p>0.007871384</text:p>
          </table:table-cell>
          <table:table-cell table:number-columns-repeated="4"/>
        </table:table-row>
        <table:table-row table:style-name="ro1">
          <table:table-cell office:value-type="float" office:value="455.571563720703">
            <text:p>455.5715637207</text:p>
          </table:table-cell>
          <table:table-cell office:value-type="float" office:value="-0.008871458">
            <text:p>-0.008871458</text:p>
          </table:table-cell>
          <table:table-cell table:number-columns-repeated="4"/>
        </table:table-row>
        <table:table-row table:style-name="ro1">
          <table:table-cell office:value-type="float" office:value="455.686157226563">
            <text:p>455.6861572266</text:p>
          </table:table-cell>
          <table:table-cell office:value-type="float" office:value="-0.01028898">
            <text:p>-0.01028898</text:p>
          </table:table-cell>
          <table:table-cell table:number-columns-repeated="4"/>
        </table:table-row>
        <table:table-row table:style-name="ro1">
          <table:table-cell office:value-type="float" office:value="455.800720214844">
            <text:p>455.8007202148</text:p>
          </table:table-cell>
          <table:table-cell office:value-type="float" office:value="0.01033161">
            <text:p>0.01033161</text:p>
          </table:table-cell>
          <table:table-cell table:number-columns-repeated="4"/>
        </table:table-row>
        <table:table-row table:style-name="ro1">
          <table:table-cell office:value-type="float" office:value="455.915313720703">
            <text:p>455.9153137207</text:p>
          </table:table-cell>
          <table:table-cell office:value-type="float" office:value="-0.0002492436">
            <text:p>-0.0002492436</text:p>
          </table:table-cell>
          <table:table-cell table:number-columns-repeated="4"/>
        </table:table-row>
        <table:table-row table:style-name="ro1">
          <table:table-cell office:value-type="float" office:value="456.029876708984">
            <text:p>456.029876709</text:p>
          </table:table-cell>
          <table:table-cell office:value-type="float" office:value="-0.006945321">
            <text:p>-0.006945321</text:p>
          </table:table-cell>
          <table:table-cell table:number-columns-repeated="4"/>
        </table:table-row>
        <table:table-row table:style-name="ro1">
          <table:table-cell office:value-type="float" office:value="456.144470214844">
            <text:p>456.1444702148</text:p>
          </table:table-cell>
          <table:table-cell office:value-type="float" office:value="-0.004638752">
            <text:p>-0.004638752</text:p>
          </table:table-cell>
          <table:table-cell table:number-columns-repeated="4"/>
        </table:table-row>
        <table:table-row table:style-name="ro1">
          <table:table-cell office:value-type="float" office:value="456.259063720703">
            <text:p>456.2590637207</text:p>
          </table:table-cell>
          <table:table-cell office:value-type="float" office:value="-0.004766396">
            <text:p>-0.004766396</text:p>
          </table:table-cell>
          <table:table-cell table:number-columns-repeated="4"/>
        </table:table-row>
        <table:table-row table:style-name="ro1">
          <table:table-cell office:value-type="float" office:value="456.373657226563">
            <text:p>456.3736572266</text:p>
          </table:table-cell>
          <table:table-cell office:value-type="float" office:value="0.008086727">
            <text:p>0.008086727</text:p>
          </table:table-cell>
          <table:table-cell table:number-columns-repeated="4"/>
        </table:table-row>
        <table:table-row table:style-name="ro1">
          <table:table-cell office:value-type="float" office:value="456.488250732422">
            <text:p>456.4882507324</text:p>
          </table:table-cell>
          <table:table-cell office:value-type="float" office:value="-0.01009298">
            <text:p>-0.01009298</text:p>
          </table:table-cell>
          <table:table-cell table:number-columns-repeated="4"/>
        </table:table-row>
        <table:table-row table:style-name="ro1">
          <table:table-cell office:value-type="float" office:value="456.602874755859">
            <text:p>456.6028747559</text:p>
          </table:table-cell>
          <table:table-cell office:value-type="float" office:value="-0.01477942">
            <text:p>-0.01477942</text:p>
          </table:table-cell>
          <table:table-cell table:number-columns-repeated="4"/>
        </table:table-row>
        <table:table-row table:style-name="ro1">
          <table:table-cell office:value-type="float" office:value="456.717468261719">
            <text:p>456.7174682617</text:p>
          </table:table-cell>
          <table:table-cell office:value-type="float" office:value="0.01317085">
            <text:p>0.01317085</text:p>
          </table:table-cell>
          <table:table-cell table:number-columns-repeated="4"/>
        </table:table-row>
        <table:table-row table:style-name="ro1">
          <table:table-cell office:value-type="float" office:value="456.832092285156">
            <text:p>456.8320922852</text:p>
          </table:table-cell>
          <table:table-cell office:value-type="float" office:value="-0.0004810671">
            <text:p>-0.0004810671</text:p>
          </table:table-cell>
          <table:table-cell table:number-columns-repeated="4"/>
        </table:table-row>
        <table:table-row table:style-name="ro1">
          <table:table-cell office:value-type="float" office:value="456.946716308594">
            <text:p>456.9467163086</text:p>
          </table:table-cell>
          <table:table-cell office:value-type="float" office:value="-0.01016741">
            <text:p>-0.01016741</text:p>
          </table:table-cell>
          <table:table-cell table:number-columns-repeated="4"/>
        </table:table-row>
        <table:table-row table:style-name="ro1">
          <table:table-cell office:value-type="float" office:value="457.061340332031">
            <text:p>457.061340332</text:p>
          </table:table-cell>
          <table:table-cell office:value-type="float" office:value="0.007688865">
            <text:p>0.007688865</text:p>
          </table:table-cell>
          <table:table-cell table:number-columns-repeated="4"/>
        </table:table-row>
        <table:table-row table:style-name="ro1">
          <table:table-cell office:value-type="float" office:value="457.175964355469">
            <text:p>457.1759643555</text:p>
          </table:table-cell>
          <table:table-cell office:value-type="float" office:value="0.003650902">
            <text:p>0.003650902</text:p>
          </table:table-cell>
          <table:table-cell table:number-columns-repeated="4"/>
        </table:table-row>
        <table:table-row table:style-name="ro1">
          <table:table-cell office:value-type="float" office:value="457.290618896484">
            <text:p>457.2906188965</text:p>
          </table:table-cell>
          <table:table-cell office:value-type="float" office:value="0.002984309">
            <text:p>0.002984309</text:p>
          </table:table-cell>
          <table:table-cell table:number-columns-repeated="4"/>
        </table:table-row>
        <table:table-row table:style-name="ro1">
          <table:table-cell office:value-type="float" office:value="457.405242919922">
            <text:p>457.4052429199</text:p>
          </table:table-cell>
          <table:table-cell office:value-type="float" office:value="-0.01327718">
            <text:p>-0.01327718</text:p>
          </table:table-cell>
          <table:table-cell table:number-columns-repeated="4"/>
        </table:table-row>
        <table:table-row table:style-name="ro1">
          <table:table-cell office:value-type="float" office:value="457.519897460938">
            <text:p>457.5198974609</text:p>
          </table:table-cell>
          <table:table-cell office:value-type="float" office:value="0.01592476">
            <text:p>0.01592476</text:p>
          </table:table-cell>
          <table:table-cell table:number-columns-repeated="4"/>
        </table:table-row>
        <table:table-row table:style-name="ro1">
          <table:table-cell office:value-type="float" office:value="457.634552001953">
            <text:p>457.634552002</text:p>
          </table:table-cell>
          <table:table-cell office:value-type="float" office:value="0.009132898">
            <text:p>0.009132898</text:p>
          </table:table-cell>
          <table:table-cell table:number-columns-repeated="4"/>
        </table:table-row>
        <table:table-row table:style-name="ro1">
          <table:table-cell office:value-type="float" office:value="457.749206542969">
            <text:p>457.749206543</text:p>
          </table:table-cell>
          <table:table-cell office:value-type="float" office:value="0.01162102">
            <text:p>0.01162102</text:p>
          </table:table-cell>
          <table:table-cell table:number-columns-repeated="4"/>
        </table:table-row>
        <table:table-row table:style-name="ro1">
          <table:table-cell office:value-type="float" office:value="457.863861083984">
            <text:p>457.863861084</text:p>
          </table:table-cell>
          <table:table-cell office:value-type="float" office:value="-0.001488226">
            <text:p>-0.001488226</text:p>
          </table:table-cell>
          <table:table-cell table:number-columns-repeated="4"/>
        </table:table-row>
        <table:table-row table:style-name="ro1">
          <table:table-cell office:value-type="float" office:value="457.978515625">
            <text:p>457.978515625</text:p>
          </table:table-cell>
          <table:table-cell office:value-type="float" office:value="-0.00159245">
            <text:p>-0.00159245</text:p>
          </table:table-cell>
          <table:table-cell table:number-columns-repeated="4"/>
        </table:table-row>
        <table:table-row table:style-name="ro1">
          <table:table-cell office:value-type="float" office:value="458.093200683594">
            <text:p>458.0932006836</text:p>
          </table:table-cell>
          <table:table-cell office:value-type="float" office:value="-0.002357981">
            <text:p>-0.002357981</text:p>
          </table:table-cell>
          <table:table-cell table:number-columns-repeated="4"/>
        </table:table-row>
        <table:table-row table:style-name="ro1">
          <table:table-cell office:value-type="float" office:value="458.207855224609">
            <text:p>458.2078552246</text:p>
          </table:table-cell>
          <table:table-cell office:value-type="float" office:value="0.006983225">
            <text:p>0.006983225</text:p>
          </table:table-cell>
          <table:table-cell table:number-columns-repeated="4"/>
        </table:table-row>
        <table:table-row table:style-name="ro1">
          <table:table-cell office:value-type="float" office:value="458.322540283203">
            <text:p>458.3225402832</text:p>
          </table:table-cell>
          <table:table-cell office:value-type="float" office:value="0.01007157">
            <text:p>0.01007157</text:p>
          </table:table-cell>
          <table:table-cell table:number-columns-repeated="4"/>
        </table:table-row>
        <table:table-row table:style-name="ro1">
          <table:table-cell office:value-type="float" office:value="458.437225341797">
            <text:p>458.4372253418</text:p>
          </table:table-cell>
          <table:table-cell office:value-type="float" office:value="-0.0006177475">
            <text:p>-0.0006177475</text:p>
          </table:table-cell>
          <table:table-cell table:number-columns-repeated="4"/>
        </table:table-row>
        <table:table-row table:style-name="ro1">
          <table:table-cell office:value-type="float" office:value="458.551910400391">
            <text:p>458.5519104004</text:p>
          </table:table-cell>
          <table:table-cell office:value-type="float" office:value="0.007391911">
            <text:p>0.007391911</text:p>
          </table:table-cell>
          <table:table-cell table:number-columns-repeated="4"/>
        </table:table-row>
        <table:table-row table:style-name="ro1">
          <table:table-cell office:value-type="float" office:value="458.666595458984">
            <text:p>458.666595459</text:p>
          </table:table-cell>
          <table:table-cell office:value-type="float" office:value="0.01489314">
            <text:p>0.01489314</text:p>
          </table:table-cell>
          <table:table-cell table:number-columns-repeated="4"/>
        </table:table-row>
        <table:table-row table:style-name="ro1">
          <table:table-cell office:value-type="float" office:value="458.781280517578">
            <text:p>458.7812805176</text:p>
          </table:table-cell>
          <table:table-cell office:value-type="float" office:value="-0.006749941">
            <text:p>-0.006749941</text:p>
          </table:table-cell>
          <table:table-cell table:number-columns-repeated="4"/>
        </table:table-row>
        <table:table-row table:style-name="ro1">
          <table:table-cell office:value-type="float" office:value="458.89599609375">
            <text:p>458.8959960938</text:p>
          </table:table-cell>
          <table:table-cell office:value-type="float" office:value="-0.002543829">
            <text:p>-0.002543829</text:p>
          </table:table-cell>
          <table:table-cell table:number-columns-repeated="4"/>
        </table:table-row>
        <table:table-row table:style-name="ro1">
          <table:table-cell office:value-type="float" office:value="459.010681152344">
            <text:p>459.0106811523</text:p>
          </table:table-cell>
          <table:table-cell office:value-type="float" office:value="0.01022343">
            <text:p>0.01022343</text:p>
          </table:table-cell>
          <table:table-cell table:number-columns-repeated="4"/>
        </table:table-row>
        <table:table-row table:style-name="ro1">
          <table:table-cell office:value-type="float" office:value="459.125396728516">
            <text:p>459.1253967285</text:p>
          </table:table-cell>
          <table:table-cell office:value-type="float" office:value="0.03098735">
            <text:p>0.03098735</text:p>
          </table:table-cell>
          <table:table-cell table:number-columns-repeated="4"/>
        </table:table-row>
        <table:table-row table:style-name="ro1">
          <table:table-cell office:value-type="float" office:value="459.240112304688">
            <text:p>459.2401123047</text:p>
          </table:table-cell>
          <table:table-cell office:value-type="float" office:value="0.01016569">
            <text:p>0.01016569</text:p>
          </table:table-cell>
          <table:table-cell table:number-columns-repeated="4"/>
        </table:table-row>
        <table:table-row table:style-name="ro1">
          <table:table-cell office:value-type="float" office:value="459.354827880859">
            <text:p>459.3548278809</text:p>
          </table:table-cell>
          <table:table-cell office:value-type="float" office:value="-0.00674616">
            <text:p>-0.00674616</text:p>
          </table:table-cell>
          <table:table-cell table:number-columns-repeated="4"/>
        </table:table-row>
        <table:table-row table:style-name="ro1">
          <table:table-cell office:value-type="float" office:value="459.469543457031">
            <text:p>459.469543457</text:p>
          </table:table-cell>
          <table:table-cell office:value-type="float" office:value="0.004770226">
            <text:p>0.004770226</text:p>
          </table:table-cell>
          <table:table-cell table:number-columns-repeated="4"/>
        </table:table-row>
        <table:table-row table:style-name="ro1">
          <table:table-cell office:value-type="float" office:value="459.584289550781">
            <text:p>459.5842895508</text:p>
          </table:table-cell>
          <table:table-cell office:value-type="float" office:value="-0.0001088285">
            <text:p>-0.0001088285</text:p>
          </table:table-cell>
          <table:table-cell table:number-columns-repeated="4"/>
        </table:table-row>
        <table:table-row table:style-name="ro1">
          <table:table-cell office:value-type="float" office:value="459.699005126953">
            <text:p>459.699005127</text:p>
          </table:table-cell>
          <table:table-cell office:value-type="float" office:value="0.006365261">
            <text:p>0.006365261</text:p>
          </table:table-cell>
          <table:table-cell table:number-columns-repeated="4"/>
        </table:table-row>
        <table:table-row table:style-name="ro1">
          <table:table-cell office:value-type="float" office:value="459.813751220703">
            <text:p>459.8137512207</text:p>
          </table:table-cell>
          <table:table-cell office:value-type="float" office:value="-0.00524311">
            <text:p>-0.00524311</text:p>
          </table:table-cell>
          <table:table-cell table:number-columns-repeated="4"/>
        </table:table-row>
        <table:table-row table:style-name="ro1">
          <table:table-cell office:value-type="float" office:value="459.928497314453">
            <text:p>459.9284973145</text:p>
          </table:table-cell>
          <table:table-cell office:value-type="float" office:value="0.007847584">
            <text:p>0.007847584</text:p>
          </table:table-cell>
          <table:table-cell table:number-columns-repeated="4"/>
        </table:table-row>
        <table:table-row table:style-name="ro1">
          <table:table-cell office:value-type="float" office:value="460.043243408203">
            <text:p>460.0432434082</text:p>
          </table:table-cell>
          <table:table-cell office:value-type="float" office:value="0.0343369">
            <text:p>0.0343369</text:p>
          </table:table-cell>
          <table:table-cell table:number-columns-repeated="4"/>
        </table:table-row>
        <table:table-row table:style-name="ro1">
          <table:table-cell office:value-type="float" office:value="460.157989501953">
            <text:p>460.157989502</text:p>
          </table:table-cell>
          <table:table-cell office:value-type="float" office:value="0.01261247">
            <text:p>0.01261247</text:p>
          </table:table-cell>
          <table:table-cell table:number-columns-repeated="4"/>
        </table:table-row>
        <table:table-row table:style-name="ro1">
          <table:table-cell office:value-type="float" office:value="460.272735595703">
            <text:p>460.2727355957</text:p>
          </table:table-cell>
          <table:table-cell office:value-type="float" office:value="-0.01054694">
            <text:p>-0.01054694</text:p>
          </table:table-cell>
          <table:table-cell table:number-columns-repeated="4"/>
        </table:table-row>
        <table:table-row table:style-name="ro1">
          <table:table-cell office:value-type="float" office:value="460.387512207031">
            <text:p>460.387512207</text:p>
          </table:table-cell>
          <table:table-cell office:value-type="float" office:value="-0.003140993">
            <text:p>-0.003140993</text:p>
          </table:table-cell>
          <table:table-cell table:number-columns-repeated="4"/>
        </table:table-row>
        <table:table-row table:style-name="ro1">
          <table:table-cell office:value-type="float" office:value="460.502258300781">
            <text:p>460.5022583008</text:p>
          </table:table-cell>
          <table:table-cell office:value-type="float" office:value="0.009986079">
            <text:p>0.009986079</text:p>
          </table:table-cell>
          <table:table-cell table:number-columns-repeated="4"/>
        </table:table-row>
        <table:table-row table:style-name="ro1">
          <table:table-cell office:value-type="float" office:value="460.617034912109">
            <text:p>460.6170349121</text:p>
          </table:table-cell>
          <table:table-cell office:value-type="float" office:value="-0.00312177">
            <text:p>-0.00312177</text:p>
          </table:table-cell>
          <table:table-cell table:number-columns-repeated="4"/>
        </table:table-row>
        <table:table-row table:style-name="ro1">
          <table:table-cell office:value-type="float" office:value="460.731811523438">
            <text:p>460.7318115234</text:p>
          </table:table-cell>
          <table:table-cell office:value-type="float" office:value="0.00813008">
            <text:p>0.00813008</text:p>
          </table:table-cell>
          <table:table-cell table:number-columns-repeated="4"/>
        </table:table-row>
        <table:table-row table:style-name="ro1">
          <table:table-cell office:value-type="float" office:value="460.846588134766">
            <text:p>460.8465881348</text:p>
          </table:table-cell>
          <table:table-cell office:value-type="float" office:value="0.01260338">
            <text:p>0.01260338</text:p>
          </table:table-cell>
          <table:table-cell table:number-columns-repeated="4"/>
        </table:table-row>
        <table:table-row table:style-name="ro1">
          <table:table-cell office:value-type="float" office:value="460.961364746094">
            <text:p>460.9613647461</text:p>
          </table:table-cell>
          <table:table-cell office:value-type="float" office:value="-0.001723378">
            <text:p>-0.001723378</text:p>
          </table:table-cell>
          <table:table-cell table:number-columns-repeated="4"/>
        </table:table-row>
        <table:table-row table:style-name="ro1">
          <table:table-cell office:value-type="float" office:value="461.076171875">
            <text:p>461.076171875</text:p>
          </table:table-cell>
          <table:table-cell office:value-type="float" office:value="-0.009977535">
            <text:p>-0.009977535</text:p>
          </table:table-cell>
          <table:table-cell table:number-columns-repeated="4"/>
        </table:table-row>
        <table:table-row table:style-name="ro1">
          <table:table-cell office:value-type="float" office:value="461.190948486328">
            <text:p>461.1909484863</text:p>
          </table:table-cell>
          <table:table-cell office:value-type="float" office:value="-0.0002074435">
            <text:p>-0.0002074435</text:p>
          </table:table-cell>
          <table:table-cell table:number-columns-repeated="4"/>
        </table:table-row>
        <table:table-row table:style-name="ro1">
          <table:table-cell office:value-type="float" office:value="461.305755615234">
            <text:p>461.3057556152</text:p>
          </table:table-cell>
          <table:table-cell office:value-type="float" office:value="0.006473048">
            <text:p>0.006473048</text:p>
          </table:table-cell>
          <table:table-cell table:number-columns-repeated="4"/>
        </table:table-row>
        <table:table-row table:style-name="ro1">
          <table:table-cell office:value-type="float" office:value="461.420562744141">
            <text:p>461.4205627441</text:p>
          </table:table-cell>
          <table:table-cell office:value-type="float" office:value="-0.001428397">
            <text:p>-0.001428397</text:p>
          </table:table-cell>
          <table:table-cell table:number-columns-repeated="4"/>
        </table:table-row>
        <table:table-row table:style-name="ro1">
          <table:table-cell office:value-type="float" office:value="461.535369873047">
            <text:p>461.535369873</text:p>
          </table:table-cell>
          <table:table-cell office:value-type="float" office:value="-0.008408781">
            <text:p>-0.008408781</text:p>
          </table:table-cell>
          <table:table-cell table:number-columns-repeated="4"/>
        </table:table-row>
        <table:table-row table:style-name="ro1">
          <table:table-cell office:value-type="float" office:value="461.650177001953">
            <text:p>461.650177002</text:p>
          </table:table-cell>
          <table:table-cell office:value-type="float" office:value="0.007823192">
            <text:p>0.007823192</text:p>
          </table:table-cell>
          <table:table-cell table:number-columns-repeated="4"/>
        </table:table-row>
        <table:table-row table:style-name="ro1">
          <table:table-cell office:value-type="float" office:value="461.764984130859">
            <text:p>461.7649841309</text:p>
          </table:table-cell>
          <table:table-cell office:value-type="float" office:value="0.003737292">
            <text:p>0.003737292</text:p>
          </table:table-cell>
          <table:table-cell table:number-columns-repeated="4"/>
        </table:table-row>
        <table:table-row table:style-name="ro1">
          <table:table-cell office:value-type="float" office:value="461.879791259766">
            <text:p>461.8797912598</text:p>
          </table:table-cell>
          <table:table-cell office:value-type="float" office:value="0.006307221">
            <text:p>0.006307221</text:p>
          </table:table-cell>
          <table:table-cell table:number-columns-repeated="4"/>
        </table:table-row>
        <table:table-row table:style-name="ro1">
          <table:table-cell office:value-type="float" office:value="461.99462890625">
            <text:p>461.9946289063</text:p>
          </table:table-cell>
          <table:table-cell office:value-type="float" office:value="-0.003000524">
            <text:p>-0.003000524</text:p>
          </table:table-cell>
          <table:table-cell table:number-columns-repeated="4"/>
        </table:table-row>
        <table:table-row table:style-name="ro1">
          <table:table-cell office:value-type="float" office:value="462.109466552734">
            <text:p>462.1094665527</text:p>
          </table:table-cell>
          <table:table-cell office:value-type="float" office:value="0.006320547">
            <text:p>0.006320547</text:p>
          </table:table-cell>
          <table:table-cell table:number-columns-repeated="4"/>
        </table:table-row>
        <table:table-row table:style-name="ro1">
          <table:table-cell office:value-type="float" office:value="462.224304199219">
            <text:p>462.2243041992</text:p>
          </table:table-cell>
          <table:table-cell office:value-type="float" office:value="0.001049003">
            <text:p>0.001049003</text:p>
          </table:table-cell>
          <table:table-cell table:number-columns-repeated="4"/>
        </table:table-row>
        <table:table-row table:style-name="ro1">
          <table:table-cell office:value-type="float" office:value="462.339141845703">
            <text:p>462.3391418457</text:p>
          </table:table-cell>
          <table:table-cell office:value-type="float" office:value="0.00892913">
            <text:p>0.00892913</text:p>
          </table:table-cell>
          <table:table-cell table:number-columns-repeated="4"/>
        </table:table-row>
        <table:table-row table:style-name="ro1">
          <table:table-cell office:value-type="float" office:value="462.453979492188">
            <text:p>462.4539794922</text:p>
          </table:table-cell>
          <table:table-cell office:value-type="float" office:value="-0.0008545114">
            <text:p>-0.0008545114</text:p>
          </table:table-cell>
          <table:table-cell table:number-columns-repeated="4"/>
        </table:table-row>
        <table:table-row table:style-name="ro1">
          <table:table-cell office:value-type="float" office:value="462.568817138672">
            <text:p>462.5688171387</text:p>
          </table:table-cell>
          <table:table-cell office:value-type="float" office:value="0.003348558">
            <text:p>0.003348558</text:p>
          </table:table-cell>
          <table:table-cell table:number-columns-repeated="4"/>
        </table:table-row>
        <table:table-row table:style-name="ro1">
          <table:table-cell office:value-type="float" office:value="462.683654785156">
            <text:p>462.6836547852</text:p>
          </table:table-cell>
          <table:table-cell office:value-type="float" office:value="0.01133735">
            <text:p>0.01133735</text:p>
          </table:table-cell>
          <table:table-cell table:number-columns-repeated="4"/>
        </table:table-row>
        <table:table-row table:style-name="ro1">
          <table:table-cell office:value-type="float" office:value="462.798522949219">
            <text:p>462.7985229492</text:p>
          </table:table-cell>
          <table:table-cell office:value-type="float" office:value="-0.008452776">
            <text:p>-0.008452776</text:p>
          </table:table-cell>
          <table:table-cell table:number-columns-repeated="4"/>
        </table:table-row>
        <table:table-row table:style-name="ro1">
          <table:table-cell office:value-type="float" office:value="462.913391113281">
            <text:p>462.9133911133</text:p>
          </table:table-cell>
          <table:table-cell office:value-type="float" office:value="-0.005117916">
            <text:p>-0.005117916</text:p>
          </table:table-cell>
          <table:table-cell table:number-columns-repeated="4"/>
        </table:table-row>
        <table:table-row table:style-name="ro1">
          <table:table-cell office:value-type="float" office:value="463.028259277344">
            <text:p>463.0282592773</text:p>
          </table:table-cell>
          <table:table-cell office:value-type="float" office:value="0.006440159">
            <text:p>0.006440159</text:p>
          </table:table-cell>
          <table:table-cell table:number-columns-repeated="4"/>
        </table:table-row>
        <table:table-row table:style-name="ro1">
          <table:table-cell office:value-type="float" office:value="463.143127441406">
            <text:p>463.1431274414</text:p>
          </table:table-cell>
          <table:table-cell office:value-type="float" office:value="0.006013974">
            <text:p>0.006013974</text:p>
          </table:table-cell>
          <table:table-cell table:number-columns-repeated="4"/>
        </table:table-row>
        <table:table-row table:style-name="ro1">
          <table:table-cell office:value-type="float" office:value="463.257995605469">
            <text:p>463.2579956055</text:p>
          </table:table-cell>
          <table:table-cell office:value-type="float" office:value="-0.008120835">
            <text:p>-0.008120835</text:p>
          </table:table-cell>
          <table:table-cell table:number-columns-repeated="4"/>
        </table:table-row>
        <table:table-row table:style-name="ro1">
          <table:table-cell office:value-type="float" office:value="463.372863769531">
            <text:p>463.3728637695</text:p>
          </table:table-cell>
          <table:table-cell office:value-type="float" office:value="0.01230157">
            <text:p>0.01230157</text:p>
          </table:table-cell>
          <table:table-cell table:number-columns-repeated="4"/>
        </table:table-row>
        <table:table-row table:style-name="ro1">
          <table:table-cell office:value-type="float" office:value="463.487762451172">
            <text:p>463.4877624512</text:p>
          </table:table-cell>
          <table:table-cell office:value-type="float" office:value="0.007104605">
            <text:p>0.007104605</text:p>
          </table:table-cell>
          <table:table-cell table:number-columns-repeated="4"/>
        </table:table-row>
        <table:table-row table:style-name="ro1">
          <table:table-cell office:value-type="float" office:value="463.602661132813">
            <text:p>463.6026611328</text:p>
          </table:table-cell>
          <table:table-cell office:value-type="float" office:value="0.006573394">
            <text:p>0.006573394</text:p>
          </table:table-cell>
          <table:table-cell table:number-columns-repeated="4"/>
        </table:table-row>
        <table:table-row table:style-name="ro1">
          <table:table-cell office:value-type="float" office:value="463.717529296875">
            <text:p>463.7175292969</text:p>
          </table:table-cell>
          <table:table-cell office:value-type="float" office:value="-0.000704543">
            <text:p>-0.000704543</text:p>
          </table:table-cell>
          <table:table-cell table:number-columns-repeated="4"/>
        </table:table-row>
        <table:table-row table:style-name="ro1">
          <table:table-cell office:value-type="float" office:value="463.832427978516">
            <text:p>463.8324279785</text:p>
          </table:table-cell>
          <table:table-cell office:value-type="float" office:value="-0.009901953">
            <text:p>-0.009901953</text:p>
          </table:table-cell>
          <table:table-cell table:number-columns-repeated="4"/>
        </table:table-row>
        <table:table-row table:style-name="ro1">
          <table:table-cell office:value-type="float" office:value="463.947326660156">
            <text:p>463.9473266602</text:p>
          </table:table-cell>
          <table:table-cell office:value-type="float" office:value="0.002503854">
            <text:p>0.002503854</text:p>
          </table:table-cell>
          <table:table-cell table:number-columns-repeated="4"/>
        </table:table-row>
        <table:table-row table:style-name="ro1">
          <table:table-cell office:value-type="float" office:value="464.062255859375">
            <text:p>464.0622558594</text:p>
          </table:table-cell>
          <table:table-cell office:value-type="float" office:value="-0.003948271">
            <text:p>-0.003948271</text:p>
          </table:table-cell>
          <table:table-cell table:number-columns-repeated="4"/>
        </table:table-row>
        <table:table-row table:style-name="ro1">
          <table:table-cell office:value-type="float" office:value="464.177154541016">
            <text:p>464.177154541</text:p>
          </table:table-cell>
          <table:table-cell office:value-type="float" office:value="-0.005408455">
            <text:p>-0.005408455</text:p>
          </table:table-cell>
          <table:table-cell table:number-columns-repeated="4"/>
        </table:table-row>
        <table:table-row table:style-name="ro1">
          <table:table-cell office:value-type="float" office:value="464.292083740234">
            <text:p>464.2920837402</text:p>
          </table:table-cell>
          <table:table-cell office:value-type="float" office:value="-0.008986621">
            <text:p>-0.008986621</text:p>
          </table:table-cell>
          <table:table-cell table:number-columns-repeated="4"/>
        </table:table-row>
        <table:table-row table:style-name="ro1">
          <table:table-cell office:value-type="float" office:value="464.406982421875">
            <text:p>464.4069824219</text:p>
          </table:table-cell>
          <table:table-cell office:value-type="float" office:value="0.006903852">
            <text:p>0.006903852</text:p>
          </table:table-cell>
          <table:table-cell table:number-columns-repeated="4"/>
        </table:table-row>
        <table:table-row table:style-name="ro1">
          <table:table-cell office:value-type="float" office:value="464.521911621094">
            <text:p>464.5219116211</text:p>
          </table:table-cell>
          <table:table-cell office:value-type="float" office:value="-0.003490245">
            <text:p>-0.003490245</text:p>
          </table:table-cell>
          <table:table-cell table:number-columns-repeated="4"/>
        </table:table-row>
        <table:table-row table:style-name="ro1">
          <table:table-cell office:value-type="float" office:value="464.636840820313">
            <text:p>464.6368408203</text:p>
          </table:table-cell>
          <table:table-cell office:value-type="float" office:value="-0.003186684">
            <text:p>-0.003186684</text:p>
          </table:table-cell>
          <table:table-cell table:number-columns-repeated="4"/>
        </table:table-row>
        <table:table-row table:style-name="ro1">
          <table:table-cell office:value-type="float" office:value="464.751770019531">
            <text:p>464.7517700195</text:p>
          </table:table-cell>
          <table:table-cell office:value-type="float" office:value="-0.007554092">
            <text:p>-0.007554092</text:p>
          </table:table-cell>
          <table:table-cell table:number-columns-repeated="4"/>
        </table:table-row>
        <table:table-row table:style-name="ro1">
          <table:table-cell office:value-type="float" office:value="464.866729736328">
            <text:p>464.8667297363</text:p>
          </table:table-cell>
          <table:table-cell office:value-type="float" office:value="0.003577934">
            <text:p>0.003577934</text:p>
          </table:table-cell>
          <table:table-cell table:number-columns-repeated="4"/>
        </table:table-row>
        <table:table-row table:style-name="ro1">
          <table:table-cell office:value-type="float" office:value="464.981658935547">
            <text:p>464.9816589355</text:p>
          </table:table-cell>
          <table:table-cell office:value-type="float" office:value="0.01324224">
            <text:p>0.01324224</text:p>
          </table:table-cell>
          <table:table-cell table:number-columns-repeated="4"/>
        </table:table-row>
        <table:table-row table:style-name="ro1">
          <table:table-cell office:value-type="float" office:value="465.096618652344">
            <text:p>465.0966186523</text:p>
          </table:table-cell>
          <table:table-cell office:value-type="float" office:value="-0.006914235">
            <text:p>-0.006914235</text:p>
          </table:table-cell>
          <table:table-cell table:number-columns-repeated="4"/>
        </table:table-row>
        <table:table-row table:style-name="ro1">
          <table:table-cell office:value-type="float" office:value="465.211547851563">
            <text:p>465.2115478516</text:p>
          </table:table-cell>
          <table:table-cell office:value-type="float" office:value="-0.01237992">
            <text:p>-0.01237992</text:p>
          </table:table-cell>
          <table:table-cell table:number-columns-repeated="4"/>
        </table:table-row>
        <table:table-row table:style-name="ro1">
          <table:table-cell office:value-type="float" office:value="465.326507568359">
            <text:p>465.3265075684</text:p>
          </table:table-cell>
          <table:table-cell office:value-type="float" office:value="-0.007193753">
            <text:p>-0.007193753</text:p>
          </table:table-cell>
          <table:table-cell table:number-columns-repeated="4"/>
        </table:table-row>
        <table:table-row table:style-name="ro1">
          <table:table-cell office:value-type="float" office:value="465.441467285156">
            <text:p>465.4414672852</text:p>
          </table:table-cell>
          <table:table-cell office:value-type="float" office:value="0.002487643">
            <text:p>0.002487643</text:p>
          </table:table-cell>
          <table:table-cell table:number-columns-repeated="4"/>
        </table:table-row>
        <table:table-row table:style-name="ro1">
          <table:table-cell office:value-type="float" office:value="465.556427001953">
            <text:p>465.556427002</text:p>
          </table:table-cell>
          <table:table-cell office:value-type="float" office:value="-0.003961284">
            <text:p>-0.003961284</text:p>
          </table:table-cell>
          <table:table-cell table:number-columns-repeated="4"/>
        </table:table-row>
        <table:table-row table:style-name="ro1">
          <table:table-cell office:value-type="float" office:value="465.671417236328">
            <text:p>465.6714172363</text:p>
          </table:table-cell>
          <table:table-cell office:value-type="float" office:value="-0.006447942">
            <text:p>-0.006447942</text:p>
          </table:table-cell>
          <table:table-cell table:number-columns-repeated="4"/>
        </table:table-row>
        <table:table-row table:style-name="ro1">
          <table:table-cell office:value-type="float" office:value="465.786376953125">
            <text:p>465.7863769531</text:p>
          </table:table-cell>
          <table:table-cell office:value-type="float" office:value="0.005024308">
            <text:p>0.005024308</text:p>
          </table:table-cell>
          <table:table-cell table:number-columns-repeated="4"/>
        </table:table-row>
        <table:table-row table:style-name="ro1">
          <table:table-cell office:value-type="float" office:value="465.9013671875">
            <text:p>465.9013671875</text:p>
          </table:table-cell>
          <table:table-cell office:value-type="float" office:value="0.005796296">
            <text:p>0.005796296</text:p>
          </table:table-cell>
          <table:table-cell table:number-columns-repeated="4"/>
        </table:table-row>
        <table:table-row table:style-name="ro1">
          <table:table-cell office:value-type="float" office:value="466.016357421875">
            <text:p>466.0163574219</text:p>
          </table:table-cell>
          <table:table-cell office:value-type="float" office:value="-0.002280688">
            <text:p>-0.002280688</text:p>
          </table:table-cell>
          <table:table-cell table:number-columns-repeated="4"/>
        </table:table-row>
        <table:table-row table:style-name="ro1">
          <table:table-cell office:value-type="float" office:value="466.13134765625">
            <text:p>466.1313476563</text:p>
          </table:table-cell>
          <table:table-cell office:value-type="float" office:value="-0.007788126">
            <text:p>-0.007788126</text:p>
          </table:table-cell>
          <table:table-cell table:number-columns-repeated="4"/>
        </table:table-row>
        <table:table-row table:style-name="ro1">
          <table:table-cell office:value-type="float" office:value="466.246337890625">
            <text:p>466.2463378906</text:p>
          </table:table-cell>
          <table:table-cell office:value-type="float" office:value="0.01619052">
            <text:p>0.01619052</text:p>
          </table:table-cell>
          <table:table-cell table:number-columns-repeated="4"/>
        </table:table-row>
        <table:table-row table:style-name="ro1">
          <table:table-cell office:value-type="float" office:value="466.361328125">
            <text:p>466.361328125</text:p>
          </table:table-cell>
          <table:table-cell office:value-type="float" office:value="-0.001247728">
            <text:p>-0.001247728</text:p>
          </table:table-cell>
          <table:table-cell table:number-columns-repeated="4"/>
        </table:table-row>
        <table:table-row table:style-name="ro1">
          <table:table-cell office:value-type="float" office:value="466.476318359375">
            <text:p>466.4763183594</text:p>
          </table:table-cell>
          <table:table-cell office:value-type="float" office:value="-0.01142374">
            <text:p>-0.01142374</text:p>
          </table:table-cell>
          <table:table-cell table:number-columns-repeated="4"/>
        </table:table-row>
        <table:table-row table:style-name="ro1">
          <table:table-cell office:value-type="float" office:value="466.591339111328">
            <text:p>466.5913391113</text:p>
          </table:table-cell>
          <table:table-cell office:value-type="float" office:value="0.003642726">
            <text:p>0.003642726</text:p>
          </table:table-cell>
          <table:table-cell table:number-columns-repeated="4"/>
        </table:table-row>
        <table:table-row table:style-name="ro1">
          <table:table-cell office:value-type="float" office:value="466.706329345703">
            <text:p>466.7063293457</text:p>
          </table:table-cell>
          <table:table-cell office:value-type="float" office:value="0.02288978">
            <text:p>0.02288978</text:p>
          </table:table-cell>
          <table:table-cell table:number-columns-repeated="4"/>
        </table:table-row>
        <table:table-row table:style-name="ro1">
          <table:table-cell office:value-type="float" office:value="466.821350097656">
            <text:p>466.8213500977</text:p>
          </table:table-cell>
          <table:table-cell office:value-type="float" office:value="-0.0002899823">
            <text:p>-0.0002899823</text:p>
          </table:table-cell>
          <table:table-cell table:number-columns-repeated="4"/>
        </table:table-row>
        <table:table-row table:style-name="ro1">
          <table:table-cell office:value-type="float" office:value="466.936370849609">
            <text:p>466.9363708496</text:p>
          </table:table-cell>
          <table:table-cell office:value-type="float" office:value="-0.006298411">
            <text:p>-0.006298411</text:p>
          </table:table-cell>
          <table:table-cell table:number-columns-repeated="4"/>
        </table:table-row>
        <table:table-row table:style-name="ro1">
          <table:table-cell office:value-type="float" office:value="467.051391601563">
            <text:p>467.0513916016</text:p>
          </table:table-cell>
          <table:table-cell office:value-type="float" office:value="0.007992638">
            <text:p>0.007992638</text:p>
          </table:table-cell>
          <table:table-cell table:number-columns-repeated="4"/>
        </table:table-row>
        <table:table-row table:style-name="ro1">
          <table:table-cell office:value-type="float" office:value="467.166442871094">
            <text:p>467.1664428711</text:p>
          </table:table-cell>
          <table:table-cell office:value-type="float" office:value="-0.003947549">
            <text:p>-0.003947549</text:p>
          </table:table-cell>
          <table:table-cell table:number-columns-repeated="4"/>
        </table:table-row>
        <table:table-row table:style-name="ro1">
          <table:table-cell office:value-type="float" office:value="467.281463623047">
            <text:p>467.281463623</text:p>
          </table:table-cell>
          <table:table-cell office:value-type="float" office:value="0.002526612">
            <text:p>0.002526612</text:p>
          </table:table-cell>
          <table:table-cell table:number-columns-repeated="4"/>
        </table:table-row>
        <table:table-row table:style-name="ro1">
          <table:table-cell office:value-type="float" office:value="467.396484375">
            <text:p>467.396484375</text:p>
          </table:table-cell>
          <table:table-cell office:value-type="float" office:value="-0.006409209">
            <text:p>-0.006409209</text:p>
          </table:table-cell>
          <table:table-cell table:number-columns-repeated="4"/>
        </table:table-row>
        <table:table-row table:style-name="ro1">
          <table:table-cell office:value-type="float" office:value="467.511535644531">
            <text:p>467.5115356445</text:p>
          </table:table-cell>
          <table:table-cell office:value-type="float" office:value="-0.008473669">
            <text:p>-0.008473669</text:p>
          </table:table-cell>
          <table:table-cell table:number-columns-repeated="4"/>
        </table:table-row>
        <table:table-row table:style-name="ro1">
          <table:table-cell office:value-type="float" office:value="467.626586914063">
            <text:p>467.6265869141</text:p>
          </table:table-cell>
          <table:table-cell office:value-type="float" office:value="0.002452737">
            <text:p>0.002452737</text:p>
          </table:table-cell>
          <table:table-cell table:number-columns-repeated="4"/>
        </table:table-row>
        <table:table-row table:style-name="ro1">
          <table:table-cell office:value-type="float" office:value="467.741638183594">
            <text:p>467.7416381836</text:p>
          </table:table-cell>
          <table:table-cell office:value-type="float" office:value="-0.008975404">
            <text:p>-0.008975404</text:p>
          </table:table-cell>
          <table:table-cell table:number-columns-repeated="4"/>
        </table:table-row>
        <table:table-row table:style-name="ro1">
          <table:table-cell office:value-type="float" office:value="467.856689453125">
            <text:p>467.8566894531</text:p>
          </table:table-cell>
          <table:table-cell office:value-type="float" office:value="-0.005037242">
            <text:p>-0.005037242</text:p>
          </table:table-cell>
          <table:table-cell table:number-columns-repeated="4"/>
        </table:table-row>
        <table:table-row table:style-name="ro1">
          <table:table-cell office:value-type="float" office:value="467.971740722656">
            <text:p>467.9717407227</text:p>
          </table:table-cell>
          <table:table-cell office:value-type="float" office:value="-0.006934328">
            <text:p>-0.006934328</text:p>
          </table:table-cell>
          <table:table-cell table:number-columns-repeated="4"/>
        </table:table-row>
        <table:table-row table:style-name="ro1">
          <table:table-cell office:value-type="float" office:value="468.086822509766">
            <text:p>468.0868225098</text:p>
          </table:table-cell>
          <table:table-cell office:value-type="float" office:value="0.0005652245">
            <text:p>0.0005652245</text:p>
          </table:table-cell>
          <table:table-cell table:number-columns-repeated="4"/>
        </table:table-row>
        <table:table-row table:style-name="ro1">
          <table:table-cell office:value-type="float" office:value="468.201873779297">
            <text:p>468.2018737793</text:p>
          </table:table-cell>
          <table:table-cell office:value-type="float" office:value="0.009873519">
            <text:p>0.009873519</text:p>
          </table:table-cell>
          <table:table-cell table:number-columns-repeated="4"/>
        </table:table-row>
        <table:table-row table:style-name="ro1">
          <table:table-cell office:value-type="float" office:value="468.316955566406">
            <text:p>468.3169555664</text:p>
          </table:table-cell>
          <table:table-cell office:value-type="float" office:value="-0.001254003">
            <text:p>-0.001254003</text:p>
          </table:table-cell>
          <table:table-cell table:number-columns-repeated="4"/>
        </table:table-row>
        <table:table-row table:style-name="ro1">
          <table:table-cell office:value-type="float" office:value="468.432037353516">
            <text:p>468.4320373535</text:p>
          </table:table-cell>
          <table:table-cell office:value-type="float" office:value="-0.001950792">
            <text:p>-0.001950792</text:p>
          </table:table-cell>
          <table:table-cell table:number-columns-repeated="4"/>
        </table:table-row>
        <table:table-row table:style-name="ro1">
          <table:table-cell office:value-type="float" office:value="468.547119140625">
            <text:p>468.5471191406</text:p>
          </table:table-cell>
          <table:table-cell office:value-type="float" office:value="0.0002398216">
            <text:p>0.0002398216</text:p>
          </table:table-cell>
          <table:table-cell table:number-columns-repeated="4"/>
        </table:table-row>
        <table:table-row table:style-name="ro1">
          <table:table-cell office:value-type="float" office:value="468.662200927734">
            <text:p>468.6622009277</text:p>
          </table:table-cell>
          <table:table-cell office:value-type="float" office:value="-0.005081541">
            <text:p>-0.005081541</text:p>
          </table:table-cell>
          <table:table-cell table:number-columns-repeated="4"/>
        </table:table-row>
        <table:table-row table:style-name="ro1">
          <table:table-cell office:value-type="float" office:value="468.777282714844">
            <text:p>468.7772827148</text:p>
          </table:table-cell>
          <table:table-cell office:value-type="float" office:value="-0.005969993">
            <text:p>-0.005969993</text:p>
          </table:table-cell>
          <table:table-cell table:number-columns-repeated="4"/>
        </table:table-row>
        <table:table-row table:style-name="ro1">
          <table:table-cell office:value-type="float" office:value="468.892395019531">
            <text:p>468.8923950195</text:p>
          </table:table-cell>
          <table:table-cell office:value-type="float" office:value="-0.004891937">
            <text:p>-0.004891937</text:p>
          </table:table-cell>
          <table:table-cell table:number-columns-repeated="4"/>
        </table:table-row>
        <table:table-row table:style-name="ro1">
          <table:table-cell office:value-type="float" office:value="469.007476806641">
            <text:p>469.0074768066</text:p>
          </table:table-cell>
          <table:table-cell office:value-type="float" office:value="0.02464221">
            <text:p>0.02464221</text:p>
          </table:table-cell>
          <table:table-cell table:number-columns-repeated="4"/>
        </table:table-row>
        <table:table-row table:style-name="ro1">
          <table:table-cell office:value-type="float" office:value="469.122589111328">
            <text:p>469.1225891113</text:p>
          </table:table-cell>
          <table:table-cell office:value-type="float" office:value="-0.0004457608">
            <text:p>-0.0004457608</text:p>
          </table:table-cell>
          <table:table-cell table:number-columns-repeated="4"/>
        </table:table-row>
        <table:table-row table:style-name="ro1">
          <table:table-cell office:value-type="float" office:value="469.237701416016">
            <text:p>469.237701416</text:p>
          </table:table-cell>
          <table:table-cell office:value-type="float" office:value="0.003406799">
            <text:p>0.003406799</text:p>
          </table:table-cell>
          <table:table-cell table:number-columns-repeated="4"/>
        </table:table-row>
        <table:table-row table:style-name="ro1">
          <table:table-cell office:value-type="float" office:value="469.352813720703">
            <text:p>469.3528137207</text:p>
          </table:table-cell>
          <table:table-cell office:value-type="float" office:value="0.008984695">
            <text:p>0.008984695</text:p>
          </table:table-cell>
          <table:table-cell table:number-columns-repeated="4"/>
        </table:table-row>
        <table:table-row table:style-name="ro1">
          <table:table-cell office:value-type="float" office:value="469.467926025391">
            <text:p>469.4679260254</text:p>
          </table:table-cell>
          <table:table-cell office:value-type="float" office:value="0.009699973">
            <text:p>0.009699973</text:p>
          </table:table-cell>
          <table:table-cell table:number-columns-repeated="4"/>
        </table:table-row>
        <table:table-row table:style-name="ro1">
          <table:table-cell office:value-type="float" office:value="469.583068847656">
            <text:p>469.5830688477</text:p>
          </table:table-cell>
          <table:table-cell office:value-type="float" office:value="0.008682554">
            <text:p>0.008682554</text:p>
          </table:table-cell>
          <table:table-cell table:number-columns-repeated="4"/>
        </table:table-row>
        <table:table-row table:style-name="ro1">
          <table:table-cell office:value-type="float" office:value="469.698181152344">
            <text:p>469.6981811523</text:p>
          </table:table-cell>
          <table:table-cell office:value-type="float" office:value="0.001369426">
            <text:p>0.001369426</text:p>
          </table:table-cell>
          <table:table-cell table:number-columns-repeated="4"/>
        </table:table-row>
        <table:table-row table:style-name="ro1">
          <table:table-cell office:value-type="float" office:value="469.813323974609">
            <text:p>469.8133239746</text:p>
          </table:table-cell>
          <table:table-cell office:value-type="float" office:value="-0.004942725">
            <text:p>-0.004942725</text:p>
          </table:table-cell>
          <table:table-cell table:number-columns-repeated="4"/>
        </table:table-row>
        <table:table-row table:style-name="ro1">
          <table:table-cell office:value-type="float" office:value="469.928436279297">
            <text:p>469.9284362793</text:p>
          </table:table-cell>
          <table:table-cell office:value-type="float" office:value="-0.002238138">
            <text:p>-0.002238138</text:p>
          </table:table-cell>
          <table:table-cell table:number-columns-repeated="4"/>
        </table:table-row>
        <table:table-row table:style-name="ro1">
          <table:table-cell office:value-type="float" office:value="470.043579101563">
            <text:p>470.0435791016</text:p>
          </table:table-cell>
          <table:table-cell office:value-type="float" office:value="0.006356299">
            <text:p>0.006356299</text:p>
          </table:table-cell>
          <table:table-cell table:number-columns-repeated="4"/>
        </table:table-row>
        <table:table-row table:style-name="ro1">
          <table:table-cell office:value-type="float" office:value="470.158721923828">
            <text:p>470.1587219238</text:p>
          </table:table-cell>
          <table:table-cell office:value-type="float" office:value="-0.008783763">
            <text:p>-0.008783763</text:p>
          </table:table-cell>
          <table:table-cell table:number-columns-repeated="4"/>
        </table:table-row>
        <table:table-row table:style-name="ro1">
          <table:table-cell office:value-type="float" office:value="470.273895263672">
            <text:p>470.2738952637</text:p>
          </table:table-cell>
          <table:table-cell office:value-type="float" office:value="0.005342128">
            <text:p>0.005342128</text:p>
          </table:table-cell>
          <table:table-cell table:number-columns-repeated="4"/>
        </table:table-row>
        <table:table-row table:style-name="ro1">
          <table:table-cell office:value-type="float" office:value="470.389038085938">
            <text:p>470.3890380859</text:p>
          </table:table-cell>
          <table:table-cell office:value-type="float" office:value="0.005438311">
            <text:p>0.005438311</text:p>
          </table:table-cell>
          <table:table-cell table:number-columns-repeated="4"/>
        </table:table-row>
        <table:table-row table:style-name="ro1">
          <table:table-cell office:value-type="float" office:value="470.504180908203">
            <text:p>470.5041809082</text:p>
          </table:table-cell>
          <table:table-cell office:value-type="float" office:value="0.0005234964">
            <text:p>0.0005234964</text:p>
          </table:table-cell>
          <table:table-cell table:number-columns-repeated="4"/>
        </table:table-row>
        <table:table-row table:style-name="ro1">
          <table:table-cell office:value-type="float" office:value="470.619354248047">
            <text:p>470.619354248</text:p>
          </table:table-cell>
          <table:table-cell office:value-type="float" office:value="-0.00790261">
            <text:p>-0.00790261</text:p>
          </table:table-cell>
          <table:table-cell table:number-columns-repeated="4"/>
        </table:table-row>
        <table:table-row table:style-name="ro1">
          <table:table-cell office:value-type="float" office:value="470.734527587891">
            <text:p>470.7345275879</text:p>
          </table:table-cell>
          <table:table-cell office:value-type="float" office:value="0.01004071">
            <text:p>0.01004071</text:p>
          </table:table-cell>
          <table:table-cell table:number-columns-repeated="4"/>
        </table:table-row>
        <table:table-row table:style-name="ro1">
          <table:table-cell office:value-type="float" office:value="470.849700927734">
            <text:p>470.8497009277</text:p>
          </table:table-cell>
          <table:table-cell office:value-type="float" office:value="0.0427942">
            <text:p>0.0427942</text:p>
          </table:table-cell>
          <table:table-cell table:number-columns-repeated="4"/>
        </table:table-row>
        <table:table-row table:style-name="ro1">
          <table:table-cell office:value-type="float" office:value="470.964874267578">
            <text:p>470.9648742676</text:p>
          </table:table-cell>
          <table:table-cell office:value-type="float" office:value="0.00300803">
            <text:p>0.00300803</text:p>
          </table:table-cell>
          <table:table-cell table:number-columns-repeated="4"/>
        </table:table-row>
        <table:table-row table:style-name="ro1">
          <table:table-cell office:value-type="float" office:value="471.080047607422">
            <text:p>471.0800476074</text:p>
          </table:table-cell>
          <table:table-cell office:value-type="float" office:value="0.01606178">
            <text:p>0.01606178</text:p>
          </table:table-cell>
          <table:table-cell table:number-columns-repeated="4"/>
        </table:table-row>
        <table:table-row table:style-name="ro1">
          <table:table-cell office:value-type="float" office:value="471.195220947266">
            <text:p>471.1952209473</text:p>
          </table:table-cell>
          <table:table-cell office:value-type="float" office:value="-0.01078196">
            <text:p>-0.01078196</text:p>
          </table:table-cell>
          <table:table-cell table:number-columns-repeated="4"/>
        </table:table-row>
        <table:table-row table:style-name="ro1">
          <table:table-cell office:value-type="float" office:value="471.310424804688">
            <text:p>471.3104248047</text:p>
          </table:table-cell>
          <table:table-cell office:value-type="float" office:value="0.007066184">
            <text:p>0.007066184</text:p>
          </table:table-cell>
          <table:table-cell table:number-columns-repeated="4"/>
        </table:table-row>
        <table:table-row table:style-name="ro1">
          <table:table-cell office:value-type="float" office:value="471.425628662109">
            <text:p>471.4256286621</text:p>
          </table:table-cell>
          <table:table-cell office:value-type="float" office:value="0.004595014">
            <text:p>0.004595014</text:p>
          </table:table-cell>
          <table:table-cell table:number-columns-repeated="4"/>
        </table:table-row>
        <table:table-row table:style-name="ro1">
          <table:table-cell office:value-type="float" office:value="471.540802001953">
            <text:p>471.540802002</text:p>
          </table:table-cell>
          <table:table-cell office:value-type="float" office:value="0.01484101">
            <text:p>0.01484101</text:p>
          </table:table-cell>
          <table:table-cell table:number-columns-repeated="4"/>
        </table:table-row>
        <table:table-row table:style-name="ro1">
          <table:table-cell office:value-type="float" office:value="471.656005859375">
            <text:p>471.6560058594</text:p>
          </table:table-cell>
          <table:table-cell office:value-type="float" office:value="-0.001151976">
            <text:p>-0.001151976</text:p>
          </table:table-cell>
          <table:table-cell table:number-columns-repeated="4"/>
        </table:table-row>
        <table:table-row table:style-name="ro1">
          <table:table-cell office:value-type="float" office:value="471.771209716797">
            <text:p>471.7712097168</text:p>
          </table:table-cell>
          <table:table-cell office:value-type="float" office:value="0.02008437">
            <text:p>0.02008437</text:p>
          </table:table-cell>
          <table:table-cell table:number-columns-repeated="4"/>
        </table:table-row>
        <table:table-row table:style-name="ro1">
          <table:table-cell office:value-type="float" office:value="471.886444091797">
            <text:p>471.8864440918</text:p>
          </table:table-cell>
          <table:table-cell office:value-type="float" office:value="0.01408099">
            <text:p>0.01408099</text:p>
          </table:table-cell>
          <table:table-cell table:number-columns-repeated="4"/>
        </table:table-row>
        <table:table-row table:style-name="ro1">
          <table:table-cell office:value-type="float" office:value="472.001647949219">
            <text:p>472.0016479492</text:p>
          </table:table-cell>
          <table:table-cell office:value-type="float" office:value="0.006723296">
            <text:p>0.006723296</text:p>
          </table:table-cell>
          <table:table-cell table:number-columns-repeated="4"/>
        </table:table-row>
        <table:table-row table:style-name="ro1">
          <table:table-cell office:value-type="float" office:value="472.116882324219">
            <text:p>472.1168823242</text:p>
          </table:table-cell>
          <table:table-cell office:value-type="float" office:value="-0.007217721">
            <text:p>-0.007217721</text:p>
          </table:table-cell>
          <table:table-cell table:number-columns-repeated="4"/>
        </table:table-row>
        <table:table-row table:style-name="ro1">
          <table:table-cell office:value-type="float" office:value="472.232086181641">
            <text:p>472.2320861816</text:p>
          </table:table-cell>
          <table:table-cell office:value-type="float" office:value="0.004572492">
            <text:p>0.004572492</text:p>
          </table:table-cell>
          <table:table-cell table:number-columns-repeated="4"/>
        </table:table-row>
        <table:table-row table:style-name="ro1">
          <table:table-cell office:value-type="float" office:value="472.347320556641">
            <text:p>472.3473205566</text:p>
          </table:table-cell>
          <table:table-cell office:value-type="float" office:value="0.003195384">
            <text:p>0.003195384</text:p>
          </table:table-cell>
          <table:table-cell table:number-columns-repeated="4"/>
        </table:table-row>
        <table:table-row table:style-name="ro1">
          <table:table-cell office:value-type="float" office:value="472.462554931641">
            <text:p>472.4625549316</text:p>
          </table:table-cell>
          <table:table-cell office:value-type="float" office:value="-0.01184135">
            <text:p>-0.01184135</text:p>
          </table:table-cell>
          <table:table-cell table:number-columns-repeated="4"/>
        </table:table-row>
        <table:table-row table:style-name="ro1">
          <table:table-cell office:value-type="float" office:value="472.577789306641">
            <text:p>472.5777893066</text:p>
          </table:table-cell>
          <table:table-cell office:value-type="float" office:value="-0.007459588">
            <text:p>-0.007459588</text:p>
          </table:table-cell>
          <table:table-cell table:number-columns-repeated="4"/>
        </table:table-row>
        <table:table-row table:style-name="ro1">
          <table:table-cell office:value-type="float" office:value="472.693023681641">
            <text:p>472.6930236816</text:p>
          </table:table-cell>
          <table:table-cell office:value-type="float" office:value="0.009678028">
            <text:p>0.009678028</text:p>
          </table:table-cell>
          <table:table-cell table:number-columns-repeated="4"/>
        </table:table-row>
        <table:table-row table:style-name="ro1">
          <table:table-cell office:value-type="float" office:value="472.808288574219">
            <text:p>472.8082885742</text:p>
          </table:table-cell>
          <table:table-cell office:value-type="float" office:value="0.0001240718">
            <text:p>0.0001240718</text:p>
          </table:table-cell>
          <table:table-cell table:number-columns-repeated="4"/>
        </table:table-row>
        <table:table-row table:style-name="ro1">
          <table:table-cell office:value-type="float" office:value="472.923522949219">
            <text:p>472.9235229492</text:p>
          </table:table-cell>
          <table:table-cell office:value-type="float" office:value="-0.005859813">
            <text:p>-0.005859813</text:p>
          </table:table-cell>
          <table:table-cell table:number-columns-repeated="4"/>
        </table:table-row>
        <table:table-row table:style-name="ro1">
          <table:table-cell office:value-type="float" office:value="473.038787841797">
            <text:p>473.0387878418</text:p>
          </table:table-cell>
          <table:table-cell office:value-type="float" office:value="-0.01013366">
            <text:p>-0.01013366</text:p>
          </table:table-cell>
          <table:table-cell table:number-columns-repeated="4"/>
        </table:table-row>
        <table:table-row table:style-name="ro1">
          <table:table-cell office:value-type="float" office:value="473.154052734375">
            <text:p>473.1540527344</text:p>
          </table:table-cell>
          <table:table-cell office:value-type="float" office:value="0.01307692">
            <text:p>0.01307692</text:p>
          </table:table-cell>
          <table:table-cell table:number-columns-repeated="4"/>
        </table:table-row>
        <table:table-row table:style-name="ro1">
          <table:table-cell office:value-type="float" office:value="473.269317626953">
            <text:p>473.269317627</text:p>
          </table:table-cell>
          <table:table-cell office:value-type="float" office:value="0.007044319">
            <text:p>0.007044319</text:p>
          </table:table-cell>
          <table:table-cell table:number-columns-repeated="4"/>
        </table:table-row>
        <table:table-row table:style-name="ro1">
          <table:table-cell office:value-type="float" office:value="473.384582519531">
            <text:p>473.3845825195</text:p>
          </table:table-cell>
          <table:table-cell office:value-type="float" office:value="-0.004364053">
            <text:p>-0.004364053</text:p>
          </table:table-cell>
          <table:table-cell table:number-columns-repeated="4"/>
        </table:table-row>
        <table:table-row table:style-name="ro1">
          <table:table-cell office:value-type="float" office:value="473.499847412109">
            <text:p>473.4998474121</text:p>
          </table:table-cell>
          <table:table-cell office:value-type="float" office:value="-0.001709441">
            <text:p>-0.001709441</text:p>
          </table:table-cell>
          <table:table-cell table:number-columns-repeated="4"/>
        </table:table-row>
        <table:table-row table:style-name="ro1">
          <table:table-cell office:value-type="float" office:value="473.615112304688">
            <text:p>473.6151123047</text:p>
          </table:table-cell>
          <table:table-cell office:value-type="float" office:value="0.01603611">
            <text:p>0.01603611</text:p>
          </table:table-cell>
          <table:table-cell table:number-columns-repeated="4"/>
        </table:table-row>
        <table:table-row table:style-name="ro1">
          <table:table-cell office:value-type="float" office:value="473.730407714844">
            <text:p>473.7304077148</text:p>
          </table:table-cell>
          <table:table-cell office:value-type="float" office:value="0.02569584">
            <text:p>0.02569584</text:p>
          </table:table-cell>
          <table:table-cell table:number-columns-repeated="4"/>
        </table:table-row>
        <table:table-row table:style-name="ro1">
          <table:table-cell office:value-type="float" office:value="473.845703125">
            <text:p>473.845703125</text:p>
          </table:table-cell>
          <table:table-cell office:value-type="float" office:value="-0.003306011">
            <text:p>-0.003306011</text:p>
          </table:table-cell>
          <table:table-cell table:number-columns-repeated="4"/>
        </table:table-row>
        <table:table-row table:style-name="ro1">
          <table:table-cell office:value-type="float" office:value="473.960998535156">
            <text:p>473.9609985352</text:p>
          </table:table-cell>
          <table:table-cell office:value-type="float" office:value="0.003446222">
            <text:p>0.003446222</text:p>
          </table:table-cell>
          <table:table-cell table:number-columns-repeated="4"/>
        </table:table-row>
        <table:table-row table:style-name="ro1">
          <table:table-cell office:value-type="float" office:value="474.076263427734">
            <text:p>474.0762634277</text:p>
          </table:table-cell>
          <table:table-cell office:value-type="float" office:value="0.004161055">
            <text:p>0.004161055</text:p>
          </table:table-cell>
          <table:table-cell table:number-columns-repeated="4"/>
        </table:table-row>
        <table:table-row table:style-name="ro1">
          <table:table-cell office:value-type="float" office:value="474.191589355469">
            <text:p>474.1915893555</text:p>
          </table:table-cell>
          <table:table-cell office:value-type="float" office:value="0.01859775">
            <text:p>0.01859775</text:p>
          </table:table-cell>
          <table:table-cell table:number-columns-repeated="4"/>
        </table:table-row>
        <table:table-row table:style-name="ro1">
          <table:table-cell office:value-type="float" office:value="474.306884765625">
            <text:p>474.3068847656</text:p>
          </table:table-cell>
          <table:table-cell office:value-type="float" office:value="0.02102472">
            <text:p>0.02102472</text:p>
          </table:table-cell>
          <table:table-cell table:number-columns-repeated="4"/>
        </table:table-row>
        <table:table-row table:style-name="ro1">
          <table:table-cell office:value-type="float" office:value="474.422180175781">
            <text:p>474.4221801758</text:p>
          </table:table-cell>
          <table:table-cell office:value-type="float" office:value="-0.01077326">
            <text:p>-0.01077326</text:p>
          </table:table-cell>
          <table:table-cell table:number-columns-repeated="4"/>
        </table:table-row>
        <table:table-row table:style-name="ro1">
          <table:table-cell office:value-type="float" office:value="474.537506103516">
            <text:p>474.5375061035</text:p>
          </table:table-cell>
          <table:table-cell office:value-type="float" office:value="0.006697961">
            <text:p>0.006697961</text:p>
          </table:table-cell>
          <table:table-cell table:number-columns-repeated="4"/>
        </table:table-row>
        <table:table-row table:style-name="ro1">
          <table:table-cell office:value-type="float" office:value="474.652801513672">
            <text:p>474.6528015137</text:p>
          </table:table-cell>
          <table:table-cell office:value-type="float" office:value="-0.002235432">
            <text:p>-0.002235432</text:p>
          </table:table-cell>
          <table:table-cell table:number-columns-repeated="4"/>
        </table:table-row>
        <table:table-row table:style-name="ro1">
          <table:table-cell office:value-type="float" office:value="474.768127441406">
            <text:p>474.7681274414</text:p>
          </table:table-cell>
          <table:table-cell office:value-type="float" office:value="-0.006639796">
            <text:p>-0.006639796</text:p>
          </table:table-cell>
          <table:table-cell table:number-columns-repeated="4"/>
        </table:table-row>
        <table:table-row table:style-name="ro1">
          <table:table-cell office:value-type="float" office:value="474.883453369141">
            <text:p>474.8834533691</text:p>
          </table:table-cell>
          <table:table-cell office:value-type="float" office:value="-0.005512626">
            <text:p>-0.005512626</text:p>
          </table:table-cell>
          <table:table-cell table:number-columns-repeated="4"/>
        </table:table-row>
        <table:table-row table:style-name="ro1">
          <table:table-cell office:value-type="float" office:value="474.998779296875">
            <text:p>474.9987792969</text:p>
          </table:table-cell>
          <table:table-cell office:value-type="float" office:value="0.006177728">
            <text:p>0.006177728</text:p>
          </table:table-cell>
          <table:table-cell table:number-columns-repeated="4"/>
        </table:table-row>
        <table:table-row table:style-name="ro1">
          <table:table-cell office:value-type="float" office:value="475.114135742188">
            <text:p>475.1141357422</text:p>
          </table:table-cell>
          <table:table-cell office:value-type="float" office:value="-0.004492533">
            <text:p>-0.004492533</text:p>
          </table:table-cell>
          <table:table-cell table:number-columns-repeated="4"/>
        </table:table-row>
        <table:table-row table:style-name="ro1">
          <table:table-cell office:value-type="float" office:value="475.229461669922">
            <text:p>475.2294616699</text:p>
          </table:table-cell>
          <table:table-cell office:value-type="float" office:value="-0.004160149">
            <text:p>-0.004160149</text:p>
          </table:table-cell>
          <table:table-cell table:number-columns-repeated="4"/>
        </table:table-row>
        <table:table-row table:style-name="ro1">
          <table:table-cell office:value-type="float" office:value="475.344818115234">
            <text:p>475.3448181152</text:p>
          </table:table-cell>
          <table:table-cell office:value-type="float" office:value="0.003777964">
            <text:p>0.003777964</text:p>
          </table:table-cell>
          <table:table-cell table:number-columns-repeated="4"/>
        </table:table-row>
        <table:table-row table:style-name="ro1">
          <table:table-cell office:value-type="float" office:value="475.460144042969">
            <text:p>475.460144043</text:p>
          </table:table-cell>
          <table:table-cell office:value-type="float" office:value="0.009540359">
            <text:p>0.009540359</text:p>
          </table:table-cell>
          <table:table-cell table:number-columns-repeated="4"/>
        </table:table-row>
        <table:table-row table:style-name="ro1">
          <table:table-cell office:value-type="float" office:value="475.575500488281">
            <text:p>475.5755004883</text:p>
          </table:table-cell>
          <table:table-cell office:value-type="float" office:value="0.002896921">
            <text:p>0.002896921</text:p>
          </table:table-cell>
          <table:table-cell table:number-columns-repeated="4"/>
        </table:table-row>
        <table:table-row table:style-name="ro1">
          <table:table-cell office:value-type="float" office:value="475.690856933594">
            <text:p>475.6908569336</text:p>
          </table:table-cell>
          <table:table-cell office:value-type="float" office:value="-0.008978697">
            <text:p>-0.008978697</text:p>
          </table:table-cell>
          <table:table-cell table:number-columns-repeated="4"/>
        </table:table-row>
        <table:table-row table:style-name="ro1">
          <table:table-cell office:value-type="float" office:value="475.806213378906">
            <text:p>475.8062133789</text:p>
          </table:table-cell>
          <table:table-cell office:value-type="float" office:value="-0.009795719">
            <text:p>-0.009795719</text:p>
          </table:table-cell>
          <table:table-cell table:number-columns-repeated="4"/>
        </table:table-row>
        <table:table-row table:style-name="ro1">
          <table:table-cell office:value-type="float" office:value="475.921569824219">
            <text:p>475.9215698242</text:p>
          </table:table-cell>
          <table:table-cell office:value-type="float" office:value="0.002674506">
            <text:p>0.002674506</text:p>
          </table:table-cell>
          <table:table-cell table:number-columns-repeated="4"/>
        </table:table-row>
        <table:table-row table:style-name="ro1">
          <table:table-cell office:value-type="float" office:value="476.036956787109">
            <text:p>476.0369567871</text:p>
          </table:table-cell>
          <table:table-cell office:value-type="float" office:value="0.008269383">
            <text:p>0.008269383</text:p>
          </table:table-cell>
          <table:table-cell table:number-columns-repeated="4"/>
        </table:table-row>
        <table:table-row table:style-name="ro1">
          <table:table-cell office:value-type="float" office:value="476.152313232422">
            <text:p>476.1523132324</text:p>
          </table:table-cell>
          <table:table-cell office:value-type="float" office:value="0.007443026">
            <text:p>0.007443026</text:p>
          </table:table-cell>
          <table:table-cell table:number-columns-repeated="4"/>
        </table:table-row>
        <table:table-row table:style-name="ro1">
          <table:table-cell office:value-type="float" office:value="476.267700195313">
            <text:p>476.2677001953</text:p>
          </table:table-cell>
          <table:table-cell office:value-type="float" office:value="-0.01028804">
            <text:p>-0.01028804</text:p>
          </table:table-cell>
          <table:table-cell table:number-columns-repeated="4"/>
        </table:table-row>
        <table:table-row table:style-name="ro1">
          <table:table-cell office:value-type="float" office:value="476.383087158203">
            <text:p>476.3830871582</text:p>
          </table:table-cell>
          <table:table-cell office:value-type="float" office:value="0.01539505">
            <text:p>0.01539505</text:p>
          </table:table-cell>
          <table:table-cell table:number-columns-repeated="4"/>
        </table:table-row>
        <table:table-row table:style-name="ro1">
          <table:table-cell office:value-type="float" office:value="476.498474121094">
            <text:p>476.4984741211</text:p>
          </table:table-cell>
          <table:table-cell office:value-type="float" office:value="0.002868271">
            <text:p>0.002868271</text:p>
          </table:table-cell>
          <table:table-cell table:number-columns-repeated="4"/>
        </table:table-row>
        <table:table-row table:style-name="ro1">
          <table:table-cell office:value-type="float" office:value="476.613861083984">
            <text:p>476.613861084</text:p>
          </table:table-cell>
          <table:table-cell office:value-type="float" office:value="-0.006433609">
            <text:p>-0.006433609</text:p>
          </table:table-cell>
          <table:table-cell table:number-columns-repeated="4"/>
        </table:table-row>
        <table:table-row table:style-name="ro1">
          <table:table-cell office:value-type="float" office:value="476.729248046875">
            <text:p>476.7292480469</text:p>
          </table:table-cell>
          <table:table-cell office:value-type="float" office:value="-0.003478035">
            <text:p>-0.003478035</text:p>
          </table:table-cell>
          <table:table-cell table:number-columns-repeated="4"/>
        </table:table-row>
        <table:table-row table:style-name="ro1">
          <table:table-cell office:value-type="float" office:value="476.844665527344">
            <text:p>476.8446655273</text:p>
          </table:table-cell>
          <table:table-cell office:value-type="float" office:value="0.01668971">
            <text:p>0.01668971</text:p>
          </table:table-cell>
          <table:table-cell table:number-columns-repeated="4"/>
        </table:table-row>
        <table:table-row table:style-name="ro1">
          <table:table-cell office:value-type="float" office:value="476.960052490234">
            <text:p>476.9600524902</text:p>
          </table:table-cell>
          <table:table-cell office:value-type="float" office:value="0.004357688">
            <text:p>0.004357688</text:p>
          </table:table-cell>
          <table:table-cell table:number-columns-repeated="4"/>
        </table:table-row>
        <table:table-row table:style-name="ro1">
          <table:table-cell office:value-type="float" office:value="477.075469970703">
            <text:p>477.0754699707</text:p>
          </table:table-cell>
          <table:table-cell office:value-type="float" office:value="-0.01129392">
            <text:p>-0.01129392</text:p>
          </table:table-cell>
          <table:table-cell table:number-columns-repeated="4"/>
        </table:table-row>
        <table:table-row table:style-name="ro1">
          <table:table-cell office:value-type="float" office:value="477.190887451172">
            <text:p>477.1908874512</text:p>
          </table:table-cell>
          <table:table-cell office:value-type="float" office:value="-0.006039348">
            <text:p>-0.006039348</text:p>
          </table:table-cell>
          <table:table-cell table:number-columns-repeated="4"/>
        </table:table-row>
        <table:table-row table:style-name="ro1">
          <table:table-cell office:value-type="float" office:value="477.306304931641">
            <text:p>477.3063049316</text:p>
          </table:table-cell>
          <table:table-cell office:value-type="float" office:value="0.01611665">
            <text:p>0.01611665</text:p>
          </table:table-cell>
          <table:table-cell table:number-columns-repeated="4"/>
        </table:table-row>
        <table:table-row table:style-name="ro1">
          <table:table-cell office:value-type="float" office:value="477.421722412109">
            <text:p>477.4217224121</text:p>
          </table:table-cell>
          <table:table-cell office:value-type="float" office:value="-0.005820434">
            <text:p>-0.005820434</text:p>
          </table:table-cell>
          <table:table-cell table:number-columns-repeated="4"/>
        </table:table-row>
        <table:table-row table:style-name="ro1">
          <table:table-cell office:value-type="float" office:value="477.537139892578">
            <text:p>477.5371398926</text:p>
          </table:table-cell>
          <table:table-cell office:value-type="float" office:value="-0.003225149">
            <text:p>-0.003225149</text:p>
          </table:table-cell>
          <table:table-cell table:number-columns-repeated="4"/>
        </table:table-row>
        <table:table-row table:style-name="ro1">
          <table:table-cell office:value-type="float" office:value="477.652557373047">
            <text:p>477.652557373</text:p>
          </table:table-cell>
          <table:table-cell office:value-type="float" office:value="-0.01084199">
            <text:p>-0.01084199</text:p>
          </table:table-cell>
          <table:table-cell table:number-columns-repeated="4"/>
        </table:table-row>
        <table:table-row table:style-name="ro1">
          <table:table-cell office:value-type="float" office:value="477.768005371094">
            <text:p>477.7680053711</text:p>
          </table:table-cell>
          <table:table-cell office:value-type="float" office:value="-0.004191983">
            <text:p>-0.004191983</text:p>
          </table:table-cell>
          <table:table-cell table:number-columns-repeated="4"/>
        </table:table-row>
        <table:table-row table:style-name="ro1">
          <table:table-cell office:value-type="float" office:value="477.883422851563">
            <text:p>477.8834228516</text:p>
          </table:table-cell>
          <table:table-cell office:value-type="float" office:value="0.01225443">
            <text:p>0.01225443</text:p>
          </table:table-cell>
          <table:table-cell table:number-columns-repeated="4"/>
        </table:table-row>
        <table:table-row table:style-name="ro1">
          <table:table-cell office:value-type="float" office:value="477.998870849609">
            <text:p>477.9988708496</text:p>
          </table:table-cell>
          <table:table-cell office:value-type="float" office:value="-0.01166349">
            <text:p>-0.01166349</text:p>
          </table:table-cell>
          <table:table-cell table:number-columns-repeated="4"/>
        </table:table-row>
        <table:table-row table:style-name="ro1">
          <table:table-cell office:value-type="float" office:value="478.114318847656">
            <text:p>478.1143188477</text:p>
          </table:table-cell>
          <table:table-cell office:value-type="float" office:value="-0.00371389">
            <text:p>-0.00371389</text:p>
          </table:table-cell>
          <table:table-cell table:number-columns-repeated="4"/>
        </table:table-row>
        <table:table-row table:style-name="ro1">
          <table:table-cell office:value-type="float" office:value="478.229766845703">
            <text:p>478.2297668457</text:p>
          </table:table-cell>
          <table:table-cell office:value-type="float" office:value="0.004823563">
            <text:p>0.004823563</text:p>
          </table:table-cell>
          <table:table-cell table:number-columns-repeated="4"/>
        </table:table-row>
        <table:table-row table:style-name="ro1">
          <table:table-cell office:value-type="float" office:value="478.345245361328">
            <text:p>478.3452453613</text:p>
          </table:table-cell>
          <table:table-cell office:value-type="float" office:value="0.002256618">
            <text:p>0.002256618</text:p>
          </table:table-cell>
          <table:table-cell table:number-columns-repeated="4"/>
        </table:table-row>
        <table:table-row table:style-name="ro1">
          <table:table-cell office:value-type="float" office:value="478.460693359375">
            <text:p>478.4606933594</text:p>
          </table:table-cell>
          <table:table-cell office:value-type="float" office:value="-0.009525991">
            <text:p>-0.009525991</text:p>
          </table:table-cell>
          <table:table-cell table:number-columns-repeated="4"/>
        </table:table-row>
        <table:table-row table:style-name="ro1">
          <table:table-cell office:value-type="float" office:value="478.576141357422">
            <text:p>478.5761413574</text:p>
          </table:table-cell>
          <table:table-cell office:value-type="float" office:value="-0.003224859">
            <text:p>-0.003224859</text:p>
          </table:table-cell>
          <table:table-cell table:number-columns-repeated="4"/>
        </table:table-row>
        <table:table-row table:style-name="ro1">
          <table:table-cell office:value-type="float" office:value="478.691619873047">
            <text:p>478.691619873</text:p>
          </table:table-cell>
          <table:table-cell office:value-type="float" office:value="0.0136897">
            <text:p>0.0136897</text:p>
          </table:table-cell>
          <table:table-cell table:number-columns-repeated="4"/>
        </table:table-row>
        <table:table-row table:style-name="ro1">
          <table:table-cell office:value-type="float" office:value="478.807098388672">
            <text:p>478.8070983887</text:p>
          </table:table-cell>
          <table:table-cell office:value-type="float" office:value="-0.000184297">
            <text:p>-0.000184297</text:p>
          </table:table-cell>
          <table:table-cell table:number-columns-repeated="4"/>
        </table:table-row>
        <table:table-row table:style-name="ro1">
          <table:table-cell office:value-type="float" office:value="478.922576904297">
            <text:p>478.9225769043</text:p>
          </table:table-cell>
          <table:table-cell office:value-type="float" office:value="-0.001413099">
            <text:p>-0.001413099</text:p>
          </table:table-cell>
          <table:table-cell table:number-columns-repeated="4"/>
        </table:table-row>
        <table:table-row table:style-name="ro1">
          <table:table-cell office:value-type="float" office:value="479.038055419922">
            <text:p>479.0380554199</text:p>
          </table:table-cell>
          <table:table-cell office:value-type="float" office:value="-0.00966743">
            <text:p>-0.00966743</text:p>
          </table:table-cell>
          <table:table-cell table:number-columns-repeated="4"/>
        </table:table-row>
        <table:table-row table:style-name="ro1">
          <table:table-cell office:value-type="float" office:value="479.153533935547">
            <text:p>479.1535339355</text:p>
          </table:table-cell>
          <table:table-cell office:value-type="float" office:value="0.001185875">
            <text:p>0.001185875</text:p>
          </table:table-cell>
          <table:table-cell table:number-columns-repeated="4"/>
        </table:table-row>
        <table:table-row table:style-name="ro1">
          <table:table-cell office:value-type="float" office:value="479.269012451172">
            <text:p>479.2690124512</text:p>
          </table:table-cell>
          <table:table-cell office:value-type="float" office:value="0.02182624">
            <text:p>0.02182624</text:p>
          </table:table-cell>
          <table:table-cell table:number-columns-repeated="4"/>
        </table:table-row>
        <table:table-row table:style-name="ro1">
          <table:table-cell office:value-type="float" office:value="479.384521484375">
            <text:p>479.3845214844</text:p>
          </table:table-cell>
          <table:table-cell office:value-type="float" office:value="-0.006689325">
            <text:p>-0.006689325</text:p>
          </table:table-cell>
          <table:table-cell table:number-columns-repeated="4"/>
        </table:table-row>
        <table:table-row table:style-name="ro1">
          <table:table-cell office:value-type="float" office:value="479.500030517578">
            <text:p>479.5000305176</text:p>
          </table:table-cell>
          <table:table-cell office:value-type="float" office:value="-0.004376873">
            <text:p>-0.004376873</text:p>
          </table:table-cell>
          <table:table-cell table:number-columns-repeated="4"/>
        </table:table-row>
        <table:table-row table:style-name="ro1">
          <table:table-cell office:value-type="float" office:value="479.615509033203">
            <text:p>479.6155090332</text:p>
          </table:table-cell>
          <table:table-cell office:value-type="float" office:value="0.004433982">
            <text:p>0.004433982</text:p>
          </table:table-cell>
          <table:table-cell table:number-columns-repeated="4"/>
        </table:table-row>
        <table:table-row table:style-name="ro1">
          <table:table-cell office:value-type="float" office:value="479.731018066406">
            <text:p>479.7310180664</text:p>
          </table:table-cell>
          <table:table-cell office:value-type="float" office:value="0.003881275">
            <text:p>0.003881275</text:p>
          </table:table-cell>
          <table:table-cell table:number-columns-repeated="4"/>
        </table:table-row>
        <table:table-row table:style-name="ro1">
          <table:table-cell office:value-type="float" office:value="479.846527099609">
            <text:p>479.8465270996</text:p>
          </table:table-cell>
          <table:table-cell office:value-type="float" office:value="-0.003510263">
            <text:p>-0.003510263</text:p>
          </table:table-cell>
          <table:table-cell table:number-columns-repeated="4"/>
        </table:table-row>
        <table:table-row table:style-name="ro1">
          <table:table-cell office:value-type="float" office:value="479.962066650391">
            <text:p>479.9620666504</text:p>
          </table:table-cell>
          <table:table-cell office:value-type="float" office:value="-0.002624722">
            <text:p>-0.002624722</text:p>
          </table:table-cell>
          <table:table-cell table:number-columns-repeated="4"/>
        </table:table-row>
        <table:table-row table:style-name="ro1">
          <table:table-cell office:value-type="float" office:value="480.077575683594">
            <text:p>480.0775756836</text:p>
          </table:table-cell>
          <table:table-cell office:value-type="float" office:value="0.005071139">
            <text:p>0.005071139</text:p>
          </table:table-cell>
          <table:table-cell table:number-columns-repeated="4"/>
        </table:table-row>
        <table:table-row table:style-name="ro1">
          <table:table-cell office:value-type="float" office:value="480.193084716797">
            <text:p>480.1930847168</text:p>
          </table:table-cell>
          <table:table-cell office:value-type="float" office:value="0.01522432">
            <text:p>0.01522432</text:p>
          </table:table-cell>
          <table:table-cell table:number-columns-repeated="4"/>
        </table:table-row>
        <table:table-row table:style-name="ro1">
          <table:table-cell office:value-type="float" office:value="480.308624267578">
            <text:p>480.3086242676</text:p>
          </table:table-cell>
          <table:table-cell office:value-type="float" office:value="-0.003438555">
            <text:p>-0.003438555</text:p>
          </table:table-cell>
          <table:table-cell table:number-columns-repeated="4"/>
        </table:table-row>
        <table:table-row table:style-name="ro1">
          <table:table-cell office:value-type="float" office:value="480.424163818359">
            <text:p>480.4241638184</text:p>
          </table:table-cell>
          <table:table-cell office:value-type="float" office:value="-0.002172094">
            <text:p>-0.002172094</text:p>
          </table:table-cell>
          <table:table-cell table:number-columns-repeated="4"/>
        </table:table-row>
        <table:table-row table:style-name="ro1">
          <table:table-cell office:value-type="float" office:value="480.539703369141">
            <text:p>480.5397033691</text:p>
          </table:table-cell>
          <table:table-cell office:value-type="float" office:value="0.00913092">
            <text:p>0.00913092</text:p>
          </table:table-cell>
          <table:table-cell table:number-columns-repeated="4"/>
        </table:table-row>
        <table:table-row table:style-name="ro1">
          <table:table-cell office:value-type="float" office:value="480.655242919922">
            <text:p>480.6552429199</text:p>
          </table:table-cell>
          <table:table-cell office:value-type="float" office:value="-0.0009895657">
            <text:p>-0.0009895657</text:p>
          </table:table-cell>
          <table:table-cell table:number-columns-repeated="4"/>
        </table:table-row>
        <table:table-row table:style-name="ro1">
          <table:table-cell office:value-type="float" office:value="480.770782470703">
            <text:p>480.7707824707</text:p>
          </table:table-cell>
          <table:table-cell office:value-type="float" office:value="-0.006949401">
            <text:p>-0.006949401</text:p>
          </table:table-cell>
          <table:table-cell table:number-columns-repeated="4"/>
        </table:table-row>
        <table:table-row table:style-name="ro1">
          <table:table-cell office:value-type="float" office:value="480.886322021484">
            <text:p>480.8863220215</text:p>
          </table:table-cell>
          <table:table-cell office:value-type="float" office:value="-0.002623068">
            <text:p>-0.002623068</text:p>
          </table:table-cell>
          <table:table-cell table:number-columns-repeated="4"/>
        </table:table-row>
        <table:table-row table:style-name="ro1">
          <table:table-cell office:value-type="float" office:value="481.001892089844">
            <text:p>481.0018920898</text:p>
          </table:table-cell>
          <table:table-cell office:value-type="float" office:value="0.005448881">
            <text:p>0.005448881</text:p>
          </table:table-cell>
          <table:table-cell table:number-columns-repeated="4"/>
        </table:table-row>
        <table:table-row table:style-name="ro1">
          <table:table-cell office:value-type="float" office:value="481.117431640625">
            <text:p>481.1174316406</text:p>
          </table:table-cell>
          <table:table-cell office:value-type="float" office:value="0.006688274">
            <text:p>0.006688274</text:p>
          </table:table-cell>
          <table:table-cell table:number-columns-repeated="4"/>
        </table:table-row>
        <table:table-row table:style-name="ro1">
          <table:table-cell office:value-type="float" office:value="481.233001708984">
            <text:p>481.233001709</text:p>
          </table:table-cell>
          <table:table-cell office:value-type="float" office:value="0.006577223">
            <text:p>0.006577223</text:p>
          </table:table-cell>
          <table:table-cell table:number-columns-repeated="4"/>
        </table:table-row>
        <table:table-row table:style-name="ro1">
          <table:table-cell office:value-type="float" office:value="481.348571777344">
            <text:p>481.3485717773</text:p>
          </table:table-cell>
          <table:table-cell office:value-type="float" office:value="-0.007072903">
            <text:p>-0.007072903</text:p>
          </table:table-cell>
          <table:table-cell table:number-columns-repeated="4"/>
        </table:table-row>
        <table:table-row table:style-name="ro1">
          <table:table-cell office:value-type="float" office:value="481.464141845703">
            <text:p>481.4641418457</text:p>
          </table:table-cell>
          <table:table-cell office:value-type="float" office:value="-0.001784743">
            <text:p>-0.001784743</text:p>
          </table:table-cell>
          <table:table-cell table:number-columns-repeated="4"/>
        </table:table-row>
        <table:table-row table:style-name="ro1">
          <table:table-cell office:value-type="float" office:value="481.579711914063">
            <text:p>481.5797119141</text:p>
          </table:table-cell>
          <table:table-cell office:value-type="float" office:value="0.007651431">
            <text:p>0.007651431</text:p>
          </table:table-cell>
          <table:table-cell table:number-columns-repeated="4"/>
        </table:table-row>
        <table:table-row table:style-name="ro1">
          <table:table-cell office:value-type="float" office:value="481.695281982422">
            <text:p>481.6952819824</text:p>
          </table:table-cell>
          <table:table-cell office:value-type="float" office:value="-0.006421791">
            <text:p>-0.006421791</text:p>
          </table:table-cell>
          <table:table-cell table:number-columns-repeated="4"/>
        </table:table-row>
        <table:table-row table:style-name="ro1">
          <table:table-cell office:value-type="float" office:value="481.810882568359">
            <text:p>481.8108825684</text:p>
          </table:table-cell>
          <table:table-cell office:value-type="float" office:value="-0.001733285">
            <text:p>-0.001733285</text:p>
          </table:table-cell>
          <table:table-cell table:number-columns-repeated="4"/>
        </table:table-row>
        <table:table-row table:style-name="ro1">
          <table:table-cell office:value-type="float" office:value="481.926452636719">
            <text:p>481.9264526367</text:p>
          </table:table-cell>
          <table:table-cell office:value-type="string">
            <text:p>-7.949879E-05</text:p>
          </table:table-cell>
          <table:table-cell table:number-columns-repeated="4"/>
        </table:table-row>
        <table:table-row table:style-name="ro1">
          <table:table-cell office:value-type="float" office:value="482.042053222656">
            <text:p>482.0420532227</text:p>
          </table:table-cell>
          <table:table-cell office:value-type="float" office:value="0.01673172">
            <text:p>0.01673172</text:p>
          </table:table-cell>
          <table:table-cell table:number-columns-repeated="4"/>
        </table:table-row>
        <table:table-row table:style-name="ro1">
          <table:table-cell office:value-type="float" office:value="482.157653808594">
            <text:p>482.1576538086</text:p>
          </table:table-cell>
          <table:table-cell office:value-type="float" office:value="-0.005281966">
            <text:p>-0.005281966</text:p>
          </table:table-cell>
          <table:table-cell table:number-columns-repeated="4"/>
        </table:table-row>
        <table:table-row table:style-name="ro1">
          <table:table-cell office:value-type="float" office:value="482.273254394531">
            <text:p>482.2732543945</text:p>
          </table:table-cell>
          <table:table-cell office:value-type="float" office:value="-0.0003138385">
            <text:p>-0.0003138385</text:p>
          </table:table-cell>
          <table:table-cell table:number-columns-repeated="4"/>
        </table:table-row>
        <table:table-row table:style-name="ro1">
          <table:table-cell office:value-type="float" office:value="482.388854980469">
            <text:p>482.3888549805</text:p>
          </table:table-cell>
          <table:table-cell office:value-type="float" office:value="0.01548024">
            <text:p>0.01548024</text:p>
          </table:table-cell>
          <table:table-cell table:number-columns-repeated="4"/>
        </table:table-row>
        <table:table-row table:style-name="ro1">
          <table:table-cell office:value-type="float" office:value="482.504455566406">
            <text:p>482.5044555664</text:p>
          </table:table-cell>
          <table:table-cell office:value-type="float" office:value="0.01887937">
            <text:p>0.01887937</text:p>
          </table:table-cell>
          <table:table-cell table:number-columns-repeated="4"/>
        </table:table-row>
        <table:table-row table:style-name="ro1">
          <table:table-cell office:value-type="float" office:value="482.620086669922">
            <text:p>482.6200866699</text:p>
          </table:table-cell>
          <table:table-cell office:value-type="float" office:value="-0.004299816">
            <text:p>-0.004299816</text:p>
          </table:table-cell>
          <table:table-cell table:number-columns-repeated="4"/>
        </table:table-row>
        <table:table-row table:style-name="ro1">
          <table:table-cell office:value-type="float" office:value="482.735687255859">
            <text:p>482.7356872559</text:p>
          </table:table-cell>
          <table:table-cell office:value-type="float" office:value="0.005499951">
            <text:p>0.005499951</text:p>
          </table:table-cell>
          <table:table-cell table:number-columns-repeated="4"/>
        </table:table-row>
        <table:table-row table:style-name="ro1">
          <table:table-cell office:value-type="float" office:value="482.851318359375">
            <text:p>482.8513183594</text:p>
          </table:table-cell>
          <table:table-cell office:value-type="float" office:value="-0.001940156">
            <text:p>-0.001940156</text:p>
          </table:table-cell>
          <table:table-cell table:number-columns-repeated="4"/>
        </table:table-row>
        <table:table-row table:style-name="ro1">
          <table:table-cell office:value-type="float" office:value="482.966949462891">
            <text:p>482.9669494629</text:p>
          </table:table-cell>
          <table:table-cell office:value-type="float" office:value="0.01097944">
            <text:p>0.01097944</text:p>
          </table:table-cell>
          <table:table-cell table:number-columns-repeated="4"/>
        </table:table-row>
        <table:table-row table:style-name="ro1">
          <table:table-cell office:value-type="float" office:value="483.082580566406">
            <text:p>483.0825805664</text:p>
          </table:table-cell>
          <table:table-cell office:value-type="float" office:value="-0.01058325">
            <text:p>-0.01058325</text:p>
          </table:table-cell>
          <table:table-cell table:number-columns-repeated="4"/>
        </table:table-row>
        <table:table-row table:style-name="ro1">
          <table:table-cell office:value-type="float" office:value="483.198211669922">
            <text:p>483.1982116699</text:p>
          </table:table-cell>
          <table:table-cell office:value-type="float" office:value="0.004174403">
            <text:p>0.004174403</text:p>
          </table:table-cell>
          <table:table-cell table:number-columns-repeated="4"/>
        </table:table-row>
        <table:table-row table:style-name="ro1">
          <table:table-cell office:value-type="float" office:value="483.313842773438">
            <text:p>483.3138427734</text:p>
          </table:table-cell>
          <table:table-cell office:value-type="float" office:value="0.008892975">
            <text:p>0.008892975</text:p>
          </table:table-cell>
          <table:table-cell table:number-columns-repeated="4"/>
        </table:table-row>
        <table:table-row table:style-name="ro1">
          <table:table-cell office:value-type="float" office:value="483.429473876953">
            <text:p>483.429473877</text:p>
          </table:table-cell>
          <table:table-cell office:value-type="float" office:value="0.0141746">
            <text:p>0.0141746</text:p>
          </table:table-cell>
          <table:table-cell table:number-columns-repeated="4"/>
        </table:table-row>
        <table:table-row table:style-name="ro1">
          <table:table-cell office:value-type="float" office:value="483.545135498047">
            <text:p>483.545135498</text:p>
          </table:table-cell>
          <table:table-cell office:value-type="float" office:value="0.001828608">
            <text:p>0.001828608</text:p>
          </table:table-cell>
          <table:table-cell table:number-columns-repeated="4"/>
        </table:table-row>
        <table:table-row table:style-name="ro1">
          <table:table-cell office:value-type="float" office:value="483.660797119141">
            <text:p>483.6607971191</text:p>
          </table:table-cell>
          <table:table-cell office:value-type="float" office:value="-0.004085152">
            <text:p>-0.004085152</text:p>
          </table:table-cell>
          <table:table-cell table:number-columns-repeated="4"/>
        </table:table-row>
        <table:table-row table:style-name="ro1">
          <table:table-cell office:value-type="float" office:value="483.776428222656">
            <text:p>483.7764282227</text:p>
          </table:table-cell>
          <table:table-cell office:value-type="float" office:value="0.006893467">
            <text:p>0.006893467</text:p>
          </table:table-cell>
          <table:table-cell table:number-columns-repeated="4"/>
        </table:table-row>
        <table:table-row table:style-name="ro1">
          <table:table-cell office:value-type="float" office:value="483.89208984375">
            <text:p>483.8920898438</text:p>
          </table:table-cell>
          <table:table-cell office:value-type="float" office:value="0.01981427">
            <text:p>0.01981427</text:p>
          </table:table-cell>
          <table:table-cell table:number-columns-repeated="4"/>
        </table:table-row>
        <table:table-row table:style-name="ro1">
          <table:table-cell office:value-type="float" office:value="484.007751464844">
            <text:p>484.0077514648</text:p>
          </table:table-cell>
          <table:table-cell office:value-type="float" office:value="-0.006807167">
            <text:p>-0.006807167</text:p>
          </table:table-cell>
          <table:table-cell table:number-columns-repeated="4"/>
        </table:table-row>
        <table:table-row table:style-name="ro1">
          <table:table-cell office:value-type="float" office:value="484.123413085938">
            <text:p>484.1234130859</text:p>
          </table:table-cell>
          <table:table-cell office:value-type="float" office:value="-0.0100161">
            <text:p>-0.0100161</text:p>
          </table:table-cell>
          <table:table-cell table:number-columns-repeated="4"/>
        </table:table-row>
        <table:table-row table:style-name="ro1">
          <table:table-cell office:value-type="float" office:value="484.239105224609">
            <text:p>484.2391052246</text:p>
          </table:table-cell>
          <table:table-cell office:value-type="float" office:value="0.01161513">
            <text:p>0.01161513</text:p>
          </table:table-cell>
          <table:table-cell table:number-columns-repeated="4"/>
        </table:table-row>
        <table:table-row table:style-name="ro1">
          <table:table-cell office:value-type="float" office:value="484.354766845703">
            <text:p>484.3547668457</text:p>
          </table:table-cell>
          <table:table-cell office:value-type="float" office:value="0.003241766">
            <text:p>0.003241766</text:p>
          </table:table-cell>
          <table:table-cell table:number-columns-repeated="4"/>
        </table:table-row>
        <table:table-row table:style-name="ro1">
          <table:table-cell office:value-type="float" office:value="484.470458984375">
            <text:p>484.4704589844</text:p>
          </table:table-cell>
          <table:table-cell office:value-type="float" office:value="0.001533314">
            <text:p>0.001533314</text:p>
          </table:table-cell>
          <table:table-cell table:number-columns-repeated="4"/>
        </table:table-row>
        <table:table-row table:style-name="ro1">
          <table:table-cell office:value-type="float" office:value="484.586151123047">
            <text:p>484.586151123</text:p>
          </table:table-cell>
          <table:table-cell office:value-type="float" office:value="-0.006472983">
            <text:p>-0.006472983</text:p>
          </table:table-cell>
          <table:table-cell table:number-columns-repeated="4"/>
        </table:table-row>
        <table:table-row table:style-name="ro1">
          <table:table-cell office:value-type="float" office:value="484.701843261719">
            <text:p>484.7018432617</text:p>
          </table:table-cell>
          <table:table-cell office:value-type="float" office:value="0.002421297">
            <text:p>0.002421297</text:p>
          </table:table-cell>
          <table:table-cell table:number-columns-repeated="4"/>
        </table:table-row>
        <table:table-row table:style-name="ro1">
          <table:table-cell office:value-type="float" office:value="484.817535400391">
            <text:p>484.8175354004</text:p>
          </table:table-cell>
          <table:table-cell office:value-type="float" office:value="0.007967271">
            <text:p>0.007967271</text:p>
          </table:table-cell>
          <table:table-cell table:number-columns-repeated="4"/>
        </table:table-row>
        <table:table-row table:style-name="ro1">
          <table:table-cell office:value-type="float" office:value="484.933227539063">
            <text:p>484.9332275391</text:p>
          </table:table-cell>
          <table:table-cell office:value-type="float" office:value="-0.008315518">
            <text:p>-0.008315518</text:p>
          </table:table-cell>
          <table:table-cell table:number-columns-repeated="4"/>
        </table:table-row>
        <table:table-row table:style-name="ro1">
          <table:table-cell office:value-type="float" office:value="485.048919677734">
            <text:p>485.0489196777</text:p>
          </table:table-cell>
          <table:table-cell office:value-type="float" office:value="-0.0005097923">
            <text:p>-0.0005097923</text:p>
          </table:table-cell>
          <table:table-cell table:number-columns-repeated="4"/>
        </table:table-row>
        <table:table-row table:style-name="ro1">
          <table:table-cell office:value-type="float" office:value="485.164642333984">
            <text:p>485.164642334</text:p>
          </table:table-cell>
          <table:table-cell office:value-type="float" office:value="0.01833736">
            <text:p>0.01833736</text:p>
          </table:table-cell>
          <table:table-cell table:number-columns-repeated="4"/>
        </table:table-row>
        <table:table-row table:style-name="ro1">
          <table:table-cell office:value-type="float" office:value="485.280334472656">
            <text:p>485.2803344727</text:p>
          </table:table-cell>
          <table:table-cell office:value-type="float" office:value="0.007687646">
            <text:p>0.007687646</text:p>
          </table:table-cell>
          <table:table-cell table:number-columns-repeated="4"/>
        </table:table-row>
        <table:table-row table:style-name="ro1">
          <table:table-cell office:value-type="float" office:value="485.396057128906">
            <text:p>485.3960571289</text:p>
          </table:table-cell>
          <table:table-cell office:value-type="float" office:value="0.01111028">
            <text:p>0.01111028</text:p>
          </table:table-cell>
          <table:table-cell table:number-columns-repeated="4"/>
        </table:table-row>
        <table:table-row table:style-name="ro1">
          <table:table-cell office:value-type="float" office:value="485.511779785156">
            <text:p>485.5117797852</text:p>
          </table:table-cell>
          <table:table-cell office:value-type="float" office:value="-0.002797735">
            <text:p>-0.002797735</text:p>
          </table:table-cell>
          <table:table-cell table:number-columns-repeated="4"/>
        </table:table-row>
        <table:table-row table:style-name="ro1">
          <table:table-cell office:value-type="float" office:value="485.627502441406">
            <text:p>485.6275024414</text:p>
          </table:table-cell>
          <table:table-cell office:value-type="float" office:value="0.004713182">
            <text:p>0.004713182</text:p>
          </table:table-cell>
          <table:table-cell table:number-columns-repeated="4"/>
        </table:table-row>
        <table:table-row table:style-name="ro1">
          <table:table-cell office:value-type="float" office:value="485.743225097656">
            <text:p>485.7432250977</text:p>
          </table:table-cell>
          <table:table-cell office:value-type="float" office:value="0.02722875">
            <text:p>0.02722875</text:p>
          </table:table-cell>
          <table:table-cell table:number-columns-repeated="4"/>
        </table:table-row>
        <table:table-row table:style-name="ro1">
          <table:table-cell office:value-type="float" office:value="485.858947753906">
            <text:p>485.8589477539</text:p>
          </table:table-cell>
          <table:table-cell office:value-type="float" office:value="-0.005810439">
            <text:p>-0.005810439</text:p>
          </table:table-cell>
          <table:table-cell table:number-columns-repeated="4"/>
        </table:table-row>
        <table:table-row table:style-name="ro1">
          <table:table-cell office:value-type="float" office:value="485.974670410156">
            <text:p>485.9746704102</text:p>
          </table:table-cell>
          <table:table-cell office:value-type="float" office:value="-0.002668814">
            <text:p>-0.002668814</text:p>
          </table:table-cell>
          <table:table-cell table:number-columns-repeated="4"/>
        </table:table-row>
        <table:table-row table:style-name="ro1">
          <table:table-cell office:value-type="float" office:value="486.090423583984">
            <text:p>486.090423584</text:p>
          </table:table-cell>
          <table:table-cell office:value-type="float" office:value="0.02608016">
            <text:p>0.02608016</text:p>
          </table:table-cell>
          <table:table-cell table:number-columns-repeated="4"/>
        </table:table-row>
        <table:table-row table:style-name="ro1">
          <table:table-cell office:value-type="float" office:value="486.206176757813">
            <text:p>486.2061767578</text:p>
          </table:table-cell>
          <table:table-cell office:value-type="float" office:value="0.006987155">
            <text:p>0.006987155</text:p>
          </table:table-cell>
          <table:table-cell table:number-columns-repeated="4"/>
        </table:table-row>
        <table:table-row table:style-name="ro1">
          <table:table-cell office:value-type="float" office:value="486.321899414063">
            <text:p>486.3218994141</text:p>
          </table:table-cell>
          <table:table-cell office:value-type="float" office:value="0.002782244">
            <text:p>0.002782244</text:p>
          </table:table-cell>
          <table:table-cell table:number-columns-repeated="4"/>
        </table:table-row>
        <table:table-row table:style-name="ro1">
          <table:table-cell office:value-type="float" office:value="486.437652587891">
            <text:p>486.4376525879</text:p>
          </table:table-cell>
          <table:table-cell office:value-type="float" office:value="0.003409171">
            <text:p>0.003409171</text:p>
          </table:table-cell>
          <table:table-cell table:number-columns-repeated="4"/>
        </table:table-row>
        <table:table-row table:style-name="ro1">
          <table:table-cell office:value-type="float" office:value="486.553436279297">
            <text:p>486.5534362793</text:p>
          </table:table-cell>
          <table:table-cell office:value-type="float" office:value="0.01069724">
            <text:p>0.01069724</text:p>
          </table:table-cell>
          <table:table-cell table:number-columns-repeated="4"/>
        </table:table-row>
        <table:table-row table:style-name="ro1">
          <table:table-cell office:value-type="float" office:value="486.669189453125">
            <text:p>486.6691894531</text:p>
          </table:table-cell>
          <table:table-cell office:value-type="float" office:value="0.008027109">
            <text:p>0.008027109</text:p>
          </table:table-cell>
          <table:table-cell table:number-columns-repeated="4"/>
        </table:table-row>
        <table:table-row table:style-name="ro1">
          <table:table-cell office:value-type="float" office:value="486.784942626953">
            <text:p>486.784942627</text:p>
          </table:table-cell>
          <table:table-cell office:value-type="float" office:value="0.006874378">
            <text:p>0.006874378</text:p>
          </table:table-cell>
          <table:table-cell table:number-columns-repeated="4"/>
        </table:table-row>
        <table:table-row table:style-name="ro1">
          <table:table-cell office:value-type="float" office:value="486.900726318359">
            <text:p>486.9007263184</text:p>
          </table:table-cell>
          <table:table-cell office:value-type="float" office:value="0.0005378269">
            <text:p>0.0005378269</text:p>
          </table:table-cell>
          <table:table-cell table:number-columns-repeated="4"/>
        </table:table-row>
        <table:table-row table:style-name="ro1">
          <table:table-cell office:value-type="float" office:value="487.016479492188">
            <text:p>487.0164794922</text:p>
          </table:table-cell>
          <table:table-cell office:value-type="float" office:value="0.01533879">
            <text:p>0.01533879</text:p>
          </table:table-cell>
          <table:table-cell table:number-columns-repeated="4"/>
        </table:table-row>
        <table:table-row table:style-name="ro1">
          <table:table-cell office:value-type="float" office:value="487.132263183594">
            <text:p>487.1322631836</text:p>
          </table:table-cell>
          <table:table-cell office:value-type="float" office:value="0.003129863">
            <text:p>0.003129863</text:p>
          </table:table-cell>
          <table:table-cell table:number-columns-repeated="4"/>
        </table:table-row>
        <table:table-row table:style-name="ro1">
          <table:table-cell office:value-type="float" office:value="487.248046875">
            <text:p>487.248046875</text:p>
          </table:table-cell>
          <table:table-cell office:value-type="float" office:value="0.01710617">
            <text:p>0.01710617</text:p>
          </table:table-cell>
          <table:table-cell table:number-columns-repeated="4"/>
        </table:table-row>
        <table:table-row table:style-name="ro1">
          <table:table-cell office:value-type="float" office:value="487.363830566406">
            <text:p>487.3638305664</text:p>
          </table:table-cell>
          <table:table-cell office:value-type="float" office:value="0.007896295">
            <text:p>0.007896295</text:p>
          </table:table-cell>
          <table:table-cell table:number-columns-repeated="4"/>
        </table:table-row>
        <table:table-row table:style-name="ro1">
          <table:table-cell office:value-type="float" office:value="487.479614257813">
            <text:p>487.4796142578</text:p>
          </table:table-cell>
          <table:table-cell office:value-type="float" office:value="0.01435104">
            <text:p>0.01435104</text:p>
          </table:table-cell>
          <table:table-cell table:number-columns-repeated="4"/>
        </table:table-row>
        <table:table-row table:style-name="ro1">
          <table:table-cell office:value-type="float" office:value="487.595397949219">
            <text:p>487.5953979492</text:p>
          </table:table-cell>
          <table:table-cell office:value-type="float" office:value="0.01407696">
            <text:p>0.01407696</text:p>
          </table:table-cell>
          <table:table-cell table:number-columns-repeated="4"/>
        </table:table-row>
        <table:table-row table:style-name="ro1">
          <table:table-cell office:value-type="float" office:value="487.711212158203">
            <text:p>487.7112121582</text:p>
          </table:table-cell>
          <table:table-cell office:value-type="float" office:value="0.01311934">
            <text:p>0.01311934</text:p>
          </table:table-cell>
          <table:table-cell table:number-columns-repeated="4"/>
        </table:table-row>
        <table:table-row table:style-name="ro1">
          <table:table-cell office:value-type="float" office:value="487.826995849609">
            <text:p>487.8269958496</text:p>
          </table:table-cell>
          <table:table-cell office:value-type="float" office:value="-0.001981839">
            <text:p>-0.001981839</text:p>
          </table:table-cell>
          <table:table-cell table:number-columns-repeated="4"/>
        </table:table-row>
        <table:table-row table:style-name="ro1">
          <table:table-cell office:value-type="float" office:value="487.942810058594">
            <text:p>487.9428100586</text:p>
          </table:table-cell>
          <table:table-cell office:value-type="float" office:value="0.01256709">
            <text:p>0.01256709</text:p>
          </table:table-cell>
          <table:table-cell table:number-columns-repeated="4"/>
        </table:table-row>
        <table:table-row table:style-name="ro1">
          <table:table-cell office:value-type="float" office:value="488.058624267578">
            <text:p>488.0586242676</text:p>
          </table:table-cell>
          <table:table-cell office:value-type="float" office:value="0.02487421">
            <text:p>0.02487421</text:p>
          </table:table-cell>
          <table:table-cell table:number-columns-repeated="4"/>
        </table:table-row>
        <table:table-row table:style-name="ro1">
          <table:table-cell office:value-type="float" office:value="488.174438476563">
            <text:p>488.1744384766</text:p>
          </table:table-cell>
          <table:table-cell office:value-type="float" office:value="0.00250713">
            <text:p>0.00250713</text:p>
          </table:table-cell>
          <table:table-cell table:number-columns-repeated="4"/>
        </table:table-row>
        <table:table-row table:style-name="ro1">
          <table:table-cell office:value-type="float" office:value="488.290252685547">
            <text:p>488.2902526855</text:p>
          </table:table-cell>
          <table:table-cell office:value-type="float" office:value="-0.003991609">
            <text:p>-0.003991609</text:p>
          </table:table-cell>
          <table:table-cell table:number-columns-repeated="4"/>
        </table:table-row>
        <table:table-row table:style-name="ro1">
          <table:table-cell office:value-type="float" office:value="488.406066894531">
            <text:p>488.4060668945</text:p>
          </table:table-cell>
          <table:table-cell office:value-type="float" office:value="0.01312115">
            <text:p>0.01312115</text:p>
          </table:table-cell>
          <table:table-cell table:number-columns-repeated="4"/>
        </table:table-row>
        <table:table-row table:style-name="ro1">
          <table:table-cell office:value-type="float" office:value="488.521911621094">
            <text:p>488.5219116211</text:p>
          </table:table-cell>
          <table:table-cell office:value-type="float" office:value="0.006083146">
            <text:p>0.006083146</text:p>
          </table:table-cell>
          <table:table-cell table:number-columns-repeated="4"/>
        </table:table-row>
        <table:table-row table:style-name="ro1">
          <table:table-cell office:value-type="float" office:value="488.637725830078">
            <text:p>488.6377258301</text:p>
          </table:table-cell>
          <table:table-cell office:value-type="float" office:value="-0.004390457">
            <text:p>-0.004390457</text:p>
          </table:table-cell>
          <table:table-cell table:number-columns-repeated="4"/>
        </table:table-row>
        <table:table-row table:style-name="ro1">
          <table:table-cell office:value-type="float" office:value="488.753570556641">
            <text:p>488.7535705566</text:p>
          </table:table-cell>
          <table:table-cell office:value-type="float" office:value="-0.005010782">
            <text:p>-0.005010782</text:p>
          </table:table-cell>
          <table:table-cell table:number-columns-repeated="4"/>
        </table:table-row>
        <table:table-row table:style-name="ro1">
          <table:table-cell office:value-type="float" office:value="488.869415283203">
            <text:p>488.8694152832</text:p>
          </table:table-cell>
          <table:table-cell office:value-type="float" office:value="0.01556343">
            <text:p>0.01556343</text:p>
          </table:table-cell>
          <table:table-cell table:number-columns-repeated="4"/>
        </table:table-row>
        <table:table-row table:style-name="ro1">
          <table:table-cell office:value-type="float" office:value="488.985260009766">
            <text:p>488.9852600098</text:p>
          </table:table-cell>
          <table:table-cell office:value-type="float" office:value="0.005697388">
            <text:p>0.005697388</text:p>
          </table:table-cell>
          <table:table-cell table:number-columns-repeated="4"/>
        </table:table-row>
        <table:table-row table:style-name="ro1">
          <table:table-cell office:value-type="float" office:value="489.101104736328">
            <text:p>489.1011047363</text:p>
          </table:table-cell>
          <table:table-cell office:value-type="float" office:value="0.00634927">
            <text:p>0.00634927</text:p>
          </table:table-cell>
          <table:table-cell table:number-columns-repeated="4"/>
        </table:table-row>
        <table:table-row table:style-name="ro1">
          <table:table-cell office:value-type="float" office:value="489.216949462891">
            <text:p>489.2169494629</text:p>
          </table:table-cell>
          <table:table-cell office:value-type="float" office:value="0.0008723235">
            <text:p>0.0008723235</text:p>
          </table:table-cell>
          <table:table-cell table:number-columns-repeated="4"/>
        </table:table-row>
        <table:table-row table:style-name="ro1">
          <table:table-cell office:value-type="float" office:value="489.332794189453">
            <text:p>489.3327941895</text:p>
          </table:table-cell>
          <table:table-cell office:value-type="float" office:value="0.01450172">
            <text:p>0.01450172</text:p>
          </table:table-cell>
          <table:table-cell table:number-columns-repeated="4"/>
        </table:table-row>
        <table:table-row table:style-name="ro1">
          <table:table-cell office:value-type="float" office:value="489.448669433594">
            <text:p>489.4486694336</text:p>
          </table:table-cell>
          <table:table-cell office:value-type="float" office:value="0.01341259">
            <text:p>0.01341259</text:p>
          </table:table-cell>
          <table:table-cell table:number-columns-repeated="4"/>
        </table:table-row>
        <table:table-row table:style-name="ro1">
          <table:table-cell office:value-type="float" office:value="489.564544677734">
            <text:p>489.5645446777</text:p>
          </table:table-cell>
          <table:table-cell office:value-type="float" office:value="-0.004707321">
            <text:p>-0.004707321</text:p>
          </table:table-cell>
          <table:table-cell table:number-columns-repeated="4"/>
        </table:table-row>
        <table:table-row table:style-name="ro1">
          <table:table-cell office:value-type="float" office:value="489.680389404297">
            <text:p>489.6803894043</text:p>
          </table:table-cell>
          <table:table-cell office:value-type="float" office:value="0.004108703">
            <text:p>0.004108703</text:p>
          </table:table-cell>
          <table:table-cell table:number-columns-repeated="4"/>
        </table:table-row>
        <table:table-row table:style-name="ro1">
          <table:table-cell office:value-type="float" office:value="489.796264648438">
            <text:p>489.7962646484</text:p>
          </table:table-cell>
          <table:table-cell office:value-type="float" office:value="0.01795137">
            <text:p>0.01795137</text:p>
          </table:table-cell>
          <table:table-cell table:number-columns-repeated="4"/>
        </table:table-row>
        <table:table-row table:style-name="ro1">
          <table:table-cell office:value-type="float" office:value="489.912139892578">
            <text:p>489.9121398926</text:p>
          </table:table-cell>
          <table:table-cell office:value-type="float" office:value="0.01058151">
            <text:p>0.01058151</text:p>
          </table:table-cell>
          <table:table-cell table:number-columns-repeated="4"/>
        </table:table-row>
        <table:table-row table:style-name="ro1">
          <table:table-cell office:value-type="float" office:value="490.028015136719">
            <text:p>490.0280151367</text:p>
          </table:table-cell>
          <table:table-cell office:value-type="float" office:value="-0.0008823702">
            <text:p>-0.0008823702</text:p>
          </table:table-cell>
          <table:table-cell table:number-columns-repeated="4"/>
        </table:table-row>
        <table:table-row table:style-name="ro1">
          <table:table-cell office:value-type="float" office:value="490.143920898438">
            <text:p>490.1439208984</text:p>
          </table:table-cell>
          <table:table-cell office:value-type="float" office:value="0.02283504">
            <text:p>0.02283504</text:p>
          </table:table-cell>
          <table:table-cell table:number-columns-repeated="4"/>
        </table:table-row>
        <table:table-row table:style-name="ro1">
          <table:table-cell office:value-type="float" office:value="490.259796142578">
            <text:p>490.2597961426</text:p>
          </table:table-cell>
          <table:table-cell office:value-type="float" office:value="0.01572651">
            <text:p>0.01572651</text:p>
          </table:table-cell>
          <table:table-cell table:number-columns-repeated="4"/>
        </table:table-row>
        <table:table-row table:style-name="ro1">
          <table:table-cell office:value-type="float" office:value="490.375701904297">
            <text:p>490.3757019043</text:p>
          </table:table-cell>
          <table:table-cell office:value-type="float" office:value="-0.001567818">
            <text:p>-0.001567818</text:p>
          </table:table-cell>
          <table:table-cell table:number-columns-repeated="4"/>
        </table:table-row>
        <table:table-row table:style-name="ro1">
          <table:table-cell office:value-type="float" office:value="490.491577148438">
            <text:p>490.4915771484</text:p>
          </table:table-cell>
          <table:table-cell office:value-type="float" office:value="0.009295455">
            <text:p>0.009295455</text:p>
          </table:table-cell>
          <table:table-cell table:number-columns-repeated="4"/>
        </table:table-row>
        <table:table-row table:style-name="ro1">
          <table:table-cell office:value-type="float" office:value="490.607482910156">
            <text:p>490.6074829102</text:p>
          </table:table-cell>
          <table:table-cell office:value-type="float" office:value="0.007195092">
            <text:p>0.007195092</text:p>
          </table:table-cell>
          <table:table-cell table:number-columns-repeated="4"/>
        </table:table-row>
        <table:table-row table:style-name="ro1">
          <table:table-cell office:value-type="float" office:value="490.723388671875">
            <text:p>490.7233886719</text:p>
          </table:table-cell>
          <table:table-cell office:value-type="float" office:value="0.02057151">
            <text:p>0.02057151</text:p>
          </table:table-cell>
          <table:table-cell table:number-columns-repeated="4"/>
        </table:table-row>
        <table:table-row table:style-name="ro1">
          <table:table-cell office:value-type="float" office:value="490.839294433594">
            <text:p>490.8392944336</text:p>
          </table:table-cell>
          <table:table-cell office:value-type="float" office:value="0.01131508">
            <text:p>0.01131508</text:p>
          </table:table-cell>
          <table:table-cell table:number-columns-repeated="4"/>
        </table:table-row>
        <table:table-row table:style-name="ro1">
          <table:table-cell office:value-type="float" office:value="490.955200195313">
            <text:p>490.9552001953</text:p>
          </table:table-cell>
          <table:table-cell office:value-type="float" office:value="0.008050568">
            <text:p>0.008050568</text:p>
          </table:table-cell>
          <table:table-cell table:number-columns-repeated="4"/>
        </table:table-row>
        <table:table-row table:style-name="ro1">
          <table:table-cell office:value-type="float" office:value="491.071136474609">
            <text:p>491.0711364746</text:p>
          </table:table-cell>
          <table:table-cell office:value-type="float" office:value="0.01323225">
            <text:p>0.01323225</text:p>
          </table:table-cell>
          <table:table-cell table:number-columns-repeated="4"/>
        </table:table-row>
        <table:table-row table:style-name="ro1">
          <table:table-cell office:value-type="float" office:value="491.187042236328">
            <text:p>491.1870422363</text:p>
          </table:table-cell>
          <table:table-cell office:value-type="float" office:value="0.02236285">
            <text:p>0.02236285</text:p>
          </table:table-cell>
          <table:table-cell table:number-columns-repeated="4"/>
        </table:table-row>
        <table:table-row table:style-name="ro1">
          <table:table-cell office:value-type="float" office:value="491.302978515625">
            <text:p>491.3029785156</text:p>
          </table:table-cell>
          <table:table-cell office:value-type="float" office:value="0.009072002">
            <text:p>0.009072002</text:p>
          </table:table-cell>
          <table:table-cell table:number-columns-repeated="4"/>
        </table:table-row>
        <table:table-row table:style-name="ro1">
          <table:table-cell office:value-type="float" office:value="491.418914794922">
            <text:p>491.4189147949</text:p>
          </table:table-cell>
          <table:table-cell office:value-type="float" office:value="0.003174766">
            <text:p>0.003174766</text:p>
          </table:table-cell>
          <table:table-cell table:number-columns-repeated="4"/>
        </table:table-row>
        <table:table-row table:style-name="ro1">
          <table:table-cell office:value-type="float" office:value="491.534851074219">
            <text:p>491.5348510742</text:p>
          </table:table-cell>
          <table:table-cell office:value-type="float" office:value="0.02343484">
            <text:p>0.02343484</text:p>
          </table:table-cell>
          <table:table-cell table:number-columns-repeated="4"/>
        </table:table-row>
        <table:table-row table:style-name="ro1">
          <table:table-cell office:value-type="float" office:value="491.650787353516">
            <text:p>491.6507873535</text:p>
          </table:table-cell>
          <table:table-cell office:value-type="float" office:value="0.01392309">
            <text:p>0.01392309</text:p>
          </table:table-cell>
          <table:table-cell table:number-columns-repeated="4"/>
        </table:table-row>
        <table:table-row table:style-name="ro1">
          <table:table-cell office:value-type="float" office:value="491.766723632813">
            <text:p>491.7667236328</text:p>
          </table:table-cell>
          <table:table-cell office:value-type="float" office:value="0.00982601">
            <text:p>0.00982601</text:p>
          </table:table-cell>
          <table:table-cell table:number-columns-repeated="4"/>
        </table:table-row>
        <table:table-row table:style-name="ro1">
          <table:table-cell office:value-type="float" office:value="491.882659912109">
            <text:p>491.8826599121</text:p>
          </table:table-cell>
          <table:table-cell office:value-type="float" office:value="0.002597239">
            <text:p>0.002597239</text:p>
          </table:table-cell>
          <table:table-cell table:number-columns-repeated="4"/>
        </table:table-row>
        <table:table-row table:style-name="ro1">
          <table:table-cell office:value-type="float" office:value="491.998596191406">
            <text:p>491.9985961914</text:p>
          </table:table-cell>
          <table:table-cell office:value-type="float" office:value="0.01918807">
            <text:p>0.01918807</text:p>
          </table:table-cell>
          <table:table-cell table:number-columns-repeated="4"/>
        </table:table-row>
        <table:table-row table:style-name="ro1">
          <table:table-cell office:value-type="float" office:value="492.114562988281">
            <text:p>492.1145629883</text:p>
          </table:table-cell>
          <table:table-cell office:value-type="float" office:value="0.01894835">
            <text:p>0.01894835</text:p>
          </table:table-cell>
          <table:table-cell table:number-columns-repeated="4"/>
        </table:table-row>
        <table:table-row table:style-name="ro1">
          <table:table-cell office:value-type="float" office:value="492.230529785156">
            <text:p>492.2305297852</text:p>
          </table:table-cell>
          <table:table-cell office:value-type="float" office:value="0.003491304">
            <text:p>0.003491304</text:p>
          </table:table-cell>
          <table:table-cell table:number-columns-repeated="4"/>
        </table:table-row>
        <table:table-row table:style-name="ro1">
          <table:table-cell office:value-type="float" office:value="492.346496582031">
            <text:p>492.346496582</text:p>
          </table:table-cell>
          <table:table-cell office:value-type="float" office:value="0.01725949">
            <text:p>0.01725949</text:p>
          </table:table-cell>
          <table:table-cell table:number-columns-repeated="4"/>
        </table:table-row>
        <table:table-row table:style-name="ro1">
          <table:table-cell office:value-type="float" office:value="492.462463378906">
            <text:p>492.4624633789</text:p>
          </table:table-cell>
          <table:table-cell office:value-type="float" office:value="0.01700421">
            <text:p>0.01700421</text:p>
          </table:table-cell>
          <table:table-cell table:number-columns-repeated="4"/>
        </table:table-row>
        <table:table-row table:style-name="ro1">
          <table:table-cell office:value-type="float" office:value="492.578430175781">
            <text:p>492.5784301758</text:p>
          </table:table-cell>
          <table:table-cell office:value-type="float" office:value="0.0184136">
            <text:p>0.0184136</text:p>
          </table:table-cell>
          <table:table-cell table:number-columns-repeated="4"/>
        </table:table-row>
        <table:table-row table:style-name="ro1">
          <table:table-cell office:value-type="float" office:value="492.694396972656">
            <text:p>492.6943969727</text:p>
          </table:table-cell>
          <table:table-cell office:value-type="float" office:value="0.01085375">
            <text:p>0.01085375</text:p>
          </table:table-cell>
          <table:table-cell table:number-columns-repeated="4"/>
        </table:table-row>
        <table:table-row table:style-name="ro1">
          <table:table-cell office:value-type="float" office:value="492.810363769531">
            <text:p>492.8103637695</text:p>
          </table:table-cell>
          <table:table-cell office:value-type="float" office:value="0.008065179">
            <text:p>0.008065179</text:p>
          </table:table-cell>
          <table:table-cell table:number-columns-repeated="4"/>
        </table:table-row>
        <table:table-row table:style-name="ro1">
          <table:table-cell office:value-type="float" office:value="492.926361083984">
            <text:p>492.926361084</text:p>
          </table:table-cell>
          <table:table-cell office:value-type="float" office:value="0.02750765">
            <text:p>0.02750765</text:p>
          </table:table-cell>
          <table:table-cell table:number-columns-repeated="4"/>
        </table:table-row>
        <table:table-row table:style-name="ro1">
          <table:table-cell office:value-type="float" office:value="493.042327880859">
            <text:p>493.0423278809</text:p>
          </table:table-cell>
          <table:table-cell office:value-type="float" office:value="0.01294379">
            <text:p>0.01294379</text:p>
          </table:table-cell>
          <table:table-cell table:number-columns-repeated="4"/>
        </table:table-row>
        <table:table-row table:style-name="ro1">
          <table:table-cell office:value-type="float" office:value="493.158325195313">
            <text:p>493.1583251953</text:p>
          </table:table-cell>
          <table:table-cell office:value-type="float" office:value="0.009609117">
            <text:p>0.009609117</text:p>
          </table:table-cell>
          <table:table-cell table:number-columns-repeated="4"/>
        </table:table-row>
        <table:table-row table:style-name="ro1">
          <table:table-cell office:value-type="float" office:value="493.274322509766">
            <text:p>493.2743225098</text:p>
          </table:table-cell>
          <table:table-cell office:value-type="float" office:value="0.01765659">
            <text:p>0.01765659</text:p>
          </table:table-cell>
          <table:table-cell table:number-columns-repeated="4"/>
        </table:table-row>
        <table:table-row table:style-name="ro1">
          <table:table-cell office:value-type="float" office:value="493.390319824219">
            <text:p>493.3903198242</text:p>
          </table:table-cell>
          <table:table-cell office:value-type="float" office:value="0.02996257">
            <text:p>0.02996257</text:p>
          </table:table-cell>
          <table:table-cell table:number-columns-repeated="4"/>
        </table:table-row>
        <table:table-row table:style-name="ro1">
          <table:table-cell office:value-type="float" office:value="493.506317138672">
            <text:p>493.5063171387</text:p>
          </table:table-cell>
          <table:table-cell office:value-type="float" office:value="0.02288202">
            <text:p>0.02288202</text:p>
          </table:table-cell>
          <table:table-cell table:number-columns-repeated="4"/>
        </table:table-row>
        <table:table-row table:style-name="ro1">
          <table:table-cell office:value-type="float" office:value="493.622344970703">
            <text:p>493.6223449707</text:p>
          </table:table-cell>
          <table:table-cell office:value-type="float" office:value="0.01998568">
            <text:p>0.01998568</text:p>
          </table:table-cell>
          <table:table-cell table:number-columns-repeated="4"/>
        </table:table-row>
        <table:table-row table:style-name="ro1">
          <table:table-cell office:value-type="float" office:value="493.738342285156">
            <text:p>493.7383422852</text:p>
          </table:table-cell>
          <table:table-cell office:value-type="float" office:value="0.009093164">
            <text:p>0.009093164</text:p>
          </table:table-cell>
          <table:table-cell table:number-columns-repeated="4"/>
        </table:table-row>
        <table:table-row table:style-name="ro1">
          <table:table-cell office:value-type="float" office:value="493.854370117188">
            <text:p>493.8543701172</text:p>
          </table:table-cell>
          <table:table-cell office:value-type="float" office:value="0.01685149">
            <text:p>0.01685149</text:p>
          </table:table-cell>
          <table:table-cell table:number-columns-repeated="4"/>
        </table:table-row>
        <table:table-row table:style-name="ro1">
          <table:table-cell office:value-type="float" office:value="493.970367431641">
            <text:p>493.9703674316</text:p>
          </table:table-cell>
          <table:table-cell office:value-type="float" office:value="0.02728816">
            <text:p>0.02728816</text:p>
          </table:table-cell>
          <table:table-cell table:number-columns-repeated="4"/>
        </table:table-row>
        <table:table-row table:style-name="ro1">
          <table:table-cell office:value-type="float" office:value="494.086395263672">
            <text:p>494.0863952637</text:p>
          </table:table-cell>
          <table:table-cell office:value-type="float" office:value="0.02248459">
            <text:p>0.02248459</text:p>
          </table:table-cell>
          <table:table-cell table:number-columns-repeated="4"/>
        </table:table-row>
        <table:table-row table:style-name="ro1">
          <table:table-cell office:value-type="float" office:value="494.202423095703">
            <text:p>494.2024230957</text:p>
          </table:table-cell>
          <table:table-cell office:value-type="float" office:value="0.02019901">
            <text:p>0.02019901</text:p>
          </table:table-cell>
          <table:table-cell table:number-columns-repeated="4"/>
        </table:table-row>
        <table:table-row table:style-name="ro1">
          <table:table-cell office:value-type="float" office:value="494.318450927734">
            <text:p>494.3184509277</text:p>
          </table:table-cell>
          <table:table-cell office:value-type="float" office:value="0.01910733">
            <text:p>0.01910733</text:p>
          </table:table-cell>
          <table:table-cell table:number-columns-repeated="4"/>
        </table:table-row>
        <table:table-row table:style-name="ro1">
          <table:table-cell office:value-type="float" office:value="494.434478759766">
            <text:p>494.4344787598</text:p>
          </table:table-cell>
          <table:table-cell office:value-type="float" office:value="0.02236799">
            <text:p>0.02236799</text:p>
          </table:table-cell>
          <table:table-cell table:number-columns-repeated="4"/>
        </table:table-row>
        <table:table-row table:style-name="ro1">
          <table:table-cell office:value-type="float" office:value="494.550537109375">
            <text:p>494.5505371094</text:p>
          </table:table-cell>
          <table:table-cell office:value-type="float" office:value="0.01749025">
            <text:p>0.01749025</text:p>
          </table:table-cell>
          <table:table-cell table:number-columns-repeated="4"/>
        </table:table-row>
        <table:table-row table:style-name="ro1">
          <table:table-cell office:value-type="float" office:value="494.666564941406">
            <text:p>494.6665649414</text:p>
          </table:table-cell>
          <table:table-cell office:value-type="float" office:value="0.01825128">
            <text:p>0.01825128</text:p>
          </table:table-cell>
          <table:table-cell table:number-columns-repeated="4"/>
        </table:table-row>
        <table:table-row table:style-name="ro1">
          <table:table-cell office:value-type="float" office:value="494.782623291016">
            <text:p>494.782623291</text:p>
          </table:table-cell>
          <table:table-cell office:value-type="float" office:value="0.02272255">
            <text:p>0.02272255</text:p>
          </table:table-cell>
          <table:table-cell table:number-columns-repeated="4"/>
        </table:table-row>
        <table:table-row table:style-name="ro1">
          <table:table-cell office:value-type="float" office:value="494.898681640625">
            <text:p>494.8986816406</text:p>
          </table:table-cell>
          <table:table-cell office:value-type="float" office:value="0.0309357">
            <text:p>0.0309357</text:p>
          </table:table-cell>
          <table:table-cell table:number-columns-repeated="4"/>
        </table:table-row>
        <table:table-row table:style-name="ro1">
          <table:table-cell office:value-type="float" office:value="495.014739990234">
            <text:p>495.0147399902</text:p>
          </table:table-cell>
          <table:table-cell office:value-type="float" office:value="0.01327641">
            <text:p>0.01327641</text:p>
          </table:table-cell>
          <table:table-cell table:number-columns-repeated="4"/>
        </table:table-row>
        <table:table-row table:style-name="ro1">
          <table:table-cell office:value-type="float" office:value="495.130798339844">
            <text:p>495.1307983398</text:p>
          </table:table-cell>
          <table:table-cell office:value-type="float" office:value="0.01570982">
            <text:p>0.01570982</text:p>
          </table:table-cell>
          <table:table-cell table:number-columns-repeated="4"/>
        </table:table-row>
        <table:table-row table:style-name="ro1">
          <table:table-cell office:value-type="float" office:value="495.246856689453">
            <text:p>495.2468566895</text:p>
          </table:table-cell>
          <table:table-cell office:value-type="float" office:value="0.03035143">
            <text:p>0.03035143</text:p>
          </table:table-cell>
          <table:table-cell table:number-columns-repeated="4"/>
        </table:table-row>
        <table:table-row table:style-name="ro1">
          <table:table-cell office:value-type="float" office:value="495.362915039063">
            <text:p>495.3629150391</text:p>
          </table:table-cell>
          <table:table-cell office:value-type="float" office:value="0.03567714">
            <text:p>0.03567714</text:p>
          </table:table-cell>
          <table:table-cell table:number-columns-repeated="4"/>
        </table:table-row>
        <table:table-row table:style-name="ro1">
          <table:table-cell office:value-type="float" office:value="495.478973388672">
            <text:p>495.4789733887</text:p>
          </table:table-cell>
          <table:table-cell office:value-type="float" office:value="0.01571796">
            <text:p>0.01571796</text:p>
          </table:table-cell>
          <table:table-cell table:number-columns-repeated="4"/>
        </table:table-row>
        <table:table-row table:style-name="ro1">
          <table:table-cell office:value-type="float" office:value="495.595062255859">
            <text:p>495.5950622559</text:p>
          </table:table-cell>
          <table:table-cell office:value-type="float" office:value="0.03398006">
            <text:p>0.03398006</text:p>
          </table:table-cell>
          <table:table-cell table:number-columns-repeated="4"/>
        </table:table-row>
        <table:table-row table:style-name="ro1">
          <table:table-cell office:value-type="float" office:value="495.711151123047">
            <text:p>495.711151123</text:p>
          </table:table-cell>
          <table:table-cell office:value-type="float" office:value="0.02597062">
            <text:p>0.02597062</text:p>
          </table:table-cell>
          <table:table-cell table:number-columns-repeated="4"/>
        </table:table-row>
        <table:table-row table:style-name="ro1">
          <table:table-cell office:value-type="float" office:value="495.827209472656">
            <text:p>495.8272094727</text:p>
          </table:table-cell>
          <table:table-cell office:value-type="float" office:value="0.05528846">
            <text:p>0.05528846</text:p>
          </table:table-cell>
          <table:table-cell table:number-columns-repeated="4"/>
        </table:table-row>
        <table:table-row table:style-name="ro1">
          <table:table-cell office:value-type="float" office:value="495.943298339844">
            <text:p>495.9432983398</text:p>
          </table:table-cell>
          <table:table-cell office:value-type="float" office:value="0.02986804">
            <text:p>0.02986804</text:p>
          </table:table-cell>
          <table:table-cell table:number-columns-repeated="4"/>
        </table:table-row>
        <table:table-row table:style-name="ro1">
          <table:table-cell office:value-type="float" office:value="496.059387207031">
            <text:p>496.059387207</text:p>
          </table:table-cell>
          <table:table-cell office:value-type="float" office:value="0.04047514">
            <text:p>0.04047514</text:p>
          </table:table-cell>
          <table:table-cell table:number-columns-repeated="4"/>
        </table:table-row>
        <table:table-row table:style-name="ro1">
          <table:table-cell office:value-type="float" office:value="496.175506591797">
            <text:p>496.1755065918</text:p>
          </table:table-cell>
          <table:table-cell office:value-type="float" office:value="0.02911317">
            <text:p>0.02911317</text:p>
          </table:table-cell>
          <table:table-cell table:number-columns-repeated="4"/>
        </table:table-row>
        <table:table-row table:style-name="ro1">
          <table:table-cell office:value-type="float" office:value="496.291595458984">
            <text:p>496.291595459</text:p>
          </table:table-cell>
          <table:table-cell office:value-type="float" office:value="0.02694128">
            <text:p>0.02694128</text:p>
          </table:table-cell>
          <table:table-cell table:number-columns-repeated="4"/>
        </table:table-row>
        <table:table-row table:style-name="ro1">
          <table:table-cell office:value-type="float" office:value="496.407684326172">
            <text:p>496.4076843262</text:p>
          </table:table-cell>
          <table:table-cell office:value-type="float" office:value="0.046275">
            <text:p>0.046275</text:p>
          </table:table-cell>
          <table:table-cell table:number-columns-repeated="4"/>
        </table:table-row>
        <table:table-row table:style-name="ro1">
          <table:table-cell office:value-type="float" office:value="496.523803710938">
            <text:p>496.5238037109</text:p>
          </table:table-cell>
          <table:table-cell office:value-type="float" office:value="0.02501049">
            <text:p>0.02501049</text:p>
          </table:table-cell>
          <table:table-cell table:number-columns-repeated="4"/>
        </table:table-row>
        <table:table-row table:style-name="ro1">
          <table:table-cell office:value-type="float" office:value="496.639923095703">
            <text:p>496.6399230957</text:p>
          </table:table-cell>
          <table:table-cell office:value-type="float" office:value="0.04348619">
            <text:p>0.04348619</text:p>
          </table:table-cell>
          <table:table-cell table:number-columns-repeated="4"/>
        </table:table-row>
        <table:table-row table:style-name="ro1">
          <table:table-cell office:value-type="float" office:value="496.756042480469">
            <text:p>496.7560424805</text:p>
          </table:table-cell>
          <table:table-cell office:value-type="float" office:value="0.0419302">
            <text:p>0.0419302</text:p>
          </table:table-cell>
          <table:table-cell table:number-columns-repeated="4"/>
        </table:table-row>
        <table:table-row table:style-name="ro1">
          <table:table-cell office:value-type="float" office:value="496.872161865234">
            <text:p>496.8721618652</text:p>
          </table:table-cell>
          <table:table-cell office:value-type="float" office:value="0.03351107">
            <text:p>0.03351107</text:p>
          </table:table-cell>
          <table:table-cell table:number-columns-repeated="4"/>
        </table:table-row>
        <table:table-row table:style-name="ro1">
          <table:table-cell office:value-type="float" office:value="496.98828125">
            <text:p>496.98828125</text:p>
          </table:table-cell>
          <table:table-cell office:value-type="float" office:value="0.0398543">
            <text:p>0.0398543</text:p>
          </table:table-cell>
          <table:table-cell table:number-columns-repeated="4"/>
        </table:table-row>
        <table:table-row table:style-name="ro1">
          <table:table-cell office:value-type="float" office:value="497.104400634766">
            <text:p>497.1044006348</text:p>
          </table:table-cell>
          <table:table-cell office:value-type="float" office:value="0.06107422">
            <text:p>0.06107422</text:p>
          </table:table-cell>
          <table:table-cell table:number-columns-repeated="4"/>
        </table:table-row>
        <table:table-row table:style-name="ro1">
          <table:table-cell office:value-type="float" office:value="497.220520019531">
            <text:p>497.2205200195</text:p>
          </table:table-cell>
          <table:table-cell office:value-type="float" office:value="0.0445479">
            <text:p>0.0445479</text:p>
          </table:table-cell>
          <table:table-cell table:number-columns-repeated="4"/>
        </table:table-row>
        <table:table-row table:style-name="ro1">
          <table:table-cell office:value-type="float" office:value="497.336669921875">
            <text:p>497.3366699219</text:p>
          </table:table-cell>
          <table:table-cell office:value-type="float" office:value="0.03784305">
            <text:p>0.03784305</text:p>
          </table:table-cell>
          <table:table-cell table:number-columns-repeated="4"/>
        </table:table-row>
        <table:table-row table:style-name="ro1">
          <table:table-cell office:value-type="float" office:value="497.452819824219">
            <text:p>497.4528198242</text:p>
          </table:table-cell>
          <table:table-cell office:value-type="float" office:value="0.03305581">
            <text:p>0.03305581</text:p>
          </table:table-cell>
          <table:table-cell table:number-columns-repeated="4"/>
        </table:table-row>
        <table:table-row table:style-name="ro1">
          <table:table-cell office:value-type="float" office:value="497.568939208984">
            <text:p>497.568939209</text:p>
          </table:table-cell>
          <table:table-cell office:value-type="float" office:value="0.04856055">
            <text:p>0.04856055</text:p>
          </table:table-cell>
          <table:table-cell table:number-columns-repeated="4"/>
        </table:table-row>
        <table:table-row table:style-name="ro1">
          <table:table-cell office:value-type="float" office:value="497.685089111328">
            <text:p>497.6850891113</text:p>
          </table:table-cell>
          <table:table-cell office:value-type="float" office:value="0.05083514">
            <text:p>0.05083514</text:p>
          </table:table-cell>
          <table:table-cell table:number-columns-repeated="4"/>
        </table:table-row>
        <table:table-row table:style-name="ro1">
          <table:table-cell office:value-type="float" office:value="497.801239013672">
            <text:p>497.8012390137</text:p>
          </table:table-cell>
          <table:table-cell office:value-type="float" office:value="0.0448893">
            <text:p>0.0448893</text:p>
          </table:table-cell>
          <table:table-cell table:number-columns-repeated="4"/>
        </table:table-row>
        <table:table-row table:style-name="ro1">
          <table:table-cell office:value-type="float" office:value="497.917388916016">
            <text:p>497.917388916</text:p>
          </table:table-cell>
          <table:table-cell office:value-type="float" office:value="0.03504563">
            <text:p>0.03504563</text:p>
          </table:table-cell>
          <table:table-cell table:number-columns-repeated="4"/>
        </table:table-row>
        <table:table-row table:style-name="ro1">
          <table:table-cell office:value-type="float" office:value="498.033569335938">
            <text:p>498.0335693359</text:p>
          </table:table-cell>
          <table:table-cell office:value-type="float" office:value="0.05370598">
            <text:p>0.05370598</text:p>
          </table:table-cell>
          <table:table-cell table:number-columns-repeated="4"/>
        </table:table-row>
        <table:table-row table:style-name="ro1">
          <table:table-cell office:value-type="float" office:value="498.149719238281">
            <text:p>498.1497192383</text:p>
          </table:table-cell>
          <table:table-cell office:value-type="float" office:value="0.06650171">
            <text:p>0.06650171</text:p>
          </table:table-cell>
          <table:table-cell table:number-columns-repeated="4"/>
        </table:table-row>
        <table:table-row table:style-name="ro1">
          <table:table-cell office:value-type="float" office:value="498.265899658203">
            <text:p>498.2658996582</text:p>
          </table:table-cell>
          <table:table-cell office:value-type="float" office:value="0.04584542">
            <text:p>0.04584542</text:p>
          </table:table-cell>
          <table:table-cell table:number-columns-repeated="4"/>
        </table:table-row>
        <table:table-row table:style-name="ro1">
          <table:table-cell office:value-type="float" office:value="498.382049560547">
            <text:p>498.3820495605</text:p>
          </table:table-cell>
          <table:table-cell office:value-type="float" office:value="0.05021063">
            <text:p>0.05021063</text:p>
          </table:table-cell>
          <table:table-cell table:number-columns-repeated="4"/>
        </table:table-row>
        <table:table-row table:style-name="ro1">
          <table:table-cell office:value-type="float" office:value="498.498229980469">
            <text:p>498.4982299805</text:p>
          </table:table-cell>
          <table:table-cell office:value-type="float" office:value="0.06726865">
            <text:p>0.06726865</text:p>
          </table:table-cell>
          <table:table-cell table:number-columns-repeated="4"/>
        </table:table-row>
        <table:table-row table:style-name="ro1">
          <table:table-cell office:value-type="float" office:value="498.614410400391">
            <text:p>498.6144104004</text:p>
          </table:table-cell>
          <table:table-cell office:value-type="float" office:value="0.05368258">
            <text:p>0.05368258</text:p>
          </table:table-cell>
          <table:table-cell table:number-columns-repeated="4"/>
        </table:table-row>
        <table:table-row table:style-name="ro1">
          <table:table-cell office:value-type="float" office:value="498.730590820313">
            <text:p>498.7305908203</text:p>
          </table:table-cell>
          <table:table-cell office:value-type="float" office:value="0.05731753">
            <text:p>0.05731753</text:p>
          </table:table-cell>
          <table:table-cell table:number-columns-repeated="4"/>
        </table:table-row>
        <table:table-row table:style-name="ro1">
          <table:table-cell office:value-type="float" office:value="498.846771240234">
            <text:p>498.8467712402</text:p>
          </table:table-cell>
          <table:table-cell office:value-type="float" office:value="0.04343397">
            <text:p>0.04343397</text:p>
          </table:table-cell>
          <table:table-cell table:number-columns-repeated="4"/>
        </table:table-row>
        <table:table-row table:style-name="ro1">
          <table:table-cell office:value-type="float" office:value="498.962982177734">
            <text:p>498.9629821777</text:p>
          </table:table-cell>
          <table:table-cell office:value-type="float" office:value="0.06141505">
            <text:p>0.06141505</text:p>
          </table:table-cell>
          <table:table-cell table:number-columns-repeated="4"/>
        </table:table-row>
        <table:table-row table:style-name="ro1">
          <table:table-cell office:value-type="float" office:value="499.079162597656">
            <text:p>499.0791625977</text:p>
          </table:table-cell>
          <table:table-cell office:value-type="float" office:value="0.08545354">
            <text:p>0.08545354</text:p>
          </table:table-cell>
          <table:table-cell table:number-columns-repeated="4"/>
        </table:table-row>
        <table:table-row table:style-name="ro1">
          <table:table-cell office:value-type="float" office:value="499.195373535156">
            <text:p>499.1953735352</text:p>
          </table:table-cell>
          <table:table-cell office:value-type="float" office:value="0.05390158">
            <text:p>0.05390158</text:p>
          </table:table-cell>
          <table:table-cell table:number-columns-repeated="4"/>
        </table:table-row>
        <table:table-row table:style-name="ro1">
          <table:table-cell office:value-type="float" office:value="499.311584472656">
            <text:p>499.3115844727</text:p>
          </table:table-cell>
          <table:table-cell office:value-type="float" office:value="0.05596722">
            <text:p>0.05596722</text:p>
          </table:table-cell>
          <table:table-cell table:number-columns-repeated="4"/>
        </table:table-row>
        <table:table-row table:style-name="ro1">
          <table:table-cell office:value-type="float" office:value="499.427764892578">
            <text:p>499.4277648926</text:p>
          </table:table-cell>
          <table:table-cell office:value-type="float" office:value="0.0717987">
            <text:p>0.0717987</text:p>
          </table:table-cell>
          <table:table-cell table:number-columns-repeated="4"/>
        </table:table-row>
        <table:table-row table:style-name="ro1">
          <table:table-cell office:value-type="float" office:value="499.543975830078">
            <text:p>499.5439758301</text:p>
          </table:table-cell>
          <table:table-cell office:value-type="float" office:value="0.06315883">
            <text:p>0.06315883</text:p>
          </table:table-cell>
          <table:table-cell table:number-columns-repeated="4"/>
        </table:table-row>
        <table:table-row table:style-name="ro1">
          <table:table-cell office:value-type="float" office:value="499.660217285156">
            <text:p>499.6602172852</text:p>
          </table:table-cell>
          <table:table-cell office:value-type="float" office:value="0.05857682">
            <text:p>0.05857682</text:p>
          </table:table-cell>
          <table:table-cell table:number-columns-repeated="4"/>
        </table:table-row>
        <table:table-row table:style-name="ro1">
          <table:table-cell office:value-type="float" office:value="499.776428222656">
            <text:p>499.7764282227</text:p>
          </table:table-cell>
          <table:table-cell office:value-type="float" office:value="0.05498835">
            <text:p>0.05498835</text:p>
          </table:table-cell>
          <table:table-cell table:number-columns-repeated="4"/>
        </table:table-row>
        <table:table-row table:style-name="ro1">
          <table:table-cell office:value-type="float" office:value="499.892639160156">
            <text:p>499.8926391602</text:p>
          </table:table-cell>
          <table:table-cell office:value-type="float" office:value="0.07067021">
            <text:p>0.07067021</text:p>
          </table:table-cell>
          <table:table-cell table:number-columns-repeated="4"/>
        </table:table-row>
        <table:table-row table:style-name="ro1">
          <table:table-cell office:value-type="float" office:value="500.008880615234">
            <text:p>500.0088806152</text:p>
          </table:table-cell>
          <table:table-cell office:value-type="float" office:value="0.09833281">
            <text:p>0.09833281</text:p>
          </table:table-cell>
          <table:table-cell table:number-columns-repeated="4"/>
        </table:table-row>
        <table:table-row table:style-name="ro1">
          <table:table-cell office:value-type="float" office:value="500.125091552734">
            <text:p>500.1250915527</text:p>
          </table:table-cell>
          <table:table-cell office:value-type="float" office:value="0.06922462">
            <text:p>0.06922462</text:p>
          </table:table-cell>
          <table:table-cell table:number-columns-repeated="4"/>
        </table:table-row>
        <table:table-row table:style-name="ro1">
          <table:table-cell office:value-type="float" office:value="500.241333007813">
            <text:p>500.2413330078</text:p>
          </table:table-cell>
          <table:table-cell office:value-type="float" office:value="0.07767946">
            <text:p>0.07767946</text:p>
          </table:table-cell>
          <table:table-cell table:number-columns-repeated="4"/>
        </table:table-row>
        <table:table-row table:style-name="ro1">
          <table:table-cell office:value-type="float" office:value="500.357574462891">
            <text:p>500.3575744629</text:p>
          </table:table-cell>
          <table:table-cell office:value-type="float" office:value="0.07953888">
            <text:p>0.07953888</text:p>
          </table:table-cell>
          <table:table-cell table:number-columns-repeated="4"/>
        </table:table-row>
        <table:table-row table:style-name="ro1">
          <table:table-cell office:value-type="float" office:value="500.473815917969">
            <text:p>500.473815918</text:p>
          </table:table-cell>
          <table:table-cell office:value-type="float" office:value="0.08057256">
            <text:p>0.08057256</text:p>
          </table:table-cell>
          <table:table-cell table:number-columns-repeated="4"/>
        </table:table-row>
        <table:table-row table:style-name="ro1">
          <table:table-cell office:value-type="float" office:value="500.590057373047">
            <text:p>500.590057373</text:p>
          </table:table-cell>
          <table:table-cell office:value-type="float" office:value="0.07227403">
            <text:p>0.07227403</text:p>
          </table:table-cell>
          <table:table-cell table:number-columns-repeated="4"/>
        </table:table-row>
        <table:table-row table:style-name="ro1">
          <table:table-cell office:value-type="float" office:value="500.706298828125">
            <text:p>500.7062988281</text:p>
          </table:table-cell>
          <table:table-cell office:value-type="float" office:value="0.07272303">
            <text:p>0.07272303</text:p>
          </table:table-cell>
          <table:table-cell table:number-columns-repeated="4"/>
        </table:table-row>
        <table:table-row table:style-name="ro1">
          <table:table-cell office:value-type="float" office:value="500.822570800781">
            <text:p>500.8225708008</text:p>
          </table:table-cell>
          <table:table-cell office:value-type="float" office:value="0.08603984">
            <text:p>0.08603984</text:p>
          </table:table-cell>
          <table:table-cell table:number-columns-repeated="4"/>
        </table:table-row>
        <table:table-row table:style-name="ro1">
          <table:table-cell office:value-type="float" office:value="500.938812255859">
            <text:p>500.9388122559</text:p>
          </table:table-cell>
          <table:table-cell office:value-type="float" office:value="0.0905449">
            <text:p>0.0905449</text:p>
          </table:table-cell>
          <table:table-cell table:number-columns-repeated="4"/>
        </table:table-row>
        <table:table-row table:style-name="ro1">
          <table:table-cell office:value-type="float" office:value="501.055084228516">
            <text:p>501.0550842285</text:p>
          </table:table-cell>
          <table:table-cell office:value-type="float" office:value="0.07605078">
            <text:p>0.07605078</text:p>
          </table:table-cell>
          <table:table-cell table:number-columns-repeated="4"/>
        </table:table-row>
        <table:table-row table:style-name="ro1">
          <table:table-cell office:value-type="float" office:value="501.171356201172">
            <text:p>501.1713562012</text:p>
          </table:table-cell>
          <table:table-cell office:value-type="float" office:value="0.08651452">
            <text:p>0.08651452</text:p>
          </table:table-cell>
          <table:table-cell table:number-columns-repeated="4"/>
        </table:table-row>
        <table:table-row table:style-name="ro1">
          <table:table-cell office:value-type="float" office:value="501.287628173828">
            <text:p>501.2876281738</text:p>
          </table:table-cell>
          <table:table-cell office:value-type="float" office:value="0.1011521">
            <text:p>0.1011521</text:p>
          </table:table-cell>
          <table:table-cell table:number-columns-repeated="4"/>
        </table:table-row>
        <table:table-row table:style-name="ro1">
          <table:table-cell office:value-type="float" office:value="501.403900146484">
            <text:p>501.4039001465</text:p>
          </table:table-cell>
          <table:table-cell office:value-type="float" office:value="0.09563079">
            <text:p>0.09563079</text:p>
          </table:table-cell>
          <table:table-cell table:number-columns-repeated="4"/>
        </table:table-row>
        <table:table-row table:style-name="ro1">
          <table:table-cell office:value-type="float" office:value="501.520172119141">
            <text:p>501.5201721191</text:p>
          </table:table-cell>
          <table:table-cell office:value-type="float" office:value="0.09493934">
            <text:p>0.09493934</text:p>
          </table:table-cell>
          <table:table-cell table:number-columns-repeated="4"/>
        </table:table-row>
        <table:table-row table:style-name="ro1">
          <table:table-cell office:value-type="float" office:value="501.636444091797">
            <text:p>501.6364440918</text:p>
          </table:table-cell>
          <table:table-cell office:value-type="float" office:value="0.1624176">
            <text:p>0.1624176</text:p>
          </table:table-cell>
          <table:table-cell table:number-columns-repeated="4"/>
        </table:table-row>
        <table:table-row table:style-name="ro1">
          <table:table-cell office:value-type="float" office:value="501.752746582031">
            <text:p>501.752746582</text:p>
          </table:table-cell>
          <table:table-cell office:value-type="float" office:value="0.1034297">
            <text:p>0.1034297</text:p>
          </table:table-cell>
          <table:table-cell table:number-columns-repeated="4"/>
        </table:table-row>
        <table:table-row table:style-name="ro1">
          <table:table-cell office:value-type="float" office:value="501.869018554688">
            <text:p>501.8690185547</text:p>
          </table:table-cell>
          <table:table-cell office:value-type="float" office:value="0.103607">
            <text:p>0.103607</text:p>
          </table:table-cell>
          <table:table-cell table:number-columns-repeated="4"/>
        </table:table-row>
        <table:table-row table:style-name="ro1">
          <table:table-cell office:value-type="float" office:value="501.985321044922">
            <text:p>501.9853210449</text:p>
          </table:table-cell>
          <table:table-cell office:value-type="float" office:value="0.1104811">
            <text:p>0.1104811</text:p>
          </table:table-cell>
          <table:table-cell table:number-columns-repeated="4"/>
        </table:table-row>
        <table:table-row table:style-name="ro1">
          <table:table-cell office:value-type="float" office:value="502.101623535156">
            <text:p>502.1016235352</text:p>
          </table:table-cell>
          <table:table-cell office:value-type="float" office:value="0.09957635">
            <text:p>0.09957635</text:p>
          </table:table-cell>
          <table:table-cell table:number-columns-repeated="4"/>
        </table:table-row>
        <table:table-row table:style-name="ro1">
          <table:table-cell office:value-type="float" office:value="502.217926025391">
            <text:p>502.2179260254</text:p>
          </table:table-cell>
          <table:table-cell office:value-type="float" office:value="0.1158633">
            <text:p>0.1158633</text:p>
          </table:table-cell>
          <table:table-cell table:number-columns-repeated="4"/>
        </table:table-row>
        <table:table-row table:style-name="ro1">
          <table:table-cell office:value-type="float" office:value="502.334228515625">
            <text:p>502.3342285156</text:p>
          </table:table-cell>
          <table:table-cell office:value-type="float" office:value="0.112552">
            <text:p>0.112552</text:p>
          </table:table-cell>
          <table:table-cell table:number-columns-repeated="4"/>
        </table:table-row>
        <table:table-row table:style-name="ro1">
          <table:table-cell office:value-type="float" office:value="502.450531005859">
            <text:p>502.4505310059</text:p>
          </table:table-cell>
          <table:table-cell office:value-type="float" office:value="0.1088548">
            <text:p>0.1088548</text:p>
          </table:table-cell>
          <table:table-cell table:number-columns-repeated="4"/>
        </table:table-row>
        <table:table-row table:style-name="ro1">
          <table:table-cell office:value-type="float" office:value="502.566833496094">
            <text:p>502.5668334961</text:p>
          </table:table-cell>
          <table:table-cell office:value-type="float" office:value="0.1222498">
            <text:p>0.1222498</text:p>
          </table:table-cell>
          <table:table-cell table:number-columns-repeated="4"/>
        </table:table-row>
        <table:table-row table:style-name="ro1">
          <table:table-cell office:value-type="float" office:value="502.683166503906">
            <text:p>502.6831665039</text:p>
          </table:table-cell>
          <table:table-cell office:value-type="float" office:value="0.1292182">
            <text:p>0.1292182</text:p>
          </table:table-cell>
          <table:table-cell table:number-columns-repeated="4"/>
        </table:table-row>
        <table:table-row table:style-name="ro1">
          <table:table-cell office:value-type="float" office:value="502.799468994141">
            <text:p>502.7994689941</text:p>
          </table:table-cell>
          <table:table-cell office:value-type="float" office:value="0.1273646">
            <text:p>0.1273646</text:p>
          </table:table-cell>
          <table:table-cell table:number-columns-repeated="4"/>
        </table:table-row>
        <table:table-row table:style-name="ro1">
          <table:table-cell office:value-type="float" office:value="502.915802001953">
            <text:p>502.915802002</text:p>
          </table:table-cell>
          <table:table-cell office:value-type="float" office:value="0.1241361">
            <text:p>0.1241361</text:p>
          </table:table-cell>
          <table:table-cell table:number-columns-repeated="4"/>
        </table:table-row>
        <table:table-row table:style-name="ro1">
          <table:table-cell office:value-type="float" office:value="503.032135009766">
            <text:p>503.0321350098</text:p>
          </table:table-cell>
          <table:table-cell office:value-type="float" office:value="0.1240594">
            <text:p>0.1240594</text:p>
          </table:table-cell>
          <table:table-cell table:number-columns-repeated="4"/>
        </table:table-row>
        <table:table-row table:style-name="ro1">
          <table:table-cell office:value-type="float" office:value="503.148468017578">
            <text:p>503.1484680176</text:p>
          </table:table-cell>
          <table:table-cell office:value-type="float" office:value="0.1332789">
            <text:p>0.1332789</text:p>
          </table:table-cell>
          <table:table-cell table:number-columns-repeated="4"/>
        </table:table-row>
        <table:table-row table:style-name="ro1">
          <table:table-cell office:value-type="float" office:value="503.264801025391">
            <text:p>503.2648010254</text:p>
          </table:table-cell>
          <table:table-cell office:value-type="float" office:value="0.1457027">
            <text:p>0.1457027</text:p>
          </table:table-cell>
          <table:table-cell table:number-columns-repeated="4"/>
        </table:table-row>
        <table:table-row table:style-name="ro1">
          <table:table-cell office:value-type="float" office:value="503.381134033203">
            <text:p>503.3811340332</text:p>
          </table:table-cell>
          <table:table-cell office:value-type="float" office:value="0.1311237">
            <text:p>0.1311237</text:p>
          </table:table-cell>
          <table:table-cell table:number-columns-repeated="4"/>
        </table:table-row>
        <table:table-row table:style-name="ro1">
          <table:table-cell office:value-type="float" office:value="503.497497558594">
            <text:p>503.4974975586</text:p>
          </table:table-cell>
          <table:table-cell office:value-type="float" office:value="0.1395341">
            <text:p>0.1395341</text:p>
          </table:table-cell>
          <table:table-cell table:number-columns-repeated="4"/>
        </table:table-row>
        <table:table-row table:style-name="ro1">
          <table:table-cell office:value-type="float" office:value="503.613830566406">
            <text:p>503.6138305664</text:p>
          </table:table-cell>
          <table:table-cell office:value-type="float" office:value="0.1488254">
            <text:p>0.1488254</text:p>
          </table:table-cell>
          <table:table-cell table:number-columns-repeated="4"/>
        </table:table-row>
        <table:table-row table:style-name="ro1">
          <table:table-cell office:value-type="float" office:value="503.730194091797">
            <text:p>503.7301940918</text:p>
          </table:table-cell>
          <table:table-cell office:value-type="float" office:value="0.1489795">
            <text:p>0.1489795</text:p>
          </table:table-cell>
          <table:table-cell table:number-columns-repeated="4"/>
        </table:table-row>
        <table:table-row table:style-name="ro1">
          <table:table-cell office:value-type="float" office:value="503.846527099609">
            <text:p>503.8465270996</text:p>
          </table:table-cell>
          <table:table-cell office:value-type="float" office:value="0.1535016">
            <text:p>0.1535016</text:p>
          </table:table-cell>
          <table:table-cell table:number-columns-repeated="4"/>
        </table:table-row>
        <table:table-row table:style-name="ro1">
          <table:table-cell office:value-type="float" office:value="503.962890625">
            <text:p>503.962890625</text:p>
          </table:table-cell>
          <table:table-cell office:value-type="float" office:value="0.1474628">
            <text:p>0.1474628</text:p>
          </table:table-cell>
          <table:table-cell table:number-columns-repeated="4"/>
        </table:table-row>
        <table:table-row table:style-name="ro1">
          <table:table-cell office:value-type="float" office:value="504.079254150391">
            <text:p>504.0792541504</text:p>
          </table:table-cell>
          <table:table-cell office:value-type="float" office:value="0.1617995">
            <text:p>0.1617995</text:p>
          </table:table-cell>
          <table:table-cell table:number-columns-repeated="4"/>
        </table:table-row>
        <table:table-row table:style-name="ro1">
          <table:table-cell office:value-type="float" office:value="504.195617675781">
            <text:p>504.1956176758</text:p>
          </table:table-cell>
          <table:table-cell office:value-type="float" office:value="0.1713578">
            <text:p>0.1713578</text:p>
          </table:table-cell>
          <table:table-cell table:number-columns-repeated="4"/>
        </table:table-row>
        <table:table-row table:style-name="ro1">
          <table:table-cell office:value-type="float" office:value="504.31201171875">
            <text:p>504.3120117188</text:p>
          </table:table-cell>
          <table:table-cell office:value-type="float" office:value="0.1749888">
            <text:p>0.1749888</text:p>
          </table:table-cell>
          <table:table-cell table:number-columns-repeated="4"/>
        </table:table-row>
        <table:table-row table:style-name="ro1">
          <table:table-cell office:value-type="float" office:value="504.428375244141">
            <text:p>504.4283752441</text:p>
          </table:table-cell>
          <table:table-cell office:value-type="float" office:value="0.1657027">
            <text:p>0.1657027</text:p>
          </table:table-cell>
          <table:table-cell table:number-columns-repeated="4"/>
        </table:table-row>
        <table:table-row table:style-name="ro1">
          <table:table-cell office:value-type="float" office:value="504.544738769531">
            <text:p>504.5447387695</text:p>
          </table:table-cell>
          <table:table-cell office:value-type="float" office:value="0.1742177">
            <text:p>0.1742177</text:p>
          </table:table-cell>
          <table:table-cell table:number-columns-repeated="4"/>
        </table:table-row>
        <table:table-row table:style-name="ro1">
          <table:table-cell office:value-type="float" office:value="504.6611328125">
            <text:p>504.6611328125</text:p>
          </table:table-cell>
          <table:table-cell office:value-type="float" office:value="0.1804456">
            <text:p>0.1804456</text:p>
          </table:table-cell>
          <table:table-cell table:number-columns-repeated="4"/>
        </table:table-row>
        <table:table-row table:style-name="ro1">
          <table:table-cell office:value-type="float" office:value="504.777526855469">
            <text:p>504.7775268555</text:p>
          </table:table-cell>
          <table:table-cell office:value-type="float" office:value="0.1824259">
            <text:p>0.1824259</text:p>
          </table:table-cell>
          <table:table-cell table:number-columns-repeated="4"/>
        </table:table-row>
        <table:table-row table:style-name="ro1">
          <table:table-cell office:value-type="float" office:value="504.893920898438">
            <text:p>504.8939208984</text:p>
          </table:table-cell>
          <table:table-cell office:value-type="float" office:value="0.1873172">
            <text:p>0.1873172</text:p>
          </table:table-cell>
          <table:table-cell table:number-columns-repeated="4"/>
        </table:table-row>
        <table:table-row table:style-name="ro1">
          <table:table-cell office:value-type="float" office:value="505.010314941406">
            <text:p>505.0103149414</text:p>
          </table:table-cell>
          <table:table-cell office:value-type="float" office:value="0.1995679">
            <text:p>0.1995679</text:p>
          </table:table-cell>
          <table:table-cell table:number-columns-repeated="4"/>
        </table:table-row>
        <table:table-row table:style-name="ro1">
          <table:table-cell office:value-type="float" office:value="505.126708984375">
            <text:p>505.1267089844</text:p>
          </table:table-cell>
          <table:table-cell office:value-type="float" office:value="0.2215076">
            <text:p>0.2215076</text:p>
          </table:table-cell>
          <table:table-cell table:number-columns-repeated="4"/>
        </table:table-row>
        <table:table-row table:style-name="ro1">
          <table:table-cell office:value-type="float" office:value="505.243103027344">
            <text:p>505.2431030273</text:p>
          </table:table-cell>
          <table:table-cell office:value-type="float" office:value="0.1976827">
            <text:p>0.1976827</text:p>
          </table:table-cell>
          <table:table-cell table:number-columns-repeated="4"/>
        </table:table-row>
        <table:table-row table:style-name="ro1">
          <table:table-cell office:value-type="float" office:value="505.359497070313">
            <text:p>505.3594970703</text:p>
          </table:table-cell>
          <table:table-cell office:value-type="float" office:value="0.1998727">
            <text:p>0.1998727</text:p>
          </table:table-cell>
          <table:table-cell table:number-columns-repeated="4"/>
        </table:table-row>
        <table:table-row table:style-name="ro1">
          <table:table-cell office:value-type="float" office:value="505.475921630859">
            <text:p>505.4759216309</text:p>
          </table:table-cell>
          <table:table-cell office:value-type="float" office:value="0.2116586">
            <text:p>0.2116586</text:p>
          </table:table-cell>
          <table:table-cell table:number-columns-repeated="4"/>
        </table:table-row>
        <table:table-row table:style-name="ro1">
          <table:table-cell office:value-type="float" office:value="505.592346191406">
            <text:p>505.5923461914</text:p>
          </table:table-cell>
          <table:table-cell office:value-type="float" office:value="0.2231003">
            <text:p>0.2231003</text:p>
          </table:table-cell>
          <table:table-cell table:number-columns-repeated="4"/>
        </table:table-row>
        <table:table-row table:style-name="ro1">
          <table:table-cell office:value-type="float" office:value="505.708740234375">
            <text:p>505.7087402344</text:p>
          </table:table-cell>
          <table:table-cell office:value-type="float" office:value="0.2081493">
            <text:p>0.2081493</text:p>
          </table:table-cell>
          <table:table-cell table:number-columns-repeated="4"/>
        </table:table-row>
        <table:table-row table:style-name="ro1">
          <table:table-cell office:value-type="float" office:value="505.825164794922">
            <text:p>505.8251647949</text:p>
          </table:table-cell>
          <table:table-cell office:value-type="float" office:value="0.2174661">
            <text:p>0.2174661</text:p>
          </table:table-cell>
          <table:table-cell table:number-columns-repeated="4"/>
        </table:table-row>
        <table:table-row table:style-name="ro1">
          <table:table-cell office:value-type="float" office:value="505.941589355469">
            <text:p>505.9415893555</text:p>
          </table:table-cell>
          <table:table-cell office:value-type="float" office:value="0.2267839">
            <text:p>0.2267839</text:p>
          </table:table-cell>
          <table:table-cell table:number-columns-repeated="4"/>
        </table:table-row>
        <table:table-row table:style-name="ro1">
          <table:table-cell office:value-type="float" office:value="506.058013916016">
            <text:p>506.058013916</text:p>
          </table:table-cell>
          <table:table-cell office:value-type="float" office:value="0.2338465">
            <text:p>0.2338465</text:p>
          </table:table-cell>
          <table:table-cell table:number-columns-repeated="4"/>
        </table:table-row>
        <table:table-row table:style-name="ro1">
          <table:table-cell office:value-type="float" office:value="506.174468994141">
            <text:p>506.1744689941</text:p>
          </table:table-cell>
          <table:table-cell office:value-type="float" office:value="0.234137">
            <text:p>0.234137</text:p>
          </table:table-cell>
          <table:table-cell table:number-columns-repeated="4"/>
        </table:table-row>
        <table:table-row table:style-name="ro1">
          <table:table-cell office:value-type="float" office:value="506.290893554688">
            <text:p>506.2908935547</text:p>
          </table:table-cell>
          <table:table-cell office:value-type="float" office:value="0.2365753">
            <text:p>0.2365753</text:p>
          </table:table-cell>
          <table:table-cell table:number-columns-repeated="4"/>
        </table:table-row>
        <table:table-row table:style-name="ro1">
          <table:table-cell office:value-type="float" office:value="506.407348632813">
            <text:p>506.4073486328</text:p>
          </table:table-cell>
          <table:table-cell office:value-type="float" office:value="0.2522734">
            <text:p>0.2522734</text:p>
          </table:table-cell>
          <table:table-cell table:number-columns-repeated="4"/>
        </table:table-row>
        <table:table-row table:style-name="ro1">
          <table:table-cell office:value-type="float" office:value="506.523773193359">
            <text:p>506.5237731934</text:p>
          </table:table-cell>
          <table:table-cell office:value-type="float" office:value="0.2498308">
            <text:p>0.2498308</text:p>
          </table:table-cell>
          <table:table-cell table:number-columns-repeated="4"/>
        </table:table-row>
        <table:table-row table:style-name="ro1">
          <table:table-cell office:value-type="float" office:value="506.640228271484">
            <text:p>506.6402282715</text:p>
          </table:table-cell>
          <table:table-cell office:value-type="float" office:value="0.2547655">
            <text:p>0.2547655</text:p>
          </table:table-cell>
          <table:table-cell table:number-columns-repeated="4"/>
        </table:table-row>
        <table:table-row table:style-name="ro1">
          <table:table-cell office:value-type="float" office:value="506.756683349609">
            <text:p>506.7566833496</text:p>
          </table:table-cell>
          <table:table-cell office:value-type="float" office:value="0.2627928">
            <text:p>0.2627928</text:p>
          </table:table-cell>
          <table:table-cell table:number-columns-repeated="4"/>
        </table:table-row>
        <table:table-row table:style-name="ro1">
          <table:table-cell office:value-type="float" office:value="506.873138427734">
            <text:p>506.8731384277</text:p>
          </table:table-cell>
          <table:table-cell office:value-type="float" office:value="0.2747643">
            <text:p>0.2747643</text:p>
          </table:table-cell>
          <table:table-cell table:number-columns-repeated="4"/>
        </table:table-row>
        <table:table-row table:style-name="ro1">
          <table:table-cell office:value-type="float" office:value="506.989593505859">
            <text:p>506.9895935059</text:p>
          </table:table-cell>
          <table:table-cell office:value-type="float" office:value="0.2681657">
            <text:p>0.2681657</text:p>
          </table:table-cell>
          <table:table-cell table:number-columns-repeated="4"/>
        </table:table-row>
        <table:table-row table:style-name="ro1">
          <table:table-cell office:value-type="float" office:value="507.106048583984">
            <text:p>507.106048584</text:p>
          </table:table-cell>
          <table:table-cell office:value-type="float" office:value="0.2671429">
            <text:p>0.2671429</text:p>
          </table:table-cell>
          <table:table-cell table:number-columns-repeated="4"/>
        </table:table-row>
        <table:table-row table:style-name="ro1">
          <table:table-cell office:value-type="float" office:value="507.222534179688">
            <text:p>507.2225341797</text:p>
          </table:table-cell>
          <table:table-cell office:value-type="float" office:value="0.2664463">
            <text:p>0.2664463</text:p>
          </table:table-cell>
          <table:table-cell table:number-columns-repeated="4"/>
        </table:table-row>
        <table:table-row table:style-name="ro1">
          <table:table-cell office:value-type="float" office:value="507.338989257813">
            <text:p>507.3389892578</text:p>
          </table:table-cell>
          <table:table-cell office:value-type="float" office:value="0.2768916">
            <text:p>0.2768916</text:p>
          </table:table-cell>
          <table:table-cell table:number-columns-repeated="4"/>
        </table:table-row>
        <table:table-row table:style-name="ro1">
          <table:table-cell office:value-type="float" office:value="507.455474853516">
            <text:p>507.4554748535</text:p>
          </table:table-cell>
          <table:table-cell office:value-type="float" office:value="0.2891609">
            <text:p>0.2891609</text:p>
          </table:table-cell>
          <table:table-cell table:number-columns-repeated="4"/>
        </table:table-row>
        <table:table-row table:style-name="ro1">
          <table:table-cell office:value-type="float" office:value="507.571960449219">
            <text:p>507.5719604492</text:p>
          </table:table-cell>
          <table:table-cell office:value-type="float" office:value="0.2798503">
            <text:p>0.2798503</text:p>
          </table:table-cell>
          <table:table-cell table:number-columns-repeated="4"/>
        </table:table-row>
        <table:table-row table:style-name="ro1">
          <table:table-cell office:value-type="float" office:value="507.688446044922">
            <text:p>507.6884460449</text:p>
          </table:table-cell>
          <table:table-cell office:value-type="float" office:value="0.2892632">
            <text:p>0.2892632</text:p>
          </table:table-cell>
          <table:table-cell table:number-columns-repeated="4"/>
        </table:table-row>
        <table:table-row table:style-name="ro1">
          <table:table-cell office:value-type="float" office:value="507.804931640625">
            <text:p>507.8049316406</text:p>
          </table:table-cell>
          <table:table-cell office:value-type="float" office:value="0.3020231">
            <text:p>0.3020231</text:p>
          </table:table-cell>
          <table:table-cell table:number-columns-repeated="4"/>
        </table:table-row>
        <table:table-row table:style-name="ro1">
          <table:table-cell office:value-type="float" office:value="507.921417236328">
            <text:p>507.9214172363</text:p>
          </table:table-cell>
          <table:table-cell office:value-type="float" office:value="0.3046623">
            <text:p>0.3046623</text:p>
          </table:table-cell>
          <table:table-cell table:number-columns-repeated="4"/>
        </table:table-row>
        <table:table-row table:style-name="ro1">
          <table:table-cell office:value-type="float" office:value="508.037902832031">
            <text:p>508.037902832</text:p>
          </table:table-cell>
          <table:table-cell office:value-type="float" office:value="0.3084749">
            <text:p>0.3084749</text:p>
          </table:table-cell>
          <table:table-cell table:number-columns-repeated="4"/>
        </table:table-row>
        <table:table-row table:style-name="ro1">
          <table:table-cell office:value-type="float" office:value="508.154388427734">
            <text:p>508.1543884277</text:p>
          </table:table-cell>
          <table:table-cell office:value-type="float" office:value="0.3185405">
            <text:p>0.3185405</text:p>
          </table:table-cell>
          <table:table-cell table:number-columns-repeated="4"/>
        </table:table-row>
        <table:table-row table:style-name="ro1">
          <table:table-cell office:value-type="float" office:value="508.270904541016">
            <text:p>508.270904541</text:p>
          </table:table-cell>
          <table:table-cell office:value-type="float" office:value="0.3265861">
            <text:p>0.3265861</text:p>
          </table:table-cell>
          <table:table-cell table:number-columns-repeated="4"/>
        </table:table-row>
        <table:table-row table:style-name="ro1">
          <table:table-cell office:value-type="float" office:value="508.387420654297">
            <text:p>508.3874206543</text:p>
          </table:table-cell>
          <table:table-cell office:value-type="float" office:value="0.3241898">
            <text:p>0.3241898</text:p>
          </table:table-cell>
          <table:table-cell table:number-columns-repeated="4"/>
        </table:table-row>
        <table:table-row table:style-name="ro1">
          <table:table-cell office:value-type="float" office:value="508.50390625">
            <text:p>508.50390625</text:p>
          </table:table-cell>
          <table:table-cell office:value-type="float" office:value="0.3248577">
            <text:p>0.3248577</text:p>
          </table:table-cell>
          <table:table-cell table:number-columns-repeated="4"/>
        </table:table-row>
        <table:table-row table:style-name="ro1">
          <table:table-cell office:value-type="float" office:value="508.620422363281">
            <text:p>508.6204223633</text:p>
          </table:table-cell>
          <table:table-cell office:value-type="float" office:value="0.3311678">
            <text:p>0.3311678</text:p>
          </table:table-cell>
          <table:table-cell table:number-columns-repeated="4"/>
        </table:table-row>
        <table:table-row table:style-name="ro1">
          <table:table-cell office:value-type="float" office:value="508.736938476563">
            <text:p>508.7369384766</text:p>
          </table:table-cell>
          <table:table-cell office:value-type="float" office:value="0.3609523">
            <text:p>0.3609523</text:p>
          </table:table-cell>
          <table:table-cell table:number-columns-repeated="4"/>
        </table:table-row>
        <table:table-row table:style-name="ro1">
          <table:table-cell office:value-type="float" office:value="508.853454589844">
            <text:p>508.8534545898</text:p>
          </table:table-cell>
          <table:table-cell office:value-type="float" office:value="0.3564497">
            <text:p>0.3564497</text:p>
          </table:table-cell>
          <table:table-cell table:number-columns-repeated="4"/>
        </table:table-row>
        <table:table-row table:style-name="ro1">
          <table:table-cell office:value-type="float" office:value="508.970001220703">
            <text:p>508.9700012207</text:p>
          </table:table-cell>
          <table:table-cell office:value-type="float" office:value="0.3501715">
            <text:p>0.3501715</text:p>
          </table:table-cell>
          <table:table-cell table:number-columns-repeated="4"/>
        </table:table-row>
        <table:table-row table:style-name="ro1">
          <table:table-cell office:value-type="float" office:value="509.086517333984">
            <text:p>509.086517334</text:p>
          </table:table-cell>
          <table:table-cell office:value-type="float" office:value="0.359705">
            <text:p>0.359705</text:p>
          </table:table-cell>
          <table:table-cell table:number-columns-repeated="4"/>
        </table:table-row>
        <table:table-row table:style-name="ro1">
          <table:table-cell office:value-type="float" office:value="509.203063964844">
            <text:p>509.2030639648</text:p>
          </table:table-cell>
          <table:table-cell office:value-type="float" office:value="0.3796947">
            <text:p>0.3796947</text:p>
          </table:table-cell>
          <table:table-cell table:number-columns-repeated="4"/>
        </table:table-row>
        <table:table-row table:style-name="ro1">
          <table:table-cell office:value-type="float" office:value="509.319580078125">
            <text:p>509.3195800781</text:p>
          </table:table-cell>
          <table:table-cell office:value-type="float" office:value="0.3677572">
            <text:p>0.3677572</text:p>
          </table:table-cell>
          <table:table-cell table:number-columns-repeated="4"/>
        </table:table-row>
        <table:table-row table:style-name="ro1">
          <table:table-cell office:value-type="float" office:value="509.436126708984">
            <text:p>509.436126709</text:p>
          </table:table-cell>
          <table:table-cell office:value-type="float" office:value="0.3739736">
            <text:p>0.3739736</text:p>
          </table:table-cell>
          <table:table-cell table:number-columns-repeated="4"/>
        </table:table-row>
        <table:table-row table:style-name="ro1">
          <table:table-cell office:value-type="float" office:value="509.552673339844">
            <text:p>509.5526733398</text:p>
          </table:table-cell>
          <table:table-cell office:value-type="float" office:value="0.3748424">
            <text:p>0.3748424</text:p>
          </table:table-cell>
          <table:table-cell table:number-columns-repeated="4"/>
        </table:table-row>
        <table:table-row table:style-name="ro1">
          <table:table-cell office:value-type="float" office:value="509.669219970703">
            <text:p>509.6692199707</text:p>
          </table:table-cell>
          <table:table-cell office:value-type="float" office:value="0.3951976">
            <text:p>0.3951976</text:p>
          </table:table-cell>
          <table:table-cell table:number-columns-repeated="4"/>
        </table:table-row>
        <table:table-row table:style-name="ro1">
          <table:table-cell office:value-type="float" office:value="509.785766601563">
            <text:p>509.7857666016</text:p>
          </table:table-cell>
          <table:table-cell office:value-type="float" office:value="0.3973842">
            <text:p>0.3973842</text:p>
          </table:table-cell>
          <table:table-cell table:number-columns-repeated="4"/>
        </table:table-row>
        <table:table-row table:style-name="ro1">
          <table:table-cell office:value-type="float" office:value="509.902313232422">
            <text:p>509.9023132324</text:p>
          </table:table-cell>
          <table:table-cell office:value-type="float" office:value="0.3943867">
            <text:p>0.3943867</text:p>
          </table:table-cell>
          <table:table-cell table:number-columns-repeated="4"/>
        </table:table-row>
        <table:table-row table:style-name="ro1">
          <table:table-cell office:value-type="float" office:value="510.018890380859">
            <text:p>510.0188903809</text:p>
          </table:table-cell>
          <table:table-cell office:value-type="float" office:value="0.3938987">
            <text:p>0.3938987</text:p>
          </table:table-cell>
          <table:table-cell table:number-columns-repeated="4"/>
        </table:table-row>
        <table:table-row table:style-name="ro1">
          <table:table-cell office:value-type="float" office:value="510.135437011719">
            <text:p>510.1354370117</text:p>
          </table:table-cell>
          <table:table-cell office:value-type="float" office:value="0.4030631">
            <text:p>0.4030631</text:p>
          </table:table-cell>
          <table:table-cell table:number-columns-repeated="4"/>
        </table:table-row>
        <table:table-row table:style-name="ro1">
          <table:table-cell office:value-type="float" office:value="510.252014160156">
            <text:p>510.2520141602</text:p>
          </table:table-cell>
          <table:table-cell office:value-type="float" office:value="0.4151646">
            <text:p>0.4151646</text:p>
          </table:table-cell>
          <table:table-cell table:number-columns-repeated="4"/>
        </table:table-row>
        <table:table-row table:style-name="ro1">
          <table:table-cell office:value-type="float" office:value="510.368560791016">
            <text:p>510.368560791</text:p>
          </table:table-cell>
          <table:table-cell office:value-type="float" office:value="0.4172612">
            <text:p>0.4172612</text:p>
          </table:table-cell>
          <table:table-cell table:number-columns-repeated="4"/>
        </table:table-row>
        <table:table-row table:style-name="ro1">
          <table:table-cell office:value-type="float" office:value="510.485137939453">
            <text:p>510.4851379395</text:p>
          </table:table-cell>
          <table:table-cell office:value-type="float" office:value="0.4129483">
            <text:p>0.4129483</text:p>
          </table:table-cell>
          <table:table-cell table:number-columns-repeated="4"/>
        </table:table-row>
        <table:table-row table:style-name="ro1">
          <table:table-cell office:value-type="float" office:value="510.601715087891">
            <text:p>510.6017150879</text:p>
          </table:table-cell>
          <table:table-cell office:value-type="float" office:value="0.4347668">
            <text:p>0.4347668</text:p>
          </table:table-cell>
          <table:table-cell table:number-columns-repeated="4"/>
        </table:table-row>
        <table:table-row table:style-name="ro1">
          <table:table-cell office:value-type="float" office:value="510.718322753906">
            <text:p>510.7183227539</text:p>
          </table:table-cell>
          <table:table-cell office:value-type="float" office:value="0.4381938">
            <text:p>0.4381938</text:p>
          </table:table-cell>
          <table:table-cell table:number-columns-repeated="4"/>
        </table:table-row>
        <table:table-row table:style-name="ro1">
          <table:table-cell office:value-type="float" office:value="510.834899902344">
            <text:p>510.8348999023</text:p>
          </table:table-cell>
          <table:table-cell office:value-type="float" office:value="0.4280088">
            <text:p>0.4280088</text:p>
          </table:table-cell>
          <table:table-cell table:number-columns-repeated="4"/>
        </table:table-row>
        <table:table-row table:style-name="ro1">
          <table:table-cell office:value-type="float" office:value="510.951477050781">
            <text:p>510.9514770508</text:p>
          </table:table-cell>
          <table:table-cell office:value-type="float" office:value="0.4539557">
            <text:p>0.4539557</text:p>
          </table:table-cell>
          <table:table-cell table:number-columns-repeated="4"/>
        </table:table-row>
        <table:table-row table:style-name="ro1">
          <table:table-cell office:value-type="float" office:value="511.068084716797">
            <text:p>511.0680847168</text:p>
          </table:table-cell>
          <table:table-cell office:value-type="float" office:value="0.4471012">
            <text:p>0.4471012</text:p>
          </table:table-cell>
          <table:table-cell table:number-columns-repeated="4"/>
        </table:table-row>
        <table:table-row table:style-name="ro1">
          <table:table-cell office:value-type="float" office:value="511.184661865234">
            <text:p>511.1846618652</text:p>
          </table:table-cell>
          <table:table-cell office:value-type="float" office:value="0.4489276">
            <text:p>0.4489276</text:p>
          </table:table-cell>
          <table:table-cell table:number-columns-repeated="4"/>
        </table:table-row>
        <table:table-row table:style-name="ro1">
          <table:table-cell office:value-type="float" office:value="511.30126953125">
            <text:p>511.3012695313</text:p>
          </table:table-cell>
          <table:table-cell office:value-type="float" office:value="0.4496832">
            <text:p>0.4496832</text:p>
          </table:table-cell>
          <table:table-cell table:number-columns-repeated="4"/>
        </table:table-row>
        <table:table-row table:style-name="ro1">
          <table:table-cell office:value-type="float" office:value="511.417877197266">
            <text:p>511.4178771973</text:p>
          </table:table-cell>
          <table:table-cell office:value-type="float" office:value="0.4532139">
            <text:p>0.4532139</text:p>
          </table:table-cell>
          <table:table-cell table:number-columns-repeated="4"/>
        </table:table-row>
        <table:table-row table:style-name="ro1">
          <table:table-cell office:value-type="float" office:value="511.534484863281">
            <text:p>511.5344848633</text:p>
          </table:table-cell>
          <table:table-cell office:value-type="float" office:value="0.4666762">
            <text:p>0.4666762</text:p>
          </table:table-cell>
          <table:table-cell table:number-columns-repeated="4"/>
        </table:table-row>
        <table:table-row table:style-name="ro1">
          <table:table-cell office:value-type="float" office:value="511.651092529297">
            <text:p>511.6510925293</text:p>
          </table:table-cell>
          <table:table-cell office:value-type="float" office:value="0.4698298">
            <text:p>0.4698298</text:p>
          </table:table-cell>
          <table:table-cell table:number-columns-repeated="4"/>
        </table:table-row>
        <table:table-row table:style-name="ro1">
          <table:table-cell office:value-type="float" office:value="511.767700195313">
            <text:p>511.7677001953</text:p>
          </table:table-cell>
          <table:table-cell office:value-type="float" office:value="0.4772105">
            <text:p>0.4772105</text:p>
          </table:table-cell>
          <table:table-cell table:number-columns-repeated="4"/>
        </table:table-row>
        <table:table-row table:style-name="ro1">
          <table:table-cell office:value-type="float" office:value="511.884338378906">
            <text:p>511.8843383789</text:p>
          </table:table-cell>
          <table:table-cell office:value-type="float" office:value="0.4817169">
            <text:p>0.4817169</text:p>
          </table:table-cell>
          <table:table-cell table:number-columns-repeated="4"/>
        </table:table-row>
        <table:table-row table:style-name="ro1">
          <table:table-cell office:value-type="float" office:value="512.0009765625">
            <text:p>512.0009765625</text:p>
          </table:table-cell>
          <table:table-cell office:value-type="float" office:value="0.4863065">
            <text:p>0.4863065</text:p>
          </table:table-cell>
          <table:table-cell table:number-columns-repeated="4"/>
        </table:table-row>
        <table:table-row table:style-name="ro1">
          <table:table-cell office:value-type="float" office:value="512.117553710938">
            <text:p>512.1175537109</text:p>
          </table:table-cell>
          <table:table-cell office:value-type="float" office:value="0.5000002">
            <text:p>0.5000002</text:p>
          </table:table-cell>
          <table:table-cell table:number-columns-repeated="4"/>
        </table:table-row>
        <table:table-row table:style-name="ro1">
          <table:table-cell office:value-type="float" office:value="512.234191894531">
            <text:p>512.2341918945</text:p>
          </table:table-cell>
          <table:table-cell office:value-type="float" office:value="0.5473565">
            <text:p>0.5473565</text:p>
          </table:table-cell>
          <table:table-cell table:number-columns-repeated="4"/>
        </table:table-row>
        <table:table-row table:style-name="ro1">
          <table:table-cell office:value-type="float" office:value="512.350830078125">
            <text:p>512.3508300781</text:p>
          </table:table-cell>
          <table:table-cell office:value-type="float" office:value="0.5032358">
            <text:p>0.5032358</text:p>
          </table:table-cell>
          <table:table-cell table:number-columns-repeated="4"/>
        </table:table-row>
        <table:table-row table:style-name="ro1">
          <table:table-cell office:value-type="float" office:value="512.467468261719">
            <text:p>512.4674682617</text:p>
          </table:table-cell>
          <table:table-cell office:value-type="float" office:value="0.5160744">
            <text:p>0.5160744</text:p>
          </table:table-cell>
          <table:table-cell table:number-columns-repeated="4"/>
        </table:table-row>
        <table:table-row table:style-name="ro1">
          <table:table-cell office:value-type="float" office:value="512.584106445313">
            <text:p>512.5841064453</text:p>
          </table:table-cell>
          <table:table-cell office:value-type="float" office:value="0.509284">
            <text:p>0.509284</text:p>
          </table:table-cell>
          <table:table-cell table:number-columns-repeated="4"/>
        </table:table-row>
        <table:table-row table:style-name="ro1">
          <table:table-cell office:value-type="float" office:value="512.700744628906">
            <text:p>512.7007446289</text:p>
          </table:table-cell>
          <table:table-cell office:value-type="float" office:value="0.5331795">
            <text:p>0.5331795</text:p>
          </table:table-cell>
          <table:table-cell table:number-columns-repeated="4"/>
        </table:table-row>
        <table:table-row table:style-name="ro1">
          <table:table-cell office:value-type="float" office:value="512.8173828125">
            <text:p>512.8173828125</text:p>
          </table:table-cell>
          <table:table-cell office:value-type="float" office:value="0.5120218">
            <text:p>0.5120218</text:p>
          </table:table-cell>
          <table:table-cell table:number-columns-repeated="4"/>
        </table:table-row>
        <table:table-row table:style-name="ro1">
          <table:table-cell office:value-type="float" office:value="512.93408203125">
            <text:p>512.9340820313</text:p>
          </table:table-cell>
          <table:table-cell office:value-type="float" office:value="0.5268459">
            <text:p>0.5268459</text:p>
          </table:table-cell>
          <table:table-cell table:number-columns-repeated="4"/>
        </table:table-row>
        <table:table-row table:style-name="ro1">
          <table:table-cell office:value-type="float" office:value="513.050720214844">
            <text:p>513.0507202148</text:p>
          </table:table-cell>
          <table:table-cell office:value-type="float" office:value="0.5361366">
            <text:p>0.5361366</text:p>
          </table:table-cell>
          <table:table-cell table:number-columns-repeated="4"/>
        </table:table-row>
        <table:table-row table:style-name="ro1">
          <table:table-cell office:value-type="float" office:value="513.167358398438">
            <text:p>513.1673583984</text:p>
          </table:table-cell>
          <table:table-cell office:value-type="float" office:value="0.5233671">
            <text:p>0.5233671</text:p>
          </table:table-cell>
          <table:table-cell table:number-columns-repeated="4"/>
        </table:table-row>
        <table:table-row table:style-name="ro1">
          <table:table-cell office:value-type="float" office:value="513.284057617188">
            <text:p>513.2840576172</text:p>
          </table:table-cell>
          <table:table-cell office:value-type="float" office:value="0.5272558">
            <text:p>0.5272558</text:p>
          </table:table-cell>
          <table:table-cell table:number-columns-repeated="4"/>
        </table:table-row>
        <table:table-row table:style-name="ro1">
          <table:table-cell office:value-type="float" office:value="513.400695800781">
            <text:p>513.4006958008</text:p>
          </table:table-cell>
          <table:table-cell office:value-type="float" office:value="0.5513894">
            <text:p>0.5513894</text:p>
          </table:table-cell>
          <table:table-cell table:number-columns-repeated="4"/>
        </table:table-row>
        <table:table-row table:style-name="ro1">
          <table:table-cell office:value-type="float" office:value="513.517395019531">
            <text:p>513.5173950195</text:p>
          </table:table-cell>
          <table:table-cell office:value-type="float" office:value="0.5526835">
            <text:p>0.5526835</text:p>
          </table:table-cell>
          <table:table-cell table:number-columns-repeated="4"/>
        </table:table-row>
        <table:table-row table:style-name="ro1">
          <table:table-cell office:value-type="float" office:value="513.634033203125">
            <text:p>513.6340332031</text:p>
          </table:table-cell>
          <table:table-cell office:value-type="float" office:value="0.5409401">
            <text:p>0.5409401</text:p>
          </table:table-cell>
          <table:table-cell table:number-columns-repeated="4"/>
        </table:table-row>
        <table:table-row table:style-name="ro1">
          <table:table-cell office:value-type="float" office:value="513.750732421875">
            <text:p>513.7507324219</text:p>
          </table:table-cell>
          <table:table-cell office:value-type="float" office:value="0.5597429">
            <text:p>0.5597429</text:p>
          </table:table-cell>
          <table:table-cell table:number-columns-repeated="4"/>
        </table:table-row>
        <table:table-row table:style-name="ro1">
          <table:table-cell office:value-type="float" office:value="513.867431640625">
            <text:p>513.8674316406</text:p>
          </table:table-cell>
          <table:table-cell office:value-type="float" office:value="0.5643248">
            <text:p>0.5643248</text:p>
          </table:table-cell>
          <table:table-cell table:number-columns-repeated="4"/>
        </table:table-row>
        <table:table-row table:style-name="ro1">
          <table:table-cell office:value-type="float" office:value="513.984069824219">
            <text:p>513.9840698242</text:p>
          </table:table-cell>
          <table:table-cell office:value-type="float" office:value="0.5697448">
            <text:p>0.5697448</text:p>
          </table:table-cell>
          <table:table-cell table:number-columns-repeated="4"/>
        </table:table-row>
        <table:table-row table:style-name="ro1">
          <table:table-cell office:value-type="float" office:value="514.100769042969">
            <text:p>514.100769043</text:p>
          </table:table-cell>
          <table:table-cell office:value-type="float" office:value="0.5729294">
            <text:p>0.5729294</text:p>
          </table:table-cell>
          <table:table-cell table:number-columns-repeated="4"/>
        </table:table-row>
        <table:table-row table:style-name="ro1">
          <table:table-cell office:value-type="float" office:value="514.217468261719">
            <text:p>514.2174682617</text:p>
          </table:table-cell>
          <table:table-cell office:value-type="float" office:value="0.563247">
            <text:p>0.563247</text:p>
          </table:table-cell>
          <table:table-cell table:number-columns-repeated="4"/>
        </table:table-row>
        <table:table-row table:style-name="ro1">
          <table:table-cell office:value-type="float" office:value="514.334167480469">
            <text:p>514.3341674805</text:p>
          </table:table-cell>
          <table:table-cell office:value-type="float" office:value="0.575129">
            <text:p>0.575129</text:p>
          </table:table-cell>
          <table:table-cell table:number-columns-repeated="4"/>
        </table:table-row>
        <table:table-row table:style-name="ro1">
          <table:table-cell office:value-type="float" office:value="514.450866699219">
            <text:p>514.4508666992</text:p>
          </table:table-cell>
          <table:table-cell office:value-type="float" office:value="0.5845589">
            <text:p>0.5845589</text:p>
          </table:table-cell>
          <table:table-cell table:number-columns-repeated="4"/>
        </table:table-row>
        <table:table-row table:style-name="ro1">
          <table:table-cell office:value-type="float" office:value="514.567565917969">
            <text:p>514.567565918</text:p>
          </table:table-cell>
          <table:table-cell office:value-type="float" office:value="0.5723043">
            <text:p>0.5723043</text:p>
          </table:table-cell>
          <table:table-cell table:number-columns-repeated="4"/>
        </table:table-row>
        <table:table-row table:style-name="ro1">
          <table:table-cell office:value-type="float" office:value="514.684265136719">
            <text:p>514.6842651367</text:p>
          </table:table-cell>
          <table:table-cell office:value-type="float" office:value="0.5813432">
            <text:p>0.5813432</text:p>
          </table:table-cell>
          <table:table-cell table:number-columns-repeated="4"/>
        </table:table-row>
        <table:table-row table:style-name="ro1">
          <table:table-cell office:value-type="float" office:value="514.801025390625">
            <text:p>514.8010253906</text:p>
          </table:table-cell>
          <table:table-cell office:value-type="float" office:value="0.5886063">
            <text:p>0.5886063</text:p>
          </table:table-cell>
          <table:table-cell table:number-columns-repeated="4"/>
        </table:table-row>
        <table:table-row table:style-name="ro1">
          <table:table-cell office:value-type="float" office:value="514.917724609375">
            <text:p>514.9177246094</text:p>
          </table:table-cell>
          <table:table-cell office:value-type="float" office:value="0.5987726">
            <text:p>0.5987726</text:p>
          </table:table-cell>
          <table:table-cell table:number-columns-repeated="4"/>
        </table:table-row>
        <table:table-row table:style-name="ro1">
          <table:table-cell office:value-type="float" office:value="515.034423828125">
            <text:p>515.0344238281</text:p>
          </table:table-cell>
          <table:table-cell office:value-type="float" office:value="0.5899422">
            <text:p>0.5899422</text:p>
          </table:table-cell>
          <table:table-cell table:number-columns-repeated="4"/>
        </table:table-row>
        <table:table-row table:style-name="ro1">
          <table:table-cell office:value-type="float" office:value="515.151184082031">
            <text:p>515.151184082</text:p>
          </table:table-cell>
          <table:table-cell office:value-type="float" office:value="0.5825784">
            <text:p>0.5825784</text:p>
          </table:table-cell>
          <table:table-cell table:number-columns-repeated="4"/>
        </table:table-row>
        <table:table-row table:style-name="ro1">
          <table:table-cell office:value-type="float" office:value="515.267883300781">
            <text:p>515.2678833008</text:p>
          </table:table-cell>
          <table:table-cell office:value-type="float" office:value="0.5989513">
            <text:p>0.5989513</text:p>
          </table:table-cell>
          <table:table-cell table:number-columns-repeated="4"/>
        </table:table-row>
        <table:table-row table:style-name="ro1">
          <table:table-cell office:value-type="float" office:value="515.384643554688">
            <text:p>515.3846435547</text:p>
          </table:table-cell>
          <table:table-cell office:value-type="float" office:value="0.6075544">
            <text:p>0.6075544</text:p>
          </table:table-cell>
          <table:table-cell table:number-columns-repeated="4"/>
        </table:table-row>
        <table:table-row table:style-name="ro1">
          <table:table-cell office:value-type="float" office:value="515.501342773438">
            <text:p>515.5013427734</text:p>
          </table:table-cell>
          <table:table-cell office:value-type="float" office:value="0.6058887">
            <text:p>0.6058887</text:p>
          </table:table-cell>
          <table:table-cell table:number-columns-repeated="4"/>
        </table:table-row>
        <table:table-row table:style-name="ro1">
          <table:table-cell office:value-type="float" office:value="515.618103027344">
            <text:p>515.6181030273</text:p>
          </table:table-cell>
          <table:table-cell office:value-type="float" office:value="0.611828">
            <text:p>0.611828</text:p>
          </table:table-cell>
          <table:table-cell table:number-columns-repeated="4"/>
        </table:table-row>
        <table:table-row table:style-name="ro1">
          <table:table-cell office:value-type="float" office:value="515.734802246094">
            <text:p>515.7348022461</text:p>
          </table:table-cell>
          <table:table-cell office:value-type="float" office:value="0.6088856">
            <text:p>0.6088856</text:p>
          </table:table-cell>
          <table:table-cell table:number-columns-repeated="4"/>
        </table:table-row>
        <table:table-row table:style-name="ro1">
          <table:table-cell office:value-type="float" office:value="515.8515625">
            <text:p>515.8515625</text:p>
          </table:table-cell>
          <table:table-cell office:value-type="float" office:value="0.6280319">
            <text:p>0.6280319</text:p>
          </table:table-cell>
          <table:table-cell table:number-columns-repeated="4"/>
        </table:table-row>
        <table:table-row table:style-name="ro1">
          <table:table-cell office:value-type="float" office:value="515.968322753906">
            <text:p>515.9683227539</text:p>
          </table:table-cell>
          <table:table-cell office:value-type="float" office:value="0.6149315">
            <text:p>0.6149315</text:p>
          </table:table-cell>
          <table:table-cell table:number-columns-repeated="4"/>
        </table:table-row>
        <table:table-row table:style-name="ro1">
          <table:table-cell office:value-type="float" office:value="516.085083007813">
            <text:p>516.0850830078</text:p>
          </table:table-cell>
          <table:table-cell office:value-type="float" office:value="0.6191899">
            <text:p>0.6191899</text:p>
          </table:table-cell>
          <table:table-cell table:number-columns-repeated="4"/>
        </table:table-row>
        <table:table-row table:style-name="ro1">
          <table:table-cell office:value-type="float" office:value="516.201843261719">
            <text:p>516.2018432617</text:p>
          </table:table-cell>
          <table:table-cell office:value-type="float" office:value="0.6192555">
            <text:p>0.6192555</text:p>
          </table:table-cell>
          <table:table-cell table:number-columns-repeated="4"/>
        </table:table-row>
        <table:table-row table:style-name="ro1">
          <table:table-cell office:value-type="float" office:value="516.318603515625">
            <text:p>516.3186035156</text:p>
          </table:table-cell>
          <table:table-cell office:value-type="float" office:value="0.62102">
            <text:p>0.62102</text:p>
          </table:table-cell>
          <table:table-cell table:number-columns-repeated="4"/>
        </table:table-row>
        <table:table-row table:style-name="ro1">
          <table:table-cell office:value-type="float" office:value="516.435363769531">
            <text:p>516.4353637695</text:p>
          </table:table-cell>
          <table:table-cell office:value-type="float" office:value="0.6184756">
            <text:p>0.6184756</text:p>
          </table:table-cell>
          <table:table-cell table:number-columns-repeated="4"/>
        </table:table-row>
        <table:table-row table:style-name="ro1">
          <table:table-cell office:value-type="float" office:value="516.552124023438">
            <text:p>516.5521240234</text:p>
          </table:table-cell>
          <table:table-cell office:value-type="float" office:value="0.6257026">
            <text:p>0.6257026</text:p>
          </table:table-cell>
          <table:table-cell table:number-columns-repeated="4"/>
        </table:table-row>
        <table:table-row table:style-name="ro1">
          <table:table-cell office:value-type="float" office:value="516.668884277344">
            <text:p>516.6688842773</text:p>
          </table:table-cell>
          <table:table-cell office:value-type="float" office:value="0.6290645">
            <text:p>0.6290645</text:p>
          </table:table-cell>
          <table:table-cell table:number-columns-repeated="4"/>
        </table:table-row>
        <table:table-row table:style-name="ro1">
          <table:table-cell office:value-type="float" office:value="516.78564453125">
            <text:p>516.7856445313</text:p>
          </table:table-cell>
          <table:table-cell office:value-type="float" office:value="0.6440322">
            <text:p>0.6440322</text:p>
          </table:table-cell>
          <table:table-cell table:number-columns-repeated="4"/>
        </table:table-row>
        <table:table-row table:style-name="ro1">
          <table:table-cell office:value-type="float" office:value="516.902465820313">
            <text:p>516.9024658203</text:p>
          </table:table-cell>
          <table:table-cell office:value-type="float" office:value="0.6547282">
            <text:p>0.6547282</text:p>
          </table:table-cell>
          <table:table-cell table:number-columns-repeated="4"/>
        </table:table-row>
        <table:table-row table:style-name="ro1">
          <table:table-cell office:value-type="float" office:value="517.019226074219">
            <text:p>517.0192260742</text:p>
          </table:table-cell>
          <table:table-cell office:value-type="float" office:value="0.6307883">
            <text:p>0.6307883</text:p>
          </table:table-cell>
          <table:table-cell table:number-columns-repeated="4"/>
        </table:table-row>
        <table:table-row table:style-name="ro1">
          <table:table-cell office:value-type="float" office:value="517.135986328125">
            <text:p>517.1359863281</text:p>
          </table:table-cell>
          <table:table-cell office:value-type="float" office:value="0.6374357">
            <text:p>0.6374357</text:p>
          </table:table-cell>
          <table:table-cell table:number-columns-repeated="4"/>
        </table:table-row>
        <table:table-row table:style-name="ro1">
          <table:table-cell office:value-type="float" office:value="517.252807617188">
            <text:p>517.2528076172</text:p>
          </table:table-cell>
          <table:table-cell office:value-type="float" office:value="0.6463126">
            <text:p>0.6463126</text:p>
          </table:table-cell>
          <table:table-cell table:number-columns-repeated="4"/>
        </table:table-row>
        <table:table-row table:style-name="ro1">
          <table:table-cell office:value-type="float" office:value="517.369567871094">
            <text:p>517.3695678711</text:p>
          </table:table-cell>
          <table:table-cell office:value-type="float" office:value="0.6360947">
            <text:p>0.6360947</text:p>
          </table:table-cell>
          <table:table-cell table:number-columns-repeated="4"/>
        </table:table-row>
        <table:table-row table:style-name="ro1">
          <table:table-cell office:value-type="float" office:value="517.486389160156">
            <text:p>517.4863891602</text:p>
          </table:table-cell>
          <table:table-cell office:value-type="float" office:value="0.644241">
            <text:p>0.644241</text:p>
          </table:table-cell>
          <table:table-cell table:number-columns-repeated="4"/>
        </table:table-row>
        <table:table-row table:style-name="ro1">
          <table:table-cell office:value-type="float" office:value="517.603210449219">
            <text:p>517.6032104492</text:p>
          </table:table-cell>
          <table:table-cell office:value-type="float" office:value="0.6481868">
            <text:p>0.6481868</text:p>
          </table:table-cell>
          <table:table-cell table:number-columns-repeated="4"/>
        </table:table-row>
        <table:table-row table:style-name="ro1">
          <table:table-cell office:value-type="float" office:value="517.719970703125">
            <text:p>517.7199707031</text:p>
          </table:table-cell>
          <table:table-cell office:value-type="float" office:value="0.6468038">
            <text:p>0.6468038</text:p>
          </table:table-cell>
          <table:table-cell table:number-columns-repeated="4"/>
        </table:table-row>
        <table:table-row table:style-name="ro1">
          <table:table-cell office:value-type="float" office:value="517.836791992188">
            <text:p>517.8367919922</text:p>
          </table:table-cell>
          <table:table-cell office:value-type="float" office:value="0.6486466">
            <text:p>0.6486466</text:p>
          </table:table-cell>
          <table:table-cell table:number-columns-repeated="4"/>
        </table:table-row>
        <table:table-row table:style-name="ro1">
          <table:table-cell office:value-type="float" office:value="517.95361328125">
            <text:p>517.9536132813</text:p>
          </table:table-cell>
          <table:table-cell office:value-type="float" office:value="0.6487793">
            <text:p>0.6487793</text:p>
          </table:table-cell>
          <table:table-cell table:number-columns-repeated="4"/>
        </table:table-row>
        <table:table-row table:style-name="ro1">
          <table:table-cell office:value-type="float" office:value="518.070434570313">
            <text:p>518.0704345703</text:p>
          </table:table-cell>
          <table:table-cell office:value-type="float" office:value="0.6447939">
            <text:p>0.6447939</text:p>
          </table:table-cell>
          <table:table-cell table:number-columns-repeated="4"/>
        </table:table-row>
        <table:table-row table:style-name="ro1">
          <table:table-cell office:value-type="float" office:value="518.187255859375">
            <text:p>518.1872558594</text:p>
          </table:table-cell>
          <table:table-cell office:value-type="float" office:value="0.6574731">
            <text:p>0.6574731</text:p>
          </table:table-cell>
          <table:table-cell table:number-columns-repeated="4"/>
        </table:table-row>
        <table:table-row table:style-name="ro1">
          <table:table-cell office:value-type="float" office:value="518.304077148438">
            <text:p>518.3040771484</text:p>
          </table:table-cell>
          <table:table-cell office:value-type="float" office:value="0.6620472">
            <text:p>0.6620472</text:p>
          </table:table-cell>
          <table:table-cell table:number-columns-repeated="4"/>
        </table:table-row>
        <table:table-row table:style-name="ro1">
          <table:table-cell office:value-type="float" office:value="518.4208984375">
            <text:p>518.4208984375</text:p>
          </table:table-cell>
          <table:table-cell office:value-type="float" office:value="0.6567847">
            <text:p>0.6567847</text:p>
          </table:table-cell>
          <table:table-cell table:number-columns-repeated="4"/>
        </table:table-row>
        <table:table-row table:style-name="ro1">
          <table:table-cell office:value-type="float" office:value="518.537719726563">
            <text:p>518.5377197266</text:p>
          </table:table-cell>
          <table:table-cell office:value-type="float" office:value="0.6702277">
            <text:p>0.6702277</text:p>
          </table:table-cell>
          <table:table-cell table:number-columns-repeated="4"/>
        </table:table-row>
        <table:table-row table:style-name="ro1">
          <table:table-cell office:value-type="float" office:value="518.654541015625">
            <text:p>518.6545410156</text:p>
          </table:table-cell>
          <table:table-cell office:value-type="float" office:value="0.6647567">
            <text:p>0.6647567</text:p>
          </table:table-cell>
          <table:table-cell table:number-columns-repeated="4"/>
        </table:table-row>
        <table:table-row table:style-name="ro1">
          <table:table-cell office:value-type="float" office:value="518.771362304688">
            <text:p>518.7713623047</text:p>
          </table:table-cell>
          <table:table-cell office:value-type="float" office:value="0.6483371">
            <text:p>0.6483371</text:p>
          </table:table-cell>
          <table:table-cell table:number-columns-repeated="4"/>
        </table:table-row>
        <table:table-row table:style-name="ro1">
          <table:table-cell office:value-type="float" office:value="518.888244628906">
            <text:p>518.8882446289</text:p>
          </table:table-cell>
          <table:table-cell office:value-type="float" office:value="0.6478556">
            <text:p>0.6478556</text:p>
          </table:table-cell>
          <table:table-cell table:number-columns-repeated="4"/>
        </table:table-row>
        <table:table-row table:style-name="ro1">
          <table:table-cell office:value-type="float" office:value="519.005065917969">
            <text:p>519.005065918</text:p>
          </table:table-cell>
          <table:table-cell office:value-type="float" office:value="0.6588359">
            <text:p>0.6588359</text:p>
          </table:table-cell>
          <table:table-cell table:number-columns-repeated="4"/>
        </table:table-row>
        <table:table-row table:style-name="ro1">
          <table:table-cell office:value-type="float" office:value="519.121887207031">
            <text:p>519.121887207</text:p>
          </table:table-cell>
          <table:table-cell office:value-type="float" office:value="0.6575541">
            <text:p>0.6575541</text:p>
          </table:table-cell>
          <table:table-cell table:number-columns-repeated="4"/>
        </table:table-row>
        <table:table-row table:style-name="ro1">
          <table:table-cell office:value-type="float" office:value="519.23876953125">
            <text:p>519.2387695313</text:p>
          </table:table-cell>
          <table:table-cell office:value-type="float" office:value="0.6644945">
            <text:p>0.6644945</text:p>
          </table:table-cell>
          <table:table-cell table:number-columns-repeated="4"/>
        </table:table-row>
        <table:table-row table:style-name="ro1">
          <table:table-cell office:value-type="float" office:value="519.355590820313">
            <text:p>519.3555908203</text:p>
          </table:table-cell>
          <table:table-cell office:value-type="float" office:value="0.6559655">
            <text:p>0.6559655</text:p>
          </table:table-cell>
          <table:table-cell table:number-columns-repeated="4"/>
        </table:table-row>
        <table:table-row table:style-name="ro1">
          <table:table-cell office:value-type="float" office:value="519.472473144531">
            <text:p>519.4724731445</text:p>
          </table:table-cell>
          <table:table-cell office:value-type="float" office:value="0.6636681">
            <text:p>0.6636681</text:p>
          </table:table-cell>
          <table:table-cell table:number-columns-repeated="4"/>
        </table:table-row>
        <table:table-row table:style-name="ro1">
          <table:table-cell office:value-type="float" office:value="519.58935546875">
            <text:p>519.5893554688</text:p>
          </table:table-cell>
          <table:table-cell office:value-type="float" office:value="0.665117">
            <text:p>0.665117</text:p>
          </table:table-cell>
          <table:table-cell table:number-columns-repeated="4"/>
        </table:table-row>
        <table:table-row table:style-name="ro1">
          <table:table-cell office:value-type="float" office:value="519.706176757813">
            <text:p>519.7061767578</text:p>
          </table:table-cell>
          <table:table-cell office:value-type="float" office:value="0.6582093">
            <text:p>0.6582093</text:p>
          </table:table-cell>
          <table:table-cell table:number-columns-repeated="4"/>
        </table:table-row>
        <table:table-row table:style-name="ro1">
          <table:table-cell office:value-type="float" office:value="519.823059082031">
            <text:p>519.823059082</text:p>
          </table:table-cell>
          <table:table-cell office:value-type="float" office:value="0.6566414">
            <text:p>0.6566414</text:p>
          </table:table-cell>
          <table:table-cell table:number-columns-repeated="4"/>
        </table:table-row>
        <table:table-row table:style-name="ro1">
          <table:table-cell office:value-type="float" office:value="519.93994140625">
            <text:p>519.9399414063</text:p>
          </table:table-cell>
          <table:table-cell office:value-type="float" office:value="0.6763347">
            <text:p>0.6763347</text:p>
          </table:table-cell>
          <table:table-cell table:number-columns-repeated="4"/>
        </table:table-row>
        <table:table-row table:style-name="ro1">
          <table:table-cell office:value-type="float" office:value="520.056823730469">
            <text:p>520.0568237305</text:p>
          </table:table-cell>
          <table:table-cell office:value-type="float" office:value="0.658199">
            <text:p>0.658199</text:p>
          </table:table-cell>
          <table:table-cell table:number-columns-repeated="4"/>
        </table:table-row>
        <table:table-row table:style-name="ro1">
          <table:table-cell office:value-type="float" office:value="520.173706054688">
            <text:p>520.1737060547</text:p>
          </table:table-cell>
          <table:table-cell office:value-type="float" office:value="0.6640307">
            <text:p>0.6640307</text:p>
          </table:table-cell>
          <table:table-cell table:number-columns-repeated="4"/>
        </table:table-row>
        <table:table-row table:style-name="ro1">
          <table:table-cell office:value-type="float" office:value="520.290588378906">
            <text:p>520.2905883789</text:p>
          </table:table-cell>
          <table:table-cell office:value-type="float" office:value="0.6541471">
            <text:p>0.6541471</text:p>
          </table:table-cell>
          <table:table-cell table:number-columns-repeated="4"/>
        </table:table-row>
        <table:table-row table:style-name="ro1">
          <table:table-cell office:value-type="float" office:value="520.407470703125">
            <text:p>520.4074707031</text:p>
          </table:table-cell>
          <table:table-cell office:value-type="float" office:value="0.6609639">
            <text:p>0.6609639</text:p>
          </table:table-cell>
          <table:table-cell table:number-columns-repeated="4"/>
        </table:table-row>
        <table:table-row table:style-name="ro1">
          <table:table-cell office:value-type="float" office:value="520.524353027344">
            <text:p>520.5243530273</text:p>
          </table:table-cell>
          <table:table-cell office:value-type="float" office:value="0.6545422">
            <text:p>0.6545422</text:p>
          </table:table-cell>
          <table:table-cell table:number-columns-repeated="4"/>
        </table:table-row>
        <table:table-row table:style-name="ro1">
          <table:table-cell office:value-type="float" office:value="520.641235351563">
            <text:p>520.6412353516</text:p>
          </table:table-cell>
          <table:table-cell office:value-type="float" office:value="0.6560129">
            <text:p>0.6560129</text:p>
          </table:table-cell>
          <table:table-cell table:number-columns-repeated="4"/>
        </table:table-row>
        <table:table-row table:style-name="ro1">
          <table:table-cell office:value-type="float" office:value="520.758178710938">
            <text:p>520.7581787109</text:p>
          </table:table-cell>
          <table:table-cell office:value-type="float" office:value="0.6600133">
            <text:p>0.6600133</text:p>
          </table:table-cell>
          <table:table-cell table:number-columns-repeated="4"/>
        </table:table-row>
        <table:table-row table:style-name="ro1">
          <table:table-cell office:value-type="float" office:value="520.875061035156">
            <text:p>520.8750610352</text:p>
          </table:table-cell>
          <table:table-cell office:value-type="float" office:value="0.685718">
            <text:p>0.685718</text:p>
          </table:table-cell>
          <table:table-cell table:number-columns-repeated="4"/>
        </table:table-row>
        <table:table-row table:style-name="ro1">
          <table:table-cell office:value-type="float" office:value="520.991943359375">
            <text:p>520.9919433594</text:p>
          </table:table-cell>
          <table:table-cell office:value-type="float" office:value="0.6667284">
            <text:p>0.6667284</text:p>
          </table:table-cell>
          <table:table-cell table:number-columns-repeated="4"/>
        </table:table-row>
        <table:table-row table:style-name="ro1">
          <table:table-cell office:value-type="float" office:value="521.10888671875">
            <text:p>521.1088867188</text:p>
          </table:table-cell>
          <table:table-cell office:value-type="float" office:value="0.656407">
            <text:p>0.656407</text:p>
          </table:table-cell>
          <table:table-cell table:number-columns-repeated="4"/>
        </table:table-row>
        <table:table-row table:style-name="ro1">
          <table:table-cell office:value-type="float" office:value="521.225769042969">
            <text:p>521.225769043</text:p>
          </table:table-cell>
          <table:table-cell office:value-type="float" office:value="0.6653759">
            <text:p>0.6653759</text:p>
          </table:table-cell>
          <table:table-cell table:number-columns-repeated="4"/>
        </table:table-row>
        <table:table-row table:style-name="ro1">
          <table:table-cell office:value-type="float" office:value="521.342712402344">
            <text:p>521.3427124023</text:p>
          </table:table-cell>
          <table:table-cell office:value-type="float" office:value="0.6727344">
            <text:p>0.6727344</text:p>
          </table:table-cell>
          <table:table-cell table:number-columns-repeated="4"/>
        </table:table-row>
        <table:table-row table:style-name="ro1">
          <table:table-cell office:value-type="float" office:value="521.459594726563">
            <text:p>521.4595947266</text:p>
          </table:table-cell>
          <table:table-cell office:value-type="float" office:value="0.6540391">
            <text:p>0.6540391</text:p>
          </table:table-cell>
          <table:table-cell table:number-columns-repeated="4"/>
        </table:table-row>
        <table:table-row table:style-name="ro1">
          <table:table-cell office:value-type="float" office:value="521.576538085938">
            <text:p>521.5765380859</text:p>
          </table:table-cell>
          <table:table-cell office:value-type="float" office:value="0.6563156">
            <text:p>0.6563156</text:p>
          </table:table-cell>
          <table:table-cell table:number-columns-repeated="4"/>
        </table:table-row>
        <table:table-row table:style-name="ro1">
          <table:table-cell office:value-type="float" office:value="521.693481445313">
            <text:p>521.6934814453</text:p>
          </table:table-cell>
          <table:table-cell office:value-type="float" office:value="0.6592131">
            <text:p>0.6592131</text:p>
          </table:table-cell>
          <table:table-cell table:number-columns-repeated="4"/>
        </table:table-row>
        <table:table-row table:style-name="ro1">
          <table:table-cell office:value-type="float" office:value="521.810424804688">
            <text:p>521.8104248047</text:p>
          </table:table-cell>
          <table:table-cell office:value-type="float" office:value="0.6568196">
            <text:p>0.6568196</text:p>
          </table:table-cell>
          <table:table-cell table:number-columns-repeated="4"/>
        </table:table-row>
        <table:table-row table:style-name="ro1">
          <table:table-cell office:value-type="float" office:value="521.927307128906">
            <text:p>521.9273071289</text:p>
          </table:table-cell>
          <table:table-cell office:value-type="float" office:value="0.6724182">
            <text:p>0.6724182</text:p>
          </table:table-cell>
          <table:table-cell table:number-columns-repeated="4"/>
        </table:table-row>
        <table:table-row table:style-name="ro1">
          <table:table-cell office:value-type="float" office:value="522.044250488281">
            <text:p>522.0442504883</text:p>
          </table:table-cell>
          <table:table-cell office:value-type="float" office:value="0.6584197">
            <text:p>0.6584197</text:p>
          </table:table-cell>
          <table:table-cell table:number-columns-repeated="4"/>
        </table:table-row>
        <table:table-row table:style-name="ro1">
          <table:table-cell office:value-type="float" office:value="522.161193847656">
            <text:p>522.1611938477</text:p>
          </table:table-cell>
          <table:table-cell office:value-type="float" office:value="0.6942568">
            <text:p>0.6942568</text:p>
          </table:table-cell>
          <table:table-cell table:number-columns-repeated="4"/>
        </table:table-row>
        <table:table-row table:style-name="ro1">
          <table:table-cell office:value-type="float" office:value="522.278137207031">
            <text:p>522.278137207</text:p>
          </table:table-cell>
          <table:table-cell office:value-type="float" office:value="0.6689836">
            <text:p>0.6689836</text:p>
          </table:table-cell>
          <table:table-cell table:number-columns-repeated="4"/>
        </table:table-row>
        <table:table-row table:style-name="ro1">
          <table:table-cell office:value-type="float" office:value="522.395080566406">
            <text:p>522.3950805664</text:p>
          </table:table-cell>
          <table:table-cell office:value-type="float" office:value="0.6595288">
            <text:p>0.6595288</text:p>
          </table:table-cell>
          <table:table-cell table:number-columns-repeated="4"/>
        </table:table-row>
        <table:table-row table:style-name="ro1">
          <table:table-cell office:value-type="float" office:value="522.512023925781">
            <text:p>522.5120239258</text:p>
          </table:table-cell>
          <table:table-cell office:value-type="float" office:value="0.6548688">
            <text:p>0.6548688</text:p>
          </table:table-cell>
          <table:table-cell table:number-columns-repeated="4"/>
        </table:table-row>
        <table:table-row table:style-name="ro1">
          <table:table-cell office:value-type="float" office:value="522.629028320313">
            <text:p>522.6290283203</text:p>
          </table:table-cell>
          <table:table-cell office:value-type="float" office:value="0.6609479">
            <text:p>0.6609479</text:p>
          </table:table-cell>
          <table:table-cell table:number-columns-repeated="4"/>
        </table:table-row>
        <table:table-row table:style-name="ro1">
          <table:table-cell office:value-type="float" office:value="522.745971679688">
            <text:p>522.7459716797</text:p>
          </table:table-cell>
          <table:table-cell office:value-type="float" office:value="0.6595866">
            <text:p>0.6595866</text:p>
          </table:table-cell>
          <table:table-cell table:number-columns-repeated="4"/>
        </table:table-row>
        <table:table-row table:style-name="ro1">
          <table:table-cell office:value-type="float" office:value="522.862915039063">
            <text:p>522.8629150391</text:p>
          </table:table-cell>
          <table:table-cell office:value-type="float" office:value="0.6691613">
            <text:p>0.6691613</text:p>
          </table:table-cell>
          <table:table-cell table:number-columns-repeated="4"/>
        </table:table-row>
        <table:table-row table:style-name="ro1">
          <table:table-cell office:value-type="float" office:value="522.979919433594">
            <text:p>522.9799194336</text:p>
          </table:table-cell>
          <table:table-cell office:value-type="float" office:value="0.6467791">
            <text:p>0.6467791</text:p>
          </table:table-cell>
          <table:table-cell table:number-columns-repeated="4"/>
        </table:table-row>
        <table:table-row table:style-name="ro1">
          <table:table-cell office:value-type="float" office:value="523.096862792969">
            <text:p>523.096862793</text:p>
          </table:table-cell>
          <table:table-cell office:value-type="float" office:value="0.6685712">
            <text:p>0.6685712</text:p>
          </table:table-cell>
          <table:table-cell table:number-columns-repeated="4"/>
        </table:table-row>
        <table:table-row table:style-name="ro1">
          <table:table-cell office:value-type="float" office:value="523.2138671875">
            <text:p>523.2138671875</text:p>
          </table:table-cell>
          <table:table-cell office:value-type="float" office:value="0.663297">
            <text:p>0.663297</text:p>
          </table:table-cell>
          <table:table-cell table:number-columns-repeated="4"/>
        </table:table-row>
        <table:table-row table:style-name="ro1">
          <table:table-cell office:value-type="float" office:value="523.330810546875">
            <text:p>523.3308105469</text:p>
          </table:table-cell>
          <table:table-cell office:value-type="float" office:value="0.6519442">
            <text:p>0.6519442</text:p>
          </table:table-cell>
          <table:table-cell table:number-columns-repeated="4"/>
        </table:table-row>
        <table:table-row table:style-name="ro1">
          <table:table-cell office:value-type="float" office:value="523.447814941406">
            <text:p>523.4478149414</text:p>
          </table:table-cell>
          <table:table-cell office:value-type="float" office:value="0.6566181">
            <text:p>0.6566181</text:p>
          </table:table-cell>
          <table:table-cell table:number-columns-repeated="4"/>
        </table:table-row>
        <table:table-row table:style-name="ro1">
          <table:table-cell office:value-type="float" office:value="523.564758300781">
            <text:p>523.5647583008</text:p>
          </table:table-cell>
          <table:table-cell office:value-type="float" office:value="0.6547908">
            <text:p>0.6547908</text:p>
          </table:table-cell>
          <table:table-cell table:number-columns-repeated="4"/>
        </table:table-row>
        <table:table-row table:style-name="ro1">
          <table:table-cell office:value-type="float" office:value="523.681762695313">
            <text:p>523.6817626953</text:p>
          </table:table-cell>
          <table:table-cell office:value-type="float" office:value="0.6488575">
            <text:p>0.6488575</text:p>
          </table:table-cell>
          <table:table-cell table:number-columns-repeated="4"/>
        </table:table-row>
        <table:table-row table:style-name="ro1">
          <table:table-cell office:value-type="float" office:value="523.798767089844">
            <text:p>523.7987670898</text:p>
          </table:table-cell>
          <table:table-cell office:value-type="float" office:value="0.6434256">
            <text:p>0.6434256</text:p>
          </table:table-cell>
          <table:table-cell table:number-columns-repeated="4"/>
        </table:table-row>
        <table:table-row table:style-name="ro1">
          <table:table-cell office:value-type="float" office:value="523.915771484375">
            <text:p>523.9157714844</text:p>
          </table:table-cell>
          <table:table-cell office:value-type="float" office:value="0.6412037">
            <text:p>0.6412037</text:p>
          </table:table-cell>
          <table:table-cell table:number-columns-repeated="4"/>
        </table:table-row>
        <table:table-row table:style-name="ro1">
          <table:table-cell office:value-type="float" office:value="524.032775878906">
            <text:p>524.0327758789</text:p>
          </table:table-cell>
          <table:table-cell office:value-type="float" office:value="0.6555727">
            <text:p>0.6555727</text:p>
          </table:table-cell>
          <table:table-cell table:number-columns-repeated="4"/>
        </table:table-row>
        <table:table-row table:style-name="ro1">
          <table:table-cell office:value-type="float" office:value="524.149719238281">
            <text:p>524.1497192383</text:p>
          </table:table-cell>
          <table:table-cell office:value-type="float" office:value="0.6515421">
            <text:p>0.6515421</text:p>
          </table:table-cell>
          <table:table-cell table:number-columns-repeated="4"/>
        </table:table-row>
        <table:table-row table:style-name="ro1">
          <table:table-cell office:value-type="float" office:value="524.266723632813">
            <text:p>524.2667236328</text:p>
          </table:table-cell>
          <table:table-cell office:value-type="float" office:value="0.6492343">
            <text:p>0.6492343</text:p>
          </table:table-cell>
          <table:table-cell table:number-columns-repeated="4"/>
        </table:table-row>
        <table:table-row table:style-name="ro1">
          <table:table-cell office:value-type="float" office:value="524.3837890625">
            <text:p>524.3837890625</text:p>
          </table:table-cell>
          <table:table-cell office:value-type="float" office:value="0.6340377">
            <text:p>0.6340377</text:p>
          </table:table-cell>
          <table:table-cell table:number-columns-repeated="4"/>
        </table:table-row>
        <table:table-row table:style-name="ro1">
          <table:table-cell office:value-type="float" office:value="524.500793457031">
            <text:p>524.500793457</text:p>
          </table:table-cell>
          <table:table-cell office:value-type="float" office:value="0.6606779">
            <text:p>0.6606779</text:p>
          </table:table-cell>
          <table:table-cell table:number-columns-repeated="4"/>
        </table:table-row>
        <table:table-row table:style-name="ro1">
          <table:table-cell office:value-type="float" office:value="524.617797851563">
            <text:p>524.6177978516</text:p>
          </table:table-cell>
          <table:table-cell office:value-type="float" office:value="0.6503255">
            <text:p>0.6503255</text:p>
          </table:table-cell>
          <table:table-cell table:number-columns-repeated="4"/>
        </table:table-row>
        <table:table-row table:style-name="ro1">
          <table:table-cell office:value-type="float" office:value="524.734802246094">
            <text:p>524.7348022461</text:p>
          </table:table-cell>
          <table:table-cell office:value-type="float" office:value="0.6331924">
            <text:p>0.6331924</text:p>
          </table:table-cell>
          <table:table-cell table:number-columns-repeated="4"/>
        </table:table-row>
        <table:table-row table:style-name="ro1">
          <table:table-cell office:value-type="float" office:value="524.851806640625">
            <text:p>524.8518066406</text:p>
          </table:table-cell>
          <table:table-cell office:value-type="float" office:value="0.6341585">
            <text:p>0.6341585</text:p>
          </table:table-cell>
          <table:table-cell table:number-columns-repeated="4"/>
        </table:table-row>
        <table:table-row table:style-name="ro1">
          <table:table-cell office:value-type="float" office:value="524.968872070313">
            <text:p>524.9688720703</text:p>
          </table:table-cell>
          <table:table-cell office:value-type="float" office:value="0.6421868">
            <text:p>0.6421868</text:p>
          </table:table-cell>
          <table:table-cell table:number-columns-repeated="4"/>
        </table:table-row>
        <table:table-row table:style-name="ro1">
          <table:table-cell office:value-type="float" office:value="525.085876464844">
            <text:p>525.0858764648</text:p>
          </table:table-cell>
          <table:table-cell office:value-type="float" office:value="0.658739">
            <text:p>0.658739</text:p>
          </table:table-cell>
          <table:table-cell table:number-columns-repeated="4"/>
        </table:table-row>
        <table:table-row table:style-name="ro1">
          <table:table-cell office:value-type="float" office:value="525.202941894531">
            <text:p>525.2029418945</text:p>
          </table:table-cell>
          <table:table-cell office:value-type="float" office:value="0.6325062">
            <text:p>0.6325062</text:p>
          </table:table-cell>
          <table:table-cell table:number-columns-repeated="4"/>
        </table:table-row>
        <table:table-row table:style-name="ro1">
          <table:table-cell office:value-type="float" office:value="525.319946289063">
            <text:p>525.3199462891</text:p>
          </table:table-cell>
          <table:table-cell office:value-type="float" office:value="0.6342616">
            <text:p>0.6342616</text:p>
          </table:table-cell>
          <table:table-cell table:number-columns-repeated="4"/>
        </table:table-row>
        <table:table-row table:style-name="ro1">
          <table:table-cell office:value-type="float" office:value="525.43701171875">
            <text:p>525.4370117188</text:p>
          </table:table-cell>
          <table:table-cell office:value-type="float" office:value="0.6380224">
            <text:p>0.6380224</text:p>
          </table:table-cell>
          <table:table-cell table:number-columns-repeated="4"/>
        </table:table-row>
        <table:table-row table:style-name="ro1">
          <table:table-cell office:value-type="float" office:value="525.554016113281">
            <text:p>525.5540161133</text:p>
          </table:table-cell>
          <table:table-cell office:value-type="float" office:value="0.6418303">
            <text:p>0.6418303</text:p>
          </table:table-cell>
          <table:table-cell table:number-columns-repeated="4"/>
        </table:table-row>
        <table:table-row table:style-name="ro1">
          <table:table-cell office:value-type="float" office:value="525.671081542969">
            <text:p>525.671081543</text:p>
          </table:table-cell>
          <table:table-cell office:value-type="float" office:value="0.6289725">
            <text:p>0.6289725</text:p>
          </table:table-cell>
          <table:table-cell table:number-columns-repeated="4"/>
        </table:table-row>
        <table:table-row table:style-name="ro1">
          <table:table-cell office:value-type="float" office:value="525.788146972656">
            <text:p>525.7881469727</text:p>
          </table:table-cell>
          <table:table-cell office:value-type="float" office:value="0.6206214">
            <text:p>0.6206214</text:p>
          </table:table-cell>
          <table:table-cell table:number-columns-repeated="4"/>
        </table:table-row>
        <table:table-row table:style-name="ro1">
          <table:table-cell office:value-type="float" office:value="525.905212402344">
            <text:p>525.9052124023</text:p>
          </table:table-cell>
          <table:table-cell office:value-type="float" office:value="0.6263679">
            <text:p>0.6263679</text:p>
          </table:table-cell>
          <table:table-cell table:number-columns-repeated="4"/>
        </table:table-row>
        <table:table-row table:style-name="ro1">
          <table:table-cell office:value-type="float" office:value="526.022277832031">
            <text:p>526.022277832</text:p>
          </table:table-cell>
          <table:table-cell office:value-type="float" office:value="0.6246257">
            <text:p>0.6246257</text:p>
          </table:table-cell>
          <table:table-cell table:number-columns-repeated="4"/>
        </table:table-row>
        <table:table-row table:style-name="ro1">
          <table:table-cell office:value-type="float" office:value="526.139282226563">
            <text:p>526.1392822266</text:p>
          </table:table-cell>
          <table:table-cell office:value-type="float" office:value="0.6239282">
            <text:p>0.6239282</text:p>
          </table:table-cell>
          <table:table-cell table:number-columns-repeated="4"/>
        </table:table-row>
        <table:table-row table:style-name="ro1">
          <table:table-cell office:value-type="float" office:value="526.25634765625">
            <text:p>526.2563476563</text:p>
          </table:table-cell>
          <table:table-cell office:value-type="float" office:value="0.6365424">
            <text:p>0.6365424</text:p>
          </table:table-cell>
          <table:table-cell table:number-columns-repeated="4"/>
        </table:table-row>
        <table:table-row table:style-name="ro1">
          <table:table-cell office:value-type="float" office:value="526.373474121094">
            <text:p>526.3734741211</text:p>
          </table:table-cell>
          <table:table-cell office:value-type="float" office:value="0.6195164">
            <text:p>0.6195164</text:p>
          </table:table-cell>
          <table:table-cell table:number-columns-repeated="4"/>
        </table:table-row>
        <table:table-row table:style-name="ro1">
          <table:table-cell office:value-type="float" office:value="526.490539550781">
            <text:p>526.4905395508</text:p>
          </table:table-cell>
          <table:table-cell office:value-type="float" office:value="0.6348363">
            <text:p>0.6348363</text:p>
          </table:table-cell>
          <table:table-cell table:number-columns-repeated="4"/>
        </table:table-row>
        <table:table-row table:style-name="ro1">
          <table:table-cell office:value-type="float" office:value="526.607604980469">
            <text:p>526.6076049805</text:p>
          </table:table-cell>
          <table:table-cell office:value-type="float" office:value="0.6158059">
            <text:p>0.6158059</text:p>
          </table:table-cell>
          <table:table-cell table:number-columns-repeated="4"/>
        </table:table-row>
        <table:table-row table:style-name="ro1">
          <table:table-cell office:value-type="float" office:value="526.724670410156">
            <text:p>526.7246704102</text:p>
          </table:table-cell>
          <table:table-cell office:value-type="float" office:value="0.6183073">
            <text:p>0.6183073</text:p>
          </table:table-cell>
          <table:table-cell table:number-columns-repeated="4"/>
        </table:table-row>
        <table:table-row table:style-name="ro1">
          <table:table-cell office:value-type="float" office:value="526.841735839844">
            <text:p>526.8417358398</text:p>
          </table:table-cell>
          <table:table-cell office:value-type="float" office:value="0.6280239">
            <text:p>0.6280239</text:p>
          </table:table-cell>
          <table:table-cell table:number-columns-repeated="4"/>
        </table:table-row>
        <table:table-row table:style-name="ro1">
          <table:table-cell office:value-type="float" office:value="526.958862304688">
            <text:p>526.9588623047</text:p>
          </table:table-cell>
          <table:table-cell office:value-type="float" office:value="0.6197846">
            <text:p>0.6197846</text:p>
          </table:table-cell>
          <table:table-cell table:number-columns-repeated="4"/>
        </table:table-row>
        <table:table-row table:style-name="ro1">
          <table:table-cell office:value-type="float" office:value="527.075927734375">
            <text:p>527.0759277344</text:p>
          </table:table-cell>
          <table:table-cell office:value-type="float" office:value="0.6321289">
            <text:p>0.6321289</text:p>
          </table:table-cell>
          <table:table-cell table:number-columns-repeated="4"/>
        </table:table-row>
        <table:table-row table:style-name="ro1">
          <table:table-cell office:value-type="float" office:value="527.192993164063">
            <text:p>527.1929931641</text:p>
          </table:table-cell>
          <table:table-cell office:value-type="float" office:value="0.6061201">
            <text:p>0.6061201</text:p>
          </table:table-cell>
          <table:table-cell table:number-columns-repeated="4"/>
        </table:table-row>
        <table:table-row table:style-name="ro1">
          <table:table-cell office:value-type="float" office:value="527.310119628906">
            <text:p>527.3101196289</text:p>
          </table:table-cell>
          <table:table-cell office:value-type="float" office:value="0.6134439">
            <text:p>0.6134439</text:p>
          </table:table-cell>
          <table:table-cell table:number-columns-repeated="4"/>
        </table:table-row>
        <table:table-row table:style-name="ro1">
          <table:table-cell office:value-type="float" office:value="527.42724609375">
            <text:p>527.4272460938</text:p>
          </table:table-cell>
          <table:table-cell office:value-type="float" office:value="0.6094727">
            <text:p>0.6094727</text:p>
          </table:table-cell>
          <table:table-cell table:number-columns-repeated="4"/>
        </table:table-row>
        <table:table-row table:style-name="ro1">
          <table:table-cell office:value-type="float" office:value="527.544311523438">
            <text:p>527.5443115234</text:p>
          </table:table-cell>
          <table:table-cell office:value-type="float" office:value="0.6009488">
            <text:p>0.6009488</text:p>
          </table:table-cell>
          <table:table-cell table:number-columns-repeated="4"/>
        </table:table-row>
        <table:table-row table:style-name="ro1">
          <table:table-cell office:value-type="float" office:value="527.661437988281">
            <text:p>527.6614379883</text:p>
          </table:table-cell>
          <table:table-cell office:value-type="float" office:value="0.5973718">
            <text:p>0.5973718</text:p>
          </table:table-cell>
          <table:table-cell table:number-columns-repeated="4"/>
        </table:table-row>
        <table:table-row table:style-name="ro1">
          <table:table-cell office:value-type="float" office:value="527.778564453125">
            <text:p>527.7785644531</text:p>
          </table:table-cell>
          <table:table-cell office:value-type="float" office:value="0.6108593">
            <text:p>0.6108593</text:p>
          </table:table-cell>
          <table:table-cell table:number-columns-repeated="4"/>
        </table:table-row>
        <table:table-row table:style-name="ro1">
          <table:table-cell office:value-type="float" office:value="527.895629882813">
            <text:p>527.8956298828</text:p>
          </table:table-cell>
          <table:table-cell office:value-type="float" office:value="0.6103946">
            <text:p>0.6103946</text:p>
          </table:table-cell>
          <table:table-cell table:number-columns-repeated="4"/>
        </table:table-row>
        <table:table-row table:style-name="ro1">
          <table:table-cell office:value-type="float" office:value="528.012756347656">
            <text:p>528.0127563477</text:p>
          </table:table-cell>
          <table:table-cell office:value-type="float" office:value="0.5961307">
            <text:p>0.5961307</text:p>
          </table:table-cell>
          <table:table-cell table:number-columns-repeated="4"/>
        </table:table-row>
        <table:table-row table:style-name="ro1">
          <table:table-cell office:value-type="float" office:value="528.1298828125">
            <text:p>528.1298828125</text:p>
          </table:table-cell>
          <table:table-cell office:value-type="float" office:value="0.5994505">
            <text:p>0.5994505</text:p>
          </table:table-cell>
          <table:table-cell table:number-columns-repeated="4"/>
        </table:table-row>
        <table:table-row table:style-name="ro1">
          <table:table-cell office:value-type="float" office:value="528.247009277344">
            <text:p>528.2470092773</text:p>
          </table:table-cell>
          <table:table-cell office:value-type="float" office:value="0.604329">
            <text:p>0.604329</text:p>
          </table:table-cell>
          <table:table-cell table:number-columns-repeated="4"/>
        </table:table-row>
        <table:table-row table:style-name="ro1">
          <table:table-cell office:value-type="float" office:value="528.364135742188">
            <text:p>528.3641357422</text:p>
          </table:table-cell>
          <table:table-cell office:value-type="float" office:value="0.5943936">
            <text:p>0.5943936</text:p>
          </table:table-cell>
          <table:table-cell table:number-columns-repeated="4"/>
        </table:table-row>
        <table:table-row table:style-name="ro1">
          <table:table-cell office:value-type="float" office:value="528.481262207031">
            <text:p>528.481262207</text:p>
          </table:table-cell>
          <table:table-cell office:value-type="float" office:value="0.6159565">
            <text:p>0.6159565</text:p>
          </table:table-cell>
          <table:table-cell table:number-columns-repeated="4"/>
        </table:table-row>
        <table:table-row table:style-name="ro1">
          <table:table-cell office:value-type="float" office:value="528.598388671875">
            <text:p>528.5983886719</text:p>
          </table:table-cell>
          <table:table-cell office:value-type="float" office:value="0.6084438">
            <text:p>0.6084438</text:p>
          </table:table-cell>
          <table:table-cell table:number-columns-repeated="4"/>
        </table:table-row>
        <table:table-row table:style-name="ro1">
          <table:table-cell office:value-type="float" office:value="528.715576171875">
            <text:p>528.7155761719</text:p>
          </table:table-cell>
          <table:table-cell office:value-type="float" office:value="0.5949853">
            <text:p>0.5949853</text:p>
          </table:table-cell>
          <table:table-cell table:number-columns-repeated="4"/>
        </table:table-row>
        <table:table-row table:style-name="ro1">
          <table:table-cell office:value-type="float" office:value="528.832702636719">
            <text:p>528.8327026367</text:p>
          </table:table-cell>
          <table:table-cell office:value-type="float" office:value="0.5943903">
            <text:p>0.5943903</text:p>
          </table:table-cell>
          <table:table-cell table:number-columns-repeated="4"/>
        </table:table-row>
        <table:table-row table:style-name="ro1">
          <table:table-cell office:value-type="float" office:value="528.949829101563">
            <text:p>528.9498291016</text:p>
          </table:table-cell>
          <table:table-cell office:value-type="float" office:value="0.5832999">
            <text:p>0.5832999</text:p>
          </table:table-cell>
          <table:table-cell table:number-columns-repeated="4"/>
        </table:table-row>
        <table:table-row table:style-name="ro1">
          <table:table-cell office:value-type="float" office:value="529.066955566406">
            <text:p>529.0669555664</text:p>
          </table:table-cell>
          <table:table-cell office:value-type="float" office:value="0.5767816">
            <text:p>0.5767816</text:p>
          </table:table-cell>
          <table:table-cell table:number-columns-repeated="4"/>
        </table:table-row>
        <table:table-row table:style-name="ro1">
          <table:table-cell office:value-type="float" office:value="529.184143066406">
            <text:p>529.1841430664</text:p>
          </table:table-cell>
          <table:table-cell office:value-type="float" office:value="0.5914959">
            <text:p>0.5914959</text:p>
          </table:table-cell>
          <table:table-cell table:number-columns-repeated="4"/>
        </table:table-row>
        <table:table-row table:style-name="ro1">
          <table:table-cell office:value-type="float" office:value="529.30126953125">
            <text:p>529.3012695313</text:p>
          </table:table-cell>
          <table:table-cell office:value-type="float" office:value="0.5994862">
            <text:p>0.5994862</text:p>
          </table:table-cell>
          <table:table-cell table:number-columns-repeated="4"/>
        </table:table-row>
        <table:table-row table:style-name="ro1">
          <table:table-cell office:value-type="float" office:value="529.41845703125">
            <text:p>529.4184570313</text:p>
          </table:table-cell>
          <table:table-cell office:value-type="float" office:value="0.5775911">
            <text:p>0.5775911</text:p>
          </table:table-cell>
          <table:table-cell table:number-columns-repeated="4"/>
        </table:table-row>
        <table:table-row table:style-name="ro1">
          <table:table-cell office:value-type="float" office:value="529.535583496094">
            <text:p>529.5355834961</text:p>
          </table:table-cell>
          <table:table-cell office:value-type="float" office:value="0.5841371">
            <text:p>0.5841371</text:p>
          </table:table-cell>
          <table:table-cell table:number-columns-repeated="4"/>
        </table:table-row>
        <table:table-row table:style-name="ro1">
          <table:table-cell office:value-type="float" office:value="529.652770996094">
            <text:p>529.6527709961</text:p>
          </table:table-cell>
          <table:table-cell office:value-type="float" office:value="0.583111">
            <text:p>0.583111</text:p>
          </table:table-cell>
          <table:table-cell table:number-columns-repeated="4"/>
        </table:table-row>
        <table:table-row table:style-name="ro1">
          <table:table-cell office:value-type="float" office:value="529.769958496094">
            <text:p>529.7699584961</text:p>
          </table:table-cell>
          <table:table-cell office:value-type="float" office:value="0.5781852">
            <text:p>0.5781852</text:p>
          </table:table-cell>
          <table:table-cell table:number-columns-repeated="4"/>
        </table:table-row>
        <table:table-row table:style-name="ro1">
          <table:table-cell office:value-type="float" office:value="529.887145996094">
            <text:p>529.8871459961</text:p>
          </table:table-cell>
          <table:table-cell office:value-type="float" office:value="0.57508">
            <text:p>0.57508</text:p>
          </table:table-cell>
          <table:table-cell table:number-columns-repeated="4"/>
        </table:table-row>
        <table:table-row table:style-name="ro1">
          <table:table-cell office:value-type="float" office:value="530.004272460938">
            <text:p>530.0042724609</text:p>
          </table:table-cell>
          <table:table-cell office:value-type="float" office:value="0.5755434">
            <text:p>0.5755434</text:p>
          </table:table-cell>
          <table:table-cell table:number-columns-repeated="4"/>
        </table:table-row>
        <table:table-row table:style-name="ro1">
          <table:table-cell office:value-type="float" office:value="530.121459960938">
            <text:p>530.1214599609</text:p>
          </table:table-cell>
          <table:table-cell office:value-type="float" office:value="0.5753846">
            <text:p>0.5753846</text:p>
          </table:table-cell>
          <table:table-cell table:number-columns-repeated="4"/>
        </table:table-row>
        <table:table-row table:style-name="ro1">
          <table:table-cell office:value-type="float" office:value="530.238647460938">
            <text:p>530.2386474609</text:p>
          </table:table-cell>
          <table:table-cell office:value-type="float" office:value="0.5729377">
            <text:p>0.5729377</text:p>
          </table:table-cell>
          <table:table-cell table:number-columns-repeated="4"/>
        </table:table-row>
        <table:table-row table:style-name="ro1">
          <table:table-cell office:value-type="float" office:value="530.355834960938">
            <text:p>530.3558349609</text:p>
          </table:table-cell>
          <table:table-cell office:value-type="float" office:value="0.5597949">
            <text:p>0.5597949</text:p>
          </table:table-cell>
          <table:table-cell table:number-columns-repeated="4"/>
        </table:table-row>
        <table:table-row table:style-name="ro1">
          <table:table-cell office:value-type="float" office:value="530.473022460938">
            <text:p>530.4730224609</text:p>
          </table:table-cell>
          <table:table-cell office:value-type="float" office:value="0.55867">
            <text:p>0.55867</text:p>
          </table:table-cell>
          <table:table-cell table:number-columns-repeated="4"/>
        </table:table-row>
        <table:table-row table:style-name="ro1">
          <table:table-cell office:value-type="float" office:value="530.590209960938">
            <text:p>530.5902099609</text:p>
          </table:table-cell>
          <table:table-cell office:value-type="float" office:value="0.5697798">
            <text:p>0.5697798</text:p>
          </table:table-cell>
          <table:table-cell table:number-columns-repeated="4"/>
        </table:table-row>
        <table:table-row table:style-name="ro1">
          <table:table-cell office:value-type="float" office:value="530.707397460938">
            <text:p>530.7073974609</text:p>
          </table:table-cell>
          <table:table-cell office:value-type="float" office:value="0.6151317">
            <text:p>0.6151317</text:p>
          </table:table-cell>
          <table:table-cell table:number-columns-repeated="4"/>
        </table:table-row>
        <table:table-row table:style-name="ro1">
          <table:table-cell office:value-type="float" office:value="530.824645996094">
            <text:p>530.8246459961</text:p>
          </table:table-cell>
          <table:table-cell office:value-type="float" office:value="0.5690915">
            <text:p>0.5690915</text:p>
          </table:table-cell>
          <table:table-cell table:number-columns-repeated="4"/>
        </table:table-row>
        <table:table-row table:style-name="ro1">
          <table:table-cell office:value-type="float" office:value="530.941833496094">
            <text:p>530.9418334961</text:p>
          </table:table-cell>
          <table:table-cell office:value-type="float" office:value="0.5633631">
            <text:p>0.5633631</text:p>
          </table:table-cell>
          <table:table-cell table:number-columns-repeated="4"/>
        </table:table-row>
        <table:table-row table:style-name="ro1">
          <table:table-cell office:value-type="float" office:value="531.059020996094">
            <text:p>531.0590209961</text:p>
          </table:table-cell>
          <table:table-cell office:value-type="float" office:value="0.5626594">
            <text:p>0.5626594</text:p>
          </table:table-cell>
          <table:table-cell table:number-columns-repeated="4"/>
        </table:table-row>
        <table:table-row table:style-name="ro1">
          <table:table-cell office:value-type="float" office:value="531.17626953125">
            <text:p>531.1762695313</text:p>
          </table:table-cell>
          <table:table-cell office:value-type="float" office:value="0.5571024">
            <text:p>0.5571024</text:p>
          </table:table-cell>
          <table:table-cell table:number-columns-repeated="4"/>
        </table:table-row>
        <table:table-row table:style-name="ro1">
          <table:table-cell office:value-type="float" office:value="531.29345703125">
            <text:p>531.2934570313</text:p>
          </table:table-cell>
          <table:table-cell office:value-type="float" office:value="0.5560679">
            <text:p>0.5560679</text:p>
          </table:table-cell>
          <table:table-cell table:number-columns-repeated="4"/>
        </table:table-row>
        <table:table-row table:style-name="ro1">
          <table:table-cell office:value-type="float" office:value="531.410705566406">
            <text:p>531.4107055664</text:p>
          </table:table-cell>
          <table:table-cell office:value-type="float" office:value="0.5616004">
            <text:p>0.5616004</text:p>
          </table:table-cell>
          <table:table-cell table:number-columns-repeated="4"/>
        </table:table-row>
        <table:table-row table:style-name="ro1">
          <table:table-cell office:value-type="float" office:value="531.527893066406">
            <text:p>531.5278930664</text:p>
          </table:table-cell>
          <table:table-cell office:value-type="float" office:value="0.5506297">
            <text:p>0.5506297</text:p>
          </table:table-cell>
          <table:table-cell table:number-columns-repeated="4"/>
        </table:table-row>
        <table:table-row table:style-name="ro1">
          <table:table-cell office:value-type="float" office:value="531.645141601563">
            <text:p>531.6451416016</text:p>
          </table:table-cell>
          <table:table-cell office:value-type="float" office:value="0.5477972">
            <text:p>0.5477972</text:p>
          </table:table-cell>
          <table:table-cell table:number-columns-repeated="4"/>
        </table:table-row>
        <table:table-row table:style-name="ro1">
          <table:table-cell office:value-type="float" office:value="531.762329101563">
            <text:p>531.7623291016</text:p>
          </table:table-cell>
          <table:table-cell office:value-type="float" office:value="0.5464399">
            <text:p>0.5464399</text:p>
          </table:table-cell>
          <table:table-cell table:number-columns-repeated="4"/>
        </table:table-row>
        <table:table-row table:style-name="ro1">
          <table:table-cell office:value-type="float" office:value="531.879577636719">
            <text:p>531.8795776367</text:p>
          </table:table-cell>
          <table:table-cell office:value-type="float" office:value="0.5435821">
            <text:p>0.5435821</text:p>
          </table:table-cell>
          <table:table-cell table:number-columns-repeated="4"/>
        </table:table-row>
        <table:table-row table:style-name="ro1">
          <table:table-cell office:value-type="float" office:value="531.996826171875">
            <text:p>531.9968261719</text:p>
          </table:table-cell>
          <table:table-cell office:value-type="float" office:value="0.5480728">
            <text:p>0.5480728</text:p>
          </table:table-cell>
          <table:table-cell table:number-columns-repeated="4"/>
        </table:table-row>
        <table:table-row table:style-name="ro1">
          <table:table-cell office:value-type="float" office:value="532.114074707031">
            <text:p>532.114074707</text:p>
          </table:table-cell>
          <table:table-cell office:value-type="float" office:value="0.5694841">
            <text:p>0.5694841</text:p>
          </table:table-cell>
          <table:table-cell table:number-columns-repeated="4"/>
        </table:table-row>
        <table:table-row table:style-name="ro1">
          <table:table-cell office:value-type="float" office:value="532.231323242188">
            <text:p>532.2313232422</text:p>
          </table:table-cell>
          <table:table-cell office:value-type="float" office:value="0.5452958">
            <text:p>0.5452958</text:p>
          </table:table-cell>
          <table:table-cell table:number-columns-repeated="4"/>
        </table:table-row>
        <table:table-row table:style-name="ro1">
          <table:table-cell office:value-type="float" office:value="532.348510742188">
            <text:p>532.3485107422</text:p>
          </table:table-cell>
          <table:table-cell office:value-type="float" office:value="0.5533699">
            <text:p>0.5533699</text:p>
          </table:table-cell>
          <table:table-cell table:number-columns-repeated="4"/>
        </table:table-row>
        <table:table-row table:style-name="ro1">
          <table:table-cell office:value-type="float" office:value="532.465759277344">
            <text:p>532.4657592773</text:p>
          </table:table-cell>
          <table:table-cell office:value-type="float" office:value="0.5280524">
            <text:p>0.5280524</text:p>
          </table:table-cell>
          <table:table-cell table:number-columns-repeated="4"/>
        </table:table-row>
        <table:table-row table:style-name="ro1">
          <table:table-cell office:value-type="float" office:value="532.583068847656">
            <text:p>532.5830688477</text:p>
          </table:table-cell>
          <table:table-cell office:value-type="float" office:value="0.5334736">
            <text:p>0.5334736</text:p>
          </table:table-cell>
          <table:table-cell table:number-columns-repeated="4"/>
        </table:table-row>
        <table:table-row table:style-name="ro1">
          <table:table-cell office:value-type="float" office:value="532.700317382813">
            <text:p>532.7003173828</text:p>
          </table:table-cell>
          <table:table-cell office:value-type="float" office:value="0.5352165">
            <text:p>0.5352165</text:p>
          </table:table-cell>
          <table:table-cell table:number-columns-repeated="4"/>
        </table:table-row>
        <table:table-row table:style-name="ro1">
          <table:table-cell office:value-type="float" office:value="532.817565917969">
            <text:p>532.817565918</text:p>
          </table:table-cell>
          <table:table-cell office:value-type="float" office:value="0.5218522">
            <text:p>0.5218522</text:p>
          </table:table-cell>
          <table:table-cell table:number-columns-repeated="4"/>
        </table:table-row>
        <table:table-row table:style-name="ro1">
          <table:table-cell office:value-type="float" office:value="532.934814453125">
            <text:p>532.9348144531</text:p>
          </table:table-cell>
          <table:table-cell office:value-type="float" office:value="0.5383317">
            <text:p>0.5383317</text:p>
          </table:table-cell>
          <table:table-cell table:number-columns-repeated="4"/>
        </table:table-row>
        <table:table-row table:style-name="ro1">
          <table:table-cell office:value-type="float" office:value="533.052062988281">
            <text:p>533.0520629883</text:p>
          </table:table-cell>
          <table:table-cell office:value-type="float" office:value="0.5229215">
            <text:p>0.5229215</text:p>
          </table:table-cell>
          <table:table-cell table:number-columns-repeated="4"/>
        </table:table-row>
        <table:table-row table:style-name="ro1">
          <table:table-cell office:value-type="float" office:value="533.169372558594">
            <text:p>533.1693725586</text:p>
          </table:table-cell>
          <table:table-cell office:value-type="float" office:value="0.5192475">
            <text:p>0.5192475</text:p>
          </table:table-cell>
          <table:table-cell table:number-columns-repeated="4"/>
        </table:table-row>
        <table:table-row table:style-name="ro1">
          <table:table-cell office:value-type="float" office:value="533.28662109375">
            <text:p>533.2866210938</text:p>
          </table:table-cell>
          <table:table-cell office:value-type="float" office:value="0.5500383">
            <text:p>0.5500383</text:p>
          </table:table-cell>
          <table:table-cell table:number-columns-repeated="4"/>
        </table:table-row>
        <table:table-row table:style-name="ro1">
          <table:table-cell office:value-type="float" office:value="533.403869628906">
            <text:p>533.4038696289</text:p>
          </table:table-cell>
          <table:table-cell office:value-type="float" office:value="0.5199854">
            <text:p>0.5199854</text:p>
          </table:table-cell>
          <table:table-cell table:number-columns-repeated="4"/>
        </table:table-row>
        <table:table-row table:style-name="ro1">
          <table:table-cell office:value-type="float" office:value="533.521179199219">
            <text:p>533.5211791992</text:p>
          </table:table-cell>
          <table:table-cell office:value-type="float" office:value="0.5272602">
            <text:p>0.5272602</text:p>
          </table:table-cell>
          <table:table-cell table:number-columns-repeated="4"/>
        </table:table-row>
        <table:table-row table:style-name="ro1">
          <table:table-cell office:value-type="float" office:value="533.638427734375">
            <text:p>533.6384277344</text:p>
          </table:table-cell>
          <table:table-cell office:value-type="float" office:value="0.5231679">
            <text:p>0.5231679</text:p>
          </table:table-cell>
          <table:table-cell table:number-columns-repeated="4"/>
        </table:table-row>
        <table:table-row table:style-name="ro1">
          <table:table-cell office:value-type="float" office:value="533.755737304688">
            <text:p>533.7557373047</text:p>
          </table:table-cell>
          <table:table-cell office:value-type="float" office:value="0.5082754">
            <text:p>0.5082754</text:p>
          </table:table-cell>
          <table:table-cell table:number-columns-repeated="4"/>
        </table:table-row>
        <table:table-row table:style-name="ro1">
          <table:table-cell office:value-type="float" office:value="533.873046875">
            <text:p>533.873046875</text:p>
          </table:table-cell>
          <table:table-cell office:value-type="float" office:value="0.5268137">
            <text:p>0.5268137</text:p>
          </table:table-cell>
          <table:table-cell table:number-columns-repeated="4"/>
        </table:table-row>
        <table:table-row table:style-name="ro1">
          <table:table-cell office:value-type="float" office:value="533.990295410156">
            <text:p>533.9902954102</text:p>
          </table:table-cell>
          <table:table-cell office:value-type="float" office:value="0.5203956">
            <text:p>0.5203956</text:p>
          </table:table-cell>
          <table:table-cell table:number-columns-repeated="4"/>
        </table:table-row>
        <table:table-row table:style-name="ro1">
          <table:table-cell office:value-type="float" office:value="534.107604980469">
            <text:p>534.1076049805</text:p>
          </table:table-cell>
          <table:table-cell office:value-type="float" office:value="0.5091472">
            <text:p>0.5091472</text:p>
          </table:table-cell>
          <table:table-cell table:number-columns-repeated="4"/>
        </table:table-row>
        <table:table-row table:style-name="ro1">
          <table:table-cell office:value-type="float" office:value="534.224914550781">
            <text:p>534.2249145508</text:p>
          </table:table-cell>
          <table:table-cell office:value-type="float" office:value="0.5161799">
            <text:p>0.5161799</text:p>
          </table:table-cell>
          <table:table-cell table:number-columns-repeated="4"/>
        </table:table-row>
        <table:table-row table:style-name="ro1">
          <table:table-cell office:value-type="float" office:value="534.342224121094">
            <text:p>534.3422241211</text:p>
          </table:table-cell>
          <table:table-cell office:value-type="float" office:value="0.5046843">
            <text:p>0.5046843</text:p>
          </table:table-cell>
          <table:table-cell table:number-columns-repeated="4"/>
        </table:table-row>
        <table:table-row table:style-name="ro1">
          <table:table-cell office:value-type="float" office:value="534.459533691406">
            <text:p>534.4595336914</text:p>
          </table:table-cell>
          <table:table-cell office:value-type="float" office:value="0.5026435">
            <text:p>0.5026435</text:p>
          </table:table-cell>
          <table:table-cell table:number-columns-repeated="4"/>
        </table:table-row>
        <table:table-row table:style-name="ro1">
          <table:table-cell office:value-type="float" office:value="534.576843261719">
            <text:p>534.5768432617</text:p>
          </table:table-cell>
          <table:table-cell office:value-type="float" office:value="0.5087162">
            <text:p>0.5087162</text:p>
          </table:table-cell>
          <table:table-cell table:number-columns-repeated="4"/>
        </table:table-row>
        <table:table-row table:style-name="ro1">
          <table:table-cell office:value-type="float" office:value="534.694152832031">
            <text:p>534.694152832</text:p>
          </table:table-cell>
          <table:table-cell office:value-type="float" office:value="0.4942457">
            <text:p>0.4942457</text:p>
          </table:table-cell>
          <table:table-cell table:number-columns-repeated="4"/>
        </table:table-row>
        <table:table-row table:style-name="ro1">
          <table:table-cell office:value-type="float" office:value="534.811462402344">
            <text:p>534.8114624023</text:p>
          </table:table-cell>
          <table:table-cell office:value-type="float" office:value="0.4996507">
            <text:p>0.4996507</text:p>
          </table:table-cell>
          <table:table-cell table:number-columns-repeated="4"/>
        </table:table-row>
        <table:table-row table:style-name="ro1">
          <table:table-cell office:value-type="float" office:value="534.928771972656">
            <text:p>534.9287719727</text:p>
          </table:table-cell>
          <table:table-cell office:value-type="float" office:value="0.4932972">
            <text:p>0.4932972</text:p>
          </table:table-cell>
          <table:table-cell table:number-columns-repeated="4"/>
        </table:table-row>
        <table:table-row table:style-name="ro1">
          <table:table-cell office:value-type="float" office:value="535.046081542969">
            <text:p>535.046081543</text:p>
          </table:table-cell>
          <table:table-cell office:value-type="float" office:value="0.4896813">
            <text:p>0.4896813</text:p>
          </table:table-cell>
          <table:table-cell table:number-columns-repeated="4"/>
        </table:table-row>
        <table:table-row table:style-name="ro1">
          <table:table-cell office:value-type="float" office:value="535.163452148438">
            <text:p>535.1634521484</text:p>
          </table:table-cell>
          <table:table-cell office:value-type="float" office:value="0.4999193">
            <text:p>0.4999193</text:p>
          </table:table-cell>
          <table:table-cell table:number-columns-repeated="4"/>
        </table:table-row>
        <table:table-row table:style-name="ro1">
          <table:table-cell office:value-type="float" office:value="535.28076171875">
            <text:p>535.2807617188</text:p>
          </table:table-cell>
          <table:table-cell office:value-type="float" office:value="0.4930434">
            <text:p>0.4930434</text:p>
          </table:table-cell>
          <table:table-cell table:number-columns-repeated="4"/>
        </table:table-row>
        <table:table-row table:style-name="ro1">
          <table:table-cell office:value-type="float" office:value="535.398071289063">
            <text:p>535.3980712891</text:p>
          </table:table-cell>
          <table:table-cell office:value-type="float" office:value="0.4924599">
            <text:p>0.4924599</text:p>
          </table:table-cell>
          <table:table-cell table:number-columns-repeated="4"/>
        </table:table-row>
        <table:table-row table:style-name="ro1">
          <table:table-cell office:value-type="float" office:value="535.515441894531">
            <text:p>535.5154418945</text:p>
          </table:table-cell>
          <table:table-cell office:value-type="float" office:value="0.4783068">
            <text:p>0.4783068</text:p>
          </table:table-cell>
          <table:table-cell table:number-columns-repeated="4"/>
        </table:table-row>
        <table:table-row table:style-name="ro1">
          <table:table-cell office:value-type="float" office:value="535.632751464844">
            <text:p>535.6327514648</text:p>
          </table:table-cell>
          <table:table-cell office:value-type="float" office:value="0.4833112">
            <text:p>0.4833112</text:p>
          </table:table-cell>
          <table:table-cell table:number-columns-repeated="4"/>
        </table:table-row>
        <table:table-row table:style-name="ro1">
          <table:table-cell office:value-type="float" office:value="535.750122070313">
            <text:p>535.7501220703</text:p>
          </table:table-cell>
          <table:table-cell office:value-type="float" office:value="0.482643">
            <text:p>0.482643</text:p>
          </table:table-cell>
          <table:table-cell table:number-columns-repeated="4"/>
        </table:table-row>
        <table:table-row table:style-name="ro1">
          <table:table-cell office:value-type="float" office:value="535.867431640625">
            <text:p>535.8674316406</text:p>
          </table:table-cell>
          <table:table-cell office:value-type="float" office:value="0.4906457">
            <text:p>0.4906457</text:p>
          </table:table-cell>
          <table:table-cell table:number-columns-repeated="4"/>
        </table:table-row>
        <table:table-row table:style-name="ro1">
          <table:table-cell office:value-type="float" office:value="535.984802246094">
            <text:p>535.9848022461</text:p>
          </table:table-cell>
          <table:table-cell office:value-type="float" office:value="0.4937208">
            <text:p>0.4937208</text:p>
          </table:table-cell>
          <table:table-cell table:number-columns-repeated="4"/>
        </table:table-row>
        <table:table-row table:style-name="ro1">
          <table:table-cell office:value-type="float" office:value="536.102172851563">
            <text:p>536.1021728516</text:p>
          </table:table-cell>
          <table:table-cell office:value-type="float" office:value="0.4912455">
            <text:p>0.4912455</text:p>
          </table:table-cell>
          <table:table-cell table:number-columns-repeated="4"/>
        </table:table-row>
        <table:table-row table:style-name="ro1">
          <table:table-cell office:value-type="float" office:value="536.219543457031">
            <text:p>536.219543457</text:p>
          </table:table-cell>
          <table:table-cell office:value-type="float" office:value="0.4794229">
            <text:p>0.4794229</text:p>
          </table:table-cell>
          <table:table-cell table:number-columns-repeated="4"/>
        </table:table-row>
        <table:table-row table:style-name="ro1">
          <table:table-cell office:value-type="float" office:value="536.336853027344">
            <text:p>536.3368530273</text:p>
          </table:table-cell>
          <table:table-cell office:value-type="float" office:value="0.4768151">
            <text:p>0.4768151</text:p>
          </table:table-cell>
          <table:table-cell table:number-columns-repeated="4"/>
        </table:table-row>
        <table:table-row table:style-name="ro1">
          <table:table-cell office:value-type="float" office:value="536.454223632813">
            <text:p>536.4542236328</text:p>
          </table:table-cell>
          <table:table-cell office:value-type="float" office:value="0.4640405">
            <text:p>0.4640405</text:p>
          </table:table-cell>
          <table:table-cell table:number-columns-repeated="4"/>
        </table:table-row>
        <table:table-row table:style-name="ro1">
          <table:table-cell office:value-type="float" office:value="536.571594238281">
            <text:p>536.5715942383</text:p>
          </table:table-cell>
          <table:table-cell office:value-type="float" office:value="0.4679887">
            <text:p>0.4679887</text:p>
          </table:table-cell>
          <table:table-cell table:number-columns-repeated="4"/>
        </table:table-row>
        <table:table-row table:style-name="ro1">
          <table:table-cell office:value-type="float" office:value="536.68896484375">
            <text:p>536.6889648438</text:p>
          </table:table-cell>
          <table:table-cell office:value-type="float" office:value="0.4732978">
            <text:p>0.4732978</text:p>
          </table:table-cell>
          <table:table-cell table:number-columns-repeated="4"/>
        </table:table-row>
        <table:table-row table:style-name="ro1">
          <table:table-cell office:value-type="float" office:value="536.806335449219">
            <text:p>536.8063354492</text:p>
          </table:table-cell>
          <table:table-cell office:value-type="float" office:value="0.472769">
            <text:p>0.472769</text:p>
          </table:table-cell>
          <table:table-cell table:number-columns-repeated="4"/>
        </table:table-row>
        <table:table-row table:style-name="ro1">
          <table:table-cell office:value-type="float" office:value="536.923706054688">
            <text:p>536.9237060547</text:p>
          </table:table-cell>
          <table:table-cell office:value-type="float" office:value="0.4884091">
            <text:p>0.4884091</text:p>
          </table:table-cell>
          <table:table-cell table:number-columns-repeated="4"/>
        </table:table-row>
        <table:table-row table:style-name="ro1">
          <table:table-cell office:value-type="float" office:value="537.041076660156">
            <text:p>537.0410766602</text:p>
          </table:table-cell>
          <table:table-cell office:value-type="float" office:value="0.4677186">
            <text:p>0.4677186</text:p>
          </table:table-cell>
          <table:table-cell table:number-columns-repeated="4"/>
        </table:table-row>
        <table:table-row table:style-name="ro1">
          <table:table-cell office:value-type="float" office:value="537.158508300781">
            <text:p>537.1585083008</text:p>
          </table:table-cell>
          <table:table-cell office:value-type="float" office:value="0.4680239">
            <text:p>0.4680239</text:p>
          </table:table-cell>
          <table:table-cell table:number-columns-repeated="4"/>
        </table:table-row>
        <table:table-row table:style-name="ro1">
          <table:table-cell office:value-type="float" office:value="537.27587890625">
            <text:p>537.2758789063</text:p>
          </table:table-cell>
          <table:table-cell office:value-type="float" office:value="0.4639948">
            <text:p>0.4639948</text:p>
          </table:table-cell>
          <table:table-cell table:number-columns-repeated="4"/>
        </table:table-row>
        <table:table-row table:style-name="ro1">
          <table:table-cell office:value-type="float" office:value="537.393249511719">
            <text:p>537.3932495117</text:p>
          </table:table-cell>
          <table:table-cell office:value-type="float" office:value="0.4689264">
            <text:p>0.4689264</text:p>
          </table:table-cell>
          <table:table-cell table:number-columns-repeated="4"/>
        </table:table-row>
        <table:table-row table:style-name="ro1">
          <table:table-cell office:value-type="float" office:value="537.510681152344">
            <text:p>537.5106811523</text:p>
          </table:table-cell>
          <table:table-cell office:value-type="float" office:value="0.4602665">
            <text:p>0.4602665</text:p>
          </table:table-cell>
          <table:table-cell table:number-columns-repeated="4"/>
        </table:table-row>
        <table:table-row table:style-name="ro1">
          <table:table-cell office:value-type="float" office:value="537.628051757813">
            <text:p>537.6280517578</text:p>
          </table:table-cell>
          <table:table-cell office:value-type="float" office:value="0.4630053">
            <text:p>0.4630053</text:p>
          </table:table-cell>
          <table:table-cell table:number-columns-repeated="4"/>
        </table:table-row>
        <table:table-row table:style-name="ro1">
          <table:table-cell office:value-type="float" office:value="537.745483398438">
            <text:p>537.7454833984</text:p>
          </table:table-cell>
          <table:table-cell office:value-type="float" office:value="0.4572594">
            <text:p>0.4572594</text:p>
          </table:table-cell>
          <table:table-cell table:number-columns-repeated="4"/>
        </table:table-row>
        <table:table-row table:style-name="ro1">
          <table:table-cell office:value-type="float" office:value="537.862854003906">
            <text:p>537.8628540039</text:p>
          </table:table-cell>
          <table:table-cell office:value-type="float" office:value="0.4594493">
            <text:p>0.4594493</text:p>
          </table:table-cell>
          <table:table-cell table:number-columns-repeated="4"/>
        </table:table-row>
        <table:table-row table:style-name="ro1">
          <table:table-cell office:value-type="float" office:value="537.980285644531">
            <text:p>537.9802856445</text:p>
          </table:table-cell>
          <table:table-cell office:value-type="float" office:value="0.4448863">
            <text:p>0.4448863</text:p>
          </table:table-cell>
          <table:table-cell table:number-columns-repeated="4"/>
        </table:table-row>
        <table:table-row table:style-name="ro1">
          <table:table-cell office:value-type="float" office:value="538.09765625">
            <text:p>538.09765625</text:p>
          </table:table-cell>
          <table:table-cell office:value-type="float" office:value="0.485896">
            <text:p>0.485896</text:p>
          </table:table-cell>
          <table:table-cell table:number-columns-repeated="4"/>
        </table:table-row>
        <table:table-row table:style-name="ro1">
          <table:table-cell office:value-type="float" office:value="538.215087890625">
            <text:p>538.2150878906</text:p>
          </table:table-cell>
          <table:table-cell office:value-type="float" office:value="0.4564069">
            <text:p>0.4564069</text:p>
          </table:table-cell>
          <table:table-cell table:number-columns-repeated="4"/>
        </table:table-row>
        <table:table-row table:style-name="ro1">
          <table:table-cell office:value-type="float" office:value="538.33251953125">
            <text:p>538.3325195313</text:p>
          </table:table-cell>
          <table:table-cell office:value-type="float" office:value="0.4754667">
            <text:p>0.4754667</text:p>
          </table:table-cell>
          <table:table-cell table:number-columns-repeated="4"/>
        </table:table-row>
        <table:table-row table:style-name="ro1">
          <table:table-cell office:value-type="float" office:value="538.449890136719">
            <text:p>538.4498901367</text:p>
          </table:table-cell>
          <table:table-cell office:value-type="float" office:value="0.4535764">
            <text:p>0.4535764</text:p>
          </table:table-cell>
          <table:table-cell table:number-columns-repeated="4"/>
        </table:table-row>
        <table:table-row table:style-name="ro1">
          <table:table-cell office:value-type="float" office:value="538.567321777344">
            <text:p>538.5673217773</text:p>
          </table:table-cell>
          <table:table-cell office:value-type="float" office:value="0.4793584">
            <text:p>0.4793584</text:p>
          </table:table-cell>
          <table:table-cell table:number-columns-repeated="4"/>
        </table:table-row>
        <table:table-row table:style-name="ro1">
          <table:table-cell office:value-type="float" office:value="538.684753417969">
            <text:p>538.684753418</text:p>
          </table:table-cell>
          <table:table-cell office:value-type="float" office:value="0.446286">
            <text:p>0.446286</text:p>
          </table:table-cell>
          <table:table-cell table:number-columns-repeated="4"/>
        </table:table-row>
        <table:table-row table:style-name="ro1">
          <table:table-cell office:value-type="float" office:value="538.802185058594">
            <text:p>538.8021850586</text:p>
          </table:table-cell>
          <table:table-cell office:value-type="float" office:value="0.4484912">
            <text:p>0.4484912</text:p>
          </table:table-cell>
          <table:table-cell table:number-columns-repeated="4"/>
        </table:table-row>
        <table:table-row table:style-name="ro1">
          <table:table-cell office:value-type="float" office:value="538.919616699219">
            <text:p>538.9196166992</text:p>
          </table:table-cell>
          <table:table-cell office:value-type="float" office:value="0.4344766">
            <text:p>0.4344766</text:p>
          </table:table-cell>
          <table:table-cell table:number-columns-repeated="4"/>
        </table:table-row>
        <table:table-row table:style-name="ro1">
          <table:table-cell office:value-type="float" office:value="539.037048339844">
            <text:p>539.0370483398</text:p>
          </table:table-cell>
          <table:table-cell office:value-type="float" office:value="0.4499273">
            <text:p>0.4499273</text:p>
          </table:table-cell>
          <table:table-cell table:number-columns-repeated="4"/>
        </table:table-row>
        <table:table-row table:style-name="ro1">
          <table:table-cell office:value-type="float" office:value="539.154479980469">
            <text:p>539.1544799805</text:p>
          </table:table-cell>
          <table:table-cell office:value-type="float" office:value="0.4464478">
            <text:p>0.4464478</text:p>
          </table:table-cell>
          <table:table-cell table:number-columns-repeated="4"/>
        </table:table-row>
        <table:table-row table:style-name="ro1">
          <table:table-cell office:value-type="float" office:value="539.27197265625">
            <text:p>539.2719726563</text:p>
          </table:table-cell>
          <table:table-cell office:value-type="float" office:value="0.4322332">
            <text:p>0.4322332</text:p>
          </table:table-cell>
          <table:table-cell table:number-columns-repeated="4"/>
        </table:table-row>
        <table:table-row table:style-name="ro1">
          <table:table-cell office:value-type="float" office:value="539.389404296875">
            <text:p>539.3894042969</text:p>
          </table:table-cell>
          <table:table-cell office:value-type="float" office:value="0.4370704">
            <text:p>0.4370704</text:p>
          </table:table-cell>
          <table:table-cell table:number-columns-repeated="4"/>
        </table:table-row>
        <table:table-row table:style-name="ro1">
          <table:table-cell office:value-type="float" office:value="539.5068359375">
            <text:p>539.5068359375</text:p>
          </table:table-cell>
          <table:table-cell office:value-type="float" office:value="0.4363492">
            <text:p>0.4363492</text:p>
          </table:table-cell>
          <table:table-cell table:number-columns-repeated="4"/>
        </table:table-row>
        <table:table-row table:style-name="ro1">
          <table:table-cell office:value-type="float" office:value="539.624267578125">
            <text:p>539.6242675781</text:p>
          </table:table-cell>
          <table:table-cell office:value-type="float" office:value="0.4335936">
            <text:p>0.4335936</text:p>
          </table:table-cell>
          <table:table-cell table:number-columns-repeated="4"/>
        </table:table-row>
        <table:table-row table:style-name="ro1">
          <table:table-cell office:value-type="float" office:value="539.741760253906">
            <text:p>539.7417602539</text:p>
          </table:table-cell>
          <table:table-cell office:value-type="float" office:value="0.4318443">
            <text:p>0.4318443</text:p>
          </table:table-cell>
          <table:table-cell table:number-columns-repeated="4"/>
        </table:table-row>
        <table:table-row table:style-name="ro1">
          <table:table-cell office:value-type="float" office:value="539.859191894531">
            <text:p>539.8591918945</text:p>
          </table:table-cell>
          <table:table-cell office:value-type="float" office:value="0.423808">
            <text:p>0.423808</text:p>
          </table:table-cell>
          <table:table-cell table:number-columns-repeated="4"/>
        </table:table-row>
        <table:table-row table:style-name="ro1">
          <table:table-cell office:value-type="float" office:value="539.976684570313">
            <text:p>539.9766845703</text:p>
          </table:table-cell>
          <table:table-cell office:value-type="float" office:value="0.4358965">
            <text:p>0.4358965</text:p>
          </table:table-cell>
          <table:table-cell table:number-columns-repeated="4"/>
        </table:table-row>
        <table:table-row table:style-name="ro1">
          <table:table-cell office:value-type="float" office:value="540.094116210938">
            <text:p>540.0941162109</text:p>
          </table:table-cell>
          <table:table-cell office:value-type="float" office:value="0.4242447">
            <text:p>0.4242447</text:p>
          </table:table-cell>
          <table:table-cell table:number-columns-repeated="4"/>
        </table:table-row>
        <table:table-row table:style-name="ro1">
          <table:table-cell office:value-type="float" office:value="540.211608886719">
            <text:p>540.2116088867</text:p>
          </table:table-cell>
          <table:table-cell office:value-type="float" office:value="0.4203788">
            <text:p>0.4203788</text:p>
          </table:table-cell>
          <table:table-cell table:number-columns-repeated="4"/>
        </table:table-row>
        <table:table-row table:style-name="ro1">
          <table:table-cell office:value-type="float" office:value="540.3291015625">
            <text:p>540.3291015625</text:p>
          </table:table-cell>
          <table:table-cell office:value-type="float" office:value="0.4280301">
            <text:p>0.4280301</text:p>
          </table:table-cell>
          <table:table-cell table:number-columns-repeated="4"/>
        </table:table-row>
        <table:table-row table:style-name="ro1">
          <table:table-cell office:value-type="float" office:value="540.446533203125">
            <text:p>540.4465332031</text:p>
          </table:table-cell>
          <table:table-cell office:value-type="float" office:value="0.4220386">
            <text:p>0.4220386</text:p>
          </table:table-cell>
          <table:table-cell table:number-columns-repeated="4"/>
        </table:table-row>
        <table:table-row table:style-name="ro1">
          <table:table-cell office:value-type="float" office:value="540.564025878906">
            <text:p>540.5640258789</text:p>
          </table:table-cell>
          <table:table-cell office:value-type="float" office:value="0.4386024">
            <text:p>0.4386024</text:p>
          </table:table-cell>
          <table:table-cell table:number-columns-repeated="4"/>
        </table:table-row>
        <table:table-row table:style-name="ro1">
          <table:table-cell office:value-type="float" office:value="540.681518554688">
            <text:p>540.6815185547</text:p>
          </table:table-cell>
          <table:table-cell office:value-type="float" office:value="0.4204679">
            <text:p>0.4204679</text:p>
          </table:table-cell>
          <table:table-cell table:number-columns-repeated="4"/>
        </table:table-row>
        <table:table-row table:style-name="ro1">
          <table:table-cell office:value-type="float" office:value="540.799011230469">
            <text:p>540.7990112305</text:p>
          </table:table-cell>
          <table:table-cell office:value-type="float" office:value="0.4189366">
            <text:p>0.4189366</text:p>
          </table:table-cell>
          <table:table-cell table:number-columns-repeated="4"/>
        </table:table-row>
        <table:table-row table:style-name="ro1">
          <table:table-cell office:value-type="float" office:value="540.91650390625">
            <text:p>540.9165039063</text:p>
          </table:table-cell>
          <table:table-cell office:value-type="float" office:value="0.4122539">
            <text:p>0.4122539</text:p>
          </table:table-cell>
          <table:table-cell table:number-columns-repeated="4"/>
        </table:table-row>
        <table:table-row table:style-name="ro1">
          <table:table-cell office:value-type="float" office:value="541.033996582031">
            <text:p>541.033996582</text:p>
          </table:table-cell>
          <table:table-cell office:value-type="float" office:value="0.4188798">
            <text:p>0.4188798</text:p>
          </table:table-cell>
          <table:table-cell table:number-columns-repeated="4"/>
        </table:table-row>
        <table:table-row table:style-name="ro1">
          <table:table-cell office:value-type="float" office:value="541.151489257813">
            <text:p>541.1514892578</text:p>
          </table:table-cell>
          <table:table-cell office:value-type="float" office:value="0.4174715">
            <text:p>0.4174715</text:p>
          </table:table-cell>
          <table:table-cell table:number-columns-repeated="4"/>
        </table:table-row>
        <table:table-row table:style-name="ro1">
          <table:table-cell office:value-type="float" office:value="541.268981933594">
            <text:p>541.2689819336</text:p>
          </table:table-cell>
          <table:table-cell office:value-type="float" office:value="0.4134977">
            <text:p>0.4134977</text:p>
          </table:table-cell>
          <table:table-cell table:number-columns-repeated="4"/>
        </table:table-row>
        <table:table-row table:style-name="ro1">
          <table:table-cell office:value-type="float" office:value="541.386474609375">
            <text:p>541.3864746094</text:p>
          </table:table-cell>
          <table:table-cell office:value-type="float" office:value="0.4240585">
            <text:p>0.4240585</text:p>
          </table:table-cell>
          <table:table-cell table:number-columns-repeated="4"/>
        </table:table-row>
        <table:table-row table:style-name="ro1">
          <table:table-cell office:value-type="float" office:value="541.503967285156">
            <text:p>541.5039672852</text:p>
          </table:table-cell>
          <table:table-cell office:value-type="float" office:value="0.4108228">
            <text:p>0.4108228</text:p>
          </table:table-cell>
          <table:table-cell table:number-columns-repeated="4"/>
        </table:table-row>
        <table:table-row table:style-name="ro1">
          <table:table-cell office:value-type="float" office:value="541.621459960938">
            <text:p>541.6214599609</text:p>
          </table:table-cell>
          <table:table-cell office:value-type="float" office:value="0.4144652">
            <text:p>0.4144652</text:p>
          </table:table-cell>
          <table:table-cell table:number-columns-repeated="4"/>
        </table:table-row>
        <table:table-row table:style-name="ro1">
          <table:table-cell office:value-type="float" office:value="541.739013671875">
            <text:p>541.7390136719</text:p>
          </table:table-cell>
          <table:table-cell office:value-type="float" office:value="0.4240334">
            <text:p>0.4240334</text:p>
          </table:table-cell>
          <table:table-cell table:number-columns-repeated="4"/>
        </table:table-row>
        <table:table-row table:style-name="ro1">
          <table:table-cell office:value-type="float" office:value="541.856506347656">
            <text:p>541.8565063477</text:p>
          </table:table-cell>
          <table:table-cell office:value-type="float" office:value="0.409454">
            <text:p>0.409454</text:p>
          </table:table-cell>
          <table:table-cell table:number-columns-repeated="4"/>
        </table:table-row>
        <table:table-row table:style-name="ro1">
          <table:table-cell office:value-type="float" office:value="541.974060058594">
            <text:p>541.9740600586</text:p>
          </table:table-cell>
          <table:table-cell office:value-type="float" office:value="0.3977848">
            <text:p>0.3977848</text:p>
          </table:table-cell>
          <table:table-cell table:number-columns-repeated="4"/>
        </table:table-row>
        <table:table-row table:style-name="ro1">
          <table:table-cell office:value-type="float" office:value="542.091552734375">
            <text:p>542.0915527344</text:p>
          </table:table-cell>
          <table:table-cell office:value-type="float" office:value="0.4105057">
            <text:p>0.4105057</text:p>
          </table:table-cell>
          <table:table-cell table:number-columns-repeated="4"/>
        </table:table-row>
        <table:table-row table:style-name="ro1">
          <table:table-cell office:value-type="float" office:value="542.209106445313">
            <text:p>542.2091064453</text:p>
          </table:table-cell>
          <table:table-cell office:value-type="float" office:value="0.408419">
            <text:p>0.408419</text:p>
          </table:table-cell>
          <table:table-cell table:number-columns-repeated="4"/>
        </table:table-row>
        <table:table-row table:style-name="ro1">
          <table:table-cell office:value-type="float" office:value="542.326599121094">
            <text:p>542.3265991211</text:p>
          </table:table-cell>
          <table:table-cell office:value-type="float" office:value="0.3997849">
            <text:p>0.3997849</text:p>
          </table:table-cell>
          <table:table-cell table:number-columns-repeated="4"/>
        </table:table-row>
        <table:table-row table:style-name="ro1">
          <table:table-cell office:value-type="float" office:value="542.444152832031">
            <text:p>542.444152832</text:p>
          </table:table-cell>
          <table:table-cell office:value-type="float" office:value="0.4122601">
            <text:p>0.4122601</text:p>
          </table:table-cell>
          <table:table-cell table:number-columns-repeated="4"/>
        </table:table-row>
        <table:table-row table:style-name="ro1">
          <table:table-cell office:value-type="float" office:value="542.561645507813">
            <text:p>542.5616455078</text:p>
          </table:table-cell>
          <table:table-cell office:value-type="float" office:value="0.4009292">
            <text:p>0.4009292</text:p>
          </table:table-cell>
          <table:table-cell table:number-columns-repeated="4"/>
        </table:table-row>
        <table:table-row table:style-name="ro1">
          <table:table-cell office:value-type="float" office:value="542.67919921875">
            <text:p>542.6791992188</text:p>
          </table:table-cell>
          <table:table-cell office:value-type="float" office:value="0.3957361">
            <text:p>0.3957361</text:p>
          </table:table-cell>
          <table:table-cell table:number-columns-repeated="4"/>
        </table:table-row>
        <table:table-row table:style-name="ro1">
          <table:table-cell office:value-type="float" office:value="542.796752929688">
            <text:p>542.7967529297</text:p>
          </table:table-cell>
          <table:table-cell office:value-type="float" office:value="0.4104263">
            <text:p>0.4104263</text:p>
          </table:table-cell>
          <table:table-cell table:number-columns-repeated="4"/>
        </table:table-row>
        <table:table-row table:style-name="ro1">
          <table:table-cell office:value-type="float" office:value="542.914306640625">
            <text:p>542.9143066406</text:p>
          </table:table-cell>
          <table:table-cell office:value-type="float" office:value="0.3970796">
            <text:p>0.3970796</text:p>
          </table:table-cell>
          <table:table-cell table:number-columns-repeated="4"/>
        </table:table-row>
        <table:table-row table:style-name="ro1">
          <table:table-cell office:value-type="float" office:value="543.031860351563">
            <text:p>543.0318603516</text:p>
          </table:table-cell>
          <table:table-cell office:value-type="float" office:value="0.4040473">
            <text:p>0.4040473</text:p>
          </table:table-cell>
          <table:table-cell table:number-columns-repeated="4"/>
        </table:table-row>
        <table:table-row table:style-name="ro1">
          <table:table-cell office:value-type="float" office:value="543.1494140625">
            <text:p>543.1494140625</text:p>
          </table:table-cell>
          <table:table-cell office:value-type="float" office:value="0.3846992">
            <text:p>0.3846992</text:p>
          </table:table-cell>
          <table:table-cell table:number-columns-repeated="4"/>
        </table:table-row>
        <table:table-row table:style-name="ro1">
          <table:table-cell office:value-type="float" office:value="543.266967773438">
            <text:p>543.2669677734</text:p>
          </table:table-cell>
          <table:table-cell office:value-type="float" office:value="0.3984292">
            <text:p>0.3984292</text:p>
          </table:table-cell>
          <table:table-cell table:number-columns-repeated="4"/>
        </table:table-row>
        <table:table-row table:style-name="ro1">
          <table:table-cell office:value-type="float" office:value="543.384521484375">
            <text:p>543.3845214844</text:p>
          </table:table-cell>
          <table:table-cell office:value-type="float" office:value="0.402415">
            <text:p>0.402415</text:p>
          </table:table-cell>
          <table:table-cell table:number-columns-repeated="4"/>
        </table:table-row>
        <table:table-row table:style-name="ro1">
          <table:table-cell office:value-type="float" office:value="543.502075195313">
            <text:p>543.5020751953</text:p>
          </table:table-cell>
          <table:table-cell office:value-type="float" office:value="0.3843717">
            <text:p>0.3843717</text:p>
          </table:table-cell>
          <table:table-cell table:number-columns-repeated="4"/>
        </table:table-row>
        <table:table-row table:style-name="ro1">
          <table:table-cell office:value-type="float" office:value="543.61962890625">
            <text:p>543.6196289063</text:p>
          </table:table-cell>
          <table:table-cell office:value-type="float" office:value="0.3963481">
            <text:p>0.3963481</text:p>
          </table:table-cell>
          <table:table-cell table:number-columns-repeated="4"/>
        </table:table-row>
        <table:table-row table:style-name="ro1">
          <table:table-cell office:value-type="float" office:value="543.737182617188">
            <text:p>543.7371826172</text:p>
          </table:table-cell>
          <table:table-cell office:value-type="float" office:value="0.3868676">
            <text:p>0.3868676</text:p>
          </table:table-cell>
          <table:table-cell table:number-columns-repeated="4"/>
        </table:table-row>
        <table:table-row table:style-name="ro1">
          <table:table-cell office:value-type="float" office:value="543.854736328125">
            <text:p>543.8547363281</text:p>
          </table:table-cell>
          <table:table-cell office:value-type="float" office:value="0.3848567">
            <text:p>0.3848567</text:p>
          </table:table-cell>
          <table:table-cell table:number-columns-repeated="4"/>
        </table:table-row>
        <table:table-row table:style-name="ro1">
          <table:table-cell office:value-type="float" office:value="543.972351074219">
            <text:p>543.9723510742</text:p>
          </table:table-cell>
          <table:table-cell office:value-type="float" office:value="0.3907699">
            <text:p>0.3907699</text:p>
          </table:table-cell>
          <table:table-cell table:number-columns-repeated="4"/>
        </table:table-row>
        <table:table-row table:style-name="ro1">
          <table:table-cell office:value-type="float" office:value="544.089904785156">
            <text:p>544.0899047852</text:p>
          </table:table-cell>
          <table:table-cell office:value-type="float" office:value="0.3860998">
            <text:p>0.3860998</text:p>
          </table:table-cell>
          <table:table-cell table:number-columns-repeated="4"/>
        </table:table-row>
        <table:table-row table:style-name="ro1">
          <table:table-cell office:value-type="float" office:value="544.207458496094">
            <text:p>544.2074584961</text:p>
          </table:table-cell>
          <table:table-cell office:value-type="float" office:value="0.3865298">
            <text:p>0.3865298</text:p>
          </table:table-cell>
          <table:table-cell table:number-columns-repeated="4"/>
        </table:table-row>
        <table:table-row table:style-name="ro1">
          <table:table-cell office:value-type="float" office:value="544.325073242188">
            <text:p>544.3250732422</text:p>
          </table:table-cell>
          <table:table-cell office:value-type="float" office:value="0.3932098">
            <text:p>0.3932098</text:p>
          </table:table-cell>
          <table:table-cell table:number-columns-repeated="4"/>
        </table:table-row>
        <table:table-row table:style-name="ro1">
          <table:table-cell office:value-type="float" office:value="544.442626953125">
            <text:p>544.4426269531</text:p>
          </table:table-cell>
          <table:table-cell office:value-type="float" office:value="0.3755174">
            <text:p>0.3755174</text:p>
          </table:table-cell>
          <table:table-cell table:number-columns-repeated="4"/>
        </table:table-row>
        <table:table-row table:style-name="ro1">
          <table:table-cell office:value-type="float" office:value="544.560241699219">
            <text:p>544.5602416992</text:p>
          </table:table-cell>
          <table:table-cell office:value-type="float" office:value="0.3859216">
            <text:p>0.3859216</text:p>
          </table:table-cell>
          <table:table-cell table:number-columns-repeated="4"/>
        </table:table-row>
        <table:table-row table:style-name="ro1">
          <table:table-cell office:value-type="float" office:value="544.677856445313">
            <text:p>544.6778564453</text:p>
          </table:table-cell>
          <table:table-cell office:value-type="float" office:value="0.3854318">
            <text:p>0.3854318</text:p>
          </table:table-cell>
          <table:table-cell table:number-columns-repeated="4"/>
        </table:table-row>
        <table:table-row table:style-name="ro1">
          <table:table-cell office:value-type="float" office:value="544.79541015625">
            <text:p>544.7954101563</text:p>
          </table:table-cell>
          <table:table-cell office:value-type="float" office:value="0.3840905">
            <text:p>0.3840905</text:p>
          </table:table-cell>
          <table:table-cell table:number-columns-repeated="4"/>
        </table:table-row>
        <table:table-row table:style-name="ro1">
          <table:table-cell office:value-type="float" office:value="544.913024902344">
            <text:p>544.9130249023</text:p>
          </table:table-cell>
          <table:table-cell office:value-type="float" office:value="0.3709594">
            <text:p>0.3709594</text:p>
          </table:table-cell>
          <table:table-cell table:number-columns-repeated="4"/>
        </table:table-row>
        <table:table-row table:style-name="ro1">
          <table:table-cell office:value-type="float" office:value="545.030639648438">
            <text:p>545.0306396484</text:p>
          </table:table-cell>
          <table:table-cell office:value-type="float" office:value="0.3764603">
            <text:p>0.3764603</text:p>
          </table:table-cell>
          <table:table-cell table:number-columns-repeated="4"/>
        </table:table-row>
        <table:table-row table:style-name="ro1">
          <table:table-cell office:value-type="float" office:value="545.148254394531">
            <text:p>545.1482543945</text:p>
          </table:table-cell>
          <table:table-cell office:value-type="float" office:value="0.3792792">
            <text:p>0.3792792</text:p>
          </table:table-cell>
          <table:table-cell table:number-columns-repeated="4"/>
        </table:table-row>
        <table:table-row table:style-name="ro1">
          <table:table-cell office:value-type="float" office:value="545.265869140625">
            <text:p>545.2658691406</text:p>
          </table:table-cell>
          <table:table-cell office:value-type="float" office:value="0.3793918">
            <text:p>0.3793918</text:p>
          </table:table-cell>
          <table:table-cell table:number-columns-repeated="4"/>
        </table:table-row>
        <table:table-row table:style-name="ro1">
          <table:table-cell office:value-type="float" office:value="545.383483886719">
            <text:p>545.3834838867</text:p>
          </table:table-cell>
          <table:table-cell office:value-type="float" office:value="0.3643982">
            <text:p>0.3643982</text:p>
          </table:table-cell>
          <table:table-cell table:number-columns-repeated="4"/>
        </table:table-row>
        <table:table-row table:style-name="ro1">
          <table:table-cell office:value-type="float" office:value="545.501098632813">
            <text:p>545.5010986328</text:p>
          </table:table-cell>
          <table:table-cell office:value-type="float" office:value="0.3756191">
            <text:p>0.3756191</text:p>
          </table:table-cell>
          <table:table-cell table:number-columns-repeated="4"/>
        </table:table-row>
        <table:table-row table:style-name="ro1">
          <table:table-cell office:value-type="float" office:value="545.618713378906">
            <text:p>545.6187133789</text:p>
          </table:table-cell>
          <table:table-cell office:value-type="float" office:value="0.3785613">
            <text:p>0.3785613</text:p>
          </table:table-cell>
          <table:table-cell table:number-columns-repeated="4"/>
        </table:table-row>
        <table:table-row table:style-name="ro1">
          <table:table-cell office:value-type="float" office:value="545.736328125">
            <text:p>545.736328125</text:p>
          </table:table-cell>
          <table:table-cell office:value-type="float" office:value="0.3780769">
            <text:p>0.3780769</text:p>
          </table:table-cell>
          <table:table-cell table:number-columns-repeated="4"/>
        </table:table-row>
        <table:table-row table:style-name="ro1">
          <table:table-cell office:value-type="float" office:value="545.853942871094">
            <text:p>545.8539428711</text:p>
          </table:table-cell>
          <table:table-cell office:value-type="float" office:value="0.3708556">
            <text:p>0.3708556</text:p>
          </table:table-cell>
          <table:table-cell table:number-columns-repeated="4"/>
        </table:table-row>
        <table:table-row table:style-name="ro1">
          <table:table-cell office:value-type="float" office:value="545.971557617188">
            <text:p>545.9715576172</text:p>
          </table:table-cell>
          <table:table-cell office:value-type="float" office:value="0.3809606">
            <text:p>0.3809606</text:p>
          </table:table-cell>
          <table:table-cell table:number-columns-repeated="4"/>
        </table:table-row>
        <table:table-row table:style-name="ro1">
          <table:table-cell office:value-type="float" office:value="546.089172363281">
            <text:p>546.0891723633</text:p>
          </table:table-cell>
          <table:table-cell office:value-type="float" office:value="0.3809612">
            <text:p>0.3809612</text:p>
          </table:table-cell>
          <table:table-cell table:number-columns-repeated="4"/>
        </table:table-row>
        <table:table-row table:style-name="ro1">
          <table:table-cell office:value-type="float" office:value="546.206848144531">
            <text:p>546.2068481445</text:p>
          </table:table-cell>
          <table:table-cell office:value-type="float" office:value="0.3803657">
            <text:p>0.3803657</text:p>
          </table:table-cell>
          <table:table-cell table:number-columns-repeated="4"/>
        </table:table-row>
        <table:table-row table:style-name="ro1">
          <table:table-cell office:value-type="float" office:value="546.324462890625">
            <text:p>546.3244628906</text:p>
          </table:table-cell>
          <table:table-cell office:value-type="float" office:value="0.3631926">
            <text:p>0.3631926</text:p>
          </table:table-cell>
          <table:table-cell table:number-columns-repeated="4"/>
        </table:table-row>
        <table:table-row table:style-name="ro1">
          <table:table-cell office:value-type="float" office:value="546.442077636719">
            <text:p>546.4420776367</text:p>
          </table:table-cell>
          <table:table-cell office:value-type="float" office:value="0.3713338">
            <text:p>0.3713338</text:p>
          </table:table-cell>
          <table:table-cell table:number-columns-repeated="4"/>
        </table:table-row>
        <table:table-row table:style-name="ro1">
          <table:table-cell office:value-type="float" office:value="546.559753417969">
            <text:p>546.559753418</text:p>
          </table:table-cell>
          <table:table-cell office:value-type="float" office:value="0.3721781">
            <text:p>0.3721781</text:p>
          </table:table-cell>
          <table:table-cell table:number-columns-repeated="4"/>
        </table:table-row>
        <table:table-row table:style-name="ro1">
          <table:table-cell office:value-type="float" office:value="546.677368164063">
            <text:p>546.6773681641</text:p>
          </table:table-cell>
          <table:table-cell office:value-type="float" office:value="0.365822">
            <text:p>0.365822</text:p>
          </table:table-cell>
          <table:table-cell table:number-columns-repeated="4"/>
        </table:table-row>
        <table:table-row table:style-name="ro1">
          <table:table-cell office:value-type="float" office:value="546.795043945313">
            <text:p>546.7950439453</text:p>
          </table:table-cell>
          <table:table-cell office:value-type="float" office:value="0.3644091">
            <text:p>0.3644091</text:p>
          </table:table-cell>
          <table:table-cell table:number-columns-repeated="4"/>
        </table:table-row>
        <table:table-row table:style-name="ro1">
          <table:table-cell office:value-type="float" office:value="546.912719726563">
            <text:p>546.9127197266</text:p>
          </table:table-cell>
          <table:table-cell office:value-type="float" office:value="0.3689085">
            <text:p>0.3689085</text:p>
          </table:table-cell>
          <table:table-cell table:number-columns-repeated="4"/>
        </table:table-row>
        <table:table-row table:style-name="ro1">
          <table:table-cell office:value-type="float" office:value="547.030334472656">
            <text:p>547.0303344727</text:p>
          </table:table-cell>
          <table:table-cell office:value-type="float" office:value="0.3616107">
            <text:p>0.3616107</text:p>
          </table:table-cell>
          <table:table-cell table:number-columns-repeated="4"/>
        </table:table-row>
        <table:table-row table:style-name="ro1">
          <table:table-cell office:value-type="float" office:value="547.148010253906">
            <text:p>547.1480102539</text:p>
          </table:table-cell>
          <table:table-cell office:value-type="float" office:value="0.3649118">
            <text:p>0.3649118</text:p>
          </table:table-cell>
          <table:table-cell table:number-columns-repeated="4"/>
        </table:table-row>
        <table:table-row table:style-name="ro1">
          <table:table-cell office:value-type="float" office:value="547.265686035156">
            <text:p>547.2656860352</text:p>
          </table:table-cell>
          <table:table-cell office:value-type="float" office:value="0.3658774">
            <text:p>0.3658774</text:p>
          </table:table-cell>
          <table:table-cell table:number-columns-repeated="4"/>
        </table:table-row>
        <table:table-row table:style-name="ro1">
          <table:table-cell office:value-type="float" office:value="547.383361816406">
            <text:p>547.3833618164</text:p>
          </table:table-cell>
          <table:table-cell office:value-type="float" office:value="0.3629646">
            <text:p>0.3629646</text:p>
          </table:table-cell>
          <table:table-cell table:number-columns-repeated="4"/>
        </table:table-row>
        <table:table-row table:style-name="ro1">
          <table:table-cell office:value-type="float" office:value="547.5009765625">
            <text:p>547.5009765625</text:p>
          </table:table-cell>
          <table:table-cell office:value-type="float" office:value="0.3514262">
            <text:p>0.3514262</text:p>
          </table:table-cell>
          <table:table-cell table:number-columns-repeated="4"/>
        </table:table-row>
        <table:table-row table:style-name="ro1">
          <table:table-cell office:value-type="float" office:value="547.61865234375">
            <text:p>547.6186523438</text:p>
          </table:table-cell>
          <table:table-cell office:value-type="float" office:value="0.3596687">
            <text:p>0.3596687</text:p>
          </table:table-cell>
          <table:table-cell table:number-columns-repeated="4"/>
        </table:table-row>
        <table:table-row table:style-name="ro1">
          <table:table-cell office:value-type="float" office:value="547.736328125">
            <text:p>547.736328125</text:p>
          </table:table-cell>
          <table:table-cell office:value-type="float" office:value="0.3592068">
            <text:p>0.3592068</text:p>
          </table:table-cell>
          <table:table-cell table:number-columns-repeated="4"/>
        </table:table-row>
        <table:table-row table:style-name="ro1">
          <table:table-cell office:value-type="float" office:value="547.85400390625">
            <text:p>547.8540039063</text:p>
          </table:table-cell>
          <table:table-cell office:value-type="float" office:value="0.3520518">
            <text:p>0.3520518</text:p>
          </table:table-cell>
          <table:table-cell table:number-columns-repeated="4"/>
        </table:table-row>
        <table:table-row table:style-name="ro1">
          <table:table-cell office:value-type="float" office:value="547.971740722656">
            <text:p>547.9717407227</text:p>
          </table:table-cell>
          <table:table-cell office:value-type="float" office:value="0.3411463">
            <text:p>0.3411463</text:p>
          </table:table-cell>
          <table:table-cell table:number-columns-repeated="4"/>
        </table:table-row>
        <table:table-row table:style-name="ro1">
          <table:table-cell office:value-type="float" office:value="548.089416503906">
            <text:p>548.0894165039</text:p>
          </table:table-cell>
          <table:table-cell office:value-type="float" office:value="0.3455602">
            <text:p>0.3455602</text:p>
          </table:table-cell>
          <table:table-cell table:number-columns-repeated="4"/>
        </table:table-row>
        <table:table-row table:style-name="ro1">
          <table:table-cell office:value-type="float" office:value="548.207092285156">
            <text:p>548.2070922852</text:p>
          </table:table-cell>
          <table:table-cell office:value-type="float" office:value="0.3599024">
            <text:p>0.3599024</text:p>
          </table:table-cell>
          <table:table-cell table:number-columns-repeated="4"/>
        </table:table-row>
        <table:table-row table:style-name="ro1">
          <table:table-cell office:value-type="float" office:value="548.324768066406">
            <text:p>548.3247680664</text:p>
          </table:table-cell>
          <table:table-cell office:value-type="float" office:value="0.3419139">
            <text:p>0.3419139</text:p>
          </table:table-cell>
          <table:table-cell table:number-columns-repeated="4"/>
        </table:table-row>
        <table:table-row table:style-name="ro1">
          <table:table-cell office:value-type="float" office:value="548.442443847656">
            <text:p>548.4424438477</text:p>
          </table:table-cell>
          <table:table-cell office:value-type="float" office:value="0.3566217">
            <text:p>0.3566217</text:p>
          </table:table-cell>
          <table:table-cell table:number-columns-repeated="4"/>
        </table:table-row>
        <table:table-row table:style-name="ro1">
          <table:table-cell office:value-type="float" office:value="548.560180664063">
            <text:p>548.5601806641</text:p>
          </table:table-cell>
          <table:table-cell office:value-type="float" office:value="0.3458174">
            <text:p>0.3458174</text:p>
          </table:table-cell>
          <table:table-cell table:number-columns-repeated="4"/>
        </table:table-row>
        <table:table-row table:style-name="ro1">
          <table:table-cell office:value-type="float" office:value="548.677856445313">
            <text:p>548.6778564453</text:p>
          </table:table-cell>
          <table:table-cell office:value-type="float" office:value="0.3544656">
            <text:p>0.3544656</text:p>
          </table:table-cell>
          <table:table-cell table:number-columns-repeated="4"/>
        </table:table-row>
        <table:table-row table:style-name="ro1">
          <table:table-cell office:value-type="float" office:value="548.795593261719">
            <text:p>548.7955932617</text:p>
          </table:table-cell>
          <table:table-cell office:value-type="float" office:value="0.3440519">
            <text:p>0.3440519</text:p>
          </table:table-cell>
          <table:table-cell table:number-columns-repeated="4"/>
        </table:table-row>
        <table:table-row table:style-name="ro1">
          <table:table-cell office:value-type="float" office:value="548.913269042969">
            <text:p>548.913269043</text:p>
          </table:table-cell>
          <table:table-cell office:value-type="float" office:value="0.3391181">
            <text:p>0.3391181</text:p>
          </table:table-cell>
          <table:table-cell table:number-columns-repeated="4"/>
        </table:table-row>
        <table:table-row table:style-name="ro1">
          <table:table-cell office:value-type="float" office:value="549.031005859375">
            <text:p>549.0310058594</text:p>
          </table:table-cell>
          <table:table-cell office:value-type="float" office:value="0.345108">
            <text:p>0.345108</text:p>
          </table:table-cell>
          <table:table-cell table:number-columns-repeated="4"/>
        </table:table-row>
        <table:table-row table:style-name="ro1">
          <table:table-cell office:value-type="float" office:value="549.148681640625">
            <text:p>549.1486816406</text:p>
          </table:table-cell>
          <table:table-cell office:value-type="float" office:value="0.3398114">
            <text:p>0.3398114</text:p>
          </table:table-cell>
          <table:table-cell table:number-columns-repeated="4"/>
        </table:table-row>
        <table:table-row table:style-name="ro1">
          <table:table-cell office:value-type="float" office:value="549.266418457031">
            <text:p>549.266418457</text:p>
          </table:table-cell>
          <table:table-cell office:value-type="float" office:value="0.3486201">
            <text:p>0.3486201</text:p>
          </table:table-cell>
          <table:table-cell table:number-columns-repeated="4"/>
        </table:table-row>
        <table:table-row table:style-name="ro1">
          <table:table-cell office:value-type="float" office:value="549.384155273438">
            <text:p>549.3841552734</text:p>
          </table:table-cell>
          <table:table-cell office:value-type="float" office:value="0.3432336">
            <text:p>0.3432336</text:p>
          </table:table-cell>
          <table:table-cell table:number-columns-repeated="4"/>
        </table:table-row>
        <table:table-row table:style-name="ro1">
          <table:table-cell office:value-type="float" office:value="549.501831054688">
            <text:p>549.5018310547</text:p>
          </table:table-cell>
          <table:table-cell office:value-type="float" office:value="0.3444112">
            <text:p>0.3444112</text:p>
          </table:table-cell>
          <table:table-cell table:number-columns-repeated="4"/>
        </table:table-row>
        <table:table-row table:style-name="ro1">
          <table:table-cell office:value-type="float" office:value="549.619567871094">
            <text:p>549.6195678711</text:p>
          </table:table-cell>
          <table:table-cell office:value-type="float" office:value="0.3537392">
            <text:p>0.3537392</text:p>
          </table:table-cell>
          <table:table-cell table:number-columns-repeated="4"/>
        </table:table-row>
        <table:table-row table:style-name="ro1">
          <table:table-cell office:value-type="float" office:value="549.7373046875">
            <text:p>549.7373046875</text:p>
          </table:table-cell>
          <table:table-cell office:value-type="float" office:value="0.3466685">
            <text:p>0.3466685</text:p>
          </table:table-cell>
          <table:table-cell table:number-columns-repeated="4"/>
        </table:table-row>
        <table:table-row table:style-name="ro1">
          <table:table-cell office:value-type="float" office:value="549.855041503906">
            <text:p>549.8550415039</text:p>
          </table:table-cell>
          <table:table-cell office:value-type="float" office:value="0.3406323">
            <text:p>0.3406323</text:p>
          </table:table-cell>
          <table:table-cell table:number-columns-repeated="4"/>
        </table:table-row>
        <table:table-row table:style-name="ro1">
          <table:table-cell office:value-type="float" office:value="549.972778320313">
            <text:p>549.9727783203</text:p>
          </table:table-cell>
          <table:table-cell office:value-type="float" office:value="0.3429173">
            <text:p>0.3429173</text:p>
          </table:table-cell>
          <table:table-cell table:number-columns-repeated="4"/>
        </table:table-row>
        <table:table-row table:style-name="ro1">
          <table:table-cell office:value-type="float" office:value="550.090515136719">
            <text:p>550.0905151367</text:p>
          </table:table-cell>
          <table:table-cell office:value-type="float" office:value="0.3278623">
            <text:p>0.3278623</text:p>
          </table:table-cell>
          <table:table-cell table:number-columns-repeated="4"/>
        </table:table-row>
        <table:table-row table:style-name="ro1">
          <table:table-cell office:value-type="float" office:value="550.208251953125">
            <text:p>550.2082519531</text:p>
          </table:table-cell>
          <table:table-cell office:value-type="float" office:value="0.3368399">
            <text:p>0.3368399</text:p>
          </table:table-cell>
          <table:table-cell table:number-columns-repeated="4"/>
        </table:table-row>
        <table:table-row table:style-name="ro1">
          <table:table-cell office:value-type="float" office:value="550.325988769531">
            <text:p>550.3259887695</text:p>
          </table:table-cell>
          <table:table-cell office:value-type="float" office:value="0.3291351">
            <text:p>0.3291351</text:p>
          </table:table-cell>
          <table:table-cell table:number-columns-repeated="4"/>
        </table:table-row>
        <table:table-row table:style-name="ro1">
          <table:table-cell office:value-type="float" office:value="550.443725585938">
            <text:p>550.4437255859</text:p>
          </table:table-cell>
          <table:table-cell office:value-type="float" office:value="0.3329576">
            <text:p>0.3329576</text:p>
          </table:table-cell>
          <table:table-cell table:number-columns-repeated="4"/>
        </table:table-row>
        <table:table-row table:style-name="ro1">
          <table:table-cell office:value-type="float" office:value="550.561462402344">
            <text:p>550.5614624023</text:p>
          </table:table-cell>
          <table:table-cell office:value-type="float" office:value="0.3411712">
            <text:p>0.3411712</text:p>
          </table:table-cell>
          <table:table-cell table:number-columns-repeated="4"/>
        </table:table-row>
        <table:table-row table:style-name="ro1">
          <table:table-cell office:value-type="float" office:value="550.679260253906">
            <text:p>550.6792602539</text:p>
          </table:table-cell>
          <table:table-cell office:value-type="float" office:value="0.3361765">
            <text:p>0.3361765</text:p>
          </table:table-cell>
          <table:table-cell table:number-columns-repeated="4"/>
        </table:table-row>
        <table:table-row table:style-name="ro1">
          <table:table-cell office:value-type="float" office:value="550.796997070313">
            <text:p>550.7969970703</text:p>
          </table:table-cell>
          <table:table-cell office:value-type="float" office:value="0.3301646">
            <text:p>0.3301646</text:p>
          </table:table-cell>
          <table:table-cell table:number-columns-repeated="4"/>
        </table:table-row>
        <table:table-row table:style-name="ro1">
          <table:table-cell office:value-type="float" office:value="550.914733886719">
            <text:p>550.9147338867</text:p>
          </table:table-cell>
          <table:table-cell office:value-type="float" office:value="0.3317557">
            <text:p>0.3317557</text:p>
          </table:table-cell>
          <table:table-cell table:number-columns-repeated="4"/>
        </table:table-row>
        <table:table-row table:style-name="ro1">
          <table:table-cell office:value-type="float" office:value="551.032531738281">
            <text:p>551.0325317383</text:p>
          </table:table-cell>
          <table:table-cell office:value-type="float" office:value="0.3249404">
            <text:p>0.3249404</text:p>
          </table:table-cell>
          <table:table-cell table:number-columns-repeated="4"/>
        </table:table-row>
        <table:table-row table:style-name="ro1">
          <table:table-cell office:value-type="float" office:value="551.150268554688">
            <text:p>551.1502685547</text:p>
          </table:table-cell>
          <table:table-cell office:value-type="float" office:value="0.3311611">
            <text:p>0.3311611</text:p>
          </table:table-cell>
          <table:table-cell table:number-columns-repeated="4"/>
        </table:table-row>
        <table:table-row table:style-name="ro1">
          <table:table-cell office:value-type="float" office:value="551.26806640625">
            <text:p>551.2680664063</text:p>
          </table:table-cell>
          <table:table-cell office:value-type="float" office:value="0.3175229">
            <text:p>0.3175229</text:p>
          </table:table-cell>
          <table:table-cell table:number-columns-repeated="4"/>
        </table:table-row>
        <table:table-row table:style-name="ro1">
          <table:table-cell office:value-type="float" office:value="551.385803222656">
            <text:p>551.3858032227</text:p>
          </table:table-cell>
          <table:table-cell office:value-type="float" office:value="0.3307507">
            <text:p>0.3307507</text:p>
          </table:table-cell>
          <table:table-cell table:number-columns-repeated="4"/>
        </table:table-row>
        <table:table-row table:style-name="ro1">
          <table:table-cell office:value-type="float" office:value="551.503601074219">
            <text:p>551.5036010742</text:p>
          </table:table-cell>
          <table:table-cell office:value-type="float" office:value="0.3168553">
            <text:p>0.3168553</text:p>
          </table:table-cell>
          <table:table-cell table:number-columns-repeated="4"/>
        </table:table-row>
        <table:table-row table:style-name="ro1">
          <table:table-cell office:value-type="float" office:value="551.621398925781">
            <text:p>551.6213989258</text:p>
          </table:table-cell>
          <table:table-cell office:value-type="float" office:value="0.3391012">
            <text:p>0.3391012</text:p>
          </table:table-cell>
          <table:table-cell table:number-columns-repeated="4"/>
        </table:table-row>
        <table:table-row table:style-name="ro1">
          <table:table-cell office:value-type="float" office:value="551.739135742188">
            <text:p>551.7391357422</text:p>
          </table:table-cell>
          <table:table-cell office:value-type="float" office:value="0.320759">
            <text:p>0.320759</text:p>
          </table:table-cell>
          <table:table-cell table:number-columns-repeated="4"/>
        </table:table-row>
        <table:table-row table:style-name="ro1">
          <table:table-cell office:value-type="float" office:value="551.85693359375">
            <text:p>551.8569335938</text:p>
          </table:table-cell>
          <table:table-cell office:value-type="float" office:value="0.3145615">
            <text:p>0.3145615</text:p>
          </table:table-cell>
          <table:table-cell table:number-columns-repeated="4"/>
        </table:table-row>
        <table:table-row table:style-name="ro1">
          <table:table-cell office:value-type="float" office:value="551.974731445313">
            <text:p>551.9747314453</text:p>
          </table:table-cell>
          <table:table-cell office:value-type="float" office:value="0.325177">
            <text:p>0.325177</text:p>
          </table:table-cell>
          <table:table-cell table:number-columns-repeated="4"/>
        </table:table-row>
        <table:table-row table:style-name="ro1">
          <table:table-cell office:value-type="float" office:value="552.092529296875">
            <text:p>552.0925292969</text:p>
          </table:table-cell>
          <table:table-cell office:value-type="float" office:value="0.3152072">
            <text:p>0.3152072</text:p>
          </table:table-cell>
          <table:table-cell table:number-columns-repeated="4"/>
        </table:table-row>
        <table:table-row table:style-name="ro1">
          <table:table-cell office:value-type="float" office:value="552.210327148438">
            <text:p>552.2103271484</text:p>
          </table:table-cell>
          <table:table-cell office:value-type="float" office:value="0.3307546">
            <text:p>0.3307546</text:p>
          </table:table-cell>
          <table:table-cell table:number-columns-repeated="4"/>
        </table:table-row>
        <table:table-row table:style-name="ro1">
          <table:table-cell office:value-type="float" office:value="552.328125">
            <text:p>552.328125</text:p>
          </table:table-cell>
          <table:table-cell office:value-type="float" office:value="0.3185687">
            <text:p>0.3185687</text:p>
          </table:table-cell>
          <table:table-cell table:number-columns-repeated="4"/>
        </table:table-row>
        <table:table-row table:style-name="ro1">
          <table:table-cell office:value-type="float" office:value="552.445922851563">
            <text:p>552.4459228516</text:p>
          </table:table-cell>
          <table:table-cell office:value-type="float" office:value="0.3191857">
            <text:p>0.3191857</text:p>
          </table:table-cell>
          <table:table-cell table:number-columns-repeated="4"/>
        </table:table-row>
        <table:table-row table:style-name="ro1">
          <table:table-cell office:value-type="float" office:value="552.563720703125">
            <text:p>552.5637207031</text:p>
          </table:table-cell>
          <table:table-cell office:value-type="float" office:value="0.3302363">
            <text:p>0.3302363</text:p>
          </table:table-cell>
          <table:table-cell table:number-columns-repeated="4"/>
        </table:table-row>
        <table:table-row table:style-name="ro1">
          <table:table-cell office:value-type="float" office:value="552.681518554688">
            <text:p>552.6815185547</text:p>
          </table:table-cell>
          <table:table-cell office:value-type="float" office:value="0.3123706">
            <text:p>0.3123706</text:p>
          </table:table-cell>
          <table:table-cell table:number-columns-repeated="4"/>
        </table:table-row>
        <table:table-row table:style-name="ro1">
          <table:table-cell office:value-type="float" office:value="552.79931640625">
            <text:p>552.7993164063</text:p>
          </table:table-cell>
          <table:table-cell office:value-type="float" office:value="0.3121318">
            <text:p>0.3121318</text:p>
          </table:table-cell>
          <table:table-cell table:number-columns-repeated="4"/>
        </table:table-row>
        <table:table-row table:style-name="ro1">
          <table:table-cell office:value-type="float" office:value="552.917114257813">
            <text:p>552.9171142578</text:p>
          </table:table-cell>
          <table:table-cell office:value-type="float" office:value="0.3115925">
            <text:p>0.3115925</text:p>
          </table:table-cell>
          <table:table-cell table:number-columns-repeated="4"/>
        </table:table-row>
        <table:table-row table:style-name="ro1">
          <table:table-cell office:value-type="float" office:value="553.034973144531">
            <text:p>553.0349731445</text:p>
          </table:table-cell>
          <table:table-cell office:value-type="float" office:value="0.3115755">
            <text:p>0.3115755</text:p>
          </table:table-cell>
          <table:table-cell table:number-columns-repeated="4"/>
        </table:table-row>
        <table:table-row table:style-name="ro1">
          <table:table-cell office:value-type="float" office:value="553.152770996094">
            <text:p>553.1527709961</text:p>
          </table:table-cell>
          <table:table-cell office:value-type="float" office:value="0.3152109">
            <text:p>0.3152109</text:p>
          </table:table-cell>
          <table:table-cell table:number-columns-repeated="4"/>
        </table:table-row>
        <table:table-row table:style-name="ro1">
          <table:table-cell office:value-type="float" office:value="553.270568847656">
            <text:p>553.2705688477</text:p>
          </table:table-cell>
          <table:table-cell office:value-type="float" office:value="0.3288419">
            <text:p>0.3288419</text:p>
          </table:table-cell>
          <table:table-cell table:number-columns-repeated="4"/>
        </table:table-row>
        <table:table-row table:style-name="ro1">
          <table:table-cell office:value-type="float" office:value="553.388427734375">
            <text:p>553.3884277344</text:p>
          </table:table-cell>
          <table:table-cell office:value-type="float" office:value="0.3030845">
            <text:p>0.3030845</text:p>
          </table:table-cell>
          <table:table-cell table:number-columns-repeated="4"/>
        </table:table-row>
        <table:table-row table:style-name="ro1">
          <table:table-cell office:value-type="float" office:value="553.506225585938">
            <text:p>553.5062255859</text:p>
          </table:table-cell>
          <table:table-cell office:value-type="float" office:value="0.3198376">
            <text:p>0.3198376</text:p>
          </table:table-cell>
          <table:table-cell table:number-columns-repeated="4"/>
        </table:table-row>
        <table:table-row table:style-name="ro1">
          <table:table-cell office:value-type="float" office:value="553.624084472656">
            <text:p>553.6240844727</text:p>
          </table:table-cell>
          <table:table-cell office:value-type="float" office:value="0.3102227">
            <text:p>0.3102227</text:p>
          </table:table-cell>
          <table:table-cell table:number-columns-repeated="4"/>
        </table:table-row>
        <table:table-row table:style-name="ro1">
          <table:table-cell office:value-type="float" office:value="553.741882324219">
            <text:p>553.7418823242</text:p>
          </table:table-cell>
          <table:table-cell office:value-type="float" office:value="0.3029155">
            <text:p>0.3029155</text:p>
          </table:table-cell>
          <table:table-cell table:number-columns-repeated="4"/>
        </table:table-row>
        <table:table-row table:style-name="ro1">
          <table:table-cell office:value-type="float" office:value="553.859741210938">
            <text:p>553.8597412109</text:p>
          </table:table-cell>
          <table:table-cell office:value-type="float" office:value="0.2958299">
            <text:p>0.2958299</text:p>
          </table:table-cell>
          <table:table-cell table:number-columns-repeated="4"/>
        </table:table-row>
        <table:table-row table:style-name="ro1">
          <table:table-cell office:value-type="float" office:value="553.977600097656">
            <text:p>553.9776000977</text:p>
          </table:table-cell>
          <table:table-cell office:value-type="float" office:value="0.3050215">
            <text:p>0.3050215</text:p>
          </table:table-cell>
          <table:table-cell table:number-columns-repeated="4"/>
        </table:table-row>
        <table:table-row table:style-name="ro1">
          <table:table-cell office:value-type="float" office:value="554.095458984375">
            <text:p>554.0954589844</text:p>
          </table:table-cell>
          <table:table-cell office:value-type="float" office:value="0.3020072">
            <text:p>0.3020072</text:p>
          </table:table-cell>
          <table:table-cell table:number-columns-repeated="4"/>
        </table:table-row>
        <table:table-row table:style-name="ro1">
          <table:table-cell office:value-type="float" office:value="554.213256835938">
            <text:p>554.2132568359</text:p>
          </table:table-cell>
          <table:table-cell office:value-type="float" office:value="0.3209828">
            <text:p>0.3209828</text:p>
          </table:table-cell>
          <table:table-cell table:number-columns-repeated="4"/>
        </table:table-row>
        <table:table-row table:style-name="ro1">
          <table:table-cell office:value-type="float" office:value="554.331115722656">
            <text:p>554.3311157227</text:p>
          </table:table-cell>
          <table:table-cell office:value-type="float" office:value="0.3047943">
            <text:p>0.3047943</text:p>
          </table:table-cell>
          <table:table-cell table:number-columns-repeated="4"/>
        </table:table-row>
        <table:table-row table:style-name="ro1">
          <table:table-cell office:value-type="float" office:value="554.448974609375">
            <text:p>554.4489746094</text:p>
          </table:table-cell>
          <table:table-cell office:value-type="float" office:value="0.2998633">
            <text:p>0.2998633</text:p>
          </table:table-cell>
          <table:table-cell table:number-columns-repeated="4"/>
        </table:table-row>
        <table:table-row table:style-name="ro1">
          <table:table-cell office:value-type="float" office:value="554.566833496094">
            <text:p>554.5668334961</text:p>
          </table:table-cell>
          <table:table-cell office:value-type="float" office:value="0.3019133">
            <text:p>0.3019133</text:p>
          </table:table-cell>
          <table:table-cell table:number-columns-repeated="4"/>
        </table:table-row>
        <table:table-row table:style-name="ro1">
          <table:table-cell office:value-type="float" office:value="554.684692382813">
            <text:p>554.6846923828</text:p>
          </table:table-cell>
          <table:table-cell office:value-type="float" office:value="0.293844">
            <text:p>0.293844</text:p>
          </table:table-cell>
          <table:table-cell table:number-columns-repeated="4"/>
        </table:table-row>
        <table:table-row table:style-name="ro1">
          <table:table-cell office:value-type="float" office:value="554.802551269531">
            <text:p>554.8025512695</text:p>
          </table:table-cell>
          <table:table-cell office:value-type="float" office:value="0.2943809">
            <text:p>0.2943809</text:p>
          </table:table-cell>
          <table:table-cell table:number-columns-repeated="4"/>
        </table:table-row>
        <table:table-row table:style-name="ro1">
          <table:table-cell office:value-type="float" office:value="554.92041015625">
            <text:p>554.9204101563</text:p>
          </table:table-cell>
          <table:table-cell office:value-type="float" office:value="0.2909768">
            <text:p>0.2909768</text:p>
          </table:table-cell>
          <table:table-cell table:number-columns-repeated="4"/>
        </table:table-row>
        <table:table-row table:style-name="ro1">
          <table:table-cell office:value-type="float" office:value="555.038269042969">
            <text:p>555.038269043</text:p>
          </table:table-cell>
          <table:table-cell office:value-type="float" office:value="0.2970104">
            <text:p>0.2970104</text:p>
          </table:table-cell>
          <table:table-cell table:number-columns-repeated="4"/>
        </table:table-row>
        <table:table-row table:style-name="ro1">
          <table:table-cell office:value-type="float" office:value="555.156127929688">
            <text:p>555.1561279297</text:p>
          </table:table-cell>
          <table:table-cell office:value-type="float" office:value="0.294219">
            <text:p>0.294219</text:p>
          </table:table-cell>
          <table:table-cell table:number-columns-repeated="4"/>
        </table:table-row>
        <table:table-row table:style-name="ro1">
          <table:table-cell office:value-type="float" office:value="555.274047851563">
            <text:p>555.2740478516</text:p>
          </table:table-cell>
          <table:table-cell office:value-type="float" office:value="0.2961877">
            <text:p>0.2961877</text:p>
          </table:table-cell>
          <table:table-cell table:number-columns-repeated="4"/>
        </table:table-row>
        <table:table-row table:style-name="ro1">
          <table:table-cell office:value-type="float" office:value="555.391906738281">
            <text:p>555.3919067383</text:p>
          </table:table-cell>
          <table:table-cell office:value-type="float" office:value="0.2953588">
            <text:p>0.2953588</text:p>
          </table:table-cell>
          <table:table-cell table:number-columns-repeated="4"/>
        </table:table-row>
        <table:table-row table:style-name="ro1">
          <table:table-cell office:value-type="float" office:value="555.509765625">
            <text:p>555.509765625</text:p>
          </table:table-cell>
          <table:table-cell office:value-type="float" office:value="0.2957258">
            <text:p>0.2957258</text:p>
          </table:table-cell>
          <table:table-cell table:number-columns-repeated="4"/>
        </table:table-row>
        <table:table-row table:style-name="ro1">
          <table:table-cell office:value-type="float" office:value="555.627685546875">
            <text:p>555.6276855469</text:p>
          </table:table-cell>
          <table:table-cell office:value-type="float" office:value="0.3015563">
            <text:p>0.3015563</text:p>
          </table:table-cell>
          <table:table-cell table:number-columns-repeated="4"/>
        </table:table-row>
        <table:table-row table:style-name="ro1">
          <table:table-cell office:value-type="float" office:value="555.745544433594">
            <text:p>555.7455444336</text:p>
          </table:table-cell>
          <table:table-cell office:value-type="float" office:value="0.2978888">
            <text:p>0.2978888</text:p>
          </table:table-cell>
          <table:table-cell table:number-columns-repeated="4"/>
        </table:table-row>
        <table:table-row table:style-name="ro1">
          <table:table-cell office:value-type="float" office:value="555.863403320313">
            <text:p>555.8634033203</text:p>
          </table:table-cell>
          <table:table-cell office:value-type="float" office:value="0.285003">
            <text:p>0.285003</text:p>
          </table:table-cell>
          <table:table-cell table:number-columns-repeated="4"/>
        </table:table-row>
        <table:table-row table:style-name="ro1">
          <table:table-cell office:value-type="float" office:value="555.981323242188">
            <text:p>555.9813232422</text:p>
          </table:table-cell>
          <table:table-cell office:value-type="float" office:value="0.2906388">
            <text:p>0.2906388</text:p>
          </table:table-cell>
          <table:table-cell table:number-columns-repeated="4"/>
        </table:table-row>
        <table:table-row table:style-name="ro1">
          <table:table-cell office:value-type="float" office:value="556.099243164063">
            <text:p>556.0992431641</text:p>
          </table:table-cell>
          <table:table-cell office:value-type="float" office:value="0.2829216">
            <text:p>0.2829216</text:p>
          </table:table-cell>
          <table:table-cell table:number-columns-repeated="4"/>
        </table:table-row>
        <table:table-row table:style-name="ro1">
          <table:table-cell office:value-type="float" office:value="556.217102050781">
            <text:p>556.2171020508</text:p>
          </table:table-cell>
          <table:table-cell office:value-type="float" office:value="0.2985778">
            <text:p>0.2985778</text:p>
          </table:table-cell>
          <table:table-cell table:number-columns-repeated="4"/>
        </table:table-row>
        <table:table-row table:style-name="ro1">
          <table:table-cell office:value-type="float" office:value="556.335021972656">
            <text:p>556.3350219727</text:p>
          </table:table-cell>
          <table:table-cell office:value-type="float" office:value="0.2981301">
            <text:p>0.2981301</text:p>
          </table:table-cell>
          <table:table-cell table:number-columns-repeated="4"/>
        </table:table-row>
        <table:table-row table:style-name="ro1">
          <table:table-cell office:value-type="float" office:value="556.452941894531">
            <text:p>556.4529418945</text:p>
          </table:table-cell>
          <table:table-cell office:value-type="float" office:value="0.2896759">
            <text:p>0.2896759</text:p>
          </table:table-cell>
          <table:table-cell table:number-columns-repeated="4"/>
        </table:table-row>
        <table:table-row table:style-name="ro1">
          <table:table-cell office:value-type="float" office:value="556.57080078125">
            <text:p>556.5708007813</text:p>
          </table:table-cell>
          <table:table-cell office:value-type="float" office:value="0.2860537">
            <text:p>0.2860537</text:p>
          </table:table-cell>
          <table:table-cell table:number-columns-repeated="4"/>
        </table:table-row>
        <table:table-row table:style-name="ro1">
          <table:table-cell office:value-type="float" office:value="556.688720703125">
            <text:p>556.6887207031</text:p>
          </table:table-cell>
          <table:table-cell office:value-type="float" office:value="0.2830435">
            <text:p>0.2830435</text:p>
          </table:table-cell>
          <table:table-cell table:number-columns-repeated="4"/>
        </table:table-row>
        <table:table-row table:style-name="ro1">
          <table:table-cell office:value-type="float" office:value="556.806640625">
            <text:p>556.806640625</text:p>
          </table:table-cell>
          <table:table-cell office:value-type="float" office:value="0.2831566">
            <text:p>0.2831566</text:p>
          </table:table-cell>
          <table:table-cell table:number-columns-repeated="4"/>
        </table:table-row>
        <table:table-row table:style-name="ro1">
          <table:table-cell office:value-type="float" office:value="556.924560546875">
            <text:p>556.9245605469</text:p>
          </table:table-cell>
          <table:table-cell office:value-type="float" office:value="0.2887267">
            <text:p>0.2887267</text:p>
          </table:table-cell>
          <table:table-cell table:number-columns-repeated="4"/>
        </table:table-row>
        <table:table-row table:style-name="ro1">
          <table:table-cell office:value-type="float" office:value="557.04248046875">
            <text:p>557.0424804688</text:p>
          </table:table-cell>
          <table:table-cell office:value-type="float" office:value="0.2825125">
            <text:p>0.2825125</text:p>
          </table:table-cell>
          <table:table-cell table:number-columns-repeated="4"/>
        </table:table-row>
        <table:table-row table:style-name="ro1">
          <table:table-cell office:value-type="float" office:value="557.160400390625">
            <text:p>557.1604003906</text:p>
          </table:table-cell>
          <table:table-cell office:value-type="float" office:value="0.2745301">
            <text:p>0.2745301</text:p>
          </table:table-cell>
          <table:table-cell table:number-columns-repeated="4"/>
        </table:table-row>
        <table:table-row table:style-name="ro1">
          <table:table-cell office:value-type="float" office:value="557.2783203125">
            <text:p>557.2783203125</text:p>
          </table:table-cell>
          <table:table-cell office:value-type="float" office:value="0.2957539">
            <text:p>0.2957539</text:p>
          </table:table-cell>
          <table:table-cell table:number-columns-repeated="4"/>
        </table:table-row>
        <table:table-row table:style-name="ro1">
          <table:table-cell office:value-type="float" office:value="557.396240234375">
            <text:p>557.3962402344</text:p>
          </table:table-cell>
          <table:table-cell office:value-type="float" office:value="0.2796325">
            <text:p>0.2796325</text:p>
          </table:table-cell>
          <table:table-cell table:number-columns-repeated="4"/>
        </table:table-row>
        <table:table-row table:style-name="ro1">
          <table:table-cell office:value-type="float" office:value="557.51416015625">
            <text:p>557.5141601563</text:p>
          </table:table-cell>
          <table:table-cell office:value-type="float" office:value="0.268897">
            <text:p>0.268897</text:p>
          </table:table-cell>
          <table:table-cell table:number-columns-repeated="4"/>
        </table:table-row>
        <table:table-row table:style-name="ro1">
          <table:table-cell office:value-type="float" office:value="557.632141113281">
            <text:p>557.6321411133</text:p>
          </table:table-cell>
          <table:table-cell office:value-type="float" office:value="0.2790405">
            <text:p>0.2790405</text:p>
          </table:table-cell>
          <table:table-cell table:number-columns-repeated="4"/>
        </table:table-row>
        <table:table-row table:style-name="ro1">
          <table:table-cell office:value-type="float" office:value="557.750061035156">
            <text:p>557.7500610352</text:p>
          </table:table-cell>
          <table:table-cell office:value-type="float" office:value="0.2755916">
            <text:p>0.2755916</text:p>
          </table:table-cell>
          <table:table-cell table:number-columns-repeated="4"/>
        </table:table-row>
        <table:table-row table:style-name="ro1">
          <table:table-cell office:value-type="float" office:value="557.867980957031">
            <text:p>557.867980957</text:p>
          </table:table-cell>
          <table:table-cell office:value-type="float" office:value="0.2755206">
            <text:p>0.2755206</text:p>
          </table:table-cell>
          <table:table-cell table:number-columns-repeated="4"/>
        </table:table-row>
        <table:table-row table:style-name="ro1">
          <table:table-cell office:value-type="float" office:value="557.985961914063">
            <text:p>557.9859619141</text:p>
          </table:table-cell>
          <table:table-cell office:value-type="float" office:value="0.2636062">
            <text:p>0.2636062</text:p>
          </table:table-cell>
          <table:table-cell table:number-columns-repeated="4"/>
        </table:table-row>
        <table:table-row table:style-name="ro1">
          <table:table-cell office:value-type="float" office:value="558.103881835938">
            <text:p>558.1038818359</text:p>
          </table:table-cell>
          <table:table-cell office:value-type="float" office:value="0.267273">
            <text:p>0.267273</text:p>
          </table:table-cell>
          <table:table-cell table:number-columns-repeated="4"/>
        </table:table-row>
        <table:table-row table:style-name="ro1">
          <table:table-cell office:value-type="float" office:value="558.221801757813">
            <text:p>558.2218017578</text:p>
          </table:table-cell>
          <table:table-cell office:value-type="float" office:value="0.2688213">
            <text:p>0.2688213</text:p>
          </table:table-cell>
          <table:table-cell table:number-columns-repeated="4"/>
        </table:table-row>
        <table:table-row table:style-name="ro1">
          <table:table-cell office:value-type="float" office:value="558.339782714844">
            <text:p>558.3397827148</text:p>
          </table:table-cell>
          <table:table-cell office:value-type="float" office:value="0.2780883">
            <text:p>0.2780883</text:p>
          </table:table-cell>
          <table:table-cell table:number-columns-repeated="4"/>
        </table:table-row>
        <table:table-row table:style-name="ro1">
          <table:table-cell office:value-type="float" office:value="558.457702636719">
            <text:p>558.4577026367</text:p>
          </table:table-cell>
          <table:table-cell office:value-type="float" office:value="0.2672153">
            <text:p>0.2672153</text:p>
          </table:table-cell>
          <table:table-cell table:number-columns-repeated="4"/>
        </table:table-row>
        <table:table-row table:style-name="ro1">
          <table:table-cell office:value-type="float" office:value="558.57568359375">
            <text:p>558.5756835938</text:p>
          </table:table-cell>
          <table:table-cell office:value-type="float" office:value="0.2713942">
            <text:p>0.2713942</text:p>
          </table:table-cell>
          <table:table-cell table:number-columns-repeated="4"/>
        </table:table-row>
        <table:table-row table:style-name="ro1">
          <table:table-cell office:value-type="float" office:value="558.693664550781">
            <text:p>558.6936645508</text:p>
          </table:table-cell>
          <table:table-cell office:value-type="float" office:value="0.2715327">
            <text:p>0.2715327</text:p>
          </table:table-cell>
          <table:table-cell table:number-columns-repeated="4"/>
        </table:table-row>
        <table:table-row table:style-name="ro1">
          <table:table-cell office:value-type="float" office:value="558.811584472656">
            <text:p>558.8115844727</text:p>
          </table:table-cell>
          <table:table-cell office:value-type="float" office:value="0.2749693">
            <text:p>0.2749693</text:p>
          </table:table-cell>
          <table:table-cell table:number-columns-repeated="4"/>
        </table:table-row>
        <table:table-row table:style-name="ro1">
          <table:table-cell office:value-type="float" office:value="558.929565429688">
            <text:p>558.9295654297</text:p>
          </table:table-cell>
          <table:table-cell office:value-type="float" office:value="0.2632169">
            <text:p>0.2632169</text:p>
          </table:table-cell>
          <table:table-cell table:number-columns-repeated="4"/>
        </table:table-row>
        <table:table-row table:style-name="ro1">
          <table:table-cell office:value-type="float" office:value="559.047546386719">
            <text:p>559.0475463867</text:p>
          </table:table-cell>
          <table:table-cell office:value-type="float" office:value="0.2691064">
            <text:p>0.2691064</text:p>
          </table:table-cell>
          <table:table-cell table:number-columns-repeated="4"/>
        </table:table-row>
        <table:table-row table:style-name="ro1">
          <table:table-cell office:value-type="float" office:value="559.16552734375">
            <text:p>559.1655273438</text:p>
          </table:table-cell>
          <table:table-cell office:value-type="float" office:value="0.2669894">
            <text:p>0.2669894</text:p>
          </table:table-cell>
          <table:table-cell table:number-columns-repeated="4"/>
        </table:table-row>
        <table:table-row table:style-name="ro1">
          <table:table-cell office:value-type="float" office:value="559.283508300781">
            <text:p>559.2835083008</text:p>
          </table:table-cell>
          <table:table-cell office:value-type="float" office:value="0.2635239">
            <text:p>0.2635239</text:p>
          </table:table-cell>
          <table:table-cell table:number-columns-repeated="4"/>
        </table:table-row>
        <table:table-row table:style-name="ro1">
          <table:table-cell office:value-type="float" office:value="559.401489257813">
            <text:p>559.4014892578</text:p>
          </table:table-cell>
          <table:table-cell office:value-type="float" office:value="0.2693569">
            <text:p>0.2693569</text:p>
          </table:table-cell>
          <table:table-cell table:number-columns-repeated="4"/>
        </table:table-row>
        <table:table-row table:style-name="ro1">
          <table:table-cell office:value-type="float" office:value="559.519470214844">
            <text:p>559.5194702148</text:p>
          </table:table-cell>
          <table:table-cell office:value-type="float" office:value="0.252246">
            <text:p>0.252246</text:p>
          </table:table-cell>
          <table:table-cell table:number-columns-repeated="4"/>
        </table:table-row>
        <table:table-row table:style-name="ro1">
          <table:table-cell office:value-type="float" office:value="559.637451171875">
            <text:p>559.6374511719</text:p>
          </table:table-cell>
          <table:table-cell office:value-type="float" office:value="0.2641432">
            <text:p>0.2641432</text:p>
          </table:table-cell>
          <table:table-cell table:number-columns-repeated="4"/>
        </table:table-row>
        <table:table-row table:style-name="ro1">
          <table:table-cell office:value-type="float" office:value="559.755432128906">
            <text:p>559.7554321289</text:p>
          </table:table-cell>
          <table:table-cell office:value-type="float" office:value="0.2685712">
            <text:p>0.2685712</text:p>
          </table:table-cell>
          <table:table-cell table:number-columns-repeated="4"/>
        </table:table-row>
        <table:table-row table:style-name="ro1">
          <table:table-cell office:value-type="float" office:value="559.873413085938">
            <text:p>559.8734130859</text:p>
          </table:table-cell>
          <table:table-cell office:value-type="float" office:value="0.2580257">
            <text:p>0.2580257</text:p>
          </table:table-cell>
          <table:table-cell table:number-columns-repeated="4"/>
        </table:table-row>
        <table:table-row table:style-name="ro1">
          <table:table-cell office:value-type="float" office:value="559.991394042969">
            <text:p>559.991394043</text:p>
          </table:table-cell>
          <table:table-cell office:value-type="float" office:value="0.2632634">
            <text:p>0.2632634</text:p>
          </table:table-cell>
          <table:table-cell table:number-columns-repeated="4"/>
        </table:table-row>
        <table:table-row table:style-name="ro1">
          <table:table-cell office:value-type="float" office:value="560.109375">
            <text:p>560.109375</text:p>
          </table:table-cell>
          <table:table-cell office:value-type="float" office:value="0.2616641">
            <text:p>0.2616641</text:p>
          </table:table-cell>
          <table:table-cell table:number-columns-repeated="4"/>
        </table:table-row>
        <table:table-row table:style-name="ro1">
          <table:table-cell office:value-type="float" office:value="560.227416992188">
            <text:p>560.2274169922</text:p>
          </table:table-cell>
          <table:table-cell office:value-type="float" office:value="0.2556196">
            <text:p>0.2556196</text:p>
          </table:table-cell>
          <table:table-cell table:number-columns-repeated="4"/>
        </table:table-row>
        <table:table-row table:style-name="ro1">
          <table:table-cell office:value-type="float" office:value="560.345397949219">
            <text:p>560.3453979492</text:p>
          </table:table-cell>
          <table:table-cell office:value-type="float" office:value="0.249011">
            <text:p>0.249011</text:p>
          </table:table-cell>
          <table:table-cell table:number-columns-repeated="4"/>
        </table:table-row>
        <table:table-row table:style-name="ro1">
          <table:table-cell office:value-type="float" office:value="560.46337890625">
            <text:p>560.4633789063</text:p>
          </table:table-cell>
          <table:table-cell office:value-type="float" office:value="0.2617036">
            <text:p>0.2617036</text:p>
          </table:table-cell>
          <table:table-cell table:number-columns-repeated="4"/>
        </table:table-row>
        <table:table-row table:style-name="ro1">
          <table:table-cell office:value-type="float" office:value="560.581420898438">
            <text:p>560.5814208984</text:p>
          </table:table-cell>
          <table:table-cell office:value-type="float" office:value="0.2780519">
            <text:p>0.2780519</text:p>
          </table:table-cell>
          <table:table-cell table:number-columns-repeated="4"/>
        </table:table-row>
        <table:table-row table:style-name="ro1">
          <table:table-cell office:value-type="float" office:value="560.699401855469">
            <text:p>560.6994018555</text:p>
          </table:table-cell>
          <table:table-cell office:value-type="float" office:value="0.24687">
            <text:p>0.24687</text:p>
          </table:table-cell>
          <table:table-cell table:number-columns-repeated="4"/>
        </table:table-row>
        <table:table-row table:style-name="ro1">
          <table:table-cell office:value-type="float" office:value="560.817443847656">
            <text:p>560.8174438477</text:p>
          </table:table-cell>
          <table:table-cell office:value-type="float" office:value="0.2481938">
            <text:p>0.2481938</text:p>
          </table:table-cell>
          <table:table-cell table:number-columns-repeated="4"/>
        </table:table-row>
        <table:table-row table:style-name="ro1">
          <table:table-cell office:value-type="float" office:value="560.935424804688">
            <text:p>560.9354248047</text:p>
          </table:table-cell>
          <table:table-cell office:value-type="float" office:value="0.2583811">
            <text:p>0.2583811</text:p>
          </table:table-cell>
          <table:table-cell table:number-columns-repeated="4"/>
        </table:table-row>
        <table:table-row table:style-name="ro1">
          <table:table-cell office:value-type="float" office:value="561.053466796875">
            <text:p>561.0534667969</text:p>
          </table:table-cell>
          <table:table-cell office:value-type="float" office:value="0.2532411">
            <text:p>0.2532411</text:p>
          </table:table-cell>
          <table:table-cell table:number-columns-repeated="4"/>
        </table:table-row>
        <table:table-row table:style-name="ro1">
          <table:table-cell office:value-type="float" office:value="561.171508789063">
            <text:p>561.1715087891</text:p>
          </table:table-cell>
          <table:table-cell office:value-type="float" office:value="0.2478066">
            <text:p>0.2478066</text:p>
          </table:table-cell>
          <table:table-cell table:number-columns-repeated="4"/>
        </table:table-row>
        <table:table-row table:style-name="ro1">
          <table:table-cell office:value-type="float" office:value="561.289489746094">
            <text:p>561.2894897461</text:p>
          </table:table-cell>
          <table:table-cell office:value-type="float" office:value="0.2542126">
            <text:p>0.2542126</text:p>
          </table:table-cell>
          <table:table-cell table:number-columns-repeated="4"/>
        </table:table-row>
        <table:table-row table:style-name="ro1">
          <table:table-cell office:value-type="float" office:value="561.407531738281">
            <text:p>561.4075317383</text:p>
          </table:table-cell>
          <table:table-cell office:value-type="float" office:value="0.2470478">
            <text:p>0.2470478</text:p>
          </table:table-cell>
          <table:table-cell table:number-columns-repeated="4"/>
        </table:table-row>
        <table:table-row table:style-name="ro1">
          <table:table-cell office:value-type="float" office:value="561.525573730469">
            <text:p>561.5255737305</text:p>
          </table:table-cell>
          <table:table-cell office:value-type="float" office:value="0.2595237">
            <text:p>0.2595237</text:p>
          </table:table-cell>
          <table:table-cell table:number-columns-repeated="4"/>
        </table:table-row>
        <table:table-row table:style-name="ro1">
          <table:table-cell office:value-type="float" office:value="561.643615722656">
            <text:p>561.6436157227</text:p>
          </table:table-cell>
          <table:table-cell office:value-type="float" office:value="0.2442613">
            <text:p>0.2442613</text:p>
          </table:table-cell>
          <table:table-cell table:number-columns-repeated="4"/>
        </table:table-row>
        <table:table-row table:style-name="ro1">
          <table:table-cell office:value-type="float" office:value="561.761657714844">
            <text:p>561.7616577148</text:p>
          </table:table-cell>
          <table:table-cell office:value-type="float" office:value="0.235454">
            <text:p>0.235454</text:p>
          </table:table-cell>
          <table:table-cell table:number-columns-repeated="4"/>
        </table:table-row>
        <table:table-row table:style-name="ro1">
          <table:table-cell office:value-type="float" office:value="561.879699707031">
            <text:p>561.879699707</text:p>
          </table:table-cell>
          <table:table-cell office:value-type="float" office:value="0.2556013">
            <text:p>0.2556013</text:p>
          </table:table-cell>
          <table:table-cell table:number-columns-repeated="4"/>
        </table:table-row>
        <table:table-row table:style-name="ro1">
          <table:table-cell office:value-type="float" office:value="561.997741699219">
            <text:p>561.9977416992</text:p>
          </table:table-cell>
          <table:table-cell office:value-type="float" office:value="0.2608826">
            <text:p>0.2608826</text:p>
          </table:table-cell>
          <table:table-cell table:number-columns-repeated="4"/>
        </table:table-row>
        <table:table-row table:style-name="ro1">
          <table:table-cell office:value-type="float" office:value="562.115783691406">
            <text:p>562.1157836914</text:p>
          </table:table-cell>
          <table:table-cell office:value-type="float" office:value="0.239038">
            <text:p>0.239038</text:p>
          </table:table-cell>
          <table:table-cell table:number-columns-repeated="4"/>
        </table:table-row>
        <table:table-row table:style-name="ro1">
          <table:table-cell office:value-type="float" office:value="562.233825683594">
            <text:p>562.2338256836</text:p>
          </table:table-cell>
          <table:table-cell office:value-type="float" office:value="0.251357">
            <text:p>0.251357</text:p>
          </table:table-cell>
          <table:table-cell table:number-columns-repeated="4"/>
        </table:table-row>
        <table:table-row table:style-name="ro1">
          <table:table-cell office:value-type="float" office:value="562.351867675781">
            <text:p>562.3518676758</text:p>
          </table:table-cell>
          <table:table-cell office:value-type="float" office:value="0.2480763">
            <text:p>0.2480763</text:p>
          </table:table-cell>
          <table:table-cell table:number-columns-repeated="4"/>
        </table:table-row>
        <table:table-row table:style-name="ro1">
          <table:table-cell office:value-type="float" office:value="562.469909667969">
            <text:p>562.469909668</text:p>
          </table:table-cell>
          <table:table-cell office:value-type="float" office:value="0.2448906">
            <text:p>0.2448906</text:p>
          </table:table-cell>
          <table:table-cell table:number-columns-repeated="4"/>
        </table:table-row>
        <table:table-row table:style-name="ro1">
          <table:table-cell office:value-type="float" office:value="562.588012695313">
            <text:p>562.5880126953</text:p>
          </table:table-cell>
          <table:table-cell office:value-type="float" office:value="0.2433425">
            <text:p>0.2433425</text:p>
          </table:table-cell>
          <table:table-cell table:number-columns-repeated="4"/>
        </table:table-row>
        <table:table-row table:style-name="ro1">
          <table:table-cell office:value-type="float" office:value="562.7060546875">
            <text:p>562.7060546875</text:p>
          </table:table-cell>
          <table:table-cell office:value-type="float" office:value="0.2305086">
            <text:p>0.2305086</text:p>
          </table:table-cell>
          <table:table-cell table:number-columns-repeated="4"/>
        </table:table-row>
        <table:table-row table:style-name="ro1">
          <table:table-cell office:value-type="float" office:value="562.824096679688">
            <text:p>562.8240966797</text:p>
          </table:table-cell>
          <table:table-cell office:value-type="float" office:value="0.2348703">
            <text:p>0.2348703</text:p>
          </table:table-cell>
          <table:table-cell table:number-columns-repeated="4"/>
        </table:table-row>
        <table:table-row table:style-name="ro1">
          <table:table-cell office:value-type="float" office:value="562.942199707031">
            <text:p>562.942199707</text:p>
          </table:table-cell>
          <table:table-cell office:value-type="float" office:value="0.2321169">
            <text:p>0.2321169</text:p>
          </table:table-cell>
          <table:table-cell table:number-columns-repeated="4"/>
        </table:table-row>
        <table:table-row table:style-name="ro1">
          <table:table-cell office:value-type="float" office:value="563.060241699219">
            <text:p>563.0602416992</text:p>
          </table:table-cell>
          <table:table-cell office:value-type="float" office:value="0.241173">
            <text:p>0.241173</text:p>
          </table:table-cell>
          <table:table-cell table:number-columns-repeated="4"/>
        </table:table-row>
        <table:table-row table:style-name="ro1">
          <table:table-cell office:value-type="float" office:value="563.178344726563">
            <text:p>563.1783447266</text:p>
          </table:table-cell>
          <table:table-cell office:value-type="float" office:value="0.2502623">
            <text:p>0.2502623</text:p>
          </table:table-cell>
          <table:table-cell table:number-columns-repeated="4"/>
        </table:table-row>
        <table:table-row table:style-name="ro1">
          <table:table-cell office:value-type="float" office:value="563.29638671875">
            <text:p>563.2963867188</text:p>
          </table:table-cell>
          <table:table-cell office:value-type="float" office:value="0.2291837">
            <text:p>0.2291837</text:p>
          </table:table-cell>
          <table:table-cell table:number-columns-repeated="4"/>
        </table:table-row>
        <table:table-row table:style-name="ro1">
          <table:table-cell office:value-type="float" office:value="563.414489746094">
            <text:p>563.4144897461</text:p>
          </table:table-cell>
          <table:table-cell office:value-type="float" office:value="0.2392017">
            <text:p>0.2392017</text:p>
          </table:table-cell>
          <table:table-cell table:number-columns-repeated="4"/>
        </table:table-row>
        <table:table-row table:style-name="ro1">
          <table:table-cell office:value-type="float" office:value="563.532531738281">
            <text:p>563.5325317383</text:p>
          </table:table-cell>
          <table:table-cell office:value-type="float" office:value="0.250047">
            <text:p>0.250047</text:p>
          </table:table-cell>
          <table:table-cell table:number-columns-repeated="4"/>
        </table:table-row>
        <table:table-row table:style-name="ro1">
          <table:table-cell office:value-type="float" office:value="563.650634765625">
            <text:p>563.6506347656</text:p>
          </table:table-cell>
          <table:table-cell office:value-type="float" office:value="0.2265497">
            <text:p>0.2265497</text:p>
          </table:table-cell>
          <table:table-cell table:number-columns-repeated="4"/>
        </table:table-row>
        <table:table-row table:style-name="ro1">
          <table:table-cell office:value-type="float" office:value="563.768737792969">
            <text:p>563.768737793</text:p>
          </table:table-cell>
          <table:table-cell office:value-type="float" office:value="0.2267321">
            <text:p>0.2267321</text:p>
          </table:table-cell>
          <table:table-cell table:number-columns-repeated="4"/>
        </table:table-row>
        <table:table-row table:style-name="ro1">
          <table:table-cell office:value-type="float" office:value="563.886779785156">
            <text:p>563.8867797852</text:p>
          </table:table-cell>
          <table:table-cell office:value-type="float" office:value="0.2339675">
            <text:p>0.2339675</text:p>
          </table:table-cell>
          <table:table-cell table:number-columns-repeated="4"/>
        </table:table-row>
        <table:table-row table:style-name="ro1">
          <table:table-cell office:value-type="float" office:value="564.0048828125">
            <text:p>564.0048828125</text:p>
          </table:table-cell>
          <table:table-cell office:value-type="float" office:value="0.2280401">
            <text:p>0.2280401</text:p>
          </table:table-cell>
          <table:table-cell table:number-columns-repeated="4"/>
        </table:table-row>
        <table:table-row table:style-name="ro1">
          <table:table-cell office:value-type="float" office:value="564.122985839844">
            <text:p>564.1229858398</text:p>
          </table:table-cell>
          <table:table-cell office:value-type="float" office:value="0.2190899">
            <text:p>0.2190899</text:p>
          </table:table-cell>
          <table:table-cell table:number-columns-repeated="4"/>
        </table:table-row>
        <table:table-row table:style-name="ro1">
          <table:table-cell office:value-type="float" office:value="564.241088867188">
            <text:p>564.2410888672</text:p>
          </table:table-cell>
          <table:table-cell office:value-type="float" office:value="0.2377494">
            <text:p>0.2377494</text:p>
          </table:table-cell>
          <table:table-cell table:number-columns-repeated="4"/>
        </table:table-row>
        <table:table-row table:style-name="ro1">
          <table:table-cell office:value-type="float" office:value="564.359191894531">
            <text:p>564.3591918945</text:p>
          </table:table-cell>
          <table:table-cell office:value-type="float" office:value="0.235564">
            <text:p>0.235564</text:p>
          </table:table-cell>
          <table:table-cell table:number-columns-repeated="4"/>
        </table:table-row>
        <table:table-row table:style-name="ro1">
          <table:table-cell office:value-type="float" office:value="564.477294921875">
            <text:p>564.4772949219</text:p>
          </table:table-cell>
          <table:table-cell office:value-type="float" office:value="0.2289011">
            <text:p>0.2289011</text:p>
          </table:table-cell>
          <table:table-cell table:number-columns-repeated="4"/>
        </table:table-row>
        <table:table-row table:style-name="ro1">
          <table:table-cell office:value-type="float" office:value="564.595397949219">
            <text:p>564.5953979492</text:p>
          </table:table-cell>
          <table:table-cell office:value-type="float" office:value="0.2350833">
            <text:p>0.2350833</text:p>
          </table:table-cell>
          <table:table-cell table:number-columns-repeated="4"/>
        </table:table-row>
        <table:table-row table:style-name="ro1">
          <table:table-cell office:value-type="float" office:value="564.713500976563">
            <text:p>564.7135009766</text:p>
          </table:table-cell>
          <table:table-cell office:value-type="float" office:value="0.2575326">
            <text:p>0.2575326</text:p>
          </table:table-cell>
          <table:table-cell table:number-columns-repeated="4"/>
        </table:table-row>
        <table:table-row table:style-name="ro1">
          <table:table-cell office:value-type="float" office:value="564.831604003906">
            <text:p>564.8316040039</text:p>
          </table:table-cell>
          <table:table-cell office:value-type="float" office:value="0.2260334">
            <text:p>0.2260334</text:p>
          </table:table-cell>
          <table:table-cell table:number-columns-repeated="4"/>
        </table:table-row>
        <table:table-row table:style-name="ro1">
          <table:table-cell office:value-type="float" office:value="564.949768066406">
            <text:p>564.9497680664</text:p>
          </table:table-cell>
          <table:table-cell office:value-type="float" office:value="0.2281979">
            <text:p>0.2281979</text:p>
          </table:table-cell>
          <table:table-cell table:number-columns-repeated="4"/>
        </table:table-row>
        <table:table-row table:style-name="ro1">
          <table:table-cell office:value-type="float" office:value="565.06787109375">
            <text:p>565.0678710938</text:p>
          </table:table-cell>
          <table:table-cell office:value-type="float" office:value="0.2343381">
            <text:p>0.2343381</text:p>
          </table:table-cell>
          <table:table-cell table:number-columns-repeated="4"/>
        </table:table-row>
        <table:table-row table:style-name="ro1">
          <table:table-cell office:value-type="float" office:value="565.185974121094">
            <text:p>565.1859741211</text:p>
          </table:table-cell>
          <table:table-cell office:value-type="float" office:value="0.2271672">
            <text:p>0.2271672</text:p>
          </table:table-cell>
          <table:table-cell table:number-columns-repeated="4"/>
        </table:table-row>
        <table:table-row table:style-name="ro1">
          <table:table-cell office:value-type="float" office:value="565.304077148438">
            <text:p>565.3040771484</text:p>
          </table:table-cell>
          <table:table-cell office:value-type="float" office:value="0.2147461">
            <text:p>0.2147461</text:p>
          </table:table-cell>
          <table:table-cell table:number-columns-repeated="4"/>
        </table:table-row>
        <table:table-row table:style-name="ro1">
          <table:table-cell office:value-type="float" office:value="565.422241210938">
            <text:p>565.4222412109</text:p>
          </table:table-cell>
          <table:table-cell office:value-type="float" office:value="0.2218865">
            <text:p>0.2218865</text:p>
          </table:table-cell>
          <table:table-cell table:number-columns-repeated="4"/>
        </table:table-row>
        <table:table-row table:style-name="ro1">
          <table:table-cell office:value-type="float" office:value="565.540344238281">
            <text:p>565.5403442383</text:p>
          </table:table-cell>
          <table:table-cell office:value-type="float" office:value="0.2150146">
            <text:p>0.2150146</text:p>
          </table:table-cell>
          <table:table-cell table:number-columns-repeated="4"/>
        </table:table-row>
        <table:table-row table:style-name="ro1">
          <table:table-cell office:value-type="float" office:value="565.658508300781">
            <text:p>565.6585083008</text:p>
          </table:table-cell>
          <table:table-cell office:value-type="float" office:value="0.2262326">
            <text:p>0.2262326</text:p>
          </table:table-cell>
          <table:table-cell table:number-columns-repeated="4"/>
        </table:table-row>
        <table:table-row table:style-name="ro1">
          <table:table-cell office:value-type="float" office:value="565.776611328125">
            <text:p>565.7766113281</text:p>
          </table:table-cell>
          <table:table-cell office:value-type="float" office:value="0.2220432">
            <text:p>0.2220432</text:p>
          </table:table-cell>
          <table:table-cell table:number-columns-repeated="4"/>
        </table:table-row>
        <table:table-row table:style-name="ro1">
          <table:table-cell office:value-type="float" office:value="565.894775390625">
            <text:p>565.8947753906</text:p>
          </table:table-cell>
          <table:table-cell office:value-type="float" office:value="0.2333891">
            <text:p>0.2333891</text:p>
          </table:table-cell>
          <table:table-cell table:number-columns-repeated="4"/>
        </table:table-row>
        <table:table-row table:style-name="ro1">
          <table:table-cell office:value-type="float" office:value="566.012878417969">
            <text:p>566.012878418</text:p>
          </table:table-cell>
          <table:table-cell office:value-type="float" office:value="0.2211181">
            <text:p>0.2211181</text:p>
          </table:table-cell>
          <table:table-cell table:number-columns-repeated="4"/>
        </table:table-row>
        <table:table-row table:style-name="ro1">
          <table:table-cell office:value-type="float" office:value="566.131042480469">
            <text:p>566.1310424805</text:p>
          </table:table-cell>
          <table:table-cell office:value-type="float" office:value="0.2166217">
            <text:p>0.2166217</text:p>
          </table:table-cell>
          <table:table-cell table:number-columns-repeated="4"/>
        </table:table-row>
        <table:table-row table:style-name="ro1">
          <table:table-cell office:value-type="float" office:value="566.249206542969">
            <text:p>566.249206543</text:p>
          </table:table-cell>
          <table:table-cell office:value-type="float" office:value="0.2190716">
            <text:p>0.2190716</text:p>
          </table:table-cell>
          <table:table-cell table:number-columns-repeated="4"/>
        </table:table-row>
        <table:table-row table:style-name="ro1">
          <table:table-cell office:value-type="float" office:value="566.367370605469">
            <text:p>566.3673706055</text:p>
          </table:table-cell>
          <table:table-cell office:value-type="float" office:value="0.2225462">
            <text:p>0.2225462</text:p>
          </table:table-cell>
          <table:table-cell table:number-columns-repeated="4"/>
        </table:table-row>
        <table:table-row table:style-name="ro1">
          <table:table-cell office:value-type="float" office:value="566.485473632813">
            <text:p>566.4854736328</text:p>
          </table:table-cell>
          <table:table-cell office:value-type="float" office:value="0.209214">
            <text:p>0.209214</text:p>
          </table:table-cell>
          <table:table-cell table:number-columns-repeated="4"/>
        </table:table-row>
        <table:table-row table:style-name="ro1">
          <table:table-cell office:value-type="float" office:value="566.603637695313">
            <text:p>566.6036376953</text:p>
          </table:table-cell>
          <table:table-cell office:value-type="float" office:value="0.2339064">
            <text:p>0.2339064</text:p>
          </table:table-cell>
          <table:table-cell table:number-columns-repeated="4"/>
        </table:table-row>
        <table:table-row table:style-name="ro1">
          <table:table-cell office:value-type="float" office:value="566.721801757813">
            <text:p>566.7218017578</text:p>
          </table:table-cell>
          <table:table-cell office:value-type="float" office:value="0.218739">
            <text:p>0.218739</text:p>
          </table:table-cell>
          <table:table-cell table:number-columns-repeated="4"/>
        </table:table-row>
        <table:table-row table:style-name="ro1">
          <table:table-cell office:value-type="float" office:value="566.839965820313">
            <text:p>566.8399658203</text:p>
          </table:table-cell>
          <table:table-cell office:value-type="float" office:value="0.2115275">
            <text:p>0.2115275</text:p>
          </table:table-cell>
          <table:table-cell table:number-columns-repeated="4"/>
        </table:table-row>
        <table:table-row table:style-name="ro1">
          <table:table-cell office:value-type="float" office:value="566.958129882813">
            <text:p>566.9581298828</text:p>
          </table:table-cell>
          <table:table-cell office:value-type="float" office:value="0.2167654">
            <text:p>0.2167654</text:p>
          </table:table-cell>
          <table:table-cell table:number-columns-repeated="4"/>
        </table:table-row>
        <table:table-row table:style-name="ro1">
          <table:table-cell office:value-type="float" office:value="567.076293945313">
            <text:p>567.0762939453</text:p>
          </table:table-cell>
          <table:table-cell office:value-type="float" office:value="0.2296504">
            <text:p>0.2296504</text:p>
          </table:table-cell>
          <table:table-cell table:number-columns-repeated="4"/>
        </table:table-row>
        <table:table-row table:style-name="ro1">
          <table:table-cell office:value-type="float" office:value="567.194458007813">
            <text:p>567.1944580078</text:p>
          </table:table-cell>
          <table:table-cell office:value-type="float" office:value="0.2196274">
            <text:p>0.2196274</text:p>
          </table:table-cell>
          <table:table-cell table:number-columns-repeated="4"/>
        </table:table-row>
        <table:table-row table:style-name="ro1">
          <table:table-cell office:value-type="float" office:value="567.312622070313">
            <text:p>567.3126220703</text:p>
          </table:table-cell>
          <table:table-cell office:value-type="float" office:value="0.2131392">
            <text:p>0.2131392</text:p>
          </table:table-cell>
          <table:table-cell table:number-columns-repeated="4"/>
        </table:table-row>
        <table:table-row table:style-name="ro1">
          <table:table-cell office:value-type="float" office:value="567.430847167969">
            <text:p>567.430847168</text:p>
          </table:table-cell>
          <table:table-cell office:value-type="float" office:value="0.2076963">
            <text:p>0.2076963</text:p>
          </table:table-cell>
          <table:table-cell table:number-columns-repeated="4"/>
        </table:table-row>
        <table:table-row table:style-name="ro1">
          <table:table-cell office:value-type="float" office:value="567.549011230469">
            <text:p>567.5490112305</text:p>
          </table:table-cell>
          <table:table-cell office:value-type="float" office:value="0.2212806">
            <text:p>0.2212806</text:p>
          </table:table-cell>
          <table:table-cell table:number-columns-repeated="4"/>
        </table:table-row>
        <table:table-row table:style-name="ro1">
          <table:table-cell office:value-type="float" office:value="567.667175292969">
            <text:p>567.667175293</text:p>
          </table:table-cell>
          <table:table-cell office:value-type="float" office:value="0.2117025">
            <text:p>0.2117025</text:p>
          </table:table-cell>
          <table:table-cell table:number-columns-repeated="4"/>
        </table:table-row>
        <table:table-row table:style-name="ro1">
          <table:table-cell office:value-type="float" office:value="567.785339355469">
            <text:p>567.7853393555</text:p>
          </table:table-cell>
          <table:table-cell office:value-type="float" office:value="0.2139039">
            <text:p>0.2139039</text:p>
          </table:table-cell>
          <table:table-cell table:number-columns-repeated="4"/>
        </table:table-row>
        <table:table-row table:style-name="ro1">
          <table:table-cell office:value-type="float" office:value="567.903564453125">
            <text:p>567.9035644531</text:p>
          </table:table-cell>
          <table:table-cell office:value-type="float" office:value="0.2057011">
            <text:p>0.2057011</text:p>
          </table:table-cell>
          <table:table-cell table:number-columns-repeated="4"/>
        </table:table-row>
        <table:table-row table:style-name="ro1">
          <table:table-cell office:value-type="float" office:value="568.021728515625">
            <text:p>568.0217285156</text:p>
          </table:table-cell>
          <table:table-cell office:value-type="float" office:value="0.2288975">
            <text:p>0.2288975</text:p>
          </table:table-cell>
          <table:table-cell table:number-columns-repeated="4"/>
        </table:table-row>
        <table:table-row table:style-name="ro1">
          <table:table-cell office:value-type="float" office:value="568.139953613281">
            <text:p>568.1399536133</text:p>
          </table:table-cell>
          <table:table-cell office:value-type="float" office:value="0.2301091">
            <text:p>0.2301091</text:p>
          </table:table-cell>
          <table:table-cell table:number-columns-repeated="4"/>
        </table:table-row>
        <table:table-row table:style-name="ro1">
          <table:table-cell office:value-type="float" office:value="568.258117675781">
            <text:p>568.2581176758</text:p>
          </table:table-cell>
          <table:table-cell office:value-type="float" office:value="0.1987041">
            <text:p>0.1987041</text:p>
          </table:table-cell>
          <table:table-cell table:number-columns-repeated="4"/>
        </table:table-row>
        <table:table-row table:style-name="ro1">
          <table:table-cell office:value-type="float" office:value="568.376342773438">
            <text:p>568.3763427734</text:p>
          </table:table-cell>
          <table:table-cell office:value-type="float" office:value="0.2025083">
            <text:p>0.2025083</text:p>
          </table:table-cell>
          <table:table-cell table:number-columns-repeated="4"/>
        </table:table-row>
        <table:table-row table:style-name="ro1">
          <table:table-cell office:value-type="float" office:value="568.494506835938">
            <text:p>568.4945068359</text:p>
          </table:table-cell>
          <table:table-cell office:value-type="float" office:value="0.2131323">
            <text:p>0.2131323</text:p>
          </table:table-cell>
          <table:table-cell table:number-columns-repeated="4"/>
        </table:table-row>
        <table:table-row table:style-name="ro1">
          <table:table-cell office:value-type="float" office:value="568.612731933594">
            <text:p>568.6127319336</text:p>
          </table:table-cell>
          <table:table-cell office:value-type="float" office:value="0.2126555">
            <text:p>0.2126555</text:p>
          </table:table-cell>
          <table:table-cell table:number-columns-repeated="4"/>
        </table:table-row>
        <table:table-row table:style-name="ro1">
          <table:table-cell office:value-type="float" office:value="568.73095703125">
            <text:p>568.7309570313</text:p>
          </table:table-cell>
          <table:table-cell office:value-type="float" office:value="0.1876783">
            <text:p>0.1876783</text:p>
          </table:table-cell>
          <table:table-cell table:number-columns-repeated="4"/>
        </table:table-row>
        <table:table-row table:style-name="ro1">
          <table:table-cell office:value-type="float" office:value="568.84912109375">
            <text:p>568.8491210938</text:p>
          </table:table-cell>
          <table:table-cell office:value-type="float" office:value="0.2050818">
            <text:p>0.2050818</text:p>
          </table:table-cell>
          <table:table-cell table:number-columns-repeated="4"/>
        </table:table-row>
        <table:table-row table:style-name="ro1">
          <table:table-cell office:value-type="float" office:value="568.967346191406">
            <text:p>568.9673461914</text:p>
          </table:table-cell>
          <table:table-cell office:value-type="float" office:value="0.2078826">
            <text:p>0.2078826</text:p>
          </table:table-cell>
          <table:table-cell table:number-columns-repeated="4"/>
        </table:table-row>
        <table:table-row table:style-name="ro1">
          <table:table-cell office:value-type="float" office:value="569.085571289063">
            <text:p>569.0855712891</text:p>
          </table:table-cell>
          <table:table-cell office:value-type="float" office:value="0.2192802">
            <text:p>0.2192802</text:p>
          </table:table-cell>
          <table:table-cell table:number-columns-repeated="4"/>
        </table:table-row>
        <table:table-row table:style-name="ro1">
          <table:table-cell office:value-type="float" office:value="569.203796386719">
            <text:p>569.2037963867</text:p>
          </table:table-cell>
          <table:table-cell office:value-type="float" office:value="0.1868061">
            <text:p>0.1868061</text:p>
          </table:table-cell>
          <table:table-cell table:number-columns-repeated="4"/>
        </table:table-row>
        <table:table-row table:style-name="ro1">
          <table:table-cell office:value-type="float" office:value="569.322021484375">
            <text:p>569.3220214844</text:p>
          </table:table-cell>
          <table:table-cell office:value-type="float" office:value="0.2009549">
            <text:p>0.2009549</text:p>
          </table:table-cell>
          <table:table-cell table:number-columns-repeated="4"/>
        </table:table-row>
        <table:table-row table:style-name="ro1">
          <table:table-cell office:value-type="float" office:value="569.440246582031">
            <text:p>569.440246582</text:p>
          </table:table-cell>
          <table:table-cell office:value-type="float" office:value="0.1982784">
            <text:p>0.1982784</text:p>
          </table:table-cell>
          <table:table-cell table:number-columns-repeated="4"/>
        </table:table-row>
        <table:table-row table:style-name="ro1">
          <table:table-cell office:value-type="float" office:value="569.558471679688">
            <text:p>569.5584716797</text:p>
          </table:table-cell>
          <table:table-cell office:value-type="float" office:value="0.2052652">
            <text:p>0.2052652</text:p>
          </table:table-cell>
          <table:table-cell table:number-columns-repeated="4"/>
        </table:table-row>
        <table:table-row table:style-name="ro1">
          <table:table-cell office:value-type="float" office:value="569.676696777344">
            <text:p>569.6766967773</text:p>
          </table:table-cell>
          <table:table-cell office:value-type="float" office:value="0.1974262">
            <text:p>0.1974262</text:p>
          </table:table-cell>
          <table:table-cell table:number-columns-repeated="4"/>
        </table:table-row>
        <table:table-row table:style-name="ro1">
          <table:table-cell office:value-type="float" office:value="569.794921875">
            <text:p>569.794921875</text:p>
          </table:table-cell>
          <table:table-cell office:value-type="float" office:value="0.1841716">
            <text:p>0.1841716</text:p>
          </table:table-cell>
          <table:table-cell table:number-columns-repeated="4"/>
        </table:table-row>
        <table:table-row table:style-name="ro1">
          <table:table-cell office:value-type="float" office:value="569.913146972656">
            <text:p>569.9131469727</text:p>
          </table:table-cell>
          <table:table-cell office:value-type="float" office:value="0.1832718">
            <text:p>0.1832718</text:p>
          </table:table-cell>
          <table:table-cell table:number-columns-repeated="4"/>
        </table:table-row>
        <table:table-row table:style-name="ro1">
          <table:table-cell office:value-type="float" office:value="570.031372070313">
            <text:p>570.0313720703</text:p>
          </table:table-cell>
          <table:table-cell office:value-type="float" office:value="0.1904612">
            <text:p>0.1904612</text:p>
          </table:table-cell>
          <table:table-cell table:number-columns-repeated="4"/>
        </table:table-row>
        <table:table-row table:style-name="ro1">
          <table:table-cell office:value-type="float" office:value="570.149597167969">
            <text:p>570.149597168</text:p>
          </table:table-cell>
          <table:table-cell office:value-type="float" office:value="0.1925298">
            <text:p>0.1925298</text:p>
          </table:table-cell>
          <table:table-cell table:number-columns-repeated="4"/>
        </table:table-row>
        <table:table-row table:style-name="ro1">
          <table:table-cell office:value-type="float" office:value="570.267883300781">
            <text:p>570.2678833008</text:p>
          </table:table-cell>
          <table:table-cell office:value-type="float" office:value="0.1781475">
            <text:p>0.1781475</text:p>
          </table:table-cell>
          <table:table-cell table:number-columns-repeated="4"/>
        </table:table-row>
        <table:table-row table:style-name="ro1">
          <table:table-cell office:value-type="float" office:value="570.386108398438">
            <text:p>570.3861083984</text:p>
          </table:table-cell>
          <table:table-cell office:value-type="float" office:value="0.1885465">
            <text:p>0.1885465</text:p>
          </table:table-cell>
          <table:table-cell table:number-columns-repeated="4"/>
        </table:table-row>
        <table:table-row table:style-name="ro1">
          <table:table-cell office:value-type="float" office:value="570.504333496094">
            <text:p>570.5043334961</text:p>
          </table:table-cell>
          <table:table-cell office:value-type="float" office:value="0.2004117">
            <text:p>0.2004117</text:p>
          </table:table-cell>
          <table:table-cell table:number-columns-repeated="4"/>
        </table:table-row>
        <table:table-row table:style-name="ro1">
          <table:table-cell office:value-type="float" office:value="570.622619628906">
            <text:p>570.6226196289</text:p>
          </table:table-cell>
          <table:table-cell office:value-type="float" office:value="0.2004963">
            <text:p>0.2004963</text:p>
          </table:table-cell>
          <table:table-cell table:number-columns-repeated="4"/>
        </table:table-row>
        <table:table-row table:style-name="ro1">
          <table:table-cell office:value-type="float" office:value="570.740844726563">
            <text:p>570.7408447266</text:p>
          </table:table-cell>
          <table:table-cell office:value-type="float" office:value="0.1841043">
            <text:p>0.1841043</text:p>
          </table:table-cell>
          <table:table-cell table:number-columns-repeated="4"/>
        </table:table-row>
        <table:table-row table:style-name="ro1">
          <table:table-cell office:value-type="float" office:value="570.859130859375">
            <text:p>570.8591308594</text:p>
          </table:table-cell>
          <table:table-cell office:value-type="float" office:value="0.1791856">
            <text:p>0.1791856</text:p>
          </table:table-cell>
          <table:table-cell table:number-columns-repeated="4"/>
        </table:table-row>
        <table:table-row table:style-name="ro1">
          <table:table-cell office:value-type="float" office:value="570.977355957031">
            <text:p>570.977355957</text:p>
          </table:table-cell>
          <table:table-cell office:value-type="float" office:value="0.1871428">
            <text:p>0.1871428</text:p>
          </table:table-cell>
          <table:table-cell table:number-columns-repeated="4"/>
        </table:table-row>
        <table:table-row table:style-name="ro1">
          <table:table-cell office:value-type="float" office:value="571.095642089844">
            <text:p>571.0956420898</text:p>
          </table:table-cell>
          <table:table-cell office:value-type="float" office:value="0.1777136">
            <text:p>0.1777136</text:p>
          </table:table-cell>
          <table:table-cell table:number-columns-repeated="4"/>
        </table:table-row>
        <table:table-row table:style-name="ro1">
          <table:table-cell office:value-type="float" office:value="571.213928222656">
            <text:p>571.2139282227</text:p>
          </table:table-cell>
          <table:table-cell office:value-type="float" office:value="0.1838861">
            <text:p>0.1838861</text:p>
          </table:table-cell>
          <table:table-cell table:number-columns-repeated="4"/>
        </table:table-row>
        <table:table-row table:style-name="ro1">
          <table:table-cell office:value-type="float" office:value="571.332153320313">
            <text:p>571.3321533203</text:p>
          </table:table-cell>
          <table:table-cell office:value-type="float" office:value="0.1835607">
            <text:p>0.1835607</text:p>
          </table:table-cell>
          <table:table-cell table:number-columns-repeated="4"/>
        </table:table-row>
        <table:table-row table:style-name="ro1">
          <table:table-cell office:value-type="float" office:value="571.450439453125">
            <text:p>571.4504394531</text:p>
          </table:table-cell>
          <table:table-cell office:value-type="float" office:value="0.18236">
            <text:p>0.18236</text:p>
          </table:table-cell>
          <table:table-cell table:number-columns-repeated="4"/>
        </table:table-row>
        <table:table-row table:style-name="ro1">
          <table:table-cell office:value-type="float" office:value="571.568725585938">
            <text:p>571.5687255859</text:p>
          </table:table-cell>
          <table:table-cell office:value-type="float" office:value="0.1718025">
            <text:p>0.1718025</text:p>
          </table:table-cell>
          <table:table-cell table:number-columns-repeated="4"/>
        </table:table-row>
        <table:table-row table:style-name="ro1">
          <table:table-cell office:value-type="float" office:value="571.68701171875">
            <text:p>571.6870117188</text:p>
          </table:table-cell>
          <table:table-cell office:value-type="float" office:value="0.1849004">
            <text:p>0.1849004</text:p>
          </table:table-cell>
          <table:table-cell table:number-columns-repeated="4"/>
        </table:table-row>
        <table:table-row table:style-name="ro1">
          <table:table-cell office:value-type="float" office:value="571.805297851563">
            <text:p>571.8052978516</text:p>
          </table:table-cell>
          <table:table-cell office:value-type="float" office:value="0.1729653">
            <text:p>0.1729653</text:p>
          </table:table-cell>
          <table:table-cell table:number-columns-repeated="4"/>
        </table:table-row>
        <table:table-row table:style-name="ro1">
          <table:table-cell office:value-type="float" office:value="571.923583984375">
            <text:p>571.9235839844</text:p>
          </table:table-cell>
          <table:table-cell office:value-type="float" office:value="0.1947875">
            <text:p>0.1947875</text:p>
          </table:table-cell>
          <table:table-cell table:number-columns-repeated="4"/>
        </table:table-row>
        <table:table-row table:style-name="ro1">
          <table:table-cell office:value-type="float" office:value="572.041870117188">
            <text:p>572.0418701172</text:p>
          </table:table-cell>
          <table:table-cell office:value-type="float" office:value="0.1732409">
            <text:p>0.1732409</text:p>
          </table:table-cell>
          <table:table-cell table:number-columns-repeated="4"/>
        </table:table-row>
        <table:table-row table:style-name="ro1">
          <table:table-cell office:value-type="float" office:value="572.16015625">
            <text:p>572.16015625</text:p>
          </table:table-cell>
          <table:table-cell office:value-type="float" office:value="0.1834447">
            <text:p>0.1834447</text:p>
          </table:table-cell>
          <table:table-cell table:number-columns-repeated="4"/>
        </table:table-row>
        <table:table-row table:style-name="ro1">
          <table:table-cell office:value-type="float" office:value="572.278442382813">
            <text:p>572.2784423828</text:p>
          </table:table-cell>
          <table:table-cell office:value-type="float" office:value="0.1703983">
            <text:p>0.1703983</text:p>
          </table:table-cell>
          <table:table-cell table:number-columns-repeated="4"/>
        </table:table-row>
        <table:table-row table:style-name="ro1">
          <table:table-cell office:value-type="float" office:value="572.396728515625">
            <text:p>572.3967285156</text:p>
          </table:table-cell>
          <table:table-cell office:value-type="float" office:value="0.168094">
            <text:p>0.168094</text:p>
          </table:table-cell>
          <table:table-cell table:number-columns-repeated="4"/>
        </table:table-row>
        <table:table-row table:style-name="ro1">
          <table:table-cell office:value-type="float" office:value="572.515014648438">
            <text:p>572.5150146484</text:p>
          </table:table-cell>
          <table:table-cell office:value-type="float" office:value="0.1658079">
            <text:p>0.1658079</text:p>
          </table:table-cell>
          <table:table-cell table:number-columns-repeated="4"/>
        </table:table-row>
        <table:table-row table:style-name="ro1">
          <table:table-cell office:value-type="float" office:value="572.63330078125">
            <text:p>572.6333007813</text:p>
          </table:table-cell>
          <table:table-cell office:value-type="float" office:value="0.1693814">
            <text:p>0.1693814</text:p>
          </table:table-cell>
          <table:table-cell table:number-columns-repeated="4"/>
        </table:table-row>
        <table:table-row table:style-name="ro1">
          <table:table-cell office:value-type="float" office:value="572.751586914063">
            <text:p>572.7515869141</text:p>
          </table:table-cell>
          <table:table-cell office:value-type="float" office:value="0.1760467">
            <text:p>0.1760467</text:p>
          </table:table-cell>
          <table:table-cell table:number-columns-repeated="4"/>
        </table:table-row>
        <table:table-row table:style-name="ro1">
          <table:table-cell office:value-type="float" office:value="572.869934082031">
            <text:p>572.869934082</text:p>
          </table:table-cell>
          <table:table-cell office:value-type="float" office:value="0.1632524">
            <text:p>0.1632524</text:p>
          </table:table-cell>
          <table:table-cell table:number-columns-repeated="4"/>
        </table:table-row>
        <table:table-row table:style-name="ro1">
          <table:table-cell office:value-type="float" office:value="572.988220214844">
            <text:p>572.9882202148</text:p>
          </table:table-cell>
          <table:table-cell office:value-type="float" office:value="0.160733">
            <text:p>0.160733</text:p>
          </table:table-cell>
          <table:table-cell table:number-columns-repeated="4"/>
        </table:table-row>
        <table:table-row table:style-name="ro1">
          <table:table-cell office:value-type="float" office:value="573.106506347656">
            <text:p>573.1065063477</text:p>
          </table:table-cell>
          <table:table-cell office:value-type="float" office:value="0.1740377">
            <text:p>0.1740377</text:p>
          </table:table-cell>
          <table:table-cell table:number-columns-repeated="4"/>
        </table:table-row>
        <table:table-row table:style-name="ro1">
          <table:table-cell office:value-type="float" office:value="573.224853515625">
            <text:p>573.2248535156</text:p>
          </table:table-cell>
          <table:table-cell office:value-type="float" office:value="0.1659324">
            <text:p>0.1659324</text:p>
          </table:table-cell>
          <table:table-cell table:number-columns-repeated="4"/>
        </table:table-row>
        <table:table-row table:style-name="ro1">
          <table:table-cell office:value-type="float" office:value="573.343139648438">
            <text:p>573.3431396484</text:p>
          </table:table-cell>
          <table:table-cell office:value-type="float" office:value="0.1657519">
            <text:p>0.1657519</text:p>
          </table:table-cell>
          <table:table-cell table:number-columns-repeated="4"/>
        </table:table-row>
        <table:table-row table:style-name="ro1">
          <table:table-cell office:value-type="float" office:value="573.461486816406">
            <text:p>573.4614868164</text:p>
          </table:table-cell>
          <table:table-cell office:value-type="float" office:value="0.1744325">
            <text:p>0.1744325</text:p>
          </table:table-cell>
          <table:table-cell table:number-columns-repeated="4"/>
        </table:table-row>
        <table:table-row table:style-name="ro1">
          <table:table-cell office:value-type="float" office:value="573.579772949219">
            <text:p>573.5797729492</text:p>
          </table:table-cell>
          <table:table-cell office:value-type="float" office:value="0.1612072">
            <text:p>0.1612072</text:p>
          </table:table-cell>
          <table:table-cell table:number-columns-repeated="4"/>
        </table:table-row>
        <table:table-row table:style-name="ro1">
          <table:table-cell office:value-type="float" office:value="573.698120117188">
            <text:p>573.6981201172</text:p>
          </table:table-cell>
          <table:table-cell office:value-type="float" office:value="0.1660657">
            <text:p>0.1660657</text:p>
          </table:table-cell>
          <table:table-cell table:number-columns-repeated="4"/>
        </table:table-row>
        <table:table-row table:style-name="ro1">
          <table:table-cell office:value-type="float" office:value="573.81640625">
            <text:p>573.81640625</text:p>
          </table:table-cell>
          <table:table-cell office:value-type="float" office:value="0.1591914">
            <text:p>0.1591914</text:p>
          </table:table-cell>
          <table:table-cell table:number-columns-repeated="4"/>
        </table:table-row>
        <table:table-row table:style-name="ro1">
          <table:table-cell office:value-type="float" office:value="573.934753417969">
            <text:p>573.934753418</text:p>
          </table:table-cell>
          <table:table-cell office:value-type="float" office:value="0.1613221">
            <text:p>0.1613221</text:p>
          </table:table-cell>
          <table:table-cell table:number-columns-repeated="4"/>
        </table:table-row>
        <table:table-row table:style-name="ro1">
          <table:table-cell office:value-type="float" office:value="574.053100585938">
            <text:p>574.0531005859</text:p>
          </table:table-cell>
          <table:table-cell office:value-type="float" office:value="0.1570746">
            <text:p>0.1570746</text:p>
          </table:table-cell>
          <table:table-cell table:number-columns-repeated="4"/>
        </table:table-row>
        <table:table-row table:style-name="ro1">
          <table:table-cell office:value-type="float" office:value="574.171447753906">
            <text:p>574.1714477539</text:p>
          </table:table-cell>
          <table:table-cell office:value-type="float" office:value="0.1571416">
            <text:p>0.1571416</text:p>
          </table:table-cell>
          <table:table-cell table:number-columns-repeated="4"/>
        </table:table-row>
        <table:table-row table:style-name="ro1">
          <table:table-cell office:value-type="float" office:value="574.289733886719">
            <text:p>574.2897338867</text:p>
          </table:table-cell>
          <table:table-cell office:value-type="float" office:value="0.155249">
            <text:p>0.155249</text:p>
          </table:table-cell>
          <table:table-cell table:number-columns-repeated="4"/>
        </table:table-row>
        <table:table-row table:style-name="ro1">
          <table:table-cell office:value-type="float" office:value="574.408081054688">
            <text:p>574.4080810547</text:p>
          </table:table-cell>
          <table:table-cell office:value-type="float" office:value="0.1607332">
            <text:p>0.1607332</text:p>
          </table:table-cell>
          <table:table-cell table:number-columns-repeated="4"/>
        </table:table-row>
        <table:table-row table:style-name="ro1">
          <table:table-cell office:value-type="float" office:value="574.526428222656">
            <text:p>574.5264282227</text:p>
          </table:table-cell>
          <table:table-cell office:value-type="float" office:value="0.1594454">
            <text:p>0.1594454</text:p>
          </table:table-cell>
          <table:table-cell table:number-columns-repeated="4"/>
        </table:table-row>
        <table:table-row table:style-name="ro1">
          <table:table-cell office:value-type="float" office:value="574.644775390625">
            <text:p>574.6447753906</text:p>
          </table:table-cell>
          <table:table-cell office:value-type="float" office:value="0.1594915">
            <text:p>0.1594915</text:p>
          </table:table-cell>
          <table:table-cell table:number-columns-repeated="4"/>
        </table:table-row>
        <table:table-row table:style-name="ro1">
          <table:table-cell office:value-type="float" office:value="574.763122558594">
            <text:p>574.7631225586</text:p>
          </table:table-cell>
          <table:table-cell office:value-type="float" office:value="0.1589114">
            <text:p>0.1589114</text:p>
          </table:table-cell>
          <table:table-cell table:number-columns-repeated="4"/>
        </table:table-row>
        <table:table-row table:style-name="ro1">
          <table:table-cell office:value-type="float" office:value="574.881469726563">
            <text:p>574.8814697266</text:p>
          </table:table-cell>
          <table:table-cell office:value-type="float" office:value="0.1623553">
            <text:p>0.1623553</text:p>
          </table:table-cell>
          <table:table-cell table:number-columns-repeated="4"/>
        </table:table-row>
        <table:table-row table:style-name="ro1">
          <table:table-cell office:value-type="float" office:value="574.999816894531">
            <text:p>574.9998168945</text:p>
          </table:table-cell>
          <table:table-cell office:value-type="float" office:value="0.1502706">
            <text:p>0.1502706</text:p>
          </table:table-cell>
          <table:table-cell table:number-columns-repeated="4"/>
        </table:table-row>
        <table:table-row table:style-name="ro1">
          <table:table-cell office:value-type="float" office:value="575.1181640625">
            <text:p>575.1181640625</text:p>
          </table:table-cell>
          <table:table-cell office:value-type="float" office:value="0.1720281">
            <text:p>0.1720281</text:p>
          </table:table-cell>
          <table:table-cell table:number-columns-repeated="4"/>
        </table:table-row>
        <table:table-row table:style-name="ro1">
          <table:table-cell office:value-type="float" office:value="575.236572265625">
            <text:p>575.2365722656</text:p>
          </table:table-cell>
          <table:table-cell office:value-type="float" office:value="0.1487219">
            <text:p>0.1487219</text:p>
          </table:table-cell>
          <table:table-cell table:number-columns-repeated="4"/>
        </table:table-row>
        <table:table-row table:style-name="ro1">
          <table:table-cell office:value-type="float" office:value="575.354919433594">
            <text:p>575.3549194336</text:p>
          </table:table-cell>
          <table:table-cell office:value-type="float" office:value="0.1627326">
            <text:p>0.1627326</text:p>
          </table:table-cell>
          <table:table-cell table:number-columns-repeated="4"/>
        </table:table-row>
        <table:table-row table:style-name="ro1">
          <table:table-cell office:value-type="float" office:value="575.473266601563">
            <text:p>575.4732666016</text:p>
          </table:table-cell>
          <table:table-cell office:value-type="float" office:value="0.1450197">
            <text:p>0.1450197</text:p>
          </table:table-cell>
          <table:table-cell table:number-columns-repeated="4"/>
        </table:table-row>
        <table:table-row table:style-name="ro1">
          <table:table-cell office:value-type="float" office:value="575.591613769531">
            <text:p>575.5916137695</text:p>
          </table:table-cell>
          <table:table-cell office:value-type="float" office:value="0.145281">
            <text:p>0.145281</text:p>
          </table:table-cell>
          <table:table-cell table:number-columns-repeated="4"/>
        </table:table-row>
        <table:table-row table:style-name="ro1">
          <table:table-cell office:value-type="float" office:value="575.710021972656">
            <text:p>575.7100219727</text:p>
          </table:table-cell>
          <table:table-cell office:value-type="float" office:value="0.1448581">
            <text:p>0.1448581</text:p>
          </table:table-cell>
          <table:table-cell table:number-columns-repeated="4"/>
        </table:table-row>
        <table:table-row table:style-name="ro1">
          <table:table-cell office:value-type="float" office:value="575.828369140625">
            <text:p>575.8283691406</text:p>
          </table:table-cell>
          <table:table-cell office:value-type="float" office:value="0.1464523">
            <text:p>0.1464523</text:p>
          </table:table-cell>
          <table:table-cell table:number-columns-repeated="4"/>
        </table:table-row>
        <table:table-row table:style-name="ro1">
          <table:table-cell office:value-type="float" office:value="575.94677734375">
            <text:p>575.9467773438</text:p>
          </table:table-cell>
          <table:table-cell office:value-type="float" office:value="0.1524814">
            <text:p>0.1524814</text:p>
          </table:table-cell>
          <table:table-cell table:number-columns-repeated="4"/>
        </table:table-row>
        <table:table-row table:style-name="ro1">
          <table:table-cell office:value-type="float" office:value="576.065124511719">
            <text:p>576.0651245117</text:p>
          </table:table-cell>
          <table:table-cell office:value-type="float" office:value="0.1496865">
            <text:p>0.1496865</text:p>
          </table:table-cell>
          <table:table-cell table:number-columns-repeated="4"/>
        </table:table-row>
        <table:table-row table:style-name="ro1">
          <table:table-cell office:value-type="float" office:value="576.183532714844">
            <text:p>576.1835327148</text:p>
          </table:table-cell>
          <table:table-cell office:value-type="float" office:value="0.1396525">
            <text:p>0.1396525</text:p>
          </table:table-cell>
          <table:table-cell table:number-columns-repeated="4"/>
        </table:table-row>
        <table:table-row table:style-name="ro1">
          <table:table-cell office:value-type="float" office:value="576.301879882813">
            <text:p>576.3018798828</text:p>
          </table:table-cell>
          <table:table-cell office:value-type="float" office:value="0.1525378">
            <text:p>0.1525378</text:p>
          </table:table-cell>
          <table:table-cell table:number-columns-repeated="4"/>
        </table:table-row>
        <table:table-row table:style-name="ro1">
          <table:table-cell office:value-type="float" office:value="576.420288085938">
            <text:p>576.4202880859</text:p>
          </table:table-cell>
          <table:table-cell office:value-type="float" office:value="0.1539321">
            <text:p>0.1539321</text:p>
          </table:table-cell>
          <table:table-cell table:number-columns-repeated="4"/>
        </table:table-row>
        <table:table-row table:style-name="ro1">
          <table:table-cell office:value-type="float" office:value="576.538635253906">
            <text:p>576.5386352539</text:p>
          </table:table-cell>
          <table:table-cell office:value-type="float" office:value="0.1422034">
            <text:p>0.1422034</text:p>
          </table:table-cell>
          <table:table-cell table:number-columns-repeated="4"/>
        </table:table-row>
        <table:table-row table:style-name="ro1">
          <table:table-cell office:value-type="float" office:value="576.657043457031">
            <text:p>576.657043457</text:p>
          </table:table-cell>
          <table:table-cell office:value-type="float" office:value="0.1579777">
            <text:p>0.1579777</text:p>
          </table:table-cell>
          <table:table-cell table:number-columns-repeated="4"/>
        </table:table-row>
        <table:table-row table:style-name="ro1">
          <table:table-cell office:value-type="float" office:value="576.775451660156">
            <text:p>576.7754516602</text:p>
          </table:table-cell>
          <table:table-cell office:value-type="float" office:value="0.1363087">
            <text:p>0.1363087</text:p>
          </table:table-cell>
          <table:table-cell table:number-columns-repeated="4"/>
        </table:table-row>
        <table:table-row table:style-name="ro1">
          <table:table-cell office:value-type="float" office:value="576.893859863281">
            <text:p>576.8938598633</text:p>
          </table:table-cell>
          <table:table-cell office:value-type="float" office:value="0.1398537">
            <text:p>0.1398537</text:p>
          </table:table-cell>
          <table:table-cell table:number-columns-repeated="4"/>
        </table:table-row>
        <table:table-row table:style-name="ro1">
          <table:table-cell office:value-type="float" office:value="577.012268066406">
            <text:p>577.0122680664</text:p>
          </table:table-cell>
          <table:table-cell office:value-type="float" office:value="0.1506098">
            <text:p>0.1506098</text:p>
          </table:table-cell>
          <table:table-cell table:number-columns-repeated="4"/>
        </table:table-row>
        <table:table-row table:style-name="ro1">
          <table:table-cell office:value-type="float" office:value="577.130615234375">
            <text:p>577.1306152344</text:p>
          </table:table-cell>
          <table:table-cell office:value-type="float" office:value="0.1436073">
            <text:p>0.1436073</text:p>
          </table:table-cell>
          <table:table-cell table:number-columns-repeated="4"/>
        </table:table-row>
        <table:table-row table:style-name="ro1">
          <table:table-cell office:value-type="float" office:value="577.2490234375">
            <text:p>577.2490234375</text:p>
          </table:table-cell>
          <table:table-cell office:value-type="float" office:value="0.1468288">
            <text:p>0.1468288</text:p>
          </table:table-cell>
          <table:table-cell table:number-columns-repeated="4"/>
        </table:table-row>
        <table:table-row table:style-name="ro1">
          <table:table-cell office:value-type="float" office:value="577.367431640625">
            <text:p>577.3674316406</text:p>
          </table:table-cell>
          <table:table-cell office:value-type="float" office:value="0.1327275">
            <text:p>0.1327275</text:p>
          </table:table-cell>
          <table:table-cell table:number-columns-repeated="4"/>
        </table:table-row>
        <table:table-row table:style-name="ro1">
          <table:table-cell office:value-type="float" office:value="577.48583984375">
            <text:p>577.4858398438</text:p>
          </table:table-cell>
          <table:table-cell office:value-type="float" office:value="0.1442472">
            <text:p>0.1442472</text:p>
          </table:table-cell>
          <table:table-cell table:number-columns-repeated="4"/>
        </table:table-row>
        <table:table-row table:style-name="ro1">
          <table:table-cell office:value-type="float" office:value="577.604248046875">
            <text:p>577.6042480469</text:p>
          </table:table-cell>
          <table:table-cell office:value-type="float" office:value="0.1311436">
            <text:p>0.1311436</text:p>
          </table:table-cell>
          <table:table-cell table:number-columns-repeated="4"/>
        </table:table-row>
        <table:table-row table:style-name="ro1">
          <table:table-cell office:value-type="float" office:value="577.722717285156">
            <text:p>577.7227172852</text:p>
          </table:table-cell>
          <table:table-cell office:value-type="float" office:value="0.1326731">
            <text:p>0.1326731</text:p>
          </table:table-cell>
          <table:table-cell table:number-columns-repeated="4"/>
        </table:table-row>
        <table:table-row table:style-name="ro1">
          <table:table-cell office:value-type="float" office:value="577.841125488281">
            <text:p>577.8411254883</text:p>
          </table:table-cell>
          <table:table-cell office:value-type="float" office:value="0.136985">
            <text:p>0.136985</text:p>
          </table:table-cell>
          <table:table-cell table:number-columns-repeated="4"/>
        </table:table-row>
        <table:table-row table:style-name="ro1">
          <table:table-cell office:value-type="float" office:value="577.959533691406">
            <text:p>577.9595336914</text:p>
          </table:table-cell>
          <table:table-cell office:value-type="float" office:value="0.1312316">
            <text:p>0.1312316</text:p>
          </table:table-cell>
          <table:table-cell table:number-columns-repeated="4"/>
        </table:table-row>
        <table:table-row table:style-name="ro1">
          <table:table-cell office:value-type="float" office:value="578.077941894531">
            <text:p>578.0779418945</text:p>
          </table:table-cell>
          <table:table-cell office:value-type="float" office:value="0.1496143">
            <text:p>0.1496143</text:p>
          </table:table-cell>
          <table:table-cell table:number-columns-repeated="4"/>
        </table:table-row>
        <table:table-row table:style-name="ro1">
          <table:table-cell office:value-type="float" office:value="578.196350097656">
            <text:p>578.1963500977</text:p>
          </table:table-cell>
          <table:table-cell office:value-type="float" office:value="0.1300661">
            <text:p>0.1300661</text:p>
          </table:table-cell>
          <table:table-cell table:number-columns-repeated="4"/>
        </table:table-row>
        <table:table-row table:style-name="ro1">
          <table:table-cell office:value-type="float" office:value="578.314819335938">
            <text:p>578.3148193359</text:p>
          </table:table-cell>
          <table:table-cell office:value-type="float" office:value="0.1302476">
            <text:p>0.1302476</text:p>
          </table:table-cell>
          <table:table-cell table:number-columns-repeated="4"/>
        </table:table-row>
        <table:table-row table:style-name="ro1">
          <table:table-cell office:value-type="float" office:value="578.433227539063">
            <text:p>578.4332275391</text:p>
          </table:table-cell>
          <table:table-cell office:value-type="float" office:value="0.1315521">
            <text:p>0.1315521</text:p>
          </table:table-cell>
          <table:table-cell table:number-columns-repeated="4"/>
        </table:table-row>
        <table:table-row table:style-name="ro1">
          <table:table-cell office:value-type="float" office:value="578.551635742188">
            <text:p>578.5516357422</text:p>
          </table:table-cell>
          <table:table-cell office:value-type="float" office:value="0.1325093">
            <text:p>0.1325093</text:p>
          </table:table-cell>
          <table:table-cell table:number-columns-repeated="4"/>
        </table:table-row>
        <table:table-row table:style-name="ro1">
          <table:table-cell office:value-type="float" office:value="578.670104980469">
            <text:p>578.6701049805</text:p>
          </table:table-cell>
          <table:table-cell office:value-type="float" office:value="0.141171">
            <text:p>0.141171</text:p>
          </table:table-cell>
          <table:table-cell table:number-columns-repeated="4"/>
        </table:table-row>
        <table:table-row table:style-name="ro1">
          <table:table-cell office:value-type="float" office:value="578.788513183594">
            <text:p>578.7885131836</text:p>
          </table:table-cell>
          <table:table-cell office:value-type="float" office:value="0.1583369">
            <text:p>0.1583369</text:p>
          </table:table-cell>
          <table:table-cell table:number-columns-repeated="4"/>
        </table:table-row>
        <table:table-row table:style-name="ro1">
          <table:table-cell office:value-type="float" office:value="578.906982421875">
            <text:p>578.9069824219</text:p>
          </table:table-cell>
          <table:table-cell office:value-type="float" office:value="0.1234249">
            <text:p>0.1234249</text:p>
          </table:table-cell>
          <table:table-cell table:number-columns-repeated="4"/>
        </table:table-row>
        <table:table-row table:style-name="ro1">
          <table:table-cell office:value-type="float" office:value="579.025451660156">
            <text:p>579.0254516602</text:p>
          </table:table-cell>
          <table:table-cell office:value-type="float" office:value="0.1295073">
            <text:p>0.1295073</text:p>
          </table:table-cell>
          <table:table-cell table:number-columns-repeated="4"/>
        </table:table-row>
        <table:table-row table:style-name="ro1">
          <table:table-cell office:value-type="float" office:value="579.143859863281">
            <text:p>579.1438598633</text:p>
          </table:table-cell>
          <table:table-cell office:value-type="float" office:value="0.1342129">
            <text:p>0.1342129</text:p>
          </table:table-cell>
          <table:table-cell table:number-columns-repeated="4"/>
        </table:table-row>
        <table:table-row table:style-name="ro1">
          <table:table-cell office:value-type="float" office:value="579.262329101563">
            <text:p>579.2623291016</text:p>
          </table:table-cell>
          <table:table-cell office:value-type="float" office:value="0.1272634">
            <text:p>0.1272634</text:p>
          </table:table-cell>
          <table:table-cell table:number-columns-repeated="4"/>
        </table:table-row>
        <table:table-row table:style-name="ro1">
          <table:table-cell office:value-type="float" office:value="579.380798339844">
            <text:p>579.3807983398</text:p>
          </table:table-cell>
          <table:table-cell office:value-type="float" office:value="0.1306344">
            <text:p>0.1306344</text:p>
          </table:table-cell>
          <table:table-cell table:number-columns-repeated="4"/>
        </table:table-row>
        <table:table-row table:style-name="ro1">
          <table:table-cell office:value-type="float" office:value="579.499206542969">
            <text:p>579.499206543</text:p>
          </table:table-cell>
          <table:table-cell office:value-type="float" office:value="0.1239406">
            <text:p>0.1239406</text:p>
          </table:table-cell>
          <table:table-cell table:number-columns-repeated="4"/>
        </table:table-row>
        <table:table-row table:style-name="ro1">
          <table:table-cell office:value-type="float" office:value="579.61767578125">
            <text:p>579.6176757813</text:p>
          </table:table-cell>
          <table:table-cell office:value-type="float" office:value="0.1233111">
            <text:p>0.1233111</text:p>
          </table:table-cell>
          <table:table-cell table:number-columns-repeated="4"/>
        </table:table-row>
        <table:table-row table:style-name="ro1">
          <table:table-cell office:value-type="float" office:value="579.736145019531">
            <text:p>579.7361450195</text:p>
          </table:table-cell>
          <table:table-cell office:value-type="float" office:value="0.1250465">
            <text:p>0.1250465</text:p>
          </table:table-cell>
          <table:table-cell table:number-columns-repeated="4"/>
        </table:table-row>
        <table:table-row table:style-name="ro1">
          <table:table-cell office:value-type="float" office:value="579.854614257813">
            <text:p>579.8546142578</text:p>
          </table:table-cell>
          <table:table-cell office:value-type="float" office:value="0.1199092">
            <text:p>0.1199092</text:p>
          </table:table-cell>
          <table:table-cell table:number-columns-repeated="4"/>
        </table:table-row>
        <table:table-row table:style-name="ro1">
          <table:table-cell office:value-type="float" office:value="579.973083496094">
            <text:p>579.9730834961</text:p>
          </table:table-cell>
          <table:table-cell office:value-type="float" office:value="0.1190453">
            <text:p>0.1190453</text:p>
          </table:table-cell>
          <table:table-cell table:number-columns-repeated="4"/>
        </table:table-row>
        <table:table-row table:style-name="ro1">
          <table:table-cell office:value-type="float" office:value="580.091552734375">
            <text:p>580.0915527344</text:p>
          </table:table-cell>
          <table:table-cell office:value-type="float" office:value="0.127975">
            <text:p>0.127975</text:p>
          </table:table-cell>
          <table:table-cell table:number-columns-repeated="4"/>
        </table:table-row>
        <table:table-row table:style-name="ro1">
          <table:table-cell office:value-type="float" office:value="580.210021972656">
            <text:p>580.2100219727</text:p>
          </table:table-cell>
          <table:table-cell office:value-type="float" office:value="0.1374518">
            <text:p>0.1374518</text:p>
          </table:table-cell>
          <table:table-cell table:number-columns-repeated="4"/>
        </table:table-row>
        <table:table-row table:style-name="ro1">
          <table:table-cell office:value-type="float" office:value="580.328491210938">
            <text:p>580.3284912109</text:p>
          </table:table-cell>
          <table:table-cell office:value-type="float" office:value="0.1272409">
            <text:p>0.1272409</text:p>
          </table:table-cell>
          <table:table-cell table:number-columns-repeated="4"/>
        </table:table-row>
        <table:table-row table:style-name="ro1">
          <table:table-cell office:value-type="float" office:value="580.446960449219">
            <text:p>580.4469604492</text:p>
          </table:table-cell>
          <table:table-cell office:value-type="float" office:value="0.1214622">
            <text:p>0.1214622</text:p>
          </table:table-cell>
          <table:table-cell table:number-columns-repeated="4"/>
        </table:table-row>
        <table:table-row table:style-name="ro1">
          <table:table-cell office:value-type="float" office:value="580.5654296875">
            <text:p>580.5654296875</text:p>
          </table:table-cell>
          <table:table-cell office:value-type="float" office:value="0.1213104">
            <text:p>0.1213104</text:p>
          </table:table-cell>
          <table:table-cell table:number-columns-repeated="4"/>
        </table:table-row>
        <table:table-row table:style-name="ro1">
          <table:table-cell office:value-type="float" office:value="580.683898925781">
            <text:p>580.6838989258</text:p>
          </table:table-cell>
          <table:table-cell office:value-type="float" office:value="0.1310883">
            <text:p>0.1310883</text:p>
          </table:table-cell>
          <table:table-cell table:number-columns-repeated="4"/>
        </table:table-row>
        <table:table-row table:style-name="ro1">
          <table:table-cell office:value-type="float" office:value="580.802368164063">
            <text:p>580.8023681641</text:p>
          </table:table-cell>
          <table:table-cell office:value-type="float" office:value="0.1234688">
            <text:p>0.1234688</text:p>
          </table:table-cell>
          <table:table-cell table:number-columns-repeated="4"/>
        </table:table-row>
        <table:table-row table:style-name="ro1">
          <table:table-cell office:value-type="float" office:value="580.9208984375">
            <text:p>580.9208984375</text:p>
          </table:table-cell>
          <table:table-cell office:value-type="float" office:value="0.1198681">
            <text:p>0.1198681</text:p>
          </table:table-cell>
          <table:table-cell table:number-columns-repeated="4"/>
        </table:table-row>
        <table:table-row table:style-name="ro1">
          <table:table-cell office:value-type="float" office:value="581.039367675781">
            <text:p>581.0393676758</text:p>
          </table:table-cell>
          <table:table-cell office:value-type="float" office:value="0.1193472">
            <text:p>0.1193472</text:p>
          </table:table-cell>
          <table:table-cell table:number-columns-repeated="4"/>
        </table:table-row>
        <table:table-row table:style-name="ro1">
          <table:table-cell office:value-type="float" office:value="581.157836914063">
            <text:p>581.1578369141</text:p>
          </table:table-cell>
          <table:table-cell office:value-type="float" office:value="0.1278033">
            <text:p>0.1278033</text:p>
          </table:table-cell>
          <table:table-cell table:number-columns-repeated="4"/>
        </table:table-row>
        <table:table-row table:style-name="ro1">
          <table:table-cell office:value-type="float" office:value="581.2763671875">
            <text:p>581.2763671875</text:p>
          </table:table-cell>
          <table:table-cell office:value-type="float" office:value="0.1307361">
            <text:p>0.1307361</text:p>
          </table:table-cell>
          <table:table-cell table:number-columns-repeated="4"/>
        </table:table-row>
        <table:table-row table:style-name="ro1">
          <table:table-cell office:value-type="float" office:value="581.394836425781">
            <text:p>581.3948364258</text:p>
          </table:table-cell>
          <table:table-cell office:value-type="float" office:value="0.1221302">
            <text:p>0.1221302</text:p>
          </table:table-cell>
          <table:table-cell table:number-columns-repeated="4"/>
        </table:table-row>
        <table:table-row table:style-name="ro1">
          <table:table-cell office:value-type="float" office:value="581.513366699219">
            <text:p>581.5133666992</text:p>
          </table:table-cell>
          <table:table-cell office:value-type="float" office:value="0.1279388">
            <text:p>0.1279388</text:p>
          </table:table-cell>
          <table:table-cell table:number-columns-repeated="4"/>
        </table:table-row>
        <table:table-row table:style-name="ro1">
          <table:table-cell office:value-type="float" office:value="581.6318359375">
            <text:p>581.6318359375</text:p>
          </table:table-cell>
          <table:table-cell office:value-type="float" office:value="0.1155675">
            <text:p>0.1155675</text:p>
          </table:table-cell>
          <table:table-cell table:number-columns-repeated="4"/>
        </table:table-row>
        <table:table-row table:style-name="ro1">
          <table:table-cell office:value-type="float" office:value="581.750366210938">
            <text:p>581.7503662109</text:p>
          </table:table-cell>
          <table:table-cell office:value-type="float" office:value="0.1113839">
            <text:p>0.1113839</text:p>
          </table:table-cell>
          <table:table-cell table:number-columns-repeated="4"/>
        </table:table-row>
        <table:table-row table:style-name="ro1">
          <table:table-cell office:value-type="float" office:value="581.868835449219">
            <text:p>581.8688354492</text:p>
          </table:table-cell>
          <table:table-cell office:value-type="float" office:value="0.114559">
            <text:p>0.114559</text:p>
          </table:table-cell>
          <table:table-cell table:number-columns-repeated="4"/>
        </table:table-row>
        <table:table-row table:style-name="ro1">
          <table:table-cell office:value-type="float" office:value="581.987365722656">
            <text:p>581.9873657227</text:p>
          </table:table-cell>
          <table:table-cell office:value-type="float" office:value="0.1144141">
            <text:p>0.1144141</text:p>
          </table:table-cell>
          <table:table-cell table:number-columns-repeated="4"/>
        </table:table-row>
        <table:table-row table:style-name="ro1">
          <table:table-cell office:value-type="float" office:value="582.105895996094">
            <text:p>582.1058959961</text:p>
          </table:table-cell>
          <table:table-cell office:value-type="float" office:value="0.116096">
            <text:p>0.116096</text:p>
          </table:table-cell>
          <table:table-cell table:number-columns-repeated="4"/>
        </table:table-row>
        <table:table-row table:style-name="ro1">
          <table:table-cell office:value-type="float" office:value="582.224365234375">
            <text:p>582.2243652344</text:p>
          </table:table-cell>
          <table:table-cell office:value-type="float" office:value="0.1185717">
            <text:p>0.1185717</text:p>
          </table:table-cell>
          <table:table-cell table:number-columns-repeated="4"/>
        </table:table-row>
        <table:table-row table:style-name="ro1">
          <table:table-cell office:value-type="float" office:value="582.342895507813">
            <text:p>582.3428955078</text:p>
          </table:table-cell>
          <table:table-cell office:value-type="float" office:value="0.1136535">
            <text:p>0.1136535</text:p>
          </table:table-cell>
          <table:table-cell table:number-columns-repeated="4"/>
        </table:table-row>
        <table:table-row table:style-name="ro1">
          <table:table-cell office:value-type="float" office:value="582.46142578125">
            <text:p>582.4614257813</text:p>
          </table:table-cell>
          <table:table-cell office:value-type="float" office:value="0.1150735">
            <text:p>0.1150735</text:p>
          </table:table-cell>
          <table:table-cell table:number-columns-repeated="4"/>
        </table:table-row>
        <table:table-row table:style-name="ro1">
          <table:table-cell office:value-type="float" office:value="582.579956054688">
            <text:p>582.5799560547</text:p>
          </table:table-cell>
          <table:table-cell office:value-type="float" office:value="0.1110354">
            <text:p>0.1110354</text:p>
          </table:table-cell>
          <table:table-cell table:number-columns-repeated="4"/>
        </table:table-row>
        <table:table-row table:style-name="ro1">
          <table:table-cell office:value-type="float" office:value="582.698486328125">
            <text:p>582.6984863281</text:p>
          </table:table-cell>
          <table:table-cell office:value-type="float" office:value="0.1080851">
            <text:p>0.1080851</text:p>
          </table:table-cell>
          <table:table-cell table:number-columns-repeated="4"/>
        </table:table-row>
        <table:table-row table:style-name="ro1">
          <table:table-cell office:value-type="float" office:value="582.817016601563">
            <text:p>582.8170166016</text:p>
          </table:table-cell>
          <table:table-cell office:value-type="float" office:value="0.113798">
            <text:p>0.113798</text:p>
          </table:table-cell>
          <table:table-cell table:number-columns-repeated="4"/>
        </table:table-row>
        <table:table-row table:style-name="ro1">
          <table:table-cell office:value-type="float" office:value="582.935546875">
            <text:p>582.935546875</text:p>
          </table:table-cell>
          <table:table-cell office:value-type="float" office:value="0.1054191">
            <text:p>0.1054191</text:p>
          </table:table-cell>
          <table:table-cell table:number-columns-repeated="4"/>
        </table:table-row>
        <table:table-row table:style-name="ro1">
          <table:table-cell office:value-type="float" office:value="583.054077148438">
            <text:p>583.0540771484</text:p>
          </table:table-cell>
          <table:table-cell office:value-type="float" office:value="0.1091377">
            <text:p>0.1091377</text:p>
          </table:table-cell>
          <table:table-cell table:number-columns-repeated="4"/>
        </table:table-row>
        <table:table-row table:style-name="ro1">
          <table:table-cell office:value-type="float" office:value="583.172607421875">
            <text:p>583.1726074219</text:p>
          </table:table-cell>
          <table:table-cell office:value-type="float" office:value="0.1373245">
            <text:p>0.1373245</text:p>
          </table:table-cell>
          <table:table-cell table:number-columns-repeated="4"/>
        </table:table-row>
        <table:table-row table:style-name="ro1">
          <table:table-cell office:value-type="float" office:value="583.291137695313">
            <text:p>583.2911376953</text:p>
          </table:table-cell>
          <table:table-cell office:value-type="float" office:value="0.1116201">
            <text:p>0.1116201</text:p>
          </table:table-cell>
          <table:table-cell table:number-columns-repeated="4"/>
        </table:table-row>
        <table:table-row table:style-name="ro1">
          <table:table-cell office:value-type="float" office:value="583.40966796875">
            <text:p>583.4096679688</text:p>
          </table:table-cell>
          <table:table-cell office:value-type="float" office:value="0.1045052">
            <text:p>0.1045052</text:p>
          </table:table-cell>
          <table:table-cell table:number-columns-repeated="4"/>
        </table:table-row>
        <table:table-row table:style-name="ro1">
          <table:table-cell office:value-type="float" office:value="583.528198242188">
            <text:p>583.5281982422</text:p>
          </table:table-cell>
          <table:table-cell office:value-type="float" office:value="0.1093846">
            <text:p>0.1093846</text:p>
          </table:table-cell>
          <table:table-cell table:number-columns-repeated="4"/>
        </table:table-row>
        <table:table-row table:style-name="ro1">
          <table:table-cell office:value-type="float" office:value="583.646789550781">
            <text:p>583.6467895508</text:p>
          </table:table-cell>
          <table:table-cell office:value-type="float" office:value="0.1039499">
            <text:p>0.1039499</text:p>
          </table:table-cell>
          <table:table-cell table:number-columns-repeated="4"/>
        </table:table-row>
        <table:table-row table:style-name="ro1">
          <table:table-cell office:value-type="float" office:value="583.765319824219">
            <text:p>583.7653198242</text:p>
          </table:table-cell>
          <table:table-cell office:value-type="float" office:value="0.101918">
            <text:p>0.101918</text:p>
          </table:table-cell>
          <table:table-cell table:number-columns-repeated="4"/>
        </table:table-row>
        <table:table-row table:style-name="ro1">
          <table:table-cell office:value-type="float" office:value="583.883850097656">
            <text:p>583.8838500977</text:p>
          </table:table-cell>
          <table:table-cell office:value-type="float" office:value="0.1141597">
            <text:p>0.1141597</text:p>
          </table:table-cell>
          <table:table-cell table:number-columns-repeated="4"/>
        </table:table-row>
        <table:table-row table:style-name="ro1">
          <table:table-cell office:value-type="float" office:value="584.00244140625">
            <text:p>584.0024414063</text:p>
          </table:table-cell>
          <table:table-cell office:value-type="float" office:value="0.09865611">
            <text:p>0.09865611</text:p>
          </table:table-cell>
          <table:table-cell table:number-columns-repeated="4"/>
        </table:table-row>
        <table:table-row table:style-name="ro1">
          <table:table-cell office:value-type="float" office:value="584.120971679688">
            <text:p>584.1209716797</text:p>
          </table:table-cell>
          <table:table-cell office:value-type="float" office:value="0.1139821">
            <text:p>0.1139821</text:p>
          </table:table-cell>
          <table:table-cell table:number-columns-repeated="4"/>
        </table:table-row>
        <table:table-row table:style-name="ro1">
          <table:table-cell office:value-type="float" office:value="584.239501953125">
            <text:p>584.2395019531</text:p>
          </table:table-cell>
          <table:table-cell office:value-type="float" office:value="0.1083735">
            <text:p>0.1083735</text:p>
          </table:table-cell>
          <table:table-cell table:number-columns-repeated="4"/>
        </table:table-row>
        <table:table-row table:style-name="ro1">
          <table:table-cell office:value-type="float" office:value="584.358093261719">
            <text:p>584.3580932617</text:p>
          </table:table-cell>
          <table:table-cell office:value-type="float" office:value="0.1031867">
            <text:p>0.1031867</text:p>
          </table:table-cell>
          <table:table-cell table:number-columns-repeated="4"/>
        </table:table-row>
        <table:table-row table:style-name="ro1">
          <table:table-cell office:value-type="float" office:value="584.476623535156">
            <text:p>584.4766235352</text:p>
          </table:table-cell>
          <table:table-cell office:value-type="float" office:value="0.1108496">
            <text:p>0.1108496</text:p>
          </table:table-cell>
          <table:table-cell table:number-columns-repeated="4"/>
        </table:table-row>
        <table:table-row table:style-name="ro1">
          <table:table-cell office:value-type="float" office:value="584.59521484375">
            <text:p>584.5952148438</text:p>
          </table:table-cell>
          <table:table-cell office:value-type="float" office:value="0.1124841">
            <text:p>0.1124841</text:p>
          </table:table-cell>
          <table:table-cell table:number-columns-repeated="4"/>
        </table:table-row>
        <table:table-row table:style-name="ro1">
          <table:table-cell office:value-type="float" office:value="584.713806152344">
            <text:p>584.7138061523</text:p>
          </table:table-cell>
          <table:table-cell office:value-type="float" office:value="0.1048183">
            <text:p>0.1048183</text:p>
          </table:table-cell>
          <table:table-cell table:number-columns-repeated="4"/>
        </table:table-row>
        <table:table-row table:style-name="ro1">
          <table:table-cell office:value-type="float" office:value="584.832336425781">
            <text:p>584.8323364258</text:p>
          </table:table-cell>
          <table:table-cell office:value-type="float" office:value="0.1042637">
            <text:p>0.1042637</text:p>
          </table:table-cell>
          <table:table-cell table:number-columns-repeated="4"/>
        </table:table-row>
        <table:table-row table:style-name="ro1">
          <table:table-cell office:value-type="float" office:value="584.950927734375">
            <text:p>584.9509277344</text:p>
          </table:table-cell>
          <table:table-cell office:value-type="float" office:value="0.103811">
            <text:p>0.103811</text:p>
          </table:table-cell>
          <table:table-cell table:number-columns-repeated="4"/>
        </table:table-row>
        <table:table-row table:style-name="ro1">
          <table:table-cell office:value-type="float" office:value="585.069519042969">
            <text:p>585.069519043</text:p>
          </table:table-cell>
          <table:table-cell office:value-type="float" office:value="0.09332594">
            <text:p>0.09332594</text:p>
          </table:table-cell>
          <table:table-cell table:number-columns-repeated="4"/>
        </table:table-row>
        <table:table-row table:style-name="ro1">
          <table:table-cell office:value-type="float" office:value="585.188110351563">
            <text:p>585.1881103516</text:p>
          </table:table-cell>
          <table:table-cell office:value-type="float" office:value="0.1066728">
            <text:p>0.1066728</text:p>
          </table:table-cell>
          <table:table-cell table:number-columns-repeated="4"/>
        </table:table-row>
        <table:table-row table:style-name="ro1">
          <table:table-cell office:value-type="float" office:value="585.306640625">
            <text:p>585.306640625</text:p>
          </table:table-cell>
          <table:table-cell office:value-type="float" office:value="0.1074188">
            <text:p>0.1074188</text:p>
          </table:table-cell>
          <table:table-cell table:number-columns-repeated="4"/>
        </table:table-row>
        <table:table-row table:style-name="ro1">
          <table:table-cell office:value-type="float" office:value="585.425231933594">
            <text:p>585.4252319336</text:p>
          </table:table-cell>
          <table:table-cell office:value-type="float" office:value="0.09886115">
            <text:p>0.09886115</text:p>
          </table:table-cell>
          <table:table-cell table:number-columns-repeated="4"/>
        </table:table-row>
        <table:table-row table:style-name="ro1">
          <table:table-cell office:value-type="float" office:value="585.543823242188">
            <text:p>585.5438232422</text:p>
          </table:table-cell>
          <table:table-cell office:value-type="float" office:value="0.1202372">
            <text:p>0.1202372</text:p>
          </table:table-cell>
          <table:table-cell table:number-columns-repeated="4"/>
        </table:table-row>
        <table:table-row table:style-name="ro1">
          <table:table-cell office:value-type="float" office:value="585.662414550781">
            <text:p>585.6624145508</text:p>
          </table:table-cell>
          <table:table-cell office:value-type="float" office:value="0.09293314">
            <text:p>0.09293314</text:p>
          </table:table-cell>
          <table:table-cell table:number-columns-repeated="4"/>
        </table:table-row>
        <table:table-row table:style-name="ro1">
          <table:table-cell office:value-type="float" office:value="585.781005859375">
            <text:p>585.7810058594</text:p>
          </table:table-cell>
          <table:table-cell office:value-type="float" office:value="0.1004438">
            <text:p>0.1004438</text:p>
          </table:table-cell>
          <table:table-cell table:number-columns-repeated="4"/>
        </table:table-row>
        <table:table-row table:style-name="ro1">
          <table:table-cell office:value-type="float" office:value="585.899597167969">
            <text:p>585.899597168</text:p>
          </table:table-cell>
          <table:table-cell office:value-type="float" office:value="0.1043183">
            <text:p>0.1043183</text:p>
          </table:table-cell>
          <table:table-cell table:number-columns-repeated="4"/>
        </table:table-row>
        <table:table-row table:style-name="ro1">
          <table:table-cell office:value-type="float" office:value="586.018188476563">
            <text:p>586.0181884766</text:p>
          </table:table-cell>
          <table:table-cell office:value-type="float" office:value="0.09159245">
            <text:p>0.09159245</text:p>
          </table:table-cell>
          <table:table-cell table:number-columns-repeated="4"/>
        </table:table-row>
        <table:table-row table:style-name="ro1">
          <table:table-cell office:value-type="float" office:value="586.136779785156">
            <text:p>586.1367797852</text:p>
          </table:table-cell>
          <table:table-cell office:value-type="float" office:value="0.094125">
            <text:p>0.094125</text:p>
          </table:table-cell>
          <table:table-cell table:number-columns-repeated="4"/>
        </table:table-row>
        <table:table-row table:style-name="ro1">
          <table:table-cell office:value-type="float" office:value="586.255432128906">
            <text:p>586.2554321289</text:p>
          </table:table-cell>
          <table:table-cell office:value-type="float" office:value="0.1000558">
            <text:p>0.1000558</text:p>
          </table:table-cell>
          <table:table-cell table:number-columns-repeated="4"/>
        </table:table-row>
        <table:table-row table:style-name="ro1">
          <table:table-cell office:value-type="float" office:value="586.3740234375">
            <text:p>586.3740234375</text:p>
          </table:table-cell>
          <table:table-cell office:value-type="float" office:value="0.1004662">
            <text:p>0.1004662</text:p>
          </table:table-cell>
          <table:table-cell table:number-columns-repeated="4"/>
        </table:table-row>
        <table:table-row table:style-name="ro1">
          <table:table-cell office:value-type="float" office:value="586.492614746094">
            <text:p>586.4926147461</text:p>
          </table:table-cell>
          <table:table-cell office:value-type="float" office:value="0.1002782">
            <text:p>0.1002782</text:p>
          </table:table-cell>
          <table:table-cell table:number-columns-repeated="4"/>
        </table:table-row>
        <table:table-row table:style-name="ro1">
          <table:table-cell office:value-type="float" office:value="586.611206054688">
            <text:p>586.6112060547</text:p>
          </table:table-cell>
          <table:table-cell office:value-type="float" office:value="0.108984">
            <text:p>0.108984</text:p>
          </table:table-cell>
          <table:table-cell table:number-columns-repeated="4"/>
        </table:table-row>
        <table:table-row table:style-name="ro1">
          <table:table-cell office:value-type="float" office:value="586.729858398438">
            <text:p>586.7298583984</text:p>
          </table:table-cell>
          <table:table-cell office:value-type="float" office:value="0.1029202">
            <text:p>0.1029202</text:p>
          </table:table-cell>
          <table:table-cell table:number-columns-repeated="4"/>
        </table:table-row>
        <table:table-row table:style-name="ro1">
          <table:table-cell office:value-type="float" office:value="586.848449707031">
            <text:p>586.848449707</text:p>
          </table:table-cell>
          <table:table-cell office:value-type="float" office:value="0.1036645">
            <text:p>0.1036645</text:p>
          </table:table-cell>
          <table:table-cell table:number-columns-repeated="4"/>
        </table:table-row>
        <table:table-row table:style-name="ro1">
          <table:table-cell office:value-type="float" office:value="586.967041015625">
            <text:p>586.9670410156</text:p>
          </table:table-cell>
          <table:table-cell office:value-type="float" office:value="0.09250913">
            <text:p>0.09250913</text:p>
          </table:table-cell>
          <table:table-cell table:number-columns-repeated="4"/>
        </table:table-row>
        <table:table-row table:style-name="ro1">
          <table:table-cell office:value-type="float" office:value="587.085693359375">
            <text:p>587.0856933594</text:p>
          </table:table-cell>
          <table:table-cell office:value-type="float" office:value="0.09452088">
            <text:p>0.09452088</text:p>
          </table:table-cell>
          <table:table-cell table:number-columns-repeated="4"/>
        </table:table-row>
        <table:table-row table:style-name="ro1">
          <table:table-cell office:value-type="float" office:value="587.204284667969">
            <text:p>587.204284668</text:p>
          </table:table-cell>
          <table:table-cell office:value-type="float" office:value="0.1042138">
            <text:p>0.1042138</text:p>
          </table:table-cell>
          <table:table-cell table:number-columns-repeated="4"/>
        </table:table-row>
        <table:table-row table:style-name="ro1">
          <table:table-cell office:value-type="float" office:value="587.322937011719">
            <text:p>587.3229370117</text:p>
          </table:table-cell>
          <table:table-cell office:value-type="float" office:value="0.09934901">
            <text:p>0.09934901</text:p>
          </table:table-cell>
          <table:table-cell table:number-columns-repeated="4"/>
        </table:table-row>
        <table:table-row table:style-name="ro1">
          <table:table-cell office:value-type="float" office:value="587.441589355469">
            <text:p>587.4415893555</text:p>
          </table:table-cell>
          <table:table-cell office:value-type="float" office:value="0.1036219">
            <text:p>0.1036219</text:p>
          </table:table-cell>
          <table:table-cell table:number-columns-repeated="4"/>
        </table:table-row>
        <table:table-row table:style-name="ro1">
          <table:table-cell office:value-type="float" office:value="587.560180664063">
            <text:p>587.5601806641</text:p>
          </table:table-cell>
          <table:table-cell office:value-type="float" office:value="0.08825307">
            <text:p>0.08825307</text:p>
          </table:table-cell>
          <table:table-cell table:number-columns-repeated="4"/>
        </table:table-row>
        <table:table-row table:style-name="ro1">
          <table:table-cell office:value-type="float" office:value="587.678833007813">
            <text:p>587.6788330078</text:p>
          </table:table-cell>
          <table:table-cell office:value-type="float" office:value="0.0969483">
            <text:p>0.0969483</text:p>
          </table:table-cell>
          <table:table-cell table:number-columns-repeated="4"/>
        </table:table-row>
        <table:table-row table:style-name="ro1">
          <table:table-cell office:value-type="float" office:value="587.797424316406">
            <text:p>587.7974243164</text:p>
          </table:table-cell>
          <table:table-cell office:value-type="float" office:value="0.102056">
            <text:p>0.102056</text:p>
          </table:table-cell>
          <table:table-cell table:number-columns-repeated="4"/>
        </table:table-row>
        <table:table-row table:style-name="ro1">
          <table:table-cell office:value-type="float" office:value="587.916076660156">
            <text:p>587.9160766602</text:p>
          </table:table-cell>
          <table:table-cell office:value-type="float" office:value="0.1037751">
            <text:p>0.1037751</text:p>
          </table:table-cell>
          <table:table-cell table:number-columns-repeated="4"/>
        </table:table-row>
        <table:table-row table:style-name="ro1">
          <table:table-cell office:value-type="float" office:value="588.034729003906">
            <text:p>588.0347290039</text:p>
          </table:table-cell>
          <table:table-cell office:value-type="float" office:value="0.09530456">
            <text:p>0.09530456</text:p>
          </table:table-cell>
          <table:table-cell table:number-columns-repeated="4"/>
        </table:table-row>
        <table:table-row table:style-name="ro1">
          <table:table-cell office:value-type="float" office:value="588.153381347656">
            <text:p>588.1533813477</text:p>
          </table:table-cell>
          <table:table-cell office:value-type="float" office:value="0.09639793">
            <text:p>0.09639793</text:p>
          </table:table-cell>
          <table:table-cell table:number-columns-repeated="4"/>
        </table:table-row>
        <table:table-row table:style-name="ro1">
          <table:table-cell office:value-type="float" office:value="588.272033691406">
            <text:p>588.2720336914</text:p>
          </table:table-cell>
          <table:table-cell office:value-type="float" office:value="0.09635567">
            <text:p>0.09635567</text:p>
          </table:table-cell>
          <table:table-cell table:number-columns-repeated="4"/>
        </table:table-row>
        <table:table-row table:style-name="ro1">
          <table:table-cell office:value-type="float" office:value="588.390686035156">
            <text:p>588.3906860352</text:p>
          </table:table-cell>
          <table:table-cell office:value-type="float" office:value="0.104553">
            <text:p>0.104553</text:p>
          </table:table-cell>
          <table:table-cell table:number-columns-repeated="4"/>
        </table:table-row>
        <table:table-row table:style-name="ro1">
          <table:table-cell office:value-type="float" office:value="588.509338378906">
            <text:p>588.5093383789</text:p>
          </table:table-cell>
          <table:table-cell office:value-type="float" office:value="0.09421418">
            <text:p>0.09421418</text:p>
          </table:table-cell>
          <table:table-cell table:number-columns-repeated="4"/>
        </table:table-row>
        <table:table-row table:style-name="ro1">
          <table:table-cell office:value-type="float" office:value="588.627990722656">
            <text:p>588.6279907227</text:p>
          </table:table-cell>
          <table:table-cell office:value-type="float" office:value="0.08796879">
            <text:p>0.08796879</text:p>
          </table:table-cell>
          <table:table-cell table:number-columns-repeated="4"/>
        </table:table-row>
        <table:table-row table:style-name="ro1">
          <table:table-cell office:value-type="float" office:value="588.746643066406">
            <text:p>588.7466430664</text:p>
          </table:table-cell>
          <table:table-cell office:value-type="float" office:value="0.08656278">
            <text:p>0.08656278</text:p>
          </table:table-cell>
          <table:table-cell table:number-columns-repeated="4"/>
        </table:table-row>
        <table:table-row table:style-name="ro1">
          <table:table-cell office:value-type="float" office:value="588.865295410156">
            <text:p>588.8652954102</text:p>
          </table:table-cell>
          <table:table-cell office:value-type="float" office:value="0.09005439">
            <text:p>0.09005439</text:p>
          </table:table-cell>
          <table:table-cell table:number-columns-repeated="4"/>
        </table:table-row>
        <table:table-row table:style-name="ro1">
          <table:table-cell office:value-type="float" office:value="588.983947753906">
            <text:p>588.9839477539</text:p>
          </table:table-cell>
          <table:table-cell office:value-type="float" office:value="0.08746549">
            <text:p>0.08746549</text:p>
          </table:table-cell>
          <table:table-cell table:number-columns-repeated="4"/>
        </table:table-row>
        <table:table-row table:style-name="ro1">
          <table:table-cell office:value-type="float" office:value="589.102600097656">
            <text:p>589.1026000977</text:p>
          </table:table-cell>
          <table:table-cell office:value-type="float" office:value="0.0958287">
            <text:p>0.0958287</text:p>
          </table:table-cell>
          <table:table-cell table:number-columns-repeated="4"/>
        </table:table-row>
        <table:table-row table:style-name="ro1">
          <table:table-cell office:value-type="float" office:value="589.221252441406">
            <text:p>589.2212524414</text:p>
          </table:table-cell>
          <table:table-cell office:value-type="float" office:value="0.08365258">
            <text:p>0.08365258</text:p>
          </table:table-cell>
          <table:table-cell table:number-columns-repeated="4"/>
        </table:table-row>
        <table:table-row table:style-name="ro1">
          <table:table-cell office:value-type="float" office:value="589.339904785156">
            <text:p>589.3399047852</text:p>
          </table:table-cell>
          <table:table-cell office:value-type="float" office:value="0.08871506">
            <text:p>0.08871506</text:p>
          </table:table-cell>
          <table:table-cell table:number-columns-repeated="4"/>
        </table:table-row>
        <table:table-row table:style-name="ro1">
          <table:table-cell office:value-type="float" office:value="589.458618164063">
            <text:p>589.4586181641</text:p>
          </table:table-cell>
          <table:table-cell office:value-type="float" office:value="0.08556844">
            <text:p>0.08556844</text:p>
          </table:table-cell>
          <table:table-cell table:number-columns-repeated="4"/>
        </table:table-row>
        <table:table-row table:style-name="ro1">
          <table:table-cell office:value-type="float" office:value="589.577270507813">
            <text:p>589.5772705078</text:p>
          </table:table-cell>
          <table:table-cell office:value-type="float" office:value="0.08189621">
            <text:p>0.08189621</text:p>
          </table:table-cell>
          <table:table-cell table:number-columns-repeated="4"/>
        </table:table-row>
        <table:table-row table:style-name="ro1">
          <table:table-cell office:value-type="float" office:value="589.695922851563">
            <text:p>589.6959228516</text:p>
          </table:table-cell>
          <table:table-cell office:value-type="float" office:value="0.09464213">
            <text:p>0.09464213</text:p>
          </table:table-cell>
          <table:table-cell table:number-columns-repeated="4"/>
        </table:table-row>
        <table:table-row table:style-name="ro1">
          <table:table-cell office:value-type="float" office:value="589.814636230469">
            <text:p>589.8146362305</text:p>
          </table:table-cell>
          <table:table-cell office:value-type="float" office:value="0.08113839">
            <text:p>0.08113839</text:p>
          </table:table-cell>
          <table:table-cell table:number-columns-repeated="4"/>
        </table:table-row>
        <table:table-row table:style-name="ro1">
          <table:table-cell office:value-type="float" office:value="589.933288574219">
            <text:p>589.9332885742</text:p>
          </table:table-cell>
          <table:table-cell office:value-type="float" office:value="0.08786178">
            <text:p>0.08786178</text:p>
          </table:table-cell>
          <table:table-cell table:number-columns-repeated="4"/>
        </table:table-row>
        <table:table-row table:style-name="ro1">
          <table:table-cell office:value-type="float" office:value="590.052001953125">
            <text:p>590.0520019531</text:p>
          </table:table-cell>
          <table:table-cell office:value-type="float" office:value="0.08352183">
            <text:p>0.08352183</text:p>
          </table:table-cell>
          <table:table-cell table:number-columns-repeated="4"/>
        </table:table-row>
        <table:table-row table:style-name="ro1">
          <table:table-cell office:value-type="float" office:value="590.170654296875">
            <text:p>590.1706542969</text:p>
          </table:table-cell>
          <table:table-cell office:value-type="float" office:value="0.08793516">
            <text:p>0.08793516</text:p>
          </table:table-cell>
          <table:table-cell table:number-columns-repeated="4"/>
        </table:table-row>
        <table:table-row table:style-name="ro1">
          <table:table-cell office:value-type="float" office:value="590.289367675781">
            <text:p>590.2893676758</text:p>
          </table:table-cell>
          <table:table-cell office:value-type="float" office:value="0.07841358">
            <text:p>0.07841358</text:p>
          </table:table-cell>
          <table:table-cell table:number-columns-repeated="4"/>
        </table:table-row>
        <table:table-row table:style-name="ro1">
          <table:table-cell office:value-type="float" office:value="590.408020019531">
            <text:p>590.4080200195</text:p>
          </table:table-cell>
          <table:table-cell office:value-type="float" office:value="0.1214108">
            <text:p>0.1214108</text:p>
          </table:table-cell>
          <table:table-cell table:number-columns-repeated="4"/>
        </table:table-row>
        <table:table-row table:style-name="ro1">
          <table:table-cell office:value-type="float" office:value="590.526733398438">
            <text:p>590.5267333984</text:p>
          </table:table-cell>
          <table:table-cell office:value-type="float" office:value="0.0926975">
            <text:p>0.0926975</text:p>
          </table:table-cell>
          <table:table-cell table:number-columns-repeated="4"/>
        </table:table-row>
        <table:table-row table:style-name="ro1">
          <table:table-cell office:value-type="float" office:value="590.645446777344">
            <text:p>590.6454467773</text:p>
          </table:table-cell>
          <table:table-cell office:value-type="float" office:value="0.08134797">
            <text:p>0.08134797</text:p>
          </table:table-cell>
          <table:table-cell table:number-columns-repeated="4"/>
        </table:table-row>
        <table:table-row table:style-name="ro1">
          <table:table-cell office:value-type="float" office:value="590.764099121094">
            <text:p>590.7640991211</text:p>
          </table:table-cell>
          <table:table-cell office:value-type="float" office:value="0.08166815">
            <text:p>0.08166815</text:p>
          </table:table-cell>
          <table:table-cell table:number-columns-repeated="4"/>
        </table:table-row>
        <table:table-row table:style-name="ro1">
          <table:table-cell office:value-type="float" office:value="590.8828125">
            <text:p>590.8828125</text:p>
          </table:table-cell>
          <table:table-cell office:value-type="float" office:value="0.09157338">
            <text:p>0.09157338</text:p>
          </table:table-cell>
          <table:table-cell table:number-columns-repeated="4"/>
        </table:table-row>
        <table:table-row table:style-name="ro1">
          <table:table-cell office:value-type="float" office:value="591.001525878906">
            <text:p>591.0015258789</text:p>
          </table:table-cell>
          <table:table-cell office:value-type="float" office:value="0.09267484">
            <text:p>0.09267484</text:p>
          </table:table-cell>
          <table:table-cell table:number-columns-repeated="4"/>
        </table:table-row>
        <table:table-row table:style-name="ro1">
          <table:table-cell office:value-type="float" office:value="591.120239257813">
            <text:p>591.1202392578</text:p>
          </table:table-cell>
          <table:table-cell office:value-type="float" office:value="0.07995182">
            <text:p>0.07995182</text:p>
          </table:table-cell>
          <table:table-cell table:number-columns-repeated="4"/>
        </table:table-row>
        <table:table-row table:style-name="ro1">
          <table:table-cell office:value-type="float" office:value="591.238891601563">
            <text:p>591.2388916016</text:p>
          </table:table-cell>
          <table:table-cell office:value-type="float" office:value="0.07927077">
            <text:p>0.07927077</text:p>
          </table:table-cell>
          <table:table-cell table:number-columns-repeated="4"/>
        </table:table-row>
        <table:table-row table:style-name="ro1">
          <table:table-cell office:value-type="float" office:value="591.357604980469">
            <text:p>591.3576049805</text:p>
          </table:table-cell>
          <table:table-cell office:value-type="float" office:value="0.08906265">
            <text:p>0.08906265</text:p>
          </table:table-cell>
          <table:table-cell table:number-columns-repeated="4"/>
        </table:table-row>
        <table:table-row table:style-name="ro1">
          <table:table-cell office:value-type="float" office:value="591.476318359375">
            <text:p>591.4763183594</text:p>
          </table:table-cell>
          <table:table-cell office:value-type="float" office:value="0.08114573">
            <text:p>0.08114573</text:p>
          </table:table-cell>
          <table:table-cell table:number-columns-repeated="4"/>
        </table:table-row>
        <table:table-row table:style-name="ro1">
          <table:table-cell office:value-type="float" office:value="591.595031738281">
            <text:p>591.5950317383</text:p>
          </table:table-cell>
          <table:table-cell office:value-type="float" office:value="0.09585053">
            <text:p>0.09585053</text:p>
          </table:table-cell>
          <table:table-cell table:number-columns-repeated="4"/>
        </table:table-row>
        <table:table-row table:style-name="ro1">
          <table:table-cell office:value-type="float" office:value="591.713745117188">
            <text:p>591.7137451172</text:p>
          </table:table-cell>
          <table:table-cell office:value-type="float" office:value="0.08155479">
            <text:p>0.08155479</text:p>
          </table:table-cell>
          <table:table-cell table:number-columns-repeated="4"/>
        </table:table-row>
        <table:table-row table:style-name="ro1">
          <table:table-cell office:value-type="float" office:value="591.832458496094">
            <text:p>591.8324584961</text:p>
          </table:table-cell>
          <table:table-cell office:value-type="float" office:value="0.09353822">
            <text:p>0.09353822</text:p>
          </table:table-cell>
          <table:table-cell table:number-columns-repeated="4"/>
        </table:table-row>
        <table:table-row table:style-name="ro1">
          <table:table-cell office:value-type="float" office:value="591.951232910156">
            <text:p>591.9512329102</text:p>
          </table:table-cell>
          <table:table-cell office:value-type="float" office:value="0.08280493">
            <text:p>0.08280493</text:p>
          </table:table-cell>
          <table:table-cell table:number-columns-repeated="4"/>
        </table:table-row>
        <table:table-row table:style-name="ro1">
          <table:table-cell office:value-type="float" office:value="592.069946289063">
            <text:p>592.0699462891</text:p>
          </table:table-cell>
          <table:table-cell office:value-type="float" office:value="0.08619553">
            <text:p>0.08619553</text:p>
          </table:table-cell>
          <table:table-cell table:number-columns-repeated="4"/>
        </table:table-row>
        <table:table-row table:style-name="ro1">
          <table:table-cell office:value-type="float" office:value="592.188659667969">
            <text:p>592.188659668</text:p>
          </table:table-cell>
          <table:table-cell office:value-type="float" office:value="0.07531714">
            <text:p>0.07531714</text:p>
          </table:table-cell>
          <table:table-cell table:number-columns-repeated="4"/>
        </table:table-row>
        <table:table-row table:style-name="ro1">
          <table:table-cell office:value-type="float" office:value="592.307373046875">
            <text:p>592.3073730469</text:p>
          </table:table-cell>
          <table:table-cell office:value-type="float" office:value="0.07696784">
            <text:p>0.07696784</text:p>
          </table:table-cell>
          <table:table-cell table:number-columns-repeated="4"/>
        </table:table-row>
        <table:table-row table:style-name="ro1">
          <table:table-cell office:value-type="float" office:value="592.426086425781">
            <text:p>592.4260864258</text:p>
          </table:table-cell>
          <table:table-cell office:value-type="float" office:value="0.09797459">
            <text:p>0.09797459</text:p>
          </table:table-cell>
          <table:table-cell table:number-columns-repeated="4"/>
        </table:table-row>
        <table:table-row table:style-name="ro1">
          <table:table-cell office:value-type="float" office:value="592.544860839844">
            <text:p>592.5448608398</text:p>
          </table:table-cell>
          <table:table-cell office:value-type="float" office:value="0.07643729">
            <text:p>0.07643729</text:p>
          </table:table-cell>
          <table:table-cell table:number-columns-repeated="4"/>
        </table:table-row>
        <table:table-row table:style-name="ro1">
          <table:table-cell office:value-type="float" office:value="592.66357421875">
            <text:p>592.6635742188</text:p>
          </table:table-cell>
          <table:table-cell office:value-type="float" office:value="0.07404989">
            <text:p>0.07404989</text:p>
          </table:table-cell>
          <table:table-cell table:number-columns-repeated="4"/>
        </table:table-row>
        <table:table-row table:style-name="ro1">
          <table:table-cell office:value-type="float" office:value="592.782348632813">
            <text:p>592.7823486328</text:p>
          </table:table-cell>
          <table:table-cell office:value-type="float" office:value="0.07285588">
            <text:p>0.07285588</text:p>
          </table:table-cell>
          <table:table-cell table:number-columns-repeated="4"/>
        </table:table-row>
        <table:table-row table:style-name="ro1">
          <table:table-cell office:value-type="float" office:value="592.901062011719">
            <text:p>592.9010620117</text:p>
          </table:table-cell>
          <table:table-cell office:value-type="float" office:value="0.07848891">
            <text:p>0.07848891</text:p>
          </table:table-cell>
          <table:table-cell table:number-columns-repeated="4"/>
        </table:table-row>
        <table:table-row table:style-name="ro1">
          <table:table-cell office:value-type="float" office:value="593.019775390625">
            <text:p>593.0197753906</text:p>
          </table:table-cell>
          <table:table-cell office:value-type="float" office:value="0.07364886">
            <text:p>0.07364886</text:p>
          </table:table-cell>
          <table:table-cell table:number-columns-repeated="4"/>
        </table:table-row>
        <table:table-row table:style-name="ro1">
          <table:table-cell office:value-type="float" office:value="593.138549804688">
            <text:p>593.1385498047</text:p>
          </table:table-cell>
          <table:table-cell office:value-type="float" office:value="0.07096222">
            <text:p>0.07096222</text:p>
          </table:table-cell>
          <table:table-cell table:number-columns-repeated="4"/>
        </table:table-row>
        <table:table-row table:style-name="ro1">
          <table:table-cell office:value-type="float" office:value="593.257263183594">
            <text:p>593.2572631836</text:p>
          </table:table-cell>
          <table:table-cell office:value-type="float" office:value="0.06885868">
            <text:p>0.06885868</text:p>
          </table:table-cell>
          <table:table-cell table:number-columns-repeated="4"/>
        </table:table-row>
        <table:table-row table:style-name="ro1">
          <table:table-cell office:value-type="float" office:value="593.376037597656">
            <text:p>593.3760375977</text:p>
          </table:table-cell>
          <table:table-cell office:value-type="float" office:value="0.06610884">
            <text:p>0.06610884</text:p>
          </table:table-cell>
          <table:table-cell table:number-columns-repeated="4"/>
        </table:table-row>
        <table:table-row table:style-name="ro1">
          <table:table-cell office:value-type="float" office:value="593.494812011719">
            <text:p>593.4948120117</text:p>
          </table:table-cell>
          <table:table-cell office:value-type="float" office:value="0.0829561">
            <text:p>0.0829561</text:p>
          </table:table-cell>
          <table:table-cell table:number-columns-repeated="4"/>
        </table:table-row>
        <table:table-row table:style-name="ro1">
          <table:table-cell office:value-type="float" office:value="593.613525390625">
            <text:p>593.6135253906</text:p>
          </table:table-cell>
          <table:table-cell office:value-type="float" office:value="0.07235728">
            <text:p>0.07235728</text:p>
          </table:table-cell>
          <table:table-cell table:number-columns-repeated="4"/>
        </table:table-row>
        <table:table-row table:style-name="ro1">
          <table:table-cell office:value-type="float" office:value="593.732299804688">
            <text:p>593.7322998047</text:p>
          </table:table-cell>
          <table:table-cell office:value-type="float" office:value="0.07372326">
            <text:p>0.07372326</text:p>
          </table:table-cell>
          <table:table-cell table:number-columns-repeated="4"/>
        </table:table-row>
        <table:table-row table:style-name="ro1">
          <table:table-cell office:value-type="float" office:value="593.85107421875">
            <text:p>593.8510742188</text:p>
          </table:table-cell>
          <table:table-cell office:value-type="float" office:value="0.07516632">
            <text:p>0.07516632</text:p>
          </table:table-cell>
          <table:table-cell table:number-columns-repeated="4"/>
        </table:table-row>
        <table:table-row table:style-name="ro1">
          <table:table-cell office:value-type="float" office:value="593.969848632813">
            <text:p>593.9698486328</text:p>
          </table:table-cell>
          <table:table-cell office:value-type="float" office:value="0.07302483">
            <text:p>0.07302483</text:p>
          </table:table-cell>
          <table:table-cell table:number-columns-repeated="4"/>
        </table:table-row>
        <table:table-row table:style-name="ro1">
          <table:table-cell office:value-type="float" office:value="594.088562011719">
            <text:p>594.0885620117</text:p>
          </table:table-cell>
          <table:table-cell office:value-type="float" office:value="0.07227057">
            <text:p>0.07227057</text:p>
          </table:table-cell>
          <table:table-cell table:number-columns-repeated="4"/>
        </table:table-row>
        <table:table-row table:style-name="ro1">
          <table:table-cell office:value-type="float" office:value="594.207336425781">
            <text:p>594.2073364258</text:p>
          </table:table-cell>
          <table:table-cell office:value-type="float" office:value="0.07421282">
            <text:p>0.07421282</text:p>
          </table:table-cell>
          <table:table-cell table:number-columns-repeated="4"/>
        </table:table-row>
        <table:table-row table:style-name="ro1">
          <table:table-cell office:value-type="float" office:value="594.326110839844">
            <text:p>594.3261108398</text:p>
          </table:table-cell>
          <table:table-cell office:value-type="float" office:value="0.07887354">
            <text:p>0.07887354</text:p>
          </table:table-cell>
          <table:table-cell table:number-columns-repeated="4"/>
        </table:table-row>
        <table:table-row table:style-name="ro1">
          <table:table-cell office:value-type="float" office:value="594.444885253906">
            <text:p>594.4448852539</text:p>
          </table:table-cell>
          <table:table-cell office:value-type="float" office:value="0.06922479">
            <text:p>0.06922479</text:p>
          </table:table-cell>
          <table:table-cell table:number-columns-repeated="4"/>
        </table:table-row>
        <table:table-row table:style-name="ro1">
          <table:table-cell office:value-type="float" office:value="594.563659667969">
            <text:p>594.563659668</text:p>
          </table:table-cell>
          <table:table-cell office:value-type="float" office:value="0.07139063">
            <text:p>0.07139063</text:p>
          </table:table-cell>
          <table:table-cell table:number-columns-repeated="4"/>
        </table:table-row>
        <table:table-row table:style-name="ro1">
          <table:table-cell office:value-type="float" office:value="594.682434082031">
            <text:p>594.682434082</text:p>
          </table:table-cell>
          <table:table-cell office:value-type="float" office:value="0.07676627">
            <text:p>0.07676627</text:p>
          </table:table-cell>
          <table:table-cell table:number-columns-repeated="4"/>
        </table:table-row>
        <table:table-row table:style-name="ro1">
          <table:table-cell office:value-type="float" office:value="594.801208496094">
            <text:p>594.8012084961</text:p>
          </table:table-cell>
          <table:table-cell office:value-type="float" office:value="0.0729543">
            <text:p>0.0729543</text:p>
          </table:table-cell>
          <table:table-cell table:number-columns-repeated="4"/>
        </table:table-row>
        <table:table-row table:style-name="ro1">
          <table:table-cell office:value-type="float" office:value="594.919982910156">
            <text:p>594.9199829102</text:p>
          </table:table-cell>
          <table:table-cell office:value-type="float" office:value="0.07089334">
            <text:p>0.07089334</text:p>
          </table:table-cell>
          <table:table-cell table:number-columns-repeated="4"/>
        </table:table-row>
        <table:table-row table:style-name="ro1">
          <table:table-cell office:value-type="float" office:value="595.038818359375">
            <text:p>595.0388183594</text:p>
          </table:table-cell>
          <table:table-cell office:value-type="float" office:value="0.07502726">
            <text:p>0.07502726</text:p>
          </table:table-cell>
          <table:table-cell table:number-columns-repeated="4"/>
        </table:table-row>
        <table:table-row table:style-name="ro1">
          <table:table-cell office:value-type="float" office:value="595.157592773438">
            <text:p>595.1575927734</text:p>
          </table:table-cell>
          <table:table-cell office:value-type="float" office:value="0.08489532">
            <text:p>0.08489532</text:p>
          </table:table-cell>
          <table:table-cell table:number-columns-repeated="4"/>
        </table:table-row>
        <table:table-row table:style-name="ro1">
          <table:table-cell office:value-type="float" office:value="595.2763671875">
            <text:p>595.2763671875</text:p>
          </table:table-cell>
          <table:table-cell office:value-type="float" office:value="0.0951233">
            <text:p>0.0951233</text:p>
          </table:table-cell>
          <table:table-cell table:number-columns-repeated="4"/>
        </table:table-row>
        <table:table-row table:style-name="ro1">
          <table:table-cell office:value-type="float" office:value="595.395141601563">
            <text:p>595.3951416016</text:p>
          </table:table-cell>
          <table:table-cell office:value-type="float" office:value="0.07423019">
            <text:p>0.07423019</text:p>
          </table:table-cell>
          <table:table-cell table:number-columns-repeated="4"/>
        </table:table-row>
        <table:table-row table:style-name="ro1">
          <table:table-cell office:value-type="float" office:value="595.513916015625">
            <text:p>595.5139160156</text:p>
          </table:table-cell>
          <table:table-cell office:value-type="float" office:value="0.08230638">
            <text:p>0.08230638</text:p>
          </table:table-cell>
          <table:table-cell table:number-columns-repeated="4"/>
        </table:table-row>
        <table:table-row table:style-name="ro1">
          <table:table-cell office:value-type="float" office:value="595.632751464844">
            <text:p>595.6327514648</text:p>
          </table:table-cell>
          <table:table-cell office:value-type="float" office:value="0.06597668">
            <text:p>0.06597668</text:p>
          </table:table-cell>
          <table:table-cell table:number-columns-repeated="4"/>
        </table:table-row>
        <table:table-row table:style-name="ro1">
          <table:table-cell office:value-type="float" office:value="595.751525878906">
            <text:p>595.7515258789</text:p>
          </table:table-cell>
          <table:table-cell office:value-type="float" office:value="0.07162368">
            <text:p>0.07162368</text:p>
          </table:table-cell>
          <table:table-cell table:number-columns-repeated="4"/>
        </table:table-row>
        <table:table-row table:style-name="ro1">
          <table:table-cell office:value-type="float" office:value="595.870361328125">
            <text:p>595.8703613281</text:p>
          </table:table-cell>
          <table:table-cell office:value-type="float" office:value="0.07015335">
            <text:p>0.07015335</text:p>
          </table:table-cell>
          <table:table-cell table:number-columns-repeated="4"/>
        </table:table-row>
        <table:table-row table:style-name="ro1">
          <table:table-cell office:value-type="float" office:value="595.989135742188">
            <text:p>595.9891357422</text:p>
          </table:table-cell>
          <table:table-cell office:value-type="float" office:value="0.07922027">
            <text:p>0.07922027</text:p>
          </table:table-cell>
          <table:table-cell table:number-columns-repeated="4"/>
        </table:table-row>
        <table:table-row table:style-name="ro1">
          <table:table-cell office:value-type="float" office:value="596.107971191406">
            <text:p>596.1079711914</text:p>
          </table:table-cell>
          <table:table-cell office:value-type="float" office:value="0.07110853">
            <text:p>0.07110853</text:p>
          </table:table-cell>
          <table:table-cell table:number-columns-repeated="4"/>
        </table:table-row>
        <table:table-row table:style-name="ro1">
          <table:table-cell office:value-type="float" office:value="596.226745605469">
            <text:p>596.2267456055</text:p>
          </table:table-cell>
          <table:table-cell office:value-type="float" office:value="0.07531702">
            <text:p>0.07531702</text:p>
          </table:table-cell>
          <table:table-cell table:number-columns-repeated="4"/>
        </table:table-row>
        <table:table-row table:style-name="ro1">
          <table:table-cell office:value-type="float" office:value="596.345581054688">
            <text:p>596.3455810547</text:p>
          </table:table-cell>
          <table:table-cell office:value-type="float" office:value="0.06966054">
            <text:p>0.06966054</text:p>
          </table:table-cell>
          <table:table-cell table:number-columns-repeated="4"/>
        </table:table-row>
        <table:table-row table:style-name="ro1">
          <table:table-cell office:value-type="float" office:value="596.46435546875">
            <text:p>596.4643554688</text:p>
          </table:table-cell>
          <table:table-cell office:value-type="float" office:value="0.08398872">
            <text:p>0.08398872</text:p>
          </table:table-cell>
          <table:table-cell table:number-columns-repeated="4"/>
        </table:table-row>
        <table:table-row table:style-name="ro1">
          <table:table-cell office:value-type="float" office:value="596.583190917969">
            <text:p>596.583190918</text:p>
          </table:table-cell>
          <table:table-cell office:value-type="float" office:value="0.07004254">
            <text:p>0.07004254</text:p>
          </table:table-cell>
          <table:table-cell table:number-columns-repeated="4"/>
        </table:table-row>
        <table:table-row table:style-name="ro1">
          <table:table-cell office:value-type="float" office:value="596.702026367188">
            <text:p>596.7020263672</text:p>
          </table:table-cell>
          <table:table-cell office:value-type="float" office:value="0.07322018">
            <text:p>0.07322018</text:p>
          </table:table-cell>
          <table:table-cell table:number-columns-repeated="4"/>
        </table:table-row>
        <table:table-row table:style-name="ro1">
          <table:table-cell office:value-type="float" office:value="596.82080078125">
            <text:p>596.8208007813</text:p>
          </table:table-cell>
          <table:table-cell office:value-type="float" office:value="0.06976902">
            <text:p>0.06976902</text:p>
          </table:table-cell>
          <table:table-cell table:number-columns-repeated="4"/>
        </table:table-row>
        <table:table-row table:style-name="ro1">
          <table:table-cell office:value-type="float" office:value="596.939636230469">
            <text:p>596.9396362305</text:p>
          </table:table-cell>
          <table:table-cell office:value-type="float" office:value="0.06671735">
            <text:p>0.06671735</text:p>
          </table:table-cell>
          <table:table-cell table:number-columns-repeated="4"/>
        </table:table-row>
        <table:table-row table:style-name="ro1">
          <table:table-cell office:value-type="float" office:value="597.058471679688">
            <text:p>597.0584716797</text:p>
          </table:table-cell>
          <table:table-cell office:value-type="float" office:value="0.07097466">
            <text:p>0.07097466</text:p>
          </table:table-cell>
          <table:table-cell table:number-columns-repeated="4"/>
        </table:table-row>
        <table:table-row table:style-name="ro1">
          <table:table-cell office:value-type="float" office:value="597.177307128906">
            <text:p>597.1773071289</text:p>
          </table:table-cell>
          <table:table-cell office:value-type="float" office:value="0.0677331">
            <text:p>0.0677331</text:p>
          </table:table-cell>
          <table:table-cell table:number-columns-repeated="4"/>
        </table:table-row>
        <table:table-row table:style-name="ro1">
          <table:table-cell office:value-type="float" office:value="597.296142578125">
            <text:p>597.2961425781</text:p>
          </table:table-cell>
          <table:table-cell office:value-type="float" office:value="0.08118248">
            <text:p>0.08118248</text:p>
          </table:table-cell>
          <table:table-cell table:number-columns-repeated="4"/>
        </table:table-row>
        <table:table-row table:style-name="ro1">
          <table:table-cell office:value-type="float" office:value="597.414978027344">
            <text:p>597.4149780273</text:p>
          </table:table-cell>
          <table:table-cell office:value-type="float" office:value="0.06889343">
            <text:p>0.06889343</text:p>
          </table:table-cell>
          <table:table-cell table:number-columns-repeated="4"/>
        </table:table-row>
        <table:table-row table:style-name="ro1">
          <table:table-cell office:value-type="float" office:value="597.533752441406">
            <text:p>597.5337524414</text:p>
          </table:table-cell>
          <table:table-cell office:value-type="float" office:value="0.06358082">
            <text:p>0.06358082</text:p>
          </table:table-cell>
          <table:table-cell table:number-columns-repeated="4"/>
        </table:table-row>
        <table:table-row table:style-name="ro1">
          <table:table-cell office:value-type="float" office:value="597.652587890625">
            <text:p>597.6525878906</text:p>
          </table:table-cell>
          <table:table-cell office:value-type="float" office:value="0.08808577">
            <text:p>0.08808577</text:p>
          </table:table-cell>
          <table:table-cell table:number-columns-repeated="4"/>
        </table:table-row>
        <table:table-row table:style-name="ro1">
          <table:table-cell office:value-type="float" office:value="597.771423339844">
            <text:p>597.7714233398</text:p>
          </table:table-cell>
          <table:table-cell office:value-type="float" office:value="0.07284998">
            <text:p>0.07284998</text:p>
          </table:table-cell>
          <table:table-cell table:number-columns-repeated="4"/>
        </table:table-row>
        <table:table-row table:style-name="ro1">
          <table:table-cell office:value-type="float" office:value="597.890319824219">
            <text:p>597.8903198242</text:p>
          </table:table-cell>
          <table:table-cell office:value-type="float" office:value="0.07332344">
            <text:p>0.07332344</text:p>
          </table:table-cell>
          <table:table-cell table:number-columns-repeated="4"/>
        </table:table-row>
        <table:table-row table:style-name="ro1">
          <table:table-cell office:value-type="float" office:value="598.009155273438">
            <text:p>598.0091552734</text:p>
          </table:table-cell>
          <table:table-cell office:value-type="float" office:value="0.06755506">
            <text:p>0.06755506</text:p>
          </table:table-cell>
          <table:table-cell table:number-columns-repeated="4"/>
        </table:table-row>
        <table:table-row table:style-name="ro1">
          <table:table-cell office:value-type="float" office:value="598.127990722656">
            <text:p>598.1279907227</text:p>
          </table:table-cell>
          <table:table-cell office:value-type="float" office:value="0.06334873">
            <text:p>0.06334873</text:p>
          </table:table-cell>
          <table:table-cell table:number-columns-repeated="4"/>
        </table:table-row>
        <table:table-row table:style-name="ro1">
          <table:table-cell office:value-type="float" office:value="598.246826171875">
            <text:p>598.2468261719</text:p>
          </table:table-cell>
          <table:table-cell office:value-type="float" office:value="0.07566453">
            <text:p>0.07566453</text:p>
          </table:table-cell>
          <table:table-cell table:number-columns-repeated="4"/>
        </table:table-row>
        <table:table-row table:style-name="ro1">
          <table:table-cell office:value-type="float" office:value="598.365661621094">
            <text:p>598.3656616211</text:p>
          </table:table-cell>
          <table:table-cell office:value-type="float" office:value="0.07136661">
            <text:p>0.07136661</text:p>
          </table:table-cell>
          <table:table-cell table:number-columns-repeated="4"/>
        </table:table-row>
        <table:table-row table:style-name="ro1">
          <table:table-cell office:value-type="float" office:value="598.484497070313">
            <text:p>598.4844970703</text:p>
          </table:table-cell>
          <table:table-cell office:value-type="float" office:value="0.06692412">
            <text:p>0.06692412</text:p>
          </table:table-cell>
          <table:table-cell table:number-columns-repeated="4"/>
        </table:table-row>
        <table:table-row table:style-name="ro1">
          <table:table-cell office:value-type="float" office:value="598.603393554688">
            <text:p>598.6033935547</text:p>
          </table:table-cell>
          <table:table-cell office:value-type="float" office:value="0.07521607">
            <text:p>0.07521607</text:p>
          </table:table-cell>
          <table:table-cell table:number-columns-repeated="4"/>
        </table:table-row>
        <table:table-row table:style-name="ro1">
          <table:table-cell office:value-type="float" office:value="598.722229003906">
            <text:p>598.7222290039</text:p>
          </table:table-cell>
          <table:table-cell office:value-type="float" office:value="0.06307247">
            <text:p>0.06307247</text:p>
          </table:table-cell>
          <table:table-cell table:number-columns-repeated="4"/>
        </table:table-row>
        <table:table-row table:style-name="ro1">
          <table:table-cell office:value-type="float" office:value="598.841064453125">
            <text:p>598.8410644531</text:p>
          </table:table-cell>
          <table:table-cell office:value-type="float" office:value="0.06561634">
            <text:p>0.06561634</text:p>
          </table:table-cell>
          <table:table-cell table:number-columns-repeated="4"/>
        </table:table-row>
        <table:table-row table:style-name="ro1">
          <table:table-cell office:value-type="float" office:value="598.9599609375">
            <text:p>598.9599609375</text:p>
          </table:table-cell>
          <table:table-cell office:value-type="float" office:value="0.07871869">
            <text:p>0.07871869</text:p>
          </table:table-cell>
          <table:table-cell table:number-columns-repeated="4"/>
        </table:table-row>
        <table:table-row table:style-name="ro1">
          <table:table-cell office:value-type="float" office:value="599.078796386719">
            <text:p>599.0787963867</text:p>
          </table:table-cell>
          <table:table-cell office:value-type="float" office:value="0.07807305">
            <text:p>0.07807305</text:p>
          </table:table-cell>
          <table:table-cell table:number-columns-repeated="4"/>
        </table:table-row>
        <table:table-row table:style-name="ro1">
          <table:table-cell office:value-type="float" office:value="599.197692871094">
            <text:p>599.1976928711</text:p>
          </table:table-cell>
          <table:table-cell office:value-type="float" office:value="0.0708468">
            <text:p>0.0708468</text:p>
          </table:table-cell>
          <table:table-cell table:number-columns-repeated="4"/>
        </table:table-row>
        <table:table-row table:style-name="ro1">
          <table:table-cell office:value-type="float" office:value="599.316528320313">
            <text:p>599.3165283203</text:p>
          </table:table-cell>
          <table:table-cell office:value-type="float" office:value="0.05534307">
            <text:p>0.05534307</text:p>
          </table:table-cell>
          <table:table-cell table:number-columns-repeated="4"/>
        </table:table-row>
        <table:table-row table:style-name="ro1">
          <table:table-cell office:value-type="float" office:value="599.435424804688">
            <text:p>599.4354248047</text:p>
          </table:table-cell>
          <table:table-cell office:value-type="float" office:value="0.07203336">
            <text:p>0.07203336</text:p>
          </table:table-cell>
          <table:table-cell table:number-columns-repeated="4"/>
        </table:table-row>
        <table:table-row table:style-name="ro1">
          <table:table-cell office:value-type="float" office:value="599.554321289063">
            <text:p>599.5543212891</text:p>
          </table:table-cell>
          <table:table-cell office:value-type="float" office:value="0.0583198">
            <text:p>0.0583198</text:p>
          </table:table-cell>
          <table:table-cell table:number-columns-repeated="4"/>
        </table:table-row>
        <table:table-row table:style-name="ro1">
          <table:table-cell office:value-type="float" office:value="599.673156738281">
            <text:p>599.6731567383</text:p>
          </table:table-cell>
          <table:table-cell office:value-type="float" office:value="0.06285133">
            <text:p>0.06285133</text:p>
          </table:table-cell>
          <table:table-cell table:number-columns-repeated="4"/>
        </table:table-row>
        <table:table-row table:style-name="ro1">
          <table:table-cell office:value-type="float" office:value="599.792053222656">
            <text:p>599.7920532227</text:p>
          </table:table-cell>
          <table:table-cell office:value-type="float" office:value="0.06946352">
            <text:p>0.06946352</text:p>
          </table:table-cell>
          <table:table-cell table:number-columns-repeated="4"/>
        </table:table-row>
        <table:table-row table:style-name="ro1">
          <table:table-cell office:value-type="float" office:value="599.910949707031">
            <text:p>599.910949707</text:p>
          </table:table-cell>
          <table:table-cell office:value-type="float" office:value="0.07008608">
            <text:p>0.07008608</text:p>
          </table:table-cell>
          <table:table-cell table:number-columns-repeated="4"/>
        </table:table-row>
        <table:table-row table:style-name="ro1">
          <table:table-cell office:value-type="float" office:value="600.02978515625">
            <text:p>600.0297851563</text:p>
          </table:table-cell>
          <table:table-cell office:value-type="float" office:value="0.06252521">
            <text:p>0.06252521</text:p>
          </table:table-cell>
          <table:table-cell table:number-columns-repeated="4"/>
        </table:table-row>
        <table:table-row table:style-name="ro1">
          <table:table-cell office:value-type="float" office:value="600.148681640625">
            <text:p>600.1486816406</text:p>
          </table:table-cell>
          <table:table-cell office:value-type="float" office:value="0.06991025">
            <text:p>0.06991025</text:p>
          </table:table-cell>
          <table:table-cell table:number-columns-repeated="4"/>
        </table:table-row>
        <table:table-row table:style-name="ro1">
          <table:table-cell office:value-type="float" office:value="600.267578125">
            <text:p>600.267578125</text:p>
          </table:table-cell>
          <table:table-cell office:value-type="float" office:value="0.06117096">
            <text:p>0.06117096</text:p>
          </table:table-cell>
          <table:table-cell table:number-columns-repeated="4"/>
        </table:table-row>
        <table:table-row table:style-name="ro1">
          <table:table-cell office:value-type="float" office:value="600.386474609375">
            <text:p>600.3864746094</text:p>
          </table:table-cell>
          <table:table-cell office:value-type="float" office:value="0.05739374">
            <text:p>0.05739374</text:p>
          </table:table-cell>
          <table:table-cell table:number-columns-repeated="4"/>
        </table:table-row>
        <table:table-row table:style-name="ro1">
          <table:table-cell office:value-type="float" office:value="600.50537109375">
            <text:p>600.5053710938</text:p>
          </table:table-cell>
          <table:table-cell office:value-type="float" office:value="0.08376013">
            <text:p>0.08376013</text:p>
          </table:table-cell>
          <table:table-cell table:number-columns-repeated="4"/>
        </table:table-row>
        <table:table-row table:style-name="ro1">
          <table:table-cell office:value-type="float" office:value="600.624267578125">
            <text:p>600.6242675781</text:p>
          </table:table-cell>
          <table:table-cell office:value-type="float" office:value="0.05651002">
            <text:p>0.05651002</text:p>
          </table:table-cell>
          <table:table-cell table:number-columns-repeated="4"/>
        </table:table-row>
        <table:table-row table:style-name="ro1">
          <table:table-cell office:value-type="float" office:value="600.7431640625">
            <text:p>600.7431640625</text:p>
          </table:table-cell>
          <table:table-cell office:value-type="float" office:value="0.0615591">
            <text:p>0.0615591</text:p>
          </table:table-cell>
          <table:table-cell table:number-columns-repeated="4"/>
        </table:table-row>
        <table:table-row table:style-name="ro1">
          <table:table-cell office:value-type="float" office:value="600.862060546875">
            <text:p>600.8620605469</text:p>
          </table:table-cell>
          <table:table-cell office:value-type="float" office:value="0.05364291">
            <text:p>0.05364291</text:p>
          </table:table-cell>
          <table:table-cell table:number-columns-repeated="4"/>
        </table:table-row>
        <table:table-row table:style-name="ro1">
          <table:table-cell office:value-type="float" office:value="600.98095703125">
            <text:p>600.9809570313</text:p>
          </table:table-cell>
          <table:table-cell office:value-type="float" office:value="0.06401297">
            <text:p>0.06401297</text:p>
          </table:table-cell>
          <table:table-cell table:number-columns-repeated="4"/>
        </table:table-row>
        <table:table-row table:style-name="ro1">
          <table:table-cell office:value-type="float" office:value="601.099853515625">
            <text:p>601.0998535156</text:p>
          </table:table-cell>
          <table:table-cell office:value-type="float" office:value="0.05397478">
            <text:p>0.05397478</text:p>
          </table:table-cell>
          <table:table-cell table:number-columns-repeated="4"/>
        </table:table-row>
        <table:table-row table:style-name="ro1">
          <table:table-cell office:value-type="float" office:value="601.21875">
            <text:p>601.21875</text:p>
          </table:table-cell>
          <table:table-cell office:value-type="float" office:value="0.06389358">
            <text:p>0.06389358</text:p>
          </table:table-cell>
          <table:table-cell table:number-columns-repeated="4"/>
        </table:table-row>
        <table:table-row table:style-name="ro1">
          <table:table-cell office:value-type="float" office:value="601.337646484375">
            <text:p>601.3376464844</text:p>
          </table:table-cell>
          <table:table-cell office:value-type="float" office:value="0.06252934">
            <text:p>0.06252934</text:p>
          </table:table-cell>
          <table:table-cell table:number-columns-repeated="4"/>
        </table:table-row>
        <table:table-row table:style-name="ro1">
          <table:table-cell office:value-type="float" office:value="601.45654296875">
            <text:p>601.4565429688</text:p>
          </table:table-cell>
          <table:table-cell office:value-type="float" office:value="0.06047672">
            <text:p>0.06047672</text:p>
          </table:table-cell>
          <table:table-cell table:number-columns-repeated="4"/>
        </table:table-row>
        <table:table-row table:style-name="ro1">
          <table:table-cell office:value-type="float" office:value="601.575500488281">
            <text:p>601.5755004883</text:p>
          </table:table-cell>
          <table:table-cell office:value-type="float" office:value="0.05855865">
            <text:p>0.05855865</text:p>
          </table:table-cell>
          <table:table-cell table:number-columns-repeated="4"/>
        </table:table-row>
        <table:table-row table:style-name="ro1">
          <table:table-cell office:value-type="float" office:value="601.694396972656">
            <text:p>601.6943969727</text:p>
          </table:table-cell>
          <table:table-cell office:value-type="float" office:value="0.06095881">
            <text:p>0.06095881</text:p>
          </table:table-cell>
          <table:table-cell table:number-columns-repeated="4"/>
        </table:table-row>
        <table:table-row table:style-name="ro1">
          <table:table-cell office:value-type="float" office:value="601.813293457031">
            <text:p>601.813293457</text:p>
          </table:table-cell>
          <table:table-cell office:value-type="float" office:value="0.06148128">
            <text:p>0.06148128</text:p>
          </table:table-cell>
          <table:table-cell table:number-columns-repeated="4"/>
        </table:table-row>
        <table:table-row table:style-name="ro1">
          <table:table-cell office:value-type="float" office:value="601.932250976563">
            <text:p>601.9322509766</text:p>
          </table:table-cell>
          <table:table-cell office:value-type="float" office:value="0.05658564">
            <text:p>0.05658564</text:p>
          </table:table-cell>
          <table:table-cell table:number-columns-repeated="4"/>
        </table:table-row>
        <table:table-row table:style-name="ro1">
          <table:table-cell office:value-type="float" office:value="602.051147460938">
            <text:p>602.0511474609</text:p>
          </table:table-cell>
          <table:table-cell office:value-type="float" office:value="0.06440125">
            <text:p>0.06440125</text:p>
          </table:table-cell>
          <table:table-cell table:number-columns-repeated="4"/>
        </table:table-row>
        <table:table-row table:style-name="ro1">
          <table:table-cell office:value-type="float" office:value="602.170043945313">
            <text:p>602.1700439453</text:p>
          </table:table-cell>
          <table:table-cell office:value-type="float" office:value="0.06666929">
            <text:p>0.06666929</text:p>
          </table:table-cell>
          <table:table-cell table:number-columns-repeated="4"/>
        </table:table-row>
        <table:table-row table:style-name="ro1">
          <table:table-cell office:value-type="float" office:value="602.289001464844">
            <text:p>602.2890014648</text:p>
          </table:table-cell>
          <table:table-cell office:value-type="float" office:value="0.05016838">
            <text:p>0.05016838</text:p>
          </table:table-cell>
          <table:table-cell table:number-columns-repeated="4"/>
        </table:table-row>
        <table:table-row table:style-name="ro1">
          <table:table-cell office:value-type="float" office:value="602.407897949219">
            <text:p>602.4078979492</text:p>
          </table:table-cell>
          <table:table-cell office:value-type="float" office:value="0.06242536">
            <text:p>0.06242536</text:p>
          </table:table-cell>
          <table:table-cell table:number-columns-repeated="4"/>
        </table:table-row>
        <table:table-row table:style-name="ro1">
          <table:table-cell office:value-type="float" office:value="602.52685546875">
            <text:p>602.5268554688</text:p>
          </table:table-cell>
          <table:table-cell office:value-type="float" office:value="0.06435675">
            <text:p>0.06435675</text:p>
          </table:table-cell>
          <table:table-cell table:number-columns-repeated="4"/>
        </table:table-row>
        <table:table-row table:style-name="ro1">
          <table:table-cell office:value-type="float" office:value="602.645751953125">
            <text:p>602.6457519531</text:p>
          </table:table-cell>
          <table:table-cell office:value-type="float" office:value="0.05055742">
            <text:p>0.05055742</text:p>
          </table:table-cell>
          <table:table-cell table:number-columns-repeated="4"/>
        </table:table-row>
        <table:table-row table:style-name="ro1">
          <table:table-cell office:value-type="float" office:value="602.764709472656">
            <text:p>602.7647094727</text:p>
          </table:table-cell>
          <table:table-cell office:value-type="float" office:value="0.05406854">
            <text:p>0.05406854</text:p>
          </table:table-cell>
          <table:table-cell table:number-columns-repeated="4"/>
        </table:table-row>
        <table:table-row table:style-name="ro1">
          <table:table-cell office:value-type="float" office:value="602.883666992188">
            <text:p>602.8836669922</text:p>
          </table:table-cell>
          <table:table-cell office:value-type="float" office:value="0.04520343">
            <text:p>0.04520343</text:p>
          </table:table-cell>
          <table:table-cell table:number-columns-repeated="4"/>
        </table:table-row>
        <table:table-row table:style-name="ro1">
          <table:table-cell office:value-type="float" office:value="603.002563476563">
            <text:p>603.0025634766</text:p>
          </table:table-cell>
          <table:table-cell office:value-type="float" office:value="0.05703541">
            <text:p>0.05703541</text:p>
          </table:table-cell>
          <table:table-cell table:number-columns-repeated="4"/>
        </table:table-row>
        <table:table-row table:style-name="ro1">
          <table:table-cell office:value-type="float" office:value="603.121520996094">
            <text:p>603.1215209961</text:p>
          </table:table-cell>
          <table:table-cell office:value-type="float" office:value="0.06026931">
            <text:p>0.06026931</text:p>
          </table:table-cell>
          <table:table-cell table:number-columns-repeated="4"/>
        </table:table-row>
        <table:table-row table:style-name="ro1">
          <table:table-cell office:value-type="float" office:value="603.240478515625">
            <text:p>603.2404785156</text:p>
          </table:table-cell>
          <table:table-cell office:value-type="float" office:value="0.06429581">
            <text:p>0.06429581</text:p>
          </table:table-cell>
          <table:table-cell table:number-columns-repeated="4"/>
        </table:table-row>
        <table:table-row table:style-name="ro1">
          <table:table-cell office:value-type="float" office:value="603.359436035156">
            <text:p>603.3594360352</text:p>
          </table:table-cell>
          <table:table-cell office:value-type="float" office:value="0.06520545">
            <text:p>0.06520545</text:p>
          </table:table-cell>
          <table:table-cell table:number-columns-repeated="4"/>
        </table:table-row>
        <table:table-row table:style-name="ro1">
          <table:table-cell office:value-type="float" office:value="603.478393554688">
            <text:p>603.4783935547</text:p>
          </table:table-cell>
          <table:table-cell office:value-type="float" office:value="0.05731298">
            <text:p>0.05731298</text:p>
          </table:table-cell>
          <table:table-cell table:number-columns-repeated="4"/>
        </table:table-row>
        <table:table-row table:style-name="ro1">
          <table:table-cell office:value-type="float" office:value="603.597290039063">
            <text:p>603.5972900391</text:p>
          </table:table-cell>
          <table:table-cell office:value-type="float" office:value="0.05643871">
            <text:p>0.05643871</text:p>
          </table:table-cell>
          <table:table-cell table:number-columns-repeated="4"/>
        </table:table-row>
        <table:table-row table:style-name="ro1">
          <table:table-cell office:value-type="float" office:value="603.716247558594">
            <text:p>603.7162475586</text:p>
          </table:table-cell>
          <table:table-cell office:value-type="float" office:value="0.05476691">
            <text:p>0.05476691</text:p>
          </table:table-cell>
          <table:table-cell table:number-columns-repeated="4"/>
        </table:table-row>
        <table:table-row table:style-name="ro1">
          <table:table-cell office:value-type="float" office:value="603.835205078125">
            <text:p>603.8352050781</text:p>
          </table:table-cell>
          <table:table-cell office:value-type="float" office:value="0.04882822">
            <text:p>0.04882822</text:p>
          </table:table-cell>
          <table:table-cell table:number-columns-repeated="4"/>
        </table:table-row>
        <table:table-row table:style-name="ro1">
          <table:table-cell office:value-type="float" office:value="603.954162597656">
            <text:p>603.9541625977</text:p>
          </table:table-cell>
          <table:table-cell office:value-type="float" office:value="0.05028445">
            <text:p>0.05028445</text:p>
          </table:table-cell>
          <table:table-cell table:number-columns-repeated="4"/>
        </table:table-row>
        <table:table-row table:style-name="ro1">
          <table:table-cell office:value-type="float" office:value="604.073120117188">
            <text:p>604.0731201172</text:p>
          </table:table-cell>
          <table:table-cell office:value-type="float" office:value="0.05004144">
            <text:p>0.05004144</text:p>
          </table:table-cell>
          <table:table-cell table:number-columns-repeated="4"/>
        </table:table-row>
        <table:table-row table:style-name="ro1">
          <table:table-cell office:value-type="float" office:value="604.192077636719">
            <text:p>604.1920776367</text:p>
          </table:table-cell>
          <table:table-cell office:value-type="float" office:value="0.04735726">
            <text:p>0.04735726</text:p>
          </table:table-cell>
          <table:table-cell table:number-columns-repeated="4"/>
        </table:table-row>
        <table:table-row table:style-name="ro1">
          <table:table-cell office:value-type="float" office:value="604.31103515625">
            <text:p>604.3110351563</text:p>
          </table:table-cell>
          <table:table-cell office:value-type="float" office:value="0.06935419">
            <text:p>0.06935419</text:p>
          </table:table-cell>
          <table:table-cell table:number-columns-repeated="4"/>
        </table:table-row>
        <table:table-row table:style-name="ro1">
          <table:table-cell office:value-type="float" office:value="604.430053710938">
            <text:p>604.4300537109</text:p>
          </table:table-cell>
          <table:table-cell office:value-type="float" office:value="0.05507815">
            <text:p>0.05507815</text:p>
          </table:table-cell>
          <table:table-cell table:number-columns-repeated="4"/>
        </table:table-row>
        <table:table-row table:style-name="ro1">
          <table:table-cell office:value-type="float" office:value="604.549011230469">
            <text:p>604.5490112305</text:p>
          </table:table-cell>
          <table:table-cell office:value-type="float" office:value="0.05058214">
            <text:p>0.05058214</text:p>
          </table:table-cell>
          <table:table-cell table:number-columns-repeated="4"/>
        </table:table-row>
        <table:table-row table:style-name="ro1">
          <table:table-cell office:value-type="float" office:value="604.66796875">
            <text:p>604.66796875</text:p>
          </table:table-cell>
          <table:table-cell office:value-type="float" office:value="0.05434557">
            <text:p>0.05434557</text:p>
          </table:table-cell>
          <table:table-cell table:number-columns-repeated="4"/>
        </table:table-row>
        <table:table-row table:style-name="ro1">
          <table:table-cell office:value-type="float" office:value="604.786926269531">
            <text:p>604.7869262695</text:p>
          </table:table-cell>
          <table:table-cell office:value-type="float" office:value="0.06458386">
            <text:p>0.06458386</text:p>
          </table:table-cell>
          <table:table-cell table:number-columns-repeated="4"/>
        </table:table-row>
        <table:table-row table:style-name="ro1">
          <table:table-cell office:value-type="float" office:value="604.905883789063">
            <text:p>604.9058837891</text:p>
          </table:table-cell>
          <table:table-cell office:value-type="float" office:value="0.06321467">
            <text:p>0.06321467</text:p>
          </table:table-cell>
          <table:table-cell table:number-columns-repeated="4"/>
        </table:table-row>
        <table:table-row table:style-name="ro1">
          <table:table-cell office:value-type="float" office:value="605.02490234375">
            <text:p>605.0249023438</text:p>
          </table:table-cell>
          <table:table-cell office:value-type="float" office:value="0.05175003">
            <text:p>0.05175003</text:p>
          </table:table-cell>
          <table:table-cell table:number-columns-repeated="4"/>
        </table:table-row>
        <table:table-row table:style-name="ro1">
          <table:table-cell office:value-type="float" office:value="605.143859863281">
            <text:p>605.1438598633</text:p>
          </table:table-cell>
          <table:table-cell office:value-type="float" office:value="0.04831376">
            <text:p>0.04831376</text:p>
          </table:table-cell>
          <table:table-cell table:number-columns-repeated="4"/>
        </table:table-row>
        <table:table-row table:style-name="ro1">
          <table:table-cell office:value-type="float" office:value="605.262817382813">
            <text:p>605.2628173828</text:p>
          </table:table-cell>
          <table:table-cell office:value-type="float" office:value="0.04677698">
            <text:p>0.04677698</text:p>
          </table:table-cell>
          <table:table-cell table:number-columns-repeated="4"/>
        </table:table-row>
        <table:table-row table:style-name="ro1">
          <table:table-cell office:value-type="float" office:value="605.3818359375">
            <text:p>605.3818359375</text:p>
          </table:table-cell>
          <table:table-cell office:value-type="float" office:value="0.05553302">
            <text:p>0.05553302</text:p>
          </table:table-cell>
          <table:table-cell table:number-columns-repeated="4"/>
        </table:table-row>
        <table:table-row table:style-name="ro1">
          <table:table-cell office:value-type="float" office:value="605.500793457031">
            <text:p>605.500793457</text:p>
          </table:table-cell>
          <table:table-cell office:value-type="float" office:value="0.05143654">
            <text:p>0.05143654</text:p>
          </table:table-cell>
          <table:table-cell table:number-columns-repeated="4"/>
        </table:table-row>
        <table:table-row table:style-name="ro1">
          <table:table-cell office:value-type="float" office:value="605.619812011719">
            <text:p>605.6198120117</text:p>
          </table:table-cell>
          <table:table-cell office:value-type="float" office:value="0.05426405">
            <text:p>0.05426405</text:p>
          </table:table-cell>
          <table:table-cell table:number-columns-repeated="4"/>
        </table:table-row>
        <table:table-row table:style-name="ro1">
          <table:table-cell office:value-type="float" office:value="605.73876953125">
            <text:p>605.7387695313</text:p>
          </table:table-cell>
          <table:table-cell office:value-type="float" office:value="0.04901459">
            <text:p>0.04901459</text:p>
          </table:table-cell>
          <table:table-cell table:number-columns-repeated="4"/>
        </table:table-row>
        <table:table-row table:style-name="ro1">
          <table:table-cell office:value-type="float" office:value="605.857788085938">
            <text:p>605.8577880859</text:p>
          </table:table-cell>
          <table:table-cell office:value-type="float" office:value="0.0616364">
            <text:p>0.0616364</text:p>
          </table:table-cell>
          <table:table-cell table:number-columns-repeated="4"/>
        </table:table-row>
        <table:table-row table:style-name="ro1">
          <table:table-cell office:value-type="float" office:value="605.976806640625">
            <text:p>605.9768066406</text:p>
          </table:table-cell>
          <table:table-cell office:value-type="float" office:value="0.06305365">
            <text:p>0.06305365</text:p>
          </table:table-cell>
          <table:table-cell table:number-columns-repeated="4"/>
        </table:table-row>
        <table:table-row table:style-name="ro1">
          <table:table-cell office:value-type="float" office:value="606.095764160156">
            <text:p>606.0957641602</text:p>
          </table:table-cell>
          <table:table-cell office:value-type="float" office:value="0.05465509">
            <text:p>0.05465509</text:p>
          </table:table-cell>
          <table:table-cell table:number-columns-repeated="4"/>
        </table:table-row>
        <table:table-row table:style-name="ro1">
          <table:table-cell office:value-type="float" office:value="606.214782714844">
            <text:p>606.2147827148</text:p>
          </table:table-cell>
          <table:table-cell office:value-type="float" office:value="0.06252383">
            <text:p>0.06252383</text:p>
          </table:table-cell>
          <table:table-cell table:number-columns-repeated="4"/>
        </table:table-row>
        <table:table-row table:style-name="ro1">
          <table:table-cell office:value-type="float" office:value="606.333801269531">
            <text:p>606.3338012695</text:p>
          </table:table-cell>
          <table:table-cell office:value-type="float" office:value="0.04691834">
            <text:p>0.04691834</text:p>
          </table:table-cell>
          <table:table-cell table:number-columns-repeated="4"/>
        </table:table-row>
        <table:table-row table:style-name="ro1">
          <table:table-cell office:value-type="float" office:value="606.452758789063">
            <text:p>606.4527587891</text:p>
          </table:table-cell>
          <table:table-cell office:value-type="float" office:value="0.05878727">
            <text:p>0.05878727</text:p>
          </table:table-cell>
          <table:table-cell table:number-columns-repeated="4"/>
        </table:table-row>
        <table:table-row table:style-name="ro1">
          <table:table-cell office:value-type="float" office:value="606.57177734375">
            <text:p>606.5717773438</text:p>
          </table:table-cell>
          <table:table-cell office:value-type="float" office:value="0.04663991">
            <text:p>0.04663991</text:p>
          </table:table-cell>
          <table:table-cell table:number-columns-repeated="4"/>
        </table:table-row>
        <table:table-row table:style-name="ro1">
          <table:table-cell office:value-type="float" office:value="606.690795898438">
            <text:p>606.6907958984</text:p>
          </table:table-cell>
          <table:table-cell office:value-type="float" office:value="0.05334295">
            <text:p>0.05334295</text:p>
          </table:table-cell>
          <table:table-cell table:number-columns-repeated="4"/>
        </table:table-row>
        <table:table-row table:style-name="ro1">
          <table:table-cell office:value-type="float" office:value="606.809814453125">
            <text:p>606.8098144531</text:p>
          </table:table-cell>
          <table:table-cell office:value-type="float" office:value="0.04627261">
            <text:p>0.04627261</text:p>
          </table:table-cell>
          <table:table-cell table:number-columns-repeated="4"/>
        </table:table-row>
        <table:table-row table:style-name="ro1">
          <table:table-cell office:value-type="float" office:value="606.928833007813">
            <text:p>606.9288330078</text:p>
          </table:table-cell>
          <table:table-cell office:value-type="float" office:value="0.04630347">
            <text:p>0.04630347</text:p>
          </table:table-cell>
          <table:table-cell table:number-columns-repeated="4"/>
        </table:table-row>
        <table:table-row table:style-name="ro1">
          <table:table-cell office:value-type="float" office:value="607.0478515625">
            <text:p>607.0478515625</text:p>
          </table:table-cell>
          <table:table-cell office:value-type="float" office:value="0.04429651">
            <text:p>0.04429651</text:p>
          </table:table-cell>
          <table:table-cell table:number-columns-repeated="4"/>
        </table:table-row>
        <table:table-row table:style-name="ro1">
          <table:table-cell office:value-type="float" office:value="607.166870117188">
            <text:p>607.1668701172</text:p>
          </table:table-cell>
          <table:table-cell office:value-type="float" office:value="0.06780029">
            <text:p>0.06780029</text:p>
          </table:table-cell>
          <table:table-cell table:number-columns-repeated="4"/>
        </table:table-row>
        <table:table-row table:style-name="ro1">
          <table:table-cell office:value-type="float" office:value="607.285888671875">
            <text:p>607.2858886719</text:p>
          </table:table-cell>
          <table:table-cell office:value-type="float" office:value="0.06004392">
            <text:p>0.06004392</text:p>
          </table:table-cell>
          <table:table-cell table:number-columns-repeated="4"/>
        </table:table-row>
        <table:table-row table:style-name="ro1">
          <table:table-cell office:value-type="float" office:value="607.404907226563">
            <text:p>607.4049072266</text:p>
          </table:table-cell>
          <table:table-cell office:value-type="float" office:value="0.05325634">
            <text:p>0.05325634</text:p>
          </table:table-cell>
          <table:table-cell table:number-columns-repeated="4"/>
        </table:table-row>
        <table:table-row table:style-name="ro1">
          <table:table-cell office:value-type="float" office:value="607.52392578125">
            <text:p>607.5239257813</text:p>
          </table:table-cell>
          <table:table-cell office:value-type="float" office:value="0.05230046">
            <text:p>0.05230046</text:p>
          </table:table-cell>
          <table:table-cell table:number-columns-repeated="4"/>
        </table:table-row>
        <table:table-row table:style-name="ro1">
          <table:table-cell office:value-type="float" office:value="607.642944335938">
            <text:p>607.6429443359</text:p>
          </table:table-cell>
          <table:table-cell office:value-type="float" office:value="0.05583718">
            <text:p>0.05583718</text:p>
          </table:table-cell>
          <table:table-cell table:number-columns-repeated="4"/>
        </table:table-row>
        <table:table-row table:style-name="ro1">
          <table:table-cell office:value-type="float" office:value="607.761962890625">
            <text:p>607.7619628906</text:p>
          </table:table-cell>
          <table:table-cell office:value-type="float" office:value="0.06955842">
            <text:p>0.06955842</text:p>
          </table:table-cell>
          <table:table-cell table:number-columns-repeated="4"/>
        </table:table-row>
        <table:table-row table:style-name="ro1">
          <table:table-cell office:value-type="float" office:value="607.880981445313">
            <text:p>607.8809814453</text:p>
          </table:table-cell>
          <table:table-cell office:value-type="float" office:value="0.059426">
            <text:p>0.059426</text:p>
          </table:table-cell>
          <table:table-cell table:number-columns-repeated="4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0.04443229">
            <text:p>0.04443229</text:p>
          </table:table-cell>
          <table:table-cell table:number-columns-repeated="4"/>
        </table:table-row>
        <table:table-row table:style-name="ro1">
          <table:table-cell office:value-type="float" office:value="608.119079589844">
            <text:p>608.1190795898</text:p>
          </table:table-cell>
          <table:table-cell office:value-type="float" office:value="0.0494039">
            <text:p>0.0494039</text:p>
          </table:table-cell>
          <table:table-cell table:number-columns-repeated="4"/>
        </table:table-row>
        <table:table-row table:style-name="ro1">
          <table:table-cell office:value-type="float" office:value="608.238098144531">
            <text:p>608.2380981445</text:p>
          </table:table-cell>
          <table:table-cell office:value-type="float" office:value="0.04794576">
            <text:p>0.04794576</text:p>
          </table:table-cell>
          <table:table-cell table:number-columns-repeated="4"/>
        </table:table-row>
        <table:table-row table:style-name="ro1">
          <table:table-cell office:value-type="float" office:value="608.357116699219">
            <text:p>608.3571166992</text:p>
          </table:table-cell>
          <table:table-cell office:value-type="float" office:value="0.04639387">
            <text:p>0.04639387</text:p>
          </table:table-cell>
          <table:table-cell table:number-columns-repeated="4"/>
        </table:table-row>
        <table:table-row table:style-name="ro1">
          <table:table-cell office:value-type="float" office:value="608.476196289063">
            <text:p>608.4761962891</text:p>
          </table:table-cell>
          <table:table-cell office:value-type="float" office:value="0.05271841">
            <text:p>0.05271841</text:p>
          </table:table-cell>
          <table:table-cell table:number-columns-repeated="4"/>
        </table:table-row>
        <table:table-row table:style-name="ro1">
          <table:table-cell office:value-type="float" office:value="608.59521484375">
            <text:p>608.5952148438</text:p>
          </table:table-cell>
          <table:table-cell office:value-type="float" office:value="0.06213746">
            <text:p>0.06213746</text:p>
          </table:table-cell>
          <table:table-cell table:number-columns-repeated="4"/>
        </table:table-row>
        <table:table-row table:style-name="ro1">
          <table:table-cell office:value-type="float" office:value="608.714233398438">
            <text:p>608.7142333984</text:p>
          </table:table-cell>
          <table:table-cell office:value-type="float" office:value="0.05101531">
            <text:p>0.05101531</text:p>
          </table:table-cell>
          <table:table-cell table:number-columns-repeated="4"/>
        </table:table-row>
        <table:table-row table:style-name="ro1">
          <table:table-cell office:value-type="float" office:value="608.833312988281">
            <text:p>608.8333129883</text:p>
          </table:table-cell>
          <table:table-cell office:value-type="float" office:value="0.05018383">
            <text:p>0.05018383</text:p>
          </table:table-cell>
          <table:table-cell table:number-columns-repeated="4"/>
        </table:table-row>
        <table:table-row table:style-name="ro1">
          <table:table-cell office:value-type="float" office:value="608.952331542969">
            <text:p>608.952331543</text:p>
          </table:table-cell>
          <table:table-cell office:value-type="float" office:value="0.03954014">
            <text:p>0.03954014</text:p>
          </table:table-cell>
          <table:table-cell table:number-columns-repeated="4"/>
        </table:table-row>
        <table:table-row table:style-name="ro1">
          <table:table-cell office:value-type="float" office:value="609.071411132813">
            <text:p>609.0714111328</text:p>
          </table:table-cell>
          <table:table-cell office:value-type="float" office:value="0.04231406">
            <text:p>0.04231406</text:p>
          </table:table-cell>
          <table:table-cell table:number-columns-repeated="4"/>
        </table:table-row>
        <table:table-row table:style-name="ro1">
          <table:table-cell office:value-type="float" office:value="609.1904296875">
            <text:p>609.1904296875</text:p>
          </table:table-cell>
          <table:table-cell office:value-type="float" office:value="0.04078097">
            <text:p>0.04078097</text:p>
          </table:table-cell>
          <table:table-cell table:number-columns-repeated="4"/>
        </table:table-row>
        <table:table-row table:style-name="ro1">
          <table:table-cell office:value-type="float" office:value="609.309509277344">
            <text:p>609.3095092773</text:p>
          </table:table-cell>
          <table:table-cell office:value-type="float" office:value="0.06039241">
            <text:p>0.06039241</text:p>
          </table:table-cell>
          <table:table-cell table:number-columns-repeated="4"/>
        </table:table-row>
        <table:table-row table:style-name="ro1">
          <table:table-cell office:value-type="float" office:value="609.428588867188">
            <text:p>609.4285888672</text:p>
          </table:table-cell>
          <table:table-cell office:value-type="float" office:value="0.05060082">
            <text:p>0.05060082</text:p>
          </table:table-cell>
          <table:table-cell table:number-columns-repeated="4"/>
        </table:table-row>
        <table:table-row table:style-name="ro1">
          <table:table-cell office:value-type="float" office:value="609.547607421875">
            <text:p>609.5476074219</text:p>
          </table:table-cell>
          <table:table-cell office:value-type="float" office:value="0.04991437">
            <text:p>0.04991437</text:p>
          </table:table-cell>
          <table:table-cell table:number-columns-repeated="4"/>
        </table:table-row>
        <table:table-row table:style-name="ro1">
          <table:table-cell office:value-type="float" office:value="609.666687011719">
            <text:p>609.6666870117</text:p>
          </table:table-cell>
          <table:table-cell office:value-type="float" office:value="0.0472746">
            <text:p>0.0472746</text:p>
          </table:table-cell>
          <table:table-cell table:number-columns-repeated="4"/>
        </table:table-row>
        <table:table-row table:style-name="ro1">
          <table:table-cell office:value-type="float" office:value="609.785766601563">
            <text:p>609.7857666016</text:p>
          </table:table-cell>
          <table:table-cell office:value-type="float" office:value="0.04579074">
            <text:p>0.04579074</text:p>
          </table:table-cell>
          <table:table-cell table:number-columns-repeated="4"/>
        </table:table-row>
        <table:table-row table:style-name="ro1">
          <table:table-cell office:value-type="float" office:value="609.904846191406">
            <text:p>609.9048461914</text:p>
          </table:table-cell>
          <table:table-cell office:value-type="float" office:value="0.04752973">
            <text:p>0.04752973</text:p>
          </table:table-cell>
          <table:table-cell table:number-columns-repeated="4"/>
        </table:table-row>
        <table:table-row table:style-name="ro1">
          <table:table-cell office:value-type="float" office:value="610.023864746094">
            <text:p>610.0238647461</text:p>
          </table:table-cell>
          <table:table-cell office:value-type="float" office:value="0.04467519">
            <text:p>0.04467519</text:p>
          </table:table-cell>
          <table:table-cell table:number-columns-repeated="4"/>
        </table:table-row>
        <table:table-row table:style-name="ro1">
          <table:table-cell office:value-type="float" office:value="610.142944335938">
            <text:p>610.1429443359</text:p>
          </table:table-cell>
          <table:table-cell office:value-type="float" office:value="0.04467076">
            <text:p>0.04467076</text:p>
          </table:table-cell>
          <table:table-cell table:number-columns-repeated="4"/>
        </table:table-row>
        <table:table-row table:style-name="ro1">
          <table:table-cell office:value-type="float" office:value="610.262023925781">
            <text:p>610.2620239258</text:p>
          </table:table-cell>
          <table:table-cell office:value-type="float" office:value="0.06172044">
            <text:p>0.06172044</text:p>
          </table:table-cell>
          <table:table-cell table:number-columns-repeated="4"/>
        </table:table-row>
        <table:table-row table:style-name="ro1">
          <table:table-cell office:value-type="float" office:value="610.381103515625">
            <text:p>610.3811035156</text:p>
          </table:table-cell>
          <table:table-cell office:value-type="float" office:value="0.04839315">
            <text:p>0.04839315</text:p>
          </table:table-cell>
          <table:table-cell table:number-columns-repeated="4"/>
        </table:table-row>
        <table:table-row table:style-name="ro1">
          <table:table-cell office:value-type="float" office:value="610.500183105469">
            <text:p>610.5001831055</text:p>
          </table:table-cell>
          <table:table-cell office:value-type="float" office:value="0.04551068">
            <text:p>0.04551068</text:p>
          </table:table-cell>
          <table:table-cell table:number-columns-repeated="4"/>
        </table:table-row>
        <table:table-row table:style-name="ro1">
          <table:table-cell office:value-type="float" office:value="610.619262695313">
            <text:p>610.6192626953</text:p>
          </table:table-cell>
          <table:table-cell office:value-type="float" office:value="0.04081975">
            <text:p>0.04081975</text:p>
          </table:table-cell>
          <table:table-cell table:number-columns-repeated="4"/>
        </table:table-row>
        <table:table-row table:style-name="ro1">
          <table:table-cell office:value-type="float" office:value="610.738342285156">
            <text:p>610.7383422852</text:p>
          </table:table-cell>
          <table:table-cell office:value-type="float" office:value="0.04746809">
            <text:p>0.04746809</text:p>
          </table:table-cell>
          <table:table-cell table:number-columns-repeated="4"/>
        </table:table-row>
        <table:table-row table:style-name="ro1">
          <table:table-cell office:value-type="float" office:value="610.857421875">
            <text:p>610.857421875</text:p>
          </table:table-cell>
          <table:table-cell office:value-type="float" office:value="0.04119908">
            <text:p>0.04119908</text:p>
          </table:table-cell>
          <table:table-cell table:number-columns-repeated="4"/>
        </table:table-row>
        <table:table-row table:style-name="ro1">
          <table:table-cell office:value-type="float" office:value="610.976501464844">
            <text:p>610.9765014648</text:p>
          </table:table-cell>
          <table:table-cell office:value-type="float" office:value="0.05081379">
            <text:p>0.05081379</text:p>
          </table:table-cell>
          <table:table-cell table:number-columns-repeated="4"/>
        </table:table-row>
        <table:table-row table:style-name="ro1">
          <table:table-cell office:value-type="float" office:value="611.095581054688">
            <text:p>611.0955810547</text:p>
          </table:table-cell>
          <table:table-cell office:value-type="float" office:value="0.04650587">
            <text:p>0.04650587</text:p>
          </table:table-cell>
          <table:table-cell table:number-columns-repeated="4"/>
        </table:table-row>
        <table:table-row table:style-name="ro1">
          <table:table-cell office:value-type="float" office:value="611.214660644531">
            <text:p>611.2146606445</text:p>
          </table:table-cell>
          <table:table-cell office:value-type="float" office:value="0.04340166">
            <text:p>0.04340166</text:p>
          </table:table-cell>
          <table:table-cell table:number-columns-repeated="4"/>
        </table:table-row>
        <table:table-row table:style-name="ro1">
          <table:table-cell office:value-type="float" office:value="611.333801269531">
            <text:p>611.3338012695</text:p>
          </table:table-cell>
          <table:table-cell office:value-type="float" office:value="0.04026086">
            <text:p>0.04026086</text:p>
          </table:table-cell>
          <table:table-cell table:number-columns-repeated="4"/>
        </table:table-row>
        <table:table-row table:style-name="ro1">
          <table:table-cell office:value-type="float" office:value="611.452880859375">
            <text:p>611.4528808594</text:p>
          </table:table-cell>
          <table:table-cell office:value-type="float" office:value="0.0340906">
            <text:p>0.0340906</text:p>
          </table:table-cell>
          <table:table-cell table:number-columns-repeated="4"/>
        </table:table-row>
        <table:table-row table:style-name="ro1">
          <table:table-cell office:value-type="float" office:value="611.571960449219">
            <text:p>611.5719604492</text:p>
          </table:table-cell>
          <table:table-cell office:value-type="float" office:value="0.04638609">
            <text:p>0.04638609</text:p>
          </table:table-cell>
          <table:table-cell table:number-columns-repeated="4"/>
        </table:table-row>
        <table:table-row table:style-name="ro1">
          <table:table-cell office:value-type="float" office:value="611.691040039063">
            <text:p>611.6910400391</text:p>
          </table:table-cell>
          <table:table-cell office:value-type="float" office:value="0.04701268">
            <text:p>0.04701268</text:p>
          </table:table-cell>
          <table:table-cell table:number-columns-repeated="4"/>
        </table:table-row>
        <table:table-row table:style-name="ro1">
          <table:table-cell office:value-type="float" office:value="611.810180664063">
            <text:p>611.8101806641</text:p>
          </table:table-cell>
          <table:table-cell office:value-type="float" office:value="0.04542082">
            <text:p>0.04542082</text:p>
          </table:table-cell>
          <table:table-cell table:number-columns-repeated="4"/>
        </table:table-row>
        <table:table-row table:style-name="ro1">
          <table:table-cell office:value-type="float" office:value="611.929260253906">
            <text:p>611.9292602539</text:p>
          </table:table-cell>
          <table:table-cell office:value-type="float" office:value="0.04497458">
            <text:p>0.04497458</text:p>
          </table:table-cell>
          <table:table-cell table:number-columns-repeated="4"/>
        </table:table-row>
        <table:table-row table:style-name="ro1">
          <table:table-cell office:value-type="float" office:value="612.048400878906">
            <text:p>612.0484008789</text:p>
          </table:table-cell>
          <table:table-cell office:value-type="float" office:value="0.0465495">
            <text:p>0.0465495</text:p>
          </table:table-cell>
          <table:table-cell table:number-columns-repeated="4"/>
        </table:table-row>
        <table:table-row table:style-name="ro1">
          <table:table-cell office:value-type="float" office:value="612.16748046875">
            <text:p>612.1674804688</text:p>
          </table:table-cell>
          <table:table-cell office:value-type="float" office:value="0.03888012">
            <text:p>0.03888012</text:p>
          </table:table-cell>
          <table:table-cell table:number-columns-repeated="4"/>
        </table:table-row>
        <table:table-row table:style-name="ro1">
          <table:table-cell office:value-type="float" office:value="612.286560058594">
            <text:p>612.2865600586</text:p>
          </table:table-cell>
          <table:table-cell office:value-type="float" office:value="0.05009894">
            <text:p>0.05009894</text:p>
          </table:table-cell>
          <table:table-cell table:number-columns-repeated="4"/>
        </table:table-row>
        <table:table-row table:style-name="ro1">
          <table:table-cell office:value-type="float" office:value="612.405700683594">
            <text:p>612.4057006836</text:p>
          </table:table-cell>
          <table:table-cell office:value-type="float" office:value="0.05087712">
            <text:p>0.05087712</text:p>
          </table:table-cell>
          <table:table-cell table:number-columns-repeated="4"/>
        </table:table-row>
        <table:table-row table:style-name="ro1">
          <table:table-cell office:value-type="float" office:value="612.524780273438">
            <text:p>612.5247802734</text:p>
          </table:table-cell>
          <table:table-cell office:value-type="float" office:value="0.04032421">
            <text:p>0.04032421</text:p>
          </table:table-cell>
          <table:table-cell table:number-columns-repeated="4"/>
        </table:table-row>
        <table:table-row table:style-name="ro1">
          <table:table-cell office:value-type="float" office:value="612.643920898438">
            <text:p>612.6439208984</text:p>
          </table:table-cell>
          <table:table-cell office:value-type="float" office:value="0.03558974">
            <text:p>0.03558974</text:p>
          </table:table-cell>
          <table:table-cell table:number-columns-repeated="4"/>
        </table:table-row>
        <table:table-row table:style-name="ro1">
          <table:table-cell office:value-type="float" office:value="612.763061523438">
            <text:p>612.7630615234</text:p>
          </table:table-cell>
          <table:table-cell office:value-type="float" office:value="0.05289705">
            <text:p>0.05289705</text:p>
          </table:table-cell>
          <table:table-cell table:number-columns-repeated="4"/>
        </table:table-row>
        <table:table-row table:style-name="ro1">
          <table:table-cell office:value-type="float" office:value="612.882141113281">
            <text:p>612.8821411133</text:p>
          </table:table-cell>
          <table:table-cell office:value-type="float" office:value="0.03655673">
            <text:p>0.03655673</text:p>
          </table:table-cell>
          <table:table-cell table:number-columns-repeated="4"/>
        </table:table-row>
        <table:table-row table:style-name="ro1">
          <table:table-cell office:value-type="float" office:value="613.001281738281">
            <text:p>613.0012817383</text:p>
          </table:table-cell>
          <table:table-cell office:value-type="float" office:value="0.04320281">
            <text:p>0.04320281</text:p>
          </table:table-cell>
          <table:table-cell table:number-columns-repeated="4"/>
        </table:table-row>
        <table:table-row table:style-name="ro1">
          <table:table-cell office:value-type="float" office:value="613.120422363281">
            <text:p>613.1204223633</text:p>
          </table:table-cell>
          <table:table-cell office:value-type="float" office:value="0.03880452">
            <text:p>0.03880452</text:p>
          </table:table-cell>
          <table:table-cell table:number-columns-repeated="4"/>
        </table:table-row>
        <table:table-row table:style-name="ro1">
          <table:table-cell office:value-type="float" office:value="613.239501953125">
            <text:p>613.2395019531</text:p>
          </table:table-cell>
          <table:table-cell office:value-type="float" office:value="0.04216353">
            <text:p>0.04216353</text:p>
          </table:table-cell>
          <table:table-cell table:number-columns-repeated="4"/>
        </table:table-row>
        <table:table-row table:style-name="ro1">
          <table:table-cell office:value-type="float" office:value="613.358642578125">
            <text:p>613.3586425781</text:p>
          </table:table-cell>
          <table:table-cell office:value-type="float" office:value="0.04668001">
            <text:p>0.04668001</text:p>
          </table:table-cell>
          <table:table-cell table:number-columns-repeated="4"/>
        </table:table-row>
        <table:table-row table:style-name="ro1">
          <table:table-cell office:value-type="float" office:value="613.477783203125">
            <text:p>613.4777832031</text:p>
          </table:table-cell>
          <table:table-cell office:value-type="float" office:value="0.03696105">
            <text:p>0.03696105</text:p>
          </table:table-cell>
          <table:table-cell table:number-columns-repeated="4"/>
        </table:table-row>
        <table:table-row table:style-name="ro1">
          <table:table-cell office:value-type="float" office:value="613.596923828125">
            <text:p>613.5969238281</text:p>
          </table:table-cell>
          <table:table-cell office:value-type="float" office:value="0.03140146">
            <text:p>0.03140146</text:p>
          </table:table-cell>
          <table:table-cell table:number-columns-repeated="4"/>
        </table:table-row>
        <table:table-row table:style-name="ro1">
          <table:table-cell office:value-type="float" office:value="613.716064453125">
            <text:p>613.7160644531</text:p>
          </table:table-cell>
          <table:table-cell office:value-type="float" office:value="0.03568156">
            <text:p>0.03568156</text:p>
          </table:table-cell>
          <table:table-cell table:number-columns-repeated="4"/>
        </table:table-row>
        <table:table-row table:style-name="ro1">
          <table:table-cell office:value-type="float" office:value="613.835205078125">
            <text:p>613.8352050781</text:p>
          </table:table-cell>
          <table:table-cell office:value-type="float" office:value="0.03462349">
            <text:p>0.03462349</text:p>
          </table:table-cell>
          <table:table-cell table:number-columns-repeated="4"/>
        </table:table-row>
        <table:table-row table:style-name="ro1">
          <table:table-cell office:value-type="float" office:value="613.954345703125">
            <text:p>613.9543457031</text:p>
          </table:table-cell>
          <table:table-cell office:value-type="float" office:value="0.03058184">
            <text:p>0.03058184</text:p>
          </table:table-cell>
          <table:table-cell table:number-columns-repeated="4"/>
        </table:table-row>
        <table:table-row table:style-name="ro1">
          <table:table-cell office:value-type="float" office:value="614.073486328125">
            <text:p>614.0734863281</text:p>
          </table:table-cell>
          <table:table-cell office:value-type="float" office:value="0.03681846">
            <text:p>0.03681846</text:p>
          </table:table-cell>
          <table:table-cell table:number-columns-repeated="4"/>
        </table:table-row>
        <table:table-row table:style-name="ro1">
          <table:table-cell office:value-type="float" office:value="614.192626953125">
            <text:p>614.1926269531</text:p>
          </table:table-cell>
          <table:table-cell office:value-type="float" office:value="0.05593207">
            <text:p>0.05593207</text:p>
          </table:table-cell>
          <table:table-cell table:number-columns-repeated="4"/>
        </table:table-row>
        <table:table-row table:style-name="ro1">
          <table:table-cell office:value-type="float" office:value="614.311767578125">
            <text:p>614.3117675781</text:p>
          </table:table-cell>
          <table:table-cell office:value-type="float" office:value="0.03440591">
            <text:p>0.03440591</text:p>
          </table:table-cell>
          <table:table-cell table:number-columns-repeated="4"/>
        </table:table-row>
        <table:table-row table:style-name="ro1">
          <table:table-cell office:value-type="float" office:value="614.430908203125">
            <text:p>614.4309082031</text:p>
          </table:table-cell>
          <table:table-cell office:value-type="float" office:value="0.03525918">
            <text:p>0.03525918</text:p>
          </table:table-cell>
          <table:table-cell table:number-columns-repeated="4"/>
        </table:table-row>
        <table:table-row table:style-name="ro1">
          <table:table-cell office:value-type="float" office:value="614.550048828125">
            <text:p>614.5500488281</text:p>
          </table:table-cell>
          <table:table-cell office:value-type="float" office:value="0.0339476">
            <text:p>0.0339476</text:p>
          </table:table-cell>
          <table:table-cell table:number-columns-repeated="4"/>
        </table:table-row>
        <table:table-row table:style-name="ro1">
          <table:table-cell office:value-type="float" office:value="614.669189453125">
            <text:p>614.6691894531</text:p>
          </table:table-cell>
          <table:table-cell office:value-type="float" office:value="0.04553558">
            <text:p>0.04553558</text:p>
          </table:table-cell>
          <table:table-cell table:number-columns-repeated="4"/>
        </table:table-row>
        <table:table-row table:style-name="ro1">
          <table:table-cell office:value-type="float" office:value="614.788330078125">
            <text:p>614.7883300781</text:p>
          </table:table-cell>
          <table:table-cell office:value-type="float" office:value="0.0357352">
            <text:p>0.0357352</text:p>
          </table:table-cell>
          <table:table-cell table:number-columns-repeated="4"/>
        </table:table-row>
        <table:table-row table:style-name="ro1">
          <table:table-cell office:value-type="float" office:value="614.907531738281">
            <text:p>614.9075317383</text:p>
          </table:table-cell>
          <table:table-cell office:value-type="float" office:value="0.04040817">
            <text:p>0.04040817</text:p>
          </table:table-cell>
          <table:table-cell table:number-columns-repeated="4"/>
        </table:table-row>
        <table:table-row table:style-name="ro1">
          <table:table-cell office:value-type="float" office:value="615.026672363281">
            <text:p>615.0266723633</text:p>
          </table:table-cell>
          <table:table-cell office:value-type="float" office:value="0.03935277">
            <text:p>0.03935277</text:p>
          </table:table-cell>
          <table:table-cell table:number-columns-repeated="4"/>
        </table:table-row>
        <table:table-row table:style-name="ro1">
          <table:table-cell office:value-type="float" office:value="615.145812988281">
            <text:p>615.1458129883</text:p>
          </table:table-cell>
          <table:table-cell office:value-type="float" office:value="0.0615947">
            <text:p>0.0615947</text:p>
          </table:table-cell>
          <table:table-cell table:number-columns-repeated="4"/>
        </table:table-row>
        <table:table-row table:style-name="ro1">
          <table:table-cell office:value-type="float" office:value="615.264953613281">
            <text:p>615.2649536133</text:p>
          </table:table-cell>
          <table:table-cell office:value-type="float" office:value="0.0410895">
            <text:p>0.0410895</text:p>
          </table:table-cell>
          <table:table-cell table:number-columns-repeated="4"/>
        </table:table-row>
        <table:table-row table:style-name="ro1">
          <table:table-cell office:value-type="float" office:value="615.384155273438">
            <text:p>615.3841552734</text:p>
          </table:table-cell>
          <table:table-cell office:value-type="float" office:value="0.04209759">
            <text:p>0.04209759</text:p>
          </table:table-cell>
          <table:table-cell table:number-columns-repeated="4"/>
        </table:table-row>
        <table:table-row table:style-name="ro1">
          <table:table-cell office:value-type="float" office:value="615.503295898438">
            <text:p>615.5032958984</text:p>
          </table:table-cell>
          <table:table-cell office:value-type="float" office:value="0.0344546">
            <text:p>0.0344546</text:p>
          </table:table-cell>
          <table:table-cell table:number-columns-repeated="4"/>
        </table:table-row>
        <table:table-row table:style-name="ro1">
          <table:table-cell office:value-type="float" office:value="615.622497558594">
            <text:p>615.6224975586</text:p>
          </table:table-cell>
          <table:table-cell office:value-type="float" office:value="0.04530589">
            <text:p>0.04530589</text:p>
          </table:table-cell>
          <table:table-cell table:number-columns-repeated="4"/>
        </table:table-row>
        <table:table-row table:style-name="ro1">
          <table:table-cell office:value-type="float" office:value="615.741638183594">
            <text:p>615.7416381836</text:p>
          </table:table-cell>
          <table:table-cell office:value-type="float" office:value="0.03388613">
            <text:p>0.03388613</text:p>
          </table:table-cell>
          <table:table-cell table:number-columns-repeated="4"/>
        </table:table-row>
        <table:table-row table:style-name="ro1">
          <table:table-cell office:value-type="float" office:value="615.86083984375">
            <text:p>615.8608398438</text:p>
          </table:table-cell>
          <table:table-cell office:value-type="float" office:value="0.03805709">
            <text:p>0.03805709</text:p>
          </table:table-cell>
          <table:table-cell table:number-columns-repeated="4"/>
        </table:table-row>
        <table:table-row table:style-name="ro1">
          <table:table-cell office:value-type="float" office:value="615.97998046875">
            <text:p>615.9799804688</text:p>
          </table:table-cell>
          <table:table-cell office:value-type="float" office:value="0.03537781">
            <text:p>0.03537781</text:p>
          </table:table-cell>
          <table:table-cell table:number-columns-repeated="4"/>
        </table:table-row>
        <table:table-row table:style-name="ro1">
          <table:table-cell office:value-type="float" office:value="616.099182128906">
            <text:p>616.0991821289</text:p>
          </table:table-cell>
          <table:table-cell office:value-type="float" office:value="0.03703194">
            <text:p>0.03703194</text:p>
          </table:table-cell>
          <table:table-cell table:number-columns-repeated="4"/>
        </table:table-row>
        <table:table-row table:style-name="ro1">
          <table:table-cell office:value-type="float" office:value="616.218322753906">
            <text:p>616.2183227539</text:p>
          </table:table-cell>
          <table:table-cell office:value-type="float" office:value="0.04274095">
            <text:p>0.04274095</text:p>
          </table:table-cell>
          <table:table-cell table:number-columns-repeated="4"/>
        </table:table-row>
        <table:table-row table:style-name="ro1">
          <table:table-cell office:value-type="float" office:value="616.337524414063">
            <text:p>616.3375244141</text:p>
          </table:table-cell>
          <table:table-cell office:value-type="float" office:value="0.03210229">
            <text:p>0.03210229</text:p>
          </table:table-cell>
          <table:table-cell table:number-columns-repeated="4"/>
        </table:table-row>
        <table:table-row table:style-name="ro1">
          <table:table-cell office:value-type="float" office:value="616.456726074219">
            <text:p>616.4567260742</text:p>
          </table:table-cell>
          <table:table-cell office:value-type="float" office:value="0.0497347">
            <text:p>0.0497347</text:p>
          </table:table-cell>
          <table:table-cell table:number-columns-repeated="4"/>
        </table:table-row>
        <table:table-row table:style-name="ro1">
          <table:table-cell office:value-type="float" office:value="616.575866699219">
            <text:p>616.5758666992</text:p>
          </table:table-cell>
          <table:table-cell office:value-type="float" office:value="0.03325855">
            <text:p>0.03325855</text:p>
          </table:table-cell>
          <table:table-cell table:number-columns-repeated="4"/>
        </table:table-row>
        <table:table-row table:style-name="ro1">
          <table:table-cell office:value-type="float" office:value="616.695068359375">
            <text:p>616.6950683594</text:p>
          </table:table-cell>
          <table:table-cell office:value-type="float" office:value="0.02775184">
            <text:p>0.02775184</text:p>
          </table:table-cell>
          <table:table-cell table:number-columns-repeated="4"/>
        </table:table-row>
        <table:table-row table:style-name="ro1">
          <table:table-cell office:value-type="float" office:value="616.814270019531">
            <text:p>616.8142700195</text:p>
          </table:table-cell>
          <table:table-cell office:value-type="float" office:value="0.03284021">
            <text:p>0.03284021</text:p>
          </table:table-cell>
          <table:table-cell table:number-columns-repeated="4"/>
        </table:table-row>
        <table:table-row table:style-name="ro1">
          <table:table-cell office:value-type="float" office:value="616.933471679688">
            <text:p>616.9334716797</text:p>
          </table:table-cell>
          <table:table-cell office:value-type="float" office:value="0.03715021">
            <text:p>0.03715021</text:p>
          </table:table-cell>
          <table:table-cell table:number-columns-repeated="4"/>
        </table:table-row>
        <table:table-row table:style-name="ro1">
          <table:table-cell office:value-type="float" office:value="617.052612304688">
            <text:p>617.0526123047</text:p>
          </table:table-cell>
          <table:table-cell office:value-type="float" office:value="0.03502232">
            <text:p>0.03502232</text:p>
          </table:table-cell>
          <table:table-cell table:number-columns-repeated="4"/>
        </table:table-row>
        <table:table-row table:style-name="ro1">
          <table:table-cell office:value-type="float" office:value="617.171813964844">
            <text:p>617.1718139648</text:p>
          </table:table-cell>
          <table:table-cell office:value-type="float" office:value="0.04321785">
            <text:p>0.04321785</text:p>
          </table:table-cell>
          <table:table-cell table:number-columns-repeated="4"/>
        </table:table-row>
        <table:table-row table:style-name="ro1">
          <table:table-cell office:value-type="float" office:value="617.291015625">
            <text:p>617.291015625</text:p>
          </table:table-cell>
          <table:table-cell office:value-type="float" office:value="0.03015971">
            <text:p>0.03015971</text:p>
          </table:table-cell>
          <table:table-cell table:number-columns-repeated="4"/>
        </table:table-row>
        <table:table-row table:style-name="ro1">
          <table:table-cell office:value-type="float" office:value="617.410217285156">
            <text:p>617.4102172852</text:p>
          </table:table-cell>
          <table:table-cell office:value-type="float" office:value="0.03584689">
            <text:p>0.03584689</text:p>
          </table:table-cell>
          <table:table-cell table:number-columns-repeated="4"/>
        </table:table-row>
        <table:table-row table:style-name="ro1">
          <table:table-cell office:value-type="float" office:value="617.529418945313">
            <text:p>617.5294189453</text:p>
          </table:table-cell>
          <table:table-cell office:value-type="float" office:value="0.04162322">
            <text:p>0.04162322</text:p>
          </table:table-cell>
          <table:table-cell table:number-columns-repeated="4"/>
        </table:table-row>
        <table:table-row table:style-name="ro1">
          <table:table-cell office:value-type="float" office:value="617.648620605469">
            <text:p>617.6486206055</text:p>
          </table:table-cell>
          <table:table-cell office:value-type="float" office:value="0.03376826">
            <text:p>0.03376826</text:p>
          </table:table-cell>
          <table:table-cell table:number-columns-repeated="4"/>
        </table:table-row>
        <table:table-row table:style-name="ro1">
          <table:table-cell office:value-type="float" office:value="617.767822265625">
            <text:p>617.7678222656</text:p>
          </table:table-cell>
          <table:table-cell office:value-type="float" office:value="0.05571878">
            <text:p>0.05571878</text:p>
          </table:table-cell>
          <table:table-cell table:number-columns-repeated="4"/>
        </table:table-row>
        <table:table-row table:style-name="ro1">
          <table:table-cell office:value-type="float" office:value="617.887023925781">
            <text:p>617.8870239258</text:p>
          </table:table-cell>
          <table:table-cell office:value-type="float" office:value="0.04091686">
            <text:p>0.04091686</text:p>
          </table:table-cell>
          <table:table-cell table:number-columns-repeated="4"/>
        </table:table-row>
        <table:table-row table:style-name="ro1">
          <table:table-cell office:value-type="float" office:value="618.006225585938">
            <text:p>618.0062255859</text:p>
          </table:table-cell>
          <table:table-cell office:value-type="float" office:value="0.03234505">
            <text:p>0.03234505</text:p>
          </table:table-cell>
          <table:table-cell table:number-columns-repeated="4"/>
        </table:table-row>
        <table:table-row table:style-name="ro1">
          <table:table-cell office:value-type="float" office:value="618.125427246094">
            <text:p>618.1254272461</text:p>
          </table:table-cell>
          <table:table-cell office:value-type="float" office:value="0.03889239">
            <text:p>0.03889239</text:p>
          </table:table-cell>
          <table:table-cell table:number-columns-repeated="4"/>
        </table:table-row>
        <table:table-row table:style-name="ro1">
          <table:table-cell office:value-type="float" office:value="618.24462890625">
            <text:p>618.2446289063</text:p>
          </table:table-cell>
          <table:table-cell office:value-type="float" office:value="0.04183659">
            <text:p>0.04183659</text:p>
          </table:table-cell>
          <table:table-cell table:number-columns-repeated="4"/>
        </table:table-row>
        <table:table-row table:style-name="ro1">
          <table:table-cell office:value-type="float" office:value="618.363891601563">
            <text:p>618.3638916016</text:p>
          </table:table-cell>
          <table:table-cell office:value-type="float" office:value="0.04141567">
            <text:p>0.04141567</text:p>
          </table:table-cell>
          <table:table-cell table:number-columns-repeated="4"/>
        </table:table-row>
        <table:table-row table:style-name="ro1">
          <table:table-cell office:value-type="float" office:value="618.483093261719">
            <text:p>618.4830932617</text:p>
          </table:table-cell>
          <table:table-cell office:value-type="float" office:value="0.0315267">
            <text:p>0.0315267</text:p>
          </table:table-cell>
          <table:table-cell table:number-columns-repeated="4"/>
        </table:table-row>
        <table:table-row table:style-name="ro1">
          <table:table-cell office:value-type="float" office:value="618.602294921875">
            <text:p>618.6022949219</text:p>
          </table:table-cell>
          <table:table-cell office:value-type="float" office:value="0.03606431">
            <text:p>0.03606431</text:p>
          </table:table-cell>
          <table:table-cell table:number-columns-repeated="4"/>
        </table:table-row>
        <table:table-row table:style-name="ro1">
          <table:table-cell office:value-type="float" office:value="618.721496582031">
            <text:p>618.721496582</text:p>
          </table:table-cell>
          <table:table-cell office:value-type="float" office:value="0.04883777">
            <text:p>0.04883777</text:p>
          </table:table-cell>
          <table:table-cell table:number-columns-repeated="4"/>
        </table:table-row>
        <table:table-row table:style-name="ro1">
          <table:table-cell office:value-type="float" office:value="618.840759277344">
            <text:p>618.8407592773</text:p>
          </table:table-cell>
          <table:table-cell office:value-type="float" office:value="0.02916712">
            <text:p>0.02916712</text:p>
          </table:table-cell>
          <table:table-cell table:number-columns-repeated="4"/>
        </table:table-row>
        <table:table-row table:style-name="ro1">
          <table:table-cell office:value-type="float" office:value="618.9599609375">
            <text:p>618.9599609375</text:p>
          </table:table-cell>
          <table:table-cell office:value-type="float" office:value="0.04145543">
            <text:p>0.04145543</text:p>
          </table:table-cell>
          <table:table-cell table:number-columns-repeated="4"/>
        </table:table-row>
        <table:table-row table:style-name="ro1">
          <table:table-cell office:value-type="float" office:value="619.079162597656">
            <text:p>619.0791625977</text:p>
          </table:table-cell>
          <table:table-cell office:value-type="float" office:value="0.02571066">
            <text:p>0.02571066</text:p>
          </table:table-cell>
          <table:table-cell table:number-columns-repeated="4"/>
        </table:table-row>
        <table:table-row table:style-name="ro1">
          <table:table-cell office:value-type="float" office:value="619.198425292969">
            <text:p>619.198425293</text:p>
          </table:table-cell>
          <table:table-cell office:value-type="float" office:value="0.04708839">
            <text:p>0.04708839</text:p>
          </table:table-cell>
          <table:table-cell table:number-columns-repeated="4"/>
        </table:table-row>
        <table:table-row table:style-name="ro1">
          <table:table-cell office:value-type="float" office:value="619.317626953125">
            <text:p>619.3176269531</text:p>
          </table:table-cell>
          <table:table-cell office:value-type="float" office:value="0.03005991">
            <text:p>0.03005991</text:p>
          </table:table-cell>
          <table:table-cell table:number-columns-repeated="4"/>
        </table:table-row>
        <table:table-row table:style-name="ro1">
          <table:table-cell office:value-type="float" office:value="619.436889648438">
            <text:p>619.4368896484</text:p>
          </table:table-cell>
          <table:table-cell office:value-type="float" office:value="0.03969133">
            <text:p>0.03969133</text:p>
          </table:table-cell>
          <table:table-cell table:number-columns-repeated="4"/>
        </table:table-row>
        <table:table-row table:style-name="ro1">
          <table:table-cell office:value-type="float" office:value="619.556091308594">
            <text:p>619.5560913086</text:p>
          </table:table-cell>
          <table:table-cell office:value-type="float" office:value="0.03438986">
            <text:p>0.03438986</text:p>
          </table:table-cell>
          <table:table-cell table:number-columns-repeated="4"/>
        </table:table-row>
        <table:table-row table:style-name="ro1">
          <table:table-cell office:value-type="float" office:value="619.675354003906">
            <text:p>619.6753540039</text:p>
          </table:table-cell>
          <table:table-cell office:value-type="float" office:value="0.02880531">
            <text:p>0.02880531</text:p>
          </table:table-cell>
          <table:table-cell table:number-columns-repeated="4"/>
        </table:table-row>
        <table:table-row table:style-name="ro1">
          <table:table-cell office:value-type="float" office:value="619.794616699219">
            <text:p>619.7946166992</text:p>
          </table:table-cell>
          <table:table-cell office:value-type="float" office:value="0.03460264">
            <text:p>0.03460264</text:p>
          </table:table-cell>
          <table:table-cell table:number-columns-repeated="4"/>
        </table:table-row>
        <table:table-row table:style-name="ro1">
          <table:table-cell office:value-type="float" office:value="619.913818359375">
            <text:p>619.9138183594</text:p>
          </table:table-cell>
          <table:table-cell office:value-type="float" office:value="0.02370018">
            <text:p>0.02370018</text:p>
          </table:table-cell>
          <table:table-cell table:number-columns-repeated="4"/>
        </table:table-row>
        <table:table-row table:style-name="ro1">
          <table:table-cell office:value-type="float" office:value="620.033081054688">
            <text:p>620.0330810547</text:p>
          </table:table-cell>
          <table:table-cell office:value-type="float" office:value="0.04896728">
            <text:p>0.04896728</text:p>
          </table:table-cell>
          <table:table-cell table:number-columns-repeated="4"/>
        </table:table-row>
        <table:table-row table:style-name="ro1">
          <table:table-cell office:value-type="float" office:value="620.152282714844">
            <text:p>620.1522827148</text:p>
          </table:table-cell>
          <table:table-cell office:value-type="float" office:value="0.03742202">
            <text:p>0.03742202</text:p>
          </table:table-cell>
          <table:table-cell table:number-columns-repeated="4"/>
        </table:table-row>
        <table:table-row table:style-name="ro1">
          <table:table-cell office:value-type="float" office:value="620.271545410156">
            <text:p>620.2715454102</text:p>
          </table:table-cell>
          <table:table-cell office:value-type="float" office:value="0.03490524">
            <text:p>0.03490524</text:p>
          </table:table-cell>
          <table:table-cell table:number-columns-repeated="4"/>
        </table:table-row>
        <table:table-row table:style-name="ro1">
          <table:table-cell office:value-type="float" office:value="620.390808105469">
            <text:p>620.3908081055</text:p>
          </table:table-cell>
          <table:table-cell office:value-type="float" office:value="0.02467237">
            <text:p>0.02467237</text:p>
          </table:table-cell>
          <table:table-cell table:number-columns-repeated="4"/>
        </table:table-row>
        <table:table-row table:style-name="ro1">
          <table:table-cell office:value-type="float" office:value="620.510070800781">
            <text:p>620.5100708008</text:p>
          </table:table-cell>
          <table:table-cell office:value-type="float" office:value="0.02990134">
            <text:p>0.02990134</text:p>
          </table:table-cell>
          <table:table-cell table:number-columns-repeated="4"/>
        </table:table-row>
        <table:table-row table:style-name="ro1">
          <table:table-cell office:value-type="float" office:value="620.629333496094">
            <text:p>620.6293334961</text:p>
          </table:table-cell>
          <table:table-cell office:value-type="float" office:value="0.02866118">
            <text:p>0.02866118</text:p>
          </table:table-cell>
          <table:table-cell table:number-columns-repeated="4"/>
        </table:table-row>
        <table:table-row table:style-name="ro1">
          <table:table-cell office:value-type="float" office:value="620.74853515625">
            <text:p>620.7485351563</text:p>
          </table:table-cell>
          <table:table-cell office:value-type="float" office:value="0.02279874">
            <text:p>0.02279874</text:p>
          </table:table-cell>
          <table:table-cell table:number-columns-repeated="4"/>
        </table:table-row>
        <table:table-row table:style-name="ro1">
          <table:table-cell office:value-type="float" office:value="620.867797851563">
            <text:p>620.8677978516</text:p>
          </table:table-cell>
          <table:table-cell office:value-type="float" office:value="0.05446887">
            <text:p>0.05446887</text:p>
          </table:table-cell>
          <table:table-cell table:number-columns-repeated="4"/>
        </table:table-row>
        <table:table-row table:style-name="ro1">
          <table:table-cell office:value-type="float" office:value="620.987060546875">
            <text:p>620.9870605469</text:p>
          </table:table-cell>
          <table:table-cell office:value-type="float" office:value="0.02751532">
            <text:p>0.02751532</text:p>
          </table:table-cell>
          <table:table-cell table:number-columns-repeated="4"/>
        </table:table-row>
        <table:table-row table:style-name="ro1">
          <table:table-cell office:value-type="float" office:value="621.106323242188">
            <text:p>621.1063232422</text:p>
          </table:table-cell>
          <table:table-cell office:value-type="float" office:value="0.02754774">
            <text:p>0.02754774</text:p>
          </table:table-cell>
          <table:table-cell table:number-columns-repeated="4"/>
        </table:table-row>
        <table:table-row table:style-name="ro1">
          <table:table-cell office:value-type="float" office:value="621.2255859375">
            <text:p>621.2255859375</text:p>
          </table:table-cell>
          <table:table-cell office:value-type="float" office:value="0.03305178">
            <text:p>0.03305178</text:p>
          </table:table-cell>
          <table:table-cell table:number-columns-repeated="4"/>
        </table:table-row>
        <table:table-row table:style-name="ro1">
          <table:table-cell office:value-type="float" office:value="621.344848632813">
            <text:p>621.3448486328</text:p>
          </table:table-cell>
          <table:table-cell office:value-type="float" office:value="0.0242866">
            <text:p>0.0242866</text:p>
          </table:table-cell>
          <table:table-cell table:number-columns-repeated="4"/>
        </table:table-row>
        <table:table-row table:style-name="ro1">
          <table:table-cell office:value-type="float" office:value="621.464111328125">
            <text:p>621.4641113281</text:p>
          </table:table-cell>
          <table:table-cell office:value-type="float" office:value="0.0258326">
            <text:p>0.0258326</text:p>
          </table:table-cell>
          <table:table-cell table:number-columns-repeated="4"/>
        </table:table-row>
        <table:table-row table:style-name="ro1">
          <table:table-cell office:value-type="float" office:value="621.583374023438">
            <text:p>621.5833740234</text:p>
          </table:table-cell>
          <table:table-cell office:value-type="float" office:value="0.05041833">
            <text:p>0.05041833</text:p>
          </table:table-cell>
          <table:table-cell table:number-columns-repeated="4"/>
        </table:table-row>
        <table:table-row table:style-name="ro1">
          <table:table-cell office:value-type="float" office:value="621.70263671875">
            <text:p>621.7026367188</text:p>
          </table:table-cell>
          <table:table-cell office:value-type="float" office:value="0.03163116">
            <text:p>0.03163116</text:p>
          </table:table-cell>
          <table:table-cell table:number-columns-repeated="4"/>
        </table:table-row>
        <table:table-row table:style-name="ro1">
          <table:table-cell office:value-type="float" office:value="621.821899414063">
            <text:p>621.8218994141</text:p>
          </table:table-cell>
          <table:table-cell office:value-type="float" office:value="0.0539169">
            <text:p>0.0539169</text:p>
          </table:table-cell>
          <table:table-cell table:number-columns-repeated="4"/>
        </table:table-row>
        <table:table-row table:style-name="ro1">
          <table:table-cell office:value-type="float" office:value="621.941223144531">
            <text:p>621.9412231445</text:p>
          </table:table-cell>
          <table:table-cell office:value-type="float" office:value="0.02043969">
            <text:p>0.02043969</text:p>
          </table:table-cell>
          <table:table-cell table:number-columns-repeated="4"/>
        </table:table-row>
        <table:table-row table:style-name="ro1">
          <table:table-cell office:value-type="float" office:value="622.060485839844">
            <text:p>622.0604858398</text:p>
          </table:table-cell>
          <table:table-cell office:value-type="float" office:value="0.03853147">
            <text:p>0.03853147</text:p>
          </table:table-cell>
          <table:table-cell table:number-columns-repeated="4"/>
        </table:table-row>
        <table:table-row table:style-name="ro1">
          <table:table-cell office:value-type="float" office:value="622.179748535156">
            <text:p>622.1797485352</text:p>
          </table:table-cell>
          <table:table-cell office:value-type="float" office:value="0.04278624">
            <text:p>0.04278624</text:p>
          </table:table-cell>
          <table:table-cell table:number-columns-repeated="4"/>
        </table:table-row>
        <table:table-row table:style-name="ro1">
          <table:table-cell office:value-type="float" office:value="622.299011230469">
            <text:p>622.2990112305</text:p>
          </table:table-cell>
          <table:table-cell office:value-type="float" office:value="0.02636956">
            <text:p>0.02636956</text:p>
          </table:table-cell>
          <table:table-cell table:number-columns-repeated="4"/>
        </table:table-row>
        <table:table-row table:style-name="ro1">
          <table:table-cell office:value-type="float" office:value="622.418334960938">
            <text:p>622.4183349609</text:p>
          </table:table-cell>
          <table:table-cell office:value-type="float" office:value="0.02872783">
            <text:p>0.02872783</text:p>
          </table:table-cell>
          <table:table-cell table:number-columns-repeated="4"/>
        </table:table-row>
        <table:table-row table:style-name="ro1">
          <table:table-cell office:value-type="float" office:value="622.53759765625">
            <text:p>622.5375976563</text:p>
          </table:table-cell>
          <table:table-cell office:value-type="float" office:value="0.02824996">
            <text:p>0.02824996</text:p>
          </table:table-cell>
          <table:table-cell table:number-columns-repeated="4"/>
        </table:table-row>
        <table:table-row table:style-name="ro1">
          <table:table-cell office:value-type="float" office:value="622.656860351563">
            <text:p>622.6568603516</text:p>
          </table:table-cell>
          <table:table-cell office:value-type="float" office:value="0.02469139">
            <text:p>0.02469139</text:p>
          </table:table-cell>
          <table:table-cell table:number-columns-repeated="4"/>
        </table:table-row>
        <table:table-row table:style-name="ro1">
          <table:table-cell office:value-type="float" office:value="622.776184082031">
            <text:p>622.776184082</text:p>
          </table:table-cell>
          <table:table-cell office:value-type="float" office:value="0.0305564">
            <text:p>0.0305564</text:p>
          </table:table-cell>
          <table:table-cell table:number-columns-repeated="4"/>
        </table:table-row>
        <table:table-row table:style-name="ro1">
          <table:table-cell office:value-type="float" office:value="622.895446777344">
            <text:p>622.8954467773</text:p>
          </table:table-cell>
          <table:table-cell office:value-type="float" office:value="0.03201463">
            <text:p>0.03201463</text:p>
          </table:table-cell>
          <table:table-cell table:number-columns-repeated="4"/>
        </table:table-row>
        <table:table-row table:style-name="ro1">
          <table:table-cell office:value-type="float" office:value="623.014709472656">
            <text:p>623.0147094727</text:p>
          </table:table-cell>
          <table:table-cell office:value-type="float" office:value="0.02904685">
            <text:p>0.02904685</text:p>
          </table:table-cell>
          <table:table-cell table:number-columns-repeated="4"/>
        </table:table-row>
        <table:table-row table:style-name="ro1">
          <table:table-cell office:value-type="float" office:value="623.134033203125">
            <text:p>623.1340332031</text:p>
          </table:table-cell>
          <table:table-cell office:value-type="float" office:value="0.02133883">
            <text:p>0.02133883</text:p>
          </table:table-cell>
          <table:table-cell table:number-columns-repeated="4"/>
        </table:table-row>
        <table:table-row table:style-name="ro1">
          <table:table-cell office:value-type="float" office:value="623.253295898438">
            <text:p>623.2532958984</text:p>
          </table:table-cell>
          <table:table-cell office:value-type="float" office:value="0.02472642">
            <text:p>0.02472642</text:p>
          </table:table-cell>
          <table:table-cell table:number-columns-repeated="4"/>
        </table:table-row>
        <table:table-row table:style-name="ro1">
          <table:table-cell office:value-type="float" office:value="623.372619628906">
            <text:p>623.3726196289</text:p>
          </table:table-cell>
          <table:table-cell office:value-type="float" office:value="0.03386154">
            <text:p>0.03386154</text:p>
          </table:table-cell>
          <table:table-cell table:number-columns-repeated="4"/>
        </table:table-row>
        <table:table-row table:style-name="ro1">
          <table:table-cell office:value-type="float" office:value="623.491943359375">
            <text:p>623.4919433594</text:p>
          </table:table-cell>
          <table:table-cell office:value-type="float" office:value="0.02810921">
            <text:p>0.02810921</text:p>
          </table:table-cell>
          <table:table-cell table:number-columns-repeated="4"/>
        </table:table-row>
        <table:table-row table:style-name="ro1">
          <table:table-cell office:value-type="float" office:value="623.611206054688">
            <text:p>623.6112060547</text:p>
          </table:table-cell>
          <table:table-cell office:value-type="float" office:value="0.023146">
            <text:p>0.023146</text:p>
          </table:table-cell>
          <table:table-cell table:number-columns-repeated="4"/>
        </table:table-row>
        <table:table-row table:style-name="ro1">
          <table:table-cell office:value-type="float" office:value="623.730529785156">
            <text:p>623.7305297852</text:p>
          </table:table-cell>
          <table:table-cell office:value-type="float" office:value="0.02948151">
            <text:p>0.02948151</text:p>
          </table:table-cell>
          <table:table-cell table:number-columns-repeated="4"/>
        </table:table-row>
        <table:table-row table:style-name="ro1">
          <table:table-cell office:value-type="float" office:value="623.849853515625">
            <text:p>623.8498535156</text:p>
          </table:table-cell>
          <table:table-cell office:value-type="float" office:value="0.02750329">
            <text:p>0.02750329</text:p>
          </table:table-cell>
          <table:table-cell table:number-columns-repeated="4"/>
        </table:table-row>
        <table:table-row table:style-name="ro1">
          <table:table-cell office:value-type="float" office:value="623.969116210938">
            <text:p>623.9691162109</text:p>
          </table:table-cell>
          <table:table-cell office:value-type="float" office:value="0.02658166">
            <text:p>0.02658166</text:p>
          </table:table-cell>
          <table:table-cell table:number-columns-repeated="4"/>
        </table:table-row>
        <table:table-row table:style-name="ro1">
          <table:table-cell office:value-type="float" office:value="624.088439941406">
            <text:p>624.0884399414</text:p>
          </table:table-cell>
          <table:table-cell office:value-type="float" office:value="0.01776086">
            <text:p>0.01776086</text:p>
          </table:table-cell>
          <table:table-cell table:number-columns-repeated="4"/>
        </table:table-row>
        <table:table-row table:style-name="ro1">
          <table:table-cell office:value-type="float" office:value="624.207763671875">
            <text:p>624.2077636719</text:p>
          </table:table-cell>
          <table:table-cell office:value-type="float" office:value="0.01794167">
            <text:p>0.01794167</text:p>
          </table:table-cell>
          <table:table-cell table:number-columns-repeated="4"/>
        </table:table-row>
        <table:table-row table:style-name="ro1">
          <table:table-cell office:value-type="float" office:value="624.327087402344">
            <text:p>624.3270874023</text:p>
          </table:table-cell>
          <table:table-cell office:value-type="float" office:value="0.02565939">
            <text:p>0.02565939</text:p>
          </table:table-cell>
          <table:table-cell table:number-columns-repeated="4"/>
        </table:table-row>
        <table:table-row table:style-name="ro1">
          <table:table-cell office:value-type="float" office:value="624.446350097656">
            <text:p>624.4463500977</text:p>
          </table:table-cell>
          <table:table-cell office:value-type="float" office:value="0.03992796">
            <text:p>0.03992796</text:p>
          </table:table-cell>
          <table:table-cell table:number-columns-repeated="4"/>
        </table:table-row>
        <table:table-row table:style-name="ro1">
          <table:table-cell office:value-type="float" office:value="624.565673828125">
            <text:p>624.5656738281</text:p>
          </table:table-cell>
          <table:table-cell office:value-type="float" office:value="0.03149785">
            <text:p>0.03149785</text:p>
          </table:table-cell>
          <table:table-cell table:number-columns-repeated="4"/>
        </table:table-row>
        <table:table-row table:style-name="ro1">
          <table:table-cell office:value-type="float" office:value="624.684997558594">
            <text:p>624.6849975586</text:p>
          </table:table-cell>
          <table:table-cell office:value-type="float" office:value="0.02841096">
            <text:p>0.02841096</text:p>
          </table:table-cell>
          <table:table-cell table:number-columns-repeated="4"/>
        </table:table-row>
        <table:table-row table:style-name="ro1">
          <table:table-cell office:value-type="float" office:value="624.804321289063">
            <text:p>624.8043212891</text:p>
          </table:table-cell>
          <table:table-cell office:value-type="float" office:value="0.0266566">
            <text:p>0.0266566</text:p>
          </table:table-cell>
          <table:table-cell table:number-columns-repeated="4"/>
        </table:table-row>
        <table:table-row table:style-name="ro1">
          <table:table-cell office:value-type="float" office:value="624.923645019531">
            <text:p>624.9236450195</text:p>
          </table:table-cell>
          <table:table-cell office:value-type="float" office:value="0.03097244">
            <text:p>0.03097244</text:p>
          </table:table-cell>
          <table:table-cell table:number-columns-repeated="4"/>
        </table:table-row>
        <table:table-row table:style-name="ro1">
          <table:table-cell office:value-type="float" office:value="625.04296875">
            <text:p>625.04296875</text:p>
          </table:table-cell>
          <table:table-cell office:value-type="float" office:value="0.01836696">
            <text:p>0.01836696</text:p>
          </table:table-cell>
          <table:table-cell table:number-columns-repeated="4"/>
        </table:table-row>
        <table:table-row table:style-name="ro1">
          <table:table-cell office:value-type="float" office:value="625.162292480469">
            <text:p>625.1622924805</text:p>
          </table:table-cell>
          <table:table-cell office:value-type="float" office:value="0.02457603">
            <text:p>0.02457603</text:p>
          </table:table-cell>
          <table:table-cell table:number-columns-repeated="4"/>
        </table:table-row>
        <table:table-row table:style-name="ro1">
          <table:table-cell office:value-type="float" office:value="625.281616210938">
            <text:p>625.2816162109</text:p>
          </table:table-cell>
          <table:table-cell office:value-type="float" office:value="0.03070262">
            <text:p>0.03070262</text:p>
          </table:table-cell>
          <table:table-cell table:number-columns-repeated="4"/>
        </table:table-row>
        <table:table-row table:style-name="ro1">
          <table:table-cell office:value-type="float" office:value="625.400939941406">
            <text:p>625.4009399414</text:p>
          </table:table-cell>
          <table:table-cell office:value-type="float" office:value="0.02549297">
            <text:p>0.02549297</text:p>
          </table:table-cell>
          <table:table-cell table:number-columns-repeated="4"/>
        </table:table-row>
        <table:table-row table:style-name="ro1">
          <table:table-cell office:value-type="float" office:value="625.520263671875">
            <text:p>625.5202636719</text:p>
          </table:table-cell>
          <table:table-cell office:value-type="float" office:value="0.02370555">
            <text:p>0.02370555</text:p>
          </table:table-cell>
          <table:table-cell table:number-columns-repeated="4"/>
        </table:table-row>
        <table:table-row table:style-name="ro1">
          <table:table-cell office:value-type="float" office:value="625.639587402344">
            <text:p>625.6395874023</text:p>
          </table:table-cell>
          <table:table-cell office:value-type="float" office:value="0.02898945">
            <text:p>0.02898945</text:p>
          </table:table-cell>
          <table:table-cell table:number-columns-repeated="4"/>
        </table:table-row>
        <table:table-row table:style-name="ro1">
          <table:table-cell office:value-type="float" office:value="625.758911132813">
            <text:p>625.7589111328</text:p>
          </table:table-cell>
          <table:table-cell office:value-type="float" office:value="0.0309236">
            <text:p>0.0309236</text:p>
          </table:table-cell>
          <table:table-cell table:number-columns-repeated="4"/>
        </table:table-row>
        <table:table-row table:style-name="ro1">
          <table:table-cell office:value-type="float" office:value="625.878295898438">
            <text:p>625.8782958984</text:p>
          </table:table-cell>
          <table:table-cell office:value-type="float" office:value="0.02059209">
            <text:p>0.02059209</text:p>
          </table:table-cell>
          <table:table-cell table:number-columns-repeated="4"/>
        </table:table-row>
        <table:table-row table:style-name="ro1">
          <table:table-cell office:value-type="float" office:value="625.997619628906">
            <text:p>625.9976196289</text:p>
          </table:table-cell>
          <table:table-cell office:value-type="float" office:value="0.01952595">
            <text:p>0.01952595</text:p>
          </table:table-cell>
          <table:table-cell table:number-columns-repeated="4"/>
        </table:table-row>
        <table:table-row table:style-name="ro1">
          <table:table-cell office:value-type="float" office:value="626.116943359375">
            <text:p>626.1169433594</text:p>
          </table:table-cell>
          <table:table-cell office:value-type="float" office:value="0.02772295">
            <text:p>0.02772295</text:p>
          </table:table-cell>
          <table:table-cell table:number-columns-repeated="4"/>
        </table:table-row>
        <table:table-row table:style-name="ro1">
          <table:table-cell office:value-type="float" office:value="626.236267089844">
            <text:p>626.2362670898</text:p>
          </table:table-cell>
          <table:table-cell office:value-type="float" office:value="0.02990978">
            <text:p>0.02990978</text:p>
          </table:table-cell>
          <table:table-cell table:number-columns-repeated="4"/>
        </table:table-row>
        <table:table-row table:style-name="ro1">
          <table:table-cell office:value-type="float" office:value="626.355651855469">
            <text:p>626.3556518555</text:p>
          </table:table-cell>
          <table:table-cell office:value-type="float" office:value="0.04265243">
            <text:p>0.04265243</text:p>
          </table:table-cell>
          <table:table-cell table:number-columns-repeated="4"/>
        </table:table-row>
        <table:table-row table:style-name="ro1">
          <table:table-cell office:value-type="float" office:value="626.474975585938">
            <text:p>626.4749755859</text:p>
          </table:table-cell>
          <table:table-cell office:value-type="float" office:value="0.01736736">
            <text:p>0.01736736</text:p>
          </table:table-cell>
          <table:table-cell table:number-columns-repeated="4"/>
        </table:table-row>
        <table:table-row table:style-name="ro1">
          <table:table-cell office:value-type="float" office:value="626.594360351563">
            <text:p>626.5943603516</text:p>
          </table:table-cell>
          <table:table-cell office:value-type="float" office:value="0.03808002">
            <text:p>0.03808002</text:p>
          </table:table-cell>
          <table:table-cell table:number-columns-repeated="4"/>
        </table:table-row>
        <table:table-row table:style-name="ro1">
          <table:table-cell office:value-type="float" office:value="626.713684082031">
            <text:p>626.713684082</text:p>
          </table:table-cell>
          <table:table-cell office:value-type="float" office:value="0.02319994">
            <text:p>0.02319994</text:p>
          </table:table-cell>
          <table:table-cell table:number-columns-repeated="4"/>
        </table:table-row>
        <table:table-row table:style-name="ro1">
          <table:table-cell office:value-type="float" office:value="626.8330078125">
            <text:p>626.8330078125</text:p>
          </table:table-cell>
          <table:table-cell office:value-type="float" office:value="0.03899474">
            <text:p>0.03899474</text:p>
          </table:table-cell>
          <table:table-cell table:number-columns-repeated="4"/>
        </table:table-row>
        <table:table-row table:style-name="ro1">
          <table:table-cell office:value-type="float" office:value="626.952392578125">
            <text:p>626.9523925781</text:p>
          </table:table-cell>
          <table:table-cell office:value-type="float" office:value="0.02981023">
            <text:p>0.02981023</text:p>
          </table:table-cell>
          <table:table-cell table:number-columns-repeated="4"/>
        </table:table-row>
        <table:table-row table:style-name="ro1">
          <table:table-cell office:value-type="float" office:value="627.071716308594">
            <text:p>627.0717163086</text:p>
          </table:table-cell>
          <table:table-cell office:value-type="float" office:value="0.03222581">
            <text:p>0.03222581</text:p>
          </table:table-cell>
          <table:table-cell table:number-columns-repeated="4"/>
        </table:table-row>
        <table:table-row table:style-name="ro1">
          <table:table-cell office:value-type="float" office:value="627.191101074219">
            <text:p>627.1911010742</text:p>
          </table:table-cell>
          <table:table-cell office:value-type="float" office:value="0.03599657">
            <text:p>0.03599657</text:p>
          </table:table-cell>
          <table:table-cell table:number-columns-repeated="4"/>
        </table:table-row>
        <table:table-row table:style-name="ro1">
          <table:table-cell office:value-type="float" office:value="627.310424804688">
            <text:p>627.3104248047</text:p>
          </table:table-cell>
          <table:table-cell office:value-type="float" office:value="0.02574229">
            <text:p>0.02574229</text:p>
          </table:table-cell>
          <table:table-cell table:number-columns-repeated="4"/>
        </table:table-row>
        <table:table-row table:style-name="ro1">
          <table:table-cell office:value-type="float" office:value="627.429809570313">
            <text:p>627.4298095703</text:p>
          </table:table-cell>
          <table:table-cell office:value-type="float" office:value="0.01761521">
            <text:p>0.01761521</text:p>
          </table:table-cell>
          <table:table-cell table:number-columns-repeated="4"/>
        </table:table-row>
        <table:table-row table:style-name="ro1">
          <table:table-cell office:value-type="float" office:value="627.549194335938">
            <text:p>627.5491943359</text:p>
          </table:table-cell>
          <table:table-cell office:value-type="float" office:value="0.0192401">
            <text:p>0.0192401</text:p>
          </table:table-cell>
          <table:table-cell table:number-columns-repeated="4"/>
        </table:table-row>
        <table:table-row table:style-name="ro1">
          <table:table-cell office:value-type="float" office:value="627.668518066406">
            <text:p>627.6685180664</text:p>
          </table:table-cell>
          <table:table-cell office:value-type="float" office:value="0.03295456">
            <text:p>0.03295456</text:p>
          </table:table-cell>
          <table:table-cell table:number-columns-repeated="4"/>
        </table:table-row>
        <table:table-row table:style-name="ro1">
          <table:table-cell office:value-type="float" office:value="627.787902832031">
            <text:p>627.787902832</text:p>
          </table:table-cell>
          <table:table-cell office:value-type="float" office:value="0.02928066">
            <text:p>0.02928066</text:p>
          </table:table-cell>
          <table:table-cell table:number-columns-repeated="4"/>
        </table:table-row>
        <table:table-row table:style-name="ro1">
          <table:table-cell office:value-type="float" office:value="627.907287597656">
            <text:p>627.9072875977</text:p>
          </table:table-cell>
          <table:table-cell office:value-type="float" office:value="0.02227082">
            <text:p>0.02227082</text:p>
          </table:table-cell>
          <table:table-cell table:number-columns-repeated="4"/>
        </table:table-row>
        <table:table-row table:style-name="ro1">
          <table:table-cell office:value-type="float" office:value="628.026672363281">
            <text:p>628.0266723633</text:p>
          </table:table-cell>
          <table:table-cell office:value-type="float" office:value="0.01802879">
            <text:p>0.01802879</text:p>
          </table:table-cell>
          <table:table-cell table:number-columns-repeated="4"/>
        </table:table-row>
        <table:table-row table:style-name="ro1">
          <table:table-cell office:value-type="float" office:value="628.14599609375">
            <text:p>628.1459960938</text:p>
          </table:table-cell>
          <table:table-cell office:value-type="float" office:value="0.0166846">
            <text:p>0.0166846</text:p>
          </table:table-cell>
          <table:table-cell table:number-columns-repeated="4"/>
        </table:table-row>
        <table:table-row table:style-name="ro1">
          <table:table-cell office:value-type="float" office:value="628.265380859375">
            <text:p>628.2653808594</text:p>
          </table:table-cell>
          <table:table-cell office:value-type="float" office:value="0.02936927">
            <text:p>0.02936927</text:p>
          </table:table-cell>
          <table:table-cell table:number-columns-repeated="4"/>
        </table:table-row>
        <table:table-row table:style-name="ro1">
          <table:table-cell office:value-type="float" office:value="628.384765625">
            <text:p>628.384765625</text:p>
          </table:table-cell>
          <table:table-cell office:value-type="float" office:value="0.03404078">
            <text:p>0.03404078</text:p>
          </table:table-cell>
          <table:table-cell table:number-columns-repeated="4"/>
        </table:table-row>
        <table:table-row table:style-name="ro1">
          <table:table-cell office:value-type="float" office:value="628.504150390625">
            <text:p>628.5041503906</text:p>
          </table:table-cell>
          <table:table-cell office:value-type="float" office:value="0.01463594">
            <text:p>0.01463594</text:p>
          </table:table-cell>
          <table:table-cell table:number-columns-repeated="4"/>
        </table:table-row>
        <table:table-row table:style-name="ro1">
          <table:table-cell office:value-type="float" office:value="628.62353515625">
            <text:p>628.6235351563</text:p>
          </table:table-cell>
          <table:table-cell office:value-type="float" office:value="0.02599142">
            <text:p>0.02599142</text:p>
          </table:table-cell>
          <table:table-cell table:number-columns-repeated="4"/>
        </table:table-row>
        <table:table-row table:style-name="ro1">
          <table:table-cell office:value-type="float" office:value="628.742919921875">
            <text:p>628.7429199219</text:p>
          </table:table-cell>
          <table:table-cell office:value-type="float" office:value="0.01502488">
            <text:p>0.01502488</text:p>
          </table:table-cell>
          <table:table-cell table:number-columns-repeated="4"/>
        </table:table-row>
        <table:table-row table:style-name="ro1">
          <table:table-cell office:value-type="float" office:value="628.8623046875">
            <text:p>628.8623046875</text:p>
          </table:table-cell>
          <table:table-cell office:value-type="float" office:value="0.01891041">
            <text:p>0.01891041</text:p>
          </table:table-cell>
          <table:table-cell table:number-columns-repeated="4"/>
        </table:table-row>
        <table:table-row table:style-name="ro1">
          <table:table-cell office:value-type="float" office:value="628.981689453125">
            <text:p>628.9816894531</text:p>
          </table:table-cell>
          <table:table-cell office:value-type="float" office:value="0.01883882">
            <text:p>0.01883882</text:p>
          </table:table-cell>
          <table:table-cell table:number-columns-repeated="4"/>
        </table:table-row>
        <table:table-row table:style-name="ro1">
          <table:table-cell office:value-type="float" office:value="629.10107421875">
            <text:p>629.1010742188</text:p>
          </table:table-cell>
          <table:table-cell office:value-type="float" office:value="0.01670424">
            <text:p>0.01670424</text:p>
          </table:table-cell>
          <table:table-cell table:number-columns-repeated="4"/>
        </table:table-row>
        <table:table-row table:style-name="ro1">
          <table:table-cell office:value-type="float" office:value="629.220458984375">
            <text:p>629.2204589844</text:p>
          </table:table-cell>
          <table:table-cell office:value-type="float" office:value="0.04122764">
            <text:p>0.04122764</text:p>
          </table:table-cell>
          <table:table-cell table:number-columns-repeated="4"/>
        </table:table-row>
        <table:table-row table:style-name="ro1">
          <table:table-cell office:value-type="float" office:value="629.33984375">
            <text:p>629.33984375</text:p>
          </table:table-cell>
          <table:table-cell office:value-type="float" office:value="0.03222264">
            <text:p>0.03222264</text:p>
          </table:table-cell>
          <table:table-cell table:number-columns-repeated="4"/>
        </table:table-row>
        <table:table-row table:style-name="ro1">
          <table:table-cell office:value-type="float" office:value="629.459228515625">
            <text:p>629.4592285156</text:p>
          </table:table-cell>
          <table:table-cell office:value-type="float" office:value="0.03199802">
            <text:p>0.03199802</text:p>
          </table:table-cell>
          <table:table-cell table:number-columns-repeated="4"/>
        </table:table-row>
        <table:table-row table:style-name="ro1">
          <table:table-cell office:value-type="float" office:value="629.57861328125">
            <text:p>629.5786132813</text:p>
          </table:table-cell>
          <table:table-cell office:value-type="float" office:value="0.01595566">
            <text:p>0.01595566</text:p>
          </table:table-cell>
          <table:table-cell table:number-columns-repeated="4"/>
        </table:table-row>
        <table:table-row table:style-name="ro1">
          <table:table-cell office:value-type="float" office:value="629.697998046875">
            <text:p>629.6979980469</text:p>
          </table:table-cell>
          <table:table-cell office:value-type="float" office:value="0.019989">
            <text:p>0.019989</text:p>
          </table:table-cell>
          <table:table-cell table:number-columns-repeated="4"/>
        </table:table-row>
        <table:table-row table:style-name="ro1">
          <table:table-cell office:value-type="float" office:value="629.8173828125">
            <text:p>629.8173828125</text:p>
          </table:table-cell>
          <table:table-cell office:value-type="float" office:value="0.02257334">
            <text:p>0.02257334</text:p>
          </table:table-cell>
          <table:table-cell table:number-columns-repeated="4"/>
        </table:table-row>
        <table:table-row table:style-name="ro1">
          <table:table-cell office:value-type="float" office:value="629.936828613281">
            <text:p>629.9368286133</text:p>
          </table:table-cell>
          <table:table-cell office:value-type="float" office:value="0.04768467">
            <text:p>0.04768467</text:p>
          </table:table-cell>
          <table:table-cell table:number-columns-repeated="4"/>
        </table:table-row>
        <table:table-row table:style-name="ro1">
          <table:table-cell office:value-type="float" office:value="630.056213378906">
            <text:p>630.0562133789</text:p>
          </table:table-cell>
          <table:table-cell office:value-type="float" office:value="0.03244657">
            <text:p>0.03244657</text:p>
          </table:table-cell>
          <table:table-cell table:number-columns-repeated="4"/>
        </table:table-row>
        <table:table-row table:style-name="ro1">
          <table:table-cell office:value-type="float" office:value="630.175598144531">
            <text:p>630.1755981445</text:p>
          </table:table-cell>
          <table:table-cell office:value-type="float" office:value="0.03142198">
            <text:p>0.03142198</text:p>
          </table:table-cell>
          <table:table-cell table:number-columns-repeated="4"/>
        </table:table-row>
        <table:table-row table:style-name="ro1">
          <table:table-cell office:value-type="float" office:value="630.295043945313">
            <text:p>630.2950439453</text:p>
          </table:table-cell>
          <table:table-cell office:value-type="float" office:value="0.01652983">
            <text:p>0.01652983</text:p>
          </table:table-cell>
          <table:table-cell table:number-columns-repeated="4"/>
        </table:table-row>
        <table:table-row table:style-name="ro1">
          <table:table-cell office:value-type="float" office:value="630.414428710938">
            <text:p>630.4144287109</text:p>
          </table:table-cell>
          <table:table-cell office:value-type="float" office:value="0.02871749">
            <text:p>0.02871749</text:p>
          </table:table-cell>
          <table:table-cell table:number-columns-repeated="4"/>
        </table:table-row>
        <table:table-row table:style-name="ro1">
          <table:table-cell office:value-type="float" office:value="630.533813476563">
            <text:p>630.5338134766</text:p>
          </table:table-cell>
          <table:table-cell office:value-type="float" office:value="0.01963162">
            <text:p>0.01963162</text:p>
          </table:table-cell>
          <table:table-cell table:number-columns-repeated="4"/>
        </table:table-row>
        <table:table-row table:style-name="ro1">
          <table:table-cell office:value-type="float" office:value="630.653259277344">
            <text:p>630.6532592773</text:p>
          </table:table-cell>
          <table:table-cell office:value-type="float" office:value="0.01561978">
            <text:p>0.01561978</text:p>
          </table:table-cell>
          <table:table-cell table:number-columns-repeated="4"/>
        </table:table-row>
        <table:table-row table:style-name="ro1">
          <table:table-cell office:value-type="float" office:value="630.772644042969">
            <text:p>630.772644043</text:p>
          </table:table-cell>
          <table:table-cell office:value-type="float" office:value="0.01997104">
            <text:p>0.01997104</text:p>
          </table:table-cell>
          <table:table-cell table:number-columns-repeated="4"/>
        </table:table-row>
        <table:table-row table:style-name="ro1">
          <table:table-cell office:value-type="float" office:value="630.89208984375">
            <text:p>630.8920898438</text:p>
          </table:table-cell>
          <table:table-cell office:value-type="float" office:value="0.02329088">
            <text:p>0.02329088</text:p>
          </table:table-cell>
          <table:table-cell table:number-columns-repeated="4"/>
        </table:table-row>
        <table:table-row table:style-name="ro1">
          <table:table-cell office:value-type="float" office:value="631.011474609375">
            <text:p>631.0114746094</text:p>
          </table:table-cell>
          <table:table-cell office:value-type="float" office:value="0.030643">
            <text:p>0.030643</text:p>
          </table:table-cell>
          <table:table-cell table:number-columns-repeated="4"/>
        </table:table-row>
        <table:table-row table:style-name="ro1">
          <table:table-cell office:value-type="float" office:value="631.130920410156">
            <text:p>631.1309204102</text:p>
          </table:table-cell>
          <table:table-cell office:value-type="float" office:value="0.02202598">
            <text:p>0.02202598</text:p>
          </table:table-cell>
          <table:table-cell table:number-columns-repeated="4"/>
        </table:table-row>
        <table:table-row table:style-name="ro1">
          <table:table-cell office:value-type="float" office:value="631.250305175781">
            <text:p>631.2503051758</text:p>
          </table:table-cell>
          <table:table-cell office:value-type="float" office:value="0.01957079">
            <text:p>0.01957079</text:p>
          </table:table-cell>
          <table:table-cell table:number-columns-repeated="4"/>
        </table:table-row>
        <table:table-row table:style-name="ro1">
          <table:table-cell office:value-type="float" office:value="631.369750976563">
            <text:p>631.3697509766</text:p>
          </table:table-cell>
          <table:table-cell office:value-type="float" office:value="0.02720094">
            <text:p>0.02720094</text:p>
          </table:table-cell>
          <table:table-cell table:number-columns-repeated="4"/>
        </table:table-row>
        <table:table-row table:style-name="ro1">
          <table:table-cell office:value-type="float" office:value="631.489135742188">
            <text:p>631.4891357422</text:p>
          </table:table-cell>
          <table:table-cell office:value-type="float" office:value="0.031266">
            <text:p>0.031266</text:p>
          </table:table-cell>
          <table:table-cell table:number-columns-repeated="4"/>
        </table:table-row>
        <table:table-row table:style-name="ro1">
          <table:table-cell office:value-type="float" office:value="631.608581542969">
            <text:p>631.608581543</text:p>
          </table:table-cell>
          <table:table-cell office:value-type="float" office:value="0.01593628">
            <text:p>0.01593628</text:p>
          </table:table-cell>
          <table:table-cell table:number-columns-repeated="4"/>
        </table:table-row>
        <table:table-row table:style-name="ro1">
          <table:table-cell office:value-type="float" office:value="631.72802734375">
            <text:p>631.7280273438</text:p>
          </table:table-cell>
          <table:table-cell office:value-type="float" office:value="0.02801438">
            <text:p>0.02801438</text:p>
          </table:table-cell>
          <table:table-cell table:number-columns-repeated="4"/>
        </table:table-row>
        <table:table-row table:style-name="ro1">
          <table:table-cell office:value-type="float" office:value="631.847412109375">
            <text:p>631.8474121094</text:p>
          </table:table-cell>
          <table:table-cell office:value-type="float" office:value="0.01919678">
            <text:p>0.01919678</text:p>
          </table:table-cell>
          <table:table-cell table:number-columns-repeated="4"/>
        </table:table-row>
        <table:table-row table:style-name="ro1">
          <table:table-cell office:value-type="float" office:value="631.966857910156">
            <text:p>631.9668579102</text:p>
          </table:table-cell>
          <table:table-cell office:value-type="float" office:value="0.0358566">
            <text:p>0.0358566</text:p>
          </table:table-cell>
          <table:table-cell table:number-columns-repeated="4"/>
        </table:table-row>
        <table:table-row table:style-name="ro1">
          <table:table-cell office:value-type="float" office:value="632.086303710938">
            <text:p>632.0863037109</text:p>
          </table:table-cell>
          <table:table-cell office:value-type="float" office:value="0.01335268">
            <text:p>0.01335268</text:p>
          </table:table-cell>
          <table:table-cell table:number-columns-repeated="4"/>
        </table:table-row>
        <table:table-row table:style-name="ro1">
          <table:table-cell office:value-type="float" office:value="632.205749511719">
            <text:p>632.2057495117</text:p>
          </table:table-cell>
          <table:table-cell office:value-type="float" office:value="0.0205944">
            <text:p>0.0205944</text:p>
          </table:table-cell>
          <table:table-cell table:number-columns-repeated="4"/>
        </table:table-row>
        <table:table-row table:style-name="ro1">
          <table:table-cell office:value-type="float" office:value="632.3251953125">
            <text:p>632.3251953125</text:p>
          </table:table-cell>
          <table:table-cell office:value-type="float" office:value="0.01942264">
            <text:p>0.01942264</text:p>
          </table:table-cell>
          <table:table-cell table:number-columns-repeated="4"/>
        </table:table-row>
        <table:table-row table:style-name="ro1">
          <table:table-cell office:value-type="float" office:value="632.444580078125">
            <text:p>632.4445800781</text:p>
          </table:table-cell>
          <table:table-cell office:value-type="float" office:value="0.03013508">
            <text:p>0.03013508</text:p>
          </table:table-cell>
          <table:table-cell table:number-columns-repeated="4"/>
        </table:table-row>
        <table:table-row table:style-name="ro1">
          <table:table-cell office:value-type="float" office:value="632.564025878906">
            <text:p>632.5640258789</text:p>
          </table:table-cell>
          <table:table-cell office:value-type="float" office:value="0.02062662">
            <text:p>0.02062662</text:p>
          </table:table-cell>
          <table:table-cell table:number-columns-repeated="4"/>
        </table:table-row>
        <table:table-row table:style-name="ro1">
          <table:table-cell office:value-type="float" office:value="632.683471679688">
            <text:p>632.6834716797</text:p>
          </table:table-cell>
          <table:table-cell office:value-type="float" office:value="0.02179854">
            <text:p>0.02179854</text:p>
          </table:table-cell>
          <table:table-cell table:number-columns-repeated="4"/>
        </table:table-row>
        <table:table-row table:style-name="ro1">
          <table:table-cell office:value-type="float" office:value="632.802917480469">
            <text:p>632.8029174805</text:p>
          </table:table-cell>
          <table:table-cell office:value-type="float" office:value="0.01735958">
            <text:p>0.01735958</text:p>
          </table:table-cell>
          <table:table-cell table:number-columns-repeated="4"/>
        </table:table-row>
        <table:table-row table:style-name="ro1">
          <table:table-cell office:value-type="float" office:value="632.92236328125">
            <text:p>632.9223632813</text:p>
          </table:table-cell>
          <table:table-cell office:value-type="float" office:value="0.01268768">
            <text:p>0.01268768</text:p>
          </table:table-cell>
          <table:table-cell table:number-columns-repeated="4"/>
        </table:table-row>
        <table:table-row table:style-name="ro1">
          <table:table-cell office:value-type="float" office:value="633.041809082031">
            <text:p>633.041809082</text:p>
          </table:table-cell>
          <table:table-cell office:value-type="float" office:value="0.02627634">
            <text:p>0.02627634</text:p>
          </table:table-cell>
          <table:table-cell table:number-columns-repeated="4"/>
        </table:table-row>
        <table:table-row table:style-name="ro1">
          <table:table-cell office:value-type="float" office:value="633.161254882813">
            <text:p>633.1612548828</text:p>
          </table:table-cell>
          <table:table-cell office:value-type="float" office:value="0.0477974">
            <text:p>0.0477974</text:p>
          </table:table-cell>
          <table:table-cell table:number-columns-repeated="4"/>
        </table:table-row>
        <table:table-row table:style-name="ro1">
          <table:table-cell office:value-type="float" office:value="633.280700683594">
            <text:p>633.2807006836</text:p>
          </table:table-cell>
          <table:table-cell office:value-type="float" office:value="0.01330464">
            <text:p>0.01330464</text:p>
          </table:table-cell>
          <table:table-cell table:number-columns-repeated="4"/>
        </table:table-row>
        <table:table-row table:style-name="ro1">
          <table:table-cell office:value-type="float" office:value="633.400146484375">
            <text:p>633.4001464844</text:p>
          </table:table-cell>
          <table:table-cell office:value-type="float" office:value="0.01708191">
            <text:p>0.01708191</text:p>
          </table:table-cell>
          <table:table-cell table:number-columns-repeated="4"/>
        </table:table-row>
        <table:table-row table:style-name="ro1">
          <table:table-cell office:value-type="float" office:value="633.519592285156">
            <text:p>633.5195922852</text:p>
          </table:table-cell>
          <table:table-cell office:value-type="float" office:value="0.01518183">
            <text:p>0.01518183</text:p>
          </table:table-cell>
          <table:table-cell table:number-columns-repeated="4"/>
        </table:table-row>
        <table:table-row table:style-name="ro1">
          <table:table-cell office:value-type="float" office:value="633.639038085938">
            <text:p>633.6390380859</text:p>
          </table:table-cell>
          <table:table-cell office:value-type="float" office:value="0.02901298">
            <text:p>0.02901298</text:p>
          </table:table-cell>
          <table:table-cell table:number-columns-repeated="4"/>
        </table:table-row>
        <table:table-row table:style-name="ro1">
          <table:table-cell office:value-type="float" office:value="633.758544921875">
            <text:p>633.7585449219</text:p>
          </table:table-cell>
          <table:table-cell office:value-type="float" office:value="0.01147925">
            <text:p>0.01147925</text:p>
          </table:table-cell>
          <table:table-cell table:number-columns-repeated="4"/>
        </table:table-row>
        <table:table-row table:style-name="ro1">
          <table:table-cell office:value-type="float" office:value="633.877990722656">
            <text:p>633.8779907227</text:p>
          </table:table-cell>
          <table:table-cell office:value-type="float" office:value="0.01874142">
            <text:p>0.01874142</text:p>
          </table:table-cell>
          <table:table-cell table:number-columns-repeated="4"/>
        </table:table-row>
        <table:table-row table:style-name="ro1">
          <table:table-cell office:value-type="float" office:value="633.997436523438">
            <text:p>633.9974365234</text:p>
          </table:table-cell>
          <table:table-cell office:value-type="float" office:value="0.01749477">
            <text:p>0.01749477</text:p>
          </table:table-cell>
          <table:table-cell table:number-columns-repeated="4"/>
        </table:table-row>
        <table:table-row table:style-name="ro1">
          <table:table-cell office:value-type="float" office:value="634.116882324219">
            <text:p>634.1168823242</text:p>
          </table:table-cell>
          <table:table-cell office:value-type="float" office:value="0.01381287">
            <text:p>0.01381287</text:p>
          </table:table-cell>
          <table:table-cell table:number-columns-repeated="4"/>
        </table:table-row>
        <table:table-row table:style-name="ro1">
          <table:table-cell office:value-type="float" office:value="634.236389160156">
            <text:p>634.2363891602</text:p>
          </table:table-cell>
          <table:table-cell office:value-type="float" office:value="0.01327365">
            <text:p>0.01327365</text:p>
          </table:table-cell>
          <table:table-cell table:number-columns-repeated="4"/>
        </table:table-row>
        <table:table-row table:style-name="ro1">
          <table:table-cell office:value-type="float" office:value="634.355834960938">
            <text:p>634.3558349609</text:p>
          </table:table-cell>
          <table:table-cell office:value-type="float" office:value="0.01928346">
            <text:p>0.01928346</text:p>
          </table:table-cell>
          <table:table-cell table:number-columns-repeated="4"/>
        </table:table-row>
        <table:table-row table:style-name="ro1">
          <table:table-cell office:value-type="float" office:value="634.475280761719">
            <text:p>634.4752807617</text:p>
          </table:table-cell>
          <table:table-cell office:value-type="float" office:value="0.01513168">
            <text:p>0.01513168</text:p>
          </table:table-cell>
          <table:table-cell table:number-columns-repeated="4"/>
        </table:table-row>
        <table:table-row table:style-name="ro1">
          <table:table-cell office:value-type="float" office:value="634.594787597656">
            <text:p>634.5947875977</text:p>
          </table:table-cell>
          <table:table-cell office:value-type="float" office:value="0.03790669">
            <text:p>0.03790669</text:p>
          </table:table-cell>
          <table:table-cell table:number-columns-repeated="4"/>
        </table:table-row>
        <table:table-row table:style-name="ro1">
          <table:table-cell office:value-type="float" office:value="634.714233398438">
            <text:p>634.7142333984</text:p>
          </table:table-cell>
          <table:table-cell office:value-type="float" office:value="0.01393021">
            <text:p>0.01393021</text:p>
          </table:table-cell>
          <table:table-cell table:number-columns-repeated="4"/>
        </table:table-row>
        <table:table-row table:style-name="ro1">
          <table:table-cell office:value-type="float" office:value="634.833679199219">
            <text:p>634.8336791992</text:p>
          </table:table-cell>
          <table:table-cell office:value-type="float" office:value="0.01189738">
            <text:p>0.01189738</text:p>
          </table:table-cell>
          <table:table-cell table:number-columns-repeated="4"/>
        </table:table-row>
        <table:table-row table:style-name="ro1">
          <table:table-cell office:value-type="float" office:value="634.953186035156">
            <text:p>634.9531860352</text:p>
          </table:table-cell>
          <table:table-cell office:value-type="float" office:value="0.02421841">
            <text:p>0.02421841</text:p>
          </table:table-cell>
          <table:table-cell table:number-columns-repeated="4"/>
        </table:table-row>
        <table:table-row table:style-name="ro1">
          <table:table-cell office:value-type="float" office:value="635.072631835938">
            <text:p>635.0726318359</text:p>
          </table:table-cell>
          <table:table-cell office:value-type="float" office:value="0.02647164">
            <text:p>0.02647164</text:p>
          </table:table-cell>
          <table:table-cell table:number-columns-repeated="4"/>
        </table:table-row>
        <table:table-row table:style-name="ro1">
          <table:table-cell office:value-type="float" office:value="635.192138671875">
            <text:p>635.1921386719</text:p>
          </table:table-cell>
          <table:table-cell office:value-type="float" office:value="0.01656991">
            <text:p>0.01656991</text:p>
          </table:table-cell>
          <table:table-cell table:number-columns-repeated="4"/>
        </table:table-row>
        <table:table-row table:style-name="ro1">
          <table:table-cell office:value-type="float" office:value="635.311584472656">
            <text:p>635.3115844727</text:p>
          </table:table-cell>
          <table:table-cell office:value-type="float" office:value="0.007778418">
            <text:p>0.007778418</text:p>
          </table:table-cell>
          <table:table-cell table:number-columns-repeated="4"/>
        </table:table-row>
        <table:table-row table:style-name="ro1">
          <table:table-cell office:value-type="float" office:value="635.431091308594">
            <text:p>635.4310913086</text:p>
          </table:table-cell>
          <table:table-cell office:value-type="float" office:value="0.03374111">
            <text:p>0.03374111</text:p>
          </table:table-cell>
          <table:table-cell table:number-columns-repeated="4"/>
        </table:table-row>
        <table:table-row table:style-name="ro1">
          <table:table-cell office:value-type="float" office:value="635.550598144531">
            <text:p>635.5505981445</text:p>
          </table:table-cell>
          <table:table-cell office:value-type="float" office:value="0.02410495">
            <text:p>0.02410495</text:p>
          </table:table-cell>
          <table:table-cell table:number-columns-repeated="4"/>
        </table:table-row>
        <table:table-row table:style-name="ro1">
          <table:table-cell office:value-type="float" office:value="635.670043945313">
            <text:p>635.6700439453</text:p>
          </table:table-cell>
          <table:table-cell office:value-type="float" office:value="0.01094182">
            <text:p>0.01094182</text:p>
          </table:table-cell>
          <table:table-cell table:number-columns-repeated="4"/>
        </table:table-row>
        <table:table-row table:style-name="ro1">
          <table:table-cell office:value-type="float" office:value="635.78955078125">
            <text:p>635.7895507813</text:p>
          </table:table-cell>
          <table:table-cell office:value-type="float" office:value="0.02003703">
            <text:p>0.02003703</text:p>
          </table:table-cell>
          <table:table-cell table:number-columns-repeated="4"/>
        </table:table-row>
        <table:table-row table:style-name="ro1">
          <table:table-cell office:value-type="float" office:value="635.909057617188">
            <text:p>635.9090576172</text:p>
          </table:table-cell>
          <table:table-cell office:value-type="float" office:value="0.01632817">
            <text:p>0.01632817</text:p>
          </table:table-cell>
          <table:table-cell table:number-columns-repeated="4"/>
        </table:table-row>
        <table:table-row table:style-name="ro1">
          <table:table-cell office:value-type="float" office:value="636.028503417969">
            <text:p>636.028503418</text:p>
          </table:table-cell>
          <table:table-cell office:value-type="float" office:value="0.0129399">
            <text:p>0.0129399</text:p>
          </table:table-cell>
          <table:table-cell table:number-columns-repeated="4"/>
        </table:table-row>
        <table:table-row table:style-name="ro1">
          <table:table-cell office:value-type="float" office:value="636.148010253906">
            <text:p>636.1480102539</text:p>
          </table:table-cell>
          <table:table-cell office:value-type="float" office:value="0.01300612">
            <text:p>0.01300612</text:p>
          </table:table-cell>
          <table:table-cell table:number-columns-repeated="4"/>
        </table:table-row>
        <table:table-row table:style-name="ro1">
          <table:table-cell office:value-type="float" office:value="636.267517089844">
            <text:p>636.2675170898</text:p>
          </table:table-cell>
          <table:table-cell office:value-type="float" office:value="0.02580857">
            <text:p>0.02580857</text:p>
          </table:table-cell>
          <table:table-cell table:number-columns-repeated="4"/>
        </table:table-row>
        <table:table-row table:style-name="ro1">
          <table:table-cell office:value-type="float" office:value="636.387023925781">
            <text:p>636.3870239258</text:p>
          </table:table-cell>
          <table:table-cell office:value-type="float" office:value="0.02715738">
            <text:p>0.02715738</text:p>
          </table:table-cell>
          <table:table-cell table:number-columns-repeated="4"/>
        </table:table-row>
        <table:table-row table:style-name="ro1">
          <table:table-cell office:value-type="float" office:value="636.506469726563">
            <text:p>636.5064697266</text:p>
          </table:table-cell>
          <table:table-cell office:value-type="float" office:value="0.01872423">
            <text:p>0.01872423</text:p>
          </table:table-cell>
          <table:table-cell table:number-columns-repeated="4"/>
        </table:table-row>
        <table:table-row table:style-name="ro1">
          <table:table-cell office:value-type="float" office:value="636.6259765625">
            <text:p>636.6259765625</text:p>
          </table:table-cell>
          <table:table-cell office:value-type="float" office:value="0.02674893">
            <text:p>0.02674893</text:p>
          </table:table-cell>
          <table:table-cell table:number-columns-repeated="4"/>
        </table:table-row>
        <table:table-row table:style-name="ro1">
          <table:table-cell office:value-type="float" office:value="636.745483398438">
            <text:p>636.7454833984</text:p>
          </table:table-cell>
          <table:table-cell office:value-type="float" office:value="0.01008475">
            <text:p>0.01008475</text:p>
          </table:table-cell>
          <table:table-cell table:number-columns-repeated="4"/>
        </table:table-row>
        <table:table-row table:style-name="ro1">
          <table:table-cell office:value-type="float" office:value="636.864990234375">
            <text:p>636.8649902344</text:p>
          </table:table-cell>
          <table:table-cell office:value-type="float" office:value="0.01588043">
            <text:p>0.01588043</text:p>
          </table:table-cell>
          <table:table-cell table:number-columns-repeated="4"/>
        </table:table-row>
        <table:table-row table:style-name="ro1">
          <table:table-cell office:value-type="float" office:value="636.984497070313">
            <text:p>636.9844970703</text:p>
          </table:table-cell>
          <table:table-cell office:value-type="float" office:value="0.01035398">
            <text:p>0.01035398</text:p>
          </table:table-cell>
          <table:table-cell table:number-columns-repeated="4"/>
        </table:table-row>
        <table:table-row table:style-name="ro1">
          <table:table-cell office:value-type="float" office:value="637.10400390625">
            <text:p>637.1040039063</text:p>
          </table:table-cell>
          <table:table-cell office:value-type="float" office:value="0.01052663">
            <text:p>0.01052663</text:p>
          </table:table-cell>
          <table:table-cell table:number-columns-repeated="4"/>
        </table:table-row>
        <table:table-row table:style-name="ro1">
          <table:table-cell office:value-type="float" office:value="637.223510742188">
            <text:p>637.2235107422</text:p>
          </table:table-cell>
          <table:table-cell office:value-type="float" office:value="0.01885135">
            <text:p>0.01885135</text:p>
          </table:table-cell>
          <table:table-cell table:number-columns-repeated="4"/>
        </table:table-row>
        <table:table-row table:style-name="ro1">
          <table:table-cell office:value-type="float" office:value="637.343017578125">
            <text:p>637.3430175781</text:p>
          </table:table-cell>
          <table:table-cell office:value-type="float" office:value="0.02718739">
            <text:p>0.02718739</text:p>
          </table:table-cell>
          <table:table-cell table:number-columns-repeated="4"/>
        </table:table-row>
        <table:table-row table:style-name="ro1">
          <table:table-cell office:value-type="float" office:value="637.462524414063">
            <text:p>637.4625244141</text:p>
          </table:table-cell>
          <table:table-cell office:value-type="float" office:value="0.01060523">
            <text:p>0.01060523</text:p>
          </table:table-cell>
          <table:table-cell table:number-columns-repeated="4"/>
        </table:table-row>
        <table:table-row table:style-name="ro1">
          <table:table-cell office:value-type="float" office:value="637.58203125">
            <text:p>637.58203125</text:p>
          </table:table-cell>
          <table:table-cell office:value-type="float" office:value="0.03618947">
            <text:p>0.03618947</text:p>
          </table:table-cell>
          <table:table-cell table:number-columns-repeated="4"/>
        </table:table-row>
        <table:table-row table:style-name="ro1">
          <table:table-cell office:value-type="float" office:value="637.701538085938">
            <text:p>637.7015380859</text:p>
          </table:table-cell>
          <table:table-cell office:value-type="float" office:value="0.01708009">
            <text:p>0.01708009</text:p>
          </table:table-cell>
          <table:table-cell table:number-columns-repeated="4"/>
        </table:table-row>
        <table:table-row table:style-name="ro1">
          <table:table-cell office:value-type="float" office:value="637.821044921875">
            <text:p>637.8210449219</text:p>
          </table:table-cell>
          <table:table-cell office:value-type="float" office:value="0.01342915">
            <text:p>0.01342915</text:p>
          </table:table-cell>
          <table:table-cell table:number-columns-repeated="4"/>
        </table:table-row>
        <table:table-row table:style-name="ro1">
          <table:table-cell office:value-type="float" office:value="637.940551757813">
            <text:p>637.9405517578</text:p>
          </table:table-cell>
          <table:table-cell office:value-type="float" office:value="0.007311372">
            <text:p>0.007311372</text:p>
          </table:table-cell>
          <table:table-cell table:number-columns-repeated="4"/>
        </table:table-row>
        <table:table-row table:style-name="ro1">
          <table:table-cell office:value-type="float" office:value="638.060119628906">
            <text:p>638.0601196289</text:p>
          </table:table-cell>
          <table:table-cell office:value-type="float" office:value="0.006775135">
            <text:p>0.006775135</text:p>
          </table:table-cell>
          <table:table-cell table:number-columns-repeated="4"/>
        </table:table-row>
        <table:table-row table:style-name="ro1">
          <table:table-cell office:value-type="float" office:value="638.179626464844">
            <text:p>638.1796264648</text:p>
          </table:table-cell>
          <table:table-cell office:value-type="float" office:value="0.0100403">
            <text:p>0.0100403</text:p>
          </table:table-cell>
          <table:table-cell table:number-columns-repeated="4"/>
        </table:table-row>
        <table:table-row table:style-name="ro1">
          <table:table-cell office:value-type="float" office:value="638.299133300781">
            <text:p>638.2991333008</text:p>
          </table:table-cell>
          <table:table-cell office:value-type="float" office:value="0.0260271">
            <text:p>0.0260271</text:p>
          </table:table-cell>
          <table:table-cell table:number-columns-repeated="4"/>
        </table:table-row>
        <table:table-row table:style-name="ro1">
          <table:table-cell office:value-type="float" office:value="638.418640136719">
            <text:p>638.4186401367</text:p>
          </table:table-cell>
          <table:table-cell office:value-type="float" office:value="0.03077059">
            <text:p>0.03077059</text:p>
          </table:table-cell>
          <table:table-cell table:number-columns-repeated="4"/>
        </table:table-row>
        <table:table-row table:style-name="ro1">
          <table:table-cell office:value-type="float" office:value="638.538208007813">
            <text:p>638.5382080078</text:p>
          </table:table-cell>
          <table:table-cell office:value-type="float" office:value="0.01276422">
            <text:p>0.01276422</text:p>
          </table:table-cell>
          <table:table-cell table:number-columns-repeated="4"/>
        </table:table-row>
        <table:table-row table:style-name="ro1">
          <table:table-cell office:value-type="float" office:value="638.65771484375">
            <text:p>638.6577148438</text:p>
          </table:table-cell>
          <table:table-cell office:value-type="float" office:value="0.01293886">
            <text:p>0.01293886</text:p>
          </table:table-cell>
          <table:table-cell table:number-columns-repeated="4"/>
        </table:table-row>
        <table:table-row table:style-name="ro1">
          <table:table-cell office:value-type="float" office:value="638.777221679688">
            <text:p>638.7772216797</text:p>
          </table:table-cell>
          <table:table-cell office:value-type="float" office:value="0.01016296">
            <text:p>0.01016296</text:p>
          </table:table-cell>
          <table:table-cell table:number-columns-repeated="4"/>
        </table:table-row>
        <table:table-row table:style-name="ro1">
          <table:table-cell office:value-type="float" office:value="638.896789550781">
            <text:p>638.8967895508</text:p>
          </table:table-cell>
          <table:table-cell office:value-type="float" office:value="0.02791792">
            <text:p>0.02791792</text:p>
          </table:table-cell>
          <table:table-cell table:number-columns-repeated="4"/>
        </table:table-row>
        <table:table-row table:style-name="ro1">
          <table:table-cell office:value-type="float" office:value="639.016296386719">
            <text:p>639.0162963867</text:p>
          </table:table-cell>
          <table:table-cell office:value-type="float" office:value="0.01707213">
            <text:p>0.01707213</text:p>
          </table:table-cell>
          <table:table-cell table:number-columns-repeated="4"/>
        </table:table-row>
        <table:table-row table:style-name="ro1">
          <table:table-cell office:value-type="float" office:value="639.135864257813">
            <text:p>639.1358642578</text:p>
          </table:table-cell>
          <table:table-cell office:value-type="float" office:value="0.005561402">
            <text:p>0.005561402</text:p>
          </table:table-cell>
          <table:table-cell table:number-columns-repeated="4"/>
        </table:table-row>
        <table:table-row table:style-name="ro1">
          <table:table-cell office:value-type="float" office:value="639.25537109375">
            <text:p>639.2553710938</text:p>
          </table:table-cell>
          <table:table-cell office:value-type="float" office:value="0.01197833">
            <text:p>0.01197833</text:p>
          </table:table-cell>
          <table:table-cell table:number-columns-repeated="4"/>
        </table:table-row>
        <table:table-row table:style-name="ro1">
          <table:table-cell office:value-type="float" office:value="639.374938964844">
            <text:p>639.3749389648</text:p>
          </table:table-cell>
          <table:table-cell office:value-type="float" office:value="0.01798498">
            <text:p>0.01798498</text:p>
          </table:table-cell>
          <table:table-cell table:number-columns-repeated="4"/>
        </table:table-row>
        <table:table-row table:style-name="ro1">
          <table:table-cell office:value-type="float" office:value="639.494445800781">
            <text:p>639.4944458008</text:p>
          </table:table-cell>
          <table:table-cell office:value-type="float" office:value="0.01165694">
            <text:p>0.01165694</text:p>
          </table:table-cell>
          <table:table-cell table:number-columns-repeated="4"/>
        </table:table-row>
        <table:table-row table:style-name="ro1">
          <table:table-cell office:value-type="float" office:value="639.614013671875">
            <text:p>639.6140136719</text:p>
          </table:table-cell>
          <table:table-cell office:value-type="float" office:value="0.01298306">
            <text:p>0.01298306</text:p>
          </table:table-cell>
          <table:table-cell table:number-columns-repeated="4"/>
        </table:table-row>
        <table:table-row table:style-name="ro1">
          <table:table-cell office:value-type="float" office:value="639.733520507813">
            <text:p>639.7335205078</text:p>
          </table:table-cell>
          <table:table-cell office:value-type="float" office:value="0.02803225">
            <text:p>0.02803225</text:p>
          </table:table-cell>
          <table:table-cell table:number-columns-repeated="4"/>
        </table:table-row>
        <table:table-row table:style-name="ro1">
          <table:table-cell office:value-type="float" office:value="639.853088378906">
            <text:p>639.8530883789</text:p>
          </table:table-cell>
          <table:table-cell office:value-type="float" office:value="0.00916707">
            <text:p>0.00916707</text:p>
          </table:table-cell>
          <table:table-cell table:number-columns-repeated="4"/>
        </table:table-row>
        <table:table-row table:style-name="ro1">
          <table:table-cell office:value-type="float" office:value="639.972595214844">
            <text:p>639.9725952148</text:p>
          </table:table-cell>
          <table:table-cell office:value-type="float" office:value="0.02730041">
            <text:p>0.02730041</text:p>
          </table:table-cell>
          <table:table-cell table:number-columns-repeated="4"/>
        </table:table-row>
        <table:table-row table:style-name="ro1">
          <table:table-cell office:value-type="float" office:value="640.092163085938">
            <text:p>640.0921630859</text:p>
          </table:table-cell>
          <table:table-cell office:value-type="float" office:value="0.009518006">
            <text:p>0.009518006</text:p>
          </table:table-cell>
          <table:table-cell table:number-columns-repeated="4"/>
        </table:table-row>
        <table:table-row table:style-name="ro1">
          <table:table-cell office:value-type="float" office:value="640.211730957031">
            <text:p>640.211730957</text:p>
          </table:table-cell>
          <table:table-cell office:value-type="float" office:value="0.02383402">
            <text:p>0.02383402</text:p>
          </table:table-cell>
          <table:table-cell table:number-columns-repeated="4"/>
        </table:table-row>
        <table:table-row table:style-name="ro1">
          <table:table-cell office:value-type="float" office:value="640.331237792969">
            <text:p>640.331237793</text:p>
          </table:table-cell>
          <table:table-cell office:value-type="float" office:value="0.01536084">
            <text:p>0.01536084</text:p>
          </table:table-cell>
          <table:table-cell table:number-columns-repeated="4"/>
        </table:table-row>
        <table:table-row table:style-name="ro1">
          <table:table-cell office:value-type="float" office:value="640.450805664063">
            <text:p>640.4508056641</text:p>
          </table:table-cell>
          <table:table-cell office:value-type="float" office:value="0.008348686">
            <text:p>0.008348686</text:p>
          </table:table-cell>
          <table:table-cell table:number-columns-repeated="4"/>
        </table:table-row>
        <table:table-row table:style-name="ro1">
          <table:table-cell office:value-type="float" office:value="640.570373535156">
            <text:p>640.5703735352</text:p>
          </table:table-cell>
          <table:table-cell office:value-type="float" office:value="0.02218568">
            <text:p>0.02218568</text:p>
          </table:table-cell>
          <table:table-cell table:number-columns-repeated="4"/>
        </table:table-row>
        <table:table-row table:style-name="ro1">
          <table:table-cell office:value-type="float" office:value="640.68994140625">
            <text:p>640.6899414063</text:p>
          </table:table-cell>
          <table:table-cell office:value-type="float" office:value="0.02197701">
            <text:p>0.02197701</text:p>
          </table:table-cell>
          <table:table-cell table:number-columns-repeated="4"/>
        </table:table-row>
        <table:table-row table:style-name="ro1">
          <table:table-cell office:value-type="float" office:value="640.809509277344">
            <text:p>640.8095092773</text:p>
          </table:table-cell>
          <table:table-cell office:value-type="float" office:value="0.009484064">
            <text:p>0.009484064</text:p>
          </table:table-cell>
          <table:table-cell table:number-columns-repeated="4"/>
        </table:table-row>
        <table:table-row table:style-name="ro1">
          <table:table-cell office:value-type="float" office:value="640.929016113281">
            <text:p>640.9290161133</text:p>
          </table:table-cell>
          <table:table-cell office:value-type="float" office:value="0.00481502">
            <text:p>0.00481502</text:p>
          </table:table-cell>
          <table:table-cell table:number-columns-repeated="4"/>
        </table:table-row>
        <table:table-row table:style-name="ro1">
          <table:table-cell office:value-type="float" office:value="641.048583984375">
            <text:p>641.0485839844</text:p>
          </table:table-cell>
          <table:table-cell office:value-type="float" office:value="0.003762783">
            <text:p>0.003762783</text:p>
          </table:table-cell>
          <table:table-cell table:number-columns-repeated="4"/>
        </table:table-row>
        <table:table-row table:style-name="ro1">
          <table:table-cell office:value-type="float" office:value="641.168151855469">
            <text:p>641.1681518555</text:p>
          </table:table-cell>
          <table:table-cell office:value-type="float" office:value="0.009748116">
            <text:p>0.009748116</text:p>
          </table:table-cell>
          <table:table-cell table:number-columns-repeated="4"/>
        </table:table-row>
        <table:table-row table:style-name="ro1">
          <table:table-cell office:value-type="float" office:value="641.287719726563">
            <text:p>641.2877197266</text:p>
          </table:table-cell>
          <table:table-cell office:value-type="float" office:value="0.009486212">
            <text:p>0.009486212</text:p>
          </table:table-cell>
          <table:table-cell table:number-columns-repeated="4"/>
        </table:table-row>
        <table:table-row table:style-name="ro1">
          <table:table-cell office:value-type="float" office:value="641.407287597656">
            <text:p>641.4072875977</text:p>
          </table:table-cell>
          <table:table-cell office:value-type="float" office:value="0.01638396">
            <text:p>0.01638396</text:p>
          </table:table-cell>
          <table:table-cell table:number-columns-repeated="4"/>
        </table:table-row>
        <table:table-row table:style-name="ro1">
          <table:table-cell office:value-type="float" office:value="641.52685546875">
            <text:p>641.5268554688</text:p>
          </table:table-cell>
          <table:table-cell office:value-type="float" office:value="0.02229185">
            <text:p>0.02229185</text:p>
          </table:table-cell>
          <table:table-cell table:number-columns-repeated="4"/>
        </table:table-row>
        <table:table-row table:style-name="ro1">
          <table:table-cell office:value-type="float" office:value="641.646423339844">
            <text:p>641.6464233398</text:p>
          </table:table-cell>
          <table:table-cell office:value-type="float" office:value="0.01382404">
            <text:p>0.01382404</text:p>
          </table:table-cell>
          <table:table-cell table:number-columns-repeated="4"/>
        </table:table-row>
        <table:table-row table:style-name="ro1">
          <table:table-cell office:value-type="float" office:value="641.765991210938">
            <text:p>641.7659912109</text:p>
          </table:table-cell>
          <table:table-cell office:value-type="float" office:value="0.0073965">
            <text:p>0.0073965</text:p>
          </table:table-cell>
          <table:table-cell table:number-columns-repeated="4"/>
        </table:table-row>
        <table:table-row table:style-name="ro1">
          <table:table-cell office:value-type="float" office:value="641.885559082031">
            <text:p>641.885559082</text:p>
          </table:table-cell>
          <table:table-cell office:value-type="float" office:value="0.01770336">
            <text:p>0.01770336</text:p>
          </table:table-cell>
          <table:table-cell table:number-columns-repeated="4"/>
        </table:table-row>
        <table:table-row table:style-name="ro1">
          <table:table-cell office:value-type="float" office:value="642.005126953125">
            <text:p>642.0051269531</text:p>
          </table:table-cell>
          <table:table-cell office:value-type="float" office:value="0.01197971">
            <text:p>0.01197971</text:p>
          </table:table-cell>
          <table:table-cell table:number-columns-repeated="4"/>
        </table:table-row>
        <table:table-row table:style-name="ro1">
          <table:table-cell office:value-type="float" office:value="642.124694824219">
            <text:p>642.1246948242</text:p>
          </table:table-cell>
          <table:table-cell office:value-type="float" office:value="0.01505588">
            <text:p>0.01505588</text:p>
          </table:table-cell>
          <table:table-cell table:number-columns-repeated="4"/>
        </table:table-row>
        <table:table-row table:style-name="ro1">
          <table:table-cell office:value-type="float" office:value="642.244262695313">
            <text:p>642.2442626953</text:p>
          </table:table-cell>
          <table:table-cell office:value-type="float" office:value="0.009326585">
            <text:p>0.009326585</text:p>
          </table:table-cell>
          <table:table-cell table:number-columns-repeated="4"/>
        </table:table-row>
        <table:table-row table:style-name="ro1">
          <table:table-cell office:value-type="float" office:value="642.363891601563">
            <text:p>642.3638916016</text:p>
          </table:table-cell>
          <table:table-cell office:value-type="float" office:value="0.006517395">
            <text:p>0.006517395</text:p>
          </table:table-cell>
          <table:table-cell table:number-columns-repeated="4"/>
        </table:table-row>
        <table:table-row table:style-name="ro1">
          <table:table-cell office:value-type="float" office:value="642.483459472656">
            <text:p>642.4834594727</text:p>
          </table:table-cell>
          <table:table-cell office:value-type="float" office:value="0.009648594">
            <text:p>0.009648594</text:p>
          </table:table-cell>
          <table:table-cell table:number-columns-repeated="4"/>
        </table:table-row>
        <table:table-row table:style-name="ro1">
          <table:table-cell office:value-type="float" office:value="642.60302734375">
            <text:p>642.6030273438</text:p>
          </table:table-cell>
          <table:table-cell office:value-type="float" office:value="0.0214447">
            <text:p>0.0214447</text:p>
          </table:table-cell>
          <table:table-cell table:number-columns-repeated="4"/>
        </table:table-row>
        <table:table-row table:style-name="ro1">
          <table:table-cell office:value-type="float" office:value="642.722595214844">
            <text:p>642.7225952148</text:p>
          </table:table-cell>
          <table:table-cell office:value-type="float" office:value="0.005993021">
            <text:p>0.005993021</text:p>
          </table:table-cell>
          <table:table-cell table:number-columns-repeated="4"/>
        </table:table-row>
        <table:table-row table:style-name="ro1">
          <table:table-cell office:value-type="float" office:value="642.842163085938">
            <text:p>642.8421630859</text:p>
          </table:table-cell>
          <table:table-cell office:value-type="float" office:value="0.008433709">
            <text:p>0.008433709</text:p>
          </table:table-cell>
          <table:table-cell table:number-columns-repeated="4"/>
        </table:table-row>
        <table:table-row table:style-name="ro1">
          <table:table-cell office:value-type="float" office:value="642.961791992188">
            <text:p>642.9617919922</text:p>
          </table:table-cell>
          <table:table-cell office:value-type="float" office:value="0.01251213">
            <text:p>0.01251213</text:p>
          </table:table-cell>
          <table:table-cell table:number-columns-repeated="4"/>
        </table:table-row>
        <table:table-row table:style-name="ro1">
          <table:table-cell office:value-type="float" office:value="643.081359863281">
            <text:p>643.0813598633</text:p>
          </table:table-cell>
          <table:table-cell office:value-type="float" office:value="0.01948664">
            <text:p>0.01948664</text:p>
          </table:table-cell>
          <table:table-cell table:number-columns-repeated="4"/>
        </table:table-row>
        <table:table-row table:style-name="ro1">
          <table:table-cell office:value-type="float" office:value="643.200927734375">
            <text:p>643.2009277344</text:p>
          </table:table-cell>
          <table:table-cell office:value-type="float" office:value="0.01495615">
            <text:p>0.01495615</text:p>
          </table:table-cell>
          <table:table-cell table:number-columns-repeated="4"/>
        </table:table-row>
        <table:table-row table:style-name="ro1">
          <table:table-cell office:value-type="float" office:value="643.320556640625">
            <text:p>643.3205566406</text:p>
          </table:table-cell>
          <table:table-cell office:value-type="float" office:value="0.01192508">
            <text:p>0.01192508</text:p>
          </table:table-cell>
          <table:table-cell table:number-columns-repeated="4"/>
        </table:table-row>
        <table:table-row table:style-name="ro1">
          <table:table-cell office:value-type="float" office:value="643.440124511719">
            <text:p>643.4401245117</text:p>
          </table:table-cell>
          <table:table-cell office:value-type="float" office:value="0.02295241">
            <text:p>0.02295241</text:p>
          </table:table-cell>
          <table:table-cell table:number-columns-repeated="4"/>
        </table:table-row>
        <table:table-row table:style-name="ro1">
          <table:table-cell office:value-type="float" office:value="643.559753417969">
            <text:p>643.559753418</text:p>
          </table:table-cell>
          <table:table-cell office:value-type="float" office:value="0.02055751">
            <text:p>0.02055751</text:p>
          </table:table-cell>
          <table:table-cell table:number-columns-repeated="4"/>
        </table:table-row>
        <table:table-row table:style-name="ro1">
          <table:table-cell office:value-type="float" office:value="643.679321289063">
            <text:p>643.6793212891</text:p>
          </table:table-cell>
          <table:table-cell office:value-type="float" office:value="0.01808125">
            <text:p>0.01808125</text:p>
          </table:table-cell>
          <table:table-cell table:number-columns-repeated="4"/>
        </table:table-row>
        <table:table-row table:style-name="ro1">
          <table:table-cell office:value-type="float" office:value="643.798950195313">
            <text:p>643.7989501953</text:p>
          </table:table-cell>
          <table:table-cell office:value-type="float" office:value="0.01392087">
            <text:p>0.01392087</text:p>
          </table:table-cell>
          <table:table-cell table:number-columns-repeated="4"/>
        </table:table-row>
        <table:table-row table:style-name="ro1">
          <table:table-cell office:value-type="float" office:value="643.918518066406">
            <text:p>643.9185180664</text:p>
          </table:table-cell>
          <table:table-cell office:value-type="float" office:value="0.01152434">
            <text:p>0.01152434</text:p>
          </table:table-cell>
          <table:table-cell table:number-columns-repeated="4"/>
        </table:table-row>
        <table:table-row table:style-name="ro1">
          <table:table-cell office:value-type="float" office:value="644.038146972656">
            <text:p>644.0381469727</text:p>
          </table:table-cell>
          <table:table-cell office:value-type="float" office:value="0.02920769">
            <text:p>0.02920769</text:p>
          </table:table-cell>
          <table:table-cell table:number-columns-repeated="4"/>
        </table:table-row>
        <table:table-row table:style-name="ro1">
          <table:table-cell office:value-type="float" office:value="644.15771484375">
            <text:p>644.1577148438</text:p>
          </table:table-cell>
          <table:table-cell office:value-type="float" office:value="0.007047941">
            <text:p>0.007047941</text:p>
          </table:table-cell>
          <table:table-cell table:number-columns-repeated="4"/>
        </table:table-row>
        <table:table-row table:style-name="ro1">
          <table:table-cell office:value-type="float" office:value="644.27734375">
            <text:p>644.27734375</text:p>
          </table:table-cell>
          <table:table-cell office:value-type="float" office:value="0.007786313">
            <text:p>0.007786313</text:p>
          </table:table-cell>
          <table:table-cell table:number-columns-repeated="4"/>
        </table:table-row>
        <table:table-row table:style-name="ro1">
          <table:table-cell office:value-type="float" office:value="644.396911621094">
            <text:p>644.3969116211</text:p>
          </table:table-cell>
          <table:table-cell office:value-type="float" office:value="0.01009622">
            <text:p>0.01009622</text:p>
          </table:table-cell>
          <table:table-cell table:number-columns-repeated="4"/>
        </table:table-row>
        <table:table-row table:style-name="ro1">
          <table:table-cell office:value-type="float" office:value="644.516540527344">
            <text:p>644.5165405273</text:p>
          </table:table-cell>
          <table:table-cell office:value-type="float" office:value="0.01041627">
            <text:p>0.01041627</text:p>
          </table:table-cell>
          <table:table-cell table:number-columns-repeated="4"/>
        </table:table-row>
        <table:table-row table:style-name="ro1">
          <table:table-cell office:value-type="float" office:value="644.636169433594">
            <text:p>644.6361694336</text:p>
          </table:table-cell>
          <table:table-cell office:value-type="float" office:value="0.00742475">
            <text:p>0.00742475</text:p>
          </table:table-cell>
          <table:table-cell table:number-columns-repeated="4"/>
        </table:table-row>
        <table:table-row table:style-name="ro1">
          <table:table-cell office:value-type="float" office:value="644.755737304688">
            <text:p>644.7557373047</text:p>
          </table:table-cell>
          <table:table-cell office:value-type="float" office:value="0.00922719">
            <text:p>0.00922719</text:p>
          </table:table-cell>
          <table:table-cell table:number-columns-repeated="4"/>
        </table:table-row>
        <table:table-row table:style-name="ro1">
          <table:table-cell office:value-type="float" office:value="644.875366210938">
            <text:p>644.8753662109</text:p>
          </table:table-cell>
          <table:table-cell office:value-type="float" office:value="0.01832531">
            <text:p>0.01832531</text:p>
          </table:table-cell>
          <table:table-cell table:number-columns-repeated="4"/>
        </table:table-row>
        <table:table-row table:style-name="ro1">
          <table:table-cell office:value-type="float" office:value="644.994995117188">
            <text:p>644.9949951172</text:p>
          </table:table-cell>
          <table:table-cell office:value-type="float" office:value="0.01735078">
            <text:p>0.01735078</text:p>
          </table:table-cell>
          <table:table-cell table:number-columns-repeated="4"/>
        </table:table-row>
        <table:table-row table:style-name="ro1">
          <table:table-cell office:value-type="float" office:value="645.114562988281">
            <text:p>645.1145629883</text:p>
          </table:table-cell>
          <table:table-cell office:value-type="float" office:value="0.02159862">
            <text:p>0.02159862</text:p>
          </table:table-cell>
          <table:table-cell table:number-columns-repeated="4"/>
        </table:table-row>
        <table:table-row table:style-name="ro1">
          <table:table-cell office:value-type="float" office:value="645.234191894531">
            <text:p>645.2341918945</text:p>
          </table:table-cell>
          <table:table-cell office:value-type="float" office:value="0.02022279">
            <text:p>0.02022279</text:p>
          </table:table-cell>
          <table:table-cell table:number-columns-repeated="4"/>
        </table:table-row>
        <table:table-row table:style-name="ro1">
          <table:table-cell office:value-type="float" office:value="645.353820800781">
            <text:p>645.3538208008</text:p>
          </table:table-cell>
          <table:table-cell office:value-type="float" office:value="0.01185116">
            <text:p>0.01185116</text:p>
          </table:table-cell>
          <table:table-cell table:number-columns-repeated="4"/>
        </table:table-row>
        <table:table-row table:style-name="ro1">
          <table:table-cell office:value-type="float" office:value="645.473449707031">
            <text:p>645.473449707</text:p>
          </table:table-cell>
          <table:table-cell office:value-type="float" office:value="0.007733388">
            <text:p>0.007733388</text:p>
          </table:table-cell>
          <table:table-cell table:number-columns-repeated="4"/>
        </table:table-row>
        <table:table-row table:style-name="ro1">
          <table:table-cell office:value-type="float" office:value="645.593078613281">
            <text:p>645.5930786133</text:p>
          </table:table-cell>
          <table:table-cell office:value-type="float" office:value="0.01160151">
            <text:p>0.01160151</text:p>
          </table:table-cell>
          <table:table-cell table:number-columns-repeated="4"/>
        </table:table-row>
        <table:table-row table:style-name="ro1">
          <table:table-cell office:value-type="float" office:value="645.712707519531">
            <text:p>645.7127075195</text:p>
          </table:table-cell>
          <table:table-cell office:value-type="float" office:value="0.009643889">
            <text:p>0.009643889</text:p>
          </table:table-cell>
          <table:table-cell table:number-columns-repeated="4"/>
        </table:table-row>
        <table:table-row table:style-name="ro1">
          <table:table-cell office:value-type="float" office:value="645.832336425781">
            <text:p>645.8323364258</text:p>
          </table:table-cell>
          <table:table-cell office:value-type="float" office:value="0.007874063">
            <text:p>0.007874063</text:p>
          </table:table-cell>
          <table:table-cell table:number-columns-repeated="4"/>
        </table:table-row>
        <table:table-row table:style-name="ro1">
          <table:table-cell office:value-type="float" office:value="645.951965332031">
            <text:p>645.951965332</text:p>
          </table:table-cell>
          <table:table-cell office:value-type="float" office:value="0.01110637">
            <text:p>0.01110637</text:p>
          </table:table-cell>
          <table:table-cell table:number-columns-repeated="4"/>
        </table:table-row>
        <table:table-row table:style-name="ro1">
          <table:table-cell office:value-type="float" office:value="646.071533203125">
            <text:p>646.0715332031</text:p>
          </table:table-cell>
          <table:table-cell office:value-type="float" office:value="0.009011791">
            <text:p>0.009011791</text:p>
          </table:table-cell>
          <table:table-cell table:number-columns-repeated="4"/>
        </table:table-row>
        <table:table-row table:style-name="ro1">
          <table:table-cell office:value-type="float" office:value="646.191162109375">
            <text:p>646.1911621094</text:p>
          </table:table-cell>
          <table:table-cell office:value-type="float" office:value="0.005492138">
            <text:p>0.005492138</text:p>
          </table:table-cell>
          <table:table-cell table:number-columns-repeated="4"/>
        </table:table-row>
        <table:table-row table:style-name="ro1">
          <table:table-cell office:value-type="float" office:value="646.310852050781">
            <text:p>646.3108520508</text:p>
          </table:table-cell>
          <table:table-cell office:value-type="float" office:value="0.01880645">
            <text:p>0.01880645</text:p>
          </table:table-cell>
          <table:table-cell table:number-columns-repeated="4"/>
        </table:table-row>
        <table:table-row table:style-name="ro1">
          <table:table-cell office:value-type="float" office:value="646.430480957031">
            <text:p>646.430480957</text:p>
          </table:table-cell>
          <table:table-cell office:value-type="float" office:value="0.01357764">
            <text:p>0.01357764</text:p>
          </table:table-cell>
          <table:table-cell table:number-columns-repeated="4"/>
        </table:table-row>
        <table:table-row table:style-name="ro1">
          <table:table-cell office:value-type="float" office:value="646.550109863281">
            <text:p>646.5501098633</text:p>
          </table:table-cell>
          <table:table-cell office:value-type="float" office:value="0.022031">
            <text:p>0.022031</text:p>
          </table:table-cell>
          <table:table-cell table:number-columns-repeated="4"/>
        </table:table-row>
        <table:table-row table:style-name="ro1">
          <table:table-cell office:value-type="float" office:value="646.669738769531">
            <text:p>646.6697387695</text:p>
          </table:table-cell>
          <table:table-cell office:value-type="float" office:value="0.009447058">
            <text:p>0.009447058</text:p>
          </table:table-cell>
          <table:table-cell table:number-columns-repeated="4"/>
        </table:table-row>
        <table:table-row table:style-name="ro1">
          <table:table-cell office:value-type="float" office:value="646.789367675781">
            <text:p>646.7893676758</text:p>
          </table:table-cell>
          <table:table-cell office:value-type="float" office:value="0.01553441">
            <text:p>0.01553441</text:p>
          </table:table-cell>
          <table:table-cell table:number-columns-repeated="4"/>
        </table:table-row>
        <table:table-row table:style-name="ro1">
          <table:table-cell office:value-type="float" office:value="646.908996582031">
            <text:p>646.908996582</text:p>
          </table:table-cell>
          <table:table-cell office:value-type="float" office:value="0.03406433">
            <text:p>0.03406433</text:p>
          </table:table-cell>
          <table:table-cell table:number-columns-repeated="4"/>
        </table:table-row>
        <table:table-row table:style-name="ro1">
          <table:table-cell office:value-type="float" office:value="647.028625488281">
            <text:p>647.0286254883</text:p>
          </table:table-cell>
          <table:table-cell office:value-type="float" office:value="0.01570442">
            <text:p>0.01570442</text:p>
          </table:table-cell>
          <table:table-cell table:number-columns-repeated="4"/>
        </table:table-row>
        <table:table-row table:style-name="ro1">
          <table:table-cell office:value-type="float" office:value="647.148254394531">
            <text:p>647.1482543945</text:p>
          </table:table-cell>
          <table:table-cell office:value-type="float" office:value="0.009819253">
            <text:p>0.009819253</text:p>
          </table:table-cell>
          <table:table-cell table:number-columns-repeated="4"/>
        </table:table-row>
        <table:table-row table:style-name="ro1">
          <table:table-cell office:value-type="float" office:value="647.267944335938">
            <text:p>647.2679443359</text:p>
          </table:table-cell>
          <table:table-cell office:value-type="float" office:value="0.009339041">
            <text:p>0.009339041</text:p>
          </table:table-cell>
          <table:table-cell table:number-columns-repeated="4"/>
        </table:table-row>
        <table:table-row table:style-name="ro1">
          <table:table-cell office:value-type="float" office:value="647.387573242188">
            <text:p>647.3875732422</text:p>
          </table:table-cell>
          <table:table-cell office:value-type="float" office:value="0.01641373">
            <text:p>0.01641373</text:p>
          </table:table-cell>
          <table:table-cell table:number-columns-repeated="4"/>
        </table:table-row>
        <table:table-row table:style-name="ro1">
          <table:table-cell office:value-type="float" office:value="647.507202148438">
            <text:p>647.5072021484</text:p>
          </table:table-cell>
          <table:table-cell office:value-type="float" office:value="0.008152044">
            <text:p>0.008152044</text:p>
          </table:table-cell>
          <table:table-cell table:number-columns-repeated="4"/>
        </table:table-row>
        <table:table-row table:style-name="ro1">
          <table:table-cell office:value-type="float" office:value="647.626831054688">
            <text:p>647.6268310547</text:p>
          </table:table-cell>
          <table:table-cell office:value-type="float" office:value="0.01364138">
            <text:p>0.01364138</text:p>
          </table:table-cell>
          <table:table-cell table:number-columns-repeated="4"/>
        </table:table-row>
        <table:table-row table:style-name="ro1">
          <table:table-cell office:value-type="float" office:value="647.746520996094">
            <text:p>647.7465209961</text:p>
          </table:table-cell>
          <table:table-cell office:value-type="float" office:value="0.0343439">
            <text:p>0.0343439</text:p>
          </table:table-cell>
          <table:table-cell table:number-columns-repeated="4"/>
        </table:table-row>
        <table:table-row table:style-name="ro1">
          <table:table-cell office:value-type="float" office:value="647.866149902344">
            <text:p>647.8661499023</text:p>
          </table:table-cell>
          <table:table-cell office:value-type="float" office:value="0.005412236">
            <text:p>0.005412236</text:p>
          </table:table-cell>
          <table:table-cell table:number-columns-repeated="4"/>
        </table:table-row>
        <table:table-row table:style-name="ro1">
          <table:table-cell office:value-type="float" office:value="647.985778808594">
            <text:p>647.9857788086</text:p>
          </table:table-cell>
          <table:table-cell office:value-type="float" office:value="0.03209849">
            <text:p>0.03209849</text:p>
          </table:table-cell>
          <table:table-cell table:number-columns-repeated="4"/>
        </table:table-row>
        <table:table-row table:style-name="ro1">
          <table:table-cell office:value-type="float" office:value="648.10546875">
            <text:p>648.10546875</text:p>
          </table:table-cell>
          <table:table-cell office:value-type="float" office:value="0.004428993">
            <text:p>0.004428993</text:p>
          </table:table-cell>
          <table:table-cell table:number-columns-repeated="4"/>
        </table:table-row>
        <table:table-row table:style-name="ro1">
          <table:table-cell office:value-type="float" office:value="648.22509765625">
            <text:p>648.2250976563</text:p>
          </table:table-cell>
          <table:table-cell office:value-type="float" office:value="0.02855555">
            <text:p>0.02855555</text:p>
          </table:table-cell>
          <table:table-cell table:number-columns-repeated="4"/>
        </table:table-row>
        <table:table-row table:style-name="ro1">
          <table:table-cell office:value-type="float" office:value="648.344787597656">
            <text:p>648.3447875977</text:p>
          </table:table-cell>
          <table:table-cell office:value-type="float" office:value="0.01893536">
            <text:p>0.01893536</text:p>
          </table:table-cell>
          <table:table-cell table:number-columns-repeated="4"/>
        </table:table-row>
        <table:table-row table:style-name="ro1">
          <table:table-cell office:value-type="float" office:value="648.464416503906">
            <text:p>648.4644165039</text:p>
          </table:table-cell>
          <table:table-cell office:value-type="float" office:value="0.01064019">
            <text:p>0.01064019</text:p>
          </table:table-cell>
          <table:table-cell table:number-columns-repeated="4"/>
        </table:table-row>
        <table:table-row table:style-name="ro1">
          <table:table-cell office:value-type="float" office:value="648.584106445313">
            <text:p>648.5841064453</text:p>
          </table:table-cell>
          <table:table-cell office:value-type="float" office:value="0.01293576">
            <text:p>0.01293576</text:p>
          </table:table-cell>
          <table:table-cell table:number-columns-repeated="4"/>
        </table:table-row>
        <table:table-row table:style-name="ro1">
          <table:table-cell office:value-type="float" office:value="648.703735351563">
            <text:p>648.7037353516</text:p>
          </table:table-cell>
          <table:table-cell office:value-type="float" office:value="0.01149327">
            <text:p>0.01149327</text:p>
          </table:table-cell>
          <table:table-cell table:number-columns-repeated="4"/>
        </table:table-row>
        <table:table-row table:style-name="ro1">
          <table:table-cell office:value-type="float" office:value="648.823425292969">
            <text:p>648.823425293</text:p>
          </table:table-cell>
          <table:table-cell office:value-type="float" office:value="0.00180805">
            <text:p>0.00180805</text:p>
          </table:table-cell>
          <table:table-cell table:number-columns-repeated="4"/>
        </table:table-row>
        <table:table-row table:style-name="ro1">
          <table:table-cell office:value-type="float" office:value="648.943054199219">
            <text:p>648.9430541992</text:p>
          </table:table-cell>
          <table:table-cell office:value-type="float" office:value="0.006927279">
            <text:p>0.006927279</text:p>
          </table:table-cell>
          <table:table-cell table:number-columns-repeated="4"/>
        </table:table-row>
        <table:table-row table:style-name="ro1">
          <table:table-cell office:value-type="float" office:value="649.062744140625">
            <text:p>649.0627441406</text:p>
          </table:table-cell>
          <table:table-cell office:value-type="float" office:value="0.009974322">
            <text:p>0.009974322</text:p>
          </table:table-cell>
          <table:table-cell table:number-columns-repeated="4"/>
        </table:table-row>
        <table:table-row table:style-name="ro1">
          <table:table-cell office:value-type="float" office:value="649.182434082031">
            <text:p>649.182434082</text:p>
          </table:table-cell>
          <table:table-cell office:value-type="float" office:value="0.01137186">
            <text:p>0.01137186</text:p>
          </table:table-cell>
          <table:table-cell table:number-columns-repeated="4"/>
        </table:table-row>
        <table:table-row table:style-name="ro1">
          <table:table-cell office:value-type="float" office:value="649.302062988281">
            <text:p>649.3020629883</text:p>
          </table:table-cell>
          <table:table-cell office:value-type="float" office:value="0.01554557">
            <text:p>0.01554557</text:p>
          </table:table-cell>
          <table:table-cell table:number-columns-repeated="4"/>
        </table:table-row>
        <table:table-row table:style-name="ro1">
          <table:table-cell office:value-type="float" office:value="649.421752929688">
            <text:p>649.4217529297</text:p>
          </table:table-cell>
          <table:table-cell office:value-type="float" office:value="0.00349764">
            <text:p>0.00349764</text:p>
          </table:table-cell>
          <table:table-cell table:number-columns-repeated="4"/>
        </table:table-row>
        <table:table-row table:style-name="ro1">
          <table:table-cell office:value-type="float" office:value="649.541442871094">
            <text:p>649.5414428711</text:p>
          </table:table-cell>
          <table:table-cell office:value-type="float" office:value="0.008563156">
            <text:p>0.008563156</text:p>
          </table:table-cell>
          <table:table-cell table:number-columns-repeated="4"/>
        </table:table-row>
        <table:table-row table:style-name="ro1">
          <table:table-cell office:value-type="float" office:value="649.661071777344">
            <text:p>649.6610717773</text:p>
          </table:table-cell>
          <table:table-cell office:value-type="float" office:value="0.02639361">
            <text:p>0.02639361</text:p>
          </table:table-cell>
          <table:table-cell table:number-columns-repeated="4"/>
        </table:table-row>
        <table:table-row table:style-name="ro1">
          <table:table-cell office:value-type="float" office:value="649.78076171875">
            <text:p>649.7807617188</text:p>
          </table:table-cell>
          <table:table-cell office:value-type="float" office:value="0.01319897">
            <text:p>0.01319897</text:p>
          </table:table-cell>
          <table:table-cell table:number-columns-repeated="4"/>
        </table:table-row>
        <table:table-row table:style-name="ro1">
          <table:table-cell office:value-type="float" office:value="649.900451660156">
            <text:p>649.9004516602</text:p>
          </table:table-cell>
          <table:table-cell office:value-type="float" office:value="0.01429285">
            <text:p>0.01429285</text:p>
          </table:table-cell>
          <table:table-cell table:number-columns-repeated="4"/>
        </table:table-row>
        <table:table-row table:style-name="ro1">
          <table:table-cell office:value-type="float" office:value="650.020141601563">
            <text:p>650.0201416016</text:p>
          </table:table-cell>
          <table:table-cell office:value-type="float" office:value="0.006524263">
            <text:p>0.006524263</text:p>
          </table:table-cell>
          <table:table-cell table:number-columns-repeated="4"/>
        </table:table-row>
        <table:table-row table:style-name="ro1">
          <table:table-cell office:value-type="float" office:value="650.139770507813">
            <text:p>650.1397705078</text:p>
          </table:table-cell>
          <table:table-cell office:value-type="float" office:value="0.003135681">
            <text:p>0.003135681</text:p>
          </table:table-cell>
          <table:table-cell table:number-columns-repeated="4"/>
        </table:table-row>
        <table:table-row table:style-name="ro1">
          <table:table-cell office:value-type="float" office:value="650.259460449219">
            <text:p>650.2594604492</text:p>
          </table:table-cell>
          <table:table-cell office:value-type="float" office:value="0.004681697">
            <text:p>0.004681697</text:p>
          </table:table-cell>
          <table:table-cell table:number-columns-repeated="4"/>
        </table:table-row>
        <table:table-row table:style-name="ro1">
          <table:table-cell office:value-type="float" office:value="650.379150390625">
            <text:p>650.3791503906</text:p>
          </table:table-cell>
          <table:table-cell office:value-type="float" office:value="0.009900994">
            <text:p>0.009900994</text:p>
          </table:table-cell>
          <table:table-cell table:number-columns-repeated="4"/>
        </table:table-row>
        <table:table-row table:style-name="ro1">
          <table:table-cell office:value-type="float" office:value="650.498840332031">
            <text:p>650.498840332</text:p>
          </table:table-cell>
          <table:table-cell office:value-type="float" office:value="0.00667154">
            <text:p>0.00667154</text:p>
          </table:table-cell>
          <table:table-cell table:number-columns-repeated="4"/>
        </table:table-row>
        <table:table-row table:style-name="ro1">
          <table:table-cell office:value-type="float" office:value="650.618530273438">
            <text:p>650.6185302734</text:p>
          </table:table-cell>
          <table:table-cell office:value-type="float" office:value="0.01489992">
            <text:p>0.01489992</text:p>
          </table:table-cell>
          <table:table-cell table:number-columns-repeated="4"/>
        </table:table-row>
        <table:table-row table:style-name="ro1">
          <table:table-cell office:value-type="float" office:value="650.738220214844">
            <text:p>650.7382202148</text:p>
          </table:table-cell>
          <table:table-cell office:value-type="float" office:value="0.008544273">
            <text:p>0.008544273</text:p>
          </table:table-cell>
          <table:table-cell table:number-columns-repeated="4"/>
        </table:table-row>
        <table:table-row table:style-name="ro1">
          <table:table-cell office:value-type="float" office:value="650.85791015625">
            <text:p>650.8579101563</text:p>
          </table:table-cell>
          <table:table-cell office:value-type="float" office:value="0.01606521">
            <text:p>0.01606521</text:p>
          </table:table-cell>
          <table:table-cell table:number-columns-repeated="4"/>
        </table:table-row>
        <table:table-row table:style-name="ro1">
          <table:table-cell office:value-type="float" office:value="650.977600097656">
            <text:p>650.9776000977</text:p>
          </table:table-cell>
          <table:table-cell office:value-type="float" office:value="0.01735676">
            <text:p>0.01735676</text:p>
          </table:table-cell>
          <table:table-cell table:number-columns-repeated="4"/>
        </table:table-row>
        <table:table-row table:style-name="ro1">
          <table:table-cell office:value-type="float" office:value="651.097290039063">
            <text:p>651.0972900391</text:p>
          </table:table-cell>
          <table:table-cell office:value-type="float" office:value="0.01044392">
            <text:p>0.01044392</text:p>
          </table:table-cell>
          <table:table-cell table:number-columns-repeated="4"/>
        </table:table-row>
        <table:table-row table:style-name="ro1">
          <table:table-cell office:value-type="float" office:value="651.216979980469">
            <text:p>651.2169799805</text:p>
          </table:table-cell>
          <table:table-cell office:value-type="float" office:value="0.01879257">
            <text:p>0.01879257</text:p>
          </table:table-cell>
          <table:table-cell table:number-columns-repeated="4"/>
        </table:table-row>
        <table:table-row table:style-name="ro1">
          <table:table-cell office:value-type="float" office:value="651.336669921875">
            <text:p>651.3366699219</text:p>
          </table:table-cell>
          <table:table-cell office:value-type="float" office:value="0.009100829">
            <text:p>0.009100829</text:p>
          </table:table-cell>
          <table:table-cell table:number-columns-repeated="4"/>
        </table:table-row>
        <table:table-row table:style-name="ro1">
          <table:table-cell office:value-type="float" office:value="651.456359863281">
            <text:p>651.4563598633</text:p>
          </table:table-cell>
          <table:table-cell office:value-type="float" office:value="0.008684131">
            <text:p>0.008684131</text:p>
          </table:table-cell>
          <table:table-cell table:number-columns-repeated="4"/>
        </table:table-row>
        <table:table-row table:style-name="ro1">
          <table:table-cell office:value-type="float" office:value="651.576049804688">
            <text:p>651.5760498047</text:p>
          </table:table-cell>
          <table:table-cell office:value-type="float" office:value="0.007338663">
            <text:p>0.007338663</text:p>
          </table:table-cell>
          <table:table-cell table:number-columns-repeated="4"/>
        </table:table-row>
        <table:table-row table:style-name="ro1">
          <table:table-cell office:value-type="float" office:value="651.695739746094">
            <text:p>651.6957397461</text:p>
          </table:table-cell>
          <table:table-cell office:value-type="float" office:value="0.01521735">
            <text:p>0.01521735</text:p>
          </table:table-cell>
          <table:table-cell table:number-columns-repeated="4"/>
        </table:table-row>
        <table:table-row table:style-name="ro1">
          <table:table-cell office:value-type="float" office:value="651.8154296875">
            <text:p>651.8154296875</text:p>
          </table:table-cell>
          <table:table-cell office:value-type="float" office:value="0.008011017">
            <text:p>0.008011017</text:p>
          </table:table-cell>
          <table:table-cell table:number-columns-repeated="4"/>
        </table:table-row>
        <table:table-row table:style-name="ro1">
          <table:table-cell office:value-type="float" office:value="651.935180664063">
            <text:p>651.9351806641</text:p>
          </table:table-cell>
          <table:table-cell office:value-type="float" office:value="0.004545773">
            <text:p>0.004545773</text:p>
          </table:table-cell>
          <table:table-cell table:number-columns-repeated="4"/>
        </table:table-row>
        <table:table-row table:style-name="ro1">
          <table:table-cell office:value-type="float" office:value="652.054870605469">
            <text:p>652.0548706055</text:p>
          </table:table-cell>
          <table:table-cell office:value-type="float" office:value="0.01234863">
            <text:p>0.01234863</text:p>
          </table:table-cell>
          <table:table-cell table:number-columns-repeated="4"/>
        </table:table-row>
        <table:table-row table:style-name="ro1">
          <table:table-cell office:value-type="float" office:value="652.174560546875">
            <text:p>652.1745605469</text:p>
          </table:table-cell>
          <table:table-cell office:value-type="float" office:value="0.006108941">
            <text:p>0.006108941</text:p>
          </table:table-cell>
          <table:table-cell table:number-columns-repeated="4"/>
        </table:table-row>
        <table:table-row table:style-name="ro1">
          <table:table-cell office:value-type="float" office:value="652.294250488281">
            <text:p>652.2942504883</text:p>
          </table:table-cell>
          <table:table-cell office:value-type="float" office:value="0.007348798">
            <text:p>0.007348798</text:p>
          </table:table-cell>
          <table:table-cell table:number-columns-repeated="4"/>
        </table:table-row>
        <table:table-row table:style-name="ro1">
          <table:table-cell office:value-type="float" office:value="652.414001464844">
            <text:p>652.4140014648</text:p>
          </table:table-cell>
          <table:table-cell office:value-type="float" office:value="0.01240748">
            <text:p>0.01240748</text:p>
          </table:table-cell>
          <table:table-cell table:number-columns-repeated="4"/>
        </table:table-row>
        <table:table-row table:style-name="ro1">
          <table:table-cell office:value-type="float" office:value="652.53369140625">
            <text:p>652.5336914063</text:p>
          </table:table-cell>
          <table:table-cell office:value-type="float" office:value="0.003166447">
            <text:p>0.003166447</text:p>
          </table:table-cell>
          <table:table-cell table:number-columns-repeated="4"/>
        </table:table-row>
        <table:table-row table:style-name="ro1">
          <table:table-cell office:value-type="float" office:value="652.653381347656">
            <text:p>652.6533813477</text:p>
          </table:table-cell>
          <table:table-cell office:value-type="float" office:value="0.009203493">
            <text:p>0.009203493</text:p>
          </table:table-cell>
          <table:table-cell table:number-columns-repeated="4"/>
        </table:table-row>
        <table:table-row table:style-name="ro1">
          <table:table-cell office:value-type="float" office:value="652.773071289063">
            <text:p>652.7730712891</text:p>
          </table:table-cell>
          <table:table-cell office:value-type="float" office:value="0.002114973">
            <text:p>0.002114973</text:p>
          </table:table-cell>
          <table:table-cell table:number-columns-repeated="4"/>
        </table:table-row>
        <table:table-row table:style-name="ro1">
          <table:table-cell office:value-type="float" office:value="652.892822265625">
            <text:p>652.8928222656</text:p>
          </table:table-cell>
          <table:table-cell office:value-type="float" office:value="0.01385681">
            <text:p>0.01385681</text:p>
          </table:table-cell>
          <table:table-cell table:number-columns-repeated="4"/>
        </table:table-row>
        <table:table-row table:style-name="ro1">
          <table:table-cell office:value-type="float" office:value="653.012512207031">
            <text:p>653.012512207</text:p>
          </table:table-cell>
          <table:table-cell office:value-type="float" office:value="0.005023973">
            <text:p>0.005023973</text:p>
          </table:table-cell>
          <table:table-cell table:number-columns-repeated="4"/>
        </table:table-row>
        <table:table-row table:style-name="ro1">
          <table:table-cell office:value-type="float" office:value="653.132263183594">
            <text:p>653.1322631836</text:p>
          </table:table-cell>
          <table:table-cell office:value-type="float" office:value="0.01218543">
            <text:p>0.01218543</text:p>
          </table:table-cell>
          <table:table-cell table:number-columns-repeated="4"/>
        </table:table-row>
        <table:table-row table:style-name="ro1">
          <table:table-cell office:value-type="float" office:value="653.251953125">
            <text:p>653.251953125</text:p>
          </table:table-cell>
          <table:table-cell office:value-type="float" office:value="0.004135324">
            <text:p>0.004135324</text:p>
          </table:table-cell>
          <table:table-cell table:number-columns-repeated="4"/>
        </table:table-row>
        <table:table-row table:style-name="ro1">
          <table:table-cell office:value-type="float" office:value="653.371704101563">
            <text:p>653.3717041016</text:p>
          </table:table-cell>
          <table:table-cell office:value-type="float" office:value="0.01129009">
            <text:p>0.01129009</text:p>
          </table:table-cell>
          <table:table-cell table:number-columns-repeated="4"/>
        </table:table-row>
        <table:table-row table:style-name="ro1">
          <table:table-cell office:value-type="float" office:value="653.491394042969">
            <text:p>653.491394043</text:p>
          </table:table-cell>
          <table:table-cell office:value-type="float" office:value="0.02567399">
            <text:p>0.02567399</text:p>
          </table:table-cell>
          <table:table-cell table:number-columns-repeated="4"/>
        </table:table-row>
        <table:table-row table:style-name="ro1">
          <table:table-cell office:value-type="float" office:value="653.611145019531">
            <text:p>653.6111450195</text:p>
          </table:table-cell>
          <table:table-cell office:value-type="float" office:value="0.01253378">
            <text:p>0.01253378</text:p>
          </table:table-cell>
          <table:table-cell table:number-columns-repeated="4"/>
        </table:table-row>
        <table:table-row table:style-name="ro1">
          <table:table-cell office:value-type="float" office:value="653.730834960938">
            <text:p>653.7308349609</text:p>
          </table:table-cell>
          <table:table-cell office:value-type="float" office:value="0.02766814">
            <text:p>0.02766814</text:p>
          </table:table-cell>
          <table:table-cell table:number-columns-repeated="4"/>
        </table:table-row>
        <table:table-row table:style-name="ro1">
          <table:table-cell office:value-type="float" office:value="653.8505859375">
            <text:p>653.8505859375</text:p>
          </table:table-cell>
          <table:table-cell office:value-type="float" office:value="0.01175287">
            <text:p>0.01175287</text:p>
          </table:table-cell>
          <table:table-cell table:number-columns-repeated="4"/>
        </table:table-row>
        <table:table-row table:style-name="ro1">
          <table:table-cell office:value-type="float" office:value="653.970275878906">
            <text:p>653.9702758789</text:p>
          </table:table-cell>
          <table:table-cell office:value-type="float" office:value="0.023741">
            <text:p>0.023741</text:p>
          </table:table-cell>
          <table:table-cell table:number-columns-repeated="4"/>
        </table:table-row>
        <table:table-row table:style-name="ro1">
          <table:table-cell office:value-type="float" office:value="654.090026855469">
            <text:p>654.0900268555</text:p>
          </table:table-cell>
          <table:table-cell office:value-type="float" office:value="0.002584834">
            <text:p>0.002584834</text:p>
          </table:table-cell>
          <table:table-cell table:number-columns-repeated="4"/>
        </table:table-row>
        <table:table-row table:style-name="ro1">
          <table:table-cell office:value-type="float" office:value="654.209716796875">
            <text:p>654.2097167969</text:p>
          </table:table-cell>
          <table:table-cell office:value-type="float" office:value="0.0039721">
            <text:p>0.0039721</text:p>
          </table:table-cell>
          <table:table-cell table:number-columns-repeated="4"/>
        </table:table-row>
        <table:table-row table:style-name="ro1">
          <table:table-cell office:value-type="float" office:value="654.329467773438">
            <text:p>654.3294677734</text:p>
          </table:table-cell>
          <table:table-cell office:value-type="float" office:value="-0.001511139">
            <text:p>-0.001511139</text:p>
          </table:table-cell>
          <table:table-cell table:number-columns-repeated="4"/>
        </table:table-row>
        <table:table-row table:style-name="ro1">
          <table:table-cell office:value-type="float" office:value="654.44921875">
            <text:p>654.44921875</text:p>
          </table:table-cell>
          <table:table-cell office:value-type="float" office:value="0.01547003">
            <text:p>0.01547003</text:p>
          </table:table-cell>
          <table:table-cell table:number-columns-repeated="4"/>
        </table:table-row>
        <table:table-row table:style-name="ro1">
          <table:table-cell office:value-type="float" office:value="654.568969726563">
            <text:p>654.5689697266</text:p>
          </table:table-cell>
          <table:table-cell office:value-type="float" office:value="0.004665029">
            <text:p>0.004665029</text:p>
          </table:table-cell>
          <table:table-cell table:number-columns-repeated="4"/>
        </table:table-row>
        <table:table-row table:style-name="ro1">
          <table:table-cell office:value-type="float" office:value="654.688659667969">
            <text:p>654.688659668</text:p>
          </table:table-cell>
          <table:table-cell office:value-type="float" office:value="0.01288017">
            <text:p>0.01288017</text:p>
          </table:table-cell>
          <table:table-cell table:number-columns-repeated="4"/>
        </table:table-row>
        <table:table-row table:style-name="ro1">
          <table:table-cell office:value-type="float" office:value="654.808410644531">
            <text:p>654.8084106445</text:p>
          </table:table-cell>
          <table:table-cell office:value-type="float" office:value="0.007810201">
            <text:p>0.007810201</text:p>
          </table:table-cell>
          <table:table-cell table:number-columns-repeated="4"/>
        </table:table-row>
        <table:table-row table:style-name="ro1">
          <table:table-cell office:value-type="float" office:value="654.928161621094">
            <text:p>654.9281616211</text:p>
          </table:table-cell>
          <table:table-cell office:value-type="float" office:value="0.00797583">
            <text:p>0.00797583</text:p>
          </table:table-cell>
          <table:table-cell table:number-columns-repeated="4"/>
        </table:table-row>
        <table:table-row table:style-name="ro1">
          <table:table-cell office:value-type="float" office:value="655.047912597656">
            <text:p>655.0479125977</text:p>
          </table:table-cell>
          <table:table-cell office:value-type="float" office:value="0.02359097">
            <text:p>0.02359097</text:p>
          </table:table-cell>
          <table:table-cell table:number-columns-repeated="4"/>
        </table:table-row>
        <table:table-row table:style-name="ro1">
          <table:table-cell office:value-type="float" office:value="655.167602539063">
            <text:p>655.1676025391</text:p>
          </table:table-cell>
          <table:table-cell office:value-type="float" office:value="0.007313958">
            <text:p>0.007313958</text:p>
          </table:table-cell>
          <table:table-cell table:number-columns-repeated="4"/>
        </table:table-row>
        <table:table-row table:style-name="ro1">
          <table:table-cell office:value-type="float" office:value="655.287353515625">
            <text:p>655.2873535156</text:p>
          </table:table-cell>
          <table:table-cell office:value-type="float" office:value="0.01615109">
            <text:p>0.01615109</text:p>
          </table:table-cell>
          <table:table-cell table:number-columns-repeated="4"/>
        </table:table-row>
        <table:table-row table:style-name="ro1">
          <table:table-cell office:value-type="float" office:value="655.407104492188">
            <text:p>655.4071044922</text:p>
          </table:table-cell>
          <table:table-cell office:value-type="float" office:value="-0.0001011143">
            <text:p>-0.0001011143</text:p>
          </table:table-cell>
          <table:table-cell table:number-columns-repeated="4"/>
        </table:table-row>
        <table:table-row table:style-name="ro1">
          <table:table-cell office:value-type="float" office:value="655.52685546875">
            <text:p>655.5268554688</text:p>
          </table:table-cell>
          <table:table-cell office:value-type="float" office:value="0.008096916">
            <text:p>0.008096916</text:p>
          </table:table-cell>
          <table:table-cell table:number-columns-repeated="4"/>
        </table:table-row>
        <table:table-row table:style-name="ro1">
          <table:table-cell office:value-type="float" office:value="655.646606445313">
            <text:p>655.6466064453</text:p>
          </table:table-cell>
          <table:table-cell office:value-type="float" office:value="-0.0006853093">
            <text:p>-0.0006853093</text:p>
          </table:table-cell>
          <table:table-cell table:number-columns-repeated="4"/>
        </table:table-row>
        <table:table-row table:style-name="ro1">
          <table:table-cell office:value-type="float" office:value="655.766357421875">
            <text:p>655.7663574219</text:p>
          </table:table-cell>
          <table:table-cell office:value-type="float" office:value="0.008428405">
            <text:p>0.008428405</text:p>
          </table:table-cell>
          <table:table-cell table:number-columns-repeated="4"/>
        </table:table-row>
        <table:table-row table:style-name="ro1">
          <table:table-cell office:value-type="float" office:value="655.886108398438">
            <text:p>655.8861083984</text:p>
          </table:table-cell>
          <table:table-cell office:value-type="float" office:value="0.001884505">
            <text:p>0.001884505</text:p>
          </table:table-cell>
          <table:table-cell table:number-columns-repeated="4"/>
        </table:table-row>
        <table:table-row table:style-name="ro1">
          <table:table-cell office:value-type="float" office:value="656.005859375">
            <text:p>656.005859375</text:p>
          </table:table-cell>
          <table:table-cell office:value-type="float" office:value="-0.0007410421">
            <text:p>-0.0007410421</text:p>
          </table:table-cell>
          <table:table-cell table:number-columns-repeated="4"/>
        </table:table-row>
        <table:table-row table:style-name="ro1">
          <table:table-cell office:value-type="float" office:value="656.125610351563">
            <text:p>656.1256103516</text:p>
          </table:table-cell>
          <table:table-cell office:value-type="float" office:value="0.009757753">
            <text:p>0.009757753</text:p>
          </table:table-cell>
          <table:table-cell table:number-columns-repeated="4"/>
        </table:table-row>
        <table:table-row table:style-name="ro1">
          <table:table-cell office:value-type="float" office:value="656.245361328125">
            <text:p>656.2453613281</text:p>
          </table:table-cell>
          <table:table-cell office:value-type="float" office:value="0.005933786">
            <text:p>0.005933786</text:p>
          </table:table-cell>
          <table:table-cell table:number-columns-repeated="4"/>
        </table:table-row>
        <table:table-row table:style-name="ro1">
          <table:table-cell office:value-type="float" office:value="656.365112304688">
            <text:p>656.3651123047</text:p>
          </table:table-cell>
          <table:table-cell office:value-type="float" office:value="0.02262473">
            <text:p>0.02262473</text:p>
          </table:table-cell>
          <table:table-cell table:number-columns-repeated="4"/>
        </table:table-row>
        <table:table-row table:style-name="ro1">
          <table:table-cell office:value-type="float" office:value="656.48486328125">
            <text:p>656.4848632813</text:p>
          </table:table-cell>
          <table:table-cell office:value-type="float" office:value="0.005945703">
            <text:p>0.005945703</text:p>
          </table:table-cell>
          <table:table-cell table:number-columns-repeated="4"/>
        </table:table-row>
        <table:table-row table:style-name="ro1">
          <table:table-cell office:value-type="float" office:value="656.604614257813">
            <text:p>656.6046142578</text:p>
          </table:table-cell>
          <table:table-cell office:value-type="float" office:value="0.01000004">
            <text:p>0.01000004</text:p>
          </table:table-cell>
          <table:table-cell table:number-columns-repeated="4"/>
        </table:table-row>
        <table:table-row table:style-name="ro1">
          <table:table-cell office:value-type="float" office:value="656.724365234375">
            <text:p>656.7243652344</text:p>
          </table:table-cell>
          <table:table-cell office:value-type="float" office:value="0.0245604">
            <text:p>0.0245604</text:p>
          </table:table-cell>
          <table:table-cell table:number-columns-repeated="4"/>
        </table:table-row>
        <table:table-row table:style-name="ro1">
          <table:table-cell office:value-type="float" office:value="656.844116210938">
            <text:p>656.8441162109</text:p>
          </table:table-cell>
          <table:table-cell office:value-type="float" office:value="0.00892127">
            <text:p>0.00892127</text:p>
          </table:table-cell>
          <table:table-cell table:number-columns-repeated="4"/>
        </table:table-row>
        <table:table-row table:style-name="ro1">
          <table:table-cell office:value-type="float" office:value="656.9638671875">
            <text:p>656.9638671875</text:p>
          </table:table-cell>
          <table:table-cell office:value-type="float" office:value="0.00713246">
            <text:p>0.00713246</text:p>
          </table:table-cell>
          <table:table-cell table:number-columns-repeated="4"/>
        </table:table-row>
        <table:table-row table:style-name="ro1">
          <table:table-cell office:value-type="float" office:value="657.083679199219">
            <text:p>657.0836791992</text:p>
          </table:table-cell>
          <table:table-cell office:value-type="float" office:value="0.01047487">
            <text:p>0.01047487</text:p>
          </table:table-cell>
          <table:table-cell table:number-columns-repeated="4"/>
        </table:table-row>
        <table:table-row table:style-name="ro1">
          <table:table-cell office:value-type="float" office:value="657.203430175781">
            <text:p>657.2034301758</text:p>
          </table:table-cell>
          <table:table-cell office:value-type="float" office:value="0.004605677">
            <text:p>0.004605677</text:p>
          </table:table-cell>
          <table:table-cell table:number-columns-repeated="4"/>
        </table:table-row>
        <table:table-row table:style-name="ro1">
          <table:table-cell office:value-type="float" office:value="657.323181152344">
            <text:p>657.3231811523</text:p>
          </table:table-cell>
          <table:table-cell office:value-type="float" office:value="0.02083793">
            <text:p>0.02083793</text:p>
          </table:table-cell>
          <table:table-cell table:number-columns-repeated="4"/>
        </table:table-row>
        <table:table-row table:style-name="ro1">
          <table:table-cell office:value-type="float" office:value="657.442932128906">
            <text:p>657.4429321289</text:p>
          </table:table-cell>
          <table:table-cell office:value-type="float" office:value="0.0161104">
            <text:p>0.0161104</text:p>
          </table:table-cell>
          <table:table-cell table:number-columns-repeated="4"/>
        </table:table-row>
        <table:table-row table:style-name="ro1">
          <table:table-cell office:value-type="float" office:value="657.562744140625">
            <text:p>657.5627441406</text:p>
          </table:table-cell>
          <table:table-cell office:value-type="float" office:value="0.01145359">
            <text:p>0.01145359</text:p>
          </table:table-cell>
          <table:table-cell table:number-columns-repeated="4"/>
        </table:table-row>
        <table:table-row table:style-name="ro1">
          <table:table-cell office:value-type="float" office:value="657.682495117188">
            <text:p>657.6824951172</text:p>
          </table:table-cell>
          <table:table-cell office:value-type="float" office:value="0.020618">
            <text:p>0.020618</text:p>
          </table:table-cell>
          <table:table-cell table:number-columns-repeated="4"/>
        </table:table-row>
        <table:table-row table:style-name="ro1">
          <table:table-cell office:value-type="float" office:value="657.80224609375">
            <text:p>657.8022460938</text:p>
          </table:table-cell>
          <table:table-cell office:value-type="float" office:value="0.01474889">
            <text:p>0.01474889</text:p>
          </table:table-cell>
          <table:table-cell table:number-columns-repeated="4"/>
        </table:table-row>
        <table:table-row table:style-name="ro1">
          <table:table-cell office:value-type="float" office:value="657.921997070313">
            <text:p>657.9219970703</text:p>
          </table:table-cell>
          <table:table-cell office:value-type="float" office:value="0.002158943">
            <text:p>0.002158943</text:p>
          </table:table-cell>
          <table:table-cell table:number-columns-repeated="4"/>
        </table:table-row>
        <table:table-row table:style-name="ro1">
          <table:table-cell office:value-type="float" office:value="658.041809082031">
            <text:p>658.041809082</text:p>
          </table:table-cell>
          <table:table-cell office:value-type="float" office:value="0.003588062">
            <text:p>0.003588062</text:p>
          </table:table-cell>
          <table:table-cell table:number-columns-repeated="4"/>
        </table:table-row>
        <table:table-row table:style-name="ro1">
          <table:table-cell office:value-type="float" office:value="658.161560058594">
            <text:p>658.1615600586</text:p>
          </table:table-cell>
          <table:table-cell office:value-type="float" office:value="-0.0007239307">
            <text:p>-0.0007239307</text:p>
          </table:table-cell>
          <table:table-cell table:number-columns-repeated="4"/>
        </table:table-row>
        <table:table-row table:style-name="ro1">
          <table:table-cell office:value-type="float" office:value="658.281372070313">
            <text:p>658.2813720703</text:p>
          </table:table-cell>
          <table:table-cell office:value-type="float" office:value="0.01924006">
            <text:p>0.01924006</text:p>
          </table:table-cell>
          <table:table-cell table:number-columns-repeated="4"/>
        </table:table-row>
        <table:table-row table:style-name="ro1">
          <table:table-cell office:value-type="float" office:value="658.401123046875">
            <text:p>658.4011230469</text:p>
          </table:table-cell>
          <table:table-cell office:value-type="float" office:value="0.03414579">
            <text:p>0.03414579</text:p>
          </table:table-cell>
          <table:table-cell table:number-columns-repeated="4"/>
        </table:table-row>
        <table:table-row table:style-name="ro1">
          <table:table-cell office:value-type="float" office:value="658.520935058594">
            <text:p>658.5209350586</text:p>
          </table:table-cell>
          <table:table-cell office:value-type="float" office:value="0.004321056">
            <text:p>0.004321056</text:p>
          </table:table-cell>
          <table:table-cell table:number-columns-repeated="4"/>
        </table:table-row>
        <table:table-row table:style-name="ro1">
          <table:table-cell office:value-type="float" office:value="658.640686035156">
            <text:p>658.6406860352</text:p>
          </table:table-cell>
          <table:table-cell office:value-type="float" office:value="0.001704308">
            <text:p>0.001704308</text:p>
          </table:table-cell>
          <table:table-cell table:number-columns-repeated="4"/>
        </table:table-row>
        <table:table-row table:style-name="ro1">
          <table:table-cell office:value-type="float" office:value="658.760437011719">
            <text:p>658.7604370117</text:p>
          </table:table-cell>
          <table:table-cell office:value-type="float" office:value="0.00692545">
            <text:p>0.00692545</text:p>
          </table:table-cell>
          <table:table-cell table:number-columns-repeated="4"/>
        </table:table-row>
        <table:table-row table:style-name="ro1">
          <table:table-cell office:value-type="float" office:value="658.880249023438">
            <text:p>658.8802490234</text:p>
          </table:table-cell>
          <table:table-cell office:value-type="float" office:value="0.00132379">
            <text:p>0.00132379</text:p>
          </table:table-cell>
          <table:table-cell table:number-columns-repeated="4"/>
        </table:table-row>
        <table:table-row table:style-name="ro1">
          <table:table-cell office:value-type="float" office:value="659.000061035156">
            <text:p>659.0000610352</text:p>
          </table:table-cell>
          <table:table-cell office:value-type="float" office:value="0.003465433">
            <text:p>0.003465433</text:p>
          </table:table-cell>
          <table:table-cell table:number-columns-repeated="4"/>
        </table:table-row>
        <table:table-row table:style-name="ro1">
          <table:table-cell office:value-type="float" office:value="659.119812011719">
            <text:p>659.1198120117</text:p>
          </table:table-cell>
          <table:table-cell office:value-type="float" office:value="0.001153779">
            <text:p>0.001153779</text:p>
          </table:table-cell>
          <table:table-cell table:number-columns-repeated="4"/>
        </table:table-row>
        <table:table-row table:style-name="ro1">
          <table:table-cell office:value-type="float" office:value="659.239624023438">
            <text:p>659.2396240234</text:p>
          </table:table-cell>
          <table:table-cell office:value-type="float" office:value="0.01176341">
            <text:p>0.01176341</text:p>
          </table:table-cell>
          <table:table-cell table:number-columns-repeated="4"/>
        </table:table-row>
        <table:table-row table:style-name="ro1">
          <table:table-cell office:value-type="float" office:value="659.359375">
            <text:p>659.359375</text:p>
          </table:table-cell>
          <table:table-cell office:value-type="float" office:value="0.01077542">
            <text:p>0.01077542</text:p>
          </table:table-cell>
          <table:table-cell table:number-columns-repeated="4"/>
        </table:table-row>
        <table:table-row table:style-name="ro1">
          <table:table-cell office:value-type="float" office:value="659.479187011719">
            <text:p>659.4791870117</text:p>
          </table:table-cell>
          <table:table-cell office:value-type="float" office:value="0.007424151">
            <text:p>0.007424151</text:p>
          </table:table-cell>
          <table:table-cell table:number-columns-repeated="4"/>
        </table:table-row>
        <table:table-row table:style-name="ro1">
          <table:table-cell office:value-type="float" office:value="659.598999023438">
            <text:p>659.5989990234</text:p>
          </table:table-cell>
          <table:table-cell office:value-type="float" office:value="0.007845605">
            <text:p>0.007845605</text:p>
          </table:table-cell>
          <table:table-cell table:number-columns-repeated="4"/>
        </table:table-row>
        <table:table-row table:style-name="ro1">
          <table:table-cell office:value-type="float" office:value="659.71875">
            <text:p>659.71875</text:p>
          </table:table-cell>
          <table:table-cell office:value-type="float" office:value="0.009871364">
            <text:p>0.009871364</text:p>
          </table:table-cell>
          <table:table-cell table:number-columns-repeated="4"/>
        </table:table-row>
        <table:table-row table:style-name="ro1">
          <table:table-cell office:value-type="float" office:value="659.838562011719">
            <text:p>659.8385620117</text:p>
          </table:table-cell>
          <table:table-cell office:value-type="float" office:value="0.001023428">
            <text:p>0.001023428</text:p>
          </table:table-cell>
          <table:table-cell table:number-columns-repeated="4"/>
        </table:table-row>
        <table:table-row table:style-name="ro1">
          <table:table-cell office:value-type="float" office:value="659.958374023438">
            <text:p>659.9583740234</text:p>
          </table:table-cell>
          <table:table-cell office:value-type="float" office:value="0.004338717">
            <text:p>0.004338717</text:p>
          </table:table-cell>
          <table:table-cell table:number-columns-repeated="4"/>
        </table:table-row>
        <table:table-row table:style-name="ro1">
          <table:table-cell office:value-type="float" office:value="660.078125">
            <text:p>660.078125</text:p>
          </table:table-cell>
          <table:table-cell office:value-type="float" office:value="-0.0005070606">
            <text:p>-0.0005070606</text:p>
          </table:table-cell>
          <table:table-cell table:number-columns-repeated="4"/>
        </table:table-row>
        <table:table-row table:style-name="ro1">
          <table:table-cell office:value-type="float" office:value="660.197937011719">
            <text:p>660.1979370117</text:p>
          </table:table-cell>
          <table:table-cell office:value-type="float" office:value="0.01238121">
            <text:p>0.01238121</text:p>
          </table:table-cell>
          <table:table-cell table:number-columns-repeated="4"/>
        </table:table-row>
        <table:table-row table:style-name="ro1">
          <table:table-cell office:value-type="float" office:value="660.317749023438">
            <text:p>660.3177490234</text:p>
          </table:table-cell>
          <table:table-cell office:value-type="float" office:value="0.008673883">
            <text:p>0.008673883</text:p>
          </table:table-cell>
          <table:table-cell table:number-columns-repeated="4"/>
        </table:table-row>
        <table:table-row table:style-name="ro1">
          <table:table-cell office:value-type="float" office:value="660.437561035156">
            <text:p>660.4375610352</text:p>
          </table:table-cell>
          <table:table-cell office:value-type="float" office:value="0.01917416">
            <text:p>0.01917416</text:p>
          </table:table-cell>
          <table:table-cell table:number-columns-repeated="4"/>
        </table:table-row>
        <table:table-row table:style-name="ro1">
          <table:table-cell office:value-type="float" office:value="660.557373046875">
            <text:p>660.5573730469</text:p>
          </table:table-cell>
          <table:table-cell office:value-type="float" office:value="-0.003354661">
            <text:p>-0.003354661</text:p>
          </table:table-cell>
          <table:table-cell table:number-columns-repeated="4"/>
        </table:table-row>
        <table:table-row table:style-name="ro1">
          <table:table-cell office:value-type="float" office:value="660.677124023438">
            <text:p>660.6771240234</text:p>
          </table:table-cell>
          <table:table-cell office:value-type="float" office:value="0.0006103849">
            <text:p>0.0006103849</text:p>
          </table:table-cell>
          <table:table-cell table:number-columns-repeated="4"/>
        </table:table-row>
        <table:table-row table:style-name="ro1">
          <table:table-cell office:value-type="float" office:value="660.796936035156">
            <text:p>660.7969360352</text:p>
          </table:table-cell>
          <table:table-cell office:value-type="float" office:value="0.005274739">
            <text:p>0.005274739</text:p>
          </table:table-cell>
          <table:table-cell table:number-columns-repeated="4"/>
        </table:table-row>
        <table:table-row table:style-name="ro1">
          <table:table-cell office:value-type="float" office:value="660.916748046875">
            <text:p>660.9167480469</text:p>
          </table:table-cell>
          <table:table-cell office:value-type="float" office:value="-0.001847187">
            <text:p>-0.001847187</text:p>
          </table:table-cell>
          <table:table-cell table:number-columns-repeated="4"/>
        </table:table-row>
        <table:table-row table:style-name="ro1">
          <table:table-cell office:value-type="float" office:value="661.036560058594">
            <text:p>661.0365600586</text:p>
          </table:table-cell>
          <table:table-cell office:value-type="float" office:value="0.009988273">
            <text:p>0.009988273</text:p>
          </table:table-cell>
          <table:table-cell table:number-columns-repeated="4"/>
        </table:table-row>
        <table:table-row table:style-name="ro1">
          <table:table-cell office:value-type="float" office:value="661.156372070313">
            <text:p>661.1563720703</text:p>
          </table:table-cell>
          <table:table-cell office:value-type="float" office:value="0.01146962">
            <text:p>0.01146962</text:p>
          </table:table-cell>
          <table:table-cell table:number-columns-repeated="4"/>
        </table:table-row>
        <table:table-row table:style-name="ro1">
          <table:table-cell office:value-type="float" office:value="661.276184082031">
            <text:p>661.276184082</text:p>
          </table:table-cell>
          <table:table-cell office:value-type="float" office:value="0.005812893">
            <text:p>0.005812893</text:p>
          </table:table-cell>
          <table:table-cell table:number-columns-repeated="4"/>
        </table:table-row>
        <table:table-row table:style-name="ro1">
          <table:table-cell office:value-type="float" office:value="661.39599609375">
            <text:p>661.3959960938</text:p>
          </table:table-cell>
          <table:table-cell office:value-type="float" office:value="0.007129835">
            <text:p>0.007129835</text:p>
          </table:table-cell>
          <table:table-cell table:number-columns-repeated="4"/>
        </table:table-row>
        <table:table-row table:style-name="ro1">
          <table:table-cell office:value-type="float" office:value="661.515808105469">
            <text:p>661.5158081055</text:p>
          </table:table-cell>
          <table:table-cell office:value-type="float" office:value="0.01647387">
            <text:p>0.01647387</text:p>
          </table:table-cell>
          <table:table-cell table:number-columns-repeated="4"/>
        </table:table-row>
        <table:table-row table:style-name="ro1">
          <table:table-cell office:value-type="float" office:value="661.635620117188">
            <text:p>661.6356201172</text:p>
          </table:table-cell>
          <table:table-cell office:value-type="float" office:value="0.003461631">
            <text:p>0.003461631</text:p>
          </table:table-cell>
          <table:table-cell table:number-columns-repeated="4"/>
        </table:table-row>
        <table:table-row table:style-name="ro1">
          <table:table-cell office:value-type="float" office:value="661.755432128906">
            <text:p>661.7554321289</text:p>
          </table:table-cell>
          <table:table-cell office:value-type="float" office:value="0.01133959">
            <text:p>0.01133959</text:p>
          </table:table-cell>
          <table:table-cell table:number-columns-repeated="4"/>
        </table:table-row>
        <table:table-row table:style-name="ro1">
          <table:table-cell office:value-type="float" office:value="661.875244140625">
            <text:p>661.8752441406</text:p>
          </table:table-cell>
          <table:table-cell office:value-type="float" office:value="0.01567041">
            <text:p>0.01567041</text:p>
          </table:table-cell>
          <table:table-cell table:number-columns-repeated="4"/>
        </table:table-row>
        <table:table-row table:style-name="ro1">
          <table:table-cell office:value-type="float" office:value="661.995056152344">
            <text:p>661.9950561523</text:p>
          </table:table-cell>
          <table:table-cell office:value-type="float" office:value="0.008101339">
            <text:p>0.008101339</text:p>
          </table:table-cell>
          <table:table-cell table:number-columns-repeated="4"/>
        </table:table-row>
        <table:table-row table:style-name="ro1">
          <table:table-cell office:value-type="float" office:value="662.114868164063">
            <text:p>662.1148681641</text:p>
          </table:table-cell>
          <table:table-cell office:value-type="float" office:value="0.003482851">
            <text:p>0.003482851</text:p>
          </table:table-cell>
          <table:table-cell table:number-columns-repeated="4"/>
        </table:table-row>
        <table:table-row table:style-name="ro1">
          <table:table-cell office:value-type="float" office:value="662.234680175781">
            <text:p>662.2346801758</text:p>
          </table:table-cell>
          <table:table-cell office:value-type="float" office:value="0.001537879">
            <text:p>0.001537879</text:p>
          </table:table-cell>
          <table:table-cell table:number-columns-repeated="4"/>
        </table:table-row>
        <table:table-row table:style-name="ro1">
          <table:table-cell office:value-type="float" office:value="662.354553222656">
            <text:p>662.3545532227</text:p>
          </table:table-cell>
          <table:table-cell office:value-type="float" office:value="0.001287913">
            <text:p>0.001287913</text:p>
          </table:table-cell>
          <table:table-cell table:number-columns-repeated="4"/>
        </table:table-row>
        <table:table-row table:style-name="ro1">
          <table:table-cell office:value-type="float" office:value="662.474365234375">
            <text:p>662.4743652344</text:p>
          </table:table-cell>
          <table:table-cell office:value-type="float" office:value="0.004829222">
            <text:p>0.004829222</text:p>
          </table:table-cell>
          <table:table-cell table:number-columns-repeated="4"/>
        </table:table-row>
        <table:table-row table:style-name="ro1">
          <table:table-cell office:value-type="float" office:value="662.594177246094">
            <text:p>662.5941772461</text:p>
          </table:table-cell>
          <table:table-cell office:value-type="float" office:value="0.008066183">
            <text:p>0.008066183</text:p>
          </table:table-cell>
          <table:table-cell table:number-columns-repeated="4"/>
        </table:table-row>
        <table:table-row table:style-name="ro1">
          <table:table-cell office:value-type="float" office:value="662.713989257813">
            <text:p>662.7139892578</text:p>
          </table:table-cell>
          <table:table-cell office:value-type="float" office:value="0.01195858">
            <text:p>0.01195858</text:p>
          </table:table-cell>
          <table:table-cell table:number-columns-repeated="4"/>
        </table:table-row>
        <table:table-row table:style-name="ro1">
          <table:table-cell office:value-type="float" office:value="662.833801269531">
            <text:p>662.8338012695</text:p>
          </table:table-cell>
          <table:table-cell office:value-type="float" office:value="-0.001287928">
            <text:p>-0.001287928</text:p>
          </table:table-cell>
          <table:table-cell table:number-columns-repeated="4"/>
        </table:table-row>
        <table:table-row table:style-name="ro1">
          <table:table-cell office:value-type="float" office:value="662.953674316406">
            <text:p>662.9536743164</text:p>
          </table:table-cell>
          <table:table-cell office:value-type="float" office:value="0.002967674">
            <text:p>0.002967674</text:p>
          </table:table-cell>
          <table:table-cell table:number-columns-repeated="4"/>
        </table:table-row>
        <table:table-row table:style-name="ro1">
          <table:table-cell office:value-type="float" office:value="663.073486328125">
            <text:p>663.0734863281</text:p>
          </table:table-cell>
          <table:table-cell office:value-type="float" office:value="0.005226649">
            <text:p>0.005226649</text:p>
          </table:table-cell>
          <table:table-cell table:number-columns-repeated="4"/>
        </table:table-row>
        <table:table-row table:style-name="ro1">
          <table:table-cell office:value-type="float" office:value="663.193298339844">
            <text:p>663.1932983398</text:p>
          </table:table-cell>
          <table:table-cell office:value-type="float" office:value="0.005091761">
            <text:p>0.005091761</text:p>
          </table:table-cell>
          <table:table-cell table:number-columns-repeated="4"/>
        </table:table-row>
        <table:table-row table:style-name="ro1">
          <table:table-cell office:value-type="float" office:value="663.313110351563">
            <text:p>663.3131103516</text:p>
          </table:table-cell>
          <table:table-cell office:value-type="float" office:value="0.008367871">
            <text:p>0.008367871</text:p>
          </table:table-cell>
          <table:table-cell table:number-columns-repeated="4"/>
        </table:table-row>
        <table:table-row table:style-name="ro1">
          <table:table-cell office:value-type="float" office:value="663.432983398438">
            <text:p>663.4329833984</text:p>
          </table:table-cell>
          <table:table-cell office:value-type="float" office:value="0.004846051">
            <text:p>0.004846051</text:p>
          </table:table-cell>
          <table:table-cell table:number-columns-repeated="4"/>
        </table:table-row>
        <table:table-row table:style-name="ro1">
          <table:table-cell office:value-type="float" office:value="663.552795410156">
            <text:p>663.5527954102</text:p>
          </table:table-cell>
          <table:table-cell office:value-type="float" office:value="0.008671404">
            <text:p>0.008671404</text:p>
          </table:table-cell>
          <table:table-cell table:number-columns-repeated="4"/>
        </table:table-row>
        <table:table-row table:style-name="ro1">
          <table:table-cell office:value-type="float" office:value="663.672668457031">
            <text:p>663.672668457</text:p>
          </table:table-cell>
          <table:table-cell office:value-type="float" office:value="0.005554994">
            <text:p>0.005554994</text:p>
          </table:table-cell>
          <table:table-cell table:number-columns-repeated="4"/>
        </table:table-row>
        <table:table-row table:style-name="ro1">
          <table:table-cell office:value-type="float" office:value="663.79248046875">
            <text:p>663.7924804688</text:p>
          </table:table-cell>
          <table:table-cell office:value-type="float" office:value="0.007234212">
            <text:p>0.007234212</text:p>
          </table:table-cell>
          <table:table-cell table:number-columns-repeated="4"/>
        </table:table-row>
        <table:table-row table:style-name="ro1">
          <table:table-cell office:value-type="float" office:value="663.912292480469">
            <text:p>663.9122924805</text:p>
          </table:table-cell>
          <table:table-cell office:value-type="float" office:value="0.005697744">
            <text:p>0.005697744</text:p>
          </table:table-cell>
          <table:table-cell table:number-columns-repeated="4"/>
        </table:table-row>
        <table:table-row table:style-name="ro1">
          <table:table-cell office:value-type="float" office:value="664.032165527344">
            <text:p>664.0321655273</text:p>
          </table:table-cell>
          <table:table-cell office:value-type="float" office:value="0.01055668">
            <text:p>0.01055668</text:p>
          </table:table-cell>
          <table:table-cell table:number-columns-repeated="4"/>
        </table:table-row>
        <table:table-row table:style-name="ro1">
          <table:table-cell office:value-type="float" office:value="664.151977539063">
            <text:p>664.1519775391</text:p>
          </table:table-cell>
          <table:table-cell office:value-type="float" office:value="0.005625307">
            <text:p>0.005625307</text:p>
          </table:table-cell>
          <table:table-cell table:number-columns-repeated="4"/>
        </table:table-row>
        <table:table-row table:style-name="ro1">
          <table:table-cell office:value-type="float" office:value="664.271850585938">
            <text:p>664.2718505859</text:p>
          </table:table-cell>
          <table:table-cell office:value-type="float" office:value="-0.0004715985">
            <text:p>-0.0004715985</text:p>
          </table:table-cell>
          <table:table-cell table:number-columns-repeated="4"/>
        </table:table-row>
        <table:table-row table:style-name="ro1">
          <table:table-cell office:value-type="float" office:value="664.391662597656">
            <text:p>664.3916625977</text:p>
          </table:table-cell>
          <table:table-cell office:value-type="float" office:value="0.004709523">
            <text:p>0.004709523</text:p>
          </table:table-cell>
          <table:table-cell table:number-columns-repeated="4"/>
        </table:table-row>
        <table:table-row table:style-name="ro1">
          <table:table-cell office:value-type="float" office:value="664.511535644531">
            <text:p>664.5115356445</text:p>
          </table:table-cell>
          <table:table-cell office:value-type="float" office:value="0.008850715">
            <text:p>0.008850715</text:p>
          </table:table-cell>
          <table:table-cell table:number-columns-repeated="4"/>
        </table:table-row>
        <table:table-row table:style-name="ro1">
          <table:table-cell office:value-type="float" office:value="664.63134765625">
            <text:p>664.6313476563</text:p>
          </table:table-cell>
          <table:table-cell office:value-type="float" office:value="0.003942418">
            <text:p>0.003942418</text:p>
          </table:table-cell>
          <table:table-cell table:number-columns-repeated="4"/>
        </table:table-row>
        <table:table-row table:style-name="ro1">
          <table:table-cell office:value-type="float" office:value="664.751220703125">
            <text:p>664.7512207031</text:p>
          </table:table-cell>
          <table:table-cell office:value-type="float" office:value="-0.001835679">
            <text:p>-0.001835679</text:p>
          </table:table-cell>
          <table:table-cell table:number-columns-repeated="4"/>
        </table:table-row>
        <table:table-row table:style-name="ro1">
          <table:table-cell office:value-type="float" office:value="664.87109375">
            <text:p>664.87109375</text:p>
          </table:table-cell>
          <table:table-cell office:value-type="float" office:value="0.01107155">
            <text:p>0.01107155</text:p>
          </table:table-cell>
          <table:table-cell table:number-columns-repeated="4"/>
        </table:table-row>
        <table:table-row table:style-name="ro1">
          <table:table-cell office:value-type="float" office:value="664.990905761719">
            <text:p>664.9909057617</text:p>
          </table:table-cell>
          <table:table-cell office:value-type="float" office:value="0.01061421">
            <text:p>0.01061421</text:p>
          </table:table-cell>
          <table:table-cell table:number-columns-repeated="4"/>
        </table:table-row>
        <table:table-row table:style-name="ro1">
          <table:table-cell office:value-type="float" office:value="665.110778808594">
            <text:p>665.1107788086</text:p>
          </table:table-cell>
          <table:table-cell office:value-type="float" office:value="0.004720824">
            <text:p>0.004720824</text:p>
          </table:table-cell>
          <table:table-cell table:number-columns-repeated="4"/>
        </table:table-row>
        <table:table-row table:style-name="ro1">
          <table:table-cell office:value-type="float" office:value="665.230590820313">
            <text:p>665.2305908203</text:p>
          </table:table-cell>
          <table:table-cell office:value-type="float" office:value="0.01123292">
            <text:p>0.01123292</text:p>
          </table:table-cell>
          <table:table-cell table:number-columns-repeated="4"/>
        </table:table-row>
        <table:table-row table:style-name="ro1">
          <table:table-cell office:value-type="float" office:value="665.350463867188">
            <text:p>665.3504638672</text:p>
          </table:table-cell>
          <table:table-cell office:value-type="float" office:value="-0.0009265682">
            <text:p>-0.0009265682</text:p>
          </table:table-cell>
          <table:table-cell table:number-columns-repeated="4"/>
        </table:table-row>
        <table:table-row table:style-name="ro1">
          <table:table-cell office:value-type="float" office:value="665.470336914063">
            <text:p>665.4703369141</text:p>
          </table:table-cell>
          <table:table-cell office:value-type="float" office:value="0.01753018">
            <text:p>0.01753018</text:p>
          </table:table-cell>
          <table:table-cell table:number-columns-repeated="4"/>
        </table:table-row>
        <table:table-row table:style-name="ro1">
          <table:table-cell office:value-type="float" office:value="665.590148925781">
            <text:p>665.5901489258</text:p>
          </table:table-cell>
          <table:table-cell office:value-type="float" office:value="0.01296124">
            <text:p>0.01296124</text:p>
          </table:table-cell>
          <table:table-cell table:number-columns-repeated="4"/>
        </table:table-row>
        <table:table-row table:style-name="ro1">
          <table:table-cell office:value-type="float" office:value="665.710021972656">
            <text:p>665.7100219727</text:p>
          </table:table-cell>
          <table:table-cell office:value-type="float" office:value="0.006088375">
            <text:p>0.006088375</text:p>
          </table:table-cell>
          <table:table-cell table:number-columns-repeated="4"/>
        </table:table-row>
        <table:table-row table:style-name="ro1">
          <table:table-cell office:value-type="float" office:value="665.829895019531">
            <text:p>665.8298950195</text:p>
          </table:table-cell>
          <table:table-cell office:value-type="float" office:value="0.0009407173">
            <text:p>0.0009407173</text:p>
          </table:table-cell>
          <table:table-cell table:number-columns-repeated="4"/>
        </table:table-row>
        <table:table-row table:style-name="ro1">
          <table:table-cell office:value-type="float" office:value="665.949768066406">
            <text:p>665.9497680664</text:p>
          </table:table-cell>
          <table:table-cell office:value-type="float" office:value="0.01892012">
            <text:p>0.01892012</text:p>
          </table:table-cell>
          <table:table-cell table:number-columns-repeated="4"/>
        </table:table-row>
        <table:table-row table:style-name="ro1">
          <table:table-cell office:value-type="float" office:value="666.069580078125">
            <text:p>666.0695800781</text:p>
          </table:table-cell>
          <table:table-cell office:value-type="float" office:value="0.001009842">
            <text:p>0.001009842</text:p>
          </table:table-cell>
          <table:table-cell table:number-columns-repeated="4"/>
        </table:table-row>
        <table:table-row table:style-name="ro1">
          <table:table-cell office:value-type="float" office:value="666.189453125">
            <text:p>666.189453125</text:p>
          </table:table-cell>
          <table:table-cell office:value-type="float" office:value="0.02092768">
            <text:p>0.02092768</text:p>
          </table:table-cell>
          <table:table-cell table:number-columns-repeated="4"/>
        </table:table-row>
        <table:table-row table:style-name="ro1">
          <table:table-cell office:value-type="float" office:value="666.309326171875">
            <text:p>666.3093261719</text:p>
          </table:table-cell>
          <table:table-cell office:value-type="float" office:value="0.002564754">
            <text:p>0.002564754</text:p>
          </table:table-cell>
          <table:table-cell table:number-columns-repeated="4"/>
        </table:table-row>
        <table:table-row table:style-name="ro1">
          <table:table-cell office:value-type="float" office:value="666.42919921875">
            <text:p>666.4291992188</text:p>
          </table:table-cell>
          <table:table-cell office:value-type="float" office:value="0.01371406">
            <text:p>0.01371406</text:p>
          </table:table-cell>
          <table:table-cell table:number-columns-repeated="4"/>
        </table:table-row>
        <table:table-row table:style-name="ro1">
          <table:table-cell office:value-type="float" office:value="666.549072265625">
            <text:p>666.5490722656</text:p>
          </table:table-cell>
          <table:table-cell office:value-type="float" office:value="0.01205836">
            <text:p>0.01205836</text:p>
          </table:table-cell>
          <table:table-cell table:number-columns-repeated="4"/>
        </table:table-row>
        <table:table-row table:style-name="ro1">
          <table:table-cell office:value-type="float" office:value="666.6689453125">
            <text:p>666.6689453125</text:p>
          </table:table-cell>
          <table:table-cell office:value-type="float" office:value="0.005972805">
            <text:p>0.005972805</text:p>
          </table:table-cell>
          <table:table-cell table:number-columns-repeated="4"/>
        </table:table-row>
        <table:table-row table:style-name="ro1">
          <table:table-cell office:value-type="float" office:value="666.788818359375">
            <text:p>666.7888183594</text:p>
          </table:table-cell>
          <table:table-cell office:value-type="float" office:value="0.004750441">
            <text:p>0.004750441</text:p>
          </table:table-cell>
          <table:table-cell table:number-columns-repeated="4"/>
        </table:table-row>
        <table:table-row table:style-name="ro1">
          <table:table-cell office:value-type="float" office:value="666.90869140625">
            <text:p>666.9086914063</text:p>
          </table:table-cell>
          <table:table-cell office:value-type="float" office:value="0.001722292">
            <text:p>0.001722292</text:p>
          </table:table-cell>
          <table:table-cell table:number-columns-repeated="4"/>
        </table:table-row>
        <table:table-row table:style-name="ro1">
          <table:table-cell office:value-type="float" office:value="667.028564453125">
            <text:p>667.0285644531</text:p>
          </table:table-cell>
          <table:table-cell office:value-type="float" office:value="0.006825678">
            <text:p>0.006825678</text:p>
          </table:table-cell>
          <table:table-cell table:number-columns-repeated="4"/>
        </table:table-row>
        <table:table-row table:style-name="ro1">
          <table:table-cell office:value-type="float" office:value="667.1484375">
            <text:p>667.1484375</text:p>
          </table:table-cell>
          <table:table-cell office:value-type="float" office:value="0.006765016">
            <text:p>0.006765016</text:p>
          </table:table-cell>
          <table:table-cell table:number-columns-repeated="4"/>
        </table:table-row>
        <table:table-row table:style-name="ro1">
          <table:table-cell office:value-type="float" office:value="667.268310546875">
            <text:p>667.2683105469</text:p>
          </table:table-cell>
          <table:table-cell office:value-type="float" office:value="0.005963568">
            <text:p>0.005963568</text:p>
          </table:table-cell>
          <table:table-cell table:number-columns-repeated="4"/>
        </table:table-row>
        <table:table-row table:style-name="ro1">
          <table:table-cell office:value-type="float" office:value="667.38818359375">
            <text:p>667.3881835938</text:p>
          </table:table-cell>
          <table:table-cell office:value-type="float" office:value="0.01393631">
            <text:p>0.01393631</text:p>
          </table:table-cell>
          <table:table-cell table:number-columns-repeated="4"/>
        </table:table-row>
        <table:table-row table:style-name="ro1">
          <table:table-cell office:value-type="float" office:value="667.508056640625">
            <text:p>667.5080566406</text:p>
          </table:table-cell>
          <table:table-cell office:value-type="float" office:value="0.002575766">
            <text:p>0.002575766</text:p>
          </table:table-cell>
          <table:table-cell table:number-columns-repeated="4"/>
        </table:table-row>
        <table:table-row table:style-name="ro1">
          <table:table-cell office:value-type="float" office:value="667.6279296875">
            <text:p>667.6279296875</text:p>
          </table:table-cell>
          <table:table-cell office:value-type="float" office:value="0.000798571">
            <text:p>0.000798571</text:p>
          </table:table-cell>
          <table:table-cell table:number-columns-repeated="4"/>
        </table:table-row>
        <table:table-row table:style-name="ro1">
          <table:table-cell office:value-type="float" office:value="667.747802734375">
            <text:p>667.7478027344</text:p>
          </table:table-cell>
          <table:table-cell office:value-type="string">
            <text:p>-1.638997E-05</text:p>
          </table:table-cell>
          <table:table-cell table:number-columns-repeated="4"/>
        </table:table-row>
        <table:table-row table:style-name="ro1">
          <table:table-cell office:value-type="float" office:value="667.86767578125">
            <text:p>667.8676757813</text:p>
          </table:table-cell>
          <table:table-cell office:value-type="float" office:value="-0.005655322">
            <text:p>-0.005655322</text:p>
          </table:table-cell>
          <table:table-cell table:number-columns-repeated="4"/>
        </table:table-row>
        <table:table-row table:style-name="ro1">
          <table:table-cell office:value-type="float" office:value="667.987548828125">
            <text:p>667.9875488281</text:p>
          </table:table-cell>
          <table:table-cell office:value-type="float" office:value="0.01042458">
            <text:p>0.01042458</text:p>
          </table:table-cell>
          <table:table-cell table:number-columns-repeated="4"/>
        </table:table-row>
        <table:table-row table:style-name="ro1">
          <table:table-cell office:value-type="float" office:value="668.107421875">
            <text:p>668.107421875</text:p>
          </table:table-cell>
          <table:table-cell office:value-type="float" office:value="-0.004881747">
            <text:p>-0.004881747</text:p>
          </table:table-cell>
          <table:table-cell table:number-columns-repeated="4"/>
        </table:table-row>
        <table:table-row table:style-name="ro1">
          <table:table-cell office:value-type="float" office:value="668.227294921875">
            <text:p>668.2272949219</text:p>
          </table:table-cell>
          <table:table-cell office:value-type="float" office:value="0.004957203">
            <text:p>0.004957203</text:p>
          </table:table-cell>
          <table:table-cell table:number-columns-repeated="4"/>
        </table:table-row>
        <table:table-row table:style-name="ro1">
          <table:table-cell office:value-type="float" office:value="668.34716796875">
            <text:p>668.3471679688</text:p>
          </table:table-cell>
          <table:table-cell office:value-type="float" office:value="0.009864864">
            <text:p>0.009864864</text:p>
          </table:table-cell>
          <table:table-cell table:number-columns-repeated="4"/>
        </table:table-row>
        <table:table-row table:style-name="ro1">
          <table:table-cell office:value-type="float" office:value="668.467102050781">
            <text:p>668.4671020508</text:p>
          </table:table-cell>
          <table:table-cell office:value-type="float" office:value="0.005825193">
            <text:p>0.005825193</text:p>
          </table:table-cell>
          <table:table-cell table:number-columns-repeated="4"/>
        </table:table-row>
        <table:table-row table:style-name="ro1">
          <table:table-cell office:value-type="float" office:value="668.586975097656">
            <text:p>668.5869750977</text:p>
          </table:table-cell>
          <table:table-cell office:value-type="float" office:value="0.003792071">
            <text:p>0.003792071</text:p>
          </table:table-cell>
          <table:table-cell table:number-columns-repeated="4"/>
        </table:table-row>
        <table:table-row table:style-name="ro1">
          <table:table-cell office:value-type="float" office:value="668.706848144531">
            <text:p>668.7068481445</text:p>
          </table:table-cell>
          <table:table-cell office:value-type="float" office:value="0.002900901">
            <text:p>0.002900901</text:p>
          </table:table-cell>
          <table:table-cell table:number-columns-repeated="4"/>
        </table:table-row>
        <table:table-row table:style-name="ro1">
          <table:table-cell office:value-type="float" office:value="668.826721191406">
            <text:p>668.8267211914</text:p>
          </table:table-cell>
          <table:table-cell office:value-type="float" office:value="0.002892966">
            <text:p>0.002892966</text:p>
          </table:table-cell>
          <table:table-cell table:number-columns-repeated="4"/>
        </table:table-row>
        <table:table-row table:style-name="ro1">
          <table:table-cell office:value-type="float" office:value="668.946594238281">
            <text:p>668.9465942383</text:p>
          </table:table-cell>
          <table:table-cell office:value-type="float" office:value="0.01079373">
            <text:p>0.01079373</text:p>
          </table:table-cell>
          <table:table-cell table:number-columns-repeated="4"/>
        </table:table-row>
        <table:table-row table:style-name="ro1">
          <table:table-cell office:value-type="float" office:value="669.066528320313">
            <text:p>669.0665283203</text:p>
          </table:table-cell>
          <table:table-cell office:value-type="float" office:value="0.006757444">
            <text:p>0.006757444</text:p>
          </table:table-cell>
          <table:table-cell table:number-columns-repeated="4"/>
        </table:table-row>
        <table:table-row table:style-name="ro1">
          <table:table-cell office:value-type="float" office:value="669.186401367188">
            <text:p>669.1864013672</text:p>
          </table:table-cell>
          <table:table-cell office:value-type="float" office:value="-0.001319575">
            <text:p>-0.001319575</text:p>
          </table:table-cell>
          <table:table-cell table:number-columns-repeated="4"/>
        </table:table-row>
        <table:table-row table:style-name="ro1">
          <table:table-cell office:value-type="float" office:value="669.306274414063">
            <text:p>669.3062744141</text:p>
          </table:table-cell>
          <table:table-cell office:value-type="float" office:value="0.01538067">
            <text:p>0.01538067</text:p>
          </table:table-cell>
          <table:table-cell table:number-columns-repeated="4"/>
        </table:table-row>
        <table:table-row table:style-name="ro1">
          <table:table-cell office:value-type="float" office:value="669.426208496094">
            <text:p>669.4262084961</text:p>
          </table:table-cell>
          <table:table-cell office:value-type="float" office:value="0.008102169">
            <text:p>0.008102169</text:p>
          </table:table-cell>
          <table:table-cell table:number-columns-repeated="4"/>
        </table:table-row>
        <table:table-row table:style-name="ro1">
          <table:table-cell office:value-type="float" office:value="669.546081542969">
            <text:p>669.546081543</text:p>
          </table:table-cell>
          <table:table-cell office:value-type="float" office:value="-0.0002993075">
            <text:p>-0.0002993075</text:p>
          </table:table-cell>
          <table:table-cell table:number-columns-repeated="4"/>
        </table:table-row>
        <table:table-row table:style-name="ro1">
          <table:table-cell office:value-type="float" office:value="669.665954589844">
            <text:p>669.6659545898</text:p>
          </table:table-cell>
          <table:table-cell office:value-type="float" office:value="0.0004343919">
            <text:p>0.0004343919</text:p>
          </table:table-cell>
          <table:table-cell table:number-columns-repeated="4"/>
        </table:table-row>
        <table:table-row table:style-name="ro1">
          <table:table-cell office:value-type="float" office:value="669.785888671875">
            <text:p>669.7858886719</text:p>
          </table:table-cell>
          <table:table-cell office:value-type="float" office:value="0.005844322">
            <text:p>0.005844322</text:p>
          </table:table-cell>
          <table:table-cell table:number-columns-repeated="4"/>
        </table:table-row>
        <table:table-row table:style-name="ro1">
          <table:table-cell office:value-type="float" office:value="669.90576171875">
            <text:p>669.9057617188</text:p>
          </table:table-cell>
          <table:table-cell office:value-type="float" office:value="0.005287312">
            <text:p>0.005287312</text:p>
          </table:table-cell>
          <table:table-cell table:number-columns-repeated="4"/>
        </table:table-row>
        <table:table-row table:style-name="ro1">
          <table:table-cell office:value-type="float" office:value="670.025695800781">
            <text:p>670.0256958008</text:p>
          </table:table-cell>
          <table:table-cell office:value-type="float" office:value="-0.001953554">
            <text:p>-0.001953554</text:p>
          </table:table-cell>
          <table:table-cell table:number-columns-repeated="4"/>
        </table:table-row>
        <table:table-row table:style-name="ro1">
          <table:table-cell office:value-type="float" office:value="670.145568847656">
            <text:p>670.1455688477</text:p>
          </table:table-cell>
          <table:table-cell office:value-type="float" office:value="0.01672908">
            <text:p>0.01672908</text:p>
          </table:table-cell>
          <table:table-cell table:number-columns-repeated="4"/>
        </table:table-row>
        <table:table-row table:style-name="ro1">
          <table:table-cell office:value-type="float" office:value="670.265502929688">
            <text:p>670.2655029297</text:p>
          </table:table-cell>
          <table:table-cell office:value-type="float" office:value="0.008382403">
            <text:p>0.008382403</text:p>
          </table:table-cell>
          <table:table-cell table:number-columns-repeated="4"/>
        </table:table-row>
        <table:table-row table:style-name="ro1">
          <table:table-cell office:value-type="float" office:value="670.385375976563">
            <text:p>670.3853759766</text:p>
          </table:table-cell>
          <table:table-cell office:value-type="float" office:value="0.01488486">
            <text:p>0.01488486</text:p>
          </table:table-cell>
          <table:table-cell table:number-columns-repeated="4"/>
        </table:table-row>
        <table:table-row table:style-name="ro1">
          <table:table-cell office:value-type="float" office:value="670.505310058594">
            <text:p>670.5053100586</text:p>
          </table:table-cell>
          <table:table-cell office:value-type="float" office:value="0.008084889">
            <text:p>0.008084889</text:p>
          </table:table-cell>
          <table:table-cell table:number-columns-repeated="4"/>
        </table:table-row>
        <table:table-row table:style-name="ro1">
          <table:table-cell office:value-type="float" office:value="670.625183105469">
            <text:p>670.6251831055</text:p>
          </table:table-cell>
          <table:table-cell office:value-type="float" office:value="0.01043961">
            <text:p>0.01043961</text:p>
          </table:table-cell>
          <table:table-cell table:number-columns-repeated="4"/>
        </table:table-row>
        <table:table-row table:style-name="ro1">
          <table:table-cell office:value-type="float" office:value="670.7451171875">
            <text:p>670.7451171875</text:p>
          </table:table-cell>
          <table:table-cell office:value-type="float" office:value="0.005233262">
            <text:p>0.005233262</text:p>
          </table:table-cell>
          <table:table-cell table:number-columns-repeated="4"/>
        </table:table-row>
        <table:table-row table:style-name="ro1">
          <table:table-cell office:value-type="float" office:value="670.864990234375">
            <text:p>670.8649902344</text:p>
          </table:table-cell>
          <table:table-cell office:value-type="float" office:value="0.01328118">
            <text:p>0.01328118</text:p>
          </table:table-cell>
          <table:table-cell table:number-columns-repeated="4"/>
        </table:table-row>
        <table:table-row table:style-name="ro1">
          <table:table-cell office:value-type="float" office:value="670.984924316406">
            <text:p>670.9849243164</text:p>
          </table:table-cell>
          <table:table-cell office:value-type="float" office:value="0.01121852">
            <text:p>0.01121852</text:p>
          </table:table-cell>
          <table:table-cell table:number-columns-repeated="4"/>
        </table:table-row>
        <table:table-row table:style-name="ro1">
          <table:table-cell office:value-type="float" office:value="671.104858398438">
            <text:p>671.1048583984</text:p>
          </table:table-cell>
          <table:table-cell office:value-type="float" office:value="-0.001527742">
            <text:p>-0.001527742</text:p>
          </table:table-cell>
          <table:table-cell table:number-columns-repeated="4"/>
        </table:table-row>
        <table:table-row table:style-name="ro1">
          <table:table-cell office:value-type="float" office:value="671.224731445313">
            <text:p>671.2247314453</text:p>
          </table:table-cell>
          <table:table-cell office:value-type="float" office:value="0.005595893">
            <text:p>0.005595893</text:p>
          </table:table-cell>
          <table:table-cell table:number-columns-repeated="4"/>
        </table:table-row>
        <table:table-row table:style-name="ro1">
          <table:table-cell office:value-type="float" office:value="671.344665527344">
            <text:p>671.3446655273</text:p>
          </table:table-cell>
          <table:table-cell office:value-type="float" office:value="0.01146833">
            <text:p>0.01146833</text:p>
          </table:table-cell>
          <table:table-cell table:number-columns-repeated="4"/>
        </table:table-row>
        <table:table-row table:style-name="ro1">
          <table:table-cell office:value-type="float" office:value="671.464599609375">
            <text:p>671.4645996094</text:p>
          </table:table-cell>
          <table:table-cell office:value-type="float" office:value="-0.003382672">
            <text:p>-0.003382672</text:p>
          </table:table-cell>
          <table:table-cell table:number-columns-repeated="4"/>
        </table:table-row>
        <table:table-row table:style-name="ro1">
          <table:table-cell office:value-type="float" office:value="671.58447265625">
            <text:p>671.5844726563</text:p>
          </table:table-cell>
          <table:table-cell office:value-type="float" office:value="0.0007839312">
            <text:p>0.0007839312</text:p>
          </table:table-cell>
          <table:table-cell table:number-columns-repeated="4"/>
        </table:table-row>
        <table:table-row table:style-name="ro1">
          <table:table-cell office:value-type="float" office:value="671.704406738281">
            <text:p>671.7044067383</text:p>
          </table:table-cell>
          <table:table-cell office:value-type="float" office:value="0.01254576">
            <text:p>0.01254576</text:p>
          </table:table-cell>
          <table:table-cell table:number-columns-repeated="4"/>
        </table:table-row>
        <table:table-row table:style-name="ro1">
          <table:table-cell office:value-type="float" office:value="671.824340820313">
            <text:p>671.8243408203</text:p>
          </table:table-cell>
          <table:table-cell office:value-type="float" office:value="0.004108902">
            <text:p>0.004108902</text:p>
          </table:table-cell>
          <table:table-cell table:number-columns-repeated="4"/>
        </table:table-row>
        <table:table-row table:style-name="ro1">
          <table:table-cell office:value-type="float" office:value="671.944213867188">
            <text:p>671.9442138672</text:p>
          </table:table-cell>
          <table:table-cell office:value-type="float" office:value="0.003807803">
            <text:p>0.003807803</text:p>
          </table:table-cell>
          <table:table-cell table:number-columns-repeated="4"/>
        </table:table-row>
        <table:table-row table:style-name="ro1">
          <table:table-cell office:value-type="float" office:value="672.064147949219">
            <text:p>672.0641479492</text:p>
          </table:table-cell>
          <table:table-cell office:value-type="float" office:value="0.001675235">
            <text:p>0.001675235</text:p>
          </table:table-cell>
          <table:table-cell table:number-columns-repeated="4"/>
        </table:table-row>
        <table:table-row table:style-name="ro1">
          <table:table-cell office:value-type="float" office:value="672.18408203125">
            <text:p>672.1840820313</text:p>
          </table:table-cell>
          <table:table-cell office:value-type="float" office:value="0.002773779">
            <text:p>0.002773779</text:p>
          </table:table-cell>
          <table:table-cell table:number-columns-repeated="4"/>
        </table:table-row>
        <table:table-row table:style-name="ro1">
          <table:table-cell office:value-type="float" office:value="672.304016113281">
            <text:p>672.3040161133</text:p>
          </table:table-cell>
          <table:table-cell office:value-type="float" office:value="-0.0006458866">
            <text:p>-0.0006458866</text:p>
          </table:table-cell>
          <table:table-cell table:number-columns-repeated="4"/>
        </table:table-row>
        <table:table-row table:style-name="ro1">
          <table:table-cell office:value-type="float" office:value="672.423950195313">
            <text:p>672.4239501953</text:p>
          </table:table-cell>
          <table:table-cell office:value-type="float" office:value="-0.004514053">
            <text:p>-0.004514053</text:p>
          </table:table-cell>
          <table:table-cell table:number-columns-repeated="4"/>
        </table:table-row>
        <table:table-row table:style-name="ro1">
          <table:table-cell office:value-type="float" office:value="672.543823242188">
            <text:p>672.5438232422</text:p>
          </table:table-cell>
          <table:table-cell office:value-type="float" office:value="-0.0005974415">
            <text:p>-0.0005974415</text:p>
          </table:table-cell>
          <table:table-cell table:number-columns-repeated="4"/>
        </table:table-row>
        <table:table-row table:style-name="ro1">
          <table:table-cell office:value-type="float" office:value="672.663757324219">
            <text:p>672.6637573242</text:p>
          </table:table-cell>
          <table:table-cell office:value-type="float" office:value="0.008777115">
            <text:p>0.008777115</text:p>
          </table:table-cell>
          <table:table-cell table:number-columns-repeated="4"/>
        </table:table-row>
        <table:table-row table:style-name="ro1">
          <table:table-cell office:value-type="float" office:value="672.78369140625">
            <text:p>672.7836914063</text:p>
          </table:table-cell>
          <table:table-cell office:value-type="float" office:value="0.00556402">
            <text:p>0.00556402</text:p>
          </table:table-cell>
          <table:table-cell table:number-columns-repeated="4"/>
        </table:table-row>
        <table:table-row table:style-name="ro1">
          <table:table-cell office:value-type="float" office:value="672.903625488281">
            <text:p>672.9036254883</text:p>
          </table:table-cell>
          <table:table-cell office:value-type="float" office:value="0.01615237">
            <text:p>0.01615237</text:p>
          </table:table-cell>
          <table:table-cell table:number-columns-repeated="4"/>
        </table:table-row>
        <table:table-row table:style-name="ro1">
          <table:table-cell office:value-type="float" office:value="673.023559570313">
            <text:p>673.0235595703</text:p>
          </table:table-cell>
          <table:table-cell office:value-type="float" office:value="0.01367144">
            <text:p>0.01367144</text:p>
          </table:table-cell>
          <table:table-cell table:number-columns-repeated="4"/>
        </table:table-row>
        <table:table-row table:style-name="ro1">
          <table:table-cell office:value-type="float" office:value="673.143493652344">
            <text:p>673.1434936523</text:p>
          </table:table-cell>
          <table:table-cell office:value-type="float" office:value="0.006149202">
            <text:p>0.006149202</text:p>
          </table:table-cell>
          <table:table-cell table:number-columns-repeated="4"/>
        </table:table-row>
        <table:table-row table:style-name="ro1">
          <table:table-cell office:value-type="float" office:value="673.263427734375">
            <text:p>673.2634277344</text:p>
          </table:table-cell>
          <table:table-cell office:value-type="float" office:value="-0.005403648">
            <text:p>-0.005403648</text:p>
          </table:table-cell>
          <table:table-cell table:number-columns-repeated="4"/>
        </table:table-row>
        <table:table-row table:style-name="ro1">
          <table:table-cell office:value-type="float" office:value="673.383361816406">
            <text:p>673.3833618164</text:p>
          </table:table-cell>
          <table:table-cell office:value-type="float" office:value="0.02077176">
            <text:p>0.02077176</text:p>
          </table:table-cell>
          <table:table-cell table:number-columns-repeated="4"/>
        </table:table-row>
        <table:table-row table:style-name="ro1">
          <table:table-cell office:value-type="float" office:value="673.503295898438">
            <text:p>673.5032958984</text:p>
          </table:table-cell>
          <table:table-cell office:value-type="float" office:value="-0.005110678">
            <text:p>-0.005110678</text:p>
          </table:table-cell>
          <table:table-cell table:number-columns-repeated="4"/>
        </table:table-row>
        <table:table-row table:style-name="ro1">
          <table:table-cell office:value-type="float" office:value="673.623229980469">
            <text:p>673.6232299805</text:p>
          </table:table-cell>
          <table:table-cell office:value-type="float" office:value="0.0008721012">
            <text:p>0.0008721012</text:p>
          </table:table-cell>
          <table:table-cell table:number-columns-repeated="4"/>
        </table:table-row>
        <table:table-row table:style-name="ro1">
          <table:table-cell office:value-type="float" office:value="673.7431640625">
            <text:p>673.7431640625</text:p>
          </table:table-cell>
          <table:table-cell office:value-type="float" office:value="0.001817515">
            <text:p>0.001817515</text:p>
          </table:table-cell>
          <table:table-cell table:number-columns-repeated="4"/>
        </table:table-row>
        <table:table-row table:style-name="ro1">
          <table:table-cell office:value-type="float" office:value="673.863098144531">
            <text:p>673.8630981445</text:p>
          </table:table-cell>
          <table:table-cell office:value-type="float" office:value="0.005750085">
            <text:p>0.005750085</text:p>
          </table:table-cell>
          <table:table-cell table:number-columns-repeated="4"/>
        </table:table-row>
        <table:table-row table:style-name="ro1">
          <table:table-cell office:value-type="float" office:value="673.983032226563">
            <text:p>673.9830322266</text:p>
          </table:table-cell>
          <table:table-cell office:value-type="float" office:value="0.003132721">
            <text:p>0.003132721</text:p>
          </table:table-cell>
          <table:table-cell table:number-columns-repeated="4"/>
        </table:table-row>
        <table:table-row table:style-name="ro1">
          <table:table-cell office:value-type="float" office:value="674.102966308594">
            <text:p>674.1029663086</text:p>
          </table:table-cell>
          <table:table-cell office:value-type="float" office:value="0.01019051">
            <text:p>0.01019051</text:p>
          </table:table-cell>
          <table:table-cell table:number-columns-repeated="4"/>
        </table:table-row>
        <table:table-row table:style-name="ro1">
          <table:table-cell office:value-type="float" office:value="674.222900390625">
            <text:p>674.2229003906</text:p>
          </table:table-cell>
          <table:table-cell office:value-type="float" office:value="-0.003078549">
            <text:p>-0.003078549</text:p>
          </table:table-cell>
          <table:table-cell table:number-columns-repeated="4"/>
        </table:table-row>
        <table:table-row table:style-name="ro1">
          <table:table-cell office:value-type="float" office:value="674.342834472656">
            <text:p>674.3428344727</text:p>
          </table:table-cell>
          <table:table-cell office:value-type="float" office:value="-0.004274134">
            <text:p>-0.004274134</text:p>
          </table:table-cell>
          <table:table-cell table:number-columns-repeated="4"/>
        </table:table-row>
        <table:table-row table:style-name="ro1">
          <table:table-cell office:value-type="float" office:value="674.462768554688">
            <text:p>674.4627685547</text:p>
          </table:table-cell>
          <table:table-cell office:value-type="float" office:value="0.005832712">
            <text:p>0.005832712</text:p>
          </table:table-cell>
          <table:table-cell table:number-columns-repeated="4"/>
        </table:table-row>
        <table:table-row table:style-name="ro1">
          <table:table-cell office:value-type="float" office:value="674.582702636719">
            <text:p>674.5827026367</text:p>
          </table:table-cell>
          <table:table-cell office:value-type="float" office:value="0.006542341">
            <text:p>0.006542341</text:p>
          </table:table-cell>
          <table:table-cell table:number-columns-repeated="4"/>
        </table:table-row>
        <table:table-row table:style-name="ro1">
          <table:table-cell office:value-type="float" office:value="674.702697753906">
            <text:p>674.7026977539</text:p>
          </table:table-cell>
          <table:table-cell office:value-type="float" office:value="0.009735149">
            <text:p>0.009735149</text:p>
          </table:table-cell>
          <table:table-cell table:number-columns-repeated="4"/>
        </table:table-row>
        <table:table-row table:style-name="ro1">
          <table:table-cell office:value-type="float" office:value="674.822631835938">
            <text:p>674.8226318359</text:p>
          </table:table-cell>
          <table:table-cell office:value-type="float" office:value="0.0007287968">
            <text:p>0.0007287968</text:p>
          </table:table-cell>
          <table:table-cell table:number-columns-repeated="4"/>
        </table:table-row>
        <table:table-row table:style-name="ro1">
          <table:table-cell office:value-type="float" office:value="674.942565917969">
            <text:p>674.942565918</text:p>
          </table:table-cell>
          <table:table-cell office:value-type="float" office:value="0.0145933">
            <text:p>0.0145933</text:p>
          </table:table-cell>
          <table:table-cell table:number-columns-repeated="4"/>
        </table:table-row>
        <table:table-row table:style-name="ro1">
          <table:table-cell office:value-type="float" office:value="675.0625">
            <text:p>675.0625</text:p>
          </table:table-cell>
          <table:table-cell office:value-type="float" office:value="-0.001007513">
            <text:p>-0.001007513</text:p>
          </table:table-cell>
          <table:table-cell table:number-columns-repeated="4"/>
        </table:table-row>
        <table:table-row table:style-name="ro1">
          <table:table-cell office:value-type="float" office:value="675.182495117188">
            <text:p>675.1824951172</text:p>
          </table:table-cell>
          <table:table-cell office:value-type="string">
            <text:p>-7.226165E-05</text:p>
          </table:table-cell>
          <table:table-cell table:number-columns-repeated="4"/>
        </table:table-row>
        <table:table-row table:style-name="ro1">
          <table:table-cell office:value-type="float" office:value="675.302429199219">
            <text:p>675.3024291992</text:p>
          </table:table-cell>
          <table:table-cell office:value-type="float" office:value="0.008312182">
            <text:p>0.008312182</text:p>
          </table:table-cell>
          <table:table-cell table:number-columns-repeated="4"/>
        </table:table-row>
        <table:table-row table:style-name="ro1">
          <table:table-cell office:value-type="float" office:value="675.42236328125">
            <text:p>675.4223632813</text:p>
          </table:table-cell>
          <table:table-cell office:value-type="float" office:value="0.01452205">
            <text:p>0.01452205</text:p>
          </table:table-cell>
          <table:table-cell table:number-columns-repeated="4"/>
        </table:table-row>
        <table:table-row table:style-name="ro1">
          <table:table-cell office:value-type="float" office:value="675.542297363281">
            <text:p>675.5422973633</text:p>
          </table:table-cell>
          <table:table-cell office:value-type="float" office:value="0.01349994">
            <text:p>0.01349994</text:p>
          </table:table-cell>
          <table:table-cell table:number-columns-repeated="4"/>
        </table:table-row>
        <table:table-row table:style-name="ro1">
          <table:table-cell office:value-type="float" office:value="675.662292480469">
            <text:p>675.6622924805</text:p>
          </table:table-cell>
          <table:table-cell office:value-type="float" office:value="0.007585448">
            <text:p>0.007585448</text:p>
          </table:table-cell>
          <table:table-cell table:number-columns-repeated="4"/>
        </table:table-row>
        <table:table-row table:style-name="ro1">
          <table:table-cell office:value-type="float" office:value="675.7822265625">
            <text:p>675.7822265625</text:p>
          </table:table-cell>
          <table:table-cell office:value-type="float" office:value="0.01002991">
            <text:p>0.01002991</text:p>
          </table:table-cell>
          <table:table-cell table:number-columns-repeated="4"/>
        </table:table-row>
        <table:table-row table:style-name="ro1">
          <table:table-cell office:value-type="float" office:value="675.902160644531">
            <text:p>675.9021606445</text:p>
          </table:table-cell>
          <table:table-cell office:value-type="float" office:value="-0.004239916">
            <text:p>-0.004239916</text:p>
          </table:table-cell>
          <table:table-cell table:number-columns-repeated="4"/>
        </table:table-row>
        <table:table-row table:style-name="ro1">
          <table:table-cell office:value-type="float" office:value="676.022155761719">
            <text:p>676.0221557617</text:p>
          </table:table-cell>
          <table:table-cell office:value-type="float" office:value="0.01101699">
            <text:p>0.01101699</text:p>
          </table:table-cell>
          <table:table-cell table:number-columns-repeated="4"/>
        </table:table-row>
        <table:table-row table:style-name="ro1">
          <table:table-cell office:value-type="float" office:value="676.14208984375">
            <text:p>676.1420898438</text:p>
          </table:table-cell>
          <table:table-cell office:value-type="float" office:value="0.003000186">
            <text:p>0.003000186</text:p>
          </table:table-cell>
          <table:table-cell table:number-columns-repeated="4"/>
        </table:table-row>
        <table:table-row table:style-name="ro1">
          <table:table-cell office:value-type="float" office:value="676.262023925781">
            <text:p>676.2620239258</text:p>
          </table:table-cell>
          <table:table-cell office:value-type="float" office:value="-0.003206676">
            <text:p>-0.003206676</text:p>
          </table:table-cell>
          <table:table-cell table:number-columns-repeated="4"/>
        </table:table-row>
        <table:table-row table:style-name="ro1">
          <table:table-cell office:value-type="float" office:value="676.382019042969">
            <text:p>676.382019043</text:p>
          </table:table-cell>
          <table:table-cell office:value-type="float" office:value="0.01182246">
            <text:p>0.01182246</text:p>
          </table:table-cell>
          <table:table-cell table:number-columns-repeated="4"/>
        </table:table-row>
        <table:table-row table:style-name="ro1">
          <table:table-cell office:value-type="float" office:value="676.501953125">
            <text:p>676.501953125</text:p>
          </table:table-cell>
          <table:table-cell office:value-type="float" office:value="0.004242628">
            <text:p>0.004242628</text:p>
          </table:table-cell>
          <table:table-cell table:number-columns-repeated="4"/>
        </table:table-row>
        <table:table-row table:style-name="ro1">
          <table:table-cell office:value-type="float" office:value="676.621948242188">
            <text:p>676.6219482422</text:p>
          </table:table-cell>
          <table:table-cell office:value-type="float" office:value="-0.002881299">
            <text:p>-0.002881299</text:p>
          </table:table-cell>
          <table:table-cell table:number-columns-repeated="4"/>
        </table:table-row>
        <table:table-row table:style-name="ro1">
          <table:table-cell office:value-type="float" office:value="676.741882324219">
            <text:p>676.7418823242</text:p>
          </table:table-cell>
          <table:table-cell office:value-type="float" office:value="-0.006598965">
            <text:p>-0.006598965</text:p>
          </table:table-cell>
          <table:table-cell table:number-columns-repeated="4"/>
        </table:table-row>
        <table:table-row table:style-name="ro1">
          <table:table-cell office:value-type="float" office:value="676.861877441406">
            <text:p>676.8618774414</text:p>
          </table:table-cell>
          <table:table-cell office:value-type="float" office:value="0.001968956">
            <text:p>0.001968956</text:p>
          </table:table-cell>
          <table:table-cell table:number-columns-repeated="4"/>
        </table:table-row>
        <table:table-row table:style-name="ro1">
          <table:table-cell office:value-type="float" office:value="676.981811523438">
            <text:p>676.9818115234</text:p>
          </table:table-cell>
          <table:table-cell office:value-type="float" office:value="0.005465983">
            <text:p>0.005465983</text:p>
          </table:table-cell>
          <table:table-cell table:number-columns-repeated="4"/>
        </table:table-row>
        <table:table-row table:style-name="ro1">
          <table:table-cell office:value-type="float" office:value="677.101806640625">
            <text:p>677.1018066406</text:p>
          </table:table-cell>
          <table:table-cell office:value-type="float" office:value="0.003400201">
            <text:p>0.003400201</text:p>
          </table:table-cell>
          <table:table-cell table:number-columns-repeated="4"/>
        </table:table-row>
        <table:table-row table:style-name="ro1">
          <table:table-cell office:value-type="float" office:value="677.221740722656">
            <text:p>677.2217407227</text:p>
          </table:table-cell>
          <table:table-cell office:value-type="float" office:value="-0.001010385">
            <text:p>-0.001010385</text:p>
          </table:table-cell>
          <table:table-cell table:number-columns-repeated="4"/>
        </table:table-row>
        <table:table-row table:style-name="ro1">
          <table:table-cell office:value-type="float" office:value="677.341735839844">
            <text:p>677.3417358398</text:p>
          </table:table-cell>
          <table:table-cell office:value-type="float" office:value="0.01119548">
            <text:p>0.01119548</text:p>
          </table:table-cell>
          <table:table-cell table:number-columns-repeated="4"/>
        </table:table-row>
        <table:table-row table:style-name="ro1">
          <table:table-cell office:value-type="float" office:value="677.461669921875">
            <text:p>677.4616699219</text:p>
          </table:table-cell>
          <table:table-cell office:value-type="float" office:value="0.00116907">
            <text:p>0.00116907</text:p>
          </table:table-cell>
          <table:table-cell table:number-columns-repeated="4"/>
        </table:table-row>
        <table:table-row table:style-name="ro1">
          <table:table-cell office:value-type="float" office:value="677.581665039063">
            <text:p>677.5816650391</text:p>
          </table:table-cell>
          <table:table-cell office:value-type="float" office:value="0.006773257">
            <text:p>0.006773257</text:p>
          </table:table-cell>
          <table:table-cell table:number-columns-repeated="4"/>
        </table:table-row>
        <table:table-row table:style-name="ro1">
          <table:table-cell office:value-type="float" office:value="677.70166015625">
            <text:p>677.7016601563</text:p>
          </table:table-cell>
          <table:table-cell office:value-type="float" office:value="-0.0001189783">
            <text:p>-0.0001189783</text:p>
          </table:table-cell>
          <table:table-cell table:number-columns-repeated="4"/>
        </table:table-row>
        <table:table-row table:style-name="ro1">
          <table:table-cell office:value-type="float" office:value="677.821594238281">
            <text:p>677.8215942383</text:p>
          </table:table-cell>
          <table:table-cell office:value-type="float" office:value="0.006994154">
            <text:p>0.006994154</text:p>
          </table:table-cell>
          <table:table-cell table:number-columns-repeated="4"/>
        </table:table-row>
        <table:table-row table:style-name="ro1">
          <table:table-cell office:value-type="float" office:value="677.941589355469">
            <text:p>677.9415893555</text:p>
          </table:table-cell>
          <table:table-cell office:value-type="float" office:value="0.003417006">
            <text:p>0.003417006</text:p>
          </table:table-cell>
          <table:table-cell table:number-columns-repeated="4"/>
        </table:table-row>
        <table:table-row table:style-name="ro1">
          <table:table-cell office:value-type="float" office:value="678.061584472656">
            <text:p>678.0615844727</text:p>
          </table:table-cell>
          <table:table-cell office:value-type="float" office:value="0.0005151098">
            <text:p>0.0005151098</text:p>
          </table:table-cell>
          <table:table-cell table:number-columns-repeated="4"/>
        </table:table-row>
        <table:table-row table:style-name="ro1">
          <table:table-cell office:value-type="float" office:value="678.181518554688">
            <text:p>678.1815185547</text:p>
          </table:table-cell>
          <table:table-cell office:value-type="float" office:value="-0.0001612253">
            <text:p>-0.0001612253</text:p>
          </table:table-cell>
          <table:table-cell table:number-columns-repeated="4"/>
        </table:table-row>
        <table:table-row table:style-name="ro1">
          <table:table-cell office:value-type="float" office:value="678.301513671875">
            <text:p>678.3015136719</text:p>
          </table:table-cell>
          <table:table-cell office:value-type="float" office:value="0.004283581">
            <text:p>0.004283581</text:p>
          </table:table-cell>
          <table:table-cell table:number-columns-repeated="4"/>
        </table:table-row>
        <table:table-row table:style-name="ro1">
          <table:table-cell office:value-type="float" office:value="678.421508789063">
            <text:p>678.4215087891</text:p>
          </table:table-cell>
          <table:table-cell office:value-type="float" office:value="-0.001333254">
            <text:p>-0.001333254</text:p>
          </table:table-cell>
          <table:table-cell table:number-columns-repeated="4"/>
        </table:table-row>
        <table:table-row table:style-name="ro1">
          <table:table-cell office:value-type="float" office:value="678.541442871094">
            <text:p>678.5414428711</text:p>
          </table:table-cell>
          <table:table-cell office:value-type="float" office:value="0.01768457">
            <text:p>0.01768457</text:p>
          </table:table-cell>
          <table:table-cell table:number-columns-repeated="4"/>
        </table:table-row>
        <table:table-row table:style-name="ro1">
          <table:table-cell office:value-type="float" office:value="678.661437988281">
            <text:p>678.6614379883</text:p>
          </table:table-cell>
          <table:table-cell office:value-type="float" office:value="0.002273249">
            <text:p>0.002273249</text:p>
          </table:table-cell>
          <table:table-cell table:number-columns-repeated="4"/>
        </table:table-row>
        <table:table-row table:style-name="ro1">
          <table:table-cell office:value-type="float" office:value="678.781433105469">
            <text:p>678.7814331055</text:p>
          </table:table-cell>
          <table:table-cell office:value-type="float" office:value="0.006425685">
            <text:p>0.006425685</text:p>
          </table:table-cell>
          <table:table-cell table:number-columns-repeated="4"/>
        </table:table-row>
        <table:table-row table:style-name="ro1">
          <table:table-cell office:value-type="float" office:value="678.901428222656">
            <text:p>678.9014282227</text:p>
          </table:table-cell>
          <table:table-cell office:value-type="float" office:value="0.008063784">
            <text:p>0.008063784</text:p>
          </table:table-cell>
          <table:table-cell table:number-columns-repeated="4"/>
        </table:table-row>
        <table:table-row table:style-name="ro1">
          <table:table-cell office:value-type="float" office:value="679.021362304688">
            <text:p>679.0213623047</text:p>
          </table:table-cell>
          <table:table-cell office:value-type="float" office:value="0.006009284">
            <text:p>0.006009284</text:p>
          </table:table-cell>
          <table:table-cell table:number-columns-repeated="4"/>
        </table:table-row>
        <table:table-row table:style-name="ro1">
          <table:table-cell office:value-type="float" office:value="679.141357421875">
            <text:p>679.1413574219</text:p>
          </table:table-cell>
          <table:table-cell office:value-type="float" office:value="0.003277988">
            <text:p>0.003277988</text:p>
          </table:table-cell>
          <table:table-cell table:number-columns-repeated="4"/>
        </table:table-row>
        <table:table-row table:style-name="ro1">
          <table:table-cell office:value-type="float" office:value="679.261352539063">
            <text:p>679.2613525391</text:p>
          </table:table-cell>
          <table:table-cell office:value-type="float" office:value="0.01000577">
            <text:p>0.01000577</text:p>
          </table:table-cell>
          <table:table-cell table:number-columns-repeated="4"/>
        </table:table-row>
        <table:table-row table:style-name="ro1">
          <table:table-cell office:value-type="float" office:value="679.38134765625">
            <text:p>679.3813476563</text:p>
          </table:table-cell>
          <table:table-cell office:value-type="float" office:value="0.01090527">
            <text:p>0.01090527</text:p>
          </table:table-cell>
          <table:table-cell table:number-columns-repeated="4"/>
        </table:table-row>
        <table:table-row table:style-name="ro1">
          <table:table-cell office:value-type="float" office:value="679.501342773438">
            <text:p>679.5013427734</text:p>
          </table:table-cell>
          <table:table-cell office:value-type="float" office:value="-0.001204311">
            <text:p>-0.001204311</text:p>
          </table:table-cell>
          <table:table-cell table:number-columns-repeated="4"/>
        </table:table-row>
        <table:table-row table:style-name="ro1">
          <table:table-cell office:value-type="float" office:value="679.621337890625">
            <text:p>679.6213378906</text:p>
          </table:table-cell>
          <table:table-cell office:value-type="float" office:value="0.007084561">
            <text:p>0.007084561</text:p>
          </table:table-cell>
          <table:table-cell table:number-columns-repeated="4"/>
        </table:table-row>
        <table:table-row table:style-name="ro1">
          <table:table-cell office:value-type="float" office:value="679.741333007813">
            <text:p>679.7413330078</text:p>
          </table:table-cell>
          <table:table-cell office:value-type="float" office:value="0.004812632">
            <text:p>0.004812632</text:p>
          </table:table-cell>
          <table:table-cell table:number-columns-repeated="4"/>
        </table:table-row>
        <table:table-row table:style-name="ro1">
          <table:table-cell office:value-type="float" office:value="679.861267089844">
            <text:p>679.8612670898</text:p>
          </table:table-cell>
          <table:table-cell office:value-type="float" office:value="0.006651338">
            <text:p>0.006651338</text:p>
          </table:table-cell>
          <table:table-cell table:number-columns-repeated="4"/>
        </table:table-row>
        <table:table-row table:style-name="ro1">
          <table:table-cell office:value-type="float" office:value="679.981262207031">
            <text:p>679.981262207</text:p>
          </table:table-cell>
          <table:table-cell office:value-type="float" office:value="0.001618515">
            <text:p>0.001618515</text:p>
          </table:table-cell>
          <table:table-cell table:number-columns-repeated="4"/>
        </table:table-row>
        <table:table-row table:style-name="ro1">
          <table:table-cell office:value-type="float" office:value="680.101257324219">
            <text:p>680.1012573242</text:p>
          </table:table-cell>
          <table:table-cell office:value-type="float" office:value="-0.002416003">
            <text:p>-0.002416003</text:p>
          </table:table-cell>
          <table:table-cell table:number-columns-repeated="4"/>
        </table:table-row>
        <table:table-row table:style-name="ro1">
          <table:table-cell office:value-type="float" office:value="680.221252441406">
            <text:p>680.2212524414</text:p>
          </table:table-cell>
          <table:table-cell office:value-type="float" office:value="0.01142666">
            <text:p>0.01142666</text:p>
          </table:table-cell>
          <table:table-cell table:number-columns-repeated="4"/>
        </table:table-row>
        <table:table-row table:style-name="ro1">
          <table:table-cell office:value-type="float" office:value="680.341247558594">
            <text:p>680.3412475586</text:p>
          </table:table-cell>
          <table:table-cell office:value-type="float" office:value="-0.001075347">
            <text:p>-0.001075347</text:p>
          </table:table-cell>
          <table:table-cell table:number-columns-repeated="4"/>
        </table:table-row>
        <table:table-row table:style-name="ro1">
          <table:table-cell office:value-type="float" office:value="680.461242675781">
            <text:p>680.4612426758</text:p>
          </table:table-cell>
          <table:table-cell office:value-type="float" office:value="-0.001505816">
            <text:p>-0.001505816</text:p>
          </table:table-cell>
          <table:table-cell table:number-columns-repeated="4"/>
        </table:table-row>
        <table:table-row table:style-name="ro1">
          <table:table-cell office:value-type="float" office:value="680.581237792969">
            <text:p>680.581237793</text:p>
          </table:table-cell>
          <table:table-cell office:value-type="float" office:value="0.001798369">
            <text:p>0.001798369</text:p>
          </table:table-cell>
          <table:table-cell table:number-columns-repeated="4"/>
        </table:table-row>
        <table:table-row table:style-name="ro1">
          <table:table-cell office:value-type="float" office:value="680.701232910156">
            <text:p>680.7012329102</text:p>
          </table:table-cell>
          <table:table-cell office:value-type="float" office:value="0.006278894">
            <text:p>0.006278894</text:p>
          </table:table-cell>
          <table:table-cell table:number-columns-repeated="4"/>
        </table:table-row>
        <table:table-row table:style-name="ro1">
          <table:table-cell office:value-type="float" office:value="680.821228027344">
            <text:p>680.8212280273</text:p>
          </table:table-cell>
          <table:table-cell office:value-type="float" office:value="0.006093977">
            <text:p>0.006093977</text:p>
          </table:table-cell>
          <table:table-cell table:number-columns-repeated="4"/>
        </table:table-row>
        <table:table-row table:style-name="ro1">
          <table:table-cell office:value-type="float" office:value="680.941223144531">
            <text:p>680.9412231445</text:p>
          </table:table-cell>
          <table:table-cell office:value-type="float" office:value="0.002509728">
            <text:p>0.002509728</text:p>
          </table:table-cell>
          <table:table-cell table:number-columns-repeated="4"/>
        </table:table-row>
        <table:table-row table:style-name="ro1">
          <table:table-cell office:value-type="float" office:value="681.061218261719">
            <text:p>681.0612182617</text:p>
          </table:table-cell>
          <table:table-cell office:value-type="float" office:value="0.0006750327">
            <text:p>0.0006750327</text:p>
          </table:table-cell>
          <table:table-cell table:number-columns-repeated="4"/>
        </table:table-row>
        <table:table-row table:style-name="ro1">
          <table:table-cell office:value-type="float" office:value="681.181274414063">
            <text:p>681.1812744141</text:p>
          </table:table-cell>
          <table:table-cell office:value-type="float" office:value="0.001506323">
            <text:p>0.001506323</text:p>
          </table:table-cell>
          <table:table-cell table:number-columns-repeated="4"/>
        </table:table-row>
        <table:table-row table:style-name="ro1">
          <table:table-cell office:value-type="float" office:value="681.30126953125">
            <text:p>681.3012695313</text:p>
          </table:table-cell>
          <table:table-cell office:value-type="float" office:value="0.005083851">
            <text:p>0.005083851</text:p>
          </table:table-cell>
          <table:table-cell table:number-columns-repeated="4"/>
        </table:table-row>
        <table:table-row table:style-name="ro1">
          <table:table-cell office:value-type="float" office:value="681.421264648438">
            <text:p>681.4212646484</text:p>
          </table:table-cell>
          <table:table-cell office:value-type="float" office:value="0.007263468">
            <text:p>0.007263468</text:p>
          </table:table-cell>
          <table:table-cell table:number-columns-repeated="4"/>
        </table:table-row>
        <table:table-row table:style-name="ro1">
          <table:table-cell office:value-type="float" office:value="681.541259765625">
            <text:p>681.5412597656</text:p>
          </table:table-cell>
          <table:table-cell office:value-type="float" office:value="-0.006576649">
            <text:p>-0.006576649</text:p>
          </table:table-cell>
          <table:table-cell table:number-columns-repeated="4"/>
        </table:table-row>
        <table:table-row table:style-name="ro1">
          <table:table-cell office:value-type="float" office:value="681.661254882813">
            <text:p>681.6612548828</text:p>
          </table:table-cell>
          <table:table-cell office:value-type="float" office:value="0.004224083">
            <text:p>0.004224083</text:p>
          </table:table-cell>
          <table:table-cell table:number-columns-repeated="4"/>
        </table:table-row>
        <table:table-row table:style-name="ro1">
          <table:table-cell office:value-type="float" office:value="681.78125">
            <text:p>681.78125</text:p>
          </table:table-cell>
          <table:table-cell office:value-type="float" office:value="-0.003302383">
            <text:p>-0.003302383</text:p>
          </table:table-cell>
          <table:table-cell table:number-columns-repeated="4"/>
        </table:table-row>
        <table:table-row table:style-name="ro1">
          <table:table-cell office:value-type="float" office:value="681.901245117188">
            <text:p>681.9012451172</text:p>
          </table:table-cell>
          <table:table-cell office:value-type="float" office:value="0.005459189">
            <text:p>0.005459189</text:p>
          </table:table-cell>
          <table:table-cell table:number-columns-repeated="4"/>
        </table:table-row>
        <table:table-row table:style-name="ro1">
          <table:table-cell office:value-type="float" office:value="682.021301269531">
            <text:p>682.0213012695</text:p>
          </table:table-cell>
          <table:table-cell office:value-type="string">
            <text:p>-7.695869E-05</text:p>
          </table:table-cell>
          <table:table-cell table:number-columns-repeated="4"/>
        </table:table-row>
        <table:table-row table:style-name="ro1">
          <table:table-cell office:value-type="float" office:value="682.141296386719">
            <text:p>682.1412963867</text:p>
          </table:table-cell>
          <table:table-cell office:value-type="float" office:value="-0.001061591">
            <text:p>-0.001061591</text:p>
          </table:table-cell>
          <table:table-cell table:number-columns-repeated="4"/>
        </table:table-row>
        <table:table-row table:style-name="ro1">
          <table:table-cell office:value-type="float" office:value="682.261291503906">
            <text:p>682.2612915039</text:p>
          </table:table-cell>
          <table:table-cell office:value-type="float" office:value="-0.001188021">
            <text:p>-0.001188021</text:p>
          </table:table-cell>
          <table:table-cell table:number-columns-repeated="4"/>
        </table:table-row>
        <table:table-row table:style-name="ro1">
          <table:table-cell office:value-type="float" office:value="682.381286621094">
            <text:p>682.3812866211</text:p>
          </table:table-cell>
          <table:table-cell office:value-type="float" office:value="0.001785306">
            <text:p>0.001785306</text:p>
          </table:table-cell>
          <table:table-cell table:number-columns-repeated="4"/>
        </table:table-row>
        <table:table-row table:style-name="ro1">
          <table:table-cell office:value-type="float" office:value="682.501342773438">
            <text:p>682.5013427734</text:p>
          </table:table-cell>
          <table:table-cell office:value-type="float" office:value="0.005156857">
            <text:p>0.005156857</text:p>
          </table:table-cell>
          <table:table-cell table:number-columns-repeated="4"/>
        </table:table-row>
        <table:table-row table:style-name="ro1">
          <table:table-cell office:value-type="float" office:value="682.621337890625">
            <text:p>682.6213378906</text:p>
          </table:table-cell>
          <table:table-cell office:value-type="float" office:value="0.001292376">
            <text:p>0.001292376</text:p>
          </table:table-cell>
          <table:table-cell table:number-columns-repeated="4"/>
        </table:table-row>
        <table:table-row table:style-name="ro1">
          <table:table-cell office:value-type="float" office:value="682.741333007813">
            <text:p>682.7413330078</text:p>
          </table:table-cell>
          <table:table-cell office:value-type="float" office:value="-0.0006455907">
            <text:p>-0.0006455907</text:p>
          </table:table-cell>
          <table:table-cell table:number-columns-repeated="4"/>
        </table:table-row>
        <table:table-row table:style-name="ro1">
          <table:table-cell office:value-type="float" office:value="682.861389160156">
            <text:p>682.8613891602</text:p>
          </table:table-cell>
          <table:table-cell office:value-type="float" office:value="0.00242445">
            <text:p>0.00242445</text:p>
          </table:table-cell>
          <table:table-cell table:number-columns-repeated="4"/>
        </table:table-row>
        <table:table-row table:style-name="ro1">
          <table:table-cell office:value-type="float" office:value="682.981384277344">
            <text:p>682.9813842773</text:p>
          </table:table-cell>
          <table:table-cell office:value-type="float" office:value="0.004197922">
            <text:p>0.004197922</text:p>
          </table:table-cell>
          <table:table-cell table:number-columns-repeated="4"/>
        </table:table-row>
        <table:table-row table:style-name="ro1">
          <table:table-cell office:value-type="float" office:value="683.101379394531">
            <text:p>683.1013793945</text:p>
          </table:table-cell>
          <table:table-cell office:value-type="float" office:value="-0.003188515">
            <text:p>-0.003188515</text:p>
          </table:table-cell>
          <table:table-cell table:number-columns-repeated="4"/>
        </table:table-row>
        <table:table-row table:style-name="ro1">
          <table:table-cell office:value-type="float" office:value="683.221435546875">
            <text:p>683.2214355469</text:p>
          </table:table-cell>
          <table:table-cell office:value-type="float" office:value="0.002087072">
            <text:p>0.002087072</text:p>
          </table:table-cell>
          <table:table-cell table:number-columns-repeated="4"/>
        </table:table-row>
        <table:table-row table:style-name="ro1">
          <table:table-cell office:value-type="float" office:value="683.341430664063">
            <text:p>683.3414306641</text:p>
          </table:table-cell>
          <table:table-cell office:value-type="float" office:value="-0.004992391">
            <text:p>-0.004992391</text:p>
          </table:table-cell>
          <table:table-cell table:number-columns-repeated="4"/>
        </table:table-row>
        <table:table-row table:style-name="ro1">
          <table:table-cell office:value-type="float" office:value="683.46142578125">
            <text:p>683.4614257813</text:p>
          </table:table-cell>
          <table:table-cell office:value-type="float" office:value="-0.003614065">
            <text:p>-0.003614065</text:p>
          </table:table-cell>
          <table:table-cell table:number-columns-repeated="4"/>
        </table:table-row>
        <table:table-row table:style-name="ro1">
          <table:table-cell office:value-type="float" office:value="683.581481933594">
            <text:p>683.5814819336</text:p>
          </table:table-cell>
          <table:table-cell office:value-type="float" office:value="-0.001745504">
            <text:p>-0.001745504</text:p>
          </table:table-cell>
          <table:table-cell table:number-columns-repeated="4"/>
        </table:table-row>
        <table:table-row table:style-name="ro1">
          <table:table-cell office:value-type="float" office:value="683.701477050781">
            <text:p>683.7014770508</text:p>
          </table:table-cell>
          <table:table-cell office:value-type="float" office:value="0.0008577415">
            <text:p>0.0008577415</text:p>
          </table:table-cell>
          <table:table-cell table:number-columns-repeated="4"/>
        </table:table-row>
        <table:table-row table:style-name="ro1">
          <table:table-cell office:value-type="float" office:value="683.821533203125">
            <text:p>683.8215332031</text:p>
          </table:table-cell>
          <table:table-cell office:value-type="float" office:value="-0.002162141">
            <text:p>-0.002162141</text:p>
          </table:table-cell>
          <table:table-cell table:number-columns-repeated="4"/>
        </table:table-row>
        <table:table-row table:style-name="ro1">
          <table:table-cell office:value-type="float" office:value="683.941528320313">
            <text:p>683.9415283203</text:p>
          </table:table-cell>
          <table:table-cell office:value-type="float" office:value="-0.00311544">
            <text:p>-0.00311544</text:p>
          </table:table-cell>
          <table:table-cell table:number-columns-repeated="4"/>
        </table:table-row>
        <table:table-row table:style-name="ro1">
          <table:table-cell office:value-type="float" office:value="684.061584472656">
            <text:p>684.0615844727</text:p>
          </table:table-cell>
          <table:table-cell office:value-type="float" office:value="0.006929183">
            <text:p>0.006929183</text:p>
          </table:table-cell>
          <table:table-cell table:number-columns-repeated="4"/>
        </table:table-row>
        <table:table-row table:style-name="ro1">
          <table:table-cell office:value-type="float" office:value="684.181579589844">
            <text:p>684.1815795898</text:p>
          </table:table-cell>
          <table:table-cell office:value-type="float" office:value="-0.007520953">
            <text:p>-0.007520953</text:p>
          </table:table-cell>
          <table:table-cell table:number-columns-repeated="4"/>
        </table:table-row>
        <table:table-row table:style-name="ro1">
          <table:table-cell office:value-type="float" office:value="684.301635742188">
            <text:p>684.3016357422</text:p>
          </table:table-cell>
          <table:table-cell office:value-type="float" office:value="-0.002382955">
            <text:p>-0.002382955</text:p>
          </table:table-cell>
          <table:table-cell table:number-columns-repeated="4"/>
        </table:table-row>
        <table:table-row table:style-name="ro1">
          <table:table-cell office:value-type="float" office:value="684.421630859375">
            <text:p>684.4216308594</text:p>
          </table:table-cell>
          <table:table-cell office:value-type="float" office:value="-0.005078045">
            <text:p>-0.005078045</text:p>
          </table:table-cell>
          <table:table-cell table:number-columns-repeated="4"/>
        </table:table-row>
        <table:table-row table:style-name="ro1">
          <table:table-cell office:value-type="float" office:value="684.541687011719">
            <text:p>684.5416870117</text:p>
          </table:table-cell>
          <table:table-cell office:value-type="float" office:value="0.006970359">
            <text:p>0.006970359</text:p>
          </table:table-cell>
          <table:table-cell table:number-columns-repeated="4"/>
        </table:table-row>
        <table:table-row table:style-name="ro1">
          <table:table-cell office:value-type="float" office:value="684.661682128906">
            <text:p>684.6616821289</text:p>
          </table:table-cell>
          <table:table-cell office:value-type="float" office:value="-0.00320974">
            <text:p>-0.00320974</text:p>
          </table:table-cell>
          <table:table-cell table:number-columns-repeated="4"/>
        </table:table-row>
        <table:table-row table:style-name="ro1">
          <table:table-cell office:value-type="float" office:value="684.78173828125">
            <text:p>684.7817382813</text:p>
          </table:table-cell>
          <table:table-cell office:value-type="float" office:value="0.008489694">
            <text:p>0.008489694</text:p>
          </table:table-cell>
          <table:table-cell table:number-columns-repeated="4"/>
        </table:table-row>
        <table:table-row table:style-name="ro1">
          <table:table-cell office:value-type="float" office:value="684.901733398438">
            <text:p>684.9017333984</text:p>
          </table:table-cell>
          <table:table-cell office:value-type="float" office:value="0.01012518">
            <text:p>0.01012518</text:p>
          </table:table-cell>
          <table:table-cell table:number-columns-repeated="4"/>
        </table:table-row>
        <table:table-row table:style-name="ro1">
          <table:table-cell office:value-type="float" office:value="685.021789550781">
            <text:p>685.0217895508</text:p>
          </table:table-cell>
          <table:table-cell office:value-type="float" office:value="-0.001502781">
            <text:p>-0.001502781</text:p>
          </table:table-cell>
          <table:table-cell table:number-columns-repeated="4"/>
        </table:table-row>
        <table:table-row table:style-name="ro1">
          <table:table-cell office:value-type="float" office:value="685.141784667969">
            <text:p>685.141784668</text:p>
          </table:table-cell>
          <table:table-cell office:value-type="float" office:value="0.003653717">
            <text:p>0.003653717</text:p>
          </table:table-cell>
          <table:table-cell table:number-columns-repeated="4"/>
        </table:table-row>
        <table:table-row table:style-name="ro1">
          <table:table-cell office:value-type="float" office:value="685.261840820313">
            <text:p>685.2618408203</text:p>
          </table:table-cell>
          <table:table-cell office:value-type="float" office:value="0.01170619">
            <text:p>0.01170619</text:p>
          </table:table-cell>
          <table:table-cell table:number-columns-repeated="4"/>
        </table:table-row>
        <table:table-row table:style-name="ro1">
          <table:table-cell office:value-type="float" office:value="685.381896972656">
            <text:p>685.3818969727</text:p>
          </table:table-cell>
          <table:table-cell office:value-type="float" office:value="0.004744434">
            <text:p>0.004744434</text:p>
          </table:table-cell>
          <table:table-cell table:number-columns-repeated="4"/>
        </table:table-row>
        <table:table-row table:style-name="ro1">
          <table:table-cell office:value-type="float" office:value="685.501892089844">
            <text:p>685.5018920898</text:p>
          </table:table-cell>
          <table:table-cell office:value-type="float" office:value="-0.0008130611">
            <text:p>-0.0008130611</text:p>
          </table:table-cell>
          <table:table-cell table:number-columns-repeated="4"/>
        </table:table-row>
        <table:table-row table:style-name="ro1">
          <table:table-cell office:value-type="float" office:value="685.621948242188">
            <text:p>685.6219482422</text:p>
          </table:table-cell>
          <table:table-cell office:value-type="float" office:value="0.01357663">
            <text:p>0.01357663</text:p>
          </table:table-cell>
          <table:table-cell table:number-columns-repeated="4"/>
        </table:table-row>
        <table:table-row table:style-name="ro1">
          <table:table-cell office:value-type="float" office:value="685.742004394531">
            <text:p>685.7420043945</text:p>
          </table:table-cell>
          <table:table-cell office:value-type="float" office:value="0.001885655">
            <text:p>0.001885655</text:p>
          </table:table-cell>
          <table:table-cell table:number-columns-repeated="4"/>
        </table:table-row>
        <table:table-row table:style-name="ro1">
          <table:table-cell office:value-type="float" office:value="685.861999511719">
            <text:p>685.8619995117</text:p>
          </table:table-cell>
          <table:table-cell office:value-type="float" office:value="0.003062258">
            <text:p>0.003062258</text:p>
          </table:table-cell>
          <table:table-cell table:number-columns-repeated="4"/>
        </table:table-row>
        <table:table-row table:style-name="ro1">
          <table:table-cell office:value-type="float" office:value="685.982055664063">
            <text:p>685.9820556641</text:p>
          </table:table-cell>
          <table:table-cell office:value-type="float" office:value="-0.0006751462">
            <text:p>-0.0006751462</text:p>
          </table:table-cell>
          <table:table-cell table:number-columns-repeated="4"/>
        </table:table-row>
        <table:table-row table:style-name="ro1">
          <table:table-cell office:value-type="float" office:value="686.102111816406">
            <text:p>686.1021118164</text:p>
          </table:table-cell>
          <table:table-cell office:value-type="float" office:value="0.004404236">
            <text:p>0.004404236</text:p>
          </table:table-cell>
          <table:table-cell table:number-columns-repeated="4"/>
        </table:table-row>
        <table:table-row table:style-name="ro1">
          <table:table-cell office:value-type="float" office:value="686.22216796875">
            <text:p>686.2221679688</text:p>
          </table:table-cell>
          <table:table-cell office:value-type="float" office:value="-0.004689561">
            <text:p>-0.004689561</text:p>
          </table:table-cell>
          <table:table-cell table:number-columns-repeated="4"/>
        </table:table-row>
        <table:table-row table:style-name="ro1">
          <table:table-cell office:value-type="float" office:value="686.342163085938">
            <text:p>686.3421630859</text:p>
          </table:table-cell>
          <table:table-cell office:value-type="float" office:value="-0.003290987">
            <text:p>-0.003290987</text:p>
          </table:table-cell>
          <table:table-cell table:number-columns-repeated="4"/>
        </table:table-row>
        <table:table-row table:style-name="ro1">
          <table:table-cell office:value-type="float" office:value="686.462219238281">
            <text:p>686.4622192383</text:p>
          </table:table-cell>
          <table:table-cell office:value-type="float" office:value="0.004254408">
            <text:p>0.004254408</text:p>
          </table:table-cell>
          <table:table-cell table:number-columns-repeated="4"/>
        </table:table-row>
        <table:table-row table:style-name="ro1">
          <table:table-cell office:value-type="float" office:value="686.582275390625">
            <text:p>686.5822753906</text:p>
          </table:table-cell>
          <table:table-cell office:value-type="float" office:value="0.001109348">
            <text:p>0.001109348</text:p>
          </table:table-cell>
          <table:table-cell table:number-columns-repeated="4"/>
        </table:table-row>
        <table:table-row table:style-name="ro1">
          <table:table-cell office:value-type="float" office:value="686.702331542969">
            <text:p>686.702331543</text:p>
          </table:table-cell>
          <table:table-cell office:value-type="float" office:value="0.004351575">
            <text:p>0.004351575</text:p>
          </table:table-cell>
          <table:table-cell table:number-columns-repeated="4"/>
        </table:table-row>
        <table:table-row table:style-name="ro1">
          <table:table-cell office:value-type="float" office:value="686.822387695313">
            <text:p>686.8223876953</text:p>
          </table:table-cell>
          <table:table-cell office:value-type="float" office:value="0.0002873504">
            <text:p>0.0002873504</text:p>
          </table:table-cell>
          <table:table-cell table:number-columns-repeated="4"/>
        </table:table-row>
        <table:table-row table:style-name="ro1">
          <table:table-cell office:value-type="float" office:value="686.9423828125">
            <text:p>686.9423828125</text:p>
          </table:table-cell>
          <table:table-cell office:value-type="float" office:value="0.008893187">
            <text:p>0.008893187</text:p>
          </table:table-cell>
          <table:table-cell table:number-columns-repeated="4"/>
        </table:table-row>
        <table:table-row table:style-name="ro1">
          <table:table-cell office:value-type="float" office:value="687.062438964844">
            <text:p>687.0624389648</text:p>
          </table:table-cell>
          <table:table-cell office:value-type="float" office:value="0.004726781">
            <text:p>0.004726781</text:p>
          </table:table-cell>
          <table:table-cell table:number-columns-repeated="4"/>
        </table:table-row>
        <table:table-row table:style-name="ro1">
          <table:table-cell office:value-type="float" office:value="687.182495117188">
            <text:p>687.1824951172</text:p>
          </table:table-cell>
          <table:table-cell office:value-type="float" office:value="-0.006861057">
            <text:p>-0.006861057</text:p>
          </table:table-cell>
          <table:table-cell table:number-columns-repeated="4"/>
        </table:table-row>
        <table:table-row table:style-name="ro1">
          <table:table-cell office:value-type="float" office:value="687.302551269531">
            <text:p>687.3025512695</text:p>
          </table:table-cell>
          <table:table-cell office:value-type="float" office:value="0.003795638">
            <text:p>0.003795638</text:p>
          </table:table-cell>
          <table:table-cell table:number-columns-repeated="4"/>
        </table:table-row>
        <table:table-row table:style-name="ro1">
          <table:table-cell office:value-type="float" office:value="687.422607421875">
            <text:p>687.4226074219</text:p>
          </table:table-cell>
          <table:table-cell office:value-type="float" office:value="-0.003305399">
            <text:p>-0.003305399</text:p>
          </table:table-cell>
          <table:table-cell table:number-columns-repeated="4"/>
        </table:table-row>
        <table:table-row table:style-name="ro1">
          <table:table-cell office:value-type="float" office:value="687.542663574219">
            <text:p>687.5426635742</text:p>
          </table:table-cell>
          <table:table-cell office:value-type="float" office:value="-0.005732778">
            <text:p>-0.005732778</text:p>
          </table:table-cell>
          <table:table-cell table:number-columns-repeated="4"/>
        </table:table-row>
        <table:table-row table:style-name="ro1">
          <table:table-cell office:value-type="float" office:value="687.662719726563">
            <text:p>687.6627197266</text:p>
          </table:table-cell>
          <table:table-cell office:value-type="float" office:value="0.01171246">
            <text:p>0.01171246</text:p>
          </table:table-cell>
          <table:table-cell table:number-columns-repeated="4"/>
        </table:table-row>
        <table:table-row table:style-name="ro1">
          <table:table-cell office:value-type="float" office:value="687.782775878906">
            <text:p>687.7827758789</text:p>
          </table:table-cell>
          <table:table-cell office:value-type="float" office:value="0.002108946">
            <text:p>0.002108946</text:p>
          </table:table-cell>
          <table:table-cell table:number-columns-repeated="4"/>
        </table:table-row>
        <table:table-row table:style-name="ro1">
          <table:table-cell office:value-type="float" office:value="687.90283203125">
            <text:p>687.9028320313</text:p>
          </table:table-cell>
          <table:table-cell office:value-type="float" office:value="0.008902605">
            <text:p>0.008902605</text:p>
          </table:table-cell>
          <table:table-cell table:number-columns-repeated="4"/>
        </table:table-row>
        <table:table-row table:style-name="ro1">
          <table:table-cell office:value-type="float" office:value="688.022888183594">
            <text:p>688.0228881836</text:p>
          </table:table-cell>
          <table:table-cell office:value-type="float" office:value="0.0102518">
            <text:p>0.0102518</text:p>
          </table:table-cell>
          <table:table-cell table:number-columns-repeated="4"/>
        </table:table-row>
        <table:table-row table:style-name="ro1">
          <table:table-cell office:value-type="float" office:value="688.142944335938">
            <text:p>688.1429443359</text:p>
          </table:table-cell>
          <table:table-cell office:value-type="float" office:value="0.005871566">
            <text:p>0.005871566</text:p>
          </table:table-cell>
          <table:table-cell table:number-columns-repeated="4"/>
        </table:table-row>
        <table:table-row table:style-name="ro1">
          <table:table-cell office:value-type="float" office:value="688.263000488281">
            <text:p>688.2630004883</text:p>
          </table:table-cell>
          <table:table-cell office:value-type="float" office:value="-0.001845936">
            <text:p>-0.001845936</text:p>
          </table:table-cell>
          <table:table-cell table:number-columns-repeated="4"/>
        </table:table-row>
        <table:table-row table:style-name="ro1">
          <table:table-cell office:value-type="float" office:value="688.383056640625">
            <text:p>688.3830566406</text:p>
          </table:table-cell>
          <table:table-cell office:value-type="float" office:value="-0.0003081277">
            <text:p>-0.0003081277</text:p>
          </table:table-cell>
          <table:table-cell table:number-columns-repeated="4"/>
        </table:table-row>
        <table:table-row table:style-name="ro1">
          <table:table-cell office:value-type="float" office:value="688.503112792969">
            <text:p>688.503112793</text:p>
          </table:table-cell>
          <table:table-cell office:value-type="float" office:value="-0.002174736">
            <text:p>-0.002174736</text:p>
          </table:table-cell>
          <table:table-cell table:number-columns-repeated="4"/>
        </table:table-row>
        <table:table-row table:style-name="ro1">
          <table:table-cell office:value-type="float" office:value="688.623168945313">
            <text:p>688.6231689453</text:p>
          </table:table-cell>
          <table:table-cell office:value-type="float" office:value="-0.003062192">
            <text:p>-0.003062192</text:p>
          </table:table-cell>
          <table:table-cell table:number-columns-repeated="4"/>
        </table:table-row>
        <table:table-row table:style-name="ro1">
          <table:table-cell office:value-type="float" office:value="688.743225097656">
            <text:p>688.7432250977</text:p>
          </table:table-cell>
          <table:table-cell office:value-type="float" office:value="-0.001737799">
            <text:p>-0.001737799</text:p>
          </table:table-cell>
          <table:table-cell table:number-columns-repeated="4"/>
        </table:table-row>
        <table:table-row table:style-name="ro1">
          <table:table-cell office:value-type="float" office:value="688.86328125">
            <text:p>688.86328125</text:p>
          </table:table-cell>
          <table:table-cell office:value-type="float" office:value="-0.0004691381">
            <text:p>-0.0004691381</text:p>
          </table:table-cell>
          <table:table-cell table:number-columns-repeated="4"/>
        </table:table-row>
        <table:table-row table:style-name="ro1">
          <table:table-cell office:value-type="float" office:value="688.983337402344">
            <text:p>688.9833374023</text:p>
          </table:table-cell>
          <table:table-cell office:value-type="float" office:value="-0.001075592">
            <text:p>-0.001075592</text:p>
          </table:table-cell>
          <table:table-cell table:number-columns-repeated="4"/>
        </table:table-row>
        <table:table-row table:style-name="ro1">
          <table:table-cell office:value-type="float" office:value="689.103393554688">
            <text:p>689.1033935547</text:p>
          </table:table-cell>
          <table:table-cell office:value-type="float" office:value="0.001898287">
            <text:p>0.001898287</text:p>
          </table:table-cell>
          <table:table-cell table:number-columns-repeated="4"/>
        </table:table-row>
        <table:table-row table:style-name="ro1">
          <table:table-cell office:value-type="float" office:value="689.223449707031">
            <text:p>689.223449707</text:p>
          </table:table-cell>
          <table:table-cell office:value-type="float" office:value="0.001664858">
            <text:p>0.001664858</text:p>
          </table:table-cell>
          <table:table-cell table:number-columns-repeated="4"/>
        </table:table-row>
        <table:table-row table:style-name="ro1">
          <table:table-cell office:value-type="float" office:value="689.343505859375">
            <text:p>689.3435058594</text:p>
          </table:table-cell>
          <table:table-cell office:value-type="float" office:value="0.01696003">
            <text:p>0.01696003</text:p>
          </table:table-cell>
          <table:table-cell table:number-columns-repeated="4"/>
        </table:table-row>
        <table:table-row table:style-name="ro1">
          <table:table-cell office:value-type="float" office:value="689.463562011719">
            <text:p>689.4635620117</text:p>
          </table:table-cell>
          <table:table-cell office:value-type="float" office:value="0.00509123">
            <text:p>0.00509123</text:p>
          </table:table-cell>
          <table:table-cell table:number-columns-repeated="4"/>
        </table:table-row>
        <table:table-row table:style-name="ro1">
          <table:table-cell office:value-type="float" office:value="689.583679199219">
            <text:p>689.5836791992</text:p>
          </table:table-cell>
          <table:table-cell office:value-type="float" office:value="0.006592936">
            <text:p>0.006592936</text:p>
          </table:table-cell>
          <table:table-cell table:number-columns-repeated="4"/>
        </table:table-row>
        <table:table-row table:style-name="ro1">
          <table:table-cell office:value-type="float" office:value="689.703735351563">
            <text:p>689.7037353516</text:p>
          </table:table-cell>
          <table:table-cell office:value-type="float" office:value="0.00630963">
            <text:p>0.00630963</text:p>
          </table:table-cell>
          <table:table-cell table:number-columns-repeated="4"/>
        </table:table-row>
        <table:table-row table:style-name="ro1">
          <table:table-cell office:value-type="float" office:value="689.823791503906">
            <text:p>689.8237915039</text:p>
          </table:table-cell>
          <table:table-cell office:value-type="float" office:value="-0.001198622">
            <text:p>-0.001198622</text:p>
          </table:table-cell>
          <table:table-cell table:number-columns-repeated="4"/>
        </table:table-row>
        <table:table-row table:style-name="ro1">
          <table:table-cell office:value-type="float" office:value="689.94384765625">
            <text:p>689.9438476563</text:p>
          </table:table-cell>
          <table:table-cell office:value-type="float" office:value="-0.001483761">
            <text:p>-0.001483761</text:p>
          </table:table-cell>
          <table:table-cell table:number-columns-repeated="4"/>
        </table:table-row>
        <table:table-row table:style-name="ro1">
          <table:table-cell office:value-type="float" office:value="690.063903808594">
            <text:p>690.0639038086</text:p>
          </table:table-cell>
          <table:table-cell office:value-type="float" office:value="0.005680969">
            <text:p>0.005680969</text:p>
          </table:table-cell>
          <table:table-cell table:number-columns-repeated="4"/>
        </table:table-row>
        <table:table-row table:style-name="ro1">
          <table:table-cell office:value-type="float" office:value="690.184020996094">
            <text:p>690.1840209961</text:p>
          </table:table-cell>
          <table:table-cell office:value-type="float" office:value="0.003853181">
            <text:p>0.003853181</text:p>
          </table:table-cell>
          <table:table-cell table:number-columns-repeated="4"/>
        </table:table-row>
        <table:table-row table:style-name="ro1">
          <table:table-cell office:value-type="float" office:value="690.304077148438">
            <text:p>690.3040771484</text:p>
          </table:table-cell>
          <table:table-cell office:value-type="float" office:value="0.001661995">
            <text:p>0.001661995</text:p>
          </table:table-cell>
          <table:table-cell table:number-columns-repeated="4"/>
        </table:table-row>
        <table:table-row table:style-name="ro1">
          <table:table-cell office:value-type="float" office:value="690.424133300781">
            <text:p>690.4241333008</text:p>
          </table:table-cell>
          <table:table-cell office:value-type="float" office:value="0.005330812">
            <text:p>0.005330812</text:p>
          </table:table-cell>
          <table:table-cell table:number-columns-repeated="4"/>
        </table:table-row>
        <table:table-row table:style-name="ro1">
          <table:table-cell office:value-type="float" office:value="690.544189453125">
            <text:p>690.5441894531</text:p>
          </table:table-cell>
          <table:table-cell office:value-type="float" office:value="0.02167569">
            <text:p>0.02167569</text:p>
          </table:table-cell>
          <table:table-cell table:number-columns-repeated="4"/>
        </table:table-row>
        <table:table-row table:style-name="ro1">
          <table:table-cell office:value-type="float" office:value="690.664306640625">
            <text:p>690.6643066406</text:p>
          </table:table-cell>
          <table:table-cell office:value-type="float" office:value="-0.00407174">
            <text:p>-0.00407174</text:p>
          </table:table-cell>
          <table:table-cell table:number-columns-repeated="4"/>
        </table:table-row>
        <table:table-row table:style-name="ro1">
          <table:table-cell office:value-type="float" office:value="690.784362792969">
            <text:p>690.784362793</text:p>
          </table:table-cell>
          <table:table-cell office:value-type="float" office:value="0.00161872">
            <text:p>0.00161872</text:p>
          </table:table-cell>
          <table:table-cell table:number-columns-repeated="4"/>
        </table:table-row>
        <table:table-row table:style-name="ro1">
          <table:table-cell office:value-type="float" office:value="690.904418945313">
            <text:p>690.9044189453</text:p>
          </table:table-cell>
          <table:table-cell office:value-type="float" office:value="0.03791422">
            <text:p>0.03791422</text:p>
          </table:table-cell>
          <table:table-cell table:number-columns-repeated="4"/>
        </table:table-row>
        <table:table-row table:style-name="ro1">
          <table:table-cell office:value-type="float" office:value="691.024475097656">
            <text:p>691.0244750977</text:p>
          </table:table-cell>
          <table:table-cell office:value-type="float" office:value="0.004933413">
            <text:p>0.004933413</text:p>
          </table:table-cell>
          <table:table-cell table:number-columns-repeated="4"/>
        </table:table-row>
        <table:table-row table:style-name="ro1">
          <table:table-cell office:value-type="float" office:value="691.144592285156">
            <text:p>691.1445922852</text:p>
          </table:table-cell>
          <table:table-cell office:value-type="float" office:value="0.005112899">
            <text:p>0.005112899</text:p>
          </table:table-cell>
          <table:table-cell table:number-columns-repeated="4"/>
        </table:table-row>
        <table:table-row table:style-name="ro1">
          <table:table-cell office:value-type="float" office:value="691.2646484375">
            <text:p>691.2646484375</text:p>
          </table:table-cell>
          <table:table-cell office:value-type="string">
            <text:p>-7.090403E-06</text:p>
          </table:table-cell>
          <table:table-cell table:number-columns-repeated="4"/>
        </table:table-row>
        <table:table-row table:style-name="ro1">
          <table:table-cell office:value-type="float" office:value="691.384765625">
            <text:p>691.384765625</text:p>
          </table:table-cell>
          <table:table-cell office:value-type="float" office:value="0.01285085">
            <text:p>0.01285085</text:p>
          </table:table-cell>
          <table:table-cell table:number-columns-repeated="4"/>
        </table:table-row>
        <table:table-row table:style-name="ro1">
          <table:table-cell office:value-type="float" office:value="691.504821777344">
            <text:p>691.5048217773</text:p>
          </table:table-cell>
          <table:table-cell office:value-type="float" office:value="0.004073382">
            <text:p>0.004073382</text:p>
          </table:table-cell>
          <table:table-cell table:number-columns-repeated="4"/>
        </table:table-row>
        <table:table-row table:style-name="ro1">
          <table:table-cell office:value-type="float" office:value="691.624877929688">
            <text:p>691.6248779297</text:p>
          </table:table-cell>
          <table:table-cell office:value-type="float" office:value="-0.00716269">
            <text:p>-0.00716269</text:p>
          </table:table-cell>
          <table:table-cell table:number-columns-repeated="4"/>
        </table:table-row>
        <table:table-row table:style-name="ro1">
          <table:table-cell office:value-type="float" office:value="691.744995117188">
            <text:p>691.7449951172</text:p>
          </table:table-cell>
          <table:table-cell office:value-type="float" office:value="0.01013416">
            <text:p>0.01013416</text:p>
          </table:table-cell>
          <table:table-cell table:number-columns-repeated="4"/>
        </table:table-row>
        <table:table-row table:style-name="ro1">
          <table:table-cell office:value-type="float" office:value="691.865051269531">
            <text:p>691.8650512695</text:p>
          </table:table-cell>
          <table:table-cell office:value-type="float" office:value="-0.003469028">
            <text:p>-0.003469028</text:p>
          </table:table-cell>
          <table:table-cell table:number-columns-repeated="4"/>
        </table:table-row>
        <table:table-row table:style-name="ro1">
          <table:table-cell office:value-type="float" office:value="691.985168457031">
            <text:p>691.985168457</text:p>
          </table:table-cell>
          <table:table-cell office:value-type="float" office:value="-0.001880011">
            <text:p>-0.001880011</text:p>
          </table:table-cell>
          <table:table-cell table:number-columns-repeated="4"/>
        </table:table-row>
        <table:table-row table:style-name="ro1">
          <table:table-cell office:value-type="float" office:value="692.105224609375">
            <text:p>692.1052246094</text:p>
          </table:table-cell>
          <table:table-cell office:value-type="float" office:value="0.009700519">
            <text:p>0.009700519</text:p>
          </table:table-cell>
          <table:table-cell table:number-columns-repeated="4"/>
        </table:table-row>
        <table:table-row table:style-name="ro1">
          <table:table-cell office:value-type="float" office:value="692.225280761719">
            <text:p>692.2252807617</text:p>
          </table:table-cell>
          <table:table-cell office:value-type="float" office:value="0.005258331">
            <text:p>0.005258331</text:p>
          </table:table-cell>
          <table:table-cell table:number-columns-repeated="4"/>
        </table:table-row>
        <table:table-row table:style-name="ro1">
          <table:table-cell office:value-type="float" office:value="692.345397949219">
            <text:p>692.3453979492</text:p>
          </table:table-cell>
          <table:table-cell office:value-type="float" office:value="0.01452181">
            <text:p>0.01452181</text:p>
          </table:table-cell>
          <table:table-cell table:number-columns-repeated="4"/>
        </table:table-row>
        <table:table-row table:style-name="ro1">
          <table:table-cell office:value-type="float" office:value="692.465454101563">
            <text:p>692.4654541016</text:p>
          </table:table-cell>
          <table:table-cell office:value-type="float" office:value="0.005878383">
            <text:p>0.005878383</text:p>
          </table:table-cell>
          <table:table-cell table:number-columns-repeated="4"/>
        </table:table-row>
        <table:table-row table:style-name="ro1">
          <table:table-cell office:value-type="float" office:value="692.585571289063">
            <text:p>692.5855712891</text:p>
          </table:table-cell>
          <table:table-cell office:value-type="float" office:value="0.007973962">
            <text:p>0.007973962</text:p>
          </table:table-cell>
          <table:table-cell table:number-columns-repeated="4"/>
        </table:table-row>
        <table:table-row table:style-name="ro1">
          <table:table-cell office:value-type="float" office:value="692.705627441406">
            <text:p>692.7056274414</text:p>
          </table:table-cell>
          <table:table-cell office:value-type="float" office:value="0.00207566">
            <text:p>0.00207566</text:p>
          </table:table-cell>
          <table:table-cell table:number-columns-repeated="4"/>
        </table:table-row>
        <table:table-row table:style-name="ro1">
          <table:table-cell office:value-type="float" office:value="692.825744628906">
            <text:p>692.8257446289</text:p>
          </table:table-cell>
          <table:table-cell office:value-type="float" office:value="0.003297674">
            <text:p>0.003297674</text:p>
          </table:table-cell>
          <table:table-cell table:number-columns-repeated="4"/>
        </table:table-row>
        <table:table-row table:style-name="ro1">
          <table:table-cell office:value-type="float" office:value="692.94580078125">
            <text:p>692.9458007813</text:p>
          </table:table-cell>
          <table:table-cell office:value-type="float" office:value="0.001484989">
            <text:p>0.001484989</text:p>
          </table:table-cell>
          <table:table-cell table:number-columns-repeated="4"/>
        </table:table-row>
        <table:table-row table:style-name="ro1">
          <table:table-cell office:value-type="float" office:value="693.06591796875">
            <text:p>693.0659179688</text:p>
          </table:table-cell>
          <table:table-cell office:value-type="float" office:value="0.002277479">
            <text:p>0.002277479</text:p>
          </table:table-cell>
          <table:table-cell table:number-columns-repeated="4"/>
        </table:table-row>
        <table:table-row table:style-name="ro1">
          <table:table-cell office:value-type="float" office:value="693.18603515625">
            <text:p>693.1860351563</text:p>
          </table:table-cell>
          <table:table-cell office:value-type="float" office:value="-0.005402497">
            <text:p>-0.005402497</text:p>
          </table:table-cell>
          <table:table-cell table:number-columns-repeated="4"/>
        </table:table-row>
        <table:table-row table:style-name="ro1">
          <table:table-cell office:value-type="float" office:value="693.306091308594">
            <text:p>693.3060913086</text:p>
          </table:table-cell>
          <table:table-cell office:value-type="float" office:value="-0.002288081">
            <text:p>-0.002288081</text:p>
          </table:table-cell>
          <table:table-cell table:number-columns-repeated="4"/>
        </table:table-row>
        <table:table-row table:style-name="ro1">
          <table:table-cell office:value-type="float" office:value="693.426208496094">
            <text:p>693.4262084961</text:p>
          </table:table-cell>
          <table:table-cell office:value-type="float" office:value="-0.008468843">
            <text:p>-0.008468843</text:p>
          </table:table-cell>
          <table:table-cell table:number-columns-repeated="4"/>
        </table:table-row>
        <table:table-row table:style-name="ro1">
          <table:table-cell office:value-type="float" office:value="693.546264648438">
            <text:p>693.5462646484</text:p>
          </table:table-cell>
          <table:table-cell office:value-type="float" office:value="0.00147112">
            <text:p>0.00147112</text:p>
          </table:table-cell>
          <table:table-cell table:number-columns-repeated="4"/>
        </table:table-row>
        <table:table-row table:style-name="ro1">
          <table:table-cell office:value-type="float" office:value="693.666381835938">
            <text:p>693.6663818359</text:p>
          </table:table-cell>
          <table:table-cell office:value-type="float" office:value="-0.002383546">
            <text:p>-0.002383546</text:p>
          </table:table-cell>
          <table:table-cell table:number-columns-repeated="4"/>
        </table:table-row>
        <table:table-row table:style-name="ro1">
          <table:table-cell office:value-type="float" office:value="693.786499023438">
            <text:p>693.7864990234</text:p>
          </table:table-cell>
          <table:table-cell office:value-type="float" office:value="0.01326187">
            <text:p>0.01326187</text:p>
          </table:table-cell>
          <table:table-cell table:number-columns-repeated="4"/>
        </table:table-row>
        <table:table-row table:style-name="ro1">
          <table:table-cell office:value-type="float" office:value="693.906555175781">
            <text:p>693.9065551758</text:p>
          </table:table-cell>
          <table:table-cell office:value-type="float" office:value="-0.004672751">
            <text:p>-0.004672751</text:p>
          </table:table-cell>
          <table:table-cell table:number-columns-repeated="4"/>
        </table:table-row>
        <table:table-row table:style-name="ro1">
          <table:table-cell office:value-type="float" office:value="694.026672363281">
            <text:p>694.0266723633</text:p>
          </table:table-cell>
          <table:table-cell office:value-type="float" office:value="0.0002225164">
            <text:p>0.0002225164</text:p>
          </table:table-cell>
          <table:table-cell table:number-columns-repeated="4"/>
        </table:table-row>
        <table:table-row table:style-name="ro1">
          <table:table-cell office:value-type="float" office:value="694.146728515625">
            <text:p>694.1467285156</text:p>
          </table:table-cell>
          <table:table-cell office:value-type="float" office:value="0.001564669">
            <text:p>0.001564669</text:p>
          </table:table-cell>
          <table:table-cell table:number-columns-repeated="4"/>
        </table:table-row>
        <table:table-row table:style-name="ro1">
          <table:table-cell office:value-type="float" office:value="694.266845703125">
            <text:p>694.2668457031</text:p>
          </table:table-cell>
          <table:table-cell office:value-type="float" office:value="0.0004147913">
            <text:p>0.0004147913</text:p>
          </table:table-cell>
          <table:table-cell table:number-columns-repeated="4"/>
        </table:table-row>
        <table:table-row table:style-name="ro1">
          <table:table-cell office:value-type="float" office:value="694.386962890625">
            <text:p>694.3869628906</text:p>
          </table:table-cell>
          <table:table-cell office:value-type="float" office:value="0.001497216">
            <text:p>0.001497216</text:p>
          </table:table-cell>
          <table:table-cell table:number-columns-repeated="4"/>
        </table:table-row>
        <table:table-row table:style-name="ro1">
          <table:table-cell office:value-type="float" office:value="694.507080078125">
            <text:p>694.5070800781</text:p>
          </table:table-cell>
          <table:table-cell office:value-type="float" office:value="0.008557594">
            <text:p>0.008557594</text:p>
          </table:table-cell>
          <table:table-cell table:number-columns-repeated="4"/>
        </table:table-row>
        <table:table-row table:style-name="ro1">
          <table:table-cell office:value-type="float" office:value="694.627136230469">
            <text:p>694.6271362305</text:p>
          </table:table-cell>
          <table:table-cell office:value-type="float" office:value="0.0009449853">
            <text:p>0.0009449853</text:p>
          </table:table-cell>
          <table:table-cell table:number-columns-repeated="4"/>
        </table:table-row>
        <table:table-row table:style-name="ro1">
          <table:table-cell office:value-type="float" office:value="694.747253417969">
            <text:p>694.747253418</text:p>
          </table:table-cell>
          <table:table-cell office:value-type="float" office:value="-0.001440596">
            <text:p>-0.001440596</text:p>
          </table:table-cell>
          <table:table-cell table:number-columns-repeated="4"/>
        </table:table-row>
        <table:table-row table:style-name="ro1">
          <table:table-cell office:value-type="float" office:value="694.867370605469">
            <text:p>694.8673706055</text:p>
          </table:table-cell>
          <table:table-cell office:value-type="float" office:value="-0.007046035">
            <text:p>-0.007046035</text:p>
          </table:table-cell>
          <table:table-cell table:number-columns-repeated="4"/>
        </table:table-row>
        <table:table-row table:style-name="ro1">
          <table:table-cell office:value-type="float" office:value="694.987426757813">
            <text:p>694.9874267578</text:p>
          </table:table-cell>
          <table:table-cell office:value-type="float" office:value="0.0004271205">
            <text:p>0.0004271205</text:p>
          </table:table-cell>
          <table:table-cell table:number-columns-repeated="4"/>
        </table:table-row>
        <table:table-row table:style-name="ro1">
          <table:table-cell office:value-type="float" office:value="695.107543945313">
            <text:p>695.1075439453</text:p>
          </table:table-cell>
          <table:table-cell office:value-type="float" office:value="0.002890494">
            <text:p>0.002890494</text:p>
          </table:table-cell>
          <table:table-cell table:number-columns-repeated="4"/>
        </table:table-row>
        <table:table-row table:style-name="ro1">
          <table:table-cell office:value-type="float" office:value="695.227661132813">
            <text:p>695.2276611328</text:p>
          </table:table-cell>
          <table:table-cell office:value-type="float" office:value="0.004398413">
            <text:p>0.004398413</text:p>
          </table:table-cell>
          <table:table-cell table:number-columns-repeated="4"/>
        </table:table-row>
        <table:table-row table:style-name="ro1">
          <table:table-cell office:value-type="float" office:value="695.347778320313">
            <text:p>695.3477783203</text:p>
          </table:table-cell>
          <table:table-cell office:value-type="float" office:value="-0.004174718">
            <text:p>-0.004174718</text:p>
          </table:table-cell>
          <table:table-cell table:number-columns-repeated="4"/>
        </table:table-row>
        <table:table-row table:style-name="ro1">
          <table:table-cell office:value-type="float" office:value="695.467895507813">
            <text:p>695.4678955078</text:p>
          </table:table-cell>
          <table:table-cell office:value-type="float" office:value="-0.005964334">
            <text:p>-0.005964334</text:p>
          </table:table-cell>
          <table:table-cell table:number-columns-repeated="4"/>
        </table:table-row>
        <table:table-row table:style-name="ro1">
          <table:table-cell office:value-type="float" office:value="695.587951660156">
            <text:p>695.5879516602</text:p>
          </table:table-cell>
          <table:table-cell office:value-type="float" office:value="0.01046285">
            <text:p>0.01046285</text:p>
          </table:table-cell>
          <table:table-cell table:number-columns-repeated="4"/>
        </table:table-row>
        <table:table-row table:style-name="ro1">
          <table:table-cell office:value-type="float" office:value="695.708068847656">
            <text:p>695.7080688477</text:p>
          </table:table-cell>
          <table:table-cell office:value-type="float" office:value="0.002890887">
            <text:p>0.002890887</text:p>
          </table:table-cell>
          <table:table-cell table:number-columns-repeated="4"/>
        </table:table-row>
        <table:table-row table:style-name="ro1">
          <table:table-cell office:value-type="float" office:value="695.828186035156">
            <text:p>695.8281860352</text:p>
          </table:table-cell>
          <table:table-cell office:value-type="float" office:value="-0.0009686504">
            <text:p>-0.0009686504</text:p>
          </table:table-cell>
          <table:table-cell table:number-columns-repeated="4"/>
        </table:table-row>
        <table:table-row table:style-name="ro1">
          <table:table-cell office:value-type="float" office:value="695.948303222656">
            <text:p>695.9483032227</text:p>
          </table:table-cell>
          <table:table-cell office:value-type="float" office:value="-0.0003268282">
            <text:p>-0.0003268282</text:p>
          </table:table-cell>
          <table:table-cell table:number-columns-repeated="4"/>
        </table:table-row>
        <table:table-row table:style-name="ro1">
          <table:table-cell office:value-type="float" office:value="696.068420410156">
            <text:p>696.0684204102</text:p>
          </table:table-cell>
          <table:table-cell office:value-type="float" office:value="-0.004220831">
            <text:p>-0.004220831</text:p>
          </table:table-cell>
          <table:table-cell table:number-columns-repeated="4"/>
        </table:table-row>
        <table:table-row table:style-name="ro1">
          <table:table-cell office:value-type="float" office:value="696.188537597656">
            <text:p>696.1885375977</text:p>
          </table:table-cell>
          <table:table-cell office:value-type="float" office:value="0.02407793">
            <text:p>0.02407793</text:p>
          </table:table-cell>
          <table:table-cell table:number-columns-repeated="4"/>
        </table:table-row>
        <table:table-row table:style-name="ro1">
          <table:table-cell office:value-type="float" office:value="696.308654785156">
            <text:p>696.3086547852</text:p>
          </table:table-cell>
          <table:table-cell office:value-type="float" office:value="-0.005792418">
            <text:p>-0.005792418</text:p>
          </table:table-cell>
          <table:table-cell table:number-columns-repeated="4"/>
        </table:table-row>
        <table:table-row table:style-name="ro1">
          <table:table-cell office:value-type="float" office:value="696.428771972656">
            <text:p>696.4287719727</text:p>
          </table:table-cell>
          <table:table-cell office:value-type="float" office:value="0.01366283">
            <text:p>0.01366283</text:p>
          </table:table-cell>
          <table:table-cell table:number-columns-repeated="4"/>
        </table:table-row>
        <table:table-row table:style-name="ro1">
          <table:table-cell office:value-type="float" office:value="696.548828125">
            <text:p>696.548828125</text:p>
          </table:table-cell>
          <table:table-cell office:value-type="float" office:value="-0.003609553">
            <text:p>-0.003609553</text:p>
          </table:table-cell>
          <table:table-cell table:number-columns-repeated="4"/>
        </table:table-row>
        <table:table-row table:style-name="ro1">
          <table:table-cell office:value-type="float" office:value="696.6689453125">
            <text:p>696.6689453125</text:p>
          </table:table-cell>
          <table:table-cell office:value-type="float" office:value="-0.003713192">
            <text:p>-0.003713192</text:p>
          </table:table-cell>
          <table:table-cell table:number-columns-repeated="4"/>
        </table:table-row>
        <table:table-row table:style-name="ro1">
          <table:table-cell office:value-type="float" office:value="696.7890625">
            <text:p>696.7890625</text:p>
          </table:table-cell>
          <table:table-cell office:value-type="float" office:value="-0.006206979">
            <text:p>-0.006206979</text:p>
          </table:table-cell>
          <table:table-cell table:number-columns-repeated="4"/>
        </table:table-row>
        <table:table-row table:style-name="ro1">
          <table:table-cell office:value-type="float" office:value="696.9091796875">
            <text:p>696.9091796875</text:p>
          </table:table-cell>
          <table:table-cell office:value-type="float" office:value="-0.004502468">
            <text:p>-0.004502468</text:p>
          </table:table-cell>
          <table:table-cell table:number-columns-repeated="4"/>
        </table:table-row>
        <table:table-row table:style-name="ro1">
          <table:table-cell office:value-type="float" office:value="697.029296875">
            <text:p>697.029296875</text:p>
          </table:table-cell>
          <table:table-cell office:value-type="float" office:value="-0.009185442">
            <text:p>-0.009185442</text:p>
          </table:table-cell>
          <table:table-cell table:number-columns-repeated="4"/>
        </table:table-row>
        <table:table-row table:style-name="ro1">
          <table:table-cell office:value-type="float" office:value="697.1494140625">
            <text:p>697.1494140625</text:p>
          </table:table-cell>
          <table:table-cell office:value-type="float" office:value="0.008760217">
            <text:p>0.008760217</text:p>
          </table:table-cell>
          <table:table-cell table:number-columns-repeated="4"/>
        </table:table-row>
        <table:table-row table:style-name="ro1">
          <table:table-cell office:value-type="float" office:value="697.26953125">
            <text:p>697.26953125</text:p>
          </table:table-cell>
          <table:table-cell office:value-type="float" office:value="0.005171277">
            <text:p>0.005171277</text:p>
          </table:table-cell>
          <table:table-cell table:number-columns-repeated="4"/>
        </table:table-row>
        <table:table-row table:style-name="ro1">
          <table:table-cell office:value-type="float" office:value="697.3896484375">
            <text:p>697.3896484375</text:p>
          </table:table-cell>
          <table:table-cell office:value-type="float" office:value="-0.00493036">
            <text:p>-0.00493036</text:p>
          </table:table-cell>
          <table:table-cell table:number-columns-repeated="4"/>
        </table:table-row>
        <table:table-row table:style-name="ro1">
          <table:table-cell office:value-type="float" office:value="697.509765625">
            <text:p>697.509765625</text:p>
          </table:table-cell>
          <table:table-cell office:value-type="float" office:value="0.002498241">
            <text:p>0.002498241</text:p>
          </table:table-cell>
          <table:table-cell table:number-columns-repeated="4"/>
        </table:table-row>
        <table:table-row table:style-name="ro1">
          <table:table-cell office:value-type="float" office:value="697.6298828125">
            <text:p>697.6298828125</text:p>
          </table:table-cell>
          <table:table-cell office:value-type="float" office:value="-0.004225498">
            <text:p>-0.004225498</text:p>
          </table:table-cell>
          <table:table-cell table:number-columns-repeated="4"/>
        </table:table-row>
        <table:table-row table:style-name="ro1">
          <table:table-cell office:value-type="float" office:value="697.75">
            <text:p>697.75</text:p>
          </table:table-cell>
          <table:table-cell office:value-type="float" office:value="0.02359161">
            <text:p>0.02359161</text:p>
          </table:table-cell>
          <table:table-cell table:number-columns-repeated="4"/>
        </table:table-row>
        <table:table-row table:style-name="ro1">
          <table:table-cell office:value-type="float" office:value="697.8701171875">
            <text:p>697.8701171875</text:p>
          </table:table-cell>
          <table:table-cell office:value-type="float" office:value="0.007427547">
            <text:p>0.007427547</text:p>
          </table:table-cell>
          <table:table-cell table:number-columns-repeated="4"/>
        </table:table-row>
        <table:table-row table:style-name="ro1">
          <table:table-cell office:value-type="float" office:value="697.990234375">
            <text:p>697.990234375</text:p>
          </table:table-cell>
          <table:table-cell office:value-type="float" office:value="0.01376042">
            <text:p>0.01376042</text:p>
          </table:table-cell>
          <table:table-cell table:number-columns-repeated="4"/>
        </table:table-row>
        <table:table-row table:style-name="ro1">
          <table:table-cell office:value-type="float" office:value="698.1103515625">
            <text:p>698.1103515625</text:p>
          </table:table-cell>
          <table:table-cell office:value-type="float" office:value="0.004151532">
            <text:p>0.004151532</text:p>
          </table:table-cell>
          <table:table-cell table:number-columns-repeated="4"/>
        </table:table-row>
        <table:table-row table:style-name="ro1">
          <table:table-cell office:value-type="float" office:value="698.23046875">
            <text:p>698.23046875</text:p>
          </table:table-cell>
          <table:table-cell office:value-type="float" office:value="-0.005041992">
            <text:p>-0.005041992</text:p>
          </table:table-cell>
          <table:table-cell table:number-columns-repeated="4"/>
        </table:table-row>
        <table:table-row table:style-name="ro1">
          <table:table-cell office:value-type="float" office:value="698.350646972656">
            <text:p>698.3506469727</text:p>
          </table:table-cell>
          <table:table-cell office:value-type="float" office:value="-0.002346471">
            <text:p>-0.002346471</text:p>
          </table:table-cell>
          <table:table-cell table:number-columns-repeated="4"/>
        </table:table-row>
        <table:table-row table:style-name="ro1">
          <table:table-cell office:value-type="float" office:value="698.470764160156">
            <text:p>698.4707641602</text:p>
          </table:table-cell>
          <table:table-cell office:value-type="float" office:value="0.004890681">
            <text:p>0.004890681</text:p>
          </table:table-cell>
          <table:table-cell table:number-columns-repeated="4"/>
        </table:table-row>
        <table:table-row table:style-name="ro1">
          <table:table-cell office:value-type="float" office:value="698.590881347656">
            <text:p>698.5908813477</text:p>
          </table:table-cell>
          <table:table-cell office:value-type="float" office:value="0.00368072">
            <text:p>0.00368072</text:p>
          </table:table-cell>
          <table:table-cell table:number-columns-repeated="4"/>
        </table:table-row>
        <table:table-row table:style-name="ro1">
          <table:table-cell office:value-type="float" office:value="698.710998535156">
            <text:p>698.7109985352</text:p>
          </table:table-cell>
          <table:table-cell office:value-type="float" office:value="0.02322043">
            <text:p>0.02322043</text:p>
          </table:table-cell>
          <table:table-cell table:number-columns-repeated="4"/>
        </table:table-row>
        <table:table-row table:style-name="ro1">
          <table:table-cell office:value-type="float" office:value="698.831115722656">
            <text:p>698.8311157227</text:p>
          </table:table-cell>
          <table:table-cell office:value-type="float" office:value="-0.0001099674">
            <text:p>-0.0001099674</text:p>
          </table:table-cell>
          <table:table-cell table:number-columns-repeated="4"/>
        </table:table-row>
        <table:table-row table:style-name="ro1">
          <table:table-cell office:value-type="float" office:value="698.951232910156">
            <text:p>698.9512329102</text:p>
          </table:table-cell>
          <table:table-cell office:value-type="float" office:value="0.001799784">
            <text:p>0.001799784</text:p>
          </table:table-cell>
          <table:table-cell table:number-columns-repeated="4"/>
        </table:table-row>
        <table:table-row table:style-name="ro1">
          <table:table-cell office:value-type="float" office:value="699.071350097656">
            <text:p>699.0713500977</text:p>
          </table:table-cell>
          <table:table-cell office:value-type="float" office:value="0.005422986">
            <text:p>0.005422986</text:p>
          </table:table-cell>
          <table:table-cell table:number-columns-repeated="4"/>
        </table:table-row>
        <table:table-row table:style-name="ro1">
          <table:table-cell office:value-type="float" office:value="699.191528320313">
            <text:p>699.1915283203</text:p>
          </table:table-cell>
          <table:table-cell office:value-type="float" office:value="0.001387887">
            <text:p>0.001387887</text:p>
          </table:table-cell>
          <table:table-cell table:number-columns-repeated="4"/>
        </table:table-row>
        <table:table-row table:style-name="ro1">
          <table:table-cell office:value-type="float" office:value="699.311645507813">
            <text:p>699.3116455078</text:p>
          </table:table-cell>
          <table:table-cell office:value-type="float" office:value="0.003025976">
            <text:p>0.003025976</text:p>
          </table:table-cell>
          <table:table-cell table:number-columns-repeated="4"/>
        </table:table-row>
        <table:table-row table:style-name="ro1">
          <table:table-cell office:value-type="float" office:value="699.431762695313">
            <text:p>699.4317626953</text:p>
          </table:table-cell>
          <table:table-cell office:value-type="float" office:value="0.005827766">
            <text:p>0.005827766</text:p>
          </table:table-cell>
          <table:table-cell table:number-columns-repeated="4"/>
        </table:table-row>
        <table:table-row table:style-name="ro1">
          <table:table-cell office:value-type="float" office:value="699.551879882813">
            <text:p>699.5518798828</text:p>
          </table:table-cell>
          <table:table-cell office:value-type="float" office:value="0.01083793">
            <text:p>0.01083793</text:p>
          </table:table-cell>
          <table:table-cell table:number-columns-repeated="4"/>
        </table:table-row>
        <table:table-row table:style-name="ro1">
          <table:table-cell office:value-type="float" office:value="699.671997070313">
            <text:p>699.6719970703</text:p>
          </table:table-cell>
          <table:table-cell office:value-type="float" office:value="0.001139235">
            <text:p>0.001139235</text:p>
          </table:table-cell>
          <table:table-cell table:number-columns-repeated="4"/>
        </table:table-row>
        <table:table-row table:style-name="ro1">
          <table:table-cell office:value-type="float" office:value="699.792175292969">
            <text:p>699.792175293</text:p>
          </table:table-cell>
          <table:table-cell office:value-type="float" office:value="-0.001101807">
            <text:p>-0.001101807</text:p>
          </table:table-cell>
          <table:table-cell table:number-columns-repeated="4"/>
        </table:table-row>
        <table:table-row table:style-name="ro1">
          <table:table-cell office:value-type="float" office:value="699.912292480469">
            <text:p>699.9122924805</text:p>
          </table:table-cell>
          <table:table-cell office:value-type="float" office:value="0.02447415">
            <text:p>0.02447415</text:p>
          </table:table-cell>
          <table:table-cell table:number-columns-repeated="4"/>
        </table:table-row>
        <table:table-row table:style-name="ro1">
          <table:table-cell office:value-type="float" office:value="700.032409667969">
            <text:p>700.032409668</text:p>
          </table:table-cell>
          <table:table-cell office:value-type="float" office:value="0.01083079">
            <text:p>0.01083079</text:p>
          </table:table-cell>
          <table:table-cell table:number-columns-repeated="4"/>
        </table:table-row>
        <table:table-row table:style-name="ro1">
          <table:table-cell office:value-type="float" office:value="700.152526855469">
            <text:p>700.1525268555</text:p>
          </table:table-cell>
          <table:table-cell office:value-type="float" office:value="0.002237641">
            <text:p>0.002237641</text:p>
          </table:table-cell>
          <table:table-cell table:number-columns-repeated="4"/>
        </table:table-row>
        <table:table-row table:style-name="ro1">
          <table:table-cell office:value-type="float" office:value="700.272705078125">
            <text:p>700.2727050781</text:p>
          </table:table-cell>
          <table:table-cell office:value-type="float" office:value="0.0003253303">
            <text:p>0.0003253303</text:p>
          </table:table-cell>
          <table:table-cell table:number-columns-repeated="4"/>
        </table:table-row>
        <table:table-row table:style-name="ro1">
          <table:table-cell office:value-type="float" office:value="700.392822265625">
            <text:p>700.3928222656</text:p>
          </table:table-cell>
          <table:table-cell office:value-type="float" office:value="0.004083309">
            <text:p>0.004083309</text:p>
          </table:table-cell>
          <table:table-cell table:number-columns-repeated="4"/>
        </table:table-row>
        <table:table-row table:style-name="ro1">
          <table:table-cell office:value-type="float" office:value="700.512939453125">
            <text:p>700.5129394531</text:p>
          </table:table-cell>
          <table:table-cell office:value-type="float" office:value="0.01106641">
            <text:p>0.01106641</text:p>
          </table:table-cell>
          <table:table-cell table:number-columns-repeated="4"/>
        </table:table-row>
        <table:table-row table:style-name="ro1">
          <table:table-cell office:value-type="float" office:value="700.633117675781">
            <text:p>700.6331176758</text:p>
          </table:table-cell>
          <table:table-cell office:value-type="float" office:value="0.002595311">
            <text:p>0.002595311</text:p>
          </table:table-cell>
          <table:table-cell table:number-columns-repeated="4"/>
        </table:table-row>
        <table:table-row table:style-name="ro1">
          <table:table-cell office:value-type="float" office:value="700.753234863281">
            <text:p>700.7532348633</text:p>
          </table:table-cell>
          <table:table-cell office:value-type="float" office:value="0.002071108">
            <text:p>0.002071108</text:p>
          </table:table-cell>
          <table:table-cell table:number-columns-repeated="4"/>
        </table:table-row>
        <table:table-row table:style-name="ro1">
          <table:table-cell office:value-type="float" office:value="700.873352050781">
            <text:p>700.8733520508</text:p>
          </table:table-cell>
          <table:table-cell office:value-type="float" office:value="-0.004874936">
            <text:p>-0.004874936</text:p>
          </table:table-cell>
          <table:table-cell table:number-columns-repeated="4"/>
        </table:table-row>
        <table:table-row table:style-name="ro1">
          <table:table-cell office:value-type="float" office:value="700.993530273438">
            <text:p>700.9935302734</text:p>
          </table:table-cell>
          <table:table-cell office:value-type="float" office:value="-0.001201971">
            <text:p>-0.001201971</text:p>
          </table:table-cell>
          <table:table-cell table:number-columns-repeated="4"/>
        </table:table-row>
        <table:table-row table:style-name="ro1">
          <table:table-cell office:value-type="float" office:value="701.113647460938">
            <text:p>701.1136474609</text:p>
          </table:table-cell>
          <table:table-cell office:value-type="float" office:value="0.004801571">
            <text:p>0.004801571</text:p>
          </table:table-cell>
          <table:table-cell table:number-columns-repeated="4"/>
        </table:table-row>
        <table:table-row table:style-name="ro1">
          <table:table-cell office:value-type="float" office:value="701.233764648438">
            <text:p>701.2337646484</text:p>
          </table:table-cell>
          <table:table-cell office:value-type="float" office:value="-0.001453546">
            <text:p>-0.001453546</text:p>
          </table:table-cell>
          <table:table-cell table:number-columns-repeated="4"/>
        </table:table-row>
        <table:table-row table:style-name="ro1">
          <table:table-cell office:value-type="float" office:value="701.353942871094">
            <text:p>701.3539428711</text:p>
          </table:table-cell>
          <table:table-cell office:value-type="float" office:value="0.01536924">
            <text:p>0.01536924</text:p>
          </table:table-cell>
          <table:table-cell table:number-columns-repeated="4"/>
        </table:table-row>
        <table:table-row table:style-name="ro1">
          <table:table-cell office:value-type="float" office:value="701.474060058594">
            <text:p>701.4740600586</text:p>
          </table:table-cell>
          <table:table-cell office:value-type="float" office:value="0.008345963">
            <text:p>0.008345963</text:p>
          </table:table-cell>
          <table:table-cell table:number-columns-repeated="4"/>
        </table:table-row>
        <table:table-row table:style-name="ro1">
          <table:table-cell office:value-type="float" office:value="701.594177246094">
            <text:p>701.5941772461</text:p>
          </table:table-cell>
          <table:table-cell office:value-type="float" office:value="-0.002973484">
            <text:p>-0.002973484</text:p>
          </table:table-cell>
          <table:table-cell table:number-columns-repeated="4"/>
        </table:table-row>
        <table:table-row table:style-name="ro1">
          <table:table-cell office:value-type="float" office:value="701.71435546875">
            <text:p>701.7143554688</text:p>
          </table:table-cell>
          <table:table-cell office:value-type="float" office:value="0.006783045">
            <text:p>0.006783045</text:p>
          </table:table-cell>
          <table:table-cell table:number-columns-repeated="4"/>
        </table:table-row>
        <table:table-row table:style-name="ro1">
          <table:table-cell office:value-type="float" office:value="701.83447265625">
            <text:p>701.8344726563</text:p>
          </table:table-cell>
          <table:table-cell office:value-type="float" office:value="-0.006855241">
            <text:p>-0.006855241</text:p>
          </table:table-cell>
          <table:table-cell table:number-columns-repeated="4"/>
        </table:table-row>
        <table:table-row table:style-name="ro1">
          <table:table-cell office:value-type="float" office:value="701.954650878906">
            <text:p>701.9546508789</text:p>
          </table:table-cell>
          <table:table-cell office:value-type="float" office:value="-0.002867398">
            <text:p>-0.002867398</text:p>
          </table:table-cell>
          <table:table-cell table:number-columns-repeated="4"/>
        </table:table-row>
        <table:table-row table:style-name="ro1">
          <table:table-cell office:value-type="float" office:value="702.074768066406">
            <text:p>702.0747680664</text:p>
          </table:table-cell>
          <table:table-cell office:value-type="float" office:value="0.005831159">
            <text:p>0.005831159</text:p>
          </table:table-cell>
          <table:table-cell table:number-columns-repeated="4"/>
        </table:table-row>
        <table:table-row table:style-name="ro1">
          <table:table-cell office:value-type="float" office:value="702.194946289063">
            <text:p>702.1949462891</text:p>
          </table:table-cell>
          <table:table-cell office:value-type="float" office:value="0.01070544">
            <text:p>0.01070544</text:p>
          </table:table-cell>
          <table:table-cell table:number-columns-repeated="4"/>
        </table:table-row>
        <table:table-row table:style-name="ro1">
          <table:table-cell office:value-type="float" office:value="702.315063476563">
            <text:p>702.3150634766</text:p>
          </table:table-cell>
          <table:table-cell office:value-type="float" office:value="-0.003110094">
            <text:p>-0.003110094</text:p>
          </table:table-cell>
          <table:table-cell table:number-columns-repeated="4"/>
        </table:table-row>
        <table:table-row table:style-name="ro1">
          <table:table-cell office:value-type="float" office:value="702.435241699219">
            <text:p>702.4352416992</text:p>
          </table:table-cell>
          <table:table-cell office:value-type="float" office:value="-0.003430731">
            <text:p>-0.003430731</text:p>
          </table:table-cell>
          <table:table-cell table:number-columns-repeated="4"/>
        </table:table-row>
        <table:table-row table:style-name="ro1">
          <table:table-cell office:value-type="float" office:value="702.555358886719">
            <text:p>702.5553588867</text:p>
          </table:table-cell>
          <table:table-cell office:value-type="float" office:value="0.009390465">
            <text:p>0.009390465</text:p>
          </table:table-cell>
          <table:table-cell table:number-columns-repeated="4"/>
        </table:table-row>
        <table:table-row table:style-name="ro1">
          <table:table-cell office:value-type="float" office:value="702.675537109375">
            <text:p>702.6755371094</text:p>
          </table:table-cell>
          <table:table-cell office:value-type="float" office:value="0.01608543">
            <text:p>0.01608543</text:p>
          </table:table-cell>
          <table:table-cell table:number-columns-repeated="4"/>
        </table:table-row>
        <table:table-row table:style-name="ro1">
          <table:table-cell office:value-type="float" office:value="702.795654296875">
            <text:p>702.7956542969</text:p>
          </table:table-cell>
          <table:table-cell office:value-type="float" office:value="0.0002646329">
            <text:p>0.0002646329</text:p>
          </table:table-cell>
          <table:table-cell table:number-columns-repeated="4"/>
        </table:table-row>
        <table:table-row table:style-name="ro1">
          <table:table-cell office:value-type="float" office:value="702.915832519531">
            <text:p>702.9158325195</text:p>
          </table:table-cell>
          <table:table-cell office:value-type="float" office:value="0.003003145">
            <text:p>0.003003145</text:p>
          </table:table-cell>
          <table:table-cell table:number-columns-repeated="4"/>
        </table:table-row>
        <table:table-row table:style-name="ro1">
          <table:table-cell office:value-type="float" office:value="703.035949707031">
            <text:p>703.035949707</text:p>
          </table:table-cell>
          <table:table-cell office:value-type="float" office:value="-0.00117856">
            <text:p>-0.00117856</text:p>
          </table:table-cell>
          <table:table-cell table:number-columns-repeated="4"/>
        </table:table-row>
        <table:table-row table:style-name="ro1">
          <table:table-cell office:value-type="float" office:value="703.156127929688">
            <text:p>703.1561279297</text:p>
          </table:table-cell>
          <table:table-cell office:value-type="float" office:value="0.0001240284">
            <text:p>0.0001240284</text:p>
          </table:table-cell>
          <table:table-cell table:number-columns-repeated="4"/>
        </table:table-row>
        <table:table-row table:style-name="ro1">
          <table:table-cell office:value-type="float" office:value="703.276245117188">
            <text:p>703.2762451172</text:p>
          </table:table-cell>
          <table:table-cell office:value-type="float" office:value="-0.0006539495">
            <text:p>-0.0006539495</text:p>
          </table:table-cell>
          <table:table-cell table:number-columns-repeated="4"/>
        </table:table-row>
        <table:table-row table:style-name="ro1">
          <table:table-cell office:value-type="float" office:value="703.396423339844">
            <text:p>703.3964233398</text:p>
          </table:table-cell>
          <table:table-cell office:value-type="float" office:value="-0.002525523">
            <text:p>-0.002525523</text:p>
          </table:table-cell>
          <table:table-cell table:number-columns-repeated="4"/>
        </table:table-row>
        <table:table-row table:style-name="ro1">
          <table:table-cell office:value-type="float" office:value="703.516540527344">
            <text:p>703.5165405273</text:p>
          </table:table-cell>
          <table:table-cell office:value-type="float" office:value="0.001125976">
            <text:p>0.001125976</text:p>
          </table:table-cell>
          <table:table-cell table:number-columns-repeated="4"/>
        </table:table-row>
        <table:table-row table:style-name="ro1">
          <table:table-cell office:value-type="float" office:value="703.63671875">
            <text:p>703.63671875</text:p>
          </table:table-cell>
          <table:table-cell office:value-type="float" office:value="0.01213454">
            <text:p>0.01213454</text:p>
          </table:table-cell>
          <table:table-cell table:number-columns-repeated="4"/>
        </table:table-row>
        <table:table-row table:style-name="ro1">
          <table:table-cell office:value-type="float" office:value="703.756896972656">
            <text:p>703.7568969727</text:p>
          </table:table-cell>
          <table:table-cell office:value-type="float" office:value="-0.007126828">
            <text:p>-0.007126828</text:p>
          </table:table-cell>
          <table:table-cell table:number-columns-repeated="4"/>
        </table:table-row>
        <table:table-row table:style-name="ro1">
          <table:table-cell office:value-type="float" office:value="703.877014160156">
            <text:p>703.8770141602</text:p>
          </table:table-cell>
          <table:table-cell office:value-type="float" office:value="0.007589408">
            <text:p>0.007589408</text:p>
          </table:table-cell>
          <table:table-cell table:number-columns-repeated="4"/>
        </table:table-row>
        <table:table-row table:style-name="ro1">
          <table:table-cell office:value-type="float" office:value="703.997192382813">
            <text:p>703.9971923828</text:p>
          </table:table-cell>
          <table:table-cell office:value-type="float" office:value="-0.002772365">
            <text:p>-0.002772365</text:p>
          </table:table-cell>
          <table:table-cell table:number-columns-repeated="4"/>
        </table:table-row>
        <table:table-row table:style-name="ro1">
          <table:table-cell office:value-type="float" office:value="704.117309570313">
            <text:p>704.1173095703</text:p>
          </table:table-cell>
          <table:table-cell office:value-type="float" office:value="-0.000570012">
            <text:p>-0.000570012</text:p>
          </table:table-cell>
          <table:table-cell table:number-columns-repeated="4"/>
        </table:table-row>
        <table:table-row table:style-name="ro1">
          <table:table-cell office:value-type="float" office:value="704.237487792969">
            <text:p>704.237487793</text:p>
          </table:table-cell>
          <table:table-cell office:value-type="float" office:value="-0.003879831">
            <text:p>-0.003879831</text:p>
          </table:table-cell>
          <table:table-cell table:number-columns-repeated="4"/>
        </table:table-row>
        <table:table-row table:style-name="ro1">
          <table:table-cell office:value-type="float" office:value="704.357666015625">
            <text:p>704.3576660156</text:p>
          </table:table-cell>
          <table:table-cell office:value-type="float" office:value="-0.003600183">
            <text:p>-0.003600183</text:p>
          </table:table-cell>
          <table:table-cell table:number-columns-repeated="4"/>
        </table:table-row>
        <table:table-row table:style-name="ro1">
          <table:table-cell office:value-type="float" office:value="704.477783203125">
            <text:p>704.4777832031</text:p>
          </table:table-cell>
          <table:table-cell office:value-type="float" office:value="0.01092884">
            <text:p>0.01092884</text:p>
          </table:table-cell>
          <table:table-cell table:number-columns-repeated="4"/>
        </table:table-row>
        <table:table-row table:style-name="ro1">
          <table:table-cell office:value-type="float" office:value="704.597961425781">
            <text:p>704.5979614258</text:p>
          </table:table-cell>
          <table:table-cell office:value-type="float" office:value="-0.0020797">
            <text:p>-0.0020797</text:p>
          </table:table-cell>
          <table:table-cell table:number-columns-repeated="4"/>
        </table:table-row>
        <table:table-row table:style-name="ro1">
          <table:table-cell office:value-type="float" office:value="704.718139648438">
            <text:p>704.7181396484</text:p>
          </table:table-cell>
          <table:table-cell office:value-type="float" office:value="-0.004931119">
            <text:p>-0.004931119</text:p>
          </table:table-cell>
          <table:table-cell table:number-columns-repeated="4"/>
        </table:table-row>
        <table:table-row table:style-name="ro1">
          <table:table-cell office:value-type="float" office:value="704.838256835938">
            <text:p>704.8382568359</text:p>
          </table:table-cell>
          <table:table-cell office:value-type="float" office:value="-0.006302787">
            <text:p>-0.006302787</text:p>
          </table:table-cell>
          <table:table-cell table:number-columns-repeated="4"/>
        </table:table-row>
        <table:table-row table:style-name="ro1">
          <table:table-cell office:value-type="float" office:value="704.958435058594">
            <text:p>704.9584350586</text:p>
          </table:table-cell>
          <table:table-cell office:value-type="float" office:value="-0.006961902">
            <text:p>-0.006961902</text:p>
          </table:table-cell>
          <table:table-cell table:number-columns-repeated="4"/>
        </table:table-row>
        <table:table-row table:style-name="ro1">
          <table:table-cell office:value-type="float" office:value="705.07861328125">
            <text:p>705.0786132813</text:p>
          </table:table-cell>
          <table:table-cell office:value-type="float" office:value="0.003174313">
            <text:p>0.003174313</text:p>
          </table:table-cell>
          <table:table-cell table:number-columns-repeated="4"/>
        </table:table-row>
        <table:table-row table:style-name="ro1">
          <table:table-cell office:value-type="float" office:value="705.19873046875">
            <text:p>705.1987304688</text:p>
          </table:table-cell>
          <table:table-cell office:value-type="float" office:value="0.002558484">
            <text:p>0.002558484</text:p>
          </table:table-cell>
          <table:table-cell table:number-columns-repeated="4"/>
        </table:table-row>
        <table:table-row table:style-name="ro1">
          <table:table-cell office:value-type="float" office:value="705.318908691406">
            <text:p>705.3189086914</text:p>
          </table:table-cell>
          <table:table-cell office:value-type="float" office:value="-0.002551093">
            <text:p>-0.002551093</text:p>
          </table:table-cell>
          <table:table-cell table:number-columns-repeated="4"/>
        </table:table-row>
        <table:table-row table:style-name="ro1">
          <table:table-cell office:value-type="float" office:value="705.439086914063">
            <text:p>705.4390869141</text:p>
          </table:table-cell>
          <table:table-cell office:value-type="float" office:value="0.01041716">
            <text:p>0.01041716</text:p>
          </table:table-cell>
          <table:table-cell table:number-columns-repeated="4"/>
        </table:table-row>
        <table:table-row table:style-name="ro1">
          <table:table-cell office:value-type="float" office:value="705.559265136719">
            <text:p>705.5592651367</text:p>
          </table:table-cell>
          <table:table-cell office:value-type="float" office:value="-0.0001021815">
            <text:p>-0.0001021815</text:p>
          </table:table-cell>
          <table:table-cell table:number-columns-repeated="4"/>
        </table:table-row>
        <table:table-row table:style-name="ro1">
          <table:table-cell office:value-type="float" office:value="705.679382324219">
            <text:p>705.6793823242</text:p>
          </table:table-cell>
          <table:table-cell office:value-type="float" office:value="0.002632852">
            <text:p>0.002632852</text:p>
          </table:table-cell>
          <table:table-cell table:number-columns-repeated="4"/>
        </table:table-row>
        <table:table-row table:style-name="ro1">
          <table:table-cell office:value-type="float" office:value="705.799560546875">
            <text:p>705.7995605469</text:p>
          </table:table-cell>
          <table:table-cell office:value-type="float" office:value="0.01269271">
            <text:p>0.01269271</text:p>
          </table:table-cell>
          <table:table-cell table:number-columns-repeated="4"/>
        </table:table-row>
        <table:table-row table:style-name="ro1">
          <table:table-cell office:value-type="float" office:value="705.919738769531">
            <text:p>705.9197387695</text:p>
          </table:table-cell>
          <table:table-cell office:value-type="float" office:value="-0.0009999443">
            <text:p>-0.0009999443</text:p>
          </table:table-cell>
          <table:table-cell table:number-columns-repeated="4"/>
        </table:table-row>
        <table:table-row table:style-name="ro1">
          <table:table-cell office:value-type="float" office:value="706.039916992188">
            <text:p>706.0399169922</text:p>
          </table:table-cell>
          <table:table-cell office:value-type="float" office:value="-0.0007231577">
            <text:p>-0.0007231577</text:p>
          </table:table-cell>
          <table:table-cell table:number-columns-repeated="4"/>
        </table:table-row>
        <table:table-row table:style-name="ro1">
          <table:table-cell office:value-type="float" office:value="706.160034179688">
            <text:p>706.1600341797</text:p>
          </table:table-cell>
          <table:table-cell office:value-type="float" office:value="0.0183563">
            <text:p>0.0183563</text:p>
          </table:table-cell>
          <table:table-cell table:number-columns-repeated="4"/>
        </table:table-row>
        <table:table-row table:style-name="ro1">
          <table:table-cell office:value-type="float" office:value="706.280212402344">
            <text:p>706.2802124023</text:p>
          </table:table-cell>
          <table:table-cell office:value-type="float" office:value="-0.0003015393">
            <text:p>-0.0003015393</text:p>
          </table:table-cell>
          <table:table-cell table:number-columns-repeated="4"/>
        </table:table-row>
        <table:table-row table:style-name="ro1">
          <table:table-cell office:value-type="float" office:value="706.400390625">
            <text:p>706.400390625</text:p>
          </table:table-cell>
          <table:table-cell office:value-type="float" office:value="0.004628697">
            <text:p>0.004628697</text:p>
          </table:table-cell>
          <table:table-cell table:number-columns-repeated="4"/>
        </table:table-row>
        <table:table-row table:style-name="ro1">
          <table:table-cell office:value-type="float" office:value="706.520568847656">
            <text:p>706.5205688477</text:p>
          </table:table-cell>
          <table:table-cell office:value-type="float" office:value="0.00562439">
            <text:p>0.00562439</text:p>
          </table:table-cell>
          <table:table-cell table:number-columns-repeated="4"/>
        </table:table-row>
        <table:table-row table:style-name="ro1">
          <table:table-cell office:value-type="float" office:value="706.640747070313">
            <text:p>706.6407470703</text:p>
          </table:table-cell>
          <table:table-cell office:value-type="float" office:value="-0.002189751">
            <text:p>-0.002189751</text:p>
          </table:table-cell>
          <table:table-cell table:number-columns-repeated="4"/>
        </table:table-row>
        <table:table-row table:style-name="ro1">
          <table:table-cell office:value-type="float" office:value="706.760925292969">
            <text:p>706.760925293</text:p>
          </table:table-cell>
          <table:table-cell office:value-type="float" office:value="0.00877709">
            <text:p>0.00877709</text:p>
          </table:table-cell>
          <table:table-cell table:number-columns-repeated="4"/>
        </table:table-row>
        <table:table-row table:style-name="ro1">
          <table:table-cell office:value-type="float" office:value="706.881042480469">
            <text:p>706.8810424805</text:p>
          </table:table-cell>
          <table:table-cell office:value-type="float" office:value="0.002040636">
            <text:p>0.002040636</text:p>
          </table:table-cell>
          <table:table-cell table:number-columns-repeated="4"/>
        </table:table-row>
        <table:table-row table:style-name="ro1">
          <table:table-cell office:value-type="float" office:value="707.001220703125">
            <text:p>707.0012207031</text:p>
          </table:table-cell>
          <table:table-cell office:value-type="float" office:value="-0.005747303">
            <text:p>-0.005747303</text:p>
          </table:table-cell>
          <table:table-cell table:number-columns-repeated="4"/>
        </table:table-row>
        <table:table-row table:style-name="ro1">
          <table:table-cell office:value-type="float" office:value="707.121398925781">
            <text:p>707.1213989258</text:p>
          </table:table-cell>
          <table:table-cell office:value-type="float" office:value="-0.006793966">
            <text:p>-0.006793966</text:p>
          </table:table-cell>
          <table:table-cell table:number-columns-repeated="4"/>
        </table:table-row>
        <table:table-row table:style-name="ro1">
          <table:table-cell office:value-type="float" office:value="707.241577148438">
            <text:p>707.2415771484</text:p>
          </table:table-cell>
          <table:table-cell office:value-type="float" office:value="0.002994431">
            <text:p>0.002994431</text:p>
          </table:table-cell>
          <table:table-cell table:number-columns-repeated="4"/>
        </table:table-row>
        <table:table-row table:style-name="ro1">
          <table:table-cell office:value-type="float" office:value="707.361755371094">
            <text:p>707.3617553711</text:p>
          </table:table-cell>
          <table:table-cell office:value-type="float" office:value="0.005023088">
            <text:p>0.005023088</text:p>
          </table:table-cell>
          <table:table-cell table:number-columns-repeated="4"/>
        </table:table-row>
        <table:table-row table:style-name="ro1">
          <table:table-cell office:value-type="float" office:value="707.48193359375">
            <text:p>707.4819335938</text:p>
          </table:table-cell>
          <table:table-cell office:value-type="float" office:value="0.004975249">
            <text:p>0.004975249</text:p>
          </table:table-cell>
          <table:table-cell table:number-columns-repeated="4"/>
        </table:table-row>
        <table:table-row table:style-name="ro1">
          <table:table-cell office:value-type="float" office:value="707.602111816406">
            <text:p>707.6021118164</text:p>
          </table:table-cell>
          <table:table-cell office:value-type="float" office:value="-0.005021374">
            <text:p>-0.005021374</text:p>
          </table:table-cell>
          <table:table-cell table:number-columns-repeated="4"/>
        </table:table-row>
        <table:table-row table:style-name="ro1">
          <table:table-cell office:value-type="float" office:value="707.722290039063">
            <text:p>707.7222900391</text:p>
          </table:table-cell>
          <table:table-cell office:value-type="float" office:value="0.003436564">
            <text:p>0.003436564</text:p>
          </table:table-cell>
          <table:table-cell table:number-columns-repeated="4"/>
        </table:table-row>
        <table:table-row table:style-name="ro1">
          <table:table-cell office:value-type="float" office:value="707.842468261719">
            <text:p>707.8424682617</text:p>
          </table:table-cell>
          <table:table-cell office:value-type="float" office:value="0.005802066">
            <text:p>0.005802066</text:p>
          </table:table-cell>
          <table:table-cell table:number-columns-repeated="4"/>
        </table:table-row>
        <table:table-row table:style-name="ro1">
          <table:table-cell office:value-type="float" office:value="707.962646484375">
            <text:p>707.9626464844</text:p>
          </table:table-cell>
          <table:table-cell office:value-type="float" office:value="0.008744535">
            <text:p>0.008744535</text:p>
          </table:table-cell>
          <table:table-cell table:number-columns-repeated="4"/>
        </table:table-row>
        <table:table-row table:style-name="ro1">
          <table:table-cell office:value-type="float" office:value="708.082763671875">
            <text:p>708.0827636719</text:p>
          </table:table-cell>
          <table:table-cell office:value-type="float" office:value="-0.001270012">
            <text:p>-0.001270012</text:p>
          </table:table-cell>
          <table:table-cell table:number-columns-repeated="4"/>
        </table:table-row>
        <table:table-row table:style-name="ro1">
          <table:table-cell office:value-type="float" office:value="708.202941894531">
            <text:p>708.2029418945</text:p>
          </table:table-cell>
          <table:table-cell office:value-type="float" office:value="0.003096429">
            <text:p>0.003096429</text:p>
          </table:table-cell>
          <table:table-cell table:number-columns-repeated="4"/>
        </table:table-row>
        <table:table-row table:style-name="ro1">
          <table:table-cell office:value-type="float" office:value="708.323120117188">
            <text:p>708.3231201172</text:p>
          </table:table-cell>
          <table:table-cell office:value-type="float" office:value="0.004932871">
            <text:p>0.004932871</text:p>
          </table:table-cell>
          <table:table-cell table:number-columns-repeated="4"/>
        </table:table-row>
        <table:table-row table:style-name="ro1">
          <table:table-cell office:value-type="float" office:value="708.443298339844">
            <text:p>708.4432983398</text:p>
          </table:table-cell>
          <table:table-cell office:value-type="float" office:value="-0.002050731">
            <text:p>-0.002050731</text:p>
          </table:table-cell>
          <table:table-cell table:number-columns-repeated="4"/>
        </table:table-row>
        <table:table-row table:style-name="ro1">
          <table:table-cell office:value-type="float" office:value="708.5634765625">
            <text:p>708.5634765625</text:p>
          </table:table-cell>
          <table:table-cell office:value-type="float" office:value="-0.00145283">
            <text:p>-0.00145283</text:p>
          </table:table-cell>
          <table:table-cell table:number-columns-repeated="4"/>
        </table:table-row>
        <table:table-row table:style-name="ro1">
          <table:table-cell office:value-type="float" office:value="708.683654785156">
            <text:p>708.6836547852</text:p>
          </table:table-cell>
          <table:table-cell office:value-type="float" office:value="-0.002607265">
            <text:p>-0.002607265</text:p>
          </table:table-cell>
          <table:table-cell table:number-columns-repeated="4"/>
        </table:table-row>
        <table:table-row table:style-name="ro1">
          <table:table-cell office:value-type="float" office:value="708.803833007813">
            <text:p>708.8038330078</text:p>
          </table:table-cell>
          <table:table-cell office:value-type="float" office:value="0.0126651">
            <text:p>0.0126651</text:p>
          </table:table-cell>
          <table:table-cell table:number-columns-repeated="4"/>
        </table:table-row>
        <table:table-row table:style-name="ro1">
          <table:table-cell office:value-type="float" office:value="708.924011230469">
            <text:p>708.9240112305</text:p>
          </table:table-cell>
          <table:table-cell office:value-type="float" office:value="-0.00725375">
            <text:p>-0.00725375</text:p>
          </table:table-cell>
          <table:table-cell table:number-columns-repeated="4"/>
        </table:table-row>
        <table:table-row table:style-name="ro1">
          <table:table-cell office:value-type="float" office:value="709.044189453125">
            <text:p>709.0441894531</text:p>
          </table:table-cell>
          <table:table-cell office:value-type="float" office:value="-0.0005916581">
            <text:p>-0.0005916581</text:p>
          </table:table-cell>
          <table:table-cell table:number-columns-repeated="4"/>
        </table:table-row>
        <table:table-row table:style-name="ro1">
          <table:table-cell office:value-type="float" office:value="709.164367675781">
            <text:p>709.1643676758</text:p>
          </table:table-cell>
          <table:table-cell office:value-type="float" office:value="0.003847152">
            <text:p>0.003847152</text:p>
          </table:table-cell>
          <table:table-cell table:number-columns-repeated="4"/>
        </table:table-row>
        <table:table-row table:style-name="ro1">
          <table:table-cell office:value-type="float" office:value="709.284545898438">
            <text:p>709.2845458984</text:p>
          </table:table-cell>
          <table:table-cell office:value-type="float" office:value="0.00330218">
            <text:p>0.00330218</text:p>
          </table:table-cell>
          <table:table-cell table:number-columns-repeated="4"/>
        </table:table-row>
        <table:table-row table:style-name="ro1">
          <table:table-cell office:value-type="float" office:value="709.404724121094">
            <text:p>709.4047241211</text:p>
          </table:table-cell>
          <table:table-cell office:value-type="float" office:value="0.002101769">
            <text:p>0.002101769</text:p>
          </table:table-cell>
          <table:table-cell table:number-columns-repeated="4"/>
        </table:table-row>
        <table:table-row table:style-name="ro1">
          <table:table-cell office:value-type="float" office:value="709.52490234375">
            <text:p>709.5249023438</text:p>
          </table:table-cell>
          <table:table-cell office:value-type="float" office:value="-0.003497045">
            <text:p>-0.003497045</text:p>
          </table:table-cell>
          <table:table-cell table:number-columns-repeated="4"/>
        </table:table-row>
        <table:table-row table:style-name="ro1">
          <table:table-cell office:value-type="float" office:value="709.645141601563">
            <text:p>709.6451416016</text:p>
          </table:table-cell>
          <table:table-cell office:value-type="float" office:value="-0.004254663">
            <text:p>-0.004254663</text:p>
          </table:table-cell>
          <table:table-cell table:number-columns-repeated="4"/>
        </table:table-row>
        <table:table-row table:style-name="ro1">
          <table:table-cell office:value-type="float" office:value="709.765319824219">
            <text:p>709.7653198242</text:p>
          </table:table-cell>
          <table:table-cell office:value-type="float" office:value="0.003010274">
            <text:p>0.003010274</text:p>
          </table:table-cell>
          <table:table-cell table:number-columns-repeated="4"/>
        </table:table-row>
        <table:table-row table:style-name="ro1">
          <table:table-cell office:value-type="float" office:value="709.885498046875">
            <text:p>709.8854980469</text:p>
          </table:table-cell>
          <table:table-cell office:value-type="float" office:value="0.000158697">
            <text:p>0.000158697</text:p>
          </table:table-cell>
          <table:table-cell table:number-columns-repeated="4"/>
        </table:table-row>
        <table:table-row table:style-name="ro1">
          <table:table-cell office:value-type="float" office:value="710.005676269531">
            <text:p>710.0056762695</text:p>
          </table:table-cell>
          <table:table-cell office:value-type="float" office:value="-0.0009140078">
            <text:p>-0.0009140078</text:p>
          </table:table-cell>
          <table:table-cell table:number-columns-repeated="4"/>
        </table:table-row>
        <table:table-row table:style-name="ro1">
          <table:table-cell office:value-type="float" office:value="710.125854492188">
            <text:p>710.1258544922</text:p>
          </table:table-cell>
          <table:table-cell office:value-type="float" office:value="0.006723173">
            <text:p>0.006723173</text:p>
          </table:table-cell>
          <table:table-cell table:number-columns-repeated="4"/>
        </table:table-row>
        <table:table-row table:style-name="ro1">
          <table:table-cell office:value-type="float" office:value="710.246032714844">
            <text:p>710.2460327148</text:p>
          </table:table-cell>
          <table:table-cell office:value-type="float" office:value="0.002864039">
            <text:p>0.002864039</text:p>
          </table:table-cell>
          <table:table-cell table:number-columns-repeated="4"/>
        </table:table-row>
        <table:table-row table:style-name="ro1">
          <table:table-cell office:value-type="float" office:value="710.3662109375">
            <text:p>710.3662109375</text:p>
          </table:table-cell>
          <table:table-cell office:value-type="float" office:value="-0.006191085">
            <text:p>-0.006191085</text:p>
          </table:table-cell>
          <table:table-cell table:number-columns-repeated="4"/>
        </table:table-row>
        <table:table-row table:style-name="ro1">
          <table:table-cell office:value-type="float" office:value="710.486389160156">
            <text:p>710.4863891602</text:p>
          </table:table-cell>
          <table:table-cell office:value-type="float" office:value="0.01007924">
            <text:p>0.01007924</text:p>
          </table:table-cell>
          <table:table-cell table:number-columns-repeated="4"/>
        </table:table-row>
        <table:table-row table:style-name="ro1">
          <table:table-cell office:value-type="float" office:value="710.606567382813">
            <text:p>710.6065673828</text:p>
          </table:table-cell>
          <table:table-cell office:value-type="float" office:value="-0.0004773862">
            <text:p>-0.0004773862</text:p>
          </table:table-cell>
          <table:table-cell table:number-columns-repeated="4"/>
        </table:table-row>
        <table:table-row table:style-name="ro1">
          <table:table-cell office:value-type="float" office:value="710.726745605469">
            <text:p>710.7267456055</text:p>
          </table:table-cell>
          <table:table-cell office:value-type="float" office:value="-0.004806712">
            <text:p>-0.004806712</text:p>
          </table:table-cell>
          <table:table-cell table:number-columns-repeated="4"/>
        </table:table-row>
        <table:table-row table:style-name="ro1">
          <table:table-cell office:value-type="float" office:value="710.846984863281">
            <text:p>710.8469848633</text:p>
          </table:table-cell>
          <table:table-cell office:value-type="float" office:value="0.003005565">
            <text:p>0.003005565</text:p>
          </table:table-cell>
          <table:table-cell table:number-columns-repeated="4"/>
        </table:table-row>
        <table:table-row table:style-name="ro1">
          <table:table-cell office:value-type="float" office:value="710.967163085938">
            <text:p>710.9671630859</text:p>
          </table:table-cell>
          <table:table-cell office:value-type="float" office:value="0.001443142">
            <text:p>0.001443142</text:p>
          </table:table-cell>
          <table:table-cell table:number-columns-repeated="4"/>
        </table:table-row>
        <table:table-row table:style-name="ro1">
          <table:table-cell office:value-type="float" office:value="711.087341308594">
            <text:p>711.0873413086</text:p>
          </table:table-cell>
          <table:table-cell office:value-type="float" office:value="0.001126495">
            <text:p>0.001126495</text:p>
          </table:table-cell>
          <table:table-cell table:number-columns-repeated="4"/>
        </table:table-row>
        <table:table-row table:style-name="ro1">
          <table:table-cell office:value-type="float" office:value="711.20751953125">
            <text:p>711.2075195313</text:p>
          </table:table-cell>
          <table:table-cell office:value-type="float" office:value="-0.007761353">
            <text:p>-0.007761353</text:p>
          </table:table-cell>
          <table:table-cell table:number-columns-repeated="4"/>
        </table:table-row>
        <table:table-row table:style-name="ro1">
          <table:table-cell office:value-type="float" office:value="711.327697753906">
            <text:p>711.3276977539</text:p>
          </table:table-cell>
          <table:table-cell office:value-type="float" office:value="-0.005538731">
            <text:p>-0.005538731</text:p>
          </table:table-cell>
          <table:table-cell table:number-columns-repeated="4"/>
        </table:table-row>
        <table:table-row table:style-name="ro1">
          <table:table-cell office:value-type="float" office:value="711.447875976563">
            <text:p>711.4478759766</text:p>
          </table:table-cell>
          <table:table-cell office:value-type="float" office:value="0.004387973">
            <text:p>0.004387973</text:p>
          </table:table-cell>
          <table:table-cell table:number-columns-repeated="4"/>
        </table:table-row>
        <table:table-row table:style-name="ro1">
          <table:table-cell office:value-type="float" office:value="711.568115234375">
            <text:p>711.5681152344</text:p>
          </table:table-cell>
          <table:table-cell office:value-type="float" office:value="-0.001854014">
            <text:p>-0.001854014</text:p>
          </table:table-cell>
          <table:table-cell table:number-columns-repeated="4"/>
        </table:table-row>
        <table:table-row table:style-name="ro1">
          <table:table-cell office:value-type="float" office:value="711.688293457031">
            <text:p>711.688293457</text:p>
          </table:table-cell>
          <table:table-cell office:value-type="float" office:value="0.01343305">
            <text:p>0.01343305</text:p>
          </table:table-cell>
          <table:table-cell table:number-columns-repeated="4"/>
        </table:table-row>
        <table:table-row table:style-name="ro1">
          <table:table-cell office:value-type="float" office:value="711.808471679688">
            <text:p>711.8084716797</text:p>
          </table:table-cell>
          <table:table-cell office:value-type="float" office:value="-0.006357987">
            <text:p>-0.006357987</text:p>
          </table:table-cell>
          <table:table-cell table:number-columns-repeated="4"/>
        </table:table-row>
        <table:table-row table:style-name="ro1">
          <table:table-cell office:value-type="float" office:value="711.928649902344">
            <text:p>711.9286499023</text:p>
          </table:table-cell>
          <table:table-cell office:value-type="float" office:value="-0.00290456">
            <text:p>-0.00290456</text:p>
          </table:table-cell>
          <table:table-cell table:number-columns-repeated="4"/>
        </table:table-row>
        <table:table-row table:style-name="ro1">
          <table:table-cell office:value-type="float" office:value="712.048889160156">
            <text:p>712.0488891602</text:p>
          </table:table-cell>
          <table:table-cell office:value-type="float" office:value="0.000611662">
            <text:p>0.000611662</text:p>
          </table:table-cell>
          <table:table-cell table:number-columns-repeated="4"/>
        </table:table-row>
        <table:table-row table:style-name="ro1">
          <table:table-cell office:value-type="float" office:value="712.169067382813">
            <text:p>712.1690673828</text:p>
          </table:table-cell>
          <table:table-cell office:value-type="float" office:value="0.008469017">
            <text:p>0.008469017</text:p>
          </table:table-cell>
          <table:table-cell table:number-columns-repeated="4"/>
        </table:table-row>
        <table:table-row table:style-name="ro1">
          <table:table-cell office:value-type="float" office:value="712.289245605469">
            <text:p>712.2892456055</text:p>
          </table:table-cell>
          <table:table-cell office:value-type="float" office:value="0.004683313">
            <text:p>0.004683313</text:p>
          </table:table-cell>
          <table:table-cell table:number-columns-repeated="4"/>
        </table:table-row>
        <table:table-row table:style-name="ro1">
          <table:table-cell office:value-type="float" office:value="712.409423828125">
            <text:p>712.4094238281</text:p>
          </table:table-cell>
          <table:table-cell office:value-type="float" office:value="-0.005030795">
            <text:p>-0.005030795</text:p>
          </table:table-cell>
          <table:table-cell table:number-columns-repeated="4"/>
        </table:table-row>
        <table:table-row table:style-name="ro1">
          <table:table-cell office:value-type="float" office:value="712.529663085938">
            <text:p>712.5296630859</text:p>
          </table:table-cell>
          <table:table-cell office:value-type="float" office:value="0.007722476">
            <text:p>0.007722476</text:p>
          </table:table-cell>
          <table:table-cell table:number-columns-repeated="4"/>
        </table:table-row>
        <table:table-row table:style-name="ro1">
          <table:table-cell office:value-type="float" office:value="712.649841308594">
            <text:p>712.6498413086</text:p>
          </table:table-cell>
          <table:table-cell office:value-type="float" office:value="-0.003273419">
            <text:p>-0.003273419</text:p>
          </table:table-cell>
          <table:table-cell table:number-columns-repeated="4"/>
        </table:table-row>
        <table:table-row table:style-name="ro1">
          <table:table-cell office:value-type="float" office:value="712.77001953125">
            <text:p>712.7700195313</text:p>
          </table:table-cell>
          <table:table-cell office:value-type="float" office:value="-0.008636475">
            <text:p>-0.008636475</text:p>
          </table:table-cell>
          <table:table-cell table:number-columns-repeated="4"/>
        </table:table-row>
        <table:table-row table:style-name="ro1">
          <table:table-cell office:value-type="float" office:value="712.890197753906">
            <text:p>712.8901977539</text:p>
          </table:table-cell>
          <table:table-cell office:value-type="float" office:value="-0.002276016">
            <text:p>-0.002276016</text:p>
          </table:table-cell>
          <table:table-cell table:number-columns-repeated="4"/>
        </table:table-row>
        <table:table-row table:style-name="ro1">
          <table:table-cell office:value-type="float" office:value="713.010437011719">
            <text:p>713.0104370117</text:p>
          </table:table-cell>
          <table:table-cell office:value-type="float" office:value="0.01686828">
            <text:p>0.01686828</text:p>
          </table:table-cell>
          <table:table-cell table:number-columns-repeated="4"/>
        </table:table-row>
        <table:table-row table:style-name="ro1">
          <table:table-cell office:value-type="float" office:value="713.130615234375">
            <text:p>713.1306152344</text:p>
          </table:table-cell>
          <table:table-cell office:value-type="float" office:value="0.01639511">
            <text:p>0.01639511</text:p>
          </table:table-cell>
          <table:table-cell table:number-columns-repeated="4"/>
        </table:table-row>
        <table:table-row table:style-name="ro1">
          <table:table-cell office:value-type="float" office:value="713.250793457031">
            <text:p>713.250793457</text:p>
          </table:table-cell>
          <table:table-cell office:value-type="float" office:value="0.01576188">
            <text:p>0.01576188</text:p>
          </table:table-cell>
          <table:table-cell table:number-columns-repeated="4"/>
        </table:table-row>
        <table:table-row table:style-name="ro1">
          <table:table-cell office:value-type="float" office:value="713.371032714844">
            <text:p>713.3710327148</text:p>
          </table:table-cell>
          <table:table-cell office:value-type="float" office:value="-0.007738465">
            <text:p>-0.007738465</text:p>
          </table:table-cell>
          <table:table-cell table:number-columns-repeated="4"/>
        </table:table-row>
        <table:table-row table:style-name="ro1">
          <table:table-cell office:value-type="float" office:value="713.4912109375">
            <text:p>713.4912109375</text:p>
          </table:table-cell>
          <table:table-cell office:value-type="float" office:value="0.0001554604">
            <text:p>0.0001554604</text:p>
          </table:table-cell>
          <table:table-cell table:number-columns-repeated="4"/>
        </table:table-row>
        <table:table-row table:style-name="ro1">
          <table:table-cell office:value-type="float" office:value="713.611389160156">
            <text:p>713.6113891602</text:p>
          </table:table-cell>
          <table:table-cell office:value-type="float" office:value="0.00495121">
            <text:p>0.00495121</text:p>
          </table:table-cell>
          <table:table-cell table:number-columns-repeated="4"/>
        </table:table-row>
        <table:table-row table:style-name="ro1">
          <table:table-cell office:value-type="float" office:value="713.731628417969">
            <text:p>713.731628418</text:p>
          </table:table-cell>
          <table:table-cell office:value-type="float" office:value="0.005485085">
            <text:p>0.005485085</text:p>
          </table:table-cell>
          <table:table-cell table:number-columns-repeated="4"/>
        </table:table-row>
        <table:table-row table:style-name="ro1">
          <table:table-cell office:value-type="float" office:value="713.851806640625">
            <text:p>713.8518066406</text:p>
          </table:table-cell>
          <table:table-cell office:value-type="float" office:value="-0.005191999">
            <text:p>-0.005191999</text:p>
          </table:table-cell>
          <table:table-cell table:number-columns-repeated="4"/>
        </table:table-row>
        <table:table-row table:style-name="ro1">
          <table:table-cell office:value-type="float" office:value="713.971984863281">
            <text:p>713.9719848633</text:p>
          </table:table-cell>
          <table:table-cell office:value-type="float" office:value="-0.0003027058">
            <text:p>-0.0003027058</text:p>
          </table:table-cell>
          <table:table-cell table:number-columns-repeated="4"/>
        </table:table-row>
        <table:table-row table:style-name="ro1">
          <table:table-cell office:value-type="float" office:value="714.092224121094">
            <text:p>714.0922241211</text:p>
          </table:table-cell>
          <table:table-cell office:value-type="float" office:value="-0.008232864">
            <text:p>-0.008232864</text:p>
          </table:table-cell>
          <table:table-cell table:number-columns-repeated="4"/>
        </table:table-row>
        <table:table-row table:style-name="ro1">
          <table:table-cell office:value-type="float" office:value="714.21240234375">
            <text:p>714.2124023438</text:p>
          </table:table-cell>
          <table:table-cell office:value-type="float" office:value="0.01002938">
            <text:p>0.01002938</text:p>
          </table:table-cell>
          <table:table-cell table:number-columns-repeated="4"/>
        </table:table-row>
        <table:table-row table:style-name="ro1">
          <table:table-cell office:value-type="float" office:value="714.332580566406">
            <text:p>714.3325805664</text:p>
          </table:table-cell>
          <table:table-cell office:value-type="float" office:value="0.004644269">
            <text:p>0.004644269</text:p>
          </table:table-cell>
          <table:table-cell table:number-columns-repeated="4"/>
        </table:table-row>
        <table:table-row table:style-name="ro1">
          <table:table-cell office:value-type="float" office:value="714.452819824219">
            <text:p>714.4528198242</text:p>
          </table:table-cell>
          <table:table-cell office:value-type="float" office:value="0.001164095">
            <text:p>0.001164095</text:p>
          </table:table-cell>
          <table:table-cell table:number-columns-repeated="4"/>
        </table:table-row>
        <table:table-row table:style-name="ro1">
          <table:table-cell office:value-type="float" office:value="714.572998046875">
            <text:p>714.5729980469</text:p>
          </table:table-cell>
          <table:table-cell office:value-type="float" office:value="0.005274478">
            <text:p>0.005274478</text:p>
          </table:table-cell>
          <table:table-cell table:number-columns-repeated="4"/>
        </table:table-row>
        <table:table-row table:style-name="ro1">
          <table:table-cell office:value-type="float" office:value="714.693237304688">
            <text:p>714.6932373047</text:p>
          </table:table-cell>
          <table:table-cell office:value-type="float" office:value="0.01385427">
            <text:p>0.01385427</text:p>
          </table:table-cell>
          <table:table-cell table:number-columns-repeated="4"/>
        </table:table-row>
        <table:table-row table:style-name="ro1">
          <table:table-cell office:value-type="float" office:value="714.813415527344">
            <text:p>714.8134155273</text:p>
          </table:table-cell>
          <table:table-cell office:value-type="float" office:value="-0.00102431">
            <text:p>-0.00102431</text:p>
          </table:table-cell>
          <table:table-cell table:number-columns-repeated="4"/>
        </table:table-row>
        <table:table-row table:style-name="ro1">
          <table:table-cell office:value-type="float" office:value="714.93359375">
            <text:p>714.93359375</text:p>
          </table:table-cell>
          <table:table-cell office:value-type="float" office:value="0.004544381">
            <text:p>0.004544381</text:p>
          </table:table-cell>
          <table:table-cell table:number-columns-repeated="4"/>
        </table:table-row>
        <table:table-row table:style-name="ro1">
          <table:table-cell office:value-type="float" office:value="715.053833007813">
            <text:p>715.0538330078</text:p>
          </table:table-cell>
          <table:table-cell office:value-type="float" office:value="0.003439134">
            <text:p>0.003439134</text:p>
          </table:table-cell>
          <table:table-cell table:number-columns-repeated="4"/>
        </table:table-row>
        <table:table-row table:style-name="ro1">
          <table:table-cell office:value-type="float" office:value="715.174011230469">
            <text:p>715.1740112305</text:p>
          </table:table-cell>
          <table:table-cell office:value-type="float" office:value="0.004947227">
            <text:p>0.004947227</text:p>
          </table:table-cell>
          <table:table-cell table:number-columns-repeated="4"/>
        </table:table-row>
        <table:table-row table:style-name="ro1">
          <table:table-cell office:value-type="float" office:value="715.294250488281">
            <text:p>715.2942504883</text:p>
          </table:table-cell>
          <table:table-cell office:value-type="float" office:value="-0.007306106">
            <text:p>-0.007306106</text:p>
          </table:table-cell>
          <table:table-cell table:number-columns-repeated="4"/>
        </table:table-row>
        <table:table-row table:style-name="ro1">
          <table:table-cell office:value-type="float" office:value="715.414428710938">
            <text:p>715.4144287109</text:p>
          </table:table-cell>
          <table:table-cell office:value-type="float" office:value="-0.002352221">
            <text:p>-0.002352221</text:p>
          </table:table-cell>
          <table:table-cell table:number-columns-repeated="4"/>
        </table:table-row>
        <table:table-row table:style-name="ro1">
          <table:table-cell office:value-type="float" office:value="715.53466796875">
            <text:p>715.5346679688</text:p>
          </table:table-cell>
          <table:table-cell office:value-type="float" office:value="0.00241707">
            <text:p>0.00241707</text:p>
          </table:table-cell>
          <table:table-cell table:number-columns-repeated="4"/>
        </table:table-row>
        <table:table-row table:style-name="ro1">
          <table:table-cell office:value-type="float" office:value="715.654846191406">
            <text:p>715.6548461914</text:p>
          </table:table-cell>
          <table:table-cell office:value-type="float" office:value="-0.005764073">
            <text:p>-0.005764073</text:p>
          </table:table-cell>
          <table:table-cell table:number-columns-repeated="4"/>
        </table:table-row>
        <table:table-row table:style-name="ro1">
          <table:table-cell office:value-type="float" office:value="715.775024414063">
            <text:p>715.7750244141</text:p>
          </table:table-cell>
          <table:table-cell office:value-type="float" office:value="0.002678786">
            <text:p>0.002678786</text:p>
          </table:table-cell>
          <table:table-cell table:number-columns-repeated="4"/>
        </table:table-row>
        <table:table-row table:style-name="ro1">
          <table:table-cell office:value-type="float" office:value="715.895263671875">
            <text:p>715.8952636719</text:p>
          </table:table-cell>
          <table:table-cell office:value-type="float" office:value="-0.0008680175">
            <text:p>-0.0008680175</text:p>
          </table:table-cell>
          <table:table-cell table:number-columns-repeated="4"/>
        </table:table-row>
        <table:table-row table:style-name="ro1">
          <table:table-cell office:value-type="float" office:value="716.015441894531">
            <text:p>716.0154418945</text:p>
          </table:table-cell>
          <table:table-cell office:value-type="float" office:value="-0.003683699">
            <text:p>-0.003683699</text:p>
          </table:table-cell>
          <table:table-cell table:number-columns-repeated="4"/>
        </table:table-row>
        <table:table-row table:style-name="ro1">
          <table:table-cell office:value-type="float" office:value="716.135681152344">
            <text:p>716.1356811523</text:p>
          </table:table-cell>
          <table:table-cell office:value-type="float" office:value="0.0007364835">
            <text:p>0.0007364835</text:p>
          </table:table-cell>
          <table:table-cell table:number-columns-repeated="4"/>
        </table:table-row>
        <table:table-row table:style-name="ro1">
          <table:table-cell office:value-type="float" office:value="716.255859375">
            <text:p>716.255859375</text:p>
          </table:table-cell>
          <table:table-cell office:value-type="float" office:value="-0.007043052">
            <text:p>-0.007043052</text:p>
          </table:table-cell>
          <table:table-cell table:number-columns-repeated="4"/>
        </table:table-row>
        <table:table-row table:style-name="ro1">
          <table:table-cell office:value-type="float" office:value="716.376098632813">
            <text:p>716.3760986328</text:p>
          </table:table-cell>
          <table:table-cell office:value-type="float" office:value="-0.008938">
            <text:p>-0.008938</text:p>
          </table:table-cell>
          <table:table-cell table:number-columns-repeated="4"/>
        </table:table-row>
        <table:table-row table:style-name="ro1">
          <table:table-cell office:value-type="float" office:value="716.496276855469">
            <text:p>716.4962768555</text:p>
          </table:table-cell>
          <table:table-cell office:value-type="float" office:value="0.006339966">
            <text:p>0.006339966</text:p>
          </table:table-cell>
          <table:table-cell table:number-columns-repeated="4"/>
        </table:table-row>
        <table:table-row table:style-name="ro1">
          <table:table-cell office:value-type="float" office:value="716.616516113281">
            <text:p>716.6165161133</text:p>
          </table:table-cell>
          <table:table-cell office:value-type="float" office:value="0.002096148">
            <text:p>0.002096148</text:p>
          </table:table-cell>
          <table:table-cell table:number-columns-repeated="4"/>
        </table:table-row>
        <table:table-row table:style-name="ro1">
          <table:table-cell office:value-type="float" office:value="716.736694335938">
            <text:p>716.7366943359</text:p>
          </table:table-cell>
          <table:table-cell office:value-type="float" office:value="0.001299042">
            <text:p>0.001299042</text:p>
          </table:table-cell>
          <table:table-cell table:number-columns-repeated="4"/>
        </table:table-row>
        <table:table-row table:style-name="ro1">
          <table:table-cell office:value-type="float" office:value="716.85693359375">
            <text:p>716.8569335938</text:p>
          </table:table-cell>
          <table:table-cell office:value-type="float" office:value="0.001460725">
            <text:p>0.001460725</text:p>
          </table:table-cell>
          <table:table-cell table:number-columns-repeated="4"/>
        </table:table-row>
        <table:table-row table:style-name="ro1">
          <table:table-cell office:value-type="float" office:value="716.977172851563">
            <text:p>716.9771728516</text:p>
          </table:table-cell>
          <table:table-cell office:value-type="float" office:value="0.00187342">
            <text:p>0.00187342</text:p>
          </table:table-cell>
          <table:table-cell table:number-columns-repeated="4"/>
        </table:table-row>
        <table:table-row table:style-name="ro1">
          <table:table-cell office:value-type="float" office:value="717.097351074219">
            <text:p>717.0973510742</text:p>
          </table:table-cell>
          <table:table-cell office:value-type="float" office:value="0.005884803">
            <text:p>0.005884803</text:p>
          </table:table-cell>
          <table:table-cell table:number-columns-repeated="4"/>
        </table:table-row>
        <table:table-row table:style-name="ro1">
          <table:table-cell office:value-type="float" office:value="717.217590332031">
            <text:p>717.217590332</text:p>
          </table:table-cell>
          <table:table-cell office:value-type="float" office:value="-0.00504381">
            <text:p>-0.00504381</text:p>
          </table:table-cell>
          <table:table-cell table:number-columns-repeated="4"/>
        </table:table-row>
        <table:table-row table:style-name="ro1">
          <table:table-cell office:value-type="float" office:value="717.337768554688">
            <text:p>717.3377685547</text:p>
          </table:table-cell>
          <table:table-cell office:value-type="float" office:value="-0.00806105">
            <text:p>-0.00806105</text:p>
          </table:table-cell>
          <table:table-cell table:number-columns-repeated="4"/>
        </table:table-row>
        <table:table-row table:style-name="ro1">
          <table:table-cell office:value-type="float" office:value="717.4580078125">
            <text:p>717.4580078125</text:p>
          </table:table-cell>
          <table:table-cell office:value-type="float" office:value="0.001700931">
            <text:p>0.001700931</text:p>
          </table:table-cell>
          <table:table-cell table:number-columns-repeated="4"/>
        </table:table-row>
        <table:table-row table:style-name="ro1">
          <table:table-cell office:value-type="float" office:value="717.578186035156">
            <text:p>717.5781860352</text:p>
          </table:table-cell>
          <table:table-cell office:value-type="float" office:value="-0.001209855">
            <text:p>-0.001209855</text:p>
          </table:table-cell>
          <table:table-cell table:number-columns-repeated="4"/>
        </table:table-row>
        <table:table-row table:style-name="ro1">
          <table:table-cell office:value-type="float" office:value="717.698425292969">
            <text:p>717.698425293</text:p>
          </table:table-cell>
          <table:table-cell office:value-type="float" office:value="0.001541197">
            <text:p>0.001541197</text:p>
          </table:table-cell>
          <table:table-cell table:number-columns-repeated="4"/>
        </table:table-row>
        <table:table-row table:style-name="ro1">
          <table:table-cell office:value-type="float" office:value="717.818603515625">
            <text:p>717.8186035156</text:p>
          </table:table-cell>
          <table:table-cell office:value-type="float" office:value="0.001549162">
            <text:p>0.001549162</text:p>
          </table:table-cell>
          <table:table-cell table:number-columns-repeated="4"/>
        </table:table-row>
        <table:table-row table:style-name="ro1">
          <table:table-cell office:value-type="float" office:value="717.938842773438">
            <text:p>717.9388427734</text:p>
          </table:table-cell>
          <table:table-cell office:value-type="float" office:value="-0.001267119">
            <text:p>-0.001267119</text:p>
          </table:table-cell>
          <table:table-cell table:number-columns-repeated="4"/>
        </table:table-row>
        <table:table-row table:style-name="ro1">
          <table:table-cell office:value-type="float" office:value="718.05908203125">
            <text:p>718.0590820313</text:p>
          </table:table-cell>
          <table:table-cell office:value-type="float" office:value="0.001852242">
            <text:p>0.001852242</text:p>
          </table:table-cell>
          <table:table-cell table:number-columns-repeated="4"/>
        </table:table-row>
        <table:table-row table:style-name="ro1">
          <table:table-cell office:value-type="float" office:value="718.179260253906">
            <text:p>718.1792602539</text:p>
          </table:table-cell>
          <table:table-cell office:value-type="float" office:value="-0.004449295">
            <text:p>-0.004449295</text:p>
          </table:table-cell>
          <table:table-cell table:number-columns-repeated="4"/>
        </table:table-row>
        <table:table-row table:style-name="ro1">
          <table:table-cell office:value-type="float" office:value="718.299499511719">
            <text:p>718.2994995117</text:p>
          </table:table-cell>
          <table:table-cell office:value-type="float" office:value="0.005610415">
            <text:p>0.005610415</text:p>
          </table:table-cell>
          <table:table-cell table:number-columns-repeated="4"/>
        </table:table-row>
        <table:table-row table:style-name="ro1">
          <table:table-cell office:value-type="float" office:value="718.419677734375">
            <text:p>718.4196777344</text:p>
          </table:table-cell>
          <table:table-cell office:value-type="float" office:value="-0.0003457102">
            <text:p>-0.0003457102</text:p>
          </table:table-cell>
          <table:table-cell table:number-columns-repeated="4"/>
        </table:table-row>
        <table:table-row table:style-name="ro1">
          <table:table-cell office:value-type="float" office:value="718.539916992188">
            <text:p>718.5399169922</text:p>
          </table:table-cell>
          <table:table-cell office:value-type="float" office:value="-0.004586479">
            <text:p>-0.004586479</text:p>
          </table:table-cell>
          <table:table-cell table:number-columns-repeated="4"/>
        </table:table-row>
        <table:table-row table:style-name="ro1">
          <table:table-cell office:value-type="float" office:value="718.66015625">
            <text:p>718.66015625</text:p>
          </table:table-cell>
          <table:table-cell office:value-type="float" office:value="0.001191355">
            <text:p>0.001191355</text:p>
          </table:table-cell>
          <table:table-cell table:number-columns-repeated="4"/>
        </table:table-row>
        <table:table-row table:style-name="ro1">
          <table:table-cell office:value-type="float" office:value="718.780334472656">
            <text:p>718.7803344727</text:p>
          </table:table-cell>
          <table:table-cell office:value-type="float" office:value="-0.001840253">
            <text:p>-0.001840253</text:p>
          </table:table-cell>
          <table:table-cell table:number-columns-repeated="4"/>
        </table:table-row>
        <table:table-row table:style-name="ro1">
          <table:table-cell office:value-type="float" office:value="718.900573730469">
            <text:p>718.9005737305</text:p>
          </table:table-cell>
          <table:table-cell office:value-type="float" office:value="0.002371229">
            <text:p>0.002371229</text:p>
          </table:table-cell>
          <table:table-cell table:number-columns-repeated="4"/>
        </table:table-row>
        <table:table-row table:style-name="ro1">
          <table:table-cell office:value-type="float" office:value="719.020812988281">
            <text:p>719.0208129883</text:p>
          </table:table-cell>
          <table:table-cell office:value-type="float" office:value="0.00511414">
            <text:p>0.00511414</text:p>
          </table:table-cell>
          <table:table-cell table:number-columns-repeated="4"/>
        </table:table-row>
        <table:table-row table:style-name="ro1">
          <table:table-cell office:value-type="float" office:value="719.140991210938">
            <text:p>719.1409912109</text:p>
          </table:table-cell>
          <table:table-cell office:value-type="float" office:value="0.007785869">
            <text:p>0.007785869</text:p>
          </table:table-cell>
          <table:table-cell table:number-columns-repeated="4"/>
        </table:table-row>
        <table:table-row table:style-name="ro1">
          <table:table-cell office:value-type="float" office:value="719.26123046875">
            <text:p>719.2612304688</text:p>
          </table:table-cell>
          <table:table-cell office:value-type="float" office:value="0.0006570549">
            <text:p>0.0006570549</text:p>
          </table:table-cell>
          <table:table-cell table:number-columns-repeated="4"/>
        </table:table-row>
        <table:table-row table:style-name="ro1">
          <table:table-cell office:value-type="float" office:value="719.381469726563">
            <text:p>719.3814697266</text:p>
          </table:table-cell>
          <table:table-cell office:value-type="float" office:value="-0.003043341">
            <text:p>-0.003043341</text:p>
          </table:table-cell>
          <table:table-cell table:number-columns-repeated="4"/>
        </table:table-row>
        <table:table-row table:style-name="ro1">
          <table:table-cell office:value-type="float" office:value="719.501647949219">
            <text:p>719.5016479492</text:p>
          </table:table-cell>
          <table:table-cell office:value-type="float" office:value="0.009320541">
            <text:p>0.009320541</text:p>
          </table:table-cell>
          <table:table-cell table:number-columns-repeated="4"/>
        </table:table-row>
        <table:table-row table:style-name="ro1">
          <table:table-cell office:value-type="float" office:value="719.621887207031">
            <text:p>719.621887207</text:p>
          </table:table-cell>
          <table:table-cell office:value-type="float" office:value="-0.001941744">
            <text:p>-0.001941744</text:p>
          </table:table-cell>
          <table:table-cell table:number-columns-repeated="4"/>
        </table:table-row>
        <table:table-row table:style-name="ro1">
          <table:table-cell office:value-type="float" office:value="719.742126464844">
            <text:p>719.7421264648</text:p>
          </table:table-cell>
          <table:table-cell office:value-type="float" office:value="-0.006760965">
            <text:p>-0.006760965</text:p>
          </table:table-cell>
          <table:table-cell table:number-columns-repeated="4"/>
        </table:table-row>
        <table:table-row table:style-name="ro1">
          <table:table-cell office:value-type="float" office:value="719.8623046875">
            <text:p>719.8623046875</text:p>
          </table:table-cell>
          <table:table-cell office:value-type="float" office:value="-0.007400797">
            <text:p>-0.007400797</text:p>
          </table:table-cell>
          <table:table-cell table:number-columns-repeated="4"/>
        </table:table-row>
        <table:table-row table:style-name="ro1">
          <table:table-cell office:value-type="float" office:value="719.982543945313">
            <text:p>719.9825439453</text:p>
          </table:table-cell>
          <table:table-cell office:value-type="float" office:value="0.004669637">
            <text:p>0.004669637</text:p>
          </table:table-cell>
          <table:table-cell table:number-columns-repeated="4"/>
        </table:table-row>
        <table:table-row table:style-name="ro1">
          <table:table-cell office:value-type="float" office:value="720.102783203125">
            <text:p>720.1027832031</text:p>
          </table:table-cell>
          <table:table-cell office:value-type="float" office:value="-0.004290007">
            <text:p>-0.004290007</text:p>
          </table:table-cell>
          <table:table-cell table:number-columns-repeated="4"/>
        </table:table-row>
        <table:table-row table:style-name="ro1">
          <table:table-cell office:value-type="float" office:value="720.222961425781">
            <text:p>720.2229614258</text:p>
          </table:table-cell>
          <table:table-cell office:value-type="float" office:value="0.009587805">
            <text:p>0.009587805</text:p>
          </table:table-cell>
          <table:table-cell table:number-columns-repeated="4"/>
        </table:table-row>
        <table:table-row table:style-name="ro1">
          <table:table-cell office:value-type="float" office:value="720.343200683594">
            <text:p>720.3432006836</text:p>
          </table:table-cell>
          <table:table-cell office:value-type="float" office:value="-0.007742994">
            <text:p>-0.007742994</text:p>
          </table:table-cell>
          <table:table-cell table:number-columns-repeated="4"/>
        </table:table-row>
        <table:table-row table:style-name="ro1">
          <table:table-cell office:value-type="float" office:value="720.463439941406">
            <text:p>720.4634399414</text:p>
          </table:table-cell>
          <table:table-cell office:value-type="float" office:value="0.001017053">
            <text:p>0.001017053</text:p>
          </table:table-cell>
          <table:table-cell table:number-columns-repeated="4"/>
        </table:table-row>
        <table:table-row table:style-name="ro1">
          <table:table-cell office:value-type="float" office:value="720.583679199219">
            <text:p>720.5836791992</text:p>
          </table:table-cell>
          <table:table-cell office:value-type="float" office:value="0.02152659">
            <text:p>0.02152659</text:p>
          </table:table-cell>
          <table:table-cell table:number-columns-repeated="4"/>
        </table:table-row>
        <table:table-row table:style-name="ro1">
          <table:table-cell office:value-type="float" office:value="720.703857421875">
            <text:p>720.7038574219</text:p>
          </table:table-cell>
          <table:table-cell office:value-type="float" office:value="0.002359367">
            <text:p>0.002359367</text:p>
          </table:table-cell>
          <table:table-cell table:number-columns-repeated="4"/>
        </table:table-row>
        <table:table-row table:style-name="ro1">
          <table:table-cell office:value-type="float" office:value="720.824096679688">
            <text:p>720.8240966797</text:p>
          </table:table-cell>
          <table:table-cell office:value-type="float" office:value="0.001247603">
            <text:p>0.001247603</text:p>
          </table:table-cell>
          <table:table-cell table:number-columns-repeated="4"/>
        </table:table-row>
        <table:table-row table:style-name="ro1">
          <table:table-cell office:value-type="float" office:value="720.9443359375">
            <text:p>720.9443359375</text:p>
          </table:table-cell>
          <table:table-cell office:value-type="float" office:value="0.006294438">
            <text:p>0.006294438</text:p>
          </table:table-cell>
          <table:table-cell table:number-columns-repeated="4"/>
        </table:table-row>
        <table:table-row table:style-name="ro1">
          <table:table-cell office:value-type="float" office:value="721.064575195313">
            <text:p>721.0645751953</text:p>
          </table:table-cell>
          <table:table-cell office:value-type="float" office:value="0.005612682">
            <text:p>0.005612682</text:p>
          </table:table-cell>
          <table:table-cell table:number-columns-repeated="4"/>
        </table:table-row>
        <table:table-row table:style-name="ro1">
          <table:table-cell office:value-type="float" office:value="721.184753417969">
            <text:p>721.184753418</text:p>
          </table:table-cell>
          <table:table-cell office:value-type="float" office:value="-0.002386821">
            <text:p>-0.002386821</text:p>
          </table:table-cell>
          <table:table-cell table:number-columns-repeated="4"/>
        </table:table-row>
        <table:table-row table:style-name="ro1">
          <table:table-cell office:value-type="float" office:value="721.304992675781">
            <text:p>721.3049926758</text:p>
          </table:table-cell>
          <table:table-cell office:value-type="float" office:value="0.002000674">
            <text:p>0.002000674</text:p>
          </table:table-cell>
          <table:table-cell table:number-columns-repeated="4"/>
        </table:table-row>
        <table:table-row table:style-name="ro1">
          <table:table-cell office:value-type="float" office:value="721.425231933594">
            <text:p>721.4252319336</text:p>
          </table:table-cell>
          <table:table-cell office:value-type="float" office:value="0.001214173">
            <text:p>0.001214173</text:p>
          </table:table-cell>
          <table:table-cell table:number-columns-repeated="4"/>
        </table:table-row>
        <table:table-row table:style-name="ro1">
          <table:table-cell office:value-type="float" office:value="721.545471191406">
            <text:p>721.5454711914</text:p>
          </table:table-cell>
          <table:table-cell office:value-type="float" office:value="0.01783213">
            <text:p>0.01783213</text:p>
          </table:table-cell>
          <table:table-cell table:number-columns-repeated="4"/>
        </table:table-row>
        <table:table-row table:style-name="ro1">
          <table:table-cell office:value-type="float" office:value="721.665649414063">
            <text:p>721.6656494141</text:p>
          </table:table-cell>
          <table:table-cell office:value-type="float" office:value="-0.007653236">
            <text:p>-0.007653236</text:p>
          </table:table-cell>
          <table:table-cell table:number-columns-repeated="4"/>
        </table:table-row>
        <table:table-row table:style-name="ro1">
          <table:table-cell office:value-type="float" office:value="721.785888671875">
            <text:p>721.7858886719</text:p>
          </table:table-cell>
          <table:table-cell office:value-type="float" office:value="0.01568234">
            <text:p>0.01568234</text:p>
          </table:table-cell>
          <table:table-cell table:number-columns-repeated="4"/>
        </table:table-row>
        <table:table-row table:style-name="ro1">
          <table:table-cell office:value-type="float" office:value="721.906127929688">
            <text:p>721.9061279297</text:p>
          </table:table-cell>
          <table:table-cell office:value-type="float" office:value="-0.0009540595">
            <text:p>-0.0009540595</text:p>
          </table:table-cell>
          <table:table-cell table:number-columns-repeated="4"/>
        </table:table-row>
        <table:table-row table:style-name="ro1">
          <table:table-cell office:value-type="float" office:value="722.0263671875">
            <text:p>722.0263671875</text:p>
          </table:table-cell>
          <table:table-cell office:value-type="float" office:value="-0.005233277">
            <text:p>-0.005233277</text:p>
          </table:table-cell>
          <table:table-cell table:number-columns-repeated="4"/>
        </table:table-row>
        <table:table-row table:style-name="ro1">
          <table:table-cell office:value-type="float" office:value="722.146606445313">
            <text:p>722.1466064453</text:p>
          </table:table-cell>
          <table:table-cell office:value-type="float" office:value="0.01303263">
            <text:p>0.01303263</text:p>
          </table:table-cell>
          <table:table-cell table:number-columns-repeated="4"/>
        </table:table-row>
        <table:table-row table:style-name="ro1">
          <table:table-cell office:value-type="float" office:value="722.266784667969">
            <text:p>722.266784668</text:p>
          </table:table-cell>
          <table:table-cell office:value-type="float" office:value="-0.002415634">
            <text:p>-0.002415634</text:p>
          </table:table-cell>
          <table:table-cell table:number-columns-repeated="4"/>
        </table:table-row>
        <table:table-row table:style-name="ro1">
          <table:table-cell office:value-type="float" office:value="722.387023925781">
            <text:p>722.3870239258</text:p>
          </table:table-cell>
          <table:table-cell office:value-type="float" office:value="-0.006020116">
            <text:p>-0.006020116</text:p>
          </table:table-cell>
          <table:table-cell table:number-columns-repeated="4"/>
        </table:table-row>
        <table:table-row table:style-name="ro1">
          <table:table-cell office:value-type="float" office:value="722.507263183594">
            <text:p>722.5072631836</text:p>
          </table:table-cell>
          <table:table-cell office:value-type="float" office:value="-0.007755441">
            <text:p>-0.007755441</text:p>
          </table:table-cell>
          <table:table-cell table:number-columns-repeated="4"/>
        </table:table-row>
        <table:table-row table:style-name="ro1">
          <table:table-cell office:value-type="float" office:value="722.627502441406">
            <text:p>722.6275024414</text:p>
          </table:table-cell>
          <table:table-cell office:value-type="float" office:value="-0.004441361">
            <text:p>-0.004441361</text:p>
          </table:table-cell>
          <table:table-cell table:number-columns-repeated="4"/>
        </table:table-row>
        <table:table-row table:style-name="ro1">
          <table:table-cell office:value-type="float" office:value="722.747741699219">
            <text:p>722.7477416992</text:p>
          </table:table-cell>
          <table:table-cell office:value-type="float" office:value="0.003043509">
            <text:p>0.003043509</text:p>
          </table:table-cell>
          <table:table-cell table:number-columns-repeated="4"/>
        </table:table-row>
        <table:table-row table:style-name="ro1">
          <table:table-cell office:value-type="float" office:value="722.867980957031">
            <text:p>722.867980957</text:p>
          </table:table-cell>
          <table:table-cell office:value-type="float" office:value="-0.005447928">
            <text:p>-0.005447928</text:p>
          </table:table-cell>
          <table:table-cell table:number-columns-repeated="4"/>
        </table:table-row>
        <table:table-row table:style-name="ro1">
          <table:table-cell office:value-type="float" office:value="722.988159179688">
            <text:p>722.9881591797</text:p>
          </table:table-cell>
          <table:table-cell office:value-type="float" office:value="0.00146646">
            <text:p>0.00146646</text:p>
          </table:table-cell>
          <table:table-cell table:number-columns-repeated="4"/>
        </table:table-row>
        <table:table-row table:style-name="ro1">
          <table:table-cell office:value-type="float" office:value="723.1083984375">
            <text:p>723.1083984375</text:p>
          </table:table-cell>
          <table:table-cell office:value-type="float" office:value="0.004263941">
            <text:p>0.004263941</text:p>
          </table:table-cell>
          <table:table-cell table:number-columns-repeated="4"/>
        </table:table-row>
        <table:table-row table:style-name="ro1">
          <table:table-cell office:value-type="float" office:value="723.228637695313">
            <text:p>723.2286376953</text:p>
          </table:table-cell>
          <table:table-cell office:value-type="float" office:value="0.01602769">
            <text:p>0.01602769</text:p>
          </table:table-cell>
          <table:table-cell table:number-columns-repeated="4"/>
        </table:table-row>
        <table:table-row table:style-name="ro1">
          <table:table-cell office:value-type="float" office:value="723.348876953125">
            <text:p>723.3488769531</text:p>
          </table:table-cell>
          <table:table-cell office:value-type="float" office:value="0.001951345">
            <text:p>0.001951345</text:p>
          </table:table-cell>
          <table:table-cell table:number-columns-repeated="4"/>
        </table:table-row>
        <table:table-row table:style-name="ro1">
          <table:table-cell office:value-type="float" office:value="723.469116210938">
            <text:p>723.4691162109</text:p>
          </table:table-cell>
          <table:table-cell office:value-type="float" office:value="-0.003510837">
            <text:p>-0.003510837</text:p>
          </table:table-cell>
          <table:table-cell table:number-columns-repeated="4"/>
        </table:table-row>
        <table:table-row table:style-name="ro1">
          <table:table-cell office:value-type="float" office:value="723.58935546875">
            <text:p>723.5893554688</text:p>
          </table:table-cell>
          <table:table-cell office:value-type="float" office:value="0.002329685">
            <text:p>0.002329685</text:p>
          </table:table-cell>
          <table:table-cell table:number-columns-repeated="4"/>
        </table:table-row>
        <table:table-row table:style-name="ro1">
          <table:table-cell office:value-type="float" office:value="723.709594726563">
            <text:p>723.7095947266</text:p>
          </table:table-cell>
          <table:table-cell office:value-type="float" office:value="-0.003895941">
            <text:p>-0.003895941</text:p>
          </table:table-cell>
          <table:table-cell table:number-columns-repeated="4"/>
        </table:table-row>
        <table:table-row table:style-name="ro1">
          <table:table-cell office:value-type="float" office:value="723.829772949219">
            <text:p>723.8297729492</text:p>
          </table:table-cell>
          <table:table-cell office:value-type="float" office:value="-0.005464063">
            <text:p>-0.005464063</text:p>
          </table:table-cell>
          <table:table-cell table:number-columns-repeated="4"/>
        </table:table-row>
        <table:table-row table:style-name="ro1">
          <table:table-cell office:value-type="float" office:value="723.950012207031">
            <text:p>723.950012207</text:p>
          </table:table-cell>
          <table:table-cell office:value-type="float" office:value="0.004244701">
            <text:p>0.004244701</text:p>
          </table:table-cell>
          <table:table-cell table:number-columns-repeated="4"/>
        </table:table-row>
        <table:table-row table:style-name="ro1">
          <table:table-cell office:value-type="float" office:value="724.070251464844">
            <text:p>724.0702514648</text:p>
          </table:table-cell>
          <table:table-cell office:value-type="float" office:value="0.00102134">
            <text:p>0.00102134</text:p>
          </table:table-cell>
          <table:table-cell table:number-columns-repeated="4"/>
        </table:table-row>
        <table:table-row table:style-name="ro1">
          <table:table-cell office:value-type="float" office:value="724.190490722656">
            <text:p>724.1904907227</text:p>
          </table:table-cell>
          <table:table-cell office:value-type="float" office:value="-0.01096524">
            <text:p>-0.01096524</text:p>
          </table:table-cell>
          <table:table-cell table:number-columns-repeated="4"/>
        </table:table-row>
        <table:table-row table:style-name="ro1">
          <table:table-cell office:value-type="float" office:value="724.310729980469">
            <text:p>724.3107299805</text:p>
          </table:table-cell>
          <table:table-cell office:value-type="float" office:value="-0.006886415">
            <text:p>-0.006886415</text:p>
          </table:table-cell>
          <table:table-cell table:number-columns-repeated="4"/>
        </table:table-row>
        <table:table-row table:style-name="ro1">
          <table:table-cell office:value-type="float" office:value="724.430969238281">
            <text:p>724.4309692383</text:p>
          </table:table-cell>
          <table:table-cell office:value-type="float" office:value="-0.006707543">
            <text:p>-0.006707543</text:p>
          </table:table-cell>
          <table:table-cell table:number-columns-repeated="4"/>
        </table:table-row>
        <table:table-row table:style-name="ro1">
          <table:table-cell office:value-type="float" office:value="724.551208496094">
            <text:p>724.5512084961</text:p>
          </table:table-cell>
          <table:table-cell office:value-type="float" office:value="-0.008812809">
            <text:p>-0.008812809</text:p>
          </table:table-cell>
          <table:table-cell table:number-columns-repeated="4"/>
        </table:table-row>
        <table:table-row table:style-name="ro1">
          <table:table-cell office:value-type="float" office:value="724.671447753906">
            <text:p>724.6714477539</text:p>
          </table:table-cell>
          <table:table-cell office:value-type="float" office:value="0.006085756">
            <text:p>0.006085756</text:p>
          </table:table-cell>
          <table:table-cell table:number-columns-repeated="4"/>
        </table:table-row>
        <table:table-row table:style-name="ro1">
          <table:table-cell office:value-type="float" office:value="724.791687011719">
            <text:p>724.7916870117</text:p>
          </table:table-cell>
          <table:table-cell office:value-type="float" office:value="-0.007085983">
            <text:p>-0.007085983</text:p>
          </table:table-cell>
          <table:table-cell table:number-columns-repeated="4"/>
        </table:table-row>
        <table:table-row table:style-name="ro1">
          <table:table-cell office:value-type="float" office:value="724.911865234375">
            <text:p>724.9118652344</text:p>
          </table:table-cell>
          <table:table-cell office:value-type="float" office:value="-0.00692272">
            <text:p>-0.00692272</text:p>
          </table:table-cell>
          <table:table-cell table:number-columns-repeated="4"/>
        </table:table-row>
        <table:table-row table:style-name="ro1">
          <table:table-cell office:value-type="float" office:value="725.032104492188">
            <text:p>725.0321044922</text:p>
          </table:table-cell>
          <table:table-cell office:value-type="float" office:value="0.003741663">
            <text:p>0.003741663</text:p>
          </table:table-cell>
          <table:table-cell table:number-columns-repeated="4"/>
        </table:table-row>
        <table:table-row table:style-name="ro1">
          <table:table-cell office:value-type="float" office:value="725.15234375">
            <text:p>725.15234375</text:p>
          </table:table-cell>
          <table:table-cell office:value-type="float" office:value="-0.006003605">
            <text:p>-0.006003605</text:p>
          </table:table-cell>
          <table:table-cell table:number-columns-repeated="4"/>
        </table:table-row>
        <table:table-row table:style-name="ro1">
          <table:table-cell office:value-type="float" office:value="725.272583007813">
            <text:p>725.2725830078</text:p>
          </table:table-cell>
          <table:table-cell office:value-type="float" office:value="-0.007289519">
            <text:p>-0.007289519</text:p>
          </table:table-cell>
          <table:table-cell table:number-columns-repeated="4"/>
        </table:table-row>
        <table:table-row table:style-name="ro1">
          <table:table-cell office:value-type="float" office:value="725.392822265625">
            <text:p>725.3928222656</text:p>
          </table:table-cell>
          <table:table-cell office:value-type="float" office:value="0.02366433">
            <text:p>0.02366433</text:p>
          </table:table-cell>
          <table:table-cell table:number-columns-repeated="4"/>
        </table:table-row>
        <table:table-row table:style-name="ro1">
          <table:table-cell office:value-type="float" office:value="725.513061523438">
            <text:p>725.5130615234</text:p>
          </table:table-cell>
          <table:table-cell office:value-type="float" office:value="-0.0005512693">
            <text:p>-0.0005512693</text:p>
          </table:table-cell>
          <table:table-cell table:number-columns-repeated="4"/>
        </table:table-row>
        <table:table-row table:style-name="ro1">
          <table:table-cell office:value-type="float" office:value="725.63330078125">
            <text:p>725.6333007813</text:p>
          </table:table-cell>
          <table:table-cell office:value-type="float" office:value="-0.0002527264">
            <text:p>-0.0002527264</text:p>
          </table:table-cell>
          <table:table-cell table:number-columns-repeated="4"/>
        </table:table-row>
        <table:table-row table:style-name="ro1">
          <table:table-cell office:value-type="float" office:value="725.753540039063">
            <text:p>725.7535400391</text:p>
          </table:table-cell>
          <table:table-cell office:value-type="float" office:value="-0.005446601">
            <text:p>-0.005446601</text:p>
          </table:table-cell>
          <table:table-cell table:number-columns-repeated="4"/>
        </table:table-row>
        <table:table-row table:style-name="ro1">
          <table:table-cell office:value-type="float" office:value="725.873779296875">
            <text:p>725.8737792969</text:p>
          </table:table-cell>
          <table:table-cell office:value-type="float" office:value="0.001729826">
            <text:p>0.001729826</text:p>
          </table:table-cell>
          <table:table-cell table:number-columns-repeated="4"/>
        </table:table-row>
        <table:table-row table:style-name="ro1">
          <table:table-cell office:value-type="float" office:value="725.994018554688">
            <text:p>725.9940185547</text:p>
          </table:table-cell>
          <table:table-cell office:value-type="float" office:value="-0.000271758">
            <text:p>-0.000271758</text:p>
          </table:table-cell>
          <table:table-cell table:number-columns-repeated="4"/>
        </table:table-row>
        <table:table-row table:style-name="ro1">
          <table:table-cell office:value-type="float" office:value="726.1142578125">
            <text:p>726.1142578125</text:p>
          </table:table-cell>
          <table:table-cell office:value-type="float" office:value="0.001490318">
            <text:p>0.001490318</text:p>
          </table:table-cell>
          <table:table-cell table:number-columns-repeated="4"/>
        </table:table-row>
        <table:table-row table:style-name="ro1">
          <table:table-cell office:value-type="float" office:value="726.234497070313">
            <text:p>726.2344970703</text:p>
          </table:table-cell>
          <table:table-cell office:value-type="float" office:value="-0.002308055">
            <text:p>-0.002308055</text:p>
          </table:table-cell>
          <table:table-cell table:number-columns-repeated="4"/>
        </table:table-row>
        <table:table-row table:style-name="ro1">
          <table:table-cell office:value-type="float" office:value="726.354736328125">
            <text:p>726.3547363281</text:p>
          </table:table-cell>
          <table:table-cell office:value-type="float" office:value="0.009397581">
            <text:p>0.009397581</text:p>
          </table:table-cell>
          <table:table-cell table:number-columns-repeated="4"/>
        </table:table-row>
        <table:table-row table:style-name="ro1">
          <table:table-cell office:value-type="float" office:value="726.474975585938">
            <text:p>726.4749755859</text:p>
          </table:table-cell>
          <table:table-cell office:value-type="float" office:value="0.0007823414">
            <text:p>0.0007823414</text:p>
          </table:table-cell>
          <table:table-cell table:number-columns-repeated="4"/>
        </table:table-row>
        <table:table-row table:style-name="ro1">
          <table:table-cell office:value-type="float" office:value="726.59521484375">
            <text:p>726.5952148438</text:p>
          </table:table-cell>
          <table:table-cell office:value-type="float" office:value="0.001083786">
            <text:p>0.001083786</text:p>
          </table:table-cell>
          <table:table-cell table:number-columns-repeated="4"/>
        </table:table-row>
        <table:table-row table:style-name="ro1">
          <table:table-cell office:value-type="float" office:value="726.715454101563">
            <text:p>726.7154541016</text:p>
          </table:table-cell>
          <table:table-cell office:value-type="float" office:value="-0.003648814">
            <text:p>-0.003648814</text:p>
          </table:table-cell>
          <table:table-cell table:number-columns-repeated="4"/>
        </table:table-row>
        <table:table-row table:style-name="ro1">
          <table:table-cell office:value-type="float" office:value="726.835693359375">
            <text:p>726.8356933594</text:p>
          </table:table-cell>
          <table:table-cell office:value-type="float" office:value="-0.004231163">
            <text:p>-0.004231163</text:p>
          </table:table-cell>
          <table:table-cell table:number-columns-repeated="4"/>
        </table:table-row>
        <table:table-row table:style-name="ro1">
          <table:table-cell office:value-type="float" office:value="726.955932617188">
            <text:p>726.9559326172</text:p>
          </table:table-cell>
          <table:table-cell office:value-type="float" office:value="-0.009309545">
            <text:p>-0.009309545</text:p>
          </table:table-cell>
          <table:table-cell table:number-columns-repeated="4"/>
        </table:table-row>
        <table:table-row table:style-name="ro1">
          <table:table-cell office:value-type="float" office:value="727.076171875">
            <text:p>727.076171875</text:p>
          </table:table-cell>
          <table:table-cell office:value-type="float" office:value="0.006316088">
            <text:p>0.006316088</text:p>
          </table:table-cell>
          <table:table-cell table:number-columns-repeated="4"/>
        </table:table-row>
        <table:table-row table:style-name="ro1">
          <table:table-cell office:value-type="float" office:value="727.196411132813">
            <text:p>727.1964111328</text:p>
          </table:table-cell>
          <table:table-cell office:value-type="float" office:value="-0.0005655841">
            <text:p>-0.0005655841</text:p>
          </table:table-cell>
          <table:table-cell table:number-columns-repeated="4"/>
        </table:table-row>
        <table:table-row table:style-name="ro1">
          <table:table-cell office:value-type="float" office:value="727.316650390625">
            <text:p>727.3166503906</text:p>
          </table:table-cell>
          <table:table-cell office:value-type="float" office:value="0.01161213">
            <text:p>0.01161213</text:p>
          </table:table-cell>
          <table:table-cell table:number-columns-repeated="4"/>
        </table:table-row>
        <table:table-row table:style-name="ro1">
          <table:table-cell office:value-type="float" office:value="727.436889648438">
            <text:p>727.4368896484</text:p>
          </table:table-cell>
          <table:table-cell office:value-type="string">
            <text:p>-5.603337E-05</text:p>
          </table:table-cell>
          <table:table-cell table:number-columns-repeated="4"/>
        </table:table-row>
        <table:table-row table:style-name="ro1">
          <table:table-cell office:value-type="float" office:value="727.55712890625">
            <text:p>727.5571289063</text:p>
          </table:table-cell>
          <table:table-cell office:value-type="float" office:value="0.0007337657">
            <text:p>0.0007337657</text:p>
          </table:table-cell>
          <table:table-cell table:number-columns-repeated="4"/>
        </table:table-row>
        <table:table-row table:style-name="ro1">
          <table:table-cell office:value-type="float" office:value="727.677368164063">
            <text:p>727.6773681641</text:p>
          </table:table-cell>
          <table:table-cell office:value-type="float" office:value="-0.0008590861">
            <text:p>-0.0008590861</text:p>
          </table:table-cell>
          <table:table-cell table:number-columns-repeated="4"/>
        </table:table-row>
        <table:table-row table:style-name="ro1">
          <table:table-cell office:value-type="float" office:value="727.797607421875">
            <text:p>727.7976074219</text:p>
          </table:table-cell>
          <table:table-cell office:value-type="float" office:value="-0.006834747">
            <text:p>-0.006834747</text:p>
          </table:table-cell>
          <table:table-cell table:number-columns-repeated="4"/>
        </table:table-row>
        <table:table-row table:style-name="ro1">
          <table:table-cell office:value-type="float" office:value="727.917846679688">
            <text:p>727.9178466797</text:p>
          </table:table-cell>
          <table:table-cell office:value-type="float" office:value="-0.01016936">
            <text:p>-0.01016936</text:p>
          </table:table-cell>
          <table:table-cell table:number-columns-repeated="4"/>
        </table:table-row>
        <table:table-row table:style-name="ro1">
          <table:table-cell office:value-type="float" office:value="728.0380859375">
            <text:p>728.0380859375</text:p>
          </table:table-cell>
          <table:table-cell office:value-type="float" office:value="0.002944987">
            <text:p>0.002944987</text:p>
          </table:table-cell>
          <table:table-cell table:number-columns-repeated="4"/>
        </table:table-row>
        <table:table-row table:style-name="ro1">
          <table:table-cell office:value-type="float" office:value="728.158325195313">
            <text:p>728.1583251953</text:p>
          </table:table-cell>
          <table:table-cell office:value-type="float" office:value="-0.008660742">
            <text:p>-0.008660742</text:p>
          </table:table-cell>
          <table:table-cell table:number-columns-repeated="4"/>
        </table:table-row>
        <table:table-row table:style-name="ro1">
          <table:table-cell office:value-type="float" office:value="728.278564453125">
            <text:p>728.2785644531</text:p>
          </table:table-cell>
          <table:table-cell office:value-type="float" office:value="-0.004056846">
            <text:p>-0.004056846</text:p>
          </table:table-cell>
          <table:table-cell table:number-columns-repeated="4"/>
        </table:table-row>
        <table:table-row table:style-name="ro1">
          <table:table-cell office:value-type="float" office:value="728.398803710938">
            <text:p>728.3988037109</text:p>
          </table:table-cell>
          <table:table-cell office:value-type="float" office:value="-0.007012538">
            <text:p>-0.007012538</text:p>
          </table:table-cell>
          <table:table-cell table:number-columns-repeated="4"/>
        </table:table-row>
        <table:table-row table:style-name="ro1">
          <table:table-cell office:value-type="float" office:value="728.51904296875">
            <text:p>728.5190429688</text:p>
          </table:table-cell>
          <table:table-cell office:value-type="float" office:value="0.004616351">
            <text:p>0.004616351</text:p>
          </table:table-cell>
          <table:table-cell table:number-columns-repeated="4"/>
        </table:table-row>
        <table:table-row table:style-name="ro1">
          <table:table-cell office:value-type="float" office:value="728.639282226563">
            <text:p>728.6392822266</text:p>
          </table:table-cell>
          <table:table-cell office:value-type="float" office:value="-0.008077092">
            <text:p>-0.008077092</text:p>
          </table:table-cell>
          <table:table-cell table:number-columns-repeated="4"/>
        </table:table-row>
        <table:table-row table:style-name="ro1">
          <table:table-cell office:value-type="float" office:value="728.759521484375">
            <text:p>728.7595214844</text:p>
          </table:table-cell>
          <table:table-cell office:value-type="float" office:value="0.001532867">
            <text:p>0.001532867</text:p>
          </table:table-cell>
          <table:table-cell table:number-columns-repeated="4"/>
        </table:table-row>
        <table:table-row table:style-name="ro1">
          <table:table-cell office:value-type="float" office:value="728.879760742188">
            <text:p>728.8797607422</text:p>
          </table:table-cell>
          <table:table-cell office:value-type="float" office:value="0.00413775">
            <text:p>0.00413775</text:p>
          </table:table-cell>
          <table:table-cell table:number-columns-repeated="4"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-0.006137776">
            <text:p>-0.006137776</text:p>
          </table:table-cell>
          <table:table-cell table:number-columns-repeated="4"/>
        </table:table-row>
        <table:table-row table:style-name="ro1">
          <table:table-cell office:value-type="float" office:value="729.120239257813">
            <text:p>729.1202392578</text:p>
          </table:table-cell>
          <table:table-cell office:value-type="float" office:value="0.001127288">
            <text:p>0.001127288</text:p>
          </table:table-cell>
          <table:table-cell table:number-columns-repeated="4"/>
        </table:table-row>
        <table:table-row table:style-name="ro1">
          <table:table-cell office:value-type="float" office:value="729.240478515625">
            <text:p>729.2404785156</text:p>
          </table:table-cell>
          <table:table-cell office:value-type="float" office:value="0.008688878">
            <text:p>0.008688878</text:p>
          </table:table-cell>
          <table:table-cell table:number-columns-repeated="4"/>
        </table:table-row>
        <table:table-row table:style-name="ro1">
          <table:table-cell office:value-type="float" office:value="729.360778808594">
            <text:p>729.3607788086</text:p>
          </table:table-cell>
          <table:table-cell office:value-type="float" office:value="0.003697427">
            <text:p>0.003697427</text:p>
          </table:table-cell>
          <table:table-cell table:number-columns-repeated="4"/>
        </table:table-row>
        <table:table-row table:style-name="ro1">
          <table:table-cell office:value-type="float" office:value="729.481018066406">
            <text:p>729.4810180664</text:p>
          </table:table-cell>
          <table:table-cell office:value-type="string">
            <text:p>-9.406201E-05</text:p>
          </table:table-cell>
          <table:table-cell table:number-columns-repeated="4"/>
        </table:table-row>
        <table:table-row table:style-name="ro1">
          <table:table-cell office:value-type="float" office:value="729.601257324219">
            <text:p>729.6012573242</text:p>
          </table:table-cell>
          <table:table-cell office:value-type="float" office:value="0.005652576">
            <text:p>0.005652576</text:p>
          </table:table-cell>
          <table:table-cell table:number-columns-repeated="4"/>
        </table:table-row>
        <table:table-row table:style-name="ro1">
          <table:table-cell office:value-type="float" office:value="729.721496582031">
            <text:p>729.721496582</text:p>
          </table:table-cell>
          <table:table-cell office:value-type="float" office:value="0.02136157">
            <text:p>0.02136157</text:p>
          </table:table-cell>
          <table:table-cell table:number-columns-repeated="4"/>
        </table:table-row>
        <table:table-row table:style-name="ro1">
          <table:table-cell office:value-type="float" office:value="729.841735839844">
            <text:p>729.8417358398</text:p>
          </table:table-cell>
          <table:table-cell office:value-type="float" office:value="-0.005189468">
            <text:p>-0.005189468</text:p>
          </table:table-cell>
          <table:table-cell table:number-columns-repeated="4"/>
        </table:table-row>
        <table:table-row table:style-name="ro1">
          <table:table-cell office:value-type="float" office:value="729.961975097656">
            <text:p>729.9619750977</text:p>
          </table:table-cell>
          <table:table-cell office:value-type="float" office:value="-0.006685793">
            <text:p>-0.006685793</text:p>
          </table:table-cell>
          <table:table-cell table:number-columns-repeated="4"/>
        </table:table-row>
        <table:table-row table:style-name="ro1">
          <table:table-cell office:value-type="float" office:value="730.082214355469">
            <text:p>730.0822143555</text:p>
          </table:table-cell>
          <table:table-cell office:value-type="float" office:value="0.01096789">
            <text:p>0.01096789</text:p>
          </table:table-cell>
          <table:table-cell table:number-columns-repeated="4"/>
        </table:table-row>
        <table:table-row table:style-name="ro1">
          <table:table-cell office:value-type="float" office:value="730.202453613281">
            <text:p>730.2024536133</text:p>
          </table:table-cell>
          <table:table-cell office:value-type="float" office:value="0.004681103">
            <text:p>0.004681103</text:p>
          </table:table-cell>
          <table:table-cell table:number-columns-repeated="4"/>
        </table:table-row>
        <table:table-row table:style-name="ro1">
          <table:table-cell office:value-type="float" office:value="730.322692871094">
            <text:p>730.3226928711</text:p>
          </table:table-cell>
          <table:table-cell office:value-type="float" office:value="-0.001374152">
            <text:p>-0.001374152</text:p>
          </table:table-cell>
          <table:table-cell table:number-columns-repeated="4"/>
        </table:table-row>
        <table:table-row table:style-name="ro1">
          <table:table-cell office:value-type="float" office:value="730.442932128906">
            <text:p>730.4429321289</text:p>
          </table:table-cell>
          <table:table-cell office:value-type="float" office:value="0.002570998">
            <text:p>0.002570998</text:p>
          </table:table-cell>
          <table:table-cell table:number-columns-repeated="4"/>
        </table:table-row>
        <table:table-row table:style-name="ro1">
          <table:table-cell office:value-type="float" office:value="730.563171386719">
            <text:p>730.5631713867</text:p>
          </table:table-cell>
          <table:table-cell office:value-type="float" office:value="0.006432788">
            <text:p>0.006432788</text:p>
          </table:table-cell>
          <table:table-cell table:number-columns-repeated="4"/>
        </table:table-row>
        <table:table-row table:style-name="ro1">
          <table:table-cell office:value-type="float" office:value="730.683471679688">
            <text:p>730.6834716797</text:p>
          </table:table-cell>
          <table:table-cell office:value-type="float" office:value="-0.001085461">
            <text:p>-0.001085461</text:p>
          </table:table-cell>
          <table:table-cell table:number-columns-repeated="4"/>
        </table:table-row>
        <table:table-row table:style-name="ro1">
          <table:table-cell office:value-type="float" office:value="730.8037109375">
            <text:p>730.8037109375</text:p>
          </table:table-cell>
          <table:table-cell office:value-type="float" office:value="0.01254938">
            <text:p>0.01254938</text:p>
          </table:table-cell>
          <table:table-cell table:number-columns-repeated="4"/>
        </table:table-row>
        <table:table-row table:style-name="ro1">
          <table:table-cell office:value-type="float" office:value="730.923950195313">
            <text:p>730.9239501953</text:p>
          </table:table-cell>
          <table:table-cell office:value-type="float" office:value="0.00627023">
            <text:p>0.00627023</text:p>
          </table:table-cell>
          <table:table-cell table:number-columns-repeated="4"/>
        </table:table-row>
        <table:table-row table:style-name="ro1">
          <table:table-cell office:value-type="float" office:value="731.044189453125">
            <text:p>731.0441894531</text:p>
          </table:table-cell>
          <table:table-cell office:value-type="float" office:value="0.01262413">
            <text:p>0.01262413</text:p>
          </table:table-cell>
          <table:table-cell table:number-columns-repeated="4"/>
        </table:table-row>
        <table:table-row table:style-name="ro1">
          <table:table-cell office:value-type="float" office:value="731.164428710938">
            <text:p>731.1644287109</text:p>
          </table:table-cell>
          <table:table-cell office:value-type="float" office:value="-0.003884869">
            <text:p>-0.003884869</text:p>
          </table:table-cell>
          <table:table-cell table:number-columns-repeated="4"/>
        </table:table-row>
        <table:table-row table:style-name="ro1">
          <table:table-cell office:value-type="float" office:value="731.28466796875">
            <text:p>731.2846679688</text:p>
          </table:table-cell>
          <table:table-cell office:value-type="float" office:value="0.001924032">
            <text:p>0.001924032</text:p>
          </table:table-cell>
          <table:table-cell table:number-columns-repeated="4"/>
        </table:table-row>
        <table:table-row table:style-name="ro1">
          <table:table-cell office:value-type="float" office:value="731.404907226563">
            <text:p>731.4049072266</text:p>
          </table:table-cell>
          <table:table-cell office:value-type="float" office:value="-0.005708305">
            <text:p>-0.005708305</text:p>
          </table:table-cell>
          <table:table-cell table:number-columns-repeated="4"/>
        </table:table-row>
        <table:table-row table:style-name="ro1">
          <table:table-cell office:value-type="float" office:value="731.525146484375">
            <text:p>731.5251464844</text:p>
          </table:table-cell>
          <table:table-cell office:value-type="float" office:value="-0.00194134">
            <text:p>-0.00194134</text:p>
          </table:table-cell>
          <table:table-cell table:number-columns-repeated="4"/>
        </table:table-row>
        <table:table-row table:style-name="ro1">
          <table:table-cell office:value-type="float" office:value="731.645446777344">
            <text:p>731.6454467773</text:p>
          </table:table-cell>
          <table:table-cell office:value-type="float" office:value="0.007721566">
            <text:p>0.007721566</text:p>
          </table:table-cell>
          <table:table-cell table:number-columns-repeated="4"/>
        </table:table-row>
        <table:table-row table:style-name="ro1">
          <table:table-cell office:value-type="float" office:value="731.765686035156">
            <text:p>731.7656860352</text:p>
          </table:table-cell>
          <table:table-cell office:value-type="float" office:value="0.008652839">
            <text:p>0.008652839</text:p>
          </table:table-cell>
          <table:table-cell table:number-columns-repeated="4"/>
        </table:table-row>
        <table:table-row table:style-name="ro1">
          <table:table-cell office:value-type="float" office:value="731.885925292969">
            <text:p>731.885925293</text:p>
          </table:table-cell>
          <table:table-cell office:value-type="float" office:value="0.005846641">
            <text:p>0.005846641</text:p>
          </table:table-cell>
          <table:table-cell table:number-columns-repeated="4"/>
        </table:table-row>
        <table:table-row table:style-name="ro1">
          <table:table-cell office:value-type="float" office:value="732.006164550781">
            <text:p>732.0061645508</text:p>
          </table:table-cell>
          <table:table-cell office:value-type="float" office:value="-0.002117609">
            <text:p>-0.002117609</text:p>
          </table:table-cell>
          <table:table-cell table:number-columns-repeated="4"/>
        </table:table-row>
        <table:table-row table:style-name="ro1">
          <table:table-cell office:value-type="float" office:value="732.126403808594">
            <text:p>732.1264038086</text:p>
          </table:table-cell>
          <table:table-cell office:value-type="float" office:value="0.01742391">
            <text:p>0.01742391</text:p>
          </table:table-cell>
          <table:table-cell table:number-columns-repeated="4"/>
        </table:table-row>
        <table:table-row table:style-name="ro1">
          <table:table-cell office:value-type="float" office:value="732.246643066406">
            <text:p>732.2466430664</text:p>
          </table:table-cell>
          <table:table-cell office:value-type="float" office:value="-0.0033102">
            <text:p>-0.0033102</text:p>
          </table:table-cell>
          <table:table-cell table:number-columns-repeated="4"/>
        </table:table-row>
        <table:table-row table:style-name="ro1">
          <table:table-cell office:value-type="float" office:value="732.366882324219">
            <text:p>732.3668823242</text:p>
          </table:table-cell>
          <table:table-cell office:value-type="float" office:value="-0.004300292">
            <text:p>-0.004300292</text:p>
          </table:table-cell>
          <table:table-cell table:number-columns-repeated="4"/>
        </table:table-row>
        <table:table-row table:style-name="ro1">
          <table:table-cell office:value-type="float" office:value="732.487182617188">
            <text:p>732.4871826172</text:p>
          </table:table-cell>
          <table:table-cell office:value-type="float" office:value="-0.005438104">
            <text:p>-0.005438104</text:p>
          </table:table-cell>
          <table:table-cell table:number-columns-repeated="4"/>
        </table:table-row>
        <table:table-row table:style-name="ro1">
          <table:table-cell office:value-type="float" office:value="732.607421875">
            <text:p>732.607421875</text:p>
          </table:table-cell>
          <table:table-cell office:value-type="float" office:value="-0.0009099767">
            <text:p>-0.0009099767</text:p>
          </table:table-cell>
          <table:table-cell table:number-columns-repeated="4"/>
        </table:table-row>
        <table:table-row table:style-name="ro1">
          <table:table-cell office:value-type="float" office:value="732.727661132813">
            <text:p>732.7276611328</text:p>
          </table:table-cell>
          <table:table-cell office:value-type="float" office:value="0.004624591">
            <text:p>0.004624591</text:p>
          </table:table-cell>
          <table:table-cell table:number-columns-repeated="4"/>
        </table:table-row>
        <table:table-row table:style-name="ro1">
          <table:table-cell office:value-type="float" office:value="732.847900390625">
            <text:p>732.8479003906</text:p>
          </table:table-cell>
          <table:table-cell office:value-type="float" office:value="-0.002291997">
            <text:p>-0.002291997</text:p>
          </table:table-cell>
          <table:table-cell table:number-columns-repeated="4"/>
        </table:table-row>
        <table:table-row table:style-name="ro1">
          <table:table-cell office:value-type="float" office:value="732.968139648438">
            <text:p>732.9681396484</text:p>
          </table:table-cell>
          <table:table-cell office:value-type="float" office:value="-0.001908997">
            <text:p>-0.001908997</text:p>
          </table:table-cell>
          <table:table-cell table:number-columns-repeated="4"/>
        </table:table-row>
        <table:table-row table:style-name="ro1">
          <table:table-cell office:value-type="float" office:value="733.08837890625">
            <text:p>733.0883789063</text:p>
          </table:table-cell>
          <table:table-cell office:value-type="float" office:value="-0.004323283">
            <text:p>-0.004323283</text:p>
          </table:table-cell>
          <table:table-cell table:number-columns-repeated="4"/>
        </table:table-row>
        <table:table-row table:style-name="ro1">
          <table:table-cell office:value-type="float" office:value="733.208679199219">
            <text:p>733.2086791992</text:p>
          </table:table-cell>
          <table:table-cell office:value-type="float" office:value="-0.006791438">
            <text:p>-0.006791438</text:p>
          </table:table-cell>
          <table:table-cell table:number-columns-repeated="4"/>
        </table:table-row>
        <table:table-row table:style-name="ro1">
          <table:table-cell office:value-type="float" office:value="733.328918457031">
            <text:p>733.328918457</text:p>
          </table:table-cell>
          <table:table-cell office:value-type="float" office:value="-0.002333739">
            <text:p>-0.002333739</text:p>
          </table:table-cell>
          <table:table-cell table:number-columns-repeated="4"/>
        </table:table-row>
        <table:table-row table:style-name="ro1">
          <table:table-cell office:value-type="float" office:value="733.449157714844">
            <text:p>733.4491577148</text:p>
          </table:table-cell>
          <table:table-cell office:value-type="float" office:value="-0.000185621">
            <text:p>-0.000185621</text:p>
          </table:table-cell>
          <table:table-cell table:number-columns-repeated="4"/>
        </table:table-row>
        <table:table-row table:style-name="ro1">
          <table:table-cell office:value-type="float" office:value="733.569396972656">
            <text:p>733.5693969727</text:p>
          </table:table-cell>
          <table:table-cell office:value-type="float" office:value="0.003645035">
            <text:p>0.003645035</text:p>
          </table:table-cell>
          <table:table-cell table:number-columns-repeated="4"/>
        </table:table-row>
        <table:table-row table:style-name="ro1">
          <table:table-cell office:value-type="float" office:value="733.689636230469">
            <text:p>733.6896362305</text:p>
          </table:table-cell>
          <table:table-cell office:value-type="float" office:value="-0.001332732">
            <text:p>-0.001332732</text:p>
          </table:table-cell>
          <table:table-cell table:number-columns-repeated="4"/>
        </table:table-row>
        <table:table-row table:style-name="ro1">
          <table:table-cell office:value-type="float" office:value="733.809936523438">
            <text:p>733.8099365234</text:p>
          </table:table-cell>
          <table:table-cell office:value-type="float" office:value="0.0007863766">
            <text:p>0.0007863766</text:p>
          </table:table-cell>
          <table:table-cell table:number-columns-repeated="4"/>
        </table:table-row>
        <table:table-row table:style-name="ro1">
          <table:table-cell office:value-type="float" office:value="733.93017578125">
            <text:p>733.9301757813</text:p>
          </table:table-cell>
          <table:table-cell office:value-type="float" office:value="0.007176529">
            <text:p>0.007176529</text:p>
          </table:table-cell>
          <table:table-cell table:number-columns-repeated="4"/>
        </table:table-row>
        <table:table-row table:style-name="ro1">
          <table:table-cell office:value-type="float" office:value="734.050415039063">
            <text:p>734.0504150391</text:p>
          </table:table-cell>
          <table:table-cell office:value-type="float" office:value="0.002088293">
            <text:p>0.002088293</text:p>
          </table:table-cell>
          <table:table-cell table:number-columns-repeated="4"/>
        </table:table-row>
        <table:table-row table:style-name="ro1">
          <table:table-cell office:value-type="float" office:value="734.170654296875">
            <text:p>734.1706542969</text:p>
          </table:table-cell>
          <table:table-cell office:value-type="float" office:value="0.006833296">
            <text:p>0.006833296</text:p>
          </table:table-cell>
          <table:table-cell table:number-columns-repeated="4"/>
        </table:table-row>
        <table:table-row table:style-name="ro1">
          <table:table-cell office:value-type="float" office:value="734.290893554688">
            <text:p>734.2908935547</text:p>
          </table:table-cell>
          <table:table-cell office:value-type="float" office:value="-0.006692592">
            <text:p>-0.006692592</text:p>
          </table:table-cell>
          <table:table-cell table:number-columns-repeated="4"/>
        </table:table-row>
        <table:table-row table:style-name="ro1">
          <table:table-cell office:value-type="float" office:value="734.4111328125">
            <text:p>734.4111328125</text:p>
          </table:table-cell>
          <table:table-cell office:value-type="float" office:value="-0.008253478">
            <text:p>-0.008253478</text:p>
          </table:table-cell>
          <table:table-cell table:number-columns-repeated="4"/>
        </table:table-row>
        <table:table-row table:style-name="ro1">
          <table:table-cell office:value-type="float" office:value="734.531433105469">
            <text:p>734.5314331055</text:p>
          </table:table-cell>
          <table:table-cell office:value-type="float" office:value="-0.001561778">
            <text:p>-0.001561778</text:p>
          </table:table-cell>
          <table:table-cell table:number-columns-repeated="4"/>
        </table:table-row>
        <table:table-row table:style-name="ro1">
          <table:table-cell office:value-type="float" office:value="734.651672363281">
            <text:p>734.6516723633</text:p>
          </table:table-cell>
          <table:table-cell office:value-type="float" office:value="0.006436287">
            <text:p>0.006436287</text:p>
          </table:table-cell>
          <table:table-cell table:number-columns-repeated="4"/>
        </table:table-row>
        <table:table-row table:style-name="ro1">
          <table:table-cell office:value-type="float" office:value="734.771911621094">
            <text:p>734.7719116211</text:p>
          </table:table-cell>
          <table:table-cell office:value-type="float" office:value="0.0001620931">
            <text:p>0.0001620931</text:p>
          </table:table-cell>
          <table:table-cell table:number-columns-repeated="4"/>
        </table:table-row>
        <table:table-row table:style-name="ro1">
          <table:table-cell office:value-type="float" office:value="734.892150878906">
            <text:p>734.8921508789</text:p>
          </table:table-cell>
          <table:table-cell office:value-type="float" office:value="-0.005343781">
            <text:p>-0.005343781</text:p>
          </table:table-cell>
          <table:table-cell table:number-columns-repeated="4"/>
        </table:table-row>
        <table:table-row table:style-name="ro1">
          <table:table-cell office:value-type="float" office:value="735.012451171875">
            <text:p>735.0124511719</text:p>
          </table:table-cell>
          <table:table-cell office:value-type="float" office:value="-0.005041104">
            <text:p>-0.005041104</text:p>
          </table:table-cell>
          <table:table-cell table:number-columns-repeated="4"/>
        </table:table-row>
        <table:table-row table:style-name="ro1">
          <table:table-cell office:value-type="float" office:value="735.132690429688">
            <text:p>735.1326904297</text:p>
          </table:table-cell>
          <table:table-cell office:value-type="float" office:value="-0.0008233018">
            <text:p>-0.0008233018</text:p>
          </table:table-cell>
          <table:table-cell table:number-columns-repeated="4"/>
        </table:table-row>
        <table:table-row table:style-name="ro1">
          <table:table-cell office:value-type="float" office:value="735.2529296875">
            <text:p>735.2529296875</text:p>
          </table:table-cell>
          <table:table-cell office:value-type="float" office:value="0.01767226">
            <text:p>0.01767226</text:p>
          </table:table-cell>
          <table:table-cell table:number-columns-repeated="4"/>
        </table:table-row>
        <table:table-row table:style-name="ro1">
          <table:table-cell office:value-type="float" office:value="735.373168945313">
            <text:p>735.3731689453</text:p>
          </table:table-cell>
          <table:table-cell office:value-type="float" office:value="0.003789898">
            <text:p>0.003789898</text:p>
          </table:table-cell>
          <table:table-cell table:number-columns-repeated="4"/>
        </table:table-row>
        <table:table-row table:style-name="ro1">
          <table:table-cell office:value-type="float" office:value="735.493408203125">
            <text:p>735.4934082031</text:p>
          </table:table-cell>
          <table:table-cell office:value-type="float" office:value="-0.0007079957">
            <text:p>-0.0007079957</text:p>
          </table:table-cell>
          <table:table-cell table:number-columns-repeated="4"/>
        </table:table-row>
        <table:table-row table:style-name="ro1">
          <table:table-cell office:value-type="float" office:value="735.613708496094">
            <text:p>735.6137084961</text:p>
          </table:table-cell>
          <table:table-cell office:value-type="float" office:value="0.003867862">
            <text:p>0.003867862</text:p>
          </table:table-cell>
          <table:table-cell table:number-columns-repeated="4"/>
        </table:table-row>
        <table:table-row table:style-name="ro1">
          <table:table-cell office:value-type="float" office:value="735.733947753906">
            <text:p>735.7339477539</text:p>
          </table:table-cell>
          <table:table-cell office:value-type="float" office:value="0.006491236">
            <text:p>0.006491236</text:p>
          </table:table-cell>
          <table:table-cell table:number-columns-repeated="4"/>
        </table:table-row>
        <table:table-row table:style-name="ro1">
          <table:table-cell office:value-type="float" office:value="735.854187011719">
            <text:p>735.8541870117</text:p>
          </table:table-cell>
          <table:table-cell office:value-type="float" office:value="0.008647757">
            <text:p>0.008647757</text:p>
          </table:table-cell>
          <table:table-cell table:number-columns-repeated="4"/>
        </table:table-row>
        <table:table-row table:style-name="ro1">
          <table:table-cell office:value-type="float" office:value="735.974426269531">
            <text:p>735.9744262695</text:p>
          </table:table-cell>
          <table:table-cell office:value-type="float" office:value="0.002997505">
            <text:p>0.002997505</text:p>
          </table:table-cell>
          <table:table-cell table:number-columns-repeated="4"/>
        </table:table-row>
        <table:table-row table:style-name="ro1">
          <table:table-cell office:value-type="float" office:value="736.094665527344">
            <text:p>736.0946655273</text:p>
          </table:table-cell>
          <table:table-cell office:value-type="float" office:value="0.004040654">
            <text:p>0.004040654</text:p>
          </table:table-cell>
          <table:table-cell table:number-columns-repeated="4"/>
        </table:table-row>
        <table:table-row table:style-name="ro1">
          <table:table-cell office:value-type="float" office:value="736.214965820313">
            <text:p>736.2149658203</text:p>
          </table:table-cell>
          <table:table-cell office:value-type="float" office:value="-0.004186653">
            <text:p>-0.004186653</text:p>
          </table:table-cell>
          <table:table-cell table:number-columns-repeated="4"/>
        </table:table-row>
        <table:table-row table:style-name="ro1">
          <table:table-cell office:value-type="float" office:value="736.335205078125">
            <text:p>736.3352050781</text:p>
          </table:table-cell>
          <table:table-cell office:value-type="float" office:value="0.0007996014">
            <text:p>0.0007996014</text:p>
          </table:table-cell>
          <table:table-cell table:number-columns-repeated="4"/>
        </table:table-row>
        <table:table-row table:style-name="ro1">
          <table:table-cell office:value-type="float" office:value="736.455444335938">
            <text:p>736.4554443359</text:p>
          </table:table-cell>
          <table:table-cell office:value-type="float" office:value="0.005323065">
            <text:p>0.005323065</text:p>
          </table:table-cell>
          <table:table-cell table:number-columns-repeated="4"/>
        </table:table-row>
        <table:table-row table:style-name="ro1">
          <table:table-cell office:value-type="float" office:value="736.57568359375">
            <text:p>736.5756835938</text:p>
          </table:table-cell>
          <table:table-cell office:value-type="float" office:value="0.003227878">
            <text:p>0.003227878</text:p>
          </table:table-cell>
          <table:table-cell table:number-columns-repeated="4"/>
        </table:table-row>
        <table:table-row table:style-name="ro1">
          <table:table-cell office:value-type="float" office:value="736.695983886719">
            <text:p>736.6959838867</text:p>
          </table:table-cell>
          <table:table-cell office:value-type="float" office:value="0.01217629">
            <text:p>0.01217629</text:p>
          </table:table-cell>
          <table:table-cell table:number-columns-repeated="4"/>
        </table:table-row>
        <table:table-row table:style-name="ro1">
          <table:table-cell office:value-type="float" office:value="736.816223144531">
            <text:p>736.8162231445</text:p>
          </table:table-cell>
          <table:table-cell office:value-type="float" office:value="0.007179343">
            <text:p>0.007179343</text:p>
          </table:table-cell>
          <table:table-cell table:number-columns-repeated="4"/>
        </table:table-row>
        <table:table-row table:style-name="ro1">
          <table:table-cell office:value-type="float" office:value="736.936462402344">
            <text:p>736.9364624023</text:p>
          </table:table-cell>
          <table:table-cell office:value-type="float" office:value="0.0111332">
            <text:p>0.0111332</text:p>
          </table:table-cell>
          <table:table-cell table:number-columns-repeated="4"/>
        </table:table-row>
        <table:table-row table:style-name="ro1">
          <table:table-cell office:value-type="float" office:value="737.056701660156">
            <text:p>737.0567016602</text:p>
          </table:table-cell>
          <table:table-cell office:value-type="float" office:value="0.000517924">
            <text:p>0.000517924</text:p>
          </table:table-cell>
          <table:table-cell table:number-columns-repeated="4"/>
        </table:table-row>
        <table:table-row table:style-name="ro1">
          <table:table-cell office:value-type="float" office:value="737.177001953125">
            <text:p>737.1770019531</text:p>
          </table:table-cell>
          <table:table-cell office:value-type="float" office:value="0.004904357">
            <text:p>0.004904357</text:p>
          </table:table-cell>
          <table:table-cell table:number-columns-repeated="4"/>
        </table:table-row>
        <table:table-row table:style-name="ro1">
          <table:table-cell office:value-type="float" office:value="737.297241210938">
            <text:p>737.2972412109</text:p>
          </table:table-cell>
          <table:table-cell office:value-type="float" office:value="0.006008852">
            <text:p>0.006008852</text:p>
          </table:table-cell>
          <table:table-cell table:number-columns-repeated="4"/>
        </table:table-row>
        <table:table-row table:style-name="ro1">
          <table:table-cell office:value-type="float" office:value="737.41748046875">
            <text:p>737.4174804688</text:p>
          </table:table-cell>
          <table:table-cell office:value-type="float" office:value="0.003718323">
            <text:p>0.003718323</text:p>
          </table:table-cell>
          <table:table-cell table:number-columns-repeated="4"/>
        </table:table-row>
        <table:table-row table:style-name="ro1">
          <table:table-cell office:value-type="float" office:value="737.537719726563">
            <text:p>737.5377197266</text:p>
          </table:table-cell>
          <table:table-cell office:value-type="float" office:value="0.003682798">
            <text:p>0.003682798</text:p>
          </table:table-cell>
          <table:table-cell table:number-columns-repeated="4"/>
        </table:table-row>
        <table:table-row table:style-name="ro1">
          <table:table-cell office:value-type="float" office:value="737.658020019531">
            <text:p>737.6580200195</text:p>
          </table:table-cell>
          <table:table-cell office:value-type="float" office:value="-0.008034169">
            <text:p>-0.008034169</text:p>
          </table:table-cell>
          <table:table-cell table:number-columns-repeated="4"/>
        </table:table-row>
        <table:table-row table:style-name="ro1">
          <table:table-cell office:value-type="float" office:value="737.778259277344">
            <text:p>737.7782592773</text:p>
          </table:table-cell>
          <table:table-cell office:value-type="float" office:value="0.00547235">
            <text:p>0.00547235</text:p>
          </table:table-cell>
          <table:table-cell table:number-columns-repeated="4"/>
        </table:table-row>
        <table:table-row table:style-name="ro1">
          <table:table-cell office:value-type="float" office:value="737.898498535156">
            <text:p>737.8984985352</text:p>
          </table:table-cell>
          <table:table-cell office:value-type="float" office:value="0.002530067">
            <text:p>0.002530067</text:p>
          </table:table-cell>
          <table:table-cell table:number-columns-repeated="4"/>
        </table:table-row>
        <table:table-row table:style-name="ro1">
          <table:table-cell office:value-type="float" office:value="738.018737792969">
            <text:p>738.018737793</text:p>
          </table:table-cell>
          <table:table-cell office:value-type="float" office:value="0.005157228">
            <text:p>0.005157228</text:p>
          </table:table-cell>
          <table:table-cell table:number-columns-repeated="4"/>
        </table:table-row>
        <table:table-row table:style-name="ro1">
          <table:table-cell office:value-type="float" office:value="738.139038085938">
            <text:p>738.1390380859</text:p>
          </table:table-cell>
          <table:table-cell office:value-type="float" office:value="0.004300425">
            <text:p>0.004300425</text:p>
          </table:table-cell>
          <table:table-cell table:number-columns-repeated="4"/>
        </table:table-row>
        <table:table-row table:style-name="ro1">
          <table:table-cell office:value-type="float" office:value="738.25927734375">
            <text:p>738.2592773438</text:p>
          </table:table-cell>
          <table:table-cell office:value-type="float" office:value="-0.001355305">
            <text:p>-0.001355305</text:p>
          </table:table-cell>
          <table:table-cell table:number-columns-repeated="4"/>
        </table:table-row>
        <table:table-row table:style-name="ro1">
          <table:table-cell office:value-type="float" office:value="738.379516601563">
            <text:p>738.3795166016</text:p>
          </table:table-cell>
          <table:table-cell office:value-type="float" office:value="0.01510271">
            <text:p>0.01510271</text:p>
          </table:table-cell>
          <table:table-cell table:number-columns-repeated="4"/>
        </table:table-row>
        <table:table-row table:style-name="ro1">
          <table:table-cell office:value-type="float" office:value="738.499755859375">
            <text:p>738.4997558594</text:p>
          </table:table-cell>
          <table:table-cell office:value-type="float" office:value="0.005194412">
            <text:p>0.005194412</text:p>
          </table:table-cell>
          <table:table-cell table:number-columns-repeated="4"/>
        </table:table-row>
        <table:table-row table:style-name="ro1">
          <table:table-cell office:value-type="float" office:value="738.620056152344">
            <text:p>738.6200561523</text:p>
          </table:table-cell>
          <table:table-cell office:value-type="float" office:value="-0.003562616">
            <text:p>-0.003562616</text:p>
          </table:table-cell>
          <table:table-cell table:number-columns-repeated="4"/>
        </table:table-row>
        <table:table-row table:style-name="ro1">
          <table:table-cell office:value-type="float" office:value="738.740295410156">
            <text:p>738.7402954102</text:p>
          </table:table-cell>
          <table:table-cell office:value-type="float" office:value="-0.0006431029">
            <text:p>-0.0006431029</text:p>
          </table:table-cell>
          <table:table-cell table:number-columns-repeated="4"/>
        </table:table-row>
        <table:table-row table:style-name="ro1">
          <table:table-cell office:value-type="float" office:value="738.860534667969">
            <text:p>738.860534668</text:p>
          </table:table-cell>
          <table:table-cell office:value-type="float" office:value="-0.004097297">
            <text:p>-0.004097297</text:p>
          </table:table-cell>
          <table:table-cell table:number-columns-repeated="4"/>
        </table:table-row>
        <table:table-row table:style-name="ro1">
          <table:table-cell office:value-type="float" office:value="738.980773925781">
            <text:p>738.9807739258</text:p>
          </table:table-cell>
          <table:table-cell office:value-type="float" office:value="0.01281443">
            <text:p>0.01281443</text:p>
          </table:table-cell>
          <table:table-cell table:number-columns-repeated="4"/>
        </table:table-row>
        <table:table-row table:style-name="ro1">
          <table:table-cell office:value-type="float" office:value="739.10107421875">
            <text:p>739.1010742188</text:p>
          </table:table-cell>
          <table:table-cell office:value-type="float" office:value="-0.002049305">
            <text:p>-0.002049305</text:p>
          </table:table-cell>
          <table:table-cell table:number-columns-repeated="4"/>
        </table:table-row>
        <table:table-row table:style-name="ro1">
          <table:table-cell office:value-type="float" office:value="739.221313476563">
            <text:p>739.2213134766</text:p>
          </table:table-cell>
          <table:table-cell office:value-type="float" office:value="0.007099401">
            <text:p>0.007099401</text:p>
          </table:table-cell>
          <table:table-cell table:number-columns-repeated="4"/>
        </table:table-row>
        <table:table-row table:style-name="ro1">
          <table:table-cell office:value-type="float" office:value="739.341552734375">
            <text:p>739.3415527344</text:p>
          </table:table-cell>
          <table:table-cell office:value-type="float" office:value="0.0011299">
            <text:p>0.0011299</text:p>
          </table:table-cell>
          <table:table-cell table:number-columns-repeated="4"/>
        </table:table-row>
        <table:table-row table:style-name="ro1">
          <table:table-cell office:value-type="float" office:value="739.461791992188">
            <text:p>739.4617919922</text:p>
          </table:table-cell>
          <table:table-cell office:value-type="float" office:value="-0.0002311073">
            <text:p>-0.0002311073</text:p>
          </table:table-cell>
          <table:table-cell table:number-columns-repeated="4"/>
        </table:table-row>
        <table:table-row table:style-name="ro1">
          <table:table-cell office:value-type="float" office:value="739.582092285156">
            <text:p>739.5820922852</text:p>
          </table:table-cell>
          <table:table-cell office:value-type="float" office:value="-0.003782212">
            <text:p>-0.003782212</text:p>
          </table:table-cell>
          <table:table-cell table:number-columns-repeated="4"/>
        </table:table-row>
        <table:table-row table:style-name="ro1">
          <table:table-cell office:value-type="float" office:value="739.702331542969">
            <text:p>739.702331543</text:p>
          </table:table-cell>
          <table:table-cell office:value-type="float" office:value="-0.00922741">
            <text:p>-0.00922741</text:p>
          </table:table-cell>
          <table:table-cell table:number-columns-repeated="4"/>
        </table:table-row>
        <table:table-row table:style-name="ro1">
          <table:table-cell office:value-type="float" office:value="739.822570800781">
            <text:p>739.8225708008</text:p>
          </table:table-cell>
          <table:table-cell office:value-type="float" office:value="-0.002370495">
            <text:p>-0.002370495</text:p>
          </table:table-cell>
          <table:table-cell table:number-columns-repeated="4"/>
        </table:table-row>
        <table:table-row table:style-name="ro1">
          <table:table-cell office:value-type="float" office:value="739.942810058594">
            <text:p>739.9428100586</text:p>
          </table:table-cell>
          <table:table-cell office:value-type="float" office:value="-0.008410043">
            <text:p>-0.008410043</text:p>
          </table:table-cell>
          <table:table-cell table:number-columns-repeated="4"/>
        </table:table-row>
        <table:table-row table:style-name="ro1">
          <table:table-cell office:value-type="float" office:value="740.063110351563">
            <text:p>740.0631103516</text:p>
          </table:table-cell>
          <table:table-cell office:value-type="float" office:value="-0.004148803">
            <text:p>-0.004148803</text:p>
          </table:table-cell>
          <table:table-cell table:number-columns-repeated="4"/>
        </table:table-row>
        <table:table-row table:style-name="ro1">
          <table:table-cell office:value-type="float" office:value="740.183349609375">
            <text:p>740.1833496094</text:p>
          </table:table-cell>
          <table:table-cell office:value-type="float" office:value="-0.002542848">
            <text:p>-0.002542848</text:p>
          </table:table-cell>
          <table:table-cell table:number-columns-repeated="4"/>
        </table:table-row>
        <table:table-row table:style-name="ro1">
          <table:table-cell office:value-type="float" office:value="740.303588867188">
            <text:p>740.3035888672</text:p>
          </table:table-cell>
          <table:table-cell office:value-type="float" office:value="-0.0006146103">
            <text:p>-0.0006146103</text:p>
          </table:table-cell>
          <table:table-cell table:number-columns-repeated="4"/>
        </table:table-row>
        <table:table-row table:style-name="ro1">
          <table:table-cell office:value-type="float" office:value="740.423889160156">
            <text:p>740.4238891602</text:p>
          </table:table-cell>
          <table:table-cell office:value-type="float" office:value="0.009116434">
            <text:p>0.009116434</text:p>
          </table:table-cell>
          <table:table-cell table:number-columns-repeated="4"/>
        </table:table-row>
        <table:table-row table:style-name="ro1">
          <table:table-cell office:value-type="float" office:value="740.544128417969">
            <text:p>740.544128418</text:p>
          </table:table-cell>
          <table:table-cell office:value-type="float" office:value="0.01342323">
            <text:p>0.01342323</text:p>
          </table:table-cell>
          <table:table-cell table:number-columns-repeated="4"/>
        </table:table-row>
        <table:table-row table:style-name="ro1">
          <table:table-cell office:value-type="float" office:value="740.664367675781">
            <text:p>740.6643676758</text:p>
          </table:table-cell>
          <table:table-cell office:value-type="float" office:value="-0.006318959">
            <text:p>-0.006318959</text:p>
          </table:table-cell>
          <table:table-cell table:number-columns-repeated="4"/>
        </table:table-row>
        <table:table-row table:style-name="ro1">
          <table:table-cell office:value-type="float" office:value="740.784606933594">
            <text:p>740.7846069336</text:p>
          </table:table-cell>
          <table:table-cell office:value-type="float" office:value="0.008183128">
            <text:p>0.008183128</text:p>
          </table:table-cell>
          <table:table-cell table:number-columns-repeated="4"/>
        </table:table-row>
        <table:table-row table:style-name="ro1">
          <table:table-cell office:value-type="float" office:value="740.904907226563">
            <text:p>740.9049072266</text:p>
          </table:table-cell>
          <table:table-cell office:value-type="float" office:value="0.001665259">
            <text:p>0.001665259</text:p>
          </table:table-cell>
          <table:table-cell table:number-columns-repeated="4"/>
        </table:table-row>
        <table:table-row table:style-name="ro1">
          <table:table-cell office:value-type="float" office:value="741.025146484375">
            <text:p>741.0251464844</text:p>
          </table:table-cell>
          <table:table-cell office:value-type="float" office:value="-0.005793314">
            <text:p>-0.005793314</text:p>
          </table:table-cell>
          <table:table-cell table:number-columns-repeated="4"/>
        </table:table-row>
        <table:table-row table:style-name="ro1">
          <table:table-cell office:value-type="float" office:value="741.145385742188">
            <text:p>741.1453857422</text:p>
          </table:table-cell>
          <table:table-cell office:value-type="float" office:value="-0.00426145">
            <text:p>-0.00426145</text:p>
          </table:table-cell>
          <table:table-cell table:number-columns-repeated="4"/>
        </table:table-row>
        <table:table-row table:style-name="ro1">
          <table:table-cell office:value-type="float" office:value="741.265625">
            <text:p>741.265625</text:p>
          </table:table-cell>
          <table:table-cell office:value-type="float" office:value="0.02202302">
            <text:p>0.02202302</text:p>
          </table:table-cell>
          <table:table-cell table:number-columns-repeated="4"/>
        </table:table-row>
        <table:table-row table:style-name="ro1">
          <table:table-cell office:value-type="float" office:value="741.385925292969">
            <text:p>741.385925293</text:p>
          </table:table-cell>
          <table:table-cell office:value-type="float" office:value="-0.00524711">
            <text:p>-0.00524711</text:p>
          </table:table-cell>
          <table:table-cell table:number-columns-repeated="4"/>
        </table:table-row>
        <table:table-row table:style-name="ro1">
          <table:table-cell office:value-type="float" office:value="741.506164550781">
            <text:p>741.5061645508</text:p>
          </table:table-cell>
          <table:table-cell office:value-type="float" office:value="0.0008367286">
            <text:p>0.0008367286</text:p>
          </table:table-cell>
          <table:table-cell table:number-columns-repeated="4"/>
        </table:table-row>
        <table:table-row table:style-name="ro1">
          <table:table-cell office:value-type="float" office:value="741.626403808594">
            <text:p>741.6264038086</text:p>
          </table:table-cell>
          <table:table-cell office:value-type="float" office:value="0.008410928">
            <text:p>0.008410928</text:p>
          </table:table-cell>
          <table:table-cell table:number-columns-repeated="4"/>
        </table:table-row>
        <table:table-row table:style-name="ro1">
          <table:table-cell office:value-type="float" office:value="741.746704101563">
            <text:p>741.7467041016</text:p>
          </table:table-cell>
          <table:table-cell office:value-type="float" office:value="0.0007420647">
            <text:p>0.0007420647</text:p>
          </table:table-cell>
          <table:table-cell table:number-columns-repeated="4"/>
        </table:table-row>
        <table:table-row table:style-name="ro1">
          <table:table-cell office:value-type="float" office:value="741.866943359375">
            <text:p>741.8669433594</text:p>
          </table:table-cell>
          <table:table-cell office:value-type="float" office:value="0.01778216">
            <text:p>0.01778216</text:p>
          </table:table-cell>
          <table:table-cell table:number-columns-repeated="4"/>
        </table:table-row>
        <table:table-row table:style-name="ro1">
          <table:table-cell office:value-type="float" office:value="741.987182617188">
            <text:p>741.9871826172</text:p>
          </table:table-cell>
          <table:table-cell office:value-type="float" office:value="-0.00218902">
            <text:p>-0.00218902</text:p>
          </table:table-cell>
          <table:table-cell table:number-columns-repeated="4"/>
        </table:table-row>
        <table:table-row table:style-name="ro1">
          <table:table-cell office:value-type="float" office:value="742.107421875">
            <text:p>742.107421875</text:p>
          </table:table-cell>
          <table:table-cell office:value-type="float" office:value="0.005669625">
            <text:p>0.005669625</text:p>
          </table:table-cell>
          <table:table-cell table:number-columns-repeated="4"/>
        </table:table-row>
        <table:table-row table:style-name="ro1">
          <table:table-cell office:value-type="float" office:value="742.227722167969">
            <text:p>742.227722168</text:p>
          </table:table-cell>
          <table:table-cell office:value-type="float" office:value="0.00729022">
            <text:p>0.00729022</text:p>
          </table:table-cell>
          <table:table-cell table:number-columns-repeated="4"/>
        </table:table-row>
        <table:table-row table:style-name="ro1">
          <table:table-cell office:value-type="float" office:value="742.347961425781">
            <text:p>742.3479614258</text:p>
          </table:table-cell>
          <table:table-cell office:value-type="float" office:value="0.002870891">
            <text:p>0.002870891</text:p>
          </table:table-cell>
          <table:table-cell table:number-columns-repeated="4"/>
        </table:table-row>
        <table:table-row table:style-name="ro1">
          <table:table-cell office:value-type="float" office:value="742.468200683594">
            <text:p>742.4682006836</text:p>
          </table:table-cell>
          <table:table-cell office:value-type="float" office:value="-0.004409801">
            <text:p>-0.004409801</text:p>
          </table:table-cell>
          <table:table-cell table:number-columns-repeated="4"/>
        </table:table-row>
        <table:table-row table:style-name="ro1">
          <table:table-cell office:value-type="float" office:value="742.588439941406">
            <text:p>742.5884399414</text:p>
          </table:table-cell>
          <table:table-cell office:value-type="float" office:value="0.0007007259">
            <text:p>0.0007007259</text:p>
          </table:table-cell>
          <table:table-cell table:number-columns-repeated="4"/>
        </table:table-row>
        <table:table-row table:style-name="ro1">
          <table:table-cell office:value-type="float" office:value="742.708740234375">
            <text:p>742.7087402344</text:p>
          </table:table-cell>
          <table:table-cell office:value-type="float" office:value="-0.001321735">
            <text:p>-0.001321735</text:p>
          </table:table-cell>
          <table:table-cell table:number-columns-repeated="4"/>
        </table:table-row>
        <table:table-row table:style-name="ro1">
          <table:table-cell office:value-type="float" office:value="742.828979492188">
            <text:p>742.8289794922</text:p>
          </table:table-cell>
          <table:table-cell office:value-type="float" office:value="-0.002062732">
            <text:p>-0.002062732</text:p>
          </table:table-cell>
          <table:table-cell table:number-columns-repeated="4"/>
        </table:table-row>
        <table:table-row table:style-name="ro1">
          <table:table-cell office:value-type="float" office:value="742.94921875">
            <text:p>742.94921875</text:p>
          </table:table-cell>
          <table:table-cell office:value-type="float" office:value="0.004951724">
            <text:p>0.004951724</text:p>
          </table:table-cell>
          <table:table-cell table:number-columns-repeated="4"/>
        </table:table-row>
        <table:table-row table:style-name="ro1">
          <table:table-cell office:value-type="float" office:value="743.069519042969">
            <text:p>743.069519043</text:p>
          </table:table-cell>
          <table:table-cell office:value-type="float" office:value="0.01154719">
            <text:p>0.01154719</text:p>
          </table:table-cell>
          <table:table-cell table:number-columns-repeated="4"/>
        </table:table-row>
        <table:table-row table:style-name="ro1">
          <table:table-cell office:value-type="float" office:value="743.189758300781">
            <text:p>743.1897583008</text:p>
          </table:table-cell>
          <table:table-cell office:value-type="float" office:value="0.00126051">
            <text:p>0.00126051</text:p>
          </table:table-cell>
          <table:table-cell table:number-columns-repeated="4"/>
        </table:table-row>
        <table:table-row table:style-name="ro1">
          <table:table-cell office:value-type="float" office:value="743.309997558594">
            <text:p>743.3099975586</text:p>
          </table:table-cell>
          <table:table-cell office:value-type="float" office:value="-0.008785389">
            <text:p>-0.008785389</text:p>
          </table:table-cell>
          <table:table-cell table:number-columns-repeated="4"/>
        </table:table-row>
        <table:table-row table:style-name="ro1">
          <table:table-cell office:value-type="float" office:value="743.430236816406">
            <text:p>743.4302368164</text:p>
          </table:table-cell>
          <table:table-cell office:value-type="float" office:value="0.002993111">
            <text:p>0.002993111</text:p>
          </table:table-cell>
          <table:table-cell table:number-columns-repeated="4"/>
        </table:table-row>
        <table:table-row table:style-name="ro1">
          <table:table-cell office:value-type="float" office:value="743.550537109375">
            <text:p>743.5505371094</text:p>
          </table:table-cell>
          <table:table-cell office:value-type="float" office:value="-0.007367376">
            <text:p>-0.007367376</text:p>
          </table:table-cell>
          <table:table-cell table:number-columns-repeated="4"/>
        </table:table-row>
        <table:table-row table:style-name="ro1">
          <table:table-cell office:value-type="float" office:value="743.670776367188">
            <text:p>743.6707763672</text:p>
          </table:table-cell>
          <table:table-cell office:value-type="float" office:value="-0.005623739">
            <text:p>-0.005623739</text:p>
          </table:table-cell>
          <table:table-cell table:number-columns-repeated="4"/>
        </table:table-row>
        <table:table-row table:style-name="ro1">
          <table:table-cell office:value-type="float" office:value="743.791015625">
            <text:p>743.791015625</text:p>
          </table:table-cell>
          <table:table-cell office:value-type="float" office:value="-0.006423687">
            <text:p>-0.006423687</text:p>
          </table:table-cell>
          <table:table-cell table:number-columns-repeated="4"/>
        </table:table-row>
        <table:table-row table:style-name="ro1">
          <table:table-cell office:value-type="float" office:value="743.911254882813">
            <text:p>743.9112548828</text:p>
          </table:table-cell>
          <table:table-cell office:value-type="float" office:value="0.02953932">
            <text:p>0.02953932</text:p>
          </table:table-cell>
          <table:table-cell table:number-columns-repeated="4"/>
        </table:table-row>
        <table:table-row table:style-name="ro1">
          <table:table-cell office:value-type="float" office:value="744.031555175781">
            <text:p>744.0315551758</text:p>
          </table:table-cell>
          <table:table-cell office:value-type="float" office:value="-0.007014812">
            <text:p>-0.007014812</text:p>
          </table:table-cell>
          <table:table-cell table:number-columns-repeated="4"/>
        </table:table-row>
        <table:table-row table:style-name="ro1">
          <table:table-cell office:value-type="float" office:value="744.151794433594">
            <text:p>744.1517944336</text:p>
          </table:table-cell>
          <table:table-cell office:value-type="float" office:value="-0.05571449">
            <text:p>-0.05571449</text:p>
          </table:table-cell>
          <table:table-cell table:number-columns-repeated="4"/>
        </table:table-row>
        <table:table-row table:style-name="ro1">
          <table:table-cell office:value-type="float" office:value="744.272033691406">
            <text:p>744.2720336914</text:p>
          </table:table-cell>
          <table:table-cell office:value-type="float" office:value="-0.05736252">
            <text:p>-0.05736252</text:p>
          </table:table-cell>
          <table:table-cell table:number-columns-repeated="4"/>
        </table:table-row>
        <table:table-row table:style-name="ro1">
          <table:table-cell office:value-type="float" office:value="744.392333984375">
            <text:p>744.3923339844</text:p>
          </table:table-cell>
          <table:table-cell office:value-type="float" office:value="-0.05910224">
            <text:p>-0.05910224</text:p>
          </table:table-cell>
          <table:table-cell table:number-columns-repeated="4"/>
        </table:table-row>
        <table:table-row table:style-name="ro1">
          <table:table-cell office:value-type="float" office:value="744.512573242188">
            <text:p>744.5125732422</text:p>
          </table:table-cell>
          <table:table-cell office:value-type="float" office:value="-0.0595693">
            <text:p>-0.0595693</text:p>
          </table:table-cell>
          <table:table-cell table:number-columns-repeated="4"/>
        </table:table-row>
        <table:table-row table:style-name="ro1">
          <table:table-cell office:value-type="float" office:value="744.6328125">
            <text:p>744.6328125</text:p>
          </table:table-cell>
          <table:table-cell office:value-type="float" office:value="-0.05999368">
            <text:p>-0.05999368</text:p>
          </table:table-cell>
          <table:table-cell table:number-columns-repeated="4"/>
        </table:table-row>
        <table:table-row table:style-name="ro1">
          <table:table-cell office:value-type="float" office:value="744.753051757813">
            <text:p>744.7530517578</text:p>
          </table:table-cell>
          <table:table-cell office:value-type="float" office:value="-0.05944458">
            <text:p>-0.05944458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9">06/29/2026</text:date>, <text:time>12:4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29T12:04:29.74</meta:creation-date>
    <dc:date>2026-06-29T12:41:38.40</dc:date>
    <meta:editing-duration>PT7M20S</meta:editing-duration>
    <meta:editing-cycles>1</meta:editing-cycles>
    <meta:generator>OpenOffice/4.1.10$Win32 OpenOffice.org_project/4110m2$Build-9807</meta:generator>
    <meta:document-statistic meta:table-count="3" meta:cell-count="72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93cm" svg:y="4.188cm" style:legend-expansion="high" chart:style-name="ch2"/>
        <chart:plot-area chart:style-name="ch3" table:cell-range-address="Sheet1.A1:Sheet1.B3649" chart:data-source-has-labels="row" svg:x="0.77cm" svg:y="0.855cm" svg:width="11.983cm" svg:height="7.545cm">
          <chartooo:coordinate-region svg:x="1.604cm" svg:y="1.067cm" svg:width="10.869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649" chart:label-cell-address="Sheet1.B1:Sheet1.B1" chart:class="chart:scatter">
            <chart:domain table:cell-range-address="Sheet1.A2:Sheet1.A3649"/>
            <chart:data-point chart:repeated="36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 [Intensity]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1.5908203125">
                <text:p>321.5908203125</text:p>
                <draw:g>
                  <svg:desc>Sheet1.A2:Sheet1.A3649</svg:desc>
                </draw:g>
              </table:table-cell>
              <table:table-cell office:value-type="float" office:value="0.005492316">
                <text:p>0.005492316</text:p>
                <draw:g>
                  <svg:desc>Sheet1.B2:Sheet1.B36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1.698333740234">
                <text:p>321.698333740234</text:p>
              </table:table-cell>
              <table:table-cell office:value-type="float" office:value="0.001940254">
                <text:p>0.0019402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1.805877685547">
                <text:p>321.805877685547</text:p>
              </table:table-cell>
              <table:table-cell office:value-type="float" office:value="0.003696188">
                <text:p>0.0036961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1.913421630859">
                <text:p>321.913421630859</text:p>
              </table:table-cell>
              <table:table-cell office:value-type="float" office:value="0.01199537">
                <text:p>0.011995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2.020965576172">
                <text:p>322.020965576172</text:p>
              </table:table-cell>
              <table:table-cell office:value-type="float" office:value="0.007912622">
                <text:p>0.0079126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2.128540039063">
                <text:p>322.128540039063</text:p>
              </table:table-cell>
              <table:table-cell office:value-type="float" office:value="0.005511125">
                <text:p>0.005511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2.236083984375">
                <text:p>322.236083984375</text:p>
              </table:table-cell>
              <table:table-cell office:value-type="float" office:value="0.0169933">
                <text:p>0.01699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2.343658447266">
                <text:p>322.343658447266</text:p>
              </table:table-cell>
              <table:table-cell office:value-type="float" office:value="-0.001002652">
                <text:p>-0.0010026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2.451232910156">
                <text:p>322.451232910156</text:p>
              </table:table-cell>
              <table:table-cell office:value-type="float" office:value="0.0002995229">
                <text:p>0.00029952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2.558837890625">
                <text:p>322.558837890625</text:p>
              </table:table-cell>
              <table:table-cell office:value-type="float" office:value="0.007656425">
                <text:p>0.007656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2.666412353516">
                <text:p>322.666412353516</text:p>
              </table:table-cell>
              <table:table-cell office:value-type="float" office:value="0.00986709">
                <text:p>0.009867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2.774017333984">
                <text:p>322.774017333984</text:p>
              </table:table-cell>
              <table:table-cell office:value-type="float" office:value="0.01133318">
                <text:p>0.01133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2.881622314453">
                <text:p>322.881622314453</text:p>
              </table:table-cell>
              <table:table-cell office:value-type="float" office:value="-0.003090942">
                <text:p>-0.0030909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2.989227294922">
                <text:p>322.989227294922</text:p>
              </table:table-cell>
              <table:table-cell office:value-type="float" office:value="0.00306174">
                <text:p>0.003061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.096862792969">
                <text:p>323.096862792969</text:p>
              </table:table-cell>
              <table:table-cell office:value-type="float" office:value="0.002008882">
                <text:p>0.0020088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3.204498291016">
                <text:p>323.204498291016</text:p>
              </table:table-cell>
              <table:table-cell office:value-type="float" office:value="0.006225385">
                <text:p>0.006225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3.312133789063">
                <text:p>323.312133789063</text:p>
              </table:table-cell>
              <table:table-cell office:value-type="float" office:value="-0.002015956">
                <text:p>-0.0020159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3.419769287109">
                <text:p>323.419769287109</text:p>
              </table:table-cell>
              <table:table-cell office:value-type="float" office:value="0.004147665">
                <text:p>0.0041476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3.527404785156">
                <text:p>323.527404785156</text:p>
              </table:table-cell>
              <table:table-cell office:value-type="float" office:value="0.03743783">
                <text:p>0.037437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3.635070800781">
                <text:p>323.635070800781</text:p>
              </table:table-cell>
              <table:table-cell office:value-type="float" office:value="-0.006337866">
                <text:p>-0.0063378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3.742736816406">
                <text:p>323.742736816406</text:p>
              </table:table-cell>
              <table:table-cell office:value-type="float" office:value="-0.003572877">
                <text:p>-0.0035728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3.850402832031">
                <text:p>323.850402832031</text:p>
              </table:table-cell>
              <table:table-cell office:value-type="float" office:value="0.01000245">
                <text:p>0.010002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3.958068847656">
                <text:p>323.958068847656</text:p>
              </table:table-cell>
              <table:table-cell office:value-type="float" office:value="0.01768482">
                <text:p>0.017684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4.065765380859">
                <text:p>324.065765380859</text:p>
              </table:table-cell>
              <table:table-cell office:value-type="float" office:value="-0.00143032">
                <text:p>-0.001430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4.173461914063">
                <text:p>324.173461914063</text:p>
              </table:table-cell>
              <table:table-cell office:value-type="float" office:value="-0.004976941">
                <text:p>-0.0049769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4.281158447266">
                <text:p>324.281158447266</text:p>
              </table:table-cell>
              <table:table-cell office:value-type="float" office:value="0.00509495">
                <text:p>0.005094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4.388854980469">
                <text:p>324.388854980469</text:p>
              </table:table-cell>
              <table:table-cell office:value-type="float" office:value="-0.001893452">
                <text:p>-0.0018934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4.496551513672">
                <text:p>324.496551513672</text:p>
              </table:table-cell>
              <table:table-cell office:value-type="float" office:value="0.003500549">
                <text:p>0.0035005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4.604278564453">
                <text:p>324.604278564453</text:p>
              </table:table-cell>
              <table:table-cell office:value-type="float" office:value="0.008880946">
                <text:p>0.0088809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4.712005615234">
                <text:p>324.712005615234</text:p>
              </table:table-cell>
              <table:table-cell office:value-type="float" office:value="0.00475488">
                <text:p>0.004754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4.819732666016">
                <text:p>324.819732666016</text:p>
              </table:table-cell>
              <table:table-cell office:value-type="float" office:value="0.002237271">
                <text:p>0.0022372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4.927490234375">
                <text:p>324.927490234375</text:p>
              </table:table-cell>
              <table:table-cell office:value-type="float" office:value="0.01637296">
                <text:p>0.016372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5.035217285156">
                <text:p>325.035217285156</text:p>
              </table:table-cell>
              <table:table-cell office:value-type="float" office:value="-0.007413154">
                <text:p>-0.0074131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5.142974853516">
                <text:p>325.142974853516</text:p>
              </table:table-cell>
              <table:table-cell office:value-type="float" office:value="0.002081244">
                <text:p>0.0020812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5.250732421875">
                <text:p>325.250732421875</text:p>
              </table:table-cell>
              <table:table-cell office:value-type="float" office:value="0.0007048565">
                <text:p>0.00070485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5.358489990234">
                <text:p>325.358489990234</text:p>
              </table:table-cell>
              <table:table-cell office:value-type="float" office:value="-0.003777897">
                <text:p>-0.0037778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5.466278076172">
                <text:p>325.466278076172</text:p>
              </table:table-cell>
              <table:table-cell office:value-type="float" office:value="0.002357268">
                <text:p>0.0023572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5.574066162109">
                <text:p>325.574066162109</text:p>
              </table:table-cell>
              <table:table-cell office:value-type="float" office:value="0.005006851">
                <text:p>0.0050068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5.681854248047">
                <text:p>325.681854248047</text:p>
              </table:table-cell>
              <table:table-cell office:value-type="float" office:value="0.003745167">
                <text:p>0.0037451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5.789642333984">
                <text:p>325.789642333984</text:p>
              </table:table-cell>
              <table:table-cell office:value-type="float" office:value="0.005883739">
                <text:p>0.0058837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5.897430419922">
                <text:p>325.897430419922</text:p>
              </table:table-cell>
              <table:table-cell office:value-type="float" office:value="0.002410229">
                <text:p>0.0024102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6.005249023438">
                <text:p>326.005249023438</text:p>
              </table:table-cell>
              <table:table-cell office:value-type="float" office:value="0.001750876">
                <text:p>0.0017508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6.113067626953">
                <text:p>326.113067626953</text:p>
              </table:table-cell>
              <table:table-cell office:value-type="float" office:value="0.00844588">
                <text:p>0.008445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6.220886230469">
                <text:p>326.220886230469</text:p>
              </table:table-cell>
              <table:table-cell office:value-type="float" office:value="0.01619323">
                <text:p>0.016193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6.328704833984">
                <text:p>326.328704833984</text:p>
              </table:table-cell>
              <table:table-cell office:value-type="float" office:value="-0.003408946">
                <text:p>-0.0034089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6.436553955078">
                <text:p>326.436553955078</text:p>
              </table:table-cell>
              <table:table-cell office:value-type="float" office:value="0.0101742">
                <text:p>0.0101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6.544403076172">
                <text:p>326.544403076172</text:p>
              </table:table-cell>
              <table:table-cell office:value-type="float" office:value="0.02370792">
                <text:p>0.023707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6.652252197266">
                <text:p>326.652252197266</text:p>
              </table:table-cell>
              <table:table-cell office:value-type="float" office:value="0.01736875">
                <text:p>0.01736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6.760101318359">
                <text:p>326.760101318359</text:p>
              </table:table-cell>
              <table:table-cell office:value-type="float" office:value="0.005904746">
                <text:p>0.0059047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6.867950439453">
                <text:p>326.867950439453</text:p>
              </table:table-cell>
              <table:table-cell office:value-type="float" office:value="0.009909216">
                <text:p>0.0099092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6.975830078125">
                <text:p>326.975830078125</text:p>
              </table:table-cell>
              <table:table-cell office:value-type="float" office:value="0.004646156">
                <text:p>0.0046461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7.083709716797">
                <text:p>327.083709716797</text:p>
              </table:table-cell>
              <table:table-cell office:value-type="float" office:value="0.007259635">
                <text:p>0.0072596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7.191589355469">
                <text:p>327.191589355469</text:p>
              </table:table-cell>
              <table:table-cell office:value-type="float" office:value="-0.001886289">
                <text:p>-0.0018862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.299499511719">
                <text:p>327.299499511719</text:p>
              </table:table-cell>
              <table:table-cell office:value-type="float" office:value="0.005195487">
                <text:p>0.0051954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7.407379150391">
                <text:p>327.407379150391</text:p>
              </table:table-cell>
              <table:table-cell office:value-type="float" office:value="0.017976">
                <text:p>0.0179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7.515289306641">
                <text:p>327.515289306641</text:p>
              </table:table-cell>
              <table:table-cell office:value-type="float" office:value="-0.002553209">
                <text:p>-0.0025532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7.623199462891">
                <text:p>327.623199462891</text:p>
              </table:table-cell>
              <table:table-cell office:value-type="float" office:value="0.008647474">
                <text:p>0.0086474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7.731109619141">
                <text:p>327.731109619141</text:p>
              </table:table-cell>
              <table:table-cell office:value-type="float" office:value="-0.002915232">
                <text:p>-0.0029152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7.839050292969">
                <text:p>327.839050292969</text:p>
              </table:table-cell>
              <table:table-cell office:value-type="float" office:value="-0.005669306">
                <text:p>-0.0056693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7.946990966797">
                <text:p>327.946990966797</text:p>
              </table:table-cell>
              <table:table-cell office:value-type="float" office:value="-0.000749303">
                <text:p>-0.0007493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8.054931640625">
                <text:p>328.054931640625</text:p>
              </table:table-cell>
              <table:table-cell office:value-type="float" office:value="0.003805107">
                <text:p>0.0038051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8.162872314453">
                <text:p>328.162872314453</text:p>
              </table:table-cell>
              <table:table-cell office:value-type="float" office:value="0.007616142">
                <text:p>0.0076161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8.270812988281">
                <text:p>328.270812988281</text:p>
              </table:table-cell>
              <table:table-cell office:value-type="float" office:value="-0.002131219">
                <text:p>-0.0021312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8.378784179688">
                <text:p>328.378784179688</text:p>
              </table:table-cell>
              <table:table-cell office:value-type="float" office:value="-0.001261554">
                <text:p>-0.0012615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8.486755371094">
                <text:p>328.486755371094</text:p>
              </table:table-cell>
              <table:table-cell office:value-type="float" office:value="-0.008070176">
                <text:p>-0.0080701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8.5947265625">
                <text:p>328.5947265625</text:p>
              </table:table-cell>
              <table:table-cell office:value-type="float" office:value="0.003312527">
                <text:p>0.0033125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8.702697753906">
                <text:p>328.702697753906</text:p>
              </table:table-cell>
              <table:table-cell office:value-type="float" office:value="0.02240828">
                <text:p>0.022408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8.810699462891">
                <text:p>328.810699462891</text:p>
              </table:table-cell>
              <table:table-cell office:value-type="float" office:value="0.002481088">
                <text:p>0.0024810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8.918670654297">
                <text:p>328.918670654297</text:p>
              </table:table-cell>
              <table:table-cell office:value-type="float" office:value="0.007485371">
                <text:p>0.0074853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9.026672363281">
                <text:p>329.026672363281</text:p>
              </table:table-cell>
              <table:table-cell office:value-type="float" office:value="0.009168755">
                <text:p>0.0091687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9.134704589844">
                <text:p>329.134704589844</text:p>
              </table:table-cell>
              <table:table-cell office:value-type="float" office:value="0.0166708">
                <text:p>0.01667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9.242706298828">
                <text:p>329.242706298828</text:p>
              </table:table-cell>
              <table:table-cell office:value-type="float" office:value="-0.002681873">
                <text:p>-0.0026818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9.350738525391">
                <text:p>329.350738525391</text:p>
              </table:table-cell>
              <table:table-cell office:value-type="float" office:value="-0.003177324">
                <text:p>-0.0031773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9.458770751953">
                <text:p>329.458770751953</text:p>
              </table:table-cell>
              <table:table-cell office:value-type="float" office:value="0.001676452">
                <text:p>0.0016764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9.566802978516">
                <text:p>329.566802978516</text:p>
              </table:table-cell>
              <table:table-cell office:value-type="float" office:value="0.003054053">
                <text:p>0.0030540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9.674835205078">
                <text:p>329.674835205078</text:p>
              </table:table-cell>
              <table:table-cell office:value-type="float" office:value="-0.002963745">
                <text:p>-0.0029637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9.782897949219">
                <text:p>329.782897949219</text:p>
              </table:table-cell>
              <table:table-cell office:value-type="float" office:value="0.007394746">
                <text:p>0.0073947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9.890960693359">
                <text:p>329.890960693359</text:p>
              </table:table-cell>
              <table:table-cell office:value-type="float" office:value="0.03863188">
                <text:p>0.038631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9.9990234375">
                <text:p>329.9990234375</text:p>
              </table:table-cell>
              <table:table-cell office:value-type="float" office:value="0.002388127">
                <text:p>0.0023881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0.107086181641">
                <text:p>330.107086181641</text:p>
              </table:table-cell>
              <table:table-cell office:value-type="float" office:value="0.001624602">
                <text:p>0.0016246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0.215148925781">
                <text:p>330.215148925781</text:p>
              </table:table-cell>
              <table:table-cell office:value-type="float" office:value="-0.006441598">
                <text:p>-0.0064415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0.3232421875">
                <text:p>330.3232421875</text:p>
              </table:table-cell>
              <table:table-cell office:value-type="float" office:value="0.01649633">
                <text:p>0.016496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0.431335449219">
                <text:p>330.431335449219</text:p>
              </table:table-cell>
              <table:table-cell office:value-type="float" office:value="0.009357913">
                <text:p>0.0093579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0.539428710938">
                <text:p>330.539428710938</text:p>
              </table:table-cell>
              <table:table-cell office:value-type="float" office:value="0.009077805">
                <text:p>0.0090778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0.647521972656">
                <text:p>330.647521972656</text:p>
              </table:table-cell>
              <table:table-cell office:value-type="float" office:value="-0.002990058">
                <text:p>-0.0029900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0.755645751953">
                <text:p>330.755645751953</text:p>
              </table:table-cell>
              <table:table-cell office:value-type="float" office:value="0.006496351">
                <text:p>0.0064963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0.86376953125">
                <text:p>330.86376953125</text:p>
              </table:table-cell>
              <table:table-cell office:value-type="float" office:value="0.0164977">
                <text:p>0.01649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0.971893310547">
                <text:p>330.971893310547</text:p>
              </table:table-cell>
              <table:table-cell office:value-type="float" office:value="0.01240882">
                <text:p>0.012408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1.080017089844">
                <text:p>331.080017089844</text:p>
              </table:table-cell>
              <table:table-cell office:value-type="float" office:value="0.02772616">
                <text:p>0.027726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1.188171386719">
                <text:p>331.188171386719</text:p>
              </table:table-cell>
              <table:table-cell office:value-type="float" office:value="0.01098724">
                <text:p>0.010987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1.296295166016">
                <text:p>331.296295166016</text:p>
              </table:table-cell>
              <table:table-cell office:value-type="float" office:value="0.01932791">
                <text:p>0.019327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1.404449462891">
                <text:p>331.404449462891</text:p>
              </table:table-cell>
              <table:table-cell office:value-type="float" office:value="-0.003811379">
                <text:p>-0.0038113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1.512603759766">
                <text:p>331.512603759766</text:p>
              </table:table-cell>
              <table:table-cell office:value-type="float" office:value="-0.004058839">
                <text:p>-0.0040588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1.620788574219">
                <text:p>331.620788574219</text:p>
              </table:table-cell>
              <table:table-cell office:value-type="float" office:value="0.003118401">
                <text:p>0.0031184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1.728942871094">
                <text:p>331.728942871094</text:p>
              </table:table-cell>
              <table:table-cell office:value-type="float" office:value="0.008999163">
                <text:p>0.0089991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1.837127685547">
                <text:p>331.837127685547</text:p>
              </table:table-cell>
              <table:table-cell office:value-type="float" office:value="-0.001049264">
                <text:p>-0.0010492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1.9453125">
                <text:p>331.9453125</text:p>
              </table:table-cell>
              <table:table-cell office:value-type="float" office:value="-0.00362848">
                <text:p>-0.003628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2.053527832031">
                <text:p>332.053527832031</text:p>
              </table:table-cell>
              <table:table-cell office:value-type="float" office:value="0.006790213">
                <text:p>0.0067902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2.161712646484">
                <text:p>332.161712646484</text:p>
              </table:table-cell>
              <table:table-cell office:value-type="float" office:value="0.0003459259">
                <text:p>0.00034592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2.269927978516">
                <text:p>332.269927978516</text:p>
              </table:table-cell>
              <table:table-cell office:value-type="float" office:value="-0.008173923">
                <text:p>-0.0081739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2.378143310547">
                <text:p>332.378143310547</text:p>
              </table:table-cell>
              <table:table-cell office:value-type="float" office:value="-0.003065282">
                <text:p>-0.0030652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2.486358642578">
                <text:p>332.486358642578</text:p>
              </table:table-cell>
              <table:table-cell office:value-type="float" office:value="0.01950448">
                <text:p>0.019504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2.594573974609">
                <text:p>332.594573974609</text:p>
              </table:table-cell>
              <table:table-cell office:value-type="float" office:value="0.01214716">
                <text:p>0.012147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2.702819824219">
                <text:p>332.702819824219</text:p>
              </table:table-cell>
              <table:table-cell office:value-type="float" office:value="0.003929395">
                <text:p>0.0039293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2.811065673828">
                <text:p>332.811065673828</text:p>
              </table:table-cell>
              <table:table-cell office:value-type="float" office:value="-0.006783134">
                <text:p>-0.0067831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2.919311523438">
                <text:p>332.919311523438</text:p>
              </table:table-cell>
              <table:table-cell office:value-type="float" office:value="0.001627296">
                <text:p>0.0016272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3.027557373047">
                <text:p>333.027557373047</text:p>
              </table:table-cell>
              <table:table-cell office:value-type="float" office:value="0.00114188">
                <text:p>0.001141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3.135833740234">
                <text:p>333.135833740234</text:p>
              </table:table-cell>
              <table:table-cell office:value-type="float" office:value="0.006002575">
                <text:p>0.0060025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3.244079589844">
                <text:p>333.244079589844</text:p>
              </table:table-cell>
              <table:table-cell office:value-type="float" office:value="0.04720763">
                <text:p>0.047207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3.352355957031">
                <text:p>333.352355957031</text:p>
              </table:table-cell>
              <table:table-cell office:value-type="float" office:value="-0.001139885">
                <text:p>-0.0011398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3.460662841797">
                <text:p>333.460662841797</text:p>
              </table:table-cell>
              <table:table-cell office:value-type="float" office:value="0.002316675">
                <text:p>0.0023166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3.568939208984">
                <text:p>333.568939208984</text:p>
              </table:table-cell>
              <table:table-cell office:value-type="float" office:value="0.002030777">
                <text:p>0.0020307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3.67724609375">
                <text:p>333.67724609375</text:p>
              </table:table-cell>
              <table:table-cell office:value-type="float" office:value="-0.006495198">
                <text:p>-0.0064951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3.785552978516">
                <text:p>333.785552978516</text:p>
              </table:table-cell>
              <table:table-cell office:value-type="float" office:value="0.007772752">
                <text:p>0.0077727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3.893859863281">
                <text:p>333.893859863281</text:p>
              </table:table-cell>
              <table:table-cell office:value-type="float" office:value="0.003929907">
                <text:p>0.0039299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4.002166748047">
                <text:p>334.002166748047</text:p>
              </table:table-cell>
              <table:table-cell office:value-type="float" office:value="-0.01036685">
                <text:p>-0.010366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4.110473632813">
                <text:p>334.110473632813</text:p>
              </table:table-cell>
              <table:table-cell office:value-type="float" office:value="0.0003337189">
                <text:p>0.00033371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4.218811035156">
                <text:p>334.218811035156</text:p>
              </table:table-cell>
              <table:table-cell office:value-type="float" office:value="0.004713952">
                <text:p>0.0047139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4.3271484375">
                <text:p>334.327148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4.435485839844">
                <text:p>334.435485839844</text:p>
              </table:table-cell>
              <table:table-cell office:value-type="float" office:value="0.0008088505">
                <text:p>0.00080885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4.543853759766">
                <text:p>334.543853759766</text:p>
              </table:table-cell>
              <table:table-cell office:value-type="float" office:value="-0.005463321">
                <text:p>-0.0054633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4.652191162109">
                <text:p>334.652191162109</text:p>
              </table:table-cell>
              <table:table-cell office:value-type="float" office:value="0.01751577">
                <text:p>0.017515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4.760559082031">
                <text:p>334.760559082031</text:p>
              </table:table-cell>
              <table:table-cell office:value-type="float" office:value="0.0003117029">
                <text:p>0.00031170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4.868927001953">
                <text:p>334.868927001953</text:p>
              </table:table-cell>
              <table:table-cell office:value-type="float" office:value="0.008829628">
                <text:p>0.0088296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4.977325439453">
                <text:p>334.977325439453</text:p>
              </table:table-cell>
              <table:table-cell office:value-type="float" office:value="0.007621932">
                <text:p>0.0076219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5.085693359375">
                <text:p>335.085693359375</text:p>
              </table:table-cell>
              <table:table-cell office:value-type="float" office:value="0.009846429">
                <text:p>0.0098464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5.194091796875">
                <text:p>335.194091796875</text:p>
              </table:table-cell>
              <table:table-cell office:value-type="float" office:value="0.00100935">
                <text:p>0.001009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5.302490234375">
                <text:p>335.302490234375</text:p>
              </table:table-cell>
              <table:table-cell office:value-type="float" office:value="0.01034665">
                <text:p>0.010346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5.410888671875">
                <text:p>335.410888671875</text:p>
              </table:table-cell>
              <table:table-cell office:value-type="float" office:value="0.006791352">
                <text:p>0.0067913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5.519287109375">
                <text:p>335.519287109375</text:p>
              </table:table-cell>
              <table:table-cell office:value-type="float" office:value="0.02998407">
                <text:p>0.029984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5.627716064453">
                <text:p>335.627716064453</text:p>
              </table:table-cell>
              <table:table-cell office:value-type="float" office:value="0.009777281">
                <text:p>0.0097772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5.736145019531">
                <text:p>335.736145019531</text:p>
              </table:table-cell>
              <table:table-cell office:value-type="float" office:value="0.006613947">
                <text:p>0.0066139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5.844573974609">
                <text:p>335.844573974609</text:p>
              </table:table-cell>
              <table:table-cell office:value-type="float" office:value="-0.001462299">
                <text:p>-0.0014622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5.953002929688">
                <text:p>335.953002929688</text:p>
              </table:table-cell>
              <table:table-cell office:value-type="float" office:value="0.01033711">
                <text:p>0.010337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6.061462402344">
                <text:p>336.061462402344</text:p>
              </table:table-cell>
              <table:table-cell office:value-type="float" office:value="0.02022225">
                <text:p>0.020222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6.169891357422">
                <text:p>336.169891357422</text:p>
              </table:table-cell>
              <table:table-cell office:value-type="float" office:value="-0.005219649">
                <text:p>-0.0052196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6.278350830078">
                <text:p>336.278350830078</text:p>
              </table:table-cell>
              <table:table-cell office:value-type="float" office:value="0.002686453">
                <text:p>0.0026864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6.386840820313">
                <text:p>336.386840820313</text:p>
              </table:table-cell>
              <table:table-cell office:value-type="float" office:value="0.01752602">
                <text:p>0.017526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6.495300292969">
                <text:p>336.495300292969</text:p>
              </table:table-cell>
              <table:table-cell office:value-type="float" office:value="0.004997647">
                <text:p>0.0049976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6.603790283203">
                <text:p>336.603790283203</text:p>
              </table:table-cell>
              <table:table-cell office:value-type="float" office:value="-0.004072904">
                <text:p>-0.0040729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6.712249755859">
                <text:p>336.712249755859</text:p>
              </table:table-cell>
              <table:table-cell office:value-type="float" office:value="-0.001753882">
                <text:p>-0.0017538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6.820770263672">
                <text:p>336.820770263672</text:p>
              </table:table-cell>
              <table:table-cell office:value-type="float" office:value="0.0006048655">
                <text:p>0.00060486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6.929260253906">
                <text:p>336.929260253906</text:p>
              </table:table-cell>
              <table:table-cell office:value-type="float" office:value="0.00332078">
                <text:p>0.003320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7.037750244141">
                <text:p>337.037750244141</text:p>
              </table:table-cell>
              <table:table-cell office:value-type="float" office:value="-0.005145012">
                <text:p>-0.0051450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37.146270751953">
                <text:p>337.146270751953</text:p>
              </table:table-cell>
              <table:table-cell office:value-type="float" office:value="-0.007696536">
                <text:p>-0.0076965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7.254791259766">
                <text:p>337.254791259766</text:p>
              </table:table-cell>
              <table:table-cell office:value-type="float" office:value="0.02434521">
                <text:p>0.024345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37.363311767578">
                <text:p>337.363311767578</text:p>
              </table:table-cell>
              <table:table-cell office:value-type="float" office:value="0.001954746">
                <text:p>0.0019547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7.471862792969">
                <text:p>337.471862792969</text:p>
              </table:table-cell>
              <table:table-cell office:value-type="float" office:value="0.003809442">
                <text:p>0.0038094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7.580383300781">
                <text:p>337.580383300781</text:p>
              </table:table-cell>
              <table:table-cell office:value-type="float" office:value="-0.003401636">
                <text:p>-0.0034016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7.688934326172">
                <text:p>337.688934326172</text:p>
              </table:table-cell>
              <table:table-cell office:value-type="float" office:value="-0.001432703">
                <text:p>-0.0014327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7.797485351563">
                <text:p>337.797485351563</text:p>
              </table:table-cell>
              <table:table-cell office:value-type="float" office:value="-0.002927952">
                <text:p>-0.0029279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7.906036376953">
                <text:p>337.906036376953</text:p>
              </table:table-cell>
              <table:table-cell office:value-type="float" office:value="-0.003397182">
                <text:p>-0.0033971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8.014617919922">
                <text:p>338.014617919922</text:p>
              </table:table-cell>
              <table:table-cell office:value-type="float" office:value="-0.002545868">
                <text:p>-0.0025458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8.123168945313">
                <text:p>338.123168945313</text:p>
              </table:table-cell>
              <table:table-cell office:value-type="float" office:value="0.01201636">
                <text:p>0.012016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8.231750488281">
                <text:p>338.231750488281</text:p>
              </table:table-cell>
              <table:table-cell office:value-type="float" office:value="0.01143628">
                <text:p>0.011436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8.340362548828">
                <text:p>338.340362548828</text:p>
              </table:table-cell>
              <table:table-cell office:value-type="float" office:value="-0.002437856">
                <text:p>-0.0024378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8.448944091797">
                <text:p>338.448944091797</text:p>
              </table:table-cell>
              <table:table-cell office:value-type="float" office:value="0.02380724">
                <text:p>0.023807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8.557525634766">
                <text:p>338.557525634766</text:p>
              </table:table-cell>
              <table:table-cell office:value-type="float" office:value="0.006480929">
                <text:p>0.0064809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8.666137695313">
                <text:p>338.666137695313</text:p>
              </table:table-cell>
              <table:table-cell office:value-type="float" office:value="0.01289556">
                <text:p>0.012895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8.774749755859">
                <text:p>338.774749755859</text:p>
              </table:table-cell>
              <table:table-cell office:value-type="float" office:value="-0.003937461">
                <text:p>-0.0039374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8.883392333984">
                <text:p>338.883392333984</text:p>
              </table:table-cell>
              <table:table-cell office:value-type="float" office:value="-0.002894801">
                <text:p>-0.0028948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8.992004394531">
                <text:p>338.992004394531</text:p>
              </table:table-cell>
              <table:table-cell office:value-type="float" office:value="0.003968291">
                <text:p>0.0039682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9.100646972656">
                <text:p>339.100646972656</text:p>
              </table:table-cell>
              <table:table-cell office:value-type="float" office:value="0.00969264">
                <text:p>0.009692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9.209289550781">
                <text:p>339.209289550781</text:p>
              </table:table-cell>
              <table:table-cell office:value-type="float" office:value="-0.004226599">
                <text:p>-0.0042265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9.317932128906">
                <text:p>339.317932128906</text:p>
              </table:table-cell>
              <table:table-cell office:value-type="float" office:value="0.009322612">
                <text:p>0.0093226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9.426574707031">
                <text:p>339.426574707031</text:p>
              </table:table-cell>
              <table:table-cell office:value-type="float" office:value="0.003249588">
                <text:p>0.0032495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9.535247802734">
                <text:p>339.535247802734</text:p>
              </table:table-cell>
              <table:table-cell office:value-type="float" office:value="0.01119028">
                <text:p>0.011190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9.643890380859">
                <text:p>339.643890380859</text:p>
              </table:table-cell>
              <table:table-cell office:value-type="float" office:value="0.003308093">
                <text:p>0.0033080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9.752563476563">
                <text:p>339.752563476563</text:p>
              </table:table-cell>
              <table:table-cell office:value-type="float" office:value="0.004120397">
                <text:p>0.0041203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.861267089844">
                <text:p>339.861267089844</text:p>
              </table:table-cell>
              <table:table-cell office:value-type="float" office:value="0.0007940951">
                <text:p>0.00079409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9.969940185547">
                <text:p>339.969940185547</text:p>
              </table:table-cell>
              <table:table-cell office:value-type="float" office:value="0.01632829">
                <text:p>0.016328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0.078643798828">
                <text:p>340.078643798828</text:p>
              </table:table-cell>
              <table:table-cell office:value-type="float" office:value="0.001939366">
                <text:p>0.0019393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0.187347412109">
                <text:p>340.187347412109</text:p>
              </table:table-cell>
              <table:table-cell office:value-type="float" office:value="0.01723809">
                <text:p>0.017238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0.296051025391">
                <text:p>340.296051025391</text:p>
              </table:table-cell>
              <table:table-cell office:value-type="float" office:value="0.006970936">
                <text:p>0.0069709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0.404754638672">
                <text:p>340.404754638672</text:p>
              </table:table-cell>
              <table:table-cell office:value-type="float" office:value="0.008839948">
                <text:p>0.0088399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0.513488769531">
                <text:p>340.513488769531</text:p>
              </table:table-cell>
              <table:table-cell office:value-type="float" office:value="-0.007009918">
                <text:p>-0.0070099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0.622192382813">
                <text:p>340.622192382813</text:p>
              </table:table-cell>
              <table:table-cell office:value-type="float" office:value="0.01686344">
                <text:p>0.016863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0.730926513672">
                <text:p>340.730926513672</text:p>
              </table:table-cell>
              <table:table-cell office:value-type="float" office:value="0.01657793">
                <text:p>0.016577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0.839660644531">
                <text:p>340.839660644531</text:p>
              </table:table-cell>
              <table:table-cell office:value-type="float" office:value="0.01516216">
                <text:p>0.015162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0.948425292969">
                <text:p>340.948425292969</text:p>
              </table:table-cell>
              <table:table-cell office:value-type="float" office:value="-0.004019307">
                <text:p>-0.0040193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1.057159423828">
                <text:p>341.057159423828</text:p>
              </table:table-cell>
              <table:table-cell office:value-type="float" office:value="-0.000164913">
                <text:p>-0.0001649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1.165924072266">
                <text:p>341.165924072266</text:p>
              </table:table-cell>
              <table:table-cell office:value-type="float" office:value="-0.001353532">
                <text:p>-0.0013535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1.274688720703">
                <text:p>341.274688720703</text:p>
              </table:table-cell>
              <table:table-cell office:value-type="float" office:value="-0.002135306">
                <text:p>-0.0021353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1.383483886719">
                <text:p>341.383483886719</text:p>
              </table:table-cell>
              <table:table-cell office:value-type="float" office:value="0.01515408">
                <text:p>0.015154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1.492248535156">
                <text:p>341.492248535156</text:p>
              </table:table-cell>
              <table:table-cell office:value-type="float" office:value="0.004616707">
                <text:p>0.0046167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1.601043701172">
                <text:p>341.601043701172</text:p>
              </table:table-cell>
              <table:table-cell office:value-type="float" office:value="0.0228178">
                <text:p>0.02281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1.709838867188">
                <text:p>341.709838867188</text:p>
              </table:table-cell>
              <table:table-cell office:value-type="float" office:value="0.0194835">
                <text:p>0.01948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1.818634033203">
                <text:p>341.818634033203</text:p>
              </table:table-cell>
              <table:table-cell office:value-type="float" office:value="0.0142981">
                <text:p>0.01429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1.927429199219">
                <text:p>341.927429199219</text:p>
              </table:table-cell>
              <table:table-cell office:value-type="float" office:value="-0.001198113">
                <text:p>-0.0011981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2.036254882813">
                <text:p>342.036254882813</text:p>
              </table:table-cell>
              <table:table-cell office:value-type="float" office:value="-0.002057465">
                <text:p>-0.0020574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2.145080566406">
                <text:p>342.145080566406</text:p>
              </table:table-cell>
              <table:table-cell office:value-type="float" office:value="0.00111479">
                <text:p>0.001114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2.25390625">
                <text:p>342.25390625</text:p>
              </table:table-cell>
              <table:table-cell office:value-type="float" office:value="0.01034453">
                <text:p>0.010344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2.362731933594">
                <text:p>342.362731933594</text:p>
              </table:table-cell>
              <table:table-cell office:value-type="float" office:value="0.004834056">
                <text:p>0.0048340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2.471557617188">
                <text:p>342.471557617188</text:p>
              </table:table-cell>
              <table:table-cell office:value-type="float" office:value="-0.0003178921">
                <text:p>-0.00031789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2.580413818359">
                <text:p>342.580413818359</text:p>
              </table:table-cell>
              <table:table-cell office:value-type="float" office:value="0.01132591">
                <text:p>0.011325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2.689270019531">
                <text:p>342.689270019531</text:p>
              </table:table-cell>
              <table:table-cell office:value-type="float" office:value="-0.003432389">
                <text:p>-0.0034323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2.798126220703">
                <text:p>342.798126220703</text:p>
              </table:table-cell>
              <table:table-cell office:value-type="float" office:value="0.008116919">
                <text:p>0.0081169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2.906982421875">
                <text:p>342.906982421875</text:p>
              </table:table-cell>
              <table:table-cell office:value-type="float" office:value="0.01567647">
                <text:p>0.015676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3.015869140625">
                <text:p>343.015869140625</text:p>
              </table:table-cell>
              <table:table-cell office:value-type="float" office:value="0.0132366">
                <text:p>0.01323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3.124755859375">
                <text:p>343.124755859375</text:p>
              </table:table-cell>
              <table:table-cell office:value-type="float" office:value="-0.001559953">
                <text:p>-0.0015599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3.233642578125">
                <text:p>343.233642578125</text:p>
              </table:table-cell>
              <table:table-cell office:value-type="float" office:value="-0.006463302">
                <text:p>-0.0064633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3.342529296875">
                <text:p>343.342529296875</text:p>
              </table:table-cell>
              <table:table-cell office:value-type="float" office:value="0.009704994">
                <text:p>0.0097049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3.451416015625">
                <text:p>343.451416015625</text:p>
              </table:table-cell>
              <table:table-cell office:value-type="float" office:value="0.001606447">
                <text:p>0.0016064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3.560333251953">
                <text:p>343.560333251953</text:p>
              </table:table-cell>
              <table:table-cell office:value-type="float" office:value="-0.002369837">
                <text:p>-0.0023698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3.669250488281">
                <text:p>343.669250488281</text:p>
              </table:table-cell>
              <table:table-cell office:value-type="float" office:value="-0.003793716">
                <text:p>-0.0037937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3.778167724609">
                <text:p>343.778167724609</text:p>
              </table:table-cell>
              <table:table-cell office:value-type="float" office:value="0.001270257">
                <text:p>0.0012702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3.887084960938">
                <text:p>343.887084960938</text:p>
              </table:table-cell>
              <table:table-cell office:value-type="float" office:value="0.003838046">
                <text:p>0.0038380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3.996032714844">
                <text:p>343.996032714844</text:p>
              </table:table-cell>
              <table:table-cell office:value-type="float" office:value="-0.007801319">
                <text:p>-0.0078013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4.104949951172">
                <text:p>344.104949951172</text:p>
              </table:table-cell>
              <table:table-cell office:value-type="float" office:value="0.009233293">
                <text:p>0.0092332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4.213897705078">
                <text:p>344.213897705078</text:p>
              </table:table-cell>
              <table:table-cell office:value-type="float" office:value="-0.002587184">
                <text:p>-0.0025871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4.322845458984">
                <text:p>344.322845458984</text:p>
              </table:table-cell>
              <table:table-cell office:value-type="float" office:value="0.007675601">
                <text:p>0.0076756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4.431823730469">
                <text:p>344.431823730469</text:p>
              </table:table-cell>
              <table:table-cell office:value-type="float" office:value="-0.003016054">
                <text:p>-0.0030160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4.540771484375">
                <text:p>344.540771484375</text:p>
              </table:table-cell>
              <table:table-cell office:value-type="float" office:value="0.0002405356">
                <text:p>0.00024053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4.649749755859">
                <text:p>344.649749755859</text:p>
              </table:table-cell>
              <table:table-cell office:value-type="float" office:value="0.0004335819">
                <text:p>0.00043358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4.758728027344">
                <text:p>344.758728027344</text:p>
              </table:table-cell>
              <table:table-cell office:value-type="float" office:value="0.001593073">
                <text:p>0.00159307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4.867706298828">
                <text:p>344.867706298828</text:p>
              </table:table-cell>
              <table:table-cell office:value-type="float" office:value="0.006918984">
                <text:p>0.0069189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4.976715087891">
                <text:p>344.976715087891</text:p>
              </table:table-cell>
              <table:table-cell office:value-type="float" office:value="0.01063766">
                <text:p>0.010637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5.085723876953">
                <text:p>345.085723876953</text:p>
              </table:table-cell>
              <table:table-cell office:value-type="float" office:value="-0.0004702387">
                <text:p>-0.000470238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5.194702148438">
                <text:p>345.194702148438</text:p>
              </table:table-cell>
              <table:table-cell office:value-type="float" office:value="0.002287803">
                <text:p>0.00228780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5.303741455078">
                <text:p>345.303741455078</text:p>
              </table:table-cell>
              <table:table-cell office:value-type="float" office:value="0.02386704">
                <text:p>0.023867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5.412750244141">
                <text:p>345.412750244141</text:p>
              </table:table-cell>
              <table:table-cell office:value-type="float" office:value="-0.006047054">
                <text:p>-0.0060470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5.521759033203">
                <text:p>345.521759033203</text:p>
              </table:table-cell>
              <table:table-cell office:value-type="float" office:value="-0.004563135">
                <text:p>-0.0045631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5.630798339844">
                <text:p>345.630798339844</text:p>
              </table:table-cell>
              <table:table-cell office:value-type="float" office:value="0.003097747">
                <text:p>0.0030977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5.739837646484">
                <text:p>345.739837646484</text:p>
              </table:table-cell>
              <table:table-cell office:value-type="float" office:value="-0.001505177">
                <text:p>-0.0015051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5.848876953125">
                <text:p>345.848876953125</text:p>
              </table:table-cell>
              <table:table-cell office:value-type="float" office:value="0.01057686">
                <text:p>0.010576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5.957946777344">
                <text:p>345.957946777344</text:p>
              </table:table-cell>
              <table:table-cell office:value-type="float" office:value="0.01161842">
                <text:p>0.011618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6.066986083984">
                <text:p>346.066986083984</text:p>
              </table:table-cell>
              <table:table-cell office:value-type="float" office:value="-0.001917333">
                <text:p>-0.0019173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6.176055908203">
                <text:p>346.176055908203</text:p>
              </table:table-cell>
              <table:table-cell office:value-type="float" office:value="-0.003698921">
                <text:p>-0.0036989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6.285125732422">
                <text:p>346.285125732422</text:p>
              </table:table-cell>
              <table:table-cell office:value-type="float" office:value="-0.004041631">
                <text:p>-0.0040416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6.394195556641">
                <text:p>346.394195556641</text:p>
              </table:table-cell>
              <table:table-cell office:value-type="float" office:value="0.002778787">
                <text:p>0.0027787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6.503295898438">
                <text:p>346.503295898438</text:p>
              </table:table-cell>
              <table:table-cell office:value-type="float" office:value="-0.001409972">
                <text:p>-0.0014099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6.612365722656">
                <text:p>346.612365722656</text:p>
              </table:table-cell>
              <table:table-cell office:value-type="float" office:value="-0.003942593">
                <text:p>-0.00394259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6.721466064453">
                <text:p>346.721466064453</text:p>
              </table:table-cell>
              <table:table-cell office:value-type="float" office:value="0.001208618">
                <text:p>0.0012086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6.83056640625">
                <text:p>346.83056640625</text:p>
              </table:table-cell>
              <table:table-cell office:value-type="float" office:value="0.01168033">
                <text:p>0.011680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6.939697265625">
                <text:p>346.939697265625</text:p>
              </table:table-cell>
              <table:table-cell office:value-type="float" office:value="0.02850224">
                <text:p>0.028502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7.048797607422">
                <text:p>347.048797607422</text:p>
              </table:table-cell>
              <table:table-cell office:value-type="float" office:value="-0.008358939">
                <text:p>-0.0083589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7.157928466797">
                <text:p>347.157928466797</text:p>
              </table:table-cell>
              <table:table-cell office:value-type="float" office:value="-0.007570902">
                <text:p>-0.0075709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7.267059326172">
                <text:p>347.267059326172</text:p>
              </table:table-cell>
              <table:table-cell office:value-type="float" office:value="0.004357897">
                <text:p>0.0043578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7.376190185547">
                <text:p>347.376190185547</text:p>
              </table:table-cell>
              <table:table-cell office:value-type="float" office:value="-0.001117492">
                <text:p>-0.0011174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7.4853515625">
                <text:p>347.4853515625</text:p>
              </table:table-cell>
              <table:table-cell office:value-type="float" office:value="0.005453211">
                <text:p>0.0054532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7.594482421875">
                <text:p>347.594482421875</text:p>
              </table:table-cell>
              <table:table-cell office:value-type="float" office:value="-0.01195789">
                <text:p>-0.011957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7.703643798828">
                <text:p>347.703643798828</text:p>
              </table:table-cell>
              <table:table-cell office:value-type="float" office:value="0.003926257">
                <text:p>0.0039262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7.812805175781">
                <text:p>347.812805175781</text:p>
              </table:table-cell>
              <table:table-cell office:value-type="float" office:value="-0.001029174">
                <text:p>-0.0010291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7.921966552734">
                <text:p>347.921966552734</text:p>
              </table:table-cell>
              <table:table-cell office:value-type="float" office:value="0.002265968">
                <text:p>0.0022659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8.031158447266">
                <text:p>348.031158447266</text:p>
              </table:table-cell>
              <table:table-cell office:value-type="float" office:value="0.006554333">
                <text:p>0.0065543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8.140319824219">
                <text:p>348.140319824219</text:p>
              </table:table-cell>
              <table:table-cell office:value-type="float" office:value="0.001761336">
                <text:p>0.0017613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8.24951171875">
                <text:p>348.24951171875</text:p>
              </table:table-cell>
              <table:table-cell office:value-type="float" office:value="0.01243524">
                <text:p>0.012435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8.358703613281">
                <text:p>348.358703613281</text:p>
              </table:table-cell>
              <table:table-cell office:value-type="float" office:value="-0.008404582">
                <text:p>-0.0084045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8.467926025391">
                <text:p>348.467926025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8.577117919922">
                <text:p>348.577117919922</text:p>
              </table:table-cell>
              <table:table-cell office:value-type="float" office:value="-0.001738508">
                <text:p>-0.0017385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8.686340332031">
                <text:p>348.686340332031</text:p>
              </table:table-cell>
              <table:table-cell office:value-type="float" office:value="0.02023659">
                <text:p>0.0202365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8.795562744141">
                <text:p>348.795562744141</text:p>
              </table:table-cell>
              <table:table-cell office:value-type="float" office:value="-0.0002525243">
                <text:p>-0.000252524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8.90478515625">
                <text:p>348.90478515625</text:p>
              </table:table-cell>
              <table:table-cell office:value-type="float" office:value="0.005396807">
                <text:p>0.0053968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9.014038085938">
                <text:p>349.014038085938</text:p>
              </table:table-cell>
              <table:table-cell office:value-type="float" office:value="0.002339902">
                <text:p>0.0023399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9.123260498047">
                <text:p>349.123260498047</text:p>
              </table:table-cell>
              <table:table-cell office:value-type="float" office:value="0.01023666">
                <text:p>0.010236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9.232513427734">
                <text:p>349.232513427734</text:p>
              </table:table-cell>
              <table:table-cell office:value-type="float" office:value="-0.006974045">
                <text:p>-0.0069740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9.341766357422">
                <text:p>349.341766357422</text:p>
              </table:table-cell>
              <table:table-cell office:value-type="float" office:value="-0.008981881">
                <text:p>-0.00898188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9.451019287109">
                <text:p>349.451019287109</text:p>
              </table:table-cell>
              <table:table-cell office:value-type="float" office:value="0.009050957">
                <text:p>0.0090509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49.560302734375">
                <text:p>349.560302734375</text:p>
              </table:table-cell>
              <table:table-cell office:value-type="float" office:value="0.003813215">
                <text:p>0.0038132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9.669586181641">
                <text:p>349.669586181641</text:p>
              </table:table-cell>
              <table:table-cell office:value-type="float" office:value="-0.006077709">
                <text:p>-0.00607770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9.778839111328">
                <text:p>349.778839111328</text:p>
              </table:table-cell>
              <table:table-cell office:value-type="float" office:value="-0.0040744">
                <text:p>-0.004074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49.888153076172">
                <text:p>349.888153076172</text:p>
              </table:table-cell>
              <table:table-cell office:value-type="float" office:value="0.01358814">
                <text:p>0.013588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9.997436523438">
                <text:p>349.997436523438</text:p>
              </table:table-cell>
              <table:table-cell office:value-type="float" office:value="0.01050475">
                <text:p>0.010504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0.106719970703">
                <text:p>350.106719970703</text:p>
              </table:table-cell>
              <table:table-cell office:value-type="float" office:value="0.009838148">
                <text:p>0.0098381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0.216033935547">
                <text:p>350.216033935547</text:p>
              </table:table-cell>
              <table:table-cell office:value-type="float" office:value="-0.007203409">
                <text:p>-0.0072034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0.325347900391">
                <text:p>350.325347900391</text:p>
              </table:table-cell>
              <table:table-cell office:value-type="float" office:value="-0.0006589679">
                <text:p>-0.000658967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0.434661865234">
                <text:p>350.434661865234</text:p>
              </table:table-cell>
              <table:table-cell office:value-type="float" office:value="0.005830516">
                <text:p>0.0058305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0.544006347656">
                <text:p>350.544006347656</text:p>
              </table:table-cell>
              <table:table-cell office:value-type="float" office:value="0.002918846">
                <text:p>0.0029188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0.6533203125">
                <text:p>350.6533203125</text:p>
              </table:table-cell>
              <table:table-cell office:value-type="float" office:value="0.005588378">
                <text:p>0.0055883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0.762664794922">
                <text:p>350.762664794922</text:p>
              </table:table-cell>
              <table:table-cell office:value-type="float" office:value="0.005123667">
                <text:p>0.0051236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0.872009277344">
                <text:p>350.872009277344</text:p>
              </table:table-cell>
              <table:table-cell office:value-type="float" office:value="0.01398182">
                <text:p>0.0139818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0.981353759766">
                <text:p>350.981353759766</text:p>
              </table:table-cell>
              <table:table-cell office:value-type="float" office:value="-0.009633945">
                <text:p>-0.0096339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1.090728759766">
                <text:p>351.090728759766</text:p>
              </table:table-cell>
              <table:table-cell office:value-type="float" office:value="0.003934877">
                <text:p>0.0039348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1.200073242188">
                <text:p>351.200073242188</text:p>
              </table:table-cell>
              <table:table-cell office:value-type="float" office:value="0.003054816">
                <text:p>0.0030548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1.309448242188">
                <text:p>351.309448242188</text:p>
              </table:table-cell>
              <table:table-cell office:value-type="float" office:value="0.01234884">
                <text:p>0.012348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1.418823242188">
                <text:p>351.418823242188</text:p>
              </table:table-cell>
              <table:table-cell office:value-type="float" office:value="0.009634919">
                <text:p>0.0096349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1.528228759766">
                <text:p>351.528228759766</text:p>
              </table:table-cell>
              <table:table-cell office:value-type="float" office:value="-0.007856503">
                <text:p>-0.0078565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1.637603759766">
                <text:p>351.637603759766</text:p>
              </table:table-cell>
              <table:table-cell office:value-type="float" office:value="0.01055718">
                <text:p>0.0105571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1.747009277344">
                <text:p>351.747009277344</text:p>
              </table:table-cell>
              <table:table-cell office:value-type="float" office:value="0.002261838">
                <text:p>0.0022618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1.856414794922">
                <text:p>351.856414794922</text:p>
              </table:table-cell>
              <table:table-cell office:value-type="float" office:value="-0.007720296">
                <text:p>-0.0077202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1.9658203125">
                <text:p>351.9658203125</text:p>
              </table:table-cell>
              <table:table-cell office:value-type="float" office:value="0.001733748">
                <text:p>0.0017337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2.075225830078">
                <text:p>352.075225830078</text:p>
              </table:table-cell>
              <table:table-cell office:value-type="float" office:value="-0.0005956823">
                <text:p>-0.00059568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2.184661865234">
                <text:p>352.184661865234</text:p>
              </table:table-cell>
              <table:table-cell office:value-type="float" office:value="0.002867287">
                <text:p>0.0028672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2.294097900391">
                <text:p>352.294097900391</text:p>
              </table:table-cell>
              <table:table-cell office:value-type="float" office:value="0.005161494">
                <text:p>0.00516149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2.403533935547">
                <text:p>352.403533935547</text:p>
              </table:table-cell>
              <table:table-cell office:value-type="float" office:value="-0.002339942">
                <text:p>-0.0023399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2.512969970703">
                <text:p>352.512969970703</text:p>
              </table:table-cell>
              <table:table-cell office:value-type="float" office:value="0.002245079">
                <text:p>0.00224507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2.622406005859">
                <text:p>352.622406005859</text:p>
              </table:table-cell>
              <table:table-cell office:value-type="float" office:value="0.01660137">
                <text:p>0.016601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52.731872558594">
                <text:p>352.731872558594</text:p>
              </table:table-cell>
              <table:table-cell office:value-type="float" office:value="-0.004637186">
                <text:p>-0.00463718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52.841339111328">
                <text:p>352.841339111328</text:p>
              </table:table-cell>
              <table:table-cell office:value-type="float" office:value="-0.006365424">
                <text:p>-0.0063654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52.950805664063">
                <text:p>352.950805664063</text:p>
              </table:table-cell>
              <table:table-cell office:value-type="float" office:value="0.01563913">
                <text:p>0.015639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3.060272216797">
                <text:p>353.060272216797</text:p>
              </table:table-cell>
              <table:table-cell office:value-type="float" office:value="0.01191157">
                <text:p>0.011911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3.169738769531">
                <text:p>353.169738769531</text:p>
              </table:table-cell>
              <table:table-cell office:value-type="float" office:value="-0.000957872">
                <text:p>-0.00095787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3.279235839844">
                <text:p>353.279235839844</text:p>
              </table:table-cell>
              <table:table-cell office:value-type="float" office:value="-0.001410385">
                <text:p>-0.00141038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53.388732910156">
                <text:p>353.388732910156</text:p>
              </table:table-cell>
              <table:table-cell office:value-type="float" office:value="0.006196064">
                <text:p>0.0061960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3.498229980469">
                <text:p>353.498229980469</text:p>
              </table:table-cell>
              <table:table-cell office:value-type="float" office:value="0.005642487">
                <text:p>0.00564248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3.607727050781">
                <text:p>353.607727050781</text:p>
              </table:table-cell>
              <table:table-cell office:value-type="float" office:value="0.008827464">
                <text:p>0.0088274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3.717254638672">
                <text:p>353.717254638672</text:p>
              </table:table-cell>
              <table:table-cell office:value-type="float" office:value="-0.001252965">
                <text:p>-0.00125296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3.826782226563">
                <text:p>353.826782226563</text:p>
              </table:table-cell>
              <table:table-cell office:value-type="float" office:value="-0.003726219">
                <text:p>-0.0037262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3.936309814453">
                <text:p>353.936309814453</text:p>
              </table:table-cell>
              <table:table-cell office:value-type="float" office:value="0.01557768">
                <text:p>0.015577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4.045837402344">
                <text:p>354.045837402344</text:p>
              </table:table-cell>
              <table:table-cell office:value-type="float" office:value="-0.004717426">
                <text:p>-0.0047174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4.155364990234">
                <text:p>354.155364990234</text:p>
              </table:table-cell>
              <table:table-cell office:value-type="float" office:value="0.00500087">
                <text:p>0.0050008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4.264923095703">
                <text:p>354.264923095703</text:p>
              </table:table-cell>
              <table:table-cell office:value-type="float" office:value="0.002564854">
                <text:p>0.00256485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4.374481201172">
                <text:p>354.374481201172</text:p>
              </table:table-cell>
              <table:table-cell office:value-type="float" office:value="0.0055727">
                <text:p>0.005572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4.484039306641">
                <text:p>354.484039306641</text:p>
              </table:table-cell>
              <table:table-cell office:value-type="float" office:value="0.003945284">
                <text:p>0.0039452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4.593597412109">
                <text:p>354.593597412109</text:p>
              </table:table-cell>
              <table:table-cell office:value-type="float" office:value="0.003882356">
                <text:p>0.0038823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4.703155517578">
                <text:p>354.703155517578</text:p>
              </table:table-cell>
              <table:table-cell office:value-type="float" office:value="0.002265309">
                <text:p>0.00226530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4.812744140625">
                <text:p>354.812744140625</text:p>
              </table:table-cell>
              <table:table-cell office:value-type="float" office:value="0.01110046">
                <text:p>0.011100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4.922332763672">
                <text:p>354.922332763672</text:p>
              </table:table-cell>
              <table:table-cell office:value-type="float" office:value="0.001428102">
                <text:p>0.00142810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5.031921386719">
                <text:p>355.031921386719</text:p>
              </table:table-cell>
              <table:table-cell office:value-type="float" office:value="0.007728355">
                <text:p>0.0077283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5.141510009766">
                <text:p>355.141510009766</text:p>
              </table:table-cell>
              <table:table-cell office:value-type="float" office:value="-0.001828647">
                <text:p>-0.00182864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5.251129150391">
                <text:p>355.251129150391</text:p>
              </table:table-cell>
              <table:table-cell office:value-type="float" office:value="0.00440996">
                <text:p>0.004409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5.360717773438">
                <text:p>355.360717773438</text:p>
              </table:table-cell>
              <table:table-cell office:value-type="float" office:value="0.003900321">
                <text:p>0.00390032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5.470336914063">
                <text:p>355.470336914063</text:p>
              </table:table-cell>
              <table:table-cell office:value-type="float" office:value="0.001547846">
                <text:p>0.00154784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5.579956054688">
                <text:p>355.579956054688</text:p>
              </table:table-cell>
              <table:table-cell office:value-type="float" office:value="0.009873386">
                <text:p>0.0098733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5.689605712891">
                <text:p>355.689605712891</text:p>
              </table:table-cell>
              <table:table-cell office:value-type="float" office:value="0.01310886">
                <text:p>0.0131088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5.799224853516">
                <text:p>355.799224853516</text:p>
              </table:table-cell>
              <table:table-cell office:value-type="float" office:value="0.0140611">
                <text:p>0.01406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5.908874511719">
                <text:p>355.908874511719</text:p>
              </table:table-cell>
              <table:table-cell office:value-type="float" office:value="-0.006094831">
                <text:p>-0.00609483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6.018524169922">
                <text:p>356.018524169922</text:p>
              </table:table-cell>
              <table:table-cell office:value-type="float" office:value="0.01008757">
                <text:p>0.0100875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6.128173828125">
                <text:p>356.128173828125</text:p>
              </table:table-cell>
              <table:table-cell office:value-type="float" office:value="-0.002525067">
                <text:p>-0.0025250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6.237823486328">
                <text:p>356.237823486328</text:p>
              </table:table-cell>
              <table:table-cell office:value-type="float" office:value="-0.005051448">
                <text:p>-0.0050514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6.347503662109">
                <text:p>356.347503662109</text:p>
              </table:table-cell>
              <table:table-cell office:value-type="float" office:value="0.003856611">
                <text:p>0.0038566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56.457183837891">
                <text:p>356.457183837891</text:p>
              </table:table-cell>
              <table:table-cell office:value-type="float" office:value="0.002951097">
                <text:p>0.00295109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56.566864013672">
                <text:p>356.566864013672</text:p>
              </table:table-cell>
              <table:table-cell office:value-type="float" office:value="0.0008024458">
                <text:p>0.00080244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56.676544189453">
                <text:p>356.676544189453</text:p>
              </table:table-cell>
              <table:table-cell office:value-type="float" office:value="-0.005792874">
                <text:p>-0.00579287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6.786224365234">
                <text:p>356.786224365234</text:p>
              </table:table-cell>
              <table:table-cell office:value-type="float" office:value="-0.005938896">
                <text:p>-0.0059388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6.895935058594">
                <text:p>356.895935058594</text:p>
              </table:table-cell>
              <table:table-cell office:value-type="float" office:value="-0.006304849">
                <text:p>-0.00630484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7.005645751953">
                <text:p>357.005645751953</text:p>
              </table:table-cell>
              <table:table-cell office:value-type="float" office:value="-0.007800184">
                <text:p>-0.00780018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7.115356445313">
                <text:p>357.115356445313</text:p>
              </table:table-cell>
              <table:table-cell office:value-type="float" office:value="0.0004575243">
                <text:p>0.000457524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7.225067138672">
                <text:p>357.225067138672</text:p>
              </table:table-cell>
              <table:table-cell office:value-type="float" office:value="0.005663601">
                <text:p>0.0056636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7.334777832031">
                <text:p>357.334777832031</text:p>
              </table:table-cell>
              <table:table-cell office:value-type="float" office:value="0.004533418">
                <text:p>0.00453341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7.444519042969">
                <text:p>357.444519042969</text:p>
              </table:table-cell>
              <table:table-cell office:value-type="float" office:value="0.008494542">
                <text:p>0.00849454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7.554260253906">
                <text:p>357.554260253906</text:p>
              </table:table-cell>
              <table:table-cell office:value-type="float" office:value="-0.00253171">
                <text:p>-0.0025317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7.664001464844">
                <text:p>357.664001464844</text:p>
              </table:table-cell>
              <table:table-cell office:value-type="float" office:value="0.000318108">
                <text:p>0.00031810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7.773742675781">
                <text:p>357.773742675781</text:p>
              </table:table-cell>
              <table:table-cell office:value-type="float" office:value="0.01525704">
                <text:p>0.015257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7.883514404297">
                <text:p>357.883514404297</text:p>
              </table:table-cell>
              <table:table-cell office:value-type="float" office:value="0.00155806">
                <text:p>0.001558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7.993286132813">
                <text:p>357.993286132813</text:p>
              </table:table-cell>
              <table:table-cell office:value-type="float" office:value="-0.000897151">
                <text:p>-0.00089715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8.10302734375">
                <text:p>358.10302734375</text:p>
              </table:table-cell>
              <table:table-cell office:value-type="float" office:value="0.009784957">
                <text:p>0.00978495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8.212829589844">
                <text:p>358.212829589844</text:p>
              </table:table-cell>
              <table:table-cell office:value-type="float" office:value="0.01053559">
                <text:p>0.0105355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8.322601318359">
                <text:p>358.322601318359</text:p>
              </table:table-cell>
              <table:table-cell office:value-type="float" office:value="0.002225321">
                <text:p>0.0022253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8.432373046875">
                <text:p>358.432373046875</text:p>
              </table:table-cell>
              <table:table-cell office:value-type="float" office:value="0.007692491">
                <text:p>0.00769249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8.542175292969">
                <text:p>358.542175292969</text:p>
              </table:table-cell>
              <table:table-cell office:value-type="float" office:value="-0.005529656">
                <text:p>-0.00552965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8.651977539063">
                <text:p>358.651977539063</text:p>
              </table:table-cell>
              <table:table-cell office:value-type="float" office:value="0.001869667">
                <text:p>0.0018696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8.761779785156">
                <text:p>358.761779785156</text:p>
              </table:table-cell>
              <table:table-cell office:value-type="float" office:value="0.009471922">
                <text:p>0.00947192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8.871612548828">
                <text:p>358.871612548828</text:p>
              </table:table-cell>
              <table:table-cell office:value-type="float" office:value="-0.004874605">
                <text:p>-0.00487460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8.981414794922">
                <text:p>358.981414794922</text:p>
              </table:table-cell>
              <table:table-cell office:value-type="float" office:value="0.003069639">
                <text:p>0.00306963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9.091247558594">
                <text:p>359.091247558594</text:p>
              </table:table-cell>
              <table:table-cell office:value-type="float" office:value="0.01551406">
                <text:p>0.0155140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9.201080322266">
                <text:p>359.201080322266</text:p>
              </table:table-cell>
              <table:table-cell office:value-type="float" office:value="0.005290224">
                <text:p>0.0052902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9.310913085938">
                <text:p>359.310913085938</text:p>
              </table:table-cell>
              <table:table-cell office:value-type="float" office:value="0.002313016">
                <text:p>0.0023130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9.420776367188">
                <text:p>359.420776367188</text:p>
              </table:table-cell>
              <table:table-cell office:value-type="float" office:value="-0.008637774">
                <text:p>-0.00863777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9.530609130859">
                <text:p>359.530609130859</text:p>
              </table:table-cell>
              <table:table-cell office:value-type="float" office:value="0.01273985">
                <text:p>0.0127398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9.640472412109">
                <text:p>359.640472412109</text:p>
              </table:table-cell>
              <table:table-cell office:value-type="float" office:value="0.0005972027">
                <text:p>0.000597202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9.750335693359">
                <text:p>359.750335693359</text:p>
              </table:table-cell>
              <table:table-cell office:value-type="float" office:value="-0.0007424128">
                <text:p>-0.000742412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9.860198974609">
                <text:p>359.860198974609</text:p>
              </table:table-cell>
              <table:table-cell office:value-type="float" office:value="0.00105421">
                <text:p>0.0010542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9.970092773438">
                <text:p>359.970092773438</text:p>
              </table:table-cell>
              <table:table-cell office:value-type="float" office:value="0.007062276">
                <text:p>0.00706227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0.079986572266">
                <text:p>360.079986572266</text:p>
              </table:table-cell>
              <table:table-cell office:value-type="float" office:value="-0.005037437">
                <text:p>-0.00503743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0.189849853516">
                <text:p>360.189849853516</text:p>
              </table:table-cell>
              <table:table-cell office:value-type="float" office:value="0.01274977">
                <text:p>0.0127497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0.299743652344">
                <text:p>360.299743652344</text:p>
              </table:table-cell>
              <table:table-cell office:value-type="float" office:value="0.01104363">
                <text:p>0.011043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0.40966796875">
                <text:p>360.40966796875</text:p>
              </table:table-cell>
              <table:table-cell office:value-type="float" office:value="0.009075961">
                <text:p>0.00907596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0.519561767578">
                <text:p>360.519561767578</text:p>
              </table:table-cell>
              <table:table-cell office:value-type="float" office:value="0.003178399">
                <text:p>0.00317839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.629486083984">
                <text:p>360.629486083984</text:p>
              </table:table-cell>
              <table:table-cell office:value-type="float" office:value="0.002923231">
                <text:p>0.00292323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.739410400391">
                <text:p>360.739410400391</text:p>
              </table:table-cell>
              <table:table-cell office:value-type="float" office:value="-0.003075695">
                <text:p>-0.00307569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0.849334716797">
                <text:p>360.849334716797</text:p>
              </table:table-cell>
              <table:table-cell office:value-type="float" office:value="0.00670083">
                <text:p>0.0067008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0.959259033203">
                <text:p>360.959259033203</text:p>
              </table:table-cell>
              <table:table-cell office:value-type="float" office:value="-0.007537764">
                <text:p>-0.0075377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1.069213867188">
                <text:p>361.069213867188</text:p>
              </table:table-cell>
              <table:table-cell office:value-type="float" office:value="-0.0006295093">
                <text:p>-0.000629509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1.179168701172">
                <text:p>361.179168701172</text:p>
              </table:table-cell>
              <table:table-cell office:value-type="float" office:value="0.0002511376">
                <text:p>0.00025113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1.289093017578">
                <text:p>361.289093017578</text:p>
              </table:table-cell>
              <table:table-cell office:value-type="float" office:value="0.002065818">
                <text:p>0.00206581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1.399078369141">
                <text:p>361.399078369141</text:p>
              </table:table-cell>
              <table:table-cell office:value-type="float" office:value="0.004637341">
                <text:p>0.00463734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1.509033203125">
                <text:p>361.509033203125</text:p>
              </table:table-cell>
              <table:table-cell office:value-type="float" office:value="-0.005579893">
                <text:p>-0.00557989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1.619018554688">
                <text:p>361.619018554688</text:p>
              </table:table-cell>
              <table:table-cell office:value-type="float" office:value="-0.004334997">
                <text:p>-0.00433499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1.728973388672">
                <text:p>361.728973388672</text:p>
              </table:table-cell>
              <table:table-cell office:value-type="float" office:value="0.008927229">
                <text:p>0.00892722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1.838958740234">
                <text:p>361.838958740234</text:p>
              </table:table-cell>
              <table:table-cell office:value-type="float" office:value="0.003404615">
                <text:p>0.0034046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1.948944091797">
                <text:p>361.948944091797</text:p>
              </table:table-cell>
              <table:table-cell office:value-type="float" office:value="0.0004285723">
                <text:p>0.00042857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62.058959960938">
                <text:p>362.058959960938</text:p>
              </table:table-cell>
              <table:table-cell office:value-type="float" office:value="-0.000343826">
                <text:p>-0.00034382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2.1689453125">
                <text:p>362.1689453125</text:p>
              </table:table-cell>
              <table:table-cell office:value-type="float" office:value="0.003923807">
                <text:p>0.00392380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62.278961181641">
                <text:p>362.278961181641</text:p>
              </table:table-cell>
              <table:table-cell office:value-type="float" office:value="0.01712961">
                <text:p>0.0171296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62.388977050781">
                <text:p>362.388977050781</text:p>
              </table:table-cell>
              <table:table-cell office:value-type="float" office:value="0.01008911">
                <text:p>0.010089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2.498992919922">
                <text:p>362.498992919922</text:p>
              </table:table-cell>
              <table:table-cell office:value-type="float" office:value="-0.0009704972">
                <text:p>-0.000970497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62.609039306641">
                <text:p>362.609039306641</text:p>
              </table:table-cell>
              <table:table-cell office:value-type="float" office:value="-0.001038059">
                <text:p>-0.0010380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2.719055175781">
                <text:p>362.719055175781</text:p>
              </table:table-cell>
              <table:table-cell office:value-type="float" office:value="0.00816305">
                <text:p>0.008163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62.8291015625">
                <text:p>362.8291015625</text:p>
              </table:table-cell>
              <table:table-cell office:value-type="float" office:value="0.01193168">
                <text:p>0.0119316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62.939147949219">
                <text:p>362.939147949219</text:p>
              </table:table-cell>
              <table:table-cell office:value-type="float" office:value="0.0008143734">
                <text:p>0.000814373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63.049224853516">
                <text:p>363.049224853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3.159271240234">
                <text:p>363.159271240234</text:p>
              </table:table-cell>
              <table:table-cell office:value-type="float" office:value="-0.0005264754">
                <text:p>-0.000526475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63.269348144531">
                <text:p>363.269348144531</text:p>
              </table:table-cell>
              <table:table-cell office:value-type="float" office:value="0.006556598">
                <text:p>0.00655659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63.37939453125">
                <text:p>363.37939453125</text:p>
              </table:table-cell>
              <table:table-cell office:value-type="float" office:value="0.006048236">
                <text:p>0.00604823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63.489501953125">
                <text:p>363.489501953125</text:p>
              </table:table-cell>
              <table:table-cell office:value-type="float" office:value="-0.005680386">
                <text:p>-0.00568038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63.599578857422">
                <text:p>363.599578857422</text:p>
              </table:table-cell>
              <table:table-cell office:value-type="float" office:value="0.01377872">
                <text:p>0.0137787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63.709655761719">
                <text:p>363.709655761719</text:p>
              </table:table-cell>
              <table:table-cell office:value-type="float" office:value="0.00849454">
                <text:p>0.0084945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63.819763183594">
                <text:p>363.819763183594</text:p>
              </table:table-cell>
              <table:table-cell office:value-type="float" office:value="0.005888288">
                <text:p>0.0058882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63.929870605469">
                <text:p>363.929870605469</text:p>
              </table:table-cell>
              <table:table-cell office:value-type="float" office:value="-0.004548237">
                <text:p>-0.00454823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64.039978027344">
                <text:p>364.039978027344</text:p>
              </table:table-cell>
              <table:table-cell office:value-type="float" office:value="-0.005357035">
                <text:p>-0.0053570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64.150085449219">
                <text:p>364.150085449219</text:p>
              </table:table-cell>
              <table:table-cell office:value-type="float" office:value="-0.003625395">
                <text:p>-0.00362539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64.260223388672">
                <text:p>364.260223388672</text:p>
              </table:table-cell>
              <table:table-cell office:value-type="float" office:value="-0.001714478">
                <text:p>-0.00171447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64.370330810547">
                <text:p>364.370330810547</text:p>
              </table:table-cell>
              <table:table-cell office:value-type="float" office:value="-0.004912766">
                <text:p>-0.00491276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64.48046875">
                <text:p>364.48046875</text:p>
              </table:table-cell>
              <table:table-cell office:value-type="float" office:value="0.00733721">
                <text:p>0.0073372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64.590606689453">
                <text:p>364.590606689453</text:p>
              </table:table-cell>
              <table:table-cell office:value-type="float" office:value="0.009649307">
                <text:p>0.00964930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64.700775146484">
                <text:p>364.700775146484</text:p>
              </table:table-cell>
              <table:table-cell office:value-type="float" office:value="0.003422785">
                <text:p>0.00342278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64.810913085938">
                <text:p>364.810913085938</text:p>
              </table:table-cell>
              <table:table-cell office:value-type="float" office:value="0.01339269">
                <text:p>0.0133926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64.921081542969">
                <text:p>364.921081542969</text:p>
              </table:table-cell>
              <table:table-cell office:value-type="float" office:value="-0.003567991">
                <text:p>-0.00356799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65.03125">
                <text:p>365.03125</text:p>
              </table:table-cell>
              <table:table-cell office:value-type="float" office:value="-0.006045075">
                <text:p>-0.0060450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65.141418457031">
                <text:p>365.141418457031</text:p>
              </table:table-cell>
              <table:table-cell office:value-type="float" office:value="-0.008467493">
                <text:p>-0.00846749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65.251586914063">
                <text:p>365.251586914063</text:p>
              </table:table-cell>
              <table:table-cell office:value-type="float" office:value="0.009792005">
                <text:p>0.0097920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65.361785888672">
                <text:p>365.361785888672</text:p>
              </table:table-cell>
              <table:table-cell office:value-type="float" office:value="0.02712235">
                <text:p>0.0271223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5.471984863281">
                <text:p>365.471984863281</text:p>
              </table:table-cell>
              <table:table-cell office:value-type="float" office:value="0.004259901">
                <text:p>0.0042599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65.582183837891">
                <text:p>365.582183837891</text:p>
              </table:table-cell>
              <table:table-cell office:value-type="float" office:value="0.007950968">
                <text:p>0.00795096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65.6923828125">
                <text:p>365.6923828125</text:p>
              </table:table-cell>
              <table:table-cell office:value-type="float" office:value="0.00945958">
                <text:p>0.0094595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65.802581787109">
                <text:p>365.802581787109</text:p>
              </table:table-cell>
              <table:table-cell office:value-type="float" office:value="0.0002474745">
                <text:p>0.000247474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5.912811279297">
                <text:p>365.912811279297</text:p>
              </table:table-cell>
              <table:table-cell office:value-type="float" office:value="0.009878839">
                <text:p>0.00987883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66.023010253906">
                <text:p>366.023010253906</text:p>
              </table:table-cell>
              <table:table-cell office:value-type="float" office:value="0.004317726">
                <text:p>0.00431772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66.133239746094">
                <text:p>366.133239746094</text:p>
              </table:table-cell>
              <table:table-cell office:value-type="float" office:value="0.005655117">
                <text:p>0.00565511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66.243499755859">
                <text:p>366.243499755859</text:p>
              </table:table-cell>
              <table:table-cell office:value-type="float" office:value="-0.001117239">
                <text:p>-0.0011172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66.353729248047">
                <text:p>366.353729248047</text:p>
              </table:table-cell>
              <table:table-cell office:value-type="float" office:value="0.000990644">
                <text:p>0.00099064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66.463989257813">
                <text:p>366.463989257813</text:p>
              </table:table-cell>
              <table:table-cell office:value-type="float" office:value="-0.0002817525">
                <text:p>-0.00028175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6.57421875">
                <text:p>366.57421875</text:p>
              </table:table-cell>
              <table:table-cell office:value-type="float" office:value="0.002384494">
                <text:p>0.00238449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66.684478759766">
                <text:p>366.684478759766</text:p>
              </table:table-cell>
              <table:table-cell office:value-type="float" office:value="-0.0007445444">
                <text:p>-0.000744544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66.794738769531">
                <text:p>366.794738769531</text:p>
              </table:table-cell>
              <table:table-cell office:value-type="float" office:value="0.009767124">
                <text:p>0.0097671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66.905029296875">
                <text:p>366.905029296875</text:p>
              </table:table-cell>
              <table:table-cell office:value-type="float" office:value="-0.00285587">
                <text:p>-0.0028558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67.015289306641">
                <text:p>367.015289306641</text:p>
              </table:table-cell>
              <table:table-cell office:value-type="float" office:value="0.0008647979">
                <text:p>0.000864797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67.125579833984">
                <text:p>367.125579833984</text:p>
              </table:table-cell>
              <table:table-cell office:value-type="float" office:value="0.01144463">
                <text:p>0.0114446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67.235870361328">
                <text:p>367.235870361328</text:p>
              </table:table-cell>
              <table:table-cell office:value-type="float" office:value="0.01459686">
                <text:p>0.0145968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67.346160888672">
                <text:p>367.346160888672</text:p>
              </table:table-cell>
              <table:table-cell office:value-type="float" office:value="0.0181836">
                <text:p>0.018183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67.456481933594">
                <text:p>367.456481933594</text:p>
              </table:table-cell>
              <table:table-cell office:value-type="float" office:value="0.01002458">
                <text:p>0.0100245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67.566772460938">
                <text:p>367.566772460938</text:p>
              </table:table-cell>
              <table:table-cell office:value-type="float" office:value="-0.004919867">
                <text:p>-0.00491986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67.677093505859">
                <text:p>367.677093505859</text:p>
              </table:table-cell>
              <table:table-cell office:value-type="float" office:value="-0.001323953">
                <text:p>-0.00132395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67.787414550781">
                <text:p>367.787414550781</text:p>
              </table:table-cell>
              <table:table-cell office:value-type="float" office:value="-0.006449461">
                <text:p>-0.00644946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67.897766113281">
                <text:p>367.897766113281</text:p>
              </table:table-cell>
              <table:table-cell office:value-type="float" office:value="-0.007589847">
                <text:p>-0.00758984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68.008087158203">
                <text:p>368.008087158203</text:p>
              </table:table-cell>
              <table:table-cell office:value-type="float" office:value="0.00122886">
                <text:p>0.0012288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68.118438720703">
                <text:p>368.118438720703</text:p>
              </table:table-cell>
              <table:table-cell office:value-type="float" office:value="-0.002142299">
                <text:p>-0.00214229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68.228759765625">
                <text:p>368.228759765625</text:p>
              </table:table-cell>
              <table:table-cell office:value-type="float" office:value="0.000529543">
                <text:p>0.00052954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68.339111328125">
                <text:p>368.339111328125</text:p>
              </table:table-cell>
              <table:table-cell office:value-type="float" office:value="-0.0006596706">
                <text:p>-0.000659670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68.449493408203">
                <text:p>368.449493408203</text:p>
              </table:table-cell>
              <table:table-cell office:value-type="float" office:value="0.003317141">
                <text:p>0.00331714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68.559844970703">
                <text:p>368.559844970703</text:p>
              </table:table-cell>
              <table:table-cell office:value-type="float" office:value="0.008181071">
                <text:p>0.00818107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68.670227050781">
                <text:p>368.670227050781</text:p>
              </table:table-cell>
              <table:table-cell office:value-type="float" office:value="-0.006271926">
                <text:p>-0.00627192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68.780609130859">
                <text:p>368.780609130859</text:p>
              </table:table-cell>
              <table:table-cell office:value-type="float" office:value="-0.002591591">
                <text:p>-0.00259159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8.890991210938">
                <text:p>368.890991210938</text:p>
              </table:table-cell>
              <table:table-cell office:value-type="float" office:value="-0.009941499">
                <text:p>-0.00994149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69.001373291016">
                <text:p>369.001373291016</text:p>
              </table:table-cell>
              <table:table-cell office:value-type="float" office:value="0.0007081014">
                <text:p>0.000708101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69.111755371094">
                <text:p>369.111755371094</text:p>
              </table:table-cell>
              <table:table-cell office:value-type="float" office:value="-0.007994819">
                <text:p>-0.00799481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69.22216796875">
                <text:p>369.22216796875</text:p>
              </table:table-cell>
              <table:table-cell office:value-type="float" office:value="-0.007932254">
                <text:p>-0.00793225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69.332580566406">
                <text:p>369.332580566406</text:p>
              </table:table-cell>
              <table:table-cell office:value-type="float" office:value="-0.00768612">
                <text:p>-0.0076861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69.442993164063">
                <text:p>369.442993164063</text:p>
              </table:table-cell>
              <table:table-cell office:value-type="float" office:value="-0.0002427016">
                <text:p>-0.00024270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69.553405761719">
                <text:p>369.553405761719</text:p>
              </table:table-cell>
              <table:table-cell office:value-type="float" office:value="0.003432789">
                <text:p>0.00343278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69.663848876953">
                <text:p>369.663848876953</text:p>
              </table:table-cell>
              <table:table-cell office:value-type="float" office:value="0.006503903">
                <text:p>0.00650390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69.774261474609">
                <text:p>369.774261474609</text:p>
              </table:table-cell>
              <table:table-cell office:value-type="float" office:value="-0.0032749">
                <text:p>-0.003274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69.884704589844">
                <text:p>369.884704589844</text:p>
              </table:table-cell>
              <table:table-cell office:value-type="float" office:value="0.003709417">
                <text:p>0.0037094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69.995147705078">
                <text:p>369.995147705078</text:p>
              </table:table-cell>
              <table:table-cell office:value-type="float" office:value="-0.005327848">
                <text:p>-0.00532784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70.105621337891">
                <text:p>370.105621337891</text:p>
              </table:table-cell>
              <table:table-cell office:value-type="float" office:value="0.01015899">
                <text:p>0.0101589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70.216064453125">
                <text:p>370.216064453125</text:p>
              </table:table-cell>
              <table:table-cell office:value-type="float" office:value="0.008252679">
                <text:p>0.00825267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70.326538085938">
                <text:p>370.326538085938</text:p>
              </table:table-cell>
              <table:table-cell office:value-type="float" office:value="0.01949603">
                <text:p>0.0194960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70.43701171875">
                <text:p>370.43701171875</text:p>
              </table:table-cell>
              <table:table-cell office:value-type="float" office:value="0.01178589">
                <text:p>0.0117858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70.547485351563">
                <text:p>370.547485351563</text:p>
              </table:table-cell>
              <table:table-cell office:value-type="float" office:value="0.00316433">
                <text:p>0.0031643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70.657958984375">
                <text:p>370.657958984375</text:p>
              </table:table-cell>
              <table:table-cell office:value-type="float" office:value="-0.004060582">
                <text:p>-0.0040605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70.768432617188">
                <text:p>370.768432617188</text:p>
              </table:table-cell>
              <table:table-cell office:value-type="float" office:value="-0.008303381">
                <text:p>-0.00830338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70.878936767578">
                <text:p>370.878936767578</text:p>
              </table:table-cell>
              <table:table-cell office:value-type="float" office:value="0.005685446">
                <text:p>0.00568544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70.989440917969">
                <text:p>370.989440917969</text:p>
              </table:table-cell>
              <table:table-cell office:value-type="float" office:value="-0.005659539">
                <text:p>-0.00565953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71.099945068359">
                <text:p>371.099945068359</text:p>
              </table:table-cell>
              <table:table-cell office:value-type="float" office:value="0.004266073">
                <text:p>0.00426607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71.21044921875">
                <text:p>371.21044921875</text:p>
              </table:table-cell>
              <table:table-cell office:value-type="float" office:value="-0.00510477">
                <text:p>-0.0051047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71.320983886719">
                <text:p>371.320983886719</text:p>
              </table:table-cell>
              <table:table-cell office:value-type="float" office:value="-0.004126201">
                <text:p>-0.00412620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71.431488037109">
                <text:p>371.431488037109</text:p>
              </table:table-cell>
              <table:table-cell office:value-type="float" office:value="0.001603457">
                <text:p>0.00160345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71.542022705078">
                <text:p>371.542022705078</text:p>
              </table:table-cell>
              <table:table-cell office:value-type="float" office:value="0.01234295">
                <text:p>0.0123429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71.652557373047">
                <text:p>371.652557373047</text:p>
              </table:table-cell>
              <table:table-cell office:value-type="float" office:value="-0.006708577">
                <text:p>-0.00670857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71.763122558594">
                <text:p>371.763122558594</text:p>
              </table:table-cell>
              <table:table-cell office:value-type="float" office:value="-0.003838435">
                <text:p>-0.00383843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71.873657226563">
                <text:p>371.873657226563</text:p>
              </table:table-cell>
              <table:table-cell office:value-type="float" office:value="-0.006601987">
                <text:p>-0.00660198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71.984222412109">
                <text:p>371.984222412109</text:p>
              </table:table-cell>
              <table:table-cell office:value-type="float" office:value="0.003875051">
                <text:p>0.00387505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72.094787597656">
                <text:p>372.094787597656</text:p>
              </table:table-cell>
              <table:table-cell office:value-type="float" office:value="-0.004379979">
                <text:p>-0.00437997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72.205352783203">
                <text:p>372.205352783203</text:p>
              </table:table-cell>
              <table:table-cell office:value-type="float" office:value="-0.004827522">
                <text:p>-0.00482752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72.31591796875">
                <text:p>372.31591796875</text:p>
              </table:table-cell>
              <table:table-cell office:value-type="float" office:value="-0.004840433">
                <text:p>-0.0048404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72.426513671875">
                <text:p>372.426513671875</text:p>
              </table:table-cell>
              <table:table-cell office:value-type="float" office:value="-0.0005085172">
                <text:p>-0.000508517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72.537078857422">
                <text:p>372.537078857422</text:p>
              </table:table-cell>
              <table:table-cell office:value-type="float" office:value="0.00295158">
                <text:p>0.0029515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72.647674560547">
                <text:p>372.647674560547</text:p>
              </table:table-cell>
              <table:table-cell office:value-type="float" office:value="-0.009633902">
                <text:p>-0.0096339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72.758270263672">
                <text:p>372.758270263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72.868896484375">
                <text:p>372.868896484375</text:p>
              </table:table-cell>
              <table:table-cell office:value-type="float" office:value="0.00565043">
                <text:p>0.0056504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72.9794921875">
                <text:p>372.9794921875</text:p>
              </table:table-cell>
              <table:table-cell office:value-type="float" office:value="-0.009548182">
                <text:p>-0.00954818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73.090118408203">
                <text:p>373.090118408203</text:p>
              </table:table-cell>
              <table:table-cell office:value-type="float" office:value="-0.00131032">
                <text:p>-0.0013103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73.200744628906">
                <text:p>373.200744628906</text:p>
              </table:table-cell>
              <table:table-cell office:value-type="float" office:value="0.02870893">
                <text:p>0.0287089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73.311370849609">
                <text:p>373.311370849609</text:p>
              </table:table-cell>
              <table:table-cell office:value-type="float" office:value="-0.0007643011">
                <text:p>-0.000764301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73.421997070313">
                <text:p>373.421997070313</text:p>
              </table:table-cell>
              <table:table-cell office:value-type="float" office:value="0.001032608">
                <text:p>0.00103260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73.532623291016">
                <text:p>373.532623291016</text:p>
              </table:table-cell>
              <table:table-cell office:value-type="float" office:value="-0.006619519">
                <text:p>-0.00661951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73.643280029297">
                <text:p>373.643280029297</text:p>
              </table:table-cell>
              <table:table-cell office:value-type="float" office:value="0.01101484">
                <text:p>0.0110148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73.753936767578">
                <text:p>373.753936767578</text:p>
              </table:table-cell>
              <table:table-cell office:value-type="float" office:value="0.007883898">
                <text:p>0.00788389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73.864593505859">
                <text:p>373.864593505859</text:p>
              </table:table-cell>
              <table:table-cell office:value-type="float" office:value="-0.00436131">
                <text:p>-0.0043613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73.975250244141">
                <text:p>373.975250244141</text:p>
              </table:table-cell>
              <table:table-cell office:value-type="float" office:value="0.00101785">
                <text:p>0.0010178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4.0859375">
                <text:p>374.0859375</text:p>
              </table:table-cell>
              <table:table-cell office:value-type="float" office:value="-0.004224106">
                <text:p>-0.00422410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4.196624755859">
                <text:p>374.196624755859</text:p>
              </table:table-cell>
              <table:table-cell office:value-type="float" office:value="-0.007509917">
                <text:p>-0.00750991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74.307281494141">
                <text:p>374.307281494141</text:p>
              </table:table-cell>
              <table:table-cell office:value-type="float" office:value="-0.001845941">
                <text:p>-0.0018459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74.417999267578">
                <text:p>374.417999267578</text:p>
              </table:table-cell>
              <table:table-cell office:value-type="float" office:value="-0.004368927">
                <text:p>-0.00436892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74.528686523438">
                <text:p>374.528686523438</text:p>
              </table:table-cell>
              <table:table-cell office:value-type="float" office:value="0.006794676">
                <text:p>0.00679467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74.639373779297">
                <text:p>374.639373779297</text:p>
              </table:table-cell>
              <table:table-cell office:value-type="float" office:value="0.009464107">
                <text:p>0.00946410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74.750091552734">
                <text:p>374.750091552734</text:p>
              </table:table-cell>
              <table:table-cell office:value-type="float" office:value="-0.00366806">
                <text:p>-0.0036680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4.860809326172">
                <text:p>374.860809326172</text:p>
              </table:table-cell>
              <table:table-cell office:value-type="float" office:value="-0.00166556">
                <text:p>-0.001665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74.971527099609">
                <text:p>374.971527099609</text:p>
              </table:table-cell>
              <table:table-cell office:value-type="float" office:value="0.0004209818">
                <text:p>0.000420981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75.082244873047">
                <text:p>375.082244873047</text:p>
              </table:table-cell>
              <table:table-cell office:value-type="float" office:value="-0.0004137044">
                <text:p>-0.000413704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75.192993164063">
                <text:p>375.192993164063</text:p>
              </table:table-cell>
              <table:table-cell office:value-type="float" office:value="-0.003573486">
                <text:p>-0.00357348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75.3037109375">
                <text:p>375.3037109375</text:p>
              </table:table-cell>
              <table:table-cell office:value-type="float" office:value="-0.00795507">
                <text:p>-0.0079550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75.414459228516">
                <text:p>375.414459228516</text:p>
              </table:table-cell>
              <table:table-cell office:value-type="float" office:value="0.003233223">
                <text:p>0.00323322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75.525207519531">
                <text:p>375.525207519531</text:p>
              </table:table-cell>
              <table:table-cell office:value-type="float" office:value="-0.000775255">
                <text:p>-0.00077525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75.635986328125">
                <text:p>375.635986328125</text:p>
              </table:table-cell>
              <table:table-cell office:value-type="float" office:value="0.007281995">
                <text:p>0.0072819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75.746734619141">
                <text:p>375.746734619141</text:p>
              </table:table-cell>
              <table:table-cell office:value-type="float" office:value="-0.0003221153">
                <text:p>-0.000322115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75.857513427734">
                <text:p>375.857513427734</text:p>
              </table:table-cell>
              <table:table-cell office:value-type="float" office:value="-0.002968635">
                <text:p>-0.00296863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75.968292236328">
                <text:p>375.968292236328</text:p>
              </table:table-cell>
              <table:table-cell office:value-type="float" office:value="-0.002039113">
                <text:p>-0.00203911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76.079071044922">
                <text:p>376.079071044922</text:p>
              </table:table-cell>
              <table:table-cell office:value-type="float" office:value="-0.005497966">
                <text:p>-0.00549796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76.189849853516">
                <text:p>376.189849853516</text:p>
              </table:table-cell>
              <table:table-cell office:value-type="float" office:value="0.001644838">
                <text:p>0.00164483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76.300628662109">
                <text:p>376.300628662109</text:p>
              </table:table-cell>
              <table:table-cell office:value-type="float" office:value="-0.001977131">
                <text:p>-0.00197713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76.411437988281">
                <text:p>376.411437988281</text:p>
              </table:table-cell>
              <table:table-cell office:value-type="float" office:value="-0.009500905">
                <text:p>-0.00950090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76.522247314453">
                <text:p>376.522247314453</text:p>
              </table:table-cell>
              <table:table-cell office:value-type="float" office:value="0.0006102982">
                <text:p>0.000610298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76.633056640625">
                <text:p>376.633056640625</text:p>
              </table:table-cell>
              <table:table-cell office:value-type="float" office:value="-0.0008028664">
                <text:p>-0.000802866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76.743865966797">
                <text:p>376.743865966797</text:p>
              </table:table-cell>
              <table:table-cell office:value-type="float" office:value="0.001811606">
                <text:p>0.00181160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76.854705810547">
                <text:p>376.854705810547</text:p>
              </table:table-cell>
              <table:table-cell office:value-type="float" office:value="0.01301398">
                <text:p>0.0130139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76.965515136719">
                <text:p>376.965515136719</text:p>
              </table:table-cell>
              <table:table-cell office:value-type="float" office:value="0.01439867">
                <text:p>0.0143986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77.076354980469">
                <text:p>377.076354980469</text:p>
              </table:table-cell>
              <table:table-cell office:value-type="float" office:value="-0.004660558">
                <text:p>-0.00466055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77.187194824219">
                <text:p>377.187194824219</text:p>
              </table:table-cell>
              <table:table-cell office:value-type="float" office:value="0.004685406">
                <text:p>0.00468540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77.298034667969">
                <text:p>377.298034667969</text:p>
              </table:table-cell>
              <table:table-cell office:value-type="float" office:value="-0.006707689">
                <text:p>-0.00670768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77.408905029297">
                <text:p>377.408905029297</text:p>
              </table:table-cell>
              <table:table-cell office:value-type="float" office:value="0.007754537">
                <text:p>0.00775453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77.519744873047">
                <text:p>377.519744873047</text:p>
              </table:table-cell>
              <table:table-cell office:value-type="float" office:value="-0.004532659">
                <text:p>-0.00453265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77.630615234375">
                <text:p>377.630615234375</text:p>
              </table:table-cell>
              <table:table-cell office:value-type="float" office:value="0.001860949">
                <text:p>0.00186094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77.741485595703">
                <text:p>377.741485595703</text:p>
              </table:table-cell>
              <table:table-cell office:value-type="float" office:value="-0.004139547">
                <text:p>-0.00413954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77.852355957031">
                <text:p>377.852355957031</text:p>
              </table:table-cell>
              <table:table-cell office:value-type="float" office:value="-0.005464846">
                <text:p>-0.00546484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77.963256835938">
                <text:p>377.963256835938</text:p>
              </table:table-cell>
              <table:table-cell office:value-type="float" office:value="-0.002390416">
                <text:p>-0.00239041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78.074157714844">
                <text:p>378.074157714844</text:p>
              </table:table-cell>
              <table:table-cell office:value-type="float" office:value="0.01203729">
                <text:p>0.0120372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78.185028076172">
                <text:p>378.185028076172</text:p>
              </table:table-cell>
              <table:table-cell office:value-type="float" office:value="0.01021102">
                <text:p>0.0102110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78.295928955078">
                <text:p>378.295928955078</text:p>
              </table:table-cell>
              <table:table-cell office:value-type="float" office:value="-0.00644411">
                <text:p>-0.0064441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78.406860351563">
                <text:p>378.406860351563</text:p>
              </table:table-cell>
              <table:table-cell office:value-type="float" office:value="0.0004934812">
                <text:p>0.000493481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78.517761230469">
                <text:p>378.517761230469</text:p>
              </table:table-cell>
              <table:table-cell office:value-type="float" office:value="0.004942137">
                <text:p>0.00494213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78.628692626953">
                <text:p>378.628692626953</text:p>
              </table:table-cell>
              <table:table-cell office:value-type="float" office:value="0.001353854">
                <text:p>0.00135385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78.739593505859">
                <text:p>378.739593505859</text:p>
              </table:table-cell>
              <table:table-cell office:value-type="float" office:value="0.0016396">
                <text:p>0.001639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78.850524902344">
                <text:p>378.850524902344</text:p>
              </table:table-cell>
              <table:table-cell office:value-type="float" office:value="0.003274119">
                <text:p>0.00327411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78.961486816406">
                <text:p>378.961486816406</text:p>
              </table:table-cell>
              <table:table-cell office:value-type="float" office:value="0.004471142">
                <text:p>0.00447114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79.072418212891">
                <text:p>379.072418212891</text:p>
              </table:table-cell>
              <table:table-cell office:value-type="float" office:value="0.009501534">
                <text:p>0.00950153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79.183380126953">
                <text:p>379.183380126953</text:p>
              </table:table-cell>
              <table:table-cell office:value-type="float" office:value="-0.006644137">
                <text:p>-0.00664413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79.294311523438">
                <text:p>379.294311523438</text:p>
              </table:table-cell>
              <table:table-cell office:value-type="float" office:value="0.0056388">
                <text:p>0.005638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79.4052734375">
                <text:p>379.4052734375</text:p>
              </table:table-cell>
              <table:table-cell office:value-type="float" office:value="-0.008857199">
                <text:p>-0.00885719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79.516235351563">
                <text:p>379.516235351563</text:p>
              </table:table-cell>
              <table:table-cell office:value-type="float" office:value="-0.006652327">
                <text:p>-0.00665232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79.627227783203">
                <text:p>379.627227783203</text:p>
              </table:table-cell>
              <table:table-cell office:value-type="float" office:value="-0.001612365">
                <text:p>-0.00161236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79.738189697266">
                <text:p>379.738189697266</text:p>
              </table:table-cell>
              <table:table-cell office:value-type="float" office:value="0.01092453">
                <text:p>0.0109245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79.849182128906">
                <text:p>379.849182128906</text:p>
              </table:table-cell>
              <table:table-cell office:value-type="float" office:value="-0.004203867">
                <text:p>-0.00420386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79.960174560547">
                <text:p>379.960174560547</text:p>
              </table:table-cell>
              <table:table-cell office:value-type="float" office:value="-0.001230558">
                <text:p>-0.00123055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80.071166992188">
                <text:p>380.071166992188</text:p>
              </table:table-cell>
              <table:table-cell office:value-type="float" office:value="-0.004220177">
                <text:p>-0.00422017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80.182189941406">
                <text:p>380.182189941406</text:p>
              </table:table-cell>
              <table:table-cell office:value-type="float" office:value="0.01136109">
                <text:p>0.0113610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80.293182373047">
                <text:p>380.293182373047</text:p>
              </table:table-cell>
              <table:table-cell office:value-type="float" office:value="0.006464233">
                <text:p>0.00646423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80.404205322266">
                <text:p>380.404205322266</text:p>
              </table:table-cell>
              <table:table-cell office:value-type="float" office:value="-0.01041846">
                <text:p>-0.0104184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80.515228271484">
                <text:p>380.515228271484</text:p>
              </table:table-cell>
              <table:table-cell office:value-type="float" office:value="-0.006640207">
                <text:p>-0.00664020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80.626251220703">
                <text:p>380.626251220703</text:p>
              </table:table-cell>
              <table:table-cell office:value-type="float" office:value="-0.0001702199">
                <text:p>-0.000170219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80.737274169922">
                <text:p>380.737274169922</text:p>
              </table:table-cell>
              <table:table-cell office:value-type="float" office:value="-0.008946376">
                <text:p>-0.00894637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80.848327636719">
                <text:p>380.848327636719</text:p>
              </table:table-cell>
              <table:table-cell office:value-type="float" office:value="0.01414554">
                <text:p>0.0141455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80.959381103516">
                <text:p>380.959381103516</text:p>
              </table:table-cell>
              <table:table-cell office:value-type="float" office:value="-0.0009802368">
                <text:p>-0.000980236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81.070404052734">
                <text:p>381.070404052734</text:p>
              </table:table-cell>
              <table:table-cell office:value-type="float" office:value="-0.004651663">
                <text:p>-0.00465166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81.181488037109">
                <text:p>381.181488037109</text:p>
              </table:table-cell>
              <table:table-cell office:value-type="float" office:value="0.0006602422">
                <text:p>0.000660242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81.292541503906">
                <text:p>381.292541503906</text:p>
              </table:table-cell>
              <table:table-cell office:value-type="float" office:value="-0.004091706">
                <text:p>-0.00409170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81.403594970703">
                <text:p>381.403594970703</text:p>
              </table:table-cell>
              <table:table-cell office:value-type="float" office:value="0.01111846">
                <text:p>0.0111184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81.514678955078">
                <text:p>381.514678955078</text:p>
              </table:table-cell>
              <table:table-cell office:value-type="float" office:value="0.01066826">
                <text:p>0.0106682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81.625762939453">
                <text:p>381.625762939453</text:p>
              </table:table-cell>
              <table:table-cell office:value-type="float" office:value="0.01164513">
                <text:p>0.0116451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81.736846923828">
                <text:p>381.736846923828</text:p>
              </table:table-cell>
              <table:table-cell office:value-type="float" office:value="0.008400283">
                <text:p>0.00840028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81.847930908203">
                <text:p>381.847930908203</text:p>
              </table:table-cell>
              <table:table-cell office:value-type="float" office:value="-0.005090719">
                <text:p>-0.00509071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81.959045410156">
                <text:p>381.959045410156</text:p>
              </table:table-cell>
              <table:table-cell office:value-type="float" office:value="0.008404244">
                <text:p>0.00840424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82.070129394531">
                <text:p>382.070129394531</text:p>
              </table:table-cell>
              <table:table-cell office:value-type="float" office:value="0.001657761">
                <text:p>0.00165776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82.181243896484">
                <text:p>382.181243896484</text:p>
              </table:table-cell>
              <table:table-cell office:value-type="float" office:value="0.005470787">
                <text:p>0.00547078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82.292358398438">
                <text:p>382.292358398438</text:p>
              </table:table-cell>
              <table:table-cell office:value-type="float" office:value="-0.003762692">
                <text:p>-0.00376269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82.403503417969">
                <text:p>382.403503417969</text:p>
              </table:table-cell>
              <table:table-cell office:value-type="float" office:value="0.004727997">
                <text:p>0.00472799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82.514617919922">
                <text:p>382.514617919922</text:p>
              </table:table-cell>
              <table:table-cell office:value-type="float" office:value="0.01551527">
                <text:p>0.0155152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82.625762939453">
                <text:p>382.625762939453</text:p>
              </table:table-cell>
              <table:table-cell office:value-type="float" office:value="-0.001678094">
                <text:p>-0.00167809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82.736907958984">
                <text:p>382.736907958984</text:p>
              </table:table-cell>
              <table:table-cell office:value-type="float" office:value="0.007771868">
                <text:p>0.00777186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82.848052978516">
                <text:p>382.848052978516</text:p>
              </table:table-cell>
              <table:table-cell office:value-type="float" office:value="0.00428222">
                <text:p>0.0042822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82.959197998047">
                <text:p>382.959197998047</text:p>
              </table:table-cell>
              <table:table-cell office:value-type="float" office:value="0.008247799">
                <text:p>0.00824779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83.070343017578">
                <text:p>383.070343017578</text:p>
              </table:table-cell>
              <table:table-cell office:value-type="float" office:value="0.00381995">
                <text:p>0.0038199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83.181518554688">
                <text:p>383.181518554688</text:p>
              </table:table-cell>
              <table:table-cell office:value-type="float" office:value="0.01299822">
                <text:p>0.0129982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83.292694091797">
                <text:p>383.292694091797</text:p>
              </table:table-cell>
              <table:table-cell office:value-type="float" office:value="0.003172143">
                <text:p>0.00317214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83.403869628906">
                <text:p>383.403869628906</text:p>
              </table:table-cell>
              <table:table-cell office:value-type="float" office:value="-0.001612823">
                <text:p>-0.00161282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83.515045166016">
                <text:p>383.515045166016</text:p>
              </table:table-cell>
              <table:table-cell office:value-type="float" office:value="-0.0007848414">
                <text:p>-0.000784841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83.626220703125">
                <text:p>383.626220703125</text:p>
              </table:table-cell>
              <table:table-cell office:value-type="float" office:value="0.01106745">
                <text:p>0.0110674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83.737426757813">
                <text:p>383.737426757813</text:p>
              </table:table-cell>
              <table:table-cell office:value-type="float" office:value="0.0126594">
                <text:p>0.012659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83.8486328125">
                <text:p>383.8486328125</text:p>
              </table:table-cell>
              <table:table-cell office:value-type="float" office:value="0.0006339179">
                <text:p>0.000633917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83.959838867188">
                <text:p>383.959838867188</text:p>
              </table:table-cell>
              <table:table-cell office:value-type="float" office:value="-0.0006536826">
                <text:p>-0.000653682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84.071044921875">
                <text:p>384.071044921875</text:p>
              </table:table-cell>
              <table:table-cell office:value-type="float" office:value="-0.00778888">
                <text:p>-0.0077888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84.182250976563">
                <text:p>384.182250976563</text:p>
              </table:table-cell>
              <table:table-cell office:value-type="float" office:value="0.01063763">
                <text:p>0.0106376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84.293487548828">
                <text:p>384.293487548828</text:p>
              </table:table-cell>
              <table:table-cell office:value-type="float" office:value="-0.006639367">
                <text:p>-0.00663936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84.404693603516">
                <text:p>384.404693603516</text:p>
              </table:table-cell>
              <table:table-cell office:value-type="float" office:value="0.01056444">
                <text:p>0.0105644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84.515930175781">
                <text:p>384.515930175781</text:p>
              </table:table-cell>
              <table:table-cell office:value-type="float" office:value="0.01152553">
                <text:p>0.0115255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84.627197265625">
                <text:p>384.627197265625</text:p>
              </table:table-cell>
              <table:table-cell office:value-type="float" office:value="-0.008143409">
                <text:p>-0.00814340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84.738433837891">
                <text:p>384.738433837891</text:p>
              </table:table-cell>
              <table:table-cell office:value-type="float" office:value="-0.002869905">
                <text:p>-0.00286990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84.849670410156">
                <text:p>384.849670410156</text:p>
              </table:table-cell>
              <table:table-cell office:value-type="float" office:value="0.01701411">
                <text:p>0.0170141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84.9609375">
                <text:p>384.9609375</text:p>
              </table:table-cell>
              <table:table-cell office:value-type="float" office:value="0.01361345">
                <text:p>0.0136134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85.072204589844">
                <text:p>385.072204589844</text:p>
              </table:table-cell>
              <table:table-cell office:value-type="float" office:value="-0.004245388">
                <text:p>-0.00424538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85.183471679688">
                <text:p>385.183471679688</text:p>
              </table:table-cell>
              <table:table-cell office:value-type="float" office:value="0.0137714">
                <text:p>0.013771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85.294738769531">
                <text:p>385.294738769531</text:p>
              </table:table-cell>
              <table:table-cell office:value-type="float" office:value="0.007918123">
                <text:p>0.00791812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85.406036376953">
                <text:p>385.406036376953</text:p>
              </table:table-cell>
              <table:table-cell office:value-type="float" office:value="-0.002588184">
                <text:p>-0.00258818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85.517333984375">
                <text:p>385.517333984375</text:p>
              </table:table-cell>
              <table:table-cell office:value-type="float" office:value="0.004722816">
                <text:p>0.00472281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85.628601074219">
                <text:p>385.628601074219</text:p>
              </table:table-cell>
              <table:table-cell office:value-type="float" office:value="-0.003989479">
                <text:p>-0.00398947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85.739898681641">
                <text:p>385.739898681641</text:p>
              </table:table-cell>
              <table:table-cell office:value-type="float" office:value="-0.006984522">
                <text:p>-0.00698452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85.851226806641">
                <text:p>385.851226806641</text:p>
              </table:table-cell>
              <table:table-cell office:value-type="float" office:value="0.01273999">
                <text:p>0.0127399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85.962524414063">
                <text:p>385.962524414063</text:p>
              </table:table-cell>
              <table:table-cell office:value-type="float" office:value="-0.003106803">
                <text:p>-0.00310680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86.073852539063">
                <text:p>386.073852539063</text:p>
              </table:table-cell>
              <table:table-cell office:value-type="float" office:value="0.01274884">
                <text:p>0.0127488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86.185180664063">
                <text:p>386.185180664063</text:p>
              </table:table-cell>
              <table:table-cell office:value-type="float" office:value="0.001009146">
                <text:p>0.00100914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86.296508789063">
                <text:p>386.296508789063</text:p>
              </table:table-cell>
              <table:table-cell office:value-type="float" office:value="0.006820864">
                <text:p>0.00682086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86.407836914063">
                <text:p>386.407836914063</text:p>
              </table:table-cell>
              <table:table-cell office:value-type="float" office:value="0.002572073">
                <text:p>0.00257207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86.519165039063">
                <text:p>386.519165039063</text:p>
              </table:table-cell>
              <table:table-cell office:value-type="float" office:value="0.0043497">
                <text:p>0.004349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86.630523681641">
                <text:p>386.630523681641</text:p>
              </table:table-cell>
              <table:table-cell office:value-type="float" office:value="0.004273926">
                <text:p>0.00427392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86.741882324219">
                <text:p>386.741882324219</text:p>
              </table:table-cell>
              <table:table-cell office:value-type="float" office:value="0.001196592">
                <text:p>0.00119659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86.853240966797">
                <text:p>386.853240966797</text:p>
              </table:table-cell>
              <table:table-cell office:value-type="float" office:value="-0.002710294">
                <text:p>-0.00271029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86.964599609375">
                <text:p>386.964599609375</text:p>
              </table:table-cell>
              <table:table-cell office:value-type="float" office:value="-0.00399003">
                <text:p>-0.0039900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87.075958251953">
                <text:p>387.075958251953</text:p>
              </table:table-cell>
              <table:table-cell office:value-type="float" office:value="0.007698169">
                <text:p>0.00769816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87.187347412109">
                <text:p>387.187347412109</text:p>
              </table:table-cell>
              <table:table-cell office:value-type="float" office:value="-0.004456688">
                <text:p>-0.00445668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87.298736572266">
                <text:p>387.298736572266</text:p>
              </table:table-cell>
              <table:table-cell office:value-type="float" office:value="0.01392458">
                <text:p>0.0139245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87.410095214844">
                <text:p>387.410095214844</text:p>
              </table:table-cell>
              <table:table-cell office:value-type="float" office:value="0.004124928">
                <text:p>0.00412492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87.521514892578">
                <text:p>387.521514892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87.632904052734">
                <text:p>387.632904052734</text:p>
              </table:table-cell>
              <table:table-cell office:value-type="float" office:value="0.000887542">
                <text:p>0.00088754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87.744293212891">
                <text:p>387.744293212891</text:p>
              </table:table-cell>
              <table:table-cell office:value-type="float" office:value="0.01233042">
                <text:p>0.0123304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87.855712890625">
                <text:p>387.855712890625</text:p>
              </table:table-cell>
              <table:table-cell office:value-type="float" office:value="0.002948994">
                <text:p>0.00294899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87.967132568359">
                <text:p>387.967132568359</text:p>
              </table:table-cell>
              <table:table-cell office:value-type="float" office:value="0.004799407">
                <text:p>0.00479940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88.078552246094">
                <text:p>388.078552246094</text:p>
              </table:table-cell>
              <table:table-cell office:value-type="float" office:value="0.001995044">
                <text:p>0.00199504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88.189971923828">
                <text:p>388.189971923828</text:p>
              </table:table-cell>
              <table:table-cell office:value-type="float" office:value="0.001266051">
                <text:p>0.00126605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88.301422119141">
                <text:p>388.301422119141</text:p>
              </table:table-cell>
              <table:table-cell office:value-type="float" office:value="-0.004012488">
                <text:p>-0.00401248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88.412872314453">
                <text:p>388.412872314453</text:p>
              </table:table-cell>
              <table:table-cell office:value-type="float" office:value="-0.006598578">
                <text:p>-0.00659857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88.524291992188">
                <text:p>388.524291992188</text:p>
              </table:table-cell>
              <table:table-cell office:value-type="float" office:value="0.006031604">
                <text:p>0.00603160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88.635772705078">
                <text:p>388.635772705078</text:p>
              </table:table-cell>
              <table:table-cell office:value-type="float" office:value="0.005211913">
                <text:p>0.00521191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88.747222900391">
                <text:p>388.747222900391</text:p>
              </table:table-cell>
              <table:table-cell office:value-type="float" office:value="0.0005611104">
                <text:p>0.000561110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88.858673095703">
                <text:p>388.858673095703</text:p>
              </table:table-cell>
              <table:table-cell office:value-type="float" office:value="-0.007232361">
                <text:p>-0.00723236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88.970153808594">
                <text:p>388.970153808594</text:p>
              </table:table-cell>
              <table:table-cell office:value-type="float" office:value="0.00282188">
                <text:p>0.0028218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89.081634521484">
                <text:p>389.081634521484</text:p>
              </table:table-cell>
              <table:table-cell office:value-type="float" office:value="-0.0009500805">
                <text:p>-0.000950080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89.193115234375">
                <text:p>389.193115234375</text:p>
              </table:table-cell>
              <table:table-cell office:value-type="float" office:value="0.002669332">
                <text:p>0.00266933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89.304595947266">
                <text:p>389.304595947266</text:p>
              </table:table-cell>
              <table:table-cell office:value-type="float" office:value="-0.0009032548">
                <text:p>-0.000903254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89.416076660156">
                <text:p>389.416076660156</text:p>
              </table:table-cell>
              <table:table-cell office:value-type="float" office:value="0.003557149">
                <text:p>0.00355714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89.527587890625">
                <text:p>389.527587890625</text:p>
              </table:table-cell>
              <table:table-cell office:value-type="float" office:value="-0.00230513">
                <text:p>-0.0023051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89.639099121094">
                <text:p>389.639099121094</text:p>
              </table:table-cell>
              <table:table-cell office:value-type="float" office:value="0.01345675">
                <text:p>0.0134567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89.750610351563">
                <text:p>389.750610351563</text:p>
              </table:table-cell>
              <table:table-cell office:value-type="float" office:value="-0.002652256">
                <text:p>-0.00265225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89.862121582031">
                <text:p>389.862121582031</text:p>
              </table:table-cell>
              <table:table-cell office:value-type="float" office:value="-0.00379122">
                <text:p>-0.0037912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89.9736328125">
                <text:p>389.9736328125</text:p>
              </table:table-cell>
              <table:table-cell office:value-type="float" office:value="-0.0007704098">
                <text:p>-0.000770409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90.085174560547">
                <text:p>390.085174560547</text:p>
              </table:table-cell>
              <table:table-cell office:value-type="float" office:value="-0.002792545">
                <text:p>-0.00279254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90.196685791016">
                <text:p>390.196685791016</text:p>
              </table:table-cell>
              <table:table-cell office:value-type="float" office:value="0.01327085">
                <text:p>0.0132708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90.308227539063">
                <text:p>390.308227539063</text:p>
              </table:table-cell>
              <table:table-cell office:value-type="float" office:value="0.0008145887">
                <text:p>0.000814588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90.419769287109">
                <text:p>390.419769287109</text:p>
              </table:table-cell>
              <table:table-cell office:value-type="float" office:value="0.001206536">
                <text:p>0.00120653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90.531341552734">
                <text:p>390.531341552734</text:p>
              </table:table-cell>
              <table:table-cell office:value-type="float" office:value="0.001695605">
                <text:p>0.00169560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90.642883300781">
                <text:p>390.642883300781</text:p>
              </table:table-cell>
              <table:table-cell office:value-type="float" office:value="-0.002570191">
                <text:p>-0.00257019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90.754455566406">
                <text:p>390.754455566406</text:p>
              </table:table-cell>
              <table:table-cell office:value-type="float" office:value="0.01447487">
                <text:p>0.0144748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90.866027832031">
                <text:p>390.866027832031</text:p>
              </table:table-cell>
              <table:table-cell office:value-type="float" office:value="0.001459444">
                <text:p>0.00145944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90.977600097656">
                <text:p>390.977600097656</text:p>
              </table:table-cell>
              <table:table-cell office:value-type="float" office:value="0.001138808">
                <text:p>0.00113880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91.089172363281">
                <text:p>391.089172363281</text:p>
              </table:table-cell>
              <table:table-cell office:value-type="float" office:value="-0.005313666">
                <text:p>-0.00531366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91.200744628906">
                <text:p>391.200744628906</text:p>
              </table:table-cell>
              <table:table-cell office:value-type="float" office:value="0.01399027">
                <text:p>0.0139902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91.312347412109">
                <text:p>391.312347412109</text:p>
              </table:table-cell>
              <table:table-cell office:value-type="float" office:value="-0.0004933355">
                <text:p>-0.000493335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91.423950195313">
                <text:p>391.423950195313</text:p>
              </table:table-cell>
              <table:table-cell office:value-type="float" office:value="0.01147935">
                <text:p>0.0114793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91.535552978516">
                <text:p>391.535552978516</text:p>
              </table:table-cell>
              <table:table-cell office:value-type="float" office:value="-0.008354053">
                <text:p>-0.00835405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91.647155761719">
                <text:p>391.647155761719</text:p>
              </table:table-cell>
              <table:table-cell office:value-type="float" office:value="0.004632961">
                <text:p>0.00463296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91.758758544922">
                <text:p>391.758758544922</text:p>
              </table:table-cell>
              <table:table-cell office:value-type="float" office:value="-0.008965471">
                <text:p>-0.00896547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91.870391845703">
                <text:p>391.870391845703</text:p>
              </table:table-cell>
              <table:table-cell office:value-type="float" office:value="0.01231676">
                <text:p>0.0123167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91.982025146484">
                <text:p>391.982025146484</text:p>
              </table:table-cell>
              <table:table-cell office:value-type="float" office:value="0.002173267">
                <text:p>0.00217326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92.093658447266">
                <text:p>392.093658447266</text:p>
              </table:table-cell>
              <table:table-cell office:value-type="float" office:value="-0.00717514">
                <text:p>-0.0071751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92.205291748047">
                <text:p>392.205291748047</text:p>
              </table:table-cell>
              <table:table-cell office:value-type="float" office:value="0.0006356442">
                <text:p>0.000635644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92.316925048828">
                <text:p>392.316925048828</text:p>
              </table:table-cell>
              <table:table-cell office:value-type="float" office:value="0.01520412">
                <text:p>0.0152041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92.428558349609">
                <text:p>392.428558349609</text:p>
              </table:table-cell>
              <table:table-cell office:value-type="float" office:value="0.01115149">
                <text:p>0.0111514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92.540222167969">
                <text:p>392.540222167969</text:p>
              </table:table-cell>
              <table:table-cell office:value-type="float" office:value="-0.002908088">
                <text:p>-0.00290808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92.651885986328">
                <text:p>392.651885986328</text:p>
              </table:table-cell>
              <table:table-cell office:value-type="float" office:value="-0.006966528">
                <text:p>-0.00696652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92.763549804688">
                <text:p>392.763549804688</text:p>
              </table:table-cell>
              <table:table-cell office:value-type="float" office:value="-0.0001217179">
                <text:p>-0.000121717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92.875213623047">
                <text:p>392.875213623047</text:p>
              </table:table-cell>
              <table:table-cell office:value-type="float" office:value="0.0006309159">
                <text:p>0.000630915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92.986907958984">
                <text:p>392.986907958984</text:p>
              </table:table-cell>
              <table:table-cell office:value-type="float" office:value="0.004602819">
                <text:p>0.00460281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93.098602294922">
                <text:p>393.098602294922</text:p>
              </table:table-cell>
              <table:table-cell office:value-type="float" office:value="0.01348516">
                <text:p>0.0134851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93.210266113281">
                <text:p>393.210266113281</text:p>
              </table:table-cell>
              <table:table-cell office:value-type="float" office:value="-0.002557262">
                <text:p>-0.00255726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93.321960449219">
                <text:p>393.321960449219</text:p>
              </table:table-cell>
              <table:table-cell office:value-type="float" office:value="-0.000998088">
                <text:p>-0.00099808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93.433685302734">
                <text:p>393.433685302734</text:p>
              </table:table-cell>
              <table:table-cell office:value-type="float" office:value="-0.004139442">
                <text:p>-0.00413944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93.545379638672">
                <text:p>393.545379638672</text:p>
              </table:table-cell>
              <table:table-cell office:value-type="float" office:value="-0.009116253">
                <text:p>-0.00911625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93.657104492188">
                <text:p>393.657104492188</text:p>
              </table:table-cell>
              <table:table-cell office:value-type="float" office:value="0.0005625964">
                <text:p>0.000562596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93.768798828125">
                <text:p>393.768798828125</text:p>
              </table:table-cell>
              <table:table-cell office:value-type="float" office:value="-0.005292573">
                <text:p>-0.00529257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93.880523681641">
                <text:p>393.880523681641</text:p>
              </table:table-cell>
              <table:table-cell office:value-type="float" office:value="0.01128847">
                <text:p>0.0112884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93.992248535156">
                <text:p>393.992248535156</text:p>
              </table:table-cell>
              <table:table-cell office:value-type="float" office:value="0.02030533">
                <text:p>0.0203053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94.10400390625">
                <text:p>394.10400390625</text:p>
              </table:table-cell>
              <table:table-cell office:value-type="float" office:value="-0.005408645">
                <text:p>-0.00540864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94.215728759766">
                <text:p>394.215728759766</text:p>
              </table:table-cell>
              <table:table-cell office:value-type="float" office:value="0.001798818">
                <text:p>0.00179881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94.327484130859">
                <text:p>394.327484130859</text:p>
              </table:table-cell>
              <table:table-cell office:value-type="float" office:value="0.006033415">
                <text:p>0.00603341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94.439239501953">
                <text:p>394.439239501953</text:p>
              </table:table-cell>
              <table:table-cell office:value-type="float" office:value="-0.001334443">
                <text:p>-0.00133444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94.550994873047">
                <text:p>394.550994873047</text:p>
              </table:table-cell>
              <table:table-cell office:value-type="float" office:value="-0.007315006">
                <text:p>-0.00731500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94.662750244141">
                <text:p>394.662750244141</text:p>
              </table:table-cell>
              <table:table-cell office:value-type="float" office:value="0.003643118">
                <text:p>0.00364311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94.774536132813">
                <text:p>394.774536132813</text:p>
              </table:table-cell>
              <table:table-cell office:value-type="float" office:value="-0.00195931">
                <text:p>-0.0019593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94.886291503906">
                <text:p>394.886291503906</text:p>
              </table:table-cell>
              <table:table-cell office:value-type="float" office:value="0.008163762">
                <text:p>0.00816376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94.998077392578">
                <text:p>394.998077392578</text:p>
              </table:table-cell>
              <table:table-cell office:value-type="float" office:value="-0.002075709">
                <text:p>-0.00207570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95.10986328125">
                <text:p>395.10986328125</text:p>
              </table:table-cell>
              <table:table-cell office:value-type="float" office:value="0.009103987">
                <text:p>0.00910398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95.221649169922">
                <text:p>395.221649169922</text:p>
              </table:table-cell>
              <table:table-cell office:value-type="float" office:value="-0.001740258">
                <text:p>-0.00174025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95.333465576172">
                <text:p>395.333465576172</text:p>
              </table:table-cell>
              <table:table-cell office:value-type="float" office:value="-0.007696766">
                <text:p>-0.00769676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95.445251464844">
                <text:p>395.445251464844</text:p>
              </table:table-cell>
              <table:table-cell office:value-type="float" office:value="-0.001918224">
                <text:p>-0.00191822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95.557067871094">
                <text:p>395.557067871094</text:p>
              </table:table-cell>
              <table:table-cell office:value-type="float" office:value="-0.005053193">
                <text:p>-0.00505319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95.668884277344">
                <text:p>395.668884277344</text:p>
              </table:table-cell>
              <table:table-cell office:value-type="float" office:value="0.04036934">
                <text:p>0.0403693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95.780700683594">
                <text:p>395.780700683594</text:p>
              </table:table-cell>
              <table:table-cell office:value-type="float" office:value="-0.002145667">
                <text:p>-0.00214566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95.892547607422">
                <text:p>395.892547607422</text:p>
              </table:table-cell>
              <table:table-cell office:value-type="float" office:value="0.003075006">
                <text:p>0.00307500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96.004364013672">
                <text:p>396.004364013672</text:p>
              </table:table-cell>
              <table:table-cell office:value-type="float" office:value="0.002738909">
                <text:p>0.00273890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96.1162109375">
                <text:p>396.1162109375</text:p>
              </table:table-cell>
              <table:table-cell office:value-type="float" office:value="0.0435134">
                <text:p>0.043513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96.228057861328">
                <text:p>396.228057861328</text:p>
              </table:table-cell>
              <table:table-cell office:value-type="float" office:value="0.0003890638">
                <text:p>0.000389063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96.339904785156">
                <text:p>396.339904785156</text:p>
              </table:table-cell>
              <table:table-cell office:value-type="float" office:value="-0.001848653">
                <text:p>-0.00184865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96.451751708984">
                <text:p>396.451751708984</text:p>
              </table:table-cell>
              <table:table-cell office:value-type="float" office:value="-0.003930273">
                <text:p>-0.00393027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96.563629150391">
                <text:p>396.563629150391</text:p>
              </table:table-cell>
              <table:table-cell office:value-type="float" office:value="-0.006078608">
                <text:p>-0.00607860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96.675476074219">
                <text:p>396.675476074219</text:p>
              </table:table-cell>
              <table:table-cell office:value-type="float" office:value="-0.001936003">
                <text:p>-0.00193600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96.787353515625">
                <text:p>396.787353515625</text:p>
              </table:table-cell>
              <table:table-cell office:value-type="float" office:value="0.01139791">
                <text:p>0.0113979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96.899230957031">
                <text:p>396.899230957031</text:p>
              </table:table-cell>
              <table:table-cell office:value-type="float" office:value="-0.003779194">
                <text:p>-0.00377919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97.011108398438">
                <text:p>397.011108398438</text:p>
              </table:table-cell>
              <table:table-cell office:value-type="float" office:value="0.002283692">
                <text:p>0.00228369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97.123016357422">
                <text:p>397.123016357422</text:p>
              </table:table-cell>
              <table:table-cell office:value-type="float" office:value="-0.003294682">
                <text:p>-0.00329468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97.234893798828">
                <text:p>397.234893798828</text:p>
              </table:table-cell>
              <table:table-cell office:value-type="float" office:value="0.006135957">
                <text:p>0.00613595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97.346801757813">
                <text:p>397.346801757813</text:p>
              </table:table-cell>
              <table:table-cell office:value-type="float" office:value="0.003290309">
                <text:p>0.00329030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97.458709716797">
                <text:p>397.458709716797</text:p>
              </table:table-cell>
              <table:table-cell office:value-type="float" office:value="-0.001577302">
                <text:p>-0.00157730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97.570617675781">
                <text:p>397.570617675781</text:p>
              </table:table-cell>
              <table:table-cell office:value-type="float" office:value="0.005552104">
                <text:p>0.00555210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97.682525634766">
                <text:p>397.682525634766</text:p>
              </table:table-cell>
              <table:table-cell office:value-type="float" office:value="-0.002269562">
                <text:p>-0.00226956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97.794464111328">
                <text:p>397.794464111328</text:p>
              </table:table-cell>
              <table:table-cell office:value-type="float" office:value="0.002598975">
                <text:p>0.00259897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97.906402587891">
                <text:p>397.906402587891</text:p>
              </table:table-cell>
              <table:table-cell office:value-type="float" office:value="0.0013291">
                <text:p>0.001329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98.018310546875">
                <text:p>398.018310546875</text:p>
              </table:table-cell>
              <table:table-cell office:value-type="float" office:value="0.006593111">
                <text:p>0.00659311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98.130249023438">
                <text:p>398.130249023438</text:p>
              </table:table-cell>
              <table:table-cell office:value-type="float" office:value="-0.002812335">
                <text:p>-0.00281233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98.242218017578">
                <text:p>398.242218017578</text:p>
              </table:table-cell>
              <table:table-cell office:value-type="float" office:value="-0.0008176969">
                <text:p>-0.000817696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98.354156494141">
                <text:p>398.354156494141</text:p>
              </table:table-cell>
              <table:table-cell office:value-type="float" office:value="-0.001756837">
                <text:p>-0.00175683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98.466125488281">
                <text:p>398.466125488281</text:p>
              </table:table-cell>
              <table:table-cell office:value-type="float" office:value="-0.001297164">
                <text:p>-0.00129716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98.578094482422">
                <text:p>398.578094482422</text:p>
              </table:table-cell>
              <table:table-cell office:value-type="float" office:value="-0.001029284">
                <text:p>-0.00102928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98.690063476563">
                <text:p>398.690063476563</text:p>
              </table:table-cell>
              <table:table-cell office:value-type="float" office:value="-0.004996883">
                <text:p>-0.00499688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98.802032470703">
                <text:p>398.802032470703</text:p>
              </table:table-cell>
              <table:table-cell office:value-type="float" office:value="-0.004803245">
                <text:p>-0.00480324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98.914001464844">
                <text:p>398.914001464844</text:p>
              </table:table-cell>
              <table:table-cell office:value-type="float" office:value="-0.003155308">
                <text:p>-0.00315530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99.026000976563">
                <text:p>399.026000976563</text:p>
              </table:table-cell>
              <table:table-cell office:value-type="float" office:value="0.02014644">
                <text:p>0.0201464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99.137969970703">
                <text:p>399.137969970703</text:p>
              </table:table-cell>
              <table:table-cell office:value-type="float" office:value="-0.001762063">
                <text:p>-0.00176206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99.249969482422">
                <text:p>399.249969482422</text:p>
              </table:table-cell>
              <table:table-cell office:value-type="float" office:value="0.0155235">
                <text:p>0.015523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99.361968994141">
                <text:p>399.361968994141</text:p>
              </table:table-cell>
              <table:table-cell office:value-type="float" office:value="-0.002176882">
                <text:p>-0.00217688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99.473999023438">
                <text:p>399.473999023438</text:p>
              </table:table-cell>
              <table:table-cell office:value-type="float" office:value="0.008294315">
                <text:p>0.00829431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99.585998535156">
                <text:p>399.585998535156</text:p>
              </table:table-cell>
              <table:table-cell office:value-type="float" office:value="0.0003941474">
                <text:p>0.000394147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99.698028564453">
                <text:p>399.698028564453</text:p>
              </table:table-cell>
              <table:table-cell office:value-type="float" office:value="-0.001848938">
                <text:p>-0.00184893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99.81005859375">
                <text:p>399.81005859375</text:p>
              </table:table-cell>
              <table:table-cell office:value-type="float" office:value="-0.00597561">
                <text:p>-0.0059756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99.922088623047">
                <text:p>399.922088623047</text:p>
              </table:table-cell>
              <table:table-cell office:value-type="float" office:value="-0.002326224">
                <text:p>-0.00232622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00.034118652344">
                <text:p>400.034118652344</text:p>
              </table:table-cell>
              <table:table-cell office:value-type="float" office:value="-0.006681163">
                <text:p>-0.00668116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00.146148681641">
                <text:p>400.146148681641</text:p>
              </table:table-cell>
              <table:table-cell office:value-type="float" office:value="0.0003624281">
                <text:p>0.000362428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00.258209228516">
                <text:p>400.258209228516</text:p>
              </table:table-cell>
              <table:table-cell office:value-type="float" office:value="-0.002330791">
                <text:p>-0.00233079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00.370269775391">
                <text:p>400.370269775391</text:p>
              </table:table-cell>
              <table:table-cell office:value-type="float" office:value="0.003563431">
                <text:p>0.00356343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00.482330322266">
                <text:p>400.482330322266</text:p>
              </table:table-cell>
              <table:table-cell office:value-type="float" office:value="-0.001438752">
                <text:p>-0.00143875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00.594390869141">
                <text:p>400.594390869141</text:p>
              </table:table-cell>
              <table:table-cell office:value-type="float" office:value="0.006885281">
                <text:p>0.00688528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00.706451416016">
                <text:p>400.706451416016</text:p>
              </table:table-cell>
              <table:table-cell office:value-type="float" office:value="-0.003371377">
                <text:p>-0.00337137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00.818511962891">
                <text:p>400.818511962891</text:p>
              </table:table-cell>
              <table:table-cell office:value-type="float" office:value="0.006523484">
                <text:p>0.00652348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00.930603027344">
                <text:p>400.930603027344</text:p>
              </table:table-cell>
              <table:table-cell office:value-type="float" office:value="0.007037331">
                <text:p>0.00703733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01.042694091797">
                <text:p>401.042694091797</text:p>
              </table:table-cell>
              <table:table-cell office:value-type="float" office:value="0.0001951299">
                <text:p>0.000195129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01.15478515625">
                <text:p>401.15478515625</text:p>
              </table:table-cell>
              <table:table-cell office:value-type="float" office:value="0.005975964">
                <text:p>0.00597596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01.266876220703">
                <text:p>401.266876220703</text:p>
              </table:table-cell>
              <table:table-cell office:value-type="float" office:value="0.00476803">
                <text:p>0.0047680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01.378997802734">
                <text:p>401.378997802734</text:p>
              </table:table-cell>
              <table:table-cell office:value-type="float" office:value="0.001357475">
                <text:p>0.00135747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01.491088867188">
                <text:p>401.491088867188</text:p>
              </table:table-cell>
              <table:table-cell office:value-type="float" office:value="-0.0003766951">
                <text:p>-0.000376695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01.603210449219">
                <text:p>401.603210449219</text:p>
              </table:table-cell>
              <table:table-cell office:value-type="float" office:value="0.0003059199">
                <text:p>0.000305919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01.71533203125">
                <text:p>401.71533203125</text:p>
              </table:table-cell>
              <table:table-cell office:value-type="float" office:value="-0.002652572">
                <text:p>-0.00265257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01.827453613281">
                <text:p>401.827453613281</text:p>
              </table:table-cell>
              <table:table-cell office:value-type="float" office:value="0.00100787">
                <text:p>0.0010078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01.939605712891">
                <text:p>401.939605712891</text:p>
              </table:table-cell>
              <table:table-cell office:value-type="float" office:value="0.002183547">
                <text:p>0.00218354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02.051727294922">
                <text:p>402.051727294922</text:p>
              </table:table-cell>
              <table:table-cell office:value-type="float" office:value="-0.005132418">
                <text:p>-0.00513241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02.163879394531">
                <text:p>402.163879394531</text:p>
              </table:table-cell>
              <table:table-cell office:value-type="float" office:value="0.009806376">
                <text:p>0.00980637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02.276031494141">
                <text:p>402.276031494141</text:p>
              </table:table-cell>
              <table:table-cell office:value-type="float" office:value="-0.001894814">
                <text:p>-0.00189481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02.38818359375">
                <text:p>402.38818359375</text:p>
              </table:table-cell>
              <table:table-cell office:value-type="float" office:value="-0.001491565">
                <text:p>-0.00149156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02.500335693359">
                <text:p>402.500335693359</text:p>
              </table:table-cell>
              <table:table-cell office:value-type="float" office:value="0.001100396">
                <text:p>0.00110039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02.612487792969">
                <text:p>402.612487792969</text:p>
              </table:table-cell>
              <table:table-cell office:value-type="float" office:value="0.005693093">
                <text:p>0.00569309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02.724670410156">
                <text:p>402.724670410156</text:p>
              </table:table-cell>
              <table:table-cell office:value-type="float" office:value="0.005917368">
                <text:p>0.00591736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02.836853027344">
                <text:p>402.836853027344</text:p>
              </table:table-cell>
              <table:table-cell office:value-type="float" office:value="0.004529992">
                <text:p>0.00452999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02.949035644531">
                <text:p>402.949035644531</text:p>
              </table:table-cell>
              <table:table-cell office:value-type="float" office:value="0.01297886">
                <text:p>0.0129788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03.061218261719">
                <text:p>403.061218261719</text:p>
              </table:table-cell>
              <table:table-cell office:value-type="float" office:value="0.002612026">
                <text:p>0.00261202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03.173400878906">
                <text:p>403.173400878906</text:p>
              </table:table-cell>
              <table:table-cell office:value-type="float" office:value="0.0128755">
                <text:p>0.012875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03.285614013672">
                <text:p>403.285614013672</text:p>
              </table:table-cell>
              <table:table-cell office:value-type="float" office:value="0.0006649108">
                <text:p>0.000664910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03.397827148438">
                <text:p>403.397827148438</text:p>
              </table:table-cell>
              <table:table-cell office:value-type="float" office:value="-0.004759095">
                <text:p>-0.00475909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03.510040283203">
                <text:p>403.510040283203</text:p>
              </table:table-cell>
              <table:table-cell office:value-type="float" office:value="0.002971791">
                <text:p>0.00297179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03.622253417969">
                <text:p>403.622253417969</text:p>
              </table:table-cell>
              <table:table-cell office:value-type="float" office:value="-0.00599859">
                <text:p>-0.0059985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03.734466552734">
                <text:p>403.734466552734</text:p>
              </table:table-cell>
              <table:table-cell office:value-type="float" office:value="0.002526789">
                <text:p>0.00252678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03.8466796875">
                <text:p>403.8466796875</text:p>
              </table:table-cell>
              <table:table-cell office:value-type="float" office:value="-0.001678218">
                <text:p>-0.00167821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03.958923339844">
                <text:p>403.958923339844</text:p>
              </table:table-cell>
              <table:table-cell office:value-type="float" office:value="-0.0007484231">
                <text:p>-0.000748423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04.071166992188">
                <text:p>404.071166992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04.183410644531">
                <text:p>404.183410644531</text:p>
              </table:table-cell>
              <table:table-cell office:value-type="float" office:value="-0.008206162">
                <text:p>-0.00820616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04.295654296875">
                <text:p>404.295654296875</text:p>
              </table:table-cell>
              <table:table-cell office:value-type="float" office:value="0.009633272">
                <text:p>0.00963327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04.407897949219">
                <text:p>404.407897949219</text:p>
              </table:table-cell>
              <table:table-cell office:value-type="float" office:value="-0.007441116">
                <text:p>-0.00744111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04.520172119141">
                <text:p>404.520172119141</text:p>
              </table:table-cell>
              <table:table-cell office:value-type="float" office:value="0.00482646">
                <text:p>0.0048264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04.632446289063">
                <text:p>404.632446289063</text:p>
              </table:table-cell>
              <table:table-cell office:value-type="float" office:value="0.005841315">
                <text:p>0.00584131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04.744689941406">
                <text:p>404.744689941406</text:p>
              </table:table-cell>
              <table:table-cell office:value-type="float" office:value="0.0056572">
                <text:p>0.005657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04.856994628906">
                <text:p>404.856994628906</text:p>
              </table:table-cell>
              <table:table-cell office:value-type="float" office:value="-0.008404738">
                <text:p>-0.00840473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04.969268798828">
                <text:p>404.969268798828</text:p>
              </table:table-cell>
              <table:table-cell office:value-type="float" office:value="0.003599154">
                <text:p>0.00359915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05.08154296875">
                <text:p>405.08154296875</text:p>
              </table:table-cell>
              <table:table-cell office:value-type="float" office:value="0.01342078">
                <text:p>0.0134207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05.19384765625">
                <text:p>405.19384765625</text:p>
              </table:table-cell>
              <table:table-cell office:value-type="float" office:value="-0.003207811">
                <text:p>-0.00320781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05.30615234375">
                <text:p>405.30615234375</text:p>
              </table:table-cell>
              <table:table-cell office:value-type="float" office:value="0.0008153284">
                <text:p>0.000815328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05.41845703125">
                <text:p>405.41845703125</text:p>
              </table:table-cell>
              <table:table-cell office:value-type="float" office:value="0.0004738709">
                <text:p>0.000473870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05.53076171875">
                <text:p>405.53076171875</text:p>
              </table:table-cell>
              <table:table-cell office:value-type="float" office:value="0.01013889">
                <text:p>0.0101388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05.64306640625">
                <text:p>405.64306640625</text:p>
              </table:table-cell>
              <table:table-cell office:value-type="float" office:value="-0.001561646">
                <text:p>-0.00156164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05.755401611328">
                <text:p>405.755401611328</text:p>
              </table:table-cell>
              <table:table-cell office:value-type="float" office:value="-0.0009822396">
                <text:p>-0.000982239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05.867706298828">
                <text:p>405.867706298828</text:p>
              </table:table-cell>
              <table:table-cell office:value-type="float" office:value="-0.002347791">
                <text:p>-0.00234779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05.980041503906">
                <text:p>405.980041503906</text:p>
              </table:table-cell>
              <table:table-cell office:value-type="float" office:value="0.0165092">
                <text:p>0.016509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06.092376708984">
                <text:p>406.092376708984</text:p>
              </table:table-cell>
              <table:table-cell office:value-type="float" office:value="-0.007049186">
                <text:p>-0.00704918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06.204742431641">
                <text:p>406.204742431641</text:p>
              </table:table-cell>
              <table:table-cell office:value-type="float" office:value="0.006985019">
                <text:p>0.00698501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06.317077636719">
                <text:p>406.317077636719</text:p>
              </table:table-cell>
              <table:table-cell office:value-type="float" office:value="0.0004966295">
                <text:p>0.000496629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06.429443359375">
                <text:p>406.429443359375</text:p>
              </table:table-cell>
              <table:table-cell office:value-type="float" office:value="-0.00653907">
                <text:p>-0.0065390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06.541809082031">
                <text:p>406.541809082031</text:p>
              </table:table-cell>
              <table:table-cell office:value-type="float" office:value="0.001301944">
                <text:p>0.00130194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06.654174804688">
                <text:p>406.654174804688</text:p>
              </table:table-cell>
              <table:table-cell office:value-type="float" office:value="-0.005624813">
                <text:p>-0.00562481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06.766540527344">
                <text:p>406.766540527344</text:p>
              </table:table-cell>
              <table:table-cell office:value-type="float" office:value="-0.006669882">
                <text:p>-0.00666988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06.87890625">
                <text:p>406.87890625</text:p>
              </table:table-cell>
              <table:table-cell office:value-type="float" office:value="-0.00381844">
                <text:p>-0.0038184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06.991302490234">
                <text:p>406.991302490234</text:p>
              </table:table-cell>
              <table:table-cell office:value-type="float" office:value="0.001360473">
                <text:p>0.00136047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07.103668212891">
                <text:p>407.103668212891</text:p>
              </table:table-cell>
              <table:table-cell office:value-type="float" office:value="-0.004062534">
                <text:p>-0.00406253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07.216064453125">
                <text:p>407.216064453125</text:p>
              </table:table-cell>
              <table:table-cell office:value-type="float" office:value="0.01636557">
                <text:p>0.0163655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07.328460693359">
                <text:p>407.328460693359</text:p>
              </table:table-cell>
              <table:table-cell office:value-type="float" office:value="0.005068507">
                <text:p>0.00506850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07.440887451172">
                <text:p>407.440887451172</text:p>
              </table:table-cell>
              <table:table-cell office:value-type="float" office:value="-0.001184612">
                <text:p>-0.00118461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07.553283691406">
                <text:p>407.553283691406</text:p>
              </table:table-cell>
              <table:table-cell office:value-type="float" office:value="0.008715331">
                <text:p>0.00871533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07.665710449219">
                <text:p>407.665710449219</text:p>
              </table:table-cell>
              <table:table-cell office:value-type="float" office:value="-0.00306589">
                <text:p>-0.0030658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07.778106689453">
                <text:p>407.778106689453</text:p>
              </table:table-cell>
              <table:table-cell office:value-type="float" office:value="0.01320855">
                <text:p>0.0132085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07.890533447266">
                <text:p>407.890533447266</text:p>
              </table:table-cell>
              <table:table-cell office:value-type="float" office:value="0.006404526">
                <text:p>0.00640452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08.002990722656">
                <text:p>408.002990722656</text:p>
              </table:table-cell>
              <table:table-cell office:value-type="float" office:value="0.007773792">
                <text:p>0.00777379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08.115417480469">
                <text:p>408.115417480469</text:p>
              </table:table-cell>
              <table:table-cell office:value-type="float" office:value="0.003090006">
                <text:p>0.00309000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08.227844238281">
                <text:p>408.227844238281</text:p>
              </table:table-cell>
              <table:table-cell office:value-type="float" office:value="0.01905179">
                <text:p>0.0190517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08.340301513672">
                <text:p>408.340301513672</text:p>
              </table:table-cell>
              <table:table-cell office:value-type="float" office:value="-0.0101227">
                <text:p>-0.010122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08.452758789063">
                <text:p>408.452758789063</text:p>
              </table:table-cell>
              <table:table-cell office:value-type="float" office:value="-0.002392106">
                <text:p>-0.00239210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08.565216064453">
                <text:p>408.565216064453</text:p>
              </table:table-cell>
              <table:table-cell office:value-type="float" office:value="-0.004435663">
                <text:p>-0.00443566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08.677673339844">
                <text:p>408.677673339844</text:p>
              </table:table-cell>
              <table:table-cell office:value-type="float" office:value="-0.0008829655">
                <text:p>-0.000882965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08.790161132813">
                <text:p>408.790161132813</text:p>
              </table:table-cell>
              <table:table-cell office:value-type="float" office:value="-0.003348512">
                <text:p>-0.00334851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08.902618408203">
                <text:p>408.902618408203</text:p>
              </table:table-cell>
              <table:table-cell office:value-type="float" office:value="-0.001570776">
                <text:p>-0.00157077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09.015106201172">
                <text:p>409.015106201172</text:p>
              </table:table-cell>
              <table:table-cell office:value-type="float" office:value="-0.005551002">
                <text:p>-0.00555100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09.127593994141">
                <text:p>409.127593994141</text:p>
              </table:table-cell>
              <table:table-cell office:value-type="float" office:value="0.002709572">
                <text:p>0.00270957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09.240081787109">
                <text:p>409.240081787109</text:p>
              </table:table-cell>
              <table:table-cell office:value-type="float" office:value="0.002103085">
                <text:p>0.00210308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09.352569580078">
                <text:p>409.352569580078</text:p>
              </table:table-cell>
              <table:table-cell office:value-type="float" office:value="-0.007521844">
                <text:p>-0.00752184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09.465087890625">
                <text:p>409.465087890625</text:p>
              </table:table-cell>
              <table:table-cell office:value-type="float" office:value="-0.00179777">
                <text:p>-0.0017977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9.577606201172">
                <text:p>409.577606201172</text:p>
              </table:table-cell>
              <table:table-cell office:value-type="float" office:value="-0.005173662">
                <text:p>-0.00517366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09.690093994141">
                <text:p>409.690093994141</text:p>
              </table:table-cell>
              <table:table-cell office:value-type="float" office:value="0.00244211">
                <text:p>0.0024421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9.802612304688">
                <text:p>409.802612304688</text:p>
              </table:table-cell>
              <table:table-cell office:value-type="float" office:value="-0.0003721052">
                <text:p>-0.000372105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9.915161132813">
                <text:p>409.915161132813</text:p>
              </table:table-cell>
              <table:table-cell office:value-type="float" office:value="0.001826723">
                <text:p>0.00182672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10.027679443359">
                <text:p>410.027679443359</text:p>
              </table:table-cell>
              <table:table-cell office:value-type="float" office:value="-0.0008380101">
                <text:p>-0.000838010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10.140228271484">
                <text:p>410.140228271484</text:p>
              </table:table-cell>
              <table:table-cell office:value-type="float" office:value="0.003355578">
                <text:p>0.00335557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10.252746582031">
                <text:p>410.252746582031</text:p>
              </table:table-cell>
              <table:table-cell office:value-type="float" office:value="0.00148224">
                <text:p>0.0014822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10.365295410156">
                <text:p>410.365295410156</text:p>
              </table:table-cell>
              <table:table-cell office:value-type="float" office:value="-0.001927886">
                <text:p>-0.00192788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10.477844238281">
                <text:p>410.477844238281</text:p>
              </table:table-cell>
              <table:table-cell office:value-type="float" office:value="0.01838304">
                <text:p>0.0183830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10.590423583984">
                <text:p>410.590423583984</text:p>
              </table:table-cell>
              <table:table-cell office:value-type="float" office:value="0.007813673">
                <text:p>0.00781367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10.702972412109">
                <text:p>410.702972412109</text:p>
              </table:table-cell>
              <table:table-cell office:value-type="float" office:value="-0.004031833">
                <text:p>-0.00403183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10.815551757813">
                <text:p>410.815551757813</text:p>
              </table:table-cell>
              <table:table-cell office:value-type="float" office:value="0.002531883">
                <text:p>0.00253188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10.928131103516">
                <text:p>410.928131103516</text:p>
              </table:table-cell>
              <table:table-cell office:value-type="float" office:value="0.0263718">
                <text:p>0.026371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11.040679931641">
                <text:p>411.040679931641</text:p>
              </table:table-cell>
              <table:table-cell office:value-type="float" office:value="0.007149112">
                <text:p>0.00714911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11.153289794922">
                <text:p>411.153289794922</text:p>
              </table:table-cell>
              <table:table-cell office:value-type="float" office:value="0.01356054">
                <text:p>0.0135605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11.265869140625">
                <text:p>411.265869140625</text:p>
              </table:table-cell>
              <table:table-cell office:value-type="float" office:value="0.006818383">
                <text:p>0.00681838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11.378479003906">
                <text:p>411.378479003906</text:p>
              </table:table-cell>
              <table:table-cell office:value-type="float" office:value="0.003471487">
                <text:p>0.00347148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11.491058349609">
                <text:p>411.491058349609</text:p>
              </table:table-cell>
              <table:table-cell office:value-type="float" office:value="0.0241332">
                <text:p>0.024133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11.603668212891">
                <text:p>411.603668212891</text:p>
              </table:table-cell>
              <table:table-cell office:value-type="float" office:value="0.004175066">
                <text:p>0.00417506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11.716278076172">
                <text:p>411.716278076172</text:p>
              </table:table-cell>
              <table:table-cell office:value-type="float" office:value="0.02258655">
                <text:p>0.0225865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11.828887939453">
                <text:p>411.828887939453</text:p>
              </table:table-cell>
              <table:table-cell office:value-type="float" office:value="0.002156195">
                <text:p>0.00215619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11.941528320313">
                <text:p>411.941528320313</text:p>
              </table:table-cell>
              <table:table-cell office:value-type="float" office:value="0.00322678">
                <text:p>0.0032267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2.054138183594">
                <text:p>412.054138183594</text:p>
              </table:table-cell>
              <table:table-cell office:value-type="float" office:value="0.001170804">
                <text:p>0.00117080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12.166778564453">
                <text:p>412.166778564453</text:p>
              </table:table-cell>
              <table:table-cell office:value-type="float" office:value="-0.007434151">
                <text:p>-0.00743415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2.279418945313">
                <text:p>412.279418945313</text:p>
              </table:table-cell>
              <table:table-cell office:value-type="float" office:value="0.008832063">
                <text:p>0.00883206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12.392059326172">
                <text:p>412.392059326172</text:p>
              </table:table-cell>
              <table:table-cell office:value-type="float" office:value="0.002491735">
                <text:p>0.00249173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12.504730224609">
                <text:p>412.504730224609</text:p>
              </table:table-cell>
              <table:table-cell office:value-type="float" office:value="-0.008360661">
                <text:p>-0.00836066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2.617370605469">
                <text:p>412.617370605469</text:p>
              </table:table-cell>
              <table:table-cell office:value-type="float" office:value="-0.00287619">
                <text:p>-0.0028761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12.730041503906">
                <text:p>412.730041503906</text:p>
              </table:table-cell>
              <table:table-cell office:value-type="float" office:value="0.0003756502">
                <text:p>0.000375650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2.842712402344">
                <text:p>412.842712402344</text:p>
              </table:table-cell>
              <table:table-cell office:value-type="float" office:value="-0.0004443129">
                <text:p>-0.000444312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12.955383300781">
                <text:p>412.955383300781</text:p>
              </table:table-cell>
              <table:table-cell office:value-type="float" office:value="-0.007865198">
                <text:p>-0.00786519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13.068054199219">
                <text:p>413.068054199219</text:p>
              </table:table-cell>
              <table:table-cell office:value-type="float" office:value="-0.00503746">
                <text:p>-0.0050374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13.180725097656">
                <text:p>413.180725097656</text:p>
              </table:table-cell>
              <table:table-cell office:value-type="float" office:value="0.0006679512">
                <text:p>0.000667951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13.293426513672">
                <text:p>413.293426513672</text:p>
              </table:table-cell>
              <table:table-cell office:value-type="float" office:value="0.0005685741">
                <text:p>0.000568574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13.406097412109">
                <text:p>413.406097412109</text:p>
              </table:table-cell>
              <table:table-cell office:value-type="float" office:value="-0.002326988">
                <text:p>-0.00232698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13.518798828125">
                <text:p>413.518798828125</text:p>
              </table:table-cell>
              <table:table-cell office:value-type="float" office:value="-0.0004182817">
                <text:p>-0.000418281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13.631500244141">
                <text:p>413.631500244141</text:p>
              </table:table-cell>
              <table:table-cell office:value-type="float" office:value="-0.0053443">
                <text:p>-0.005344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13.744232177734">
                <text:p>413.744232177734</text:p>
              </table:table-cell>
              <table:table-cell office:value-type="float" office:value="0.002777788">
                <text:p>0.00277778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3.85693359375">
                <text:p>413.85693359375</text:p>
              </table:table-cell>
              <table:table-cell office:value-type="float" office:value="0.0033797">
                <text:p>0.003379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13.969665527344">
                <text:p>413.969665527344</text:p>
              </table:table-cell>
              <table:table-cell office:value-type="float" office:value="-0.002581721">
                <text:p>-0.00258172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14.082366943359">
                <text:p>414.082366943359</text:p>
              </table:table-cell>
              <table:table-cell office:value-type="float" office:value="0.0122005">
                <text:p>0.012200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14.195098876953">
                <text:p>414.195098876953</text:p>
              </table:table-cell>
              <table:table-cell office:value-type="float" office:value="0.002006513">
                <text:p>0.00200651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14.307861328125">
                <text:p>414.307861328125</text:p>
              </table:table-cell>
              <table:table-cell office:value-type="float" office:value="0.008140838">
                <text:p>0.00814083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14.420593261719">
                <text:p>414.420593261719</text:p>
              </table:table-cell>
              <table:table-cell office:value-type="float" office:value="-0.008899037">
                <text:p>-0.00889903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14.533325195313">
                <text:p>414.533325195313</text:p>
              </table:table-cell>
              <table:table-cell office:value-type="float" office:value="0.006343454">
                <text:p>0.00634345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14.646087646484">
                <text:p>414.646087646484</text:p>
              </table:table-cell>
              <table:table-cell office:value-type="float" office:value="-0.003566598">
                <text:p>-0.00356659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14.758850097656">
                <text:p>414.758850097656</text:p>
              </table:table-cell>
              <table:table-cell office:value-type="float" office:value="-0.003086928">
                <text:p>-0.00308692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14.871612548828">
                <text:p>414.871612548828</text:p>
              </table:table-cell>
              <table:table-cell office:value-type="float" office:value="0.003666854">
                <text:p>0.00366685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14.984375">
                <text:p>414.984375</text:p>
              </table:table-cell>
              <table:table-cell office:value-type="float" office:value="0.003197273">
                <text:p>0.00319727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15.09716796875">
                <text:p>415.09716796875</text:p>
              </table:table-cell>
              <table:table-cell office:value-type="float" office:value="0.001426278">
                <text:p>0.00142627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15.209930419922">
                <text:p>415.209930419922</text:p>
              </table:table-cell>
              <table:table-cell office:value-type="float" office:value="-0.002722155">
                <text:p>-0.00272215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15.322723388672">
                <text:p>415.322723388672</text:p>
              </table:table-cell>
              <table:table-cell office:value-type="float" office:value="-0.002249407">
                <text:p>-0.00224940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15.435516357422">
                <text:p>415.435516357422</text:p>
              </table:table-cell>
              <table:table-cell office:value-type="float" office:value="-0.00290401">
                <text:p>-0.0029040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15.548309326172">
                <text:p>415.548309326172</text:p>
              </table:table-cell>
              <table:table-cell office:value-type="float" office:value="0.001417614">
                <text:p>0.00141761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15.661102294922">
                <text:p>415.661102294922</text:p>
              </table:table-cell>
              <table:table-cell office:value-type="float" office:value="-0.005726947">
                <text:p>-0.00572694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15.773895263672">
                <text:p>415.773895263672</text:p>
              </table:table-cell>
              <table:table-cell office:value-type="float" office:value="0.006382022">
                <text:p>0.00638202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15.88671875">
                <text:p>415.88671875</text:p>
              </table:table-cell>
              <table:table-cell office:value-type="float" office:value="-0.00359419">
                <text:p>-0.0035941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15.999542236328">
                <text:p>415.999542236328</text:p>
              </table:table-cell>
              <table:table-cell office:value-type="float" office:value="-0.007465038">
                <text:p>-0.00746503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16.112365722656">
                <text:p>416.112365722656</text:p>
              </table:table-cell>
              <table:table-cell office:value-type="float" office:value="-0.008327263">
                <text:p>-0.00832726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16.225189208984">
                <text:p>416.225189208984</text:p>
              </table:table-cell>
              <table:table-cell office:value-type="float" office:value="-0.0006101676">
                <text:p>-0.000610167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16.338012695313">
                <text:p>416.338012695313</text:p>
              </table:table-cell>
              <table:table-cell office:value-type="float" office:value="-0.002270299">
                <text:p>-0.00227029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16.450866699219">
                <text:p>416.450866699219</text:p>
              </table:table-cell>
              <table:table-cell office:value-type="float" office:value="0.0006763188">
                <text:p>0.000676318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16.563690185547">
                <text:p>416.563690185547</text:p>
              </table:table-cell>
              <table:table-cell office:value-type="float" office:value="-0.003917527">
                <text:p>-0.00391752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16.676544189453">
                <text:p>416.676544189453</text:p>
              </table:table-cell>
              <table:table-cell office:value-type="float" office:value="-0.004539449">
                <text:p>-0.00453944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16.789398193359">
                <text:p>416.789398193359</text:p>
              </table:table-cell>
              <table:table-cell office:value-type="float" office:value="0.0005657839">
                <text:p>0.000565783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16.902252197266">
                <text:p>416.902252197266</text:p>
              </table:table-cell>
              <table:table-cell office:value-type="float" office:value="-0.00279883">
                <text:p>-0.0027988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17.01513671875">
                <text:p>417.01513671875</text:p>
              </table:table-cell>
              <table:table-cell office:value-type="float" office:value="-0.001775087">
                <text:p>-0.00177508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17.127990722656">
                <text:p>417.127990722656</text:p>
              </table:table-cell>
              <table:table-cell office:value-type="float" office:value="0.01148004">
                <text:p>0.0114800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17.240875244141">
                <text:p>417.240875244141</text:p>
              </table:table-cell>
              <table:table-cell office:value-type="float" office:value="0.004499712">
                <text:p>0.00449971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17.353759765625">
                <text:p>417.353759765625</text:p>
              </table:table-cell>
              <table:table-cell office:value-type="float" office:value="0.01975076">
                <text:p>0.0197507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17.466644287109">
                <text:p>417.466644287109</text:p>
              </table:table-cell>
              <table:table-cell office:value-type="float" office:value="-0.008729651">
                <text:p>-0.00872965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17.579528808594">
                <text:p>417.579528808594</text:p>
              </table:table-cell>
              <table:table-cell office:value-type="float" office:value="-0.004755739">
                <text:p>-0.00475573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17.692443847656">
                <text:p>417.692443847656</text:p>
              </table:table-cell>
              <table:table-cell office:value-type="float" office:value="0.001712349">
                <text:p>0.00171234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17.805328369141">
                <text:p>417.805328369141</text:p>
              </table:table-cell>
              <table:table-cell office:value-type="float" office:value="0.004246619">
                <text:p>0.00424661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17.918243408203">
                <text:p>417.918243408203</text:p>
              </table:table-cell>
              <table:table-cell office:value-type="float" office:value="-0.01440763">
                <text:p>-0.0144076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18.031158447266">
                <text:p>418.031158447266</text:p>
              </table:table-cell>
              <table:table-cell office:value-type="float" office:value="-0.007414638">
                <text:p>-0.00741463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18.144073486328">
                <text:p>418.144073486328</text:p>
              </table:table-cell>
              <table:table-cell office:value-type="float" office:value="0.02965161">
                <text:p>0.0296516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18.256988525391">
                <text:p>418.256988525391</text:p>
              </table:table-cell>
              <table:table-cell office:value-type="float" office:value="0.01573648">
                <text:p>0.0157364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18.369934082031">
                <text:p>418.369934082031</text:p>
              </table:table-cell>
              <table:table-cell office:value-type="float" office:value="0.005190836">
                <text:p>0.00519083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18.482849121094">
                <text:p>418.482849121094</text:p>
              </table:table-cell>
              <table:table-cell office:value-type="float" office:value="0.004727248">
                <text:p>0.00472724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18.595794677734">
                <text:p>418.595794677734</text:p>
              </table:table-cell>
              <table:table-cell office:value-type="float" office:value="0.000404143">
                <text:p>0.00040414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18.708740234375">
                <text:p>418.708740234375</text:p>
              </table:table-cell>
              <table:table-cell office:value-type="float" office:value="0.000688532">
                <text:p>0.00068853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18.821685791016">
                <text:p>418.821685791016</text:p>
              </table:table-cell>
              <table:table-cell office:value-type="float" office:value="0.001633082">
                <text:p>0.00163308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18.934661865234">
                <text:p>418.934661865234</text:p>
              </table:table-cell>
              <table:table-cell office:value-type="float" office:value="0.004457053">
                <text:p>0.00445705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19.047607421875">
                <text:p>419.047607421875</text:p>
              </table:table-cell>
              <table:table-cell office:value-type="float" office:value="-0.003609305">
                <text:p>-0.00360930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19.160583496094">
                <text:p>419.160583496094</text:p>
              </table:table-cell>
              <table:table-cell office:value-type="float" office:value="-0.00779213">
                <text:p>-0.0077921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19.273559570313">
                <text:p>419.273559570313</text:p>
              </table:table-cell>
              <table:table-cell office:value-type="float" office:value="-0.00502857">
                <text:p>-0.0050285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19.386535644531">
                <text:p>419.386535644531</text:p>
              </table:table-cell>
              <table:table-cell office:value-type="float" office:value="0.000724571">
                <text:p>0.00072457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19.49951171875">
                <text:p>419.49951171875</text:p>
              </table:table-cell>
              <table:table-cell office:value-type="float" office:value="0.0106044">
                <text:p>0.010604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19.612487792969">
                <text:p>419.612487792969</text:p>
              </table:table-cell>
              <table:table-cell office:value-type="float" office:value="0.006728989">
                <text:p>0.00672898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19.725494384766">
                <text:p>419.725494384766</text:p>
              </table:table-cell>
              <table:table-cell office:value-type="float" office:value="0.009121153">
                <text:p>0.00912115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19.838470458984">
                <text:p>419.838470458984</text:p>
              </table:table-cell>
              <table:table-cell office:value-type="float" office:value="0.002056826">
                <text:p>0.00205682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19.951477050781">
                <text:p>419.951477050781</text:p>
              </table:table-cell>
              <table:table-cell office:value-type="float" office:value="0.01272955">
                <text:p>0.0127295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20.064483642578">
                <text:p>420.064483642578</text:p>
              </table:table-cell>
              <table:table-cell office:value-type="float" office:value="-0.001583859">
                <text:p>-0.00158385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20.177520751953">
                <text:p>420.177520751953</text:p>
              </table:table-cell>
              <table:table-cell office:value-type="float" office:value="0.0008507335">
                <text:p>0.000850733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20.29052734375">
                <text:p>420.29052734375</text:p>
              </table:table-cell>
              <table:table-cell office:value-type="float" office:value="-0.005964324">
                <text:p>-0.00596432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20.403564453125">
                <text:p>420.403564453125</text:p>
              </table:table-cell>
              <table:table-cell office:value-type="float" office:value="-0.005263645">
                <text:p>-0.00526364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20.516571044922">
                <text:p>420.516571044922</text:p>
              </table:table-cell>
              <table:table-cell office:value-type="float" office:value="-0.003276937">
                <text:p>-0.00327693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20.629608154297">
                <text:p>420.629608154297</text:p>
              </table:table-cell>
              <table:table-cell office:value-type="float" office:value="0.00233047">
                <text:p>0.0023304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20.742645263672">
                <text:p>420.742645263672</text:p>
              </table:table-cell>
              <table:table-cell office:value-type="float" office:value="0.003813994">
                <text:p>0.00381399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20.855712890625">
                <text:p>420.855712890625</text:p>
              </table:table-cell>
              <table:table-cell office:value-type="float" office:value="0.004193345">
                <text:p>0.00419334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20.96875">
                <text:p>420.96875</text:p>
              </table:table-cell>
              <table:table-cell office:value-type="float" office:value="0.01380577">
                <text:p>0.0138057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21.081817626953">
                <text:p>421.081817626953</text:p>
              </table:table-cell>
              <table:table-cell office:value-type="float" office:value="-0.002598281">
                <text:p>-0.00259828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21.194854736328">
                <text:p>421.194854736328</text:p>
              </table:table-cell>
              <table:table-cell office:value-type="float" office:value="-0.004640489">
                <text:p>-0.00464048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21.307922363281">
                <text:p>421.307922363281</text:p>
              </table:table-cell>
              <table:table-cell office:value-type="float" office:value="0.002330813">
                <text:p>0.00233081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21.421020507813">
                <text:p>421.421020507813</text:p>
              </table:table-cell>
              <table:table-cell office:value-type="float" office:value="0.01107043">
                <text:p>0.0110704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21.534088134766">
                <text:p>421.534088134766</text:p>
              </table:table-cell>
              <table:table-cell office:value-type="float" office:value="-0.007556981">
                <text:p>-0.00755698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21.647155761719">
                <text:p>421.647155761719</text:p>
              </table:table-cell>
              <table:table-cell office:value-type="float" office:value="0.004227053">
                <text:p>0.00422705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21.76025390625">
                <text:p>421.76025390625</text:p>
              </table:table-cell>
              <table:table-cell office:value-type="float" office:value="-0.001505454">
                <text:p>-0.00150545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21.873352050781">
                <text:p>421.873352050781</text:p>
              </table:table-cell>
              <table:table-cell office:value-type="float" office:value="0.008545299">
                <text:p>0.00854529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21.986450195313">
                <text:p>421.986450195313</text:p>
              </table:table-cell>
              <table:table-cell office:value-type="float" office:value="0.006114178">
                <text:p>0.00611417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22.099548339844">
                <text:p>422.099548339844</text:p>
              </table:table-cell>
              <table:table-cell office:value-type="float" office:value="-0.0007428529">
                <text:p>-0.000742852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22.212646484375">
                <text:p>422.212646484375</text:p>
              </table:table-cell>
              <table:table-cell office:value-type="float" office:value="0.02106957">
                <text:p>0.0210695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22.325775146484">
                <text:p>422.325775146484</text:p>
              </table:table-cell>
              <table:table-cell office:value-type="float" office:value="-0.002124785">
                <text:p>-0.00212478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22.438903808594">
                <text:p>422.438903808594</text:p>
              </table:table-cell>
              <table:table-cell office:value-type="float" office:value="-0.007185654">
                <text:p>-0.00718565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22.552001953125">
                <text:p>422.552001953125</text:p>
              </table:table-cell>
              <table:table-cell office:value-type="float" office:value="-0.00708247">
                <text:p>-0.0070824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22.665130615234">
                <text:p>422.665130615234</text:p>
              </table:table-cell>
              <table:table-cell office:value-type="float" office:value="0.008977043">
                <text:p>0.00897704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22.778289794922">
                <text:p>422.778289794922</text:p>
              </table:table-cell>
              <table:table-cell office:value-type="float" office:value="-0.00487718">
                <text:p>-0.0048771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22.891418457031">
                <text:p>422.891418457031</text:p>
              </table:table-cell>
              <table:table-cell office:value-type="float" office:value="0.01008716">
                <text:p>0.0100871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23.004577636719">
                <text:p>423.004577636719</text:p>
              </table:table-cell>
              <table:table-cell office:value-type="float" office:value="0.006513295">
                <text:p>0.00651329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23.117706298828">
                <text:p>423.117706298828</text:p>
              </table:table-cell>
              <table:table-cell office:value-type="float" office:value="-0.002127175">
                <text:p>-0.00212717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23.230865478516">
                <text:p>423.230865478516</text:p>
              </table:table-cell>
              <table:table-cell office:value-type="float" office:value="-0.003916656">
                <text:p>-0.00391665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23.344024658203">
                <text:p>423.344024658203</text:p>
              </table:table-cell>
              <table:table-cell office:value-type="float" office:value="0.002673917">
                <text:p>0.00267391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23.457183837891">
                <text:p>423.457183837891</text:p>
              </table:table-cell>
              <table:table-cell office:value-type="float" office:value="-0.008163352">
                <text:p>-0.00816335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23.570373535156">
                <text:p>423.570373535156</text:p>
              </table:table-cell>
              <table:table-cell office:value-type="float" office:value="0.01091556">
                <text:p>0.0109155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23.683532714844">
                <text:p>423.683532714844</text:p>
              </table:table-cell>
              <table:table-cell office:value-type="float" office:value="0.0008382864">
                <text:p>0.000838286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23.796722412109">
                <text:p>423.796722412109</text:p>
              </table:table-cell>
              <table:table-cell office:value-type="float" office:value="-0.002831218">
                <text:p>-0.00283121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23.909912109375">
                <text:p>423.909912109375</text:p>
              </table:table-cell>
              <table:table-cell office:value-type="float" office:value="-0.009198085">
                <text:p>-0.00919808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24.023101806641">
                <text:p>424.023101806641</text:p>
              </table:table-cell>
              <table:table-cell office:value-type="float" office:value="0.005192237">
                <text:p>0.00519223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24.136291503906">
                <text:p>424.136291503906</text:p>
              </table:table-cell>
              <table:table-cell office:value-type="float" office:value="0.01084608">
                <text:p>0.0108460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24.24951171875">
                <text:p>424.24951171875</text:p>
              </table:table-cell>
              <table:table-cell office:value-type="float" office:value="0.00603798">
                <text:p>0.0060379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24.362701416016">
                <text:p>424.362701416016</text:p>
              </table:table-cell>
              <table:table-cell office:value-type="float" office:value="-0.00332728">
                <text:p>-0.0033272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24.475921630859">
                <text:p>424.475921630859</text:p>
              </table:table-cell>
              <table:table-cell office:value-type="float" office:value="0.003471492">
                <text:p>0.00347149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24.589141845703">
                <text:p>424.589141845703</text:p>
              </table:table-cell>
              <table:table-cell office:value-type="float" office:value="-0.0005574659">
                <text:p>-0.000557465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24.702362060547">
                <text:p>424.702362060547</text:p>
              </table:table-cell>
              <table:table-cell office:value-type="float" office:value="-0.006594896">
                <text:p>-0.00659489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24.815612792969">
                <text:p>424.815612792969</text:p>
              </table:table-cell>
              <table:table-cell office:value-type="float" office:value="-0.002386301">
                <text:p>-0.00238630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24.928833007813">
                <text:p>424.928833007813</text:p>
              </table:table-cell>
              <table:table-cell office:value-type="float" office:value="0.01467533">
                <text:p>0.0146753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25.042083740234">
                <text:p>425.042083740234</text:p>
              </table:table-cell>
              <table:table-cell office:value-type="float" office:value="-0.004182646">
                <text:p>-0.00418264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25.155303955078">
                <text:p>425.155303955078</text:p>
              </table:table-cell>
              <table:table-cell office:value-type="float" office:value="-0.003136945">
                <text:p>-0.00313694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25.2685546875">
                <text:p>425.2685546875</text:p>
              </table:table-cell>
              <table:table-cell office:value-type="float" office:value="-0.01261619">
                <text:p>-0.0126161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25.3818359375">
                <text:p>425.3818359375</text:p>
              </table:table-cell>
              <table:table-cell office:value-type="float" office:value="-0.0008636731">
                <text:p>-0.000863673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25.495086669922">
                <text:p>425.495086669922</text:p>
              </table:table-cell>
              <table:table-cell office:value-type="float" office:value="0.005293916">
                <text:p>0.00529391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25.608337402344">
                <text:p>425.608337402344</text:p>
              </table:table-cell>
              <table:table-cell office:value-type="float" office:value="0.005638307">
                <text:p>0.00563830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25.721618652344">
                <text:p>425.721618652344</text:p>
              </table:table-cell>
              <table:table-cell office:value-type="float" office:value="-0.004743944">
                <text:p>-0.00474394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25.834899902344">
                <text:p>425.834899902344</text:p>
              </table:table-cell>
              <table:table-cell office:value-type="float" office:value="-0.005578207">
                <text:p>-0.00557820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25.948181152344">
                <text:p>425.948181152344</text:p>
              </table:table-cell>
              <table:table-cell office:value-type="float" office:value="0.004357453">
                <text:p>0.00435745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26.061462402344">
                <text:p>426.061462402344</text:p>
              </table:table-cell>
              <table:table-cell office:value-type="float" office:value="0.0112373">
                <text:p>0.011237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26.174743652344">
                <text:p>426.174743652344</text:p>
              </table:table-cell>
              <table:table-cell office:value-type="float" office:value="-0.003735317">
                <text:p>-0.00373531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26.288055419922">
                <text:p>426.288055419922</text:p>
              </table:table-cell>
              <table:table-cell office:value-type="float" office:value="0.01052263">
                <text:p>0.0105226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26.401336669922">
                <text:p>426.401336669922</text:p>
              </table:table-cell>
              <table:table-cell office:value-type="float" office:value="0.0005258866">
                <text:p>0.000525886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26.5146484375">
                <text:p>426.5146484375</text:p>
              </table:table-cell>
              <table:table-cell office:value-type="float" office:value="-0.00173814">
                <text:p>-0.0017381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26.627960205078">
                <text:p>426.627960205078</text:p>
              </table:table-cell>
              <table:table-cell office:value-type="float" office:value="0.003333762">
                <text:p>0.00333376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26.741271972656">
                <text:p>426.741271972656</text:p>
              </table:table-cell>
              <table:table-cell office:value-type="float" office:value="0.009134651">
                <text:p>0.00913465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26.854614257813">
                <text:p>426.854614257813</text:p>
              </table:table-cell>
              <table:table-cell office:value-type="float" office:value="0.008173966">
                <text:p>0.00817396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26.967926025391">
                <text:p>426.967926025391</text:p>
              </table:table-cell>
              <table:table-cell office:value-type="float" office:value="-0.003407286">
                <text:p>-0.00340728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27.081268310547">
                <text:p>427.081268310547</text:p>
              </table:table-cell>
              <table:table-cell office:value-type="float" office:value="-0.004143139">
                <text:p>-0.00414313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27.194610595703">
                <text:p>427.194610595703</text:p>
              </table:table-cell>
              <table:table-cell office:value-type="float" office:value="0.003784782">
                <text:p>0.00378478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27.307952880859">
                <text:p>427.307952880859</text:p>
              </table:table-cell>
              <table:table-cell office:value-type="float" office:value="0.003217484">
                <text:p>0.00321748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27.421295166016">
                <text:p>427.421295166016</text:p>
              </table:table-cell>
              <table:table-cell office:value-type="float" office:value="0.001293296">
                <text:p>0.00129329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27.534637451172">
                <text:p>427.534637451172</text:p>
              </table:table-cell>
              <table:table-cell office:value-type="float" office:value="-0.008873031">
                <text:p>-0.00887303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27.648010253906">
                <text:p>427.648010253906</text:p>
              </table:table-cell>
              <table:table-cell office:value-type="float" office:value="0.003192962">
                <text:p>0.00319296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27.761383056641">
                <text:p>427.761383056641</text:p>
              </table:table-cell>
              <table:table-cell office:value-type="float" office:value="0.005107174">
                <text:p>0.00510717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27.874755859375">
                <text:p>427.874755859375</text:p>
              </table:table-cell>
              <table:table-cell office:value-type="float" office:value="-0.006449669">
                <text:p>-0.00644966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27.988128662109">
                <text:p>427.988128662109</text:p>
              </table:table-cell>
              <table:table-cell office:value-type="float" office:value="-0.008692644">
                <text:p>-0.00869264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28.101501464844">
                <text:p>428.101501464844</text:p>
              </table:table-cell>
              <table:table-cell office:value-type="float" office:value="-0.0008675637">
                <text:p>-0.000867563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28.214874267578">
                <text:p>428.214874267578</text:p>
              </table:table-cell>
              <table:table-cell office:value-type="float" office:value="0.008727925">
                <text:p>0.00872792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28.328277587891">
                <text:p>428.328277587891</text:p>
              </table:table-cell>
              <table:table-cell office:value-type="float" office:value="-0.001604172">
                <text:p>-0.00160417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28.441650390625">
                <text:p>428.441650390625</text:p>
              </table:table-cell>
              <table:table-cell office:value-type="float" office:value="-0.005399091">
                <text:p>-0.00539909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28.555053710938">
                <text:p>428.555053710938</text:p>
              </table:table-cell>
              <table:table-cell office:value-type="float" office:value="-0.003077286">
                <text:p>-0.00307728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28.66845703125">
                <text:p>428.66845703125</text:p>
              </table:table-cell>
              <table:table-cell office:value-type="float" office:value="0.003437435">
                <text:p>0.00343743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28.781890869141">
                <text:p>428.781890869141</text:p>
              </table:table-cell>
              <table:table-cell office:value-type="float" office:value="-0.000221074">
                <text:p>-0.00022107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28.895294189453">
                <text:p>428.895294189453</text:p>
              </table:table-cell>
              <table:table-cell office:value-type="float" office:value="0.007059935">
                <text:p>0.00705993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29.008728027344">
                <text:p>429.008728027344</text:p>
              </table:table-cell>
              <table:table-cell office:value-type="float" office:value="-0.006478569">
                <text:p>-0.00647856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29.122131347656">
                <text:p>429.122131347656</text:p>
              </table:table-cell>
              <table:table-cell office:value-type="float" office:value="-0.004039782">
                <text:p>-0.00403978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29.235565185547">
                <text:p>429.235565185547</text:p>
              </table:table-cell>
              <table:table-cell office:value-type="float" office:value="-0.004983236">
                <text:p>-0.00498323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29.348999023438">
                <text:p>429.348999023438</text:p>
              </table:table-cell>
              <table:table-cell office:value-type="float" office:value="0.01603059">
                <text:p>0.0160305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29.462432861328">
                <text:p>429.462432861328</text:p>
              </table:table-cell>
              <table:table-cell office:value-type="float" office:value="0.02414501">
                <text:p>0.0241450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29.575897216797">
                <text:p>429.575897216797</text:p>
              </table:table-cell>
              <table:table-cell office:value-type="float" office:value="-0.000147687">
                <text:p>-0.00014768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29.689331054688">
                <text:p>429.689331054688</text:p>
              </table:table-cell>
              <table:table-cell office:value-type="float" office:value="-0.004814073">
                <text:p>-0.00481407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29.802795410156">
                <text:p>429.802795410156</text:p>
              </table:table-cell>
              <table:table-cell office:value-type="float" office:value="0.007376812">
                <text:p>0.00737681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29.916259765625">
                <text:p>429.916259765625</text:p>
              </table:table-cell>
              <table:table-cell office:value-type="float" office:value="0.0004993241">
                <text:p>0.000499324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30.029724121094">
                <text:p>430.029724121094</text:p>
              </table:table-cell>
              <table:table-cell office:value-type="float" office:value="0.007912259">
                <text:p>0.00791225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30.143188476563">
                <text:p>430.143188476563</text:p>
              </table:table-cell>
              <table:table-cell office:value-type="float" office:value="0.008257475">
                <text:p>0.00825747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30.256683349609">
                <text:p>430.256683349609</text:p>
              </table:table-cell>
              <table:table-cell office:value-type="float" office:value="-0.002634912">
                <text:p>-0.00263491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30.370147705078">
                <text:p>430.370147705078</text:p>
              </table:table-cell>
              <table:table-cell office:value-type="float" office:value="0.01144349">
                <text:p>0.0114434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30.483642578125">
                <text:p>430.483642578125</text:p>
              </table:table-cell>
              <table:table-cell office:value-type="float" office:value="-0.001195063">
                <text:p>-0.00119506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30.597137451172">
                <text:p>430.597137451172</text:p>
              </table:table-cell>
              <table:table-cell office:value-type="float" office:value="0.0002474726">
                <text:p>0.000247472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30.710632324219">
                <text:p>430.710632324219</text:p>
              </table:table-cell>
              <table:table-cell office:value-type="float" office:value="-0.001939804">
                <text:p>-0.00193980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30.824127197266">
                <text:p>430.824127197266</text:p>
              </table:table-cell>
              <table:table-cell office:value-type="float" office:value="0.005826423">
                <text:p>0.00582642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30.937652587891">
                <text:p>430.937652587891</text:p>
              </table:table-cell>
              <table:table-cell office:value-type="float" office:value="-0.0008407977">
                <text:p>-0.000840797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31.051147460938">
                <text:p>431.051147460938</text:p>
              </table:table-cell>
              <table:table-cell office:value-type="float" office:value="-0.003536709">
                <text:p>-0.00353670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31.164672851563">
                <text:p>431.164672851563</text:p>
              </table:table-cell>
              <table:table-cell office:value-type="float" office:value="-0.005501807">
                <text:p>-0.00550180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31.278198242188">
                <text:p>431.278198242188</text:p>
              </table:table-cell>
              <table:table-cell office:value-type="float" office:value="0.003920511">
                <text:p>0.00392051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31.391723632813">
                <text:p>431.391723632813</text:p>
              </table:table-cell>
              <table:table-cell office:value-type="float" office:value="-0.004078169">
                <text:p>-0.00407816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31.505249023438">
                <text:p>431.505249023438</text:p>
              </table:table-cell>
              <table:table-cell office:value-type="float" office:value="-0.001455517">
                <text:p>-0.00145551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31.618804931641">
                <text:p>431.618804931641</text:p>
              </table:table-cell>
              <table:table-cell office:value-type="float" office:value="-0.002566891">
                <text:p>-0.00256689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31.732330322266">
                <text:p>431.732330322266</text:p>
              </table:table-cell>
              <table:table-cell office:value-type="float" office:value="0.008773839">
                <text:p>0.00877383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31.845886230469">
                <text:p>431.845886230469</text:p>
              </table:table-cell>
              <table:table-cell office:value-type="float" office:value="0.01031145">
                <text:p>0.0103114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31.959442138672">
                <text:p>431.959442138672</text:p>
              </table:table-cell>
              <table:table-cell office:value-type="float" office:value="0.006391167">
                <text:p>0.00639116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32.072998046875">
                <text:p>432.072998046875</text:p>
              </table:table-cell>
              <table:table-cell office:value-type="float" office:value="0.01964427">
                <text:p>0.0196442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32.186553955078">
                <text:p>432.186553955078</text:p>
              </table:table-cell>
              <table:table-cell office:value-type="float" office:value="-0.005291439">
                <text:p>-0.00529143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32.300140380859">
                <text:p>432.300140380859</text:p>
              </table:table-cell>
              <table:table-cell office:value-type="float" office:value="-0.001762752">
                <text:p>-0.00176275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32.413696289063">
                <text:p>432.413696289063</text:p>
              </table:table-cell>
              <table:table-cell office:value-type="float" office:value="0.001088531">
                <text:p>0.00108853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32.527282714844">
                <text:p>432.527282714844</text:p>
              </table:table-cell>
              <table:table-cell office:value-type="float" office:value="0.003959746">
                <text:p>0.00395974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32.640869140625">
                <text:p>432.640869140625</text:p>
              </table:table-cell>
              <table:table-cell office:value-type="float" office:value="-0.002306917">
                <text:p>-0.00230691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32.754455566406">
                <text:p>432.754455566406</text:p>
              </table:table-cell>
              <table:table-cell office:value-type="float" office:value="0.01183687">
                <text:p>0.0118368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32.868041992188">
                <text:p>432.868041992188</text:p>
              </table:table-cell>
              <table:table-cell office:value-type="float" office:value="0.01583133">
                <text:p>0.0158313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32.981658935547">
                <text:p>432.981658935547</text:p>
              </table:table-cell>
              <table:table-cell office:value-type="float" office:value="0.008423">
                <text:p>0.00842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33.095245361328">
                <text:p>433.095245361328</text:p>
              </table:table-cell>
              <table:table-cell office:value-type="float" office:value="0.003362443">
                <text:p>0.00336244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33.208862304688">
                <text:p>433.208862304688</text:p>
              </table:table-cell>
              <table:table-cell office:value-type="float" office:value="0.003164419">
                <text:p>0.00316441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33.322479248047">
                <text:p>433.322479248047</text:p>
              </table:table-cell>
              <table:table-cell office:value-type="float" office:value="-0.001922723">
                <text:p>-0.00192272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33.436096191406">
                <text:p>433.436096191406</text:p>
              </table:table-cell>
              <table:table-cell office:value-type="float" office:value="0.004738774">
                <text:p>0.00473877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33.549713134766">
                <text:p>433.549713134766</text:p>
              </table:table-cell>
              <table:table-cell office:value-type="float" office:value="-0.001956414">
                <text:p>-0.00195641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33.663330078125">
                <text:p>433.663330078125</text:p>
              </table:table-cell>
              <table:table-cell office:value-type="float" office:value="-0.003827952">
                <text:p>-0.00382795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33.776977539063">
                <text:p>433.776977539063</text:p>
              </table:table-cell>
              <table:table-cell office:value-type="float" office:value="-0.004304695">
                <text:p>-0.00430469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33.890625">
                <text:p>433.890625</text:p>
              </table:table-cell>
              <table:table-cell office:value-type="float" office:value="0.01438957">
                <text:p>0.0143895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34.004272460938">
                <text:p>434.004272460938</text:p>
              </table:table-cell>
              <table:table-cell office:value-type="float" office:value="-0.0002197881">
                <text:p>-0.000219788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34.117919921875">
                <text:p>434.117919921875</text:p>
              </table:table-cell>
              <table:table-cell office:value-type="float" office:value="0.002854478">
                <text:p>0.00285447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34.231567382813">
                <text:p>434.231567382813</text:p>
              </table:table-cell>
              <table:table-cell office:value-type="float" office:value="-0.00746063">
                <text:p>-0.0074606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34.34521484375">
                <text:p>434.34521484375</text:p>
              </table:table-cell>
              <table:table-cell office:value-type="float" office:value="-0.004544168">
                <text:p>-0.00454416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34.458892822266">
                <text:p>434.458892822266</text:p>
              </table:table-cell>
              <table:table-cell office:value-type="float" office:value="0.01997759">
                <text:p>0.0199775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34.572570800781">
                <text:p>434.572570800781</text:p>
              </table:table-cell>
              <table:table-cell office:value-type="float" office:value="-0.003708348">
                <text:p>-0.00370834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34.686248779297">
                <text:p>434.686248779297</text:p>
              </table:table-cell>
              <table:table-cell office:value-type="float" office:value="-0.002328448">
                <text:p>-0.00232844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34.799926757813">
                <text:p>434.799926757813</text:p>
              </table:table-cell>
              <table:table-cell office:value-type="float" office:value="-0.003161275">
                <text:p>-0.00316127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34.913604736328">
                <text:p>434.913604736328</text:p>
              </table:table-cell>
              <table:table-cell office:value-type="float" office:value="0.002589616">
                <text:p>0.00258961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35.027282714844">
                <text:p>435.027282714844</text:p>
              </table:table-cell>
              <table:table-cell office:value-type="float" office:value="-0.00206648">
                <text:p>-0.0020664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35.140991210938">
                <text:p>435.140991210938</text:p>
              </table:table-cell>
              <table:table-cell office:value-type="float" office:value="-0.001162991">
                <text:p>-0.00116299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35.254669189453">
                <text:p>435.254669189453</text:p>
              </table:table-cell>
              <table:table-cell office:value-type="float" office:value="0.006183192">
                <text:p>0.00618319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35.368377685547">
                <text:p>435.368377685547</text:p>
              </table:table-cell>
              <table:table-cell office:value-type="float" office:value="-0.007750557">
                <text:p>-0.00775055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35.482086181641">
                <text:p>435.482086181641</text:p>
              </table:table-cell>
              <table:table-cell office:value-type="float" office:value="-0.007448931">
                <text:p>-0.00744893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35.595825195313">
                <text:p>435.595825195313</text:p>
              </table:table-cell>
              <table:table-cell office:value-type="float" office:value="-0.004259453">
                <text:p>-0.00425945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35.709533691406">
                <text:p>435.709533691406</text:p>
              </table:table-cell>
              <table:table-cell office:value-type="float" office:value="0.01154477">
                <text:p>0.0115447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35.823272705078">
                <text:p>435.823272705078</text:p>
              </table:table-cell>
              <table:table-cell office:value-type="float" office:value="0.003315735">
                <text:p>0.00331573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35.936981201172">
                <text:p>435.936981201172</text:p>
              </table:table-cell>
              <table:table-cell office:value-type="float" office:value="-0.008821798">
                <text:p>-0.00882179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36.050720214844">
                <text:p>436.050720214844</text:p>
              </table:table-cell>
              <table:table-cell office:value-type="float" office:value="0.003643899">
                <text:p>0.00364389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36.164459228516">
                <text:p>436.164459228516</text:p>
              </table:table-cell>
              <table:table-cell office:value-type="float" office:value="-0.001524564">
                <text:p>-0.00152456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36.278198242188">
                <text:p>436.278198242188</text:p>
              </table:table-cell>
              <table:table-cell office:value-type="float" office:value="0.02518572">
                <text:p>0.0251857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36.391967773438">
                <text:p>436.391967773438</text:p>
              </table:table-cell>
              <table:table-cell office:value-type="float" office:value="-0.0001280591">
                <text:p>-0.000128059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36.505706787109">
                <text:p>436.505706787109</text:p>
              </table:table-cell>
              <table:table-cell office:value-type="float" office:value="-0.001102201">
                <text:p>-0.00110220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36.619476318359">
                <text:p>436.619476318359</text:p>
              </table:table-cell>
              <table:table-cell office:value-type="float" office:value="0.004727489">
                <text:p>0.00472748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36.733245849609">
                <text:p>436.733245849609</text:p>
              </table:table-cell>
              <table:table-cell office:value-type="float" office:value="0.003035412">
                <text:p>0.00303541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36.847015380859">
                <text:p>436.847015380859</text:p>
              </table:table-cell>
              <table:table-cell office:value-type="float" office:value="-0.008975377">
                <text:p>-0.00897537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36.960784912109">
                <text:p>436.960784912109</text:p>
              </table:table-cell>
              <table:table-cell office:value-type="float" office:value="0.005097736">
                <text:p>0.00509773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37.074554443359">
                <text:p>437.074554443359</text:p>
              </table:table-cell>
              <table:table-cell office:value-type="float" office:value="0.002508901">
                <text:p>0.00250890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37.188354492188">
                <text:p>437.188354492188</text:p>
              </table:table-cell>
              <table:table-cell office:value-type="float" office:value="-0.0006222586">
                <text:p>-0.000622258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37.302154541016">
                <text:p>437.302154541016</text:p>
              </table:table-cell>
              <table:table-cell office:value-type="float" office:value="0.002393884">
                <text:p>0.00239388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37.415924072266">
                <text:p>437.415924072266</text:p>
              </table:table-cell>
              <table:table-cell office:value-type="float" office:value="0.002586114">
                <text:p>0.00258611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37.529724121094">
                <text:p>437.529724121094</text:p>
              </table:table-cell>
              <table:table-cell office:value-type="float" office:value="0.0007367783">
                <text:p>0.000736778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37.6435546875">
                <text:p>437.6435546875</text:p>
              </table:table-cell>
              <table:table-cell office:value-type="float" office:value="-0.0005122993">
                <text:p>-0.000512299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37.757354736328">
                <text:p>437.757354736328</text:p>
              </table:table-cell>
              <table:table-cell office:value-type="float" office:value="0.003745429">
                <text:p>0.00374542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37.871154785156">
                <text:p>437.871154785156</text:p>
              </table:table-cell>
              <table:table-cell office:value-type="float" office:value="-0.003585732">
                <text:p>-0.00358573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37.984985351563">
                <text:p>437.984985351563</text:p>
              </table:table-cell>
              <table:table-cell office:value-type="float" office:value="0.01494151">
                <text:p>0.0149415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38.098815917969">
                <text:p>438.098815917969</text:p>
              </table:table-cell>
              <table:table-cell office:value-type="float" office:value="0.00485595">
                <text:p>0.0048559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38.212646484375">
                <text:p>438.212646484375</text:p>
              </table:table-cell>
              <table:table-cell office:value-type="float" office:value="-0.006108441">
                <text:p>-0.00610844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38.326477050781">
                <text:p>438.326477050781</text:p>
              </table:table-cell>
              <table:table-cell office:value-type="float" office:value="-0.008708077">
                <text:p>-0.00870807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38.440307617188">
                <text:p>438.440307617188</text:p>
              </table:table-cell>
              <table:table-cell office:value-type="float" office:value="-0.0001481191">
                <text:p>-0.000148119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38.554168701172">
                <text:p>438.554168701172</text:p>
              </table:table-cell>
              <table:table-cell office:value-type="float" office:value="0.007274394">
                <text:p>0.00727439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38.667999267578">
                <text:p>438.667999267578</text:p>
              </table:table-cell>
              <table:table-cell office:value-type="float" office:value="-0.007611673">
                <text:p>-0.00761167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38.781860351563">
                <text:p>438.781860351563</text:p>
              </table:table-cell>
              <table:table-cell office:value-type="float" office:value="-0.01154395">
                <text:p>-0.0115439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38.895721435547">
                <text:p>438.895721435547</text:p>
              </table:table-cell>
              <table:table-cell office:value-type="float" office:value="-0.002412214">
                <text:p>-0.00241221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39.009582519531">
                <text:p>439.009582519531</text:p>
              </table:table-cell>
              <table:table-cell office:value-type="float" office:value="0.002789866">
                <text:p>0.00278986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39.123474121094">
                <text:p>439.123474121094</text:p>
              </table:table-cell>
              <table:table-cell office:value-type="float" office:value="-0.008926511">
                <text:p>-0.00892651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39.237335205078">
                <text:p>439.237335205078</text:p>
              </table:table-cell>
              <table:table-cell office:value-type="float" office:value="-0.007345452">
                <text:p>-0.00734545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39.351226806641">
                <text:p>439.351226806641</text:p>
              </table:table-cell>
              <table:table-cell office:value-type="float" office:value="0.003496066">
                <text:p>0.00349606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39.465087890625">
                <text:p>439.465087890625</text:p>
              </table:table-cell>
              <table:table-cell office:value-type="float" office:value="0.01935758">
                <text:p>0.0193575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39.578979492188">
                <text:p>439.578979492188</text:p>
              </table:table-cell>
              <table:table-cell office:value-type="float" office:value="-0.005250941">
                <text:p>-0.00525094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39.69287109375">
                <text:p>439.69287109375</text:p>
              </table:table-cell>
              <table:table-cell office:value-type="float" office:value="-0.007991659">
                <text:p>-0.00799165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39.806793212891">
                <text:p>439.806793212891</text:p>
              </table:table-cell>
              <table:table-cell office:value-type="float" office:value="-0.006074095">
                <text:p>-0.00607409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39.920684814453">
                <text:p>439.920684814453</text:p>
              </table:table-cell>
              <table:table-cell office:value-type="float" office:value="0.05465851">
                <text:p>0.0546585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40.034606933594">
                <text:p>440.034606933594</text:p>
              </table:table-cell>
              <table:table-cell office:value-type="float" office:value="-0.0006205839">
                <text:p>-0.000620583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40.148498535156">
                <text:p>440.148498535156</text:p>
              </table:table-cell>
              <table:table-cell office:value-type="float" office:value="-0.002761513">
                <text:p>-0.00276151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40.262420654297">
                <text:p>440.262420654297</text:p>
              </table:table-cell>
              <table:table-cell office:value-type="float" office:value="0.006879921">
                <text:p>0.00687992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40.376342773438">
                <text:p>440.376342773438</text:p>
              </table:table-cell>
              <table:table-cell office:value-type="float" office:value="0.02925914">
                <text:p>0.0292591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40.490295410156">
                <text:p>440.490295410156</text:p>
              </table:table-cell>
              <table:table-cell office:value-type="float" office:value="-0.0002067355">
                <text:p>-0.000206735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40.604217529297">
                <text:p>440.604217529297</text:p>
              </table:table-cell>
              <table:table-cell office:value-type="float" office:value="-0.01544828">
                <text:p>-0.0154482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40.718170166016">
                <text:p>440.718170166016</text:p>
              </table:table-cell>
              <table:table-cell office:value-type="float" office:value="0.01932318">
                <text:p>0.0193231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40.832092285156">
                <text:p>440.832092285156</text:p>
              </table:table-cell>
              <table:table-cell office:value-type="float" office:value="0.01024309">
                <text:p>0.0102430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40.946044921875">
                <text:p>440.946044921875</text:p>
              </table:table-cell>
              <table:table-cell office:value-type="float" office:value="-0.001769618">
                <text:p>-0.00176961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41.059997558594">
                <text:p>441.059997558594</text:p>
              </table:table-cell>
              <table:table-cell office:value-type="float" office:value="-0.001805326">
                <text:p>-0.00180532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41.173950195313">
                <text:p>441.173950195313</text:p>
              </table:table-cell>
              <table:table-cell office:value-type="float" office:value="0.005702023">
                <text:p>0.00570202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41.287933349609">
                <text:p>441.287933349609</text:p>
              </table:table-cell>
              <table:table-cell office:value-type="float" office:value="-0.0001612445">
                <text:p>-0.000161244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41.401885986328">
                <text:p>441.401885986328</text:p>
              </table:table-cell>
              <table:table-cell office:value-type="float" office:value="-0.0007902816">
                <text:p>-0.000790281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41.515869140625">
                <text:p>441.515869140625</text:p>
              </table:table-cell>
              <table:table-cell office:value-type="float" office:value="0.01320458">
                <text:p>0.0132045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41.629852294922">
                <text:p>441.629852294922</text:p>
              </table:table-cell>
              <table:table-cell office:value-type="float" office:value="0.001170602">
                <text:p>0.00117060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41.743835449219">
                <text:p>441.743835449219</text:p>
              </table:table-cell>
              <table:table-cell office:value-type="float" office:value="0.005507291">
                <text:p>0.00550729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41.857818603516">
                <text:p>441.857818603516</text:p>
              </table:table-cell>
              <table:table-cell office:value-type="float" office:value="-0.01063203">
                <text:p>-0.0106320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41.971801757813">
                <text:p>441.971801757813</text:p>
              </table:table-cell>
              <table:table-cell office:value-type="float" office:value="0.0003024628">
                <text:p>0.000302462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42.085815429688">
                <text:p>442.085815429688</text:p>
              </table:table-cell>
              <table:table-cell office:value-type="float" office:value="0.008795439">
                <text:p>0.00879543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42.199829101563">
                <text:p>442.199829101563</text:p>
              </table:table-cell>
              <table:table-cell office:value-type="float" office:value="-0.00479074">
                <text:p>-0.0047907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42.313812255859">
                <text:p>442.313812255859</text:p>
              </table:table-cell>
              <table:table-cell office:value-type="float" office:value="-0.000282971">
                <text:p>-0.00028297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42.427825927734">
                <text:p>442.427825927734</text:p>
              </table:table-cell>
              <table:table-cell office:value-type="float" office:value="0.01837243">
                <text:p>0.0183724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42.541839599609">
                <text:p>442.541839599609</text:p>
              </table:table-cell>
              <table:table-cell office:value-type="float" office:value="0.002891971">
                <text:p>0.00289197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42.655883789063">
                <text:p>442.655883789063</text:p>
              </table:table-cell>
              <table:table-cell office:value-type="float" office:value="-0.001465071">
                <text:p>-0.00146507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42.769897460938">
                <text:p>442.769897460938</text:p>
              </table:table-cell>
              <table:table-cell office:value-type="float" office:value="-0.0001509031">
                <text:p>-0.000150903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42.883941650391">
                <text:p>442.883941650391</text:p>
              </table:table-cell>
              <table:table-cell office:value-type="float" office:value="-0.002697202">
                <text:p>-0.00269720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42.997985839844">
                <text:p>442.997985839844</text:p>
              </table:table-cell>
              <table:table-cell office:value-type="float" office:value="0.008039827">
                <text:p>0.00803982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43.112030029297">
                <text:p>443.112030029297</text:p>
              </table:table-cell>
              <table:table-cell office:value-type="float" office:value="0.003411401">
                <text:p>0.00341140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443.22607421875">
                <text:p>443.22607421875</text:p>
              </table:table-cell>
              <table:table-cell office:value-type="float" office:value="-0.00528676">
                <text:p>-0.0052867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443.340118408203">
                <text:p>443.340118408203</text:p>
              </table:table-cell>
              <table:table-cell office:value-type="float" office:value="-0.0009615896">
                <text:p>-0.000961589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443.454162597656">
                <text:p>443.454162597656</text:p>
              </table:table-cell>
              <table:table-cell office:value-type="float" office:value="0.002788405">
                <text:p>0.00278840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443.568237304688">
                <text:p>443.568237304688</text:p>
              </table:table-cell>
              <table:table-cell office:value-type="float" office:value="-0.006456979">
                <text:p>-0.00645697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443.682312011719">
                <text:p>443.682312011719</text:p>
              </table:table-cell>
              <table:table-cell office:value-type="float" office:value="-0.009810359">
                <text:p>-0.00981035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443.79638671875">
                <text:p>443.79638671875</text:p>
              </table:table-cell>
              <table:table-cell office:value-type="float" office:value="0.001041396">
                <text:p>0.00104139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443.910461425781">
                <text:p>443.910461425781</text:p>
              </table:table-cell>
              <table:table-cell office:value-type="float" office:value="-0.00378407">
                <text:p>-0.0037840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44.024536132813">
                <text:p>444.024536132813</text:p>
              </table:table-cell>
              <table:table-cell office:value-type="float" office:value="0.004068415">
                <text:p>0.00406841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44.138610839844">
                <text:p>444.138610839844</text:p>
              </table:table-cell>
              <table:table-cell office:value-type="float" office:value="0.02305081">
                <text:p>0.0230508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444.252716064453">
                <text:p>444.252716064453</text:p>
              </table:table-cell>
              <table:table-cell office:value-type="float" office:value="-0.004612212">
                <text:p>-0.00461221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444.366821289063">
                <text:p>444.366821289063</text:p>
              </table:table-cell>
              <table:table-cell office:value-type="float" office:value="-0.0005422477">
                <text:p>-0.000542247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44.480895996094">
                <text:p>444.480895996094</text:p>
              </table:table-cell>
              <table:table-cell office:value-type="float" office:value="0.001907878">
                <text:p>0.00190787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44.595001220703">
                <text:p>444.595001220703</text:p>
              </table:table-cell>
              <table:table-cell office:value-type="float" office:value="-0.004606978">
                <text:p>-0.00460697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44.709136962891">
                <text:p>444.709136962891</text:p>
              </table:table-cell>
              <table:table-cell office:value-type="float" office:value="-0.002610884">
                <text:p>-0.00261088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44.8232421875">
                <text:p>444.8232421875</text:p>
              </table:table-cell>
              <table:table-cell office:value-type="float" office:value="0.004584168">
                <text:p>0.00458416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44.937347412109">
                <text:p>444.937347412109</text:p>
              </table:table-cell>
              <table:table-cell office:value-type="float" office:value="0.006635805">
                <text:p>0.00663580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445.051483154297">
                <text:p>445.051483154297</text:p>
              </table:table-cell>
              <table:table-cell office:value-type="float" office:value="-0.003086118">
                <text:p>-0.00308611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445.165618896484">
                <text:p>445.165618896484</text:p>
              </table:table-cell>
              <table:table-cell office:value-type="float" office:value="-0.009784395">
                <text:p>-0.00978439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445.279754638672">
                <text:p>445.279754638672</text:p>
              </table:table-cell>
              <table:table-cell office:value-type="float" office:value="0.005297241">
                <text:p>0.00529724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45.393890380859">
                <text:p>445.393890380859</text:p>
              </table:table-cell>
              <table:table-cell office:value-type="float" office:value="-0.001043868">
                <text:p>-0.00104386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445.508026123047">
                <text:p>445.508026123047</text:p>
              </table:table-cell>
              <table:table-cell office:value-type="float" office:value="-0.005868977">
                <text:p>-0.00586897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45.622192382813">
                <text:p>445.622192382813</text:p>
              </table:table-cell>
              <table:table-cell office:value-type="float" office:value="-0.0003649254">
                <text:p>-0.000364925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45.736328125">
                <text:p>445.736328125</text:p>
              </table:table-cell>
              <table:table-cell office:value-type="float" office:value="0.0009522107">
                <text:p>0.000952210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45.850494384766">
                <text:p>445.850494384766</text:p>
              </table:table-cell>
              <table:table-cell office:value-type="float" office:value="0.00389165">
                <text:p>0.0038916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45.964660644531">
                <text:p>445.964660644531</text:p>
              </table:table-cell>
              <table:table-cell office:value-type="float" office:value="-0.005463441">
                <text:p>-0.00546344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46.078826904297">
                <text:p>446.078826904297</text:p>
              </table:table-cell>
              <table:table-cell office:value-type="float" office:value="-0.001717644">
                <text:p>-0.00171764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446.192993164063">
                <text:p>446.192993164063</text:p>
              </table:table-cell>
              <table:table-cell office:value-type="float" office:value="0.004020798">
                <text:p>0.00402079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446.307189941406">
                <text:p>446.307189941406</text:p>
              </table:table-cell>
              <table:table-cell office:value-type="float" office:value="0.003457204">
                <text:p>0.00345720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46.421356201172">
                <text:p>446.421356201172</text:p>
              </table:table-cell>
              <table:table-cell office:value-type="float" office:value="-0.004699244">
                <text:p>-0.00469924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46.535552978516">
                <text:p>446.535552978516</text:p>
              </table:table-cell>
              <table:table-cell office:value-type="float" office:value="0.0006087361">
                <text:p>0.000608736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46.649749755859">
                <text:p>446.649749755859</text:p>
              </table:table-cell>
              <table:table-cell office:value-type="float" office:value="0.01235336">
                <text:p>0.0123533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46.763946533203">
                <text:p>446.763946533203</text:p>
              </table:table-cell>
              <table:table-cell office:value-type="float" office:value="-0.003216299">
                <text:p>-0.00321629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46.878143310547">
                <text:p>446.878143310547</text:p>
              </table:table-cell>
              <table:table-cell office:value-type="float" office:value="-0.001868852">
                <text:p>-0.00186885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46.992370605469">
                <text:p>446.992370605469</text:p>
              </table:table-cell>
              <table:table-cell office:value-type="float" office:value="-0.003275">
                <text:p>-0.00327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47.106567382813">
                <text:p>447.106567382813</text:p>
              </table:table-cell>
              <table:table-cell office:value-type="float" office:value="0.01417647">
                <text:p>0.0141764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47.220794677734">
                <text:p>447.220794677734</text:p>
              </table:table-cell>
              <table:table-cell office:value-type="float" office:value="0.001725976">
                <text:p>0.00172597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47.335021972656">
                <text:p>447.335021972656</text:p>
              </table:table-cell>
              <table:table-cell office:value-type="float" office:value="0.003488555">
                <text:p>0.00348855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47.449249267578">
                <text:p>447.449249267578</text:p>
              </table:table-cell>
              <table:table-cell office:value-type="float" office:value="0.007727896">
                <text:p>0.00772789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47.5634765625">
                <text:p>447.5634765625</text:p>
              </table:table-cell>
              <table:table-cell office:value-type="float" office:value="0.001202318">
                <text:p>0.00120231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447.677703857422">
                <text:p>447.677703857422</text:p>
              </table:table-cell>
              <table:table-cell office:value-type="float" office:value="0.00295301">
                <text:p>0.0029530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447.791961669922">
                <text:p>447.791961669922</text:p>
              </table:table-cell>
              <table:table-cell office:value-type="float" office:value="-0.006852461">
                <text:p>-0.00685246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447.906188964844">
                <text:p>447.906188964844</text:p>
              </table:table-cell>
              <table:table-cell office:value-type="float" office:value="-0.008971799">
                <text:p>-0.00897179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48.020446777344">
                <text:p>448.020446777344</text:p>
              </table:table-cell>
              <table:table-cell office:value-type="float" office:value="-0.006865475">
                <text:p>-0.00686547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448.134704589844">
                <text:p>448.134704589844</text:p>
              </table:table-cell>
              <table:table-cell office:value-type="float" office:value="0.01060609">
                <text:p>0.0106060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448.248962402344">
                <text:p>448.248962402344</text:p>
              </table:table-cell>
              <table:table-cell office:value-type="float" office:value="-0.008532668">
                <text:p>-0.00853266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448.363220214844">
                <text:p>448.363220214844</text:p>
              </table:table-cell>
              <table:table-cell office:value-type="float" office:value="-0.002781375">
                <text:p>-0.00278137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48.477508544922">
                <text:p>448.477508544922</text:p>
              </table:table-cell>
              <table:table-cell office:value-type="float" office:value="0.006938518">
                <text:p>0.00693851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448.591766357422">
                <text:p>448.591766357422</text:p>
              </table:table-cell>
              <table:table-cell office:value-type="float" office:value="0.009420912">
                <text:p>0.00942091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48.7060546875">
                <text:p>448.7060546875</text:p>
              </table:table-cell>
              <table:table-cell office:value-type="float" office:value="0.009545773">
                <text:p>0.00954577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48.820343017578">
                <text:p>448.820343017578</text:p>
              </table:table-cell>
              <table:table-cell office:value-type="float" office:value="-0.008618123">
                <text:p>-0.00861812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48.934631347656">
                <text:p>448.934631347656</text:p>
              </table:table-cell>
              <table:table-cell office:value-type="float" office:value="-0.0009745055">
                <text:p>-0.000974505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449.048919677734">
                <text:p>449.048919677734</text:p>
              </table:table-cell>
              <table:table-cell office:value-type="float" office:value="-0.00196486">
                <text:p>-0.0019648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49.163238525391">
                <text:p>449.163238525391</text:p>
              </table:table-cell>
              <table:table-cell office:value-type="float" office:value="-0.01101243">
                <text:p>-0.0110124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449.277526855469">
                <text:p>449.277526855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449.391845703125">
                <text:p>449.391845703125</text:p>
              </table:table-cell>
              <table:table-cell office:value-type="float" office:value="0.0133175">
                <text:p>0.013317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449.506164550781">
                <text:p>449.506164550781</text:p>
              </table:table-cell>
              <table:table-cell office:value-type="float" office:value="0.0006319256">
                <text:p>0.000631925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449.620483398438">
                <text:p>449.620483398438</text:p>
              </table:table-cell>
              <table:table-cell office:value-type="float" office:value="0.00809796">
                <text:p>0.0080979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449.734802246094">
                <text:p>449.734802246094</text:p>
              </table:table-cell>
              <table:table-cell office:value-type="float" office:value="-0.01055318">
                <text:p>-0.0105531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449.84912109375">
                <text:p>449.84912109375</text:p>
              </table:table-cell>
              <table:table-cell office:value-type="float" office:value="0.005508601">
                <text:p>0.00550860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49.963439941406">
                <text:p>449.963439941406</text:p>
              </table:table-cell>
              <table:table-cell office:value-type="float" office:value="-0.004458492">
                <text:p>-0.00445849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450.077789306641">
                <text:p>450.077789306641</text:p>
              </table:table-cell>
              <table:table-cell office:value-type="float" office:value="-0.003230833">
                <text:p>-0.00323083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450.192138671875">
                <text:p>450.192138671875</text:p>
              </table:table-cell>
              <table:table-cell office:value-type="float" office:value="-0.01360894">
                <text:p>-0.0136089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450.306488037109">
                <text:p>450.306488037109</text:p>
              </table:table-cell>
              <table:table-cell office:value-type="float" office:value="0.005483343">
                <text:p>0.00548334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450.420837402344">
                <text:p>450.420837402344</text:p>
              </table:table-cell>
              <table:table-cell office:value-type="float" office:value="0.00191024">
                <text:p>0.0019102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450.535186767578">
                <text:p>450.535186767578</text:p>
              </table:table-cell>
              <table:table-cell office:value-type="float" office:value="-0.0005234408">
                <text:p>-0.000523440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450.649536132813">
                <text:p>450.649536132813</text:p>
              </table:table-cell>
              <table:table-cell office:value-type="float" office:value="-0.01297613">
                <text:p>-0.0129761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450.763916015625">
                <text:p>450.763916015625</text:p>
              </table:table-cell>
              <table:table-cell office:value-type="float" office:value="0.00793793">
                <text:p>0.0079379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450.878295898438">
                <text:p>450.878295898438</text:p>
              </table:table-cell>
              <table:table-cell office:value-type="float" office:value="-0.005864428">
                <text:p>-0.00586442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450.99267578125">
                <text:p>450.99267578125</text:p>
              </table:table-cell>
              <table:table-cell office:value-type="float" office:value="-0.001306144">
                <text:p>-0.00130614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451.107055664063">
                <text:p>451.107055664063</text:p>
              </table:table-cell>
              <table:table-cell office:value-type="float" office:value="-0.01339733">
                <text:p>-0.0133973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451.221435546875">
                <text:p>451.22143554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451.335815429688">
                <text:p>451.335815429688</text:p>
              </table:table-cell>
              <table:table-cell office:value-type="float" office:value="0.0105277">
                <text:p>0.010527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451.450225830078">
                <text:p>451.450225830078</text:p>
              </table:table-cell>
              <table:table-cell office:value-type="float" office:value="0.001525361">
                <text:p>0.00152536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451.564605712891">
                <text:p>451.564605712891</text:p>
              </table:table-cell>
              <table:table-cell office:value-type="float" office:value="-0.01274981">
                <text:p>-0.0127498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451.679016113281">
                <text:p>451.679016113281</text:p>
              </table:table-cell>
              <table:table-cell office:value-type="float" office:value="0.006725348">
                <text:p>0.00672534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451.793426513672">
                <text:p>451.793426513672</text:p>
              </table:table-cell>
              <table:table-cell office:value-type="float" office:value="0.009441743">
                <text:p>0.00944174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451.907836914063">
                <text:p>451.907836914063</text:p>
              </table:table-cell>
              <table:table-cell office:value-type="float" office:value="-0.007940503">
                <text:p>-0.00794050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452.022247314453">
                <text:p>452.022247314453</text:p>
              </table:table-cell>
              <table:table-cell office:value-type="float" office:value="-0.003944693">
                <text:p>-0.00394469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452.136688232422">
                <text:p>452.136688232422</text:p>
              </table:table-cell>
              <table:table-cell office:value-type="float" office:value="0.00184967">
                <text:p>0.0018496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452.251098632813">
                <text:p>452.251098632813</text:p>
              </table:table-cell>
              <table:table-cell office:value-type="float" office:value="0.006720328">
                <text:p>0.00672032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452.365539550781">
                <text:p>452.365539550781</text:p>
              </table:table-cell>
              <table:table-cell office:value-type="float" office:value="-0.01090081">
                <text:p>-0.0109008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452.47998046875">
                <text:p>452.47998046875</text:p>
              </table:table-cell>
              <table:table-cell office:value-type="float" office:value="0.001458571">
                <text:p>0.00145857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452.594421386719">
                <text:p>452.594421386719</text:p>
              </table:table-cell>
              <table:table-cell office:value-type="float" office:value="0.008113977">
                <text:p>0.00811397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452.708862304688">
                <text:p>452.708862304688</text:p>
              </table:table-cell>
              <table:table-cell office:value-type="float" office:value="0.004744197">
                <text:p>0.00474419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452.823333740234">
                <text:p>452.823333740234</text:p>
              </table:table-cell>
              <table:table-cell office:value-type="float" office:value="0.007742384">
                <text:p>0.00774238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452.937774658203">
                <text:p>452.937774658203</text:p>
              </table:table-cell>
              <table:table-cell office:value-type="float" office:value="-0.007484894">
                <text:p>-0.00748489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453.05224609375">
                <text:p>453.05224609375</text:p>
              </table:table-cell>
              <table:table-cell office:value-type="float" office:value="-0.002073216">
                <text:p>-0.00207321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453.166717529297">
                <text:p>453.166717529297</text:p>
              </table:table-cell>
              <table:table-cell office:value-type="float" office:value="0.005574669">
                <text:p>0.00557466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453.281188964844">
                <text:p>453.281188964844</text:p>
              </table:table-cell>
              <table:table-cell office:value-type="float" office:value="-0.01041136">
                <text:p>-0.0104113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453.395660400391">
                <text:p>453.395660400391</text:p>
              </table:table-cell>
              <table:table-cell office:value-type="float" office:value="-0.003408096">
                <text:p>-0.00340809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453.510131835938">
                <text:p>453.510131835938</text:p>
              </table:table-cell>
              <table:table-cell office:value-type="float" office:value="0.01565748">
                <text:p>0.0156574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453.624603271484">
                <text:p>453.624603271484</text:p>
              </table:table-cell>
              <table:table-cell office:value-type="float" office:value="-0.006357312">
                <text:p>-0.00635731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453.739105224609">
                <text:p>453.739105224609</text:p>
              </table:table-cell>
              <table:table-cell office:value-type="float" office:value="-0.004493312">
                <text:p>-0.00449331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453.853607177734">
                <text:p>453.853607177734</text:p>
              </table:table-cell>
              <table:table-cell office:value-type="float" office:value="-0.00407332">
                <text:p>-0.0040733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453.968109130859">
                <text:p>453.968109130859</text:p>
              </table:table-cell>
              <table:table-cell office:value-type="float" office:value="0.001397014">
                <text:p>0.00139701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454.082611083984">
                <text:p>454.082611083984</text:p>
              </table:table-cell>
              <table:table-cell office:value-type="float" office:value="-0.002175326">
                <text:p>-0.00217532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454.197113037109">
                <text:p>454.197113037109</text:p>
              </table:table-cell>
              <table:table-cell office:value-type="float" office:value="-0.01165734">
                <text:p>-0.0116573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54.311614990234">
                <text:p>454.311614990234</text:p>
              </table:table-cell>
              <table:table-cell office:value-type="float" office:value="-0.01569928">
                <text:p>-0.01569928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54.426147460938">
                <text:p>454.426147460938</text:p>
              </table:table-cell>
              <table:table-cell office:value-type="float" office:value="0.00495114">
                <text:p>0.0049511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54.540649414063">
                <text:p>454.540649414063</text:p>
              </table:table-cell>
              <table:table-cell office:value-type="float" office:value="0.007939743">
                <text:p>0.00793974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54.655181884766">
                <text:p>454.655181884766</text:p>
              </table:table-cell>
              <table:table-cell office:value-type="float" office:value="-0.006401457">
                <text:p>-0.00640145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54.769714355469">
                <text:p>454.769714355469</text:p>
              </table:table-cell>
              <table:table-cell office:value-type="float" office:value="-0.003625714">
                <text:p>-0.00362571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54.884246826172">
                <text:p>454.884246826172</text:p>
              </table:table-cell>
              <table:table-cell office:value-type="float" office:value="0.00901326">
                <text:p>0.0090132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54.998809814453">
                <text:p>454.998809814453</text:p>
              </table:table-cell>
              <table:table-cell office:value-type="float" office:value="0.0109356">
                <text:p>0.010935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55.113342285156">
                <text:p>455.113342285156</text:p>
              </table:table-cell>
              <table:table-cell office:value-type="float" office:value="-0.006632231">
                <text:p>-0.00663223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55.227905273438">
                <text:p>455.227905273438</text:p>
              </table:table-cell>
              <table:table-cell office:value-type="float" office:value="-0.005411291">
                <text:p>-0.00541129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55.342468261719">
                <text:p>455.342468261719</text:p>
              </table:table-cell>
              <table:table-cell office:value-type="float" office:value="0.007089373">
                <text:p>0.00708937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55.457000732422">
                <text:p>455.457000732422</text:p>
              </table:table-cell>
              <table:table-cell office:value-type="float" office:value="0.007871384">
                <text:p>0.00787138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55.571563720703">
                <text:p>455.571563720703</text:p>
              </table:table-cell>
              <table:table-cell office:value-type="float" office:value="-0.008871458">
                <text:p>-0.00887145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55.686157226563">
                <text:p>455.686157226563</text:p>
              </table:table-cell>
              <table:table-cell office:value-type="float" office:value="-0.01028898">
                <text:p>-0.0102889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55.800720214844">
                <text:p>455.800720214844</text:p>
              </table:table-cell>
              <table:table-cell office:value-type="float" office:value="0.01033161">
                <text:p>0.0103316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55.915313720703">
                <text:p>455.915313720703</text:p>
              </table:table-cell>
              <table:table-cell office:value-type="float" office:value="-0.0002492436">
                <text:p>-0.000249243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56.029876708984">
                <text:p>456.029876708984</text:p>
              </table:table-cell>
              <table:table-cell office:value-type="float" office:value="-0.006945321">
                <text:p>-0.00694532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56.144470214844">
                <text:p>456.144470214844</text:p>
              </table:table-cell>
              <table:table-cell office:value-type="float" office:value="-0.004638752">
                <text:p>-0.00463875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56.259063720703">
                <text:p>456.259063720703</text:p>
              </table:table-cell>
              <table:table-cell office:value-type="float" office:value="-0.004766396">
                <text:p>-0.00476639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56.373657226563">
                <text:p>456.373657226563</text:p>
              </table:table-cell>
              <table:table-cell office:value-type="float" office:value="0.008086727">
                <text:p>0.00808672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56.488250732422">
                <text:p>456.488250732422</text:p>
              </table:table-cell>
              <table:table-cell office:value-type="float" office:value="-0.01009298">
                <text:p>-0.0100929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56.602874755859">
                <text:p>456.602874755859</text:p>
              </table:table-cell>
              <table:table-cell office:value-type="float" office:value="-0.01477942">
                <text:p>-0.0147794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56.717468261719">
                <text:p>456.717468261719</text:p>
              </table:table-cell>
              <table:table-cell office:value-type="float" office:value="0.01317085">
                <text:p>0.0131708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56.832092285156">
                <text:p>456.832092285156</text:p>
              </table:table-cell>
              <table:table-cell office:value-type="float" office:value="-0.0004810671">
                <text:p>-0.000481067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56.946716308594">
                <text:p>456.946716308594</text:p>
              </table:table-cell>
              <table:table-cell office:value-type="float" office:value="-0.01016741">
                <text:p>-0.0101674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57.061340332031">
                <text:p>457.061340332031</text:p>
              </table:table-cell>
              <table:table-cell office:value-type="float" office:value="0.007688865">
                <text:p>0.00768886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57.175964355469">
                <text:p>457.175964355469</text:p>
              </table:table-cell>
              <table:table-cell office:value-type="float" office:value="0.003650902">
                <text:p>0.00365090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57.290618896484">
                <text:p>457.290618896484</text:p>
              </table:table-cell>
              <table:table-cell office:value-type="float" office:value="0.002984309">
                <text:p>0.00298430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57.405242919922">
                <text:p>457.405242919922</text:p>
              </table:table-cell>
              <table:table-cell office:value-type="float" office:value="-0.01327718">
                <text:p>-0.0132771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57.519897460938">
                <text:p>457.519897460938</text:p>
              </table:table-cell>
              <table:table-cell office:value-type="float" office:value="0.01592476">
                <text:p>0.0159247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57.634552001953">
                <text:p>457.634552001953</text:p>
              </table:table-cell>
              <table:table-cell office:value-type="float" office:value="0.009132898">
                <text:p>0.00913289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57.749206542969">
                <text:p>457.749206542969</text:p>
              </table:table-cell>
              <table:table-cell office:value-type="float" office:value="0.01162102">
                <text:p>0.01162102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57.863861083984">
                <text:p>457.863861083984</text:p>
              </table:table-cell>
              <table:table-cell office:value-type="float" office:value="-0.001488226">
                <text:p>-0.00148822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57.978515625">
                <text:p>457.978515625</text:p>
              </table:table-cell>
              <table:table-cell office:value-type="float" office:value="-0.00159245">
                <text:p>-0.0015924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58.093200683594">
                <text:p>458.093200683594</text:p>
              </table:table-cell>
              <table:table-cell office:value-type="float" office:value="-0.002357981">
                <text:p>-0.00235798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58.207855224609">
                <text:p>458.207855224609</text:p>
              </table:table-cell>
              <table:table-cell office:value-type="float" office:value="0.006983225">
                <text:p>0.00698322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58.322540283203">
                <text:p>458.322540283203</text:p>
              </table:table-cell>
              <table:table-cell office:value-type="float" office:value="0.01007157">
                <text:p>0.0100715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58.437225341797">
                <text:p>458.437225341797</text:p>
              </table:table-cell>
              <table:table-cell office:value-type="float" office:value="-0.0006177475">
                <text:p>-0.000617747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58.551910400391">
                <text:p>458.551910400391</text:p>
              </table:table-cell>
              <table:table-cell office:value-type="float" office:value="0.007391911">
                <text:p>0.00739191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58.666595458984">
                <text:p>458.666595458984</text:p>
              </table:table-cell>
              <table:table-cell office:value-type="float" office:value="0.01489314">
                <text:p>0.0148931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58.781280517578">
                <text:p>458.781280517578</text:p>
              </table:table-cell>
              <table:table-cell office:value-type="float" office:value="-0.006749941">
                <text:p>-0.00674994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58.89599609375">
                <text:p>458.89599609375</text:p>
              </table:table-cell>
              <table:table-cell office:value-type="float" office:value="-0.002543829">
                <text:p>-0.00254382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59.010681152344">
                <text:p>459.010681152344</text:p>
              </table:table-cell>
              <table:table-cell office:value-type="float" office:value="0.01022343">
                <text:p>0.0102234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59.125396728516">
                <text:p>459.125396728516</text:p>
              </table:table-cell>
              <table:table-cell office:value-type="float" office:value="0.03098735">
                <text:p>0.0309873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59.240112304688">
                <text:p>459.240112304688</text:p>
              </table:table-cell>
              <table:table-cell office:value-type="float" office:value="0.01016569">
                <text:p>0.0101656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59.354827880859">
                <text:p>459.354827880859</text:p>
              </table:table-cell>
              <table:table-cell office:value-type="float" office:value="-0.00674616">
                <text:p>-0.0067461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59.469543457031">
                <text:p>459.469543457031</text:p>
              </table:table-cell>
              <table:table-cell office:value-type="float" office:value="0.004770226">
                <text:p>0.00477022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59.584289550781">
                <text:p>459.584289550781</text:p>
              </table:table-cell>
              <table:table-cell office:value-type="float" office:value="-0.0001088285">
                <text:p>-0.000108828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59.699005126953">
                <text:p>459.699005126953</text:p>
              </table:table-cell>
              <table:table-cell office:value-type="float" office:value="0.006365261">
                <text:p>0.00636526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59.813751220703">
                <text:p>459.813751220703</text:p>
              </table:table-cell>
              <table:table-cell office:value-type="float" office:value="-0.00524311">
                <text:p>-0.0052431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59.928497314453">
                <text:p>459.928497314453</text:p>
              </table:table-cell>
              <table:table-cell office:value-type="float" office:value="0.007847584">
                <text:p>0.00784758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60.043243408203">
                <text:p>460.043243408203</text:p>
              </table:table-cell>
              <table:table-cell office:value-type="float" office:value="0.0343369">
                <text:p>0.0343369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60.157989501953">
                <text:p>460.157989501953</text:p>
              </table:table-cell>
              <table:table-cell office:value-type="float" office:value="0.01261247">
                <text:p>0.0126124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60.272735595703">
                <text:p>460.272735595703</text:p>
              </table:table-cell>
              <table:table-cell office:value-type="float" office:value="-0.01054694">
                <text:p>-0.0105469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60.387512207031">
                <text:p>460.387512207031</text:p>
              </table:table-cell>
              <table:table-cell office:value-type="float" office:value="-0.003140993">
                <text:p>-0.00314099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60.502258300781">
                <text:p>460.502258300781</text:p>
              </table:table-cell>
              <table:table-cell office:value-type="float" office:value="0.009986079">
                <text:p>0.009986079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60.617034912109">
                <text:p>460.617034912109</text:p>
              </table:table-cell>
              <table:table-cell office:value-type="float" office:value="-0.00312177">
                <text:p>-0.0031217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60.731811523438">
                <text:p>460.731811523438</text:p>
              </table:table-cell>
              <table:table-cell office:value-type="float" office:value="0.00813008">
                <text:p>0.0081300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60.846588134766">
                <text:p>460.846588134766</text:p>
              </table:table-cell>
              <table:table-cell office:value-type="float" office:value="0.01260338">
                <text:p>0.0126033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60.961364746094">
                <text:p>460.961364746094</text:p>
              </table:table-cell>
              <table:table-cell office:value-type="float" office:value="-0.001723378">
                <text:p>-0.00172337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61.076171875">
                <text:p>461.076171875</text:p>
              </table:table-cell>
              <table:table-cell office:value-type="float" office:value="-0.009977535">
                <text:p>-0.00997753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61.190948486328">
                <text:p>461.190948486328</text:p>
              </table:table-cell>
              <table:table-cell office:value-type="float" office:value="-0.0002074435">
                <text:p>-0.000207443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61.305755615234">
                <text:p>461.305755615234</text:p>
              </table:table-cell>
              <table:table-cell office:value-type="float" office:value="0.006473048">
                <text:p>0.00647304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61.420562744141">
                <text:p>461.420562744141</text:p>
              </table:table-cell>
              <table:table-cell office:value-type="float" office:value="-0.001428397">
                <text:p>-0.00142839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61.535369873047">
                <text:p>461.535369873047</text:p>
              </table:table-cell>
              <table:table-cell office:value-type="float" office:value="-0.008408781">
                <text:p>-0.00840878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61.650177001953">
                <text:p>461.650177001953</text:p>
              </table:table-cell>
              <table:table-cell office:value-type="float" office:value="0.007823192">
                <text:p>0.00782319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61.764984130859">
                <text:p>461.764984130859</text:p>
              </table:table-cell>
              <table:table-cell office:value-type="float" office:value="0.003737292">
                <text:p>0.00373729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61.879791259766">
                <text:p>461.879791259766</text:p>
              </table:table-cell>
              <table:table-cell office:value-type="float" office:value="0.006307221">
                <text:p>0.00630722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61.99462890625">
                <text:p>461.99462890625</text:p>
              </table:table-cell>
              <table:table-cell office:value-type="float" office:value="-0.003000524">
                <text:p>-0.00300052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62.109466552734">
                <text:p>462.109466552734</text:p>
              </table:table-cell>
              <table:table-cell office:value-type="float" office:value="0.006320547">
                <text:p>0.00632054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62.224304199219">
                <text:p>462.224304199219</text:p>
              </table:table-cell>
              <table:table-cell office:value-type="float" office:value="0.001049003">
                <text:p>0.00104900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62.339141845703">
                <text:p>462.339141845703</text:p>
              </table:table-cell>
              <table:table-cell office:value-type="float" office:value="0.00892913">
                <text:p>0.0089291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62.453979492188">
                <text:p>462.453979492188</text:p>
              </table:table-cell>
              <table:table-cell office:value-type="float" office:value="-0.0008545114">
                <text:p>-0.0008545114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62.568817138672">
                <text:p>462.568817138672</text:p>
              </table:table-cell>
              <table:table-cell office:value-type="float" office:value="0.003348558">
                <text:p>0.00334855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62.683654785156">
                <text:p>462.683654785156</text:p>
              </table:table-cell>
              <table:table-cell office:value-type="float" office:value="0.01133735">
                <text:p>0.0113373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62.798522949219">
                <text:p>462.798522949219</text:p>
              </table:table-cell>
              <table:table-cell office:value-type="float" office:value="-0.008452776">
                <text:p>-0.00845277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62.913391113281">
                <text:p>462.913391113281</text:p>
              </table:table-cell>
              <table:table-cell office:value-type="float" office:value="-0.005117916">
                <text:p>-0.005117916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63.028259277344">
                <text:p>463.028259277344</text:p>
              </table:table-cell>
              <table:table-cell office:value-type="float" office:value="0.006440159">
                <text:p>0.00644015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63.143127441406">
                <text:p>463.143127441406</text:p>
              </table:table-cell>
              <table:table-cell office:value-type="float" office:value="0.006013974">
                <text:p>0.006013974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63.257995605469">
                <text:p>463.257995605469</text:p>
              </table:table-cell>
              <table:table-cell office:value-type="float" office:value="-0.008120835">
                <text:p>-0.00812083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63.372863769531">
                <text:p>463.372863769531</text:p>
              </table:table-cell>
              <table:table-cell office:value-type="float" office:value="0.01230157">
                <text:p>0.0123015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63.487762451172">
                <text:p>463.487762451172</text:p>
              </table:table-cell>
              <table:table-cell office:value-type="float" office:value="0.007104605">
                <text:p>0.00710460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63.602661132813">
                <text:p>463.602661132813</text:p>
              </table:table-cell>
              <table:table-cell office:value-type="float" office:value="0.006573394">
                <text:p>0.006573394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63.717529296875">
                <text:p>463.717529296875</text:p>
              </table:table-cell>
              <table:table-cell office:value-type="float" office:value="-0.000704543">
                <text:p>-0.00070454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63.832427978516">
                <text:p>463.832427978516</text:p>
              </table:table-cell>
              <table:table-cell office:value-type="float" office:value="-0.009901953">
                <text:p>-0.009901953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63.947326660156">
                <text:p>463.947326660156</text:p>
              </table:table-cell>
              <table:table-cell office:value-type="float" office:value="0.002503854">
                <text:p>0.00250385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64.062255859375">
                <text:p>464.062255859375</text:p>
              </table:table-cell>
              <table:table-cell office:value-type="float" office:value="-0.003948271">
                <text:p>-0.00394827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64.177154541016">
                <text:p>464.177154541016</text:p>
              </table:table-cell>
              <table:table-cell office:value-type="float" office:value="-0.005408455">
                <text:p>-0.00540845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64.292083740234">
                <text:p>464.292083740234</text:p>
              </table:table-cell>
              <table:table-cell office:value-type="float" office:value="-0.008986621">
                <text:p>-0.00898662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64.406982421875">
                <text:p>464.406982421875</text:p>
              </table:table-cell>
              <table:table-cell office:value-type="float" office:value="0.006903852">
                <text:p>0.00690385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64.521911621094">
                <text:p>464.521911621094</text:p>
              </table:table-cell>
              <table:table-cell office:value-type="float" office:value="-0.003490245">
                <text:p>-0.00349024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64.636840820313">
                <text:p>464.636840820313</text:p>
              </table:table-cell>
              <table:table-cell office:value-type="float" office:value="-0.003186684">
                <text:p>-0.00318668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64.751770019531">
                <text:p>464.751770019531</text:p>
              </table:table-cell>
              <table:table-cell office:value-type="float" office:value="-0.007554092">
                <text:p>-0.00755409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64.866729736328">
                <text:p>464.866729736328</text:p>
              </table:table-cell>
              <table:table-cell office:value-type="float" office:value="0.003577934">
                <text:p>0.00357793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64.981658935547">
                <text:p>464.981658935547</text:p>
              </table:table-cell>
              <table:table-cell office:value-type="float" office:value="0.01324224">
                <text:p>0.0132422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65.096618652344">
                <text:p>465.096618652344</text:p>
              </table:table-cell>
              <table:table-cell office:value-type="float" office:value="-0.006914235">
                <text:p>-0.00691423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65.211547851563">
                <text:p>465.211547851563</text:p>
              </table:table-cell>
              <table:table-cell office:value-type="float" office:value="-0.01237992">
                <text:p>-0.0123799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65.326507568359">
                <text:p>465.326507568359</text:p>
              </table:table-cell>
              <table:table-cell office:value-type="float" office:value="-0.007193753">
                <text:p>-0.00719375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65.441467285156">
                <text:p>465.441467285156</text:p>
              </table:table-cell>
              <table:table-cell office:value-type="float" office:value="0.002487643">
                <text:p>0.002487643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65.556427001953">
                <text:p>465.556427001953</text:p>
              </table:table-cell>
              <table:table-cell office:value-type="float" office:value="-0.003961284">
                <text:p>-0.00396128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65.671417236328">
                <text:p>465.671417236328</text:p>
              </table:table-cell>
              <table:table-cell office:value-type="float" office:value="-0.006447942">
                <text:p>-0.00644794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65.786376953125">
                <text:p>465.786376953125</text:p>
              </table:table-cell>
              <table:table-cell office:value-type="float" office:value="0.005024308">
                <text:p>0.00502430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65.9013671875">
                <text:p>465.9013671875</text:p>
              </table:table-cell>
              <table:table-cell office:value-type="float" office:value="0.005796296">
                <text:p>0.00579629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66.016357421875">
                <text:p>466.016357421875</text:p>
              </table:table-cell>
              <table:table-cell office:value-type="float" office:value="-0.002280688">
                <text:p>-0.00228068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66.13134765625">
                <text:p>466.13134765625</text:p>
              </table:table-cell>
              <table:table-cell office:value-type="float" office:value="-0.007788126">
                <text:p>-0.00778812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66.246337890625">
                <text:p>466.246337890625</text:p>
              </table:table-cell>
              <table:table-cell office:value-type="float" office:value="0.01619052">
                <text:p>0.0161905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66.361328125">
                <text:p>466.361328125</text:p>
              </table:table-cell>
              <table:table-cell office:value-type="float" office:value="-0.001247728">
                <text:p>-0.00124772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66.476318359375">
                <text:p>466.476318359375</text:p>
              </table:table-cell>
              <table:table-cell office:value-type="float" office:value="-0.01142374">
                <text:p>-0.0114237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66.591339111328">
                <text:p>466.591339111328</text:p>
              </table:table-cell>
              <table:table-cell office:value-type="float" office:value="0.003642726">
                <text:p>0.00364272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66.706329345703">
                <text:p>466.706329345703</text:p>
              </table:table-cell>
              <table:table-cell office:value-type="float" office:value="0.02288978">
                <text:p>0.0228897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66.821350097656">
                <text:p>466.821350097656</text:p>
              </table:table-cell>
              <table:table-cell office:value-type="float" office:value="-0.0002899823">
                <text:p>-0.000289982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66.936370849609">
                <text:p>466.936370849609</text:p>
              </table:table-cell>
              <table:table-cell office:value-type="float" office:value="-0.006298411">
                <text:p>-0.00629841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67.051391601563">
                <text:p>467.051391601563</text:p>
              </table:table-cell>
              <table:table-cell office:value-type="float" office:value="0.007992638">
                <text:p>0.00799263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67.166442871094">
                <text:p>467.166442871094</text:p>
              </table:table-cell>
              <table:table-cell office:value-type="float" office:value="-0.003947549">
                <text:p>-0.00394754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67.281463623047">
                <text:p>467.281463623047</text:p>
              </table:table-cell>
              <table:table-cell office:value-type="float" office:value="0.002526612">
                <text:p>0.00252661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67.396484375">
                <text:p>467.396484375</text:p>
              </table:table-cell>
              <table:table-cell office:value-type="float" office:value="-0.006409209">
                <text:p>-0.00640920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67.511535644531">
                <text:p>467.511535644531</text:p>
              </table:table-cell>
              <table:table-cell office:value-type="float" office:value="-0.008473669">
                <text:p>-0.00847366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67.626586914063">
                <text:p>467.626586914063</text:p>
              </table:table-cell>
              <table:table-cell office:value-type="float" office:value="0.002452737">
                <text:p>0.00245273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67.741638183594">
                <text:p>467.741638183594</text:p>
              </table:table-cell>
              <table:table-cell office:value-type="float" office:value="-0.008975404">
                <text:p>-0.00897540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67.856689453125">
                <text:p>467.856689453125</text:p>
              </table:table-cell>
              <table:table-cell office:value-type="float" office:value="-0.005037242">
                <text:p>-0.00503724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67.971740722656">
                <text:p>467.971740722656</text:p>
              </table:table-cell>
              <table:table-cell office:value-type="float" office:value="-0.006934328">
                <text:p>-0.006934328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68.086822509766">
                <text:p>468.086822509766</text:p>
              </table:table-cell>
              <table:table-cell office:value-type="float" office:value="0.0005652245">
                <text:p>0.000565224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68.201873779297">
                <text:p>468.201873779297</text:p>
              </table:table-cell>
              <table:table-cell office:value-type="float" office:value="0.009873519">
                <text:p>0.00987351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68.316955566406">
                <text:p>468.316955566406</text:p>
              </table:table-cell>
              <table:table-cell office:value-type="float" office:value="-0.001254003">
                <text:p>-0.00125400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68.432037353516">
                <text:p>468.432037353516</text:p>
              </table:table-cell>
              <table:table-cell office:value-type="float" office:value="-0.001950792">
                <text:p>-0.00195079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68.547119140625">
                <text:p>468.547119140625</text:p>
              </table:table-cell>
              <table:table-cell office:value-type="float" office:value="0.0002398216">
                <text:p>0.000239821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68.662200927734">
                <text:p>468.662200927734</text:p>
              </table:table-cell>
              <table:table-cell office:value-type="float" office:value="-0.005081541">
                <text:p>-0.00508154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68.777282714844">
                <text:p>468.777282714844</text:p>
              </table:table-cell>
              <table:table-cell office:value-type="float" office:value="-0.005969993">
                <text:p>-0.005969993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68.892395019531">
                <text:p>468.892395019531</text:p>
              </table:table-cell>
              <table:table-cell office:value-type="float" office:value="-0.004891937">
                <text:p>-0.00489193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69.007476806641">
                <text:p>469.007476806641</text:p>
              </table:table-cell>
              <table:table-cell office:value-type="float" office:value="0.02464221">
                <text:p>0.0246422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69.122589111328">
                <text:p>469.122589111328</text:p>
              </table:table-cell>
              <table:table-cell office:value-type="float" office:value="-0.0004457608">
                <text:p>-0.000445760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69.237701416016">
                <text:p>469.237701416016</text:p>
              </table:table-cell>
              <table:table-cell office:value-type="float" office:value="0.003406799">
                <text:p>0.00340679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69.352813720703">
                <text:p>469.352813720703</text:p>
              </table:table-cell>
              <table:table-cell office:value-type="float" office:value="0.008984695">
                <text:p>0.00898469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69.467926025391">
                <text:p>469.467926025391</text:p>
              </table:table-cell>
              <table:table-cell office:value-type="float" office:value="0.009699973">
                <text:p>0.00969997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69.583068847656">
                <text:p>469.583068847656</text:p>
              </table:table-cell>
              <table:table-cell office:value-type="float" office:value="0.008682554">
                <text:p>0.00868255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69.698181152344">
                <text:p>469.698181152344</text:p>
              </table:table-cell>
              <table:table-cell office:value-type="float" office:value="0.001369426">
                <text:p>0.00136942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69.813323974609">
                <text:p>469.813323974609</text:p>
              </table:table-cell>
              <table:table-cell office:value-type="float" office:value="-0.004942725">
                <text:p>-0.00494272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69.928436279297">
                <text:p>469.928436279297</text:p>
              </table:table-cell>
              <table:table-cell office:value-type="float" office:value="-0.002238138">
                <text:p>-0.00223813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70.043579101563">
                <text:p>470.043579101563</text:p>
              </table:table-cell>
              <table:table-cell office:value-type="float" office:value="0.006356299">
                <text:p>0.00635629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70.158721923828">
                <text:p>470.158721923828</text:p>
              </table:table-cell>
              <table:table-cell office:value-type="float" office:value="-0.008783763">
                <text:p>-0.008783763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70.273895263672">
                <text:p>470.273895263672</text:p>
              </table:table-cell>
              <table:table-cell office:value-type="float" office:value="0.005342128">
                <text:p>0.005342128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70.389038085938">
                <text:p>470.389038085938</text:p>
              </table:table-cell>
              <table:table-cell office:value-type="float" office:value="0.005438311">
                <text:p>0.00543831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70.504180908203">
                <text:p>470.504180908203</text:p>
              </table:table-cell>
              <table:table-cell office:value-type="float" office:value="0.0005234964">
                <text:p>0.000523496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70.619354248047">
                <text:p>470.619354248047</text:p>
              </table:table-cell>
              <table:table-cell office:value-type="float" office:value="-0.00790261">
                <text:p>-0.0079026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70.734527587891">
                <text:p>470.734527587891</text:p>
              </table:table-cell>
              <table:table-cell office:value-type="float" office:value="0.01004071">
                <text:p>0.0100407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70.849700927734">
                <text:p>470.849700927734</text:p>
              </table:table-cell>
              <table:table-cell office:value-type="float" office:value="0.0427942">
                <text:p>0.042794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70.964874267578">
                <text:p>470.964874267578</text:p>
              </table:table-cell>
              <table:table-cell office:value-type="float" office:value="0.00300803">
                <text:p>0.0030080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71.080047607422">
                <text:p>471.080047607422</text:p>
              </table:table-cell>
              <table:table-cell office:value-type="float" office:value="0.01606178">
                <text:p>0.0160617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71.195220947266">
                <text:p>471.195220947266</text:p>
              </table:table-cell>
              <table:table-cell office:value-type="float" office:value="-0.01078196">
                <text:p>-0.0107819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71.310424804688">
                <text:p>471.310424804688</text:p>
              </table:table-cell>
              <table:table-cell office:value-type="float" office:value="0.007066184">
                <text:p>0.007066184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71.425628662109">
                <text:p>471.425628662109</text:p>
              </table:table-cell>
              <table:table-cell office:value-type="float" office:value="0.004595014">
                <text:p>0.004595014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71.540802001953">
                <text:p>471.540802001953</text:p>
              </table:table-cell>
              <table:table-cell office:value-type="float" office:value="0.01484101">
                <text:p>0.0148410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71.656005859375">
                <text:p>471.656005859375</text:p>
              </table:table-cell>
              <table:table-cell office:value-type="float" office:value="-0.001151976">
                <text:p>-0.00115197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71.771209716797">
                <text:p>471.771209716797</text:p>
              </table:table-cell>
              <table:table-cell office:value-type="float" office:value="0.02008437">
                <text:p>0.0200843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71.886444091797">
                <text:p>471.886444091797</text:p>
              </table:table-cell>
              <table:table-cell office:value-type="float" office:value="0.01408099">
                <text:p>0.01408099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72.001647949219">
                <text:p>472.001647949219</text:p>
              </table:table-cell>
              <table:table-cell office:value-type="float" office:value="0.006723296">
                <text:p>0.00672329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72.116882324219">
                <text:p>472.116882324219</text:p>
              </table:table-cell>
              <table:table-cell office:value-type="float" office:value="-0.007217721">
                <text:p>-0.007217721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72.232086181641">
                <text:p>472.232086181641</text:p>
              </table:table-cell>
              <table:table-cell office:value-type="float" office:value="0.004572492">
                <text:p>0.00457249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72.347320556641">
                <text:p>472.347320556641</text:p>
              </table:table-cell>
              <table:table-cell office:value-type="float" office:value="0.003195384">
                <text:p>0.00319538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72.462554931641">
                <text:p>472.462554931641</text:p>
              </table:table-cell>
              <table:table-cell office:value-type="float" office:value="-0.01184135">
                <text:p>-0.0118413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72.577789306641">
                <text:p>472.577789306641</text:p>
              </table:table-cell>
              <table:table-cell office:value-type="float" office:value="-0.007459588">
                <text:p>-0.00745958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72.693023681641">
                <text:p>472.693023681641</text:p>
              </table:table-cell>
              <table:table-cell office:value-type="float" office:value="0.009678028">
                <text:p>0.009678028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72.808288574219">
                <text:p>472.808288574219</text:p>
              </table:table-cell>
              <table:table-cell office:value-type="float" office:value="0.0001240718">
                <text:p>0.0001240718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72.923522949219">
                <text:p>472.923522949219</text:p>
              </table:table-cell>
              <table:table-cell office:value-type="float" office:value="-0.005859813">
                <text:p>-0.00585981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73.038787841797">
                <text:p>473.038787841797</text:p>
              </table:table-cell>
              <table:table-cell office:value-type="float" office:value="-0.01013366">
                <text:p>-0.0101336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73.154052734375">
                <text:p>473.154052734375</text:p>
              </table:table-cell>
              <table:table-cell office:value-type="float" office:value="0.01307692">
                <text:p>0.0130769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73.269317626953">
                <text:p>473.269317626953</text:p>
              </table:table-cell>
              <table:table-cell office:value-type="float" office:value="0.007044319">
                <text:p>0.00704431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73.384582519531">
                <text:p>473.384582519531</text:p>
              </table:table-cell>
              <table:table-cell office:value-type="float" office:value="-0.004364053">
                <text:p>-0.00436405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73.499847412109">
                <text:p>473.499847412109</text:p>
              </table:table-cell>
              <table:table-cell office:value-type="float" office:value="-0.001709441">
                <text:p>-0.00170944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73.615112304688">
                <text:p>473.615112304688</text:p>
              </table:table-cell>
              <table:table-cell office:value-type="float" office:value="0.01603611">
                <text:p>0.0160361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73.730407714844">
                <text:p>473.730407714844</text:p>
              </table:table-cell>
              <table:table-cell office:value-type="float" office:value="0.02569584">
                <text:p>0.0256958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73.845703125">
                <text:p>473.845703125</text:p>
              </table:table-cell>
              <table:table-cell office:value-type="float" office:value="-0.003306011">
                <text:p>-0.00330601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73.960998535156">
                <text:p>473.960998535156</text:p>
              </table:table-cell>
              <table:table-cell office:value-type="float" office:value="0.003446222">
                <text:p>0.00344622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74.076263427734">
                <text:p>474.076263427734</text:p>
              </table:table-cell>
              <table:table-cell office:value-type="float" office:value="0.004161055">
                <text:p>0.00416105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74.191589355469">
                <text:p>474.191589355469</text:p>
              </table:table-cell>
              <table:table-cell office:value-type="float" office:value="0.01859775">
                <text:p>0.0185977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74.306884765625">
                <text:p>474.306884765625</text:p>
              </table:table-cell>
              <table:table-cell office:value-type="float" office:value="0.02102472">
                <text:p>0.0210247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74.422180175781">
                <text:p>474.422180175781</text:p>
              </table:table-cell>
              <table:table-cell office:value-type="float" office:value="-0.01077326">
                <text:p>-0.0107732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74.537506103516">
                <text:p>474.537506103516</text:p>
              </table:table-cell>
              <table:table-cell office:value-type="float" office:value="0.006697961">
                <text:p>0.00669796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74.652801513672">
                <text:p>474.652801513672</text:p>
              </table:table-cell>
              <table:table-cell office:value-type="float" office:value="-0.002235432">
                <text:p>-0.00223543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74.768127441406">
                <text:p>474.768127441406</text:p>
              </table:table-cell>
              <table:table-cell office:value-type="float" office:value="-0.006639796">
                <text:p>-0.00663979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74.883453369141">
                <text:p>474.883453369141</text:p>
              </table:table-cell>
              <table:table-cell office:value-type="float" office:value="-0.005512626">
                <text:p>-0.00551262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74.998779296875">
                <text:p>474.998779296875</text:p>
              </table:table-cell>
              <table:table-cell office:value-type="float" office:value="0.006177728">
                <text:p>0.00617772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75.114135742188">
                <text:p>475.114135742188</text:p>
              </table:table-cell>
              <table:table-cell office:value-type="float" office:value="-0.004492533">
                <text:p>-0.00449253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75.229461669922">
                <text:p>475.229461669922</text:p>
              </table:table-cell>
              <table:table-cell office:value-type="float" office:value="-0.004160149">
                <text:p>-0.00416014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75.344818115234">
                <text:p>475.344818115234</text:p>
              </table:table-cell>
              <table:table-cell office:value-type="float" office:value="0.003777964">
                <text:p>0.00377796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75.460144042969">
                <text:p>475.460144042969</text:p>
              </table:table-cell>
              <table:table-cell office:value-type="float" office:value="0.009540359">
                <text:p>0.00954035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75.575500488281">
                <text:p>475.575500488281</text:p>
              </table:table-cell>
              <table:table-cell office:value-type="float" office:value="0.002896921">
                <text:p>0.00289692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75.690856933594">
                <text:p>475.690856933594</text:p>
              </table:table-cell>
              <table:table-cell office:value-type="float" office:value="-0.008978697">
                <text:p>-0.00897869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75.806213378906">
                <text:p>475.806213378906</text:p>
              </table:table-cell>
              <table:table-cell office:value-type="float" office:value="-0.009795719">
                <text:p>-0.00979571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75.921569824219">
                <text:p>475.921569824219</text:p>
              </table:table-cell>
              <table:table-cell office:value-type="float" office:value="0.002674506">
                <text:p>0.00267450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76.036956787109">
                <text:p>476.036956787109</text:p>
              </table:table-cell>
              <table:table-cell office:value-type="float" office:value="0.008269383">
                <text:p>0.00826938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76.152313232422">
                <text:p>476.152313232422</text:p>
              </table:table-cell>
              <table:table-cell office:value-type="float" office:value="0.007443026">
                <text:p>0.00744302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76.267700195313">
                <text:p>476.267700195313</text:p>
              </table:table-cell>
              <table:table-cell office:value-type="float" office:value="-0.01028804">
                <text:p>-0.01028804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76.383087158203">
                <text:p>476.383087158203</text:p>
              </table:table-cell>
              <table:table-cell office:value-type="float" office:value="0.01539505">
                <text:p>0.0153950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76.498474121094">
                <text:p>476.498474121094</text:p>
              </table:table-cell>
              <table:table-cell office:value-type="float" office:value="0.002868271">
                <text:p>0.00286827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76.613861083984">
                <text:p>476.613861083984</text:p>
              </table:table-cell>
              <table:table-cell office:value-type="float" office:value="-0.006433609">
                <text:p>-0.00643360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76.729248046875">
                <text:p>476.729248046875</text:p>
              </table:table-cell>
              <table:table-cell office:value-type="float" office:value="-0.003478035">
                <text:p>-0.00347803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76.844665527344">
                <text:p>476.844665527344</text:p>
              </table:table-cell>
              <table:table-cell office:value-type="float" office:value="0.01668971">
                <text:p>0.0166897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76.960052490234">
                <text:p>476.960052490234</text:p>
              </table:table-cell>
              <table:table-cell office:value-type="float" office:value="0.004357688">
                <text:p>0.00435768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77.075469970703">
                <text:p>477.075469970703</text:p>
              </table:table-cell>
              <table:table-cell office:value-type="float" office:value="-0.01129392">
                <text:p>-0.01129392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77.190887451172">
                <text:p>477.190887451172</text:p>
              </table:table-cell>
              <table:table-cell office:value-type="float" office:value="-0.006039348">
                <text:p>-0.006039348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77.306304931641">
                <text:p>477.306304931641</text:p>
              </table:table-cell>
              <table:table-cell office:value-type="float" office:value="0.01611665">
                <text:p>0.0161166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77.421722412109">
                <text:p>477.421722412109</text:p>
              </table:table-cell>
              <table:table-cell office:value-type="float" office:value="-0.005820434">
                <text:p>-0.00582043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77.537139892578">
                <text:p>477.537139892578</text:p>
              </table:table-cell>
              <table:table-cell office:value-type="float" office:value="-0.003225149">
                <text:p>-0.00322514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77.652557373047">
                <text:p>477.652557373047</text:p>
              </table:table-cell>
              <table:table-cell office:value-type="float" office:value="-0.01084199">
                <text:p>-0.0108419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77.768005371094">
                <text:p>477.768005371094</text:p>
              </table:table-cell>
              <table:table-cell office:value-type="float" office:value="-0.004191983">
                <text:p>-0.00419198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77.883422851563">
                <text:p>477.883422851563</text:p>
              </table:table-cell>
              <table:table-cell office:value-type="float" office:value="0.01225443">
                <text:p>0.0122544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77.998870849609">
                <text:p>477.998870849609</text:p>
              </table:table-cell>
              <table:table-cell office:value-type="float" office:value="-0.01166349">
                <text:p>-0.0116634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78.114318847656">
                <text:p>478.114318847656</text:p>
              </table:table-cell>
              <table:table-cell office:value-type="float" office:value="-0.00371389">
                <text:p>-0.0037138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78.229766845703">
                <text:p>478.229766845703</text:p>
              </table:table-cell>
              <table:table-cell office:value-type="float" office:value="0.004823563">
                <text:p>0.00482356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78.345245361328">
                <text:p>478.345245361328</text:p>
              </table:table-cell>
              <table:table-cell office:value-type="float" office:value="0.002256618">
                <text:p>0.00225661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78.460693359375">
                <text:p>478.460693359375</text:p>
              </table:table-cell>
              <table:table-cell office:value-type="float" office:value="-0.009525991">
                <text:p>-0.00952599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78.576141357422">
                <text:p>478.576141357422</text:p>
              </table:table-cell>
              <table:table-cell office:value-type="float" office:value="-0.003224859">
                <text:p>-0.00322485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78.691619873047">
                <text:p>478.691619873047</text:p>
              </table:table-cell>
              <table:table-cell office:value-type="float" office:value="0.0136897">
                <text:p>0.013689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78.807098388672">
                <text:p>478.807098388672</text:p>
              </table:table-cell>
              <table:table-cell office:value-type="float" office:value="-0.000184297">
                <text:p>-0.000184297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78.922576904297">
                <text:p>478.922576904297</text:p>
              </table:table-cell>
              <table:table-cell office:value-type="float" office:value="-0.001413099">
                <text:p>-0.00141309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79.038055419922">
                <text:p>479.038055419922</text:p>
              </table:table-cell>
              <table:table-cell office:value-type="float" office:value="-0.00966743">
                <text:p>-0.0096674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79.153533935547">
                <text:p>479.153533935547</text:p>
              </table:table-cell>
              <table:table-cell office:value-type="float" office:value="0.001185875">
                <text:p>0.00118587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79.269012451172">
                <text:p>479.269012451172</text:p>
              </table:table-cell>
              <table:table-cell office:value-type="float" office:value="0.02182624">
                <text:p>0.0218262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79.384521484375">
                <text:p>479.384521484375</text:p>
              </table:table-cell>
              <table:table-cell office:value-type="float" office:value="-0.006689325">
                <text:p>-0.00668932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79.500030517578">
                <text:p>479.500030517578</text:p>
              </table:table-cell>
              <table:table-cell office:value-type="float" office:value="-0.004376873">
                <text:p>-0.00437687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79.615509033203">
                <text:p>479.615509033203</text:p>
              </table:table-cell>
              <table:table-cell office:value-type="float" office:value="0.004433982">
                <text:p>0.00443398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79.731018066406">
                <text:p>479.731018066406</text:p>
              </table:table-cell>
              <table:table-cell office:value-type="float" office:value="0.003881275">
                <text:p>0.00388127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79.846527099609">
                <text:p>479.846527099609</text:p>
              </table:table-cell>
              <table:table-cell office:value-type="float" office:value="-0.003510263">
                <text:p>-0.00351026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79.962066650391">
                <text:p>479.962066650391</text:p>
              </table:table-cell>
              <table:table-cell office:value-type="float" office:value="-0.002624722">
                <text:p>-0.00262472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80.077575683594">
                <text:p>480.077575683594</text:p>
              </table:table-cell>
              <table:table-cell office:value-type="float" office:value="0.005071139">
                <text:p>0.005071139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80.193084716797">
                <text:p>480.193084716797</text:p>
              </table:table-cell>
              <table:table-cell office:value-type="float" office:value="0.01522432">
                <text:p>0.0152243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80.308624267578">
                <text:p>480.308624267578</text:p>
              </table:table-cell>
              <table:table-cell office:value-type="float" office:value="-0.003438555">
                <text:p>-0.00343855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80.424163818359">
                <text:p>480.424163818359</text:p>
              </table:table-cell>
              <table:table-cell office:value-type="float" office:value="-0.002172094">
                <text:p>-0.00217209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80.539703369141">
                <text:p>480.539703369141</text:p>
              </table:table-cell>
              <table:table-cell office:value-type="float" office:value="0.00913092">
                <text:p>0.00913092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80.655242919922">
                <text:p>480.655242919922</text:p>
              </table:table-cell>
              <table:table-cell office:value-type="float" office:value="-0.0009895657">
                <text:p>-0.000989565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80.770782470703">
                <text:p>480.770782470703</text:p>
              </table:table-cell>
              <table:table-cell office:value-type="float" office:value="-0.006949401">
                <text:p>-0.00694940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80.886322021484">
                <text:p>480.886322021484</text:p>
              </table:table-cell>
              <table:table-cell office:value-type="float" office:value="-0.002623068">
                <text:p>-0.00262306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81.001892089844">
                <text:p>481.001892089844</text:p>
              </table:table-cell>
              <table:table-cell office:value-type="float" office:value="0.005448881">
                <text:p>0.00544888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81.117431640625">
                <text:p>481.117431640625</text:p>
              </table:table-cell>
              <table:table-cell office:value-type="float" office:value="0.006688274">
                <text:p>0.00668827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81.233001708984">
                <text:p>481.233001708984</text:p>
              </table:table-cell>
              <table:table-cell office:value-type="float" office:value="0.006577223">
                <text:p>0.00657722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81.348571777344">
                <text:p>481.348571777344</text:p>
              </table:table-cell>
              <table:table-cell office:value-type="float" office:value="-0.007072903">
                <text:p>-0.00707290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81.464141845703">
                <text:p>481.464141845703</text:p>
              </table:table-cell>
              <table:table-cell office:value-type="float" office:value="-0.001784743">
                <text:p>-0.00178474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81.579711914063">
                <text:p>481.579711914063</text:p>
              </table:table-cell>
              <table:table-cell office:value-type="float" office:value="0.007651431">
                <text:p>0.00765143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81.695281982422">
                <text:p>481.695281982422</text:p>
              </table:table-cell>
              <table:table-cell office:value-type="float" office:value="-0.006421791">
                <text:p>-0.00642179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81.810882568359">
                <text:p>481.810882568359</text:p>
              </table:table-cell>
              <table:table-cell office:value-type="float" office:value="-0.001733285">
                <text:p>-0.00173328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81.926452636719">
                <text:p>481.92645263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82.042053222656">
                <text:p>482.042053222656</text:p>
              </table:table-cell>
              <table:table-cell office:value-type="float" office:value="0.01673172">
                <text:p>0.01673172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82.157653808594">
                <text:p>482.157653808594</text:p>
              </table:table-cell>
              <table:table-cell office:value-type="float" office:value="-0.005281966">
                <text:p>-0.00528196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82.273254394531">
                <text:p>482.273254394531</text:p>
              </table:table-cell>
              <table:table-cell office:value-type="float" office:value="-0.0003138385">
                <text:p>-0.000313838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82.388854980469">
                <text:p>482.388854980469</text:p>
              </table:table-cell>
              <table:table-cell office:value-type="float" office:value="0.01548024">
                <text:p>0.0154802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82.504455566406">
                <text:p>482.504455566406</text:p>
              </table:table-cell>
              <table:table-cell office:value-type="float" office:value="0.01887937">
                <text:p>0.0188793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82.620086669922">
                <text:p>482.620086669922</text:p>
              </table:table-cell>
              <table:table-cell office:value-type="float" office:value="-0.004299816">
                <text:p>-0.00429981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82.735687255859">
                <text:p>482.735687255859</text:p>
              </table:table-cell>
              <table:table-cell office:value-type="float" office:value="0.005499951">
                <text:p>0.00549995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82.851318359375">
                <text:p>482.851318359375</text:p>
              </table:table-cell>
              <table:table-cell office:value-type="float" office:value="-0.001940156">
                <text:p>-0.00194015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82.966949462891">
                <text:p>482.966949462891</text:p>
              </table:table-cell>
              <table:table-cell office:value-type="float" office:value="0.01097944">
                <text:p>0.0109794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83.082580566406">
                <text:p>483.082580566406</text:p>
              </table:table-cell>
              <table:table-cell office:value-type="float" office:value="-0.01058325">
                <text:p>-0.0105832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83.198211669922">
                <text:p>483.198211669922</text:p>
              </table:table-cell>
              <table:table-cell office:value-type="float" office:value="0.004174403">
                <text:p>0.00417440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83.313842773438">
                <text:p>483.313842773438</text:p>
              </table:table-cell>
              <table:table-cell office:value-type="float" office:value="0.008892975">
                <text:p>0.00889297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83.429473876953">
                <text:p>483.429473876953</text:p>
              </table:table-cell>
              <table:table-cell office:value-type="float" office:value="0.0141746">
                <text:p>0.014174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83.545135498047">
                <text:p>483.545135498047</text:p>
              </table:table-cell>
              <table:table-cell office:value-type="float" office:value="0.001828608">
                <text:p>0.00182860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83.660797119141">
                <text:p>483.660797119141</text:p>
              </table:table-cell>
              <table:table-cell office:value-type="float" office:value="-0.004085152">
                <text:p>-0.00408515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83.776428222656">
                <text:p>483.776428222656</text:p>
              </table:table-cell>
              <table:table-cell office:value-type="float" office:value="0.006893467">
                <text:p>0.00689346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83.89208984375">
                <text:p>483.89208984375</text:p>
              </table:table-cell>
              <table:table-cell office:value-type="float" office:value="0.01981427">
                <text:p>0.01981427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84.007751464844">
                <text:p>484.007751464844</text:p>
              </table:table-cell>
              <table:table-cell office:value-type="float" office:value="-0.006807167">
                <text:p>-0.006807167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84.123413085938">
                <text:p>484.123413085938</text:p>
              </table:table-cell>
              <table:table-cell office:value-type="float" office:value="-0.0100161">
                <text:p>-0.010016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84.239105224609">
                <text:p>484.239105224609</text:p>
              </table:table-cell>
              <table:table-cell office:value-type="float" office:value="0.01161513">
                <text:p>0.0116151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84.354766845703">
                <text:p>484.354766845703</text:p>
              </table:table-cell>
              <table:table-cell office:value-type="float" office:value="0.003241766">
                <text:p>0.00324176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84.470458984375">
                <text:p>484.470458984375</text:p>
              </table:table-cell>
              <table:table-cell office:value-type="float" office:value="0.001533314">
                <text:p>0.00153331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84.586151123047">
                <text:p>484.586151123047</text:p>
              </table:table-cell>
              <table:table-cell office:value-type="float" office:value="-0.006472983">
                <text:p>-0.00647298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84.701843261719">
                <text:p>484.701843261719</text:p>
              </table:table-cell>
              <table:table-cell office:value-type="float" office:value="0.002421297">
                <text:p>0.00242129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84.817535400391">
                <text:p>484.817535400391</text:p>
              </table:table-cell>
              <table:table-cell office:value-type="float" office:value="0.007967271">
                <text:p>0.00796727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84.933227539063">
                <text:p>484.933227539063</text:p>
              </table:table-cell>
              <table:table-cell office:value-type="float" office:value="-0.008315518">
                <text:p>-0.008315518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85.048919677734">
                <text:p>485.048919677734</text:p>
              </table:table-cell>
              <table:table-cell office:value-type="float" office:value="-0.0005097923">
                <text:p>-0.0005097923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85.164642333984">
                <text:p>485.164642333984</text:p>
              </table:table-cell>
              <table:table-cell office:value-type="float" office:value="0.01833736">
                <text:p>0.0183373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85.280334472656">
                <text:p>485.280334472656</text:p>
              </table:table-cell>
              <table:table-cell office:value-type="float" office:value="0.007687646">
                <text:p>0.00768764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85.396057128906">
                <text:p>485.396057128906</text:p>
              </table:table-cell>
              <table:table-cell office:value-type="float" office:value="0.01111028">
                <text:p>0.01111028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85.511779785156">
                <text:p>485.511779785156</text:p>
              </table:table-cell>
              <table:table-cell office:value-type="float" office:value="-0.002797735">
                <text:p>-0.00279773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85.627502441406">
                <text:p>485.627502441406</text:p>
              </table:table-cell>
              <table:table-cell office:value-type="float" office:value="0.004713182">
                <text:p>0.00471318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85.743225097656">
                <text:p>485.743225097656</text:p>
              </table:table-cell>
              <table:table-cell office:value-type="float" office:value="0.02722875">
                <text:p>0.0272287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85.858947753906">
                <text:p>485.858947753906</text:p>
              </table:table-cell>
              <table:table-cell office:value-type="float" office:value="-0.005810439">
                <text:p>-0.00581043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85.974670410156">
                <text:p>485.974670410156</text:p>
              </table:table-cell>
              <table:table-cell office:value-type="float" office:value="-0.002668814">
                <text:p>-0.00266881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86.090423583984">
                <text:p>486.090423583984</text:p>
              </table:table-cell>
              <table:table-cell office:value-type="float" office:value="0.02608016">
                <text:p>0.02608016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86.206176757813">
                <text:p>486.206176757813</text:p>
              </table:table-cell>
              <table:table-cell office:value-type="float" office:value="0.006987155">
                <text:p>0.00698715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86.321899414063">
                <text:p>486.321899414063</text:p>
              </table:table-cell>
              <table:table-cell office:value-type="float" office:value="0.002782244">
                <text:p>0.00278224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86.437652587891">
                <text:p>486.437652587891</text:p>
              </table:table-cell>
              <table:table-cell office:value-type="float" office:value="0.003409171">
                <text:p>0.00340917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86.553436279297">
                <text:p>486.553436279297</text:p>
              </table:table-cell>
              <table:table-cell office:value-type="float" office:value="0.01069724">
                <text:p>0.0106972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86.669189453125">
                <text:p>486.669189453125</text:p>
              </table:table-cell>
              <table:table-cell office:value-type="float" office:value="0.008027109">
                <text:p>0.008027109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86.784942626953">
                <text:p>486.784942626953</text:p>
              </table:table-cell>
              <table:table-cell office:value-type="float" office:value="0.006874378">
                <text:p>0.00687437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86.900726318359">
                <text:p>486.900726318359</text:p>
              </table:table-cell>
              <table:table-cell office:value-type="float" office:value="0.0005378269">
                <text:p>0.0005378269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87.016479492188">
                <text:p>487.016479492188</text:p>
              </table:table-cell>
              <table:table-cell office:value-type="float" office:value="0.01533879">
                <text:p>0.0153387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87.132263183594">
                <text:p>487.132263183594</text:p>
              </table:table-cell>
              <table:table-cell office:value-type="float" office:value="0.003129863">
                <text:p>0.003129863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87.248046875">
                <text:p>487.248046875</text:p>
              </table:table-cell>
              <table:table-cell office:value-type="float" office:value="0.01710617">
                <text:p>0.0171061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87.363830566406">
                <text:p>487.363830566406</text:p>
              </table:table-cell>
              <table:table-cell office:value-type="float" office:value="0.007896295">
                <text:p>0.00789629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87.479614257813">
                <text:p>487.479614257813</text:p>
              </table:table-cell>
              <table:table-cell office:value-type="float" office:value="0.01435104">
                <text:p>0.0143510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87.595397949219">
                <text:p>487.595397949219</text:p>
              </table:table-cell>
              <table:table-cell office:value-type="float" office:value="0.01407696">
                <text:p>0.0140769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87.711212158203">
                <text:p>487.711212158203</text:p>
              </table:table-cell>
              <table:table-cell office:value-type="float" office:value="0.01311934">
                <text:p>0.01311934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87.826995849609">
                <text:p>487.826995849609</text:p>
              </table:table-cell>
              <table:table-cell office:value-type="float" office:value="-0.001981839">
                <text:p>-0.00198183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87.942810058594">
                <text:p>487.942810058594</text:p>
              </table:table-cell>
              <table:table-cell office:value-type="float" office:value="0.01256709">
                <text:p>0.01256709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88.058624267578">
                <text:p>488.058624267578</text:p>
              </table:table-cell>
              <table:table-cell office:value-type="float" office:value="0.02487421">
                <text:p>0.0248742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88.174438476563">
                <text:p>488.174438476563</text:p>
              </table:table-cell>
              <table:table-cell office:value-type="float" office:value="0.00250713">
                <text:p>0.0025071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88.290252685547">
                <text:p>488.290252685547</text:p>
              </table:table-cell>
              <table:table-cell office:value-type="float" office:value="-0.003991609">
                <text:p>-0.003991609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88.406066894531">
                <text:p>488.406066894531</text:p>
              </table:table-cell>
              <table:table-cell office:value-type="float" office:value="0.01312115">
                <text:p>0.0131211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88.521911621094">
                <text:p>488.521911621094</text:p>
              </table:table-cell>
              <table:table-cell office:value-type="float" office:value="0.006083146">
                <text:p>0.006083146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88.637725830078">
                <text:p>488.637725830078</text:p>
              </table:table-cell>
              <table:table-cell office:value-type="float" office:value="-0.004390457">
                <text:p>-0.004390457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88.753570556641">
                <text:p>488.753570556641</text:p>
              </table:table-cell>
              <table:table-cell office:value-type="float" office:value="-0.005010782">
                <text:p>-0.00501078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88.869415283203">
                <text:p>488.869415283203</text:p>
              </table:table-cell>
              <table:table-cell office:value-type="float" office:value="0.01556343">
                <text:p>0.0155634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88.985260009766">
                <text:p>488.985260009766</text:p>
              </table:table-cell>
              <table:table-cell office:value-type="float" office:value="0.005697388">
                <text:p>0.005697388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89.101104736328">
                <text:p>489.101104736328</text:p>
              </table:table-cell>
              <table:table-cell office:value-type="float" office:value="0.00634927">
                <text:p>0.00634927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89.216949462891">
                <text:p>489.216949462891</text:p>
              </table:table-cell>
              <table:table-cell office:value-type="float" office:value="0.0008723235">
                <text:p>0.000872323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89.332794189453">
                <text:p>489.332794189453</text:p>
              </table:table-cell>
              <table:table-cell office:value-type="float" office:value="0.01450172">
                <text:p>0.0145017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89.448669433594">
                <text:p>489.448669433594</text:p>
              </table:table-cell>
              <table:table-cell office:value-type="float" office:value="0.01341259">
                <text:p>0.0134125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89.564544677734">
                <text:p>489.564544677734</text:p>
              </table:table-cell>
              <table:table-cell office:value-type="float" office:value="-0.004707321">
                <text:p>-0.00470732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89.680389404297">
                <text:p>489.680389404297</text:p>
              </table:table-cell>
              <table:table-cell office:value-type="float" office:value="0.004108703">
                <text:p>0.004108703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89.796264648438">
                <text:p>489.796264648438</text:p>
              </table:table-cell>
              <table:table-cell office:value-type="float" office:value="0.01795137">
                <text:p>0.01795137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89.912139892578">
                <text:p>489.912139892578</text:p>
              </table:table-cell>
              <table:table-cell office:value-type="float" office:value="0.01058151">
                <text:p>0.0105815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90.028015136719">
                <text:p>490.028015136719</text:p>
              </table:table-cell>
              <table:table-cell office:value-type="float" office:value="-0.0008823702">
                <text:p>-0.000882370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90.143920898438">
                <text:p>490.143920898438</text:p>
              </table:table-cell>
              <table:table-cell office:value-type="float" office:value="0.02283504">
                <text:p>0.02283504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90.259796142578">
                <text:p>490.259796142578</text:p>
              </table:table-cell>
              <table:table-cell office:value-type="float" office:value="0.01572651">
                <text:p>0.0157265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90.375701904297">
                <text:p>490.375701904297</text:p>
              </table:table-cell>
              <table:table-cell office:value-type="float" office:value="-0.001567818">
                <text:p>-0.00156781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90.491577148438">
                <text:p>490.491577148438</text:p>
              </table:table-cell>
              <table:table-cell office:value-type="float" office:value="0.009295455">
                <text:p>0.00929545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90.607482910156">
                <text:p>490.607482910156</text:p>
              </table:table-cell>
              <table:table-cell office:value-type="float" office:value="0.007195092">
                <text:p>0.007195092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90.723388671875">
                <text:p>490.723388671875</text:p>
              </table:table-cell>
              <table:table-cell office:value-type="float" office:value="0.02057151">
                <text:p>0.0205715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90.839294433594">
                <text:p>490.839294433594</text:p>
              </table:table-cell>
              <table:table-cell office:value-type="float" office:value="0.01131508">
                <text:p>0.01131508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90.955200195313">
                <text:p>490.955200195313</text:p>
              </table:table-cell>
              <table:table-cell office:value-type="float" office:value="0.008050568">
                <text:p>0.00805056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91.071136474609">
                <text:p>491.071136474609</text:p>
              </table:table-cell>
              <table:table-cell office:value-type="float" office:value="0.01323225">
                <text:p>0.0132322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91.187042236328">
                <text:p>491.187042236328</text:p>
              </table:table-cell>
              <table:table-cell office:value-type="float" office:value="0.02236285">
                <text:p>0.0223628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91.302978515625">
                <text:p>491.302978515625</text:p>
              </table:table-cell>
              <table:table-cell office:value-type="float" office:value="0.009072002">
                <text:p>0.009072002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91.418914794922">
                <text:p>491.418914794922</text:p>
              </table:table-cell>
              <table:table-cell office:value-type="float" office:value="0.003174766">
                <text:p>0.003174766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91.534851074219">
                <text:p>491.534851074219</text:p>
              </table:table-cell>
              <table:table-cell office:value-type="float" office:value="0.02343484">
                <text:p>0.02343484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91.650787353516">
                <text:p>491.650787353516</text:p>
              </table:table-cell>
              <table:table-cell office:value-type="float" office:value="0.01392309">
                <text:p>0.0139230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91.766723632813">
                <text:p>491.766723632813</text:p>
              </table:table-cell>
              <table:table-cell office:value-type="float" office:value="0.00982601">
                <text:p>0.00982601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91.882659912109">
                <text:p>491.882659912109</text:p>
              </table:table-cell>
              <table:table-cell office:value-type="float" office:value="0.002597239">
                <text:p>0.002597239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91.998596191406">
                <text:p>491.998596191406</text:p>
              </table:table-cell>
              <table:table-cell office:value-type="float" office:value="0.01918807">
                <text:p>0.01918807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92.114562988281">
                <text:p>492.114562988281</text:p>
              </table:table-cell>
              <table:table-cell office:value-type="float" office:value="0.01894835">
                <text:p>0.0189483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92.230529785156">
                <text:p>492.230529785156</text:p>
              </table:table-cell>
              <table:table-cell office:value-type="float" office:value="0.003491304">
                <text:p>0.003491304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92.346496582031">
                <text:p>492.346496582031</text:p>
              </table:table-cell>
              <table:table-cell office:value-type="float" office:value="0.01725949">
                <text:p>0.01725949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92.462463378906">
                <text:p>492.462463378906</text:p>
              </table:table-cell>
              <table:table-cell office:value-type="float" office:value="0.01700421">
                <text:p>0.0170042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92.578430175781">
                <text:p>492.578430175781</text:p>
              </table:table-cell>
              <table:table-cell office:value-type="float" office:value="0.0184136">
                <text:p>0.0184136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92.694396972656">
                <text:p>492.694396972656</text:p>
              </table:table-cell>
              <table:table-cell office:value-type="float" office:value="0.01085375">
                <text:p>0.0108537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92.810363769531">
                <text:p>492.810363769531</text:p>
              </table:table-cell>
              <table:table-cell office:value-type="float" office:value="0.008065179">
                <text:p>0.00806517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92.926361083984">
                <text:p>492.926361083984</text:p>
              </table:table-cell>
              <table:table-cell office:value-type="float" office:value="0.02750765">
                <text:p>0.0275076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93.042327880859">
                <text:p>493.042327880859</text:p>
              </table:table-cell>
              <table:table-cell office:value-type="float" office:value="0.01294379">
                <text:p>0.0129437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93.158325195313">
                <text:p>493.158325195313</text:p>
              </table:table-cell>
              <table:table-cell office:value-type="float" office:value="0.009609117">
                <text:p>0.00960911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93.274322509766">
                <text:p>493.274322509766</text:p>
              </table:table-cell>
              <table:table-cell office:value-type="float" office:value="0.01765659">
                <text:p>0.01765659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93.390319824219">
                <text:p>493.390319824219</text:p>
              </table:table-cell>
              <table:table-cell office:value-type="float" office:value="0.02996257">
                <text:p>0.02996257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93.506317138672">
                <text:p>493.506317138672</text:p>
              </table:table-cell>
              <table:table-cell office:value-type="float" office:value="0.02288202">
                <text:p>0.02288202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93.622344970703">
                <text:p>493.622344970703</text:p>
              </table:table-cell>
              <table:table-cell office:value-type="float" office:value="0.01998568">
                <text:p>0.01998568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93.738342285156">
                <text:p>493.738342285156</text:p>
              </table:table-cell>
              <table:table-cell office:value-type="float" office:value="0.009093164">
                <text:p>0.009093164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93.854370117188">
                <text:p>493.854370117188</text:p>
              </table:table-cell>
              <table:table-cell office:value-type="float" office:value="0.01685149">
                <text:p>0.01685149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93.970367431641">
                <text:p>493.970367431641</text:p>
              </table:table-cell>
              <table:table-cell office:value-type="float" office:value="0.02728816">
                <text:p>0.02728816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94.086395263672">
                <text:p>494.086395263672</text:p>
              </table:table-cell>
              <table:table-cell office:value-type="float" office:value="0.02248459">
                <text:p>0.02248459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94.202423095703">
                <text:p>494.202423095703</text:p>
              </table:table-cell>
              <table:table-cell office:value-type="float" office:value="0.02019901">
                <text:p>0.0201990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94.318450927734">
                <text:p>494.318450927734</text:p>
              </table:table-cell>
              <table:table-cell office:value-type="float" office:value="0.01910733">
                <text:p>0.01910733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94.434478759766">
                <text:p>494.434478759766</text:p>
              </table:table-cell>
              <table:table-cell office:value-type="float" office:value="0.02236799">
                <text:p>0.02236799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94.550537109375">
                <text:p>494.550537109375</text:p>
              </table:table-cell>
              <table:table-cell office:value-type="float" office:value="0.01749025">
                <text:p>0.0174902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94.666564941406">
                <text:p>494.666564941406</text:p>
              </table:table-cell>
              <table:table-cell office:value-type="float" office:value="0.01825128">
                <text:p>0.0182512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94.782623291016">
                <text:p>494.782623291016</text:p>
              </table:table-cell>
              <table:table-cell office:value-type="float" office:value="0.02272255">
                <text:p>0.0227225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94.898681640625">
                <text:p>494.898681640625</text:p>
              </table:table-cell>
              <table:table-cell office:value-type="float" office:value="0.0309357">
                <text:p>0.0309357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95.014739990234">
                <text:p>495.014739990234</text:p>
              </table:table-cell>
              <table:table-cell office:value-type="float" office:value="0.01327641">
                <text:p>0.0132764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95.130798339844">
                <text:p>495.130798339844</text:p>
              </table:table-cell>
              <table:table-cell office:value-type="float" office:value="0.01570982">
                <text:p>0.01570982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95.246856689453">
                <text:p>495.246856689453</text:p>
              </table:table-cell>
              <table:table-cell office:value-type="float" office:value="0.03035143">
                <text:p>0.03035143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495.362915039063">
                <text:p>495.362915039063</text:p>
              </table:table-cell>
              <table:table-cell office:value-type="float" office:value="0.03567714">
                <text:p>0.03567714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95.478973388672">
                <text:p>495.478973388672</text:p>
              </table:table-cell>
              <table:table-cell office:value-type="float" office:value="0.01571796">
                <text:p>0.01571796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95.595062255859">
                <text:p>495.595062255859</text:p>
              </table:table-cell>
              <table:table-cell office:value-type="float" office:value="0.03398006">
                <text:p>0.0339800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95.711151123047">
                <text:p>495.711151123047</text:p>
              </table:table-cell>
              <table:table-cell office:value-type="float" office:value="0.02597062">
                <text:p>0.0259706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95.827209472656">
                <text:p>495.827209472656</text:p>
              </table:table-cell>
              <table:table-cell office:value-type="float" office:value="0.05528846">
                <text:p>0.05528846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95.943298339844">
                <text:p>495.943298339844</text:p>
              </table:table-cell>
              <table:table-cell office:value-type="float" office:value="0.02986804">
                <text:p>0.0298680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96.059387207031">
                <text:p>496.059387207031</text:p>
              </table:table-cell>
              <table:table-cell office:value-type="float" office:value="0.04047514">
                <text:p>0.04047514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96.175506591797">
                <text:p>496.175506591797</text:p>
              </table:table-cell>
              <table:table-cell office:value-type="float" office:value="0.02911317">
                <text:p>0.02911317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96.291595458984">
                <text:p>496.291595458984</text:p>
              </table:table-cell>
              <table:table-cell office:value-type="float" office:value="0.02694128">
                <text:p>0.02694128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96.407684326172">
                <text:p>496.407684326172</text:p>
              </table:table-cell>
              <table:table-cell office:value-type="float" office:value="0.046275">
                <text:p>0.04627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96.523803710938">
                <text:p>496.523803710938</text:p>
              </table:table-cell>
              <table:table-cell office:value-type="float" office:value="0.02501049">
                <text:p>0.02501049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96.639923095703">
                <text:p>496.639923095703</text:p>
              </table:table-cell>
              <table:table-cell office:value-type="float" office:value="0.04348619">
                <text:p>0.04348619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96.756042480469">
                <text:p>496.756042480469</text:p>
              </table:table-cell>
              <table:table-cell office:value-type="float" office:value="0.0419302">
                <text:p>0.041930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96.872161865234">
                <text:p>496.872161865234</text:p>
              </table:table-cell>
              <table:table-cell office:value-type="float" office:value="0.03351107">
                <text:p>0.03351107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96.98828125">
                <text:p>496.98828125</text:p>
              </table:table-cell>
              <table:table-cell office:value-type="float" office:value="0.0398543">
                <text:p>0.0398543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97.104400634766">
                <text:p>497.104400634766</text:p>
              </table:table-cell>
              <table:table-cell office:value-type="float" office:value="0.06107422">
                <text:p>0.06107422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97.220520019531">
                <text:p>497.220520019531</text:p>
              </table:table-cell>
              <table:table-cell office:value-type="float" office:value="0.0445479">
                <text:p>0.044547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97.336669921875">
                <text:p>497.336669921875</text:p>
              </table:table-cell>
              <table:table-cell office:value-type="float" office:value="0.03784305">
                <text:p>0.0378430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97.452819824219">
                <text:p>497.452819824219</text:p>
              </table:table-cell>
              <table:table-cell office:value-type="float" office:value="0.03305581">
                <text:p>0.0330558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97.568939208984">
                <text:p>497.568939208984</text:p>
              </table:table-cell>
              <table:table-cell office:value-type="float" office:value="0.04856055">
                <text:p>0.0485605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97.685089111328">
                <text:p>497.685089111328</text:p>
              </table:table-cell>
              <table:table-cell office:value-type="float" office:value="0.05083514">
                <text:p>0.0508351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97.801239013672">
                <text:p>497.801239013672</text:p>
              </table:table-cell>
              <table:table-cell office:value-type="float" office:value="0.0448893">
                <text:p>0.0448893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497.917388916016">
                <text:p>497.917388916016</text:p>
              </table:table-cell>
              <table:table-cell office:value-type="float" office:value="0.03504563">
                <text:p>0.03504563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98.033569335938">
                <text:p>498.033569335938</text:p>
              </table:table-cell>
              <table:table-cell office:value-type="float" office:value="0.05370598">
                <text:p>0.0537059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98.149719238281">
                <text:p>498.149719238281</text:p>
              </table:table-cell>
              <table:table-cell office:value-type="float" office:value="0.06650171">
                <text:p>0.06650171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98.265899658203">
                <text:p>498.265899658203</text:p>
              </table:table-cell>
              <table:table-cell office:value-type="float" office:value="0.04584542">
                <text:p>0.0458454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98.382049560547">
                <text:p>498.382049560547</text:p>
              </table:table-cell>
              <table:table-cell office:value-type="float" office:value="0.05021063">
                <text:p>0.05021063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98.498229980469">
                <text:p>498.498229980469</text:p>
              </table:table-cell>
              <table:table-cell office:value-type="float" office:value="0.06726865">
                <text:p>0.0672686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498.614410400391">
                <text:p>498.614410400391</text:p>
              </table:table-cell>
              <table:table-cell office:value-type="float" office:value="0.05368258">
                <text:p>0.05368258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98.730590820313">
                <text:p>498.730590820313</text:p>
              </table:table-cell>
              <table:table-cell office:value-type="float" office:value="0.05731753">
                <text:p>0.0573175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98.846771240234">
                <text:p>498.846771240234</text:p>
              </table:table-cell>
              <table:table-cell office:value-type="float" office:value="0.04343397">
                <text:p>0.04343397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98.962982177734">
                <text:p>498.962982177734</text:p>
              </table:table-cell>
              <table:table-cell office:value-type="float" office:value="0.06141505">
                <text:p>0.06141505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99.079162597656">
                <text:p>499.079162597656</text:p>
              </table:table-cell>
              <table:table-cell office:value-type="float" office:value="0.08545354">
                <text:p>0.0854535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499.195373535156">
                <text:p>499.195373535156</text:p>
              </table:table-cell>
              <table:table-cell office:value-type="float" office:value="0.05390158">
                <text:p>0.05390158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499.311584472656">
                <text:p>499.311584472656</text:p>
              </table:table-cell>
              <table:table-cell office:value-type="float" office:value="0.05596722">
                <text:p>0.05596722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99.427764892578">
                <text:p>499.427764892578</text:p>
              </table:table-cell>
              <table:table-cell office:value-type="float" office:value="0.0717987">
                <text:p>0.0717987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99.543975830078">
                <text:p>499.543975830078</text:p>
              </table:table-cell>
              <table:table-cell office:value-type="float" office:value="0.06315883">
                <text:p>0.06315883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499.660217285156">
                <text:p>499.660217285156</text:p>
              </table:table-cell>
              <table:table-cell office:value-type="float" office:value="0.05857682">
                <text:p>0.05857682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99.776428222656">
                <text:p>499.776428222656</text:p>
              </table:table-cell>
              <table:table-cell office:value-type="float" office:value="0.05498835">
                <text:p>0.0549883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99.892639160156">
                <text:p>499.892639160156</text:p>
              </table:table-cell>
              <table:table-cell office:value-type="float" office:value="0.07067021">
                <text:p>0.07067021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00.008880615234">
                <text:p>500.008880615234</text:p>
              </table:table-cell>
              <table:table-cell office:value-type="float" office:value="0.09833281">
                <text:p>0.09833281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00.125091552734">
                <text:p>500.125091552734</text:p>
              </table:table-cell>
              <table:table-cell office:value-type="float" office:value="0.06922462">
                <text:p>0.06922462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00.241333007813">
                <text:p>500.241333007813</text:p>
              </table:table-cell>
              <table:table-cell office:value-type="float" office:value="0.07767946">
                <text:p>0.07767946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00.357574462891">
                <text:p>500.357574462891</text:p>
              </table:table-cell>
              <table:table-cell office:value-type="float" office:value="0.07953888">
                <text:p>0.07953888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00.473815917969">
                <text:p>500.473815917969</text:p>
              </table:table-cell>
              <table:table-cell office:value-type="float" office:value="0.08057256">
                <text:p>0.08057256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00.590057373047">
                <text:p>500.590057373047</text:p>
              </table:table-cell>
              <table:table-cell office:value-type="float" office:value="0.07227403">
                <text:p>0.0722740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00.706298828125">
                <text:p>500.706298828125</text:p>
              </table:table-cell>
              <table:table-cell office:value-type="float" office:value="0.07272303">
                <text:p>0.07272303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00.822570800781">
                <text:p>500.822570800781</text:p>
              </table:table-cell>
              <table:table-cell office:value-type="float" office:value="0.08603984">
                <text:p>0.08603984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00.938812255859">
                <text:p>500.938812255859</text:p>
              </table:table-cell>
              <table:table-cell office:value-type="float" office:value="0.0905449">
                <text:p>0.0905449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01.055084228516">
                <text:p>501.055084228516</text:p>
              </table:table-cell>
              <table:table-cell office:value-type="float" office:value="0.07605078">
                <text:p>0.0760507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01.171356201172">
                <text:p>501.171356201172</text:p>
              </table:table-cell>
              <table:table-cell office:value-type="float" office:value="0.08651452">
                <text:p>0.08651452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01.287628173828">
                <text:p>501.287628173828</text:p>
              </table:table-cell>
              <table:table-cell office:value-type="float" office:value="0.1011521">
                <text:p>0.1011521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501.403900146484">
                <text:p>501.403900146484</text:p>
              </table:table-cell>
              <table:table-cell office:value-type="float" office:value="0.09563079">
                <text:p>0.09563079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01.520172119141">
                <text:p>501.520172119141</text:p>
              </table:table-cell>
              <table:table-cell office:value-type="float" office:value="0.09493934">
                <text:p>0.09493934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01.636444091797">
                <text:p>501.636444091797</text:p>
              </table:table-cell>
              <table:table-cell office:value-type="float" office:value="0.1624176">
                <text:p>0.1624176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01.752746582031">
                <text:p>501.752746582031</text:p>
              </table:table-cell>
              <table:table-cell office:value-type="float" office:value="0.1034297">
                <text:p>0.1034297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01.869018554688">
                <text:p>501.869018554688</text:p>
              </table:table-cell>
              <table:table-cell office:value-type="float" office:value="0.103607">
                <text:p>0.103607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01.985321044922">
                <text:p>501.985321044922</text:p>
              </table:table-cell>
              <table:table-cell office:value-type="float" office:value="0.1104811">
                <text:p>0.1104811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02.101623535156">
                <text:p>502.101623535156</text:p>
              </table:table-cell>
              <table:table-cell office:value-type="float" office:value="0.09957635">
                <text:p>0.0995763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02.217926025391">
                <text:p>502.217926025391</text:p>
              </table:table-cell>
              <table:table-cell office:value-type="float" office:value="0.1158633">
                <text:p>0.1158633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02.334228515625">
                <text:p>502.334228515625</text:p>
              </table:table-cell>
              <table:table-cell office:value-type="float" office:value="0.112552">
                <text:p>0.112552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02.450531005859">
                <text:p>502.450531005859</text:p>
              </table:table-cell>
              <table:table-cell office:value-type="float" office:value="0.1088548">
                <text:p>0.1088548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02.566833496094">
                <text:p>502.566833496094</text:p>
              </table:table-cell>
              <table:table-cell office:value-type="float" office:value="0.1222498">
                <text:p>0.1222498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02.683166503906">
                <text:p>502.683166503906</text:p>
              </table:table-cell>
              <table:table-cell office:value-type="float" office:value="0.1292182">
                <text:p>0.1292182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02.799468994141">
                <text:p>502.799468994141</text:p>
              </table:table-cell>
              <table:table-cell office:value-type="float" office:value="0.1273646">
                <text:p>0.1273646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02.915802001953">
                <text:p>502.915802001953</text:p>
              </table:table-cell>
              <table:table-cell office:value-type="float" office:value="0.1241361">
                <text:p>0.124136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03.032135009766">
                <text:p>503.032135009766</text:p>
              </table:table-cell>
              <table:table-cell office:value-type="float" office:value="0.1240594">
                <text:p>0.1240594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03.148468017578">
                <text:p>503.148468017578</text:p>
              </table:table-cell>
              <table:table-cell office:value-type="float" office:value="0.1332789">
                <text:p>0.1332789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03.264801025391">
                <text:p>503.264801025391</text:p>
              </table:table-cell>
              <table:table-cell office:value-type="float" office:value="0.1457027">
                <text:p>0.1457027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03.381134033203">
                <text:p>503.381134033203</text:p>
              </table:table-cell>
              <table:table-cell office:value-type="float" office:value="0.1311237">
                <text:p>0.1311237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03.497497558594">
                <text:p>503.497497558594</text:p>
              </table:table-cell>
              <table:table-cell office:value-type="float" office:value="0.1395341">
                <text:p>0.1395341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03.613830566406">
                <text:p>503.613830566406</text:p>
              </table:table-cell>
              <table:table-cell office:value-type="float" office:value="0.1488254">
                <text:p>0.1488254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03.730194091797">
                <text:p>503.730194091797</text:p>
              </table:table-cell>
              <table:table-cell office:value-type="float" office:value="0.1489795">
                <text:p>0.148979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03.846527099609">
                <text:p>503.846527099609</text:p>
              </table:table-cell>
              <table:table-cell office:value-type="float" office:value="0.1535016">
                <text:p>0.1535016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03.962890625">
                <text:p>503.962890625</text:p>
              </table:table-cell>
              <table:table-cell office:value-type="float" office:value="0.1474628">
                <text:p>0.1474628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04.079254150391">
                <text:p>504.079254150391</text:p>
              </table:table-cell>
              <table:table-cell office:value-type="float" office:value="0.1617995">
                <text:p>0.1617995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504.195617675781">
                <text:p>504.195617675781</text:p>
              </table:table-cell>
              <table:table-cell office:value-type="float" office:value="0.1713578">
                <text:p>0.1713578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04.31201171875">
                <text:p>504.31201171875</text:p>
              </table:table-cell>
              <table:table-cell office:value-type="float" office:value="0.1749888">
                <text:p>0.1749888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04.428375244141">
                <text:p>504.428375244141</text:p>
              </table:table-cell>
              <table:table-cell office:value-type="float" office:value="0.1657027">
                <text:p>0.1657027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04.544738769531">
                <text:p>504.544738769531</text:p>
              </table:table-cell>
              <table:table-cell office:value-type="float" office:value="0.1742177">
                <text:p>0.1742177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04.6611328125">
                <text:p>504.6611328125</text:p>
              </table:table-cell>
              <table:table-cell office:value-type="float" office:value="0.1804456">
                <text:p>0.1804456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504.777526855469">
                <text:p>504.777526855469</text:p>
              </table:table-cell>
              <table:table-cell office:value-type="float" office:value="0.1824259">
                <text:p>0.1824259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504.893920898438">
                <text:p>504.893920898438</text:p>
              </table:table-cell>
              <table:table-cell office:value-type="float" office:value="0.1873172">
                <text:p>0.1873172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505.010314941406">
                <text:p>505.010314941406</text:p>
              </table:table-cell>
              <table:table-cell office:value-type="float" office:value="0.1995679">
                <text:p>0.1995679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505.126708984375">
                <text:p>505.126708984375</text:p>
              </table:table-cell>
              <table:table-cell office:value-type="float" office:value="0.2215076">
                <text:p>0.2215076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505.243103027344">
                <text:p>505.243103027344</text:p>
              </table:table-cell>
              <table:table-cell office:value-type="float" office:value="0.1976827">
                <text:p>0.1976827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505.359497070313">
                <text:p>505.359497070313</text:p>
              </table:table-cell>
              <table:table-cell office:value-type="float" office:value="0.1998727">
                <text:p>0.1998727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505.475921630859">
                <text:p>505.475921630859</text:p>
              </table:table-cell>
              <table:table-cell office:value-type="float" office:value="0.2116586">
                <text:p>0.2116586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505.592346191406">
                <text:p>505.592346191406</text:p>
              </table:table-cell>
              <table:table-cell office:value-type="float" office:value="0.2231003">
                <text:p>0.223100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05.708740234375">
                <text:p>505.708740234375</text:p>
              </table:table-cell>
              <table:table-cell office:value-type="float" office:value="0.2081493">
                <text:p>0.2081493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05.825164794922">
                <text:p>505.825164794922</text:p>
              </table:table-cell>
              <table:table-cell office:value-type="float" office:value="0.2174661">
                <text:p>0.217466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05.941589355469">
                <text:p>505.941589355469</text:p>
              </table:table-cell>
              <table:table-cell office:value-type="float" office:value="0.2267839">
                <text:p>0.2267839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06.058013916016">
                <text:p>506.058013916016</text:p>
              </table:table-cell>
              <table:table-cell office:value-type="float" office:value="0.2338465">
                <text:p>0.233846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06.174468994141">
                <text:p>506.174468994141</text:p>
              </table:table-cell>
              <table:table-cell office:value-type="float" office:value="0.234137">
                <text:p>0.234137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06.290893554688">
                <text:p>506.290893554688</text:p>
              </table:table-cell>
              <table:table-cell office:value-type="float" office:value="0.2365753">
                <text:p>0.2365753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06.407348632813">
                <text:p>506.407348632813</text:p>
              </table:table-cell>
              <table:table-cell office:value-type="float" office:value="0.2522734">
                <text:p>0.2522734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06.523773193359">
                <text:p>506.523773193359</text:p>
              </table:table-cell>
              <table:table-cell office:value-type="float" office:value="0.2498308">
                <text:p>0.2498308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506.640228271484">
                <text:p>506.640228271484</text:p>
              </table:table-cell>
              <table:table-cell office:value-type="float" office:value="0.2547655">
                <text:p>0.254765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506.756683349609">
                <text:p>506.756683349609</text:p>
              </table:table-cell>
              <table:table-cell office:value-type="float" office:value="0.2627928">
                <text:p>0.262792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506.873138427734">
                <text:p>506.873138427734</text:p>
              </table:table-cell>
              <table:table-cell office:value-type="float" office:value="0.2747643">
                <text:p>0.2747643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506.989593505859">
                <text:p>506.989593505859</text:p>
              </table:table-cell>
              <table:table-cell office:value-type="float" office:value="0.2681657">
                <text:p>0.2681657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507.106048583984">
                <text:p>507.106048583984</text:p>
              </table:table-cell>
              <table:table-cell office:value-type="float" office:value="0.2671429">
                <text:p>0.2671429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507.222534179688">
                <text:p>507.222534179688</text:p>
              </table:table-cell>
              <table:table-cell office:value-type="float" office:value="0.2664463">
                <text:p>0.2664463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507.338989257813">
                <text:p>507.338989257813</text:p>
              </table:table-cell>
              <table:table-cell office:value-type="float" office:value="0.2768916">
                <text:p>0.2768916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507.455474853516">
                <text:p>507.455474853516</text:p>
              </table:table-cell>
              <table:table-cell office:value-type="float" office:value="0.2891609">
                <text:p>0.2891609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507.571960449219">
                <text:p>507.571960449219</text:p>
              </table:table-cell>
              <table:table-cell office:value-type="float" office:value="0.2798503">
                <text:p>0.279850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507.688446044922">
                <text:p>507.688446044922</text:p>
              </table:table-cell>
              <table:table-cell office:value-type="float" office:value="0.2892632">
                <text:p>0.2892632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507.804931640625">
                <text:p>507.804931640625</text:p>
              </table:table-cell>
              <table:table-cell office:value-type="float" office:value="0.3020231">
                <text:p>0.3020231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507.921417236328">
                <text:p>507.921417236328</text:p>
              </table:table-cell>
              <table:table-cell office:value-type="float" office:value="0.3046623">
                <text:p>0.304662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508.037902832031">
                <text:p>508.037902832031</text:p>
              </table:table-cell>
              <table:table-cell office:value-type="float" office:value="0.3084749">
                <text:p>0.3084749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508.154388427734">
                <text:p>508.154388427734</text:p>
              </table:table-cell>
              <table:table-cell office:value-type="float" office:value="0.3185405">
                <text:p>0.318540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508.270904541016">
                <text:p>508.270904541016</text:p>
              </table:table-cell>
              <table:table-cell office:value-type="float" office:value="0.3265861">
                <text:p>0.3265861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508.387420654297">
                <text:p>508.387420654297</text:p>
              </table:table-cell>
              <table:table-cell office:value-type="float" office:value="0.3241898">
                <text:p>0.3241898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508.50390625">
                <text:p>508.50390625</text:p>
              </table:table-cell>
              <table:table-cell office:value-type="float" office:value="0.3248577">
                <text:p>0.3248577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508.620422363281">
                <text:p>508.620422363281</text:p>
              </table:table-cell>
              <table:table-cell office:value-type="float" office:value="0.3311678">
                <text:p>0.3311678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508.736938476563">
                <text:p>508.736938476563</text:p>
              </table:table-cell>
              <table:table-cell office:value-type="float" office:value="0.3609523">
                <text:p>0.3609523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508.853454589844">
                <text:p>508.853454589844</text:p>
              </table:table-cell>
              <table:table-cell office:value-type="float" office:value="0.3564497">
                <text:p>0.3564497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508.970001220703">
                <text:p>508.970001220703</text:p>
              </table:table-cell>
              <table:table-cell office:value-type="float" office:value="0.3501715">
                <text:p>0.350171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509.086517333984">
                <text:p>509.086517333984</text:p>
              </table:table-cell>
              <table:table-cell office:value-type="float" office:value="0.359705">
                <text:p>0.35970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509.203063964844">
                <text:p>509.203063964844</text:p>
              </table:table-cell>
              <table:table-cell office:value-type="float" office:value="0.3796947">
                <text:p>0.3796947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509.319580078125">
                <text:p>509.319580078125</text:p>
              </table:table-cell>
              <table:table-cell office:value-type="float" office:value="0.3677572">
                <text:p>0.3677572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509.436126708984">
                <text:p>509.436126708984</text:p>
              </table:table-cell>
              <table:table-cell office:value-type="float" office:value="0.3739736">
                <text:p>0.3739736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509.552673339844">
                <text:p>509.552673339844</text:p>
              </table:table-cell>
              <table:table-cell office:value-type="float" office:value="0.3748424">
                <text:p>0.3748424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09.669219970703">
                <text:p>509.669219970703</text:p>
              </table:table-cell>
              <table:table-cell office:value-type="float" office:value="0.3951976">
                <text:p>0.3951976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09.785766601563">
                <text:p>509.785766601563</text:p>
              </table:table-cell>
              <table:table-cell office:value-type="float" office:value="0.3973842">
                <text:p>0.3973842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09.902313232422">
                <text:p>509.902313232422</text:p>
              </table:table-cell>
              <table:table-cell office:value-type="float" office:value="0.3943867">
                <text:p>0.3943867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510.018890380859">
                <text:p>510.018890380859</text:p>
              </table:table-cell>
              <table:table-cell office:value-type="float" office:value="0.3938987">
                <text:p>0.3938987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510.135437011719">
                <text:p>510.135437011719</text:p>
              </table:table-cell>
              <table:table-cell office:value-type="float" office:value="0.4030631">
                <text:p>0.403063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510.252014160156">
                <text:p>510.252014160156</text:p>
              </table:table-cell>
              <table:table-cell office:value-type="float" office:value="0.4151646">
                <text:p>0.4151646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510.368560791016">
                <text:p>510.368560791016</text:p>
              </table:table-cell>
              <table:table-cell office:value-type="float" office:value="0.4172612">
                <text:p>0.417261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510.485137939453">
                <text:p>510.485137939453</text:p>
              </table:table-cell>
              <table:table-cell office:value-type="float" office:value="0.4129483">
                <text:p>0.4129483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510.601715087891">
                <text:p>510.601715087891</text:p>
              </table:table-cell>
              <table:table-cell office:value-type="float" office:value="0.4347668">
                <text:p>0.4347668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510.718322753906">
                <text:p>510.718322753906</text:p>
              </table:table-cell>
              <table:table-cell office:value-type="float" office:value="0.4381938">
                <text:p>0.4381938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510.834899902344">
                <text:p>510.834899902344</text:p>
              </table:table-cell>
              <table:table-cell office:value-type="float" office:value="0.4280088">
                <text:p>0.4280088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510.951477050781">
                <text:p>510.951477050781</text:p>
              </table:table-cell>
              <table:table-cell office:value-type="float" office:value="0.4539557">
                <text:p>0.4539557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511.068084716797">
                <text:p>511.068084716797</text:p>
              </table:table-cell>
              <table:table-cell office:value-type="float" office:value="0.4471012">
                <text:p>0.447101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511.184661865234">
                <text:p>511.184661865234</text:p>
              </table:table-cell>
              <table:table-cell office:value-type="float" office:value="0.4489276">
                <text:p>0.4489276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511.30126953125">
                <text:p>511.30126953125</text:p>
              </table:table-cell>
              <table:table-cell office:value-type="float" office:value="0.4496832">
                <text:p>0.4496832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511.417877197266">
                <text:p>511.417877197266</text:p>
              </table:table-cell>
              <table:table-cell office:value-type="float" office:value="0.4532139">
                <text:p>0.4532139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511.534484863281">
                <text:p>511.534484863281</text:p>
              </table:table-cell>
              <table:table-cell office:value-type="float" office:value="0.4666762">
                <text:p>0.4666762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511.651092529297">
                <text:p>511.651092529297</text:p>
              </table:table-cell>
              <table:table-cell office:value-type="float" office:value="0.4698298">
                <text:p>0.4698298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511.767700195313">
                <text:p>511.767700195313</text:p>
              </table:table-cell>
              <table:table-cell office:value-type="float" office:value="0.4772105">
                <text:p>0.477210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511.884338378906">
                <text:p>511.884338378906</text:p>
              </table:table-cell>
              <table:table-cell office:value-type="float" office:value="0.4817169">
                <text:p>0.4817169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512.0009765625">
                <text:p>512.0009765625</text:p>
              </table:table-cell>
              <table:table-cell office:value-type="float" office:value="0.4863065">
                <text:p>0.486306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512.117553710938">
                <text:p>512.117553710938</text:p>
              </table:table-cell>
              <table:table-cell office:value-type="float" office:value="0.5000002">
                <text:p>0.500000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12.234191894531">
                <text:p>512.234191894531</text:p>
              </table:table-cell>
              <table:table-cell office:value-type="float" office:value="0.5473565">
                <text:p>0.547356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12.350830078125">
                <text:p>512.350830078125</text:p>
              </table:table-cell>
              <table:table-cell office:value-type="float" office:value="0.5032358">
                <text:p>0.503235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512.467468261719">
                <text:p>512.467468261719</text:p>
              </table:table-cell>
              <table:table-cell office:value-type="float" office:value="0.5160744">
                <text:p>0.5160744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512.584106445313">
                <text:p>512.584106445313</text:p>
              </table:table-cell>
              <table:table-cell office:value-type="float" office:value="0.509284">
                <text:p>0.509284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512.700744628906">
                <text:p>512.700744628906</text:p>
              </table:table-cell>
              <table:table-cell office:value-type="float" office:value="0.5331795">
                <text:p>0.533179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512.8173828125">
                <text:p>512.8173828125</text:p>
              </table:table-cell>
              <table:table-cell office:value-type="float" office:value="0.5120218">
                <text:p>0.5120218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512.93408203125">
                <text:p>512.93408203125</text:p>
              </table:table-cell>
              <table:table-cell office:value-type="float" office:value="0.5268459">
                <text:p>0.5268459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13.050720214844">
                <text:p>513.050720214844</text:p>
              </table:table-cell>
              <table:table-cell office:value-type="float" office:value="0.5361366">
                <text:p>0.5361366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13.167358398438">
                <text:p>513.167358398438</text:p>
              </table:table-cell>
              <table:table-cell office:value-type="float" office:value="0.5233671">
                <text:p>0.5233671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13.284057617188">
                <text:p>513.284057617188</text:p>
              </table:table-cell>
              <table:table-cell office:value-type="float" office:value="0.5272558">
                <text:p>0.5272558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513.400695800781">
                <text:p>513.400695800781</text:p>
              </table:table-cell>
              <table:table-cell office:value-type="float" office:value="0.5513894">
                <text:p>0.5513894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13.517395019531">
                <text:p>513.517395019531</text:p>
              </table:table-cell>
              <table:table-cell office:value-type="float" office:value="0.5526835">
                <text:p>0.552683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13.634033203125">
                <text:p>513.634033203125</text:p>
              </table:table-cell>
              <table:table-cell office:value-type="float" office:value="0.5409401">
                <text:p>0.5409401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13.750732421875">
                <text:p>513.750732421875</text:p>
              </table:table-cell>
              <table:table-cell office:value-type="float" office:value="0.5597429">
                <text:p>0.5597429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13.867431640625">
                <text:p>513.867431640625</text:p>
              </table:table-cell>
              <table:table-cell office:value-type="float" office:value="0.5643248">
                <text:p>0.5643248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513.984069824219">
                <text:p>513.984069824219</text:p>
              </table:table-cell>
              <table:table-cell office:value-type="float" office:value="0.5697448">
                <text:p>0.5697448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14.100769042969">
                <text:p>514.100769042969</text:p>
              </table:table-cell>
              <table:table-cell office:value-type="float" office:value="0.5729294">
                <text:p>0.5729294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14.217468261719">
                <text:p>514.217468261719</text:p>
              </table:table-cell>
              <table:table-cell office:value-type="float" office:value="0.563247">
                <text:p>0.563247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14.334167480469">
                <text:p>514.334167480469</text:p>
              </table:table-cell>
              <table:table-cell office:value-type="float" office:value="0.575129">
                <text:p>0.575129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14.450866699219">
                <text:p>514.450866699219</text:p>
              </table:table-cell>
              <table:table-cell office:value-type="float" office:value="0.5845589">
                <text:p>0.584558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14.567565917969">
                <text:p>514.567565917969</text:p>
              </table:table-cell>
              <table:table-cell office:value-type="float" office:value="0.5723043">
                <text:p>0.5723043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14.684265136719">
                <text:p>514.684265136719</text:p>
              </table:table-cell>
              <table:table-cell office:value-type="float" office:value="0.5813432">
                <text:p>0.581343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14.801025390625">
                <text:p>514.801025390625</text:p>
              </table:table-cell>
              <table:table-cell office:value-type="float" office:value="0.5886063">
                <text:p>0.5886063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14.917724609375">
                <text:p>514.917724609375</text:p>
              </table:table-cell>
              <table:table-cell office:value-type="float" office:value="0.5987726">
                <text:p>0.5987726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515.034423828125">
                <text:p>515.034423828125</text:p>
              </table:table-cell>
              <table:table-cell office:value-type="float" office:value="0.5899422">
                <text:p>0.589942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515.151184082031">
                <text:p>515.151184082031</text:p>
              </table:table-cell>
              <table:table-cell office:value-type="float" office:value="0.5825784">
                <text:p>0.5825784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15.267883300781">
                <text:p>515.267883300781</text:p>
              </table:table-cell>
              <table:table-cell office:value-type="float" office:value="0.5989513">
                <text:p>0.5989513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515.384643554688">
                <text:p>515.384643554688</text:p>
              </table:table-cell>
              <table:table-cell office:value-type="float" office:value="0.6075544">
                <text:p>0.6075544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515.501342773438">
                <text:p>515.501342773438</text:p>
              </table:table-cell>
              <table:table-cell office:value-type="float" office:value="0.6058887">
                <text:p>0.6058887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15.618103027344">
                <text:p>515.618103027344</text:p>
              </table:table-cell>
              <table:table-cell office:value-type="float" office:value="0.611828">
                <text:p>0.611828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515.734802246094">
                <text:p>515.734802246094</text:p>
              </table:table-cell>
              <table:table-cell office:value-type="float" office:value="0.6088856">
                <text:p>0.608885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15.8515625">
                <text:p>515.8515625</text:p>
              </table:table-cell>
              <table:table-cell office:value-type="float" office:value="0.6280319">
                <text:p>0.6280319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515.968322753906">
                <text:p>515.968322753906</text:p>
              </table:table-cell>
              <table:table-cell office:value-type="float" office:value="0.6149315">
                <text:p>0.6149315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516.085083007813">
                <text:p>516.085083007813</text:p>
              </table:table-cell>
              <table:table-cell office:value-type="float" office:value="0.6191899">
                <text:p>0.6191899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516.201843261719">
                <text:p>516.201843261719</text:p>
              </table:table-cell>
              <table:table-cell office:value-type="float" office:value="0.6192555">
                <text:p>0.619255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16.318603515625">
                <text:p>516.318603515625</text:p>
              </table:table-cell>
              <table:table-cell office:value-type="float" office:value="0.62102">
                <text:p>0.62102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516.435363769531">
                <text:p>516.435363769531</text:p>
              </table:table-cell>
              <table:table-cell office:value-type="float" office:value="0.6184756">
                <text:p>0.6184756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516.552124023438">
                <text:p>516.552124023438</text:p>
              </table:table-cell>
              <table:table-cell office:value-type="float" office:value="0.6257026">
                <text:p>0.6257026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516.668884277344">
                <text:p>516.668884277344</text:p>
              </table:table-cell>
              <table:table-cell office:value-type="float" office:value="0.6290645">
                <text:p>0.6290645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516.78564453125">
                <text:p>516.78564453125</text:p>
              </table:table-cell>
              <table:table-cell office:value-type="float" office:value="0.6440322">
                <text:p>0.644032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516.902465820313">
                <text:p>516.902465820313</text:p>
              </table:table-cell>
              <table:table-cell office:value-type="float" office:value="0.6547282">
                <text:p>0.6547282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17.019226074219">
                <text:p>517.019226074219</text:p>
              </table:table-cell>
              <table:table-cell office:value-type="float" office:value="0.6307883">
                <text:p>0.630788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17.135986328125">
                <text:p>517.135986328125</text:p>
              </table:table-cell>
              <table:table-cell office:value-type="float" office:value="0.6374357">
                <text:p>0.6374357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17.252807617188">
                <text:p>517.252807617188</text:p>
              </table:table-cell>
              <table:table-cell office:value-type="float" office:value="0.6463126">
                <text:p>0.6463126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17.369567871094">
                <text:p>517.369567871094</text:p>
              </table:table-cell>
              <table:table-cell office:value-type="float" office:value="0.6360947">
                <text:p>0.6360947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517.486389160156">
                <text:p>517.486389160156</text:p>
              </table:table-cell>
              <table:table-cell office:value-type="float" office:value="0.644241">
                <text:p>0.644241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517.603210449219">
                <text:p>517.603210449219</text:p>
              </table:table-cell>
              <table:table-cell office:value-type="float" office:value="0.6481868">
                <text:p>0.648186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517.719970703125">
                <text:p>517.719970703125</text:p>
              </table:table-cell>
              <table:table-cell office:value-type="float" office:value="0.6468038">
                <text:p>0.6468038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17.836791992188">
                <text:p>517.836791992188</text:p>
              </table:table-cell>
              <table:table-cell office:value-type="float" office:value="0.6486466">
                <text:p>0.6486466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17.95361328125">
                <text:p>517.95361328125</text:p>
              </table:table-cell>
              <table:table-cell office:value-type="float" office:value="0.6487793">
                <text:p>0.648779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18.070434570313">
                <text:p>518.070434570313</text:p>
              </table:table-cell>
              <table:table-cell office:value-type="float" office:value="0.6447939">
                <text:p>0.6447939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518.187255859375">
                <text:p>518.187255859375</text:p>
              </table:table-cell>
              <table:table-cell office:value-type="float" office:value="0.6574731">
                <text:p>0.657473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518.304077148438">
                <text:p>518.304077148438</text:p>
              </table:table-cell>
              <table:table-cell office:value-type="float" office:value="0.6620472">
                <text:p>0.6620472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518.4208984375">
                <text:p>518.4208984375</text:p>
              </table:table-cell>
              <table:table-cell office:value-type="float" office:value="0.6567847">
                <text:p>0.6567847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518.537719726563">
                <text:p>518.537719726563</text:p>
              </table:table-cell>
              <table:table-cell office:value-type="float" office:value="0.6702277">
                <text:p>0.6702277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518.654541015625">
                <text:p>518.654541015625</text:p>
              </table:table-cell>
              <table:table-cell office:value-type="float" office:value="0.6647567">
                <text:p>0.6647567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518.771362304688">
                <text:p>518.771362304688</text:p>
              </table:table-cell>
              <table:table-cell office:value-type="float" office:value="0.6483371">
                <text:p>0.6483371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518.888244628906">
                <text:p>518.888244628906</text:p>
              </table:table-cell>
              <table:table-cell office:value-type="float" office:value="0.6478556">
                <text:p>0.6478556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519.005065917969">
                <text:p>519.005065917969</text:p>
              </table:table-cell>
              <table:table-cell office:value-type="float" office:value="0.6588359">
                <text:p>0.6588359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519.121887207031">
                <text:p>519.121887207031</text:p>
              </table:table-cell>
              <table:table-cell office:value-type="float" office:value="0.6575541">
                <text:p>0.6575541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519.23876953125">
                <text:p>519.23876953125</text:p>
              </table:table-cell>
              <table:table-cell office:value-type="float" office:value="0.6644945">
                <text:p>0.6644945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519.355590820313">
                <text:p>519.355590820313</text:p>
              </table:table-cell>
              <table:table-cell office:value-type="float" office:value="0.6559655">
                <text:p>0.655965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519.472473144531">
                <text:p>519.472473144531</text:p>
              </table:table-cell>
              <table:table-cell office:value-type="float" office:value="0.6636681">
                <text:p>0.663668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519.58935546875">
                <text:p>519.58935546875</text:p>
              </table:table-cell>
              <table:table-cell office:value-type="float" office:value="0.665117">
                <text:p>0.665117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519.706176757813">
                <text:p>519.706176757813</text:p>
              </table:table-cell>
              <table:table-cell office:value-type="float" office:value="0.6582093">
                <text:p>0.6582093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519.823059082031">
                <text:p>519.823059082031</text:p>
              </table:table-cell>
              <table:table-cell office:value-type="float" office:value="0.6566414">
                <text:p>0.6566414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519.93994140625">
                <text:p>519.93994140625</text:p>
              </table:table-cell>
              <table:table-cell office:value-type="float" office:value="0.6763347">
                <text:p>0.6763347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520.056823730469">
                <text:p>520.056823730469</text:p>
              </table:table-cell>
              <table:table-cell office:value-type="float" office:value="0.658199">
                <text:p>0.658199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20.173706054688">
                <text:p>520.173706054688</text:p>
              </table:table-cell>
              <table:table-cell office:value-type="float" office:value="0.6640307">
                <text:p>0.6640307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20.290588378906">
                <text:p>520.290588378906</text:p>
              </table:table-cell>
              <table:table-cell office:value-type="float" office:value="0.6541471">
                <text:p>0.6541471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20.407470703125">
                <text:p>520.407470703125</text:p>
              </table:table-cell>
              <table:table-cell office:value-type="float" office:value="0.6609639">
                <text:p>0.6609639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20.524353027344">
                <text:p>520.524353027344</text:p>
              </table:table-cell>
              <table:table-cell office:value-type="float" office:value="0.6545422">
                <text:p>0.6545422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20.641235351563">
                <text:p>520.641235351563</text:p>
              </table:table-cell>
              <table:table-cell office:value-type="float" office:value="0.6560129">
                <text:p>0.6560129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20.758178710938">
                <text:p>520.758178710938</text:p>
              </table:table-cell>
              <table:table-cell office:value-type="float" office:value="0.6600133">
                <text:p>0.660013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520.875061035156">
                <text:p>520.875061035156</text:p>
              </table:table-cell>
              <table:table-cell office:value-type="float" office:value="0.685718">
                <text:p>0.685718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20.991943359375">
                <text:p>520.991943359375</text:p>
              </table:table-cell>
              <table:table-cell office:value-type="float" office:value="0.6667284">
                <text:p>0.6667284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521.10888671875">
                <text:p>521.10888671875</text:p>
              </table:table-cell>
              <table:table-cell office:value-type="float" office:value="0.656407">
                <text:p>0.656407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521.225769042969">
                <text:p>521.225769042969</text:p>
              </table:table-cell>
              <table:table-cell office:value-type="float" office:value="0.6653759">
                <text:p>0.6653759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521.342712402344">
                <text:p>521.342712402344</text:p>
              </table:table-cell>
              <table:table-cell office:value-type="float" office:value="0.6727344">
                <text:p>0.6727344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521.459594726563">
                <text:p>521.459594726563</text:p>
              </table:table-cell>
              <table:table-cell office:value-type="float" office:value="0.6540391">
                <text:p>0.6540391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21.576538085938">
                <text:p>521.576538085938</text:p>
              </table:table-cell>
              <table:table-cell office:value-type="float" office:value="0.6563156">
                <text:p>0.6563156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521.693481445313">
                <text:p>521.693481445313</text:p>
              </table:table-cell>
              <table:table-cell office:value-type="float" office:value="0.6592131">
                <text:p>0.6592131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521.810424804688">
                <text:p>521.810424804688</text:p>
              </table:table-cell>
              <table:table-cell office:value-type="float" office:value="0.6568196">
                <text:p>0.6568196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521.927307128906">
                <text:p>521.927307128906</text:p>
              </table:table-cell>
              <table:table-cell office:value-type="float" office:value="0.6724182">
                <text:p>0.6724182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522.044250488281">
                <text:p>522.044250488281</text:p>
              </table:table-cell>
              <table:table-cell office:value-type="float" office:value="0.6584197">
                <text:p>0.6584197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522.161193847656">
                <text:p>522.161193847656</text:p>
              </table:table-cell>
              <table:table-cell office:value-type="float" office:value="0.6942568">
                <text:p>0.6942568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522.278137207031">
                <text:p>522.278137207031</text:p>
              </table:table-cell>
              <table:table-cell office:value-type="float" office:value="0.6689836">
                <text:p>0.6689836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522.395080566406">
                <text:p>522.395080566406</text:p>
              </table:table-cell>
              <table:table-cell office:value-type="float" office:value="0.6595288">
                <text:p>0.659528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522.512023925781">
                <text:p>522.512023925781</text:p>
              </table:table-cell>
              <table:table-cell office:value-type="float" office:value="0.6548688">
                <text:p>0.6548688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522.629028320313">
                <text:p>522.629028320313</text:p>
              </table:table-cell>
              <table:table-cell office:value-type="float" office:value="0.6609479">
                <text:p>0.6609479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522.745971679688">
                <text:p>522.745971679688</text:p>
              </table:table-cell>
              <table:table-cell office:value-type="float" office:value="0.6595866">
                <text:p>0.6595866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522.862915039063">
                <text:p>522.862915039063</text:p>
              </table:table-cell>
              <table:table-cell office:value-type="float" office:value="0.6691613">
                <text:p>0.6691613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522.979919433594">
                <text:p>522.979919433594</text:p>
              </table:table-cell>
              <table:table-cell office:value-type="float" office:value="0.6467791">
                <text:p>0.6467791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523.096862792969">
                <text:p>523.096862792969</text:p>
              </table:table-cell>
              <table:table-cell office:value-type="float" office:value="0.6685712">
                <text:p>0.6685712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523.2138671875">
                <text:p>523.2138671875</text:p>
              </table:table-cell>
              <table:table-cell office:value-type="float" office:value="0.663297">
                <text:p>0.663297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523.330810546875">
                <text:p>523.330810546875</text:p>
              </table:table-cell>
              <table:table-cell office:value-type="float" office:value="0.6519442">
                <text:p>0.6519442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523.447814941406">
                <text:p>523.447814941406</text:p>
              </table:table-cell>
              <table:table-cell office:value-type="float" office:value="0.6566181">
                <text:p>0.6566181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523.564758300781">
                <text:p>523.564758300781</text:p>
              </table:table-cell>
              <table:table-cell office:value-type="float" office:value="0.6547908">
                <text:p>0.6547908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523.681762695313">
                <text:p>523.681762695313</text:p>
              </table:table-cell>
              <table:table-cell office:value-type="float" office:value="0.6488575">
                <text:p>0.6488575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523.798767089844">
                <text:p>523.798767089844</text:p>
              </table:table-cell>
              <table:table-cell office:value-type="float" office:value="0.6434256">
                <text:p>0.6434256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523.915771484375">
                <text:p>523.915771484375</text:p>
              </table:table-cell>
              <table:table-cell office:value-type="float" office:value="0.6412037">
                <text:p>0.6412037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524.032775878906">
                <text:p>524.032775878906</text:p>
              </table:table-cell>
              <table:table-cell office:value-type="float" office:value="0.6555727">
                <text:p>0.6555727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524.149719238281">
                <text:p>524.149719238281</text:p>
              </table:table-cell>
              <table:table-cell office:value-type="float" office:value="0.6515421">
                <text:p>0.6515421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524.266723632813">
                <text:p>524.266723632813</text:p>
              </table:table-cell>
              <table:table-cell office:value-type="float" office:value="0.6492343">
                <text:p>0.6492343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524.3837890625">
                <text:p>524.3837890625</text:p>
              </table:table-cell>
              <table:table-cell office:value-type="float" office:value="0.6340377">
                <text:p>0.6340377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524.500793457031">
                <text:p>524.500793457031</text:p>
              </table:table-cell>
              <table:table-cell office:value-type="float" office:value="0.6606779">
                <text:p>0.6606779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524.617797851563">
                <text:p>524.617797851563</text:p>
              </table:table-cell>
              <table:table-cell office:value-type="float" office:value="0.6503255">
                <text:p>0.6503255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524.734802246094">
                <text:p>524.734802246094</text:p>
              </table:table-cell>
              <table:table-cell office:value-type="float" office:value="0.6331924">
                <text:p>0.6331924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524.851806640625">
                <text:p>524.851806640625</text:p>
              </table:table-cell>
              <table:table-cell office:value-type="float" office:value="0.6341585">
                <text:p>0.6341585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524.968872070313">
                <text:p>524.968872070313</text:p>
              </table:table-cell>
              <table:table-cell office:value-type="float" office:value="0.6421868">
                <text:p>0.6421868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525.085876464844">
                <text:p>525.085876464844</text:p>
              </table:table-cell>
              <table:table-cell office:value-type="float" office:value="0.658739">
                <text:p>0.658739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525.202941894531">
                <text:p>525.202941894531</text:p>
              </table:table-cell>
              <table:table-cell office:value-type="float" office:value="0.6325062">
                <text:p>0.6325062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525.319946289063">
                <text:p>525.319946289063</text:p>
              </table:table-cell>
              <table:table-cell office:value-type="float" office:value="0.6342616">
                <text:p>0.6342616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525.43701171875">
                <text:p>525.43701171875</text:p>
              </table:table-cell>
              <table:table-cell office:value-type="float" office:value="0.6380224">
                <text:p>0.6380224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525.554016113281">
                <text:p>525.554016113281</text:p>
              </table:table-cell>
              <table:table-cell office:value-type="float" office:value="0.6418303">
                <text:p>0.6418303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525.671081542969">
                <text:p>525.671081542969</text:p>
              </table:table-cell>
              <table:table-cell office:value-type="float" office:value="0.6289725">
                <text:p>0.6289725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525.788146972656">
                <text:p>525.788146972656</text:p>
              </table:table-cell>
              <table:table-cell office:value-type="float" office:value="0.6206214">
                <text:p>0.6206214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525.905212402344">
                <text:p>525.905212402344</text:p>
              </table:table-cell>
              <table:table-cell office:value-type="float" office:value="0.6263679">
                <text:p>0.6263679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526.022277832031">
                <text:p>526.022277832031</text:p>
              </table:table-cell>
              <table:table-cell office:value-type="float" office:value="0.6246257">
                <text:p>0.6246257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526.139282226563">
                <text:p>526.139282226563</text:p>
              </table:table-cell>
              <table:table-cell office:value-type="float" office:value="0.6239282">
                <text:p>0.6239282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526.25634765625">
                <text:p>526.25634765625</text:p>
              </table:table-cell>
              <table:table-cell office:value-type="float" office:value="0.6365424">
                <text:p>0.6365424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526.373474121094">
                <text:p>526.373474121094</text:p>
              </table:table-cell>
              <table:table-cell office:value-type="float" office:value="0.6195164">
                <text:p>0.6195164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526.490539550781">
                <text:p>526.490539550781</text:p>
              </table:table-cell>
              <table:table-cell office:value-type="float" office:value="0.6348363">
                <text:p>0.6348363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526.607604980469">
                <text:p>526.607604980469</text:p>
              </table:table-cell>
              <table:table-cell office:value-type="float" office:value="0.6158059">
                <text:p>0.615805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526.724670410156">
                <text:p>526.724670410156</text:p>
              </table:table-cell>
              <table:table-cell office:value-type="float" office:value="0.6183073">
                <text:p>0.6183073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526.841735839844">
                <text:p>526.841735839844</text:p>
              </table:table-cell>
              <table:table-cell office:value-type="float" office:value="0.6280239">
                <text:p>0.6280239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526.958862304688">
                <text:p>526.958862304688</text:p>
              </table:table-cell>
              <table:table-cell office:value-type="float" office:value="0.6197846">
                <text:p>0.619784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527.075927734375">
                <text:p>527.075927734375</text:p>
              </table:table-cell>
              <table:table-cell office:value-type="float" office:value="0.6321289">
                <text:p>0.6321289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527.192993164063">
                <text:p>527.192993164063</text:p>
              </table:table-cell>
              <table:table-cell office:value-type="float" office:value="0.6061201">
                <text:p>0.6061201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527.310119628906">
                <text:p>527.310119628906</text:p>
              </table:table-cell>
              <table:table-cell office:value-type="float" office:value="0.6134439">
                <text:p>0.6134439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527.42724609375">
                <text:p>527.42724609375</text:p>
              </table:table-cell>
              <table:table-cell office:value-type="float" office:value="0.6094727">
                <text:p>0.6094727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527.544311523438">
                <text:p>527.544311523438</text:p>
              </table:table-cell>
              <table:table-cell office:value-type="float" office:value="0.6009488">
                <text:p>0.6009488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527.661437988281">
                <text:p>527.661437988281</text:p>
              </table:table-cell>
              <table:table-cell office:value-type="float" office:value="0.5973718">
                <text:p>0.5973718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527.778564453125">
                <text:p>527.778564453125</text:p>
              </table:table-cell>
              <table:table-cell office:value-type="float" office:value="0.6108593">
                <text:p>0.6108593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527.895629882813">
                <text:p>527.895629882813</text:p>
              </table:table-cell>
              <table:table-cell office:value-type="float" office:value="0.6103946">
                <text:p>0.6103946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528.012756347656">
                <text:p>528.012756347656</text:p>
              </table:table-cell>
              <table:table-cell office:value-type="float" office:value="0.5961307">
                <text:p>0.5961307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528.1298828125">
                <text:p>528.1298828125</text:p>
              </table:table-cell>
              <table:table-cell office:value-type="float" office:value="0.5994505">
                <text:p>0.599450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528.247009277344">
                <text:p>528.247009277344</text:p>
              </table:table-cell>
              <table:table-cell office:value-type="float" office:value="0.604329">
                <text:p>0.604329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528.364135742188">
                <text:p>528.364135742188</text:p>
              </table:table-cell>
              <table:table-cell office:value-type="float" office:value="0.5943936">
                <text:p>0.5943936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528.481262207031">
                <text:p>528.481262207031</text:p>
              </table:table-cell>
              <table:table-cell office:value-type="float" office:value="0.6159565">
                <text:p>0.6159565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528.598388671875">
                <text:p>528.598388671875</text:p>
              </table:table-cell>
              <table:table-cell office:value-type="float" office:value="0.6084438">
                <text:p>0.6084438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528.715576171875">
                <text:p>528.715576171875</text:p>
              </table:table-cell>
              <table:table-cell office:value-type="float" office:value="0.5949853">
                <text:p>0.5949853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528.832702636719">
                <text:p>528.832702636719</text:p>
              </table:table-cell>
              <table:table-cell office:value-type="float" office:value="0.5943903">
                <text:p>0.5943903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528.949829101563">
                <text:p>528.949829101563</text:p>
              </table:table-cell>
              <table:table-cell office:value-type="float" office:value="0.5832999">
                <text:p>0.5832999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529.066955566406">
                <text:p>529.066955566406</text:p>
              </table:table-cell>
              <table:table-cell office:value-type="float" office:value="0.5767816">
                <text:p>0.5767816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529.184143066406">
                <text:p>529.184143066406</text:p>
              </table:table-cell>
              <table:table-cell office:value-type="float" office:value="0.5914959">
                <text:p>0.5914959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529.30126953125">
                <text:p>529.30126953125</text:p>
              </table:table-cell>
              <table:table-cell office:value-type="float" office:value="0.5994862">
                <text:p>0.599486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529.41845703125">
                <text:p>529.41845703125</text:p>
              </table:table-cell>
              <table:table-cell office:value-type="float" office:value="0.5775911">
                <text:p>0.5775911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529.535583496094">
                <text:p>529.535583496094</text:p>
              </table:table-cell>
              <table:table-cell office:value-type="float" office:value="0.5841371">
                <text:p>0.5841371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529.652770996094">
                <text:p>529.652770996094</text:p>
              </table:table-cell>
              <table:table-cell office:value-type="float" office:value="0.583111">
                <text:p>0.583111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529.769958496094">
                <text:p>529.769958496094</text:p>
              </table:table-cell>
              <table:table-cell office:value-type="float" office:value="0.5781852">
                <text:p>0.5781852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529.887145996094">
                <text:p>529.887145996094</text:p>
              </table:table-cell>
              <table:table-cell office:value-type="float" office:value="0.57508">
                <text:p>0.57508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530.004272460938">
                <text:p>530.004272460938</text:p>
              </table:table-cell>
              <table:table-cell office:value-type="float" office:value="0.5755434">
                <text:p>0.5755434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530.121459960938">
                <text:p>530.121459960938</text:p>
              </table:table-cell>
              <table:table-cell office:value-type="float" office:value="0.5753846">
                <text:p>0.5753846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530.238647460938">
                <text:p>530.238647460938</text:p>
              </table:table-cell>
              <table:table-cell office:value-type="float" office:value="0.5729377">
                <text:p>0.5729377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530.355834960938">
                <text:p>530.355834960938</text:p>
              </table:table-cell>
              <table:table-cell office:value-type="float" office:value="0.5597949">
                <text:p>0.5597949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530.473022460938">
                <text:p>530.473022460938</text:p>
              </table:table-cell>
              <table:table-cell office:value-type="float" office:value="0.55867">
                <text:p>0.55867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530.590209960938">
                <text:p>530.590209960938</text:p>
              </table:table-cell>
              <table:table-cell office:value-type="float" office:value="0.5697798">
                <text:p>0.5697798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530.707397460938">
                <text:p>530.707397460938</text:p>
              </table:table-cell>
              <table:table-cell office:value-type="float" office:value="0.6151317">
                <text:p>0.6151317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530.824645996094">
                <text:p>530.824645996094</text:p>
              </table:table-cell>
              <table:table-cell office:value-type="float" office:value="0.5690915">
                <text:p>0.569091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530.941833496094">
                <text:p>530.941833496094</text:p>
              </table:table-cell>
              <table:table-cell office:value-type="float" office:value="0.5633631">
                <text:p>0.5633631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531.059020996094">
                <text:p>531.059020996094</text:p>
              </table:table-cell>
              <table:table-cell office:value-type="float" office:value="0.5626594">
                <text:p>0.5626594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531.17626953125">
                <text:p>531.17626953125</text:p>
              </table:table-cell>
              <table:table-cell office:value-type="float" office:value="0.5571024">
                <text:p>0.5571024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531.29345703125">
                <text:p>531.29345703125</text:p>
              </table:table-cell>
              <table:table-cell office:value-type="float" office:value="0.5560679">
                <text:p>0.5560679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531.410705566406">
                <text:p>531.410705566406</text:p>
              </table:table-cell>
              <table:table-cell office:value-type="float" office:value="0.5616004">
                <text:p>0.5616004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531.527893066406">
                <text:p>531.527893066406</text:p>
              </table:table-cell>
              <table:table-cell office:value-type="float" office:value="0.5506297">
                <text:p>0.5506297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531.645141601563">
                <text:p>531.645141601563</text:p>
              </table:table-cell>
              <table:table-cell office:value-type="float" office:value="0.5477972">
                <text:p>0.5477972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531.762329101563">
                <text:p>531.762329101563</text:p>
              </table:table-cell>
              <table:table-cell office:value-type="float" office:value="0.5464399">
                <text:p>0.5464399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531.879577636719">
                <text:p>531.879577636719</text:p>
              </table:table-cell>
              <table:table-cell office:value-type="float" office:value="0.5435821">
                <text:p>0.5435821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531.996826171875">
                <text:p>531.996826171875</text:p>
              </table:table-cell>
              <table:table-cell office:value-type="float" office:value="0.5480728">
                <text:p>0.5480728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532.114074707031">
                <text:p>532.114074707031</text:p>
              </table:table-cell>
              <table:table-cell office:value-type="float" office:value="0.5694841">
                <text:p>0.5694841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532.231323242188">
                <text:p>532.231323242188</text:p>
              </table:table-cell>
              <table:table-cell office:value-type="float" office:value="0.5452958">
                <text:p>0.5452958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532.348510742188">
                <text:p>532.348510742188</text:p>
              </table:table-cell>
              <table:table-cell office:value-type="float" office:value="0.5533699">
                <text:p>0.5533699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532.465759277344">
                <text:p>532.465759277344</text:p>
              </table:table-cell>
              <table:table-cell office:value-type="float" office:value="0.5280524">
                <text:p>0.5280524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532.583068847656">
                <text:p>532.583068847656</text:p>
              </table:table-cell>
              <table:table-cell office:value-type="float" office:value="0.5334736">
                <text:p>0.5334736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532.700317382813">
                <text:p>532.700317382813</text:p>
              </table:table-cell>
              <table:table-cell office:value-type="float" office:value="0.5352165">
                <text:p>0.535216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532.817565917969">
                <text:p>532.817565917969</text:p>
              </table:table-cell>
              <table:table-cell office:value-type="float" office:value="0.5218522">
                <text:p>0.5218522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532.934814453125">
                <text:p>532.934814453125</text:p>
              </table:table-cell>
              <table:table-cell office:value-type="float" office:value="0.5383317">
                <text:p>0.5383317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533.052062988281">
                <text:p>533.052062988281</text:p>
              </table:table-cell>
              <table:table-cell office:value-type="float" office:value="0.5229215">
                <text:p>0.5229215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533.169372558594">
                <text:p>533.169372558594</text:p>
              </table:table-cell>
              <table:table-cell office:value-type="float" office:value="0.5192475">
                <text:p>0.519247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533.28662109375">
                <text:p>533.28662109375</text:p>
              </table:table-cell>
              <table:table-cell office:value-type="float" office:value="0.5500383">
                <text:p>0.5500383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533.403869628906">
                <text:p>533.403869628906</text:p>
              </table:table-cell>
              <table:table-cell office:value-type="float" office:value="0.5199854">
                <text:p>0.5199854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533.521179199219">
                <text:p>533.521179199219</text:p>
              </table:table-cell>
              <table:table-cell office:value-type="float" office:value="0.5272602">
                <text:p>0.5272602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533.638427734375">
                <text:p>533.638427734375</text:p>
              </table:table-cell>
              <table:table-cell office:value-type="float" office:value="0.5231679">
                <text:p>0.5231679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533.755737304688">
                <text:p>533.755737304688</text:p>
              </table:table-cell>
              <table:table-cell office:value-type="float" office:value="0.5082754">
                <text:p>0.508275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533.873046875">
                <text:p>533.873046875</text:p>
              </table:table-cell>
              <table:table-cell office:value-type="float" office:value="0.5268137">
                <text:p>0.5268137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533.990295410156">
                <text:p>533.990295410156</text:p>
              </table:table-cell>
              <table:table-cell office:value-type="float" office:value="0.5203956">
                <text:p>0.520395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534.107604980469">
                <text:p>534.107604980469</text:p>
              </table:table-cell>
              <table:table-cell office:value-type="float" office:value="0.5091472">
                <text:p>0.5091472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534.224914550781">
                <text:p>534.224914550781</text:p>
              </table:table-cell>
              <table:table-cell office:value-type="float" office:value="0.5161799">
                <text:p>0.5161799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534.342224121094">
                <text:p>534.342224121094</text:p>
              </table:table-cell>
              <table:table-cell office:value-type="float" office:value="0.5046843">
                <text:p>0.5046843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534.459533691406">
                <text:p>534.459533691406</text:p>
              </table:table-cell>
              <table:table-cell office:value-type="float" office:value="0.5026435">
                <text:p>0.502643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534.576843261719">
                <text:p>534.576843261719</text:p>
              </table:table-cell>
              <table:table-cell office:value-type="float" office:value="0.5087162">
                <text:p>0.5087162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534.694152832031">
                <text:p>534.694152832031</text:p>
              </table:table-cell>
              <table:table-cell office:value-type="float" office:value="0.4942457">
                <text:p>0.4942457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534.811462402344">
                <text:p>534.811462402344</text:p>
              </table:table-cell>
              <table:table-cell office:value-type="float" office:value="0.4996507">
                <text:p>0.4996507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534.928771972656">
                <text:p>534.928771972656</text:p>
              </table:table-cell>
              <table:table-cell office:value-type="float" office:value="0.4932972">
                <text:p>0.4932972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535.046081542969">
                <text:p>535.046081542969</text:p>
              </table:table-cell>
              <table:table-cell office:value-type="float" office:value="0.4896813">
                <text:p>0.4896813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535.163452148438">
                <text:p>535.163452148438</text:p>
              </table:table-cell>
              <table:table-cell office:value-type="float" office:value="0.4999193">
                <text:p>0.4999193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535.28076171875">
                <text:p>535.28076171875</text:p>
              </table:table-cell>
              <table:table-cell office:value-type="float" office:value="0.4930434">
                <text:p>0.4930434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535.398071289063">
                <text:p>535.398071289063</text:p>
              </table:table-cell>
              <table:table-cell office:value-type="float" office:value="0.4924599">
                <text:p>0.4924599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535.515441894531">
                <text:p>535.515441894531</text:p>
              </table:table-cell>
              <table:table-cell office:value-type="float" office:value="0.4783068">
                <text:p>0.4783068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535.632751464844">
                <text:p>535.632751464844</text:p>
              </table:table-cell>
              <table:table-cell office:value-type="float" office:value="0.4833112">
                <text:p>0.4833112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535.750122070313">
                <text:p>535.750122070313</text:p>
              </table:table-cell>
              <table:table-cell office:value-type="float" office:value="0.482643">
                <text:p>0.482643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535.867431640625">
                <text:p>535.867431640625</text:p>
              </table:table-cell>
              <table:table-cell office:value-type="float" office:value="0.4906457">
                <text:p>0.4906457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535.984802246094">
                <text:p>535.984802246094</text:p>
              </table:table-cell>
              <table:table-cell office:value-type="float" office:value="0.4937208">
                <text:p>0.4937208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536.102172851563">
                <text:p>536.102172851563</text:p>
              </table:table-cell>
              <table:table-cell office:value-type="float" office:value="0.4912455">
                <text:p>0.491245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536.219543457031">
                <text:p>536.219543457031</text:p>
              </table:table-cell>
              <table:table-cell office:value-type="float" office:value="0.4794229">
                <text:p>0.4794229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536.336853027344">
                <text:p>536.336853027344</text:p>
              </table:table-cell>
              <table:table-cell office:value-type="float" office:value="0.4768151">
                <text:p>0.4768151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536.454223632813">
                <text:p>536.454223632813</text:p>
              </table:table-cell>
              <table:table-cell office:value-type="float" office:value="0.4640405">
                <text:p>0.464040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536.571594238281">
                <text:p>536.571594238281</text:p>
              </table:table-cell>
              <table:table-cell office:value-type="float" office:value="0.4679887">
                <text:p>0.4679887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536.68896484375">
                <text:p>536.68896484375</text:p>
              </table:table-cell>
              <table:table-cell office:value-type="float" office:value="0.4732978">
                <text:p>0.4732978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536.806335449219">
                <text:p>536.806335449219</text:p>
              </table:table-cell>
              <table:table-cell office:value-type="float" office:value="0.472769">
                <text:p>0.472769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536.923706054688">
                <text:p>536.923706054688</text:p>
              </table:table-cell>
              <table:table-cell office:value-type="float" office:value="0.4884091">
                <text:p>0.4884091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537.041076660156">
                <text:p>537.041076660156</text:p>
              </table:table-cell>
              <table:table-cell office:value-type="float" office:value="0.4677186">
                <text:p>0.467718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537.158508300781">
                <text:p>537.158508300781</text:p>
              </table:table-cell>
              <table:table-cell office:value-type="float" office:value="0.4680239">
                <text:p>0.4680239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537.27587890625">
                <text:p>537.27587890625</text:p>
              </table:table-cell>
              <table:table-cell office:value-type="float" office:value="0.4639948">
                <text:p>0.4639948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537.393249511719">
                <text:p>537.393249511719</text:p>
              </table:table-cell>
              <table:table-cell office:value-type="float" office:value="0.4689264">
                <text:p>0.4689264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537.510681152344">
                <text:p>537.510681152344</text:p>
              </table:table-cell>
              <table:table-cell office:value-type="float" office:value="0.4602665">
                <text:p>0.460266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537.628051757813">
                <text:p>537.628051757813</text:p>
              </table:table-cell>
              <table:table-cell office:value-type="float" office:value="0.4630053">
                <text:p>0.4630053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537.745483398438">
                <text:p>537.745483398438</text:p>
              </table:table-cell>
              <table:table-cell office:value-type="float" office:value="0.4572594">
                <text:p>0.4572594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537.862854003906">
                <text:p>537.862854003906</text:p>
              </table:table-cell>
              <table:table-cell office:value-type="float" office:value="0.4594493">
                <text:p>0.4594493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537.980285644531">
                <text:p>537.980285644531</text:p>
              </table:table-cell>
              <table:table-cell office:value-type="float" office:value="0.4448863">
                <text:p>0.4448863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538.09765625">
                <text:p>538.09765625</text:p>
              </table:table-cell>
              <table:table-cell office:value-type="float" office:value="0.485896">
                <text:p>0.485896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538.215087890625">
                <text:p>538.215087890625</text:p>
              </table:table-cell>
              <table:table-cell office:value-type="float" office:value="0.4564069">
                <text:p>0.4564069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538.33251953125">
                <text:p>538.33251953125</text:p>
              </table:table-cell>
              <table:table-cell office:value-type="float" office:value="0.4754667">
                <text:p>0.4754667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538.449890136719">
                <text:p>538.449890136719</text:p>
              </table:table-cell>
              <table:table-cell office:value-type="float" office:value="0.4535764">
                <text:p>0.4535764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538.567321777344">
                <text:p>538.567321777344</text:p>
              </table:table-cell>
              <table:table-cell office:value-type="float" office:value="0.4793584">
                <text:p>0.4793584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538.684753417969">
                <text:p>538.684753417969</text:p>
              </table:table-cell>
              <table:table-cell office:value-type="float" office:value="0.446286">
                <text:p>0.446286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538.802185058594">
                <text:p>538.802185058594</text:p>
              </table:table-cell>
              <table:table-cell office:value-type="float" office:value="0.4484912">
                <text:p>0.4484912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538.919616699219">
                <text:p>538.919616699219</text:p>
              </table:table-cell>
              <table:table-cell office:value-type="float" office:value="0.4344766">
                <text:p>0.4344766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539.037048339844">
                <text:p>539.037048339844</text:p>
              </table:table-cell>
              <table:table-cell office:value-type="float" office:value="0.4499273">
                <text:p>0.449927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539.154479980469">
                <text:p>539.154479980469</text:p>
              </table:table-cell>
              <table:table-cell office:value-type="float" office:value="0.4464478">
                <text:p>0.4464478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539.27197265625">
                <text:p>539.27197265625</text:p>
              </table:table-cell>
              <table:table-cell office:value-type="float" office:value="0.4322332">
                <text:p>0.4322332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539.389404296875">
                <text:p>539.389404296875</text:p>
              </table:table-cell>
              <table:table-cell office:value-type="float" office:value="0.4370704">
                <text:p>0.4370704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539.5068359375">
                <text:p>539.5068359375</text:p>
              </table:table-cell>
              <table:table-cell office:value-type="float" office:value="0.4363492">
                <text:p>0.4363492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539.624267578125">
                <text:p>539.624267578125</text:p>
              </table:table-cell>
              <table:table-cell office:value-type="float" office:value="0.4335936">
                <text:p>0.4335936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539.741760253906">
                <text:p>539.741760253906</text:p>
              </table:table-cell>
              <table:table-cell office:value-type="float" office:value="0.4318443">
                <text:p>0.4318443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539.859191894531">
                <text:p>539.859191894531</text:p>
              </table:table-cell>
              <table:table-cell office:value-type="float" office:value="0.423808">
                <text:p>0.423808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539.976684570313">
                <text:p>539.976684570313</text:p>
              </table:table-cell>
              <table:table-cell office:value-type="float" office:value="0.4358965">
                <text:p>0.4358965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540.094116210938">
                <text:p>540.094116210938</text:p>
              </table:table-cell>
              <table:table-cell office:value-type="float" office:value="0.4242447">
                <text:p>0.4242447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540.211608886719">
                <text:p>540.211608886719</text:p>
              </table:table-cell>
              <table:table-cell office:value-type="float" office:value="0.4203788">
                <text:p>0.4203788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540.3291015625">
                <text:p>540.3291015625</text:p>
              </table:table-cell>
              <table:table-cell office:value-type="float" office:value="0.4280301">
                <text:p>0.4280301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540.446533203125">
                <text:p>540.446533203125</text:p>
              </table:table-cell>
              <table:table-cell office:value-type="float" office:value="0.4220386">
                <text:p>0.4220386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540.564025878906">
                <text:p>540.564025878906</text:p>
              </table:table-cell>
              <table:table-cell office:value-type="float" office:value="0.4386024">
                <text:p>0.4386024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540.681518554688">
                <text:p>540.681518554688</text:p>
              </table:table-cell>
              <table:table-cell office:value-type="float" office:value="0.4204679">
                <text:p>0.4204679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540.799011230469">
                <text:p>540.799011230469</text:p>
              </table:table-cell>
              <table:table-cell office:value-type="float" office:value="0.4189366">
                <text:p>0.418936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540.91650390625">
                <text:p>540.91650390625</text:p>
              </table:table-cell>
              <table:table-cell office:value-type="float" office:value="0.4122539">
                <text:p>0.4122539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541.033996582031">
                <text:p>541.033996582031</text:p>
              </table:table-cell>
              <table:table-cell office:value-type="float" office:value="0.4188798">
                <text:p>0.4188798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541.151489257813">
                <text:p>541.151489257813</text:p>
              </table:table-cell>
              <table:table-cell office:value-type="float" office:value="0.4174715">
                <text:p>0.417471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541.268981933594">
                <text:p>541.268981933594</text:p>
              </table:table-cell>
              <table:table-cell office:value-type="float" office:value="0.4134977">
                <text:p>0.4134977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541.386474609375">
                <text:p>541.386474609375</text:p>
              </table:table-cell>
              <table:table-cell office:value-type="float" office:value="0.4240585">
                <text:p>0.4240585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541.503967285156">
                <text:p>541.503967285156</text:p>
              </table:table-cell>
              <table:table-cell office:value-type="float" office:value="0.4108228">
                <text:p>0.4108228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541.621459960938">
                <text:p>541.621459960938</text:p>
              </table:table-cell>
              <table:table-cell office:value-type="float" office:value="0.4144652">
                <text:p>0.4144652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541.739013671875">
                <text:p>541.739013671875</text:p>
              </table:table-cell>
              <table:table-cell office:value-type="float" office:value="0.4240334">
                <text:p>0.4240334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541.856506347656">
                <text:p>541.856506347656</text:p>
              </table:table-cell>
              <table:table-cell office:value-type="float" office:value="0.409454">
                <text:p>0.409454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541.974060058594">
                <text:p>541.974060058594</text:p>
              </table:table-cell>
              <table:table-cell office:value-type="float" office:value="0.3977848">
                <text:p>0.3977848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542.091552734375">
                <text:p>542.091552734375</text:p>
              </table:table-cell>
              <table:table-cell office:value-type="float" office:value="0.4105057">
                <text:p>0.4105057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542.209106445313">
                <text:p>542.209106445313</text:p>
              </table:table-cell>
              <table:table-cell office:value-type="float" office:value="0.408419">
                <text:p>0.408419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542.326599121094">
                <text:p>542.326599121094</text:p>
              </table:table-cell>
              <table:table-cell office:value-type="float" office:value="0.3997849">
                <text:p>0.3997849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542.444152832031">
                <text:p>542.444152832031</text:p>
              </table:table-cell>
              <table:table-cell office:value-type="float" office:value="0.4122601">
                <text:p>0.4122601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542.561645507813">
                <text:p>542.561645507813</text:p>
              </table:table-cell>
              <table:table-cell office:value-type="float" office:value="0.4009292">
                <text:p>0.4009292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542.67919921875">
                <text:p>542.67919921875</text:p>
              </table:table-cell>
              <table:table-cell office:value-type="float" office:value="0.3957361">
                <text:p>0.3957361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542.796752929688">
                <text:p>542.796752929688</text:p>
              </table:table-cell>
              <table:table-cell office:value-type="float" office:value="0.4104263">
                <text:p>0.4104263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542.914306640625">
                <text:p>542.914306640625</text:p>
              </table:table-cell>
              <table:table-cell office:value-type="float" office:value="0.3970796">
                <text:p>0.397079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543.031860351563">
                <text:p>543.031860351563</text:p>
              </table:table-cell>
              <table:table-cell office:value-type="float" office:value="0.4040473">
                <text:p>0.4040473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543.1494140625">
                <text:p>543.1494140625</text:p>
              </table:table-cell>
              <table:table-cell office:value-type="float" office:value="0.3846992">
                <text:p>0.3846992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543.266967773438">
                <text:p>543.266967773438</text:p>
              </table:table-cell>
              <table:table-cell office:value-type="float" office:value="0.3984292">
                <text:p>0.3984292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543.384521484375">
                <text:p>543.384521484375</text:p>
              </table:table-cell>
              <table:table-cell office:value-type="float" office:value="0.402415">
                <text:p>0.40241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543.502075195313">
                <text:p>543.502075195313</text:p>
              </table:table-cell>
              <table:table-cell office:value-type="float" office:value="0.3843717">
                <text:p>0.3843717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543.61962890625">
                <text:p>543.61962890625</text:p>
              </table:table-cell>
              <table:table-cell office:value-type="float" office:value="0.3963481">
                <text:p>0.3963481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543.737182617188">
                <text:p>543.737182617188</text:p>
              </table:table-cell>
              <table:table-cell office:value-type="float" office:value="0.3868676">
                <text:p>0.3868676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543.854736328125">
                <text:p>543.854736328125</text:p>
              </table:table-cell>
              <table:table-cell office:value-type="float" office:value="0.3848567">
                <text:p>0.3848567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543.972351074219">
                <text:p>543.972351074219</text:p>
              </table:table-cell>
              <table:table-cell office:value-type="float" office:value="0.3907699">
                <text:p>0.3907699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544.089904785156">
                <text:p>544.089904785156</text:p>
              </table:table-cell>
              <table:table-cell office:value-type="float" office:value="0.3860998">
                <text:p>0.3860998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544.207458496094">
                <text:p>544.207458496094</text:p>
              </table:table-cell>
              <table:table-cell office:value-type="float" office:value="0.3865298">
                <text:p>0.3865298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544.325073242188">
                <text:p>544.325073242188</text:p>
              </table:table-cell>
              <table:table-cell office:value-type="float" office:value="0.3932098">
                <text:p>0.3932098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544.442626953125">
                <text:p>544.442626953125</text:p>
              </table:table-cell>
              <table:table-cell office:value-type="float" office:value="0.3755174">
                <text:p>0.3755174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544.560241699219">
                <text:p>544.560241699219</text:p>
              </table:table-cell>
              <table:table-cell office:value-type="float" office:value="0.3859216">
                <text:p>0.3859216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544.677856445313">
                <text:p>544.677856445313</text:p>
              </table:table-cell>
              <table:table-cell office:value-type="float" office:value="0.3854318">
                <text:p>0.3854318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544.79541015625">
                <text:p>544.79541015625</text:p>
              </table:table-cell>
              <table:table-cell office:value-type="float" office:value="0.3840905">
                <text:p>0.3840905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544.913024902344">
                <text:p>544.913024902344</text:p>
              </table:table-cell>
              <table:table-cell office:value-type="float" office:value="0.3709594">
                <text:p>0.3709594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545.030639648438">
                <text:p>545.030639648438</text:p>
              </table:table-cell>
              <table:table-cell office:value-type="float" office:value="0.3764603">
                <text:p>0.3764603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545.148254394531">
                <text:p>545.148254394531</text:p>
              </table:table-cell>
              <table:table-cell office:value-type="float" office:value="0.3792792">
                <text:p>0.3792792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545.265869140625">
                <text:p>545.265869140625</text:p>
              </table:table-cell>
              <table:table-cell office:value-type="float" office:value="0.3793918">
                <text:p>0.3793918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545.383483886719">
                <text:p>545.383483886719</text:p>
              </table:table-cell>
              <table:table-cell office:value-type="float" office:value="0.3643982">
                <text:p>0.3643982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545.501098632813">
                <text:p>545.501098632813</text:p>
              </table:table-cell>
              <table:table-cell office:value-type="float" office:value="0.3756191">
                <text:p>0.3756191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545.618713378906">
                <text:p>545.618713378906</text:p>
              </table:table-cell>
              <table:table-cell office:value-type="float" office:value="0.3785613">
                <text:p>0.3785613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545.736328125">
                <text:p>545.736328125</text:p>
              </table:table-cell>
              <table:table-cell office:value-type="float" office:value="0.3780769">
                <text:p>0.3780769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545.853942871094">
                <text:p>545.853942871094</text:p>
              </table:table-cell>
              <table:table-cell office:value-type="float" office:value="0.3708556">
                <text:p>0.3708556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545.971557617188">
                <text:p>545.971557617188</text:p>
              </table:table-cell>
              <table:table-cell office:value-type="float" office:value="0.3809606">
                <text:p>0.3809606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546.089172363281">
                <text:p>546.089172363281</text:p>
              </table:table-cell>
              <table:table-cell office:value-type="float" office:value="0.3809612">
                <text:p>0.3809612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546.206848144531">
                <text:p>546.206848144531</text:p>
              </table:table-cell>
              <table:table-cell office:value-type="float" office:value="0.3803657">
                <text:p>0.3803657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546.324462890625">
                <text:p>546.324462890625</text:p>
              </table:table-cell>
              <table:table-cell office:value-type="float" office:value="0.3631926">
                <text:p>0.3631926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546.442077636719">
                <text:p>546.442077636719</text:p>
              </table:table-cell>
              <table:table-cell office:value-type="float" office:value="0.3713338">
                <text:p>0.3713338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546.559753417969">
                <text:p>546.559753417969</text:p>
              </table:table-cell>
              <table:table-cell office:value-type="float" office:value="0.3721781">
                <text:p>0.3721781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546.677368164063">
                <text:p>546.677368164063</text:p>
              </table:table-cell>
              <table:table-cell office:value-type="float" office:value="0.365822">
                <text:p>0.365822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546.795043945313">
                <text:p>546.795043945313</text:p>
              </table:table-cell>
              <table:table-cell office:value-type="float" office:value="0.3644091">
                <text:p>0.3644091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546.912719726563">
                <text:p>546.912719726563</text:p>
              </table:table-cell>
              <table:table-cell office:value-type="float" office:value="0.3689085">
                <text:p>0.3689085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547.030334472656">
                <text:p>547.030334472656</text:p>
              </table:table-cell>
              <table:table-cell office:value-type="float" office:value="0.3616107">
                <text:p>0.3616107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547.148010253906">
                <text:p>547.148010253906</text:p>
              </table:table-cell>
              <table:table-cell office:value-type="float" office:value="0.3649118">
                <text:p>0.3649118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547.265686035156">
                <text:p>547.265686035156</text:p>
              </table:table-cell>
              <table:table-cell office:value-type="float" office:value="0.3658774">
                <text:p>0.3658774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547.383361816406">
                <text:p>547.383361816406</text:p>
              </table:table-cell>
              <table:table-cell office:value-type="float" office:value="0.3629646">
                <text:p>0.3629646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547.5009765625">
                <text:p>547.5009765625</text:p>
              </table:table-cell>
              <table:table-cell office:value-type="float" office:value="0.3514262">
                <text:p>0.3514262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547.61865234375">
                <text:p>547.61865234375</text:p>
              </table:table-cell>
              <table:table-cell office:value-type="float" office:value="0.3596687">
                <text:p>0.3596687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547.736328125">
                <text:p>547.736328125</text:p>
              </table:table-cell>
              <table:table-cell office:value-type="float" office:value="0.3592068">
                <text:p>0.3592068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547.85400390625">
                <text:p>547.85400390625</text:p>
              </table:table-cell>
              <table:table-cell office:value-type="float" office:value="0.3520518">
                <text:p>0.352051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547.971740722656">
                <text:p>547.971740722656</text:p>
              </table:table-cell>
              <table:table-cell office:value-type="float" office:value="0.3411463">
                <text:p>0.341146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548.089416503906">
                <text:p>548.089416503906</text:p>
              </table:table-cell>
              <table:table-cell office:value-type="float" office:value="0.3455602">
                <text:p>0.3455602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548.207092285156">
                <text:p>548.207092285156</text:p>
              </table:table-cell>
              <table:table-cell office:value-type="float" office:value="0.3599024">
                <text:p>0.3599024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548.324768066406">
                <text:p>548.324768066406</text:p>
              </table:table-cell>
              <table:table-cell office:value-type="float" office:value="0.3419139">
                <text:p>0.3419139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48.442443847656">
                <text:p>548.442443847656</text:p>
              </table:table-cell>
              <table:table-cell office:value-type="float" office:value="0.3566217">
                <text:p>0.3566217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48.560180664063">
                <text:p>548.560180664063</text:p>
              </table:table-cell>
              <table:table-cell office:value-type="float" office:value="0.3458174">
                <text:p>0.3458174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48.677856445313">
                <text:p>548.677856445313</text:p>
              </table:table-cell>
              <table:table-cell office:value-type="float" office:value="0.3544656">
                <text:p>0.354465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48.795593261719">
                <text:p>548.795593261719</text:p>
              </table:table-cell>
              <table:table-cell office:value-type="float" office:value="0.3440519">
                <text:p>0.3440519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48.913269042969">
                <text:p>548.913269042969</text:p>
              </table:table-cell>
              <table:table-cell office:value-type="float" office:value="0.3391181">
                <text:p>0.3391181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49.031005859375">
                <text:p>549.031005859375</text:p>
              </table:table-cell>
              <table:table-cell office:value-type="float" office:value="0.345108">
                <text:p>0.34510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49.148681640625">
                <text:p>549.148681640625</text:p>
              </table:table-cell>
              <table:table-cell office:value-type="float" office:value="0.3398114">
                <text:p>0.3398114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49.266418457031">
                <text:p>549.266418457031</text:p>
              </table:table-cell>
              <table:table-cell office:value-type="float" office:value="0.3486201">
                <text:p>0.3486201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49.384155273438">
                <text:p>549.384155273438</text:p>
              </table:table-cell>
              <table:table-cell office:value-type="float" office:value="0.3432336">
                <text:p>0.3432336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49.501831054688">
                <text:p>549.501831054688</text:p>
              </table:table-cell>
              <table:table-cell office:value-type="float" office:value="0.3444112">
                <text:p>0.3444112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49.619567871094">
                <text:p>549.619567871094</text:p>
              </table:table-cell>
              <table:table-cell office:value-type="float" office:value="0.3537392">
                <text:p>0.3537392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49.7373046875">
                <text:p>549.7373046875</text:p>
              </table:table-cell>
              <table:table-cell office:value-type="float" office:value="0.3466685">
                <text:p>0.346668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49.855041503906">
                <text:p>549.855041503906</text:p>
              </table:table-cell>
              <table:table-cell office:value-type="float" office:value="0.3406323">
                <text:p>0.3406323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49.972778320313">
                <text:p>549.972778320313</text:p>
              </table:table-cell>
              <table:table-cell office:value-type="float" office:value="0.3429173">
                <text:p>0.3429173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550.090515136719">
                <text:p>550.090515136719</text:p>
              </table:table-cell>
              <table:table-cell office:value-type="float" office:value="0.3278623">
                <text:p>0.3278623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550.208251953125">
                <text:p>550.208251953125</text:p>
              </table:table-cell>
              <table:table-cell office:value-type="float" office:value="0.3368399">
                <text:p>0.3368399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550.325988769531">
                <text:p>550.325988769531</text:p>
              </table:table-cell>
              <table:table-cell office:value-type="float" office:value="0.3291351">
                <text:p>0.3291351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550.443725585938">
                <text:p>550.443725585938</text:p>
              </table:table-cell>
              <table:table-cell office:value-type="float" office:value="0.3329576">
                <text:p>0.3329576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550.561462402344">
                <text:p>550.561462402344</text:p>
              </table:table-cell>
              <table:table-cell office:value-type="float" office:value="0.3411712">
                <text:p>0.3411712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550.679260253906">
                <text:p>550.679260253906</text:p>
              </table:table-cell>
              <table:table-cell office:value-type="float" office:value="0.3361765">
                <text:p>0.3361765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50.796997070313">
                <text:p>550.796997070313</text:p>
              </table:table-cell>
              <table:table-cell office:value-type="float" office:value="0.3301646">
                <text:p>0.3301646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550.914733886719">
                <text:p>550.914733886719</text:p>
              </table:table-cell>
              <table:table-cell office:value-type="float" office:value="0.3317557">
                <text:p>0.3317557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51.032531738281">
                <text:p>551.032531738281</text:p>
              </table:table-cell>
              <table:table-cell office:value-type="float" office:value="0.3249404">
                <text:p>0.3249404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551.150268554688">
                <text:p>551.150268554688</text:p>
              </table:table-cell>
              <table:table-cell office:value-type="float" office:value="0.3311611">
                <text:p>0.3311611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551.26806640625">
                <text:p>551.26806640625</text:p>
              </table:table-cell>
              <table:table-cell office:value-type="float" office:value="0.3175229">
                <text:p>0.3175229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551.385803222656">
                <text:p>551.385803222656</text:p>
              </table:table-cell>
              <table:table-cell office:value-type="float" office:value="0.3307507">
                <text:p>0.3307507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551.503601074219">
                <text:p>551.503601074219</text:p>
              </table:table-cell>
              <table:table-cell office:value-type="float" office:value="0.3168553">
                <text:p>0.3168553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551.621398925781">
                <text:p>551.621398925781</text:p>
              </table:table-cell>
              <table:table-cell office:value-type="float" office:value="0.3391012">
                <text:p>0.3391012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551.739135742188">
                <text:p>551.739135742188</text:p>
              </table:table-cell>
              <table:table-cell office:value-type="float" office:value="0.320759">
                <text:p>0.320759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551.85693359375">
                <text:p>551.85693359375</text:p>
              </table:table-cell>
              <table:table-cell office:value-type="float" office:value="0.3145615">
                <text:p>0.3145615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551.974731445313">
                <text:p>551.974731445313</text:p>
              </table:table-cell>
              <table:table-cell office:value-type="float" office:value="0.325177">
                <text:p>0.325177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552.092529296875">
                <text:p>552.092529296875</text:p>
              </table:table-cell>
              <table:table-cell office:value-type="float" office:value="0.3152072">
                <text:p>0.3152072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552.210327148438">
                <text:p>552.210327148438</text:p>
              </table:table-cell>
              <table:table-cell office:value-type="float" office:value="0.3307546">
                <text:p>0.3307546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552.328125">
                <text:p>552.328125</text:p>
              </table:table-cell>
              <table:table-cell office:value-type="float" office:value="0.3185687">
                <text:p>0.3185687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552.445922851563">
                <text:p>552.445922851563</text:p>
              </table:table-cell>
              <table:table-cell office:value-type="float" office:value="0.3191857">
                <text:p>0.3191857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552.563720703125">
                <text:p>552.563720703125</text:p>
              </table:table-cell>
              <table:table-cell office:value-type="float" office:value="0.3302363">
                <text:p>0.3302363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552.681518554688">
                <text:p>552.681518554688</text:p>
              </table:table-cell>
              <table:table-cell office:value-type="float" office:value="0.3123706">
                <text:p>0.3123706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552.79931640625">
                <text:p>552.79931640625</text:p>
              </table:table-cell>
              <table:table-cell office:value-type="float" office:value="0.3121318">
                <text:p>0.3121318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552.917114257813">
                <text:p>552.917114257813</text:p>
              </table:table-cell>
              <table:table-cell office:value-type="float" office:value="0.3115925">
                <text:p>0.3115925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553.034973144531">
                <text:p>553.034973144531</text:p>
              </table:table-cell>
              <table:table-cell office:value-type="float" office:value="0.3115755">
                <text:p>0.3115755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553.152770996094">
                <text:p>553.152770996094</text:p>
              </table:table-cell>
              <table:table-cell office:value-type="float" office:value="0.3152109">
                <text:p>0.3152109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553.270568847656">
                <text:p>553.270568847656</text:p>
              </table:table-cell>
              <table:table-cell office:value-type="float" office:value="0.3288419">
                <text:p>0.3288419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553.388427734375">
                <text:p>553.388427734375</text:p>
              </table:table-cell>
              <table:table-cell office:value-type="float" office:value="0.3030845">
                <text:p>0.303084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553.506225585938">
                <text:p>553.506225585938</text:p>
              </table:table-cell>
              <table:table-cell office:value-type="float" office:value="0.3198376">
                <text:p>0.3198376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553.624084472656">
                <text:p>553.624084472656</text:p>
              </table:table-cell>
              <table:table-cell office:value-type="float" office:value="0.3102227">
                <text:p>0.3102227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553.741882324219">
                <text:p>553.741882324219</text:p>
              </table:table-cell>
              <table:table-cell office:value-type="float" office:value="0.3029155">
                <text:p>0.3029155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553.859741210938">
                <text:p>553.859741210938</text:p>
              </table:table-cell>
              <table:table-cell office:value-type="float" office:value="0.2958299">
                <text:p>0.2958299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553.977600097656">
                <text:p>553.977600097656</text:p>
              </table:table-cell>
              <table:table-cell office:value-type="float" office:value="0.3050215">
                <text:p>0.3050215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554.095458984375">
                <text:p>554.095458984375</text:p>
              </table:table-cell>
              <table:table-cell office:value-type="float" office:value="0.3020072">
                <text:p>0.3020072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554.213256835938">
                <text:p>554.213256835938</text:p>
              </table:table-cell>
              <table:table-cell office:value-type="float" office:value="0.3209828">
                <text:p>0.3209828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554.331115722656">
                <text:p>554.331115722656</text:p>
              </table:table-cell>
              <table:table-cell office:value-type="float" office:value="0.3047943">
                <text:p>0.3047943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554.448974609375">
                <text:p>554.448974609375</text:p>
              </table:table-cell>
              <table:table-cell office:value-type="float" office:value="0.2998633">
                <text:p>0.2998633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554.566833496094">
                <text:p>554.566833496094</text:p>
              </table:table-cell>
              <table:table-cell office:value-type="float" office:value="0.3019133">
                <text:p>0.3019133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554.684692382813">
                <text:p>554.684692382813</text:p>
              </table:table-cell>
              <table:table-cell office:value-type="float" office:value="0.293844">
                <text:p>0.293844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554.802551269531">
                <text:p>554.802551269531</text:p>
              </table:table-cell>
              <table:table-cell office:value-type="float" office:value="0.2943809">
                <text:p>0.2943809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554.92041015625">
                <text:p>554.92041015625</text:p>
              </table:table-cell>
              <table:table-cell office:value-type="float" office:value="0.2909768">
                <text:p>0.2909768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55.038269042969">
                <text:p>555.038269042969</text:p>
              </table:table-cell>
              <table:table-cell office:value-type="float" office:value="0.2970104">
                <text:p>0.2970104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555.156127929688">
                <text:p>555.156127929688</text:p>
              </table:table-cell>
              <table:table-cell office:value-type="float" office:value="0.294219">
                <text:p>0.294219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555.274047851563">
                <text:p>555.274047851563</text:p>
              </table:table-cell>
              <table:table-cell office:value-type="float" office:value="0.2961877">
                <text:p>0.2961877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555.391906738281">
                <text:p>555.391906738281</text:p>
              </table:table-cell>
              <table:table-cell office:value-type="float" office:value="0.2953588">
                <text:p>0.2953588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555.509765625">
                <text:p>555.509765625</text:p>
              </table:table-cell>
              <table:table-cell office:value-type="float" office:value="0.2957258">
                <text:p>0.2957258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555.627685546875">
                <text:p>555.627685546875</text:p>
              </table:table-cell>
              <table:table-cell office:value-type="float" office:value="0.3015563">
                <text:p>0.3015563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555.745544433594">
                <text:p>555.745544433594</text:p>
              </table:table-cell>
              <table:table-cell office:value-type="float" office:value="0.2978888">
                <text:p>0.2978888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555.863403320313">
                <text:p>555.863403320313</text:p>
              </table:table-cell>
              <table:table-cell office:value-type="float" office:value="0.285003">
                <text:p>0.285003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555.981323242188">
                <text:p>555.981323242188</text:p>
              </table:table-cell>
              <table:table-cell office:value-type="float" office:value="0.2906388">
                <text:p>0.2906388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556.099243164063">
                <text:p>556.099243164063</text:p>
              </table:table-cell>
              <table:table-cell office:value-type="float" office:value="0.2829216">
                <text:p>0.2829216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556.217102050781">
                <text:p>556.217102050781</text:p>
              </table:table-cell>
              <table:table-cell office:value-type="float" office:value="0.2985778">
                <text:p>0.2985778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556.335021972656">
                <text:p>556.335021972656</text:p>
              </table:table-cell>
              <table:table-cell office:value-type="float" office:value="0.2981301">
                <text:p>0.2981301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556.452941894531">
                <text:p>556.452941894531</text:p>
              </table:table-cell>
              <table:table-cell office:value-type="float" office:value="0.2896759">
                <text:p>0.2896759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556.57080078125">
                <text:p>556.57080078125</text:p>
              </table:table-cell>
              <table:table-cell office:value-type="float" office:value="0.2860537">
                <text:p>0.2860537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556.688720703125">
                <text:p>556.688720703125</text:p>
              </table:table-cell>
              <table:table-cell office:value-type="float" office:value="0.2830435">
                <text:p>0.2830435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556.806640625">
                <text:p>556.806640625</text:p>
              </table:table-cell>
              <table:table-cell office:value-type="float" office:value="0.2831566">
                <text:p>0.2831566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556.924560546875">
                <text:p>556.924560546875</text:p>
              </table:table-cell>
              <table:table-cell office:value-type="float" office:value="0.2887267">
                <text:p>0.2887267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57.04248046875">
                <text:p>557.04248046875</text:p>
              </table:table-cell>
              <table:table-cell office:value-type="float" office:value="0.2825125">
                <text:p>0.282512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557.160400390625">
                <text:p>557.160400390625</text:p>
              </table:table-cell>
              <table:table-cell office:value-type="float" office:value="0.2745301">
                <text:p>0.2745301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557.2783203125">
                <text:p>557.2783203125</text:p>
              </table:table-cell>
              <table:table-cell office:value-type="float" office:value="0.2957539">
                <text:p>0.2957539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557.396240234375">
                <text:p>557.396240234375</text:p>
              </table:table-cell>
              <table:table-cell office:value-type="float" office:value="0.2796325">
                <text:p>0.2796325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557.51416015625">
                <text:p>557.51416015625</text:p>
              </table:table-cell>
              <table:table-cell office:value-type="float" office:value="0.268897">
                <text:p>0.268897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557.632141113281">
                <text:p>557.632141113281</text:p>
              </table:table-cell>
              <table:table-cell office:value-type="float" office:value="0.2790405">
                <text:p>0.279040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557.750061035156">
                <text:p>557.750061035156</text:p>
              </table:table-cell>
              <table:table-cell office:value-type="float" office:value="0.2755916">
                <text:p>0.2755916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557.867980957031">
                <text:p>557.867980957031</text:p>
              </table:table-cell>
              <table:table-cell office:value-type="float" office:value="0.2755206">
                <text:p>0.2755206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557.985961914063">
                <text:p>557.985961914063</text:p>
              </table:table-cell>
              <table:table-cell office:value-type="float" office:value="0.2636062">
                <text:p>0.2636062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558.103881835938">
                <text:p>558.103881835938</text:p>
              </table:table-cell>
              <table:table-cell office:value-type="float" office:value="0.267273">
                <text:p>0.267273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558.221801757813">
                <text:p>558.221801757813</text:p>
              </table:table-cell>
              <table:table-cell office:value-type="float" office:value="0.2688213">
                <text:p>0.2688213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558.339782714844">
                <text:p>558.339782714844</text:p>
              </table:table-cell>
              <table:table-cell office:value-type="float" office:value="0.2780883">
                <text:p>0.2780883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558.457702636719">
                <text:p>558.457702636719</text:p>
              </table:table-cell>
              <table:table-cell office:value-type="float" office:value="0.2672153">
                <text:p>0.2672153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558.57568359375">
                <text:p>558.57568359375</text:p>
              </table:table-cell>
              <table:table-cell office:value-type="float" office:value="0.2713942">
                <text:p>0.2713942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558.693664550781">
                <text:p>558.693664550781</text:p>
              </table:table-cell>
              <table:table-cell office:value-type="float" office:value="0.2715327">
                <text:p>0.2715327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558.811584472656">
                <text:p>558.811584472656</text:p>
              </table:table-cell>
              <table:table-cell office:value-type="float" office:value="0.2749693">
                <text:p>0.2749693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558.929565429688">
                <text:p>558.929565429688</text:p>
              </table:table-cell>
              <table:table-cell office:value-type="float" office:value="0.2632169">
                <text:p>0.2632169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559.047546386719">
                <text:p>559.047546386719</text:p>
              </table:table-cell>
              <table:table-cell office:value-type="float" office:value="0.2691064">
                <text:p>0.2691064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559.16552734375">
                <text:p>559.16552734375</text:p>
              </table:table-cell>
              <table:table-cell office:value-type="float" office:value="0.2669894">
                <text:p>0.2669894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559.283508300781">
                <text:p>559.283508300781</text:p>
              </table:table-cell>
              <table:table-cell office:value-type="float" office:value="0.2635239">
                <text:p>0.2635239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559.401489257813">
                <text:p>559.401489257813</text:p>
              </table:table-cell>
              <table:table-cell office:value-type="float" office:value="0.2693569">
                <text:p>0.2693569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559.519470214844">
                <text:p>559.519470214844</text:p>
              </table:table-cell>
              <table:table-cell office:value-type="float" office:value="0.252246">
                <text:p>0.252246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559.637451171875">
                <text:p>559.637451171875</text:p>
              </table:table-cell>
              <table:table-cell office:value-type="float" office:value="0.2641432">
                <text:p>0.2641432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559.755432128906">
                <text:p>559.755432128906</text:p>
              </table:table-cell>
              <table:table-cell office:value-type="float" office:value="0.2685712">
                <text:p>0.2685712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559.873413085938">
                <text:p>559.873413085938</text:p>
              </table:table-cell>
              <table:table-cell office:value-type="float" office:value="0.2580257">
                <text:p>0.2580257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559.991394042969">
                <text:p>559.991394042969</text:p>
              </table:table-cell>
              <table:table-cell office:value-type="float" office:value="0.2632634">
                <text:p>0.2632634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560.109375">
                <text:p>560.109375</text:p>
              </table:table-cell>
              <table:table-cell office:value-type="float" office:value="0.2616641">
                <text:p>0.2616641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560.227416992188">
                <text:p>560.227416992188</text:p>
              </table:table-cell>
              <table:table-cell office:value-type="float" office:value="0.2556196">
                <text:p>0.2556196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560.345397949219">
                <text:p>560.345397949219</text:p>
              </table:table-cell>
              <table:table-cell office:value-type="float" office:value="0.249011">
                <text:p>0.249011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560.46337890625">
                <text:p>560.46337890625</text:p>
              </table:table-cell>
              <table:table-cell office:value-type="float" office:value="0.2617036">
                <text:p>0.2617036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560.581420898438">
                <text:p>560.581420898438</text:p>
              </table:table-cell>
              <table:table-cell office:value-type="float" office:value="0.2780519">
                <text:p>0.2780519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560.699401855469">
                <text:p>560.699401855469</text:p>
              </table:table-cell>
              <table:table-cell office:value-type="float" office:value="0.24687">
                <text:p>0.24687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560.817443847656">
                <text:p>560.817443847656</text:p>
              </table:table-cell>
              <table:table-cell office:value-type="float" office:value="0.2481938">
                <text:p>0.2481938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560.935424804688">
                <text:p>560.935424804688</text:p>
              </table:table-cell>
              <table:table-cell office:value-type="float" office:value="0.2583811">
                <text:p>0.2583811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561.053466796875">
                <text:p>561.053466796875</text:p>
              </table:table-cell>
              <table:table-cell office:value-type="float" office:value="0.2532411">
                <text:p>0.2532411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561.171508789063">
                <text:p>561.171508789063</text:p>
              </table:table-cell>
              <table:table-cell office:value-type="float" office:value="0.2478066">
                <text:p>0.2478066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561.289489746094">
                <text:p>561.289489746094</text:p>
              </table:table-cell>
              <table:table-cell office:value-type="float" office:value="0.2542126">
                <text:p>0.2542126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561.407531738281">
                <text:p>561.407531738281</text:p>
              </table:table-cell>
              <table:table-cell office:value-type="float" office:value="0.2470478">
                <text:p>0.2470478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561.525573730469">
                <text:p>561.525573730469</text:p>
              </table:table-cell>
              <table:table-cell office:value-type="float" office:value="0.2595237">
                <text:p>0.2595237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561.643615722656">
                <text:p>561.643615722656</text:p>
              </table:table-cell>
              <table:table-cell office:value-type="float" office:value="0.2442613">
                <text:p>0.2442613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561.761657714844">
                <text:p>561.761657714844</text:p>
              </table:table-cell>
              <table:table-cell office:value-type="float" office:value="0.235454">
                <text:p>0.235454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561.879699707031">
                <text:p>561.879699707031</text:p>
              </table:table-cell>
              <table:table-cell office:value-type="float" office:value="0.2556013">
                <text:p>0.2556013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561.997741699219">
                <text:p>561.997741699219</text:p>
              </table:table-cell>
              <table:table-cell office:value-type="float" office:value="0.2608826">
                <text:p>0.2608826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62.115783691406">
                <text:p>562.115783691406</text:p>
              </table:table-cell>
              <table:table-cell office:value-type="float" office:value="0.239038">
                <text:p>0.239038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62.233825683594">
                <text:p>562.233825683594</text:p>
              </table:table-cell>
              <table:table-cell office:value-type="float" office:value="0.251357">
                <text:p>0.251357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62.351867675781">
                <text:p>562.351867675781</text:p>
              </table:table-cell>
              <table:table-cell office:value-type="float" office:value="0.2480763">
                <text:p>0.2480763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62.469909667969">
                <text:p>562.469909667969</text:p>
              </table:table-cell>
              <table:table-cell office:value-type="float" office:value="0.2448906">
                <text:p>0.2448906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562.588012695313">
                <text:p>562.588012695313</text:p>
              </table:table-cell>
              <table:table-cell office:value-type="float" office:value="0.2433425">
                <text:p>0.2433425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562.7060546875">
                <text:p>562.7060546875</text:p>
              </table:table-cell>
              <table:table-cell office:value-type="float" office:value="0.2305086">
                <text:p>0.2305086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562.824096679688">
                <text:p>562.824096679688</text:p>
              </table:table-cell>
              <table:table-cell office:value-type="float" office:value="0.2348703">
                <text:p>0.2348703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562.942199707031">
                <text:p>562.942199707031</text:p>
              </table:table-cell>
              <table:table-cell office:value-type="float" office:value="0.2321169">
                <text:p>0.2321169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563.060241699219">
                <text:p>563.060241699219</text:p>
              </table:table-cell>
              <table:table-cell office:value-type="float" office:value="0.241173">
                <text:p>0.241173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563.178344726563">
                <text:p>563.178344726563</text:p>
              </table:table-cell>
              <table:table-cell office:value-type="float" office:value="0.2502623">
                <text:p>0.2502623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563.29638671875">
                <text:p>563.29638671875</text:p>
              </table:table-cell>
              <table:table-cell office:value-type="float" office:value="0.2291837">
                <text:p>0.2291837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563.414489746094">
                <text:p>563.414489746094</text:p>
              </table:table-cell>
              <table:table-cell office:value-type="float" office:value="0.2392017">
                <text:p>0.2392017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563.532531738281">
                <text:p>563.532531738281</text:p>
              </table:table-cell>
              <table:table-cell office:value-type="float" office:value="0.250047">
                <text:p>0.250047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563.650634765625">
                <text:p>563.650634765625</text:p>
              </table:table-cell>
              <table:table-cell office:value-type="float" office:value="0.2265497">
                <text:p>0.2265497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563.768737792969">
                <text:p>563.768737792969</text:p>
              </table:table-cell>
              <table:table-cell office:value-type="float" office:value="0.2267321">
                <text:p>0.2267321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563.886779785156">
                <text:p>563.886779785156</text:p>
              </table:table-cell>
              <table:table-cell office:value-type="float" office:value="0.2339675">
                <text:p>0.2339675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564.0048828125">
                <text:p>564.0048828125</text:p>
              </table:table-cell>
              <table:table-cell office:value-type="float" office:value="0.2280401">
                <text:p>0.2280401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564.122985839844">
                <text:p>564.122985839844</text:p>
              </table:table-cell>
              <table:table-cell office:value-type="float" office:value="0.2190899">
                <text:p>0.2190899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564.241088867188">
                <text:p>564.241088867188</text:p>
              </table:table-cell>
              <table:table-cell office:value-type="float" office:value="0.2377494">
                <text:p>0.2377494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564.359191894531">
                <text:p>564.359191894531</text:p>
              </table:table-cell>
              <table:table-cell office:value-type="float" office:value="0.235564">
                <text:p>0.235564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564.477294921875">
                <text:p>564.477294921875</text:p>
              </table:table-cell>
              <table:table-cell office:value-type="float" office:value="0.2289011">
                <text:p>0.2289011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564.595397949219">
                <text:p>564.595397949219</text:p>
              </table:table-cell>
              <table:table-cell office:value-type="float" office:value="0.2350833">
                <text:p>0.2350833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564.713500976563">
                <text:p>564.713500976563</text:p>
              </table:table-cell>
              <table:table-cell office:value-type="float" office:value="0.2575326">
                <text:p>0.2575326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564.831604003906">
                <text:p>564.831604003906</text:p>
              </table:table-cell>
              <table:table-cell office:value-type="float" office:value="0.2260334">
                <text:p>0.2260334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564.949768066406">
                <text:p>564.949768066406</text:p>
              </table:table-cell>
              <table:table-cell office:value-type="float" office:value="0.2281979">
                <text:p>0.2281979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565.06787109375">
                <text:p>565.06787109375</text:p>
              </table:table-cell>
              <table:table-cell office:value-type="float" office:value="0.2343381">
                <text:p>0.2343381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565.185974121094">
                <text:p>565.185974121094</text:p>
              </table:table-cell>
              <table:table-cell office:value-type="float" office:value="0.2271672">
                <text:p>0.2271672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565.304077148438">
                <text:p>565.304077148438</text:p>
              </table:table-cell>
              <table:table-cell office:value-type="float" office:value="0.2147461">
                <text:p>0.2147461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565.422241210938">
                <text:p>565.422241210938</text:p>
              </table:table-cell>
              <table:table-cell office:value-type="float" office:value="0.2218865">
                <text:p>0.2218865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565.540344238281">
                <text:p>565.540344238281</text:p>
              </table:table-cell>
              <table:table-cell office:value-type="float" office:value="0.2150146">
                <text:p>0.2150146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565.658508300781">
                <text:p>565.658508300781</text:p>
              </table:table-cell>
              <table:table-cell office:value-type="float" office:value="0.2262326">
                <text:p>0.2262326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565.776611328125">
                <text:p>565.776611328125</text:p>
              </table:table-cell>
              <table:table-cell office:value-type="float" office:value="0.2220432">
                <text:p>0.2220432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565.894775390625">
                <text:p>565.894775390625</text:p>
              </table:table-cell>
              <table:table-cell office:value-type="float" office:value="0.2333891">
                <text:p>0.2333891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566.012878417969">
                <text:p>566.012878417969</text:p>
              </table:table-cell>
              <table:table-cell office:value-type="float" office:value="0.2211181">
                <text:p>0.2211181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566.131042480469">
                <text:p>566.131042480469</text:p>
              </table:table-cell>
              <table:table-cell office:value-type="float" office:value="0.2166217">
                <text:p>0.2166217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566.249206542969">
                <text:p>566.249206542969</text:p>
              </table:table-cell>
              <table:table-cell office:value-type="float" office:value="0.2190716">
                <text:p>0.2190716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566.367370605469">
                <text:p>566.367370605469</text:p>
              </table:table-cell>
              <table:table-cell office:value-type="float" office:value="0.2225462">
                <text:p>0.2225462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566.485473632813">
                <text:p>566.485473632813</text:p>
              </table:table-cell>
              <table:table-cell office:value-type="float" office:value="0.209214">
                <text:p>0.209214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566.603637695313">
                <text:p>566.603637695313</text:p>
              </table:table-cell>
              <table:table-cell office:value-type="float" office:value="0.2339064">
                <text:p>0.2339064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566.721801757813">
                <text:p>566.721801757813</text:p>
              </table:table-cell>
              <table:table-cell office:value-type="float" office:value="0.218739">
                <text:p>0.218739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566.839965820313">
                <text:p>566.839965820313</text:p>
              </table:table-cell>
              <table:table-cell office:value-type="float" office:value="0.2115275">
                <text:p>0.211527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566.958129882813">
                <text:p>566.958129882813</text:p>
              </table:table-cell>
              <table:table-cell office:value-type="float" office:value="0.2167654">
                <text:p>0.2167654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567.076293945313">
                <text:p>567.076293945313</text:p>
              </table:table-cell>
              <table:table-cell office:value-type="float" office:value="0.2296504">
                <text:p>0.2296504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567.194458007813">
                <text:p>567.194458007813</text:p>
              </table:table-cell>
              <table:table-cell office:value-type="float" office:value="0.2196274">
                <text:p>0.2196274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567.312622070313">
                <text:p>567.312622070313</text:p>
              </table:table-cell>
              <table:table-cell office:value-type="float" office:value="0.2131392">
                <text:p>0.2131392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567.430847167969">
                <text:p>567.430847167969</text:p>
              </table:table-cell>
              <table:table-cell office:value-type="float" office:value="0.2076963">
                <text:p>0.2076963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567.549011230469">
                <text:p>567.549011230469</text:p>
              </table:table-cell>
              <table:table-cell office:value-type="float" office:value="0.2212806">
                <text:p>0.2212806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567.667175292969">
                <text:p>567.667175292969</text:p>
              </table:table-cell>
              <table:table-cell office:value-type="float" office:value="0.2117025">
                <text:p>0.211702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567.785339355469">
                <text:p>567.785339355469</text:p>
              </table:table-cell>
              <table:table-cell office:value-type="float" office:value="0.2139039">
                <text:p>0.2139039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567.903564453125">
                <text:p>567.903564453125</text:p>
              </table:table-cell>
              <table:table-cell office:value-type="float" office:value="0.2057011">
                <text:p>0.2057011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568.021728515625">
                <text:p>568.021728515625</text:p>
              </table:table-cell>
              <table:table-cell office:value-type="float" office:value="0.2288975">
                <text:p>0.2288975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568.139953613281">
                <text:p>568.139953613281</text:p>
              </table:table-cell>
              <table:table-cell office:value-type="float" office:value="0.2301091">
                <text:p>0.2301091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568.258117675781">
                <text:p>568.258117675781</text:p>
              </table:table-cell>
              <table:table-cell office:value-type="float" office:value="0.1987041">
                <text:p>0.1987041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568.376342773438">
                <text:p>568.376342773438</text:p>
              </table:table-cell>
              <table:table-cell office:value-type="float" office:value="0.2025083">
                <text:p>0.2025083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568.494506835938">
                <text:p>568.494506835938</text:p>
              </table:table-cell>
              <table:table-cell office:value-type="float" office:value="0.2131323">
                <text:p>0.2131323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568.612731933594">
                <text:p>568.612731933594</text:p>
              </table:table-cell>
              <table:table-cell office:value-type="float" office:value="0.2126555">
                <text:p>0.212655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568.73095703125">
                <text:p>568.73095703125</text:p>
              </table:table-cell>
              <table:table-cell office:value-type="float" office:value="0.1876783">
                <text:p>0.1876783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568.84912109375">
                <text:p>568.84912109375</text:p>
              </table:table-cell>
              <table:table-cell office:value-type="float" office:value="0.2050818">
                <text:p>0.2050818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568.967346191406">
                <text:p>568.967346191406</text:p>
              </table:table-cell>
              <table:table-cell office:value-type="float" office:value="0.2078826">
                <text:p>0.2078826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569.085571289063">
                <text:p>569.085571289063</text:p>
              </table:table-cell>
              <table:table-cell office:value-type="float" office:value="0.2192802">
                <text:p>0.2192802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569.203796386719">
                <text:p>569.203796386719</text:p>
              </table:table-cell>
              <table:table-cell office:value-type="float" office:value="0.1868061">
                <text:p>0.1868061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569.322021484375">
                <text:p>569.322021484375</text:p>
              </table:table-cell>
              <table:table-cell office:value-type="float" office:value="0.2009549">
                <text:p>0.2009549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569.440246582031">
                <text:p>569.440246582031</text:p>
              </table:table-cell>
              <table:table-cell office:value-type="float" office:value="0.1982784">
                <text:p>0.1982784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569.558471679688">
                <text:p>569.558471679688</text:p>
              </table:table-cell>
              <table:table-cell office:value-type="float" office:value="0.2052652">
                <text:p>0.2052652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569.676696777344">
                <text:p>569.676696777344</text:p>
              </table:table-cell>
              <table:table-cell office:value-type="float" office:value="0.1974262">
                <text:p>0.1974262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569.794921875">
                <text:p>569.794921875</text:p>
              </table:table-cell>
              <table:table-cell office:value-type="float" office:value="0.1841716">
                <text:p>0.1841716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569.913146972656">
                <text:p>569.913146972656</text:p>
              </table:table-cell>
              <table:table-cell office:value-type="float" office:value="0.1832718">
                <text:p>0.1832718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570.031372070313">
                <text:p>570.031372070313</text:p>
              </table:table-cell>
              <table:table-cell office:value-type="float" office:value="0.1904612">
                <text:p>0.1904612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570.149597167969">
                <text:p>570.149597167969</text:p>
              </table:table-cell>
              <table:table-cell office:value-type="float" office:value="0.1925298">
                <text:p>0.1925298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570.267883300781">
                <text:p>570.267883300781</text:p>
              </table:table-cell>
              <table:table-cell office:value-type="float" office:value="0.1781475">
                <text:p>0.1781475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570.386108398438">
                <text:p>570.386108398438</text:p>
              </table:table-cell>
              <table:table-cell office:value-type="float" office:value="0.1885465">
                <text:p>0.188546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570.504333496094">
                <text:p>570.504333496094</text:p>
              </table:table-cell>
              <table:table-cell office:value-type="float" office:value="0.2004117">
                <text:p>0.2004117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570.622619628906">
                <text:p>570.622619628906</text:p>
              </table:table-cell>
              <table:table-cell office:value-type="float" office:value="0.2004963">
                <text:p>0.2004963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570.740844726563">
                <text:p>570.740844726563</text:p>
              </table:table-cell>
              <table:table-cell office:value-type="float" office:value="0.1841043">
                <text:p>0.1841043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570.859130859375">
                <text:p>570.859130859375</text:p>
              </table:table-cell>
              <table:table-cell office:value-type="float" office:value="0.1791856">
                <text:p>0.1791856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570.977355957031">
                <text:p>570.977355957031</text:p>
              </table:table-cell>
              <table:table-cell office:value-type="float" office:value="0.1871428">
                <text:p>0.1871428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571.095642089844">
                <text:p>571.095642089844</text:p>
              </table:table-cell>
              <table:table-cell office:value-type="float" office:value="0.1777136">
                <text:p>0.1777136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571.213928222656">
                <text:p>571.213928222656</text:p>
              </table:table-cell>
              <table:table-cell office:value-type="float" office:value="0.1838861">
                <text:p>0.1838861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571.332153320313">
                <text:p>571.332153320313</text:p>
              </table:table-cell>
              <table:table-cell office:value-type="float" office:value="0.1835607">
                <text:p>0.1835607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571.450439453125">
                <text:p>571.450439453125</text:p>
              </table:table-cell>
              <table:table-cell office:value-type="float" office:value="0.18236">
                <text:p>0.18236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571.568725585938">
                <text:p>571.568725585938</text:p>
              </table:table-cell>
              <table:table-cell office:value-type="float" office:value="0.1718025">
                <text:p>0.1718025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571.68701171875">
                <text:p>571.68701171875</text:p>
              </table:table-cell>
              <table:table-cell office:value-type="float" office:value="0.1849004">
                <text:p>0.1849004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571.805297851563">
                <text:p>571.805297851563</text:p>
              </table:table-cell>
              <table:table-cell office:value-type="float" office:value="0.1729653">
                <text:p>0.1729653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571.923583984375">
                <text:p>571.923583984375</text:p>
              </table:table-cell>
              <table:table-cell office:value-type="float" office:value="0.1947875">
                <text:p>0.194787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572.041870117188">
                <text:p>572.041870117188</text:p>
              </table:table-cell>
              <table:table-cell office:value-type="float" office:value="0.1732409">
                <text:p>0.1732409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572.16015625">
                <text:p>572.16015625</text:p>
              </table:table-cell>
              <table:table-cell office:value-type="float" office:value="0.1834447">
                <text:p>0.1834447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572.278442382813">
                <text:p>572.278442382813</text:p>
              </table:table-cell>
              <table:table-cell office:value-type="float" office:value="0.1703983">
                <text:p>0.1703983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572.396728515625">
                <text:p>572.396728515625</text:p>
              </table:table-cell>
              <table:table-cell office:value-type="float" office:value="0.168094">
                <text:p>0.168094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572.515014648438">
                <text:p>572.515014648438</text:p>
              </table:table-cell>
              <table:table-cell office:value-type="float" office:value="0.1658079">
                <text:p>0.1658079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572.63330078125">
                <text:p>572.63330078125</text:p>
              </table:table-cell>
              <table:table-cell office:value-type="float" office:value="0.1693814">
                <text:p>0.1693814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572.751586914063">
                <text:p>572.751586914063</text:p>
              </table:table-cell>
              <table:table-cell office:value-type="float" office:value="0.1760467">
                <text:p>0.1760467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572.869934082031">
                <text:p>572.869934082031</text:p>
              </table:table-cell>
              <table:table-cell office:value-type="float" office:value="0.1632524">
                <text:p>0.1632524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572.988220214844">
                <text:p>572.988220214844</text:p>
              </table:table-cell>
              <table:table-cell office:value-type="float" office:value="0.160733">
                <text:p>0.160733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573.106506347656">
                <text:p>573.106506347656</text:p>
              </table:table-cell>
              <table:table-cell office:value-type="float" office:value="0.1740377">
                <text:p>0.1740377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573.224853515625">
                <text:p>573.224853515625</text:p>
              </table:table-cell>
              <table:table-cell office:value-type="float" office:value="0.1659324">
                <text:p>0.1659324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573.343139648438">
                <text:p>573.343139648438</text:p>
              </table:table-cell>
              <table:table-cell office:value-type="float" office:value="0.1657519">
                <text:p>0.1657519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573.461486816406">
                <text:p>573.461486816406</text:p>
              </table:table-cell>
              <table:table-cell office:value-type="float" office:value="0.1744325">
                <text:p>0.174432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573.579772949219">
                <text:p>573.579772949219</text:p>
              </table:table-cell>
              <table:table-cell office:value-type="float" office:value="0.1612072">
                <text:p>0.1612072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573.698120117188">
                <text:p>573.698120117188</text:p>
              </table:table-cell>
              <table:table-cell office:value-type="float" office:value="0.1660657">
                <text:p>0.1660657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573.81640625">
                <text:p>573.81640625</text:p>
              </table:table-cell>
              <table:table-cell office:value-type="float" office:value="0.1591914">
                <text:p>0.1591914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573.934753417969">
                <text:p>573.934753417969</text:p>
              </table:table-cell>
              <table:table-cell office:value-type="float" office:value="0.1613221">
                <text:p>0.1613221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574.053100585938">
                <text:p>574.053100585938</text:p>
              </table:table-cell>
              <table:table-cell office:value-type="float" office:value="0.1570746">
                <text:p>0.1570746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574.171447753906">
                <text:p>574.171447753906</text:p>
              </table:table-cell>
              <table:table-cell office:value-type="float" office:value="0.1571416">
                <text:p>0.1571416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574.289733886719">
                <text:p>574.289733886719</text:p>
              </table:table-cell>
              <table:table-cell office:value-type="float" office:value="0.155249">
                <text:p>0.155249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574.408081054688">
                <text:p>574.408081054688</text:p>
              </table:table-cell>
              <table:table-cell office:value-type="float" office:value="0.1607332">
                <text:p>0.1607332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574.526428222656">
                <text:p>574.526428222656</text:p>
              </table:table-cell>
              <table:table-cell office:value-type="float" office:value="0.1594454">
                <text:p>0.1594454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574.644775390625">
                <text:p>574.644775390625</text:p>
              </table:table-cell>
              <table:table-cell office:value-type="float" office:value="0.1594915">
                <text:p>0.1594915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574.763122558594">
                <text:p>574.763122558594</text:p>
              </table:table-cell>
              <table:table-cell office:value-type="float" office:value="0.1589114">
                <text:p>0.1589114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574.881469726563">
                <text:p>574.881469726563</text:p>
              </table:table-cell>
              <table:table-cell office:value-type="float" office:value="0.1623553">
                <text:p>0.1623553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574.999816894531">
                <text:p>574.999816894531</text:p>
              </table:table-cell>
              <table:table-cell office:value-type="float" office:value="0.1502706">
                <text:p>0.1502706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575.1181640625">
                <text:p>575.1181640625</text:p>
              </table:table-cell>
              <table:table-cell office:value-type="float" office:value="0.1720281">
                <text:p>0.1720281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575.236572265625">
                <text:p>575.236572265625</text:p>
              </table:table-cell>
              <table:table-cell office:value-type="float" office:value="0.1487219">
                <text:p>0.1487219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575.354919433594">
                <text:p>575.354919433594</text:p>
              </table:table-cell>
              <table:table-cell office:value-type="float" office:value="0.1627326">
                <text:p>0.1627326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575.473266601563">
                <text:p>575.473266601563</text:p>
              </table:table-cell>
              <table:table-cell office:value-type="float" office:value="0.1450197">
                <text:p>0.1450197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575.591613769531">
                <text:p>575.591613769531</text:p>
              </table:table-cell>
              <table:table-cell office:value-type="float" office:value="0.145281">
                <text:p>0.145281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575.710021972656">
                <text:p>575.710021972656</text:p>
              </table:table-cell>
              <table:table-cell office:value-type="float" office:value="0.1448581">
                <text:p>0.1448581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575.828369140625">
                <text:p>575.828369140625</text:p>
              </table:table-cell>
              <table:table-cell office:value-type="float" office:value="0.1464523">
                <text:p>0.1464523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575.94677734375">
                <text:p>575.94677734375</text:p>
              </table:table-cell>
              <table:table-cell office:value-type="float" office:value="0.1524814">
                <text:p>0.1524814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576.065124511719">
                <text:p>576.065124511719</text:p>
              </table:table-cell>
              <table:table-cell office:value-type="float" office:value="0.1496865">
                <text:p>0.1496865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576.183532714844">
                <text:p>576.183532714844</text:p>
              </table:table-cell>
              <table:table-cell office:value-type="float" office:value="0.1396525">
                <text:p>0.1396525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576.301879882813">
                <text:p>576.301879882813</text:p>
              </table:table-cell>
              <table:table-cell office:value-type="float" office:value="0.1525378">
                <text:p>0.1525378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576.420288085938">
                <text:p>576.420288085938</text:p>
              </table:table-cell>
              <table:table-cell office:value-type="float" office:value="0.1539321">
                <text:p>0.1539321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576.538635253906">
                <text:p>576.538635253906</text:p>
              </table:table-cell>
              <table:table-cell office:value-type="float" office:value="0.1422034">
                <text:p>0.1422034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576.657043457031">
                <text:p>576.657043457031</text:p>
              </table:table-cell>
              <table:table-cell office:value-type="float" office:value="0.1579777">
                <text:p>0.1579777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576.775451660156">
                <text:p>576.775451660156</text:p>
              </table:table-cell>
              <table:table-cell office:value-type="float" office:value="0.1363087">
                <text:p>0.1363087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576.893859863281">
                <text:p>576.893859863281</text:p>
              </table:table-cell>
              <table:table-cell office:value-type="float" office:value="0.1398537">
                <text:p>0.1398537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577.012268066406">
                <text:p>577.012268066406</text:p>
              </table:table-cell>
              <table:table-cell office:value-type="float" office:value="0.1506098">
                <text:p>0.1506098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577.130615234375">
                <text:p>577.130615234375</text:p>
              </table:table-cell>
              <table:table-cell office:value-type="float" office:value="0.1436073">
                <text:p>0.1436073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577.2490234375">
                <text:p>577.2490234375</text:p>
              </table:table-cell>
              <table:table-cell office:value-type="float" office:value="0.1468288">
                <text:p>0.1468288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577.367431640625">
                <text:p>577.367431640625</text:p>
              </table:table-cell>
              <table:table-cell office:value-type="float" office:value="0.1327275">
                <text:p>0.1327275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577.48583984375">
                <text:p>577.48583984375</text:p>
              </table:table-cell>
              <table:table-cell office:value-type="float" office:value="0.1442472">
                <text:p>0.1442472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577.604248046875">
                <text:p>577.604248046875</text:p>
              </table:table-cell>
              <table:table-cell office:value-type="float" office:value="0.1311436">
                <text:p>0.1311436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577.722717285156">
                <text:p>577.722717285156</text:p>
              </table:table-cell>
              <table:table-cell office:value-type="float" office:value="0.1326731">
                <text:p>0.1326731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577.841125488281">
                <text:p>577.841125488281</text:p>
              </table:table-cell>
              <table:table-cell office:value-type="float" office:value="0.136985">
                <text:p>0.136985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577.959533691406">
                <text:p>577.959533691406</text:p>
              </table:table-cell>
              <table:table-cell office:value-type="float" office:value="0.1312316">
                <text:p>0.1312316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578.077941894531">
                <text:p>578.077941894531</text:p>
              </table:table-cell>
              <table:table-cell office:value-type="float" office:value="0.1496143">
                <text:p>0.1496143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578.196350097656">
                <text:p>578.196350097656</text:p>
              </table:table-cell>
              <table:table-cell office:value-type="float" office:value="0.1300661">
                <text:p>0.1300661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578.314819335938">
                <text:p>578.314819335938</text:p>
              </table:table-cell>
              <table:table-cell office:value-type="float" office:value="0.1302476">
                <text:p>0.1302476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578.433227539063">
                <text:p>578.433227539063</text:p>
              </table:table-cell>
              <table:table-cell office:value-type="float" office:value="0.1315521">
                <text:p>0.1315521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578.551635742188">
                <text:p>578.551635742188</text:p>
              </table:table-cell>
              <table:table-cell office:value-type="float" office:value="0.1325093">
                <text:p>0.1325093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578.670104980469">
                <text:p>578.670104980469</text:p>
              </table:table-cell>
              <table:table-cell office:value-type="float" office:value="0.141171">
                <text:p>0.141171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578.788513183594">
                <text:p>578.788513183594</text:p>
              </table:table-cell>
              <table:table-cell office:value-type="float" office:value="0.1583369">
                <text:p>0.1583369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578.906982421875">
                <text:p>578.906982421875</text:p>
              </table:table-cell>
              <table:table-cell office:value-type="float" office:value="0.1234249">
                <text:p>0.1234249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579.025451660156">
                <text:p>579.025451660156</text:p>
              </table:table-cell>
              <table:table-cell office:value-type="float" office:value="0.1295073">
                <text:p>0.1295073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579.143859863281">
                <text:p>579.143859863281</text:p>
              </table:table-cell>
              <table:table-cell office:value-type="float" office:value="0.1342129">
                <text:p>0.1342129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579.262329101563">
                <text:p>579.262329101563</text:p>
              </table:table-cell>
              <table:table-cell office:value-type="float" office:value="0.1272634">
                <text:p>0.1272634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579.380798339844">
                <text:p>579.380798339844</text:p>
              </table:table-cell>
              <table:table-cell office:value-type="float" office:value="0.1306344">
                <text:p>0.1306344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579.499206542969">
                <text:p>579.499206542969</text:p>
              </table:table-cell>
              <table:table-cell office:value-type="float" office:value="0.1239406">
                <text:p>0.1239406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579.61767578125">
                <text:p>579.61767578125</text:p>
              </table:table-cell>
              <table:table-cell office:value-type="float" office:value="0.1233111">
                <text:p>0.1233111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579.736145019531">
                <text:p>579.736145019531</text:p>
              </table:table-cell>
              <table:table-cell office:value-type="float" office:value="0.1250465">
                <text:p>0.1250465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579.854614257813">
                <text:p>579.854614257813</text:p>
              </table:table-cell>
              <table:table-cell office:value-type="float" office:value="0.1199092">
                <text:p>0.1199092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579.973083496094">
                <text:p>579.973083496094</text:p>
              </table:table-cell>
              <table:table-cell office:value-type="float" office:value="0.1190453">
                <text:p>0.1190453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580.091552734375">
                <text:p>580.091552734375</text:p>
              </table:table-cell>
              <table:table-cell office:value-type="float" office:value="0.127975">
                <text:p>0.127975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580.210021972656">
                <text:p>580.210021972656</text:p>
              </table:table-cell>
              <table:table-cell office:value-type="float" office:value="0.1374518">
                <text:p>0.1374518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580.328491210938">
                <text:p>580.328491210938</text:p>
              </table:table-cell>
              <table:table-cell office:value-type="float" office:value="0.1272409">
                <text:p>0.1272409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580.446960449219">
                <text:p>580.446960449219</text:p>
              </table:table-cell>
              <table:table-cell office:value-type="float" office:value="0.1214622">
                <text:p>0.1214622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580.5654296875">
                <text:p>580.5654296875</text:p>
              </table:table-cell>
              <table:table-cell office:value-type="float" office:value="0.1213104">
                <text:p>0.1213104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580.683898925781">
                <text:p>580.683898925781</text:p>
              </table:table-cell>
              <table:table-cell office:value-type="float" office:value="0.1310883">
                <text:p>0.1310883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580.802368164063">
                <text:p>580.802368164063</text:p>
              </table:table-cell>
              <table:table-cell office:value-type="float" office:value="0.1234688">
                <text:p>0.1234688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580.9208984375">
                <text:p>580.9208984375</text:p>
              </table:table-cell>
              <table:table-cell office:value-type="float" office:value="0.1198681">
                <text:p>0.1198681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581.039367675781">
                <text:p>581.039367675781</text:p>
              </table:table-cell>
              <table:table-cell office:value-type="float" office:value="0.1193472">
                <text:p>0.1193472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581.157836914063">
                <text:p>581.157836914063</text:p>
              </table:table-cell>
              <table:table-cell office:value-type="float" office:value="0.1278033">
                <text:p>0.1278033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581.2763671875">
                <text:p>581.2763671875</text:p>
              </table:table-cell>
              <table:table-cell office:value-type="float" office:value="0.1307361">
                <text:p>0.1307361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581.394836425781">
                <text:p>581.394836425781</text:p>
              </table:table-cell>
              <table:table-cell office:value-type="float" office:value="0.1221302">
                <text:p>0.1221302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581.513366699219">
                <text:p>581.513366699219</text:p>
              </table:table-cell>
              <table:table-cell office:value-type="float" office:value="0.1279388">
                <text:p>0.1279388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581.6318359375">
                <text:p>581.6318359375</text:p>
              </table:table-cell>
              <table:table-cell office:value-type="float" office:value="0.1155675">
                <text:p>0.1155675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581.750366210938">
                <text:p>581.750366210938</text:p>
              </table:table-cell>
              <table:table-cell office:value-type="float" office:value="0.1113839">
                <text:p>0.1113839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581.868835449219">
                <text:p>581.868835449219</text:p>
              </table:table-cell>
              <table:table-cell office:value-type="float" office:value="0.114559">
                <text:p>0.114559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581.987365722656">
                <text:p>581.987365722656</text:p>
              </table:table-cell>
              <table:table-cell office:value-type="float" office:value="0.1144141">
                <text:p>0.1144141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582.105895996094">
                <text:p>582.105895996094</text:p>
              </table:table-cell>
              <table:table-cell office:value-type="float" office:value="0.116096">
                <text:p>0.116096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582.224365234375">
                <text:p>582.224365234375</text:p>
              </table:table-cell>
              <table:table-cell office:value-type="float" office:value="0.1185717">
                <text:p>0.1185717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582.342895507813">
                <text:p>582.342895507813</text:p>
              </table:table-cell>
              <table:table-cell office:value-type="float" office:value="0.1136535">
                <text:p>0.1136535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582.46142578125">
                <text:p>582.46142578125</text:p>
              </table:table-cell>
              <table:table-cell office:value-type="float" office:value="0.1150735">
                <text:p>0.1150735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582.579956054688">
                <text:p>582.579956054688</text:p>
              </table:table-cell>
              <table:table-cell office:value-type="float" office:value="0.1110354">
                <text:p>0.1110354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582.698486328125">
                <text:p>582.698486328125</text:p>
              </table:table-cell>
              <table:table-cell office:value-type="float" office:value="0.1080851">
                <text:p>0.1080851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582.817016601563">
                <text:p>582.817016601563</text:p>
              </table:table-cell>
              <table:table-cell office:value-type="float" office:value="0.113798">
                <text:p>0.113798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582.935546875">
                <text:p>582.935546875</text:p>
              </table:table-cell>
              <table:table-cell office:value-type="float" office:value="0.1054191">
                <text:p>0.1054191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583.054077148438">
                <text:p>583.054077148438</text:p>
              </table:table-cell>
              <table:table-cell office:value-type="float" office:value="0.1091377">
                <text:p>0.1091377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583.172607421875">
                <text:p>583.172607421875</text:p>
              </table:table-cell>
              <table:table-cell office:value-type="float" office:value="0.1373245">
                <text:p>0.1373245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583.291137695313">
                <text:p>583.291137695313</text:p>
              </table:table-cell>
              <table:table-cell office:value-type="float" office:value="0.1116201">
                <text:p>0.1116201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583.40966796875">
                <text:p>583.40966796875</text:p>
              </table:table-cell>
              <table:table-cell office:value-type="float" office:value="0.1045052">
                <text:p>0.1045052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583.528198242188">
                <text:p>583.528198242188</text:p>
              </table:table-cell>
              <table:table-cell office:value-type="float" office:value="0.1093846">
                <text:p>0.1093846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583.646789550781">
                <text:p>583.646789550781</text:p>
              </table:table-cell>
              <table:table-cell office:value-type="float" office:value="0.1039499">
                <text:p>0.1039499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583.765319824219">
                <text:p>583.765319824219</text:p>
              </table:table-cell>
              <table:table-cell office:value-type="float" office:value="0.101918">
                <text:p>0.101918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583.883850097656">
                <text:p>583.883850097656</text:p>
              </table:table-cell>
              <table:table-cell office:value-type="float" office:value="0.1141597">
                <text:p>0.1141597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584.00244140625">
                <text:p>584.00244140625</text:p>
              </table:table-cell>
              <table:table-cell office:value-type="float" office:value="0.09865611">
                <text:p>0.09865611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584.120971679688">
                <text:p>584.120971679688</text:p>
              </table:table-cell>
              <table:table-cell office:value-type="float" office:value="0.1139821">
                <text:p>0.1139821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584.239501953125">
                <text:p>584.239501953125</text:p>
              </table:table-cell>
              <table:table-cell office:value-type="float" office:value="0.1083735">
                <text:p>0.1083735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584.358093261719">
                <text:p>584.358093261719</text:p>
              </table:table-cell>
              <table:table-cell office:value-type="float" office:value="0.1031867">
                <text:p>0.1031867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584.476623535156">
                <text:p>584.476623535156</text:p>
              </table:table-cell>
              <table:table-cell office:value-type="float" office:value="0.1108496">
                <text:p>0.1108496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584.59521484375">
                <text:p>584.59521484375</text:p>
              </table:table-cell>
              <table:table-cell office:value-type="float" office:value="0.1124841">
                <text:p>0.1124841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584.713806152344">
                <text:p>584.713806152344</text:p>
              </table:table-cell>
              <table:table-cell office:value-type="float" office:value="0.1048183">
                <text:p>0.1048183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584.832336425781">
                <text:p>584.832336425781</text:p>
              </table:table-cell>
              <table:table-cell office:value-type="float" office:value="0.1042637">
                <text:p>0.1042637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584.950927734375">
                <text:p>584.950927734375</text:p>
              </table:table-cell>
              <table:table-cell office:value-type="float" office:value="0.103811">
                <text:p>0.103811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585.069519042969">
                <text:p>585.069519042969</text:p>
              </table:table-cell>
              <table:table-cell office:value-type="float" office:value="0.09332594">
                <text:p>0.09332594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585.188110351563">
                <text:p>585.188110351563</text:p>
              </table:table-cell>
              <table:table-cell office:value-type="float" office:value="0.1066728">
                <text:p>0.1066728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585.306640625">
                <text:p>585.306640625</text:p>
              </table:table-cell>
              <table:table-cell office:value-type="float" office:value="0.1074188">
                <text:p>0.1074188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585.425231933594">
                <text:p>585.425231933594</text:p>
              </table:table-cell>
              <table:table-cell office:value-type="float" office:value="0.09886115">
                <text:p>0.09886115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585.543823242188">
                <text:p>585.543823242188</text:p>
              </table:table-cell>
              <table:table-cell office:value-type="float" office:value="0.1202372">
                <text:p>0.1202372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585.662414550781">
                <text:p>585.662414550781</text:p>
              </table:table-cell>
              <table:table-cell office:value-type="float" office:value="0.09293314">
                <text:p>0.09293314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585.781005859375">
                <text:p>585.781005859375</text:p>
              </table:table-cell>
              <table:table-cell office:value-type="float" office:value="0.1004438">
                <text:p>0.1004438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585.899597167969">
                <text:p>585.899597167969</text:p>
              </table:table-cell>
              <table:table-cell office:value-type="float" office:value="0.1043183">
                <text:p>0.1043183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586.018188476563">
                <text:p>586.018188476563</text:p>
              </table:table-cell>
              <table:table-cell office:value-type="float" office:value="0.09159245">
                <text:p>0.09159245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586.136779785156">
                <text:p>586.136779785156</text:p>
              </table:table-cell>
              <table:table-cell office:value-type="float" office:value="0.094125">
                <text:p>0.094125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586.255432128906">
                <text:p>586.255432128906</text:p>
              </table:table-cell>
              <table:table-cell office:value-type="float" office:value="0.1000558">
                <text:p>0.1000558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586.3740234375">
                <text:p>586.3740234375</text:p>
              </table:table-cell>
              <table:table-cell office:value-type="float" office:value="0.1004662">
                <text:p>0.1004662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586.492614746094">
                <text:p>586.492614746094</text:p>
              </table:table-cell>
              <table:table-cell office:value-type="float" office:value="0.1002782">
                <text:p>0.1002782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586.611206054688">
                <text:p>586.611206054688</text:p>
              </table:table-cell>
              <table:table-cell office:value-type="float" office:value="0.108984">
                <text:p>0.108984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586.729858398438">
                <text:p>586.729858398438</text:p>
              </table:table-cell>
              <table:table-cell office:value-type="float" office:value="0.1029202">
                <text:p>0.1029202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586.848449707031">
                <text:p>586.848449707031</text:p>
              </table:table-cell>
              <table:table-cell office:value-type="float" office:value="0.1036645">
                <text:p>0.1036645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586.967041015625">
                <text:p>586.967041015625</text:p>
              </table:table-cell>
              <table:table-cell office:value-type="float" office:value="0.09250913">
                <text:p>0.09250913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587.085693359375">
                <text:p>587.085693359375</text:p>
              </table:table-cell>
              <table:table-cell office:value-type="float" office:value="0.09452088">
                <text:p>0.09452088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587.204284667969">
                <text:p>587.204284667969</text:p>
              </table:table-cell>
              <table:table-cell office:value-type="float" office:value="0.1042138">
                <text:p>0.1042138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587.322937011719">
                <text:p>587.322937011719</text:p>
              </table:table-cell>
              <table:table-cell office:value-type="float" office:value="0.09934901">
                <text:p>0.09934901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587.441589355469">
                <text:p>587.441589355469</text:p>
              </table:table-cell>
              <table:table-cell office:value-type="float" office:value="0.1036219">
                <text:p>0.1036219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587.560180664063">
                <text:p>587.560180664063</text:p>
              </table:table-cell>
              <table:table-cell office:value-type="float" office:value="0.08825307">
                <text:p>0.08825307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587.678833007813">
                <text:p>587.678833007813</text:p>
              </table:table-cell>
              <table:table-cell office:value-type="float" office:value="0.0969483">
                <text:p>0.0969483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587.797424316406">
                <text:p>587.797424316406</text:p>
              </table:table-cell>
              <table:table-cell office:value-type="float" office:value="0.102056">
                <text:p>0.102056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587.916076660156">
                <text:p>587.916076660156</text:p>
              </table:table-cell>
              <table:table-cell office:value-type="float" office:value="0.1037751">
                <text:p>0.1037751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588.034729003906">
                <text:p>588.034729003906</text:p>
              </table:table-cell>
              <table:table-cell office:value-type="float" office:value="0.09530456">
                <text:p>0.09530456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588.153381347656">
                <text:p>588.153381347656</text:p>
              </table:table-cell>
              <table:table-cell office:value-type="float" office:value="0.09639793">
                <text:p>0.09639793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588.272033691406">
                <text:p>588.272033691406</text:p>
              </table:table-cell>
              <table:table-cell office:value-type="float" office:value="0.09635567">
                <text:p>0.09635567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588.390686035156">
                <text:p>588.390686035156</text:p>
              </table:table-cell>
              <table:table-cell office:value-type="float" office:value="0.104553">
                <text:p>0.104553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588.509338378906">
                <text:p>588.509338378906</text:p>
              </table:table-cell>
              <table:table-cell office:value-type="float" office:value="0.09421418">
                <text:p>0.09421418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588.627990722656">
                <text:p>588.627990722656</text:p>
              </table:table-cell>
              <table:table-cell office:value-type="float" office:value="0.08796879">
                <text:p>0.08796879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588.746643066406">
                <text:p>588.746643066406</text:p>
              </table:table-cell>
              <table:table-cell office:value-type="float" office:value="0.08656278">
                <text:p>0.08656278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588.865295410156">
                <text:p>588.865295410156</text:p>
              </table:table-cell>
              <table:table-cell office:value-type="float" office:value="0.09005439">
                <text:p>0.09005439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588.983947753906">
                <text:p>588.983947753906</text:p>
              </table:table-cell>
              <table:table-cell office:value-type="float" office:value="0.08746549">
                <text:p>0.08746549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589.102600097656">
                <text:p>589.102600097656</text:p>
              </table:table-cell>
              <table:table-cell office:value-type="float" office:value="0.0958287">
                <text:p>0.0958287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589.221252441406">
                <text:p>589.221252441406</text:p>
              </table:table-cell>
              <table:table-cell office:value-type="float" office:value="0.08365258">
                <text:p>0.08365258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589.339904785156">
                <text:p>589.339904785156</text:p>
              </table:table-cell>
              <table:table-cell office:value-type="float" office:value="0.08871506">
                <text:p>0.08871506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589.458618164063">
                <text:p>589.458618164063</text:p>
              </table:table-cell>
              <table:table-cell office:value-type="float" office:value="0.08556844">
                <text:p>0.08556844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589.577270507813">
                <text:p>589.577270507813</text:p>
              </table:table-cell>
              <table:table-cell office:value-type="float" office:value="0.08189621">
                <text:p>0.08189621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589.695922851563">
                <text:p>589.695922851563</text:p>
              </table:table-cell>
              <table:table-cell office:value-type="float" office:value="0.09464213">
                <text:p>0.09464213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589.814636230469">
                <text:p>589.814636230469</text:p>
              </table:table-cell>
              <table:table-cell office:value-type="float" office:value="0.08113839">
                <text:p>0.08113839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589.933288574219">
                <text:p>589.933288574219</text:p>
              </table:table-cell>
              <table:table-cell office:value-type="float" office:value="0.08786178">
                <text:p>0.08786178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590.052001953125">
                <text:p>590.052001953125</text:p>
              </table:table-cell>
              <table:table-cell office:value-type="float" office:value="0.08352183">
                <text:p>0.08352183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590.170654296875">
                <text:p>590.170654296875</text:p>
              </table:table-cell>
              <table:table-cell office:value-type="float" office:value="0.08793516">
                <text:p>0.08793516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590.289367675781">
                <text:p>590.289367675781</text:p>
              </table:table-cell>
              <table:table-cell office:value-type="float" office:value="0.07841358">
                <text:p>0.07841358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590.408020019531">
                <text:p>590.408020019531</text:p>
              </table:table-cell>
              <table:table-cell office:value-type="float" office:value="0.1214108">
                <text:p>0.1214108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590.526733398438">
                <text:p>590.526733398438</text:p>
              </table:table-cell>
              <table:table-cell office:value-type="float" office:value="0.0926975">
                <text:p>0.0926975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590.645446777344">
                <text:p>590.645446777344</text:p>
              </table:table-cell>
              <table:table-cell office:value-type="float" office:value="0.08134797">
                <text:p>0.08134797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590.764099121094">
                <text:p>590.764099121094</text:p>
              </table:table-cell>
              <table:table-cell office:value-type="float" office:value="0.08166815">
                <text:p>0.08166815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590.8828125">
                <text:p>590.8828125</text:p>
              </table:table-cell>
              <table:table-cell office:value-type="float" office:value="0.09157338">
                <text:p>0.09157338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591.001525878906">
                <text:p>591.001525878906</text:p>
              </table:table-cell>
              <table:table-cell office:value-type="float" office:value="0.09267484">
                <text:p>0.09267484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591.120239257813">
                <text:p>591.120239257813</text:p>
              </table:table-cell>
              <table:table-cell office:value-type="float" office:value="0.07995182">
                <text:p>0.07995182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591.238891601563">
                <text:p>591.238891601563</text:p>
              </table:table-cell>
              <table:table-cell office:value-type="float" office:value="0.07927077">
                <text:p>0.07927077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591.357604980469">
                <text:p>591.357604980469</text:p>
              </table:table-cell>
              <table:table-cell office:value-type="float" office:value="0.08906265">
                <text:p>0.08906265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591.476318359375">
                <text:p>591.476318359375</text:p>
              </table:table-cell>
              <table:table-cell office:value-type="float" office:value="0.08114573">
                <text:p>0.08114573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591.595031738281">
                <text:p>591.595031738281</text:p>
              </table:table-cell>
              <table:table-cell office:value-type="float" office:value="0.09585053">
                <text:p>0.09585053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591.713745117188">
                <text:p>591.713745117188</text:p>
              </table:table-cell>
              <table:table-cell office:value-type="float" office:value="0.08155479">
                <text:p>0.08155479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591.832458496094">
                <text:p>591.832458496094</text:p>
              </table:table-cell>
              <table:table-cell office:value-type="float" office:value="0.09353822">
                <text:p>0.09353822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591.951232910156">
                <text:p>591.951232910156</text:p>
              </table:table-cell>
              <table:table-cell office:value-type="float" office:value="0.08280493">
                <text:p>0.08280493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592.069946289063">
                <text:p>592.069946289063</text:p>
              </table:table-cell>
              <table:table-cell office:value-type="float" office:value="0.08619553">
                <text:p>0.08619553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592.188659667969">
                <text:p>592.188659667969</text:p>
              </table:table-cell>
              <table:table-cell office:value-type="float" office:value="0.07531714">
                <text:p>0.07531714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592.307373046875">
                <text:p>592.307373046875</text:p>
              </table:table-cell>
              <table:table-cell office:value-type="float" office:value="0.07696784">
                <text:p>0.07696784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592.426086425781">
                <text:p>592.426086425781</text:p>
              </table:table-cell>
              <table:table-cell office:value-type="float" office:value="0.09797459">
                <text:p>0.09797459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592.544860839844">
                <text:p>592.544860839844</text:p>
              </table:table-cell>
              <table:table-cell office:value-type="float" office:value="0.07643729">
                <text:p>0.07643729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592.66357421875">
                <text:p>592.66357421875</text:p>
              </table:table-cell>
              <table:table-cell office:value-type="float" office:value="0.07404989">
                <text:p>0.07404989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592.782348632813">
                <text:p>592.782348632813</text:p>
              </table:table-cell>
              <table:table-cell office:value-type="float" office:value="0.07285588">
                <text:p>0.07285588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592.901062011719">
                <text:p>592.901062011719</text:p>
              </table:table-cell>
              <table:table-cell office:value-type="float" office:value="0.07848891">
                <text:p>0.07848891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593.019775390625">
                <text:p>593.019775390625</text:p>
              </table:table-cell>
              <table:table-cell office:value-type="float" office:value="0.07364886">
                <text:p>0.07364886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593.138549804688">
                <text:p>593.138549804688</text:p>
              </table:table-cell>
              <table:table-cell office:value-type="float" office:value="0.07096222">
                <text:p>0.07096222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593.257263183594">
                <text:p>593.257263183594</text:p>
              </table:table-cell>
              <table:table-cell office:value-type="float" office:value="0.06885868">
                <text:p>0.06885868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593.376037597656">
                <text:p>593.376037597656</text:p>
              </table:table-cell>
              <table:table-cell office:value-type="float" office:value="0.06610884">
                <text:p>0.06610884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593.494812011719">
                <text:p>593.494812011719</text:p>
              </table:table-cell>
              <table:table-cell office:value-type="float" office:value="0.0829561">
                <text:p>0.0829561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593.613525390625">
                <text:p>593.613525390625</text:p>
              </table:table-cell>
              <table:table-cell office:value-type="float" office:value="0.07235728">
                <text:p>0.07235728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593.732299804688">
                <text:p>593.732299804688</text:p>
              </table:table-cell>
              <table:table-cell office:value-type="float" office:value="0.07372326">
                <text:p>0.07372326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593.85107421875">
                <text:p>593.85107421875</text:p>
              </table:table-cell>
              <table:table-cell office:value-type="float" office:value="0.07516632">
                <text:p>0.07516632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593.969848632813">
                <text:p>593.969848632813</text:p>
              </table:table-cell>
              <table:table-cell office:value-type="float" office:value="0.07302483">
                <text:p>0.07302483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594.088562011719">
                <text:p>594.088562011719</text:p>
              </table:table-cell>
              <table:table-cell office:value-type="float" office:value="0.07227057">
                <text:p>0.07227057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594.207336425781">
                <text:p>594.207336425781</text:p>
              </table:table-cell>
              <table:table-cell office:value-type="float" office:value="0.07421282">
                <text:p>0.07421282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594.326110839844">
                <text:p>594.326110839844</text:p>
              </table:table-cell>
              <table:table-cell office:value-type="float" office:value="0.07887354">
                <text:p>0.07887354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594.444885253906">
                <text:p>594.444885253906</text:p>
              </table:table-cell>
              <table:table-cell office:value-type="float" office:value="0.06922479">
                <text:p>0.06922479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594.563659667969">
                <text:p>594.563659667969</text:p>
              </table:table-cell>
              <table:table-cell office:value-type="float" office:value="0.07139063">
                <text:p>0.07139063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594.682434082031">
                <text:p>594.682434082031</text:p>
              </table:table-cell>
              <table:table-cell office:value-type="float" office:value="0.07676627">
                <text:p>0.07676627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594.801208496094">
                <text:p>594.801208496094</text:p>
              </table:table-cell>
              <table:table-cell office:value-type="float" office:value="0.0729543">
                <text:p>0.0729543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594.919982910156">
                <text:p>594.919982910156</text:p>
              </table:table-cell>
              <table:table-cell office:value-type="float" office:value="0.07089334">
                <text:p>0.07089334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595.038818359375">
                <text:p>595.038818359375</text:p>
              </table:table-cell>
              <table:table-cell office:value-type="float" office:value="0.07502726">
                <text:p>0.07502726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595.157592773438">
                <text:p>595.157592773438</text:p>
              </table:table-cell>
              <table:table-cell office:value-type="float" office:value="0.08489532">
                <text:p>0.08489532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595.2763671875">
                <text:p>595.2763671875</text:p>
              </table:table-cell>
              <table:table-cell office:value-type="float" office:value="0.0951233">
                <text:p>0.0951233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595.395141601563">
                <text:p>595.395141601563</text:p>
              </table:table-cell>
              <table:table-cell office:value-type="float" office:value="0.07423019">
                <text:p>0.07423019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595.513916015625">
                <text:p>595.513916015625</text:p>
              </table:table-cell>
              <table:table-cell office:value-type="float" office:value="0.08230638">
                <text:p>0.08230638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595.632751464844">
                <text:p>595.632751464844</text:p>
              </table:table-cell>
              <table:table-cell office:value-type="float" office:value="0.06597668">
                <text:p>0.06597668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595.751525878906">
                <text:p>595.751525878906</text:p>
              </table:table-cell>
              <table:table-cell office:value-type="float" office:value="0.07162368">
                <text:p>0.07162368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595.870361328125">
                <text:p>595.870361328125</text:p>
              </table:table-cell>
              <table:table-cell office:value-type="float" office:value="0.07015335">
                <text:p>0.07015335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595.989135742188">
                <text:p>595.989135742188</text:p>
              </table:table-cell>
              <table:table-cell office:value-type="float" office:value="0.07922027">
                <text:p>0.07922027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596.107971191406">
                <text:p>596.107971191406</text:p>
              </table:table-cell>
              <table:table-cell office:value-type="float" office:value="0.07110853">
                <text:p>0.07110853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596.226745605469">
                <text:p>596.226745605469</text:p>
              </table:table-cell>
              <table:table-cell office:value-type="float" office:value="0.07531702">
                <text:p>0.07531702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596.345581054688">
                <text:p>596.345581054688</text:p>
              </table:table-cell>
              <table:table-cell office:value-type="float" office:value="0.06966054">
                <text:p>0.06966054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596.46435546875">
                <text:p>596.46435546875</text:p>
              </table:table-cell>
              <table:table-cell office:value-type="float" office:value="0.08398872">
                <text:p>0.08398872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596.583190917969">
                <text:p>596.583190917969</text:p>
              </table:table-cell>
              <table:table-cell office:value-type="float" office:value="0.07004254">
                <text:p>0.07004254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596.702026367188">
                <text:p>596.702026367188</text:p>
              </table:table-cell>
              <table:table-cell office:value-type="float" office:value="0.07322018">
                <text:p>0.07322018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596.82080078125">
                <text:p>596.82080078125</text:p>
              </table:table-cell>
              <table:table-cell office:value-type="float" office:value="0.06976902">
                <text:p>0.06976902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596.939636230469">
                <text:p>596.939636230469</text:p>
              </table:table-cell>
              <table:table-cell office:value-type="float" office:value="0.06671735">
                <text:p>0.06671735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597.058471679688">
                <text:p>597.058471679688</text:p>
              </table:table-cell>
              <table:table-cell office:value-type="float" office:value="0.07097466">
                <text:p>0.07097466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597.177307128906">
                <text:p>597.177307128906</text:p>
              </table:table-cell>
              <table:table-cell office:value-type="float" office:value="0.0677331">
                <text:p>0.0677331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597.296142578125">
                <text:p>597.296142578125</text:p>
              </table:table-cell>
              <table:table-cell office:value-type="float" office:value="0.08118248">
                <text:p>0.08118248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597.414978027344">
                <text:p>597.414978027344</text:p>
              </table:table-cell>
              <table:table-cell office:value-type="float" office:value="0.06889343">
                <text:p>0.06889343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597.533752441406">
                <text:p>597.533752441406</text:p>
              </table:table-cell>
              <table:table-cell office:value-type="float" office:value="0.06358082">
                <text:p>0.06358082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597.652587890625">
                <text:p>597.652587890625</text:p>
              </table:table-cell>
              <table:table-cell office:value-type="float" office:value="0.08808577">
                <text:p>0.08808577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597.771423339844">
                <text:p>597.771423339844</text:p>
              </table:table-cell>
              <table:table-cell office:value-type="float" office:value="0.07284998">
                <text:p>0.07284998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597.890319824219">
                <text:p>597.890319824219</text:p>
              </table:table-cell>
              <table:table-cell office:value-type="float" office:value="0.07332344">
                <text:p>0.07332344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598.009155273438">
                <text:p>598.009155273438</text:p>
              </table:table-cell>
              <table:table-cell office:value-type="float" office:value="0.06755506">
                <text:p>0.06755506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598.127990722656">
                <text:p>598.127990722656</text:p>
              </table:table-cell>
              <table:table-cell office:value-type="float" office:value="0.06334873">
                <text:p>0.06334873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598.246826171875">
                <text:p>598.246826171875</text:p>
              </table:table-cell>
              <table:table-cell office:value-type="float" office:value="0.07566453">
                <text:p>0.07566453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598.365661621094">
                <text:p>598.365661621094</text:p>
              </table:table-cell>
              <table:table-cell office:value-type="float" office:value="0.07136661">
                <text:p>0.07136661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598.484497070313">
                <text:p>598.484497070313</text:p>
              </table:table-cell>
              <table:table-cell office:value-type="float" office:value="0.06692412">
                <text:p>0.06692412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598.603393554688">
                <text:p>598.603393554688</text:p>
              </table:table-cell>
              <table:table-cell office:value-type="float" office:value="0.07521607">
                <text:p>0.07521607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598.722229003906">
                <text:p>598.722229003906</text:p>
              </table:table-cell>
              <table:table-cell office:value-type="float" office:value="0.06307247">
                <text:p>0.06307247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598.841064453125">
                <text:p>598.841064453125</text:p>
              </table:table-cell>
              <table:table-cell office:value-type="float" office:value="0.06561634">
                <text:p>0.06561634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598.9599609375">
                <text:p>598.9599609375</text:p>
              </table:table-cell>
              <table:table-cell office:value-type="float" office:value="0.07871869">
                <text:p>0.07871869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599.078796386719">
                <text:p>599.078796386719</text:p>
              </table:table-cell>
              <table:table-cell office:value-type="float" office:value="0.07807305">
                <text:p>0.07807305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599.197692871094">
                <text:p>599.197692871094</text:p>
              </table:table-cell>
              <table:table-cell office:value-type="float" office:value="0.0708468">
                <text:p>0.0708468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599.316528320313">
                <text:p>599.316528320313</text:p>
              </table:table-cell>
              <table:table-cell office:value-type="float" office:value="0.05534307">
                <text:p>0.05534307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599.435424804688">
                <text:p>599.435424804688</text:p>
              </table:table-cell>
              <table:table-cell office:value-type="float" office:value="0.07203336">
                <text:p>0.07203336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599.554321289063">
                <text:p>599.554321289063</text:p>
              </table:table-cell>
              <table:table-cell office:value-type="float" office:value="0.0583198">
                <text:p>0.0583198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599.673156738281">
                <text:p>599.673156738281</text:p>
              </table:table-cell>
              <table:table-cell office:value-type="float" office:value="0.06285133">
                <text:p>0.06285133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599.792053222656">
                <text:p>599.792053222656</text:p>
              </table:table-cell>
              <table:table-cell office:value-type="float" office:value="0.06946352">
                <text:p>0.06946352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599.910949707031">
                <text:p>599.910949707031</text:p>
              </table:table-cell>
              <table:table-cell office:value-type="float" office:value="0.07008608">
                <text:p>0.07008608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600.02978515625">
                <text:p>600.02978515625</text:p>
              </table:table-cell>
              <table:table-cell office:value-type="float" office:value="0.06252521">
                <text:p>0.06252521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600.148681640625">
                <text:p>600.148681640625</text:p>
              </table:table-cell>
              <table:table-cell office:value-type="float" office:value="0.06991025">
                <text:p>0.06991025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600.267578125">
                <text:p>600.267578125</text:p>
              </table:table-cell>
              <table:table-cell office:value-type="float" office:value="0.06117096">
                <text:p>0.06117096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600.386474609375">
                <text:p>600.386474609375</text:p>
              </table:table-cell>
              <table:table-cell office:value-type="float" office:value="0.05739374">
                <text:p>0.05739374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600.50537109375">
                <text:p>600.50537109375</text:p>
              </table:table-cell>
              <table:table-cell office:value-type="float" office:value="0.08376013">
                <text:p>0.08376013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600.624267578125">
                <text:p>600.624267578125</text:p>
              </table:table-cell>
              <table:table-cell office:value-type="float" office:value="0.05651002">
                <text:p>0.05651002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600.7431640625">
                <text:p>600.7431640625</text:p>
              </table:table-cell>
              <table:table-cell office:value-type="float" office:value="0.0615591">
                <text:p>0.0615591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600.862060546875">
                <text:p>600.862060546875</text:p>
              </table:table-cell>
              <table:table-cell office:value-type="float" office:value="0.05364291">
                <text:p>0.05364291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600.98095703125">
                <text:p>600.98095703125</text:p>
              </table:table-cell>
              <table:table-cell office:value-type="float" office:value="0.06401297">
                <text:p>0.06401297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601.099853515625">
                <text:p>601.099853515625</text:p>
              </table:table-cell>
              <table:table-cell office:value-type="float" office:value="0.05397478">
                <text:p>0.05397478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601.21875">
                <text:p>601.21875</text:p>
              </table:table-cell>
              <table:table-cell office:value-type="float" office:value="0.06389358">
                <text:p>0.06389358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601.337646484375">
                <text:p>601.337646484375</text:p>
              </table:table-cell>
              <table:table-cell office:value-type="float" office:value="0.06252934">
                <text:p>0.06252934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601.45654296875">
                <text:p>601.45654296875</text:p>
              </table:table-cell>
              <table:table-cell office:value-type="float" office:value="0.06047672">
                <text:p>0.06047672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601.575500488281">
                <text:p>601.575500488281</text:p>
              </table:table-cell>
              <table:table-cell office:value-type="float" office:value="0.05855865">
                <text:p>0.05855865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601.694396972656">
                <text:p>601.694396972656</text:p>
              </table:table-cell>
              <table:table-cell office:value-type="float" office:value="0.06095881">
                <text:p>0.06095881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601.813293457031">
                <text:p>601.813293457031</text:p>
              </table:table-cell>
              <table:table-cell office:value-type="float" office:value="0.06148128">
                <text:p>0.06148128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601.932250976563">
                <text:p>601.932250976563</text:p>
              </table:table-cell>
              <table:table-cell office:value-type="float" office:value="0.05658564">
                <text:p>0.05658564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602.051147460938">
                <text:p>602.051147460938</text:p>
              </table:table-cell>
              <table:table-cell office:value-type="float" office:value="0.06440125">
                <text:p>0.06440125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602.170043945313">
                <text:p>602.170043945313</text:p>
              </table:table-cell>
              <table:table-cell office:value-type="float" office:value="0.06666929">
                <text:p>0.06666929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602.289001464844">
                <text:p>602.289001464844</text:p>
              </table:table-cell>
              <table:table-cell office:value-type="float" office:value="0.05016838">
                <text:p>0.05016838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602.407897949219">
                <text:p>602.407897949219</text:p>
              </table:table-cell>
              <table:table-cell office:value-type="float" office:value="0.06242536">
                <text:p>0.06242536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602.52685546875">
                <text:p>602.52685546875</text:p>
              </table:table-cell>
              <table:table-cell office:value-type="float" office:value="0.06435675">
                <text:p>0.06435675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602.645751953125">
                <text:p>602.645751953125</text:p>
              </table:table-cell>
              <table:table-cell office:value-type="float" office:value="0.05055742">
                <text:p>0.05055742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602.764709472656">
                <text:p>602.764709472656</text:p>
              </table:table-cell>
              <table:table-cell office:value-type="float" office:value="0.05406854">
                <text:p>0.05406854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602.883666992188">
                <text:p>602.883666992188</text:p>
              </table:table-cell>
              <table:table-cell office:value-type="float" office:value="0.04520343">
                <text:p>0.04520343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603.002563476563">
                <text:p>603.002563476563</text:p>
              </table:table-cell>
              <table:table-cell office:value-type="float" office:value="0.05703541">
                <text:p>0.05703541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603.121520996094">
                <text:p>603.121520996094</text:p>
              </table:table-cell>
              <table:table-cell office:value-type="float" office:value="0.06026931">
                <text:p>0.06026931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603.240478515625">
                <text:p>603.240478515625</text:p>
              </table:table-cell>
              <table:table-cell office:value-type="float" office:value="0.06429581">
                <text:p>0.06429581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603.359436035156">
                <text:p>603.359436035156</text:p>
              </table:table-cell>
              <table:table-cell office:value-type="float" office:value="0.06520545">
                <text:p>0.06520545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603.478393554688">
                <text:p>603.478393554688</text:p>
              </table:table-cell>
              <table:table-cell office:value-type="float" office:value="0.05731298">
                <text:p>0.05731298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603.597290039063">
                <text:p>603.597290039063</text:p>
              </table:table-cell>
              <table:table-cell office:value-type="float" office:value="0.05643871">
                <text:p>0.05643871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603.716247558594">
                <text:p>603.716247558594</text:p>
              </table:table-cell>
              <table:table-cell office:value-type="float" office:value="0.05476691">
                <text:p>0.05476691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603.835205078125">
                <text:p>603.835205078125</text:p>
              </table:table-cell>
              <table:table-cell office:value-type="float" office:value="0.04882822">
                <text:p>0.04882822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603.954162597656">
                <text:p>603.954162597656</text:p>
              </table:table-cell>
              <table:table-cell office:value-type="float" office:value="0.05028445">
                <text:p>0.05028445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604.073120117188">
                <text:p>604.073120117188</text:p>
              </table:table-cell>
              <table:table-cell office:value-type="float" office:value="0.05004144">
                <text:p>0.05004144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604.192077636719">
                <text:p>604.192077636719</text:p>
              </table:table-cell>
              <table:table-cell office:value-type="float" office:value="0.04735726">
                <text:p>0.04735726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604.31103515625">
                <text:p>604.31103515625</text:p>
              </table:table-cell>
              <table:table-cell office:value-type="float" office:value="0.06935419">
                <text:p>0.06935419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604.430053710938">
                <text:p>604.430053710938</text:p>
              </table:table-cell>
              <table:table-cell office:value-type="float" office:value="0.05507815">
                <text:p>0.05507815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604.549011230469">
                <text:p>604.549011230469</text:p>
              </table:table-cell>
              <table:table-cell office:value-type="float" office:value="0.05058214">
                <text:p>0.05058214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604.66796875">
                <text:p>604.66796875</text:p>
              </table:table-cell>
              <table:table-cell office:value-type="float" office:value="0.05434557">
                <text:p>0.05434557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604.786926269531">
                <text:p>604.786926269531</text:p>
              </table:table-cell>
              <table:table-cell office:value-type="float" office:value="0.06458386">
                <text:p>0.06458386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604.905883789063">
                <text:p>604.905883789063</text:p>
              </table:table-cell>
              <table:table-cell office:value-type="float" office:value="0.06321467">
                <text:p>0.06321467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605.02490234375">
                <text:p>605.02490234375</text:p>
              </table:table-cell>
              <table:table-cell office:value-type="float" office:value="0.05175003">
                <text:p>0.05175003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605.143859863281">
                <text:p>605.143859863281</text:p>
              </table:table-cell>
              <table:table-cell office:value-type="float" office:value="0.04831376">
                <text:p>0.04831376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05.262817382813">
                <text:p>605.262817382813</text:p>
              </table:table-cell>
              <table:table-cell office:value-type="float" office:value="0.04677698">
                <text:p>0.04677698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605.3818359375">
                <text:p>605.3818359375</text:p>
              </table:table-cell>
              <table:table-cell office:value-type="float" office:value="0.05553302">
                <text:p>0.05553302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605.500793457031">
                <text:p>605.500793457031</text:p>
              </table:table-cell>
              <table:table-cell office:value-type="float" office:value="0.05143654">
                <text:p>0.05143654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605.619812011719">
                <text:p>605.619812011719</text:p>
              </table:table-cell>
              <table:table-cell office:value-type="float" office:value="0.05426405">
                <text:p>0.05426405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605.73876953125">
                <text:p>605.73876953125</text:p>
              </table:table-cell>
              <table:table-cell office:value-type="float" office:value="0.04901459">
                <text:p>0.04901459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605.857788085938">
                <text:p>605.857788085938</text:p>
              </table:table-cell>
              <table:table-cell office:value-type="float" office:value="0.0616364">
                <text:p>0.0616364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605.976806640625">
                <text:p>605.976806640625</text:p>
              </table:table-cell>
              <table:table-cell office:value-type="float" office:value="0.06305365">
                <text:p>0.06305365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606.095764160156">
                <text:p>606.095764160156</text:p>
              </table:table-cell>
              <table:table-cell office:value-type="float" office:value="0.05465509">
                <text:p>0.05465509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606.214782714844">
                <text:p>606.214782714844</text:p>
              </table:table-cell>
              <table:table-cell office:value-type="float" office:value="0.06252383">
                <text:p>0.06252383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606.333801269531">
                <text:p>606.333801269531</text:p>
              </table:table-cell>
              <table:table-cell office:value-type="float" office:value="0.04691834">
                <text:p>0.04691834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606.452758789063">
                <text:p>606.452758789063</text:p>
              </table:table-cell>
              <table:table-cell office:value-type="float" office:value="0.05878727">
                <text:p>0.05878727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606.57177734375">
                <text:p>606.57177734375</text:p>
              </table:table-cell>
              <table:table-cell office:value-type="float" office:value="0.04663991">
                <text:p>0.04663991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606.690795898438">
                <text:p>606.690795898438</text:p>
              </table:table-cell>
              <table:table-cell office:value-type="float" office:value="0.05334295">
                <text:p>0.05334295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606.809814453125">
                <text:p>606.809814453125</text:p>
              </table:table-cell>
              <table:table-cell office:value-type="float" office:value="0.04627261">
                <text:p>0.04627261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606.928833007813">
                <text:p>606.928833007813</text:p>
              </table:table-cell>
              <table:table-cell office:value-type="float" office:value="0.04630347">
                <text:p>0.04630347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607.0478515625">
                <text:p>607.0478515625</text:p>
              </table:table-cell>
              <table:table-cell office:value-type="float" office:value="0.04429651">
                <text:p>0.04429651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607.166870117188">
                <text:p>607.166870117188</text:p>
              </table:table-cell>
              <table:table-cell office:value-type="float" office:value="0.06780029">
                <text:p>0.06780029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607.285888671875">
                <text:p>607.285888671875</text:p>
              </table:table-cell>
              <table:table-cell office:value-type="float" office:value="0.06004392">
                <text:p>0.06004392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607.404907226563">
                <text:p>607.404907226563</text:p>
              </table:table-cell>
              <table:table-cell office:value-type="float" office:value="0.05325634">
                <text:p>0.05325634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607.52392578125">
                <text:p>607.52392578125</text:p>
              </table:table-cell>
              <table:table-cell office:value-type="float" office:value="0.05230046">
                <text:p>0.05230046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607.642944335938">
                <text:p>607.642944335938</text:p>
              </table:table-cell>
              <table:table-cell office:value-type="float" office:value="0.05583718">
                <text:p>0.05583718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607.761962890625">
                <text:p>607.761962890625</text:p>
              </table:table-cell>
              <table:table-cell office:value-type="float" office:value="0.06955842">
                <text:p>0.06955842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607.880981445313">
                <text:p>607.880981445313</text:p>
              </table:table-cell>
              <table:table-cell office:value-type="float" office:value="0.059426">
                <text:p>0.059426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608">
                <text:p>608</text:p>
              </table:table-cell>
              <table:table-cell office:value-type="float" office:value="0.04443229">
                <text:p>0.04443229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608.119079589844">
                <text:p>608.119079589844</text:p>
              </table:table-cell>
              <table:table-cell office:value-type="float" office:value="0.0494039">
                <text:p>0.0494039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608.238098144531">
                <text:p>608.238098144531</text:p>
              </table:table-cell>
              <table:table-cell office:value-type="float" office:value="0.04794576">
                <text:p>0.04794576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608.357116699219">
                <text:p>608.357116699219</text:p>
              </table:table-cell>
              <table:table-cell office:value-type="float" office:value="0.04639387">
                <text:p>0.04639387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608.476196289063">
                <text:p>608.476196289063</text:p>
              </table:table-cell>
              <table:table-cell office:value-type="float" office:value="0.05271841">
                <text:p>0.05271841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608.59521484375">
                <text:p>608.59521484375</text:p>
              </table:table-cell>
              <table:table-cell office:value-type="float" office:value="0.06213746">
                <text:p>0.06213746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608.714233398438">
                <text:p>608.714233398438</text:p>
              </table:table-cell>
              <table:table-cell office:value-type="float" office:value="0.05101531">
                <text:p>0.05101531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608.833312988281">
                <text:p>608.833312988281</text:p>
              </table:table-cell>
              <table:table-cell office:value-type="float" office:value="0.05018383">
                <text:p>0.05018383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608.952331542969">
                <text:p>608.952331542969</text:p>
              </table:table-cell>
              <table:table-cell office:value-type="float" office:value="0.03954014">
                <text:p>0.03954014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609.071411132813">
                <text:p>609.071411132813</text:p>
              </table:table-cell>
              <table:table-cell office:value-type="float" office:value="0.04231406">
                <text:p>0.04231406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609.1904296875">
                <text:p>609.1904296875</text:p>
              </table:table-cell>
              <table:table-cell office:value-type="float" office:value="0.04078097">
                <text:p>0.04078097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609.309509277344">
                <text:p>609.309509277344</text:p>
              </table:table-cell>
              <table:table-cell office:value-type="float" office:value="0.06039241">
                <text:p>0.06039241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609.428588867188">
                <text:p>609.428588867188</text:p>
              </table:table-cell>
              <table:table-cell office:value-type="float" office:value="0.05060082">
                <text:p>0.05060082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609.547607421875">
                <text:p>609.547607421875</text:p>
              </table:table-cell>
              <table:table-cell office:value-type="float" office:value="0.04991437">
                <text:p>0.04991437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609.666687011719">
                <text:p>609.666687011719</text:p>
              </table:table-cell>
              <table:table-cell office:value-type="float" office:value="0.0472746">
                <text:p>0.0472746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609.785766601563">
                <text:p>609.785766601563</text:p>
              </table:table-cell>
              <table:table-cell office:value-type="float" office:value="0.04579074">
                <text:p>0.04579074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609.904846191406">
                <text:p>609.904846191406</text:p>
              </table:table-cell>
              <table:table-cell office:value-type="float" office:value="0.04752973">
                <text:p>0.04752973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610.023864746094">
                <text:p>610.023864746094</text:p>
              </table:table-cell>
              <table:table-cell office:value-type="float" office:value="0.04467519">
                <text:p>0.04467519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610.142944335938">
                <text:p>610.142944335938</text:p>
              </table:table-cell>
              <table:table-cell office:value-type="float" office:value="0.04467076">
                <text:p>0.04467076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610.262023925781">
                <text:p>610.262023925781</text:p>
              </table:table-cell>
              <table:table-cell office:value-type="float" office:value="0.06172044">
                <text:p>0.06172044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610.381103515625">
                <text:p>610.381103515625</text:p>
              </table:table-cell>
              <table:table-cell office:value-type="float" office:value="0.04839315">
                <text:p>0.04839315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610.500183105469">
                <text:p>610.500183105469</text:p>
              </table:table-cell>
              <table:table-cell office:value-type="float" office:value="0.04551068">
                <text:p>0.04551068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610.619262695313">
                <text:p>610.619262695313</text:p>
              </table:table-cell>
              <table:table-cell office:value-type="float" office:value="0.04081975">
                <text:p>0.04081975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610.738342285156">
                <text:p>610.738342285156</text:p>
              </table:table-cell>
              <table:table-cell office:value-type="float" office:value="0.04746809">
                <text:p>0.04746809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610.857421875">
                <text:p>610.857421875</text:p>
              </table:table-cell>
              <table:table-cell office:value-type="float" office:value="0.04119908">
                <text:p>0.04119908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610.976501464844">
                <text:p>610.976501464844</text:p>
              </table:table-cell>
              <table:table-cell office:value-type="float" office:value="0.05081379">
                <text:p>0.05081379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611.095581054688">
                <text:p>611.095581054688</text:p>
              </table:table-cell>
              <table:table-cell office:value-type="float" office:value="0.04650587">
                <text:p>0.04650587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611.214660644531">
                <text:p>611.214660644531</text:p>
              </table:table-cell>
              <table:table-cell office:value-type="float" office:value="0.04340166">
                <text:p>0.04340166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611.333801269531">
                <text:p>611.333801269531</text:p>
              </table:table-cell>
              <table:table-cell office:value-type="float" office:value="0.04026086">
                <text:p>0.04026086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611.452880859375">
                <text:p>611.452880859375</text:p>
              </table:table-cell>
              <table:table-cell office:value-type="float" office:value="0.0340906">
                <text:p>0.0340906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611.571960449219">
                <text:p>611.571960449219</text:p>
              </table:table-cell>
              <table:table-cell office:value-type="float" office:value="0.04638609">
                <text:p>0.04638609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611.691040039063">
                <text:p>611.691040039063</text:p>
              </table:table-cell>
              <table:table-cell office:value-type="float" office:value="0.04701268">
                <text:p>0.04701268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611.810180664063">
                <text:p>611.810180664063</text:p>
              </table:table-cell>
              <table:table-cell office:value-type="float" office:value="0.04542082">
                <text:p>0.04542082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611.929260253906">
                <text:p>611.929260253906</text:p>
              </table:table-cell>
              <table:table-cell office:value-type="float" office:value="0.04497458">
                <text:p>0.04497458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612.048400878906">
                <text:p>612.048400878906</text:p>
              </table:table-cell>
              <table:table-cell office:value-type="float" office:value="0.0465495">
                <text:p>0.0465495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612.16748046875">
                <text:p>612.16748046875</text:p>
              </table:table-cell>
              <table:table-cell office:value-type="float" office:value="0.03888012">
                <text:p>0.03888012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612.286560058594">
                <text:p>612.286560058594</text:p>
              </table:table-cell>
              <table:table-cell office:value-type="float" office:value="0.05009894">
                <text:p>0.05009894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612.405700683594">
                <text:p>612.405700683594</text:p>
              </table:table-cell>
              <table:table-cell office:value-type="float" office:value="0.05087712">
                <text:p>0.05087712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612.524780273438">
                <text:p>612.524780273438</text:p>
              </table:table-cell>
              <table:table-cell office:value-type="float" office:value="0.04032421">
                <text:p>0.04032421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612.643920898438">
                <text:p>612.643920898438</text:p>
              </table:table-cell>
              <table:table-cell office:value-type="float" office:value="0.03558974">
                <text:p>0.03558974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612.763061523438">
                <text:p>612.763061523438</text:p>
              </table:table-cell>
              <table:table-cell office:value-type="float" office:value="0.05289705">
                <text:p>0.05289705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612.882141113281">
                <text:p>612.882141113281</text:p>
              </table:table-cell>
              <table:table-cell office:value-type="float" office:value="0.03655673">
                <text:p>0.03655673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613.001281738281">
                <text:p>613.001281738281</text:p>
              </table:table-cell>
              <table:table-cell office:value-type="float" office:value="0.04320281">
                <text:p>0.04320281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613.120422363281">
                <text:p>613.120422363281</text:p>
              </table:table-cell>
              <table:table-cell office:value-type="float" office:value="0.03880452">
                <text:p>0.03880452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613.239501953125">
                <text:p>613.239501953125</text:p>
              </table:table-cell>
              <table:table-cell office:value-type="float" office:value="0.04216353">
                <text:p>0.04216353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613.358642578125">
                <text:p>613.358642578125</text:p>
              </table:table-cell>
              <table:table-cell office:value-type="float" office:value="0.04668001">
                <text:p>0.04668001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613.477783203125">
                <text:p>613.477783203125</text:p>
              </table:table-cell>
              <table:table-cell office:value-type="float" office:value="0.03696105">
                <text:p>0.03696105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613.596923828125">
                <text:p>613.596923828125</text:p>
              </table:table-cell>
              <table:table-cell office:value-type="float" office:value="0.03140146">
                <text:p>0.03140146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613.716064453125">
                <text:p>613.716064453125</text:p>
              </table:table-cell>
              <table:table-cell office:value-type="float" office:value="0.03568156">
                <text:p>0.03568156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613.835205078125">
                <text:p>613.835205078125</text:p>
              </table:table-cell>
              <table:table-cell office:value-type="float" office:value="0.03462349">
                <text:p>0.03462349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613.954345703125">
                <text:p>613.954345703125</text:p>
              </table:table-cell>
              <table:table-cell office:value-type="float" office:value="0.03058184">
                <text:p>0.03058184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614.073486328125">
                <text:p>614.073486328125</text:p>
              </table:table-cell>
              <table:table-cell office:value-type="float" office:value="0.03681846">
                <text:p>0.03681846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614.192626953125">
                <text:p>614.192626953125</text:p>
              </table:table-cell>
              <table:table-cell office:value-type="float" office:value="0.05593207">
                <text:p>0.05593207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614.311767578125">
                <text:p>614.311767578125</text:p>
              </table:table-cell>
              <table:table-cell office:value-type="float" office:value="0.03440591">
                <text:p>0.03440591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614.430908203125">
                <text:p>614.430908203125</text:p>
              </table:table-cell>
              <table:table-cell office:value-type="float" office:value="0.03525918">
                <text:p>0.03525918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614.550048828125">
                <text:p>614.550048828125</text:p>
              </table:table-cell>
              <table:table-cell office:value-type="float" office:value="0.0339476">
                <text:p>0.0339476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614.669189453125">
                <text:p>614.669189453125</text:p>
              </table:table-cell>
              <table:table-cell office:value-type="float" office:value="0.04553558">
                <text:p>0.04553558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614.788330078125">
                <text:p>614.788330078125</text:p>
              </table:table-cell>
              <table:table-cell office:value-type="float" office:value="0.0357352">
                <text:p>0.0357352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614.907531738281">
                <text:p>614.907531738281</text:p>
              </table:table-cell>
              <table:table-cell office:value-type="float" office:value="0.04040817">
                <text:p>0.04040817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615.026672363281">
                <text:p>615.026672363281</text:p>
              </table:table-cell>
              <table:table-cell office:value-type="float" office:value="0.03935277">
                <text:p>0.03935277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615.145812988281">
                <text:p>615.145812988281</text:p>
              </table:table-cell>
              <table:table-cell office:value-type="float" office:value="0.0615947">
                <text:p>0.0615947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615.264953613281">
                <text:p>615.264953613281</text:p>
              </table:table-cell>
              <table:table-cell office:value-type="float" office:value="0.0410895">
                <text:p>0.0410895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615.384155273438">
                <text:p>615.384155273438</text:p>
              </table:table-cell>
              <table:table-cell office:value-type="float" office:value="0.04209759">
                <text:p>0.04209759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615.503295898438">
                <text:p>615.503295898438</text:p>
              </table:table-cell>
              <table:table-cell office:value-type="float" office:value="0.0344546">
                <text:p>0.0344546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615.622497558594">
                <text:p>615.622497558594</text:p>
              </table:table-cell>
              <table:table-cell office:value-type="float" office:value="0.04530589">
                <text:p>0.04530589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615.741638183594">
                <text:p>615.741638183594</text:p>
              </table:table-cell>
              <table:table-cell office:value-type="float" office:value="0.03388613">
                <text:p>0.03388613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615.86083984375">
                <text:p>615.86083984375</text:p>
              </table:table-cell>
              <table:table-cell office:value-type="float" office:value="0.03805709">
                <text:p>0.03805709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615.97998046875">
                <text:p>615.97998046875</text:p>
              </table:table-cell>
              <table:table-cell office:value-type="float" office:value="0.03537781">
                <text:p>0.03537781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616.099182128906">
                <text:p>616.099182128906</text:p>
              </table:table-cell>
              <table:table-cell office:value-type="float" office:value="0.03703194">
                <text:p>0.03703194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616.218322753906">
                <text:p>616.218322753906</text:p>
              </table:table-cell>
              <table:table-cell office:value-type="float" office:value="0.04274095">
                <text:p>0.04274095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616.337524414063">
                <text:p>616.337524414063</text:p>
              </table:table-cell>
              <table:table-cell office:value-type="float" office:value="0.03210229">
                <text:p>0.03210229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616.456726074219">
                <text:p>616.456726074219</text:p>
              </table:table-cell>
              <table:table-cell office:value-type="float" office:value="0.0497347">
                <text:p>0.0497347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616.575866699219">
                <text:p>616.575866699219</text:p>
              </table:table-cell>
              <table:table-cell office:value-type="float" office:value="0.03325855">
                <text:p>0.03325855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616.695068359375">
                <text:p>616.695068359375</text:p>
              </table:table-cell>
              <table:table-cell office:value-type="float" office:value="0.02775184">
                <text:p>0.02775184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616.814270019531">
                <text:p>616.814270019531</text:p>
              </table:table-cell>
              <table:table-cell office:value-type="float" office:value="0.03284021">
                <text:p>0.03284021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616.933471679688">
                <text:p>616.933471679688</text:p>
              </table:table-cell>
              <table:table-cell office:value-type="float" office:value="0.03715021">
                <text:p>0.03715021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617.052612304688">
                <text:p>617.052612304688</text:p>
              </table:table-cell>
              <table:table-cell office:value-type="float" office:value="0.03502232">
                <text:p>0.03502232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617.171813964844">
                <text:p>617.171813964844</text:p>
              </table:table-cell>
              <table:table-cell office:value-type="float" office:value="0.04321785">
                <text:p>0.04321785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617.291015625">
                <text:p>617.291015625</text:p>
              </table:table-cell>
              <table:table-cell office:value-type="float" office:value="0.03015971">
                <text:p>0.03015971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617.410217285156">
                <text:p>617.410217285156</text:p>
              </table:table-cell>
              <table:table-cell office:value-type="float" office:value="0.03584689">
                <text:p>0.03584689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617.529418945313">
                <text:p>617.529418945313</text:p>
              </table:table-cell>
              <table:table-cell office:value-type="float" office:value="0.04162322">
                <text:p>0.04162322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617.648620605469">
                <text:p>617.648620605469</text:p>
              </table:table-cell>
              <table:table-cell office:value-type="float" office:value="0.03376826">
                <text:p>0.03376826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617.767822265625">
                <text:p>617.767822265625</text:p>
              </table:table-cell>
              <table:table-cell office:value-type="float" office:value="0.05571878">
                <text:p>0.05571878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617.887023925781">
                <text:p>617.887023925781</text:p>
              </table:table-cell>
              <table:table-cell office:value-type="float" office:value="0.04091686">
                <text:p>0.04091686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618.006225585938">
                <text:p>618.006225585938</text:p>
              </table:table-cell>
              <table:table-cell office:value-type="float" office:value="0.03234505">
                <text:p>0.03234505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618.125427246094">
                <text:p>618.125427246094</text:p>
              </table:table-cell>
              <table:table-cell office:value-type="float" office:value="0.03889239">
                <text:p>0.03889239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618.24462890625">
                <text:p>618.24462890625</text:p>
              </table:table-cell>
              <table:table-cell office:value-type="float" office:value="0.04183659">
                <text:p>0.04183659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618.363891601563">
                <text:p>618.363891601563</text:p>
              </table:table-cell>
              <table:table-cell office:value-type="float" office:value="0.04141567">
                <text:p>0.04141567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618.483093261719">
                <text:p>618.483093261719</text:p>
              </table:table-cell>
              <table:table-cell office:value-type="float" office:value="0.0315267">
                <text:p>0.0315267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618.602294921875">
                <text:p>618.602294921875</text:p>
              </table:table-cell>
              <table:table-cell office:value-type="float" office:value="0.03606431">
                <text:p>0.03606431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618.721496582031">
                <text:p>618.721496582031</text:p>
              </table:table-cell>
              <table:table-cell office:value-type="float" office:value="0.04883777">
                <text:p>0.04883777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618.840759277344">
                <text:p>618.840759277344</text:p>
              </table:table-cell>
              <table:table-cell office:value-type="float" office:value="0.02916712">
                <text:p>0.02916712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618.9599609375">
                <text:p>618.9599609375</text:p>
              </table:table-cell>
              <table:table-cell office:value-type="float" office:value="0.04145543">
                <text:p>0.04145543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619.079162597656">
                <text:p>619.079162597656</text:p>
              </table:table-cell>
              <table:table-cell office:value-type="float" office:value="0.02571066">
                <text:p>0.02571066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619.198425292969">
                <text:p>619.198425292969</text:p>
              </table:table-cell>
              <table:table-cell office:value-type="float" office:value="0.04708839">
                <text:p>0.04708839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619.317626953125">
                <text:p>619.317626953125</text:p>
              </table:table-cell>
              <table:table-cell office:value-type="float" office:value="0.03005991">
                <text:p>0.03005991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619.436889648438">
                <text:p>619.436889648438</text:p>
              </table:table-cell>
              <table:table-cell office:value-type="float" office:value="0.03969133">
                <text:p>0.03969133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619.556091308594">
                <text:p>619.556091308594</text:p>
              </table:table-cell>
              <table:table-cell office:value-type="float" office:value="0.03438986">
                <text:p>0.03438986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619.675354003906">
                <text:p>619.675354003906</text:p>
              </table:table-cell>
              <table:table-cell office:value-type="float" office:value="0.02880531">
                <text:p>0.02880531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619.794616699219">
                <text:p>619.794616699219</text:p>
              </table:table-cell>
              <table:table-cell office:value-type="float" office:value="0.03460264">
                <text:p>0.03460264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619.913818359375">
                <text:p>619.913818359375</text:p>
              </table:table-cell>
              <table:table-cell office:value-type="float" office:value="0.02370018">
                <text:p>0.02370018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620.033081054688">
                <text:p>620.033081054688</text:p>
              </table:table-cell>
              <table:table-cell office:value-type="float" office:value="0.04896728">
                <text:p>0.04896728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620.152282714844">
                <text:p>620.152282714844</text:p>
              </table:table-cell>
              <table:table-cell office:value-type="float" office:value="0.03742202">
                <text:p>0.03742202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620.271545410156">
                <text:p>620.271545410156</text:p>
              </table:table-cell>
              <table:table-cell office:value-type="float" office:value="0.03490524">
                <text:p>0.03490524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620.390808105469">
                <text:p>620.390808105469</text:p>
              </table:table-cell>
              <table:table-cell office:value-type="float" office:value="0.02467237">
                <text:p>0.02467237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620.510070800781">
                <text:p>620.510070800781</text:p>
              </table:table-cell>
              <table:table-cell office:value-type="float" office:value="0.02990134">
                <text:p>0.02990134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620.629333496094">
                <text:p>620.629333496094</text:p>
              </table:table-cell>
              <table:table-cell office:value-type="float" office:value="0.02866118">
                <text:p>0.02866118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620.74853515625">
                <text:p>620.74853515625</text:p>
              </table:table-cell>
              <table:table-cell office:value-type="float" office:value="0.02279874">
                <text:p>0.02279874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620.867797851563">
                <text:p>620.867797851563</text:p>
              </table:table-cell>
              <table:table-cell office:value-type="float" office:value="0.05446887">
                <text:p>0.05446887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620.987060546875">
                <text:p>620.987060546875</text:p>
              </table:table-cell>
              <table:table-cell office:value-type="float" office:value="0.02751532">
                <text:p>0.02751532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621.106323242188">
                <text:p>621.106323242188</text:p>
              </table:table-cell>
              <table:table-cell office:value-type="float" office:value="0.02754774">
                <text:p>0.02754774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621.2255859375">
                <text:p>621.2255859375</text:p>
              </table:table-cell>
              <table:table-cell office:value-type="float" office:value="0.03305178">
                <text:p>0.03305178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621.344848632813">
                <text:p>621.344848632813</text:p>
              </table:table-cell>
              <table:table-cell office:value-type="float" office:value="0.0242866">
                <text:p>0.0242866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621.464111328125">
                <text:p>621.464111328125</text:p>
              </table:table-cell>
              <table:table-cell office:value-type="float" office:value="0.0258326">
                <text:p>0.0258326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621.583374023438">
                <text:p>621.583374023438</text:p>
              </table:table-cell>
              <table:table-cell office:value-type="float" office:value="0.05041833">
                <text:p>0.05041833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621.70263671875">
                <text:p>621.70263671875</text:p>
              </table:table-cell>
              <table:table-cell office:value-type="float" office:value="0.03163116">
                <text:p>0.03163116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621.821899414063">
                <text:p>621.821899414063</text:p>
              </table:table-cell>
              <table:table-cell office:value-type="float" office:value="0.0539169">
                <text:p>0.0539169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621.941223144531">
                <text:p>621.941223144531</text:p>
              </table:table-cell>
              <table:table-cell office:value-type="float" office:value="0.02043969">
                <text:p>0.02043969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622.060485839844">
                <text:p>622.060485839844</text:p>
              </table:table-cell>
              <table:table-cell office:value-type="float" office:value="0.03853147">
                <text:p>0.03853147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622.179748535156">
                <text:p>622.179748535156</text:p>
              </table:table-cell>
              <table:table-cell office:value-type="float" office:value="0.04278624">
                <text:p>0.04278624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622.299011230469">
                <text:p>622.299011230469</text:p>
              </table:table-cell>
              <table:table-cell office:value-type="float" office:value="0.02636956">
                <text:p>0.02636956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622.418334960938">
                <text:p>622.418334960938</text:p>
              </table:table-cell>
              <table:table-cell office:value-type="float" office:value="0.02872783">
                <text:p>0.02872783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622.53759765625">
                <text:p>622.53759765625</text:p>
              </table:table-cell>
              <table:table-cell office:value-type="float" office:value="0.02824996">
                <text:p>0.02824996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622.656860351563">
                <text:p>622.656860351563</text:p>
              </table:table-cell>
              <table:table-cell office:value-type="float" office:value="0.02469139">
                <text:p>0.02469139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622.776184082031">
                <text:p>622.776184082031</text:p>
              </table:table-cell>
              <table:table-cell office:value-type="float" office:value="0.0305564">
                <text:p>0.0305564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622.895446777344">
                <text:p>622.895446777344</text:p>
              </table:table-cell>
              <table:table-cell office:value-type="float" office:value="0.03201463">
                <text:p>0.03201463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623.014709472656">
                <text:p>623.014709472656</text:p>
              </table:table-cell>
              <table:table-cell office:value-type="float" office:value="0.02904685">
                <text:p>0.02904685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623.134033203125">
                <text:p>623.134033203125</text:p>
              </table:table-cell>
              <table:table-cell office:value-type="float" office:value="0.02133883">
                <text:p>0.02133883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623.253295898438">
                <text:p>623.253295898438</text:p>
              </table:table-cell>
              <table:table-cell office:value-type="float" office:value="0.02472642">
                <text:p>0.02472642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623.372619628906">
                <text:p>623.372619628906</text:p>
              </table:table-cell>
              <table:table-cell office:value-type="float" office:value="0.03386154">
                <text:p>0.03386154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623.491943359375">
                <text:p>623.491943359375</text:p>
              </table:table-cell>
              <table:table-cell office:value-type="float" office:value="0.02810921">
                <text:p>0.02810921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623.611206054688">
                <text:p>623.611206054688</text:p>
              </table:table-cell>
              <table:table-cell office:value-type="float" office:value="0.023146">
                <text:p>0.023146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623.730529785156">
                <text:p>623.730529785156</text:p>
              </table:table-cell>
              <table:table-cell office:value-type="float" office:value="0.02948151">
                <text:p>0.02948151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623.849853515625">
                <text:p>623.849853515625</text:p>
              </table:table-cell>
              <table:table-cell office:value-type="float" office:value="0.02750329">
                <text:p>0.02750329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623.969116210938">
                <text:p>623.969116210938</text:p>
              </table:table-cell>
              <table:table-cell office:value-type="float" office:value="0.02658166">
                <text:p>0.02658166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624.088439941406">
                <text:p>624.088439941406</text:p>
              </table:table-cell>
              <table:table-cell office:value-type="float" office:value="0.01776086">
                <text:p>0.01776086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624.207763671875">
                <text:p>624.207763671875</text:p>
              </table:table-cell>
              <table:table-cell office:value-type="float" office:value="0.01794167">
                <text:p>0.01794167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624.327087402344">
                <text:p>624.327087402344</text:p>
              </table:table-cell>
              <table:table-cell office:value-type="float" office:value="0.02565939">
                <text:p>0.02565939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624.446350097656">
                <text:p>624.446350097656</text:p>
              </table:table-cell>
              <table:table-cell office:value-type="float" office:value="0.03992796">
                <text:p>0.03992796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624.565673828125">
                <text:p>624.565673828125</text:p>
              </table:table-cell>
              <table:table-cell office:value-type="float" office:value="0.03149785">
                <text:p>0.03149785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624.684997558594">
                <text:p>624.684997558594</text:p>
              </table:table-cell>
              <table:table-cell office:value-type="float" office:value="0.02841096">
                <text:p>0.02841096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624.804321289063">
                <text:p>624.804321289063</text:p>
              </table:table-cell>
              <table:table-cell office:value-type="float" office:value="0.0266566">
                <text:p>0.0266566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624.923645019531">
                <text:p>624.923645019531</text:p>
              </table:table-cell>
              <table:table-cell office:value-type="float" office:value="0.03097244">
                <text:p>0.03097244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625.04296875">
                <text:p>625.04296875</text:p>
              </table:table-cell>
              <table:table-cell office:value-type="float" office:value="0.01836696">
                <text:p>0.01836696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625.162292480469">
                <text:p>625.162292480469</text:p>
              </table:table-cell>
              <table:table-cell office:value-type="float" office:value="0.02457603">
                <text:p>0.02457603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625.281616210938">
                <text:p>625.281616210938</text:p>
              </table:table-cell>
              <table:table-cell office:value-type="float" office:value="0.03070262">
                <text:p>0.03070262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625.400939941406">
                <text:p>625.400939941406</text:p>
              </table:table-cell>
              <table:table-cell office:value-type="float" office:value="0.02549297">
                <text:p>0.02549297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625.520263671875">
                <text:p>625.520263671875</text:p>
              </table:table-cell>
              <table:table-cell office:value-type="float" office:value="0.02370555">
                <text:p>0.02370555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625.639587402344">
                <text:p>625.639587402344</text:p>
              </table:table-cell>
              <table:table-cell office:value-type="float" office:value="0.02898945">
                <text:p>0.02898945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625.758911132813">
                <text:p>625.758911132813</text:p>
              </table:table-cell>
              <table:table-cell office:value-type="float" office:value="0.0309236">
                <text:p>0.0309236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625.878295898438">
                <text:p>625.878295898438</text:p>
              </table:table-cell>
              <table:table-cell office:value-type="float" office:value="0.02059209">
                <text:p>0.02059209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625.997619628906">
                <text:p>625.997619628906</text:p>
              </table:table-cell>
              <table:table-cell office:value-type="float" office:value="0.01952595">
                <text:p>0.01952595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626.116943359375">
                <text:p>626.116943359375</text:p>
              </table:table-cell>
              <table:table-cell office:value-type="float" office:value="0.02772295">
                <text:p>0.02772295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626.236267089844">
                <text:p>626.236267089844</text:p>
              </table:table-cell>
              <table:table-cell office:value-type="float" office:value="0.02990978">
                <text:p>0.02990978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626.355651855469">
                <text:p>626.355651855469</text:p>
              </table:table-cell>
              <table:table-cell office:value-type="float" office:value="0.04265243">
                <text:p>0.04265243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626.474975585938">
                <text:p>626.474975585938</text:p>
              </table:table-cell>
              <table:table-cell office:value-type="float" office:value="0.01736736">
                <text:p>0.01736736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626.594360351563">
                <text:p>626.594360351563</text:p>
              </table:table-cell>
              <table:table-cell office:value-type="float" office:value="0.03808002">
                <text:p>0.03808002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626.713684082031">
                <text:p>626.713684082031</text:p>
              </table:table-cell>
              <table:table-cell office:value-type="float" office:value="0.02319994">
                <text:p>0.02319994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626.8330078125">
                <text:p>626.8330078125</text:p>
              </table:table-cell>
              <table:table-cell office:value-type="float" office:value="0.03899474">
                <text:p>0.03899474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626.952392578125">
                <text:p>626.952392578125</text:p>
              </table:table-cell>
              <table:table-cell office:value-type="float" office:value="0.02981023">
                <text:p>0.02981023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627.071716308594">
                <text:p>627.071716308594</text:p>
              </table:table-cell>
              <table:table-cell office:value-type="float" office:value="0.03222581">
                <text:p>0.03222581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627.191101074219">
                <text:p>627.191101074219</text:p>
              </table:table-cell>
              <table:table-cell office:value-type="float" office:value="0.03599657">
                <text:p>0.03599657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627.310424804688">
                <text:p>627.310424804688</text:p>
              </table:table-cell>
              <table:table-cell office:value-type="float" office:value="0.02574229">
                <text:p>0.02574229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627.429809570313">
                <text:p>627.429809570313</text:p>
              </table:table-cell>
              <table:table-cell office:value-type="float" office:value="0.01761521">
                <text:p>0.01761521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627.549194335938">
                <text:p>627.549194335938</text:p>
              </table:table-cell>
              <table:table-cell office:value-type="float" office:value="0.0192401">
                <text:p>0.0192401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627.668518066406">
                <text:p>627.668518066406</text:p>
              </table:table-cell>
              <table:table-cell office:value-type="float" office:value="0.03295456">
                <text:p>0.03295456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627.787902832031">
                <text:p>627.787902832031</text:p>
              </table:table-cell>
              <table:table-cell office:value-type="float" office:value="0.02928066">
                <text:p>0.02928066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627.907287597656">
                <text:p>627.907287597656</text:p>
              </table:table-cell>
              <table:table-cell office:value-type="float" office:value="0.02227082">
                <text:p>0.02227082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628.026672363281">
                <text:p>628.026672363281</text:p>
              </table:table-cell>
              <table:table-cell office:value-type="float" office:value="0.01802879">
                <text:p>0.01802879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628.14599609375">
                <text:p>628.14599609375</text:p>
              </table:table-cell>
              <table:table-cell office:value-type="float" office:value="0.0166846">
                <text:p>0.0166846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628.265380859375">
                <text:p>628.265380859375</text:p>
              </table:table-cell>
              <table:table-cell office:value-type="float" office:value="0.02936927">
                <text:p>0.02936927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628.384765625">
                <text:p>628.384765625</text:p>
              </table:table-cell>
              <table:table-cell office:value-type="float" office:value="0.03404078">
                <text:p>0.03404078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628.504150390625">
                <text:p>628.504150390625</text:p>
              </table:table-cell>
              <table:table-cell office:value-type="float" office:value="0.01463594">
                <text:p>0.01463594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628.62353515625">
                <text:p>628.62353515625</text:p>
              </table:table-cell>
              <table:table-cell office:value-type="float" office:value="0.02599142">
                <text:p>0.02599142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628.742919921875">
                <text:p>628.742919921875</text:p>
              </table:table-cell>
              <table:table-cell office:value-type="float" office:value="0.01502488">
                <text:p>0.01502488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628.8623046875">
                <text:p>628.8623046875</text:p>
              </table:table-cell>
              <table:table-cell office:value-type="float" office:value="0.01891041">
                <text:p>0.01891041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628.981689453125">
                <text:p>628.981689453125</text:p>
              </table:table-cell>
              <table:table-cell office:value-type="float" office:value="0.01883882">
                <text:p>0.01883882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629.10107421875">
                <text:p>629.10107421875</text:p>
              </table:table-cell>
              <table:table-cell office:value-type="float" office:value="0.01670424">
                <text:p>0.01670424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629.220458984375">
                <text:p>629.220458984375</text:p>
              </table:table-cell>
              <table:table-cell office:value-type="float" office:value="0.04122764">
                <text:p>0.04122764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629.33984375">
                <text:p>629.33984375</text:p>
              </table:table-cell>
              <table:table-cell office:value-type="float" office:value="0.03222264">
                <text:p>0.03222264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629.459228515625">
                <text:p>629.459228515625</text:p>
              </table:table-cell>
              <table:table-cell office:value-type="float" office:value="0.03199802">
                <text:p>0.03199802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629.57861328125">
                <text:p>629.57861328125</text:p>
              </table:table-cell>
              <table:table-cell office:value-type="float" office:value="0.01595566">
                <text:p>0.01595566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629.697998046875">
                <text:p>629.697998046875</text:p>
              </table:table-cell>
              <table:table-cell office:value-type="float" office:value="0.019989">
                <text:p>0.019989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629.8173828125">
                <text:p>629.8173828125</text:p>
              </table:table-cell>
              <table:table-cell office:value-type="float" office:value="0.02257334">
                <text:p>0.02257334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629.936828613281">
                <text:p>629.936828613281</text:p>
              </table:table-cell>
              <table:table-cell office:value-type="float" office:value="0.04768467">
                <text:p>0.04768467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630.056213378906">
                <text:p>630.056213378906</text:p>
              </table:table-cell>
              <table:table-cell office:value-type="float" office:value="0.03244657">
                <text:p>0.03244657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630.175598144531">
                <text:p>630.175598144531</text:p>
              </table:table-cell>
              <table:table-cell office:value-type="float" office:value="0.03142198">
                <text:p>0.03142198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630.295043945313">
                <text:p>630.295043945313</text:p>
              </table:table-cell>
              <table:table-cell office:value-type="float" office:value="0.01652983">
                <text:p>0.01652983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630.414428710938">
                <text:p>630.414428710938</text:p>
              </table:table-cell>
              <table:table-cell office:value-type="float" office:value="0.02871749">
                <text:p>0.02871749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630.533813476563">
                <text:p>630.533813476563</text:p>
              </table:table-cell>
              <table:table-cell office:value-type="float" office:value="0.01963162">
                <text:p>0.01963162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630.653259277344">
                <text:p>630.653259277344</text:p>
              </table:table-cell>
              <table:table-cell office:value-type="float" office:value="0.01561978">
                <text:p>0.01561978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630.772644042969">
                <text:p>630.772644042969</text:p>
              </table:table-cell>
              <table:table-cell office:value-type="float" office:value="0.01997104">
                <text:p>0.01997104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630.89208984375">
                <text:p>630.89208984375</text:p>
              </table:table-cell>
              <table:table-cell office:value-type="float" office:value="0.02329088">
                <text:p>0.02329088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631.011474609375">
                <text:p>631.011474609375</text:p>
              </table:table-cell>
              <table:table-cell office:value-type="float" office:value="0.030643">
                <text:p>0.030643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631.130920410156">
                <text:p>631.130920410156</text:p>
              </table:table-cell>
              <table:table-cell office:value-type="float" office:value="0.02202598">
                <text:p>0.02202598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631.250305175781">
                <text:p>631.250305175781</text:p>
              </table:table-cell>
              <table:table-cell office:value-type="float" office:value="0.01957079">
                <text:p>0.01957079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631.369750976563">
                <text:p>631.369750976563</text:p>
              </table:table-cell>
              <table:table-cell office:value-type="float" office:value="0.02720094">
                <text:p>0.02720094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631.489135742188">
                <text:p>631.489135742188</text:p>
              </table:table-cell>
              <table:table-cell office:value-type="float" office:value="0.031266">
                <text:p>0.031266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631.608581542969">
                <text:p>631.608581542969</text:p>
              </table:table-cell>
              <table:table-cell office:value-type="float" office:value="0.01593628">
                <text:p>0.01593628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631.72802734375">
                <text:p>631.72802734375</text:p>
              </table:table-cell>
              <table:table-cell office:value-type="float" office:value="0.02801438">
                <text:p>0.02801438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631.847412109375">
                <text:p>631.847412109375</text:p>
              </table:table-cell>
              <table:table-cell office:value-type="float" office:value="0.01919678">
                <text:p>0.01919678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631.966857910156">
                <text:p>631.966857910156</text:p>
              </table:table-cell>
              <table:table-cell office:value-type="float" office:value="0.0358566">
                <text:p>0.0358566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632.086303710938">
                <text:p>632.086303710938</text:p>
              </table:table-cell>
              <table:table-cell office:value-type="float" office:value="0.01335268">
                <text:p>0.01335268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632.205749511719">
                <text:p>632.205749511719</text:p>
              </table:table-cell>
              <table:table-cell office:value-type="float" office:value="0.0205944">
                <text:p>0.0205944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632.3251953125">
                <text:p>632.3251953125</text:p>
              </table:table-cell>
              <table:table-cell office:value-type="float" office:value="0.01942264">
                <text:p>0.01942264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632.444580078125">
                <text:p>632.444580078125</text:p>
              </table:table-cell>
              <table:table-cell office:value-type="float" office:value="0.03013508">
                <text:p>0.03013508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632.564025878906">
                <text:p>632.564025878906</text:p>
              </table:table-cell>
              <table:table-cell office:value-type="float" office:value="0.02062662">
                <text:p>0.02062662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632.683471679688">
                <text:p>632.683471679688</text:p>
              </table:table-cell>
              <table:table-cell office:value-type="float" office:value="0.02179854">
                <text:p>0.02179854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632.802917480469">
                <text:p>632.802917480469</text:p>
              </table:table-cell>
              <table:table-cell office:value-type="float" office:value="0.01735958">
                <text:p>0.01735958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632.92236328125">
                <text:p>632.92236328125</text:p>
              </table:table-cell>
              <table:table-cell office:value-type="float" office:value="0.01268768">
                <text:p>0.01268768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633.041809082031">
                <text:p>633.041809082031</text:p>
              </table:table-cell>
              <table:table-cell office:value-type="float" office:value="0.02627634">
                <text:p>0.02627634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633.161254882813">
                <text:p>633.161254882813</text:p>
              </table:table-cell>
              <table:table-cell office:value-type="float" office:value="0.0477974">
                <text:p>0.0477974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633.280700683594">
                <text:p>633.280700683594</text:p>
              </table:table-cell>
              <table:table-cell office:value-type="float" office:value="0.01330464">
                <text:p>0.01330464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633.400146484375">
                <text:p>633.400146484375</text:p>
              </table:table-cell>
              <table:table-cell office:value-type="float" office:value="0.01708191">
                <text:p>0.01708191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633.519592285156">
                <text:p>633.519592285156</text:p>
              </table:table-cell>
              <table:table-cell office:value-type="float" office:value="0.01518183">
                <text:p>0.01518183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633.639038085938">
                <text:p>633.639038085938</text:p>
              </table:table-cell>
              <table:table-cell office:value-type="float" office:value="0.02901298">
                <text:p>0.02901298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633.758544921875">
                <text:p>633.758544921875</text:p>
              </table:table-cell>
              <table:table-cell office:value-type="float" office:value="0.01147925">
                <text:p>0.01147925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633.877990722656">
                <text:p>633.877990722656</text:p>
              </table:table-cell>
              <table:table-cell office:value-type="float" office:value="0.01874142">
                <text:p>0.01874142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633.997436523438">
                <text:p>633.997436523438</text:p>
              </table:table-cell>
              <table:table-cell office:value-type="float" office:value="0.01749477">
                <text:p>0.01749477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634.116882324219">
                <text:p>634.116882324219</text:p>
              </table:table-cell>
              <table:table-cell office:value-type="float" office:value="0.01381287">
                <text:p>0.01381287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634.236389160156">
                <text:p>634.236389160156</text:p>
              </table:table-cell>
              <table:table-cell office:value-type="float" office:value="0.01327365">
                <text:p>0.01327365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634.355834960938">
                <text:p>634.355834960938</text:p>
              </table:table-cell>
              <table:table-cell office:value-type="float" office:value="0.01928346">
                <text:p>0.01928346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634.475280761719">
                <text:p>634.475280761719</text:p>
              </table:table-cell>
              <table:table-cell office:value-type="float" office:value="0.01513168">
                <text:p>0.01513168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634.594787597656">
                <text:p>634.594787597656</text:p>
              </table:table-cell>
              <table:table-cell office:value-type="float" office:value="0.03790669">
                <text:p>0.03790669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634.714233398438">
                <text:p>634.714233398438</text:p>
              </table:table-cell>
              <table:table-cell office:value-type="float" office:value="0.01393021">
                <text:p>0.01393021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634.833679199219">
                <text:p>634.833679199219</text:p>
              </table:table-cell>
              <table:table-cell office:value-type="float" office:value="0.01189738">
                <text:p>0.01189738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634.953186035156">
                <text:p>634.953186035156</text:p>
              </table:table-cell>
              <table:table-cell office:value-type="float" office:value="0.02421841">
                <text:p>0.02421841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635.072631835938">
                <text:p>635.072631835938</text:p>
              </table:table-cell>
              <table:table-cell office:value-type="float" office:value="0.02647164">
                <text:p>0.02647164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635.192138671875">
                <text:p>635.192138671875</text:p>
              </table:table-cell>
              <table:table-cell office:value-type="float" office:value="0.01656991">
                <text:p>0.01656991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635.311584472656">
                <text:p>635.311584472656</text:p>
              </table:table-cell>
              <table:table-cell office:value-type="float" office:value="0.007778418">
                <text:p>0.007778418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635.431091308594">
                <text:p>635.431091308594</text:p>
              </table:table-cell>
              <table:table-cell office:value-type="float" office:value="0.03374111">
                <text:p>0.03374111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635.550598144531">
                <text:p>635.550598144531</text:p>
              </table:table-cell>
              <table:table-cell office:value-type="float" office:value="0.02410495">
                <text:p>0.02410495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635.670043945313">
                <text:p>635.670043945313</text:p>
              </table:table-cell>
              <table:table-cell office:value-type="float" office:value="0.01094182">
                <text:p>0.01094182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635.78955078125">
                <text:p>635.78955078125</text:p>
              </table:table-cell>
              <table:table-cell office:value-type="float" office:value="0.02003703">
                <text:p>0.02003703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635.909057617188">
                <text:p>635.909057617188</text:p>
              </table:table-cell>
              <table:table-cell office:value-type="float" office:value="0.01632817">
                <text:p>0.01632817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636.028503417969">
                <text:p>636.028503417969</text:p>
              </table:table-cell>
              <table:table-cell office:value-type="float" office:value="0.0129399">
                <text:p>0.0129399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636.148010253906">
                <text:p>636.148010253906</text:p>
              </table:table-cell>
              <table:table-cell office:value-type="float" office:value="0.01300612">
                <text:p>0.01300612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636.267517089844">
                <text:p>636.267517089844</text:p>
              </table:table-cell>
              <table:table-cell office:value-type="float" office:value="0.02580857">
                <text:p>0.02580857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636.387023925781">
                <text:p>636.387023925781</text:p>
              </table:table-cell>
              <table:table-cell office:value-type="float" office:value="0.02715738">
                <text:p>0.02715738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636.506469726563">
                <text:p>636.506469726563</text:p>
              </table:table-cell>
              <table:table-cell office:value-type="float" office:value="0.01872423">
                <text:p>0.01872423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636.6259765625">
                <text:p>636.6259765625</text:p>
              </table:table-cell>
              <table:table-cell office:value-type="float" office:value="0.02674893">
                <text:p>0.02674893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636.745483398438">
                <text:p>636.745483398438</text:p>
              </table:table-cell>
              <table:table-cell office:value-type="float" office:value="0.01008475">
                <text:p>0.01008475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636.864990234375">
                <text:p>636.864990234375</text:p>
              </table:table-cell>
              <table:table-cell office:value-type="float" office:value="0.01588043">
                <text:p>0.01588043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636.984497070313">
                <text:p>636.984497070313</text:p>
              </table:table-cell>
              <table:table-cell office:value-type="float" office:value="0.01035398">
                <text:p>0.01035398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637.10400390625">
                <text:p>637.10400390625</text:p>
              </table:table-cell>
              <table:table-cell office:value-type="float" office:value="0.01052663">
                <text:p>0.01052663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637.223510742188">
                <text:p>637.223510742188</text:p>
              </table:table-cell>
              <table:table-cell office:value-type="float" office:value="0.01885135">
                <text:p>0.01885135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637.343017578125">
                <text:p>637.343017578125</text:p>
              </table:table-cell>
              <table:table-cell office:value-type="float" office:value="0.02718739">
                <text:p>0.02718739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637.462524414063">
                <text:p>637.462524414063</text:p>
              </table:table-cell>
              <table:table-cell office:value-type="float" office:value="0.01060523">
                <text:p>0.01060523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637.58203125">
                <text:p>637.58203125</text:p>
              </table:table-cell>
              <table:table-cell office:value-type="float" office:value="0.03618947">
                <text:p>0.03618947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637.701538085938">
                <text:p>637.701538085938</text:p>
              </table:table-cell>
              <table:table-cell office:value-type="float" office:value="0.01708009">
                <text:p>0.01708009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637.821044921875">
                <text:p>637.821044921875</text:p>
              </table:table-cell>
              <table:table-cell office:value-type="float" office:value="0.01342915">
                <text:p>0.01342915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637.940551757813">
                <text:p>637.940551757813</text:p>
              </table:table-cell>
              <table:table-cell office:value-type="float" office:value="0.007311372">
                <text:p>0.007311372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638.060119628906">
                <text:p>638.060119628906</text:p>
              </table:table-cell>
              <table:table-cell office:value-type="float" office:value="0.006775135">
                <text:p>0.006775135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638.179626464844">
                <text:p>638.179626464844</text:p>
              </table:table-cell>
              <table:table-cell office:value-type="float" office:value="0.0100403">
                <text:p>0.0100403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638.299133300781">
                <text:p>638.299133300781</text:p>
              </table:table-cell>
              <table:table-cell office:value-type="float" office:value="0.0260271">
                <text:p>0.0260271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638.418640136719">
                <text:p>638.418640136719</text:p>
              </table:table-cell>
              <table:table-cell office:value-type="float" office:value="0.03077059">
                <text:p>0.03077059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638.538208007813">
                <text:p>638.538208007813</text:p>
              </table:table-cell>
              <table:table-cell office:value-type="float" office:value="0.01276422">
                <text:p>0.01276422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638.65771484375">
                <text:p>638.65771484375</text:p>
              </table:table-cell>
              <table:table-cell office:value-type="float" office:value="0.01293886">
                <text:p>0.01293886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638.777221679688">
                <text:p>638.777221679688</text:p>
              </table:table-cell>
              <table:table-cell office:value-type="float" office:value="0.01016296">
                <text:p>0.01016296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638.896789550781">
                <text:p>638.896789550781</text:p>
              </table:table-cell>
              <table:table-cell office:value-type="float" office:value="0.02791792">
                <text:p>0.02791792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639.016296386719">
                <text:p>639.016296386719</text:p>
              </table:table-cell>
              <table:table-cell office:value-type="float" office:value="0.01707213">
                <text:p>0.01707213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639.135864257813">
                <text:p>639.135864257813</text:p>
              </table:table-cell>
              <table:table-cell office:value-type="float" office:value="0.005561402">
                <text:p>0.005561402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639.25537109375">
                <text:p>639.25537109375</text:p>
              </table:table-cell>
              <table:table-cell office:value-type="float" office:value="0.01197833">
                <text:p>0.01197833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639.374938964844">
                <text:p>639.374938964844</text:p>
              </table:table-cell>
              <table:table-cell office:value-type="float" office:value="0.01798498">
                <text:p>0.01798498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639.494445800781">
                <text:p>639.494445800781</text:p>
              </table:table-cell>
              <table:table-cell office:value-type="float" office:value="0.01165694">
                <text:p>0.01165694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639.614013671875">
                <text:p>639.614013671875</text:p>
              </table:table-cell>
              <table:table-cell office:value-type="float" office:value="0.01298306">
                <text:p>0.01298306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639.733520507813">
                <text:p>639.733520507813</text:p>
              </table:table-cell>
              <table:table-cell office:value-type="float" office:value="0.02803225">
                <text:p>0.02803225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639.853088378906">
                <text:p>639.853088378906</text:p>
              </table:table-cell>
              <table:table-cell office:value-type="float" office:value="0.00916707">
                <text:p>0.00916707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639.972595214844">
                <text:p>639.972595214844</text:p>
              </table:table-cell>
              <table:table-cell office:value-type="float" office:value="0.02730041">
                <text:p>0.02730041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640.092163085938">
                <text:p>640.092163085938</text:p>
              </table:table-cell>
              <table:table-cell office:value-type="float" office:value="0.009518006">
                <text:p>0.009518006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640.211730957031">
                <text:p>640.211730957031</text:p>
              </table:table-cell>
              <table:table-cell office:value-type="float" office:value="0.02383402">
                <text:p>0.02383402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640.331237792969">
                <text:p>640.331237792969</text:p>
              </table:table-cell>
              <table:table-cell office:value-type="float" office:value="0.01536084">
                <text:p>0.01536084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640.450805664063">
                <text:p>640.450805664063</text:p>
              </table:table-cell>
              <table:table-cell office:value-type="float" office:value="0.008348686">
                <text:p>0.008348686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640.570373535156">
                <text:p>640.570373535156</text:p>
              </table:table-cell>
              <table:table-cell office:value-type="float" office:value="0.02218568">
                <text:p>0.02218568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640.68994140625">
                <text:p>640.68994140625</text:p>
              </table:table-cell>
              <table:table-cell office:value-type="float" office:value="0.02197701">
                <text:p>0.02197701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640.809509277344">
                <text:p>640.809509277344</text:p>
              </table:table-cell>
              <table:table-cell office:value-type="float" office:value="0.009484064">
                <text:p>0.009484064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640.929016113281">
                <text:p>640.929016113281</text:p>
              </table:table-cell>
              <table:table-cell office:value-type="float" office:value="0.00481502">
                <text:p>0.00481502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641.048583984375">
                <text:p>641.048583984375</text:p>
              </table:table-cell>
              <table:table-cell office:value-type="float" office:value="0.003762783">
                <text:p>0.003762783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641.168151855469">
                <text:p>641.168151855469</text:p>
              </table:table-cell>
              <table:table-cell office:value-type="float" office:value="0.009748116">
                <text:p>0.009748116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641.287719726563">
                <text:p>641.287719726563</text:p>
              </table:table-cell>
              <table:table-cell office:value-type="float" office:value="0.009486212">
                <text:p>0.009486212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641.407287597656">
                <text:p>641.407287597656</text:p>
              </table:table-cell>
              <table:table-cell office:value-type="float" office:value="0.01638396">
                <text:p>0.01638396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641.52685546875">
                <text:p>641.52685546875</text:p>
              </table:table-cell>
              <table:table-cell office:value-type="float" office:value="0.02229185">
                <text:p>0.02229185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641.646423339844">
                <text:p>641.646423339844</text:p>
              </table:table-cell>
              <table:table-cell office:value-type="float" office:value="0.01382404">
                <text:p>0.01382404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641.765991210938">
                <text:p>641.765991210938</text:p>
              </table:table-cell>
              <table:table-cell office:value-type="float" office:value="0.0073965">
                <text:p>0.0073965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641.885559082031">
                <text:p>641.885559082031</text:p>
              </table:table-cell>
              <table:table-cell office:value-type="float" office:value="0.01770336">
                <text:p>0.01770336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642.005126953125">
                <text:p>642.005126953125</text:p>
              </table:table-cell>
              <table:table-cell office:value-type="float" office:value="0.01197971">
                <text:p>0.01197971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642.124694824219">
                <text:p>642.124694824219</text:p>
              </table:table-cell>
              <table:table-cell office:value-type="float" office:value="0.01505588">
                <text:p>0.01505588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642.244262695313">
                <text:p>642.244262695313</text:p>
              </table:table-cell>
              <table:table-cell office:value-type="float" office:value="0.009326585">
                <text:p>0.009326585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642.363891601563">
                <text:p>642.363891601563</text:p>
              </table:table-cell>
              <table:table-cell office:value-type="float" office:value="0.006517395">
                <text:p>0.006517395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642.483459472656">
                <text:p>642.483459472656</text:p>
              </table:table-cell>
              <table:table-cell office:value-type="float" office:value="0.009648594">
                <text:p>0.009648594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642.60302734375">
                <text:p>642.60302734375</text:p>
              </table:table-cell>
              <table:table-cell office:value-type="float" office:value="0.0214447">
                <text:p>0.0214447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642.722595214844">
                <text:p>642.722595214844</text:p>
              </table:table-cell>
              <table:table-cell office:value-type="float" office:value="0.005993021">
                <text:p>0.005993021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642.842163085938">
                <text:p>642.842163085938</text:p>
              </table:table-cell>
              <table:table-cell office:value-type="float" office:value="0.008433709">
                <text:p>0.008433709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642.961791992188">
                <text:p>642.961791992188</text:p>
              </table:table-cell>
              <table:table-cell office:value-type="float" office:value="0.01251213">
                <text:p>0.01251213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643.081359863281">
                <text:p>643.081359863281</text:p>
              </table:table-cell>
              <table:table-cell office:value-type="float" office:value="0.01948664">
                <text:p>0.01948664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643.200927734375">
                <text:p>643.200927734375</text:p>
              </table:table-cell>
              <table:table-cell office:value-type="float" office:value="0.01495615">
                <text:p>0.01495615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643.320556640625">
                <text:p>643.320556640625</text:p>
              </table:table-cell>
              <table:table-cell office:value-type="float" office:value="0.01192508">
                <text:p>0.01192508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643.440124511719">
                <text:p>643.440124511719</text:p>
              </table:table-cell>
              <table:table-cell office:value-type="float" office:value="0.02295241">
                <text:p>0.02295241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643.559753417969">
                <text:p>643.559753417969</text:p>
              </table:table-cell>
              <table:table-cell office:value-type="float" office:value="0.02055751">
                <text:p>0.02055751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643.679321289063">
                <text:p>643.679321289063</text:p>
              </table:table-cell>
              <table:table-cell office:value-type="float" office:value="0.01808125">
                <text:p>0.01808125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643.798950195313">
                <text:p>643.798950195313</text:p>
              </table:table-cell>
              <table:table-cell office:value-type="float" office:value="0.01392087">
                <text:p>0.01392087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643.918518066406">
                <text:p>643.918518066406</text:p>
              </table:table-cell>
              <table:table-cell office:value-type="float" office:value="0.01152434">
                <text:p>0.01152434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644.038146972656">
                <text:p>644.038146972656</text:p>
              </table:table-cell>
              <table:table-cell office:value-type="float" office:value="0.02920769">
                <text:p>0.02920769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644.15771484375">
                <text:p>644.15771484375</text:p>
              </table:table-cell>
              <table:table-cell office:value-type="float" office:value="0.007047941">
                <text:p>0.007047941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644.27734375">
                <text:p>644.27734375</text:p>
              </table:table-cell>
              <table:table-cell office:value-type="float" office:value="0.007786313">
                <text:p>0.007786313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644.396911621094">
                <text:p>644.396911621094</text:p>
              </table:table-cell>
              <table:table-cell office:value-type="float" office:value="0.01009622">
                <text:p>0.01009622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644.516540527344">
                <text:p>644.516540527344</text:p>
              </table:table-cell>
              <table:table-cell office:value-type="float" office:value="0.01041627">
                <text:p>0.01041627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644.636169433594">
                <text:p>644.636169433594</text:p>
              </table:table-cell>
              <table:table-cell office:value-type="float" office:value="0.00742475">
                <text:p>0.00742475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644.755737304688">
                <text:p>644.755737304688</text:p>
              </table:table-cell>
              <table:table-cell office:value-type="float" office:value="0.00922719">
                <text:p>0.00922719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644.875366210938">
                <text:p>644.875366210938</text:p>
              </table:table-cell>
              <table:table-cell office:value-type="float" office:value="0.01832531">
                <text:p>0.01832531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644.994995117188">
                <text:p>644.994995117188</text:p>
              </table:table-cell>
              <table:table-cell office:value-type="float" office:value="0.01735078">
                <text:p>0.01735078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645.114562988281">
                <text:p>645.114562988281</text:p>
              </table:table-cell>
              <table:table-cell office:value-type="float" office:value="0.02159862">
                <text:p>0.02159862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645.234191894531">
                <text:p>645.234191894531</text:p>
              </table:table-cell>
              <table:table-cell office:value-type="float" office:value="0.02022279">
                <text:p>0.02022279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645.353820800781">
                <text:p>645.353820800781</text:p>
              </table:table-cell>
              <table:table-cell office:value-type="float" office:value="0.01185116">
                <text:p>0.01185116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645.473449707031">
                <text:p>645.473449707031</text:p>
              </table:table-cell>
              <table:table-cell office:value-type="float" office:value="0.007733388">
                <text:p>0.007733388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645.593078613281">
                <text:p>645.593078613281</text:p>
              </table:table-cell>
              <table:table-cell office:value-type="float" office:value="0.01160151">
                <text:p>0.01160151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645.712707519531">
                <text:p>645.712707519531</text:p>
              </table:table-cell>
              <table:table-cell office:value-type="float" office:value="0.009643889">
                <text:p>0.009643889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645.832336425781">
                <text:p>645.832336425781</text:p>
              </table:table-cell>
              <table:table-cell office:value-type="float" office:value="0.007874063">
                <text:p>0.007874063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645.951965332031">
                <text:p>645.951965332031</text:p>
              </table:table-cell>
              <table:table-cell office:value-type="float" office:value="0.01110637">
                <text:p>0.01110637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646.071533203125">
                <text:p>646.071533203125</text:p>
              </table:table-cell>
              <table:table-cell office:value-type="float" office:value="0.009011791">
                <text:p>0.009011791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646.191162109375">
                <text:p>646.191162109375</text:p>
              </table:table-cell>
              <table:table-cell office:value-type="float" office:value="0.005492138">
                <text:p>0.005492138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646.310852050781">
                <text:p>646.310852050781</text:p>
              </table:table-cell>
              <table:table-cell office:value-type="float" office:value="0.01880645">
                <text:p>0.01880645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646.430480957031">
                <text:p>646.430480957031</text:p>
              </table:table-cell>
              <table:table-cell office:value-type="float" office:value="0.01357764">
                <text:p>0.01357764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646.550109863281">
                <text:p>646.550109863281</text:p>
              </table:table-cell>
              <table:table-cell office:value-type="float" office:value="0.022031">
                <text:p>0.022031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646.669738769531">
                <text:p>646.669738769531</text:p>
              </table:table-cell>
              <table:table-cell office:value-type="float" office:value="0.009447058">
                <text:p>0.009447058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646.789367675781">
                <text:p>646.789367675781</text:p>
              </table:table-cell>
              <table:table-cell office:value-type="float" office:value="0.01553441">
                <text:p>0.01553441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646.908996582031">
                <text:p>646.908996582031</text:p>
              </table:table-cell>
              <table:table-cell office:value-type="float" office:value="0.03406433">
                <text:p>0.03406433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647.028625488281">
                <text:p>647.028625488281</text:p>
              </table:table-cell>
              <table:table-cell office:value-type="float" office:value="0.01570442">
                <text:p>0.01570442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647.148254394531">
                <text:p>647.148254394531</text:p>
              </table:table-cell>
              <table:table-cell office:value-type="float" office:value="0.009819253">
                <text:p>0.009819253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647.267944335938">
                <text:p>647.267944335938</text:p>
              </table:table-cell>
              <table:table-cell office:value-type="float" office:value="0.009339041">
                <text:p>0.009339041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647.387573242188">
                <text:p>647.387573242188</text:p>
              </table:table-cell>
              <table:table-cell office:value-type="float" office:value="0.01641373">
                <text:p>0.01641373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647.507202148438">
                <text:p>647.507202148438</text:p>
              </table:table-cell>
              <table:table-cell office:value-type="float" office:value="0.008152044">
                <text:p>0.008152044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647.626831054688">
                <text:p>647.626831054688</text:p>
              </table:table-cell>
              <table:table-cell office:value-type="float" office:value="0.01364138">
                <text:p>0.01364138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647.746520996094">
                <text:p>647.746520996094</text:p>
              </table:table-cell>
              <table:table-cell office:value-type="float" office:value="0.0343439">
                <text:p>0.0343439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647.866149902344">
                <text:p>647.866149902344</text:p>
              </table:table-cell>
              <table:table-cell office:value-type="float" office:value="0.005412236">
                <text:p>0.005412236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647.985778808594">
                <text:p>647.985778808594</text:p>
              </table:table-cell>
              <table:table-cell office:value-type="float" office:value="0.03209849">
                <text:p>0.03209849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648.10546875">
                <text:p>648.10546875</text:p>
              </table:table-cell>
              <table:table-cell office:value-type="float" office:value="0.004428993">
                <text:p>0.004428993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648.22509765625">
                <text:p>648.22509765625</text:p>
              </table:table-cell>
              <table:table-cell office:value-type="float" office:value="0.02855555">
                <text:p>0.02855555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648.344787597656">
                <text:p>648.344787597656</text:p>
              </table:table-cell>
              <table:table-cell office:value-type="float" office:value="0.01893536">
                <text:p>0.01893536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648.464416503906">
                <text:p>648.464416503906</text:p>
              </table:table-cell>
              <table:table-cell office:value-type="float" office:value="0.01064019">
                <text:p>0.01064019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648.584106445313">
                <text:p>648.584106445313</text:p>
              </table:table-cell>
              <table:table-cell office:value-type="float" office:value="0.01293576">
                <text:p>0.01293576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648.703735351563">
                <text:p>648.703735351563</text:p>
              </table:table-cell>
              <table:table-cell office:value-type="float" office:value="0.01149327">
                <text:p>0.01149327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648.823425292969">
                <text:p>648.823425292969</text:p>
              </table:table-cell>
              <table:table-cell office:value-type="float" office:value="0.00180805">
                <text:p>0.00180805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648.943054199219">
                <text:p>648.943054199219</text:p>
              </table:table-cell>
              <table:table-cell office:value-type="float" office:value="0.006927279">
                <text:p>0.006927279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649.062744140625">
                <text:p>649.062744140625</text:p>
              </table:table-cell>
              <table:table-cell office:value-type="float" office:value="0.009974322">
                <text:p>0.009974322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649.182434082031">
                <text:p>649.182434082031</text:p>
              </table:table-cell>
              <table:table-cell office:value-type="float" office:value="0.01137186">
                <text:p>0.01137186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649.302062988281">
                <text:p>649.302062988281</text:p>
              </table:table-cell>
              <table:table-cell office:value-type="float" office:value="0.01554557">
                <text:p>0.01554557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649.421752929688">
                <text:p>649.421752929688</text:p>
              </table:table-cell>
              <table:table-cell office:value-type="float" office:value="0.00349764">
                <text:p>0.00349764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649.541442871094">
                <text:p>649.541442871094</text:p>
              </table:table-cell>
              <table:table-cell office:value-type="float" office:value="0.008563156">
                <text:p>0.008563156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649.661071777344">
                <text:p>649.661071777344</text:p>
              </table:table-cell>
              <table:table-cell office:value-type="float" office:value="0.02639361">
                <text:p>0.02639361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649.78076171875">
                <text:p>649.78076171875</text:p>
              </table:table-cell>
              <table:table-cell office:value-type="float" office:value="0.01319897">
                <text:p>0.01319897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649.900451660156">
                <text:p>649.900451660156</text:p>
              </table:table-cell>
              <table:table-cell office:value-type="float" office:value="0.01429285">
                <text:p>0.01429285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650.020141601563">
                <text:p>650.020141601563</text:p>
              </table:table-cell>
              <table:table-cell office:value-type="float" office:value="0.006524263">
                <text:p>0.006524263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650.139770507813">
                <text:p>650.139770507813</text:p>
              </table:table-cell>
              <table:table-cell office:value-type="float" office:value="0.003135681">
                <text:p>0.003135681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650.259460449219">
                <text:p>650.259460449219</text:p>
              </table:table-cell>
              <table:table-cell office:value-type="float" office:value="0.004681697">
                <text:p>0.004681697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650.379150390625">
                <text:p>650.379150390625</text:p>
              </table:table-cell>
              <table:table-cell office:value-type="float" office:value="0.009900994">
                <text:p>0.009900994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650.498840332031">
                <text:p>650.498840332031</text:p>
              </table:table-cell>
              <table:table-cell office:value-type="float" office:value="0.00667154">
                <text:p>0.00667154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650.618530273438">
                <text:p>650.618530273438</text:p>
              </table:table-cell>
              <table:table-cell office:value-type="float" office:value="0.01489992">
                <text:p>0.01489992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650.738220214844">
                <text:p>650.738220214844</text:p>
              </table:table-cell>
              <table:table-cell office:value-type="float" office:value="0.008544273">
                <text:p>0.008544273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650.85791015625">
                <text:p>650.85791015625</text:p>
              </table:table-cell>
              <table:table-cell office:value-type="float" office:value="0.01606521">
                <text:p>0.01606521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650.977600097656">
                <text:p>650.977600097656</text:p>
              </table:table-cell>
              <table:table-cell office:value-type="float" office:value="0.01735676">
                <text:p>0.01735676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651.097290039063">
                <text:p>651.097290039063</text:p>
              </table:table-cell>
              <table:table-cell office:value-type="float" office:value="0.01044392">
                <text:p>0.01044392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651.216979980469">
                <text:p>651.216979980469</text:p>
              </table:table-cell>
              <table:table-cell office:value-type="float" office:value="0.01879257">
                <text:p>0.01879257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651.336669921875">
                <text:p>651.336669921875</text:p>
              </table:table-cell>
              <table:table-cell office:value-type="float" office:value="0.009100829">
                <text:p>0.009100829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651.456359863281">
                <text:p>651.456359863281</text:p>
              </table:table-cell>
              <table:table-cell office:value-type="float" office:value="0.008684131">
                <text:p>0.008684131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651.576049804688">
                <text:p>651.576049804688</text:p>
              </table:table-cell>
              <table:table-cell office:value-type="float" office:value="0.007338663">
                <text:p>0.007338663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651.695739746094">
                <text:p>651.695739746094</text:p>
              </table:table-cell>
              <table:table-cell office:value-type="float" office:value="0.01521735">
                <text:p>0.01521735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651.8154296875">
                <text:p>651.8154296875</text:p>
              </table:table-cell>
              <table:table-cell office:value-type="float" office:value="0.008011017">
                <text:p>0.008011017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651.935180664063">
                <text:p>651.935180664063</text:p>
              </table:table-cell>
              <table:table-cell office:value-type="float" office:value="0.004545773">
                <text:p>0.004545773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652.054870605469">
                <text:p>652.054870605469</text:p>
              </table:table-cell>
              <table:table-cell office:value-type="float" office:value="0.01234863">
                <text:p>0.01234863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652.174560546875">
                <text:p>652.174560546875</text:p>
              </table:table-cell>
              <table:table-cell office:value-type="float" office:value="0.006108941">
                <text:p>0.006108941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652.294250488281">
                <text:p>652.294250488281</text:p>
              </table:table-cell>
              <table:table-cell office:value-type="float" office:value="0.007348798">
                <text:p>0.007348798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652.414001464844">
                <text:p>652.414001464844</text:p>
              </table:table-cell>
              <table:table-cell office:value-type="float" office:value="0.01240748">
                <text:p>0.01240748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652.53369140625">
                <text:p>652.53369140625</text:p>
              </table:table-cell>
              <table:table-cell office:value-type="float" office:value="0.003166447">
                <text:p>0.003166447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652.653381347656">
                <text:p>652.653381347656</text:p>
              </table:table-cell>
              <table:table-cell office:value-type="float" office:value="0.009203493">
                <text:p>0.009203493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652.773071289063">
                <text:p>652.773071289063</text:p>
              </table:table-cell>
              <table:table-cell office:value-type="float" office:value="0.002114973">
                <text:p>0.002114973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652.892822265625">
                <text:p>652.892822265625</text:p>
              </table:table-cell>
              <table:table-cell office:value-type="float" office:value="0.01385681">
                <text:p>0.01385681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653.012512207031">
                <text:p>653.012512207031</text:p>
              </table:table-cell>
              <table:table-cell office:value-type="float" office:value="0.005023973">
                <text:p>0.005023973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653.132263183594">
                <text:p>653.132263183594</text:p>
              </table:table-cell>
              <table:table-cell office:value-type="float" office:value="0.01218543">
                <text:p>0.01218543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653.251953125">
                <text:p>653.251953125</text:p>
              </table:table-cell>
              <table:table-cell office:value-type="float" office:value="0.004135324">
                <text:p>0.004135324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653.371704101563">
                <text:p>653.371704101563</text:p>
              </table:table-cell>
              <table:table-cell office:value-type="float" office:value="0.01129009">
                <text:p>0.01129009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653.491394042969">
                <text:p>653.491394042969</text:p>
              </table:table-cell>
              <table:table-cell office:value-type="float" office:value="0.02567399">
                <text:p>0.02567399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653.611145019531">
                <text:p>653.611145019531</text:p>
              </table:table-cell>
              <table:table-cell office:value-type="float" office:value="0.01253378">
                <text:p>0.01253378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653.730834960938">
                <text:p>653.730834960938</text:p>
              </table:table-cell>
              <table:table-cell office:value-type="float" office:value="0.02766814">
                <text:p>0.02766814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653.8505859375">
                <text:p>653.8505859375</text:p>
              </table:table-cell>
              <table:table-cell office:value-type="float" office:value="0.01175287">
                <text:p>0.01175287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653.970275878906">
                <text:p>653.970275878906</text:p>
              </table:table-cell>
              <table:table-cell office:value-type="float" office:value="0.023741">
                <text:p>0.023741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654.090026855469">
                <text:p>654.090026855469</text:p>
              </table:table-cell>
              <table:table-cell office:value-type="float" office:value="0.002584834">
                <text:p>0.002584834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654.209716796875">
                <text:p>654.209716796875</text:p>
              </table:table-cell>
              <table:table-cell office:value-type="float" office:value="0.0039721">
                <text:p>0.0039721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654.329467773438">
                <text:p>654.329467773438</text:p>
              </table:table-cell>
              <table:table-cell office:value-type="float" office:value="-0.001511139">
                <text:p>-0.001511139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654.44921875">
                <text:p>654.44921875</text:p>
              </table:table-cell>
              <table:table-cell office:value-type="float" office:value="0.01547003">
                <text:p>0.01547003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654.568969726563">
                <text:p>654.568969726563</text:p>
              </table:table-cell>
              <table:table-cell office:value-type="float" office:value="0.004665029">
                <text:p>0.004665029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654.688659667969">
                <text:p>654.688659667969</text:p>
              </table:table-cell>
              <table:table-cell office:value-type="float" office:value="0.01288017">
                <text:p>0.01288017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654.808410644531">
                <text:p>654.808410644531</text:p>
              </table:table-cell>
              <table:table-cell office:value-type="float" office:value="0.007810201">
                <text:p>0.007810201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654.928161621094">
                <text:p>654.928161621094</text:p>
              </table:table-cell>
              <table:table-cell office:value-type="float" office:value="0.00797583">
                <text:p>0.00797583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655.047912597656">
                <text:p>655.047912597656</text:p>
              </table:table-cell>
              <table:table-cell office:value-type="float" office:value="0.02359097">
                <text:p>0.02359097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655.167602539063">
                <text:p>655.167602539063</text:p>
              </table:table-cell>
              <table:table-cell office:value-type="float" office:value="0.007313958">
                <text:p>0.007313958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655.287353515625">
                <text:p>655.287353515625</text:p>
              </table:table-cell>
              <table:table-cell office:value-type="float" office:value="0.01615109">
                <text:p>0.01615109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655.407104492188">
                <text:p>655.407104492188</text:p>
              </table:table-cell>
              <table:table-cell office:value-type="float" office:value="-0.0001011143">
                <text:p>-0.0001011143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655.52685546875">
                <text:p>655.52685546875</text:p>
              </table:table-cell>
              <table:table-cell office:value-type="float" office:value="0.008096916">
                <text:p>0.008096916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655.646606445313">
                <text:p>655.646606445313</text:p>
              </table:table-cell>
              <table:table-cell office:value-type="float" office:value="-0.0006853093">
                <text:p>-0.0006853093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655.766357421875">
                <text:p>655.766357421875</text:p>
              </table:table-cell>
              <table:table-cell office:value-type="float" office:value="0.008428405">
                <text:p>0.008428405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655.886108398438">
                <text:p>655.886108398438</text:p>
              </table:table-cell>
              <table:table-cell office:value-type="float" office:value="0.001884505">
                <text:p>0.001884505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656.005859375">
                <text:p>656.005859375</text:p>
              </table:table-cell>
              <table:table-cell office:value-type="float" office:value="-0.0007410421">
                <text:p>-0.0007410421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656.125610351563">
                <text:p>656.125610351563</text:p>
              </table:table-cell>
              <table:table-cell office:value-type="float" office:value="0.009757753">
                <text:p>0.009757753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656.245361328125">
                <text:p>656.245361328125</text:p>
              </table:table-cell>
              <table:table-cell office:value-type="float" office:value="0.005933786">
                <text:p>0.005933786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656.365112304688">
                <text:p>656.365112304688</text:p>
              </table:table-cell>
              <table:table-cell office:value-type="float" office:value="0.02262473">
                <text:p>0.02262473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656.48486328125">
                <text:p>656.48486328125</text:p>
              </table:table-cell>
              <table:table-cell office:value-type="float" office:value="0.005945703">
                <text:p>0.005945703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656.604614257813">
                <text:p>656.604614257813</text:p>
              </table:table-cell>
              <table:table-cell office:value-type="float" office:value="0.01000004">
                <text:p>0.01000004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656.724365234375">
                <text:p>656.724365234375</text:p>
              </table:table-cell>
              <table:table-cell office:value-type="float" office:value="0.0245604">
                <text:p>0.0245604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656.844116210938">
                <text:p>656.844116210938</text:p>
              </table:table-cell>
              <table:table-cell office:value-type="float" office:value="0.00892127">
                <text:p>0.00892127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656.9638671875">
                <text:p>656.9638671875</text:p>
              </table:table-cell>
              <table:table-cell office:value-type="float" office:value="0.00713246">
                <text:p>0.00713246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657.083679199219">
                <text:p>657.083679199219</text:p>
              </table:table-cell>
              <table:table-cell office:value-type="float" office:value="0.01047487">
                <text:p>0.01047487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657.203430175781">
                <text:p>657.203430175781</text:p>
              </table:table-cell>
              <table:table-cell office:value-type="float" office:value="0.004605677">
                <text:p>0.004605677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657.323181152344">
                <text:p>657.323181152344</text:p>
              </table:table-cell>
              <table:table-cell office:value-type="float" office:value="0.02083793">
                <text:p>0.02083793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657.442932128906">
                <text:p>657.442932128906</text:p>
              </table:table-cell>
              <table:table-cell office:value-type="float" office:value="0.0161104">
                <text:p>0.0161104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657.562744140625">
                <text:p>657.562744140625</text:p>
              </table:table-cell>
              <table:table-cell office:value-type="float" office:value="0.01145359">
                <text:p>0.01145359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657.682495117188">
                <text:p>657.682495117188</text:p>
              </table:table-cell>
              <table:table-cell office:value-type="float" office:value="0.020618">
                <text:p>0.020618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657.80224609375">
                <text:p>657.80224609375</text:p>
              </table:table-cell>
              <table:table-cell office:value-type="float" office:value="0.01474889">
                <text:p>0.01474889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657.921997070313">
                <text:p>657.921997070313</text:p>
              </table:table-cell>
              <table:table-cell office:value-type="float" office:value="0.002158943">
                <text:p>0.002158943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658.041809082031">
                <text:p>658.041809082031</text:p>
              </table:table-cell>
              <table:table-cell office:value-type="float" office:value="0.003588062">
                <text:p>0.003588062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658.161560058594">
                <text:p>658.161560058594</text:p>
              </table:table-cell>
              <table:table-cell office:value-type="float" office:value="-0.0007239307">
                <text:p>-0.0007239307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658.281372070313">
                <text:p>658.281372070313</text:p>
              </table:table-cell>
              <table:table-cell office:value-type="float" office:value="0.01924006">
                <text:p>0.01924006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658.401123046875">
                <text:p>658.401123046875</text:p>
              </table:table-cell>
              <table:table-cell office:value-type="float" office:value="0.03414579">
                <text:p>0.03414579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658.520935058594">
                <text:p>658.520935058594</text:p>
              </table:table-cell>
              <table:table-cell office:value-type="float" office:value="0.004321056">
                <text:p>0.004321056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658.640686035156">
                <text:p>658.640686035156</text:p>
              </table:table-cell>
              <table:table-cell office:value-type="float" office:value="0.001704308">
                <text:p>0.001704308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658.760437011719">
                <text:p>658.760437011719</text:p>
              </table:table-cell>
              <table:table-cell office:value-type="float" office:value="0.00692545">
                <text:p>0.00692545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658.880249023438">
                <text:p>658.880249023438</text:p>
              </table:table-cell>
              <table:table-cell office:value-type="float" office:value="0.00132379">
                <text:p>0.00132379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659.000061035156">
                <text:p>659.000061035156</text:p>
              </table:table-cell>
              <table:table-cell office:value-type="float" office:value="0.003465433">
                <text:p>0.003465433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659.119812011719">
                <text:p>659.119812011719</text:p>
              </table:table-cell>
              <table:table-cell office:value-type="float" office:value="0.001153779">
                <text:p>0.001153779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659.239624023438">
                <text:p>659.239624023438</text:p>
              </table:table-cell>
              <table:table-cell office:value-type="float" office:value="0.01176341">
                <text:p>0.01176341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659.359375">
                <text:p>659.359375</text:p>
              </table:table-cell>
              <table:table-cell office:value-type="float" office:value="0.01077542">
                <text:p>0.01077542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659.479187011719">
                <text:p>659.479187011719</text:p>
              </table:table-cell>
              <table:table-cell office:value-type="float" office:value="0.007424151">
                <text:p>0.007424151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659.598999023438">
                <text:p>659.598999023438</text:p>
              </table:table-cell>
              <table:table-cell office:value-type="float" office:value="0.007845605">
                <text:p>0.007845605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659.71875">
                <text:p>659.71875</text:p>
              </table:table-cell>
              <table:table-cell office:value-type="float" office:value="0.009871364">
                <text:p>0.009871364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659.838562011719">
                <text:p>659.838562011719</text:p>
              </table:table-cell>
              <table:table-cell office:value-type="float" office:value="0.001023428">
                <text:p>0.001023428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659.958374023438">
                <text:p>659.958374023438</text:p>
              </table:table-cell>
              <table:table-cell office:value-type="float" office:value="0.004338717">
                <text:p>0.004338717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660.078125">
                <text:p>660.078125</text:p>
              </table:table-cell>
              <table:table-cell office:value-type="float" office:value="-0.0005070606">
                <text:p>-0.0005070606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660.197937011719">
                <text:p>660.197937011719</text:p>
              </table:table-cell>
              <table:table-cell office:value-type="float" office:value="0.01238121">
                <text:p>0.01238121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660.317749023438">
                <text:p>660.317749023438</text:p>
              </table:table-cell>
              <table:table-cell office:value-type="float" office:value="0.008673883">
                <text:p>0.008673883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660.437561035156">
                <text:p>660.437561035156</text:p>
              </table:table-cell>
              <table:table-cell office:value-type="float" office:value="0.01917416">
                <text:p>0.01917416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660.557373046875">
                <text:p>660.557373046875</text:p>
              </table:table-cell>
              <table:table-cell office:value-type="float" office:value="-0.003354661">
                <text:p>-0.003354661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660.677124023438">
                <text:p>660.677124023438</text:p>
              </table:table-cell>
              <table:table-cell office:value-type="float" office:value="0.0006103849">
                <text:p>0.0006103849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660.796936035156">
                <text:p>660.796936035156</text:p>
              </table:table-cell>
              <table:table-cell office:value-type="float" office:value="0.005274739">
                <text:p>0.005274739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660.916748046875">
                <text:p>660.916748046875</text:p>
              </table:table-cell>
              <table:table-cell office:value-type="float" office:value="-0.001847187">
                <text:p>-0.001847187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661.036560058594">
                <text:p>661.036560058594</text:p>
              </table:table-cell>
              <table:table-cell office:value-type="float" office:value="0.009988273">
                <text:p>0.009988273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661.156372070313">
                <text:p>661.156372070313</text:p>
              </table:table-cell>
              <table:table-cell office:value-type="float" office:value="0.01146962">
                <text:p>0.01146962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661.276184082031">
                <text:p>661.276184082031</text:p>
              </table:table-cell>
              <table:table-cell office:value-type="float" office:value="0.005812893">
                <text:p>0.005812893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661.39599609375">
                <text:p>661.39599609375</text:p>
              </table:table-cell>
              <table:table-cell office:value-type="float" office:value="0.007129835">
                <text:p>0.007129835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661.515808105469">
                <text:p>661.515808105469</text:p>
              </table:table-cell>
              <table:table-cell office:value-type="float" office:value="0.01647387">
                <text:p>0.01647387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661.635620117188">
                <text:p>661.635620117188</text:p>
              </table:table-cell>
              <table:table-cell office:value-type="float" office:value="0.003461631">
                <text:p>0.003461631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661.755432128906">
                <text:p>661.755432128906</text:p>
              </table:table-cell>
              <table:table-cell office:value-type="float" office:value="0.01133959">
                <text:p>0.01133959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661.875244140625">
                <text:p>661.875244140625</text:p>
              </table:table-cell>
              <table:table-cell office:value-type="float" office:value="0.01567041">
                <text:p>0.01567041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661.995056152344">
                <text:p>661.995056152344</text:p>
              </table:table-cell>
              <table:table-cell office:value-type="float" office:value="0.008101339">
                <text:p>0.008101339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662.114868164063">
                <text:p>662.114868164063</text:p>
              </table:table-cell>
              <table:table-cell office:value-type="float" office:value="0.003482851">
                <text:p>0.003482851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662.234680175781">
                <text:p>662.234680175781</text:p>
              </table:table-cell>
              <table:table-cell office:value-type="float" office:value="0.001537879">
                <text:p>0.001537879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662.354553222656">
                <text:p>662.354553222656</text:p>
              </table:table-cell>
              <table:table-cell office:value-type="float" office:value="0.001287913">
                <text:p>0.001287913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662.474365234375">
                <text:p>662.474365234375</text:p>
              </table:table-cell>
              <table:table-cell office:value-type="float" office:value="0.004829222">
                <text:p>0.004829222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662.594177246094">
                <text:p>662.594177246094</text:p>
              </table:table-cell>
              <table:table-cell office:value-type="float" office:value="0.008066183">
                <text:p>0.008066183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662.713989257813">
                <text:p>662.713989257813</text:p>
              </table:table-cell>
              <table:table-cell office:value-type="float" office:value="0.01195858">
                <text:p>0.01195858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662.833801269531">
                <text:p>662.833801269531</text:p>
              </table:table-cell>
              <table:table-cell office:value-type="float" office:value="-0.001287928">
                <text:p>-0.001287928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662.953674316406">
                <text:p>662.953674316406</text:p>
              </table:table-cell>
              <table:table-cell office:value-type="float" office:value="0.002967674">
                <text:p>0.002967674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663.073486328125">
                <text:p>663.073486328125</text:p>
              </table:table-cell>
              <table:table-cell office:value-type="float" office:value="0.005226649">
                <text:p>0.005226649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663.193298339844">
                <text:p>663.193298339844</text:p>
              </table:table-cell>
              <table:table-cell office:value-type="float" office:value="0.005091761">
                <text:p>0.005091761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663.313110351563">
                <text:p>663.313110351563</text:p>
              </table:table-cell>
              <table:table-cell office:value-type="float" office:value="0.008367871">
                <text:p>0.008367871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663.432983398438">
                <text:p>663.432983398438</text:p>
              </table:table-cell>
              <table:table-cell office:value-type="float" office:value="0.004846051">
                <text:p>0.004846051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663.552795410156">
                <text:p>663.552795410156</text:p>
              </table:table-cell>
              <table:table-cell office:value-type="float" office:value="0.008671404">
                <text:p>0.008671404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663.672668457031">
                <text:p>663.672668457031</text:p>
              </table:table-cell>
              <table:table-cell office:value-type="float" office:value="0.005554994">
                <text:p>0.005554994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663.79248046875">
                <text:p>663.79248046875</text:p>
              </table:table-cell>
              <table:table-cell office:value-type="float" office:value="0.007234212">
                <text:p>0.007234212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663.912292480469">
                <text:p>663.912292480469</text:p>
              </table:table-cell>
              <table:table-cell office:value-type="float" office:value="0.005697744">
                <text:p>0.005697744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664.032165527344">
                <text:p>664.032165527344</text:p>
              </table:table-cell>
              <table:table-cell office:value-type="float" office:value="0.01055668">
                <text:p>0.01055668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664.151977539063">
                <text:p>664.151977539063</text:p>
              </table:table-cell>
              <table:table-cell office:value-type="float" office:value="0.005625307">
                <text:p>0.005625307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664.271850585938">
                <text:p>664.271850585938</text:p>
              </table:table-cell>
              <table:table-cell office:value-type="float" office:value="-0.0004715985">
                <text:p>-0.0004715985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664.391662597656">
                <text:p>664.391662597656</text:p>
              </table:table-cell>
              <table:table-cell office:value-type="float" office:value="0.004709523">
                <text:p>0.004709523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664.511535644531">
                <text:p>664.511535644531</text:p>
              </table:table-cell>
              <table:table-cell office:value-type="float" office:value="0.008850715">
                <text:p>0.008850715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664.63134765625">
                <text:p>664.63134765625</text:p>
              </table:table-cell>
              <table:table-cell office:value-type="float" office:value="0.003942418">
                <text:p>0.003942418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664.751220703125">
                <text:p>664.751220703125</text:p>
              </table:table-cell>
              <table:table-cell office:value-type="float" office:value="-0.001835679">
                <text:p>-0.001835679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664.87109375">
                <text:p>664.87109375</text:p>
              </table:table-cell>
              <table:table-cell office:value-type="float" office:value="0.01107155">
                <text:p>0.01107155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664.990905761719">
                <text:p>664.990905761719</text:p>
              </table:table-cell>
              <table:table-cell office:value-type="float" office:value="0.01061421">
                <text:p>0.01061421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665.110778808594">
                <text:p>665.110778808594</text:p>
              </table:table-cell>
              <table:table-cell office:value-type="float" office:value="0.004720824">
                <text:p>0.004720824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665.230590820313">
                <text:p>665.230590820313</text:p>
              </table:table-cell>
              <table:table-cell office:value-type="float" office:value="0.01123292">
                <text:p>0.01123292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665.350463867188">
                <text:p>665.350463867188</text:p>
              </table:table-cell>
              <table:table-cell office:value-type="float" office:value="-0.0009265682">
                <text:p>-0.0009265682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665.470336914063">
                <text:p>665.470336914063</text:p>
              </table:table-cell>
              <table:table-cell office:value-type="float" office:value="0.01753018">
                <text:p>0.01753018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665.590148925781">
                <text:p>665.590148925781</text:p>
              </table:table-cell>
              <table:table-cell office:value-type="float" office:value="0.01296124">
                <text:p>0.01296124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665.710021972656">
                <text:p>665.710021972656</text:p>
              </table:table-cell>
              <table:table-cell office:value-type="float" office:value="0.006088375">
                <text:p>0.006088375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665.829895019531">
                <text:p>665.829895019531</text:p>
              </table:table-cell>
              <table:table-cell office:value-type="float" office:value="0.0009407173">
                <text:p>0.0009407173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665.949768066406">
                <text:p>665.949768066406</text:p>
              </table:table-cell>
              <table:table-cell office:value-type="float" office:value="0.01892012">
                <text:p>0.01892012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666.069580078125">
                <text:p>666.069580078125</text:p>
              </table:table-cell>
              <table:table-cell office:value-type="float" office:value="0.001009842">
                <text:p>0.001009842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666.189453125">
                <text:p>666.189453125</text:p>
              </table:table-cell>
              <table:table-cell office:value-type="float" office:value="0.02092768">
                <text:p>0.02092768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666.309326171875">
                <text:p>666.309326171875</text:p>
              </table:table-cell>
              <table:table-cell office:value-type="float" office:value="0.002564754">
                <text:p>0.002564754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666.42919921875">
                <text:p>666.42919921875</text:p>
              </table:table-cell>
              <table:table-cell office:value-type="float" office:value="0.01371406">
                <text:p>0.01371406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666.549072265625">
                <text:p>666.549072265625</text:p>
              </table:table-cell>
              <table:table-cell office:value-type="float" office:value="0.01205836">
                <text:p>0.01205836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666.6689453125">
                <text:p>666.6689453125</text:p>
              </table:table-cell>
              <table:table-cell office:value-type="float" office:value="0.005972805">
                <text:p>0.005972805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666.788818359375">
                <text:p>666.788818359375</text:p>
              </table:table-cell>
              <table:table-cell office:value-type="float" office:value="0.004750441">
                <text:p>0.004750441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666.90869140625">
                <text:p>666.90869140625</text:p>
              </table:table-cell>
              <table:table-cell office:value-type="float" office:value="0.001722292">
                <text:p>0.001722292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667.028564453125">
                <text:p>667.028564453125</text:p>
              </table:table-cell>
              <table:table-cell office:value-type="float" office:value="0.006825678">
                <text:p>0.006825678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667.1484375">
                <text:p>667.1484375</text:p>
              </table:table-cell>
              <table:table-cell office:value-type="float" office:value="0.006765016">
                <text:p>0.006765016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667.268310546875">
                <text:p>667.268310546875</text:p>
              </table:table-cell>
              <table:table-cell office:value-type="float" office:value="0.005963568">
                <text:p>0.005963568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667.38818359375">
                <text:p>667.38818359375</text:p>
              </table:table-cell>
              <table:table-cell office:value-type="float" office:value="0.01393631">
                <text:p>0.01393631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667.508056640625">
                <text:p>667.508056640625</text:p>
              </table:table-cell>
              <table:table-cell office:value-type="float" office:value="0.002575766">
                <text:p>0.002575766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667.6279296875">
                <text:p>667.6279296875</text:p>
              </table:table-cell>
              <table:table-cell office:value-type="float" office:value="0.000798571">
                <text:p>0.000798571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667.747802734375">
                <text:p>667.74780273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667.86767578125">
                <text:p>667.86767578125</text:p>
              </table:table-cell>
              <table:table-cell office:value-type="float" office:value="-0.005655322">
                <text:p>-0.005655322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667.987548828125">
                <text:p>667.987548828125</text:p>
              </table:table-cell>
              <table:table-cell office:value-type="float" office:value="0.01042458">
                <text:p>0.01042458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668.107421875">
                <text:p>668.107421875</text:p>
              </table:table-cell>
              <table:table-cell office:value-type="float" office:value="-0.004881747">
                <text:p>-0.004881747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668.227294921875">
                <text:p>668.227294921875</text:p>
              </table:table-cell>
              <table:table-cell office:value-type="float" office:value="0.004957203">
                <text:p>0.004957203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668.34716796875">
                <text:p>668.34716796875</text:p>
              </table:table-cell>
              <table:table-cell office:value-type="float" office:value="0.009864864">
                <text:p>0.009864864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668.467102050781">
                <text:p>668.467102050781</text:p>
              </table:table-cell>
              <table:table-cell office:value-type="float" office:value="0.005825193">
                <text:p>0.005825193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668.586975097656">
                <text:p>668.586975097656</text:p>
              </table:table-cell>
              <table:table-cell office:value-type="float" office:value="0.003792071">
                <text:p>0.003792071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668.706848144531">
                <text:p>668.706848144531</text:p>
              </table:table-cell>
              <table:table-cell office:value-type="float" office:value="0.002900901">
                <text:p>0.002900901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668.826721191406">
                <text:p>668.826721191406</text:p>
              </table:table-cell>
              <table:table-cell office:value-type="float" office:value="0.002892966">
                <text:p>0.002892966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668.946594238281">
                <text:p>668.946594238281</text:p>
              </table:table-cell>
              <table:table-cell office:value-type="float" office:value="0.01079373">
                <text:p>0.01079373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669.066528320313">
                <text:p>669.066528320313</text:p>
              </table:table-cell>
              <table:table-cell office:value-type="float" office:value="0.006757444">
                <text:p>0.006757444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669.186401367188">
                <text:p>669.186401367188</text:p>
              </table:table-cell>
              <table:table-cell office:value-type="float" office:value="-0.001319575">
                <text:p>-0.001319575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669.306274414063">
                <text:p>669.306274414063</text:p>
              </table:table-cell>
              <table:table-cell office:value-type="float" office:value="0.01538067">
                <text:p>0.01538067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669.426208496094">
                <text:p>669.426208496094</text:p>
              </table:table-cell>
              <table:table-cell office:value-type="float" office:value="0.008102169">
                <text:p>0.008102169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669.546081542969">
                <text:p>669.546081542969</text:p>
              </table:table-cell>
              <table:table-cell office:value-type="float" office:value="-0.0002993075">
                <text:p>-0.0002993075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669.665954589844">
                <text:p>669.665954589844</text:p>
              </table:table-cell>
              <table:table-cell office:value-type="float" office:value="0.0004343919">
                <text:p>0.0004343919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669.785888671875">
                <text:p>669.785888671875</text:p>
              </table:table-cell>
              <table:table-cell office:value-type="float" office:value="0.005844322">
                <text:p>0.005844322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669.90576171875">
                <text:p>669.90576171875</text:p>
              </table:table-cell>
              <table:table-cell office:value-type="float" office:value="0.005287312">
                <text:p>0.005287312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670.025695800781">
                <text:p>670.025695800781</text:p>
              </table:table-cell>
              <table:table-cell office:value-type="float" office:value="-0.001953554">
                <text:p>-0.001953554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670.145568847656">
                <text:p>670.145568847656</text:p>
              </table:table-cell>
              <table:table-cell office:value-type="float" office:value="0.01672908">
                <text:p>0.01672908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670.265502929688">
                <text:p>670.265502929688</text:p>
              </table:table-cell>
              <table:table-cell office:value-type="float" office:value="0.008382403">
                <text:p>0.008382403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670.385375976563">
                <text:p>670.385375976563</text:p>
              </table:table-cell>
              <table:table-cell office:value-type="float" office:value="0.01488486">
                <text:p>0.01488486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670.505310058594">
                <text:p>670.505310058594</text:p>
              </table:table-cell>
              <table:table-cell office:value-type="float" office:value="0.008084889">
                <text:p>0.008084889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670.625183105469">
                <text:p>670.625183105469</text:p>
              </table:table-cell>
              <table:table-cell office:value-type="float" office:value="0.01043961">
                <text:p>0.01043961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670.7451171875">
                <text:p>670.7451171875</text:p>
              </table:table-cell>
              <table:table-cell office:value-type="float" office:value="0.005233262">
                <text:p>0.005233262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670.864990234375">
                <text:p>670.864990234375</text:p>
              </table:table-cell>
              <table:table-cell office:value-type="float" office:value="0.01328118">
                <text:p>0.01328118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670.984924316406">
                <text:p>670.984924316406</text:p>
              </table:table-cell>
              <table:table-cell office:value-type="float" office:value="0.01121852">
                <text:p>0.01121852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671.104858398438">
                <text:p>671.104858398438</text:p>
              </table:table-cell>
              <table:table-cell office:value-type="float" office:value="-0.001527742">
                <text:p>-0.001527742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671.224731445313">
                <text:p>671.224731445313</text:p>
              </table:table-cell>
              <table:table-cell office:value-type="float" office:value="0.005595893">
                <text:p>0.005595893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671.344665527344">
                <text:p>671.344665527344</text:p>
              </table:table-cell>
              <table:table-cell office:value-type="float" office:value="0.01146833">
                <text:p>0.01146833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671.464599609375">
                <text:p>671.464599609375</text:p>
              </table:table-cell>
              <table:table-cell office:value-type="float" office:value="-0.003382672">
                <text:p>-0.003382672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671.58447265625">
                <text:p>671.58447265625</text:p>
              </table:table-cell>
              <table:table-cell office:value-type="float" office:value="0.0007839312">
                <text:p>0.0007839312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671.704406738281">
                <text:p>671.704406738281</text:p>
              </table:table-cell>
              <table:table-cell office:value-type="float" office:value="0.01254576">
                <text:p>0.01254576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671.824340820313">
                <text:p>671.824340820313</text:p>
              </table:table-cell>
              <table:table-cell office:value-type="float" office:value="0.004108902">
                <text:p>0.004108902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671.944213867188">
                <text:p>671.944213867188</text:p>
              </table:table-cell>
              <table:table-cell office:value-type="float" office:value="0.003807803">
                <text:p>0.003807803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672.064147949219">
                <text:p>672.064147949219</text:p>
              </table:table-cell>
              <table:table-cell office:value-type="float" office:value="0.001675235">
                <text:p>0.001675235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672.18408203125">
                <text:p>672.18408203125</text:p>
              </table:table-cell>
              <table:table-cell office:value-type="float" office:value="0.002773779">
                <text:p>0.002773779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672.304016113281">
                <text:p>672.304016113281</text:p>
              </table:table-cell>
              <table:table-cell office:value-type="float" office:value="-0.0006458866">
                <text:p>-0.0006458866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672.423950195313">
                <text:p>672.423950195313</text:p>
              </table:table-cell>
              <table:table-cell office:value-type="float" office:value="-0.004514053">
                <text:p>-0.004514053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672.543823242188">
                <text:p>672.543823242188</text:p>
              </table:table-cell>
              <table:table-cell office:value-type="float" office:value="-0.0005974415">
                <text:p>-0.0005974415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672.663757324219">
                <text:p>672.663757324219</text:p>
              </table:table-cell>
              <table:table-cell office:value-type="float" office:value="0.008777115">
                <text:p>0.008777115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672.78369140625">
                <text:p>672.78369140625</text:p>
              </table:table-cell>
              <table:table-cell office:value-type="float" office:value="0.00556402">
                <text:p>0.00556402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672.903625488281">
                <text:p>672.903625488281</text:p>
              </table:table-cell>
              <table:table-cell office:value-type="float" office:value="0.01615237">
                <text:p>0.01615237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673.023559570313">
                <text:p>673.023559570313</text:p>
              </table:table-cell>
              <table:table-cell office:value-type="float" office:value="0.01367144">
                <text:p>0.01367144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673.143493652344">
                <text:p>673.143493652344</text:p>
              </table:table-cell>
              <table:table-cell office:value-type="float" office:value="0.006149202">
                <text:p>0.006149202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673.263427734375">
                <text:p>673.263427734375</text:p>
              </table:table-cell>
              <table:table-cell office:value-type="float" office:value="-0.005403648">
                <text:p>-0.005403648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673.383361816406">
                <text:p>673.383361816406</text:p>
              </table:table-cell>
              <table:table-cell office:value-type="float" office:value="0.02077176">
                <text:p>0.02077176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673.503295898438">
                <text:p>673.503295898438</text:p>
              </table:table-cell>
              <table:table-cell office:value-type="float" office:value="-0.005110678">
                <text:p>-0.005110678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673.623229980469">
                <text:p>673.623229980469</text:p>
              </table:table-cell>
              <table:table-cell office:value-type="float" office:value="0.0008721012">
                <text:p>0.0008721012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673.7431640625">
                <text:p>673.7431640625</text:p>
              </table:table-cell>
              <table:table-cell office:value-type="float" office:value="0.001817515">
                <text:p>0.001817515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673.863098144531">
                <text:p>673.863098144531</text:p>
              </table:table-cell>
              <table:table-cell office:value-type="float" office:value="0.005750085">
                <text:p>0.005750085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673.983032226563">
                <text:p>673.983032226563</text:p>
              </table:table-cell>
              <table:table-cell office:value-type="float" office:value="0.003132721">
                <text:p>0.003132721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674.102966308594">
                <text:p>674.102966308594</text:p>
              </table:table-cell>
              <table:table-cell office:value-type="float" office:value="0.01019051">
                <text:p>0.01019051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674.222900390625">
                <text:p>674.222900390625</text:p>
              </table:table-cell>
              <table:table-cell office:value-type="float" office:value="-0.003078549">
                <text:p>-0.003078549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674.342834472656">
                <text:p>674.342834472656</text:p>
              </table:table-cell>
              <table:table-cell office:value-type="float" office:value="-0.004274134">
                <text:p>-0.004274134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674.462768554688">
                <text:p>674.462768554688</text:p>
              </table:table-cell>
              <table:table-cell office:value-type="float" office:value="0.005832712">
                <text:p>0.005832712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674.582702636719">
                <text:p>674.582702636719</text:p>
              </table:table-cell>
              <table:table-cell office:value-type="float" office:value="0.006542341">
                <text:p>0.006542341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674.702697753906">
                <text:p>674.702697753906</text:p>
              </table:table-cell>
              <table:table-cell office:value-type="float" office:value="0.009735149">
                <text:p>0.009735149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674.822631835938">
                <text:p>674.822631835938</text:p>
              </table:table-cell>
              <table:table-cell office:value-type="float" office:value="0.0007287968">
                <text:p>0.0007287968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674.942565917969">
                <text:p>674.942565917969</text:p>
              </table:table-cell>
              <table:table-cell office:value-type="float" office:value="0.0145933">
                <text:p>0.0145933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675.0625">
                <text:p>675.0625</text:p>
              </table:table-cell>
              <table:table-cell office:value-type="float" office:value="-0.001007513">
                <text:p>-0.001007513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675.182495117188">
                <text:p>675.182495117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675.302429199219">
                <text:p>675.302429199219</text:p>
              </table:table-cell>
              <table:table-cell office:value-type="float" office:value="0.008312182">
                <text:p>0.008312182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675.42236328125">
                <text:p>675.42236328125</text:p>
              </table:table-cell>
              <table:table-cell office:value-type="float" office:value="0.01452205">
                <text:p>0.01452205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675.542297363281">
                <text:p>675.542297363281</text:p>
              </table:table-cell>
              <table:table-cell office:value-type="float" office:value="0.01349994">
                <text:p>0.01349994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675.662292480469">
                <text:p>675.662292480469</text:p>
              </table:table-cell>
              <table:table-cell office:value-type="float" office:value="0.007585448">
                <text:p>0.007585448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675.7822265625">
                <text:p>675.7822265625</text:p>
              </table:table-cell>
              <table:table-cell office:value-type="float" office:value="0.01002991">
                <text:p>0.01002991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675.902160644531">
                <text:p>675.902160644531</text:p>
              </table:table-cell>
              <table:table-cell office:value-type="float" office:value="-0.004239916">
                <text:p>-0.004239916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676.022155761719">
                <text:p>676.022155761719</text:p>
              </table:table-cell>
              <table:table-cell office:value-type="float" office:value="0.01101699">
                <text:p>0.01101699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676.14208984375">
                <text:p>676.14208984375</text:p>
              </table:table-cell>
              <table:table-cell office:value-type="float" office:value="0.003000186">
                <text:p>0.003000186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676.262023925781">
                <text:p>676.262023925781</text:p>
              </table:table-cell>
              <table:table-cell office:value-type="float" office:value="-0.003206676">
                <text:p>-0.003206676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676.382019042969">
                <text:p>676.382019042969</text:p>
              </table:table-cell>
              <table:table-cell office:value-type="float" office:value="0.01182246">
                <text:p>0.01182246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676.501953125">
                <text:p>676.501953125</text:p>
              </table:table-cell>
              <table:table-cell office:value-type="float" office:value="0.004242628">
                <text:p>0.004242628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676.621948242188">
                <text:p>676.621948242188</text:p>
              </table:table-cell>
              <table:table-cell office:value-type="float" office:value="-0.002881299">
                <text:p>-0.002881299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676.741882324219">
                <text:p>676.741882324219</text:p>
              </table:table-cell>
              <table:table-cell office:value-type="float" office:value="-0.006598965">
                <text:p>-0.006598965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676.861877441406">
                <text:p>676.861877441406</text:p>
              </table:table-cell>
              <table:table-cell office:value-type="float" office:value="0.001968956">
                <text:p>0.001968956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676.981811523438">
                <text:p>676.981811523438</text:p>
              </table:table-cell>
              <table:table-cell office:value-type="float" office:value="0.005465983">
                <text:p>0.005465983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677.101806640625">
                <text:p>677.101806640625</text:p>
              </table:table-cell>
              <table:table-cell office:value-type="float" office:value="0.003400201">
                <text:p>0.003400201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677.221740722656">
                <text:p>677.221740722656</text:p>
              </table:table-cell>
              <table:table-cell office:value-type="float" office:value="-0.001010385">
                <text:p>-0.001010385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677.341735839844">
                <text:p>677.341735839844</text:p>
              </table:table-cell>
              <table:table-cell office:value-type="float" office:value="0.01119548">
                <text:p>0.01119548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677.461669921875">
                <text:p>677.461669921875</text:p>
              </table:table-cell>
              <table:table-cell office:value-type="float" office:value="0.00116907">
                <text:p>0.00116907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677.581665039063">
                <text:p>677.581665039063</text:p>
              </table:table-cell>
              <table:table-cell office:value-type="float" office:value="0.006773257">
                <text:p>0.006773257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677.70166015625">
                <text:p>677.70166015625</text:p>
              </table:table-cell>
              <table:table-cell office:value-type="float" office:value="-0.0001189783">
                <text:p>-0.0001189783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677.821594238281">
                <text:p>677.821594238281</text:p>
              </table:table-cell>
              <table:table-cell office:value-type="float" office:value="0.006994154">
                <text:p>0.006994154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677.941589355469">
                <text:p>677.941589355469</text:p>
              </table:table-cell>
              <table:table-cell office:value-type="float" office:value="0.003417006">
                <text:p>0.003417006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678.061584472656">
                <text:p>678.061584472656</text:p>
              </table:table-cell>
              <table:table-cell office:value-type="float" office:value="0.0005151098">
                <text:p>0.0005151098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678.181518554688">
                <text:p>678.181518554688</text:p>
              </table:table-cell>
              <table:table-cell office:value-type="float" office:value="-0.0001612253">
                <text:p>-0.0001612253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678.301513671875">
                <text:p>678.301513671875</text:p>
              </table:table-cell>
              <table:table-cell office:value-type="float" office:value="0.004283581">
                <text:p>0.004283581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678.421508789063">
                <text:p>678.421508789063</text:p>
              </table:table-cell>
              <table:table-cell office:value-type="float" office:value="-0.001333254">
                <text:p>-0.001333254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678.541442871094">
                <text:p>678.541442871094</text:p>
              </table:table-cell>
              <table:table-cell office:value-type="float" office:value="0.01768457">
                <text:p>0.01768457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678.661437988281">
                <text:p>678.661437988281</text:p>
              </table:table-cell>
              <table:table-cell office:value-type="float" office:value="0.002273249">
                <text:p>0.002273249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678.781433105469">
                <text:p>678.781433105469</text:p>
              </table:table-cell>
              <table:table-cell office:value-type="float" office:value="0.006425685">
                <text:p>0.006425685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678.901428222656">
                <text:p>678.901428222656</text:p>
              </table:table-cell>
              <table:table-cell office:value-type="float" office:value="0.008063784">
                <text:p>0.008063784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679.021362304688">
                <text:p>679.021362304688</text:p>
              </table:table-cell>
              <table:table-cell office:value-type="float" office:value="0.006009284">
                <text:p>0.006009284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679.141357421875">
                <text:p>679.141357421875</text:p>
              </table:table-cell>
              <table:table-cell office:value-type="float" office:value="0.003277988">
                <text:p>0.003277988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679.261352539063">
                <text:p>679.261352539063</text:p>
              </table:table-cell>
              <table:table-cell office:value-type="float" office:value="0.01000577">
                <text:p>0.01000577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679.38134765625">
                <text:p>679.38134765625</text:p>
              </table:table-cell>
              <table:table-cell office:value-type="float" office:value="0.01090527">
                <text:p>0.01090527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679.501342773438">
                <text:p>679.501342773438</text:p>
              </table:table-cell>
              <table:table-cell office:value-type="float" office:value="-0.001204311">
                <text:p>-0.001204311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679.621337890625">
                <text:p>679.621337890625</text:p>
              </table:table-cell>
              <table:table-cell office:value-type="float" office:value="0.007084561">
                <text:p>0.007084561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679.741333007813">
                <text:p>679.741333007813</text:p>
              </table:table-cell>
              <table:table-cell office:value-type="float" office:value="0.004812632">
                <text:p>0.004812632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679.861267089844">
                <text:p>679.861267089844</text:p>
              </table:table-cell>
              <table:table-cell office:value-type="float" office:value="0.006651338">
                <text:p>0.006651338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679.981262207031">
                <text:p>679.981262207031</text:p>
              </table:table-cell>
              <table:table-cell office:value-type="float" office:value="0.001618515">
                <text:p>0.001618515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680.101257324219">
                <text:p>680.101257324219</text:p>
              </table:table-cell>
              <table:table-cell office:value-type="float" office:value="-0.002416003">
                <text:p>-0.002416003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680.221252441406">
                <text:p>680.221252441406</text:p>
              </table:table-cell>
              <table:table-cell office:value-type="float" office:value="0.01142666">
                <text:p>0.01142666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680.341247558594">
                <text:p>680.341247558594</text:p>
              </table:table-cell>
              <table:table-cell office:value-type="float" office:value="-0.001075347">
                <text:p>-0.001075347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680.461242675781">
                <text:p>680.461242675781</text:p>
              </table:table-cell>
              <table:table-cell office:value-type="float" office:value="-0.001505816">
                <text:p>-0.001505816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680.581237792969">
                <text:p>680.581237792969</text:p>
              </table:table-cell>
              <table:table-cell office:value-type="float" office:value="0.001798369">
                <text:p>0.001798369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680.701232910156">
                <text:p>680.701232910156</text:p>
              </table:table-cell>
              <table:table-cell office:value-type="float" office:value="0.006278894">
                <text:p>0.006278894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680.821228027344">
                <text:p>680.821228027344</text:p>
              </table:table-cell>
              <table:table-cell office:value-type="float" office:value="0.006093977">
                <text:p>0.006093977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680.941223144531">
                <text:p>680.941223144531</text:p>
              </table:table-cell>
              <table:table-cell office:value-type="float" office:value="0.002509728">
                <text:p>0.002509728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681.061218261719">
                <text:p>681.061218261719</text:p>
              </table:table-cell>
              <table:table-cell office:value-type="float" office:value="0.0006750327">
                <text:p>0.0006750327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681.181274414063">
                <text:p>681.181274414063</text:p>
              </table:table-cell>
              <table:table-cell office:value-type="float" office:value="0.001506323">
                <text:p>0.001506323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681.30126953125">
                <text:p>681.30126953125</text:p>
              </table:table-cell>
              <table:table-cell office:value-type="float" office:value="0.005083851">
                <text:p>0.005083851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681.421264648438">
                <text:p>681.421264648438</text:p>
              </table:table-cell>
              <table:table-cell office:value-type="float" office:value="0.007263468">
                <text:p>0.007263468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681.541259765625">
                <text:p>681.541259765625</text:p>
              </table:table-cell>
              <table:table-cell office:value-type="float" office:value="-0.006576649">
                <text:p>-0.006576649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681.661254882813">
                <text:p>681.661254882813</text:p>
              </table:table-cell>
              <table:table-cell office:value-type="float" office:value="0.004224083">
                <text:p>0.004224083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681.78125">
                <text:p>681.78125</text:p>
              </table:table-cell>
              <table:table-cell office:value-type="float" office:value="-0.003302383">
                <text:p>-0.003302383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681.901245117188">
                <text:p>681.901245117188</text:p>
              </table:table-cell>
              <table:table-cell office:value-type="float" office:value="0.005459189">
                <text:p>0.005459189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682.021301269531">
                <text:p>682.021301269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682.141296386719">
                <text:p>682.141296386719</text:p>
              </table:table-cell>
              <table:table-cell office:value-type="float" office:value="-0.001061591">
                <text:p>-0.001061591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682.261291503906">
                <text:p>682.261291503906</text:p>
              </table:table-cell>
              <table:table-cell office:value-type="float" office:value="-0.001188021">
                <text:p>-0.001188021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682.381286621094">
                <text:p>682.381286621094</text:p>
              </table:table-cell>
              <table:table-cell office:value-type="float" office:value="0.001785306">
                <text:p>0.001785306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682.501342773438">
                <text:p>682.501342773438</text:p>
              </table:table-cell>
              <table:table-cell office:value-type="float" office:value="0.005156857">
                <text:p>0.005156857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682.621337890625">
                <text:p>682.621337890625</text:p>
              </table:table-cell>
              <table:table-cell office:value-type="float" office:value="0.001292376">
                <text:p>0.001292376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682.741333007813">
                <text:p>682.741333007813</text:p>
              </table:table-cell>
              <table:table-cell office:value-type="float" office:value="-0.0006455907">
                <text:p>-0.0006455907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682.861389160156">
                <text:p>682.861389160156</text:p>
              </table:table-cell>
              <table:table-cell office:value-type="float" office:value="0.00242445">
                <text:p>0.00242445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682.981384277344">
                <text:p>682.981384277344</text:p>
              </table:table-cell>
              <table:table-cell office:value-type="float" office:value="0.004197922">
                <text:p>0.004197922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683.101379394531">
                <text:p>683.101379394531</text:p>
              </table:table-cell>
              <table:table-cell office:value-type="float" office:value="-0.003188515">
                <text:p>-0.003188515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683.221435546875">
                <text:p>683.221435546875</text:p>
              </table:table-cell>
              <table:table-cell office:value-type="float" office:value="0.002087072">
                <text:p>0.002087072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683.341430664063">
                <text:p>683.341430664063</text:p>
              </table:table-cell>
              <table:table-cell office:value-type="float" office:value="-0.004992391">
                <text:p>-0.004992391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683.46142578125">
                <text:p>683.46142578125</text:p>
              </table:table-cell>
              <table:table-cell office:value-type="float" office:value="-0.003614065">
                <text:p>-0.003614065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683.581481933594">
                <text:p>683.581481933594</text:p>
              </table:table-cell>
              <table:table-cell office:value-type="float" office:value="-0.001745504">
                <text:p>-0.001745504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683.701477050781">
                <text:p>683.701477050781</text:p>
              </table:table-cell>
              <table:table-cell office:value-type="float" office:value="0.0008577415">
                <text:p>0.0008577415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683.821533203125">
                <text:p>683.821533203125</text:p>
              </table:table-cell>
              <table:table-cell office:value-type="float" office:value="-0.002162141">
                <text:p>-0.002162141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683.941528320313">
                <text:p>683.941528320313</text:p>
              </table:table-cell>
              <table:table-cell office:value-type="float" office:value="-0.00311544">
                <text:p>-0.00311544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684.061584472656">
                <text:p>684.061584472656</text:p>
              </table:table-cell>
              <table:table-cell office:value-type="float" office:value="0.006929183">
                <text:p>0.006929183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684.181579589844">
                <text:p>684.181579589844</text:p>
              </table:table-cell>
              <table:table-cell office:value-type="float" office:value="-0.007520953">
                <text:p>-0.007520953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684.301635742188">
                <text:p>684.301635742188</text:p>
              </table:table-cell>
              <table:table-cell office:value-type="float" office:value="-0.002382955">
                <text:p>-0.002382955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684.421630859375">
                <text:p>684.421630859375</text:p>
              </table:table-cell>
              <table:table-cell office:value-type="float" office:value="-0.005078045">
                <text:p>-0.005078045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684.541687011719">
                <text:p>684.541687011719</text:p>
              </table:table-cell>
              <table:table-cell office:value-type="float" office:value="0.006970359">
                <text:p>0.006970359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684.661682128906">
                <text:p>684.661682128906</text:p>
              </table:table-cell>
              <table:table-cell office:value-type="float" office:value="-0.00320974">
                <text:p>-0.00320974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684.78173828125">
                <text:p>684.78173828125</text:p>
              </table:table-cell>
              <table:table-cell office:value-type="float" office:value="0.008489694">
                <text:p>0.008489694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684.901733398438">
                <text:p>684.901733398438</text:p>
              </table:table-cell>
              <table:table-cell office:value-type="float" office:value="0.01012518">
                <text:p>0.01012518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685.021789550781">
                <text:p>685.021789550781</text:p>
              </table:table-cell>
              <table:table-cell office:value-type="float" office:value="-0.001502781">
                <text:p>-0.001502781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685.141784667969">
                <text:p>685.141784667969</text:p>
              </table:table-cell>
              <table:table-cell office:value-type="float" office:value="0.003653717">
                <text:p>0.003653717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685.261840820313">
                <text:p>685.261840820313</text:p>
              </table:table-cell>
              <table:table-cell office:value-type="float" office:value="0.01170619">
                <text:p>0.01170619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685.381896972656">
                <text:p>685.381896972656</text:p>
              </table:table-cell>
              <table:table-cell office:value-type="float" office:value="0.004744434">
                <text:p>0.004744434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685.501892089844">
                <text:p>685.501892089844</text:p>
              </table:table-cell>
              <table:table-cell office:value-type="float" office:value="-0.0008130611">
                <text:p>-0.0008130611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685.621948242188">
                <text:p>685.621948242188</text:p>
              </table:table-cell>
              <table:table-cell office:value-type="float" office:value="0.01357663">
                <text:p>0.01357663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685.742004394531">
                <text:p>685.742004394531</text:p>
              </table:table-cell>
              <table:table-cell office:value-type="float" office:value="0.001885655">
                <text:p>0.001885655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685.861999511719">
                <text:p>685.861999511719</text:p>
              </table:table-cell>
              <table:table-cell office:value-type="float" office:value="0.003062258">
                <text:p>0.003062258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685.982055664063">
                <text:p>685.982055664063</text:p>
              </table:table-cell>
              <table:table-cell office:value-type="float" office:value="-0.0006751462">
                <text:p>-0.0006751462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686.102111816406">
                <text:p>686.102111816406</text:p>
              </table:table-cell>
              <table:table-cell office:value-type="float" office:value="0.004404236">
                <text:p>0.004404236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686.22216796875">
                <text:p>686.22216796875</text:p>
              </table:table-cell>
              <table:table-cell office:value-type="float" office:value="-0.004689561">
                <text:p>-0.004689561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686.342163085938">
                <text:p>686.342163085938</text:p>
              </table:table-cell>
              <table:table-cell office:value-type="float" office:value="-0.003290987">
                <text:p>-0.003290987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686.462219238281">
                <text:p>686.462219238281</text:p>
              </table:table-cell>
              <table:table-cell office:value-type="float" office:value="0.004254408">
                <text:p>0.004254408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686.582275390625">
                <text:p>686.582275390625</text:p>
              </table:table-cell>
              <table:table-cell office:value-type="float" office:value="0.001109348">
                <text:p>0.001109348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686.702331542969">
                <text:p>686.702331542969</text:p>
              </table:table-cell>
              <table:table-cell office:value-type="float" office:value="0.004351575">
                <text:p>0.004351575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686.822387695313">
                <text:p>686.822387695313</text:p>
              </table:table-cell>
              <table:table-cell office:value-type="float" office:value="0.0002873504">
                <text:p>0.0002873504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686.9423828125">
                <text:p>686.9423828125</text:p>
              </table:table-cell>
              <table:table-cell office:value-type="float" office:value="0.008893187">
                <text:p>0.008893187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687.062438964844">
                <text:p>687.062438964844</text:p>
              </table:table-cell>
              <table:table-cell office:value-type="float" office:value="0.004726781">
                <text:p>0.004726781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687.182495117188">
                <text:p>687.182495117188</text:p>
              </table:table-cell>
              <table:table-cell office:value-type="float" office:value="-0.006861057">
                <text:p>-0.006861057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687.302551269531">
                <text:p>687.302551269531</text:p>
              </table:table-cell>
              <table:table-cell office:value-type="float" office:value="0.003795638">
                <text:p>0.003795638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687.422607421875">
                <text:p>687.422607421875</text:p>
              </table:table-cell>
              <table:table-cell office:value-type="float" office:value="-0.003305399">
                <text:p>-0.003305399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687.542663574219">
                <text:p>687.542663574219</text:p>
              </table:table-cell>
              <table:table-cell office:value-type="float" office:value="-0.005732778">
                <text:p>-0.005732778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687.662719726563">
                <text:p>687.662719726563</text:p>
              </table:table-cell>
              <table:table-cell office:value-type="float" office:value="0.01171246">
                <text:p>0.01171246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687.782775878906">
                <text:p>687.782775878906</text:p>
              </table:table-cell>
              <table:table-cell office:value-type="float" office:value="0.002108946">
                <text:p>0.002108946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687.90283203125">
                <text:p>687.90283203125</text:p>
              </table:table-cell>
              <table:table-cell office:value-type="float" office:value="0.008902605">
                <text:p>0.008902605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688.022888183594">
                <text:p>688.022888183594</text:p>
              </table:table-cell>
              <table:table-cell office:value-type="float" office:value="0.0102518">
                <text:p>0.0102518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688.142944335938">
                <text:p>688.142944335938</text:p>
              </table:table-cell>
              <table:table-cell office:value-type="float" office:value="0.005871566">
                <text:p>0.005871566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688.263000488281">
                <text:p>688.263000488281</text:p>
              </table:table-cell>
              <table:table-cell office:value-type="float" office:value="-0.001845936">
                <text:p>-0.001845936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688.383056640625">
                <text:p>688.383056640625</text:p>
              </table:table-cell>
              <table:table-cell office:value-type="float" office:value="-0.0003081277">
                <text:p>-0.0003081277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688.503112792969">
                <text:p>688.503112792969</text:p>
              </table:table-cell>
              <table:table-cell office:value-type="float" office:value="-0.002174736">
                <text:p>-0.002174736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688.623168945313">
                <text:p>688.623168945313</text:p>
              </table:table-cell>
              <table:table-cell office:value-type="float" office:value="-0.003062192">
                <text:p>-0.003062192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688.743225097656">
                <text:p>688.743225097656</text:p>
              </table:table-cell>
              <table:table-cell office:value-type="float" office:value="-0.001737799">
                <text:p>-0.001737799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688.86328125">
                <text:p>688.86328125</text:p>
              </table:table-cell>
              <table:table-cell office:value-type="float" office:value="-0.0004691381">
                <text:p>-0.0004691381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688.983337402344">
                <text:p>688.983337402344</text:p>
              </table:table-cell>
              <table:table-cell office:value-type="float" office:value="-0.001075592">
                <text:p>-0.001075592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689.103393554688">
                <text:p>689.103393554688</text:p>
              </table:table-cell>
              <table:table-cell office:value-type="float" office:value="0.001898287">
                <text:p>0.001898287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689.223449707031">
                <text:p>689.223449707031</text:p>
              </table:table-cell>
              <table:table-cell office:value-type="float" office:value="0.001664858">
                <text:p>0.001664858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689.343505859375">
                <text:p>689.343505859375</text:p>
              </table:table-cell>
              <table:table-cell office:value-type="float" office:value="0.01696003">
                <text:p>0.01696003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689.463562011719">
                <text:p>689.463562011719</text:p>
              </table:table-cell>
              <table:table-cell office:value-type="float" office:value="0.00509123">
                <text:p>0.00509123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689.583679199219">
                <text:p>689.583679199219</text:p>
              </table:table-cell>
              <table:table-cell office:value-type="float" office:value="0.006592936">
                <text:p>0.006592936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689.703735351563">
                <text:p>689.703735351563</text:p>
              </table:table-cell>
              <table:table-cell office:value-type="float" office:value="0.00630963">
                <text:p>0.00630963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689.823791503906">
                <text:p>689.823791503906</text:p>
              </table:table-cell>
              <table:table-cell office:value-type="float" office:value="-0.001198622">
                <text:p>-0.001198622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689.94384765625">
                <text:p>689.94384765625</text:p>
              </table:table-cell>
              <table:table-cell office:value-type="float" office:value="-0.001483761">
                <text:p>-0.001483761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690.063903808594">
                <text:p>690.063903808594</text:p>
              </table:table-cell>
              <table:table-cell office:value-type="float" office:value="0.005680969">
                <text:p>0.005680969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690.184020996094">
                <text:p>690.184020996094</text:p>
              </table:table-cell>
              <table:table-cell office:value-type="float" office:value="0.003853181">
                <text:p>0.003853181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690.304077148438">
                <text:p>690.304077148438</text:p>
              </table:table-cell>
              <table:table-cell office:value-type="float" office:value="0.001661995">
                <text:p>0.001661995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690.424133300781">
                <text:p>690.424133300781</text:p>
              </table:table-cell>
              <table:table-cell office:value-type="float" office:value="0.005330812">
                <text:p>0.005330812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690.544189453125">
                <text:p>690.544189453125</text:p>
              </table:table-cell>
              <table:table-cell office:value-type="float" office:value="0.02167569">
                <text:p>0.02167569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690.664306640625">
                <text:p>690.664306640625</text:p>
              </table:table-cell>
              <table:table-cell office:value-type="float" office:value="-0.00407174">
                <text:p>-0.00407174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690.784362792969">
                <text:p>690.784362792969</text:p>
              </table:table-cell>
              <table:table-cell office:value-type="float" office:value="0.00161872">
                <text:p>0.00161872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690.904418945313">
                <text:p>690.904418945313</text:p>
              </table:table-cell>
              <table:table-cell office:value-type="float" office:value="0.03791422">
                <text:p>0.03791422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691.024475097656">
                <text:p>691.024475097656</text:p>
              </table:table-cell>
              <table:table-cell office:value-type="float" office:value="0.004933413">
                <text:p>0.004933413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691.144592285156">
                <text:p>691.144592285156</text:p>
              </table:table-cell>
              <table:table-cell office:value-type="float" office:value="0.005112899">
                <text:p>0.005112899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691.2646484375">
                <text:p>691.264648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691.384765625">
                <text:p>691.384765625</text:p>
              </table:table-cell>
              <table:table-cell office:value-type="float" office:value="0.01285085">
                <text:p>0.01285085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691.504821777344">
                <text:p>691.504821777344</text:p>
              </table:table-cell>
              <table:table-cell office:value-type="float" office:value="0.004073382">
                <text:p>0.004073382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691.624877929688">
                <text:p>691.624877929688</text:p>
              </table:table-cell>
              <table:table-cell office:value-type="float" office:value="-0.00716269">
                <text:p>-0.00716269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691.744995117188">
                <text:p>691.744995117188</text:p>
              </table:table-cell>
              <table:table-cell office:value-type="float" office:value="0.01013416">
                <text:p>0.01013416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691.865051269531">
                <text:p>691.865051269531</text:p>
              </table:table-cell>
              <table:table-cell office:value-type="float" office:value="-0.003469028">
                <text:p>-0.003469028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691.985168457031">
                <text:p>691.985168457031</text:p>
              </table:table-cell>
              <table:table-cell office:value-type="float" office:value="-0.001880011">
                <text:p>-0.001880011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692.105224609375">
                <text:p>692.105224609375</text:p>
              </table:table-cell>
              <table:table-cell office:value-type="float" office:value="0.009700519">
                <text:p>0.009700519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692.225280761719">
                <text:p>692.225280761719</text:p>
              </table:table-cell>
              <table:table-cell office:value-type="float" office:value="0.005258331">
                <text:p>0.005258331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692.345397949219">
                <text:p>692.345397949219</text:p>
              </table:table-cell>
              <table:table-cell office:value-type="float" office:value="0.01452181">
                <text:p>0.01452181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692.465454101563">
                <text:p>692.465454101563</text:p>
              </table:table-cell>
              <table:table-cell office:value-type="float" office:value="0.005878383">
                <text:p>0.005878383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692.585571289063">
                <text:p>692.585571289063</text:p>
              </table:table-cell>
              <table:table-cell office:value-type="float" office:value="0.007973962">
                <text:p>0.007973962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692.705627441406">
                <text:p>692.705627441406</text:p>
              </table:table-cell>
              <table:table-cell office:value-type="float" office:value="0.00207566">
                <text:p>0.00207566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692.825744628906">
                <text:p>692.825744628906</text:p>
              </table:table-cell>
              <table:table-cell office:value-type="float" office:value="0.003297674">
                <text:p>0.003297674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692.94580078125">
                <text:p>692.94580078125</text:p>
              </table:table-cell>
              <table:table-cell office:value-type="float" office:value="0.001484989">
                <text:p>0.001484989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693.06591796875">
                <text:p>693.06591796875</text:p>
              </table:table-cell>
              <table:table-cell office:value-type="float" office:value="0.002277479">
                <text:p>0.002277479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693.18603515625">
                <text:p>693.18603515625</text:p>
              </table:table-cell>
              <table:table-cell office:value-type="float" office:value="-0.005402497">
                <text:p>-0.005402497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693.306091308594">
                <text:p>693.306091308594</text:p>
              </table:table-cell>
              <table:table-cell office:value-type="float" office:value="-0.002288081">
                <text:p>-0.002288081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693.426208496094">
                <text:p>693.426208496094</text:p>
              </table:table-cell>
              <table:table-cell office:value-type="float" office:value="-0.008468843">
                <text:p>-0.008468843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693.546264648438">
                <text:p>693.546264648438</text:p>
              </table:table-cell>
              <table:table-cell office:value-type="float" office:value="0.00147112">
                <text:p>0.00147112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693.666381835938">
                <text:p>693.666381835938</text:p>
              </table:table-cell>
              <table:table-cell office:value-type="float" office:value="-0.002383546">
                <text:p>-0.002383546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693.786499023438">
                <text:p>693.786499023438</text:p>
              </table:table-cell>
              <table:table-cell office:value-type="float" office:value="0.01326187">
                <text:p>0.01326187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693.906555175781">
                <text:p>693.906555175781</text:p>
              </table:table-cell>
              <table:table-cell office:value-type="float" office:value="-0.004672751">
                <text:p>-0.004672751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694.026672363281">
                <text:p>694.026672363281</text:p>
              </table:table-cell>
              <table:table-cell office:value-type="float" office:value="0.0002225164">
                <text:p>0.0002225164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694.146728515625">
                <text:p>694.146728515625</text:p>
              </table:table-cell>
              <table:table-cell office:value-type="float" office:value="0.001564669">
                <text:p>0.001564669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694.266845703125">
                <text:p>694.266845703125</text:p>
              </table:table-cell>
              <table:table-cell office:value-type="float" office:value="0.0004147913">
                <text:p>0.0004147913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694.386962890625">
                <text:p>694.386962890625</text:p>
              </table:table-cell>
              <table:table-cell office:value-type="float" office:value="0.001497216">
                <text:p>0.001497216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694.507080078125">
                <text:p>694.507080078125</text:p>
              </table:table-cell>
              <table:table-cell office:value-type="float" office:value="0.008557594">
                <text:p>0.008557594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694.627136230469">
                <text:p>694.627136230469</text:p>
              </table:table-cell>
              <table:table-cell office:value-type="float" office:value="0.0009449853">
                <text:p>0.0009449853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694.747253417969">
                <text:p>694.747253417969</text:p>
              </table:table-cell>
              <table:table-cell office:value-type="float" office:value="-0.001440596">
                <text:p>-0.001440596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694.867370605469">
                <text:p>694.867370605469</text:p>
              </table:table-cell>
              <table:table-cell office:value-type="float" office:value="-0.007046035">
                <text:p>-0.007046035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694.987426757813">
                <text:p>694.987426757813</text:p>
              </table:table-cell>
              <table:table-cell office:value-type="float" office:value="0.0004271205">
                <text:p>0.0004271205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695.107543945313">
                <text:p>695.107543945313</text:p>
              </table:table-cell>
              <table:table-cell office:value-type="float" office:value="0.002890494">
                <text:p>0.002890494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695.227661132813">
                <text:p>695.227661132813</text:p>
              </table:table-cell>
              <table:table-cell office:value-type="float" office:value="0.004398413">
                <text:p>0.004398413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695.347778320313">
                <text:p>695.347778320313</text:p>
              </table:table-cell>
              <table:table-cell office:value-type="float" office:value="-0.004174718">
                <text:p>-0.004174718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695.467895507813">
                <text:p>695.467895507813</text:p>
              </table:table-cell>
              <table:table-cell office:value-type="float" office:value="-0.005964334">
                <text:p>-0.005964334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695.587951660156">
                <text:p>695.587951660156</text:p>
              </table:table-cell>
              <table:table-cell office:value-type="float" office:value="0.01046285">
                <text:p>0.01046285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695.708068847656">
                <text:p>695.708068847656</text:p>
              </table:table-cell>
              <table:table-cell office:value-type="float" office:value="0.002890887">
                <text:p>0.002890887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695.828186035156">
                <text:p>695.828186035156</text:p>
              </table:table-cell>
              <table:table-cell office:value-type="float" office:value="-0.0009686504">
                <text:p>-0.0009686504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695.948303222656">
                <text:p>695.948303222656</text:p>
              </table:table-cell>
              <table:table-cell office:value-type="float" office:value="-0.0003268282">
                <text:p>-0.0003268282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696.068420410156">
                <text:p>696.068420410156</text:p>
              </table:table-cell>
              <table:table-cell office:value-type="float" office:value="-0.004220831">
                <text:p>-0.004220831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696.188537597656">
                <text:p>696.188537597656</text:p>
              </table:table-cell>
              <table:table-cell office:value-type="float" office:value="0.02407793">
                <text:p>0.02407793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696.308654785156">
                <text:p>696.308654785156</text:p>
              </table:table-cell>
              <table:table-cell office:value-type="float" office:value="-0.005792418">
                <text:p>-0.005792418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696.428771972656">
                <text:p>696.428771972656</text:p>
              </table:table-cell>
              <table:table-cell office:value-type="float" office:value="0.01366283">
                <text:p>0.01366283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696.548828125">
                <text:p>696.548828125</text:p>
              </table:table-cell>
              <table:table-cell office:value-type="float" office:value="-0.003609553">
                <text:p>-0.003609553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696.6689453125">
                <text:p>696.6689453125</text:p>
              </table:table-cell>
              <table:table-cell office:value-type="float" office:value="-0.003713192">
                <text:p>-0.003713192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696.7890625">
                <text:p>696.7890625</text:p>
              </table:table-cell>
              <table:table-cell office:value-type="float" office:value="-0.006206979">
                <text:p>-0.006206979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696.9091796875">
                <text:p>696.9091796875</text:p>
              </table:table-cell>
              <table:table-cell office:value-type="float" office:value="-0.004502468">
                <text:p>-0.004502468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697.029296875">
                <text:p>697.029296875</text:p>
              </table:table-cell>
              <table:table-cell office:value-type="float" office:value="-0.009185442">
                <text:p>-0.009185442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697.1494140625">
                <text:p>697.1494140625</text:p>
              </table:table-cell>
              <table:table-cell office:value-type="float" office:value="0.008760217">
                <text:p>0.008760217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697.26953125">
                <text:p>697.26953125</text:p>
              </table:table-cell>
              <table:table-cell office:value-type="float" office:value="0.005171277">
                <text:p>0.005171277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697.3896484375">
                <text:p>697.3896484375</text:p>
              </table:table-cell>
              <table:table-cell office:value-type="float" office:value="-0.00493036">
                <text:p>-0.00493036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697.509765625">
                <text:p>697.509765625</text:p>
              </table:table-cell>
              <table:table-cell office:value-type="float" office:value="0.002498241">
                <text:p>0.002498241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697.6298828125">
                <text:p>697.6298828125</text:p>
              </table:table-cell>
              <table:table-cell office:value-type="float" office:value="-0.004225498">
                <text:p>-0.004225498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697.75">
                <text:p>697.75</text:p>
              </table:table-cell>
              <table:table-cell office:value-type="float" office:value="0.02359161">
                <text:p>0.02359161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697.8701171875">
                <text:p>697.8701171875</text:p>
              </table:table-cell>
              <table:table-cell office:value-type="float" office:value="0.007427547">
                <text:p>0.007427547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697.990234375">
                <text:p>697.990234375</text:p>
              </table:table-cell>
              <table:table-cell office:value-type="float" office:value="0.01376042">
                <text:p>0.01376042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698.1103515625">
                <text:p>698.1103515625</text:p>
              </table:table-cell>
              <table:table-cell office:value-type="float" office:value="0.004151532">
                <text:p>0.004151532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698.23046875">
                <text:p>698.23046875</text:p>
              </table:table-cell>
              <table:table-cell office:value-type="float" office:value="-0.005041992">
                <text:p>-0.005041992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698.350646972656">
                <text:p>698.350646972656</text:p>
              </table:table-cell>
              <table:table-cell office:value-type="float" office:value="-0.002346471">
                <text:p>-0.002346471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698.470764160156">
                <text:p>698.470764160156</text:p>
              </table:table-cell>
              <table:table-cell office:value-type="float" office:value="0.004890681">
                <text:p>0.004890681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698.590881347656">
                <text:p>698.590881347656</text:p>
              </table:table-cell>
              <table:table-cell office:value-type="float" office:value="0.00368072">
                <text:p>0.00368072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698.710998535156">
                <text:p>698.710998535156</text:p>
              </table:table-cell>
              <table:table-cell office:value-type="float" office:value="0.02322043">
                <text:p>0.02322043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698.831115722656">
                <text:p>698.831115722656</text:p>
              </table:table-cell>
              <table:table-cell office:value-type="float" office:value="-0.0001099674">
                <text:p>-0.0001099674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698.951232910156">
                <text:p>698.951232910156</text:p>
              </table:table-cell>
              <table:table-cell office:value-type="float" office:value="0.001799784">
                <text:p>0.001799784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699.071350097656">
                <text:p>699.071350097656</text:p>
              </table:table-cell>
              <table:table-cell office:value-type="float" office:value="0.005422986">
                <text:p>0.005422986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699.191528320313">
                <text:p>699.191528320313</text:p>
              </table:table-cell>
              <table:table-cell office:value-type="float" office:value="0.001387887">
                <text:p>0.001387887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699.311645507813">
                <text:p>699.311645507813</text:p>
              </table:table-cell>
              <table:table-cell office:value-type="float" office:value="0.003025976">
                <text:p>0.003025976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699.431762695313">
                <text:p>699.431762695313</text:p>
              </table:table-cell>
              <table:table-cell office:value-type="float" office:value="0.005827766">
                <text:p>0.005827766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699.551879882813">
                <text:p>699.551879882813</text:p>
              </table:table-cell>
              <table:table-cell office:value-type="float" office:value="0.01083793">
                <text:p>0.01083793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699.671997070313">
                <text:p>699.671997070313</text:p>
              </table:table-cell>
              <table:table-cell office:value-type="float" office:value="0.001139235">
                <text:p>0.001139235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699.792175292969">
                <text:p>699.792175292969</text:p>
              </table:table-cell>
              <table:table-cell office:value-type="float" office:value="-0.001101807">
                <text:p>-0.001101807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699.912292480469">
                <text:p>699.912292480469</text:p>
              </table:table-cell>
              <table:table-cell office:value-type="float" office:value="0.02447415">
                <text:p>0.02447415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700.032409667969">
                <text:p>700.032409667969</text:p>
              </table:table-cell>
              <table:table-cell office:value-type="float" office:value="0.01083079">
                <text:p>0.01083079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700.152526855469">
                <text:p>700.152526855469</text:p>
              </table:table-cell>
              <table:table-cell office:value-type="float" office:value="0.002237641">
                <text:p>0.002237641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700.272705078125">
                <text:p>700.272705078125</text:p>
              </table:table-cell>
              <table:table-cell office:value-type="float" office:value="0.0003253303">
                <text:p>0.0003253303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700.392822265625">
                <text:p>700.392822265625</text:p>
              </table:table-cell>
              <table:table-cell office:value-type="float" office:value="0.004083309">
                <text:p>0.004083309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700.512939453125">
                <text:p>700.512939453125</text:p>
              </table:table-cell>
              <table:table-cell office:value-type="float" office:value="0.01106641">
                <text:p>0.01106641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700.633117675781">
                <text:p>700.633117675781</text:p>
              </table:table-cell>
              <table:table-cell office:value-type="float" office:value="0.002595311">
                <text:p>0.002595311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700.753234863281">
                <text:p>700.753234863281</text:p>
              </table:table-cell>
              <table:table-cell office:value-type="float" office:value="0.002071108">
                <text:p>0.002071108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700.873352050781">
                <text:p>700.873352050781</text:p>
              </table:table-cell>
              <table:table-cell office:value-type="float" office:value="-0.004874936">
                <text:p>-0.004874936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700.993530273438">
                <text:p>700.993530273438</text:p>
              </table:table-cell>
              <table:table-cell office:value-type="float" office:value="-0.001201971">
                <text:p>-0.001201971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701.113647460938">
                <text:p>701.113647460938</text:p>
              </table:table-cell>
              <table:table-cell office:value-type="float" office:value="0.004801571">
                <text:p>0.004801571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701.233764648438">
                <text:p>701.233764648438</text:p>
              </table:table-cell>
              <table:table-cell office:value-type="float" office:value="-0.001453546">
                <text:p>-0.001453546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701.353942871094">
                <text:p>701.353942871094</text:p>
              </table:table-cell>
              <table:table-cell office:value-type="float" office:value="0.01536924">
                <text:p>0.01536924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701.474060058594">
                <text:p>701.474060058594</text:p>
              </table:table-cell>
              <table:table-cell office:value-type="float" office:value="0.008345963">
                <text:p>0.008345963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701.594177246094">
                <text:p>701.594177246094</text:p>
              </table:table-cell>
              <table:table-cell office:value-type="float" office:value="-0.002973484">
                <text:p>-0.002973484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701.71435546875">
                <text:p>701.71435546875</text:p>
              </table:table-cell>
              <table:table-cell office:value-type="float" office:value="0.006783045">
                <text:p>0.006783045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701.83447265625">
                <text:p>701.83447265625</text:p>
              </table:table-cell>
              <table:table-cell office:value-type="float" office:value="-0.006855241">
                <text:p>-0.006855241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701.954650878906">
                <text:p>701.954650878906</text:p>
              </table:table-cell>
              <table:table-cell office:value-type="float" office:value="-0.002867398">
                <text:p>-0.002867398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702.074768066406">
                <text:p>702.074768066406</text:p>
              </table:table-cell>
              <table:table-cell office:value-type="float" office:value="0.005831159">
                <text:p>0.005831159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702.194946289063">
                <text:p>702.194946289063</text:p>
              </table:table-cell>
              <table:table-cell office:value-type="float" office:value="0.01070544">
                <text:p>0.01070544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702.315063476563">
                <text:p>702.315063476563</text:p>
              </table:table-cell>
              <table:table-cell office:value-type="float" office:value="-0.003110094">
                <text:p>-0.003110094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702.435241699219">
                <text:p>702.435241699219</text:p>
              </table:table-cell>
              <table:table-cell office:value-type="float" office:value="-0.003430731">
                <text:p>-0.003430731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702.555358886719">
                <text:p>702.555358886719</text:p>
              </table:table-cell>
              <table:table-cell office:value-type="float" office:value="0.009390465">
                <text:p>0.009390465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702.675537109375">
                <text:p>702.675537109375</text:p>
              </table:table-cell>
              <table:table-cell office:value-type="float" office:value="0.01608543">
                <text:p>0.01608543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702.795654296875">
                <text:p>702.795654296875</text:p>
              </table:table-cell>
              <table:table-cell office:value-type="float" office:value="0.0002646329">
                <text:p>0.0002646329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702.915832519531">
                <text:p>702.915832519531</text:p>
              </table:table-cell>
              <table:table-cell office:value-type="float" office:value="0.003003145">
                <text:p>0.003003145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703.035949707031">
                <text:p>703.035949707031</text:p>
              </table:table-cell>
              <table:table-cell office:value-type="float" office:value="-0.00117856">
                <text:p>-0.00117856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703.156127929688">
                <text:p>703.156127929688</text:p>
              </table:table-cell>
              <table:table-cell office:value-type="float" office:value="0.0001240284">
                <text:p>0.0001240284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703.276245117188">
                <text:p>703.276245117188</text:p>
              </table:table-cell>
              <table:table-cell office:value-type="float" office:value="-0.0006539495">
                <text:p>-0.0006539495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703.396423339844">
                <text:p>703.396423339844</text:p>
              </table:table-cell>
              <table:table-cell office:value-type="float" office:value="-0.002525523">
                <text:p>-0.002525523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703.516540527344">
                <text:p>703.516540527344</text:p>
              </table:table-cell>
              <table:table-cell office:value-type="float" office:value="0.001125976">
                <text:p>0.001125976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703.63671875">
                <text:p>703.63671875</text:p>
              </table:table-cell>
              <table:table-cell office:value-type="float" office:value="0.01213454">
                <text:p>0.01213454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703.756896972656">
                <text:p>703.756896972656</text:p>
              </table:table-cell>
              <table:table-cell office:value-type="float" office:value="-0.007126828">
                <text:p>-0.007126828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703.877014160156">
                <text:p>703.877014160156</text:p>
              </table:table-cell>
              <table:table-cell office:value-type="float" office:value="0.007589408">
                <text:p>0.007589408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703.997192382813">
                <text:p>703.997192382813</text:p>
              </table:table-cell>
              <table:table-cell office:value-type="float" office:value="-0.002772365">
                <text:p>-0.002772365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704.117309570313">
                <text:p>704.117309570313</text:p>
              </table:table-cell>
              <table:table-cell office:value-type="float" office:value="-0.000570012">
                <text:p>-0.000570012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704.237487792969">
                <text:p>704.237487792969</text:p>
              </table:table-cell>
              <table:table-cell office:value-type="float" office:value="-0.003879831">
                <text:p>-0.003879831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704.357666015625">
                <text:p>704.357666015625</text:p>
              </table:table-cell>
              <table:table-cell office:value-type="float" office:value="-0.003600183">
                <text:p>-0.003600183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704.477783203125">
                <text:p>704.477783203125</text:p>
              </table:table-cell>
              <table:table-cell office:value-type="float" office:value="0.01092884">
                <text:p>0.01092884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704.597961425781">
                <text:p>704.597961425781</text:p>
              </table:table-cell>
              <table:table-cell office:value-type="float" office:value="-0.0020797">
                <text:p>-0.0020797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704.718139648438">
                <text:p>704.718139648438</text:p>
              </table:table-cell>
              <table:table-cell office:value-type="float" office:value="-0.004931119">
                <text:p>-0.004931119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704.838256835938">
                <text:p>704.838256835938</text:p>
              </table:table-cell>
              <table:table-cell office:value-type="float" office:value="-0.006302787">
                <text:p>-0.006302787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704.958435058594">
                <text:p>704.958435058594</text:p>
              </table:table-cell>
              <table:table-cell office:value-type="float" office:value="-0.006961902">
                <text:p>-0.006961902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705.07861328125">
                <text:p>705.07861328125</text:p>
              </table:table-cell>
              <table:table-cell office:value-type="float" office:value="0.003174313">
                <text:p>0.003174313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705.19873046875">
                <text:p>705.19873046875</text:p>
              </table:table-cell>
              <table:table-cell office:value-type="float" office:value="0.002558484">
                <text:p>0.002558484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705.318908691406">
                <text:p>705.318908691406</text:p>
              </table:table-cell>
              <table:table-cell office:value-type="float" office:value="-0.002551093">
                <text:p>-0.002551093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705.439086914063">
                <text:p>705.439086914063</text:p>
              </table:table-cell>
              <table:table-cell office:value-type="float" office:value="0.01041716">
                <text:p>0.01041716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705.559265136719">
                <text:p>705.559265136719</text:p>
              </table:table-cell>
              <table:table-cell office:value-type="float" office:value="-0.0001021815">
                <text:p>-0.0001021815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705.679382324219">
                <text:p>705.679382324219</text:p>
              </table:table-cell>
              <table:table-cell office:value-type="float" office:value="0.002632852">
                <text:p>0.002632852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705.799560546875">
                <text:p>705.799560546875</text:p>
              </table:table-cell>
              <table:table-cell office:value-type="float" office:value="0.01269271">
                <text:p>0.01269271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705.919738769531">
                <text:p>705.919738769531</text:p>
              </table:table-cell>
              <table:table-cell office:value-type="float" office:value="-0.0009999443">
                <text:p>-0.0009999443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706.039916992188">
                <text:p>706.039916992188</text:p>
              </table:table-cell>
              <table:table-cell office:value-type="float" office:value="-0.0007231577">
                <text:p>-0.0007231577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706.160034179688">
                <text:p>706.160034179688</text:p>
              </table:table-cell>
              <table:table-cell office:value-type="float" office:value="0.0183563">
                <text:p>0.0183563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706.280212402344">
                <text:p>706.280212402344</text:p>
              </table:table-cell>
              <table:table-cell office:value-type="float" office:value="-0.0003015393">
                <text:p>-0.0003015393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706.400390625">
                <text:p>706.400390625</text:p>
              </table:table-cell>
              <table:table-cell office:value-type="float" office:value="0.004628697">
                <text:p>0.004628697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706.520568847656">
                <text:p>706.520568847656</text:p>
              </table:table-cell>
              <table:table-cell office:value-type="float" office:value="0.00562439">
                <text:p>0.00562439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706.640747070313">
                <text:p>706.640747070313</text:p>
              </table:table-cell>
              <table:table-cell office:value-type="float" office:value="-0.002189751">
                <text:p>-0.002189751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706.760925292969">
                <text:p>706.760925292969</text:p>
              </table:table-cell>
              <table:table-cell office:value-type="float" office:value="0.00877709">
                <text:p>0.00877709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706.881042480469">
                <text:p>706.881042480469</text:p>
              </table:table-cell>
              <table:table-cell office:value-type="float" office:value="0.002040636">
                <text:p>0.002040636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707.001220703125">
                <text:p>707.001220703125</text:p>
              </table:table-cell>
              <table:table-cell office:value-type="float" office:value="-0.005747303">
                <text:p>-0.005747303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707.121398925781">
                <text:p>707.121398925781</text:p>
              </table:table-cell>
              <table:table-cell office:value-type="float" office:value="-0.006793966">
                <text:p>-0.006793966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707.241577148438">
                <text:p>707.241577148438</text:p>
              </table:table-cell>
              <table:table-cell office:value-type="float" office:value="0.002994431">
                <text:p>0.002994431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707.361755371094">
                <text:p>707.361755371094</text:p>
              </table:table-cell>
              <table:table-cell office:value-type="float" office:value="0.005023088">
                <text:p>0.005023088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707.48193359375">
                <text:p>707.48193359375</text:p>
              </table:table-cell>
              <table:table-cell office:value-type="float" office:value="0.004975249">
                <text:p>0.004975249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707.602111816406">
                <text:p>707.602111816406</text:p>
              </table:table-cell>
              <table:table-cell office:value-type="float" office:value="-0.005021374">
                <text:p>-0.005021374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707.722290039063">
                <text:p>707.722290039063</text:p>
              </table:table-cell>
              <table:table-cell office:value-type="float" office:value="0.003436564">
                <text:p>0.003436564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707.842468261719">
                <text:p>707.842468261719</text:p>
              </table:table-cell>
              <table:table-cell office:value-type="float" office:value="0.005802066">
                <text:p>0.005802066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707.962646484375">
                <text:p>707.962646484375</text:p>
              </table:table-cell>
              <table:table-cell office:value-type="float" office:value="0.008744535">
                <text:p>0.008744535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708.082763671875">
                <text:p>708.082763671875</text:p>
              </table:table-cell>
              <table:table-cell office:value-type="float" office:value="-0.001270012">
                <text:p>-0.001270012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708.202941894531">
                <text:p>708.202941894531</text:p>
              </table:table-cell>
              <table:table-cell office:value-type="float" office:value="0.003096429">
                <text:p>0.003096429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708.323120117188">
                <text:p>708.323120117188</text:p>
              </table:table-cell>
              <table:table-cell office:value-type="float" office:value="0.004932871">
                <text:p>0.004932871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708.443298339844">
                <text:p>708.443298339844</text:p>
              </table:table-cell>
              <table:table-cell office:value-type="float" office:value="-0.002050731">
                <text:p>-0.002050731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708.5634765625">
                <text:p>708.5634765625</text:p>
              </table:table-cell>
              <table:table-cell office:value-type="float" office:value="-0.00145283">
                <text:p>-0.00145283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708.683654785156">
                <text:p>708.683654785156</text:p>
              </table:table-cell>
              <table:table-cell office:value-type="float" office:value="-0.002607265">
                <text:p>-0.002607265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708.803833007813">
                <text:p>708.803833007813</text:p>
              </table:table-cell>
              <table:table-cell office:value-type="float" office:value="0.0126651">
                <text:p>0.0126651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708.924011230469">
                <text:p>708.924011230469</text:p>
              </table:table-cell>
              <table:table-cell office:value-type="float" office:value="-0.00725375">
                <text:p>-0.00725375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709.044189453125">
                <text:p>709.044189453125</text:p>
              </table:table-cell>
              <table:table-cell office:value-type="float" office:value="-0.0005916581">
                <text:p>-0.0005916581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709.164367675781">
                <text:p>709.164367675781</text:p>
              </table:table-cell>
              <table:table-cell office:value-type="float" office:value="0.003847152">
                <text:p>0.003847152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709.284545898438">
                <text:p>709.284545898438</text:p>
              </table:table-cell>
              <table:table-cell office:value-type="float" office:value="0.00330218">
                <text:p>0.00330218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709.404724121094">
                <text:p>709.404724121094</text:p>
              </table:table-cell>
              <table:table-cell office:value-type="float" office:value="0.002101769">
                <text:p>0.002101769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709.52490234375">
                <text:p>709.52490234375</text:p>
              </table:table-cell>
              <table:table-cell office:value-type="float" office:value="-0.003497045">
                <text:p>-0.003497045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709.645141601563">
                <text:p>709.645141601563</text:p>
              </table:table-cell>
              <table:table-cell office:value-type="float" office:value="-0.004254663">
                <text:p>-0.004254663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709.765319824219">
                <text:p>709.765319824219</text:p>
              </table:table-cell>
              <table:table-cell office:value-type="float" office:value="0.003010274">
                <text:p>0.003010274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709.885498046875">
                <text:p>709.885498046875</text:p>
              </table:table-cell>
              <table:table-cell office:value-type="float" office:value="0.000158697">
                <text:p>0.000158697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710.005676269531">
                <text:p>710.005676269531</text:p>
              </table:table-cell>
              <table:table-cell office:value-type="float" office:value="-0.0009140078">
                <text:p>-0.0009140078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710.125854492188">
                <text:p>710.125854492188</text:p>
              </table:table-cell>
              <table:table-cell office:value-type="float" office:value="0.006723173">
                <text:p>0.006723173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710.246032714844">
                <text:p>710.246032714844</text:p>
              </table:table-cell>
              <table:table-cell office:value-type="float" office:value="0.002864039">
                <text:p>0.002864039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710.3662109375">
                <text:p>710.3662109375</text:p>
              </table:table-cell>
              <table:table-cell office:value-type="float" office:value="-0.006191085">
                <text:p>-0.006191085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710.486389160156">
                <text:p>710.486389160156</text:p>
              </table:table-cell>
              <table:table-cell office:value-type="float" office:value="0.01007924">
                <text:p>0.01007924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710.606567382813">
                <text:p>710.606567382813</text:p>
              </table:table-cell>
              <table:table-cell office:value-type="float" office:value="-0.0004773862">
                <text:p>-0.0004773862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710.726745605469">
                <text:p>710.726745605469</text:p>
              </table:table-cell>
              <table:table-cell office:value-type="float" office:value="-0.004806712">
                <text:p>-0.004806712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710.846984863281">
                <text:p>710.846984863281</text:p>
              </table:table-cell>
              <table:table-cell office:value-type="float" office:value="0.003005565">
                <text:p>0.003005565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710.967163085938">
                <text:p>710.967163085938</text:p>
              </table:table-cell>
              <table:table-cell office:value-type="float" office:value="0.001443142">
                <text:p>0.001443142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711.087341308594">
                <text:p>711.087341308594</text:p>
              </table:table-cell>
              <table:table-cell office:value-type="float" office:value="0.001126495">
                <text:p>0.001126495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711.20751953125">
                <text:p>711.20751953125</text:p>
              </table:table-cell>
              <table:table-cell office:value-type="float" office:value="-0.007761353">
                <text:p>-0.007761353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711.327697753906">
                <text:p>711.327697753906</text:p>
              </table:table-cell>
              <table:table-cell office:value-type="float" office:value="-0.005538731">
                <text:p>-0.005538731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711.447875976563">
                <text:p>711.447875976563</text:p>
              </table:table-cell>
              <table:table-cell office:value-type="float" office:value="0.004387973">
                <text:p>0.004387973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711.568115234375">
                <text:p>711.568115234375</text:p>
              </table:table-cell>
              <table:table-cell office:value-type="float" office:value="-0.001854014">
                <text:p>-0.001854014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711.688293457031">
                <text:p>711.688293457031</text:p>
              </table:table-cell>
              <table:table-cell office:value-type="float" office:value="0.01343305">
                <text:p>0.01343305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711.808471679688">
                <text:p>711.808471679688</text:p>
              </table:table-cell>
              <table:table-cell office:value-type="float" office:value="-0.006357987">
                <text:p>-0.006357987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711.928649902344">
                <text:p>711.928649902344</text:p>
              </table:table-cell>
              <table:table-cell office:value-type="float" office:value="-0.00290456">
                <text:p>-0.00290456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712.048889160156">
                <text:p>712.048889160156</text:p>
              </table:table-cell>
              <table:table-cell office:value-type="float" office:value="0.000611662">
                <text:p>0.000611662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712.169067382813">
                <text:p>712.169067382813</text:p>
              </table:table-cell>
              <table:table-cell office:value-type="float" office:value="0.008469017">
                <text:p>0.008469017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712.289245605469">
                <text:p>712.289245605469</text:p>
              </table:table-cell>
              <table:table-cell office:value-type="float" office:value="0.004683313">
                <text:p>0.004683313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712.409423828125">
                <text:p>712.409423828125</text:p>
              </table:table-cell>
              <table:table-cell office:value-type="float" office:value="-0.005030795">
                <text:p>-0.005030795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712.529663085938">
                <text:p>712.529663085938</text:p>
              </table:table-cell>
              <table:table-cell office:value-type="float" office:value="0.007722476">
                <text:p>0.007722476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712.649841308594">
                <text:p>712.649841308594</text:p>
              </table:table-cell>
              <table:table-cell office:value-type="float" office:value="-0.003273419">
                <text:p>-0.003273419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712.77001953125">
                <text:p>712.77001953125</text:p>
              </table:table-cell>
              <table:table-cell office:value-type="float" office:value="-0.008636475">
                <text:p>-0.008636475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712.890197753906">
                <text:p>712.890197753906</text:p>
              </table:table-cell>
              <table:table-cell office:value-type="float" office:value="-0.002276016">
                <text:p>-0.002276016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713.010437011719">
                <text:p>713.010437011719</text:p>
              </table:table-cell>
              <table:table-cell office:value-type="float" office:value="0.01686828">
                <text:p>0.01686828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713.130615234375">
                <text:p>713.130615234375</text:p>
              </table:table-cell>
              <table:table-cell office:value-type="float" office:value="0.01639511">
                <text:p>0.01639511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713.250793457031">
                <text:p>713.250793457031</text:p>
              </table:table-cell>
              <table:table-cell office:value-type="float" office:value="0.01576188">
                <text:p>0.01576188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713.371032714844">
                <text:p>713.371032714844</text:p>
              </table:table-cell>
              <table:table-cell office:value-type="float" office:value="-0.007738465">
                <text:p>-0.007738465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713.4912109375">
                <text:p>713.4912109375</text:p>
              </table:table-cell>
              <table:table-cell office:value-type="float" office:value="0.0001554604">
                <text:p>0.0001554604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713.611389160156">
                <text:p>713.611389160156</text:p>
              </table:table-cell>
              <table:table-cell office:value-type="float" office:value="0.00495121">
                <text:p>0.00495121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713.731628417969">
                <text:p>713.731628417969</text:p>
              </table:table-cell>
              <table:table-cell office:value-type="float" office:value="0.005485085">
                <text:p>0.005485085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713.851806640625">
                <text:p>713.851806640625</text:p>
              </table:table-cell>
              <table:table-cell office:value-type="float" office:value="-0.005191999">
                <text:p>-0.005191999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713.971984863281">
                <text:p>713.971984863281</text:p>
              </table:table-cell>
              <table:table-cell office:value-type="float" office:value="-0.0003027058">
                <text:p>-0.0003027058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714.092224121094">
                <text:p>714.092224121094</text:p>
              </table:table-cell>
              <table:table-cell office:value-type="float" office:value="-0.008232864">
                <text:p>-0.008232864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714.21240234375">
                <text:p>714.21240234375</text:p>
              </table:table-cell>
              <table:table-cell office:value-type="float" office:value="0.01002938">
                <text:p>0.01002938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714.332580566406">
                <text:p>714.332580566406</text:p>
              </table:table-cell>
              <table:table-cell office:value-type="float" office:value="0.004644269">
                <text:p>0.004644269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714.452819824219">
                <text:p>714.452819824219</text:p>
              </table:table-cell>
              <table:table-cell office:value-type="float" office:value="0.001164095">
                <text:p>0.001164095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714.572998046875">
                <text:p>714.572998046875</text:p>
              </table:table-cell>
              <table:table-cell office:value-type="float" office:value="0.005274478">
                <text:p>0.005274478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714.693237304688">
                <text:p>714.693237304688</text:p>
              </table:table-cell>
              <table:table-cell office:value-type="float" office:value="0.01385427">
                <text:p>0.01385427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714.813415527344">
                <text:p>714.813415527344</text:p>
              </table:table-cell>
              <table:table-cell office:value-type="float" office:value="-0.00102431">
                <text:p>-0.00102431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714.93359375">
                <text:p>714.93359375</text:p>
              </table:table-cell>
              <table:table-cell office:value-type="float" office:value="0.004544381">
                <text:p>0.004544381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715.053833007813">
                <text:p>715.053833007813</text:p>
              </table:table-cell>
              <table:table-cell office:value-type="float" office:value="0.003439134">
                <text:p>0.003439134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715.174011230469">
                <text:p>715.174011230469</text:p>
              </table:table-cell>
              <table:table-cell office:value-type="float" office:value="0.004947227">
                <text:p>0.004947227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715.294250488281">
                <text:p>715.294250488281</text:p>
              </table:table-cell>
              <table:table-cell office:value-type="float" office:value="-0.007306106">
                <text:p>-0.007306106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715.414428710938">
                <text:p>715.414428710938</text:p>
              </table:table-cell>
              <table:table-cell office:value-type="float" office:value="-0.002352221">
                <text:p>-0.002352221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715.53466796875">
                <text:p>715.53466796875</text:p>
              </table:table-cell>
              <table:table-cell office:value-type="float" office:value="0.00241707">
                <text:p>0.00241707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715.654846191406">
                <text:p>715.654846191406</text:p>
              </table:table-cell>
              <table:table-cell office:value-type="float" office:value="-0.005764073">
                <text:p>-0.005764073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715.775024414063">
                <text:p>715.775024414063</text:p>
              </table:table-cell>
              <table:table-cell office:value-type="float" office:value="0.002678786">
                <text:p>0.002678786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715.895263671875">
                <text:p>715.895263671875</text:p>
              </table:table-cell>
              <table:table-cell office:value-type="float" office:value="-0.0008680175">
                <text:p>-0.0008680175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716.015441894531">
                <text:p>716.015441894531</text:p>
              </table:table-cell>
              <table:table-cell office:value-type="float" office:value="-0.003683699">
                <text:p>-0.003683699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716.135681152344">
                <text:p>716.135681152344</text:p>
              </table:table-cell>
              <table:table-cell office:value-type="float" office:value="0.0007364835">
                <text:p>0.0007364835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716.255859375">
                <text:p>716.255859375</text:p>
              </table:table-cell>
              <table:table-cell office:value-type="float" office:value="-0.007043052">
                <text:p>-0.007043052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716.376098632813">
                <text:p>716.376098632813</text:p>
              </table:table-cell>
              <table:table-cell office:value-type="float" office:value="-0.008938">
                <text:p>-0.008938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716.496276855469">
                <text:p>716.496276855469</text:p>
              </table:table-cell>
              <table:table-cell office:value-type="float" office:value="0.006339966">
                <text:p>0.006339966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716.616516113281">
                <text:p>716.616516113281</text:p>
              </table:table-cell>
              <table:table-cell office:value-type="float" office:value="0.002096148">
                <text:p>0.002096148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716.736694335938">
                <text:p>716.736694335938</text:p>
              </table:table-cell>
              <table:table-cell office:value-type="float" office:value="0.001299042">
                <text:p>0.001299042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716.85693359375">
                <text:p>716.85693359375</text:p>
              </table:table-cell>
              <table:table-cell office:value-type="float" office:value="0.001460725">
                <text:p>0.001460725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716.977172851563">
                <text:p>716.977172851563</text:p>
              </table:table-cell>
              <table:table-cell office:value-type="float" office:value="0.00187342">
                <text:p>0.00187342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717.097351074219">
                <text:p>717.097351074219</text:p>
              </table:table-cell>
              <table:table-cell office:value-type="float" office:value="0.005884803">
                <text:p>0.005884803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717.217590332031">
                <text:p>717.217590332031</text:p>
              </table:table-cell>
              <table:table-cell office:value-type="float" office:value="-0.00504381">
                <text:p>-0.00504381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717.337768554688">
                <text:p>717.337768554688</text:p>
              </table:table-cell>
              <table:table-cell office:value-type="float" office:value="-0.00806105">
                <text:p>-0.00806105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717.4580078125">
                <text:p>717.4580078125</text:p>
              </table:table-cell>
              <table:table-cell office:value-type="float" office:value="0.001700931">
                <text:p>0.001700931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717.578186035156">
                <text:p>717.578186035156</text:p>
              </table:table-cell>
              <table:table-cell office:value-type="float" office:value="-0.001209855">
                <text:p>-0.001209855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717.698425292969">
                <text:p>717.698425292969</text:p>
              </table:table-cell>
              <table:table-cell office:value-type="float" office:value="0.001541197">
                <text:p>0.001541197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717.818603515625">
                <text:p>717.818603515625</text:p>
              </table:table-cell>
              <table:table-cell office:value-type="float" office:value="0.001549162">
                <text:p>0.001549162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717.938842773438">
                <text:p>717.938842773438</text:p>
              </table:table-cell>
              <table:table-cell office:value-type="float" office:value="-0.001267119">
                <text:p>-0.001267119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718.05908203125">
                <text:p>718.05908203125</text:p>
              </table:table-cell>
              <table:table-cell office:value-type="float" office:value="0.001852242">
                <text:p>0.001852242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718.179260253906">
                <text:p>718.179260253906</text:p>
              </table:table-cell>
              <table:table-cell office:value-type="float" office:value="-0.004449295">
                <text:p>-0.004449295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718.299499511719">
                <text:p>718.299499511719</text:p>
              </table:table-cell>
              <table:table-cell office:value-type="float" office:value="0.005610415">
                <text:p>0.005610415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718.419677734375">
                <text:p>718.419677734375</text:p>
              </table:table-cell>
              <table:table-cell office:value-type="float" office:value="-0.0003457102">
                <text:p>-0.0003457102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718.539916992188">
                <text:p>718.539916992188</text:p>
              </table:table-cell>
              <table:table-cell office:value-type="float" office:value="-0.004586479">
                <text:p>-0.004586479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718.66015625">
                <text:p>718.66015625</text:p>
              </table:table-cell>
              <table:table-cell office:value-type="float" office:value="0.001191355">
                <text:p>0.001191355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718.780334472656">
                <text:p>718.780334472656</text:p>
              </table:table-cell>
              <table:table-cell office:value-type="float" office:value="-0.001840253">
                <text:p>-0.001840253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718.900573730469">
                <text:p>718.900573730469</text:p>
              </table:table-cell>
              <table:table-cell office:value-type="float" office:value="0.002371229">
                <text:p>0.002371229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719.020812988281">
                <text:p>719.020812988281</text:p>
              </table:table-cell>
              <table:table-cell office:value-type="float" office:value="0.00511414">
                <text:p>0.00511414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719.140991210938">
                <text:p>719.140991210938</text:p>
              </table:table-cell>
              <table:table-cell office:value-type="float" office:value="0.007785869">
                <text:p>0.007785869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719.26123046875">
                <text:p>719.26123046875</text:p>
              </table:table-cell>
              <table:table-cell office:value-type="float" office:value="0.0006570549">
                <text:p>0.0006570549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719.381469726563">
                <text:p>719.381469726563</text:p>
              </table:table-cell>
              <table:table-cell office:value-type="float" office:value="-0.003043341">
                <text:p>-0.003043341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719.501647949219">
                <text:p>719.501647949219</text:p>
              </table:table-cell>
              <table:table-cell office:value-type="float" office:value="0.009320541">
                <text:p>0.009320541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719.621887207031">
                <text:p>719.621887207031</text:p>
              </table:table-cell>
              <table:table-cell office:value-type="float" office:value="-0.001941744">
                <text:p>-0.001941744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719.742126464844">
                <text:p>719.742126464844</text:p>
              </table:table-cell>
              <table:table-cell office:value-type="float" office:value="-0.006760965">
                <text:p>-0.006760965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719.8623046875">
                <text:p>719.8623046875</text:p>
              </table:table-cell>
              <table:table-cell office:value-type="float" office:value="-0.007400797">
                <text:p>-0.007400797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719.982543945313">
                <text:p>719.982543945313</text:p>
              </table:table-cell>
              <table:table-cell office:value-type="float" office:value="0.004669637">
                <text:p>0.004669637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720.102783203125">
                <text:p>720.102783203125</text:p>
              </table:table-cell>
              <table:table-cell office:value-type="float" office:value="-0.004290007">
                <text:p>-0.004290007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720.222961425781">
                <text:p>720.222961425781</text:p>
              </table:table-cell>
              <table:table-cell office:value-type="float" office:value="0.009587805">
                <text:p>0.009587805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720.343200683594">
                <text:p>720.343200683594</text:p>
              </table:table-cell>
              <table:table-cell office:value-type="float" office:value="-0.007742994">
                <text:p>-0.007742994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720.463439941406">
                <text:p>720.463439941406</text:p>
              </table:table-cell>
              <table:table-cell office:value-type="float" office:value="0.001017053">
                <text:p>0.001017053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720.583679199219">
                <text:p>720.583679199219</text:p>
              </table:table-cell>
              <table:table-cell office:value-type="float" office:value="0.02152659">
                <text:p>0.02152659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720.703857421875">
                <text:p>720.703857421875</text:p>
              </table:table-cell>
              <table:table-cell office:value-type="float" office:value="0.002359367">
                <text:p>0.002359367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720.824096679688">
                <text:p>720.824096679688</text:p>
              </table:table-cell>
              <table:table-cell office:value-type="float" office:value="0.001247603">
                <text:p>0.001247603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720.9443359375">
                <text:p>720.9443359375</text:p>
              </table:table-cell>
              <table:table-cell office:value-type="float" office:value="0.006294438">
                <text:p>0.006294438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721.064575195313">
                <text:p>721.064575195313</text:p>
              </table:table-cell>
              <table:table-cell office:value-type="float" office:value="0.005612682">
                <text:p>0.005612682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721.184753417969">
                <text:p>721.184753417969</text:p>
              </table:table-cell>
              <table:table-cell office:value-type="float" office:value="-0.002386821">
                <text:p>-0.002386821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721.304992675781">
                <text:p>721.304992675781</text:p>
              </table:table-cell>
              <table:table-cell office:value-type="float" office:value="0.002000674">
                <text:p>0.002000674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721.425231933594">
                <text:p>721.425231933594</text:p>
              </table:table-cell>
              <table:table-cell office:value-type="float" office:value="0.001214173">
                <text:p>0.001214173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721.545471191406">
                <text:p>721.545471191406</text:p>
              </table:table-cell>
              <table:table-cell office:value-type="float" office:value="0.01783213">
                <text:p>0.01783213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721.665649414063">
                <text:p>721.665649414063</text:p>
              </table:table-cell>
              <table:table-cell office:value-type="float" office:value="-0.007653236">
                <text:p>-0.007653236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721.785888671875">
                <text:p>721.785888671875</text:p>
              </table:table-cell>
              <table:table-cell office:value-type="float" office:value="0.01568234">
                <text:p>0.01568234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721.906127929688">
                <text:p>721.906127929688</text:p>
              </table:table-cell>
              <table:table-cell office:value-type="float" office:value="-0.0009540595">
                <text:p>-0.0009540595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722.0263671875">
                <text:p>722.0263671875</text:p>
              </table:table-cell>
              <table:table-cell office:value-type="float" office:value="-0.005233277">
                <text:p>-0.005233277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722.146606445313">
                <text:p>722.146606445313</text:p>
              </table:table-cell>
              <table:table-cell office:value-type="float" office:value="0.01303263">
                <text:p>0.01303263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722.266784667969">
                <text:p>722.266784667969</text:p>
              </table:table-cell>
              <table:table-cell office:value-type="float" office:value="-0.002415634">
                <text:p>-0.002415634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722.387023925781">
                <text:p>722.387023925781</text:p>
              </table:table-cell>
              <table:table-cell office:value-type="float" office:value="-0.006020116">
                <text:p>-0.006020116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722.507263183594">
                <text:p>722.507263183594</text:p>
              </table:table-cell>
              <table:table-cell office:value-type="float" office:value="-0.007755441">
                <text:p>-0.007755441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722.627502441406">
                <text:p>722.627502441406</text:p>
              </table:table-cell>
              <table:table-cell office:value-type="float" office:value="-0.004441361">
                <text:p>-0.004441361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722.747741699219">
                <text:p>722.747741699219</text:p>
              </table:table-cell>
              <table:table-cell office:value-type="float" office:value="0.003043509">
                <text:p>0.003043509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722.867980957031">
                <text:p>722.867980957031</text:p>
              </table:table-cell>
              <table:table-cell office:value-type="float" office:value="-0.005447928">
                <text:p>-0.005447928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722.988159179688">
                <text:p>722.988159179688</text:p>
              </table:table-cell>
              <table:table-cell office:value-type="float" office:value="0.00146646">
                <text:p>0.00146646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723.1083984375">
                <text:p>723.1083984375</text:p>
              </table:table-cell>
              <table:table-cell office:value-type="float" office:value="0.004263941">
                <text:p>0.004263941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723.228637695313">
                <text:p>723.228637695313</text:p>
              </table:table-cell>
              <table:table-cell office:value-type="float" office:value="0.01602769">
                <text:p>0.01602769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723.348876953125">
                <text:p>723.348876953125</text:p>
              </table:table-cell>
              <table:table-cell office:value-type="float" office:value="0.001951345">
                <text:p>0.001951345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723.469116210938">
                <text:p>723.469116210938</text:p>
              </table:table-cell>
              <table:table-cell office:value-type="float" office:value="-0.003510837">
                <text:p>-0.003510837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723.58935546875">
                <text:p>723.58935546875</text:p>
              </table:table-cell>
              <table:table-cell office:value-type="float" office:value="0.002329685">
                <text:p>0.002329685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723.709594726563">
                <text:p>723.709594726563</text:p>
              </table:table-cell>
              <table:table-cell office:value-type="float" office:value="-0.003895941">
                <text:p>-0.003895941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723.829772949219">
                <text:p>723.829772949219</text:p>
              </table:table-cell>
              <table:table-cell office:value-type="float" office:value="-0.005464063">
                <text:p>-0.005464063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723.950012207031">
                <text:p>723.950012207031</text:p>
              </table:table-cell>
              <table:table-cell office:value-type="float" office:value="0.004244701">
                <text:p>0.004244701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724.070251464844">
                <text:p>724.070251464844</text:p>
              </table:table-cell>
              <table:table-cell office:value-type="float" office:value="0.00102134">
                <text:p>0.00102134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724.190490722656">
                <text:p>724.190490722656</text:p>
              </table:table-cell>
              <table:table-cell office:value-type="float" office:value="-0.01096524">
                <text:p>-0.01096524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724.310729980469">
                <text:p>724.310729980469</text:p>
              </table:table-cell>
              <table:table-cell office:value-type="float" office:value="-0.006886415">
                <text:p>-0.006886415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724.430969238281">
                <text:p>724.430969238281</text:p>
              </table:table-cell>
              <table:table-cell office:value-type="float" office:value="-0.006707543">
                <text:p>-0.006707543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724.551208496094">
                <text:p>724.551208496094</text:p>
              </table:table-cell>
              <table:table-cell office:value-type="float" office:value="-0.008812809">
                <text:p>-0.008812809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724.671447753906">
                <text:p>724.671447753906</text:p>
              </table:table-cell>
              <table:table-cell office:value-type="float" office:value="0.006085756">
                <text:p>0.006085756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724.791687011719">
                <text:p>724.791687011719</text:p>
              </table:table-cell>
              <table:table-cell office:value-type="float" office:value="-0.007085983">
                <text:p>-0.007085983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724.911865234375">
                <text:p>724.911865234375</text:p>
              </table:table-cell>
              <table:table-cell office:value-type="float" office:value="-0.00692272">
                <text:p>-0.00692272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725.032104492188">
                <text:p>725.032104492188</text:p>
              </table:table-cell>
              <table:table-cell office:value-type="float" office:value="0.003741663">
                <text:p>0.003741663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725.15234375">
                <text:p>725.15234375</text:p>
              </table:table-cell>
              <table:table-cell office:value-type="float" office:value="-0.006003605">
                <text:p>-0.006003605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725.272583007813">
                <text:p>725.272583007813</text:p>
              </table:table-cell>
              <table:table-cell office:value-type="float" office:value="-0.007289519">
                <text:p>-0.007289519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725.392822265625">
                <text:p>725.392822265625</text:p>
              </table:table-cell>
              <table:table-cell office:value-type="float" office:value="0.02366433">
                <text:p>0.02366433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725.513061523438">
                <text:p>725.513061523438</text:p>
              </table:table-cell>
              <table:table-cell office:value-type="float" office:value="-0.0005512693">
                <text:p>-0.0005512693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725.63330078125">
                <text:p>725.63330078125</text:p>
              </table:table-cell>
              <table:table-cell office:value-type="float" office:value="-0.0002527264">
                <text:p>-0.0002527264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725.753540039063">
                <text:p>725.753540039063</text:p>
              </table:table-cell>
              <table:table-cell office:value-type="float" office:value="-0.005446601">
                <text:p>-0.005446601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725.873779296875">
                <text:p>725.873779296875</text:p>
              </table:table-cell>
              <table:table-cell office:value-type="float" office:value="0.001729826">
                <text:p>0.001729826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725.994018554688">
                <text:p>725.994018554688</text:p>
              </table:table-cell>
              <table:table-cell office:value-type="float" office:value="-0.000271758">
                <text:p>-0.000271758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726.1142578125">
                <text:p>726.1142578125</text:p>
              </table:table-cell>
              <table:table-cell office:value-type="float" office:value="0.001490318">
                <text:p>0.001490318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726.234497070313">
                <text:p>726.234497070313</text:p>
              </table:table-cell>
              <table:table-cell office:value-type="float" office:value="-0.002308055">
                <text:p>-0.002308055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726.354736328125">
                <text:p>726.354736328125</text:p>
              </table:table-cell>
              <table:table-cell office:value-type="float" office:value="0.009397581">
                <text:p>0.009397581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726.474975585938">
                <text:p>726.474975585938</text:p>
              </table:table-cell>
              <table:table-cell office:value-type="float" office:value="0.0007823414">
                <text:p>0.0007823414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726.59521484375">
                <text:p>726.59521484375</text:p>
              </table:table-cell>
              <table:table-cell office:value-type="float" office:value="0.001083786">
                <text:p>0.001083786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726.715454101563">
                <text:p>726.715454101563</text:p>
              </table:table-cell>
              <table:table-cell office:value-type="float" office:value="-0.003648814">
                <text:p>-0.003648814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726.835693359375">
                <text:p>726.835693359375</text:p>
              </table:table-cell>
              <table:table-cell office:value-type="float" office:value="-0.004231163">
                <text:p>-0.004231163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726.955932617188">
                <text:p>726.955932617188</text:p>
              </table:table-cell>
              <table:table-cell office:value-type="float" office:value="-0.009309545">
                <text:p>-0.009309545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727.076171875">
                <text:p>727.076171875</text:p>
              </table:table-cell>
              <table:table-cell office:value-type="float" office:value="0.006316088">
                <text:p>0.006316088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727.196411132813">
                <text:p>727.196411132813</text:p>
              </table:table-cell>
              <table:table-cell office:value-type="float" office:value="-0.0005655841">
                <text:p>-0.0005655841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727.316650390625">
                <text:p>727.316650390625</text:p>
              </table:table-cell>
              <table:table-cell office:value-type="float" office:value="0.01161213">
                <text:p>0.01161213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727.436889648438">
                <text:p>727.436889648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727.55712890625">
                <text:p>727.55712890625</text:p>
              </table:table-cell>
              <table:table-cell office:value-type="float" office:value="0.0007337657">
                <text:p>0.0007337657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727.677368164063">
                <text:p>727.677368164063</text:p>
              </table:table-cell>
              <table:table-cell office:value-type="float" office:value="-0.0008590861">
                <text:p>-0.0008590861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727.797607421875">
                <text:p>727.797607421875</text:p>
              </table:table-cell>
              <table:table-cell office:value-type="float" office:value="-0.006834747">
                <text:p>-0.006834747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727.917846679688">
                <text:p>727.917846679688</text:p>
              </table:table-cell>
              <table:table-cell office:value-type="float" office:value="-0.01016936">
                <text:p>-0.01016936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728.0380859375">
                <text:p>728.0380859375</text:p>
              </table:table-cell>
              <table:table-cell office:value-type="float" office:value="0.002944987">
                <text:p>0.002944987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728.158325195313">
                <text:p>728.158325195313</text:p>
              </table:table-cell>
              <table:table-cell office:value-type="float" office:value="-0.008660742">
                <text:p>-0.008660742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728.278564453125">
                <text:p>728.278564453125</text:p>
              </table:table-cell>
              <table:table-cell office:value-type="float" office:value="-0.004056846">
                <text:p>-0.004056846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728.398803710938">
                <text:p>728.398803710938</text:p>
              </table:table-cell>
              <table:table-cell office:value-type="float" office:value="-0.007012538">
                <text:p>-0.007012538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728.51904296875">
                <text:p>728.51904296875</text:p>
              </table:table-cell>
              <table:table-cell office:value-type="float" office:value="0.004616351">
                <text:p>0.004616351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728.639282226563">
                <text:p>728.639282226563</text:p>
              </table:table-cell>
              <table:table-cell office:value-type="float" office:value="-0.008077092">
                <text:p>-0.008077092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728.759521484375">
                <text:p>728.759521484375</text:p>
              </table:table-cell>
              <table:table-cell office:value-type="float" office:value="0.001532867">
                <text:p>0.001532867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728.879760742188">
                <text:p>728.879760742188</text:p>
              </table:table-cell>
              <table:table-cell office:value-type="float" office:value="0.00413775">
                <text:p>0.00413775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729">
                <text:p>729</text:p>
              </table:table-cell>
              <table:table-cell office:value-type="float" office:value="-0.006137776">
                <text:p>-0.006137776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729.120239257813">
                <text:p>729.120239257813</text:p>
              </table:table-cell>
              <table:table-cell office:value-type="float" office:value="0.001127288">
                <text:p>0.001127288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729.240478515625">
                <text:p>729.240478515625</text:p>
              </table:table-cell>
              <table:table-cell office:value-type="float" office:value="0.008688878">
                <text:p>0.008688878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729.360778808594">
                <text:p>729.360778808594</text:p>
              </table:table-cell>
              <table:table-cell office:value-type="float" office:value="0.003697427">
                <text:p>0.003697427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729.481018066406">
                <text:p>729.481018066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729.601257324219">
                <text:p>729.601257324219</text:p>
              </table:table-cell>
              <table:table-cell office:value-type="float" office:value="0.005652576">
                <text:p>0.005652576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729.721496582031">
                <text:p>729.721496582031</text:p>
              </table:table-cell>
              <table:table-cell office:value-type="float" office:value="0.02136157">
                <text:p>0.02136157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729.841735839844">
                <text:p>729.841735839844</text:p>
              </table:table-cell>
              <table:table-cell office:value-type="float" office:value="-0.005189468">
                <text:p>-0.005189468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729.961975097656">
                <text:p>729.961975097656</text:p>
              </table:table-cell>
              <table:table-cell office:value-type="float" office:value="-0.006685793">
                <text:p>-0.006685793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730.082214355469">
                <text:p>730.082214355469</text:p>
              </table:table-cell>
              <table:table-cell office:value-type="float" office:value="0.01096789">
                <text:p>0.01096789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730.202453613281">
                <text:p>730.202453613281</text:p>
              </table:table-cell>
              <table:table-cell office:value-type="float" office:value="0.004681103">
                <text:p>0.004681103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730.322692871094">
                <text:p>730.322692871094</text:p>
              </table:table-cell>
              <table:table-cell office:value-type="float" office:value="-0.001374152">
                <text:p>-0.001374152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730.442932128906">
                <text:p>730.442932128906</text:p>
              </table:table-cell>
              <table:table-cell office:value-type="float" office:value="0.002570998">
                <text:p>0.002570998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730.563171386719">
                <text:p>730.563171386719</text:p>
              </table:table-cell>
              <table:table-cell office:value-type="float" office:value="0.006432788">
                <text:p>0.006432788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730.683471679688">
                <text:p>730.683471679688</text:p>
              </table:table-cell>
              <table:table-cell office:value-type="float" office:value="-0.001085461">
                <text:p>-0.001085461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730.8037109375">
                <text:p>730.8037109375</text:p>
              </table:table-cell>
              <table:table-cell office:value-type="float" office:value="0.01254938">
                <text:p>0.01254938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730.923950195313">
                <text:p>730.923950195313</text:p>
              </table:table-cell>
              <table:table-cell office:value-type="float" office:value="0.00627023">
                <text:p>0.00627023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731.044189453125">
                <text:p>731.044189453125</text:p>
              </table:table-cell>
              <table:table-cell office:value-type="float" office:value="0.01262413">
                <text:p>0.01262413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731.164428710938">
                <text:p>731.164428710938</text:p>
              </table:table-cell>
              <table:table-cell office:value-type="float" office:value="-0.003884869">
                <text:p>-0.003884869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731.28466796875">
                <text:p>731.28466796875</text:p>
              </table:table-cell>
              <table:table-cell office:value-type="float" office:value="0.001924032">
                <text:p>0.001924032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731.404907226563">
                <text:p>731.404907226563</text:p>
              </table:table-cell>
              <table:table-cell office:value-type="float" office:value="-0.005708305">
                <text:p>-0.005708305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731.525146484375">
                <text:p>731.525146484375</text:p>
              </table:table-cell>
              <table:table-cell office:value-type="float" office:value="-0.00194134">
                <text:p>-0.00194134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731.645446777344">
                <text:p>731.645446777344</text:p>
              </table:table-cell>
              <table:table-cell office:value-type="float" office:value="0.007721566">
                <text:p>0.007721566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731.765686035156">
                <text:p>731.765686035156</text:p>
              </table:table-cell>
              <table:table-cell office:value-type="float" office:value="0.008652839">
                <text:p>0.008652839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731.885925292969">
                <text:p>731.885925292969</text:p>
              </table:table-cell>
              <table:table-cell office:value-type="float" office:value="0.005846641">
                <text:p>0.005846641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732.006164550781">
                <text:p>732.006164550781</text:p>
              </table:table-cell>
              <table:table-cell office:value-type="float" office:value="-0.002117609">
                <text:p>-0.002117609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732.126403808594">
                <text:p>732.126403808594</text:p>
              </table:table-cell>
              <table:table-cell office:value-type="float" office:value="0.01742391">
                <text:p>0.01742391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732.246643066406">
                <text:p>732.246643066406</text:p>
              </table:table-cell>
              <table:table-cell office:value-type="float" office:value="-0.0033102">
                <text:p>-0.0033102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732.366882324219">
                <text:p>732.366882324219</text:p>
              </table:table-cell>
              <table:table-cell office:value-type="float" office:value="-0.004300292">
                <text:p>-0.004300292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732.487182617188">
                <text:p>732.487182617188</text:p>
              </table:table-cell>
              <table:table-cell office:value-type="float" office:value="-0.005438104">
                <text:p>-0.005438104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732.607421875">
                <text:p>732.607421875</text:p>
              </table:table-cell>
              <table:table-cell office:value-type="float" office:value="-0.0009099767">
                <text:p>-0.0009099767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732.727661132813">
                <text:p>732.727661132813</text:p>
              </table:table-cell>
              <table:table-cell office:value-type="float" office:value="0.004624591">
                <text:p>0.004624591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732.847900390625">
                <text:p>732.847900390625</text:p>
              </table:table-cell>
              <table:table-cell office:value-type="float" office:value="-0.002291997">
                <text:p>-0.002291997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732.968139648438">
                <text:p>732.968139648438</text:p>
              </table:table-cell>
              <table:table-cell office:value-type="float" office:value="-0.001908997">
                <text:p>-0.001908997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733.08837890625">
                <text:p>733.08837890625</text:p>
              </table:table-cell>
              <table:table-cell office:value-type="float" office:value="-0.004323283">
                <text:p>-0.004323283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733.208679199219">
                <text:p>733.208679199219</text:p>
              </table:table-cell>
              <table:table-cell office:value-type="float" office:value="-0.006791438">
                <text:p>-0.006791438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733.328918457031">
                <text:p>733.328918457031</text:p>
              </table:table-cell>
              <table:table-cell office:value-type="float" office:value="-0.002333739">
                <text:p>-0.002333739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733.449157714844">
                <text:p>733.449157714844</text:p>
              </table:table-cell>
              <table:table-cell office:value-type="float" office:value="-0.000185621">
                <text:p>-0.000185621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733.569396972656">
                <text:p>733.569396972656</text:p>
              </table:table-cell>
              <table:table-cell office:value-type="float" office:value="0.003645035">
                <text:p>0.003645035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733.689636230469">
                <text:p>733.689636230469</text:p>
              </table:table-cell>
              <table:table-cell office:value-type="float" office:value="-0.001332732">
                <text:p>-0.001332732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733.809936523438">
                <text:p>733.809936523438</text:p>
              </table:table-cell>
              <table:table-cell office:value-type="float" office:value="0.0007863766">
                <text:p>0.0007863766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733.93017578125">
                <text:p>733.93017578125</text:p>
              </table:table-cell>
              <table:table-cell office:value-type="float" office:value="0.007176529">
                <text:p>0.007176529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734.050415039063">
                <text:p>734.050415039063</text:p>
              </table:table-cell>
              <table:table-cell office:value-type="float" office:value="0.002088293">
                <text:p>0.002088293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734.170654296875">
                <text:p>734.170654296875</text:p>
              </table:table-cell>
              <table:table-cell office:value-type="float" office:value="0.006833296">
                <text:p>0.006833296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734.290893554688">
                <text:p>734.290893554688</text:p>
              </table:table-cell>
              <table:table-cell office:value-type="float" office:value="-0.006692592">
                <text:p>-0.006692592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734.4111328125">
                <text:p>734.4111328125</text:p>
              </table:table-cell>
              <table:table-cell office:value-type="float" office:value="-0.008253478">
                <text:p>-0.008253478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734.531433105469">
                <text:p>734.531433105469</text:p>
              </table:table-cell>
              <table:table-cell office:value-type="float" office:value="-0.001561778">
                <text:p>-0.001561778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734.651672363281">
                <text:p>734.651672363281</text:p>
              </table:table-cell>
              <table:table-cell office:value-type="float" office:value="0.006436287">
                <text:p>0.006436287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734.771911621094">
                <text:p>734.771911621094</text:p>
              </table:table-cell>
              <table:table-cell office:value-type="float" office:value="0.0001620931">
                <text:p>0.0001620931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734.892150878906">
                <text:p>734.892150878906</text:p>
              </table:table-cell>
              <table:table-cell office:value-type="float" office:value="-0.005343781">
                <text:p>-0.005343781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735.012451171875">
                <text:p>735.012451171875</text:p>
              </table:table-cell>
              <table:table-cell office:value-type="float" office:value="-0.005041104">
                <text:p>-0.005041104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735.132690429688">
                <text:p>735.132690429688</text:p>
              </table:table-cell>
              <table:table-cell office:value-type="float" office:value="-0.0008233018">
                <text:p>-0.0008233018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735.2529296875">
                <text:p>735.2529296875</text:p>
              </table:table-cell>
              <table:table-cell office:value-type="float" office:value="0.01767226">
                <text:p>0.01767226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735.373168945313">
                <text:p>735.373168945313</text:p>
              </table:table-cell>
              <table:table-cell office:value-type="float" office:value="0.003789898">
                <text:p>0.003789898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735.493408203125">
                <text:p>735.493408203125</text:p>
              </table:table-cell>
              <table:table-cell office:value-type="float" office:value="-0.0007079957">
                <text:p>-0.0007079957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735.613708496094">
                <text:p>735.613708496094</text:p>
              </table:table-cell>
              <table:table-cell office:value-type="float" office:value="0.003867862">
                <text:p>0.003867862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735.733947753906">
                <text:p>735.733947753906</text:p>
              </table:table-cell>
              <table:table-cell office:value-type="float" office:value="0.006491236">
                <text:p>0.006491236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735.854187011719">
                <text:p>735.854187011719</text:p>
              </table:table-cell>
              <table:table-cell office:value-type="float" office:value="0.008647757">
                <text:p>0.008647757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735.974426269531">
                <text:p>735.974426269531</text:p>
              </table:table-cell>
              <table:table-cell office:value-type="float" office:value="0.002997505">
                <text:p>0.002997505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736.094665527344">
                <text:p>736.094665527344</text:p>
              </table:table-cell>
              <table:table-cell office:value-type="float" office:value="0.004040654">
                <text:p>0.004040654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736.214965820313">
                <text:p>736.214965820313</text:p>
              </table:table-cell>
              <table:table-cell office:value-type="float" office:value="-0.004186653">
                <text:p>-0.004186653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736.335205078125">
                <text:p>736.335205078125</text:p>
              </table:table-cell>
              <table:table-cell office:value-type="float" office:value="0.0007996014">
                <text:p>0.0007996014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736.455444335938">
                <text:p>736.455444335938</text:p>
              </table:table-cell>
              <table:table-cell office:value-type="float" office:value="0.005323065">
                <text:p>0.005323065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736.57568359375">
                <text:p>736.57568359375</text:p>
              </table:table-cell>
              <table:table-cell office:value-type="float" office:value="0.003227878">
                <text:p>0.003227878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736.695983886719">
                <text:p>736.695983886719</text:p>
              </table:table-cell>
              <table:table-cell office:value-type="float" office:value="0.01217629">
                <text:p>0.01217629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736.816223144531">
                <text:p>736.816223144531</text:p>
              </table:table-cell>
              <table:table-cell office:value-type="float" office:value="0.007179343">
                <text:p>0.007179343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736.936462402344">
                <text:p>736.936462402344</text:p>
              </table:table-cell>
              <table:table-cell office:value-type="float" office:value="0.0111332">
                <text:p>0.0111332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737.056701660156">
                <text:p>737.056701660156</text:p>
              </table:table-cell>
              <table:table-cell office:value-type="float" office:value="0.000517924">
                <text:p>0.000517924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737.177001953125">
                <text:p>737.177001953125</text:p>
              </table:table-cell>
              <table:table-cell office:value-type="float" office:value="0.004904357">
                <text:p>0.004904357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737.297241210938">
                <text:p>737.297241210938</text:p>
              </table:table-cell>
              <table:table-cell office:value-type="float" office:value="0.006008852">
                <text:p>0.006008852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737.41748046875">
                <text:p>737.41748046875</text:p>
              </table:table-cell>
              <table:table-cell office:value-type="float" office:value="0.003718323">
                <text:p>0.003718323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737.537719726563">
                <text:p>737.537719726563</text:p>
              </table:table-cell>
              <table:table-cell office:value-type="float" office:value="0.003682798">
                <text:p>0.003682798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737.658020019531">
                <text:p>737.658020019531</text:p>
              </table:table-cell>
              <table:table-cell office:value-type="float" office:value="-0.008034169">
                <text:p>-0.008034169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737.778259277344">
                <text:p>737.778259277344</text:p>
              </table:table-cell>
              <table:table-cell office:value-type="float" office:value="0.00547235">
                <text:p>0.00547235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737.898498535156">
                <text:p>737.898498535156</text:p>
              </table:table-cell>
              <table:table-cell office:value-type="float" office:value="0.002530067">
                <text:p>0.002530067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738.018737792969">
                <text:p>738.018737792969</text:p>
              </table:table-cell>
              <table:table-cell office:value-type="float" office:value="0.005157228">
                <text:p>0.005157228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738.139038085938">
                <text:p>738.139038085938</text:p>
              </table:table-cell>
              <table:table-cell office:value-type="float" office:value="0.004300425">
                <text:p>0.004300425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738.25927734375">
                <text:p>738.25927734375</text:p>
              </table:table-cell>
              <table:table-cell office:value-type="float" office:value="-0.001355305">
                <text:p>-0.001355305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738.379516601563">
                <text:p>738.379516601563</text:p>
              </table:table-cell>
              <table:table-cell office:value-type="float" office:value="0.01510271">
                <text:p>0.01510271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738.499755859375">
                <text:p>738.499755859375</text:p>
              </table:table-cell>
              <table:table-cell office:value-type="float" office:value="0.005194412">
                <text:p>0.005194412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738.620056152344">
                <text:p>738.620056152344</text:p>
              </table:table-cell>
              <table:table-cell office:value-type="float" office:value="-0.003562616">
                <text:p>-0.003562616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738.740295410156">
                <text:p>738.740295410156</text:p>
              </table:table-cell>
              <table:table-cell office:value-type="float" office:value="-0.0006431029">
                <text:p>-0.0006431029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738.860534667969">
                <text:p>738.860534667969</text:p>
              </table:table-cell>
              <table:table-cell office:value-type="float" office:value="-0.004097297">
                <text:p>-0.004097297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738.980773925781">
                <text:p>738.980773925781</text:p>
              </table:table-cell>
              <table:table-cell office:value-type="float" office:value="0.01281443">
                <text:p>0.01281443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739.10107421875">
                <text:p>739.10107421875</text:p>
              </table:table-cell>
              <table:table-cell office:value-type="float" office:value="-0.002049305">
                <text:p>-0.002049305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739.221313476563">
                <text:p>739.221313476563</text:p>
              </table:table-cell>
              <table:table-cell office:value-type="float" office:value="0.007099401">
                <text:p>0.007099401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739.341552734375">
                <text:p>739.341552734375</text:p>
              </table:table-cell>
              <table:table-cell office:value-type="float" office:value="0.0011299">
                <text:p>0.0011299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739.461791992188">
                <text:p>739.461791992188</text:p>
              </table:table-cell>
              <table:table-cell office:value-type="float" office:value="-0.0002311073">
                <text:p>-0.0002311073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739.582092285156">
                <text:p>739.582092285156</text:p>
              </table:table-cell>
              <table:table-cell office:value-type="float" office:value="-0.003782212">
                <text:p>-0.003782212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739.702331542969">
                <text:p>739.702331542969</text:p>
              </table:table-cell>
              <table:table-cell office:value-type="float" office:value="-0.00922741">
                <text:p>-0.00922741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739.822570800781">
                <text:p>739.822570800781</text:p>
              </table:table-cell>
              <table:table-cell office:value-type="float" office:value="-0.002370495">
                <text:p>-0.002370495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739.942810058594">
                <text:p>739.942810058594</text:p>
              </table:table-cell>
              <table:table-cell office:value-type="float" office:value="-0.008410043">
                <text:p>-0.008410043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740.063110351563">
                <text:p>740.063110351563</text:p>
              </table:table-cell>
              <table:table-cell office:value-type="float" office:value="-0.004148803">
                <text:p>-0.004148803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740.183349609375">
                <text:p>740.183349609375</text:p>
              </table:table-cell>
              <table:table-cell office:value-type="float" office:value="-0.002542848">
                <text:p>-0.002542848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740.303588867188">
                <text:p>740.303588867188</text:p>
              </table:table-cell>
              <table:table-cell office:value-type="float" office:value="-0.0006146103">
                <text:p>-0.0006146103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740.423889160156">
                <text:p>740.423889160156</text:p>
              </table:table-cell>
              <table:table-cell office:value-type="float" office:value="0.009116434">
                <text:p>0.009116434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740.544128417969">
                <text:p>740.544128417969</text:p>
              </table:table-cell>
              <table:table-cell office:value-type="float" office:value="0.01342323">
                <text:p>0.01342323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740.664367675781">
                <text:p>740.664367675781</text:p>
              </table:table-cell>
              <table:table-cell office:value-type="float" office:value="-0.006318959">
                <text:p>-0.006318959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740.784606933594">
                <text:p>740.784606933594</text:p>
              </table:table-cell>
              <table:table-cell office:value-type="float" office:value="0.008183128">
                <text:p>0.008183128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740.904907226563">
                <text:p>740.904907226563</text:p>
              </table:table-cell>
              <table:table-cell office:value-type="float" office:value="0.001665259">
                <text:p>0.001665259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741.025146484375">
                <text:p>741.025146484375</text:p>
              </table:table-cell>
              <table:table-cell office:value-type="float" office:value="-0.005793314">
                <text:p>-0.005793314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741.145385742188">
                <text:p>741.145385742188</text:p>
              </table:table-cell>
              <table:table-cell office:value-type="float" office:value="-0.00426145">
                <text:p>-0.00426145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741.265625">
                <text:p>741.265625</text:p>
              </table:table-cell>
              <table:table-cell office:value-type="float" office:value="0.02202302">
                <text:p>0.02202302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741.385925292969">
                <text:p>741.385925292969</text:p>
              </table:table-cell>
              <table:table-cell office:value-type="float" office:value="-0.00524711">
                <text:p>-0.00524711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741.506164550781">
                <text:p>741.506164550781</text:p>
              </table:table-cell>
              <table:table-cell office:value-type="float" office:value="0.0008367286">
                <text:p>0.0008367286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741.626403808594">
                <text:p>741.626403808594</text:p>
              </table:table-cell>
              <table:table-cell office:value-type="float" office:value="0.008410928">
                <text:p>0.008410928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741.746704101563">
                <text:p>741.746704101563</text:p>
              </table:table-cell>
              <table:table-cell office:value-type="float" office:value="0.0007420647">
                <text:p>0.0007420647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741.866943359375">
                <text:p>741.866943359375</text:p>
              </table:table-cell>
              <table:table-cell office:value-type="float" office:value="0.01778216">
                <text:p>0.01778216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741.987182617188">
                <text:p>741.987182617188</text:p>
              </table:table-cell>
              <table:table-cell office:value-type="float" office:value="-0.00218902">
                <text:p>-0.00218902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742.107421875">
                <text:p>742.107421875</text:p>
              </table:table-cell>
              <table:table-cell office:value-type="float" office:value="0.005669625">
                <text:p>0.005669625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742.227722167969">
                <text:p>742.227722167969</text:p>
              </table:table-cell>
              <table:table-cell office:value-type="float" office:value="0.00729022">
                <text:p>0.00729022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742.347961425781">
                <text:p>742.347961425781</text:p>
              </table:table-cell>
              <table:table-cell office:value-type="float" office:value="0.002870891">
                <text:p>0.002870891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742.468200683594">
                <text:p>742.468200683594</text:p>
              </table:table-cell>
              <table:table-cell office:value-type="float" office:value="-0.004409801">
                <text:p>-0.004409801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742.588439941406">
                <text:p>742.588439941406</text:p>
              </table:table-cell>
              <table:table-cell office:value-type="float" office:value="0.0007007259">
                <text:p>0.0007007259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742.708740234375">
                <text:p>742.708740234375</text:p>
              </table:table-cell>
              <table:table-cell office:value-type="float" office:value="-0.001321735">
                <text:p>-0.001321735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742.828979492188">
                <text:p>742.828979492188</text:p>
              </table:table-cell>
              <table:table-cell office:value-type="float" office:value="-0.002062732">
                <text:p>-0.002062732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742.94921875">
                <text:p>742.94921875</text:p>
              </table:table-cell>
              <table:table-cell office:value-type="float" office:value="0.004951724">
                <text:p>0.004951724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743.069519042969">
                <text:p>743.069519042969</text:p>
              </table:table-cell>
              <table:table-cell office:value-type="float" office:value="0.01154719">
                <text:p>0.01154719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743.189758300781">
                <text:p>743.189758300781</text:p>
              </table:table-cell>
              <table:table-cell office:value-type="float" office:value="0.00126051">
                <text:p>0.00126051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743.309997558594">
                <text:p>743.309997558594</text:p>
              </table:table-cell>
              <table:table-cell office:value-type="float" office:value="-0.008785389">
                <text:p>-0.008785389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743.430236816406">
                <text:p>743.430236816406</text:p>
              </table:table-cell>
              <table:table-cell office:value-type="float" office:value="0.002993111">
                <text:p>0.002993111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743.550537109375">
                <text:p>743.550537109375</text:p>
              </table:table-cell>
              <table:table-cell office:value-type="float" office:value="-0.007367376">
                <text:p>-0.007367376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743.670776367188">
                <text:p>743.670776367188</text:p>
              </table:table-cell>
              <table:table-cell office:value-type="float" office:value="-0.005623739">
                <text:p>-0.005623739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743.791015625">
                <text:p>743.791015625</text:p>
              </table:table-cell>
              <table:table-cell office:value-type="float" office:value="-0.006423687">
                <text:p>-0.006423687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743.911254882813">
                <text:p>743.911254882813</text:p>
              </table:table-cell>
              <table:table-cell office:value-type="float" office:value="0.02953932">
                <text:p>0.02953932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744.031555175781">
                <text:p>744.031555175781</text:p>
              </table:table-cell>
              <table:table-cell office:value-type="float" office:value="-0.007014812">
                <text:p>-0.007014812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744.151794433594">
                <text:p>744.151794433594</text:p>
              </table:table-cell>
              <table:table-cell office:value-type="float" office:value="-0.05571449">
                <text:p>-0.05571449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744.272033691406">
                <text:p>744.272033691406</text:p>
              </table:table-cell>
              <table:table-cell office:value-type="float" office:value="-0.05736252">
                <text:p>-0.05736252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744.392333984375">
                <text:p>744.392333984375</text:p>
              </table:table-cell>
              <table:table-cell office:value-type="float" office:value="-0.05910224">
                <text:p>-0.05910224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744.512573242188">
                <text:p>744.512573242188</text:p>
              </table:table-cell>
              <table:table-cell office:value-type="float" office:value="-0.0595693">
                <text:p>-0.0595693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744.6328125">
                <text:p>744.6328125</text:p>
              </table:table-cell>
              <table:table-cell office:value-type="float" office:value="-0.05999368">
                <text:p>-0.05999368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744.753051757813">
                <text:p>744.753051757813</text:p>
              </table:table-cell>
              <table:table-cell office:value-type="float" office:value="-0.05944458">
                <text:p>-0.059444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