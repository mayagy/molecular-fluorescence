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 [nm (air)]</text:p>
          </table:table-cell>
          <table:table-cell office:value-type="string">
            <text:p>Y [Intensity]</text:p>
          </table:table-cell>
          <table:table-cell table:number-columns-repeated="4"/>
        </table:table-row>
        <table:table-row table:style-name="ro1">
          <table:table-cell office:value-type="float" office:value="321.5908203125">
            <text:p>321.5908203125</text:p>
          </table:table-cell>
          <table:table-cell office:value-type="float" office:value="0.006633598">
            <text:p>0.006633598</text:p>
          </table:table-cell>
          <table:table-cell table:number-columns-repeated="4"/>
        </table:table-row>
        <table:table-row table:style-name="ro1">
          <table:table-cell office:value-type="float" office:value="321.698333740234">
            <text:p>321.6983337402</text:p>
          </table:table-cell>
          <table:table-cell office:value-type="float" office:value="0.002889248">
            <text:p>0.002889248</text:p>
          </table:table-cell>
          <table:table-cell table:number-columns-repeated="3"/>
          <table:table-cell>
            <draw:frame table:end-cell-address="Sheet1.M23" table:end-x="0.7083in" table:end-y="0.1417in" draw:z-index="0" draw:style-name="gr1" draw:text-style-name="P1" svg:width="6.2988in" svg:height="3.5429in" svg:x="0.6327in" svg:y="0.1547in">
              <draw:object draw:notify-on-update-of-ranges="Sheet1.A1:Sheet1.A1 Sheet1.A2:Sheet1.A3649 Sheet1.B1:Sheet1.B1 Sheet1.B2:Sheet1.B36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1.805877685547">
            <text:p>321.8058776855</text:p>
          </table:table-cell>
          <table:table-cell office:value-type="float" office:value="0.003788146">
            <text:p>0.003788146</text:p>
          </table:table-cell>
          <table:table-cell table:number-columns-repeated="4"/>
        </table:table-row>
        <table:table-row table:style-name="ro1">
          <table:table-cell office:value-type="float" office:value="321.913421630859">
            <text:p>321.9134216309</text:p>
          </table:table-cell>
          <table:table-cell office:value-type="float" office:value="0.01283257">
            <text:p>0.01283257</text:p>
          </table:table-cell>
          <table:table-cell table:number-columns-repeated="4"/>
        </table:table-row>
        <table:table-row table:style-name="ro1">
          <table:table-cell office:value-type="float" office:value="322.020965576172">
            <text:p>322.0209655762</text:p>
          </table:table-cell>
          <table:table-cell office:value-type="float" office:value="0.008145528">
            <text:p>0.008145528</text:p>
          </table:table-cell>
          <table:table-cell table:number-columns-repeated="4"/>
        </table:table-row>
        <table:table-row table:style-name="ro1">
          <table:table-cell office:value-type="float" office:value="322.128540039063">
            <text:p>322.1285400391</text:p>
          </table:table-cell>
          <table:table-cell office:value-type="float" office:value="0.00460327">
            <text:p>0.00460327</text:p>
          </table:table-cell>
          <table:table-cell table:number-columns-repeated="4"/>
        </table:table-row>
        <table:table-row table:style-name="ro1">
          <table:table-cell office:value-type="float" office:value="322.236083984375">
            <text:p>322.2360839844</text:p>
          </table:table-cell>
          <table:table-cell office:value-type="float" office:value="0.01709387">
            <text:p>0.01709387</text:p>
          </table:table-cell>
          <table:table-cell table:number-columns-repeated="4"/>
        </table:table-row>
        <table:table-row table:style-name="ro1">
          <table:table-cell office:value-type="float" office:value="322.343658447266">
            <text:p>322.3436584473</text:p>
          </table:table-cell>
          <table:table-cell office:value-type="float" office:value="-0.001533004">
            <text:p>-0.001533004</text:p>
          </table:table-cell>
          <table:table-cell table:number-columns-repeated="4"/>
        </table:table-row>
        <table:table-row table:style-name="ro1">
          <table:table-cell office:value-type="float" office:value="322.451232910156">
            <text:p>322.4512329102</text:p>
          </table:table-cell>
          <table:table-cell office:value-type="float" office:value="-0.0003246236">
            <text:p>-0.0003246236</text:p>
          </table:table-cell>
          <table:table-cell table:number-columns-repeated="4"/>
        </table:table-row>
        <table:table-row table:style-name="ro1">
          <table:table-cell office:value-type="float" office:value="322.558837890625">
            <text:p>322.5588378906</text:p>
          </table:table-cell>
          <table:table-cell office:value-type="float" office:value="0.006966604">
            <text:p>0.006966604</text:p>
          </table:table-cell>
          <table:table-cell table:number-columns-repeated="4"/>
        </table:table-row>
        <table:table-row table:style-name="ro1">
          <table:table-cell office:value-type="float" office:value="322.666412353516">
            <text:p>322.6664123535</text:p>
          </table:table-cell>
          <table:table-cell office:value-type="float" office:value="0.009895044">
            <text:p>0.009895044</text:p>
          </table:table-cell>
          <table:table-cell table:number-columns-repeated="4"/>
        </table:table-row>
        <table:table-row table:style-name="ro1">
          <table:table-cell office:value-type="float" office:value="322.774017333984">
            <text:p>322.774017334</text:p>
          </table:table-cell>
          <table:table-cell office:value-type="float" office:value="0.01197758">
            <text:p>0.01197758</text:p>
          </table:table-cell>
          <table:table-cell table:number-columns-repeated="4"/>
        </table:table-row>
        <table:table-row table:style-name="ro1">
          <table:table-cell office:value-type="float" office:value="322.881622314453">
            <text:p>322.8816223145</text:p>
          </table:table-cell>
          <table:table-cell office:value-type="float" office:value="-0.002711107">
            <text:p>-0.002711107</text:p>
          </table:table-cell>
          <table:table-cell table:number-columns-repeated="4"/>
        </table:table-row>
        <table:table-row table:style-name="ro1">
          <table:table-cell office:value-type="float" office:value="322.989227294922">
            <text:p>322.9892272949</text:p>
          </table:table-cell>
          <table:table-cell office:value-type="float" office:value="0.003110009">
            <text:p>0.003110009</text:p>
          </table:table-cell>
          <table:table-cell table:number-columns-repeated="4"/>
        </table:table-row>
        <table:table-row table:style-name="ro1">
          <table:table-cell office:value-type="float" office:value="323.096862792969">
            <text:p>323.096862793</text:p>
          </table:table-cell>
          <table:table-cell office:value-type="float" office:value="0.001061948">
            <text:p>0.001061948</text:p>
          </table:table-cell>
          <table:table-cell table:number-columns-repeated="4"/>
        </table:table-row>
        <table:table-row table:style-name="ro1">
          <table:table-cell office:value-type="float" office:value="323.204498291016">
            <text:p>323.204498291</text:p>
          </table:table-cell>
          <table:table-cell office:value-type="float" office:value="0.006604338">
            <text:p>0.006604338</text:p>
          </table:table-cell>
          <table:table-cell table:number-columns-repeated="4"/>
        </table:table-row>
        <table:table-row table:style-name="ro1">
          <table:table-cell office:value-type="float" office:value="323.312133789063">
            <text:p>323.3121337891</text:p>
          </table:table-cell>
          <table:table-cell office:value-type="float" office:value="-0.002226956">
            <text:p>-0.002226956</text:p>
          </table:table-cell>
          <table:table-cell table:number-columns-repeated="4"/>
        </table:table-row>
        <table:table-row table:style-name="ro1">
          <table:table-cell office:value-type="float" office:value="323.419769287109">
            <text:p>323.4197692871</text:p>
          </table:table-cell>
          <table:table-cell office:value-type="float" office:value="0.003827022">
            <text:p>0.003827022</text:p>
          </table:table-cell>
          <table:table-cell table:number-columns-repeated="4"/>
        </table:table-row>
        <table:table-row table:style-name="ro1">
          <table:table-cell office:value-type="float" office:value="323.527404785156">
            <text:p>323.5274047852</text:p>
          </table:table-cell>
          <table:table-cell office:value-type="float" office:value="0.04100899">
            <text:p>0.04100899</text:p>
          </table:table-cell>
          <table:table-cell table:number-columns-repeated="4"/>
        </table:table-row>
        <table:table-row table:style-name="ro1">
          <table:table-cell office:value-type="float" office:value="323.635070800781">
            <text:p>323.6350708008</text:p>
          </table:table-cell>
          <table:table-cell office:value-type="float" office:value="-0.006658774">
            <text:p>-0.006658774</text:p>
          </table:table-cell>
          <table:table-cell table:number-columns-repeated="4"/>
        </table:table-row>
        <table:table-row table:style-name="ro1">
          <table:table-cell office:value-type="float" office:value="323.742736816406">
            <text:p>323.7427368164</text:p>
          </table:table-cell>
          <table:table-cell office:value-type="float" office:value="-0.003551021">
            <text:p>-0.003551021</text:p>
          </table:table-cell>
          <table:table-cell table:number-columns-repeated="4"/>
        </table:table-row>
        <table:table-row table:style-name="ro1">
          <table:table-cell office:value-type="float" office:value="323.850402832031">
            <text:p>323.850402832</text:p>
          </table:table-cell>
          <table:table-cell office:value-type="float" office:value="0.0118152">
            <text:p>0.0118152</text:p>
          </table:table-cell>
          <table:table-cell table:number-columns-repeated="4"/>
        </table:table-row>
        <table:table-row table:style-name="ro1">
          <table:table-cell office:value-type="float" office:value="323.958068847656">
            <text:p>323.9580688477</text:p>
          </table:table-cell>
          <table:table-cell office:value-type="float" office:value="0.01911346">
            <text:p>0.01911346</text:p>
          </table:table-cell>
          <table:table-cell table:number-columns-repeated="4"/>
        </table:table-row>
        <table:table-row table:style-name="ro1">
          <table:table-cell office:value-type="float" office:value="324.065765380859">
            <text:p>324.0657653809</text:p>
          </table:table-cell>
          <table:table-cell office:value-type="float" office:value="-0.001240793">
            <text:p>-0.001240793</text:p>
          </table:table-cell>
          <table:table-cell table:number-columns-repeated="4"/>
        </table:table-row>
        <table:table-row table:style-name="ro1">
          <table:table-cell office:value-type="float" office:value="324.173461914063">
            <text:p>324.1734619141</text:p>
          </table:table-cell>
          <table:table-cell office:value-type="float" office:value="-0.005823247">
            <text:p>-0.005823247</text:p>
          </table:table-cell>
          <table:table-cell table:number-columns-repeated="4"/>
        </table:table-row>
        <table:table-row table:style-name="ro1">
          <table:table-cell office:value-type="float" office:value="324.281158447266">
            <text:p>324.2811584473</text:p>
          </table:table-cell>
          <table:table-cell office:value-type="float" office:value="0.004437591">
            <text:p>0.004437591</text:p>
          </table:table-cell>
          <table:table-cell table:number-columns-repeated="4"/>
        </table:table-row>
        <table:table-row table:style-name="ro1">
          <table:table-cell office:value-type="float" office:value="324.388854980469">
            <text:p>324.3888549805</text:p>
          </table:table-cell>
          <table:table-cell office:value-type="float" office:value="-0.003818965">
            <text:p>-0.003818965</text:p>
          </table:table-cell>
          <table:table-cell table:number-columns-repeated="4"/>
        </table:table-row>
        <table:table-row table:style-name="ro1">
          <table:table-cell office:value-type="float" office:value="324.496551513672">
            <text:p>324.4965515137</text:p>
          </table:table-cell>
          <table:table-cell office:value-type="float" office:value="0.003352616">
            <text:p>0.003352616</text:p>
          </table:table-cell>
          <table:table-cell table:number-columns-repeated="4"/>
        </table:table-row>
        <table:table-row table:style-name="ro1">
          <table:table-cell office:value-type="float" office:value="324.604278564453">
            <text:p>324.6042785645</text:p>
          </table:table-cell>
          <table:table-cell office:value-type="float" office:value="0.00821708">
            <text:p>0.00821708</text:p>
          </table:table-cell>
          <table:table-cell table:number-columns-repeated="4"/>
        </table:table-row>
        <table:table-row table:style-name="ro1">
          <table:table-cell office:value-type="float" office:value="324.712005615234">
            <text:p>324.7120056152</text:p>
          </table:table-cell>
          <table:table-cell office:value-type="float" office:value="0.003592107">
            <text:p>0.003592107</text:p>
          </table:table-cell>
          <table:table-cell table:number-columns-repeated="4"/>
        </table:table-row>
        <table:table-row table:style-name="ro1">
          <table:table-cell office:value-type="float" office:value="324.819732666016">
            <text:p>324.819732666</text:p>
          </table:table-cell>
          <table:table-cell office:value-type="float" office:value="0.001369642">
            <text:p>0.001369642</text:p>
          </table:table-cell>
          <table:table-cell table:number-columns-repeated="4"/>
        </table:table-row>
        <table:table-row table:style-name="ro1">
          <table:table-cell office:value-type="float" office:value="324.927490234375">
            <text:p>324.9274902344</text:p>
          </table:table-cell>
          <table:table-cell office:value-type="float" office:value="0.01689675">
            <text:p>0.01689675</text:p>
          </table:table-cell>
          <table:table-cell table:number-columns-repeated="4"/>
        </table:table-row>
        <table:table-row table:style-name="ro1">
          <table:table-cell office:value-type="float" office:value="325.035217285156">
            <text:p>325.0352172852</text:p>
          </table:table-cell>
          <table:table-cell office:value-type="float" office:value="-0.008480207">
            <text:p>-0.008480207</text:p>
          </table:table-cell>
          <table:table-cell table:number-columns-repeated="4"/>
        </table:table-row>
        <table:table-row table:style-name="ro1">
          <table:table-cell office:value-type="float" office:value="325.142974853516">
            <text:p>325.1429748535</text:p>
          </table:table-cell>
          <table:table-cell office:value-type="float" office:value="0.001833447">
            <text:p>0.001833447</text:p>
          </table:table-cell>
          <table:table-cell table:number-columns-repeated="4"/>
        </table:table-row>
        <table:table-row table:style-name="ro1">
          <table:table-cell office:value-type="float" office:value="325.250732421875">
            <text:p>325.2507324219</text:p>
          </table:table-cell>
          <table:table-cell office:value-type="float" office:value="0.0008489772">
            <text:p>0.0008489772</text:p>
          </table:table-cell>
          <table:table-cell table:number-columns-repeated="4"/>
        </table:table-row>
        <table:table-row table:style-name="ro1">
          <table:table-cell office:value-type="float" office:value="325.358489990234">
            <text:p>325.3584899902</text:p>
          </table:table-cell>
          <table:table-cell office:value-type="float" office:value="-0.003776472">
            <text:p>-0.003776472</text:p>
          </table:table-cell>
          <table:table-cell table:number-columns-repeated="4"/>
        </table:table-row>
        <table:table-row table:style-name="ro1">
          <table:table-cell office:value-type="float" office:value="325.466278076172">
            <text:p>325.4662780762</text:p>
          </table:table-cell>
          <table:table-cell office:value-type="float" office:value="0.002519314">
            <text:p>0.002519314</text:p>
          </table:table-cell>
          <table:table-cell table:number-columns-repeated="4"/>
        </table:table-row>
        <table:table-row table:style-name="ro1">
          <table:table-cell office:value-type="float" office:value="325.574066162109">
            <text:p>325.5740661621</text:p>
          </table:table-cell>
          <table:table-cell office:value-type="float" office:value="0.005526546">
            <text:p>0.005526546</text:p>
          </table:table-cell>
          <table:table-cell table:number-columns-repeated="4"/>
        </table:table-row>
        <table:table-row table:style-name="ro1">
          <table:table-cell office:value-type="float" office:value="325.681854248047">
            <text:p>325.681854248</text:p>
          </table:table-cell>
          <table:table-cell office:value-type="float" office:value="0.003862127">
            <text:p>0.003862127</text:p>
          </table:table-cell>
          <table:table-cell table:number-columns-repeated="4"/>
        </table:table-row>
        <table:table-row table:style-name="ro1">
          <table:table-cell office:value-type="float" office:value="325.789642333984">
            <text:p>325.789642334</text:p>
          </table:table-cell>
          <table:table-cell office:value-type="float" office:value="0.005610921">
            <text:p>0.005610921</text:p>
          </table:table-cell>
          <table:table-cell table:number-columns-repeated="4"/>
        </table:table-row>
        <table:table-row table:style-name="ro1">
          <table:table-cell office:value-type="float" office:value="325.897430419922">
            <text:p>325.8974304199</text:p>
          </table:table-cell>
          <table:table-cell office:value-type="float" office:value="0.00386668">
            <text:p>0.00386668</text:p>
          </table:table-cell>
          <table:table-cell table:number-columns-repeated="4"/>
        </table:table-row>
        <table:table-row table:style-name="ro1">
          <table:table-cell office:value-type="float" office:value="326.005249023438">
            <text:p>326.0052490234</text:p>
          </table:table-cell>
          <table:table-cell office:value-type="float" office:value="0.001509076">
            <text:p>0.001509076</text:p>
          </table:table-cell>
          <table:table-cell table:number-columns-repeated="4"/>
        </table:table-row>
        <table:table-row table:style-name="ro1">
          <table:table-cell office:value-type="float" office:value="326.113067626953">
            <text:p>326.113067627</text:p>
          </table:table-cell>
          <table:table-cell office:value-type="float" office:value="0.008136901">
            <text:p>0.008136901</text:p>
          </table:table-cell>
          <table:table-cell table:number-columns-repeated="4"/>
        </table:table-row>
        <table:table-row table:style-name="ro1">
          <table:table-cell office:value-type="float" office:value="326.220886230469">
            <text:p>326.2208862305</text:p>
          </table:table-cell>
          <table:table-cell office:value-type="float" office:value="0.01740996">
            <text:p>0.01740996</text:p>
          </table:table-cell>
          <table:table-cell table:number-columns-repeated="4"/>
        </table:table-row>
        <table:table-row table:style-name="ro1">
          <table:table-cell office:value-type="float" office:value="326.328704833984">
            <text:p>326.328704834</text:p>
          </table:table-cell>
          <table:table-cell office:value-type="float" office:value="-0.004520986">
            <text:p>-0.004520986</text:p>
          </table:table-cell>
          <table:table-cell table:number-columns-repeated="4"/>
        </table:table-row>
        <table:table-row table:style-name="ro1">
          <table:table-cell office:value-type="float" office:value="326.436553955078">
            <text:p>326.4365539551</text:p>
          </table:table-cell>
          <table:table-cell office:value-type="float" office:value="0.009940187">
            <text:p>0.009940187</text:p>
          </table:table-cell>
          <table:table-cell table:number-columns-repeated="4"/>
        </table:table-row>
        <table:table-row table:style-name="ro1">
          <table:table-cell office:value-type="float" office:value="326.544403076172">
            <text:p>326.5444030762</text:p>
          </table:table-cell>
          <table:table-cell office:value-type="float" office:value="0.0244963">
            <text:p>0.0244963</text:p>
          </table:table-cell>
          <table:table-cell table:number-columns-repeated="4"/>
        </table:table-row>
        <table:table-row table:style-name="ro1">
          <table:table-cell office:value-type="float" office:value="326.652252197266">
            <text:p>326.6522521973</text:p>
          </table:table-cell>
          <table:table-cell office:value-type="float" office:value="0.01856223">
            <text:p>0.01856223</text:p>
          </table:table-cell>
          <table:table-cell table:number-columns-repeated="4"/>
        </table:table-row>
        <table:table-row table:style-name="ro1">
          <table:table-cell office:value-type="float" office:value="326.760101318359">
            <text:p>326.7601013184</text:p>
          </table:table-cell>
          <table:table-cell office:value-type="float" office:value="0.005699103">
            <text:p>0.005699103</text:p>
          </table:table-cell>
          <table:table-cell table:number-columns-repeated="4"/>
        </table:table-row>
        <table:table-row table:style-name="ro1">
          <table:table-cell office:value-type="float" office:value="326.867950439453">
            <text:p>326.8679504395</text:p>
          </table:table-cell>
          <table:table-cell office:value-type="float" office:value="0.009738255">
            <text:p>0.009738255</text:p>
          </table:table-cell>
          <table:table-cell table:number-columns-repeated="4"/>
        </table:table-row>
        <table:table-row table:style-name="ro1">
          <table:table-cell office:value-type="float" office:value="326.975830078125">
            <text:p>326.9758300781</text:p>
          </table:table-cell>
          <table:table-cell office:value-type="float" office:value="0.003988258">
            <text:p>0.003988258</text:p>
          </table:table-cell>
          <table:table-cell table:number-columns-repeated="4"/>
        </table:table-row>
        <table:table-row table:style-name="ro1">
          <table:table-cell office:value-type="float" office:value="327.083709716797">
            <text:p>327.0837097168</text:p>
          </table:table-cell>
          <table:table-cell office:value-type="float" office:value="0.007029164">
            <text:p>0.007029164</text:p>
          </table:table-cell>
          <table:table-cell table:number-columns-repeated="4"/>
        </table:table-row>
        <table:table-row table:style-name="ro1">
          <table:table-cell office:value-type="float" office:value="327.191589355469">
            <text:p>327.1915893555</text:p>
          </table:table-cell>
          <table:table-cell office:value-type="float" office:value="-0.001784059">
            <text:p>-0.001784059</text:p>
          </table:table-cell>
          <table:table-cell table:number-columns-repeated="4"/>
        </table:table-row>
        <table:table-row table:style-name="ro1">
          <table:table-cell office:value-type="float" office:value="327.299499511719">
            <text:p>327.2994995117</text:p>
          </table:table-cell>
          <table:table-cell office:value-type="float" office:value="0.005473457">
            <text:p>0.005473457</text:p>
          </table:table-cell>
          <table:table-cell table:number-columns-repeated="4"/>
        </table:table-row>
        <table:table-row table:style-name="ro1">
          <table:table-cell office:value-type="float" office:value="327.407379150391">
            <text:p>327.4073791504</text:p>
          </table:table-cell>
          <table:table-cell office:value-type="float" office:value="0.01959198">
            <text:p>0.01959198</text:p>
          </table:table-cell>
          <table:table-cell table:number-columns-repeated="4"/>
        </table:table-row>
        <table:table-row table:style-name="ro1">
          <table:table-cell office:value-type="float" office:value="327.515289306641">
            <text:p>327.5152893066</text:p>
          </table:table-cell>
          <table:table-cell office:value-type="float" office:value="-0.003346804">
            <text:p>-0.003346804</text:p>
          </table:table-cell>
          <table:table-cell table:number-columns-repeated="4"/>
        </table:table-row>
        <table:table-row table:style-name="ro1">
          <table:table-cell office:value-type="float" office:value="327.623199462891">
            <text:p>327.6231994629</text:p>
          </table:table-cell>
          <table:table-cell office:value-type="float" office:value="0.01020987">
            <text:p>0.01020987</text:p>
          </table:table-cell>
          <table:table-cell table:number-columns-repeated="4"/>
        </table:table-row>
        <table:table-row table:style-name="ro1">
          <table:table-cell office:value-type="float" office:value="327.731109619141">
            <text:p>327.7311096191</text:p>
          </table:table-cell>
          <table:table-cell office:value-type="float" office:value="-0.003135254">
            <text:p>-0.003135254</text:p>
          </table:table-cell>
          <table:table-cell table:number-columns-repeated="4"/>
        </table:table-row>
        <table:table-row table:style-name="ro1">
          <table:table-cell office:value-type="float" office:value="327.839050292969">
            <text:p>327.839050293</text:p>
          </table:table-cell>
          <table:table-cell office:value-type="float" office:value="-0.006971035">
            <text:p>-0.006971035</text:p>
          </table:table-cell>
          <table:table-cell table:number-columns-repeated="4"/>
        </table:table-row>
        <table:table-row table:style-name="ro1">
          <table:table-cell office:value-type="float" office:value="327.946990966797">
            <text:p>327.9469909668</text:p>
          </table:table-cell>
          <table:table-cell office:value-type="float" office:value="-0.000120816">
            <text:p>-0.000120816</text:p>
          </table:table-cell>
          <table:table-cell table:number-columns-repeated="4"/>
        </table:table-row>
        <table:table-row table:style-name="ro1">
          <table:table-cell office:value-type="float" office:value="328.054931640625">
            <text:p>328.0549316406</text:p>
          </table:table-cell>
          <table:table-cell office:value-type="float" office:value="0.004200836">
            <text:p>0.004200836</text:p>
          </table:table-cell>
          <table:table-cell table:number-columns-repeated="4"/>
        </table:table-row>
        <table:table-row table:style-name="ro1">
          <table:table-cell office:value-type="float" office:value="328.162872314453">
            <text:p>328.1628723145</text:p>
          </table:table-cell>
          <table:table-cell office:value-type="float" office:value="0.006933776">
            <text:p>0.006933776</text:p>
          </table:table-cell>
          <table:table-cell table:number-columns-repeated="4"/>
        </table:table-row>
        <table:table-row table:style-name="ro1">
          <table:table-cell office:value-type="float" office:value="328.270812988281">
            <text:p>328.2708129883</text:p>
          </table:table-cell>
          <table:table-cell office:value-type="float" office:value="-0.003127952">
            <text:p>-0.003127952</text:p>
          </table:table-cell>
          <table:table-cell table:number-columns-repeated="4"/>
        </table:table-row>
        <table:table-row table:style-name="ro1">
          <table:table-cell office:value-type="float" office:value="328.378784179688">
            <text:p>328.3787841797</text:p>
          </table:table-cell>
          <table:table-cell office:value-type="float" office:value="-0.001352674">
            <text:p>-0.001352674</text:p>
          </table:table-cell>
          <table:table-cell table:number-columns-repeated="4"/>
        </table:table-row>
        <table:table-row table:style-name="ro1">
          <table:table-cell office:value-type="float" office:value="328.486755371094">
            <text:p>328.4867553711</text:p>
          </table:table-cell>
          <table:table-cell office:value-type="float" office:value="-0.009085423">
            <text:p>-0.009085423</text:p>
          </table:table-cell>
          <table:table-cell table:number-columns-repeated="4"/>
        </table:table-row>
        <table:table-row table:style-name="ro1">
          <table:table-cell office:value-type="float" office:value="328.5947265625">
            <text:p>328.5947265625</text:p>
          </table:table-cell>
          <table:table-cell office:value-type="float" office:value="0.00306123">
            <text:p>0.00306123</text:p>
          </table:table-cell>
          <table:table-cell table:number-columns-repeated="4"/>
        </table:table-row>
        <table:table-row table:style-name="ro1">
          <table:table-cell office:value-type="float" office:value="328.702697753906">
            <text:p>328.7026977539</text:p>
          </table:table-cell>
          <table:table-cell office:value-type="float" office:value="0.02327563">
            <text:p>0.02327563</text:p>
          </table:table-cell>
          <table:table-cell table:number-columns-repeated="4"/>
        </table:table-row>
        <table:table-row table:style-name="ro1">
          <table:table-cell office:value-type="float" office:value="328.810699462891">
            <text:p>328.8106994629</text:p>
          </table:table-cell>
          <table:table-cell office:value-type="float" office:value="0.001530248">
            <text:p>0.001530248</text:p>
          </table:table-cell>
          <table:table-cell table:number-columns-repeated="4"/>
        </table:table-row>
        <table:table-row table:style-name="ro1">
          <table:table-cell office:value-type="float" office:value="328.918670654297">
            <text:p>328.9186706543</text:p>
          </table:table-cell>
          <table:table-cell office:value-type="float" office:value="0.008821449">
            <text:p>0.008821449</text:p>
          </table:table-cell>
          <table:table-cell table:number-columns-repeated="4"/>
        </table:table-row>
        <table:table-row table:style-name="ro1">
          <table:table-cell office:value-type="float" office:value="329.026672363281">
            <text:p>329.0266723633</text:p>
          </table:table-cell>
          <table:table-cell office:value-type="float" office:value="0.008814553">
            <text:p>0.008814553</text:p>
          </table:table-cell>
          <table:table-cell table:number-columns-repeated="4"/>
        </table:table-row>
        <table:table-row table:style-name="ro1">
          <table:table-cell office:value-type="float" office:value="329.134704589844">
            <text:p>329.1347045898</text:p>
          </table:table-cell>
          <table:table-cell office:value-type="float" office:value="0.01692944">
            <text:p>0.01692944</text:p>
          </table:table-cell>
          <table:table-cell table:number-columns-repeated="4"/>
        </table:table-row>
        <table:table-row table:style-name="ro1">
          <table:table-cell office:value-type="float" office:value="329.242706298828">
            <text:p>329.2427062988</text:p>
          </table:table-cell>
          <table:table-cell office:value-type="float" office:value="-0.002318544">
            <text:p>-0.002318544</text:p>
          </table:table-cell>
          <table:table-cell table:number-columns-repeated="4"/>
        </table:table-row>
        <table:table-row table:style-name="ro1">
          <table:table-cell office:value-type="float" office:value="329.350738525391">
            <text:p>329.3507385254</text:p>
          </table:table-cell>
          <table:table-cell office:value-type="float" office:value="-0.003676968">
            <text:p>-0.003676968</text:p>
          </table:table-cell>
          <table:table-cell table:number-columns-repeated="4"/>
        </table:table-row>
        <table:table-row table:style-name="ro1">
          <table:table-cell office:value-type="float" office:value="329.458770751953">
            <text:p>329.458770752</text:p>
          </table:table-cell>
          <table:table-cell office:value-type="float" office:value="0.001782966">
            <text:p>0.001782966</text:p>
          </table:table-cell>
          <table:table-cell table:number-columns-repeated="4"/>
        </table:table-row>
        <table:table-row table:style-name="ro1">
          <table:table-cell office:value-type="float" office:value="329.566802978516">
            <text:p>329.5668029785</text:p>
          </table:table-cell>
          <table:table-cell office:value-type="float" office:value="0.003091095">
            <text:p>0.003091095</text:p>
          </table:table-cell>
          <table:table-cell table:number-columns-repeated="4"/>
        </table:table-row>
        <table:table-row table:style-name="ro1">
          <table:table-cell office:value-type="float" office:value="329.674835205078">
            <text:p>329.6748352051</text:p>
          </table:table-cell>
          <table:table-cell office:value-type="float" office:value="-0.002489517">
            <text:p>-0.002489517</text:p>
          </table:table-cell>
          <table:table-cell table:number-columns-repeated="4"/>
        </table:table-row>
        <table:table-row table:style-name="ro1">
          <table:table-cell office:value-type="float" office:value="329.782897949219">
            <text:p>329.7828979492</text:p>
          </table:table-cell>
          <table:table-cell office:value-type="float" office:value="0.008082417">
            <text:p>0.008082417</text:p>
          </table:table-cell>
          <table:table-cell table:number-columns-repeated="4"/>
        </table:table-row>
        <table:table-row table:style-name="ro1">
          <table:table-cell office:value-type="float" office:value="329.890960693359">
            <text:p>329.8909606934</text:p>
          </table:table-cell>
          <table:table-cell office:value-type="float" office:value="0.04332095">
            <text:p>0.04332095</text:p>
          </table:table-cell>
          <table:table-cell table:number-columns-repeated="4"/>
        </table:table-row>
        <table:table-row table:style-name="ro1">
          <table:table-cell office:value-type="float" office:value="329.9990234375">
            <text:p>329.9990234375</text:p>
          </table:table-cell>
          <table:table-cell office:value-type="float" office:value="0.00275565">
            <text:p>0.00275565</text:p>
          </table:table-cell>
          <table:table-cell table:number-columns-repeated="4"/>
        </table:table-row>
        <table:table-row table:style-name="ro1">
          <table:table-cell office:value-type="float" office:value="330.107086181641">
            <text:p>330.1070861816</text:p>
          </table:table-cell>
          <table:table-cell office:value-type="float" office:value="0.001689764">
            <text:p>0.001689764</text:p>
          </table:table-cell>
          <table:table-cell table:number-columns-repeated="4"/>
        </table:table-row>
        <table:table-row table:style-name="ro1">
          <table:table-cell office:value-type="float" office:value="330.215148925781">
            <text:p>330.2151489258</text:p>
          </table:table-cell>
          <table:table-cell office:value-type="float" office:value="-0.007268459">
            <text:p>-0.007268459</text:p>
          </table:table-cell>
          <table:table-cell table:number-columns-repeated="4"/>
        </table:table-row>
        <table:table-row table:style-name="ro1">
          <table:table-cell office:value-type="float" office:value="330.3232421875">
            <text:p>330.3232421875</text:p>
          </table:table-cell>
          <table:table-cell office:value-type="float" office:value="0.01728653">
            <text:p>0.01728653</text:p>
          </table:table-cell>
          <table:table-cell table:number-columns-repeated="4"/>
        </table:table-row>
        <table:table-row table:style-name="ro1">
          <table:table-cell office:value-type="float" office:value="330.431335449219">
            <text:p>330.4313354492</text:p>
          </table:table-cell>
          <table:table-cell office:value-type="float" office:value="0.00916073">
            <text:p>0.00916073</text:p>
          </table:table-cell>
          <table:table-cell table:number-columns-repeated="4"/>
        </table:table-row>
        <table:table-row table:style-name="ro1">
          <table:table-cell office:value-type="float" office:value="330.539428710938">
            <text:p>330.5394287109</text:p>
          </table:table-cell>
          <table:table-cell office:value-type="float" office:value="0.009219321">
            <text:p>0.009219321</text:p>
          </table:table-cell>
          <table:table-cell table:number-columns-repeated="4"/>
        </table:table-row>
        <table:table-row table:style-name="ro1">
          <table:table-cell office:value-type="float" office:value="330.647521972656">
            <text:p>330.6475219727</text:p>
          </table:table-cell>
          <table:table-cell office:value-type="float" office:value="-0.003056032">
            <text:p>-0.003056032</text:p>
          </table:table-cell>
          <table:table-cell table:number-columns-repeated="4"/>
        </table:table-row>
        <table:table-row table:style-name="ro1">
          <table:table-cell office:value-type="float" office:value="330.755645751953">
            <text:p>330.755645752</text:p>
          </table:table-cell>
          <table:table-cell office:value-type="float" office:value="0.006368544">
            <text:p>0.006368544</text:p>
          </table:table-cell>
          <table:table-cell table:number-columns-repeated="4"/>
        </table:table-row>
        <table:table-row table:style-name="ro1">
          <table:table-cell office:value-type="float" office:value="330.86376953125">
            <text:p>330.8637695313</text:p>
          </table:table-cell>
          <table:table-cell office:value-type="float" office:value="0.01685665">
            <text:p>0.01685665</text:p>
          </table:table-cell>
          <table:table-cell table:number-columns-repeated="4"/>
        </table:table-row>
        <table:table-row table:style-name="ro1">
          <table:table-cell office:value-type="float" office:value="330.971893310547">
            <text:p>330.9718933105</text:p>
          </table:table-cell>
          <table:table-cell office:value-type="float" office:value="0.01232661">
            <text:p>0.01232661</text:p>
          </table:table-cell>
          <table:table-cell table:number-columns-repeated="4"/>
        </table:table-row>
        <table:table-row table:style-name="ro1">
          <table:table-cell office:value-type="float" office:value="331.080017089844">
            <text:p>331.0800170898</text:p>
          </table:table-cell>
          <table:table-cell office:value-type="float" office:value="0.03023081">
            <text:p>0.03023081</text:p>
          </table:table-cell>
          <table:table-cell table:number-columns-repeated="4"/>
        </table:table-row>
        <table:table-row table:style-name="ro1">
          <table:table-cell office:value-type="float" office:value="331.188171386719">
            <text:p>331.1881713867</text:p>
          </table:table-cell>
          <table:table-cell office:value-type="float" office:value="0.009500972">
            <text:p>0.009500972</text:p>
          </table:table-cell>
          <table:table-cell table:number-columns-repeated="4"/>
        </table:table-row>
        <table:table-row table:style-name="ro1">
          <table:table-cell office:value-type="float" office:value="331.296295166016">
            <text:p>331.296295166</text:p>
          </table:table-cell>
          <table:table-cell office:value-type="float" office:value="0.02021951">
            <text:p>0.02021951</text:p>
          </table:table-cell>
          <table:table-cell table:number-columns-repeated="4"/>
        </table:table-row>
        <table:table-row table:style-name="ro1">
          <table:table-cell office:value-type="float" office:value="331.404449462891">
            <text:p>331.4044494629</text:p>
          </table:table-cell>
          <table:table-cell office:value-type="float" office:value="-0.0038998">
            <text:p>-0.0038998</text:p>
          </table:table-cell>
          <table:table-cell table:number-columns-repeated="4"/>
        </table:table-row>
        <table:table-row table:style-name="ro1">
          <table:table-cell office:value-type="float" office:value="331.512603759766">
            <text:p>331.5126037598</text:p>
          </table:table-cell>
          <table:table-cell office:value-type="float" office:value="-0.004483832">
            <text:p>-0.004483832</text:p>
          </table:table-cell>
          <table:table-cell table:number-columns-repeated="4"/>
        </table:table-row>
        <table:table-row table:style-name="ro1">
          <table:table-cell office:value-type="float" office:value="331.620788574219">
            <text:p>331.6207885742</text:p>
          </table:table-cell>
          <table:table-cell office:value-type="float" office:value="0.003683876">
            <text:p>0.003683876</text:p>
          </table:table-cell>
          <table:table-cell table:number-columns-repeated="4"/>
        </table:table-row>
        <table:table-row table:style-name="ro1">
          <table:table-cell office:value-type="float" office:value="331.728942871094">
            <text:p>331.7289428711</text:p>
          </table:table-cell>
          <table:table-cell office:value-type="float" office:value="0.00935006">
            <text:p>0.00935006</text:p>
          </table:table-cell>
          <table:table-cell table:number-columns-repeated="4"/>
        </table:table-row>
        <table:table-row table:style-name="ro1">
          <table:table-cell office:value-type="float" office:value="331.837127685547">
            <text:p>331.8371276855</text:p>
          </table:table-cell>
          <table:table-cell office:value-type="float" office:value="-0.0009010628">
            <text:p>-0.0009010628</text:p>
          </table:table-cell>
          <table:table-cell table:number-columns-repeated="4"/>
        </table:table-row>
        <table:table-row table:style-name="ro1">
          <table:table-cell office:value-type="float" office:value="331.9453125">
            <text:p>331.9453125</text:p>
          </table:table-cell>
          <table:table-cell office:value-type="float" office:value="-0.003013965">
            <text:p>-0.003013965</text:p>
          </table:table-cell>
          <table:table-cell table:number-columns-repeated="4"/>
        </table:table-row>
        <table:table-row table:style-name="ro1">
          <table:table-cell office:value-type="float" office:value="332.053527832031">
            <text:p>332.053527832</text:p>
          </table:table-cell>
          <table:table-cell office:value-type="float" office:value="0.007384525">
            <text:p>0.007384525</text:p>
          </table:table-cell>
          <table:table-cell table:number-columns-repeated="4"/>
        </table:table-row>
        <table:table-row table:style-name="ro1">
          <table:table-cell office:value-type="float" office:value="332.161712646484">
            <text:p>332.1617126465</text:p>
          </table:table-cell>
          <table:table-cell office:value-type="float" office:value="-0.0002719252">
            <text:p>-0.0002719252</text:p>
          </table:table-cell>
          <table:table-cell table:number-columns-repeated="4"/>
        </table:table-row>
        <table:table-row table:style-name="ro1">
          <table:table-cell office:value-type="float" office:value="332.269927978516">
            <text:p>332.2699279785</text:p>
          </table:table-cell>
          <table:table-cell office:value-type="float" office:value="-0.009327843">
            <text:p>-0.009327843</text:p>
          </table:table-cell>
          <table:table-cell table:number-columns-repeated="4"/>
        </table:table-row>
        <table:table-row table:style-name="ro1">
          <table:table-cell office:value-type="float" office:value="332.378143310547">
            <text:p>332.3781433105</text:p>
          </table:table-cell>
          <table:table-cell office:value-type="float" office:value="-0.002946661">
            <text:p>-0.002946661</text:p>
          </table:table-cell>
          <table:table-cell table:number-columns-repeated="4"/>
        </table:table-row>
        <table:table-row table:style-name="ro1">
          <table:table-cell office:value-type="float" office:value="332.486358642578">
            <text:p>332.4863586426</text:p>
          </table:table-cell>
          <table:table-cell office:value-type="float" office:value="0.02052438">
            <text:p>0.02052438</text:p>
          </table:table-cell>
          <table:table-cell table:number-columns-repeated="4"/>
        </table:table-row>
        <table:table-row table:style-name="ro1">
          <table:table-cell office:value-type="float" office:value="332.594573974609">
            <text:p>332.5945739746</text:p>
          </table:table-cell>
          <table:table-cell office:value-type="float" office:value="0.0138881">
            <text:p>0.0138881</text:p>
          </table:table-cell>
          <table:table-cell table:number-columns-repeated="4"/>
        </table:table-row>
        <table:table-row table:style-name="ro1">
          <table:table-cell office:value-type="float" office:value="332.702819824219">
            <text:p>332.7028198242</text:p>
          </table:table-cell>
          <table:table-cell office:value-type="float" office:value="0.00435674">
            <text:p>0.00435674</text:p>
          </table:table-cell>
          <table:table-cell table:number-columns-repeated="4"/>
        </table:table-row>
        <table:table-row table:style-name="ro1">
          <table:table-cell office:value-type="float" office:value="332.811065673828">
            <text:p>332.8110656738</text:p>
          </table:table-cell>
          <table:table-cell office:value-type="float" office:value="-0.008198136">
            <text:p>-0.008198136</text:p>
          </table:table-cell>
          <table:table-cell table:number-columns-repeated="4"/>
        </table:table-row>
        <table:table-row table:style-name="ro1">
          <table:table-cell office:value-type="float" office:value="332.919311523438">
            <text:p>332.9193115234</text:p>
          </table:table-cell>
          <table:table-cell office:value-type="float" office:value="0.0008159722">
            <text:p>0.0008159722</text:p>
          </table:table-cell>
          <table:table-cell table:number-columns-repeated="4"/>
        </table:table-row>
        <table:table-row table:style-name="ro1">
          <table:table-cell office:value-type="float" office:value="333.027557373047">
            <text:p>333.027557373</text:p>
          </table:table-cell>
          <table:table-cell office:value-type="string">
            <text:p>-2.441038E-05</text:p>
          </table:table-cell>
          <table:table-cell table:number-columns-repeated="4"/>
        </table:table-row>
        <table:table-row table:style-name="ro1">
          <table:table-cell office:value-type="float" office:value="333.135833740234">
            <text:p>333.1358337402</text:p>
          </table:table-cell>
          <table:table-cell office:value-type="float" office:value="0.005314921">
            <text:p>0.005314921</text:p>
          </table:table-cell>
          <table:table-cell table:number-columns-repeated="4"/>
        </table:table-row>
        <table:table-row table:style-name="ro1">
          <table:table-cell office:value-type="float" office:value="333.244079589844">
            <text:p>333.2440795898</text:p>
          </table:table-cell>
          <table:table-cell office:value-type="float" office:value="0.05011484">
            <text:p>0.05011484</text:p>
          </table:table-cell>
          <table:table-cell table:number-columns-repeated="4"/>
        </table:table-row>
        <table:table-row table:style-name="ro1">
          <table:table-cell office:value-type="float" office:value="333.352355957031">
            <text:p>333.352355957</text:p>
          </table:table-cell>
          <table:table-cell office:value-type="float" office:value="-0.002422715">
            <text:p>-0.002422715</text:p>
          </table:table-cell>
          <table:table-cell table:number-columns-repeated="4"/>
        </table:table-row>
        <table:table-row table:style-name="ro1">
          <table:table-cell office:value-type="float" office:value="333.460662841797">
            <text:p>333.4606628418</text:p>
          </table:table-cell>
          <table:table-cell office:value-type="float" office:value="0.001210929">
            <text:p>0.001210929</text:p>
          </table:table-cell>
          <table:table-cell table:number-columns-repeated="4"/>
        </table:table-row>
        <table:table-row table:style-name="ro1">
          <table:table-cell office:value-type="float" office:value="333.568939208984">
            <text:p>333.568939209</text:p>
          </table:table-cell>
          <table:table-cell office:value-type="float" office:value="0.001770697">
            <text:p>0.001770697</text:p>
          </table:table-cell>
          <table:table-cell table:number-columns-repeated="4"/>
        </table:table-row>
        <table:table-row table:style-name="ro1">
          <table:table-cell office:value-type="float" office:value="333.67724609375">
            <text:p>333.6772460938</text:p>
          </table:table-cell>
          <table:table-cell office:value-type="float" office:value="-0.007321039">
            <text:p>-0.007321039</text:p>
          </table:table-cell>
          <table:table-cell table:number-columns-repeated="4"/>
        </table:table-row>
        <table:table-row table:style-name="ro1">
          <table:table-cell office:value-type="float" office:value="333.785552978516">
            <text:p>333.7855529785</text:p>
          </table:table-cell>
          <table:table-cell office:value-type="float" office:value="0.008788014">
            <text:p>0.008788014</text:p>
          </table:table-cell>
          <table:table-cell table:number-columns-repeated="4"/>
        </table:table-row>
        <table:table-row table:style-name="ro1">
          <table:table-cell office:value-type="float" office:value="333.893859863281">
            <text:p>333.8938598633</text:p>
          </table:table-cell>
          <table:table-cell office:value-type="float" office:value="0.003330369">
            <text:p>0.003330369</text:p>
          </table:table-cell>
          <table:table-cell table:number-columns-repeated="4"/>
        </table:table-row>
        <table:table-row table:style-name="ro1">
          <table:table-cell office:value-type="float" office:value="334.002166748047">
            <text:p>334.002166748</text:p>
          </table:table-cell>
          <table:table-cell office:value-type="float" office:value="-0.01149153">
            <text:p>-0.01149153</text:p>
          </table:table-cell>
          <table:table-cell table:number-columns-repeated="4"/>
        </table:table-row>
        <table:table-row table:style-name="ro1">
          <table:table-cell office:value-type="float" office:value="334.110473632813">
            <text:p>334.1104736328</text:p>
          </table:table-cell>
          <table:table-cell office:value-type="float" office:value="0.001169592">
            <text:p>0.001169592</text:p>
          </table:table-cell>
          <table:table-cell table:number-columns-repeated="4"/>
        </table:table-row>
        <table:table-row table:style-name="ro1">
          <table:table-cell office:value-type="float" office:value="334.218811035156">
            <text:p>334.2188110352</text:p>
          </table:table-cell>
          <table:table-cell office:value-type="float" office:value="0.004765469">
            <text:p>0.004765469</text:p>
          </table:table-cell>
          <table:table-cell table:number-columns-repeated="4"/>
        </table:table-row>
        <table:table-row table:style-name="ro1">
          <table:table-cell office:value-type="float" office:value="334.3271484375">
            <text:p>334.3271484375</text:p>
          </table:table-cell>
          <table:table-cell office:value-type="float" office:value="-0.0006322923">
            <text:p>-0.0006322923</text:p>
          </table:table-cell>
          <table:table-cell table:number-columns-repeated="4"/>
        </table:table-row>
        <table:table-row table:style-name="ro1">
          <table:table-cell office:value-type="float" office:value="334.435485839844">
            <text:p>334.4354858398</text:p>
          </table:table-cell>
          <table:table-cell office:value-type="float" office:value="0.0008433579">
            <text:p>0.0008433579</text:p>
          </table:table-cell>
          <table:table-cell table:number-columns-repeated="4"/>
        </table:table-row>
        <table:table-row table:style-name="ro1">
          <table:table-cell office:value-type="float" office:value="334.543853759766">
            <text:p>334.5438537598</text:p>
          </table:table-cell>
          <table:table-cell office:value-type="float" office:value="-0.00545069">
            <text:p>-0.00545069</text:p>
          </table:table-cell>
          <table:table-cell table:number-columns-repeated="4"/>
        </table:table-row>
        <table:table-row table:style-name="ro1">
          <table:table-cell office:value-type="float" office:value="334.652191162109">
            <text:p>334.6521911621</text:p>
          </table:table-cell>
          <table:table-cell office:value-type="float" office:value="0.0169998">
            <text:p>0.0169998</text:p>
          </table:table-cell>
          <table:table-cell table:number-columns-repeated="4"/>
        </table:table-row>
        <table:table-row table:style-name="ro1">
          <table:table-cell office:value-type="float" office:value="334.760559082031">
            <text:p>334.760559082</text:p>
          </table:table-cell>
          <table:table-cell office:value-type="float" office:value="-0.0001867768">
            <text:p>-0.0001867768</text:p>
          </table:table-cell>
          <table:table-cell table:number-columns-repeated="4"/>
        </table:table-row>
        <table:table-row table:style-name="ro1">
          <table:table-cell office:value-type="float" office:value="334.868927001953">
            <text:p>334.868927002</text:p>
          </table:table-cell>
          <table:table-cell office:value-type="float" office:value="0.009133531">
            <text:p>0.009133531</text:p>
          </table:table-cell>
          <table:table-cell table:number-columns-repeated="4"/>
        </table:table-row>
        <table:table-row table:style-name="ro1">
          <table:table-cell office:value-type="float" office:value="334.977325439453">
            <text:p>334.9773254395</text:p>
          </table:table-cell>
          <table:table-cell office:value-type="float" office:value="0.007620829">
            <text:p>0.007620829</text:p>
          </table:table-cell>
          <table:table-cell table:number-columns-repeated="4"/>
        </table:table-row>
        <table:table-row table:style-name="ro1">
          <table:table-cell office:value-type="float" office:value="335.085693359375">
            <text:p>335.0856933594</text:p>
          </table:table-cell>
          <table:table-cell office:value-type="float" office:value="0.009323714">
            <text:p>0.009323714</text:p>
          </table:table-cell>
          <table:table-cell table:number-columns-repeated="4"/>
        </table:table-row>
        <table:table-row table:style-name="ro1">
          <table:table-cell office:value-type="float" office:value="335.194091796875">
            <text:p>335.1940917969</text:p>
          </table:table-cell>
          <table:table-cell office:value-type="float" office:value="0.0002919112">
            <text:p>0.0002919112</text:p>
          </table:table-cell>
          <table:table-cell table:number-columns-repeated="4"/>
        </table:table-row>
        <table:table-row table:style-name="ro1">
          <table:table-cell office:value-type="float" office:value="335.302490234375">
            <text:p>335.3024902344</text:p>
          </table:table-cell>
          <table:table-cell office:value-type="float" office:value="0.007360746">
            <text:p>0.007360746</text:p>
          </table:table-cell>
          <table:table-cell table:number-columns-repeated="4"/>
        </table:table-row>
        <table:table-row table:style-name="ro1">
          <table:table-cell office:value-type="float" office:value="335.410888671875">
            <text:p>335.4108886719</text:p>
          </table:table-cell>
          <table:table-cell office:value-type="float" office:value="0.007250173">
            <text:p>0.007250173</text:p>
          </table:table-cell>
          <table:table-cell table:number-columns-repeated="4"/>
        </table:table-row>
        <table:table-row table:style-name="ro1">
          <table:table-cell office:value-type="float" office:value="335.519287109375">
            <text:p>335.5192871094</text:p>
          </table:table-cell>
          <table:table-cell office:value-type="float" office:value="0.03136897">
            <text:p>0.03136897</text:p>
          </table:table-cell>
          <table:table-cell table:number-columns-repeated="4"/>
        </table:table-row>
        <table:table-row table:style-name="ro1">
          <table:table-cell office:value-type="float" office:value="335.627716064453">
            <text:p>335.6277160645</text:p>
          </table:table-cell>
          <table:table-cell office:value-type="float" office:value="0.00981797">
            <text:p>0.00981797</text:p>
          </table:table-cell>
          <table:table-cell table:number-columns-repeated="4"/>
        </table:table-row>
        <table:table-row table:style-name="ro1">
          <table:table-cell office:value-type="float" office:value="335.736145019531">
            <text:p>335.7361450195</text:p>
          </table:table-cell>
          <table:table-cell office:value-type="float" office:value="0.007104755">
            <text:p>0.007104755</text:p>
          </table:table-cell>
          <table:table-cell table:number-columns-repeated="4"/>
        </table:table-row>
        <table:table-row table:style-name="ro1">
          <table:table-cell office:value-type="float" office:value="335.844573974609">
            <text:p>335.8445739746</text:p>
          </table:table-cell>
          <table:table-cell office:value-type="float" office:value="-0.001146849">
            <text:p>-0.001146849</text:p>
          </table:table-cell>
          <table:table-cell table:number-columns-repeated="4"/>
        </table:table-row>
        <table:table-row table:style-name="ro1">
          <table:table-cell office:value-type="float" office:value="335.953002929688">
            <text:p>335.9530029297</text:p>
          </table:table-cell>
          <table:table-cell office:value-type="float" office:value="0.01056444">
            <text:p>0.01056444</text:p>
          </table:table-cell>
          <table:table-cell table:number-columns-repeated="4"/>
        </table:table-row>
        <table:table-row table:style-name="ro1">
          <table:table-cell office:value-type="float" office:value="336.061462402344">
            <text:p>336.0614624023</text:p>
          </table:table-cell>
          <table:table-cell office:value-type="float" office:value="0.02203013">
            <text:p>0.02203013</text:p>
          </table:table-cell>
          <table:table-cell table:number-columns-repeated="4"/>
        </table:table-row>
        <table:table-row table:style-name="ro1">
          <table:table-cell office:value-type="float" office:value="336.169891357422">
            <text:p>336.1698913574</text:p>
          </table:table-cell>
          <table:table-cell office:value-type="float" office:value="-0.005822995">
            <text:p>-0.005822995</text:p>
          </table:table-cell>
          <table:table-cell table:number-columns-repeated="4"/>
        </table:table-row>
        <table:table-row table:style-name="ro1">
          <table:table-cell office:value-type="float" office:value="336.278350830078">
            <text:p>336.2783508301</text:p>
          </table:table-cell>
          <table:table-cell office:value-type="float" office:value="0.002972414">
            <text:p>0.002972414</text:p>
          </table:table-cell>
          <table:table-cell table:number-columns-repeated="4"/>
        </table:table-row>
        <table:table-row table:style-name="ro1">
          <table:table-cell office:value-type="float" office:value="336.386840820313">
            <text:p>336.3868408203</text:p>
          </table:table-cell>
          <table:table-cell office:value-type="float" office:value="0.01908881">
            <text:p>0.01908881</text:p>
          </table:table-cell>
          <table:table-cell table:number-columns-repeated="4"/>
        </table:table-row>
        <table:table-row table:style-name="ro1">
          <table:table-cell office:value-type="float" office:value="336.495300292969">
            <text:p>336.495300293</text:p>
          </table:table-cell>
          <table:table-cell office:value-type="float" office:value="0.004178282">
            <text:p>0.004178282</text:p>
          </table:table-cell>
          <table:table-cell table:number-columns-repeated="4"/>
        </table:table-row>
        <table:table-row table:style-name="ro1">
          <table:table-cell office:value-type="float" office:value="336.603790283203">
            <text:p>336.6037902832</text:p>
          </table:table-cell>
          <table:table-cell office:value-type="float" office:value="-0.004780014">
            <text:p>-0.004780014</text:p>
          </table:table-cell>
          <table:table-cell table:number-columns-repeated="4"/>
        </table:table-row>
        <table:table-row table:style-name="ro1">
          <table:table-cell office:value-type="float" office:value="336.712249755859">
            <text:p>336.7122497559</text:p>
          </table:table-cell>
          <table:table-cell office:value-type="float" office:value="-0.002588507">
            <text:p>-0.002588507</text:p>
          </table:table-cell>
          <table:table-cell table:number-columns-repeated="4"/>
        </table:table-row>
        <table:table-row table:style-name="ro1">
          <table:table-cell office:value-type="float" office:value="336.820770263672">
            <text:p>336.8207702637</text:p>
          </table:table-cell>
          <table:table-cell office:value-type="float" office:value="-0.000776583">
            <text:p>-0.000776583</text:p>
          </table:table-cell>
          <table:table-cell table:number-columns-repeated="4"/>
        </table:table-row>
        <table:table-row table:style-name="ro1">
          <table:table-cell office:value-type="float" office:value="336.929260253906">
            <text:p>336.9292602539</text:p>
          </table:table-cell>
          <table:table-cell office:value-type="float" office:value="0.00202536">
            <text:p>0.00202536</text:p>
          </table:table-cell>
          <table:table-cell table:number-columns-repeated="4"/>
        </table:table-row>
        <table:table-row table:style-name="ro1">
          <table:table-cell office:value-type="float" office:value="337.037750244141">
            <text:p>337.0377502441</text:p>
          </table:table-cell>
          <table:table-cell office:value-type="float" office:value="-0.006903297">
            <text:p>-0.006903297</text:p>
          </table:table-cell>
          <table:table-cell table:number-columns-repeated="4"/>
        </table:table-row>
        <table:table-row table:style-name="ro1">
          <table:table-cell office:value-type="float" office:value="337.146270751953">
            <text:p>337.146270752</text:p>
          </table:table-cell>
          <table:table-cell office:value-type="float" office:value="-0.009142403">
            <text:p>-0.009142403</text:p>
          </table:table-cell>
          <table:table-cell table:number-columns-repeated="4"/>
        </table:table-row>
        <table:table-row table:style-name="ro1">
          <table:table-cell office:value-type="float" office:value="337.254791259766">
            <text:p>337.2547912598</text:p>
          </table:table-cell>
          <table:table-cell office:value-type="float" office:value="0.02570326">
            <text:p>0.02570326</text:p>
          </table:table-cell>
          <table:table-cell table:number-columns-repeated="4"/>
        </table:table-row>
        <table:table-row table:style-name="ro1">
          <table:table-cell office:value-type="float" office:value="337.363311767578">
            <text:p>337.3633117676</text:p>
          </table:table-cell>
          <table:table-cell office:value-type="float" office:value="0.0008240984">
            <text:p>0.0008240984</text:p>
          </table:table-cell>
          <table:table-cell table:number-columns-repeated="4"/>
        </table:table-row>
        <table:table-row table:style-name="ro1">
          <table:table-cell office:value-type="float" office:value="337.471862792969">
            <text:p>337.471862793</text:p>
          </table:table-cell>
          <table:table-cell office:value-type="float" office:value="0.003501966">
            <text:p>0.003501966</text:p>
          </table:table-cell>
          <table:table-cell table:number-columns-repeated="4"/>
        </table:table-row>
        <table:table-row table:style-name="ro1">
          <table:table-cell office:value-type="float" office:value="337.580383300781">
            <text:p>337.5803833008</text:p>
          </table:table-cell>
          <table:table-cell office:value-type="float" office:value="-0.003259953">
            <text:p>-0.003259953</text:p>
          </table:table-cell>
          <table:table-cell table:number-columns-repeated="4"/>
        </table:table-row>
        <table:table-row table:style-name="ro1">
          <table:table-cell office:value-type="float" office:value="337.688934326172">
            <text:p>337.6889343262</text:p>
          </table:table-cell>
          <table:table-cell office:value-type="float" office:value="-0.001635226">
            <text:p>-0.001635226</text:p>
          </table:table-cell>
          <table:table-cell table:number-columns-repeated="4"/>
        </table:table-row>
        <table:table-row table:style-name="ro1">
          <table:table-cell office:value-type="float" office:value="337.797485351563">
            <text:p>337.7974853516</text:p>
          </table:table-cell>
          <table:table-cell office:value-type="float" office:value="-0.003906505">
            <text:p>-0.003906505</text:p>
          </table:table-cell>
          <table:table-cell table:number-columns-repeated="4"/>
        </table:table-row>
        <table:table-row table:style-name="ro1">
          <table:table-cell office:value-type="float" office:value="337.906036376953">
            <text:p>337.906036377</text:p>
          </table:table-cell>
          <table:table-cell office:value-type="float" office:value="-0.003282076">
            <text:p>-0.003282076</text:p>
          </table:table-cell>
          <table:table-cell table:number-columns-repeated="4"/>
        </table:table-row>
        <table:table-row table:style-name="ro1">
          <table:table-cell office:value-type="float" office:value="338.014617919922">
            <text:p>338.0146179199</text:p>
          </table:table-cell>
          <table:table-cell office:value-type="float" office:value="-0.002604684">
            <text:p>-0.002604684</text:p>
          </table:table-cell>
          <table:table-cell table:number-columns-repeated="4"/>
        </table:table-row>
        <table:table-row table:style-name="ro1">
          <table:table-cell office:value-type="float" office:value="338.123168945313">
            <text:p>338.1231689453</text:p>
          </table:table-cell>
          <table:table-cell office:value-type="float" office:value="0.01313602">
            <text:p>0.01313602</text:p>
          </table:table-cell>
          <table:table-cell table:number-columns-repeated="4"/>
        </table:table-row>
        <table:table-row table:style-name="ro1">
          <table:table-cell office:value-type="float" office:value="338.231750488281">
            <text:p>338.2317504883</text:p>
          </table:table-cell>
          <table:table-cell office:value-type="float" office:value="0.01152978">
            <text:p>0.01152978</text:p>
          </table:table-cell>
          <table:table-cell table:number-columns-repeated="4"/>
        </table:table-row>
        <table:table-row table:style-name="ro1">
          <table:table-cell office:value-type="float" office:value="338.340362548828">
            <text:p>338.3403625488</text:p>
          </table:table-cell>
          <table:table-cell office:value-type="float" office:value="-0.002399744">
            <text:p>-0.002399744</text:p>
          </table:table-cell>
          <table:table-cell table:number-columns-repeated="4"/>
        </table:table-row>
        <table:table-row table:style-name="ro1">
          <table:table-cell office:value-type="float" office:value="338.448944091797">
            <text:p>338.4489440918</text:p>
          </table:table-cell>
          <table:table-cell office:value-type="float" office:value="0.02681981">
            <text:p>0.02681981</text:p>
          </table:table-cell>
          <table:table-cell table:number-columns-repeated="4"/>
        </table:table-row>
        <table:table-row table:style-name="ro1">
          <table:table-cell office:value-type="float" office:value="338.557525634766">
            <text:p>338.5575256348</text:p>
          </table:table-cell>
          <table:table-cell office:value-type="float" office:value="0.005946919">
            <text:p>0.005946919</text:p>
          </table:table-cell>
          <table:table-cell table:number-columns-repeated="4"/>
        </table:table-row>
        <table:table-row table:style-name="ro1">
          <table:table-cell office:value-type="float" office:value="338.666137695313">
            <text:p>338.6661376953</text:p>
          </table:table-cell>
          <table:table-cell office:value-type="float" office:value="0.01244501">
            <text:p>0.01244501</text:p>
          </table:table-cell>
          <table:table-cell table:number-columns-repeated="4"/>
        </table:table-row>
        <table:table-row table:style-name="ro1">
          <table:table-cell office:value-type="float" office:value="338.774749755859">
            <text:p>338.7747497559</text:p>
          </table:table-cell>
          <table:table-cell office:value-type="float" office:value="-0.00420818">
            <text:p>-0.00420818</text:p>
          </table:table-cell>
          <table:table-cell table:number-columns-repeated="4"/>
        </table:table-row>
        <table:table-row table:style-name="ro1">
          <table:table-cell office:value-type="float" office:value="338.883392333984">
            <text:p>338.883392334</text:p>
          </table:table-cell>
          <table:table-cell office:value-type="float" office:value="-0.002725706">
            <text:p>-0.002725706</text:p>
          </table:table-cell>
          <table:table-cell table:number-columns-repeated="4"/>
        </table:table-row>
        <table:table-row table:style-name="ro1">
          <table:table-cell office:value-type="float" office:value="338.992004394531">
            <text:p>338.9920043945</text:p>
          </table:table-cell>
          <table:table-cell office:value-type="float" office:value="0.003713368">
            <text:p>0.003713368</text:p>
          </table:table-cell>
          <table:table-cell table:number-columns-repeated="4"/>
        </table:table-row>
        <table:table-row table:style-name="ro1">
          <table:table-cell office:value-type="float" office:value="339.100646972656">
            <text:p>339.1006469727</text:p>
          </table:table-cell>
          <table:table-cell office:value-type="float" office:value="0.009654918">
            <text:p>0.009654918</text:p>
          </table:table-cell>
          <table:table-cell table:number-columns-repeated="4"/>
        </table:table-row>
        <table:table-row table:style-name="ro1">
          <table:table-cell office:value-type="float" office:value="339.209289550781">
            <text:p>339.2092895508</text:p>
          </table:table-cell>
          <table:table-cell office:value-type="float" office:value="-0.004962437">
            <text:p>-0.004962437</text:p>
          </table:table-cell>
          <table:table-cell table:number-columns-repeated="4"/>
        </table:table-row>
        <table:table-row table:style-name="ro1">
          <table:table-cell office:value-type="float" office:value="339.317932128906">
            <text:p>339.3179321289</text:p>
          </table:table-cell>
          <table:table-cell office:value-type="float" office:value="0.01025955">
            <text:p>0.01025955</text:p>
          </table:table-cell>
          <table:table-cell table:number-columns-repeated="4"/>
        </table:table-row>
        <table:table-row table:style-name="ro1">
          <table:table-cell office:value-type="float" office:value="339.426574707031">
            <text:p>339.426574707</text:p>
          </table:table-cell>
          <table:table-cell office:value-type="float" office:value="0.00235228">
            <text:p>0.00235228</text:p>
          </table:table-cell>
          <table:table-cell table:number-columns-repeated="4"/>
        </table:table-row>
        <table:table-row table:style-name="ro1">
          <table:table-cell office:value-type="float" office:value="339.535247802734">
            <text:p>339.5352478027</text:p>
          </table:table-cell>
          <table:table-cell office:value-type="float" office:value="0.0107119">
            <text:p>0.0107119</text:p>
          </table:table-cell>
          <table:table-cell table:number-columns-repeated="4"/>
        </table:table-row>
        <table:table-row table:style-name="ro1">
          <table:table-cell office:value-type="float" office:value="339.643890380859">
            <text:p>339.6438903809</text:p>
          </table:table-cell>
          <table:table-cell office:value-type="float" office:value="0.003090548">
            <text:p>0.003090548</text:p>
          </table:table-cell>
          <table:table-cell table:number-columns-repeated="4"/>
        </table:table-row>
        <table:table-row table:style-name="ro1">
          <table:table-cell office:value-type="float" office:value="339.752563476563">
            <text:p>339.7525634766</text:p>
          </table:table-cell>
          <table:table-cell office:value-type="float" office:value="0.003546316">
            <text:p>0.003546316</text:p>
          </table:table-cell>
          <table:table-cell table:number-columns-repeated="4"/>
        </table:table-row>
        <table:table-row table:style-name="ro1">
          <table:table-cell office:value-type="float" office:value="339.861267089844">
            <text:p>339.8612670898</text:p>
          </table:table-cell>
          <table:table-cell office:value-type="string">
            <text:p>-6.126001E-05</text:p>
          </table:table-cell>
          <table:table-cell table:number-columns-repeated="4"/>
        </table:table-row>
        <table:table-row table:style-name="ro1">
          <table:table-cell office:value-type="float" office:value="339.969940185547">
            <text:p>339.9699401855</text:p>
          </table:table-cell>
          <table:table-cell office:value-type="float" office:value="0.01767801">
            <text:p>0.01767801</text:p>
          </table:table-cell>
          <table:table-cell table:number-columns-repeated="4"/>
        </table:table-row>
        <table:table-row table:style-name="ro1">
          <table:table-cell office:value-type="float" office:value="340.078643798828">
            <text:p>340.0786437988</text:p>
          </table:table-cell>
          <table:table-cell office:value-type="float" office:value="0.002193148">
            <text:p>0.002193148</text:p>
          </table:table-cell>
          <table:table-cell table:number-columns-repeated="4"/>
        </table:table-row>
        <table:table-row table:style-name="ro1">
          <table:table-cell office:value-type="float" office:value="340.187347412109">
            <text:p>340.1873474121</text:p>
          </table:table-cell>
          <table:table-cell office:value-type="float" office:value="0.01893912">
            <text:p>0.01893912</text:p>
          </table:table-cell>
          <table:table-cell table:number-columns-repeated="4"/>
        </table:table-row>
        <table:table-row table:style-name="ro1">
          <table:table-cell office:value-type="float" office:value="340.296051025391">
            <text:p>340.2960510254</text:p>
          </table:table-cell>
          <table:table-cell office:value-type="float" office:value="0.006321493">
            <text:p>0.006321493</text:p>
          </table:table-cell>
          <table:table-cell table:number-columns-repeated="4"/>
        </table:table-row>
        <table:table-row table:style-name="ro1">
          <table:table-cell office:value-type="float" office:value="340.404754638672">
            <text:p>340.4047546387</text:p>
          </table:table-cell>
          <table:table-cell office:value-type="float" office:value="0.009135314">
            <text:p>0.009135314</text:p>
          </table:table-cell>
          <table:table-cell table:number-columns-repeated="4"/>
        </table:table-row>
        <table:table-row table:style-name="ro1">
          <table:table-cell office:value-type="float" office:value="340.513488769531">
            <text:p>340.5134887695</text:p>
          </table:table-cell>
          <table:table-cell office:value-type="float" office:value="-0.008378968">
            <text:p>-0.008378968</text:p>
          </table:table-cell>
          <table:table-cell table:number-columns-repeated="4"/>
        </table:table-row>
        <table:table-row table:style-name="ro1">
          <table:table-cell office:value-type="float" office:value="340.622192382813">
            <text:p>340.6221923828</text:p>
          </table:table-cell>
          <table:table-cell office:value-type="float" office:value="0.01916627">
            <text:p>0.01916627</text:p>
          </table:table-cell>
          <table:table-cell table:number-columns-repeated="4"/>
        </table:table-row>
        <table:table-row table:style-name="ro1">
          <table:table-cell office:value-type="float" office:value="340.730926513672">
            <text:p>340.7309265137</text:p>
          </table:table-cell>
          <table:table-cell office:value-type="float" office:value="0.016979">
            <text:p>0.016979</text:p>
          </table:table-cell>
          <table:table-cell table:number-columns-repeated="4"/>
        </table:table-row>
        <table:table-row table:style-name="ro1">
          <table:table-cell office:value-type="float" office:value="340.839660644531">
            <text:p>340.8396606445</text:p>
          </table:table-cell>
          <table:table-cell office:value-type="float" office:value="0.01590648">
            <text:p>0.01590648</text:p>
          </table:table-cell>
          <table:table-cell table:number-columns-repeated="4"/>
        </table:table-row>
        <table:table-row table:style-name="ro1">
          <table:table-cell office:value-type="float" office:value="340.948425292969">
            <text:p>340.948425293</text:p>
          </table:table-cell>
          <table:table-cell office:value-type="float" office:value="-0.004307983">
            <text:p>-0.004307983</text:p>
          </table:table-cell>
          <table:table-cell table:number-columns-repeated="4"/>
        </table:table-row>
        <table:table-row table:style-name="ro1">
          <table:table-cell office:value-type="float" office:value="341.057159423828">
            <text:p>341.0571594238</text:p>
          </table:table-cell>
          <table:table-cell office:value-type="float" office:value="-0.0003073168">
            <text:p>-0.0003073168</text:p>
          </table:table-cell>
          <table:table-cell table:number-columns-repeated="4"/>
        </table:table-row>
        <table:table-row table:style-name="ro1">
          <table:table-cell office:value-type="float" office:value="341.165924072266">
            <text:p>341.1659240723</text:p>
          </table:table-cell>
          <table:table-cell office:value-type="float" office:value="-0.002343707">
            <text:p>-0.002343707</text:p>
          </table:table-cell>
          <table:table-cell table:number-columns-repeated="4"/>
        </table:table-row>
        <table:table-row table:style-name="ro1">
          <table:table-cell office:value-type="float" office:value="341.274688720703">
            <text:p>341.2746887207</text:p>
          </table:table-cell>
          <table:table-cell office:value-type="float" office:value="-0.003488448">
            <text:p>-0.003488448</text:p>
          </table:table-cell>
          <table:table-cell table:number-columns-repeated="4"/>
        </table:table-row>
        <table:table-row table:style-name="ro1">
          <table:table-cell office:value-type="float" office:value="341.383483886719">
            <text:p>341.3834838867</text:p>
          </table:table-cell>
          <table:table-cell office:value-type="float" office:value="0.01662268">
            <text:p>0.01662268</text:p>
          </table:table-cell>
          <table:table-cell table:number-columns-repeated="4"/>
        </table:table-row>
        <table:table-row table:style-name="ro1">
          <table:table-cell office:value-type="float" office:value="341.492248535156">
            <text:p>341.4922485352</text:p>
          </table:table-cell>
          <table:table-cell office:value-type="float" office:value="0.004856588">
            <text:p>0.004856588</text:p>
          </table:table-cell>
          <table:table-cell table:number-columns-repeated="4"/>
        </table:table-row>
        <table:table-row table:style-name="ro1">
          <table:table-cell office:value-type="float" office:value="341.601043701172">
            <text:p>341.6010437012</text:p>
          </table:table-cell>
          <table:table-cell office:value-type="float" office:value="0.02397807">
            <text:p>0.02397807</text:p>
          </table:table-cell>
          <table:table-cell table:number-columns-repeated="4"/>
        </table:table-row>
        <table:table-row table:style-name="ro1">
          <table:table-cell office:value-type="float" office:value="341.709838867188">
            <text:p>341.7098388672</text:p>
          </table:table-cell>
          <table:table-cell office:value-type="float" office:value="0.02090504">
            <text:p>0.02090504</text:p>
          </table:table-cell>
          <table:table-cell table:number-columns-repeated="4"/>
        </table:table-row>
        <table:table-row table:style-name="ro1">
          <table:table-cell office:value-type="float" office:value="341.818634033203">
            <text:p>341.8186340332</text:p>
          </table:table-cell>
          <table:table-cell office:value-type="float" office:value="0.01519674">
            <text:p>0.01519674</text:p>
          </table:table-cell>
          <table:table-cell table:number-columns-repeated="4"/>
        </table:table-row>
        <table:table-row table:style-name="ro1">
          <table:table-cell office:value-type="float" office:value="341.927429199219">
            <text:p>341.9274291992</text:p>
          </table:table-cell>
          <table:table-cell office:value-type="float" office:value="-0.001961926">
            <text:p>-0.001961926</text:p>
          </table:table-cell>
          <table:table-cell table:number-columns-repeated="4"/>
        </table:table-row>
        <table:table-row table:style-name="ro1">
          <table:table-cell office:value-type="float" office:value="342.036254882813">
            <text:p>342.0362548828</text:p>
          </table:table-cell>
          <table:table-cell office:value-type="float" office:value="-0.002851514">
            <text:p>-0.002851514</text:p>
          </table:table-cell>
          <table:table-cell table:number-columns-repeated="4"/>
        </table:table-row>
        <table:table-row table:style-name="ro1">
          <table:table-cell office:value-type="float" office:value="342.145080566406">
            <text:p>342.1450805664</text:p>
          </table:table-cell>
          <table:table-cell office:value-type="float" office:value="0.0006181262">
            <text:p>0.0006181262</text:p>
          </table:table-cell>
          <table:table-cell table:number-columns-repeated="4"/>
        </table:table-row>
        <table:table-row table:style-name="ro1">
          <table:table-cell office:value-type="float" office:value="342.25390625">
            <text:p>342.25390625</text:p>
          </table:table-cell>
          <table:table-cell office:value-type="float" office:value="0.01086501">
            <text:p>0.01086501</text:p>
          </table:table-cell>
          <table:table-cell table:number-columns-repeated="4"/>
        </table:table-row>
        <table:table-row table:style-name="ro1">
          <table:table-cell office:value-type="float" office:value="342.362731933594">
            <text:p>342.3627319336</text:p>
          </table:table-cell>
          <table:table-cell office:value-type="float" office:value="0.004912429">
            <text:p>0.004912429</text:p>
          </table:table-cell>
          <table:table-cell table:number-columns-repeated="4"/>
        </table:table-row>
        <table:table-row table:style-name="ro1">
          <table:table-cell office:value-type="float" office:value="342.471557617188">
            <text:p>342.4715576172</text:p>
          </table:table-cell>
          <table:table-cell office:value-type="float" office:value="-0.0002965055">
            <text:p>-0.0002965055</text:p>
          </table:table-cell>
          <table:table-cell table:number-columns-repeated="4"/>
        </table:table-row>
        <table:table-row table:style-name="ro1">
          <table:table-cell office:value-type="float" office:value="342.580413818359">
            <text:p>342.5804138184</text:p>
          </table:table-cell>
          <table:table-cell office:value-type="float" office:value="0.01179403">
            <text:p>0.01179403</text:p>
          </table:table-cell>
          <table:table-cell table:number-columns-repeated="4"/>
        </table:table-row>
        <table:table-row table:style-name="ro1">
          <table:table-cell office:value-type="float" office:value="342.689270019531">
            <text:p>342.6892700195</text:p>
          </table:table-cell>
          <table:table-cell office:value-type="float" office:value="-0.004514199">
            <text:p>-0.004514199</text:p>
          </table:table-cell>
          <table:table-cell table:number-columns-repeated="4"/>
        </table:table-row>
        <table:table-row table:style-name="ro1">
          <table:table-cell office:value-type="float" office:value="342.798126220703">
            <text:p>342.7981262207</text:p>
          </table:table-cell>
          <table:table-cell office:value-type="float" office:value="0.008429361">
            <text:p>0.008429361</text:p>
          </table:table-cell>
          <table:table-cell table:number-columns-repeated="4"/>
        </table:table-row>
        <table:table-row table:style-name="ro1">
          <table:table-cell office:value-type="float" office:value="342.906982421875">
            <text:p>342.9069824219</text:p>
          </table:table-cell>
          <table:table-cell office:value-type="float" office:value="0.01654417">
            <text:p>0.01654417</text:p>
          </table:table-cell>
          <table:table-cell table:number-columns-repeated="4"/>
        </table:table-row>
        <table:table-row table:style-name="ro1">
          <table:table-cell office:value-type="float" office:value="343.015869140625">
            <text:p>343.0158691406</text:p>
          </table:table-cell>
          <table:table-cell office:value-type="float" office:value="0.01336043">
            <text:p>0.01336043</text:p>
          </table:table-cell>
          <table:table-cell table:number-columns-repeated="4"/>
        </table:table-row>
        <table:table-row table:style-name="ro1">
          <table:table-cell office:value-type="float" office:value="343.124755859375">
            <text:p>343.1247558594</text:p>
          </table:table-cell>
          <table:table-cell office:value-type="float" office:value="-0.002844066">
            <text:p>-0.002844066</text:p>
          </table:table-cell>
          <table:table-cell table:number-columns-repeated="4"/>
        </table:table-row>
        <table:table-row table:style-name="ro1">
          <table:table-cell office:value-type="float" office:value="343.233642578125">
            <text:p>343.2336425781</text:p>
          </table:table-cell>
          <table:table-cell office:value-type="float" office:value="-0.007689068">
            <text:p>-0.007689068</text:p>
          </table:table-cell>
          <table:table-cell table:number-columns-repeated="4"/>
        </table:table-row>
        <table:table-row table:style-name="ro1">
          <table:table-cell office:value-type="float" office:value="343.342529296875">
            <text:p>343.3425292969</text:p>
          </table:table-cell>
          <table:table-cell office:value-type="float" office:value="0.009578574">
            <text:p>0.009578574</text:p>
          </table:table-cell>
          <table:table-cell table:number-columns-repeated="4"/>
        </table:table-row>
        <table:table-row table:style-name="ro1">
          <table:table-cell office:value-type="float" office:value="343.451416015625">
            <text:p>343.4514160156</text:p>
          </table:table-cell>
          <table:table-cell office:value-type="float" office:value="0.001218894">
            <text:p>0.001218894</text:p>
          </table:table-cell>
          <table:table-cell table:number-columns-repeated="4"/>
        </table:table-row>
        <table:table-row table:style-name="ro1">
          <table:table-cell office:value-type="float" office:value="343.560333251953">
            <text:p>343.560333252</text:p>
          </table:table-cell>
          <table:table-cell office:value-type="float" office:value="-0.00289254">
            <text:p>-0.00289254</text:p>
          </table:table-cell>
          <table:table-cell table:number-columns-repeated="4"/>
        </table:table-row>
        <table:table-row table:style-name="ro1">
          <table:table-cell office:value-type="float" office:value="343.669250488281">
            <text:p>343.6692504883</text:p>
          </table:table-cell>
          <table:table-cell office:value-type="float" office:value="-0.004529978">
            <text:p>-0.004529978</text:p>
          </table:table-cell>
          <table:table-cell table:number-columns-repeated="4"/>
        </table:table-row>
        <table:table-row table:style-name="ro1">
          <table:table-cell office:value-type="float" office:value="343.778167724609">
            <text:p>343.7781677246</text:p>
          </table:table-cell>
          <table:table-cell office:value-type="float" office:value="0.001082073">
            <text:p>0.001082073</text:p>
          </table:table-cell>
          <table:table-cell table:number-columns-repeated="4"/>
        </table:table-row>
        <table:table-row table:style-name="ro1">
          <table:table-cell office:value-type="float" office:value="343.887084960938">
            <text:p>343.8870849609</text:p>
          </table:table-cell>
          <table:table-cell office:value-type="float" office:value="0.004076856">
            <text:p>0.004076856</text:p>
          </table:table-cell>
          <table:table-cell table:number-columns-repeated="4"/>
        </table:table-row>
        <table:table-row table:style-name="ro1">
          <table:table-cell office:value-type="float" office:value="343.996032714844">
            <text:p>343.9960327148</text:p>
          </table:table-cell>
          <table:table-cell office:value-type="float" office:value="-0.008474383">
            <text:p>-0.008474383</text:p>
          </table:table-cell>
          <table:table-cell table:number-columns-repeated="4"/>
        </table:table-row>
        <table:table-row table:style-name="ro1">
          <table:table-cell office:value-type="float" office:value="344.104949951172">
            <text:p>344.1049499512</text:p>
          </table:table-cell>
          <table:table-cell office:value-type="float" office:value="0.01065174">
            <text:p>0.01065174</text:p>
          </table:table-cell>
          <table:table-cell table:number-columns-repeated="4"/>
        </table:table-row>
        <table:table-row table:style-name="ro1">
          <table:table-cell office:value-type="float" office:value="344.213897705078">
            <text:p>344.2138977051</text:p>
          </table:table-cell>
          <table:table-cell office:value-type="float" office:value="-0.002735723">
            <text:p>-0.002735723</text:p>
          </table:table-cell>
          <table:table-cell table:number-columns-repeated="4"/>
        </table:table-row>
        <table:table-row table:style-name="ro1">
          <table:table-cell office:value-type="float" office:value="344.322845458984">
            <text:p>344.322845459</text:p>
          </table:table-cell>
          <table:table-cell office:value-type="float" office:value="0.007324839">
            <text:p>0.007324839</text:p>
          </table:table-cell>
          <table:table-cell table:number-columns-repeated="4"/>
        </table:table-row>
        <table:table-row table:style-name="ro1">
          <table:table-cell office:value-type="float" office:value="344.431823730469">
            <text:p>344.4318237305</text:p>
          </table:table-cell>
          <table:table-cell office:value-type="float" office:value="-0.00404207">
            <text:p>-0.00404207</text:p>
          </table:table-cell>
          <table:table-cell table:number-columns-repeated="4"/>
        </table:table-row>
        <table:table-row table:style-name="ro1">
          <table:table-cell office:value-type="float" office:value="344.540771484375">
            <text:p>344.5407714844</text:p>
          </table:table-cell>
          <table:table-cell office:value-type="float" office:value="-0.0002079452">
            <text:p>-0.0002079452</text:p>
          </table:table-cell>
          <table:table-cell table:number-columns-repeated="4"/>
        </table:table-row>
        <table:table-row table:style-name="ro1">
          <table:table-cell office:value-type="float" office:value="344.649749755859">
            <text:p>344.6497497559</text:p>
          </table:table-cell>
          <table:table-cell office:value-type="float" office:value="-0.0004925509">
            <text:p>-0.0004925509</text:p>
          </table:table-cell>
          <table:table-cell table:number-columns-repeated="4"/>
        </table:table-row>
        <table:table-row table:style-name="ro1">
          <table:table-cell office:value-type="float" office:value="344.758728027344">
            <text:p>344.7587280273</text:p>
          </table:table-cell>
          <table:table-cell office:value-type="float" office:value="0.0009322755">
            <text:p>0.0009322755</text:p>
          </table:table-cell>
          <table:table-cell table:number-columns-repeated="4"/>
        </table:table-row>
        <table:table-row table:style-name="ro1">
          <table:table-cell office:value-type="float" office:value="344.867706298828">
            <text:p>344.8677062988</text:p>
          </table:table-cell>
          <table:table-cell office:value-type="float" office:value="0.006614653">
            <text:p>0.006614653</text:p>
          </table:table-cell>
          <table:table-cell table:number-columns-repeated="4"/>
        </table:table-row>
        <table:table-row table:style-name="ro1">
          <table:table-cell office:value-type="float" office:value="344.976715087891">
            <text:p>344.9767150879</text:p>
          </table:table-cell>
          <table:table-cell office:value-type="float" office:value="0.01136393">
            <text:p>0.01136393</text:p>
          </table:table-cell>
          <table:table-cell table:number-columns-repeated="4"/>
        </table:table-row>
        <table:table-row table:style-name="ro1">
          <table:table-cell office:value-type="float" office:value="345.085723876953">
            <text:p>345.085723877</text:p>
          </table:table-cell>
          <table:table-cell office:value-type="float" office:value="-0.001173289">
            <text:p>-0.001173289</text:p>
          </table:table-cell>
          <table:table-cell table:number-columns-repeated="4"/>
        </table:table-row>
        <table:table-row table:style-name="ro1">
          <table:table-cell office:value-type="float" office:value="345.194702148438">
            <text:p>345.1947021484</text:p>
          </table:table-cell>
          <table:table-cell office:value-type="float" office:value="0.002549817">
            <text:p>0.002549817</text:p>
          </table:table-cell>
          <table:table-cell table:number-columns-repeated="4"/>
        </table:table-row>
        <table:table-row table:style-name="ro1">
          <table:table-cell office:value-type="float" office:value="345.303741455078">
            <text:p>345.3037414551</text:p>
          </table:table-cell>
          <table:table-cell office:value-type="float" office:value="0.02480588">
            <text:p>0.02480588</text:p>
          </table:table-cell>
          <table:table-cell table:number-columns-repeated="4"/>
        </table:table-row>
        <table:table-row table:style-name="ro1">
          <table:table-cell office:value-type="float" office:value="345.412750244141">
            <text:p>345.4127502441</text:p>
          </table:table-cell>
          <table:table-cell office:value-type="float" office:value="-0.006728298">
            <text:p>-0.006728298</text:p>
          </table:table-cell>
          <table:table-cell table:number-columns-repeated="4"/>
        </table:table-row>
        <table:table-row table:style-name="ro1">
          <table:table-cell office:value-type="float" office:value="345.521759033203">
            <text:p>345.5217590332</text:p>
          </table:table-cell>
          <table:table-cell office:value-type="float" office:value="-0.005211751">
            <text:p>-0.005211751</text:p>
          </table:table-cell>
          <table:table-cell table:number-columns-repeated="4"/>
        </table:table-row>
        <table:table-row table:style-name="ro1">
          <table:table-cell office:value-type="float" office:value="345.630798339844">
            <text:p>345.6307983398</text:p>
          </table:table-cell>
          <table:table-cell office:value-type="float" office:value="0.003068138">
            <text:p>0.003068138</text:p>
          </table:table-cell>
          <table:table-cell table:number-columns-repeated="4"/>
        </table:table-row>
        <table:table-row table:style-name="ro1">
          <table:table-cell office:value-type="float" office:value="345.739837646484">
            <text:p>345.7398376465</text:p>
          </table:table-cell>
          <table:table-cell office:value-type="float" office:value="-0.001277579">
            <text:p>-0.001277579</text:p>
          </table:table-cell>
          <table:table-cell table:number-columns-repeated="4"/>
        </table:table-row>
        <table:table-row table:style-name="ro1">
          <table:table-cell office:value-type="float" office:value="345.848876953125">
            <text:p>345.8488769531</text:p>
          </table:table-cell>
          <table:table-cell office:value-type="float" office:value="0.01136998">
            <text:p>0.01136998</text:p>
          </table:table-cell>
          <table:table-cell table:number-columns-repeated="4"/>
        </table:table-row>
        <table:table-row table:style-name="ro1">
          <table:table-cell office:value-type="float" office:value="345.957946777344">
            <text:p>345.9579467773</text:p>
          </table:table-cell>
          <table:table-cell office:value-type="float" office:value="0.01203132">
            <text:p>0.01203132</text:p>
          </table:table-cell>
          <table:table-cell table:number-columns-repeated="4"/>
        </table:table-row>
        <table:table-row table:style-name="ro1">
          <table:table-cell office:value-type="float" office:value="346.066986083984">
            <text:p>346.066986084</text:p>
          </table:table-cell>
          <table:table-cell office:value-type="float" office:value="-0.001547018">
            <text:p>-0.001547018</text:p>
          </table:table-cell>
          <table:table-cell table:number-columns-repeated="4"/>
        </table:table-row>
        <table:table-row table:style-name="ro1">
          <table:table-cell office:value-type="float" office:value="346.176055908203">
            <text:p>346.1760559082</text:p>
          </table:table-cell>
          <table:table-cell office:value-type="float" office:value="-0.002813395">
            <text:p>-0.002813395</text:p>
          </table:table-cell>
          <table:table-cell table:number-columns-repeated="4"/>
        </table:table-row>
        <table:table-row table:style-name="ro1">
          <table:table-cell office:value-type="float" office:value="346.285125732422">
            <text:p>346.2851257324</text:p>
          </table:table-cell>
          <table:table-cell office:value-type="float" office:value="-0.004779035">
            <text:p>-0.004779035</text:p>
          </table:table-cell>
          <table:table-cell table:number-columns-repeated="4"/>
        </table:table-row>
        <table:table-row table:style-name="ro1">
          <table:table-cell office:value-type="float" office:value="346.394195556641">
            <text:p>346.3941955566</text:p>
          </table:table-cell>
          <table:table-cell office:value-type="float" office:value="0.003425203">
            <text:p>0.003425203</text:p>
          </table:table-cell>
          <table:table-cell table:number-columns-repeated="4"/>
        </table:table-row>
        <table:table-row table:style-name="ro1">
          <table:table-cell office:value-type="float" office:value="346.503295898438">
            <text:p>346.5032958984</text:p>
          </table:table-cell>
          <table:table-cell office:value-type="float" office:value="-0.002169623">
            <text:p>-0.002169623</text:p>
          </table:table-cell>
          <table:table-cell table:number-columns-repeated="4"/>
        </table:table-row>
        <table:table-row table:style-name="ro1">
          <table:table-cell office:value-type="float" office:value="346.612365722656">
            <text:p>346.6123657227</text:p>
          </table:table-cell>
          <table:table-cell office:value-type="float" office:value="-0.004065851">
            <text:p>-0.004065851</text:p>
          </table:table-cell>
          <table:table-cell table:number-columns-repeated="4"/>
        </table:table-row>
        <table:table-row table:style-name="ro1">
          <table:table-cell office:value-type="float" office:value="346.721466064453">
            <text:p>346.7214660645</text:p>
          </table:table-cell>
          <table:table-cell office:value-type="float" office:value="0.00145762">
            <text:p>0.00145762</text:p>
          </table:table-cell>
          <table:table-cell table:number-columns-repeated="4"/>
        </table:table-row>
        <table:table-row table:style-name="ro1">
          <table:table-cell office:value-type="float" office:value="346.83056640625">
            <text:p>346.8305664063</text:p>
          </table:table-cell>
          <table:table-cell office:value-type="float" office:value="0.01242508">
            <text:p>0.01242508</text:p>
          </table:table-cell>
          <table:table-cell table:number-columns-repeated="4"/>
        </table:table-row>
        <table:table-row table:style-name="ro1">
          <table:table-cell office:value-type="float" office:value="346.939697265625">
            <text:p>346.9396972656</text:p>
          </table:table-cell>
          <table:table-cell office:value-type="float" office:value="0.03114718">
            <text:p>0.03114718</text:p>
          </table:table-cell>
          <table:table-cell table:number-columns-repeated="4"/>
        </table:table-row>
        <table:table-row table:style-name="ro1">
          <table:table-cell office:value-type="float" office:value="347.048797607422">
            <text:p>347.0487976074</text:p>
          </table:table-cell>
          <table:table-cell office:value-type="float" office:value="-0.008753757">
            <text:p>-0.008753757</text:p>
          </table:table-cell>
          <table:table-cell table:number-columns-repeated="4"/>
        </table:table-row>
        <table:table-row table:style-name="ro1">
          <table:table-cell office:value-type="float" office:value="347.157928466797">
            <text:p>347.1579284668</text:p>
          </table:table-cell>
          <table:table-cell office:value-type="float" office:value="-0.00871776">
            <text:p>-0.00871776</text:p>
          </table:table-cell>
          <table:table-cell table:number-columns-repeated="4"/>
        </table:table-row>
        <table:table-row table:style-name="ro1">
          <table:table-cell office:value-type="float" office:value="347.267059326172">
            <text:p>347.2670593262</text:p>
          </table:table-cell>
          <table:table-cell office:value-type="float" office:value="0.004241815">
            <text:p>0.004241815</text:p>
          </table:table-cell>
          <table:table-cell table:number-columns-repeated="4"/>
        </table:table-row>
        <table:table-row table:style-name="ro1">
          <table:table-cell office:value-type="float" office:value="347.376190185547">
            <text:p>347.3761901855</text:p>
          </table:table-cell>
          <table:table-cell office:value-type="float" office:value="-0.00194481">
            <text:p>-0.00194481</text:p>
          </table:table-cell>
          <table:table-cell table:number-columns-repeated="4"/>
        </table:table-row>
        <table:table-row table:style-name="ro1">
          <table:table-cell office:value-type="float" office:value="347.4853515625">
            <text:p>347.4853515625</text:p>
          </table:table-cell>
          <table:table-cell office:value-type="float" office:value="0.005839883">
            <text:p>0.005839883</text:p>
          </table:table-cell>
          <table:table-cell table:number-columns-repeated="4"/>
        </table:table-row>
        <table:table-row table:style-name="ro1">
          <table:table-cell office:value-type="float" office:value="347.594482421875">
            <text:p>347.5944824219</text:p>
          </table:table-cell>
          <table:table-cell office:value-type="float" office:value="-0.01270081">
            <text:p>-0.01270081</text:p>
          </table:table-cell>
          <table:table-cell table:number-columns-repeated="4"/>
        </table:table-row>
        <table:table-row table:style-name="ro1">
          <table:table-cell office:value-type="float" office:value="347.703643798828">
            <text:p>347.7036437988</text:p>
          </table:table-cell>
          <table:table-cell office:value-type="float" office:value="0.004429605">
            <text:p>0.004429605</text:p>
          </table:table-cell>
          <table:table-cell table:number-columns-repeated="4"/>
        </table:table-row>
        <table:table-row table:style-name="ro1">
          <table:table-cell office:value-type="float" office:value="347.812805175781">
            <text:p>347.8128051758</text:p>
          </table:table-cell>
          <table:table-cell office:value-type="float" office:value="-0.001439996">
            <text:p>-0.001439996</text:p>
          </table:table-cell>
          <table:table-cell table:number-columns-repeated="4"/>
        </table:table-row>
        <table:table-row table:style-name="ro1">
          <table:table-cell office:value-type="float" office:value="347.921966552734">
            <text:p>347.9219665527</text:p>
          </table:table-cell>
          <table:table-cell office:value-type="float" office:value="0.00172809">
            <text:p>0.00172809</text:p>
          </table:table-cell>
          <table:table-cell table:number-columns-repeated="4"/>
        </table:table-row>
        <table:table-row table:style-name="ro1">
          <table:table-cell office:value-type="float" office:value="348.031158447266">
            <text:p>348.0311584473</text:p>
          </table:table-cell>
          <table:table-cell office:value-type="float" office:value="0.007483876">
            <text:p>0.007483876</text:p>
          </table:table-cell>
          <table:table-cell table:number-columns-repeated="4"/>
        </table:table-row>
        <table:table-row table:style-name="ro1">
          <table:table-cell office:value-type="float" office:value="348.140319824219">
            <text:p>348.1403198242</text:p>
          </table:table-cell>
          <table:table-cell office:value-type="float" office:value="0.001087223">
            <text:p>0.001087223</text:p>
          </table:table-cell>
          <table:table-cell table:number-columns-repeated="4"/>
        </table:table-row>
        <table:table-row table:style-name="ro1">
          <table:table-cell office:value-type="float" office:value="348.24951171875">
            <text:p>348.2495117188</text:p>
          </table:table-cell>
          <table:table-cell office:value-type="float" office:value="0.01294159">
            <text:p>0.01294159</text:p>
          </table:table-cell>
          <table:table-cell table:number-columns-repeated="4"/>
        </table:table-row>
        <table:table-row table:style-name="ro1">
          <table:table-cell office:value-type="float" office:value="348.358703613281">
            <text:p>348.3587036133</text:p>
          </table:table-cell>
          <table:table-cell office:value-type="float" office:value="-0.008707291">
            <text:p>-0.008707291</text:p>
          </table:table-cell>
          <table:table-cell table:number-columns-repeated="4"/>
        </table:table-row>
        <table:table-row table:style-name="ro1">
          <table:table-cell office:value-type="float" office:value="348.467926025391">
            <text:p>348.4679260254</text:p>
          </table:table-cell>
          <table:table-cell office:value-type="float" office:value="-0.0004639985">
            <text:p>-0.0004639985</text:p>
          </table:table-cell>
          <table:table-cell table:number-columns-repeated="4"/>
        </table:table-row>
        <table:table-row table:style-name="ro1">
          <table:table-cell office:value-type="float" office:value="348.577117919922">
            <text:p>348.5771179199</text:p>
          </table:table-cell>
          <table:table-cell office:value-type="float" office:value="-0.001213198">
            <text:p>-0.001213198</text:p>
          </table:table-cell>
          <table:table-cell table:number-columns-repeated="4"/>
        </table:table-row>
        <table:table-row table:style-name="ro1">
          <table:table-cell office:value-type="float" office:value="348.686340332031">
            <text:p>348.686340332</text:p>
          </table:table-cell>
          <table:table-cell office:value-type="float" office:value="0.02145853">
            <text:p>0.02145853</text:p>
          </table:table-cell>
          <table:table-cell table:number-columns-repeated="4"/>
        </table:table-row>
        <table:table-row table:style-name="ro1">
          <table:table-cell office:value-type="float" office:value="348.795562744141">
            <text:p>348.7955627441</text:p>
          </table:table-cell>
          <table:table-cell office:value-type="float" office:value="0.0007879569">
            <text:p>0.0007879569</text:p>
          </table:table-cell>
          <table:table-cell table:number-columns-repeated="4"/>
        </table:table-row>
        <table:table-row table:style-name="ro1">
          <table:table-cell office:value-type="float" office:value="348.90478515625">
            <text:p>348.9047851563</text:p>
          </table:table-cell>
          <table:table-cell office:value-type="float" office:value="0.006048647">
            <text:p>0.006048647</text:p>
          </table:table-cell>
          <table:table-cell table:number-columns-repeated="4"/>
        </table:table-row>
        <table:table-row table:style-name="ro1">
          <table:table-cell office:value-type="float" office:value="349.014038085938">
            <text:p>349.0140380859</text:p>
          </table:table-cell>
          <table:table-cell office:value-type="float" office:value="0.000787486">
            <text:p>0.000787486</text:p>
          </table:table-cell>
          <table:table-cell table:number-columns-repeated="4"/>
        </table:table-row>
        <table:table-row table:style-name="ro1">
          <table:table-cell office:value-type="float" office:value="349.123260498047">
            <text:p>349.123260498</text:p>
          </table:table-cell>
          <table:table-cell office:value-type="float" office:value="0.011272">
            <text:p>0.011272</text:p>
          </table:table-cell>
          <table:table-cell table:number-columns-repeated="4"/>
        </table:table-row>
        <table:table-row table:style-name="ro1">
          <table:table-cell office:value-type="float" office:value="349.232513427734">
            <text:p>349.2325134277</text:p>
          </table:table-cell>
          <table:table-cell office:value-type="float" office:value="-0.008184201">
            <text:p>-0.008184201</text:p>
          </table:table-cell>
          <table:table-cell table:number-columns-repeated="4"/>
        </table:table-row>
        <table:table-row table:style-name="ro1">
          <table:table-cell office:value-type="float" office:value="349.341766357422">
            <text:p>349.3417663574</text:p>
          </table:table-cell>
          <table:table-cell office:value-type="float" office:value="-0.009266685">
            <text:p>-0.009266685</text:p>
          </table:table-cell>
          <table:table-cell table:number-columns-repeated="4"/>
        </table:table-row>
        <table:table-row table:style-name="ro1">
          <table:table-cell office:value-type="float" office:value="349.451019287109">
            <text:p>349.4510192871</text:p>
          </table:table-cell>
          <table:table-cell office:value-type="float" office:value="0.009383939">
            <text:p>0.009383939</text:p>
          </table:table-cell>
          <table:table-cell table:number-columns-repeated="4"/>
        </table:table-row>
        <table:table-row table:style-name="ro1">
          <table:table-cell office:value-type="float" office:value="349.560302734375">
            <text:p>349.5603027344</text:p>
          </table:table-cell>
          <table:table-cell office:value-type="float" office:value="0.003183956">
            <text:p>0.003183956</text:p>
          </table:table-cell>
          <table:table-cell table:number-columns-repeated="4"/>
        </table:table-row>
        <table:table-row table:style-name="ro1">
          <table:table-cell office:value-type="float" office:value="349.669586181641">
            <text:p>349.6695861816</text:p>
          </table:table-cell>
          <table:table-cell office:value-type="float" office:value="-0.007341891">
            <text:p>-0.007341891</text:p>
          </table:table-cell>
          <table:table-cell table:number-columns-repeated="4"/>
        </table:table-row>
        <table:table-row table:style-name="ro1">
          <table:table-cell office:value-type="float" office:value="349.778839111328">
            <text:p>349.7788391113</text:p>
          </table:table-cell>
          <table:table-cell office:value-type="float" office:value="-0.004863418">
            <text:p>-0.004863418</text:p>
          </table:table-cell>
          <table:table-cell table:number-columns-repeated="4"/>
        </table:table-row>
        <table:table-row table:style-name="ro1">
          <table:table-cell office:value-type="float" office:value="349.888153076172">
            <text:p>349.8881530762</text:p>
          </table:table-cell>
          <table:table-cell office:value-type="float" office:value="0.01455947">
            <text:p>0.01455947</text:p>
          </table:table-cell>
          <table:table-cell table:number-columns-repeated="4"/>
        </table:table-row>
        <table:table-row table:style-name="ro1">
          <table:table-cell office:value-type="float" office:value="349.997436523438">
            <text:p>349.9974365234</text:p>
          </table:table-cell>
          <table:table-cell office:value-type="float" office:value="0.01042214">
            <text:p>0.01042214</text:p>
          </table:table-cell>
          <table:table-cell table:number-columns-repeated="4"/>
        </table:table-row>
        <table:table-row table:style-name="ro1">
          <table:table-cell office:value-type="float" office:value="350.106719970703">
            <text:p>350.1067199707</text:p>
          </table:table-cell>
          <table:table-cell office:value-type="float" office:value="0.01035129">
            <text:p>0.01035129</text:p>
          </table:table-cell>
          <table:table-cell table:number-columns-repeated="4"/>
        </table:table-row>
        <table:table-row table:style-name="ro1">
          <table:table-cell office:value-type="float" office:value="350.216033935547">
            <text:p>350.2160339355</text:p>
          </table:table-cell>
          <table:table-cell office:value-type="float" office:value="-0.008089722">
            <text:p>-0.008089722</text:p>
          </table:table-cell>
          <table:table-cell table:number-columns-repeated="4"/>
        </table:table-row>
        <table:table-row table:style-name="ro1">
          <table:table-cell office:value-type="float" office:value="350.325347900391">
            <text:p>350.3253479004</text:p>
          </table:table-cell>
          <table:table-cell office:value-type="float" office:value="-0.001390258">
            <text:p>-0.001390258</text:p>
          </table:table-cell>
          <table:table-cell table:number-columns-repeated="4"/>
        </table:table-row>
        <table:table-row table:style-name="ro1">
          <table:table-cell office:value-type="float" office:value="350.434661865234">
            <text:p>350.4346618652</text:p>
          </table:table-cell>
          <table:table-cell office:value-type="float" office:value="0.00531325">
            <text:p>0.00531325</text:p>
          </table:table-cell>
          <table:table-cell table:number-columns-repeated="4"/>
        </table:table-row>
        <table:table-row table:style-name="ro1">
          <table:table-cell office:value-type="float" office:value="350.544006347656">
            <text:p>350.5440063477</text:p>
          </table:table-cell>
          <table:table-cell office:value-type="float" office:value="0.003061961">
            <text:p>0.003061961</text:p>
          </table:table-cell>
          <table:table-cell table:number-columns-repeated="4"/>
        </table:table-row>
        <table:table-row table:style-name="ro1">
          <table:table-cell office:value-type="float" office:value="350.6533203125">
            <text:p>350.6533203125</text:p>
          </table:table-cell>
          <table:table-cell office:value-type="float" office:value="0.00555822">
            <text:p>0.00555822</text:p>
          </table:table-cell>
          <table:table-cell table:number-columns-repeated="4"/>
        </table:table-row>
        <table:table-row table:style-name="ro1">
          <table:table-cell office:value-type="float" office:value="350.762664794922">
            <text:p>350.7626647949</text:p>
          </table:table-cell>
          <table:table-cell office:value-type="float" office:value="0.004862636">
            <text:p>0.004862636</text:p>
          </table:table-cell>
          <table:table-cell table:number-columns-repeated="4"/>
        </table:table-row>
        <table:table-row table:style-name="ro1">
          <table:table-cell office:value-type="float" office:value="350.872009277344">
            <text:p>350.8720092773</text:p>
          </table:table-cell>
          <table:table-cell office:value-type="float" office:value="0.0151525">
            <text:p>0.0151525</text:p>
          </table:table-cell>
          <table:table-cell table:number-columns-repeated="4"/>
        </table:table-row>
        <table:table-row table:style-name="ro1">
          <table:table-cell office:value-type="float" office:value="350.981353759766">
            <text:p>350.9813537598</text:p>
          </table:table-cell>
          <table:table-cell office:value-type="float" office:value="-0.01080867">
            <text:p>-0.01080867</text:p>
          </table:table-cell>
          <table:table-cell table:number-columns-repeated="4"/>
        </table:table-row>
        <table:table-row table:style-name="ro1">
          <table:table-cell office:value-type="float" office:value="351.090728759766">
            <text:p>351.0907287598</text:p>
          </table:table-cell>
          <table:table-cell office:value-type="float" office:value="0.003436131">
            <text:p>0.003436131</text:p>
          </table:table-cell>
          <table:table-cell table:number-columns-repeated="4"/>
        </table:table-row>
        <table:table-row table:style-name="ro1">
          <table:table-cell office:value-type="float" office:value="351.200073242188">
            <text:p>351.2000732422</text:p>
          </table:table-cell>
          <table:table-cell office:value-type="float" office:value="0.002533924">
            <text:p>0.002533924</text:p>
          </table:table-cell>
          <table:table-cell table:number-columns-repeated="4"/>
        </table:table-row>
        <table:table-row table:style-name="ro1">
          <table:table-cell office:value-type="float" office:value="351.309448242188">
            <text:p>351.3094482422</text:p>
          </table:table-cell>
          <table:table-cell office:value-type="float" office:value="0.01240638">
            <text:p>0.01240638</text:p>
          </table:table-cell>
          <table:table-cell table:number-columns-repeated="4"/>
        </table:table-row>
        <table:table-row table:style-name="ro1">
          <table:table-cell office:value-type="float" office:value="351.418823242188">
            <text:p>351.4188232422</text:p>
          </table:table-cell>
          <table:table-cell office:value-type="float" office:value="0.009505238">
            <text:p>0.009505238</text:p>
          </table:table-cell>
          <table:table-cell table:number-columns-repeated="4"/>
        </table:table-row>
        <table:table-row table:style-name="ro1">
          <table:table-cell office:value-type="float" office:value="351.528228759766">
            <text:p>351.5282287598</text:p>
          </table:table-cell>
          <table:table-cell office:value-type="float" office:value="-0.009544713">
            <text:p>-0.009544713</text:p>
          </table:table-cell>
          <table:table-cell table:number-columns-repeated="4"/>
        </table:table-row>
        <table:table-row table:style-name="ro1">
          <table:table-cell office:value-type="float" office:value="351.637603759766">
            <text:p>351.6376037598</text:p>
          </table:table-cell>
          <table:table-cell office:value-type="float" office:value="0.01110757">
            <text:p>0.01110757</text:p>
          </table:table-cell>
          <table:table-cell table:number-columns-repeated="4"/>
        </table:table-row>
        <table:table-row table:style-name="ro1">
          <table:table-cell office:value-type="float" office:value="351.747009277344">
            <text:p>351.7470092773</text:p>
          </table:table-cell>
          <table:table-cell office:value-type="float" office:value="0.001213237">
            <text:p>0.001213237</text:p>
          </table:table-cell>
          <table:table-cell table:number-columns-repeated="4"/>
        </table:table-row>
        <table:table-row table:style-name="ro1">
          <table:table-cell office:value-type="float" office:value="351.856414794922">
            <text:p>351.8564147949</text:p>
          </table:table-cell>
          <table:table-cell office:value-type="float" office:value="-0.008995879">
            <text:p>-0.008995879</text:p>
          </table:table-cell>
          <table:table-cell table:number-columns-repeated="4"/>
        </table:table-row>
        <table:table-row table:style-name="ro1">
          <table:table-cell office:value-type="float" office:value="351.9658203125">
            <text:p>351.9658203125</text:p>
          </table:table-cell>
          <table:table-cell office:value-type="float" office:value="0.001828007">
            <text:p>0.001828007</text:p>
          </table:table-cell>
          <table:table-cell table:number-columns-repeated="4"/>
        </table:table-row>
        <table:table-row table:style-name="ro1">
          <table:table-cell office:value-type="float" office:value="352.075225830078">
            <text:p>352.0752258301</text:p>
          </table:table-cell>
          <table:table-cell office:value-type="float" office:value="-0.0008824295">
            <text:p>-0.0008824295</text:p>
          </table:table-cell>
          <table:table-cell table:number-columns-repeated="4"/>
        </table:table-row>
        <table:table-row table:style-name="ro1">
          <table:table-cell office:value-type="float" office:value="352.184661865234">
            <text:p>352.1846618652</text:p>
          </table:table-cell>
          <table:table-cell office:value-type="float" office:value="0.002725606">
            <text:p>0.002725606</text:p>
          </table:table-cell>
          <table:table-cell table:number-columns-repeated="4"/>
        </table:table-row>
        <table:table-row table:style-name="ro1">
          <table:table-cell office:value-type="float" office:value="352.294097900391">
            <text:p>352.2940979004</text:p>
          </table:table-cell>
          <table:table-cell office:value-type="float" office:value="0.004826259">
            <text:p>0.004826259</text:p>
          </table:table-cell>
          <table:table-cell table:number-columns-repeated="4"/>
        </table:table-row>
        <table:table-row table:style-name="ro1">
          <table:table-cell office:value-type="float" office:value="352.403533935547">
            <text:p>352.4035339355</text:p>
          </table:table-cell>
          <table:table-cell office:value-type="float" office:value="-0.002615777">
            <text:p>-0.002615777</text:p>
          </table:table-cell>
          <table:table-cell table:number-columns-repeated="4"/>
        </table:table-row>
        <table:table-row table:style-name="ro1">
          <table:table-cell office:value-type="float" office:value="352.512969970703">
            <text:p>352.5129699707</text:p>
          </table:table-cell>
          <table:table-cell office:value-type="float" office:value="0.002237036">
            <text:p>0.002237036</text:p>
          </table:table-cell>
          <table:table-cell table:number-columns-repeated="4"/>
        </table:table-row>
        <table:table-row table:style-name="ro1">
          <table:table-cell office:value-type="float" office:value="352.622406005859">
            <text:p>352.6224060059</text:p>
          </table:table-cell>
          <table:table-cell office:value-type="float" office:value="0.01872138">
            <text:p>0.01872138</text:p>
          </table:table-cell>
          <table:table-cell table:number-columns-repeated="4"/>
        </table:table-row>
        <table:table-row table:style-name="ro1">
          <table:table-cell office:value-type="float" office:value="352.731872558594">
            <text:p>352.7318725586</text:p>
          </table:table-cell>
          <table:table-cell office:value-type="float" office:value="-0.004421472">
            <text:p>-0.004421472</text:p>
          </table:table-cell>
          <table:table-cell table:number-columns-repeated="4"/>
        </table:table-row>
        <table:table-row table:style-name="ro1">
          <table:table-cell office:value-type="float" office:value="352.841339111328">
            <text:p>352.8413391113</text:p>
          </table:table-cell>
          <table:table-cell office:value-type="float" office:value="-0.007357235">
            <text:p>-0.007357235</text:p>
          </table:table-cell>
          <table:table-cell table:number-columns-repeated="4"/>
        </table:table-row>
        <table:table-row table:style-name="ro1">
          <table:table-cell office:value-type="float" office:value="352.950805664063">
            <text:p>352.9508056641</text:p>
          </table:table-cell>
          <table:table-cell office:value-type="float" office:value="0.01691626">
            <text:p>0.01691626</text:p>
          </table:table-cell>
          <table:table-cell table:number-columns-repeated="4"/>
        </table:table-row>
        <table:table-row table:style-name="ro1">
          <table:table-cell office:value-type="float" office:value="353.060272216797">
            <text:p>353.0602722168</text:p>
          </table:table-cell>
          <table:table-cell office:value-type="float" office:value="0.01176444">
            <text:p>0.01176444</text:p>
          </table:table-cell>
          <table:table-cell table:number-columns-repeated="4"/>
        </table:table-row>
        <table:table-row table:style-name="ro1">
          <table:table-cell office:value-type="float" office:value="353.169738769531">
            <text:p>353.1697387695</text:p>
          </table:table-cell>
          <table:table-cell office:value-type="float" office:value="-0.0008073385">
            <text:p>-0.0008073385</text:p>
          </table:table-cell>
          <table:table-cell table:number-columns-repeated="4"/>
        </table:table-row>
        <table:table-row table:style-name="ro1">
          <table:table-cell office:value-type="float" office:value="353.279235839844">
            <text:p>353.2792358398</text:p>
          </table:table-cell>
          <table:table-cell office:value-type="float" office:value="-0.001838158">
            <text:p>-0.001838158</text:p>
          </table:table-cell>
          <table:table-cell table:number-columns-repeated="4"/>
        </table:table-row>
        <table:table-row table:style-name="ro1">
          <table:table-cell office:value-type="float" office:value="353.388732910156">
            <text:p>353.3887329102</text:p>
          </table:table-cell>
          <table:table-cell office:value-type="float" office:value="0.0058513">
            <text:p>0.0058513</text:p>
          </table:table-cell>
          <table:table-cell table:number-columns-repeated="4"/>
        </table:table-row>
        <table:table-row table:style-name="ro1">
          <table:table-cell office:value-type="float" office:value="353.498229980469">
            <text:p>353.4982299805</text:p>
          </table:table-cell>
          <table:table-cell office:value-type="float" office:value="0.004979355">
            <text:p>0.004979355</text:p>
          </table:table-cell>
          <table:table-cell table:number-columns-repeated="4"/>
        </table:table-row>
        <table:table-row table:style-name="ro1">
          <table:table-cell office:value-type="float" office:value="353.607727050781">
            <text:p>353.6077270508</text:p>
          </table:table-cell>
          <table:table-cell office:value-type="float" office:value="0.009280181">
            <text:p>0.009280181</text:p>
          </table:table-cell>
          <table:table-cell table:number-columns-repeated="4"/>
        </table:table-row>
        <table:table-row table:style-name="ro1">
          <table:table-cell office:value-type="float" office:value="353.717254638672">
            <text:p>353.7172546387</text:p>
          </table:table-cell>
          <table:table-cell office:value-type="float" office:value="-0.001634018">
            <text:p>-0.001634018</text:p>
          </table:table-cell>
          <table:table-cell table:number-columns-repeated="4"/>
        </table:table-row>
        <table:table-row table:style-name="ro1">
          <table:table-cell office:value-type="float" office:value="353.826782226563">
            <text:p>353.8267822266</text:p>
          </table:table-cell>
          <table:table-cell office:value-type="float" office:value="-0.004412352">
            <text:p>-0.004412352</text:p>
          </table:table-cell>
          <table:table-cell table:number-columns-repeated="4"/>
        </table:table-row>
        <table:table-row table:style-name="ro1">
          <table:table-cell office:value-type="float" office:value="353.936309814453">
            <text:p>353.9363098145</text:p>
          </table:table-cell>
          <table:table-cell office:value-type="float" office:value="0.01649481">
            <text:p>0.01649481</text:p>
          </table:table-cell>
          <table:table-cell table:number-columns-repeated="4"/>
        </table:table-row>
        <table:table-row table:style-name="ro1">
          <table:table-cell office:value-type="float" office:value="354.045837402344">
            <text:p>354.0458374023</text:p>
          </table:table-cell>
          <table:table-cell office:value-type="float" office:value="-0.004990804">
            <text:p>-0.004990804</text:p>
          </table:table-cell>
          <table:table-cell table:number-columns-repeated="4"/>
        </table:table-row>
        <table:table-row table:style-name="ro1">
          <table:table-cell office:value-type="float" office:value="354.155364990234">
            <text:p>354.1553649902</text:p>
          </table:table-cell>
          <table:table-cell office:value-type="float" office:value="0.004575399">
            <text:p>0.004575399</text:p>
          </table:table-cell>
          <table:table-cell table:number-columns-repeated="4"/>
        </table:table-row>
        <table:table-row table:style-name="ro1">
          <table:table-cell office:value-type="float" office:value="354.264923095703">
            <text:p>354.2649230957</text:p>
          </table:table-cell>
          <table:table-cell office:value-type="float" office:value="0.002373856">
            <text:p>0.002373856</text:p>
          </table:table-cell>
          <table:table-cell table:number-columns-repeated="4"/>
        </table:table-row>
        <table:table-row table:style-name="ro1">
          <table:table-cell office:value-type="float" office:value="354.374481201172">
            <text:p>354.3744812012</text:p>
          </table:table-cell>
          <table:table-cell office:value-type="float" office:value="0.005198263">
            <text:p>0.005198263</text:p>
          </table:table-cell>
          <table:table-cell table:number-columns-repeated="4"/>
        </table:table-row>
        <table:table-row table:style-name="ro1">
          <table:table-cell office:value-type="float" office:value="354.484039306641">
            <text:p>354.4840393066</text:p>
          </table:table-cell>
          <table:table-cell office:value-type="float" office:value="0.004250232">
            <text:p>0.004250232</text:p>
          </table:table-cell>
          <table:table-cell table:number-columns-repeated="4"/>
        </table:table-row>
        <table:table-row table:style-name="ro1">
          <table:table-cell office:value-type="float" office:value="354.593597412109">
            <text:p>354.5935974121</text:p>
          </table:table-cell>
          <table:table-cell office:value-type="float" office:value="0.004781985">
            <text:p>0.004781985</text:p>
          </table:table-cell>
          <table:table-cell table:number-columns-repeated="4"/>
        </table:table-row>
        <table:table-row table:style-name="ro1">
          <table:table-cell office:value-type="float" office:value="354.703155517578">
            <text:p>354.7031555176</text:p>
          </table:table-cell>
          <table:table-cell office:value-type="float" office:value="0.00250354">
            <text:p>0.00250354</text:p>
          </table:table-cell>
          <table:table-cell table:number-columns-repeated="4"/>
        </table:table-row>
        <table:table-row table:style-name="ro1">
          <table:table-cell office:value-type="float" office:value="354.812744140625">
            <text:p>354.8127441406</text:p>
          </table:table-cell>
          <table:table-cell office:value-type="float" office:value="0.01223232">
            <text:p>0.01223232</text:p>
          </table:table-cell>
          <table:table-cell table:number-columns-repeated="4"/>
        </table:table-row>
        <table:table-row table:style-name="ro1">
          <table:table-cell office:value-type="float" office:value="354.922332763672">
            <text:p>354.9223327637</text:p>
          </table:table-cell>
          <table:table-cell office:value-type="float" office:value="0.00170294">
            <text:p>0.00170294</text:p>
          </table:table-cell>
          <table:table-cell table:number-columns-repeated="4"/>
        </table:table-row>
        <table:table-row table:style-name="ro1">
          <table:table-cell office:value-type="float" office:value="355.031921386719">
            <text:p>355.0319213867</text:p>
          </table:table-cell>
          <table:table-cell office:value-type="float" office:value="0.007809261">
            <text:p>0.007809261</text:p>
          </table:table-cell>
          <table:table-cell table:number-columns-repeated="4"/>
        </table:table-row>
        <table:table-row table:style-name="ro1">
          <table:table-cell office:value-type="float" office:value="355.141510009766">
            <text:p>355.1415100098</text:p>
          </table:table-cell>
          <table:table-cell office:value-type="float" office:value="-0.002000728">
            <text:p>-0.002000728</text:p>
          </table:table-cell>
          <table:table-cell table:number-columns-repeated="4"/>
        </table:table-row>
        <table:table-row table:style-name="ro1">
          <table:table-cell office:value-type="float" office:value="355.251129150391">
            <text:p>355.2511291504</text:p>
          </table:table-cell>
          <table:table-cell office:value-type="float" office:value="0.004219124">
            <text:p>0.004219124</text:p>
          </table:table-cell>
          <table:table-cell table:number-columns-repeated="4"/>
        </table:table-row>
        <table:table-row table:style-name="ro1">
          <table:table-cell office:value-type="float" office:value="355.360717773438">
            <text:p>355.3607177734</text:p>
          </table:table-cell>
          <table:table-cell office:value-type="float" office:value="0.003750375">
            <text:p>0.003750375</text:p>
          </table:table-cell>
          <table:table-cell table:number-columns-repeated="4"/>
        </table:table-row>
        <table:table-row table:style-name="ro1">
          <table:table-cell office:value-type="float" office:value="355.470336914063">
            <text:p>355.4703369141</text:p>
          </table:table-cell>
          <table:table-cell office:value-type="float" office:value="0.0008391561">
            <text:p>0.0008391561</text:p>
          </table:table-cell>
          <table:table-cell table:number-columns-repeated="4"/>
        </table:table-row>
        <table:table-row table:style-name="ro1">
          <table:table-cell office:value-type="float" office:value="355.579956054688">
            <text:p>355.5799560547</text:p>
          </table:table-cell>
          <table:table-cell office:value-type="float" office:value="0.009179863">
            <text:p>0.009179863</text:p>
          </table:table-cell>
          <table:table-cell table:number-columns-repeated="4"/>
        </table:table-row>
        <table:table-row table:style-name="ro1">
          <table:table-cell office:value-type="float" office:value="355.689605712891">
            <text:p>355.6896057129</text:p>
          </table:table-cell>
          <table:table-cell office:value-type="float" office:value="0.01391636">
            <text:p>0.01391636</text:p>
          </table:table-cell>
          <table:table-cell table:number-columns-repeated="4"/>
        </table:table-row>
        <table:table-row table:style-name="ro1">
          <table:table-cell office:value-type="float" office:value="355.799224853516">
            <text:p>355.7992248535</text:p>
          </table:table-cell>
          <table:table-cell office:value-type="float" office:value="0.01457885">
            <text:p>0.01457885</text:p>
          </table:table-cell>
          <table:table-cell table:number-columns-repeated="4"/>
        </table:table-row>
        <table:table-row table:style-name="ro1">
          <table:table-cell office:value-type="float" office:value="355.908874511719">
            <text:p>355.9088745117</text:p>
          </table:table-cell>
          <table:table-cell office:value-type="float" office:value="-0.006595103">
            <text:p>-0.006595103</text:p>
          </table:table-cell>
          <table:table-cell table:number-columns-repeated="4"/>
        </table:table-row>
        <table:table-row table:style-name="ro1">
          <table:table-cell office:value-type="float" office:value="356.018524169922">
            <text:p>356.0185241699</text:p>
          </table:table-cell>
          <table:table-cell office:value-type="float" office:value="0.01047315">
            <text:p>0.01047315</text:p>
          </table:table-cell>
          <table:table-cell table:number-columns-repeated="4"/>
        </table:table-row>
        <table:table-row table:style-name="ro1">
          <table:table-cell office:value-type="float" office:value="356.128173828125">
            <text:p>356.1281738281</text:p>
          </table:table-cell>
          <table:table-cell office:value-type="float" office:value="-0.003226324">
            <text:p>-0.003226324</text:p>
          </table:table-cell>
          <table:table-cell table:number-columns-repeated="4"/>
        </table:table-row>
        <table:table-row table:style-name="ro1">
          <table:table-cell office:value-type="float" office:value="356.237823486328">
            <text:p>356.2378234863</text:p>
          </table:table-cell>
          <table:table-cell office:value-type="float" office:value="-0.00575662">
            <text:p>-0.00575662</text:p>
          </table:table-cell>
          <table:table-cell table:number-columns-repeated="4"/>
        </table:table-row>
        <table:table-row table:style-name="ro1">
          <table:table-cell office:value-type="float" office:value="356.347503662109">
            <text:p>356.3475036621</text:p>
          </table:table-cell>
          <table:table-cell office:value-type="float" office:value="0.003577163">
            <text:p>0.003577163</text:p>
          </table:table-cell>
          <table:table-cell table:number-columns-repeated="4"/>
        </table:table-row>
        <table:table-row table:style-name="ro1">
          <table:table-cell office:value-type="float" office:value="356.457183837891">
            <text:p>356.4571838379</text:p>
          </table:table-cell>
          <table:table-cell office:value-type="float" office:value="0.002449682">
            <text:p>0.002449682</text:p>
          </table:table-cell>
          <table:table-cell table:number-columns-repeated="4"/>
        </table:table-row>
        <table:table-row table:style-name="ro1">
          <table:table-cell office:value-type="float" office:value="356.566864013672">
            <text:p>356.5668640137</text:p>
          </table:table-cell>
          <table:table-cell office:value-type="float" office:value="-0.0002533141">
            <text:p>-0.0002533141</text:p>
          </table:table-cell>
          <table:table-cell table:number-columns-repeated="4"/>
        </table:table-row>
        <table:table-row table:style-name="ro1">
          <table:table-cell office:value-type="float" office:value="356.676544189453">
            <text:p>356.6765441895</text:p>
          </table:table-cell>
          <table:table-cell office:value-type="float" office:value="-0.006263275">
            <text:p>-0.006263275</text:p>
          </table:table-cell>
          <table:table-cell table:number-columns-repeated="4"/>
        </table:table-row>
        <table:table-row table:style-name="ro1">
          <table:table-cell office:value-type="float" office:value="356.786224365234">
            <text:p>356.7862243652</text:p>
          </table:table-cell>
          <table:table-cell office:value-type="float" office:value="-0.005944601">
            <text:p>-0.005944601</text:p>
          </table:table-cell>
          <table:table-cell table:number-columns-repeated="4"/>
        </table:table-row>
        <table:table-row table:style-name="ro1">
          <table:table-cell office:value-type="float" office:value="356.895935058594">
            <text:p>356.8959350586</text:p>
          </table:table-cell>
          <table:table-cell office:value-type="float" office:value="-0.006816398">
            <text:p>-0.006816398</text:p>
          </table:table-cell>
          <table:table-cell table:number-columns-repeated="4"/>
        </table:table-row>
        <table:table-row table:style-name="ro1">
          <table:table-cell office:value-type="float" office:value="357.005645751953">
            <text:p>357.005645752</text:p>
          </table:table-cell>
          <table:table-cell office:value-type="float" office:value="-0.009410129">
            <text:p>-0.009410129</text:p>
          </table:table-cell>
          <table:table-cell table:number-columns-repeated="4"/>
        </table:table-row>
        <table:table-row table:style-name="ro1">
          <table:table-cell office:value-type="float" office:value="357.115356445313">
            <text:p>357.1153564453</text:p>
          </table:table-cell>
          <table:table-cell office:value-type="float" office:value="0.0002181401">
            <text:p>0.0002181401</text:p>
          </table:table-cell>
          <table:table-cell table:number-columns-repeated="4"/>
        </table:table-row>
        <table:table-row table:style-name="ro1">
          <table:table-cell office:value-type="float" office:value="357.225067138672">
            <text:p>357.2250671387</text:p>
          </table:table-cell>
          <table:table-cell office:value-type="float" office:value="0.005477905">
            <text:p>0.005477905</text:p>
          </table:table-cell>
          <table:table-cell table:number-columns-repeated="4"/>
        </table:table-row>
        <table:table-row table:style-name="ro1">
          <table:table-cell office:value-type="float" office:value="357.334777832031">
            <text:p>357.334777832</text:p>
          </table:table-cell>
          <table:table-cell office:value-type="float" office:value="0.004093537">
            <text:p>0.004093537</text:p>
          </table:table-cell>
          <table:table-cell table:number-columns-repeated="4"/>
        </table:table-row>
        <table:table-row table:style-name="ro1">
          <table:table-cell office:value-type="float" office:value="357.444519042969">
            <text:p>357.444519043</text:p>
          </table:table-cell>
          <table:table-cell office:value-type="float" office:value="0.008150487">
            <text:p>0.008150487</text:p>
          </table:table-cell>
          <table:table-cell table:number-columns-repeated="4"/>
        </table:table-row>
        <table:table-row table:style-name="ro1">
          <table:table-cell office:value-type="float" office:value="357.554260253906">
            <text:p>357.5542602539</text:p>
          </table:table-cell>
          <table:table-cell office:value-type="float" office:value="-0.003641653">
            <text:p>-0.003641653</text:p>
          </table:table-cell>
          <table:table-cell table:number-columns-repeated="4"/>
        </table:table-row>
        <table:table-row table:style-name="ro1">
          <table:table-cell office:value-type="float" office:value="357.664001464844">
            <text:p>357.6640014648</text:p>
          </table:table-cell>
          <table:table-cell office:value-type="float" office:value="-0.000903605">
            <text:p>-0.000903605</text:p>
          </table:table-cell>
          <table:table-cell table:number-columns-repeated="4"/>
        </table:table-row>
        <table:table-row table:style-name="ro1">
          <table:table-cell office:value-type="float" office:value="357.773742675781">
            <text:p>357.7737426758</text:p>
          </table:table-cell>
          <table:table-cell office:value-type="float" office:value="0.01641667">
            <text:p>0.01641667</text:p>
          </table:table-cell>
          <table:table-cell table:number-columns-repeated="4"/>
        </table:table-row>
        <table:table-row table:style-name="ro1">
          <table:table-cell office:value-type="float" office:value="357.883514404297">
            <text:p>357.8835144043</text:p>
          </table:table-cell>
          <table:table-cell office:value-type="float" office:value="0.0009488664">
            <text:p>0.0009488664</text:p>
          </table:table-cell>
          <table:table-cell table:number-columns-repeated="4"/>
        </table:table-row>
        <table:table-row table:style-name="ro1">
          <table:table-cell office:value-type="float" office:value="357.993286132813">
            <text:p>357.9932861328</text:p>
          </table:table-cell>
          <table:table-cell office:value-type="float" office:value="-0.001653329">
            <text:p>-0.001653329</text:p>
          </table:table-cell>
          <table:table-cell table:number-columns-repeated="4"/>
        </table:table-row>
        <table:table-row table:style-name="ro1">
          <table:table-cell office:value-type="float" office:value="358.10302734375">
            <text:p>358.1030273438</text:p>
          </table:table-cell>
          <table:table-cell office:value-type="float" office:value="0.009905946">
            <text:p>0.009905946</text:p>
          </table:table-cell>
          <table:table-cell table:number-columns-repeated="4"/>
        </table:table-row>
        <table:table-row table:style-name="ro1">
          <table:table-cell office:value-type="float" office:value="358.212829589844">
            <text:p>358.2128295898</text:p>
          </table:table-cell>
          <table:table-cell office:value-type="float" office:value="0.01082639">
            <text:p>0.01082639</text:p>
          </table:table-cell>
          <table:table-cell table:number-columns-repeated="4"/>
        </table:table-row>
        <table:table-row table:style-name="ro1">
          <table:table-cell office:value-type="float" office:value="358.322601318359">
            <text:p>358.3226013184</text:p>
          </table:table-cell>
          <table:table-cell office:value-type="float" office:value="0.001810054">
            <text:p>0.001810054</text:p>
          </table:table-cell>
          <table:table-cell table:number-columns-repeated="4"/>
        </table:table-row>
        <table:table-row table:style-name="ro1">
          <table:table-cell office:value-type="float" office:value="358.432373046875">
            <text:p>358.4323730469</text:p>
          </table:table-cell>
          <table:table-cell office:value-type="float" office:value="0.007426285">
            <text:p>0.007426285</text:p>
          </table:table-cell>
          <table:table-cell table:number-columns-repeated="4"/>
        </table:table-row>
        <table:table-row table:style-name="ro1">
          <table:table-cell office:value-type="float" office:value="358.542175292969">
            <text:p>358.542175293</text:p>
          </table:table-cell>
          <table:table-cell office:value-type="float" office:value="-0.005413832">
            <text:p>-0.005413832</text:p>
          </table:table-cell>
          <table:table-cell table:number-columns-repeated="4"/>
        </table:table-row>
        <table:table-row table:style-name="ro1">
          <table:table-cell office:value-type="float" office:value="358.651977539063">
            <text:p>358.6519775391</text:p>
          </table:table-cell>
          <table:table-cell office:value-type="float" office:value="0.001470443">
            <text:p>0.001470443</text:p>
          </table:table-cell>
          <table:table-cell table:number-columns-repeated="4"/>
        </table:table-row>
        <table:table-row table:style-name="ro1">
          <table:table-cell office:value-type="float" office:value="358.761779785156">
            <text:p>358.7617797852</text:p>
          </table:table-cell>
          <table:table-cell office:value-type="float" office:value="0.010342">
            <text:p>0.010342</text:p>
          </table:table-cell>
          <table:table-cell table:number-columns-repeated="4"/>
        </table:table-row>
        <table:table-row table:style-name="ro1">
          <table:table-cell office:value-type="float" office:value="358.871612548828">
            <text:p>358.8716125488</text:p>
          </table:table-cell>
          <table:table-cell office:value-type="float" office:value="-0.005602581">
            <text:p>-0.005602581</text:p>
          </table:table-cell>
          <table:table-cell table:number-columns-repeated="4"/>
        </table:table-row>
        <table:table-row table:style-name="ro1">
          <table:table-cell office:value-type="float" office:value="358.981414794922">
            <text:p>358.9814147949</text:p>
          </table:table-cell>
          <table:table-cell office:value-type="float" office:value="0.003502237">
            <text:p>0.003502237</text:p>
          </table:table-cell>
          <table:table-cell table:number-columns-repeated="4"/>
        </table:table-row>
        <table:table-row table:style-name="ro1">
          <table:table-cell office:value-type="float" office:value="359.091247558594">
            <text:p>359.0912475586</text:p>
          </table:table-cell>
          <table:table-cell office:value-type="float" office:value="0.01546083">
            <text:p>0.01546083</text:p>
          </table:table-cell>
          <table:table-cell table:number-columns-repeated="4"/>
        </table:table-row>
        <table:table-row table:style-name="ro1">
          <table:table-cell office:value-type="float" office:value="359.201080322266">
            <text:p>359.2010803223</text:p>
          </table:table-cell>
          <table:table-cell office:value-type="float" office:value="0.005875281">
            <text:p>0.005875281</text:p>
          </table:table-cell>
          <table:table-cell table:number-columns-repeated="4"/>
        </table:table-row>
        <table:table-row table:style-name="ro1">
          <table:table-cell office:value-type="float" office:value="359.310913085938">
            <text:p>359.3109130859</text:p>
          </table:table-cell>
          <table:table-cell office:value-type="float" office:value="0.002133033">
            <text:p>0.002133033</text:p>
          </table:table-cell>
          <table:table-cell table:number-columns-repeated="4"/>
        </table:table-row>
        <table:table-row table:style-name="ro1">
          <table:table-cell office:value-type="float" office:value="359.420776367188">
            <text:p>359.4207763672</text:p>
          </table:table-cell>
          <table:table-cell office:value-type="float" office:value="-0.01004291">
            <text:p>-0.01004291</text:p>
          </table:table-cell>
          <table:table-cell table:number-columns-repeated="4"/>
        </table:table-row>
        <table:table-row table:style-name="ro1">
          <table:table-cell office:value-type="float" office:value="359.530609130859">
            <text:p>359.5306091309</text:p>
          </table:table-cell>
          <table:table-cell office:value-type="float" office:value="0.01314302">
            <text:p>0.01314302</text:p>
          </table:table-cell>
          <table:table-cell table:number-columns-repeated="4"/>
        </table:table-row>
        <table:table-row table:style-name="ro1">
          <table:table-cell office:value-type="float" office:value="359.640472412109">
            <text:p>359.6404724121</text:p>
          </table:table-cell>
          <table:table-cell office:value-type="float" office:value="-0.0001372089">
            <text:p>-0.0001372089</text:p>
          </table:table-cell>
          <table:table-cell table:number-columns-repeated="4"/>
        </table:table-row>
        <table:table-row table:style-name="ro1">
          <table:table-cell office:value-type="float" office:value="359.750335693359">
            <text:p>359.7503356934</text:p>
          </table:table-cell>
          <table:table-cell office:value-type="float" office:value="-0.001659479">
            <text:p>-0.001659479</text:p>
          </table:table-cell>
          <table:table-cell table:number-columns-repeated="4"/>
        </table:table-row>
        <table:table-row table:style-name="ro1">
          <table:table-cell office:value-type="float" office:value="359.860198974609">
            <text:p>359.8601989746</text:p>
          </table:table-cell>
          <table:table-cell office:value-type="float" office:value="0.000323459">
            <text:p>0.000323459</text:p>
          </table:table-cell>
          <table:table-cell table:number-columns-repeated="4"/>
        </table:table-row>
        <table:table-row table:style-name="ro1">
          <table:table-cell office:value-type="float" office:value="359.970092773438">
            <text:p>359.9700927734</text:p>
          </table:table-cell>
          <table:table-cell office:value-type="float" office:value="0.006907609">
            <text:p>0.006907609</text:p>
          </table:table-cell>
          <table:table-cell table:number-columns-repeated="4"/>
        </table:table-row>
        <table:table-row table:style-name="ro1">
          <table:table-cell office:value-type="float" office:value="360.079986572266">
            <text:p>360.0799865723</text:p>
          </table:table-cell>
          <table:table-cell office:value-type="float" office:value="-0.006675743">
            <text:p>-0.006675743</text:p>
          </table:table-cell>
          <table:table-cell table:number-columns-repeated="4"/>
        </table:table-row>
        <table:table-row table:style-name="ro1">
          <table:table-cell office:value-type="float" office:value="360.189849853516">
            <text:p>360.1898498535</text:p>
          </table:table-cell>
          <table:table-cell office:value-type="float" office:value="0.01248182">
            <text:p>0.01248182</text:p>
          </table:table-cell>
          <table:table-cell table:number-columns-repeated="4"/>
        </table:table-row>
        <table:table-row table:style-name="ro1">
          <table:table-cell office:value-type="float" office:value="360.299743652344">
            <text:p>360.2997436523</text:p>
          </table:table-cell>
          <table:table-cell office:value-type="float" office:value="0.01153227">
            <text:p>0.01153227</text:p>
          </table:table-cell>
          <table:table-cell table:number-columns-repeated="4"/>
        </table:table-row>
        <table:table-row table:style-name="ro1">
          <table:table-cell office:value-type="float" office:value="360.40966796875">
            <text:p>360.4096679688</text:p>
          </table:table-cell>
          <table:table-cell office:value-type="float" office:value="0.009537775">
            <text:p>0.009537775</text:p>
          </table:table-cell>
          <table:table-cell table:number-columns-repeated="4"/>
        </table:table-row>
        <table:table-row table:style-name="ro1">
          <table:table-cell office:value-type="float" office:value="360.519561767578">
            <text:p>360.5195617676</text:p>
          </table:table-cell>
          <table:table-cell office:value-type="float" office:value="0.003350078">
            <text:p>0.003350078</text:p>
          </table:table-cell>
          <table:table-cell table:number-columns-repeated="4"/>
        </table:table-row>
        <table:table-row table:style-name="ro1">
          <table:table-cell office:value-type="float" office:value="360.629486083984">
            <text:p>360.629486084</text:p>
          </table:table-cell>
          <table:table-cell office:value-type="float" office:value="0.003113319">
            <text:p>0.003113319</text:p>
          </table:table-cell>
          <table:table-cell table:number-columns-repeated="4"/>
        </table:table-row>
        <table:table-row table:style-name="ro1">
          <table:table-cell office:value-type="float" office:value="360.739410400391">
            <text:p>360.7394104004</text:p>
          </table:table-cell>
          <table:table-cell office:value-type="float" office:value="-0.003108263">
            <text:p>-0.003108263</text:p>
          </table:table-cell>
          <table:table-cell table:number-columns-repeated="4"/>
        </table:table-row>
        <table:table-row table:style-name="ro1">
          <table:table-cell office:value-type="float" office:value="360.849334716797">
            <text:p>360.8493347168</text:p>
          </table:table-cell>
          <table:table-cell office:value-type="float" office:value="0.006422913">
            <text:p>0.006422913</text:p>
          </table:table-cell>
          <table:table-cell table:number-columns-repeated="4"/>
        </table:table-row>
        <table:table-row table:style-name="ro1">
          <table:table-cell office:value-type="float" office:value="360.959259033203">
            <text:p>360.9592590332</text:p>
          </table:table-cell>
          <table:table-cell office:value-type="float" office:value="-0.007831322">
            <text:p>-0.007831322</text:p>
          </table:table-cell>
          <table:table-cell table:number-columns-repeated="4"/>
        </table:table-row>
        <table:table-row table:style-name="ro1">
          <table:table-cell office:value-type="float" office:value="361.069213867188">
            <text:p>361.0692138672</text:p>
          </table:table-cell>
          <table:table-cell office:value-type="float" office:value="0.0007206852">
            <text:p>0.0007206852</text:p>
          </table:table-cell>
          <table:table-cell table:number-columns-repeated="4"/>
        </table:table-row>
        <table:table-row table:style-name="ro1">
          <table:table-cell office:value-type="float" office:value="361.179168701172">
            <text:p>361.1791687012</text:p>
          </table:table-cell>
          <table:table-cell office:value-type="float" office:value="0.0007806194">
            <text:p>0.0007806194</text:p>
          </table:table-cell>
          <table:table-cell table:number-columns-repeated="4"/>
        </table:table-row>
        <table:table-row table:style-name="ro1">
          <table:table-cell office:value-type="float" office:value="361.289093017578">
            <text:p>361.2890930176</text:p>
          </table:table-cell>
          <table:table-cell office:value-type="float" office:value="0.002254388">
            <text:p>0.002254388</text:p>
          </table:table-cell>
          <table:table-cell table:number-columns-repeated="4"/>
        </table:table-row>
        <table:table-row table:style-name="ro1">
          <table:table-cell office:value-type="float" office:value="361.399078369141">
            <text:p>361.3990783691</text:p>
          </table:table-cell>
          <table:table-cell office:value-type="float" office:value="0.003326203">
            <text:p>0.003326203</text:p>
          </table:table-cell>
          <table:table-cell table:number-columns-repeated="4"/>
        </table:table-row>
        <table:table-row table:style-name="ro1">
          <table:table-cell office:value-type="float" office:value="361.509033203125">
            <text:p>361.5090332031</text:p>
          </table:table-cell>
          <table:table-cell office:value-type="float" office:value="-0.005962112">
            <text:p>-0.005962112</text:p>
          </table:table-cell>
          <table:table-cell table:number-columns-repeated="4"/>
        </table:table-row>
        <table:table-row table:style-name="ro1">
          <table:table-cell office:value-type="float" office:value="361.619018554688">
            <text:p>361.6190185547</text:p>
          </table:table-cell>
          <table:table-cell office:value-type="float" office:value="-0.00528988">
            <text:p>-0.00528988</text:p>
          </table:table-cell>
          <table:table-cell table:number-columns-repeated="4"/>
        </table:table-row>
        <table:table-row table:style-name="ro1">
          <table:table-cell office:value-type="float" office:value="361.728973388672">
            <text:p>361.7289733887</text:p>
          </table:table-cell>
          <table:table-cell office:value-type="float" office:value="0.008498705">
            <text:p>0.008498705</text:p>
          </table:table-cell>
          <table:table-cell table:number-columns-repeated="4"/>
        </table:table-row>
        <table:table-row table:style-name="ro1">
          <table:table-cell office:value-type="float" office:value="361.838958740234">
            <text:p>361.8389587402</text:p>
          </table:table-cell>
          <table:table-cell office:value-type="float" office:value="0.002369031">
            <text:p>0.002369031</text:p>
          </table:table-cell>
          <table:table-cell table:number-columns-repeated="4"/>
        </table:table-row>
        <table:table-row table:style-name="ro1">
          <table:table-cell office:value-type="float" office:value="361.948944091797">
            <text:p>361.9489440918</text:p>
          </table:table-cell>
          <table:table-cell office:value-type="float" office:value="0.0002387065">
            <text:p>0.0002387065</text:p>
          </table:table-cell>
          <table:table-cell table:number-columns-repeated="4"/>
        </table:table-row>
        <table:table-row table:style-name="ro1">
          <table:table-cell office:value-type="float" office:value="362.058959960938">
            <text:p>362.0589599609</text:p>
          </table:table-cell>
          <table:table-cell office:value-type="float" office:value="-0.001513499">
            <text:p>-0.001513499</text:p>
          </table:table-cell>
          <table:table-cell table:number-columns-repeated="4"/>
        </table:table-row>
        <table:table-row table:style-name="ro1">
          <table:table-cell office:value-type="float" office:value="362.1689453125">
            <text:p>362.1689453125</text:p>
          </table:table-cell>
          <table:table-cell office:value-type="float" office:value="0.00326536">
            <text:p>0.00326536</text:p>
          </table:table-cell>
          <table:table-cell table:number-columns-repeated="4"/>
        </table:table-row>
        <table:table-row table:style-name="ro1">
          <table:table-cell office:value-type="float" office:value="362.278961181641">
            <text:p>362.2789611816</text:p>
          </table:table-cell>
          <table:table-cell office:value-type="float" office:value="0.01850847">
            <text:p>0.01850847</text:p>
          </table:table-cell>
          <table:table-cell table:number-columns-repeated="4"/>
        </table:table-row>
        <table:table-row table:style-name="ro1">
          <table:table-cell office:value-type="float" office:value="362.388977050781">
            <text:p>362.3889770508</text:p>
          </table:table-cell>
          <table:table-cell office:value-type="float" office:value="0.01062765">
            <text:p>0.01062765</text:p>
          </table:table-cell>
          <table:table-cell table:number-columns-repeated="4"/>
        </table:table-row>
        <table:table-row table:style-name="ro1">
          <table:table-cell office:value-type="float" office:value="362.498992919922">
            <text:p>362.4989929199</text:p>
          </table:table-cell>
          <table:table-cell office:value-type="float" office:value="-0.002279438">
            <text:p>-0.002279438</text:p>
          </table:table-cell>
          <table:table-cell table:number-columns-repeated="4"/>
        </table:table-row>
        <table:table-row table:style-name="ro1">
          <table:table-cell office:value-type="float" office:value="362.609039306641">
            <text:p>362.6090393066</text:p>
          </table:table-cell>
          <table:table-cell office:value-type="float" office:value="-0.002452605">
            <text:p>-0.002452605</text:p>
          </table:table-cell>
          <table:table-cell table:number-columns-repeated="4"/>
        </table:table-row>
        <table:table-row table:style-name="ro1">
          <table:table-cell office:value-type="float" office:value="362.719055175781">
            <text:p>362.7190551758</text:p>
          </table:table-cell>
          <table:table-cell office:value-type="float" office:value="0.008196532">
            <text:p>0.008196532</text:p>
          </table:table-cell>
          <table:table-cell table:number-columns-repeated="4"/>
        </table:table-row>
        <table:table-row table:style-name="ro1">
          <table:table-cell office:value-type="float" office:value="362.8291015625">
            <text:p>362.8291015625</text:p>
          </table:table-cell>
          <table:table-cell office:value-type="float" office:value="0.01274283">
            <text:p>0.01274283</text:p>
          </table:table-cell>
          <table:table-cell table:number-columns-repeated="4"/>
        </table:table-row>
        <table:table-row table:style-name="ro1">
          <table:table-cell office:value-type="float" office:value="362.939147949219">
            <text:p>362.9391479492</text:p>
          </table:table-cell>
          <table:table-cell office:value-type="float" office:value="0.001461797">
            <text:p>0.001461797</text:p>
          </table:table-cell>
          <table:table-cell table:number-columns-repeated="4"/>
        </table:table-row>
        <table:table-row table:style-name="ro1">
          <table:table-cell office:value-type="float" office:value="363.049224853516">
            <text:p>363.0492248535</text:p>
          </table:table-cell>
          <table:table-cell office:value-type="float" office:value="-0.001300946">
            <text:p>-0.001300946</text:p>
          </table:table-cell>
          <table:table-cell table:number-columns-repeated="4"/>
        </table:table-row>
        <table:table-row table:style-name="ro1">
          <table:table-cell office:value-type="float" office:value="363.159271240234">
            <text:p>363.1592712402</text:p>
          </table:table-cell>
          <table:table-cell office:value-type="float" office:value="-0.0006351495">
            <text:p>-0.0006351495</text:p>
          </table:table-cell>
          <table:table-cell table:number-columns-repeated="4"/>
        </table:table-row>
        <table:table-row table:style-name="ro1">
          <table:table-cell office:value-type="float" office:value="363.269348144531">
            <text:p>363.2693481445</text:p>
          </table:table-cell>
          <table:table-cell office:value-type="float" office:value="0.006659418">
            <text:p>0.006659418</text:p>
          </table:table-cell>
          <table:table-cell table:number-columns-repeated="4"/>
        </table:table-row>
        <table:table-row table:style-name="ro1">
          <table:table-cell office:value-type="float" office:value="363.37939453125">
            <text:p>363.3793945313</text:p>
          </table:table-cell>
          <table:table-cell office:value-type="float" office:value="0.006803073">
            <text:p>0.006803073</text:p>
          </table:table-cell>
          <table:table-cell table:number-columns-repeated="4"/>
        </table:table-row>
        <table:table-row table:style-name="ro1">
          <table:table-cell office:value-type="float" office:value="363.489501953125">
            <text:p>363.4895019531</text:p>
          </table:table-cell>
          <table:table-cell office:value-type="float" office:value="-0.006309646">
            <text:p>-0.006309646</text:p>
          </table:table-cell>
          <table:table-cell table:number-columns-repeated="4"/>
        </table:table-row>
        <table:table-row table:style-name="ro1">
          <table:table-cell office:value-type="float" office:value="363.599578857422">
            <text:p>363.5995788574</text:p>
          </table:table-cell>
          <table:table-cell office:value-type="float" office:value="0.01453447">
            <text:p>0.01453447</text:p>
          </table:table-cell>
          <table:table-cell table:number-columns-repeated="4"/>
        </table:table-row>
        <table:table-row table:style-name="ro1">
          <table:table-cell office:value-type="float" office:value="363.709655761719">
            <text:p>363.7096557617</text:p>
          </table:table-cell>
          <table:table-cell office:value-type="float" office:value="0.008714032">
            <text:p>0.008714032</text:p>
          </table:table-cell>
          <table:table-cell table:number-columns-repeated="4"/>
        </table:table-row>
        <table:table-row table:style-name="ro1">
          <table:table-cell office:value-type="float" office:value="363.819763183594">
            <text:p>363.8197631836</text:p>
          </table:table-cell>
          <table:table-cell office:value-type="float" office:value="0.00562245">
            <text:p>0.00562245</text:p>
          </table:table-cell>
          <table:table-cell table:number-columns-repeated="4"/>
        </table:table-row>
        <table:table-row table:style-name="ro1">
          <table:table-cell office:value-type="float" office:value="363.929870605469">
            <text:p>363.9298706055</text:p>
          </table:table-cell>
          <table:table-cell office:value-type="float" office:value="-0.006696374">
            <text:p>-0.006696374</text:p>
          </table:table-cell>
          <table:table-cell table:number-columns-repeated="4"/>
        </table:table-row>
        <table:table-row table:style-name="ro1">
          <table:table-cell office:value-type="float" office:value="364.039978027344">
            <text:p>364.0399780273</text:p>
          </table:table-cell>
          <table:table-cell office:value-type="float" office:value="-0.00745143">
            <text:p>-0.00745143</text:p>
          </table:table-cell>
          <table:table-cell table:number-columns-repeated="4"/>
        </table:table-row>
        <table:table-row table:style-name="ro1">
          <table:table-cell office:value-type="float" office:value="364.150085449219">
            <text:p>364.1500854492</text:p>
          </table:table-cell>
          <table:table-cell office:value-type="float" office:value="-0.004631709">
            <text:p>-0.004631709</text:p>
          </table:table-cell>
          <table:table-cell table:number-columns-repeated="4"/>
        </table:table-row>
        <table:table-row table:style-name="ro1">
          <table:table-cell office:value-type="float" office:value="364.260223388672">
            <text:p>364.2602233887</text:p>
          </table:table-cell>
          <table:table-cell office:value-type="float" office:value="-0.002732802">
            <text:p>-0.002732802</text:p>
          </table:table-cell>
          <table:table-cell table:number-columns-repeated="4"/>
        </table:table-row>
        <table:table-row table:style-name="ro1">
          <table:table-cell office:value-type="float" office:value="364.370330810547">
            <text:p>364.3703308105</text:p>
          </table:table-cell>
          <table:table-cell office:value-type="float" office:value="-0.00553824">
            <text:p>-0.00553824</text:p>
          </table:table-cell>
          <table:table-cell table:number-columns-repeated="4"/>
        </table:table-row>
        <table:table-row table:style-name="ro1">
          <table:table-cell office:value-type="float" office:value="364.48046875">
            <text:p>364.48046875</text:p>
          </table:table-cell>
          <table:table-cell office:value-type="float" office:value="0.006955812">
            <text:p>0.006955812</text:p>
          </table:table-cell>
          <table:table-cell table:number-columns-repeated="4"/>
        </table:table-row>
        <table:table-row table:style-name="ro1">
          <table:table-cell office:value-type="float" office:value="364.590606689453">
            <text:p>364.5906066895</text:p>
          </table:table-cell>
          <table:table-cell office:value-type="float" office:value="0.0116093">
            <text:p>0.0116093</text:p>
          </table:table-cell>
          <table:table-cell table:number-columns-repeated="4"/>
        </table:table-row>
        <table:table-row table:style-name="ro1">
          <table:table-cell office:value-type="float" office:value="364.700775146484">
            <text:p>364.7007751465</text:p>
          </table:table-cell>
          <table:table-cell office:value-type="float" office:value="0.003360508">
            <text:p>0.003360508</text:p>
          </table:table-cell>
          <table:table-cell table:number-columns-repeated="4"/>
        </table:table-row>
        <table:table-row table:style-name="ro1">
          <table:table-cell office:value-type="float" office:value="364.810913085938">
            <text:p>364.8109130859</text:p>
          </table:table-cell>
          <table:table-cell office:value-type="float" office:value="0.006302217">
            <text:p>0.006302217</text:p>
          </table:table-cell>
          <table:table-cell table:number-columns-repeated="4"/>
        </table:table-row>
        <table:table-row table:style-name="ro1">
          <table:table-cell office:value-type="float" office:value="364.921081542969">
            <text:p>364.921081543</text:p>
          </table:table-cell>
          <table:table-cell office:value-type="float" office:value="-0.003567717">
            <text:p>-0.003567717</text:p>
          </table:table-cell>
          <table:table-cell table:number-columns-repeated="4"/>
        </table:table-row>
        <table:table-row table:style-name="ro1">
          <table:table-cell office:value-type="float" office:value="365.03125">
            <text:p>365.03125</text:p>
          </table:table-cell>
          <table:table-cell office:value-type="float" office:value="-0.006023728">
            <text:p>-0.006023728</text:p>
          </table:table-cell>
          <table:table-cell table:number-columns-repeated="4"/>
        </table:table-row>
        <table:table-row table:style-name="ro1">
          <table:table-cell office:value-type="float" office:value="365.141418457031">
            <text:p>365.141418457</text:p>
          </table:table-cell>
          <table:table-cell office:value-type="float" office:value="-0.008957">
            <text:p>-0.008957</text:p>
          </table:table-cell>
          <table:table-cell table:number-columns-repeated="4"/>
        </table:table-row>
        <table:table-row table:style-name="ro1">
          <table:table-cell office:value-type="float" office:value="365.251586914063">
            <text:p>365.2515869141</text:p>
          </table:table-cell>
          <table:table-cell office:value-type="float" office:value="0.01031767">
            <text:p>0.01031767</text:p>
          </table:table-cell>
          <table:table-cell table:number-columns-repeated="4"/>
        </table:table-row>
        <table:table-row table:style-name="ro1">
          <table:table-cell office:value-type="float" office:value="365.361785888672">
            <text:p>365.3617858887</text:p>
          </table:table-cell>
          <table:table-cell office:value-type="float" office:value="0.02966298">
            <text:p>0.02966298</text:p>
          </table:table-cell>
          <table:table-cell table:number-columns-repeated="4"/>
        </table:table-row>
        <table:table-row table:style-name="ro1">
          <table:table-cell office:value-type="float" office:value="365.471984863281">
            <text:p>365.4719848633</text:p>
          </table:table-cell>
          <table:table-cell office:value-type="float" office:value="0.00480073">
            <text:p>0.00480073</text:p>
          </table:table-cell>
          <table:table-cell table:number-columns-repeated="4"/>
        </table:table-row>
        <table:table-row table:style-name="ro1">
          <table:table-cell office:value-type="float" office:value="365.582183837891">
            <text:p>365.5821838379</text:p>
          </table:table-cell>
          <table:table-cell office:value-type="float" office:value="0.00861555">
            <text:p>0.00861555</text:p>
          </table:table-cell>
          <table:table-cell table:number-columns-repeated="4"/>
        </table:table-row>
        <table:table-row table:style-name="ro1">
          <table:table-cell office:value-type="float" office:value="365.6923828125">
            <text:p>365.6923828125</text:p>
          </table:table-cell>
          <table:table-cell office:value-type="float" office:value="0.009441358">
            <text:p>0.009441358</text:p>
          </table:table-cell>
          <table:table-cell table:number-columns-repeated="4"/>
        </table:table-row>
        <table:table-row table:style-name="ro1">
          <table:table-cell office:value-type="float" office:value="365.802581787109">
            <text:p>365.8025817871</text:p>
          </table:table-cell>
          <table:table-cell office:value-type="float" office:value="-0.0008446686">
            <text:p>-0.0008446686</text:p>
          </table:table-cell>
          <table:table-cell table:number-columns-repeated="4"/>
        </table:table-row>
        <table:table-row table:style-name="ro1">
          <table:table-cell office:value-type="float" office:value="365.912811279297">
            <text:p>365.9128112793</text:p>
          </table:table-cell>
          <table:table-cell office:value-type="float" office:value="0.009577835">
            <text:p>0.009577835</text:p>
          </table:table-cell>
          <table:table-cell table:number-columns-repeated="4"/>
        </table:table-row>
        <table:table-row table:style-name="ro1">
          <table:table-cell office:value-type="float" office:value="366.023010253906">
            <text:p>366.0230102539</text:p>
          </table:table-cell>
          <table:table-cell office:value-type="float" office:value="0.003853276">
            <text:p>0.003853276</text:p>
          </table:table-cell>
          <table:table-cell table:number-columns-repeated="4"/>
        </table:table-row>
        <table:table-row table:style-name="ro1">
          <table:table-cell office:value-type="float" office:value="366.133239746094">
            <text:p>366.1332397461</text:p>
          </table:table-cell>
          <table:table-cell office:value-type="float" office:value="0.004449168">
            <text:p>0.004449168</text:p>
          </table:table-cell>
          <table:table-cell table:number-columns-repeated="4"/>
        </table:table-row>
        <table:table-row table:style-name="ro1">
          <table:table-cell office:value-type="float" office:value="366.243499755859">
            <text:p>366.2434997559</text:p>
          </table:table-cell>
          <table:table-cell office:value-type="float" office:value="-0.002762512">
            <text:p>-0.002762512</text:p>
          </table:table-cell>
          <table:table-cell table:number-columns-repeated="4"/>
        </table:table-row>
        <table:table-row table:style-name="ro1">
          <table:table-cell office:value-type="float" office:value="366.353729248047">
            <text:p>366.353729248</text:p>
          </table:table-cell>
          <table:table-cell office:value-type="float" office:value="-0.0006205959">
            <text:p>-0.0006205959</text:p>
          </table:table-cell>
          <table:table-cell table:number-columns-repeated="4"/>
        </table:table-row>
        <table:table-row table:style-name="ro1">
          <table:table-cell office:value-type="float" office:value="366.463989257813">
            <text:p>366.4639892578</text:p>
          </table:table-cell>
          <table:table-cell office:value-type="float" office:value="-0.0007753328">
            <text:p>-0.0007753328</text:p>
          </table:table-cell>
          <table:table-cell table:number-columns-repeated="4"/>
        </table:table-row>
        <table:table-row table:style-name="ro1">
          <table:table-cell office:value-type="float" office:value="366.57421875">
            <text:p>366.57421875</text:p>
          </table:table-cell>
          <table:table-cell office:value-type="float" office:value="0.001876101">
            <text:p>0.001876101</text:p>
          </table:table-cell>
          <table:table-cell table:number-columns-repeated="4"/>
        </table:table-row>
        <table:table-row table:style-name="ro1">
          <table:table-cell office:value-type="float" office:value="366.684478759766">
            <text:p>366.6844787598</text:p>
          </table:table-cell>
          <table:table-cell office:value-type="float" office:value="-0.001486711">
            <text:p>-0.001486711</text:p>
          </table:table-cell>
          <table:table-cell table:number-columns-repeated="4"/>
        </table:table-row>
        <table:table-row table:style-name="ro1">
          <table:table-cell office:value-type="float" office:value="366.794738769531">
            <text:p>366.7947387695</text:p>
          </table:table-cell>
          <table:table-cell office:value-type="float" office:value="0.0100783">
            <text:p>0.0100783</text:p>
          </table:table-cell>
          <table:table-cell table:number-columns-repeated="4"/>
        </table:table-row>
        <table:table-row table:style-name="ro1">
          <table:table-cell office:value-type="float" office:value="366.905029296875">
            <text:p>366.9050292969</text:p>
          </table:table-cell>
          <table:table-cell office:value-type="float" office:value="-0.002993159">
            <text:p>-0.002993159</text:p>
          </table:table-cell>
          <table:table-cell table:number-columns-repeated="4"/>
        </table:table-row>
        <table:table-row table:style-name="ro1">
          <table:table-cell office:value-type="float" office:value="367.015289306641">
            <text:p>367.0152893066</text:p>
          </table:table-cell>
          <table:table-cell office:value-type="float" office:value="0.0007360757">
            <text:p>0.0007360757</text:p>
          </table:table-cell>
          <table:table-cell table:number-columns-repeated="4"/>
        </table:table-row>
        <table:table-row table:style-name="ro1">
          <table:table-cell office:value-type="float" office:value="367.125579833984">
            <text:p>367.125579834</text:p>
          </table:table-cell>
          <table:table-cell office:value-type="float" office:value="0.01316913">
            <text:p>0.01316913</text:p>
          </table:table-cell>
          <table:table-cell table:number-columns-repeated="4"/>
        </table:table-row>
        <table:table-row table:style-name="ro1">
          <table:table-cell office:value-type="float" office:value="367.235870361328">
            <text:p>367.2358703613</text:p>
          </table:table-cell>
          <table:table-cell office:value-type="float" office:value="0.01611075">
            <text:p>0.01611075</text:p>
          </table:table-cell>
          <table:table-cell table:number-columns-repeated="4"/>
        </table:table-row>
        <table:table-row table:style-name="ro1">
          <table:table-cell office:value-type="float" office:value="367.346160888672">
            <text:p>367.3461608887</text:p>
          </table:table-cell>
          <table:table-cell office:value-type="float" office:value="0.02030856">
            <text:p>0.02030856</text:p>
          </table:table-cell>
          <table:table-cell table:number-columns-repeated="4"/>
        </table:table-row>
        <table:table-row table:style-name="ro1">
          <table:table-cell office:value-type="float" office:value="367.456481933594">
            <text:p>367.4564819336</text:p>
          </table:table-cell>
          <table:table-cell office:value-type="float" office:value="0.01004394">
            <text:p>0.01004394</text:p>
          </table:table-cell>
          <table:table-cell table:number-columns-repeated="4"/>
        </table:table-row>
        <table:table-row table:style-name="ro1">
          <table:table-cell office:value-type="float" office:value="367.566772460938">
            <text:p>367.5667724609</text:p>
          </table:table-cell>
          <table:table-cell office:value-type="float" office:value="-0.00592927">
            <text:p>-0.00592927</text:p>
          </table:table-cell>
          <table:table-cell table:number-columns-repeated="4"/>
        </table:table-row>
        <table:table-row table:style-name="ro1">
          <table:table-cell office:value-type="float" office:value="367.677093505859">
            <text:p>367.6770935059</text:p>
          </table:table-cell>
          <table:table-cell office:value-type="float" office:value="-0.003045841">
            <text:p>-0.003045841</text:p>
          </table:table-cell>
          <table:table-cell table:number-columns-repeated="4"/>
        </table:table-row>
        <table:table-row table:style-name="ro1">
          <table:table-cell office:value-type="float" office:value="367.787414550781">
            <text:p>367.7874145508</text:p>
          </table:table-cell>
          <table:table-cell office:value-type="float" office:value="-0.008325241">
            <text:p>-0.008325241</text:p>
          </table:table-cell>
          <table:table-cell table:number-columns-repeated="4"/>
        </table:table-row>
        <table:table-row table:style-name="ro1">
          <table:table-cell office:value-type="float" office:value="367.897766113281">
            <text:p>367.8977661133</text:p>
          </table:table-cell>
          <table:table-cell office:value-type="float" office:value="-0.008833534">
            <text:p>-0.008833534</text:p>
          </table:table-cell>
          <table:table-cell table:number-columns-repeated="4"/>
        </table:table-row>
        <table:table-row table:style-name="ro1">
          <table:table-cell office:value-type="float" office:value="368.008087158203">
            <text:p>368.0080871582</text:p>
          </table:table-cell>
          <table:table-cell office:value-type="string">
            <text:p>7.232933E-05</text:p>
          </table:table-cell>
          <table:table-cell table:number-columns-repeated="4"/>
        </table:table-row>
        <table:table-row table:style-name="ro1">
          <table:table-cell office:value-type="float" office:value="368.118438720703">
            <text:p>368.1184387207</text:p>
          </table:table-cell>
          <table:table-cell office:value-type="float" office:value="-0.003217273">
            <text:p>-0.003217273</text:p>
          </table:table-cell>
          <table:table-cell table:number-columns-repeated="4"/>
        </table:table-row>
        <table:table-row table:style-name="ro1">
          <table:table-cell office:value-type="float" office:value="368.228759765625">
            <text:p>368.2287597656</text:p>
          </table:table-cell>
          <table:table-cell office:value-type="float" office:value="0.0001434464">
            <text:p>0.0001434464</text:p>
          </table:table-cell>
          <table:table-cell table:number-columns-repeated="4"/>
        </table:table-row>
        <table:table-row table:style-name="ro1">
          <table:table-cell office:value-type="float" office:value="368.339111328125">
            <text:p>368.3391113281</text:p>
          </table:table-cell>
          <table:table-cell office:value-type="float" office:value="-0.001044328">
            <text:p>-0.001044328</text:p>
          </table:table-cell>
          <table:table-cell table:number-columns-repeated="4"/>
        </table:table-row>
        <table:table-row table:style-name="ro1">
          <table:table-cell office:value-type="float" office:value="368.449493408203">
            <text:p>368.4494934082</text:p>
          </table:table-cell>
          <table:table-cell office:value-type="float" office:value="0.002882064">
            <text:p>0.002882064</text:p>
          </table:table-cell>
          <table:table-cell table:number-columns-repeated="4"/>
        </table:table-row>
        <table:table-row table:style-name="ro1">
          <table:table-cell office:value-type="float" office:value="368.559844970703">
            <text:p>368.5598449707</text:p>
          </table:table-cell>
          <table:table-cell office:value-type="float" office:value="0.00835109">
            <text:p>0.00835109</text:p>
          </table:table-cell>
          <table:table-cell table:number-columns-repeated="4"/>
        </table:table-row>
        <table:table-row table:style-name="ro1">
          <table:table-cell office:value-type="float" office:value="368.670227050781">
            <text:p>368.6702270508</text:p>
          </table:table-cell>
          <table:table-cell office:value-type="float" office:value="-0.006550615">
            <text:p>-0.006550615</text:p>
          </table:table-cell>
          <table:table-cell table:number-columns-repeated="4"/>
        </table:table-row>
        <table:table-row table:style-name="ro1">
          <table:table-cell office:value-type="float" office:value="368.780609130859">
            <text:p>368.7806091309</text:p>
          </table:table-cell>
          <table:table-cell office:value-type="float" office:value="-0.003530797">
            <text:p>-0.003530797</text:p>
          </table:table-cell>
          <table:table-cell table:number-columns-repeated="4"/>
        </table:table-row>
        <table:table-row table:style-name="ro1">
          <table:table-cell office:value-type="float" office:value="368.890991210938">
            <text:p>368.8909912109</text:p>
          </table:table-cell>
          <table:table-cell office:value-type="float" office:value="-0.01011254">
            <text:p>-0.01011254</text:p>
          </table:table-cell>
          <table:table-cell table:number-columns-repeated="4"/>
        </table:table-row>
        <table:table-row table:style-name="ro1">
          <table:table-cell office:value-type="float" office:value="369.001373291016">
            <text:p>369.001373291</text:p>
          </table:table-cell>
          <table:table-cell office:value-type="float" office:value="0.0006881307">
            <text:p>0.0006881307</text:p>
          </table:table-cell>
          <table:table-cell table:number-columns-repeated="4"/>
        </table:table-row>
        <table:table-row table:style-name="ro1">
          <table:table-cell office:value-type="float" office:value="369.111755371094">
            <text:p>369.1117553711</text:p>
          </table:table-cell>
          <table:table-cell office:value-type="float" office:value="-0.008030651">
            <text:p>-0.008030651</text:p>
          </table:table-cell>
          <table:table-cell table:number-columns-repeated="4"/>
        </table:table-row>
        <table:table-row table:style-name="ro1">
          <table:table-cell office:value-type="float" office:value="369.22216796875">
            <text:p>369.2221679688</text:p>
          </table:table-cell>
          <table:table-cell office:value-type="float" office:value="-0.008453229">
            <text:p>-0.008453229</text:p>
          </table:table-cell>
          <table:table-cell table:number-columns-repeated="4"/>
        </table:table-row>
        <table:table-row table:style-name="ro1">
          <table:table-cell office:value-type="float" office:value="369.332580566406">
            <text:p>369.3325805664</text:p>
          </table:table-cell>
          <table:table-cell office:value-type="float" office:value="-0.008426443">
            <text:p>-0.008426443</text:p>
          </table:table-cell>
          <table:table-cell table:number-columns-repeated="4"/>
        </table:table-row>
        <table:table-row table:style-name="ro1">
          <table:table-cell office:value-type="float" office:value="369.442993164063">
            <text:p>369.4429931641</text:p>
          </table:table-cell>
          <table:table-cell office:value-type="float" office:value="-0.0005568189">
            <text:p>-0.0005568189</text:p>
          </table:table-cell>
          <table:table-cell table:number-columns-repeated="4"/>
        </table:table-row>
        <table:table-row table:style-name="ro1">
          <table:table-cell office:value-type="float" office:value="369.553405761719">
            <text:p>369.5534057617</text:p>
          </table:table-cell>
          <table:table-cell office:value-type="float" office:value="0.004165764">
            <text:p>0.004165764</text:p>
          </table:table-cell>
          <table:table-cell table:number-columns-repeated="4"/>
        </table:table-row>
        <table:table-row table:style-name="ro1">
          <table:table-cell office:value-type="float" office:value="369.663848876953">
            <text:p>369.663848877</text:p>
          </table:table-cell>
          <table:table-cell office:value-type="float" office:value="0.007046624">
            <text:p>0.007046624</text:p>
          </table:table-cell>
          <table:table-cell table:number-columns-repeated="4"/>
        </table:table-row>
        <table:table-row table:style-name="ro1">
          <table:table-cell office:value-type="float" office:value="369.774261474609">
            <text:p>369.7742614746</text:p>
          </table:table-cell>
          <table:table-cell office:value-type="float" office:value="-0.004215473">
            <text:p>-0.004215473</text:p>
          </table:table-cell>
          <table:table-cell table:number-columns-repeated="4"/>
        </table:table-row>
        <table:table-row table:style-name="ro1">
          <table:table-cell office:value-type="float" office:value="369.884704589844">
            <text:p>369.8847045898</text:p>
          </table:table-cell>
          <table:table-cell office:value-type="float" office:value="0.002779544">
            <text:p>0.002779544</text:p>
          </table:table-cell>
          <table:table-cell table:number-columns-repeated="4"/>
        </table:table-row>
        <table:table-row table:style-name="ro1">
          <table:table-cell office:value-type="float" office:value="369.995147705078">
            <text:p>369.9951477051</text:p>
          </table:table-cell>
          <table:table-cell office:value-type="float" office:value="-0.006252792">
            <text:p>-0.006252792</text:p>
          </table:table-cell>
          <table:table-cell table:number-columns-repeated="4"/>
        </table:table-row>
        <table:table-row table:style-name="ro1">
          <table:table-cell office:value-type="float" office:value="370.105621337891">
            <text:p>370.1056213379</text:p>
          </table:table-cell>
          <table:table-cell office:value-type="float" office:value="0.01075776">
            <text:p>0.01075776</text:p>
          </table:table-cell>
          <table:table-cell table:number-columns-repeated="4"/>
        </table:table-row>
        <table:table-row table:style-name="ro1">
          <table:table-cell office:value-type="float" office:value="370.216064453125">
            <text:p>370.2160644531</text:p>
          </table:table-cell>
          <table:table-cell office:value-type="float" office:value="0.007544273">
            <text:p>0.007544273</text:p>
          </table:table-cell>
          <table:table-cell table:number-columns-repeated="4"/>
        </table:table-row>
        <table:table-row table:style-name="ro1">
          <table:table-cell office:value-type="float" office:value="370.326538085938">
            <text:p>370.3265380859</text:p>
          </table:table-cell>
          <table:table-cell office:value-type="float" office:value="0.02032174">
            <text:p>0.02032174</text:p>
          </table:table-cell>
          <table:table-cell table:number-columns-repeated="4"/>
        </table:table-row>
        <table:table-row table:style-name="ro1">
          <table:table-cell office:value-type="float" office:value="370.43701171875">
            <text:p>370.4370117188</text:p>
          </table:table-cell>
          <table:table-cell office:value-type="float" office:value="0.01178832">
            <text:p>0.01178832</text:p>
          </table:table-cell>
          <table:table-cell table:number-columns-repeated="4"/>
        </table:table-row>
        <table:table-row table:style-name="ro1">
          <table:table-cell office:value-type="float" office:value="370.547485351563">
            <text:p>370.5474853516</text:p>
          </table:table-cell>
          <table:table-cell office:value-type="float" office:value="0.00240486">
            <text:p>0.00240486</text:p>
          </table:table-cell>
          <table:table-cell table:number-columns-repeated="4"/>
        </table:table-row>
        <table:table-row table:style-name="ro1">
          <table:table-cell office:value-type="float" office:value="370.657958984375">
            <text:p>370.6579589844</text:p>
          </table:table-cell>
          <table:table-cell office:value-type="float" office:value="-0.004557325">
            <text:p>-0.004557325</text:p>
          </table:table-cell>
          <table:table-cell table:number-columns-repeated="4"/>
        </table:table-row>
        <table:table-row table:style-name="ro1">
          <table:table-cell office:value-type="float" office:value="370.768432617188">
            <text:p>370.7684326172</text:p>
          </table:table-cell>
          <table:table-cell office:value-type="float" office:value="-0.01027698">
            <text:p>-0.01027698</text:p>
          </table:table-cell>
          <table:table-cell table:number-columns-repeated="4"/>
        </table:table-row>
        <table:table-row table:style-name="ro1">
          <table:table-cell office:value-type="float" office:value="370.878936767578">
            <text:p>370.8789367676</text:p>
          </table:table-cell>
          <table:table-cell office:value-type="float" office:value="0.007249857">
            <text:p>0.007249857</text:p>
          </table:table-cell>
          <table:table-cell table:number-columns-repeated="4"/>
        </table:table-row>
        <table:table-row table:style-name="ro1">
          <table:table-cell office:value-type="float" office:value="370.989440917969">
            <text:p>370.989440918</text:p>
          </table:table-cell>
          <table:table-cell office:value-type="float" office:value="-0.007159048">
            <text:p>-0.007159048</text:p>
          </table:table-cell>
          <table:table-cell table:number-columns-repeated="4"/>
        </table:table-row>
        <table:table-row table:style-name="ro1">
          <table:table-cell office:value-type="float" office:value="371.099945068359">
            <text:p>371.0999450684</text:p>
          </table:table-cell>
          <table:table-cell office:value-type="float" office:value="0.004879286">
            <text:p>0.004879286</text:p>
          </table:table-cell>
          <table:table-cell table:number-columns-repeated="4"/>
        </table:table-row>
        <table:table-row table:style-name="ro1">
          <table:table-cell office:value-type="float" office:value="371.21044921875">
            <text:p>371.2104492188</text:p>
          </table:table-cell>
          <table:table-cell office:value-type="float" office:value="-0.005309272">
            <text:p>-0.005309272</text:p>
          </table:table-cell>
          <table:table-cell table:number-columns-repeated="4"/>
        </table:table-row>
        <table:table-row table:style-name="ro1">
          <table:table-cell office:value-type="float" office:value="371.320983886719">
            <text:p>371.3209838867</text:p>
          </table:table-cell>
          <table:table-cell office:value-type="float" office:value="-0.004728318">
            <text:p>-0.004728318</text:p>
          </table:table-cell>
          <table:table-cell table:number-columns-repeated="4"/>
        </table:table-row>
        <table:table-row table:style-name="ro1">
          <table:table-cell office:value-type="float" office:value="371.431488037109">
            <text:p>371.4314880371</text:p>
          </table:table-cell>
          <table:table-cell office:value-type="float" office:value="0.001854537">
            <text:p>0.001854537</text:p>
          </table:table-cell>
          <table:table-cell table:number-columns-repeated="4"/>
        </table:table-row>
        <table:table-row table:style-name="ro1">
          <table:table-cell office:value-type="float" office:value="371.542022705078">
            <text:p>371.5420227051</text:p>
          </table:table-cell>
          <table:table-cell office:value-type="float" office:value="0.01341918">
            <text:p>0.01341918</text:p>
          </table:table-cell>
          <table:table-cell table:number-columns-repeated="4"/>
        </table:table-row>
        <table:table-row table:style-name="ro1">
          <table:table-cell office:value-type="float" office:value="371.652557373047">
            <text:p>371.652557373</text:p>
          </table:table-cell>
          <table:table-cell office:value-type="float" office:value="-0.007629526">
            <text:p>-0.007629526</text:p>
          </table:table-cell>
          <table:table-cell table:number-columns-repeated="4"/>
        </table:table-row>
        <table:table-row table:style-name="ro1">
          <table:table-cell office:value-type="float" office:value="371.763122558594">
            <text:p>371.7631225586</text:p>
          </table:table-cell>
          <table:table-cell office:value-type="float" office:value="-0.004839507">
            <text:p>-0.004839507</text:p>
          </table:table-cell>
          <table:table-cell table:number-columns-repeated="4"/>
        </table:table-row>
        <table:table-row table:style-name="ro1">
          <table:table-cell office:value-type="float" office:value="371.873657226563">
            <text:p>371.8736572266</text:p>
          </table:table-cell>
          <table:table-cell office:value-type="float" office:value="-0.008307681">
            <text:p>-0.008307681</text:p>
          </table:table-cell>
          <table:table-cell table:number-columns-repeated="4"/>
        </table:table-row>
        <table:table-row table:style-name="ro1">
          <table:table-cell office:value-type="float" office:value="371.984222412109">
            <text:p>371.9842224121</text:p>
          </table:table-cell>
          <table:table-cell office:value-type="float" office:value="0.003398918">
            <text:p>0.003398918</text:p>
          </table:table-cell>
          <table:table-cell table:number-columns-repeated="4"/>
        </table:table-row>
        <table:table-row table:style-name="ro1">
          <table:table-cell office:value-type="float" office:value="372.094787597656">
            <text:p>372.0947875977</text:p>
          </table:table-cell>
          <table:table-cell office:value-type="float" office:value="-0.005598886">
            <text:p>-0.005598886</text:p>
          </table:table-cell>
          <table:table-cell table:number-columns-repeated="4"/>
        </table:table-row>
        <table:table-row table:style-name="ro1">
          <table:table-cell office:value-type="float" office:value="372.205352783203">
            <text:p>372.2053527832</text:p>
          </table:table-cell>
          <table:table-cell office:value-type="float" office:value="-0.006488933">
            <text:p>-0.006488933</text:p>
          </table:table-cell>
          <table:table-cell table:number-columns-repeated="4"/>
        </table:table-row>
        <table:table-row table:style-name="ro1">
          <table:table-cell office:value-type="float" office:value="372.31591796875">
            <text:p>372.3159179688</text:p>
          </table:table-cell>
          <table:table-cell office:value-type="float" office:value="-0.005207733">
            <text:p>-0.005207733</text:p>
          </table:table-cell>
          <table:table-cell table:number-columns-repeated="4"/>
        </table:table-row>
        <table:table-row table:style-name="ro1">
          <table:table-cell office:value-type="float" office:value="372.426513671875">
            <text:p>372.4265136719</text:p>
          </table:table-cell>
          <table:table-cell office:value-type="float" office:value="-0.001049041">
            <text:p>-0.001049041</text:p>
          </table:table-cell>
          <table:table-cell table:number-columns-repeated="4"/>
        </table:table-row>
        <table:table-row table:style-name="ro1">
          <table:table-cell office:value-type="float" office:value="372.537078857422">
            <text:p>372.5370788574</text:p>
          </table:table-cell>
          <table:table-cell office:value-type="float" office:value="0.002408085">
            <text:p>0.002408085</text:p>
          </table:table-cell>
          <table:table-cell table:number-columns-repeated="4"/>
        </table:table-row>
        <table:table-row table:style-name="ro1">
          <table:table-cell office:value-type="float" office:value="372.647674560547">
            <text:p>372.6476745605</text:p>
          </table:table-cell>
          <table:table-cell office:value-type="float" office:value="-0.01064472">
            <text:p>-0.01064472</text:p>
          </table:table-cell>
          <table:table-cell table:number-columns-repeated="4"/>
        </table:table-row>
        <table:table-row table:style-name="ro1">
          <table:table-cell office:value-type="float" office:value="372.758270263672">
            <text:p>372.7582702637</text:p>
          </table:table-cell>
          <table:table-cell office:value-type="float" office:value="0.0003367566">
            <text:p>0.0003367566</text:p>
          </table:table-cell>
          <table:table-cell table:number-columns-repeated="4"/>
        </table:table-row>
        <table:table-row table:style-name="ro1">
          <table:table-cell office:value-type="float" office:value="372.868896484375">
            <text:p>372.8688964844</text:p>
          </table:table-cell>
          <table:table-cell office:value-type="float" office:value="0.006321796">
            <text:p>0.006321796</text:p>
          </table:table-cell>
          <table:table-cell table:number-columns-repeated="4"/>
        </table:table-row>
        <table:table-row table:style-name="ro1">
          <table:table-cell office:value-type="float" office:value="372.9794921875">
            <text:p>372.9794921875</text:p>
          </table:table-cell>
          <table:table-cell office:value-type="float" office:value="-0.01051965">
            <text:p>-0.01051965</text:p>
          </table:table-cell>
          <table:table-cell table:number-columns-repeated="4"/>
        </table:table-row>
        <table:table-row table:style-name="ro1">
          <table:table-cell office:value-type="float" office:value="373.090118408203">
            <text:p>373.0901184082</text:p>
          </table:table-cell>
          <table:table-cell office:value-type="float" office:value="-0.001236132">
            <text:p>-0.001236132</text:p>
          </table:table-cell>
          <table:table-cell table:number-columns-repeated="4"/>
        </table:table-row>
        <table:table-row table:style-name="ro1">
          <table:table-cell office:value-type="float" office:value="373.200744628906">
            <text:p>373.2007446289</text:p>
          </table:table-cell>
          <table:table-cell office:value-type="float" office:value="0.03046968">
            <text:p>0.03046968</text:p>
          </table:table-cell>
          <table:table-cell table:number-columns-repeated="4"/>
        </table:table-row>
        <table:table-row table:style-name="ro1">
          <table:table-cell office:value-type="float" office:value="373.311370849609">
            <text:p>373.3113708496</text:p>
          </table:table-cell>
          <table:table-cell office:value-type="float" office:value="-0.001355214">
            <text:p>-0.001355214</text:p>
          </table:table-cell>
          <table:table-cell table:number-columns-repeated="4"/>
        </table:table-row>
        <table:table-row table:style-name="ro1">
          <table:table-cell office:value-type="float" office:value="373.421997070313">
            <text:p>373.4219970703</text:p>
          </table:table-cell>
          <table:table-cell office:value-type="float" office:value="0.00169891">
            <text:p>0.00169891</text:p>
          </table:table-cell>
          <table:table-cell table:number-columns-repeated="4"/>
        </table:table-row>
        <table:table-row table:style-name="ro1">
          <table:table-cell office:value-type="float" office:value="373.532623291016">
            <text:p>373.532623291</text:p>
          </table:table-cell>
          <table:table-cell office:value-type="float" office:value="-0.006872395">
            <text:p>-0.006872395</text:p>
          </table:table-cell>
          <table:table-cell table:number-columns-repeated="4"/>
        </table:table-row>
        <table:table-row table:style-name="ro1">
          <table:table-cell office:value-type="float" office:value="373.643280029297">
            <text:p>373.6432800293</text:p>
          </table:table-cell>
          <table:table-cell office:value-type="float" office:value="0.0114242">
            <text:p>0.0114242</text:p>
          </table:table-cell>
          <table:table-cell table:number-columns-repeated="4"/>
        </table:table-row>
        <table:table-row table:style-name="ro1">
          <table:table-cell office:value-type="float" office:value="373.753936767578">
            <text:p>373.7539367676</text:p>
          </table:table-cell>
          <table:table-cell office:value-type="float" office:value="0.006629608">
            <text:p>0.006629608</text:p>
          </table:table-cell>
          <table:table-cell table:number-columns-repeated="4"/>
        </table:table-row>
        <table:table-row table:style-name="ro1">
          <table:table-cell office:value-type="float" office:value="373.864593505859">
            <text:p>373.8645935059</text:p>
          </table:table-cell>
          <table:table-cell office:value-type="float" office:value="-0.005160256">
            <text:p>-0.005160256</text:p>
          </table:table-cell>
          <table:table-cell table:number-columns-repeated="4"/>
        </table:table-row>
        <table:table-row table:style-name="ro1">
          <table:table-cell office:value-type="float" office:value="373.975250244141">
            <text:p>373.9752502441</text:p>
          </table:table-cell>
          <table:table-cell office:value-type="float" office:value="-0.0002738815">
            <text:p>-0.0002738815</text:p>
          </table:table-cell>
          <table:table-cell table:number-columns-repeated="4"/>
        </table:table-row>
        <table:table-row table:style-name="ro1">
          <table:table-cell office:value-type="float" office:value="374.0859375">
            <text:p>374.0859375</text:p>
          </table:table-cell>
          <table:table-cell office:value-type="float" office:value="-0.00475263">
            <text:p>-0.00475263</text:p>
          </table:table-cell>
          <table:table-cell table:number-columns-repeated="4"/>
        </table:table-row>
        <table:table-row table:style-name="ro1">
          <table:table-cell office:value-type="float" office:value="374.196624755859">
            <text:p>374.1966247559</text:p>
          </table:table-cell>
          <table:table-cell office:value-type="float" office:value="-0.009210437">
            <text:p>-0.009210437</text:p>
          </table:table-cell>
          <table:table-cell table:number-columns-repeated="4"/>
        </table:table-row>
        <table:table-row table:style-name="ro1">
          <table:table-cell office:value-type="float" office:value="374.307281494141">
            <text:p>374.3072814941</text:p>
          </table:table-cell>
          <table:table-cell office:value-type="float" office:value="-0.003071812">
            <text:p>-0.003071812</text:p>
          </table:table-cell>
          <table:table-cell table:number-columns-repeated="4"/>
        </table:table-row>
        <table:table-row table:style-name="ro1">
          <table:table-cell office:value-type="float" office:value="374.417999267578">
            <text:p>374.4179992676</text:p>
          </table:table-cell>
          <table:table-cell office:value-type="float" office:value="-0.006341137">
            <text:p>-0.006341137</text:p>
          </table:table-cell>
          <table:table-cell table:number-columns-repeated="4"/>
        </table:table-row>
        <table:table-row table:style-name="ro1">
          <table:table-cell office:value-type="float" office:value="374.528686523438">
            <text:p>374.5286865234</text:p>
          </table:table-cell>
          <table:table-cell office:value-type="float" office:value="0.006049452">
            <text:p>0.006049452</text:p>
          </table:table-cell>
          <table:table-cell table:number-columns-repeated="4"/>
        </table:table-row>
        <table:table-row table:style-name="ro1">
          <table:table-cell office:value-type="float" office:value="374.639373779297">
            <text:p>374.6393737793</text:p>
          </table:table-cell>
          <table:table-cell office:value-type="float" office:value="0.009093779">
            <text:p>0.009093779</text:p>
          </table:table-cell>
          <table:table-cell table:number-columns-repeated="4"/>
        </table:table-row>
        <table:table-row table:style-name="ro1">
          <table:table-cell office:value-type="float" office:value="374.750091552734">
            <text:p>374.7500915527</text:p>
          </table:table-cell>
          <table:table-cell office:value-type="float" office:value="-0.00504826">
            <text:p>-0.00504826</text:p>
          </table:table-cell>
          <table:table-cell table:number-columns-repeated="4"/>
        </table:table-row>
        <table:table-row table:style-name="ro1">
          <table:table-cell office:value-type="float" office:value="374.860809326172">
            <text:p>374.8608093262</text:p>
          </table:table-cell>
          <table:table-cell office:value-type="float" office:value="-0.001906432">
            <text:p>-0.001906432</text:p>
          </table:table-cell>
          <table:table-cell table:number-columns-repeated="4"/>
        </table:table-row>
        <table:table-row table:style-name="ro1">
          <table:table-cell office:value-type="float" office:value="374.971527099609">
            <text:p>374.9715270996</text:p>
          </table:table-cell>
          <table:table-cell office:value-type="float" office:value="-0.0002755743">
            <text:p>-0.0002755743</text:p>
          </table:table-cell>
          <table:table-cell table:number-columns-repeated="4"/>
        </table:table-row>
        <table:table-row table:style-name="ro1">
          <table:table-cell office:value-type="float" office:value="375.082244873047">
            <text:p>375.082244873</text:p>
          </table:table-cell>
          <table:table-cell office:value-type="float" office:value="-0.0008715886">
            <text:p>-0.0008715886</text:p>
          </table:table-cell>
          <table:table-cell table:number-columns-repeated="4"/>
        </table:table-row>
        <table:table-row table:style-name="ro1">
          <table:table-cell office:value-type="float" office:value="375.192993164063">
            <text:p>375.1929931641</text:p>
          </table:table-cell>
          <table:table-cell office:value-type="float" office:value="-0.0031218">
            <text:p>-0.0031218</text:p>
          </table:table-cell>
          <table:table-cell table:number-columns-repeated="4"/>
        </table:table-row>
        <table:table-row table:style-name="ro1">
          <table:table-cell office:value-type="float" office:value="375.3037109375">
            <text:p>375.3037109375</text:p>
          </table:table-cell>
          <table:table-cell office:value-type="float" office:value="-0.008283277">
            <text:p>-0.008283277</text:p>
          </table:table-cell>
          <table:table-cell table:number-columns-repeated="4"/>
        </table:table-row>
        <table:table-row table:style-name="ro1">
          <table:table-cell office:value-type="float" office:value="375.414459228516">
            <text:p>375.4144592285</text:p>
          </table:table-cell>
          <table:table-cell office:value-type="float" office:value="0.003386438">
            <text:p>0.003386438</text:p>
          </table:table-cell>
          <table:table-cell table:number-columns-repeated="4"/>
        </table:table-row>
        <table:table-row table:style-name="ro1">
          <table:table-cell office:value-type="float" office:value="375.525207519531">
            <text:p>375.5252075195</text:p>
          </table:table-cell>
          <table:table-cell office:value-type="float" office:value="-0.001612988">
            <text:p>-0.001612988</text:p>
          </table:table-cell>
          <table:table-cell table:number-columns-repeated="4"/>
        </table:table-row>
        <table:table-row table:style-name="ro1">
          <table:table-cell office:value-type="float" office:value="375.635986328125">
            <text:p>375.6359863281</text:p>
          </table:table-cell>
          <table:table-cell office:value-type="float" office:value="0.007954383">
            <text:p>0.007954383</text:p>
          </table:table-cell>
          <table:table-cell table:number-columns-repeated="4"/>
        </table:table-row>
        <table:table-row table:style-name="ro1">
          <table:table-cell office:value-type="float" office:value="375.746734619141">
            <text:p>375.7467346191</text:p>
          </table:table-cell>
          <table:table-cell office:value-type="float" office:value="-0.0006398848">
            <text:p>-0.0006398848</text:p>
          </table:table-cell>
          <table:table-cell table:number-columns-repeated="4"/>
        </table:table-row>
        <table:table-row table:style-name="ro1">
          <table:table-cell office:value-type="float" office:value="375.857513427734">
            <text:p>375.8575134277</text:p>
          </table:table-cell>
          <table:table-cell office:value-type="float" office:value="-0.003673121">
            <text:p>-0.003673121</text:p>
          </table:table-cell>
          <table:table-cell table:number-columns-repeated="4"/>
        </table:table-row>
        <table:table-row table:style-name="ro1">
          <table:table-cell office:value-type="float" office:value="375.968292236328">
            <text:p>375.9682922363</text:p>
          </table:table-cell>
          <table:table-cell office:value-type="float" office:value="-0.002822639">
            <text:p>-0.002822639</text:p>
          </table:table-cell>
          <table:table-cell table:number-columns-repeated="4"/>
        </table:table-row>
        <table:table-row table:style-name="ro1">
          <table:table-cell office:value-type="float" office:value="376.079071044922">
            <text:p>376.0790710449</text:p>
          </table:table-cell>
          <table:table-cell office:value-type="float" office:value="-0.00653531">
            <text:p>-0.00653531</text:p>
          </table:table-cell>
          <table:table-cell table:number-columns-repeated="4"/>
        </table:table-row>
        <table:table-row table:style-name="ro1">
          <table:table-cell office:value-type="float" office:value="376.189849853516">
            <text:p>376.1898498535</text:p>
          </table:table-cell>
          <table:table-cell office:value-type="float" office:value="0.0009518825">
            <text:p>0.0009518825</text:p>
          </table:table-cell>
          <table:table-cell table:number-columns-repeated="4"/>
        </table:table-row>
        <table:table-row table:style-name="ro1">
          <table:table-cell office:value-type="float" office:value="376.300628662109">
            <text:p>376.3006286621</text:p>
          </table:table-cell>
          <table:table-cell office:value-type="float" office:value="-0.002089037">
            <text:p>-0.002089037</text:p>
          </table:table-cell>
          <table:table-cell table:number-columns-repeated="4"/>
        </table:table-row>
        <table:table-row table:style-name="ro1">
          <table:table-cell office:value-type="float" office:value="376.411437988281">
            <text:p>376.4114379883</text:p>
          </table:table-cell>
          <table:table-cell office:value-type="float" office:value="-0.01099194">
            <text:p>-0.01099194</text:p>
          </table:table-cell>
          <table:table-cell table:number-columns-repeated="4"/>
        </table:table-row>
        <table:table-row table:style-name="ro1">
          <table:table-cell office:value-type="float" office:value="376.522247314453">
            <text:p>376.5222473145</text:p>
          </table:table-cell>
          <table:table-cell office:value-type="float" office:value="-0.0008239076">
            <text:p>-0.0008239076</text:p>
          </table:table-cell>
          <table:table-cell table:number-columns-repeated="4"/>
        </table:table-row>
        <table:table-row table:style-name="ro1">
          <table:table-cell office:value-type="float" office:value="376.633056640625">
            <text:p>376.6330566406</text:p>
          </table:table-cell>
          <table:table-cell office:value-type="float" office:value="-0.002399389">
            <text:p>-0.002399389</text:p>
          </table:table-cell>
          <table:table-cell table:number-columns-repeated="4"/>
        </table:table-row>
        <table:table-row table:style-name="ro1">
          <table:table-cell office:value-type="float" office:value="376.743865966797">
            <text:p>376.7438659668</text:p>
          </table:table-cell>
          <table:table-cell office:value-type="float" office:value="0.001762732">
            <text:p>0.001762732</text:p>
          </table:table-cell>
          <table:table-cell table:number-columns-repeated="4"/>
        </table:table-row>
        <table:table-row table:style-name="ro1">
          <table:table-cell office:value-type="float" office:value="376.854705810547">
            <text:p>376.8547058105</text:p>
          </table:table-cell>
          <table:table-cell office:value-type="float" office:value="0.01304573">
            <text:p>0.01304573</text:p>
          </table:table-cell>
          <table:table-cell table:number-columns-repeated="4"/>
        </table:table-row>
        <table:table-row table:style-name="ro1">
          <table:table-cell office:value-type="float" office:value="376.965515136719">
            <text:p>376.9655151367</text:p>
          </table:table-cell>
          <table:table-cell office:value-type="float" office:value="0.01554718">
            <text:p>0.01554718</text:p>
          </table:table-cell>
          <table:table-cell table:number-columns-repeated="4"/>
        </table:table-row>
        <table:table-row table:style-name="ro1">
          <table:table-cell office:value-type="float" office:value="377.076354980469">
            <text:p>377.0763549805</text:p>
          </table:table-cell>
          <table:table-cell office:value-type="float" office:value="-0.004869612">
            <text:p>-0.004869612</text:p>
          </table:table-cell>
          <table:table-cell table:number-columns-repeated="4"/>
        </table:table-row>
        <table:table-row table:style-name="ro1">
          <table:table-cell office:value-type="float" office:value="377.187194824219">
            <text:p>377.1871948242</text:p>
          </table:table-cell>
          <table:table-cell office:value-type="float" office:value="0.003898218">
            <text:p>0.003898218</text:p>
          </table:table-cell>
          <table:table-cell table:number-columns-repeated="4"/>
        </table:table-row>
        <table:table-row table:style-name="ro1">
          <table:table-cell office:value-type="float" office:value="377.298034667969">
            <text:p>377.298034668</text:p>
          </table:table-cell>
          <table:table-cell office:value-type="float" office:value="-0.00721706">
            <text:p>-0.00721706</text:p>
          </table:table-cell>
          <table:table-cell table:number-columns-repeated="4"/>
        </table:table-row>
        <table:table-row table:style-name="ro1">
          <table:table-cell office:value-type="float" office:value="377.408905029297">
            <text:p>377.4089050293</text:p>
          </table:table-cell>
          <table:table-cell office:value-type="float" office:value="0.007035878">
            <text:p>0.007035878</text:p>
          </table:table-cell>
          <table:table-cell table:number-columns-repeated="4"/>
        </table:table-row>
        <table:table-row table:style-name="ro1">
          <table:table-cell office:value-type="float" office:value="377.519744873047">
            <text:p>377.519744873</text:p>
          </table:table-cell>
          <table:table-cell office:value-type="float" office:value="-0.00364854">
            <text:p>-0.00364854</text:p>
          </table:table-cell>
          <table:table-cell table:number-columns-repeated="4"/>
        </table:table-row>
        <table:table-row table:style-name="ro1">
          <table:table-cell office:value-type="float" office:value="377.630615234375">
            <text:p>377.6306152344</text:p>
          </table:table-cell>
          <table:table-cell office:value-type="float" office:value="0.002668983">
            <text:p>0.002668983</text:p>
          </table:table-cell>
          <table:table-cell table:number-columns-repeated="4"/>
        </table:table-row>
        <table:table-row table:style-name="ro1">
          <table:table-cell office:value-type="float" office:value="377.741485595703">
            <text:p>377.7414855957</text:p>
          </table:table-cell>
          <table:table-cell office:value-type="float" office:value="-0.005786588">
            <text:p>-0.005786588</text:p>
          </table:table-cell>
          <table:table-cell table:number-columns-repeated="4"/>
        </table:table-row>
        <table:table-row table:style-name="ro1">
          <table:table-cell office:value-type="float" office:value="377.852355957031">
            <text:p>377.852355957</text:p>
          </table:table-cell>
          <table:table-cell office:value-type="float" office:value="-0.006406432">
            <text:p>-0.006406432</text:p>
          </table:table-cell>
          <table:table-cell table:number-columns-repeated="4"/>
        </table:table-row>
        <table:table-row table:style-name="ro1">
          <table:table-cell office:value-type="float" office:value="377.963256835938">
            <text:p>377.9632568359</text:p>
          </table:table-cell>
          <table:table-cell office:value-type="float" office:value="-0.003521074">
            <text:p>-0.003521074</text:p>
          </table:table-cell>
          <table:table-cell table:number-columns-repeated="4"/>
        </table:table-row>
        <table:table-row table:style-name="ro1">
          <table:table-cell office:value-type="float" office:value="378.074157714844">
            <text:p>378.0741577148</text:p>
          </table:table-cell>
          <table:table-cell office:value-type="float" office:value="0.01166791">
            <text:p>0.01166791</text:p>
          </table:table-cell>
          <table:table-cell table:number-columns-repeated="4"/>
        </table:table-row>
        <table:table-row table:style-name="ro1">
          <table:table-cell office:value-type="float" office:value="378.185028076172">
            <text:p>378.1850280762</text:p>
          </table:table-cell>
          <table:table-cell office:value-type="float" office:value="0.01014248">
            <text:p>0.01014248</text:p>
          </table:table-cell>
          <table:table-cell table:number-columns-repeated="4"/>
        </table:table-row>
        <table:table-row table:style-name="ro1">
          <table:table-cell office:value-type="float" office:value="378.295928955078">
            <text:p>378.2959289551</text:p>
          </table:table-cell>
          <table:table-cell office:value-type="float" office:value="-0.007288689">
            <text:p>-0.007288689</text:p>
          </table:table-cell>
          <table:table-cell table:number-columns-repeated="4"/>
        </table:table-row>
        <table:table-row table:style-name="ro1">
          <table:table-cell office:value-type="float" office:value="378.406860351563">
            <text:p>378.4068603516</text:p>
          </table:table-cell>
          <table:table-cell office:value-type="float" office:value="-0.001359381">
            <text:p>-0.001359381</text:p>
          </table:table-cell>
          <table:table-cell table:number-columns-repeated="4"/>
        </table:table-row>
        <table:table-row table:style-name="ro1">
          <table:table-cell office:value-type="float" office:value="378.517761230469">
            <text:p>378.5177612305</text:p>
          </table:table-cell>
          <table:table-cell office:value-type="float" office:value="0.004338545">
            <text:p>0.004338545</text:p>
          </table:table-cell>
          <table:table-cell table:number-columns-repeated="4"/>
        </table:table-row>
        <table:table-row table:style-name="ro1">
          <table:table-cell office:value-type="float" office:value="378.628692626953">
            <text:p>378.628692627</text:p>
          </table:table-cell>
          <table:table-cell office:value-type="float" office:value="0.0005127144">
            <text:p>0.0005127144</text:p>
          </table:table-cell>
          <table:table-cell table:number-columns-repeated="4"/>
        </table:table-row>
        <table:table-row table:style-name="ro1">
          <table:table-cell office:value-type="float" office:value="378.739593505859">
            <text:p>378.7395935059</text:p>
          </table:table-cell>
          <table:table-cell office:value-type="float" office:value="0.001115029">
            <text:p>0.001115029</text:p>
          </table:table-cell>
          <table:table-cell table:number-columns-repeated="4"/>
        </table:table-row>
        <table:table-row table:style-name="ro1">
          <table:table-cell office:value-type="float" office:value="378.850524902344">
            <text:p>378.8505249023</text:p>
          </table:table-cell>
          <table:table-cell office:value-type="float" office:value="0.002707368">
            <text:p>0.002707368</text:p>
          </table:table-cell>
          <table:table-cell table:number-columns-repeated="4"/>
        </table:table-row>
        <table:table-row table:style-name="ro1">
          <table:table-cell office:value-type="float" office:value="378.961486816406">
            <text:p>378.9614868164</text:p>
          </table:table-cell>
          <table:table-cell office:value-type="float" office:value="0.004385261">
            <text:p>0.004385261</text:p>
          </table:table-cell>
          <table:table-cell table:number-columns-repeated="4"/>
        </table:table-row>
        <table:table-row table:style-name="ro1">
          <table:table-cell office:value-type="float" office:value="379.072418212891">
            <text:p>379.0724182129</text:p>
          </table:table-cell>
          <table:table-cell office:value-type="float" office:value="0.009879011">
            <text:p>0.009879011</text:p>
          </table:table-cell>
          <table:table-cell table:number-columns-repeated="4"/>
        </table:table-row>
        <table:table-row table:style-name="ro1">
          <table:table-cell office:value-type="float" office:value="379.183380126953">
            <text:p>379.183380127</text:p>
          </table:table-cell>
          <table:table-cell office:value-type="float" office:value="-0.007252206">
            <text:p>-0.007252206</text:p>
          </table:table-cell>
          <table:table-cell table:number-columns-repeated="4"/>
        </table:table-row>
        <table:table-row table:style-name="ro1">
          <table:table-cell office:value-type="float" office:value="379.294311523438">
            <text:p>379.2943115234</text:p>
          </table:table-cell>
          <table:table-cell office:value-type="float" office:value="0.005956415">
            <text:p>0.005956415</text:p>
          </table:table-cell>
          <table:table-cell table:number-columns-repeated="4"/>
        </table:table-row>
        <table:table-row table:style-name="ro1">
          <table:table-cell office:value-type="float" office:value="379.4052734375">
            <text:p>379.4052734375</text:p>
          </table:table-cell>
          <table:table-cell office:value-type="float" office:value="-0.009678422">
            <text:p>-0.009678422</text:p>
          </table:table-cell>
          <table:table-cell table:number-columns-repeated="4"/>
        </table:table-row>
        <table:table-row table:style-name="ro1">
          <table:table-cell office:value-type="float" office:value="379.516235351563">
            <text:p>379.5162353516</text:p>
          </table:table-cell>
          <table:table-cell office:value-type="float" office:value="-0.006949804">
            <text:p>-0.006949804</text:p>
          </table:table-cell>
          <table:table-cell table:number-columns-repeated="4"/>
        </table:table-row>
        <table:table-row table:style-name="ro1">
          <table:table-cell office:value-type="float" office:value="379.627227783203">
            <text:p>379.6272277832</text:p>
          </table:table-cell>
          <table:table-cell office:value-type="float" office:value="-0.001915979">
            <text:p>-0.001915979</text:p>
          </table:table-cell>
          <table:table-cell table:number-columns-repeated="4"/>
        </table:table-row>
        <table:table-row table:style-name="ro1">
          <table:table-cell office:value-type="float" office:value="379.738189697266">
            <text:p>379.7381896973</text:p>
          </table:table-cell>
          <table:table-cell office:value-type="float" office:value="0.01175953">
            <text:p>0.01175953</text:p>
          </table:table-cell>
          <table:table-cell table:number-columns-repeated="4"/>
        </table:table-row>
        <table:table-row table:style-name="ro1">
          <table:table-cell office:value-type="float" office:value="379.849182128906">
            <text:p>379.8491821289</text:p>
          </table:table-cell>
          <table:table-cell office:value-type="float" office:value="-0.005272818">
            <text:p>-0.005272818</text:p>
          </table:table-cell>
          <table:table-cell table:number-columns-repeated="4"/>
        </table:table-row>
        <table:table-row table:style-name="ro1">
          <table:table-cell office:value-type="float" office:value="379.960174560547">
            <text:p>379.9601745605</text:p>
          </table:table-cell>
          <table:table-cell office:value-type="float" office:value="-0.002355219">
            <text:p>-0.002355219</text:p>
          </table:table-cell>
          <table:table-cell table:number-columns-repeated="4"/>
        </table:table-row>
        <table:table-row table:style-name="ro1">
          <table:table-cell office:value-type="float" office:value="380.071166992188">
            <text:p>380.0711669922</text:p>
          </table:table-cell>
          <table:table-cell office:value-type="float" office:value="-0.005333526">
            <text:p>-0.005333526</text:p>
          </table:table-cell>
          <table:table-cell table:number-columns-repeated="4"/>
        </table:table-row>
        <table:table-row table:style-name="ro1">
          <table:table-cell office:value-type="float" office:value="380.182189941406">
            <text:p>380.1821899414</text:p>
          </table:table-cell>
          <table:table-cell office:value-type="float" office:value="0.01105132">
            <text:p>0.01105132</text:p>
          </table:table-cell>
          <table:table-cell table:number-columns-repeated="4"/>
        </table:table-row>
        <table:table-row table:style-name="ro1">
          <table:table-cell office:value-type="float" office:value="380.293182373047">
            <text:p>380.293182373</text:p>
          </table:table-cell>
          <table:table-cell office:value-type="float" office:value="0.006883189">
            <text:p>0.006883189</text:p>
          </table:table-cell>
          <table:table-cell table:number-columns-repeated="4"/>
        </table:table-row>
        <table:table-row table:style-name="ro1">
          <table:table-cell office:value-type="float" office:value="380.404205322266">
            <text:p>380.4042053223</text:p>
          </table:table-cell>
          <table:table-cell office:value-type="float" office:value="-0.01260963">
            <text:p>-0.01260963</text:p>
          </table:table-cell>
          <table:table-cell table:number-columns-repeated="4"/>
        </table:table-row>
        <table:table-row table:style-name="ro1">
          <table:table-cell office:value-type="float" office:value="380.515228271484">
            <text:p>380.5152282715</text:p>
          </table:table-cell>
          <table:table-cell office:value-type="float" office:value="-0.008873795">
            <text:p>-0.008873795</text:p>
          </table:table-cell>
          <table:table-cell table:number-columns-repeated="4"/>
        </table:table-row>
        <table:table-row table:style-name="ro1">
          <table:table-cell office:value-type="float" office:value="380.626251220703">
            <text:p>380.6262512207</text:p>
          </table:table-cell>
          <table:table-cell office:value-type="float" office:value="-0.001475817">
            <text:p>-0.001475817</text:p>
          </table:table-cell>
          <table:table-cell table:number-columns-repeated="4"/>
        </table:table-row>
        <table:table-row table:style-name="ro1">
          <table:table-cell office:value-type="float" office:value="380.737274169922">
            <text:p>380.7372741699</text:p>
          </table:table-cell>
          <table:table-cell office:value-type="float" office:value="-0.0107249">
            <text:p>-0.0107249</text:p>
          </table:table-cell>
          <table:table-cell table:number-columns-repeated="4"/>
        </table:table-row>
        <table:table-row table:style-name="ro1">
          <table:table-cell office:value-type="float" office:value="380.848327636719">
            <text:p>380.8483276367</text:p>
          </table:table-cell>
          <table:table-cell office:value-type="float" office:value="0.01502462">
            <text:p>0.01502462</text:p>
          </table:table-cell>
          <table:table-cell table:number-columns-repeated="4"/>
        </table:table-row>
        <table:table-row table:style-name="ro1">
          <table:table-cell office:value-type="float" office:value="380.959381103516">
            <text:p>380.9593811035</text:p>
          </table:table-cell>
          <table:table-cell office:value-type="float" office:value="-0.00150739">
            <text:p>-0.00150739</text:p>
          </table:table-cell>
          <table:table-cell table:number-columns-repeated="4"/>
        </table:table-row>
        <table:table-row table:style-name="ro1">
          <table:table-cell office:value-type="float" office:value="381.070404052734">
            <text:p>381.0704040527</text:p>
          </table:table-cell>
          <table:table-cell office:value-type="float" office:value="-0.005831989">
            <text:p>-0.005831989</text:p>
          </table:table-cell>
          <table:table-cell table:number-columns-repeated="4"/>
        </table:table-row>
        <table:table-row table:style-name="ro1">
          <table:table-cell office:value-type="float" office:value="381.181488037109">
            <text:p>381.1814880371</text:p>
          </table:table-cell>
          <table:table-cell office:value-type="float" office:value="0.001727279">
            <text:p>0.001727279</text:p>
          </table:table-cell>
          <table:table-cell table:number-columns-repeated="4"/>
        </table:table-row>
        <table:table-row table:style-name="ro1">
          <table:table-cell office:value-type="float" office:value="381.292541503906">
            <text:p>381.2925415039</text:p>
          </table:table-cell>
          <table:table-cell office:value-type="float" office:value="-0.005136741">
            <text:p>-0.005136741</text:p>
          </table:table-cell>
          <table:table-cell table:number-columns-repeated="4"/>
        </table:table-row>
        <table:table-row table:style-name="ro1">
          <table:table-cell office:value-type="float" office:value="381.403594970703">
            <text:p>381.4035949707</text:p>
          </table:table-cell>
          <table:table-cell office:value-type="float" office:value="0.01231385">
            <text:p>0.01231385</text:p>
          </table:table-cell>
          <table:table-cell table:number-columns-repeated="4"/>
        </table:table-row>
        <table:table-row table:style-name="ro1">
          <table:table-cell office:value-type="float" office:value="381.514678955078">
            <text:p>381.5146789551</text:p>
          </table:table-cell>
          <table:table-cell office:value-type="float" office:value="0.01120383">
            <text:p>0.01120383</text:p>
          </table:table-cell>
          <table:table-cell table:number-columns-repeated="4"/>
        </table:table-row>
        <table:table-row table:style-name="ro1">
          <table:table-cell office:value-type="float" office:value="381.625762939453">
            <text:p>381.6257629395</text:p>
          </table:table-cell>
          <table:table-cell office:value-type="float" office:value="0.01314389">
            <text:p>0.01314389</text:p>
          </table:table-cell>
          <table:table-cell table:number-columns-repeated="4"/>
        </table:table-row>
        <table:table-row table:style-name="ro1">
          <table:table-cell office:value-type="float" office:value="381.736846923828">
            <text:p>381.7368469238</text:p>
          </table:table-cell>
          <table:table-cell office:value-type="float" office:value="0.009746639">
            <text:p>0.009746639</text:p>
          </table:table-cell>
          <table:table-cell table:number-columns-repeated="4"/>
        </table:table-row>
        <table:table-row table:style-name="ro1">
          <table:table-cell office:value-type="float" office:value="381.847930908203">
            <text:p>381.8479309082</text:p>
          </table:table-cell>
          <table:table-cell office:value-type="float" office:value="-0.005781002">
            <text:p>-0.005781002</text:p>
          </table:table-cell>
          <table:table-cell table:number-columns-repeated="4"/>
        </table:table-row>
        <table:table-row table:style-name="ro1">
          <table:table-cell office:value-type="float" office:value="381.959045410156">
            <text:p>381.9590454102</text:p>
          </table:table-cell>
          <table:table-cell office:value-type="float" office:value="0.00889968">
            <text:p>0.00889968</text:p>
          </table:table-cell>
          <table:table-cell table:number-columns-repeated="4"/>
        </table:table-row>
        <table:table-row table:style-name="ro1">
          <table:table-cell office:value-type="float" office:value="382.070129394531">
            <text:p>382.0701293945</text:p>
          </table:table-cell>
          <table:table-cell office:value-type="float" office:value="0.0008985199">
            <text:p>0.0008985199</text:p>
          </table:table-cell>
          <table:table-cell table:number-columns-repeated="4"/>
        </table:table-row>
        <table:table-row table:style-name="ro1">
          <table:table-cell office:value-type="float" office:value="382.181243896484">
            <text:p>382.1812438965</text:p>
          </table:table-cell>
          <table:table-cell office:value-type="float" office:value="0.0052179">
            <text:p>0.0052179</text:p>
          </table:table-cell>
          <table:table-cell table:number-columns-repeated="4"/>
        </table:table-row>
        <table:table-row table:style-name="ro1">
          <table:table-cell office:value-type="float" office:value="382.292358398438">
            <text:p>382.2923583984</text:p>
          </table:table-cell>
          <table:table-cell office:value-type="float" office:value="-0.005169506">
            <text:p>-0.005169506</text:p>
          </table:table-cell>
          <table:table-cell table:number-columns-repeated="4"/>
        </table:table-row>
        <table:table-row table:style-name="ro1">
          <table:table-cell office:value-type="float" office:value="382.403503417969">
            <text:p>382.403503418</text:p>
          </table:table-cell>
          <table:table-cell office:value-type="float" office:value="0.004474175">
            <text:p>0.004474175</text:p>
          </table:table-cell>
          <table:table-cell table:number-columns-repeated="4"/>
        </table:table-row>
        <table:table-row table:style-name="ro1">
          <table:table-cell office:value-type="float" office:value="382.514617919922">
            <text:p>382.5146179199</text:p>
          </table:table-cell>
          <table:table-cell office:value-type="float" office:value="0.01677292">
            <text:p>0.01677292</text:p>
          </table:table-cell>
          <table:table-cell table:number-columns-repeated="4"/>
        </table:table-row>
        <table:table-row table:style-name="ro1">
          <table:table-cell office:value-type="float" office:value="382.625762939453">
            <text:p>382.6257629395</text:p>
          </table:table-cell>
          <table:table-cell office:value-type="float" office:value="-0.002829721">
            <text:p>-0.002829721</text:p>
          </table:table-cell>
          <table:table-cell table:number-columns-repeated="4"/>
        </table:table-row>
        <table:table-row table:style-name="ro1">
          <table:table-cell office:value-type="float" office:value="382.736907958984">
            <text:p>382.736907959</text:p>
          </table:table-cell>
          <table:table-cell office:value-type="float" office:value="0.0065542">
            <text:p>0.0065542</text:p>
          </table:table-cell>
          <table:table-cell table:number-columns-repeated="4"/>
        </table:table-row>
        <table:table-row table:style-name="ro1">
          <table:table-cell office:value-type="float" office:value="382.848052978516">
            <text:p>382.8480529785</text:p>
          </table:table-cell>
          <table:table-cell office:value-type="float" office:value="0.003774532">
            <text:p>0.003774532</text:p>
          </table:table-cell>
          <table:table-cell table:number-columns-repeated="4"/>
        </table:table-row>
        <table:table-row table:style-name="ro1">
          <table:table-cell office:value-type="float" office:value="382.959197998047">
            <text:p>382.959197998</text:p>
          </table:table-cell>
          <table:table-cell office:value-type="float" office:value="0.009240808">
            <text:p>0.009240808</text:p>
          </table:table-cell>
          <table:table-cell table:number-columns-repeated="4"/>
        </table:table-row>
        <table:table-row table:style-name="ro1">
          <table:table-cell office:value-type="float" office:value="383.070343017578">
            <text:p>383.0703430176</text:p>
          </table:table-cell>
          <table:table-cell office:value-type="float" office:value="0.003713477">
            <text:p>0.003713477</text:p>
          </table:table-cell>
          <table:table-cell table:number-columns-repeated="4"/>
        </table:table-row>
        <table:table-row table:style-name="ro1">
          <table:table-cell office:value-type="float" office:value="383.181518554688">
            <text:p>383.1815185547</text:p>
          </table:table-cell>
          <table:table-cell office:value-type="float" office:value="0.01365884">
            <text:p>0.01365884</text:p>
          </table:table-cell>
          <table:table-cell table:number-columns-repeated="4"/>
        </table:table-row>
        <table:table-row table:style-name="ro1">
          <table:table-cell office:value-type="float" office:value="383.292694091797">
            <text:p>383.2926940918</text:p>
          </table:table-cell>
          <table:table-cell office:value-type="float" office:value="0.003221892">
            <text:p>0.003221892</text:p>
          </table:table-cell>
          <table:table-cell table:number-columns-repeated="4"/>
        </table:table-row>
        <table:table-row table:style-name="ro1">
          <table:table-cell office:value-type="float" office:value="383.403869628906">
            <text:p>383.4038696289</text:p>
          </table:table-cell>
          <table:table-cell office:value-type="float" office:value="-0.001503286">
            <text:p>-0.001503286</text:p>
          </table:table-cell>
          <table:table-cell table:number-columns-repeated="4"/>
        </table:table-row>
        <table:table-row table:style-name="ro1">
          <table:table-cell office:value-type="float" office:value="383.515045166016">
            <text:p>383.515045166</text:p>
          </table:table-cell>
          <table:table-cell office:value-type="float" office:value="-0.001180413">
            <text:p>-0.001180413</text:p>
          </table:table-cell>
          <table:table-cell table:number-columns-repeated="4"/>
        </table:table-row>
        <table:table-row table:style-name="ro1">
          <table:table-cell office:value-type="float" office:value="383.626220703125">
            <text:p>383.6262207031</text:p>
          </table:table-cell>
          <table:table-cell office:value-type="float" office:value="0.01234565">
            <text:p>0.01234565</text:p>
          </table:table-cell>
          <table:table-cell table:number-columns-repeated="4"/>
        </table:table-row>
        <table:table-row table:style-name="ro1">
          <table:table-cell office:value-type="float" office:value="383.737426757813">
            <text:p>383.7374267578</text:p>
          </table:table-cell>
          <table:table-cell office:value-type="float" office:value="0.0136975">
            <text:p>0.0136975</text:p>
          </table:table-cell>
          <table:table-cell table:number-columns-repeated="4"/>
        </table:table-row>
        <table:table-row table:style-name="ro1">
          <table:table-cell office:value-type="float" office:value="383.8486328125">
            <text:p>383.8486328125</text:p>
          </table:table-cell>
          <table:table-cell office:value-type="float" office:value="-0.0002284833">
            <text:p>-0.0002284833</text:p>
          </table:table-cell>
          <table:table-cell table:number-columns-repeated="4"/>
        </table:table-row>
        <table:table-row table:style-name="ro1">
          <table:table-cell office:value-type="float" office:value="383.959838867188">
            <text:p>383.9598388672</text:p>
          </table:table-cell>
          <table:table-cell office:value-type="float" office:value="-0.0009825112">
            <text:p>-0.0009825112</text:p>
          </table:table-cell>
          <table:table-cell table:number-columns-repeated="4"/>
        </table:table-row>
        <table:table-row table:style-name="ro1">
          <table:table-cell office:value-type="float" office:value="384.071044921875">
            <text:p>384.0710449219</text:p>
          </table:table-cell>
          <table:table-cell office:value-type="float" office:value="-0.008645377">
            <text:p>-0.008645377</text:p>
          </table:table-cell>
          <table:table-cell table:number-columns-repeated="4"/>
        </table:table-row>
        <table:table-row table:style-name="ro1">
          <table:table-cell office:value-type="float" office:value="384.182250976563">
            <text:p>384.1822509766</text:p>
          </table:table-cell>
          <table:table-cell office:value-type="float" office:value="0.01127582">
            <text:p>0.01127582</text:p>
          </table:table-cell>
          <table:table-cell table:number-columns-repeated="4"/>
        </table:table-row>
        <table:table-row table:style-name="ro1">
          <table:table-cell office:value-type="float" office:value="384.293487548828">
            <text:p>384.2934875488</text:p>
          </table:table-cell>
          <table:table-cell office:value-type="float" office:value="-0.007832539">
            <text:p>-0.007832539</text:p>
          </table:table-cell>
          <table:table-cell table:number-columns-repeated="4"/>
        </table:table-row>
        <table:table-row table:style-name="ro1">
          <table:table-cell office:value-type="float" office:value="384.404693603516">
            <text:p>384.4046936035</text:p>
          </table:table-cell>
          <table:table-cell office:value-type="float" office:value="0.0115223">
            <text:p>0.0115223</text:p>
          </table:table-cell>
          <table:table-cell table:number-columns-repeated="4"/>
        </table:table-row>
        <table:table-row table:style-name="ro1">
          <table:table-cell office:value-type="float" office:value="384.515930175781">
            <text:p>384.5159301758</text:p>
          </table:table-cell>
          <table:table-cell office:value-type="float" office:value="0.01240729">
            <text:p>0.01240729</text:p>
          </table:table-cell>
          <table:table-cell table:number-columns-repeated="4"/>
        </table:table-row>
        <table:table-row table:style-name="ro1">
          <table:table-cell office:value-type="float" office:value="384.627197265625">
            <text:p>384.6271972656</text:p>
          </table:table-cell>
          <table:table-cell office:value-type="float" office:value="-0.009875837">
            <text:p>-0.009875837</text:p>
          </table:table-cell>
          <table:table-cell table:number-columns-repeated="4"/>
        </table:table-row>
        <table:table-row table:style-name="ro1">
          <table:table-cell office:value-type="float" office:value="384.738433837891">
            <text:p>384.7384338379</text:p>
          </table:table-cell>
          <table:table-cell office:value-type="float" office:value="-0.004482382">
            <text:p>-0.004482382</text:p>
          </table:table-cell>
          <table:table-cell table:number-columns-repeated="4"/>
        </table:table-row>
        <table:table-row table:style-name="ro1">
          <table:table-cell office:value-type="float" office:value="384.849670410156">
            <text:p>384.8496704102</text:p>
          </table:table-cell>
          <table:table-cell office:value-type="float" office:value="0.01650831">
            <text:p>0.01650831</text:p>
          </table:table-cell>
          <table:table-cell table:number-columns-repeated="4"/>
        </table:table-row>
        <table:table-row table:style-name="ro1">
          <table:table-cell office:value-type="float" office:value="384.9609375">
            <text:p>384.9609375</text:p>
          </table:table-cell>
          <table:table-cell office:value-type="float" office:value="0.01364036">
            <text:p>0.01364036</text:p>
          </table:table-cell>
          <table:table-cell table:number-columns-repeated="4"/>
        </table:table-row>
        <table:table-row table:style-name="ro1">
          <table:table-cell office:value-type="float" office:value="385.072204589844">
            <text:p>385.0722045898</text:p>
          </table:table-cell>
          <table:table-cell office:value-type="float" office:value="-0.006237119">
            <text:p>-0.006237119</text:p>
          </table:table-cell>
          <table:table-cell table:number-columns-repeated="4"/>
        </table:table-row>
        <table:table-row table:style-name="ro1">
          <table:table-cell office:value-type="float" office:value="385.183471679688">
            <text:p>385.1834716797</text:p>
          </table:table-cell>
          <table:table-cell office:value-type="float" office:value="0.01387064">
            <text:p>0.01387064</text:p>
          </table:table-cell>
          <table:table-cell table:number-columns-repeated="4"/>
        </table:table-row>
        <table:table-row table:style-name="ro1">
          <table:table-cell office:value-type="float" office:value="385.294738769531">
            <text:p>385.2947387695</text:p>
          </table:table-cell>
          <table:table-cell office:value-type="float" office:value="0.008470399">
            <text:p>0.008470399</text:p>
          </table:table-cell>
          <table:table-cell table:number-columns-repeated="4"/>
        </table:table-row>
        <table:table-row table:style-name="ro1">
          <table:table-cell office:value-type="float" office:value="385.406036376953">
            <text:p>385.406036377</text:p>
          </table:table-cell>
          <table:table-cell office:value-type="float" office:value="-0.002661438">
            <text:p>-0.002661438</text:p>
          </table:table-cell>
          <table:table-cell table:number-columns-repeated="4"/>
        </table:table-row>
        <table:table-row table:style-name="ro1">
          <table:table-cell office:value-type="float" office:value="385.517333984375">
            <text:p>385.5173339844</text:p>
          </table:table-cell>
          <table:table-cell office:value-type="float" office:value="0.004385749">
            <text:p>0.004385749</text:p>
          </table:table-cell>
          <table:table-cell table:number-columns-repeated="4"/>
        </table:table-row>
        <table:table-row table:style-name="ro1">
          <table:table-cell office:value-type="float" office:value="385.628601074219">
            <text:p>385.6286010742</text:p>
          </table:table-cell>
          <table:table-cell office:value-type="float" office:value="-0.004015415">
            <text:p>-0.004015415</text:p>
          </table:table-cell>
          <table:table-cell table:number-columns-repeated="4"/>
        </table:table-row>
        <table:table-row table:style-name="ro1">
          <table:table-cell office:value-type="float" office:value="385.739898681641">
            <text:p>385.7398986816</text:p>
          </table:table-cell>
          <table:table-cell office:value-type="float" office:value="-0.007850381">
            <text:p>-0.007850381</text:p>
          </table:table-cell>
          <table:table-cell table:number-columns-repeated="4"/>
        </table:table-row>
        <table:table-row table:style-name="ro1">
          <table:table-cell office:value-type="float" office:value="385.851226806641">
            <text:p>385.8512268066</text:p>
          </table:table-cell>
          <table:table-cell office:value-type="float" office:value="0.01303278">
            <text:p>0.01303278</text:p>
          </table:table-cell>
          <table:table-cell table:number-columns-repeated="4"/>
        </table:table-row>
        <table:table-row table:style-name="ro1">
          <table:table-cell office:value-type="float" office:value="385.962524414063">
            <text:p>385.9625244141</text:p>
          </table:table-cell>
          <table:table-cell office:value-type="float" office:value="-0.003451243">
            <text:p>-0.003451243</text:p>
          </table:table-cell>
          <table:table-cell table:number-columns-repeated="4"/>
        </table:table-row>
        <table:table-row table:style-name="ro1">
          <table:table-cell office:value-type="float" office:value="386.073852539063">
            <text:p>386.0738525391</text:p>
          </table:table-cell>
          <table:table-cell office:value-type="float" office:value="0.01346878">
            <text:p>0.01346878</text:p>
          </table:table-cell>
          <table:table-cell table:number-columns-repeated="4"/>
        </table:table-row>
        <table:table-row table:style-name="ro1">
          <table:table-cell office:value-type="float" office:value="386.185180664063">
            <text:p>386.1851806641</text:p>
          </table:table-cell>
          <table:table-cell office:value-type="float" office:value="0.0009238591">
            <text:p>0.0009238591</text:p>
          </table:table-cell>
          <table:table-cell table:number-columns-repeated="4"/>
        </table:table-row>
        <table:table-row table:style-name="ro1">
          <table:table-cell office:value-type="float" office:value="386.296508789063">
            <text:p>386.2965087891</text:p>
          </table:table-cell>
          <table:table-cell office:value-type="float" office:value="0.007399801">
            <text:p>0.007399801</text:p>
          </table:table-cell>
          <table:table-cell table:number-columns-repeated="4"/>
        </table:table-row>
        <table:table-row table:style-name="ro1">
          <table:table-cell office:value-type="float" office:value="386.407836914063">
            <text:p>386.4078369141</text:p>
          </table:table-cell>
          <table:table-cell office:value-type="float" office:value="0.002162221">
            <text:p>0.002162221</text:p>
          </table:table-cell>
          <table:table-cell table:number-columns-repeated="4"/>
        </table:table-row>
        <table:table-row table:style-name="ro1">
          <table:table-cell office:value-type="float" office:value="386.519165039063">
            <text:p>386.5191650391</text:p>
          </table:table-cell>
          <table:table-cell office:value-type="float" office:value="0.003595523">
            <text:p>0.003595523</text:p>
          </table:table-cell>
          <table:table-cell table:number-columns-repeated="4"/>
        </table:table-row>
        <table:table-row table:style-name="ro1">
          <table:table-cell office:value-type="float" office:value="386.630523681641">
            <text:p>386.6305236816</text:p>
          </table:table-cell>
          <table:table-cell office:value-type="float" office:value="0.003054399">
            <text:p>0.003054399</text:p>
          </table:table-cell>
          <table:table-cell table:number-columns-repeated="4"/>
        </table:table-row>
        <table:table-row table:style-name="ro1">
          <table:table-cell office:value-type="float" office:value="386.741882324219">
            <text:p>386.7418823242</text:p>
          </table:table-cell>
          <table:table-cell office:value-type="float" office:value="0.0009198532">
            <text:p>0.0009198532</text:p>
          </table:table-cell>
          <table:table-cell table:number-columns-repeated="4"/>
        </table:table-row>
        <table:table-row table:style-name="ro1">
          <table:table-cell office:value-type="float" office:value="386.853240966797">
            <text:p>386.8532409668</text:p>
          </table:table-cell>
          <table:table-cell office:value-type="float" office:value="-0.003601717">
            <text:p>-0.003601717</text:p>
          </table:table-cell>
          <table:table-cell table:number-columns-repeated="4"/>
        </table:table-row>
        <table:table-row table:style-name="ro1">
          <table:table-cell office:value-type="float" office:value="386.964599609375">
            <text:p>386.9645996094</text:p>
          </table:table-cell>
          <table:table-cell office:value-type="float" office:value="-0.005581487">
            <text:p>-0.005581487</text:p>
          </table:table-cell>
          <table:table-cell table:number-columns-repeated="4"/>
        </table:table-row>
        <table:table-row table:style-name="ro1">
          <table:table-cell office:value-type="float" office:value="387.075958251953">
            <text:p>387.075958252</text:p>
          </table:table-cell>
          <table:table-cell office:value-type="float" office:value="0.008063002">
            <text:p>0.008063002</text:p>
          </table:table-cell>
          <table:table-cell table:number-columns-repeated="4"/>
        </table:table-row>
        <table:table-row table:style-name="ro1">
          <table:table-cell office:value-type="float" office:value="387.187347412109">
            <text:p>387.1873474121</text:p>
          </table:table-cell>
          <table:table-cell office:value-type="float" office:value="-0.005571512">
            <text:p>-0.005571512</text:p>
          </table:table-cell>
          <table:table-cell table:number-columns-repeated="4"/>
        </table:table-row>
        <table:table-row table:style-name="ro1">
          <table:table-cell office:value-type="float" office:value="387.298736572266">
            <text:p>387.2987365723</text:p>
          </table:table-cell>
          <table:table-cell office:value-type="float" office:value="0.01507243">
            <text:p>0.01507243</text:p>
          </table:table-cell>
          <table:table-cell table:number-columns-repeated="4"/>
        </table:table-row>
        <table:table-row table:style-name="ro1">
          <table:table-cell office:value-type="float" office:value="387.410095214844">
            <text:p>387.4100952148</text:p>
          </table:table-cell>
          <table:table-cell office:value-type="float" office:value="0.0038972">
            <text:p>0.0038972</text:p>
          </table:table-cell>
          <table:table-cell table:number-columns-repeated="4"/>
        </table:table-row>
        <table:table-row table:style-name="ro1">
          <table:table-cell office:value-type="float" office:value="387.521514892578">
            <text:p>387.5215148926</text:p>
          </table:table-cell>
          <table:table-cell office:value-type="float" office:value="-0.0006043543">
            <text:p>-0.0006043543</text:p>
          </table:table-cell>
          <table:table-cell table:number-columns-repeated="4"/>
        </table:table-row>
        <table:table-row table:style-name="ro1">
          <table:table-cell office:value-type="float" office:value="387.632904052734">
            <text:p>387.6329040527</text:p>
          </table:table-cell>
          <table:table-cell office:value-type="float" office:value="0.0006582212">
            <text:p>0.0006582212</text:p>
          </table:table-cell>
          <table:table-cell table:number-columns-repeated="4"/>
        </table:table-row>
        <table:table-row table:style-name="ro1">
          <table:table-cell office:value-type="float" office:value="387.744293212891">
            <text:p>387.7442932129</text:p>
          </table:table-cell>
          <table:table-cell office:value-type="float" office:value="0.01396008">
            <text:p>0.01396008</text:p>
          </table:table-cell>
          <table:table-cell table:number-columns-repeated="4"/>
        </table:table-row>
        <table:table-row table:style-name="ro1">
          <table:table-cell office:value-type="float" office:value="387.855712890625">
            <text:p>387.8557128906</text:p>
          </table:table-cell>
          <table:table-cell office:value-type="float" office:value="0.002641956">
            <text:p>0.002641956</text:p>
          </table:table-cell>
          <table:table-cell table:number-columns-repeated="4"/>
        </table:table-row>
        <table:table-row table:style-name="ro1">
          <table:table-cell office:value-type="float" office:value="387.967132568359">
            <text:p>387.9671325684</text:p>
          </table:table-cell>
          <table:table-cell office:value-type="float" office:value="0.005103338">
            <text:p>0.005103338</text:p>
          </table:table-cell>
          <table:table-cell table:number-columns-repeated="4"/>
        </table:table-row>
        <table:table-row table:style-name="ro1">
          <table:table-cell office:value-type="float" office:value="388.078552246094">
            <text:p>388.0785522461</text:p>
          </table:table-cell>
          <table:table-cell office:value-type="float" office:value="0.00217135">
            <text:p>0.00217135</text:p>
          </table:table-cell>
          <table:table-cell table:number-columns-repeated="4"/>
        </table:table-row>
        <table:table-row table:style-name="ro1">
          <table:table-cell office:value-type="float" office:value="388.189971923828">
            <text:p>388.1899719238</text:p>
          </table:table-cell>
          <table:table-cell office:value-type="float" office:value="0.001587919">
            <text:p>0.001587919</text:p>
          </table:table-cell>
          <table:table-cell table:number-columns-repeated="4"/>
        </table:table-row>
        <table:table-row table:style-name="ro1">
          <table:table-cell office:value-type="float" office:value="388.301422119141">
            <text:p>388.3014221191</text:p>
          </table:table-cell>
          <table:table-cell office:value-type="float" office:value="-0.004581164">
            <text:p>-0.004581164</text:p>
          </table:table-cell>
          <table:table-cell table:number-columns-repeated="4"/>
        </table:table-row>
        <table:table-row table:style-name="ro1">
          <table:table-cell office:value-type="float" office:value="388.412872314453">
            <text:p>388.4128723145</text:p>
          </table:table-cell>
          <table:table-cell office:value-type="float" office:value="-0.00796071">
            <text:p>-0.00796071</text:p>
          </table:table-cell>
          <table:table-cell table:number-columns-repeated="4"/>
        </table:table-row>
        <table:table-row table:style-name="ro1">
          <table:table-cell office:value-type="float" office:value="388.524291992188">
            <text:p>388.5242919922</text:p>
          </table:table-cell>
          <table:table-cell office:value-type="float" office:value="0.006181448">
            <text:p>0.006181448</text:p>
          </table:table-cell>
          <table:table-cell table:number-columns-repeated="4"/>
        </table:table-row>
        <table:table-row table:style-name="ro1">
          <table:table-cell office:value-type="float" office:value="388.635772705078">
            <text:p>388.6357727051</text:p>
          </table:table-cell>
          <table:table-cell office:value-type="float" office:value="0.004428688">
            <text:p>0.004428688</text:p>
          </table:table-cell>
          <table:table-cell table:number-columns-repeated="4"/>
        </table:table-row>
        <table:table-row table:style-name="ro1">
          <table:table-cell office:value-type="float" office:value="388.747222900391">
            <text:p>388.7472229004</text:p>
          </table:table-cell>
          <table:table-cell office:value-type="float" office:value="-0.0007571847">
            <text:p>-0.0007571847</text:p>
          </table:table-cell>
          <table:table-cell table:number-columns-repeated="4"/>
        </table:table-row>
        <table:table-row table:style-name="ro1">
          <table:table-cell office:value-type="float" office:value="388.858673095703">
            <text:p>388.8586730957</text:p>
          </table:table-cell>
          <table:table-cell office:value-type="float" office:value="-0.008451517">
            <text:p>-0.008451517</text:p>
          </table:table-cell>
          <table:table-cell table:number-columns-repeated="4"/>
        </table:table-row>
        <table:table-row table:style-name="ro1">
          <table:table-cell office:value-type="float" office:value="388.970153808594">
            <text:p>388.9701538086</text:p>
          </table:table-cell>
          <table:table-cell office:value-type="float" office:value="0.002528015">
            <text:p>0.002528015</text:p>
          </table:table-cell>
          <table:table-cell table:number-columns-repeated="4"/>
        </table:table-row>
        <table:table-row table:style-name="ro1">
          <table:table-cell office:value-type="float" office:value="389.081634521484">
            <text:p>389.0816345215</text:p>
          </table:table-cell>
          <table:table-cell office:value-type="float" office:value="-0.001505915">
            <text:p>-0.001505915</text:p>
          </table:table-cell>
          <table:table-cell table:number-columns-repeated="4"/>
        </table:table-row>
        <table:table-row table:style-name="ro1">
          <table:table-cell office:value-type="float" office:value="389.193115234375">
            <text:p>389.1931152344</text:p>
          </table:table-cell>
          <table:table-cell office:value-type="float" office:value="0.001299911">
            <text:p>0.001299911</text:p>
          </table:table-cell>
          <table:table-cell table:number-columns-repeated="4"/>
        </table:table-row>
        <table:table-row table:style-name="ro1">
          <table:table-cell office:value-type="float" office:value="389.304595947266">
            <text:p>389.3045959473</text:p>
          </table:table-cell>
          <table:table-cell office:value-type="float" office:value="-0.00221556">
            <text:p>-0.00221556</text:p>
          </table:table-cell>
          <table:table-cell table:number-columns-repeated="4"/>
        </table:table-row>
        <table:table-row table:style-name="ro1">
          <table:table-cell office:value-type="float" office:value="389.416076660156">
            <text:p>389.4160766602</text:p>
          </table:table-cell>
          <table:table-cell office:value-type="float" office:value="0.004320651">
            <text:p>0.004320651</text:p>
          </table:table-cell>
          <table:table-cell table:number-columns-repeated="4"/>
        </table:table-row>
        <table:table-row table:style-name="ro1">
          <table:table-cell office:value-type="float" office:value="389.527587890625">
            <text:p>389.5275878906</text:p>
          </table:table-cell>
          <table:table-cell office:value-type="float" office:value="-0.003139973">
            <text:p>-0.003139973</text:p>
          </table:table-cell>
          <table:table-cell table:number-columns-repeated="4"/>
        </table:table-row>
        <table:table-row table:style-name="ro1">
          <table:table-cell office:value-type="float" office:value="389.639099121094">
            <text:p>389.6390991211</text:p>
          </table:table-cell>
          <table:table-cell office:value-type="float" office:value="0.01409106">
            <text:p>0.01409106</text:p>
          </table:table-cell>
          <table:table-cell table:number-columns-repeated="4"/>
        </table:table-row>
        <table:table-row table:style-name="ro1">
          <table:table-cell office:value-type="float" office:value="389.750610351563">
            <text:p>389.7506103516</text:p>
          </table:table-cell>
          <table:table-cell office:value-type="float" office:value="-0.003310428">
            <text:p>-0.003310428</text:p>
          </table:table-cell>
          <table:table-cell table:number-columns-repeated="4"/>
        </table:table-row>
        <table:table-row table:style-name="ro1">
          <table:table-cell office:value-type="float" office:value="389.862121582031">
            <text:p>389.862121582</text:p>
          </table:table-cell>
          <table:table-cell office:value-type="float" office:value="-0.0028836">
            <text:p>-0.0028836</text:p>
          </table:table-cell>
          <table:table-cell table:number-columns-repeated="4"/>
        </table:table-row>
        <table:table-row table:style-name="ro1">
          <table:table-cell office:value-type="float" office:value="389.9736328125">
            <text:p>389.9736328125</text:p>
          </table:table-cell>
          <table:table-cell office:value-type="float" office:value="-0.001393726">
            <text:p>-0.001393726</text:p>
          </table:table-cell>
          <table:table-cell table:number-columns-repeated="4"/>
        </table:table-row>
        <table:table-row table:style-name="ro1">
          <table:table-cell office:value-type="float" office:value="390.085174560547">
            <text:p>390.0851745605</text:p>
          </table:table-cell>
          <table:table-cell office:value-type="float" office:value="-0.002685087">
            <text:p>-0.002685087</text:p>
          </table:table-cell>
          <table:table-cell table:number-columns-repeated="4"/>
        </table:table-row>
        <table:table-row table:style-name="ro1">
          <table:table-cell office:value-type="float" office:value="390.196685791016">
            <text:p>390.196685791</text:p>
          </table:table-cell>
          <table:table-cell office:value-type="float" office:value="0.01472548">
            <text:p>0.01472548</text:p>
          </table:table-cell>
          <table:table-cell table:number-columns-repeated="4"/>
        </table:table-row>
        <table:table-row table:style-name="ro1">
          <table:table-cell office:value-type="float" office:value="390.308227539063">
            <text:p>390.3082275391</text:p>
          </table:table-cell>
          <table:table-cell office:value-type="float" office:value="0.0001102471">
            <text:p>0.0001102471</text:p>
          </table:table-cell>
          <table:table-cell table:number-columns-repeated="4"/>
        </table:table-row>
        <table:table-row table:style-name="ro1">
          <table:table-cell office:value-type="float" office:value="390.419769287109">
            <text:p>390.4197692871</text:p>
          </table:table-cell>
          <table:table-cell office:value-type="float" office:value="0.0005978962">
            <text:p>0.0005978962</text:p>
          </table:table-cell>
          <table:table-cell table:number-columns-repeated="4"/>
        </table:table-row>
        <table:table-row table:style-name="ro1">
          <table:table-cell office:value-type="float" office:value="390.531341552734">
            <text:p>390.5313415527</text:p>
          </table:table-cell>
          <table:table-cell office:value-type="float" office:value="0.001600372">
            <text:p>0.001600372</text:p>
          </table:table-cell>
          <table:table-cell table:number-columns-repeated="4"/>
        </table:table-row>
        <table:table-row table:style-name="ro1">
          <table:table-cell office:value-type="float" office:value="390.642883300781">
            <text:p>390.6428833008</text:p>
          </table:table-cell>
          <table:table-cell office:value-type="float" office:value="-0.003867771">
            <text:p>-0.003867771</text:p>
          </table:table-cell>
          <table:table-cell table:number-columns-repeated="4"/>
        </table:table-row>
        <table:table-row table:style-name="ro1">
          <table:table-cell office:value-type="float" office:value="390.754455566406">
            <text:p>390.7544555664</text:p>
          </table:table-cell>
          <table:table-cell office:value-type="float" office:value="0.01458897">
            <text:p>0.01458897</text:p>
          </table:table-cell>
          <table:table-cell table:number-columns-repeated="4"/>
        </table:table-row>
        <table:table-row table:style-name="ro1">
          <table:table-cell office:value-type="float" office:value="390.866027832031">
            <text:p>390.866027832</text:p>
          </table:table-cell>
          <table:table-cell office:value-type="float" office:value="0.0008961246">
            <text:p>0.0008961246</text:p>
          </table:table-cell>
          <table:table-cell table:number-columns-repeated="4"/>
        </table:table-row>
        <table:table-row table:style-name="ro1">
          <table:table-cell office:value-type="float" office:value="390.977600097656">
            <text:p>390.9776000977</text:p>
          </table:table-cell>
          <table:table-cell office:value-type="float" office:value="0.00040883">
            <text:p>0.00040883</text:p>
          </table:table-cell>
          <table:table-cell table:number-columns-repeated="4"/>
        </table:table-row>
        <table:table-row table:style-name="ro1">
          <table:table-cell office:value-type="float" office:value="391.089172363281">
            <text:p>391.0891723633</text:p>
          </table:table-cell>
          <table:table-cell office:value-type="float" office:value="-0.007009082">
            <text:p>-0.007009082</text:p>
          </table:table-cell>
          <table:table-cell table:number-columns-repeated="4"/>
        </table:table-row>
        <table:table-row table:style-name="ro1">
          <table:table-cell office:value-type="float" office:value="391.200744628906">
            <text:p>391.2007446289</text:p>
          </table:table-cell>
          <table:table-cell office:value-type="float" office:value="0.0160732">
            <text:p>0.0160732</text:p>
          </table:table-cell>
          <table:table-cell table:number-columns-repeated="4"/>
        </table:table-row>
        <table:table-row table:style-name="ro1">
          <table:table-cell office:value-type="float" office:value="391.312347412109">
            <text:p>391.3123474121</text:p>
          </table:table-cell>
          <table:table-cell office:value-type="float" office:value="-0.001679944">
            <text:p>-0.001679944</text:p>
          </table:table-cell>
          <table:table-cell table:number-columns-repeated="4"/>
        </table:table-row>
        <table:table-row table:style-name="ro1">
          <table:table-cell office:value-type="float" office:value="391.423950195313">
            <text:p>391.4239501953</text:p>
          </table:table-cell>
          <table:table-cell office:value-type="float" office:value="0.01231186">
            <text:p>0.01231186</text:p>
          </table:table-cell>
          <table:table-cell table:number-columns-repeated="4"/>
        </table:table-row>
        <table:table-row table:style-name="ro1">
          <table:table-cell office:value-type="float" office:value="391.535552978516">
            <text:p>391.5355529785</text:p>
          </table:table-cell>
          <table:table-cell office:value-type="float" office:value="-0.009381955">
            <text:p>-0.009381955</text:p>
          </table:table-cell>
          <table:table-cell table:number-columns-repeated="4"/>
        </table:table-row>
        <table:table-row table:style-name="ro1">
          <table:table-cell office:value-type="float" office:value="391.647155761719">
            <text:p>391.6471557617</text:p>
          </table:table-cell>
          <table:table-cell office:value-type="float" office:value="0.003902981">
            <text:p>0.003902981</text:p>
          </table:table-cell>
          <table:table-cell table:number-columns-repeated="4"/>
        </table:table-row>
        <table:table-row table:style-name="ro1">
          <table:table-cell office:value-type="float" office:value="391.758758544922">
            <text:p>391.7587585449</text:p>
          </table:table-cell>
          <table:table-cell office:value-type="float" office:value="-0.009954171">
            <text:p>-0.009954171</text:p>
          </table:table-cell>
          <table:table-cell table:number-columns-repeated="4"/>
        </table:table-row>
        <table:table-row table:style-name="ro1">
          <table:table-cell office:value-type="float" office:value="391.870391845703">
            <text:p>391.8703918457</text:p>
          </table:table-cell>
          <table:table-cell office:value-type="float" office:value="0.01249375">
            <text:p>0.01249375</text:p>
          </table:table-cell>
          <table:table-cell table:number-columns-repeated="4"/>
        </table:table-row>
        <table:table-row table:style-name="ro1">
          <table:table-cell office:value-type="float" office:value="391.982025146484">
            <text:p>391.9820251465</text:p>
          </table:table-cell>
          <table:table-cell office:value-type="float" office:value="0.002392685">
            <text:p>0.002392685</text:p>
          </table:table-cell>
          <table:table-cell table:number-columns-repeated="4"/>
        </table:table-row>
        <table:table-row table:style-name="ro1">
          <table:table-cell office:value-type="float" office:value="392.093658447266">
            <text:p>392.0936584473</text:p>
          </table:table-cell>
          <table:table-cell office:value-type="float" office:value="-0.008207048">
            <text:p>-0.008207048</text:p>
          </table:table-cell>
          <table:table-cell table:number-columns-repeated="4"/>
        </table:table-row>
        <table:table-row table:style-name="ro1">
          <table:table-cell office:value-type="float" office:value="392.205291748047">
            <text:p>392.205291748</text:p>
          </table:table-cell>
          <table:table-cell office:value-type="float" office:value="0.0007750069">
            <text:p>0.0007750069</text:p>
          </table:table-cell>
          <table:table-cell table:number-columns-repeated="4"/>
        </table:table-row>
        <table:table-row table:style-name="ro1">
          <table:table-cell office:value-type="float" office:value="392.316925048828">
            <text:p>392.3169250488</text:p>
          </table:table-cell>
          <table:table-cell office:value-type="float" office:value="0.01667764">
            <text:p>0.01667764</text:p>
          </table:table-cell>
          <table:table-cell table:number-columns-repeated="4"/>
        </table:table-row>
        <table:table-row table:style-name="ro1">
          <table:table-cell office:value-type="float" office:value="392.428558349609">
            <text:p>392.4285583496</text:p>
          </table:table-cell>
          <table:table-cell office:value-type="float" office:value="0.01138807">
            <text:p>0.01138807</text:p>
          </table:table-cell>
          <table:table-cell table:number-columns-repeated="4"/>
        </table:table-row>
        <table:table-row table:style-name="ro1">
          <table:table-cell office:value-type="float" office:value="392.540222167969">
            <text:p>392.540222168</text:p>
          </table:table-cell>
          <table:table-cell office:value-type="float" office:value="-0.004607955">
            <text:p>-0.004607955</text:p>
          </table:table-cell>
          <table:table-cell table:number-columns-repeated="4"/>
        </table:table-row>
        <table:table-row table:style-name="ro1">
          <table:table-cell office:value-type="float" office:value="392.651885986328">
            <text:p>392.6518859863</text:p>
          </table:table-cell>
          <table:table-cell office:value-type="float" office:value="-0.007684313">
            <text:p>-0.007684313</text:p>
          </table:table-cell>
          <table:table-cell table:number-columns-repeated="4"/>
        </table:table-row>
        <table:table-row table:style-name="ro1">
          <table:table-cell office:value-type="float" office:value="392.763549804688">
            <text:p>392.7635498047</text:p>
          </table:table-cell>
          <table:table-cell office:value-type="float" office:value="-0.0002232914">
            <text:p>-0.0002232914</text:p>
          </table:table-cell>
          <table:table-cell table:number-columns-repeated="4"/>
        </table:table-row>
        <table:table-row table:style-name="ro1">
          <table:table-cell office:value-type="float" office:value="392.875213623047">
            <text:p>392.875213623</text:p>
          </table:table-cell>
          <table:table-cell office:value-type="float" office:value="0.0007379391">
            <text:p>0.0007379391</text:p>
          </table:table-cell>
          <table:table-cell table:number-columns-repeated="4"/>
        </table:table-row>
        <table:table-row table:style-name="ro1">
          <table:table-cell office:value-type="float" office:value="392.986907958984">
            <text:p>392.986907959</text:p>
          </table:table-cell>
          <table:table-cell office:value-type="float" office:value="0.003986406">
            <text:p>0.003986406</text:p>
          </table:table-cell>
          <table:table-cell table:number-columns-repeated="4"/>
        </table:table-row>
        <table:table-row table:style-name="ro1">
          <table:table-cell office:value-type="float" office:value="393.098602294922">
            <text:p>393.0986022949</text:p>
          </table:table-cell>
          <table:table-cell office:value-type="float" office:value="0.01393706">
            <text:p>0.01393706</text:p>
          </table:table-cell>
          <table:table-cell table:number-columns-repeated="4"/>
        </table:table-row>
        <table:table-row table:style-name="ro1">
          <table:table-cell office:value-type="float" office:value="393.210266113281">
            <text:p>393.2102661133</text:p>
          </table:table-cell>
          <table:table-cell office:value-type="float" office:value="-0.003638733">
            <text:p>-0.003638733</text:p>
          </table:table-cell>
          <table:table-cell table:number-columns-repeated="4"/>
        </table:table-row>
        <table:table-row table:style-name="ro1">
          <table:table-cell office:value-type="float" office:value="393.321960449219">
            <text:p>393.3219604492</text:p>
          </table:table-cell>
          <table:table-cell office:value-type="float" office:value="-0.002285779">
            <text:p>-0.002285779</text:p>
          </table:table-cell>
          <table:table-cell table:number-columns-repeated="4"/>
        </table:table-row>
        <table:table-row table:style-name="ro1">
          <table:table-cell office:value-type="float" office:value="393.433685302734">
            <text:p>393.4336853027</text:p>
          </table:table-cell>
          <table:table-cell office:value-type="float" office:value="-0.00612667">
            <text:p>-0.00612667</text:p>
          </table:table-cell>
          <table:table-cell table:number-columns-repeated="4"/>
        </table:table-row>
        <table:table-row table:style-name="ro1">
          <table:table-cell office:value-type="float" office:value="393.545379638672">
            <text:p>393.5453796387</text:p>
          </table:table-cell>
          <table:table-cell office:value-type="float" office:value="-0.01029963">
            <text:p>-0.01029963</text:p>
          </table:table-cell>
          <table:table-cell table:number-columns-repeated="4"/>
        </table:table-row>
        <table:table-row table:style-name="ro1">
          <table:table-cell office:value-type="float" office:value="393.657104492188">
            <text:p>393.6571044922</text:p>
          </table:table-cell>
          <table:table-cell office:value-type="float" office:value="0.0004373128">
            <text:p>0.0004373128</text:p>
          </table:table-cell>
          <table:table-cell table:number-columns-repeated="4"/>
        </table:table-row>
        <table:table-row table:style-name="ro1">
          <table:table-cell office:value-type="float" office:value="393.768798828125">
            <text:p>393.7687988281</text:p>
          </table:table-cell>
          <table:table-cell office:value-type="float" office:value="-0.006278546">
            <text:p>-0.006278546</text:p>
          </table:table-cell>
          <table:table-cell table:number-columns-repeated="4"/>
        </table:table-row>
        <table:table-row table:style-name="ro1">
          <table:table-cell office:value-type="float" office:value="393.880523681641">
            <text:p>393.8805236816</text:p>
          </table:table-cell>
          <table:table-cell office:value-type="float" office:value="0.01200364">
            <text:p>0.01200364</text:p>
          </table:table-cell>
          <table:table-cell table:number-columns-repeated="4"/>
        </table:table-row>
        <table:table-row table:style-name="ro1">
          <table:table-cell office:value-type="float" office:value="393.992248535156">
            <text:p>393.9922485352</text:p>
          </table:table-cell>
          <table:table-cell office:value-type="float" office:value="0.02191984">
            <text:p>0.02191984</text:p>
          </table:table-cell>
          <table:table-cell table:number-columns-repeated="4"/>
        </table:table-row>
        <table:table-row table:style-name="ro1">
          <table:table-cell office:value-type="float" office:value="394.10400390625">
            <text:p>394.1040039063</text:p>
          </table:table-cell>
          <table:table-cell office:value-type="float" office:value="-0.005925564">
            <text:p>-0.005925564</text:p>
          </table:table-cell>
          <table:table-cell table:number-columns-repeated="4"/>
        </table:table-row>
        <table:table-row table:style-name="ro1">
          <table:table-cell office:value-type="float" office:value="394.215728759766">
            <text:p>394.2157287598</text:p>
          </table:table-cell>
          <table:table-cell office:value-type="float" office:value="0.001915159">
            <text:p>0.001915159</text:p>
          </table:table-cell>
          <table:table-cell table:number-columns-repeated="4"/>
        </table:table-row>
        <table:table-row table:style-name="ro1">
          <table:table-cell office:value-type="float" office:value="394.327484130859">
            <text:p>394.3274841309</text:p>
          </table:table-cell>
          <table:table-cell office:value-type="float" office:value="0.00641993">
            <text:p>0.00641993</text:p>
          </table:table-cell>
          <table:table-cell table:number-columns-repeated="4"/>
        </table:table-row>
        <table:table-row table:style-name="ro1">
          <table:table-cell office:value-type="float" office:value="394.439239501953">
            <text:p>394.439239502</text:p>
          </table:table-cell>
          <table:table-cell office:value-type="float" office:value="-0.001761794">
            <text:p>-0.001761794</text:p>
          </table:table-cell>
          <table:table-cell table:number-columns-repeated="4"/>
        </table:table-row>
        <table:table-row table:style-name="ro1">
          <table:table-cell office:value-type="float" office:value="394.550994873047">
            <text:p>394.550994873</text:p>
          </table:table-cell>
          <table:table-cell office:value-type="float" office:value="-0.007840494">
            <text:p>-0.007840494</text:p>
          </table:table-cell>
          <table:table-cell table:number-columns-repeated="4"/>
        </table:table-row>
        <table:table-row table:style-name="ro1">
          <table:table-cell office:value-type="float" office:value="394.662750244141">
            <text:p>394.6627502441</text:p>
          </table:table-cell>
          <table:table-cell office:value-type="float" office:value="0.003927822">
            <text:p>0.003927822</text:p>
          </table:table-cell>
          <table:table-cell table:number-columns-repeated="4"/>
        </table:table-row>
        <table:table-row table:style-name="ro1">
          <table:table-cell office:value-type="float" office:value="394.774536132813">
            <text:p>394.7745361328</text:p>
          </table:table-cell>
          <table:table-cell office:value-type="float" office:value="-0.002957985">
            <text:p>-0.002957985</text:p>
          </table:table-cell>
          <table:table-cell table:number-columns-repeated="4"/>
        </table:table-row>
        <table:table-row table:style-name="ro1">
          <table:table-cell office:value-type="float" office:value="394.886291503906">
            <text:p>394.8862915039</text:p>
          </table:table-cell>
          <table:table-cell office:value-type="float" office:value="0.007953324">
            <text:p>0.007953324</text:p>
          </table:table-cell>
          <table:table-cell table:number-columns-repeated="4"/>
        </table:table-row>
        <table:table-row table:style-name="ro1">
          <table:table-cell office:value-type="float" office:value="394.998077392578">
            <text:p>394.9980773926</text:p>
          </table:table-cell>
          <table:table-cell office:value-type="float" office:value="-0.002870357">
            <text:p>-0.002870357</text:p>
          </table:table-cell>
          <table:table-cell table:number-columns-repeated="4"/>
        </table:table-row>
        <table:table-row table:style-name="ro1">
          <table:table-cell office:value-type="float" office:value="395.10986328125">
            <text:p>395.1098632813</text:p>
          </table:table-cell>
          <table:table-cell office:value-type="float" office:value="0.009588307">
            <text:p>0.009588307</text:p>
          </table:table-cell>
          <table:table-cell table:number-columns-repeated="4"/>
        </table:table-row>
        <table:table-row table:style-name="ro1">
          <table:table-cell office:value-type="float" office:value="395.221649169922">
            <text:p>395.2216491699</text:p>
          </table:table-cell>
          <table:table-cell office:value-type="float" office:value="-0.003627539">
            <text:p>-0.003627539</text:p>
          </table:table-cell>
          <table:table-cell table:number-columns-repeated="4"/>
        </table:table-row>
        <table:table-row table:style-name="ro1">
          <table:table-cell office:value-type="float" office:value="395.333465576172">
            <text:p>395.3334655762</text:p>
          </table:table-cell>
          <table:table-cell office:value-type="float" office:value="-0.008872228">
            <text:p>-0.008872228</text:p>
          </table:table-cell>
          <table:table-cell table:number-columns-repeated="4"/>
        </table:table-row>
        <table:table-row table:style-name="ro1">
          <table:table-cell office:value-type="float" office:value="395.445251464844">
            <text:p>395.4452514648</text:p>
          </table:table-cell>
          <table:table-cell office:value-type="float" office:value="-0.003105602">
            <text:p>-0.003105602</text:p>
          </table:table-cell>
          <table:table-cell table:number-columns-repeated="4"/>
        </table:table-row>
        <table:table-row table:style-name="ro1">
          <table:table-cell office:value-type="float" office:value="395.557067871094">
            <text:p>395.5570678711</text:p>
          </table:table-cell>
          <table:table-cell office:value-type="float" office:value="-0.006162853">
            <text:p>-0.006162853</text:p>
          </table:table-cell>
          <table:table-cell table:number-columns-repeated="4"/>
        </table:table-row>
        <table:table-row table:style-name="ro1">
          <table:table-cell office:value-type="float" office:value="395.668884277344">
            <text:p>395.6688842773</text:p>
          </table:table-cell>
          <table:table-cell office:value-type="float" office:value="0.04389344">
            <text:p>0.04389344</text:p>
          </table:table-cell>
          <table:table-cell table:number-columns-repeated="4"/>
        </table:table-row>
        <table:table-row table:style-name="ro1">
          <table:table-cell office:value-type="float" office:value="395.780700683594">
            <text:p>395.7807006836</text:p>
          </table:table-cell>
          <table:table-cell office:value-type="float" office:value="-0.003126439">
            <text:p>-0.003126439</text:p>
          </table:table-cell>
          <table:table-cell table:number-columns-repeated="4"/>
        </table:table-row>
        <table:table-row table:style-name="ro1">
          <table:table-cell office:value-type="float" office:value="395.892547607422">
            <text:p>395.8925476074</text:p>
          </table:table-cell>
          <table:table-cell office:value-type="float" office:value="0.002717341">
            <text:p>0.002717341</text:p>
          </table:table-cell>
          <table:table-cell table:number-columns-repeated="4"/>
        </table:table-row>
        <table:table-row table:style-name="ro1">
          <table:table-cell office:value-type="float" office:value="396.004364013672">
            <text:p>396.0043640137</text:p>
          </table:table-cell>
          <table:table-cell office:value-type="float" office:value="0.002500009">
            <text:p>0.002500009</text:p>
          </table:table-cell>
          <table:table-cell table:number-columns-repeated="4"/>
        </table:table-row>
        <table:table-row table:style-name="ro1">
          <table:table-cell office:value-type="float" office:value="396.1162109375">
            <text:p>396.1162109375</text:p>
          </table:table-cell>
          <table:table-cell office:value-type="float" office:value="0.04775495">
            <text:p>0.04775495</text:p>
          </table:table-cell>
          <table:table-cell table:number-columns-repeated="4"/>
        </table:table-row>
        <table:table-row table:style-name="ro1">
          <table:table-cell office:value-type="float" office:value="396.228057861328">
            <text:p>396.2280578613</text:p>
          </table:table-cell>
          <table:table-cell office:value-type="float" office:value="0.0004268414">
            <text:p>0.0004268414</text:p>
          </table:table-cell>
          <table:table-cell table:number-columns-repeated="4"/>
        </table:table-row>
        <table:table-row table:style-name="ro1">
          <table:table-cell office:value-type="float" office:value="396.339904785156">
            <text:p>396.3399047852</text:p>
          </table:table-cell>
          <table:table-cell office:value-type="float" office:value="-0.001527188">
            <text:p>-0.001527188</text:p>
          </table:table-cell>
          <table:table-cell table:number-columns-repeated="4"/>
        </table:table-row>
        <table:table-row table:style-name="ro1">
          <table:table-cell office:value-type="float" office:value="396.451751708984">
            <text:p>396.451751709</text:p>
          </table:table-cell>
          <table:table-cell office:value-type="float" office:value="-0.004322811">
            <text:p>-0.004322811</text:p>
          </table:table-cell>
          <table:table-cell table:number-columns-repeated="4"/>
        </table:table-row>
        <table:table-row table:style-name="ro1">
          <table:table-cell office:value-type="float" office:value="396.563629150391">
            <text:p>396.5636291504</text:p>
          </table:table-cell>
          <table:table-cell office:value-type="float" office:value="-0.007342211">
            <text:p>-0.007342211</text:p>
          </table:table-cell>
          <table:table-cell table:number-columns-repeated="4"/>
        </table:table-row>
        <table:table-row table:style-name="ro1">
          <table:table-cell office:value-type="float" office:value="396.675476074219">
            <text:p>396.6754760742</text:p>
          </table:table-cell>
          <table:table-cell office:value-type="float" office:value="-0.002705093">
            <text:p>-0.002705093</text:p>
          </table:table-cell>
          <table:table-cell table:number-columns-repeated="4"/>
        </table:table-row>
        <table:table-row table:style-name="ro1">
          <table:table-cell office:value-type="float" office:value="396.787353515625">
            <text:p>396.7873535156</text:p>
          </table:table-cell>
          <table:table-cell office:value-type="float" office:value="0.01146033">
            <text:p>0.01146033</text:p>
          </table:table-cell>
          <table:table-cell table:number-columns-repeated="4"/>
        </table:table-row>
        <table:table-row table:style-name="ro1">
          <table:table-cell office:value-type="float" office:value="396.899230957031">
            <text:p>396.899230957</text:p>
          </table:table-cell>
          <table:table-cell office:value-type="float" office:value="-0.004204408">
            <text:p>-0.004204408</text:p>
          </table:table-cell>
          <table:table-cell table:number-columns-repeated="4"/>
        </table:table-row>
        <table:table-row table:style-name="ro1">
          <table:table-cell office:value-type="float" office:value="397.011108398438">
            <text:p>397.0111083984</text:p>
          </table:table-cell>
          <table:table-cell office:value-type="float" office:value="0.001905519">
            <text:p>0.001905519</text:p>
          </table:table-cell>
          <table:table-cell table:number-columns-repeated="4"/>
        </table:table-row>
        <table:table-row table:style-name="ro1">
          <table:table-cell office:value-type="float" office:value="397.123016357422">
            <text:p>397.1230163574</text:p>
          </table:table-cell>
          <table:table-cell office:value-type="float" office:value="-0.004661118">
            <text:p>-0.004661118</text:p>
          </table:table-cell>
          <table:table-cell table:number-columns-repeated="4"/>
        </table:table-row>
        <table:table-row table:style-name="ro1">
          <table:table-cell office:value-type="float" office:value="397.234893798828">
            <text:p>397.2348937988</text:p>
          </table:table-cell>
          <table:table-cell office:value-type="float" office:value="0.005498847">
            <text:p>0.005498847</text:p>
          </table:table-cell>
          <table:table-cell table:number-columns-repeated="4"/>
        </table:table-row>
        <table:table-row table:style-name="ro1">
          <table:table-cell office:value-type="float" office:value="397.346801757813">
            <text:p>397.3468017578</text:p>
          </table:table-cell>
          <table:table-cell office:value-type="float" office:value="0.002508689">
            <text:p>0.002508689</text:p>
          </table:table-cell>
          <table:table-cell table:number-columns-repeated="4"/>
        </table:table-row>
        <table:table-row table:style-name="ro1">
          <table:table-cell office:value-type="float" office:value="397.458709716797">
            <text:p>397.4587097168</text:p>
          </table:table-cell>
          <table:table-cell office:value-type="float" office:value="-0.002904254">
            <text:p>-0.002904254</text:p>
          </table:table-cell>
          <table:table-cell table:number-columns-repeated="4"/>
        </table:table-row>
        <table:table-row table:style-name="ro1">
          <table:table-cell office:value-type="float" office:value="397.570617675781">
            <text:p>397.5706176758</text:p>
          </table:table-cell>
          <table:table-cell office:value-type="float" office:value="0.00505428">
            <text:p>0.00505428</text:p>
          </table:table-cell>
          <table:table-cell table:number-columns-repeated="4"/>
        </table:table-row>
        <table:table-row table:style-name="ro1">
          <table:table-cell office:value-type="float" office:value="397.682525634766">
            <text:p>397.6825256348</text:p>
          </table:table-cell>
          <table:table-cell office:value-type="float" office:value="-0.002478734">
            <text:p>-0.002478734</text:p>
          </table:table-cell>
          <table:table-cell table:number-columns-repeated="4"/>
        </table:table-row>
        <table:table-row table:style-name="ro1">
          <table:table-cell office:value-type="float" office:value="397.794464111328">
            <text:p>397.7944641113</text:p>
          </table:table-cell>
          <table:table-cell office:value-type="float" office:value="0.001595337">
            <text:p>0.001595337</text:p>
          </table:table-cell>
          <table:table-cell table:number-columns-repeated="4"/>
        </table:table-row>
        <table:table-row table:style-name="ro1">
          <table:table-cell office:value-type="float" office:value="397.906402587891">
            <text:p>397.9064025879</text:p>
          </table:table-cell>
          <table:table-cell office:value-type="float" office:value="0.0007693572">
            <text:p>0.0007693572</text:p>
          </table:table-cell>
          <table:table-cell table:number-columns-repeated="4"/>
        </table:table-row>
        <table:table-row table:style-name="ro1">
          <table:table-cell office:value-type="float" office:value="398.018310546875">
            <text:p>398.0183105469</text:p>
          </table:table-cell>
          <table:table-cell office:value-type="float" office:value="0.006269809">
            <text:p>0.006269809</text:p>
          </table:table-cell>
          <table:table-cell table:number-columns-repeated="4"/>
        </table:table-row>
        <table:table-row table:style-name="ro1">
          <table:table-cell office:value-type="float" office:value="398.130249023438">
            <text:p>398.1302490234</text:p>
          </table:table-cell>
          <table:table-cell office:value-type="float" office:value="-0.002665886">
            <text:p>-0.002665886</text:p>
          </table:table-cell>
          <table:table-cell table:number-columns-repeated="4"/>
        </table:table-row>
        <table:table-row table:style-name="ro1">
          <table:table-cell office:value-type="float" office:value="398.242218017578">
            <text:p>398.2422180176</text:p>
          </table:table-cell>
          <table:table-cell office:value-type="float" office:value="-0.0003331692">
            <text:p>-0.0003331692</text:p>
          </table:table-cell>
          <table:table-cell table:number-columns-repeated="4"/>
        </table:table-row>
        <table:table-row table:style-name="ro1">
          <table:table-cell office:value-type="float" office:value="398.354156494141">
            <text:p>398.3541564941</text:p>
          </table:table-cell>
          <table:table-cell office:value-type="float" office:value="-0.002229175">
            <text:p>-0.002229175</text:p>
          </table:table-cell>
          <table:table-cell table:number-columns-repeated="4"/>
        </table:table-row>
        <table:table-row table:style-name="ro1">
          <table:table-cell office:value-type="float" office:value="398.466125488281">
            <text:p>398.4661254883</text:p>
          </table:table-cell>
          <table:table-cell office:value-type="float" office:value="-0.001411724">
            <text:p>-0.001411724</text:p>
          </table:table-cell>
          <table:table-cell table:number-columns-repeated="4"/>
        </table:table-row>
        <table:table-row table:style-name="ro1">
          <table:table-cell office:value-type="float" office:value="398.578094482422">
            <text:p>398.5780944824</text:p>
          </table:table-cell>
          <table:table-cell office:value-type="float" office:value="-0.001592741">
            <text:p>-0.001592741</text:p>
          </table:table-cell>
          <table:table-cell table:number-columns-repeated="4"/>
        </table:table-row>
        <table:table-row table:style-name="ro1">
          <table:table-cell office:value-type="float" office:value="398.690063476563">
            <text:p>398.6900634766</text:p>
          </table:table-cell>
          <table:table-cell office:value-type="float" office:value="-0.006726391">
            <text:p>-0.006726391</text:p>
          </table:table-cell>
          <table:table-cell table:number-columns-repeated="4"/>
        </table:table-row>
        <table:table-row table:style-name="ro1">
          <table:table-cell office:value-type="float" office:value="398.802032470703">
            <text:p>398.8020324707</text:p>
          </table:table-cell>
          <table:table-cell office:value-type="float" office:value="-0.005551233">
            <text:p>-0.005551233</text:p>
          </table:table-cell>
          <table:table-cell table:number-columns-repeated="4"/>
        </table:table-row>
        <table:table-row table:style-name="ro1">
          <table:table-cell office:value-type="float" office:value="398.914001464844">
            <text:p>398.9140014648</text:p>
          </table:table-cell>
          <table:table-cell office:value-type="float" office:value="-0.003804219">
            <text:p>-0.003804219</text:p>
          </table:table-cell>
          <table:table-cell table:number-columns-repeated="4"/>
        </table:table-row>
        <table:table-row table:style-name="ro1">
          <table:table-cell office:value-type="float" office:value="399.026000976563">
            <text:p>399.0260009766</text:p>
          </table:table-cell>
          <table:table-cell office:value-type="float" office:value="0.02145736">
            <text:p>0.02145736</text:p>
          </table:table-cell>
          <table:table-cell table:number-columns-repeated="4"/>
        </table:table-row>
        <table:table-row table:style-name="ro1">
          <table:table-cell office:value-type="float" office:value="399.137969970703">
            <text:p>399.1379699707</text:p>
          </table:table-cell>
          <table:table-cell office:value-type="float" office:value="-0.002631201">
            <text:p>-0.002631201</text:p>
          </table:table-cell>
          <table:table-cell table:number-columns-repeated="4"/>
        </table:table-row>
        <table:table-row table:style-name="ro1">
          <table:table-cell office:value-type="float" office:value="399.249969482422">
            <text:p>399.2499694824</text:p>
          </table:table-cell>
          <table:table-cell office:value-type="float" office:value="0.0162617">
            <text:p>0.0162617</text:p>
          </table:table-cell>
          <table:table-cell table:number-columns-repeated="4"/>
        </table:table-row>
        <table:table-row table:style-name="ro1">
          <table:table-cell office:value-type="float" office:value="399.361968994141">
            <text:p>399.3619689941</text:p>
          </table:table-cell>
          <table:table-cell office:value-type="float" office:value="-0.003531387">
            <text:p>-0.003531387</text:p>
          </table:table-cell>
          <table:table-cell table:number-columns-repeated="4"/>
        </table:table-row>
        <table:table-row table:style-name="ro1">
          <table:table-cell office:value-type="float" office:value="399.473999023438">
            <text:p>399.4739990234</text:p>
          </table:table-cell>
          <table:table-cell office:value-type="float" office:value="0.009070625">
            <text:p>0.009070625</text:p>
          </table:table-cell>
          <table:table-cell table:number-columns-repeated="4"/>
        </table:table-row>
        <table:table-row table:style-name="ro1">
          <table:table-cell office:value-type="float" office:value="399.585998535156">
            <text:p>399.5859985352</text:p>
          </table:table-cell>
          <table:table-cell office:value-type="float" office:value="-0.0003830136">
            <text:p>-0.0003830136</text:p>
          </table:table-cell>
          <table:table-cell table:number-columns-repeated="4"/>
        </table:table-row>
        <table:table-row table:style-name="ro1">
          <table:table-cell office:value-type="float" office:value="399.698028564453">
            <text:p>399.6980285645</text:p>
          </table:table-cell>
          <table:table-cell office:value-type="float" office:value="-0.002560906">
            <text:p>-0.002560906</text:p>
          </table:table-cell>
          <table:table-cell table:number-columns-repeated="4"/>
        </table:table-row>
        <table:table-row table:style-name="ro1">
          <table:table-cell office:value-type="float" office:value="399.81005859375">
            <text:p>399.8100585938</text:p>
          </table:table-cell>
          <table:table-cell office:value-type="float" office:value="-0.007214855">
            <text:p>-0.007214855</text:p>
          </table:table-cell>
          <table:table-cell table:number-columns-repeated="4"/>
        </table:table-row>
        <table:table-row table:style-name="ro1">
          <table:table-cell office:value-type="float" office:value="399.922088623047">
            <text:p>399.922088623</text:p>
          </table:table-cell>
          <table:table-cell office:value-type="float" office:value="-0.002970036">
            <text:p>-0.002970036</text:p>
          </table:table-cell>
          <table:table-cell table:number-columns-repeated="4"/>
        </table:table-row>
        <table:table-row table:style-name="ro1">
          <table:table-cell office:value-type="float" office:value="400.034118652344">
            <text:p>400.0341186523</text:p>
          </table:table-cell>
          <table:table-cell office:value-type="float" office:value="-0.006663259">
            <text:p>-0.006663259</text:p>
          </table:table-cell>
          <table:table-cell table:number-columns-repeated="4"/>
        </table:table-row>
        <table:table-row table:style-name="ro1">
          <table:table-cell office:value-type="float" office:value="400.146148681641">
            <text:p>400.1461486816</text:p>
          </table:table-cell>
          <table:table-cell office:value-type="float" office:value="-0.0003959536">
            <text:p>-0.0003959536</text:p>
          </table:table-cell>
          <table:table-cell table:number-columns-repeated="4"/>
        </table:table-row>
        <table:table-row table:style-name="ro1">
          <table:table-cell office:value-type="float" office:value="400.258209228516">
            <text:p>400.2582092285</text:p>
          </table:table-cell>
          <table:table-cell office:value-type="float" office:value="-0.002878191">
            <text:p>-0.002878191</text:p>
          </table:table-cell>
          <table:table-cell table:number-columns-repeated="4"/>
        </table:table-row>
        <table:table-row table:style-name="ro1">
          <table:table-cell office:value-type="float" office:value="400.370269775391">
            <text:p>400.3702697754</text:p>
          </table:table-cell>
          <table:table-cell office:value-type="float" office:value="0.002490611">
            <text:p>0.002490611</text:p>
          </table:table-cell>
          <table:table-cell table:number-columns-repeated="4"/>
        </table:table-row>
        <table:table-row table:style-name="ro1">
          <table:table-cell office:value-type="float" office:value="400.482330322266">
            <text:p>400.4823303223</text:p>
          </table:table-cell>
          <table:table-cell office:value-type="float" office:value="-0.002037864">
            <text:p>-0.002037864</text:p>
          </table:table-cell>
          <table:table-cell table:number-columns-repeated="4"/>
        </table:table-row>
        <table:table-row table:style-name="ro1">
          <table:table-cell office:value-type="float" office:value="400.594390869141">
            <text:p>400.5943908691</text:p>
          </table:table-cell>
          <table:table-cell office:value-type="float" office:value="0.006342154">
            <text:p>0.006342154</text:p>
          </table:table-cell>
          <table:table-cell table:number-columns-repeated="4"/>
        </table:table-row>
        <table:table-row table:style-name="ro1">
          <table:table-cell office:value-type="float" office:value="400.706451416016">
            <text:p>400.706451416</text:p>
          </table:table-cell>
          <table:table-cell office:value-type="float" office:value="-0.003968223">
            <text:p>-0.003968223</text:p>
          </table:table-cell>
          <table:table-cell table:number-columns-repeated="4"/>
        </table:table-row>
        <table:table-row table:style-name="ro1">
          <table:table-cell office:value-type="float" office:value="400.818511962891">
            <text:p>400.8185119629</text:p>
          </table:table-cell>
          <table:table-cell office:value-type="float" office:value="0.00608433">
            <text:p>0.00608433</text:p>
          </table:table-cell>
          <table:table-cell table:number-columns-repeated="4"/>
        </table:table-row>
        <table:table-row table:style-name="ro1">
          <table:table-cell office:value-type="float" office:value="400.930603027344">
            <text:p>400.9306030273</text:p>
          </table:table-cell>
          <table:table-cell office:value-type="float" office:value="0.006649504">
            <text:p>0.006649504</text:p>
          </table:table-cell>
          <table:table-cell table:number-columns-repeated="4"/>
        </table:table-row>
        <table:table-row table:style-name="ro1">
          <table:table-cell office:value-type="float" office:value="401.042694091797">
            <text:p>401.0426940918</text:p>
          </table:table-cell>
          <table:table-cell office:value-type="float" office:value="-0.0005579174">
            <text:p>-0.0005579174</text:p>
          </table:table-cell>
          <table:table-cell table:number-columns-repeated="4"/>
        </table:table-row>
        <table:table-row table:style-name="ro1">
          <table:table-cell office:value-type="float" office:value="401.15478515625">
            <text:p>401.1547851563</text:p>
          </table:table-cell>
          <table:table-cell office:value-type="float" office:value="0.005811685">
            <text:p>0.005811685</text:p>
          </table:table-cell>
          <table:table-cell table:number-columns-repeated="4"/>
        </table:table-row>
        <table:table-row table:style-name="ro1">
          <table:table-cell office:value-type="float" office:value="401.266876220703">
            <text:p>401.2668762207</text:p>
          </table:table-cell>
          <table:table-cell office:value-type="float" office:value="0.005225659">
            <text:p>0.005225659</text:p>
          </table:table-cell>
          <table:table-cell table:number-columns-repeated="4"/>
        </table:table-row>
        <table:table-row table:style-name="ro1">
          <table:table-cell office:value-type="float" office:value="401.378997802734">
            <text:p>401.3789978027</text:p>
          </table:table-cell>
          <table:table-cell office:value-type="float" office:value="0.001002481">
            <text:p>0.001002481</text:p>
          </table:table-cell>
          <table:table-cell table:number-columns-repeated="4"/>
        </table:table-row>
        <table:table-row table:style-name="ro1">
          <table:table-cell office:value-type="float" office:value="401.491088867188">
            <text:p>401.4910888672</text:p>
          </table:table-cell>
          <table:table-cell office:value-type="float" office:value="-0.0018129">
            <text:p>-0.0018129</text:p>
          </table:table-cell>
          <table:table-cell table:number-columns-repeated="4"/>
        </table:table-row>
        <table:table-row table:style-name="ro1">
          <table:table-cell office:value-type="float" office:value="401.603210449219">
            <text:p>401.6032104492</text:p>
          </table:table-cell>
          <table:table-cell office:value-type="float" office:value="-0.0005062087">
            <text:p>-0.0005062087</text:p>
          </table:table-cell>
          <table:table-cell table:number-columns-repeated="4"/>
        </table:table-row>
        <table:table-row table:style-name="ro1">
          <table:table-cell office:value-type="float" office:value="401.71533203125">
            <text:p>401.7153320313</text:p>
          </table:table-cell>
          <table:table-cell office:value-type="float" office:value="-0.003652536">
            <text:p>-0.003652536</text:p>
          </table:table-cell>
          <table:table-cell table:number-columns-repeated="4"/>
        </table:table-row>
        <table:table-row table:style-name="ro1">
          <table:table-cell office:value-type="float" office:value="401.827453613281">
            <text:p>401.8274536133</text:p>
          </table:table-cell>
          <table:table-cell office:value-type="float" office:value="0.0005867228">
            <text:p>0.0005867228</text:p>
          </table:table-cell>
          <table:table-cell table:number-columns-repeated="4"/>
        </table:table-row>
        <table:table-row table:style-name="ro1">
          <table:table-cell office:value-type="float" office:value="401.939605712891">
            <text:p>401.9396057129</text:p>
          </table:table-cell>
          <table:table-cell office:value-type="float" office:value="0.002595068">
            <text:p>0.002595068</text:p>
          </table:table-cell>
          <table:table-cell table:number-columns-repeated="4"/>
        </table:table-row>
        <table:table-row table:style-name="ro1">
          <table:table-cell office:value-type="float" office:value="402.051727294922">
            <text:p>402.0517272949</text:p>
          </table:table-cell>
          <table:table-cell office:value-type="float" office:value="-0.006022473">
            <text:p>-0.006022473</text:p>
          </table:table-cell>
          <table:table-cell table:number-columns-repeated="4"/>
        </table:table-row>
        <table:table-row table:style-name="ro1">
          <table:table-cell office:value-type="float" office:value="402.163879394531">
            <text:p>402.1638793945</text:p>
          </table:table-cell>
          <table:table-cell office:value-type="float" office:value="0.01056245">
            <text:p>0.01056245</text:p>
          </table:table-cell>
          <table:table-cell table:number-columns-repeated="4"/>
        </table:table-row>
        <table:table-row table:style-name="ro1">
          <table:table-cell office:value-type="float" office:value="402.276031494141">
            <text:p>402.2760314941</text:p>
          </table:table-cell>
          <table:table-cell office:value-type="float" office:value="-0.002326349">
            <text:p>-0.002326349</text:p>
          </table:table-cell>
          <table:table-cell table:number-columns-repeated="4"/>
        </table:table-row>
        <table:table-row table:style-name="ro1">
          <table:table-cell office:value-type="float" office:value="402.38818359375">
            <text:p>402.3881835938</text:p>
          </table:table-cell>
          <table:table-cell office:value-type="float" office:value="-0.001278637">
            <text:p>-0.001278637</text:p>
          </table:table-cell>
          <table:table-cell table:number-columns-repeated="4"/>
        </table:table-row>
        <table:table-row table:style-name="ro1">
          <table:table-cell office:value-type="float" office:value="402.500335693359">
            <text:p>402.5003356934</text:p>
          </table:table-cell>
          <table:table-cell office:value-type="float" office:value="0.0006176832">
            <text:p>0.0006176832</text:p>
          </table:table-cell>
          <table:table-cell table:number-columns-repeated="4"/>
        </table:table-row>
        <table:table-row table:style-name="ro1">
          <table:table-cell office:value-type="float" office:value="402.612487792969">
            <text:p>402.612487793</text:p>
          </table:table-cell>
          <table:table-cell office:value-type="float" office:value="0.005899705">
            <text:p>0.005899705</text:p>
          </table:table-cell>
          <table:table-cell table:number-columns-repeated="4"/>
        </table:table-row>
        <table:table-row table:style-name="ro1">
          <table:table-cell office:value-type="float" office:value="402.724670410156">
            <text:p>402.7246704102</text:p>
          </table:table-cell>
          <table:table-cell office:value-type="float" office:value="0.006051911">
            <text:p>0.006051911</text:p>
          </table:table-cell>
          <table:table-cell table:number-columns-repeated="4"/>
        </table:table-row>
        <table:table-row table:style-name="ro1">
          <table:table-cell office:value-type="float" office:value="402.836853027344">
            <text:p>402.8368530273</text:p>
          </table:table-cell>
          <table:table-cell office:value-type="float" office:value="0.004730646">
            <text:p>0.004730646</text:p>
          </table:table-cell>
          <table:table-cell table:number-columns-repeated="4"/>
        </table:table-row>
        <table:table-row table:style-name="ro1">
          <table:table-cell office:value-type="float" office:value="402.949035644531">
            <text:p>402.9490356445</text:p>
          </table:table-cell>
          <table:table-cell office:value-type="float" office:value="0.0132353">
            <text:p>0.0132353</text:p>
          </table:table-cell>
          <table:table-cell table:number-columns-repeated="4"/>
        </table:table-row>
        <table:table-row table:style-name="ro1">
          <table:table-cell office:value-type="float" office:value="403.061218261719">
            <text:p>403.0612182617</text:p>
          </table:table-cell>
          <table:table-cell office:value-type="float" office:value="0.002956697">
            <text:p>0.002956697</text:p>
          </table:table-cell>
          <table:table-cell table:number-columns-repeated="4"/>
        </table:table-row>
        <table:table-row table:style-name="ro1">
          <table:table-cell office:value-type="float" office:value="403.173400878906">
            <text:p>403.1734008789</text:p>
          </table:table-cell>
          <table:table-cell office:value-type="float" office:value="0.01260429">
            <text:p>0.01260429</text:p>
          </table:table-cell>
          <table:table-cell table:number-columns-repeated="4"/>
        </table:table-row>
        <table:table-row table:style-name="ro1">
          <table:table-cell office:value-type="float" office:value="403.285614013672">
            <text:p>403.2856140137</text:p>
          </table:table-cell>
          <table:table-cell office:value-type="float" office:value="-0.0004609792">
            <text:p>-0.0004609792</text:p>
          </table:table-cell>
          <table:table-cell table:number-columns-repeated="4"/>
        </table:table-row>
        <table:table-row table:style-name="ro1">
          <table:table-cell office:value-type="float" office:value="403.397827148438">
            <text:p>403.3978271484</text:p>
          </table:table-cell>
          <table:table-cell office:value-type="float" office:value="-0.005936795">
            <text:p>-0.005936795</text:p>
          </table:table-cell>
          <table:table-cell table:number-columns-repeated="4"/>
        </table:table-row>
        <table:table-row table:style-name="ro1">
          <table:table-cell office:value-type="float" office:value="403.510040283203">
            <text:p>403.5100402832</text:p>
          </table:table-cell>
          <table:table-cell office:value-type="float" office:value="0.001635134">
            <text:p>0.001635134</text:p>
          </table:table-cell>
          <table:table-cell table:number-columns-repeated="4"/>
        </table:table-row>
        <table:table-row table:style-name="ro1">
          <table:table-cell office:value-type="float" office:value="403.622253417969">
            <text:p>403.622253418</text:p>
          </table:table-cell>
          <table:table-cell office:value-type="float" office:value="-0.00803104">
            <text:p>-0.00803104</text:p>
          </table:table-cell>
          <table:table-cell table:number-columns-repeated="4"/>
        </table:table-row>
        <table:table-row table:style-name="ro1">
          <table:table-cell office:value-type="float" office:value="403.734466552734">
            <text:p>403.7344665527</text:p>
          </table:table-cell>
          <table:table-cell office:value-type="float" office:value="0.002668507">
            <text:p>0.002668507</text:p>
          </table:table-cell>
          <table:table-cell table:number-columns-repeated="4"/>
        </table:table-row>
        <table:table-row table:style-name="ro1">
          <table:table-cell office:value-type="float" office:value="403.8466796875">
            <text:p>403.8466796875</text:p>
          </table:table-cell>
          <table:table-cell office:value-type="float" office:value="-0.002696947">
            <text:p>-0.002696947</text:p>
          </table:table-cell>
          <table:table-cell table:number-columns-repeated="4"/>
        </table:table-row>
        <table:table-row table:style-name="ro1">
          <table:table-cell office:value-type="float" office:value="403.958923339844">
            <text:p>403.9589233398</text:p>
          </table:table-cell>
          <table:table-cell office:value-type="float" office:value="-0.00127392">
            <text:p>-0.00127392</text:p>
          </table:table-cell>
          <table:table-cell table:number-columns-repeated="4"/>
        </table:table-row>
        <table:table-row table:style-name="ro1">
          <table:table-cell office:value-type="float" office:value="404.071166992188">
            <text:p>404.0711669922</text:p>
          </table:table-cell>
          <table:table-cell office:value-type="float" office:value="-0.0006848316">
            <text:p>-0.0006848316</text:p>
          </table:table-cell>
          <table:table-cell table:number-columns-repeated="4"/>
        </table:table-row>
        <table:table-row table:style-name="ro1">
          <table:table-cell office:value-type="float" office:value="404.183410644531">
            <text:p>404.1834106445</text:p>
          </table:table-cell>
          <table:table-cell office:value-type="float" office:value="-0.009392937">
            <text:p>-0.009392937</text:p>
          </table:table-cell>
          <table:table-cell table:number-columns-repeated="4"/>
        </table:table-row>
        <table:table-row table:style-name="ro1">
          <table:table-cell office:value-type="float" office:value="404.295654296875">
            <text:p>404.2956542969</text:p>
          </table:table-cell>
          <table:table-cell office:value-type="float" office:value="0.01026023">
            <text:p>0.01026023</text:p>
          </table:table-cell>
          <table:table-cell table:number-columns-repeated="4"/>
        </table:table-row>
        <table:table-row table:style-name="ro1">
          <table:table-cell office:value-type="float" office:value="404.407897949219">
            <text:p>404.4078979492</text:p>
          </table:table-cell>
          <table:table-cell office:value-type="float" office:value="-0.009625173">
            <text:p>-0.009625173</text:p>
          </table:table-cell>
          <table:table-cell table:number-columns-repeated="4"/>
        </table:table-row>
        <table:table-row table:style-name="ro1">
          <table:table-cell office:value-type="float" office:value="404.520172119141">
            <text:p>404.5201721191</text:p>
          </table:table-cell>
          <table:table-cell office:value-type="float" office:value="0.005832538">
            <text:p>0.005832538</text:p>
          </table:table-cell>
          <table:table-cell table:number-columns-repeated="4"/>
        </table:table-row>
        <table:table-row table:style-name="ro1">
          <table:table-cell office:value-type="float" office:value="404.632446289063">
            <text:p>404.6324462891</text:p>
          </table:table-cell>
          <table:table-cell office:value-type="float" office:value="0.005332847">
            <text:p>0.005332847</text:p>
          </table:table-cell>
          <table:table-cell table:number-columns-repeated="4"/>
        </table:table-row>
        <table:table-row table:style-name="ro1">
          <table:table-cell office:value-type="float" office:value="404.744689941406">
            <text:p>404.7446899414</text:p>
          </table:table-cell>
          <table:table-cell office:value-type="float" office:value="0.005590582">
            <text:p>0.005590582</text:p>
          </table:table-cell>
          <table:table-cell table:number-columns-repeated="4"/>
        </table:table-row>
        <table:table-row table:style-name="ro1">
          <table:table-cell office:value-type="float" office:value="404.856994628906">
            <text:p>404.8569946289</text:p>
          </table:table-cell>
          <table:table-cell office:value-type="float" office:value="-0.008972347">
            <text:p>-0.008972347</text:p>
          </table:table-cell>
          <table:table-cell table:number-columns-repeated="4"/>
        </table:table-row>
        <table:table-row table:style-name="ro1">
          <table:table-cell office:value-type="float" office:value="404.969268798828">
            <text:p>404.9692687988</text:p>
          </table:table-cell>
          <table:table-cell office:value-type="float" office:value="0.002929033">
            <text:p>0.002929033</text:p>
          </table:table-cell>
          <table:table-cell table:number-columns-repeated="4"/>
        </table:table-row>
        <table:table-row table:style-name="ro1">
          <table:table-cell office:value-type="float" office:value="405.08154296875">
            <text:p>405.0815429688</text:p>
          </table:table-cell>
          <table:table-cell office:value-type="float" office:value="0.01495417">
            <text:p>0.01495417</text:p>
          </table:table-cell>
          <table:table-cell table:number-columns-repeated="4"/>
        </table:table-row>
        <table:table-row table:style-name="ro1">
          <table:table-cell office:value-type="float" office:value="405.19384765625">
            <text:p>405.1938476563</text:p>
          </table:table-cell>
          <table:table-cell office:value-type="float" office:value="-0.004803774">
            <text:p>-0.004803774</text:p>
          </table:table-cell>
          <table:table-cell table:number-columns-repeated="4"/>
        </table:table-row>
        <table:table-row table:style-name="ro1">
          <table:table-cell office:value-type="float" office:value="405.30615234375">
            <text:p>405.3061523438</text:p>
          </table:table-cell>
          <table:table-cell office:value-type="float" office:value="0.001738991">
            <text:p>0.001738991</text:p>
          </table:table-cell>
          <table:table-cell table:number-columns-repeated="4"/>
        </table:table-row>
        <table:table-row table:style-name="ro1">
          <table:table-cell office:value-type="float" office:value="405.41845703125">
            <text:p>405.4184570313</text:p>
          </table:table-cell>
          <table:table-cell office:value-type="float" office:value="-0.0004925455">
            <text:p>-0.0004925455</text:p>
          </table:table-cell>
          <table:table-cell table:number-columns-repeated="4"/>
        </table:table-row>
        <table:table-row table:style-name="ro1">
          <table:table-cell office:value-type="float" office:value="405.53076171875">
            <text:p>405.5307617188</text:p>
          </table:table-cell>
          <table:table-cell office:value-type="float" office:value="0.00952237">
            <text:p>0.00952237</text:p>
          </table:table-cell>
          <table:table-cell table:number-columns-repeated="4"/>
        </table:table-row>
        <table:table-row table:style-name="ro1">
          <table:table-cell office:value-type="float" office:value="405.64306640625">
            <text:p>405.6430664063</text:p>
          </table:table-cell>
          <table:table-cell office:value-type="float" office:value="-0.002887802">
            <text:p>-0.002887802</text:p>
          </table:table-cell>
          <table:table-cell table:number-columns-repeated="4"/>
        </table:table-row>
        <table:table-row table:style-name="ro1">
          <table:table-cell office:value-type="float" office:value="405.755401611328">
            <text:p>405.7554016113</text:p>
          </table:table-cell>
          <table:table-cell office:value-type="float" office:value="-0.002396626">
            <text:p>-0.002396626</text:p>
          </table:table-cell>
          <table:table-cell table:number-columns-repeated="4"/>
        </table:table-row>
        <table:table-row table:style-name="ro1">
          <table:table-cell office:value-type="float" office:value="405.867706298828">
            <text:p>405.8677062988</text:p>
          </table:table-cell>
          <table:table-cell office:value-type="float" office:value="-0.00331852">
            <text:p>-0.00331852</text:p>
          </table:table-cell>
          <table:table-cell table:number-columns-repeated="4"/>
        </table:table-row>
        <table:table-row table:style-name="ro1">
          <table:table-cell office:value-type="float" office:value="405.980041503906">
            <text:p>405.9800415039</text:p>
          </table:table-cell>
          <table:table-cell office:value-type="float" office:value="0.016873">
            <text:p>0.016873</text:p>
          </table:table-cell>
          <table:table-cell table:number-columns-repeated="4"/>
        </table:table-row>
        <table:table-row table:style-name="ro1">
          <table:table-cell office:value-type="float" office:value="406.092376708984">
            <text:p>406.092376709</text:p>
          </table:table-cell>
          <table:table-cell office:value-type="float" office:value="-0.00773868">
            <text:p>-0.00773868</text:p>
          </table:table-cell>
          <table:table-cell table:number-columns-repeated="4"/>
        </table:table-row>
        <table:table-row table:style-name="ro1">
          <table:table-cell office:value-type="float" office:value="406.204742431641">
            <text:p>406.2047424316</text:p>
          </table:table-cell>
          <table:table-cell office:value-type="float" office:value="0.00632454">
            <text:p>0.00632454</text:p>
          </table:table-cell>
          <table:table-cell table:number-columns-repeated="4"/>
        </table:table-row>
        <table:table-row table:style-name="ro1">
          <table:table-cell office:value-type="float" office:value="406.317077636719">
            <text:p>406.3170776367</text:p>
          </table:table-cell>
          <table:table-cell office:value-type="float" office:value="-0.0004669489">
            <text:p>-0.0004669489</text:p>
          </table:table-cell>
          <table:table-cell table:number-columns-repeated="4"/>
        </table:table-row>
        <table:table-row table:style-name="ro1">
          <table:table-cell office:value-type="float" office:value="406.429443359375">
            <text:p>406.4294433594</text:p>
          </table:table-cell>
          <table:table-cell office:value-type="float" office:value="-0.006973189">
            <text:p>-0.006973189</text:p>
          </table:table-cell>
          <table:table-cell table:number-columns-repeated="4"/>
        </table:table-row>
        <table:table-row table:style-name="ro1">
          <table:table-cell office:value-type="float" office:value="406.541809082031">
            <text:p>406.541809082</text:p>
          </table:table-cell>
          <table:table-cell office:value-type="float" office:value="0.0006643547">
            <text:p>0.0006643547</text:p>
          </table:table-cell>
          <table:table-cell table:number-columns-repeated="4"/>
        </table:table-row>
        <table:table-row table:style-name="ro1">
          <table:table-cell office:value-type="float" office:value="406.654174804688">
            <text:p>406.6541748047</text:p>
          </table:table-cell>
          <table:table-cell office:value-type="float" office:value="-0.006988942">
            <text:p>-0.006988942</text:p>
          </table:table-cell>
          <table:table-cell table:number-columns-repeated="4"/>
        </table:table-row>
        <table:table-row table:style-name="ro1">
          <table:table-cell office:value-type="float" office:value="406.766540527344">
            <text:p>406.7665405273</text:p>
          </table:table-cell>
          <table:table-cell office:value-type="float" office:value="-0.008252449">
            <text:p>-0.008252449</text:p>
          </table:table-cell>
          <table:table-cell table:number-columns-repeated="4"/>
        </table:table-row>
        <table:table-row table:style-name="ro1">
          <table:table-cell office:value-type="float" office:value="406.87890625">
            <text:p>406.87890625</text:p>
          </table:table-cell>
          <table:table-cell office:value-type="float" office:value="-0.005045434">
            <text:p>-0.005045434</text:p>
          </table:table-cell>
          <table:table-cell table:number-columns-repeated="4"/>
        </table:table-row>
        <table:table-row table:style-name="ro1">
          <table:table-cell office:value-type="float" office:value="406.991302490234">
            <text:p>406.9913024902</text:p>
          </table:table-cell>
          <table:table-cell office:value-type="float" office:value="0.001659737">
            <text:p>0.001659737</text:p>
          </table:table-cell>
          <table:table-cell table:number-columns-repeated="4"/>
        </table:table-row>
        <table:table-row table:style-name="ro1">
          <table:table-cell office:value-type="float" office:value="407.103668212891">
            <text:p>407.1036682129</text:p>
          </table:table-cell>
          <table:table-cell office:value-type="float" office:value="-0.005040873">
            <text:p>-0.005040873</text:p>
          </table:table-cell>
          <table:table-cell table:number-columns-repeated="4"/>
        </table:table-row>
        <table:table-row table:style-name="ro1">
          <table:table-cell office:value-type="float" office:value="407.216064453125">
            <text:p>407.2160644531</text:p>
          </table:table-cell>
          <table:table-cell office:value-type="float" office:value="0.01708172">
            <text:p>0.01708172</text:p>
          </table:table-cell>
          <table:table-cell table:number-columns-repeated="4"/>
        </table:table-row>
        <table:table-row table:style-name="ro1">
          <table:table-cell office:value-type="float" office:value="407.328460693359">
            <text:p>407.3284606934</text:p>
          </table:table-cell>
          <table:table-cell office:value-type="float" office:value="0.004725292">
            <text:p>0.004725292</text:p>
          </table:table-cell>
          <table:table-cell table:number-columns-repeated="4"/>
        </table:table-row>
        <table:table-row table:style-name="ro1">
          <table:table-cell office:value-type="float" office:value="407.440887451172">
            <text:p>407.4408874512</text:p>
          </table:table-cell>
          <table:table-cell office:value-type="float" office:value="-0.001871991">
            <text:p>-0.001871991</text:p>
          </table:table-cell>
          <table:table-cell table:number-columns-repeated="4"/>
        </table:table-row>
        <table:table-row table:style-name="ro1">
          <table:table-cell office:value-type="float" office:value="407.553283691406">
            <text:p>407.5532836914</text:p>
          </table:table-cell>
          <table:table-cell office:value-type="float" office:value="0.00908317">
            <text:p>0.00908317</text:p>
          </table:table-cell>
          <table:table-cell table:number-columns-repeated="4"/>
        </table:table-row>
        <table:table-row table:style-name="ro1">
          <table:table-cell office:value-type="float" office:value="407.665710449219">
            <text:p>407.6657104492</text:p>
          </table:table-cell>
          <table:table-cell office:value-type="float" office:value="-0.0027064">
            <text:p>-0.0027064</text:p>
          </table:table-cell>
          <table:table-cell table:number-columns-repeated="4"/>
        </table:table-row>
        <table:table-row table:style-name="ro1">
          <table:table-cell office:value-type="float" office:value="407.778106689453">
            <text:p>407.7781066895</text:p>
          </table:table-cell>
          <table:table-cell office:value-type="float" office:value="0.01227703">
            <text:p>0.01227703</text:p>
          </table:table-cell>
          <table:table-cell table:number-columns-repeated="4"/>
        </table:table-row>
        <table:table-row table:style-name="ro1">
          <table:table-cell office:value-type="float" office:value="407.890533447266">
            <text:p>407.8905334473</text:p>
          </table:table-cell>
          <table:table-cell office:value-type="float" office:value="0.005813523">
            <text:p>0.005813523</text:p>
          </table:table-cell>
          <table:table-cell table:number-columns-repeated="4"/>
        </table:table-row>
        <table:table-row table:style-name="ro1">
          <table:table-cell office:value-type="float" office:value="408.002990722656">
            <text:p>408.0029907227</text:p>
          </table:table-cell>
          <table:table-cell office:value-type="float" office:value="0.008000596">
            <text:p>0.008000596</text:p>
          </table:table-cell>
          <table:table-cell table:number-columns-repeated="4"/>
        </table:table-row>
        <table:table-row table:style-name="ro1">
          <table:table-cell office:value-type="float" office:value="408.115417480469">
            <text:p>408.1154174805</text:p>
          </table:table-cell>
          <table:table-cell office:value-type="float" office:value="0.00316854">
            <text:p>0.00316854</text:p>
          </table:table-cell>
          <table:table-cell table:number-columns-repeated="4"/>
        </table:table-row>
        <table:table-row table:style-name="ro1">
          <table:table-cell office:value-type="float" office:value="408.227844238281">
            <text:p>408.2278442383</text:p>
          </table:table-cell>
          <table:table-cell office:value-type="float" office:value="0.02004536">
            <text:p>0.02004536</text:p>
          </table:table-cell>
          <table:table-cell table:number-columns-repeated="4"/>
        </table:table-row>
        <table:table-row table:style-name="ro1">
          <table:table-cell office:value-type="float" office:value="408.340301513672">
            <text:p>408.3403015137</text:p>
          </table:table-cell>
          <table:table-cell office:value-type="float" office:value="-0.01124873">
            <text:p>-0.01124873</text:p>
          </table:table-cell>
          <table:table-cell table:number-columns-repeated="4"/>
        </table:table-row>
        <table:table-row table:style-name="ro1">
          <table:table-cell office:value-type="float" office:value="408.452758789063">
            <text:p>408.4527587891</text:p>
          </table:table-cell>
          <table:table-cell office:value-type="float" office:value="-0.002798624">
            <text:p>-0.002798624</text:p>
          </table:table-cell>
          <table:table-cell table:number-columns-repeated="4"/>
        </table:table-row>
        <table:table-row table:style-name="ro1">
          <table:table-cell office:value-type="float" office:value="408.565216064453">
            <text:p>408.5652160645</text:p>
          </table:table-cell>
          <table:table-cell office:value-type="float" office:value="-0.005781165">
            <text:p>-0.005781165</text:p>
          </table:table-cell>
          <table:table-cell table:number-columns-repeated="4"/>
        </table:table-row>
        <table:table-row table:style-name="ro1">
          <table:table-cell office:value-type="float" office:value="408.677673339844">
            <text:p>408.6776733398</text:p>
          </table:table-cell>
          <table:table-cell office:value-type="float" office:value="-0.001546956">
            <text:p>-0.001546956</text:p>
          </table:table-cell>
          <table:table-cell table:number-columns-repeated="4"/>
        </table:table-row>
        <table:table-row table:style-name="ro1">
          <table:table-cell office:value-type="float" office:value="408.790161132813">
            <text:p>408.7901611328</text:p>
          </table:table-cell>
          <table:table-cell office:value-type="float" office:value="-0.003841167">
            <text:p>-0.003841167</text:p>
          </table:table-cell>
          <table:table-cell table:number-columns-repeated="4"/>
        </table:table-row>
        <table:table-row table:style-name="ro1">
          <table:table-cell office:value-type="float" office:value="408.902618408203">
            <text:p>408.9026184082</text:p>
          </table:table-cell>
          <table:table-cell office:value-type="float" office:value="-0.002421586">
            <text:p>-0.002421586</text:p>
          </table:table-cell>
          <table:table-cell table:number-columns-repeated="4"/>
        </table:table-row>
        <table:table-row table:style-name="ro1">
          <table:table-cell office:value-type="float" office:value="409.015106201172">
            <text:p>409.0151062012</text:p>
          </table:table-cell>
          <table:table-cell office:value-type="float" office:value="-0.006551124">
            <text:p>-0.006551124</text:p>
          </table:table-cell>
          <table:table-cell table:number-columns-repeated="4"/>
        </table:table-row>
        <table:table-row table:style-name="ro1">
          <table:table-cell office:value-type="float" office:value="409.127593994141">
            <text:p>409.1275939941</text:p>
          </table:table-cell>
          <table:table-cell office:value-type="float" office:value="0.001545604">
            <text:p>0.001545604</text:p>
          </table:table-cell>
          <table:table-cell table:number-columns-repeated="4"/>
        </table:table-row>
        <table:table-row table:style-name="ro1">
          <table:table-cell office:value-type="float" office:value="409.240081787109">
            <text:p>409.2400817871</text:p>
          </table:table-cell>
          <table:table-cell office:value-type="float" office:value="0.002133694">
            <text:p>0.002133694</text:p>
          </table:table-cell>
          <table:table-cell table:number-columns-repeated="4"/>
        </table:table-row>
        <table:table-row table:style-name="ro1">
          <table:table-cell office:value-type="float" office:value="409.352569580078">
            <text:p>409.3525695801</text:p>
          </table:table-cell>
          <table:table-cell office:value-type="float" office:value="-0.008776065">
            <text:p>-0.008776065</text:p>
          </table:table-cell>
          <table:table-cell table:number-columns-repeated="4"/>
        </table:table-row>
        <table:table-row table:style-name="ro1">
          <table:table-cell office:value-type="float" office:value="409.465087890625">
            <text:p>409.4650878906</text:p>
          </table:table-cell>
          <table:table-cell office:value-type="float" office:value="-0.00219598">
            <text:p>-0.00219598</text:p>
          </table:table-cell>
          <table:table-cell table:number-columns-repeated="4"/>
        </table:table-row>
        <table:table-row table:style-name="ro1">
          <table:table-cell office:value-type="float" office:value="409.577606201172">
            <text:p>409.5776062012</text:p>
          </table:table-cell>
          <table:table-cell office:value-type="float" office:value="-0.005980355">
            <text:p>-0.005980355</text:p>
          </table:table-cell>
          <table:table-cell table:number-columns-repeated="4"/>
        </table:table-row>
        <table:table-row table:style-name="ro1">
          <table:table-cell office:value-type="float" office:value="409.690093994141">
            <text:p>409.6900939941</text:p>
          </table:table-cell>
          <table:table-cell office:value-type="float" office:value="0.00131536">
            <text:p>0.00131536</text:p>
          </table:table-cell>
          <table:table-cell table:number-columns-repeated="4"/>
        </table:table-row>
        <table:table-row table:style-name="ro1">
          <table:table-cell office:value-type="float" office:value="409.802612304688">
            <text:p>409.8026123047</text:p>
          </table:table-cell>
          <table:table-cell office:value-type="float" office:value="-0.0003140388">
            <text:p>-0.0003140388</text:p>
          </table:table-cell>
          <table:table-cell table:number-columns-repeated="4"/>
        </table:table-row>
        <table:table-row table:style-name="ro1">
          <table:table-cell office:value-type="float" office:value="409.915161132813">
            <text:p>409.9151611328</text:p>
          </table:table-cell>
          <table:table-cell office:value-type="float" office:value="0.001429026">
            <text:p>0.001429026</text:p>
          </table:table-cell>
          <table:table-cell table:number-columns-repeated="4"/>
        </table:table-row>
        <table:table-row table:style-name="ro1">
          <table:table-cell office:value-type="float" office:value="410.027679443359">
            <text:p>410.0276794434</text:p>
          </table:table-cell>
          <table:table-cell office:value-type="float" office:value="-0.001501004">
            <text:p>-0.001501004</text:p>
          </table:table-cell>
          <table:table-cell table:number-columns-repeated="4"/>
        </table:table-row>
        <table:table-row table:style-name="ro1">
          <table:table-cell office:value-type="float" office:value="410.140228271484">
            <text:p>410.1402282715</text:p>
          </table:table-cell>
          <table:table-cell office:value-type="float" office:value="0.003524943">
            <text:p>0.003524943</text:p>
          </table:table-cell>
          <table:table-cell table:number-columns-repeated="4"/>
        </table:table-row>
        <table:table-row table:style-name="ro1">
          <table:table-cell office:value-type="float" office:value="410.252746582031">
            <text:p>410.252746582</text:p>
          </table:table-cell>
          <table:table-cell office:value-type="float" office:value="0.001579052">
            <text:p>0.001579052</text:p>
          </table:table-cell>
          <table:table-cell table:number-columns-repeated="4"/>
        </table:table-row>
        <table:table-row table:style-name="ro1">
          <table:table-cell office:value-type="float" office:value="410.365295410156">
            <text:p>410.3652954102</text:p>
          </table:table-cell>
          <table:table-cell office:value-type="float" office:value="-0.002396934">
            <text:p>-0.002396934</text:p>
          </table:table-cell>
          <table:table-cell table:number-columns-repeated="4"/>
        </table:table-row>
        <table:table-row table:style-name="ro1">
          <table:table-cell office:value-type="float" office:value="410.477844238281">
            <text:p>410.4778442383</text:p>
          </table:table-cell>
          <table:table-cell office:value-type="float" office:value="0.01937173">
            <text:p>0.01937173</text:p>
          </table:table-cell>
          <table:table-cell table:number-columns-repeated="4"/>
        </table:table-row>
        <table:table-row table:style-name="ro1">
          <table:table-cell office:value-type="float" office:value="410.590423583984">
            <text:p>410.590423584</text:p>
          </table:table-cell>
          <table:table-cell office:value-type="float" office:value="0.007685856">
            <text:p>0.007685856</text:p>
          </table:table-cell>
          <table:table-cell table:number-columns-repeated="4"/>
        </table:table-row>
        <table:table-row table:style-name="ro1">
          <table:table-cell office:value-type="float" office:value="410.702972412109">
            <text:p>410.7029724121</text:p>
          </table:table-cell>
          <table:table-cell office:value-type="float" office:value="-0.004091782">
            <text:p>-0.004091782</text:p>
          </table:table-cell>
          <table:table-cell table:number-columns-repeated="4"/>
        </table:table-row>
        <table:table-row table:style-name="ro1">
          <table:table-cell office:value-type="float" office:value="410.815551757813">
            <text:p>410.8155517578</text:p>
          </table:table-cell>
          <table:table-cell office:value-type="float" office:value="0.002061659">
            <text:p>0.002061659</text:p>
          </table:table-cell>
          <table:table-cell table:number-columns-repeated="4"/>
        </table:table-row>
        <table:table-row table:style-name="ro1">
          <table:table-cell office:value-type="float" office:value="410.928131103516">
            <text:p>410.9281311035</text:p>
          </table:table-cell>
          <table:table-cell office:value-type="float" office:value="0.02700286">
            <text:p>0.02700286</text:p>
          </table:table-cell>
          <table:table-cell table:number-columns-repeated="4"/>
        </table:table-row>
        <table:table-row table:style-name="ro1">
          <table:table-cell office:value-type="float" office:value="411.040679931641">
            <text:p>411.0406799316</text:p>
          </table:table-cell>
          <table:table-cell office:value-type="float" office:value="0.006623222">
            <text:p>0.006623222</text:p>
          </table:table-cell>
          <table:table-cell table:number-columns-repeated="4"/>
        </table:table-row>
        <table:table-row table:style-name="ro1">
          <table:table-cell office:value-type="float" office:value="411.153289794922">
            <text:p>411.1532897949</text:p>
          </table:table-cell>
          <table:table-cell office:value-type="float" office:value="0.01443326">
            <text:p>0.01443326</text:p>
          </table:table-cell>
          <table:table-cell table:number-columns-repeated="4"/>
        </table:table-row>
        <table:table-row table:style-name="ro1">
          <table:table-cell office:value-type="float" office:value="411.265869140625">
            <text:p>411.2658691406</text:p>
          </table:table-cell>
          <table:table-cell office:value-type="float" office:value="0.007059324">
            <text:p>0.007059324</text:p>
          </table:table-cell>
          <table:table-cell table:number-columns-repeated="4"/>
        </table:table-row>
        <table:table-row table:style-name="ro1">
          <table:table-cell office:value-type="float" office:value="411.378479003906">
            <text:p>411.3784790039</text:p>
          </table:table-cell>
          <table:table-cell office:value-type="float" office:value="0.003369825">
            <text:p>0.003369825</text:p>
          </table:table-cell>
          <table:table-cell table:number-columns-repeated="4"/>
        </table:table-row>
        <table:table-row table:style-name="ro1">
          <table:table-cell office:value-type="float" office:value="411.491058349609">
            <text:p>411.4910583496</text:p>
          </table:table-cell>
          <table:table-cell office:value-type="float" office:value="0.02550936">
            <text:p>0.02550936</text:p>
          </table:table-cell>
          <table:table-cell table:number-columns-repeated="4"/>
        </table:table-row>
        <table:table-row table:style-name="ro1">
          <table:table-cell office:value-type="float" office:value="411.603668212891">
            <text:p>411.6036682129</text:p>
          </table:table-cell>
          <table:table-cell office:value-type="float" office:value="0.004287634">
            <text:p>0.004287634</text:p>
          </table:table-cell>
          <table:table-cell table:number-columns-repeated="4"/>
        </table:table-row>
        <table:table-row table:style-name="ro1">
          <table:table-cell office:value-type="float" office:value="411.716278076172">
            <text:p>411.7162780762</text:p>
          </table:table-cell>
          <table:table-cell office:value-type="float" office:value="0.02342527">
            <text:p>0.02342527</text:p>
          </table:table-cell>
          <table:table-cell table:number-columns-repeated="4"/>
        </table:table-row>
        <table:table-row table:style-name="ro1">
          <table:table-cell office:value-type="float" office:value="411.828887939453">
            <text:p>411.8288879395</text:p>
          </table:table-cell>
          <table:table-cell office:value-type="float" office:value="0.001348485">
            <text:p>0.001348485</text:p>
          </table:table-cell>
          <table:table-cell table:number-columns-repeated="4"/>
        </table:table-row>
        <table:table-row table:style-name="ro1">
          <table:table-cell office:value-type="float" office:value="411.941528320313">
            <text:p>411.9415283203</text:p>
          </table:table-cell>
          <table:table-cell office:value-type="float" office:value="0.002280778">
            <text:p>0.002280778</text:p>
          </table:table-cell>
          <table:table-cell table:number-columns-repeated="4"/>
        </table:table-row>
        <table:table-row table:style-name="ro1">
          <table:table-cell office:value-type="float" office:value="412.054138183594">
            <text:p>412.0541381836</text:p>
          </table:table-cell>
          <table:table-cell office:value-type="float" office:value="0.0009701462">
            <text:p>0.0009701462</text:p>
          </table:table-cell>
          <table:table-cell table:number-columns-repeated="4"/>
        </table:table-row>
        <table:table-row table:style-name="ro1">
          <table:table-cell office:value-type="float" office:value="412.166778564453">
            <text:p>412.1667785645</text:p>
          </table:table-cell>
          <table:table-cell office:value-type="float" office:value="-0.007770743">
            <text:p>-0.007770743</text:p>
          </table:table-cell>
          <table:table-cell table:number-columns-repeated="4"/>
        </table:table-row>
        <table:table-row table:style-name="ro1">
          <table:table-cell office:value-type="float" office:value="412.279418945313">
            <text:p>412.2794189453</text:p>
          </table:table-cell>
          <table:table-cell office:value-type="float" office:value="0.008724854">
            <text:p>0.008724854</text:p>
          </table:table-cell>
          <table:table-cell table:number-columns-repeated="4"/>
        </table:table-row>
        <table:table-row table:style-name="ro1">
          <table:table-cell office:value-type="float" office:value="412.392059326172">
            <text:p>412.3920593262</text:p>
          </table:table-cell>
          <table:table-cell office:value-type="float" office:value="0.002240441">
            <text:p>0.002240441</text:p>
          </table:table-cell>
          <table:table-cell table:number-columns-repeated="4"/>
        </table:table-row>
        <table:table-row table:style-name="ro1">
          <table:table-cell office:value-type="float" office:value="412.504730224609">
            <text:p>412.5047302246</text:p>
          </table:table-cell>
          <table:table-cell office:value-type="float" office:value="-0.008923532">
            <text:p>-0.008923532</text:p>
          </table:table-cell>
          <table:table-cell table:number-columns-repeated="4"/>
        </table:table-row>
        <table:table-row table:style-name="ro1">
          <table:table-cell office:value-type="float" office:value="412.617370605469">
            <text:p>412.6173706055</text:p>
          </table:table-cell>
          <table:table-cell office:value-type="float" office:value="-0.003269504">
            <text:p>-0.003269504</text:p>
          </table:table-cell>
          <table:table-cell table:number-columns-repeated="4"/>
        </table:table-row>
        <table:table-row table:style-name="ro1">
          <table:table-cell office:value-type="float" office:value="412.730041503906">
            <text:p>412.7300415039</text:p>
          </table:table-cell>
          <table:table-cell office:value-type="float" office:value="-0.0009188884">
            <text:p>-0.0009188884</text:p>
          </table:table-cell>
          <table:table-cell table:number-columns-repeated="4"/>
        </table:table-row>
        <table:table-row table:style-name="ro1">
          <table:table-cell office:value-type="float" office:value="412.842712402344">
            <text:p>412.8427124023</text:p>
          </table:table-cell>
          <table:table-cell office:value-type="float" office:value="-0.001279027">
            <text:p>-0.001279027</text:p>
          </table:table-cell>
          <table:table-cell table:number-columns-repeated="4"/>
        </table:table-row>
        <table:table-row table:style-name="ro1">
          <table:table-cell office:value-type="float" office:value="412.955383300781">
            <text:p>412.9553833008</text:p>
          </table:table-cell>
          <table:table-cell office:value-type="float" office:value="-0.009700381">
            <text:p>-0.009700381</text:p>
          </table:table-cell>
          <table:table-cell table:number-columns-repeated="4"/>
        </table:table-row>
        <table:table-row table:style-name="ro1">
          <table:table-cell office:value-type="float" office:value="413.068054199219">
            <text:p>413.0680541992</text:p>
          </table:table-cell>
          <table:table-cell office:value-type="float" office:value="-0.006771096">
            <text:p>-0.006771096</text:p>
          </table:table-cell>
          <table:table-cell table:number-columns-repeated="4"/>
        </table:table-row>
        <table:table-row table:style-name="ro1">
          <table:table-cell office:value-type="float" office:value="413.180725097656">
            <text:p>413.1807250977</text:p>
          </table:table-cell>
          <table:table-cell office:value-type="float" office:value="-0.0005521766">
            <text:p>-0.0005521766</text:p>
          </table:table-cell>
          <table:table-cell table:number-columns-repeated="4"/>
        </table:table-row>
        <table:table-row table:style-name="ro1">
          <table:table-cell office:value-type="float" office:value="413.293426513672">
            <text:p>413.2934265137</text:p>
          </table:table-cell>
          <table:table-cell office:value-type="string">
            <text:p>-2.438805E-05</text:p>
          </table:table-cell>
          <table:table-cell table:number-columns-repeated="4"/>
        </table:table-row>
        <table:table-row table:style-name="ro1">
          <table:table-cell office:value-type="float" office:value="413.406097412109">
            <text:p>413.4060974121</text:p>
          </table:table-cell>
          <table:table-cell office:value-type="float" office:value="-0.003078666">
            <text:p>-0.003078666</text:p>
          </table:table-cell>
          <table:table-cell table:number-columns-repeated="4"/>
        </table:table-row>
        <table:table-row table:style-name="ro1">
          <table:table-cell office:value-type="float" office:value="413.518798828125">
            <text:p>413.5187988281</text:p>
          </table:table-cell>
          <table:table-cell office:value-type="float" office:value="-0.001827848">
            <text:p>-0.001827848</text:p>
          </table:table-cell>
          <table:table-cell table:number-columns-repeated="4"/>
        </table:table-row>
        <table:table-row table:style-name="ro1">
          <table:table-cell office:value-type="float" office:value="413.631500244141">
            <text:p>413.6315002441</text:p>
          </table:table-cell>
          <table:table-cell office:value-type="float" office:value="-0.006692001">
            <text:p>-0.006692001</text:p>
          </table:table-cell>
          <table:table-cell table:number-columns-repeated="4"/>
        </table:table-row>
        <table:table-row table:style-name="ro1">
          <table:table-cell office:value-type="float" office:value="413.744232177734">
            <text:p>413.7442321777</text:p>
          </table:table-cell>
          <table:table-cell office:value-type="float" office:value="0.00210466">
            <text:p>0.00210466</text:p>
          </table:table-cell>
          <table:table-cell table:number-columns-repeated="4"/>
        </table:table-row>
        <table:table-row table:style-name="ro1">
          <table:table-cell office:value-type="float" office:value="413.85693359375">
            <text:p>413.8569335938</text:p>
          </table:table-cell>
          <table:table-cell office:value-type="float" office:value="0.002808252">
            <text:p>0.002808252</text:p>
          </table:table-cell>
          <table:table-cell table:number-columns-repeated="4"/>
        </table:table-row>
        <table:table-row table:style-name="ro1">
          <table:table-cell office:value-type="float" office:value="413.969665527344">
            <text:p>413.9696655273</text:p>
          </table:table-cell>
          <table:table-cell office:value-type="float" office:value="-0.003372063">
            <text:p>-0.003372063</text:p>
          </table:table-cell>
          <table:table-cell table:number-columns-repeated="4"/>
        </table:table-row>
        <table:table-row table:style-name="ro1">
          <table:table-cell office:value-type="float" office:value="414.082366943359">
            <text:p>414.0823669434</text:p>
          </table:table-cell>
          <table:table-cell office:value-type="float" office:value="0.01230138">
            <text:p>0.01230138</text:p>
          </table:table-cell>
          <table:table-cell table:number-columns-repeated="4"/>
        </table:table-row>
        <table:table-row table:style-name="ro1">
          <table:table-cell office:value-type="float" office:value="414.195098876953">
            <text:p>414.195098877</text:p>
          </table:table-cell>
          <table:table-cell office:value-type="float" office:value="0.001184421">
            <text:p>0.001184421</text:p>
          </table:table-cell>
          <table:table-cell table:number-columns-repeated="4"/>
        </table:table-row>
        <table:table-row table:style-name="ro1">
          <table:table-cell office:value-type="float" office:value="414.307861328125">
            <text:p>414.3078613281</text:p>
          </table:table-cell>
          <table:table-cell office:value-type="float" office:value="0.008697125">
            <text:p>0.008697125</text:p>
          </table:table-cell>
          <table:table-cell table:number-columns-repeated="4"/>
        </table:table-row>
        <table:table-row table:style-name="ro1">
          <table:table-cell office:value-type="float" office:value="414.420593261719">
            <text:p>414.4205932617</text:p>
          </table:table-cell>
          <table:table-cell office:value-type="float" office:value="-0.010094">
            <text:p>-0.010094</text:p>
          </table:table-cell>
          <table:table-cell table:number-columns-repeated="4"/>
        </table:table-row>
        <table:table-row table:style-name="ro1">
          <table:table-cell office:value-type="float" office:value="414.533325195313">
            <text:p>414.5333251953</text:p>
          </table:table-cell>
          <table:table-cell office:value-type="float" office:value="0.007398704">
            <text:p>0.007398704</text:p>
          </table:table-cell>
          <table:table-cell table:number-columns-repeated="4"/>
        </table:table-row>
        <table:table-row table:style-name="ro1">
          <table:table-cell office:value-type="float" office:value="414.646087646484">
            <text:p>414.6460876465</text:p>
          </table:table-cell>
          <table:table-cell office:value-type="float" office:value="-0.004802979">
            <text:p>-0.004802979</text:p>
          </table:table-cell>
          <table:table-cell table:number-columns-repeated="4"/>
        </table:table-row>
        <table:table-row table:style-name="ro1">
          <table:table-cell office:value-type="float" office:value="414.758850097656">
            <text:p>414.7588500977</text:p>
          </table:table-cell>
          <table:table-cell office:value-type="float" office:value="-0.003420528">
            <text:p>-0.003420528</text:p>
          </table:table-cell>
          <table:table-cell table:number-columns-repeated="4"/>
        </table:table-row>
        <table:table-row table:style-name="ro1">
          <table:table-cell office:value-type="float" office:value="414.871612548828">
            <text:p>414.8716125488</text:p>
          </table:table-cell>
          <table:table-cell office:value-type="float" office:value="0.004507768">
            <text:p>0.004507768</text:p>
          </table:table-cell>
          <table:table-cell table:number-columns-repeated="4"/>
        </table:table-row>
        <table:table-row table:style-name="ro1">
          <table:table-cell office:value-type="float" office:value="414.984375">
            <text:p>414.984375</text:p>
          </table:table-cell>
          <table:table-cell office:value-type="float" office:value="0.002741648">
            <text:p>0.002741648</text:p>
          </table:table-cell>
          <table:table-cell table:number-columns-repeated="4"/>
        </table:table-row>
        <table:table-row table:style-name="ro1">
          <table:table-cell office:value-type="float" office:value="415.09716796875">
            <text:p>415.0971679688</text:p>
          </table:table-cell>
          <table:table-cell office:value-type="string">
            <text:p>8.491592E-05</text:p>
          </table:table-cell>
          <table:table-cell table:number-columns-repeated="4"/>
        </table:table-row>
        <table:table-row table:style-name="ro1">
          <table:table-cell office:value-type="float" office:value="415.209930419922">
            <text:p>415.2099304199</text:p>
          </table:table-cell>
          <table:table-cell office:value-type="float" office:value="-0.004518707">
            <text:p>-0.004518707</text:p>
          </table:table-cell>
          <table:table-cell table:number-columns-repeated="4"/>
        </table:table-row>
        <table:table-row table:style-name="ro1">
          <table:table-cell office:value-type="float" office:value="415.322723388672">
            <text:p>415.3227233887</text:p>
          </table:table-cell>
          <table:table-cell office:value-type="float" office:value="-0.002950583">
            <text:p>-0.002950583</text:p>
          </table:table-cell>
          <table:table-cell table:number-columns-repeated="4"/>
        </table:table-row>
        <table:table-row table:style-name="ro1">
          <table:table-cell office:value-type="float" office:value="415.435516357422">
            <text:p>415.4355163574</text:p>
          </table:table-cell>
          <table:table-cell office:value-type="float" office:value="-0.004309512">
            <text:p>-0.004309512</text:p>
          </table:table-cell>
          <table:table-cell table:number-columns-repeated="4"/>
        </table:table-row>
        <table:table-row table:style-name="ro1">
          <table:table-cell office:value-type="float" office:value="415.548309326172">
            <text:p>415.5483093262</text:p>
          </table:table-cell>
          <table:table-cell office:value-type="float" office:value="0.0007689908">
            <text:p>0.0007689908</text:p>
          </table:table-cell>
          <table:table-cell table:number-columns-repeated="4"/>
        </table:table-row>
        <table:table-row table:style-name="ro1">
          <table:table-cell office:value-type="float" office:value="415.661102294922">
            <text:p>415.6611022949</text:p>
          </table:table-cell>
          <table:table-cell office:value-type="float" office:value="-0.006183531">
            <text:p>-0.006183531</text:p>
          </table:table-cell>
          <table:table-cell table:number-columns-repeated="4"/>
        </table:table-row>
        <table:table-row table:style-name="ro1">
          <table:table-cell office:value-type="float" office:value="415.773895263672">
            <text:p>415.7738952637</text:p>
          </table:table-cell>
          <table:table-cell office:value-type="float" office:value="0.006025364">
            <text:p>0.006025364</text:p>
          </table:table-cell>
          <table:table-cell table:number-columns-repeated="4"/>
        </table:table-row>
        <table:table-row table:style-name="ro1">
          <table:table-cell office:value-type="float" office:value="415.88671875">
            <text:p>415.88671875</text:p>
          </table:table-cell>
          <table:table-cell office:value-type="float" office:value="-0.004647098">
            <text:p>-0.004647098</text:p>
          </table:table-cell>
          <table:table-cell table:number-columns-repeated="4"/>
        </table:table-row>
        <table:table-row table:style-name="ro1">
          <table:table-cell office:value-type="float" office:value="415.999542236328">
            <text:p>415.9995422363</text:p>
          </table:table-cell>
          <table:table-cell office:value-type="float" office:value="-0.009045297">
            <text:p>-0.009045297</text:p>
          </table:table-cell>
          <table:table-cell table:number-columns-repeated="4"/>
        </table:table-row>
        <table:table-row table:style-name="ro1">
          <table:table-cell office:value-type="float" office:value="416.112365722656">
            <text:p>416.1123657227</text:p>
          </table:table-cell>
          <table:table-cell office:value-type="float" office:value="-0.00878836">
            <text:p>-0.00878836</text:p>
          </table:table-cell>
          <table:table-cell table:number-columns-repeated="4"/>
        </table:table-row>
        <table:table-row table:style-name="ro1">
          <table:table-cell office:value-type="float" office:value="416.225189208984">
            <text:p>416.225189209</text:p>
          </table:table-cell>
          <table:table-cell office:value-type="float" office:value="-0.0002010738">
            <text:p>-0.0002010738</text:p>
          </table:table-cell>
          <table:table-cell table:number-columns-repeated="4"/>
        </table:table-row>
        <table:table-row table:style-name="ro1">
          <table:table-cell office:value-type="float" office:value="416.338012695313">
            <text:p>416.3380126953</text:p>
          </table:table-cell>
          <table:table-cell office:value-type="float" office:value="-0.002900541">
            <text:p>-0.002900541</text:p>
          </table:table-cell>
          <table:table-cell table:number-columns-repeated="4"/>
        </table:table-row>
        <table:table-row table:style-name="ro1">
          <table:table-cell office:value-type="float" office:value="416.450866699219">
            <text:p>416.4508666992</text:p>
          </table:table-cell>
          <table:table-cell office:value-type="float" office:value="0.0003872488">
            <text:p>0.0003872488</text:p>
          </table:table-cell>
          <table:table-cell table:number-columns-repeated="4"/>
        </table:table-row>
        <table:table-row table:style-name="ro1">
          <table:table-cell office:value-type="float" office:value="416.563690185547">
            <text:p>416.5636901855</text:p>
          </table:table-cell>
          <table:table-cell office:value-type="float" office:value="-0.004597381">
            <text:p>-0.004597381</text:p>
          </table:table-cell>
          <table:table-cell table:number-columns-repeated="4"/>
        </table:table-row>
        <table:table-row table:style-name="ro1">
          <table:table-cell office:value-type="float" office:value="416.676544189453">
            <text:p>416.6765441895</text:p>
          </table:table-cell>
          <table:table-cell office:value-type="float" office:value="-0.005046128">
            <text:p>-0.005046128</text:p>
          </table:table-cell>
          <table:table-cell table:number-columns-repeated="4"/>
        </table:table-row>
        <table:table-row table:style-name="ro1">
          <table:table-cell office:value-type="float" office:value="416.789398193359">
            <text:p>416.7893981934</text:p>
          </table:table-cell>
          <table:table-cell office:value-type="string">
            <text:p>-8.511569E-05</text:p>
          </table:table-cell>
          <table:table-cell table:number-columns-repeated="4"/>
        </table:table-row>
        <table:table-row table:style-name="ro1">
          <table:table-cell office:value-type="float" office:value="416.902252197266">
            <text:p>416.9022521973</text:p>
          </table:table-cell>
          <table:table-cell office:value-type="float" office:value="-0.003278393">
            <text:p>-0.003278393</text:p>
          </table:table-cell>
          <table:table-cell table:number-columns-repeated="4"/>
        </table:table-row>
        <table:table-row table:style-name="ro1">
          <table:table-cell office:value-type="float" office:value="417.01513671875">
            <text:p>417.0151367188</text:p>
          </table:table-cell>
          <table:table-cell office:value-type="float" office:value="-0.003075092">
            <text:p>-0.003075092</text:p>
          </table:table-cell>
          <table:table-cell table:number-columns-repeated="4"/>
        </table:table-row>
        <table:table-row table:style-name="ro1">
          <table:table-cell office:value-type="float" office:value="417.127990722656">
            <text:p>417.1279907227</text:p>
          </table:table-cell>
          <table:table-cell office:value-type="float" office:value="0.01231424">
            <text:p>0.01231424</text:p>
          </table:table-cell>
          <table:table-cell table:number-columns-repeated="4"/>
        </table:table-row>
        <table:table-row table:style-name="ro1">
          <table:table-cell office:value-type="float" office:value="417.240875244141">
            <text:p>417.2408752441</text:p>
          </table:table-cell>
          <table:table-cell office:value-type="float" office:value="0.002685191">
            <text:p>0.002685191</text:p>
          </table:table-cell>
          <table:table-cell table:number-columns-repeated="4"/>
        </table:table-row>
        <table:table-row table:style-name="ro1">
          <table:table-cell office:value-type="float" office:value="417.353759765625">
            <text:p>417.3537597656</text:p>
          </table:table-cell>
          <table:table-cell office:value-type="float" office:value="0.02112189">
            <text:p>0.02112189</text:p>
          </table:table-cell>
          <table:table-cell table:number-columns-repeated="4"/>
        </table:table-row>
        <table:table-row table:style-name="ro1">
          <table:table-cell office:value-type="float" office:value="417.466644287109">
            <text:p>417.4666442871</text:p>
          </table:table-cell>
          <table:table-cell office:value-type="float" office:value="-0.0104138">
            <text:p>-0.0104138</text:p>
          </table:table-cell>
          <table:table-cell table:number-columns-repeated="4"/>
        </table:table-row>
        <table:table-row table:style-name="ro1">
          <table:table-cell office:value-type="float" office:value="417.579528808594">
            <text:p>417.5795288086</text:p>
          </table:table-cell>
          <table:table-cell office:value-type="float" office:value="-0.005587594">
            <text:p>-0.005587594</text:p>
          </table:table-cell>
          <table:table-cell table:number-columns-repeated="4"/>
        </table:table-row>
        <table:table-row table:style-name="ro1">
          <table:table-cell office:value-type="float" office:value="417.692443847656">
            <text:p>417.6924438477</text:p>
          </table:table-cell>
          <table:table-cell office:value-type="float" office:value="0.0009104851">
            <text:p>0.0009104851</text:p>
          </table:table-cell>
          <table:table-cell table:number-columns-repeated="4"/>
        </table:table-row>
        <table:table-row table:style-name="ro1">
          <table:table-cell office:value-type="float" office:value="417.805328369141">
            <text:p>417.8053283691</text:p>
          </table:table-cell>
          <table:table-cell office:value-type="float" office:value="0.002893388">
            <text:p>0.002893388</text:p>
          </table:table-cell>
          <table:table-cell table:number-columns-repeated="4"/>
        </table:table-row>
        <table:table-row table:style-name="ro1">
          <table:table-cell office:value-type="float" office:value="417.918243408203">
            <text:p>417.9182434082</text:p>
          </table:table-cell>
          <table:table-cell office:value-type="float" office:value="-0.01542159">
            <text:p>-0.01542159</text:p>
          </table:table-cell>
          <table:table-cell table:number-columns-repeated="4"/>
        </table:table-row>
        <table:table-row table:style-name="ro1">
          <table:table-cell office:value-type="float" office:value="418.031158447266">
            <text:p>418.0311584473</text:p>
          </table:table-cell>
          <table:table-cell office:value-type="float" office:value="-0.008690248">
            <text:p>-0.008690248</text:p>
          </table:table-cell>
          <table:table-cell table:number-columns-repeated="4"/>
        </table:table-row>
        <table:table-row table:style-name="ro1">
          <table:table-cell office:value-type="float" office:value="418.144073486328">
            <text:p>418.1440734863</text:p>
          </table:table-cell>
          <table:table-cell office:value-type="float" office:value="0.03123377">
            <text:p>0.03123377</text:p>
          </table:table-cell>
          <table:table-cell table:number-columns-repeated="4"/>
        </table:table-row>
        <table:table-row table:style-name="ro1">
          <table:table-cell office:value-type="float" office:value="418.256988525391">
            <text:p>418.2569885254</text:p>
          </table:table-cell>
          <table:table-cell office:value-type="float" office:value="0.01569343">
            <text:p>0.01569343</text:p>
          </table:table-cell>
          <table:table-cell table:number-columns-repeated="4"/>
        </table:table-row>
        <table:table-row table:style-name="ro1">
          <table:table-cell office:value-type="float" office:value="418.369934082031">
            <text:p>418.369934082</text:p>
          </table:table-cell>
          <table:table-cell office:value-type="float" office:value="0.005280911">
            <text:p>0.005280911</text:p>
          </table:table-cell>
          <table:table-cell table:number-columns-repeated="4"/>
        </table:table-row>
        <table:table-row table:style-name="ro1">
          <table:table-cell office:value-type="float" office:value="418.482849121094">
            <text:p>418.4828491211</text:p>
          </table:table-cell>
          <table:table-cell office:value-type="float" office:value="0.004762172">
            <text:p>0.004762172</text:p>
          </table:table-cell>
          <table:table-cell table:number-columns-repeated="4"/>
        </table:table-row>
        <table:table-row table:style-name="ro1">
          <table:table-cell office:value-type="float" office:value="418.595794677734">
            <text:p>418.5957946777</text:p>
          </table:table-cell>
          <table:table-cell office:value-type="float" office:value="0.01250834">
            <text:p>0.01250834</text:p>
          </table:table-cell>
          <table:table-cell table:number-columns-repeated="4"/>
        </table:table-row>
        <table:table-row table:style-name="ro1">
          <table:table-cell office:value-type="float" office:value="418.708740234375">
            <text:p>418.7087402344</text:p>
          </table:table-cell>
          <table:table-cell office:value-type="float" office:value="0.0005312041">
            <text:p>0.0005312041</text:p>
          </table:table-cell>
          <table:table-cell table:number-columns-repeated="4"/>
        </table:table-row>
        <table:table-row table:style-name="ro1">
          <table:table-cell office:value-type="float" office:value="418.821685791016">
            <text:p>418.821685791</text:p>
          </table:table-cell>
          <table:table-cell office:value-type="float" office:value="0.001510141">
            <text:p>0.001510141</text:p>
          </table:table-cell>
          <table:table-cell table:number-columns-repeated="4"/>
        </table:table-row>
        <table:table-row table:style-name="ro1">
          <table:table-cell office:value-type="float" office:value="418.934661865234">
            <text:p>418.9346618652</text:p>
          </table:table-cell>
          <table:table-cell office:value-type="float" office:value="0.003876136">
            <text:p>0.003876136</text:p>
          </table:table-cell>
          <table:table-cell table:number-columns-repeated="4"/>
        </table:table-row>
        <table:table-row table:style-name="ro1">
          <table:table-cell office:value-type="float" office:value="419.047607421875">
            <text:p>419.0476074219</text:p>
          </table:table-cell>
          <table:table-cell office:value-type="float" office:value="-0.004719929">
            <text:p>-0.004719929</text:p>
          </table:table-cell>
          <table:table-cell table:number-columns-repeated="4"/>
        </table:table-row>
        <table:table-row table:style-name="ro1">
          <table:table-cell office:value-type="float" office:value="419.160583496094">
            <text:p>419.1605834961</text:p>
          </table:table-cell>
          <table:table-cell office:value-type="float" office:value="-0.009449346">
            <text:p>-0.009449346</text:p>
          </table:table-cell>
          <table:table-cell table:number-columns-repeated="4"/>
        </table:table-row>
        <table:table-row table:style-name="ro1">
          <table:table-cell office:value-type="float" office:value="419.273559570313">
            <text:p>419.2735595703</text:p>
          </table:table-cell>
          <table:table-cell office:value-type="float" office:value="-0.006841034">
            <text:p>-0.006841034</text:p>
          </table:table-cell>
          <table:table-cell table:number-columns-repeated="4"/>
        </table:table-row>
        <table:table-row table:style-name="ro1">
          <table:table-cell office:value-type="float" office:value="419.386535644531">
            <text:p>419.3865356445</text:p>
          </table:table-cell>
          <table:table-cell office:value-type="float" office:value="-0.0009555885">
            <text:p>-0.0009555885</text:p>
          </table:table-cell>
          <table:table-cell table:number-columns-repeated="4"/>
        </table:table-row>
        <table:table-row table:style-name="ro1">
          <table:table-cell office:value-type="float" office:value="419.49951171875">
            <text:p>419.4995117188</text:p>
          </table:table-cell>
          <table:table-cell office:value-type="float" office:value="0.01052739">
            <text:p>0.01052739</text:p>
          </table:table-cell>
          <table:table-cell table:number-columns-repeated="4"/>
        </table:table-row>
        <table:table-row table:style-name="ro1">
          <table:table-cell office:value-type="float" office:value="419.612487792969">
            <text:p>419.612487793</text:p>
          </table:table-cell>
          <table:table-cell office:value-type="float" office:value="0.005961216">
            <text:p>0.005961216</text:p>
          </table:table-cell>
          <table:table-cell table:number-columns-repeated="4"/>
        </table:table-row>
        <table:table-row table:style-name="ro1">
          <table:table-cell office:value-type="float" office:value="419.725494384766">
            <text:p>419.7254943848</text:p>
          </table:table-cell>
          <table:table-cell office:value-type="float" office:value="0.009192368">
            <text:p>0.009192368</text:p>
          </table:table-cell>
          <table:table-cell table:number-columns-repeated="4"/>
        </table:table-row>
        <table:table-row table:style-name="ro1">
          <table:table-cell office:value-type="float" office:value="419.838470458984">
            <text:p>419.838470459</text:p>
          </table:table-cell>
          <table:table-cell office:value-type="float" office:value="0.0009051297">
            <text:p>0.0009051297</text:p>
          </table:table-cell>
          <table:table-cell table:number-columns-repeated="4"/>
        </table:table-row>
        <table:table-row table:style-name="ro1">
          <table:table-cell office:value-type="float" office:value="419.951477050781">
            <text:p>419.9514770508</text:p>
          </table:table-cell>
          <table:table-cell office:value-type="float" office:value="0.01362405">
            <text:p>0.01362405</text:p>
          </table:table-cell>
          <table:table-cell table:number-columns-repeated="4"/>
        </table:table-row>
        <table:table-row table:style-name="ro1">
          <table:table-cell office:value-type="float" office:value="420.064483642578">
            <text:p>420.0644836426</text:p>
          </table:table-cell>
          <table:table-cell office:value-type="float" office:value="-0.002825367">
            <text:p>-0.002825367</text:p>
          </table:table-cell>
          <table:table-cell table:number-columns-repeated="4"/>
        </table:table-row>
        <table:table-row table:style-name="ro1">
          <table:table-cell office:value-type="float" office:value="420.177520751953">
            <text:p>420.177520752</text:p>
          </table:table-cell>
          <table:table-cell office:value-type="float" office:value="-0.004531045">
            <text:p>-0.004531045</text:p>
          </table:table-cell>
          <table:table-cell table:number-columns-repeated="4"/>
        </table:table-row>
        <table:table-row table:style-name="ro1">
          <table:table-cell office:value-type="float" office:value="420.29052734375">
            <text:p>420.2905273438</text:p>
          </table:table-cell>
          <table:table-cell office:value-type="float" office:value="-0.007293383">
            <text:p>-0.007293383</text:p>
          </table:table-cell>
          <table:table-cell table:number-columns-repeated="4"/>
        </table:table-row>
        <table:table-row table:style-name="ro1">
          <table:table-cell office:value-type="float" office:value="420.403564453125">
            <text:p>420.4035644531</text:p>
          </table:table-cell>
          <table:table-cell office:value-type="float" office:value="-0.006093252">
            <text:p>-0.006093252</text:p>
          </table:table-cell>
          <table:table-cell table:number-columns-repeated="4"/>
        </table:table-row>
        <table:table-row table:style-name="ro1">
          <table:table-cell office:value-type="float" office:value="420.516571044922">
            <text:p>420.5165710449</text:p>
          </table:table-cell>
          <table:table-cell office:value-type="float" office:value="-0.004971431">
            <text:p>-0.004971431</text:p>
          </table:table-cell>
          <table:table-cell table:number-columns-repeated="4"/>
        </table:table-row>
        <table:table-row table:style-name="ro1">
          <table:table-cell office:value-type="float" office:value="420.629608154297">
            <text:p>420.6296081543</text:p>
          </table:table-cell>
          <table:table-cell office:value-type="float" office:value="0.002127042">
            <text:p>0.002127042</text:p>
          </table:table-cell>
          <table:table-cell table:number-columns-repeated="4"/>
        </table:table-row>
        <table:table-row table:style-name="ro1">
          <table:table-cell office:value-type="float" office:value="420.742645263672">
            <text:p>420.7426452637</text:p>
          </table:table-cell>
          <table:table-cell office:value-type="float" office:value="0.004364666">
            <text:p>0.004364666</text:p>
          </table:table-cell>
          <table:table-cell table:number-columns-repeated="4"/>
        </table:table-row>
        <table:table-row table:style-name="ro1">
          <table:table-cell office:value-type="float" office:value="420.855712890625">
            <text:p>420.8557128906</text:p>
          </table:table-cell>
          <table:table-cell office:value-type="float" office:value="0.005015123">
            <text:p>0.005015123</text:p>
          </table:table-cell>
          <table:table-cell table:number-columns-repeated="4"/>
        </table:table-row>
        <table:table-row table:style-name="ro1">
          <table:table-cell office:value-type="float" office:value="420.96875">
            <text:p>420.96875</text:p>
          </table:table-cell>
          <table:table-cell office:value-type="float" office:value="0.01404127">
            <text:p>0.01404127</text:p>
          </table:table-cell>
          <table:table-cell table:number-columns-repeated="4"/>
        </table:table-row>
        <table:table-row table:style-name="ro1">
          <table:table-cell office:value-type="float" office:value="421.081817626953">
            <text:p>421.081817627</text:p>
          </table:table-cell>
          <table:table-cell office:value-type="float" office:value="-0.003459768">
            <text:p>-0.003459768</text:p>
          </table:table-cell>
          <table:table-cell table:number-columns-repeated="4"/>
        </table:table-row>
        <table:table-row table:style-name="ro1">
          <table:table-cell office:value-type="float" office:value="421.194854736328">
            <text:p>421.1948547363</text:p>
          </table:table-cell>
          <table:table-cell office:value-type="float" office:value="-0.005428411">
            <text:p>-0.005428411</text:p>
          </table:table-cell>
          <table:table-cell table:number-columns-repeated="4"/>
        </table:table-row>
        <table:table-row table:style-name="ro1">
          <table:table-cell office:value-type="float" office:value="421.307922363281">
            <text:p>421.3079223633</text:p>
          </table:table-cell>
          <table:table-cell office:value-type="float" office:value="0.001325939">
            <text:p>0.001325939</text:p>
          </table:table-cell>
          <table:table-cell table:number-columns-repeated="4"/>
        </table:table-row>
        <table:table-row table:style-name="ro1">
          <table:table-cell office:value-type="float" office:value="421.421020507813">
            <text:p>421.4210205078</text:p>
          </table:table-cell>
          <table:table-cell office:value-type="float" office:value="0.01082288">
            <text:p>0.01082288</text:p>
          </table:table-cell>
          <table:table-cell table:number-columns-repeated="4"/>
        </table:table-row>
        <table:table-row table:style-name="ro1">
          <table:table-cell office:value-type="float" office:value="421.534088134766">
            <text:p>421.5340881348</text:p>
          </table:table-cell>
          <table:table-cell office:value-type="float" office:value="-0.00946648">
            <text:p>-0.00946648</text:p>
          </table:table-cell>
          <table:table-cell table:number-columns-repeated="4"/>
        </table:table-row>
        <table:table-row table:style-name="ro1">
          <table:table-cell office:value-type="float" office:value="421.647155761719">
            <text:p>421.6471557617</text:p>
          </table:table-cell>
          <table:table-cell office:value-type="float" office:value="0.003989483">
            <text:p>0.003989483</text:p>
          </table:table-cell>
          <table:table-cell table:number-columns-repeated="4"/>
        </table:table-row>
        <table:table-row table:style-name="ro1">
          <table:table-cell office:value-type="float" office:value="421.76025390625">
            <text:p>421.7602539063</text:p>
          </table:table-cell>
          <table:table-cell office:value-type="float" office:value="-0.002771426">
            <text:p>-0.002771426</text:p>
          </table:table-cell>
          <table:table-cell table:number-columns-repeated="4"/>
        </table:table-row>
        <table:table-row table:style-name="ro1">
          <table:table-cell office:value-type="float" office:value="421.873352050781">
            <text:p>421.8733520508</text:p>
          </table:table-cell>
          <table:table-cell office:value-type="float" office:value="0.008123767">
            <text:p>0.008123767</text:p>
          </table:table-cell>
          <table:table-cell table:number-columns-repeated="4"/>
        </table:table-row>
        <table:table-row table:style-name="ro1">
          <table:table-cell office:value-type="float" office:value="421.986450195313">
            <text:p>421.9864501953</text:p>
          </table:table-cell>
          <table:table-cell office:value-type="float" office:value="0.006344699">
            <text:p>0.006344699</text:p>
          </table:table-cell>
          <table:table-cell table:number-columns-repeated="4"/>
        </table:table-row>
        <table:table-row table:style-name="ro1">
          <table:table-cell office:value-type="float" office:value="422.099548339844">
            <text:p>422.0995483398</text:p>
          </table:table-cell>
          <table:table-cell office:value-type="float" office:value="-0.001908359">
            <text:p>-0.001908359</text:p>
          </table:table-cell>
          <table:table-cell table:number-columns-repeated="4"/>
        </table:table-row>
        <table:table-row table:style-name="ro1">
          <table:table-cell office:value-type="float" office:value="422.212646484375">
            <text:p>422.2126464844</text:p>
          </table:table-cell>
          <table:table-cell office:value-type="float" office:value="0.02287369">
            <text:p>0.02287369</text:p>
          </table:table-cell>
          <table:table-cell table:number-columns-repeated="4"/>
        </table:table-row>
        <table:table-row table:style-name="ro1">
          <table:table-cell office:value-type="float" office:value="422.325775146484">
            <text:p>422.3257751465</text:p>
          </table:table-cell>
          <table:table-cell office:value-type="float" office:value="-0.003245563">
            <text:p>-0.003245563</text:p>
          </table:table-cell>
          <table:table-cell table:number-columns-repeated="4"/>
        </table:table-row>
        <table:table-row table:style-name="ro1">
          <table:table-cell office:value-type="float" office:value="422.438903808594">
            <text:p>422.4389038086</text:p>
          </table:table-cell>
          <table:table-cell office:value-type="float" office:value="-0.007932858">
            <text:p>-0.007932858</text:p>
          </table:table-cell>
          <table:table-cell table:number-columns-repeated="4"/>
        </table:table-row>
        <table:table-row table:style-name="ro1">
          <table:table-cell office:value-type="float" office:value="422.552001953125">
            <text:p>422.5520019531</text:p>
          </table:table-cell>
          <table:table-cell office:value-type="float" office:value="-0.008304183">
            <text:p>-0.008304183</text:p>
          </table:table-cell>
          <table:table-cell table:number-columns-repeated="4"/>
        </table:table-row>
        <table:table-row table:style-name="ro1">
          <table:table-cell office:value-type="float" office:value="422.665130615234">
            <text:p>422.6651306152</text:p>
          </table:table-cell>
          <table:table-cell office:value-type="float" office:value="0.009088709">
            <text:p>0.009088709</text:p>
          </table:table-cell>
          <table:table-cell table:number-columns-repeated="4"/>
        </table:table-row>
        <table:table-row table:style-name="ro1">
          <table:table-cell office:value-type="float" office:value="422.778289794922">
            <text:p>422.7782897949</text:p>
          </table:table-cell>
          <table:table-cell office:value-type="float" office:value="-0.005875554">
            <text:p>-0.005875554</text:p>
          </table:table-cell>
          <table:table-cell table:number-columns-repeated="4"/>
        </table:table-row>
        <table:table-row table:style-name="ro1">
          <table:table-cell office:value-type="float" office:value="422.891418457031">
            <text:p>422.891418457</text:p>
          </table:table-cell>
          <table:table-cell office:value-type="float" office:value="0.01161192">
            <text:p>0.01161192</text:p>
          </table:table-cell>
          <table:table-cell table:number-columns-repeated="4"/>
        </table:table-row>
        <table:table-row table:style-name="ro1">
          <table:table-cell office:value-type="float" office:value="423.004577636719">
            <text:p>423.0045776367</text:p>
          </table:table-cell>
          <table:table-cell office:value-type="float" office:value="0.006623576">
            <text:p>0.006623576</text:p>
          </table:table-cell>
          <table:table-cell table:number-columns-repeated="4"/>
        </table:table-row>
        <table:table-row table:style-name="ro1">
          <table:table-cell office:value-type="float" office:value="423.117706298828">
            <text:p>423.1177062988</text:p>
          </table:table-cell>
          <table:table-cell office:value-type="float" office:value="-0.002296611">
            <text:p>-0.002296611</text:p>
          </table:table-cell>
          <table:table-cell table:number-columns-repeated="4"/>
        </table:table-row>
        <table:table-row table:style-name="ro1">
          <table:table-cell office:value-type="float" office:value="423.230865478516">
            <text:p>423.2308654785</text:p>
          </table:table-cell>
          <table:table-cell office:value-type="float" office:value="-0.005056168">
            <text:p>-0.005056168</text:p>
          </table:table-cell>
          <table:table-cell table:number-columns-repeated="4"/>
        </table:table-row>
        <table:table-row table:style-name="ro1">
          <table:table-cell office:value-type="float" office:value="423.344024658203">
            <text:p>423.3440246582</text:p>
          </table:table-cell>
          <table:table-cell office:value-type="float" office:value="0.001997305">
            <text:p>0.001997305</text:p>
          </table:table-cell>
          <table:table-cell table:number-columns-repeated="4"/>
        </table:table-row>
        <table:table-row table:style-name="ro1">
          <table:table-cell office:value-type="float" office:value="423.457183837891">
            <text:p>423.4571838379</text:p>
          </table:table-cell>
          <table:table-cell office:value-type="float" office:value="-0.009768444">
            <text:p>-0.009768444</text:p>
          </table:table-cell>
          <table:table-cell table:number-columns-repeated="4"/>
        </table:table-row>
        <table:table-row table:style-name="ro1">
          <table:table-cell office:value-type="float" office:value="423.570373535156">
            <text:p>423.5703735352</text:p>
          </table:table-cell>
          <table:table-cell office:value-type="float" office:value="0.01027482">
            <text:p>0.01027482</text:p>
          </table:table-cell>
          <table:table-cell table:number-columns-repeated="4"/>
        </table:table-row>
        <table:table-row table:style-name="ro1">
          <table:table-cell office:value-type="float" office:value="423.683532714844">
            <text:p>423.6835327148</text:p>
          </table:table-cell>
          <table:table-cell office:value-type="float" office:value="-0.0004498261">
            <text:p>-0.0004498261</text:p>
          </table:table-cell>
          <table:table-cell table:number-columns-repeated="4"/>
        </table:table-row>
        <table:table-row table:style-name="ro1">
          <table:table-cell office:value-type="float" office:value="423.796722412109">
            <text:p>423.7967224121</text:p>
          </table:table-cell>
          <table:table-cell office:value-type="float" office:value="-0.003997019">
            <text:p>-0.003997019</text:p>
          </table:table-cell>
          <table:table-cell table:number-columns-repeated="4"/>
        </table:table-row>
        <table:table-row table:style-name="ro1">
          <table:table-cell office:value-type="float" office:value="423.909912109375">
            <text:p>423.9099121094</text:p>
          </table:table-cell>
          <table:table-cell office:value-type="float" office:value="-0.01081964">
            <text:p>-0.01081964</text:p>
          </table:table-cell>
          <table:table-cell table:number-columns-repeated="4"/>
        </table:table-row>
        <table:table-row table:style-name="ro1">
          <table:table-cell office:value-type="float" office:value="424.023101806641">
            <text:p>424.0231018066</text:p>
          </table:table-cell>
          <table:table-cell office:value-type="float" office:value="0.004856274">
            <text:p>0.004856274</text:p>
          </table:table-cell>
          <table:table-cell table:number-columns-repeated="4"/>
        </table:table-row>
        <table:table-row table:style-name="ro1">
          <table:table-cell office:value-type="float" office:value="424.136291503906">
            <text:p>424.1362915039</text:p>
          </table:table-cell>
          <table:table-cell office:value-type="float" office:value="0.01012984">
            <text:p>0.01012984</text:p>
          </table:table-cell>
          <table:table-cell table:number-columns-repeated="4"/>
        </table:table-row>
        <table:table-row table:style-name="ro1">
          <table:table-cell office:value-type="float" office:value="424.24951171875">
            <text:p>424.2495117188</text:p>
          </table:table-cell>
          <table:table-cell office:value-type="float" office:value="0.006695336">
            <text:p>0.006695336</text:p>
          </table:table-cell>
          <table:table-cell table:number-columns-repeated="4"/>
        </table:table-row>
        <table:table-row table:style-name="ro1">
          <table:table-cell office:value-type="float" office:value="424.362701416016">
            <text:p>424.362701416</text:p>
          </table:table-cell>
          <table:table-cell office:value-type="float" office:value="-0.004189676">
            <text:p>-0.004189676</text:p>
          </table:table-cell>
          <table:table-cell table:number-columns-repeated="4"/>
        </table:table-row>
        <table:table-row table:style-name="ro1">
          <table:table-cell office:value-type="float" office:value="424.475921630859">
            <text:p>424.4759216309</text:p>
          </table:table-cell>
          <table:table-cell office:value-type="float" office:value="0.003024944">
            <text:p>0.003024944</text:p>
          </table:table-cell>
          <table:table-cell table:number-columns-repeated="4"/>
        </table:table-row>
        <table:table-row table:style-name="ro1">
          <table:table-cell office:value-type="float" office:value="424.589141845703">
            <text:p>424.5891418457</text:p>
          </table:table-cell>
          <table:table-cell office:value-type="float" office:value="-0.0007869502">
            <text:p>-0.0007869502</text:p>
          </table:table-cell>
          <table:table-cell table:number-columns-repeated="4"/>
        </table:table-row>
        <table:table-row table:style-name="ro1">
          <table:table-cell office:value-type="float" office:value="424.702362060547">
            <text:p>424.7023620605</text:p>
          </table:table-cell>
          <table:table-cell office:value-type="float" office:value="-0.006943111">
            <text:p>-0.006943111</text:p>
          </table:table-cell>
          <table:table-cell table:number-columns-repeated="4"/>
        </table:table-row>
        <table:table-row table:style-name="ro1">
          <table:table-cell office:value-type="float" office:value="424.815612792969">
            <text:p>424.815612793</text:p>
          </table:table-cell>
          <table:table-cell office:value-type="float" office:value="-0.002406648">
            <text:p>-0.002406648</text:p>
          </table:table-cell>
          <table:table-cell table:number-columns-repeated="4"/>
        </table:table-row>
        <table:table-row table:style-name="ro1">
          <table:table-cell office:value-type="float" office:value="424.928833007813">
            <text:p>424.9288330078</text:p>
          </table:table-cell>
          <table:table-cell office:value-type="float" office:value="0.01521718">
            <text:p>0.01521718</text:p>
          </table:table-cell>
          <table:table-cell table:number-columns-repeated="4"/>
        </table:table-row>
        <table:table-row table:style-name="ro1">
          <table:table-cell office:value-type="float" office:value="425.042083740234">
            <text:p>425.0420837402</text:p>
          </table:table-cell>
          <table:table-cell office:value-type="float" office:value="-0.005316579">
            <text:p>-0.005316579</text:p>
          </table:table-cell>
          <table:table-cell table:number-columns-repeated="4"/>
        </table:table-row>
        <table:table-row table:style-name="ro1">
          <table:table-cell office:value-type="float" office:value="425.155303955078">
            <text:p>425.1553039551</text:p>
          </table:table-cell>
          <table:table-cell office:value-type="float" office:value="-0.003524555">
            <text:p>-0.003524555</text:p>
          </table:table-cell>
          <table:table-cell table:number-columns-repeated="4"/>
        </table:table-row>
        <table:table-row table:style-name="ro1">
          <table:table-cell office:value-type="float" office:value="425.2685546875">
            <text:p>425.2685546875</text:p>
          </table:table-cell>
          <table:table-cell office:value-type="float" office:value="-0.01452253">
            <text:p>-0.01452253</text:p>
          </table:table-cell>
          <table:table-cell table:number-columns-repeated="4"/>
        </table:table-row>
        <table:table-row table:style-name="ro1">
          <table:table-cell office:value-type="float" office:value="425.3818359375">
            <text:p>425.3818359375</text:p>
          </table:table-cell>
          <table:table-cell office:value-type="float" office:value="-0.001970197">
            <text:p>-0.001970197</text:p>
          </table:table-cell>
          <table:table-cell table:number-columns-repeated="4"/>
        </table:table-row>
        <table:table-row table:style-name="ro1">
          <table:table-cell office:value-type="float" office:value="425.495086669922">
            <text:p>425.4950866699</text:p>
          </table:table-cell>
          <table:table-cell office:value-type="float" office:value="0.005494957">
            <text:p>0.005494957</text:p>
          </table:table-cell>
          <table:table-cell table:number-columns-repeated="4"/>
        </table:table-row>
        <table:table-row table:style-name="ro1">
          <table:table-cell office:value-type="float" office:value="425.608337402344">
            <text:p>425.6083374023</text:p>
          </table:table-cell>
          <table:table-cell office:value-type="float" office:value="0.005320088">
            <text:p>0.005320088</text:p>
          </table:table-cell>
          <table:table-cell table:number-columns-repeated="4"/>
        </table:table-row>
        <table:table-row table:style-name="ro1">
          <table:table-cell office:value-type="float" office:value="425.721618652344">
            <text:p>425.7216186523</text:p>
          </table:table-cell>
          <table:table-cell office:value-type="float" office:value="-0.005709361">
            <text:p>-0.005709361</text:p>
          </table:table-cell>
          <table:table-cell table:number-columns-repeated="4"/>
        </table:table-row>
        <table:table-row table:style-name="ro1">
          <table:table-cell office:value-type="float" office:value="425.834899902344">
            <text:p>425.8348999023</text:p>
          </table:table-cell>
          <table:table-cell office:value-type="float" office:value="-0.007630948">
            <text:p>-0.007630948</text:p>
          </table:table-cell>
          <table:table-cell table:number-columns-repeated="4"/>
        </table:table-row>
        <table:table-row table:style-name="ro1">
          <table:table-cell office:value-type="float" office:value="425.948181152344">
            <text:p>425.9481811523</text:p>
          </table:table-cell>
          <table:table-cell office:value-type="float" office:value="0.003415446">
            <text:p>0.003415446</text:p>
          </table:table-cell>
          <table:table-cell table:number-columns-repeated="4"/>
        </table:table-row>
        <table:table-row table:style-name="ro1">
          <table:table-cell office:value-type="float" office:value="426.061462402344">
            <text:p>426.0614624023</text:p>
          </table:table-cell>
          <table:table-cell office:value-type="float" office:value="0.01141191">
            <text:p>0.01141191</text:p>
          </table:table-cell>
          <table:table-cell table:number-columns-repeated="4"/>
        </table:table-row>
        <table:table-row table:style-name="ro1">
          <table:table-cell office:value-type="float" office:value="426.174743652344">
            <text:p>426.1747436523</text:p>
          </table:table-cell>
          <table:table-cell office:value-type="float" office:value="-0.005580805">
            <text:p>-0.005580805</text:p>
          </table:table-cell>
          <table:table-cell table:number-columns-repeated="4"/>
        </table:table-row>
        <table:table-row table:style-name="ro1">
          <table:table-cell office:value-type="float" office:value="426.288055419922">
            <text:p>426.2880554199</text:p>
          </table:table-cell>
          <table:table-cell office:value-type="float" office:value="0.01025301">
            <text:p>0.01025301</text:p>
          </table:table-cell>
          <table:table-cell table:number-columns-repeated="4"/>
        </table:table-row>
        <table:table-row table:style-name="ro1">
          <table:table-cell office:value-type="float" office:value="426.401336669922">
            <text:p>426.4013366699</text:p>
          </table:table-cell>
          <table:table-cell office:value-type="float" office:value="-0.0003839112">
            <text:p>-0.0003839112</text:p>
          </table:table-cell>
          <table:table-cell table:number-columns-repeated="4"/>
        </table:table-row>
        <table:table-row table:style-name="ro1">
          <table:table-cell office:value-type="float" office:value="426.5146484375">
            <text:p>426.5146484375</text:p>
          </table:table-cell>
          <table:table-cell office:value-type="float" office:value="-0.001541435">
            <text:p>-0.001541435</text:p>
          </table:table-cell>
          <table:table-cell table:number-columns-repeated="4"/>
        </table:table-row>
        <table:table-row table:style-name="ro1">
          <table:table-cell office:value-type="float" office:value="426.627960205078">
            <text:p>426.6279602051</text:p>
          </table:table-cell>
          <table:table-cell office:value-type="float" office:value="0.003090237">
            <text:p>0.003090237</text:p>
          </table:table-cell>
          <table:table-cell table:number-columns-repeated="4"/>
        </table:table-row>
        <table:table-row table:style-name="ro1">
          <table:table-cell office:value-type="float" office:value="426.741271972656">
            <text:p>426.7412719727</text:p>
          </table:table-cell>
          <table:table-cell office:value-type="float" office:value="0.0084721">
            <text:p>0.0084721</text:p>
          </table:table-cell>
          <table:table-cell table:number-columns-repeated="4"/>
        </table:table-row>
        <table:table-row table:style-name="ro1">
          <table:table-cell office:value-type="float" office:value="426.854614257813">
            <text:p>426.8546142578</text:p>
          </table:table-cell>
          <table:table-cell office:value-type="float" office:value="0.009295519">
            <text:p>0.009295519</text:p>
          </table:table-cell>
          <table:table-cell table:number-columns-repeated="4"/>
        </table:table-row>
        <table:table-row table:style-name="ro1">
          <table:table-cell office:value-type="float" office:value="426.967926025391">
            <text:p>426.9679260254</text:p>
          </table:table-cell>
          <table:table-cell office:value-type="float" office:value="-0.004039877">
            <text:p>-0.004039877</text:p>
          </table:table-cell>
          <table:table-cell table:number-columns-repeated="4"/>
        </table:table-row>
        <table:table-row table:style-name="ro1">
          <table:table-cell office:value-type="float" office:value="427.081268310547">
            <text:p>427.0812683105</text:p>
          </table:table-cell>
          <table:table-cell office:value-type="float" office:value="-0.004626142">
            <text:p>-0.004626142</text:p>
          </table:table-cell>
          <table:table-cell table:number-columns-repeated="4"/>
        </table:table-row>
        <table:table-row table:style-name="ro1">
          <table:table-cell office:value-type="float" office:value="427.194610595703">
            <text:p>427.1946105957</text:p>
          </table:table-cell>
          <table:table-cell office:value-type="float" office:value="0.004068657">
            <text:p>0.004068657</text:p>
          </table:table-cell>
          <table:table-cell table:number-columns-repeated="4"/>
        </table:table-row>
        <table:table-row table:style-name="ro1">
          <table:table-cell office:value-type="float" office:value="427.307952880859">
            <text:p>427.3079528809</text:p>
          </table:table-cell>
          <table:table-cell office:value-type="float" office:value="0.002469227">
            <text:p>0.002469227</text:p>
          </table:table-cell>
          <table:table-cell table:number-columns-repeated="4"/>
        </table:table-row>
        <table:table-row table:style-name="ro1">
          <table:table-cell office:value-type="float" office:value="427.421295166016">
            <text:p>427.421295166</text:p>
          </table:table-cell>
          <table:table-cell office:value-type="float" office:value="0.000464003">
            <text:p>0.000464003</text:p>
          </table:table-cell>
          <table:table-cell table:number-columns-repeated="4"/>
        </table:table-row>
        <table:table-row table:style-name="ro1">
          <table:table-cell office:value-type="float" office:value="427.534637451172">
            <text:p>427.5346374512</text:p>
          </table:table-cell>
          <table:table-cell office:value-type="float" office:value="-0.0101131">
            <text:p>-0.0101131</text:p>
          </table:table-cell>
          <table:table-cell table:number-columns-repeated="4"/>
        </table:table-row>
        <table:table-row table:style-name="ro1">
          <table:table-cell office:value-type="float" office:value="427.648010253906">
            <text:p>427.6480102539</text:p>
          </table:table-cell>
          <table:table-cell office:value-type="float" office:value="0.002063085">
            <text:p>0.002063085</text:p>
          </table:table-cell>
          <table:table-cell table:number-columns-repeated="4"/>
        </table:table-row>
        <table:table-row table:style-name="ro1">
          <table:table-cell office:value-type="float" office:value="427.761383056641">
            <text:p>427.7613830566</text:p>
          </table:table-cell>
          <table:table-cell office:value-type="float" office:value="0.005010234">
            <text:p>0.005010234</text:p>
          </table:table-cell>
          <table:table-cell table:number-columns-repeated="4"/>
        </table:table-row>
        <table:table-row table:style-name="ro1">
          <table:table-cell office:value-type="float" office:value="427.874755859375">
            <text:p>427.8747558594</text:p>
          </table:table-cell>
          <table:table-cell office:value-type="float" office:value="-0.007465993">
            <text:p>-0.007465993</text:p>
          </table:table-cell>
          <table:table-cell table:number-columns-repeated="4"/>
        </table:table-row>
        <table:table-row table:style-name="ro1">
          <table:table-cell office:value-type="float" office:value="427.988128662109">
            <text:p>427.9881286621</text:p>
          </table:table-cell>
          <table:table-cell office:value-type="float" office:value="-0.01004182">
            <text:p>-0.01004182</text:p>
          </table:table-cell>
          <table:table-cell table:number-columns-repeated="4"/>
        </table:table-row>
        <table:table-row table:style-name="ro1">
          <table:table-cell office:value-type="float" office:value="428.101501464844">
            <text:p>428.1015014648</text:p>
          </table:table-cell>
          <table:table-cell office:value-type="float" office:value="-0.002621243">
            <text:p>-0.002621243</text:p>
          </table:table-cell>
          <table:table-cell table:number-columns-repeated="4"/>
        </table:table-row>
        <table:table-row table:style-name="ro1">
          <table:table-cell office:value-type="float" office:value="428.214874267578">
            <text:p>428.2148742676</text:p>
          </table:table-cell>
          <table:table-cell office:value-type="float" office:value="0.008145892">
            <text:p>0.008145892</text:p>
          </table:table-cell>
          <table:table-cell table:number-columns-repeated="4"/>
        </table:table-row>
        <table:table-row table:style-name="ro1">
          <table:table-cell office:value-type="float" office:value="428.328277587891">
            <text:p>428.3282775879</text:p>
          </table:table-cell>
          <table:table-cell office:value-type="float" office:value="-0.002711243">
            <text:p>-0.002711243</text:p>
          </table:table-cell>
          <table:table-cell table:number-columns-repeated="4"/>
        </table:table-row>
        <table:table-row table:style-name="ro1">
          <table:table-cell office:value-type="float" office:value="428.441650390625">
            <text:p>428.4416503906</text:p>
          </table:table-cell>
          <table:table-cell office:value-type="float" office:value="-0.006704796">
            <text:p>-0.006704796</text:p>
          </table:table-cell>
          <table:table-cell table:number-columns-repeated="4"/>
        </table:table-row>
        <table:table-row table:style-name="ro1">
          <table:table-cell office:value-type="float" office:value="428.555053710938">
            <text:p>428.5550537109</text:p>
          </table:table-cell>
          <table:table-cell office:value-type="float" office:value="-0.003876141">
            <text:p>-0.003876141</text:p>
          </table:table-cell>
          <table:table-cell table:number-columns-repeated="4"/>
        </table:table-row>
        <table:table-row table:style-name="ro1">
          <table:table-cell office:value-type="float" office:value="428.66845703125">
            <text:p>428.6684570313</text:p>
          </table:table-cell>
          <table:table-cell office:value-type="float" office:value="0.003786866">
            <text:p>0.003786866</text:p>
          </table:table-cell>
          <table:table-cell table:number-columns-repeated="4"/>
        </table:table-row>
        <table:table-row table:style-name="ro1">
          <table:table-cell office:value-type="float" office:value="428.781890869141">
            <text:p>428.7818908691</text:p>
          </table:table-cell>
          <table:table-cell office:value-type="float" office:value="-0.0003381002">
            <text:p>-0.0003381002</text:p>
          </table:table-cell>
          <table:table-cell table:number-columns-repeated="4"/>
        </table:table-row>
        <table:table-row table:style-name="ro1">
          <table:table-cell office:value-type="float" office:value="428.895294189453">
            <text:p>428.8952941895</text:p>
          </table:table-cell>
          <table:table-cell office:value-type="float" office:value="0.007702813">
            <text:p>0.007702813</text:p>
          </table:table-cell>
          <table:table-cell table:number-columns-repeated="4"/>
        </table:table-row>
        <table:table-row table:style-name="ro1">
          <table:table-cell office:value-type="float" office:value="429.008728027344">
            <text:p>429.0087280273</text:p>
          </table:table-cell>
          <table:table-cell office:value-type="float" office:value="-0.006524614">
            <text:p>-0.006524614</text:p>
          </table:table-cell>
          <table:table-cell table:number-columns-repeated="4"/>
        </table:table-row>
        <table:table-row table:style-name="ro1">
          <table:table-cell office:value-type="float" office:value="429.122131347656">
            <text:p>429.1221313477</text:p>
          </table:table-cell>
          <table:table-cell office:value-type="float" office:value="-0.004594743">
            <text:p>-0.004594743</text:p>
          </table:table-cell>
          <table:table-cell table:number-columns-repeated="4"/>
        </table:table-row>
        <table:table-row table:style-name="ro1">
          <table:table-cell office:value-type="float" office:value="429.235565185547">
            <text:p>429.2355651855</text:p>
          </table:table-cell>
          <table:table-cell office:value-type="float" office:value="-0.005601637">
            <text:p>-0.005601637</text:p>
          </table:table-cell>
          <table:table-cell table:number-columns-repeated="4"/>
        </table:table-row>
        <table:table-row table:style-name="ro1">
          <table:table-cell office:value-type="float" office:value="429.348999023438">
            <text:p>429.3489990234</text:p>
          </table:table-cell>
          <table:table-cell office:value-type="float" office:value="0.01699505">
            <text:p>0.01699505</text:p>
          </table:table-cell>
          <table:table-cell table:number-columns-repeated="4"/>
        </table:table-row>
        <table:table-row table:style-name="ro1">
          <table:table-cell office:value-type="float" office:value="429.462432861328">
            <text:p>429.4624328613</text:p>
          </table:table-cell>
          <table:table-cell office:value-type="float" office:value="0.02551323">
            <text:p>0.02551323</text:p>
          </table:table-cell>
          <table:table-cell table:number-columns-repeated="4"/>
        </table:table-row>
        <table:table-row table:style-name="ro1">
          <table:table-cell office:value-type="float" office:value="429.575897216797">
            <text:p>429.5758972168</text:p>
          </table:table-cell>
          <table:table-cell office:value-type="string">
            <text:p>6.83123E-05</text:p>
          </table:table-cell>
          <table:table-cell table:number-columns-repeated="4"/>
        </table:table-row>
        <table:table-row table:style-name="ro1">
          <table:table-cell office:value-type="float" office:value="429.689331054688">
            <text:p>429.6893310547</text:p>
          </table:table-cell>
          <table:table-cell office:value-type="float" office:value="-0.005775164">
            <text:p>-0.005775164</text:p>
          </table:table-cell>
          <table:table-cell table:number-columns-repeated="4"/>
        </table:table-row>
        <table:table-row table:style-name="ro1">
          <table:table-cell office:value-type="float" office:value="429.802795410156">
            <text:p>429.8027954102</text:p>
          </table:table-cell>
          <table:table-cell office:value-type="float" office:value="0.00753891">
            <text:p>0.00753891</text:p>
          </table:table-cell>
          <table:table-cell table:number-columns-repeated="4"/>
        </table:table-row>
        <table:table-row table:style-name="ro1">
          <table:table-cell office:value-type="float" office:value="429.916259765625">
            <text:p>429.9162597656</text:p>
          </table:table-cell>
          <table:table-cell office:value-type="float" office:value="-0.001140254">
            <text:p>-0.001140254</text:p>
          </table:table-cell>
          <table:table-cell table:number-columns-repeated="4"/>
        </table:table-row>
        <table:table-row table:style-name="ro1">
          <table:table-cell office:value-type="float" office:value="430.029724121094">
            <text:p>430.0297241211</text:p>
          </table:table-cell>
          <table:table-cell office:value-type="float" office:value="0.007622736">
            <text:p>0.007622736</text:p>
          </table:table-cell>
          <table:table-cell table:number-columns-repeated="4"/>
        </table:table-row>
        <table:table-row table:style-name="ro1">
          <table:table-cell office:value-type="float" office:value="430.143188476563">
            <text:p>430.1431884766</text:p>
          </table:table-cell>
          <table:table-cell office:value-type="float" office:value="0.007993262">
            <text:p>0.007993262</text:p>
          </table:table-cell>
          <table:table-cell table:number-columns-repeated="4"/>
        </table:table-row>
        <table:table-row table:style-name="ro1">
          <table:table-cell office:value-type="float" office:value="430.256683349609">
            <text:p>430.2566833496</text:p>
          </table:table-cell>
          <table:table-cell office:value-type="float" office:value="-0.004218978">
            <text:p>-0.004218978</text:p>
          </table:table-cell>
          <table:table-cell table:number-columns-repeated="4"/>
        </table:table-row>
        <table:table-row table:style-name="ro1">
          <table:table-cell office:value-type="float" office:value="430.370147705078">
            <text:p>430.3701477051</text:p>
          </table:table-cell>
          <table:table-cell office:value-type="float" office:value="0.01216062">
            <text:p>0.01216062</text:p>
          </table:table-cell>
          <table:table-cell table:number-columns-repeated="4"/>
        </table:table-row>
        <table:table-row table:style-name="ro1">
          <table:table-cell office:value-type="float" office:value="430.483642578125">
            <text:p>430.4836425781</text:p>
          </table:table-cell>
          <table:table-cell office:value-type="float" office:value="-0.002816889">
            <text:p>-0.002816889</text:p>
          </table:table-cell>
          <table:table-cell table:number-columns-repeated="4"/>
        </table:table-row>
        <table:table-row table:style-name="ro1">
          <table:table-cell office:value-type="float" office:value="430.597137451172">
            <text:p>430.5971374512</text:p>
          </table:table-cell>
          <table:table-cell office:value-type="string">
            <text:p>7.185592E-05</text:p>
          </table:table-cell>
          <table:table-cell table:number-columns-repeated="4"/>
        </table:table-row>
        <table:table-row table:style-name="ro1">
          <table:table-cell office:value-type="float" office:value="430.710632324219">
            <text:p>430.7106323242</text:p>
          </table:table-cell>
          <table:table-cell office:value-type="float" office:value="-0.003116786">
            <text:p>-0.003116786</text:p>
          </table:table-cell>
          <table:table-cell table:number-columns-repeated="4"/>
        </table:table-row>
        <table:table-row table:style-name="ro1">
          <table:table-cell office:value-type="float" office:value="430.824127197266">
            <text:p>430.8241271973</text:p>
          </table:table-cell>
          <table:table-cell office:value-type="float" office:value="0.006249283">
            <text:p>0.006249283</text:p>
          </table:table-cell>
          <table:table-cell table:number-columns-repeated="4"/>
        </table:table-row>
        <table:table-row table:style-name="ro1">
          <table:table-cell office:value-type="float" office:value="430.937652587891">
            <text:p>430.9376525879</text:p>
          </table:table-cell>
          <table:table-cell office:value-type="float" office:value="-0.001422123">
            <text:p>-0.001422123</text:p>
          </table:table-cell>
          <table:table-cell table:number-columns-repeated="4"/>
        </table:table-row>
        <table:table-row table:style-name="ro1">
          <table:table-cell office:value-type="float" office:value="431.051147460938">
            <text:p>431.0511474609</text:p>
          </table:table-cell>
          <table:table-cell office:value-type="float" office:value="-0.003843797">
            <text:p>-0.003843797</text:p>
          </table:table-cell>
          <table:table-cell table:number-columns-repeated="4"/>
        </table:table-row>
        <table:table-row table:style-name="ro1">
          <table:table-cell office:value-type="float" office:value="431.164672851563">
            <text:p>431.1646728516</text:p>
          </table:table-cell>
          <table:table-cell office:value-type="float" office:value="-0.005771199">
            <text:p>-0.005771199</text:p>
          </table:table-cell>
          <table:table-cell table:number-columns-repeated="4"/>
        </table:table-row>
        <table:table-row table:style-name="ro1">
          <table:table-cell office:value-type="float" office:value="431.278198242188">
            <text:p>431.2781982422</text:p>
          </table:table-cell>
          <table:table-cell office:value-type="float" office:value="0.004141913">
            <text:p>0.004141913</text:p>
          </table:table-cell>
          <table:table-cell table:number-columns-repeated="4"/>
        </table:table-row>
        <table:table-row table:style-name="ro1">
          <table:table-cell office:value-type="float" office:value="431.391723632813">
            <text:p>431.3917236328</text:p>
          </table:table-cell>
          <table:table-cell office:value-type="float" office:value="-0.005095949">
            <text:p>-0.005095949</text:p>
          </table:table-cell>
          <table:table-cell table:number-columns-repeated="4"/>
        </table:table-row>
        <table:table-row table:style-name="ro1">
          <table:table-cell office:value-type="float" office:value="431.505249023438">
            <text:p>431.5052490234</text:p>
          </table:table-cell>
          <table:table-cell office:value-type="float" office:value="-0.002042573">
            <text:p>-0.002042573</text:p>
          </table:table-cell>
          <table:table-cell table:number-columns-repeated="4"/>
        </table:table-row>
        <table:table-row table:style-name="ro1">
          <table:table-cell office:value-type="float" office:value="431.618804931641">
            <text:p>431.6188049316</text:p>
          </table:table-cell>
          <table:table-cell office:value-type="float" office:value="-0.003041495">
            <text:p>-0.003041495</text:p>
          </table:table-cell>
          <table:table-cell table:number-columns-repeated="4"/>
        </table:table-row>
        <table:table-row table:style-name="ro1">
          <table:table-cell office:value-type="float" office:value="431.732330322266">
            <text:p>431.7323303223</text:p>
          </table:table-cell>
          <table:table-cell office:value-type="float" office:value="0.008457165">
            <text:p>0.008457165</text:p>
          </table:table-cell>
          <table:table-cell table:number-columns-repeated="4"/>
        </table:table-row>
        <table:table-row table:style-name="ro1">
          <table:table-cell office:value-type="float" office:value="431.845886230469">
            <text:p>431.8458862305</text:p>
          </table:table-cell>
          <table:table-cell office:value-type="float" office:value="0.01033142">
            <text:p>0.01033142</text:p>
          </table:table-cell>
          <table:table-cell table:number-columns-repeated="4"/>
        </table:table-row>
        <table:table-row table:style-name="ro1">
          <table:table-cell office:value-type="float" office:value="431.959442138672">
            <text:p>431.9594421387</text:p>
          </table:table-cell>
          <table:table-cell office:value-type="float" office:value="0.007021063">
            <text:p>0.007021063</text:p>
          </table:table-cell>
          <table:table-cell table:number-columns-repeated="4"/>
        </table:table-row>
        <table:table-row table:style-name="ro1">
          <table:table-cell office:value-type="float" office:value="432.072998046875">
            <text:p>432.0729980469</text:p>
          </table:table-cell>
          <table:table-cell office:value-type="float" office:value="0.01967669">
            <text:p>0.01967669</text:p>
          </table:table-cell>
          <table:table-cell table:number-columns-repeated="4"/>
        </table:table-row>
        <table:table-row table:style-name="ro1">
          <table:table-cell office:value-type="float" office:value="432.186553955078">
            <text:p>432.1865539551</text:p>
          </table:table-cell>
          <table:table-cell office:value-type="float" office:value="-0.006260596">
            <text:p>-0.006260596</text:p>
          </table:table-cell>
          <table:table-cell table:number-columns-repeated="4"/>
        </table:table-row>
        <table:table-row table:style-name="ro1">
          <table:table-cell office:value-type="float" office:value="432.300140380859">
            <text:p>432.3001403809</text:p>
          </table:table-cell>
          <table:table-cell office:value-type="float" office:value="-0.002633144">
            <text:p>-0.002633144</text:p>
          </table:table-cell>
          <table:table-cell table:number-columns-repeated="4"/>
        </table:table-row>
        <table:table-row table:style-name="ro1">
          <table:table-cell office:value-type="float" office:value="432.413696289063">
            <text:p>432.4136962891</text:p>
          </table:table-cell>
          <table:table-cell office:value-type="float" office:value="0.0002506219">
            <text:p>0.0002506219</text:p>
          </table:table-cell>
          <table:table-cell table:number-columns-repeated="4"/>
        </table:table-row>
        <table:table-row table:style-name="ro1">
          <table:table-cell office:value-type="float" office:value="432.527282714844">
            <text:p>432.5272827148</text:p>
          </table:table-cell>
          <table:table-cell office:value-type="float" office:value="0.004469314">
            <text:p>0.004469314</text:p>
          </table:table-cell>
          <table:table-cell table:number-columns-repeated="4"/>
        </table:table-row>
        <table:table-row table:style-name="ro1">
          <table:table-cell office:value-type="float" office:value="432.640869140625">
            <text:p>432.6408691406</text:p>
          </table:table-cell>
          <table:table-cell office:value-type="float" office:value="-0.004351395">
            <text:p>-0.004351395</text:p>
          </table:table-cell>
          <table:table-cell table:number-columns-repeated="4"/>
        </table:table-row>
        <table:table-row table:style-name="ro1">
          <table:table-cell office:value-type="float" office:value="432.754455566406">
            <text:p>432.7544555664</text:p>
          </table:table-cell>
          <table:table-cell office:value-type="float" office:value="0.01239326">
            <text:p>0.01239326</text:p>
          </table:table-cell>
          <table:table-cell table:number-columns-repeated="4"/>
        </table:table-row>
        <table:table-row table:style-name="ro1">
          <table:table-cell office:value-type="float" office:value="432.868041992188">
            <text:p>432.8680419922</text:p>
          </table:table-cell>
          <table:table-cell office:value-type="float" office:value="0.01772843">
            <text:p>0.01772843</text:p>
          </table:table-cell>
          <table:table-cell table:number-columns-repeated="4"/>
        </table:table-row>
        <table:table-row table:style-name="ro1">
          <table:table-cell office:value-type="float" office:value="432.981658935547">
            <text:p>432.9816589355</text:p>
          </table:table-cell>
          <table:table-cell office:value-type="float" office:value="0.00807489">
            <text:p>0.00807489</text:p>
          </table:table-cell>
          <table:table-cell table:number-columns-repeated="4"/>
        </table:table-row>
        <table:table-row table:style-name="ro1">
          <table:table-cell office:value-type="float" office:value="433.095245361328">
            <text:p>433.0952453613</text:p>
          </table:table-cell>
          <table:table-cell office:value-type="float" office:value="0.003161446">
            <text:p>0.003161446</text:p>
          </table:table-cell>
          <table:table-cell table:number-columns-repeated="4"/>
        </table:table-row>
        <table:table-row table:style-name="ro1">
          <table:table-cell office:value-type="float" office:value="433.208862304688">
            <text:p>433.2088623047</text:p>
          </table:table-cell>
          <table:table-cell office:value-type="float" office:value="0.003616423">
            <text:p>0.003616423</text:p>
          </table:table-cell>
          <table:table-cell table:number-columns-repeated="4"/>
        </table:table-row>
        <table:table-row table:style-name="ro1">
          <table:table-cell office:value-type="float" office:value="433.322479248047">
            <text:p>433.322479248</text:p>
          </table:table-cell>
          <table:table-cell office:value-type="float" office:value="-0.001443392">
            <text:p>-0.001443392</text:p>
          </table:table-cell>
          <table:table-cell table:number-columns-repeated="4"/>
        </table:table-row>
        <table:table-row table:style-name="ro1">
          <table:table-cell office:value-type="float" office:value="433.436096191406">
            <text:p>433.4360961914</text:p>
          </table:table-cell>
          <table:table-cell office:value-type="float" office:value="0.004643036">
            <text:p>0.004643036</text:p>
          </table:table-cell>
          <table:table-cell table:number-columns-repeated="4"/>
        </table:table-row>
        <table:table-row table:style-name="ro1">
          <table:table-cell office:value-type="float" office:value="433.549713134766">
            <text:p>433.5497131348</text:p>
          </table:table-cell>
          <table:table-cell office:value-type="float" office:value="-0.00297107">
            <text:p>-0.00297107</text:p>
          </table:table-cell>
          <table:table-cell table:number-columns-repeated="4"/>
        </table:table-row>
        <table:table-row table:style-name="ro1">
          <table:table-cell office:value-type="float" office:value="433.663330078125">
            <text:p>433.6633300781</text:p>
          </table:table-cell>
          <table:table-cell office:value-type="float" office:value="-0.004784667">
            <text:p>-0.004784667</text:p>
          </table:table-cell>
          <table:table-cell table:number-columns-repeated="4"/>
        </table:table-row>
        <table:table-row table:style-name="ro1">
          <table:table-cell office:value-type="float" office:value="433.776977539063">
            <text:p>433.7769775391</text:p>
          </table:table-cell>
          <table:table-cell office:value-type="float" office:value="-0.00537006">
            <text:p>-0.00537006</text:p>
          </table:table-cell>
          <table:table-cell table:number-columns-repeated="4"/>
        </table:table-row>
        <table:table-row table:style-name="ro1">
          <table:table-cell office:value-type="float" office:value="433.890625">
            <text:p>433.890625</text:p>
          </table:table-cell>
          <table:table-cell office:value-type="float" office:value="0.01476104">
            <text:p>0.01476104</text:p>
          </table:table-cell>
          <table:table-cell table:number-columns-repeated="4"/>
        </table:table-row>
        <table:table-row table:style-name="ro1">
          <table:table-cell office:value-type="float" office:value="434.004272460938">
            <text:p>434.0042724609</text:p>
          </table:table-cell>
          <table:table-cell office:value-type="float" office:value="-0.001648683">
            <text:p>-0.001648683</text:p>
          </table:table-cell>
          <table:table-cell table:number-columns-repeated="4"/>
        </table:table-row>
        <table:table-row table:style-name="ro1">
          <table:table-cell office:value-type="float" office:value="434.117919921875">
            <text:p>434.1179199219</text:p>
          </table:table-cell>
          <table:table-cell office:value-type="float" office:value="0.002683022">
            <text:p>0.002683022</text:p>
          </table:table-cell>
          <table:table-cell table:number-columns-repeated="4"/>
        </table:table-row>
        <table:table-row table:style-name="ro1">
          <table:table-cell office:value-type="float" office:value="434.231567382813">
            <text:p>434.2315673828</text:p>
          </table:table-cell>
          <table:table-cell office:value-type="float" office:value="-0.008248267">
            <text:p>-0.008248267</text:p>
          </table:table-cell>
          <table:table-cell table:number-columns-repeated="4"/>
        </table:table-row>
        <table:table-row table:style-name="ro1">
          <table:table-cell office:value-type="float" office:value="434.34521484375">
            <text:p>434.3452148438</text:p>
          </table:table-cell>
          <table:table-cell office:value-type="float" office:value="-0.006127032">
            <text:p>-0.006127032</text:p>
          </table:table-cell>
          <table:table-cell table:number-columns-repeated="4"/>
        </table:table-row>
        <table:table-row table:style-name="ro1">
          <table:table-cell office:value-type="float" office:value="434.458892822266">
            <text:p>434.4588928223</text:p>
          </table:table-cell>
          <table:table-cell office:value-type="float" office:value="0.02195816">
            <text:p>0.02195816</text:p>
          </table:table-cell>
          <table:table-cell table:number-columns-repeated="4"/>
        </table:table-row>
        <table:table-row table:style-name="ro1">
          <table:table-cell office:value-type="float" office:value="434.572570800781">
            <text:p>434.5725708008</text:p>
          </table:table-cell>
          <table:table-cell office:value-type="float" office:value="-0.004079598">
            <text:p>-0.004079598</text:p>
          </table:table-cell>
          <table:table-cell table:number-columns-repeated="4"/>
        </table:table-row>
        <table:table-row table:style-name="ro1">
          <table:table-cell office:value-type="float" office:value="434.686248779297">
            <text:p>434.6862487793</text:p>
          </table:table-cell>
          <table:table-cell office:value-type="float" office:value="-0.00267013">
            <text:p>-0.00267013</text:p>
          </table:table-cell>
          <table:table-cell table:number-columns-repeated="4"/>
        </table:table-row>
        <table:table-row table:style-name="ro1">
          <table:table-cell office:value-type="float" office:value="434.799926757813">
            <text:p>434.7999267578</text:p>
          </table:table-cell>
          <table:table-cell office:value-type="float" office:value="-0.003514898">
            <text:p>-0.003514898</text:p>
          </table:table-cell>
          <table:table-cell table:number-columns-repeated="4"/>
        </table:table-row>
        <table:table-row table:style-name="ro1">
          <table:table-cell office:value-type="float" office:value="434.913604736328">
            <text:p>434.9136047363</text:p>
          </table:table-cell>
          <table:table-cell office:value-type="float" office:value="0.002712782">
            <text:p>0.002712782</text:p>
          </table:table-cell>
          <table:table-cell table:number-columns-repeated="4"/>
        </table:table-row>
        <table:table-row table:style-name="ro1">
          <table:table-cell office:value-type="float" office:value="435.027282714844">
            <text:p>435.0272827148</text:p>
          </table:table-cell>
          <table:table-cell office:value-type="float" office:value="-0.002330412">
            <text:p>-0.002330412</text:p>
          </table:table-cell>
          <table:table-cell table:number-columns-repeated="4"/>
        </table:table-row>
        <table:table-row table:style-name="ro1">
          <table:table-cell office:value-type="float" office:value="435.140991210938">
            <text:p>435.1409912109</text:p>
          </table:table-cell>
          <table:table-cell office:value-type="float" office:value="-0.001644226">
            <text:p>-0.001644226</text:p>
          </table:table-cell>
          <table:table-cell table:number-columns-repeated="4"/>
        </table:table-row>
        <table:table-row table:style-name="ro1">
          <table:table-cell office:value-type="float" office:value="435.254669189453">
            <text:p>435.2546691895</text:p>
          </table:table-cell>
          <table:table-cell office:value-type="float" office:value="0.006363191">
            <text:p>0.006363191</text:p>
          </table:table-cell>
          <table:table-cell table:number-columns-repeated="4"/>
        </table:table-row>
        <table:table-row table:style-name="ro1">
          <table:table-cell office:value-type="float" office:value="435.368377685547">
            <text:p>435.3683776855</text:p>
          </table:table-cell>
          <table:table-cell office:value-type="float" office:value="-0.008023026">
            <text:p>-0.008023026</text:p>
          </table:table-cell>
          <table:table-cell table:number-columns-repeated="4"/>
        </table:table-row>
        <table:table-row table:style-name="ro1">
          <table:table-cell office:value-type="float" office:value="435.482086181641">
            <text:p>435.4820861816</text:p>
          </table:table-cell>
          <table:table-cell office:value-type="float" office:value="-0.00819084">
            <text:p>-0.00819084</text:p>
          </table:table-cell>
          <table:table-cell table:number-columns-repeated="4"/>
        </table:table-row>
        <table:table-row table:style-name="ro1">
          <table:table-cell office:value-type="float" office:value="435.595825195313">
            <text:p>435.5958251953</text:p>
          </table:table-cell>
          <table:table-cell office:value-type="float" office:value="-0.004887749">
            <text:p>-0.004887749</text:p>
          </table:table-cell>
          <table:table-cell table:number-columns-repeated="4"/>
        </table:table-row>
        <table:table-row table:style-name="ro1">
          <table:table-cell office:value-type="float" office:value="435.709533691406">
            <text:p>435.7095336914</text:p>
          </table:table-cell>
          <table:table-cell office:value-type="float" office:value="0.01228636">
            <text:p>0.01228636</text:p>
          </table:table-cell>
          <table:table-cell table:number-columns-repeated="4"/>
        </table:table-row>
        <table:table-row table:style-name="ro1">
          <table:table-cell office:value-type="float" office:value="435.823272705078">
            <text:p>435.8232727051</text:p>
          </table:table-cell>
          <table:table-cell office:value-type="float" office:value="0.002679841">
            <text:p>0.002679841</text:p>
          </table:table-cell>
          <table:table-cell table:number-columns-repeated="4"/>
        </table:table-row>
        <table:table-row table:style-name="ro1">
          <table:table-cell office:value-type="float" office:value="435.936981201172">
            <text:p>435.9369812012</text:p>
          </table:table-cell>
          <table:table-cell office:value-type="float" office:value="-0.009767308">
            <text:p>-0.009767308</text:p>
          </table:table-cell>
          <table:table-cell table:number-columns-repeated="4"/>
        </table:table-row>
        <table:table-row table:style-name="ro1">
          <table:table-cell office:value-type="float" office:value="436.050720214844">
            <text:p>436.0507202148</text:p>
          </table:table-cell>
          <table:table-cell office:value-type="float" office:value="0.003059708">
            <text:p>0.003059708</text:p>
          </table:table-cell>
          <table:table-cell table:number-columns-repeated="4"/>
        </table:table-row>
        <table:table-row table:style-name="ro1">
          <table:table-cell office:value-type="float" office:value="436.164459228516">
            <text:p>436.1644592285</text:p>
          </table:table-cell>
          <table:table-cell office:value-type="float" office:value="-0.002727986">
            <text:p>-0.002727986</text:p>
          </table:table-cell>
          <table:table-cell table:number-columns-repeated="4"/>
        </table:table-row>
        <table:table-row table:style-name="ro1">
          <table:table-cell office:value-type="float" office:value="436.278198242188">
            <text:p>436.2781982422</text:p>
          </table:table-cell>
          <table:table-cell office:value-type="float" office:value="0.02625166">
            <text:p>0.02625166</text:p>
          </table:table-cell>
          <table:table-cell table:number-columns-repeated="4"/>
        </table:table-row>
        <table:table-row table:style-name="ro1">
          <table:table-cell office:value-type="float" office:value="436.391967773438">
            <text:p>436.3919677734</text:p>
          </table:table-cell>
          <table:table-cell office:value-type="float" office:value="-0.0007228992">
            <text:p>-0.0007228992</text:p>
          </table:table-cell>
          <table:table-cell table:number-columns-repeated="4"/>
        </table:table-row>
        <table:table-row table:style-name="ro1">
          <table:table-cell office:value-type="float" office:value="436.505706787109">
            <text:p>436.5057067871</text:p>
          </table:table-cell>
          <table:table-cell office:value-type="float" office:value="-0.001716455">
            <text:p>-0.001716455</text:p>
          </table:table-cell>
          <table:table-cell table:number-columns-repeated="4"/>
        </table:table-row>
        <table:table-row table:style-name="ro1">
          <table:table-cell office:value-type="float" office:value="436.619476318359">
            <text:p>436.6194763184</text:p>
          </table:table-cell>
          <table:table-cell office:value-type="float" office:value="0.004709457">
            <text:p>0.004709457</text:p>
          </table:table-cell>
          <table:table-cell table:number-columns-repeated="4"/>
        </table:table-row>
        <table:table-row table:style-name="ro1">
          <table:table-cell office:value-type="float" office:value="436.733245849609">
            <text:p>436.7332458496</text:p>
          </table:table-cell>
          <table:table-cell office:value-type="float" office:value="0.002744865">
            <text:p>0.002744865</text:p>
          </table:table-cell>
          <table:table-cell table:number-columns-repeated="4"/>
        </table:table-row>
        <table:table-row table:style-name="ro1">
          <table:table-cell office:value-type="float" office:value="436.847015380859">
            <text:p>436.8470153809</text:p>
          </table:table-cell>
          <table:table-cell office:value-type="float" office:value="-0.009681031">
            <text:p>-0.009681031</text:p>
          </table:table-cell>
          <table:table-cell table:number-columns-repeated="4"/>
        </table:table-row>
        <table:table-row table:style-name="ro1">
          <table:table-cell office:value-type="float" office:value="436.960784912109">
            <text:p>436.9607849121</text:p>
          </table:table-cell>
          <table:table-cell office:value-type="float" office:value="0.005431454">
            <text:p>0.005431454</text:p>
          </table:table-cell>
          <table:table-cell table:number-columns-repeated="4"/>
        </table:table-row>
        <table:table-row table:style-name="ro1">
          <table:table-cell office:value-type="float" office:value="437.074554443359">
            <text:p>437.0745544434</text:p>
          </table:table-cell>
          <table:table-cell office:value-type="float" office:value="0.003040711">
            <text:p>0.003040711</text:p>
          </table:table-cell>
          <table:table-cell table:number-columns-repeated="4"/>
        </table:table-row>
        <table:table-row table:style-name="ro1">
          <table:table-cell office:value-type="float" office:value="437.188354492188">
            <text:p>437.1883544922</text:p>
          </table:table-cell>
          <table:table-cell office:value-type="float" office:value="-0.0008208938">
            <text:p>-0.0008208938</text:p>
          </table:table-cell>
          <table:table-cell table:number-columns-repeated="4"/>
        </table:table-row>
        <table:table-row table:style-name="ro1">
          <table:table-cell office:value-type="float" office:value="437.302154541016">
            <text:p>437.302154541</text:p>
          </table:table-cell>
          <table:table-cell office:value-type="float" office:value="0.003272811">
            <text:p>0.003272811</text:p>
          </table:table-cell>
          <table:table-cell table:number-columns-repeated="4"/>
        </table:table-row>
        <table:table-row table:style-name="ro1">
          <table:table-cell office:value-type="float" office:value="437.415924072266">
            <text:p>437.4159240723</text:p>
          </table:table-cell>
          <table:table-cell office:value-type="float" office:value="0.003895759">
            <text:p>0.003895759</text:p>
          </table:table-cell>
          <table:table-cell table:number-columns-repeated="4"/>
        </table:table-row>
        <table:table-row table:style-name="ro1">
          <table:table-cell office:value-type="float" office:value="437.529724121094">
            <text:p>437.5297241211</text:p>
          </table:table-cell>
          <table:table-cell office:value-type="string">
            <text:p>-6.846954E-05</text:p>
          </table:table-cell>
          <table:table-cell table:number-columns-repeated="4"/>
        </table:table-row>
        <table:table-row table:style-name="ro1">
          <table:table-cell office:value-type="float" office:value="437.6435546875">
            <text:p>437.6435546875</text:p>
          </table:table-cell>
          <table:table-cell office:value-type="float" office:value="-0.0006688982">
            <text:p>-0.0006688982</text:p>
          </table:table-cell>
          <table:table-cell table:number-columns-repeated="4"/>
        </table:table-row>
        <table:table-row table:style-name="ro1">
          <table:table-cell office:value-type="float" office:value="437.757354736328">
            <text:p>437.7573547363</text:p>
          </table:table-cell>
          <table:table-cell office:value-type="float" office:value="0.004219047">
            <text:p>0.004219047</text:p>
          </table:table-cell>
          <table:table-cell table:number-columns-repeated="4"/>
        </table:table-row>
        <table:table-row table:style-name="ro1">
          <table:table-cell office:value-type="float" office:value="437.871154785156">
            <text:p>437.8711547852</text:p>
          </table:table-cell>
          <table:table-cell office:value-type="float" office:value="-0.003906944">
            <text:p>-0.003906944</text:p>
          </table:table-cell>
          <table:table-cell table:number-columns-repeated="4"/>
        </table:table-row>
        <table:table-row table:style-name="ro1">
          <table:table-cell office:value-type="float" office:value="437.984985351563">
            <text:p>437.9849853516</text:p>
          </table:table-cell>
          <table:table-cell office:value-type="float" office:value="0.01489087">
            <text:p>0.01489087</text:p>
          </table:table-cell>
          <table:table-cell table:number-columns-repeated="4"/>
        </table:table-row>
        <table:table-row table:style-name="ro1">
          <table:table-cell office:value-type="float" office:value="438.098815917969">
            <text:p>438.098815918</text:p>
          </table:table-cell>
          <table:table-cell office:value-type="float" office:value="0.004294663">
            <text:p>0.004294663</text:p>
          </table:table-cell>
          <table:table-cell table:number-columns-repeated="4"/>
        </table:table-row>
        <table:table-row table:style-name="ro1">
          <table:table-cell office:value-type="float" office:value="438.212646484375">
            <text:p>438.2126464844</text:p>
          </table:table-cell>
          <table:table-cell office:value-type="float" office:value="-0.007044431">
            <text:p>-0.007044431</text:p>
          </table:table-cell>
          <table:table-cell table:number-columns-repeated="4"/>
        </table:table-row>
        <table:table-row table:style-name="ro1">
          <table:table-cell office:value-type="float" office:value="438.326477050781">
            <text:p>438.3264770508</text:p>
          </table:table-cell>
          <table:table-cell office:value-type="float" office:value="-0.01051952">
            <text:p>-0.01051952</text:p>
          </table:table-cell>
          <table:table-cell table:number-columns-repeated="4"/>
        </table:table-row>
        <table:table-row table:style-name="ro1">
          <table:table-cell office:value-type="float" office:value="438.440307617188">
            <text:p>438.4403076172</text:p>
          </table:table-cell>
          <table:table-cell office:value-type="float" office:value="-0.001157335">
            <text:p>-0.001157335</text:p>
          </table:table-cell>
          <table:table-cell table:number-columns-repeated="4"/>
        </table:table-row>
        <table:table-row table:style-name="ro1">
          <table:table-cell office:value-type="float" office:value="438.554168701172">
            <text:p>438.5541687012</text:p>
          </table:table-cell>
          <table:table-cell office:value-type="float" office:value="0.007115511">
            <text:p>0.007115511</text:p>
          </table:table-cell>
          <table:table-cell table:number-columns-repeated="4"/>
        </table:table-row>
        <table:table-row table:style-name="ro1">
          <table:table-cell office:value-type="float" office:value="438.667999267578">
            <text:p>438.6679992676</text:p>
          </table:table-cell>
          <table:table-cell office:value-type="float" office:value="-0.008852866">
            <text:p>-0.008852866</text:p>
          </table:table-cell>
          <table:table-cell table:number-columns-repeated="4"/>
        </table:table-row>
        <table:table-row table:style-name="ro1">
          <table:table-cell office:value-type="float" office:value="438.781860351563">
            <text:p>438.7818603516</text:p>
          </table:table-cell>
          <table:table-cell office:value-type="float" office:value="-0.01225667">
            <text:p>-0.01225667</text:p>
          </table:table-cell>
          <table:table-cell table:number-columns-repeated="4"/>
        </table:table-row>
        <table:table-row table:style-name="ro1">
          <table:table-cell office:value-type="float" office:value="438.895721435547">
            <text:p>438.8957214355</text:p>
          </table:table-cell>
          <table:table-cell office:value-type="float" office:value="-0.003069658">
            <text:p>-0.003069658</text:p>
          </table:table-cell>
          <table:table-cell table:number-columns-repeated="4"/>
        </table:table-row>
        <table:table-row table:style-name="ro1">
          <table:table-cell office:value-type="float" office:value="439.009582519531">
            <text:p>439.0095825195</text:p>
          </table:table-cell>
          <table:table-cell office:value-type="float" office:value="0.002782297">
            <text:p>0.002782297</text:p>
          </table:table-cell>
          <table:table-cell table:number-columns-repeated="4"/>
        </table:table-row>
        <table:table-row table:style-name="ro1">
          <table:table-cell office:value-type="float" office:value="439.123474121094">
            <text:p>439.1234741211</text:p>
          </table:table-cell>
          <table:table-cell office:value-type="float" office:value="-0.009272358">
            <text:p>-0.009272358</text:p>
          </table:table-cell>
          <table:table-cell table:number-columns-repeated="4"/>
        </table:table-row>
        <table:table-row table:style-name="ro1">
          <table:table-cell office:value-type="float" office:value="439.237335205078">
            <text:p>439.2373352051</text:p>
          </table:table-cell>
          <table:table-cell office:value-type="float" office:value="-0.007511495">
            <text:p>-0.007511495</text:p>
          </table:table-cell>
          <table:table-cell table:number-columns-repeated="4"/>
        </table:table-row>
        <table:table-row table:style-name="ro1">
          <table:table-cell office:value-type="float" office:value="439.351226806641">
            <text:p>439.3512268066</text:p>
          </table:table-cell>
          <table:table-cell office:value-type="float" office:value="0.00381881">
            <text:p>0.00381881</text:p>
          </table:table-cell>
          <table:table-cell table:number-columns-repeated="4"/>
        </table:table-row>
        <table:table-row table:style-name="ro1">
          <table:table-cell office:value-type="float" office:value="439.465087890625">
            <text:p>439.4650878906</text:p>
          </table:table-cell>
          <table:table-cell office:value-type="float" office:value="0.02121494">
            <text:p>0.02121494</text:p>
          </table:table-cell>
          <table:table-cell table:number-columns-repeated="4"/>
        </table:table-row>
        <table:table-row table:style-name="ro1">
          <table:table-cell office:value-type="float" office:value="439.578979492188">
            <text:p>439.5789794922</text:p>
          </table:table-cell>
          <table:table-cell office:value-type="float" office:value="-0.005043818">
            <text:p>-0.005043818</text:p>
          </table:table-cell>
          <table:table-cell table:number-columns-repeated="4"/>
        </table:table-row>
        <table:table-row table:style-name="ro1">
          <table:table-cell office:value-type="float" office:value="439.69287109375">
            <text:p>439.6928710938</text:p>
          </table:table-cell>
          <table:table-cell office:value-type="float" office:value="-0.009194559">
            <text:p>-0.009194559</text:p>
          </table:table-cell>
          <table:table-cell table:number-columns-repeated="4"/>
        </table:table-row>
        <table:table-row table:style-name="ro1">
          <table:table-cell office:value-type="float" office:value="439.806793212891">
            <text:p>439.8067932129</text:p>
          </table:table-cell>
          <table:table-cell office:value-type="float" office:value="-0.006985533">
            <text:p>-0.006985533</text:p>
          </table:table-cell>
          <table:table-cell table:number-columns-repeated="4"/>
        </table:table-row>
        <table:table-row table:style-name="ro1">
          <table:table-cell office:value-type="float" office:value="439.920684814453">
            <text:p>439.9206848145</text:p>
          </table:table-cell>
          <table:table-cell office:value-type="float" office:value="0.05979371">
            <text:p>0.05979371</text:p>
          </table:table-cell>
          <table:table-cell table:number-columns-repeated="4"/>
        </table:table-row>
        <table:table-row table:style-name="ro1">
          <table:table-cell office:value-type="float" office:value="440.034606933594">
            <text:p>440.0346069336</text:p>
          </table:table-cell>
          <table:table-cell office:value-type="float" office:value="-0.0008705214">
            <text:p>-0.0008705214</text:p>
          </table:table-cell>
          <table:table-cell table:number-columns-repeated="4"/>
        </table:table-row>
        <table:table-row table:style-name="ro1">
          <table:table-cell office:value-type="float" office:value="440.148498535156">
            <text:p>440.1484985352</text:p>
          </table:table-cell>
          <table:table-cell office:value-type="float" office:value="-0.003386632">
            <text:p>-0.003386632</text:p>
          </table:table-cell>
          <table:table-cell table:number-columns-repeated="4"/>
        </table:table-row>
        <table:table-row table:style-name="ro1">
          <table:table-cell office:value-type="float" office:value="440.262420654297">
            <text:p>440.2624206543</text:p>
          </table:table-cell>
          <table:table-cell office:value-type="float" office:value="0.00707591">
            <text:p>0.00707591</text:p>
          </table:table-cell>
          <table:table-cell table:number-columns-repeated="4"/>
        </table:table-row>
        <table:table-row table:style-name="ro1">
          <table:table-cell office:value-type="float" office:value="440.376342773438">
            <text:p>440.3763427734</text:p>
          </table:table-cell>
          <table:table-cell office:value-type="float" office:value="0.03197754">
            <text:p>0.03197754</text:p>
          </table:table-cell>
          <table:table-cell table:number-columns-repeated="4"/>
        </table:table-row>
        <table:table-row table:style-name="ro1">
          <table:table-cell office:value-type="float" office:value="440.490295410156">
            <text:p>440.4902954102</text:p>
          </table:table-cell>
          <table:table-cell office:value-type="float" office:value="-0.0009471286">
            <text:p>-0.0009471286</text:p>
          </table:table-cell>
          <table:table-cell table:number-columns-repeated="4"/>
        </table:table-row>
        <table:table-row table:style-name="ro1">
          <table:table-cell office:value-type="float" office:value="440.604217529297">
            <text:p>440.6042175293</text:p>
          </table:table-cell>
          <table:table-cell office:value-type="float" office:value="-0.01683324">
            <text:p>-0.01683324</text:p>
          </table:table-cell>
          <table:table-cell table:number-columns-repeated="4"/>
        </table:table-row>
        <table:table-row table:style-name="ro1">
          <table:table-cell office:value-type="float" office:value="440.718170166016">
            <text:p>440.718170166</text:p>
          </table:table-cell>
          <table:table-cell office:value-type="float" office:value="0.02064874">
            <text:p>0.02064874</text:p>
          </table:table-cell>
          <table:table-cell table:number-columns-repeated="4"/>
        </table:table-row>
        <table:table-row table:style-name="ro1">
          <table:table-cell office:value-type="float" office:value="440.832092285156">
            <text:p>440.8320922852</text:p>
          </table:table-cell>
          <table:table-cell office:value-type="float" office:value="0.01074459">
            <text:p>0.01074459</text:p>
          </table:table-cell>
          <table:table-cell table:number-columns-repeated="4"/>
        </table:table-row>
        <table:table-row table:style-name="ro1">
          <table:table-cell office:value-type="float" office:value="440.946044921875">
            <text:p>440.9460449219</text:p>
          </table:table-cell>
          <table:table-cell office:value-type="float" office:value="-0.002608904">
            <text:p>-0.002608904</text:p>
          </table:table-cell>
          <table:table-cell table:number-columns-repeated="4"/>
        </table:table-row>
        <table:table-row table:style-name="ro1">
          <table:table-cell office:value-type="float" office:value="441.059997558594">
            <text:p>441.0599975586</text:p>
          </table:table-cell>
          <table:table-cell office:value-type="float" office:value="-0.002348454">
            <text:p>-0.002348454</text:p>
          </table:table-cell>
          <table:table-cell table:number-columns-repeated="4"/>
        </table:table-row>
        <table:table-row table:style-name="ro1">
          <table:table-cell office:value-type="float" office:value="441.173950195313">
            <text:p>441.1739501953</text:p>
          </table:table-cell>
          <table:table-cell office:value-type="float" office:value="0.005385718">
            <text:p>0.005385718</text:p>
          </table:table-cell>
          <table:table-cell table:number-columns-repeated="4"/>
        </table:table-row>
        <table:table-row table:style-name="ro1">
          <table:table-cell office:value-type="float" office:value="441.287933349609">
            <text:p>441.2879333496</text:p>
          </table:table-cell>
          <table:table-cell office:value-type="string">
            <text:p>-4.265111E-05</text:p>
          </table:table-cell>
          <table:table-cell table:number-columns-repeated="4"/>
        </table:table-row>
        <table:table-row table:style-name="ro1">
          <table:table-cell office:value-type="float" office:value="441.401885986328">
            <text:p>441.4018859863</text:p>
          </table:table-cell>
          <table:table-cell office:value-type="float" office:value="0.0006423462">
            <text:p>0.0006423462</text:p>
          </table:table-cell>
          <table:table-cell table:number-columns-repeated="4"/>
        </table:table-row>
        <table:table-row table:style-name="ro1">
          <table:table-cell office:value-type="float" office:value="441.515869140625">
            <text:p>441.5158691406</text:p>
          </table:table-cell>
          <table:table-cell office:value-type="float" office:value="0.01586471">
            <text:p>0.01586471</text:p>
          </table:table-cell>
          <table:table-cell table:number-columns-repeated="4"/>
        </table:table-row>
        <table:table-row table:style-name="ro1">
          <table:table-cell office:value-type="float" office:value="441.629852294922">
            <text:p>441.6298522949</text:p>
          </table:table-cell>
          <table:table-cell office:value-type="float" office:value="0.00182429">
            <text:p>0.00182429</text:p>
          </table:table-cell>
          <table:table-cell table:number-columns-repeated="4"/>
        </table:table-row>
        <table:table-row table:style-name="ro1">
          <table:table-cell office:value-type="float" office:value="441.743835449219">
            <text:p>441.7438354492</text:p>
          </table:table-cell>
          <table:table-cell office:value-type="float" office:value="0.006514091">
            <text:p>0.006514091</text:p>
          </table:table-cell>
          <table:table-cell table:number-columns-repeated="4"/>
        </table:table-row>
        <table:table-row table:style-name="ro1">
          <table:table-cell office:value-type="float" office:value="441.857818603516">
            <text:p>441.8578186035</text:p>
          </table:table-cell>
          <table:table-cell office:value-type="float" office:value="-0.01115356">
            <text:p>-0.01115356</text:p>
          </table:table-cell>
          <table:table-cell table:number-columns-repeated="4"/>
        </table:table-row>
        <table:table-row table:style-name="ro1">
          <table:table-cell office:value-type="float" office:value="441.971801757813">
            <text:p>441.9718017578</text:p>
          </table:table-cell>
          <table:table-cell office:value-type="float" office:value="0.00179298">
            <text:p>0.00179298</text:p>
          </table:table-cell>
          <table:table-cell table:number-columns-repeated="4"/>
        </table:table-row>
        <table:table-row table:style-name="ro1">
          <table:table-cell office:value-type="float" office:value="442.085815429688">
            <text:p>442.0858154297</text:p>
          </table:table-cell>
          <table:table-cell office:value-type="float" office:value="0.008877264">
            <text:p>0.008877264</text:p>
          </table:table-cell>
          <table:table-cell table:number-columns-repeated="4"/>
        </table:table-row>
        <table:table-row table:style-name="ro1">
          <table:table-cell office:value-type="float" office:value="442.199829101563">
            <text:p>442.1998291016</text:p>
          </table:table-cell>
          <table:table-cell office:value-type="float" office:value="-0.005338493">
            <text:p>-0.005338493</text:p>
          </table:table-cell>
          <table:table-cell table:number-columns-repeated="4"/>
        </table:table-row>
        <table:table-row table:style-name="ro1">
          <table:table-cell office:value-type="float" office:value="442.313812255859">
            <text:p>442.3138122559</text:p>
          </table:table-cell>
          <table:table-cell office:value-type="float" office:value="-0.0003389123">
            <text:p>-0.0003389123</text:p>
          </table:table-cell>
          <table:table-cell table:number-columns-repeated="4"/>
        </table:table-row>
        <table:table-row table:style-name="ro1">
          <table:table-cell office:value-type="float" office:value="442.427825927734">
            <text:p>442.4278259277</text:p>
          </table:table-cell>
          <table:table-cell office:value-type="float" office:value="0.02015454">
            <text:p>0.02015454</text:p>
          </table:table-cell>
          <table:table-cell table:number-columns-repeated="4"/>
        </table:table-row>
        <table:table-row table:style-name="ro1">
          <table:table-cell office:value-type="float" office:value="442.541839599609">
            <text:p>442.5418395996</text:p>
          </table:table-cell>
          <table:table-cell office:value-type="float" office:value="0.001588914">
            <text:p>0.001588914</text:p>
          </table:table-cell>
          <table:table-cell table:number-columns-repeated="4"/>
        </table:table-row>
        <table:table-row table:style-name="ro1">
          <table:table-cell office:value-type="float" office:value="442.655883789063">
            <text:p>442.6558837891</text:p>
          </table:table-cell>
          <table:table-cell office:value-type="float" office:value="-0.002702881">
            <text:p>-0.002702881</text:p>
          </table:table-cell>
          <table:table-cell table:number-columns-repeated="4"/>
        </table:table-row>
        <table:table-row table:style-name="ro1">
          <table:table-cell office:value-type="float" office:value="442.769897460938">
            <text:p>442.7698974609</text:p>
          </table:table-cell>
          <table:table-cell office:value-type="float" office:value="-0.0005448221">
            <text:p>-0.0005448221</text:p>
          </table:table-cell>
          <table:table-cell table:number-columns-repeated="4"/>
        </table:table-row>
        <table:table-row table:style-name="ro1">
          <table:table-cell office:value-type="float" office:value="442.883941650391">
            <text:p>442.8839416504</text:p>
          </table:table-cell>
          <table:table-cell office:value-type="float" office:value="-0.003303847">
            <text:p>-0.003303847</text:p>
          </table:table-cell>
          <table:table-cell table:number-columns-repeated="4"/>
        </table:table-row>
        <table:table-row table:style-name="ro1">
          <table:table-cell office:value-type="float" office:value="442.997985839844">
            <text:p>442.9979858398</text:p>
          </table:table-cell>
          <table:table-cell office:value-type="float" office:value="0.00795102">
            <text:p>0.00795102</text:p>
          </table:table-cell>
          <table:table-cell table:number-columns-repeated="4"/>
        </table:table-row>
        <table:table-row table:style-name="ro1">
          <table:table-cell office:value-type="float" office:value="443.112030029297">
            <text:p>443.1120300293</text:p>
          </table:table-cell>
          <table:table-cell office:value-type="float" office:value="0.0035035">
            <text:p>0.0035035</text:p>
          </table:table-cell>
          <table:table-cell table:number-columns-repeated="4"/>
        </table:table-row>
        <table:table-row table:style-name="ro1">
          <table:table-cell office:value-type="float" office:value="443.22607421875">
            <text:p>443.2260742188</text:p>
          </table:table-cell>
          <table:table-cell office:value-type="float" office:value="-0.005208674">
            <text:p>-0.005208674</text:p>
          </table:table-cell>
          <table:table-cell table:number-columns-repeated="4"/>
        </table:table-row>
        <table:table-row table:style-name="ro1">
          <table:table-cell office:value-type="float" office:value="443.340118408203">
            <text:p>443.3401184082</text:p>
          </table:table-cell>
          <table:table-cell office:value-type="float" office:value="-0.0002714571">
            <text:p>-0.0002714571</text:p>
          </table:table-cell>
          <table:table-cell table:number-columns-repeated="4"/>
        </table:table-row>
        <table:table-row table:style-name="ro1">
          <table:table-cell office:value-type="float" office:value="443.454162597656">
            <text:p>443.4541625977</text:p>
          </table:table-cell>
          <table:table-cell office:value-type="float" office:value="0.003460696">
            <text:p>0.003460696</text:p>
          </table:table-cell>
          <table:table-cell table:number-columns-repeated="4"/>
        </table:table-row>
        <table:table-row table:style-name="ro1">
          <table:table-cell office:value-type="float" office:value="443.568237304688">
            <text:p>443.5682373047</text:p>
          </table:table-cell>
          <table:table-cell office:value-type="float" office:value="-0.00564506">
            <text:p>-0.00564506</text:p>
          </table:table-cell>
          <table:table-cell table:number-columns-repeated="4"/>
        </table:table-row>
        <table:table-row table:style-name="ro1">
          <table:table-cell office:value-type="float" office:value="443.682312011719">
            <text:p>443.6823120117</text:p>
          </table:table-cell>
          <table:table-cell office:value-type="float" office:value="-0.009630001">
            <text:p>-0.009630001</text:p>
          </table:table-cell>
          <table:table-cell table:number-columns-repeated="4"/>
        </table:table-row>
        <table:table-row table:style-name="ro1">
          <table:table-cell office:value-type="float" office:value="443.79638671875">
            <text:p>443.7963867188</text:p>
          </table:table-cell>
          <table:table-cell office:value-type="float" office:value="0.002228089">
            <text:p>0.002228089</text:p>
          </table:table-cell>
          <table:table-cell table:number-columns-repeated="4"/>
        </table:table-row>
        <table:table-row table:style-name="ro1">
          <table:table-cell office:value-type="float" office:value="443.910461425781">
            <text:p>443.9104614258</text:p>
          </table:table-cell>
          <table:table-cell office:value-type="float" office:value="-0.0036938">
            <text:p>-0.0036938</text:p>
          </table:table-cell>
          <table:table-cell table:number-columns-repeated="4"/>
        </table:table-row>
        <table:table-row table:style-name="ro1">
          <table:table-cell office:value-type="float" office:value="444.024536132813">
            <text:p>444.0245361328</text:p>
          </table:table-cell>
          <table:table-cell office:value-type="float" office:value="0.004397541">
            <text:p>0.004397541</text:p>
          </table:table-cell>
          <table:table-cell table:number-columns-repeated="4"/>
        </table:table-row>
        <table:table-row table:style-name="ro1">
          <table:table-cell office:value-type="float" office:value="444.138610839844">
            <text:p>444.1386108398</text:p>
          </table:table-cell>
          <table:table-cell office:value-type="float" office:value="0.02563432">
            <text:p>0.02563432</text:p>
          </table:table-cell>
          <table:table-cell table:number-columns-repeated="4"/>
        </table:table-row>
        <table:table-row table:style-name="ro1">
          <table:table-cell office:value-type="float" office:value="444.252716064453">
            <text:p>444.2527160645</text:p>
          </table:table-cell>
          <table:table-cell office:value-type="float" office:value="-0.004526269">
            <text:p>-0.004526269</text:p>
          </table:table-cell>
          <table:table-cell table:number-columns-repeated="4"/>
        </table:table-row>
        <table:table-row table:style-name="ro1">
          <table:table-cell office:value-type="float" office:value="444.366821289063">
            <text:p>444.3668212891</text:p>
          </table:table-cell>
          <table:table-cell office:value-type="float" office:value="-0.0001671418">
            <text:p>-0.0001671418</text:p>
          </table:table-cell>
          <table:table-cell table:number-columns-repeated="4"/>
        </table:table-row>
        <table:table-row table:style-name="ro1">
          <table:table-cell office:value-type="float" office:value="444.480895996094">
            <text:p>444.4808959961</text:p>
          </table:table-cell>
          <table:table-cell office:value-type="float" office:value="0.001131944">
            <text:p>0.001131944</text:p>
          </table:table-cell>
          <table:table-cell table:number-columns-repeated="4"/>
        </table:table-row>
        <table:table-row table:style-name="ro1">
          <table:table-cell office:value-type="float" office:value="444.595001220703">
            <text:p>444.5950012207</text:p>
          </table:table-cell>
          <table:table-cell office:value-type="float" office:value="-0.004605077">
            <text:p>-0.004605077</text:p>
          </table:table-cell>
          <table:table-cell table:number-columns-repeated="4"/>
        </table:table-row>
        <table:table-row table:style-name="ro1">
          <table:table-cell office:value-type="float" office:value="444.709136962891">
            <text:p>444.7091369629</text:p>
          </table:table-cell>
          <table:table-cell office:value-type="float" office:value="-0.003244645">
            <text:p>-0.003244645</text:p>
          </table:table-cell>
          <table:table-cell table:number-columns-repeated="4"/>
        </table:table-row>
        <table:table-row table:style-name="ro1">
          <table:table-cell office:value-type="float" office:value="444.8232421875">
            <text:p>444.8232421875</text:p>
          </table:table-cell>
          <table:table-cell office:value-type="float" office:value="0.003981415">
            <text:p>0.003981415</text:p>
          </table:table-cell>
          <table:table-cell table:number-columns-repeated="4"/>
        </table:table-row>
        <table:table-row table:style-name="ro1">
          <table:table-cell office:value-type="float" office:value="444.937347412109">
            <text:p>444.9373474121</text:p>
          </table:table-cell>
          <table:table-cell office:value-type="float" office:value="0.006735835">
            <text:p>0.006735835</text:p>
          </table:table-cell>
          <table:table-cell table:number-columns-repeated="4"/>
        </table:table-row>
        <table:table-row table:style-name="ro1">
          <table:table-cell office:value-type="float" office:value="445.051483154297">
            <text:p>445.0514831543</text:p>
          </table:table-cell>
          <table:table-cell office:value-type="float" office:value="-0.003341534">
            <text:p>-0.003341534</text:p>
          </table:table-cell>
          <table:table-cell table:number-columns-repeated="4"/>
        </table:table-row>
        <table:table-row table:style-name="ro1">
          <table:table-cell office:value-type="float" office:value="445.165618896484">
            <text:p>445.1656188965</text:p>
          </table:table-cell>
          <table:table-cell office:value-type="float" office:value="-0.01018039">
            <text:p>-0.01018039</text:p>
          </table:table-cell>
          <table:table-cell table:number-columns-repeated="4"/>
        </table:table-row>
        <table:table-row table:style-name="ro1">
          <table:table-cell office:value-type="float" office:value="445.279754638672">
            <text:p>445.2797546387</text:p>
          </table:table-cell>
          <table:table-cell office:value-type="float" office:value="0.006302206">
            <text:p>0.006302206</text:p>
          </table:table-cell>
          <table:table-cell table:number-columns-repeated="4"/>
        </table:table-row>
        <table:table-row table:style-name="ro1">
          <table:table-cell office:value-type="float" office:value="445.393890380859">
            <text:p>445.3938903809</text:p>
          </table:table-cell>
          <table:table-cell office:value-type="float" office:value="-0.0009039361">
            <text:p>-0.0009039361</text:p>
          </table:table-cell>
          <table:table-cell table:number-columns-repeated="4"/>
        </table:table-row>
        <table:table-row table:style-name="ro1">
          <table:table-cell office:value-type="float" office:value="445.508026123047">
            <text:p>445.508026123</text:p>
          </table:table-cell>
          <table:table-cell office:value-type="float" office:value="-0.005433103">
            <text:p>-0.005433103</text:p>
          </table:table-cell>
          <table:table-cell table:number-columns-repeated="4"/>
        </table:table-row>
        <table:table-row table:style-name="ro1">
          <table:table-cell office:value-type="float" office:value="445.622192382813">
            <text:p>445.6221923828</text:p>
          </table:table-cell>
          <table:table-cell office:value-type="float" office:value="0.00147544">
            <text:p>0.00147544</text:p>
          </table:table-cell>
          <table:table-cell table:number-columns-repeated="4"/>
        </table:table-row>
        <table:table-row table:style-name="ro1">
          <table:table-cell office:value-type="float" office:value="445.736328125">
            <text:p>445.736328125</text:p>
          </table:table-cell>
          <table:table-cell office:value-type="float" office:value="0.001821717">
            <text:p>0.001821717</text:p>
          </table:table-cell>
          <table:table-cell table:number-columns-repeated="4"/>
        </table:table-row>
        <table:table-row table:style-name="ro1">
          <table:table-cell office:value-type="float" office:value="445.850494384766">
            <text:p>445.8504943848</text:p>
          </table:table-cell>
          <table:table-cell office:value-type="float" office:value="0.004816364">
            <text:p>0.004816364</text:p>
          </table:table-cell>
          <table:table-cell table:number-columns-repeated="4"/>
        </table:table-row>
        <table:table-row table:style-name="ro1">
          <table:table-cell office:value-type="float" office:value="445.964660644531">
            <text:p>445.9646606445</text:p>
          </table:table-cell>
          <table:table-cell office:value-type="float" office:value="-0.004626085">
            <text:p>-0.004626085</text:p>
          </table:table-cell>
          <table:table-cell table:number-columns-repeated="4"/>
        </table:table-row>
        <table:table-row table:style-name="ro1">
          <table:table-cell office:value-type="float" office:value="446.078826904297">
            <text:p>446.0788269043</text:p>
          </table:table-cell>
          <table:table-cell office:value-type="string">
            <text:p>-8.538095E-05</text:p>
          </table:table-cell>
          <table:table-cell table:number-columns-repeated="4"/>
        </table:table-row>
        <table:table-row table:style-name="ro1">
          <table:table-cell office:value-type="float" office:value="446.192993164063">
            <text:p>446.1929931641</text:p>
          </table:table-cell>
          <table:table-cell office:value-type="float" office:value="0.004606787">
            <text:p>0.004606787</text:p>
          </table:table-cell>
          <table:table-cell table:number-columns-repeated="4"/>
        </table:table-row>
        <table:table-row table:style-name="ro1">
          <table:table-cell office:value-type="float" office:value="446.307189941406">
            <text:p>446.3071899414</text:p>
          </table:table-cell>
          <table:table-cell office:value-type="float" office:value="0.003712367">
            <text:p>0.003712367</text:p>
          </table:table-cell>
          <table:table-cell table:number-columns-repeated="4"/>
        </table:table-row>
        <table:table-row table:style-name="ro1">
          <table:table-cell office:value-type="float" office:value="446.421356201172">
            <text:p>446.4213562012</text:p>
          </table:table-cell>
          <table:table-cell office:value-type="float" office:value="-0.004620066">
            <text:p>-0.004620066</text:p>
          </table:table-cell>
          <table:table-cell table:number-columns-repeated="4"/>
        </table:table-row>
        <table:table-row table:style-name="ro1">
          <table:table-cell office:value-type="float" office:value="446.535552978516">
            <text:p>446.5355529785</text:p>
          </table:table-cell>
          <table:table-cell office:value-type="float" office:value="0.0005643199">
            <text:p>0.0005643199</text:p>
          </table:table-cell>
          <table:table-cell table:number-columns-repeated="4"/>
        </table:table-row>
        <table:table-row table:style-name="ro1">
          <table:table-cell office:value-type="float" office:value="446.649749755859">
            <text:p>446.6497497559</text:p>
          </table:table-cell>
          <table:table-cell office:value-type="float" office:value="0.01293073">
            <text:p>0.01293073</text:p>
          </table:table-cell>
          <table:table-cell table:number-columns-repeated="4"/>
        </table:table-row>
        <table:table-row table:style-name="ro1">
          <table:table-cell office:value-type="float" office:value="446.763946533203">
            <text:p>446.7639465332</text:p>
          </table:table-cell>
          <table:table-cell office:value-type="float" office:value="-0.003295182">
            <text:p>-0.003295182</text:p>
          </table:table-cell>
          <table:table-cell table:number-columns-repeated="4"/>
        </table:table-row>
        <table:table-row table:style-name="ro1">
          <table:table-cell office:value-type="float" office:value="446.878143310547">
            <text:p>446.8781433105</text:p>
          </table:table-cell>
          <table:table-cell office:value-type="float" office:value="-0.001861133">
            <text:p>-0.001861133</text:p>
          </table:table-cell>
          <table:table-cell table:number-columns-repeated="4"/>
        </table:table-row>
        <table:table-row table:style-name="ro1">
          <table:table-cell office:value-type="float" office:value="446.992370605469">
            <text:p>446.9923706055</text:p>
          </table:table-cell>
          <table:table-cell office:value-type="float" office:value="-0.003696974">
            <text:p>-0.003696974</text:p>
          </table:table-cell>
          <table:table-cell table:number-columns-repeated="4"/>
        </table:table-row>
        <table:table-row table:style-name="ro1">
          <table:table-cell office:value-type="float" office:value="447.106567382813">
            <text:p>447.1065673828</text:p>
          </table:table-cell>
          <table:table-cell office:value-type="float" office:value="0.01415076">
            <text:p>0.01415076</text:p>
          </table:table-cell>
          <table:table-cell table:number-columns-repeated="4"/>
        </table:table-row>
        <table:table-row table:style-name="ro1">
          <table:table-cell office:value-type="float" office:value="447.220794677734">
            <text:p>447.2207946777</text:p>
          </table:table-cell>
          <table:table-cell office:value-type="float" office:value="0.002402792">
            <text:p>0.002402792</text:p>
          </table:table-cell>
          <table:table-cell table:number-columns-repeated="4"/>
        </table:table-row>
        <table:table-row table:style-name="ro1">
          <table:table-cell office:value-type="float" office:value="447.335021972656">
            <text:p>447.3350219727</text:p>
          </table:table-cell>
          <table:table-cell office:value-type="float" office:value="0.003734251">
            <text:p>0.003734251</text:p>
          </table:table-cell>
          <table:table-cell table:number-columns-repeated="4"/>
        </table:table-row>
        <table:table-row table:style-name="ro1">
          <table:table-cell office:value-type="float" office:value="447.449249267578">
            <text:p>447.4492492676</text:p>
          </table:table-cell>
          <table:table-cell office:value-type="float" office:value="0.008662864">
            <text:p>0.008662864</text:p>
          </table:table-cell>
          <table:table-cell table:number-columns-repeated="4"/>
        </table:table-row>
        <table:table-row table:style-name="ro1">
          <table:table-cell office:value-type="float" office:value="447.5634765625">
            <text:p>447.5634765625</text:p>
          </table:table-cell>
          <table:table-cell office:value-type="float" office:value="0.001753819">
            <text:p>0.001753819</text:p>
          </table:table-cell>
          <table:table-cell table:number-columns-repeated="4"/>
        </table:table-row>
        <table:table-row table:style-name="ro1">
          <table:table-cell office:value-type="float" office:value="447.677703857422">
            <text:p>447.6777038574</text:p>
          </table:table-cell>
          <table:table-cell office:value-type="float" office:value="0.004056124">
            <text:p>0.004056124</text:p>
          </table:table-cell>
          <table:table-cell table:number-columns-repeated="4"/>
        </table:table-row>
        <table:table-row table:style-name="ro1">
          <table:table-cell office:value-type="float" office:value="447.791961669922">
            <text:p>447.7919616699</text:p>
          </table:table-cell>
          <table:table-cell office:value-type="float" office:value="-0.005542804">
            <text:p>-0.005542804</text:p>
          </table:table-cell>
          <table:table-cell table:number-columns-repeated="4"/>
        </table:table-row>
        <table:table-row table:style-name="ro1">
          <table:table-cell office:value-type="float" office:value="447.906188964844">
            <text:p>447.9061889648</text:p>
          </table:table-cell>
          <table:table-cell office:value-type="float" office:value="-0.008503168">
            <text:p>-0.008503168</text:p>
          </table:table-cell>
          <table:table-cell table:number-columns-repeated="4"/>
        </table:table-row>
        <table:table-row table:style-name="ro1">
          <table:table-cell office:value-type="float" office:value="448.020446777344">
            <text:p>448.0204467773</text:p>
          </table:table-cell>
          <table:table-cell office:value-type="float" office:value="-0.006057428">
            <text:p>-0.006057428</text:p>
          </table:table-cell>
          <table:table-cell table:number-columns-repeated="4"/>
        </table:table-row>
        <table:table-row table:style-name="ro1">
          <table:table-cell office:value-type="float" office:value="448.134704589844">
            <text:p>448.1347045898</text:p>
          </table:table-cell>
          <table:table-cell office:value-type="float" office:value="0.01217135">
            <text:p>0.01217135</text:p>
          </table:table-cell>
          <table:table-cell table:number-columns-repeated="4"/>
        </table:table-row>
        <table:table-row table:style-name="ro1">
          <table:table-cell office:value-type="float" office:value="448.248962402344">
            <text:p>448.2489624023</text:p>
          </table:table-cell>
          <table:table-cell office:value-type="float" office:value="-0.007776252">
            <text:p>-0.007776252</text:p>
          </table:table-cell>
          <table:table-cell table:number-columns-repeated="4"/>
        </table:table-row>
        <table:table-row table:style-name="ro1">
          <table:table-cell office:value-type="float" office:value="448.363220214844">
            <text:p>448.3632202148</text:p>
          </table:table-cell>
          <table:table-cell office:value-type="float" office:value="-0.002471786">
            <text:p>-0.002471786</text:p>
          </table:table-cell>
          <table:table-cell table:number-columns-repeated="4"/>
        </table:table-row>
        <table:table-row table:style-name="ro1">
          <table:table-cell office:value-type="float" office:value="448.477508544922">
            <text:p>448.4775085449</text:p>
          </table:table-cell>
          <table:table-cell office:value-type="float" office:value="0.006644785">
            <text:p>0.006644785</text:p>
          </table:table-cell>
          <table:table-cell table:number-columns-repeated="4"/>
        </table:table-row>
        <table:table-row table:style-name="ro1">
          <table:table-cell office:value-type="float" office:value="448.591766357422">
            <text:p>448.5917663574</text:p>
          </table:table-cell>
          <table:table-cell office:value-type="float" office:value="0.01044013">
            <text:p>0.01044013</text:p>
          </table:table-cell>
          <table:table-cell table:number-columns-repeated="4"/>
        </table:table-row>
        <table:table-row table:style-name="ro1">
          <table:table-cell office:value-type="float" office:value="448.7060546875">
            <text:p>448.7060546875</text:p>
          </table:table-cell>
          <table:table-cell office:value-type="float" office:value="0.01018292">
            <text:p>0.01018292</text:p>
          </table:table-cell>
          <table:table-cell table:number-columns-repeated="4"/>
        </table:table-row>
        <table:table-row table:style-name="ro1">
          <table:table-cell office:value-type="float" office:value="448.820343017578">
            <text:p>448.8203430176</text:p>
          </table:table-cell>
          <table:table-cell office:value-type="float" office:value="-0.008540745">
            <text:p>-0.008540745</text:p>
          </table:table-cell>
          <table:table-cell table:number-columns-repeated="4"/>
        </table:table-row>
        <table:table-row table:style-name="ro1">
          <table:table-cell office:value-type="float" office:value="448.934631347656">
            <text:p>448.9346313477</text:p>
          </table:table-cell>
          <table:table-cell office:value-type="float" office:value="-0.001318544">
            <text:p>-0.001318544</text:p>
          </table:table-cell>
          <table:table-cell table:number-columns-repeated="4"/>
        </table:table-row>
        <table:table-row table:style-name="ro1">
          <table:table-cell office:value-type="float" office:value="449.048919677734">
            <text:p>449.0489196777</text:p>
          </table:table-cell>
          <table:table-cell office:value-type="float" office:value="-0.00196989">
            <text:p>-0.00196989</text:p>
          </table:table-cell>
          <table:table-cell table:number-columns-repeated="4"/>
        </table:table-row>
        <table:table-row table:style-name="ro1">
          <table:table-cell office:value-type="float" office:value="449.163238525391">
            <text:p>449.1632385254</text:p>
          </table:table-cell>
          <table:table-cell office:value-type="float" office:value="-0.01159021">
            <text:p>-0.01159021</text:p>
          </table:table-cell>
          <table:table-cell table:number-columns-repeated="4"/>
        </table:table-row>
        <table:table-row table:style-name="ro1">
          <table:table-cell office:value-type="float" office:value="449.277526855469">
            <text:p>449.2775268555</text:p>
          </table:table-cell>
          <table:table-cell office:value-type="float" office:value="0.0005923345">
            <text:p>0.0005923345</text:p>
          </table:table-cell>
          <table:table-cell table:number-columns-repeated="4"/>
        </table:table-row>
        <table:table-row table:style-name="ro1">
          <table:table-cell office:value-type="float" office:value="449.391845703125">
            <text:p>449.3918457031</text:p>
          </table:table-cell>
          <table:table-cell office:value-type="float" office:value="0.01482492">
            <text:p>0.01482492</text:p>
          </table:table-cell>
          <table:table-cell table:number-columns-repeated="4"/>
        </table:table-row>
        <table:table-row table:style-name="ro1">
          <table:table-cell office:value-type="float" office:value="449.506164550781">
            <text:p>449.5061645508</text:p>
          </table:table-cell>
          <table:table-cell office:value-type="float" office:value="0.001357784">
            <text:p>0.001357784</text:p>
          </table:table-cell>
          <table:table-cell table:number-columns-repeated="4"/>
        </table:table-row>
        <table:table-row table:style-name="ro1">
          <table:table-cell office:value-type="float" office:value="449.620483398438">
            <text:p>449.6204833984</text:p>
          </table:table-cell>
          <table:table-cell office:value-type="float" office:value="0.01058859">
            <text:p>0.01058859</text:p>
          </table:table-cell>
          <table:table-cell table:number-columns-repeated="4"/>
        </table:table-row>
        <table:table-row table:style-name="ro1">
          <table:table-cell office:value-type="float" office:value="449.734802246094">
            <text:p>449.7348022461</text:p>
          </table:table-cell>
          <table:table-cell office:value-type="float" office:value="-0.01004524">
            <text:p>-0.01004524</text:p>
          </table:table-cell>
          <table:table-cell table:number-columns-repeated="4"/>
        </table:table-row>
        <table:table-row table:style-name="ro1">
          <table:table-cell office:value-type="float" office:value="449.84912109375">
            <text:p>449.8491210938</text:p>
          </table:table-cell>
          <table:table-cell office:value-type="float" office:value="0.007632442">
            <text:p>0.007632442</text:p>
          </table:table-cell>
          <table:table-cell table:number-columns-repeated="4"/>
        </table:table-row>
        <table:table-row table:style-name="ro1">
          <table:table-cell office:value-type="float" office:value="449.963439941406">
            <text:p>449.9634399414</text:p>
          </table:table-cell>
          <table:table-cell office:value-type="float" office:value="-0.003497042">
            <text:p>-0.003497042</text:p>
          </table:table-cell>
          <table:table-cell table:number-columns-repeated="4"/>
        </table:table-row>
        <table:table-row table:style-name="ro1">
          <table:table-cell office:value-type="float" office:value="450.077789306641">
            <text:p>450.0777893066</text:p>
          </table:table-cell>
          <table:table-cell office:value-type="float" office:value="-0.001493698">
            <text:p>-0.001493698</text:p>
          </table:table-cell>
          <table:table-cell table:number-columns-repeated="4"/>
        </table:table-row>
        <table:table-row table:style-name="ro1">
          <table:table-cell office:value-type="float" office:value="450.192138671875">
            <text:p>450.1921386719</text:p>
          </table:table-cell>
          <table:table-cell office:value-type="float" office:value="-0.0124068">
            <text:p>-0.0124068</text:p>
          </table:table-cell>
          <table:table-cell table:number-columns-repeated="4"/>
        </table:table-row>
        <table:table-row table:style-name="ro1">
          <table:table-cell office:value-type="float" office:value="450.306488037109">
            <text:p>450.3064880371</text:p>
          </table:table-cell>
          <table:table-cell office:value-type="float" office:value="0.007009082">
            <text:p>0.007009082</text:p>
          </table:table-cell>
          <table:table-cell table:number-columns-repeated="4"/>
        </table:table-row>
        <table:table-row table:style-name="ro1">
          <table:table-cell office:value-type="float" office:value="450.420837402344">
            <text:p>450.4208374023</text:p>
          </table:table-cell>
          <table:table-cell office:value-type="float" office:value="0.003151573">
            <text:p>0.003151573</text:p>
          </table:table-cell>
          <table:table-cell table:number-columns-repeated="4"/>
        </table:table-row>
        <table:table-row table:style-name="ro1">
          <table:table-cell office:value-type="float" office:value="450.535186767578">
            <text:p>450.5351867676</text:p>
          </table:table-cell>
          <table:table-cell office:value-type="float" office:value="0.0006779217">
            <text:p>0.0006779217</text:p>
          </table:table-cell>
          <table:table-cell table:number-columns-repeated="4"/>
        </table:table-row>
        <table:table-row table:style-name="ro1">
          <table:table-cell office:value-type="float" office:value="450.649536132813">
            <text:p>450.6495361328</text:p>
          </table:table-cell>
          <table:table-cell office:value-type="float" office:value="-0.01262772">
            <text:p>-0.01262772</text:p>
          </table:table-cell>
          <table:table-cell table:number-columns-repeated="4"/>
        </table:table-row>
        <table:table-row table:style-name="ro1">
          <table:table-cell office:value-type="float" office:value="450.763916015625">
            <text:p>450.7639160156</text:p>
          </table:table-cell>
          <table:table-cell office:value-type="float" office:value="0.00867147">
            <text:p>0.00867147</text:p>
          </table:table-cell>
          <table:table-cell table:number-columns-repeated="4"/>
        </table:table-row>
        <table:table-row table:style-name="ro1">
          <table:table-cell office:value-type="float" office:value="450.878295898438">
            <text:p>450.8782958984</text:p>
          </table:table-cell>
          <table:table-cell office:value-type="float" office:value="-0.006024386">
            <text:p>-0.006024386</text:p>
          </table:table-cell>
          <table:table-cell table:number-columns-repeated="4"/>
        </table:table-row>
        <table:table-row table:style-name="ro1">
          <table:table-cell office:value-type="float" office:value="450.99267578125">
            <text:p>450.9926757813</text:p>
          </table:table-cell>
          <table:table-cell office:value-type="float" office:value="-0.001519079">
            <text:p>-0.001519079</text:p>
          </table:table-cell>
          <table:table-cell table:number-columns-repeated="4"/>
        </table:table-row>
        <table:table-row table:style-name="ro1">
          <table:table-cell office:value-type="float" office:value="451.107055664063">
            <text:p>451.1070556641</text:p>
          </table:table-cell>
          <table:table-cell office:value-type="float" office:value="-0.01415166">
            <text:p>-0.01415166</text:p>
          </table:table-cell>
          <table:table-cell table:number-columns-repeated="4"/>
        </table:table-row>
        <table:table-row table:style-name="ro1">
          <table:table-cell office:value-type="float" office:value="451.221435546875">
            <text:p>451.2214355469</text:p>
          </table:table-cell>
          <table:table-cell office:value-type="float" office:value="0.000278218">
            <text:p>0.000278218</text:p>
          </table:table-cell>
          <table:table-cell table:number-columns-repeated="4"/>
        </table:table-row>
        <table:table-row table:style-name="ro1">
          <table:table-cell office:value-type="float" office:value="451.335815429688">
            <text:p>451.3358154297</text:p>
          </table:table-cell>
          <table:table-cell office:value-type="float" office:value="0.01216315">
            <text:p>0.01216315</text:p>
          </table:table-cell>
          <table:table-cell table:number-columns-repeated="4"/>
        </table:table-row>
        <table:table-row table:style-name="ro1">
          <table:table-cell office:value-type="float" office:value="451.450225830078">
            <text:p>451.4502258301</text:p>
          </table:table-cell>
          <table:table-cell office:value-type="float" office:value="0.001935651">
            <text:p>0.001935651</text:p>
          </table:table-cell>
          <table:table-cell table:number-columns-repeated="4"/>
        </table:table-row>
        <table:table-row table:style-name="ro1">
          <table:table-cell office:value-type="float" office:value="451.564605712891">
            <text:p>451.5646057129</text:p>
          </table:table-cell>
          <table:table-cell office:value-type="float" office:value="-0.01275293">
            <text:p>-0.01275293</text:p>
          </table:table-cell>
          <table:table-cell table:number-columns-repeated="4"/>
        </table:table-row>
        <table:table-row table:style-name="ro1">
          <table:table-cell office:value-type="float" office:value="451.679016113281">
            <text:p>451.6790161133</text:p>
          </table:table-cell>
          <table:table-cell office:value-type="float" office:value="0.007695225">
            <text:p>0.007695225</text:p>
          </table:table-cell>
          <table:table-cell table:number-columns-repeated="4"/>
        </table:table-row>
        <table:table-row table:style-name="ro1">
          <table:table-cell office:value-type="float" office:value="451.793426513672">
            <text:p>451.7934265137</text:p>
          </table:table-cell>
          <table:table-cell office:value-type="float" office:value="0.01122526">
            <text:p>0.01122526</text:p>
          </table:table-cell>
          <table:table-cell table:number-columns-repeated="4"/>
        </table:table-row>
        <table:table-row table:style-name="ro1">
          <table:table-cell office:value-type="float" office:value="451.907836914063">
            <text:p>451.9078369141</text:p>
          </table:table-cell>
          <table:table-cell office:value-type="float" office:value="-0.006696718">
            <text:p>-0.006696718</text:p>
          </table:table-cell>
          <table:table-cell table:number-columns-repeated="4"/>
        </table:table-row>
        <table:table-row table:style-name="ro1">
          <table:table-cell office:value-type="float" office:value="452.022247314453">
            <text:p>452.0222473145</text:p>
          </table:table-cell>
          <table:table-cell office:value-type="float" office:value="-0.00220316">
            <text:p>-0.00220316</text:p>
          </table:table-cell>
          <table:table-cell table:number-columns-repeated="4"/>
        </table:table-row>
        <table:table-row table:style-name="ro1">
          <table:table-cell office:value-type="float" office:value="452.136688232422">
            <text:p>452.1366882324</text:p>
          </table:table-cell>
          <table:table-cell office:value-type="float" office:value="0.003387463">
            <text:p>0.003387463</text:p>
          </table:table-cell>
          <table:table-cell table:number-columns-repeated="4"/>
        </table:table-row>
        <table:table-row table:style-name="ro1">
          <table:table-cell office:value-type="float" office:value="452.251098632813">
            <text:p>452.2510986328</text:p>
          </table:table-cell>
          <table:table-cell office:value-type="float" office:value="0.009057035">
            <text:p>0.009057035</text:p>
          </table:table-cell>
          <table:table-cell table:number-columns-repeated="4"/>
        </table:table-row>
        <table:table-row table:style-name="ro1">
          <table:table-cell office:value-type="float" office:value="452.365539550781">
            <text:p>452.3655395508</text:p>
          </table:table-cell>
          <table:table-cell office:value-type="float" office:value="-0.00952978">
            <text:p>-0.00952978</text:p>
          </table:table-cell>
          <table:table-cell table:number-columns-repeated="4"/>
        </table:table-row>
        <table:table-row table:style-name="ro1">
          <table:table-cell office:value-type="float" office:value="452.47998046875">
            <text:p>452.4799804688</text:p>
          </table:table-cell>
          <table:table-cell office:value-type="float" office:value="0.003043616">
            <text:p>0.003043616</text:p>
          </table:table-cell>
          <table:table-cell table:number-columns-repeated="4"/>
        </table:table-row>
        <table:table-row table:style-name="ro1">
          <table:table-cell office:value-type="float" office:value="452.594421386719">
            <text:p>452.5944213867</text:p>
          </table:table-cell>
          <table:table-cell office:value-type="float" office:value="0.009923716">
            <text:p>0.009923716</text:p>
          </table:table-cell>
          <table:table-cell table:number-columns-repeated="4"/>
        </table:table-row>
        <table:table-row table:style-name="ro1">
          <table:table-cell office:value-type="float" office:value="452.708862304688">
            <text:p>452.7088623047</text:p>
          </table:table-cell>
          <table:table-cell office:value-type="float" office:value="0.006275399">
            <text:p>0.006275399</text:p>
          </table:table-cell>
          <table:table-cell table:number-columns-repeated="4"/>
        </table:table-row>
        <table:table-row table:style-name="ro1">
          <table:table-cell office:value-type="float" office:value="452.823333740234">
            <text:p>452.8233337402</text:p>
          </table:table-cell>
          <table:table-cell office:value-type="float" office:value="0.009301028">
            <text:p>0.009301028</text:p>
          </table:table-cell>
          <table:table-cell table:number-columns-repeated="4"/>
        </table:table-row>
        <table:table-row table:style-name="ro1">
          <table:table-cell office:value-type="float" office:value="452.937774658203">
            <text:p>452.9377746582</text:p>
          </table:table-cell>
          <table:table-cell office:value-type="float" office:value="-0.007232691">
            <text:p>-0.007232691</text:p>
          </table:table-cell>
          <table:table-cell table:number-columns-repeated="4"/>
        </table:table-row>
        <table:table-row table:style-name="ro1">
          <table:table-cell office:value-type="float" office:value="453.05224609375">
            <text:p>453.0522460938</text:p>
          </table:table-cell>
          <table:table-cell office:value-type="float" office:value="-0.002403071">
            <text:p>-0.002403071</text:p>
          </table:table-cell>
          <table:table-cell table:number-columns-repeated="4"/>
        </table:table-row>
        <table:table-row table:style-name="ro1">
          <table:table-cell office:value-type="float" office:value="453.166717529297">
            <text:p>453.1667175293</text:p>
          </table:table-cell>
          <table:table-cell office:value-type="float" office:value="0.005588928">
            <text:p>0.005588928</text:p>
          </table:table-cell>
          <table:table-cell table:number-columns-repeated="4"/>
        </table:table-row>
        <table:table-row table:style-name="ro1">
          <table:table-cell office:value-type="float" office:value="453.281188964844">
            <text:p>453.2811889648</text:p>
          </table:table-cell>
          <table:table-cell office:value-type="float" office:value="-0.01040061">
            <text:p>-0.01040061</text:p>
          </table:table-cell>
          <table:table-cell table:number-columns-repeated="4"/>
        </table:table-row>
        <table:table-row table:style-name="ro1">
          <table:table-cell office:value-type="float" office:value="453.395660400391">
            <text:p>453.3956604004</text:p>
          </table:table-cell>
          <table:table-cell office:value-type="float" office:value="-0.003329359">
            <text:p>-0.003329359</text:p>
          </table:table-cell>
          <table:table-cell table:number-columns-repeated="4"/>
        </table:table-row>
        <table:table-row table:style-name="ro1">
          <table:table-cell office:value-type="float" office:value="453.510131835938">
            <text:p>453.5101318359</text:p>
          </table:table-cell>
          <table:table-cell office:value-type="float" office:value="0.01649828">
            <text:p>0.01649828</text:p>
          </table:table-cell>
          <table:table-cell table:number-columns-repeated="4"/>
        </table:table-row>
        <table:table-row table:style-name="ro1">
          <table:table-cell office:value-type="float" office:value="453.624603271484">
            <text:p>453.6246032715</text:p>
          </table:table-cell>
          <table:table-cell office:value-type="float" office:value="-0.005759771">
            <text:p>-0.005759771</text:p>
          </table:table-cell>
          <table:table-cell table:number-columns-repeated="4"/>
        </table:table-row>
        <table:table-row table:style-name="ro1">
          <table:table-cell office:value-type="float" office:value="453.739105224609">
            <text:p>453.7391052246</text:p>
          </table:table-cell>
          <table:table-cell office:value-type="float" office:value="-0.0030459">
            <text:p>-0.0030459</text:p>
          </table:table-cell>
          <table:table-cell table:number-columns-repeated="4"/>
        </table:table-row>
        <table:table-row table:style-name="ro1">
          <table:table-cell office:value-type="float" office:value="453.853607177734">
            <text:p>453.8536071777</text:p>
          </table:table-cell>
          <table:table-cell office:value-type="float" office:value="-0.003454701">
            <text:p>-0.003454701</text:p>
          </table:table-cell>
          <table:table-cell table:number-columns-repeated="4"/>
        </table:table-row>
        <table:table-row table:style-name="ro1">
          <table:table-cell office:value-type="float" office:value="453.968109130859">
            <text:p>453.9681091309</text:p>
          </table:table-cell>
          <table:table-cell office:value-type="float" office:value="0.002542226">
            <text:p>0.002542226</text:p>
          </table:table-cell>
          <table:table-cell table:number-columns-repeated="4"/>
        </table:table-row>
        <table:table-row table:style-name="ro1">
          <table:table-cell office:value-type="float" office:value="454.082611083984">
            <text:p>454.082611084</text:p>
          </table:table-cell>
          <table:table-cell office:value-type="float" office:value="-0.001199882">
            <text:p>-0.001199882</text:p>
          </table:table-cell>
          <table:table-cell table:number-columns-repeated="4"/>
        </table:table-row>
        <table:table-row table:style-name="ro1">
          <table:table-cell office:value-type="float" office:value="454.197113037109">
            <text:p>454.1971130371</text:p>
          </table:table-cell>
          <table:table-cell office:value-type="float" office:value="-0.01101455">
            <text:p>-0.01101455</text:p>
          </table:table-cell>
          <table:table-cell table:number-columns-repeated="4"/>
        </table:table-row>
        <table:table-row table:style-name="ro1">
          <table:table-cell office:value-type="float" office:value="454.311614990234">
            <text:p>454.3116149902</text:p>
          </table:table-cell>
          <table:table-cell office:value-type="float" office:value="-0.01453665">
            <text:p>-0.01453665</text:p>
          </table:table-cell>
          <table:table-cell table:number-columns-repeated="4"/>
        </table:table-row>
        <table:table-row table:style-name="ro1">
          <table:table-cell office:value-type="float" office:value="454.426147460938">
            <text:p>454.4261474609</text:p>
          </table:table-cell>
          <table:table-cell office:value-type="float" office:value="0.007345875">
            <text:p>0.007345875</text:p>
          </table:table-cell>
          <table:table-cell table:number-columns-repeated="4"/>
        </table:table-row>
        <table:table-row table:style-name="ro1">
          <table:table-cell office:value-type="float" office:value="454.540649414063">
            <text:p>454.5406494141</text:p>
          </table:table-cell>
          <table:table-cell office:value-type="float" office:value="0.01010056">
            <text:p>0.01010056</text:p>
          </table:table-cell>
          <table:table-cell table:number-columns-repeated="4"/>
        </table:table-row>
        <table:table-row table:style-name="ro1">
          <table:table-cell office:value-type="float" office:value="454.655181884766">
            <text:p>454.6551818848</text:p>
          </table:table-cell>
          <table:table-cell office:value-type="float" office:value="-0.006067786">
            <text:p>-0.006067786</text:p>
          </table:table-cell>
          <table:table-cell table:number-columns-repeated="4"/>
        </table:table-row>
        <table:table-row table:style-name="ro1">
          <table:table-cell office:value-type="float" office:value="454.769714355469">
            <text:p>454.7697143555</text:p>
          </table:table-cell>
          <table:table-cell office:value-type="float" office:value="-0.002538952">
            <text:p>-0.002538952</text:p>
          </table:table-cell>
          <table:table-cell table:number-columns-repeated="4"/>
        </table:table-row>
        <table:table-row table:style-name="ro1">
          <table:table-cell office:value-type="float" office:value="454.884246826172">
            <text:p>454.8842468262</text:p>
          </table:table-cell>
          <table:table-cell office:value-type="float" office:value="0.00994135">
            <text:p>0.00994135</text:p>
          </table:table-cell>
          <table:table-cell table:number-columns-repeated="4"/>
        </table:table-row>
        <table:table-row table:style-name="ro1">
          <table:table-cell office:value-type="float" office:value="454.998809814453">
            <text:p>454.9988098145</text:p>
          </table:table-cell>
          <table:table-cell office:value-type="float" office:value="0.01159937">
            <text:p>0.01159937</text:p>
          </table:table-cell>
          <table:table-cell table:number-columns-repeated="4"/>
        </table:table-row>
        <table:table-row table:style-name="ro1">
          <table:table-cell office:value-type="float" office:value="455.113342285156">
            <text:p>455.1133422852</text:p>
          </table:table-cell>
          <table:table-cell office:value-type="float" office:value="-0.007483373">
            <text:p>-0.007483373</text:p>
          </table:table-cell>
          <table:table-cell table:number-columns-repeated="4"/>
        </table:table-row>
        <table:table-row table:style-name="ro1">
          <table:table-cell office:value-type="float" office:value="455.227905273438">
            <text:p>455.2279052734</text:p>
          </table:table-cell>
          <table:table-cell office:value-type="float" office:value="-0.005526342">
            <text:p>-0.005526342</text:p>
          </table:table-cell>
          <table:table-cell table:number-columns-repeated="4"/>
        </table:table-row>
        <table:table-row table:style-name="ro1">
          <table:table-cell office:value-type="float" office:value="455.342468261719">
            <text:p>455.3424682617</text:p>
          </table:table-cell>
          <table:table-cell office:value-type="float" office:value="0.00683476">
            <text:p>0.00683476</text:p>
          </table:table-cell>
          <table:table-cell table:number-columns-repeated="4"/>
        </table:table-row>
        <table:table-row table:style-name="ro1">
          <table:table-cell office:value-type="float" office:value="455.457000732422">
            <text:p>455.4570007324</text:p>
          </table:table-cell>
          <table:table-cell office:value-type="float" office:value="0.007887262">
            <text:p>0.007887262</text:p>
          </table:table-cell>
          <table:table-cell table:number-columns-repeated="4"/>
        </table:table-row>
        <table:table-row table:style-name="ro1">
          <table:table-cell office:value-type="float" office:value="455.571563720703">
            <text:p>455.5715637207</text:p>
          </table:table-cell>
          <table:table-cell office:value-type="float" office:value="-0.009444555">
            <text:p>-0.009444555</text:p>
          </table:table-cell>
          <table:table-cell table:number-columns-repeated="4"/>
        </table:table-row>
        <table:table-row table:style-name="ro1">
          <table:table-cell office:value-type="float" office:value="455.686157226563">
            <text:p>455.6861572266</text:p>
          </table:table-cell>
          <table:table-cell office:value-type="float" office:value="-0.01010775">
            <text:p>-0.01010775</text:p>
          </table:table-cell>
          <table:table-cell table:number-columns-repeated="4"/>
        </table:table-row>
        <table:table-row table:style-name="ro1">
          <table:table-cell office:value-type="float" office:value="455.800720214844">
            <text:p>455.8007202148</text:p>
          </table:table-cell>
          <table:table-cell office:value-type="float" office:value="0.01097522">
            <text:p>0.01097522</text:p>
          </table:table-cell>
          <table:table-cell table:number-columns-repeated="4"/>
        </table:table-row>
        <table:table-row table:style-name="ro1">
          <table:table-cell office:value-type="float" office:value="455.915313720703">
            <text:p>455.9153137207</text:p>
          </table:table-cell>
          <table:table-cell office:value-type="float" office:value="-0.0005865601">
            <text:p>-0.0005865601</text:p>
          </table:table-cell>
          <table:table-cell table:number-columns-repeated="4"/>
        </table:table-row>
        <table:table-row table:style-name="ro1">
          <table:table-cell office:value-type="float" office:value="456.029876708984">
            <text:p>456.029876709</text:p>
          </table:table-cell>
          <table:table-cell office:value-type="float" office:value="-0.00681825">
            <text:p>-0.00681825</text:p>
          </table:table-cell>
          <table:table-cell table:number-columns-repeated="4"/>
        </table:table-row>
        <table:table-row table:style-name="ro1">
          <table:table-cell office:value-type="float" office:value="456.144470214844">
            <text:p>456.1444702148</text:p>
          </table:table-cell>
          <table:table-cell office:value-type="float" office:value="-0.003770465">
            <text:p>-0.003770465</text:p>
          </table:table-cell>
          <table:table-cell table:number-columns-repeated="4"/>
        </table:table-row>
        <table:table-row table:style-name="ro1">
          <table:table-cell office:value-type="float" office:value="456.259063720703">
            <text:p>456.2590637207</text:p>
          </table:table-cell>
          <table:table-cell office:value-type="float" office:value="-0.004241146">
            <text:p>-0.004241146</text:p>
          </table:table-cell>
          <table:table-cell table:number-columns-repeated="4"/>
        </table:table-row>
        <table:table-row table:style-name="ro1">
          <table:table-cell office:value-type="float" office:value="456.373657226563">
            <text:p>456.3736572266</text:p>
          </table:table-cell>
          <table:table-cell office:value-type="float" office:value="0.008704997">
            <text:p>0.008704997</text:p>
          </table:table-cell>
          <table:table-cell table:number-columns-repeated="4"/>
        </table:table-row>
        <table:table-row table:style-name="ro1">
          <table:table-cell office:value-type="float" office:value="456.488250732422">
            <text:p>456.4882507324</text:p>
          </table:table-cell>
          <table:table-cell office:value-type="float" office:value="-0.006252227">
            <text:p>-0.006252227</text:p>
          </table:table-cell>
          <table:table-cell table:number-columns-repeated="4"/>
        </table:table-row>
        <table:table-row table:style-name="ro1">
          <table:table-cell office:value-type="float" office:value="456.602874755859">
            <text:p>456.6028747559</text:p>
          </table:table-cell>
          <table:table-cell office:value-type="float" office:value="-0.01403819">
            <text:p>-0.01403819</text:p>
          </table:table-cell>
          <table:table-cell table:number-columns-repeated="4"/>
        </table:table-row>
        <table:table-row table:style-name="ro1">
          <table:table-cell office:value-type="float" office:value="456.717468261719">
            <text:p>456.7174682617</text:p>
          </table:table-cell>
          <table:table-cell office:value-type="float" office:value="0.01539105">
            <text:p>0.01539105</text:p>
          </table:table-cell>
          <table:table-cell table:number-columns-repeated="4"/>
        </table:table-row>
        <table:table-row table:style-name="ro1">
          <table:table-cell office:value-type="float" office:value="456.832092285156">
            <text:p>456.8320922852</text:p>
          </table:table-cell>
          <table:table-cell office:value-type="float" office:value="0.0004551723">
            <text:p>0.0004551723</text:p>
          </table:table-cell>
          <table:table-cell table:number-columns-repeated="4"/>
        </table:table-row>
        <table:table-row table:style-name="ro1">
          <table:table-cell office:value-type="float" office:value="456.946716308594">
            <text:p>456.9467163086</text:p>
          </table:table-cell>
          <table:table-cell office:value-type="float" office:value="-0.01044128">
            <text:p>-0.01044128</text:p>
          </table:table-cell>
          <table:table-cell table:number-columns-repeated="4"/>
        </table:table-row>
        <table:table-row table:style-name="ro1">
          <table:table-cell office:value-type="float" office:value="457.061340332031">
            <text:p>457.061340332</text:p>
          </table:table-cell>
          <table:table-cell office:value-type="float" office:value="0.008498439">
            <text:p>0.008498439</text:p>
          </table:table-cell>
          <table:table-cell table:number-columns-repeated="4"/>
        </table:table-row>
        <table:table-row table:style-name="ro1">
          <table:table-cell office:value-type="float" office:value="457.175964355469">
            <text:p>457.1759643555</text:p>
          </table:table-cell>
          <table:table-cell office:value-type="float" office:value="0.002806969">
            <text:p>0.002806969</text:p>
          </table:table-cell>
          <table:table-cell table:number-columns-repeated="4"/>
        </table:table-row>
        <table:table-row table:style-name="ro1">
          <table:table-cell office:value-type="float" office:value="457.290618896484">
            <text:p>457.2906188965</text:p>
          </table:table-cell>
          <table:table-cell office:value-type="float" office:value="0.002358828">
            <text:p>0.002358828</text:p>
          </table:table-cell>
          <table:table-cell table:number-columns-repeated="4"/>
        </table:table-row>
        <table:table-row table:style-name="ro1">
          <table:table-cell office:value-type="float" office:value="457.405242919922">
            <text:p>457.4052429199</text:p>
          </table:table-cell>
          <table:table-cell office:value-type="float" office:value="-0.01443423">
            <text:p>-0.01443423</text:p>
          </table:table-cell>
          <table:table-cell table:number-columns-repeated="4"/>
        </table:table-row>
        <table:table-row table:style-name="ro1">
          <table:table-cell office:value-type="float" office:value="457.519897460938">
            <text:p>457.5198974609</text:p>
          </table:table-cell>
          <table:table-cell office:value-type="float" office:value="0.01718184">
            <text:p>0.01718184</text:p>
          </table:table-cell>
          <table:table-cell table:number-columns-repeated="4"/>
        </table:table-row>
        <table:table-row table:style-name="ro1">
          <table:table-cell office:value-type="float" office:value="457.634552001953">
            <text:p>457.634552002</text:p>
          </table:table-cell>
          <table:table-cell office:value-type="float" office:value="0.009065214">
            <text:p>0.009065214</text:p>
          </table:table-cell>
          <table:table-cell table:number-columns-repeated="4"/>
        </table:table-row>
        <table:table-row table:style-name="ro1">
          <table:table-cell office:value-type="float" office:value="457.749206542969">
            <text:p>457.749206543</text:p>
          </table:table-cell>
          <table:table-cell office:value-type="float" office:value="0.01183826">
            <text:p>0.01183826</text:p>
          </table:table-cell>
          <table:table-cell table:number-columns-repeated="4"/>
        </table:table-row>
        <table:table-row table:style-name="ro1">
          <table:table-cell office:value-type="float" office:value="457.863861083984">
            <text:p>457.863861084</text:p>
          </table:table-cell>
          <table:table-cell office:value-type="float" office:value="-0.0008521579">
            <text:p>-0.0008521579</text:p>
          </table:table-cell>
          <table:table-cell table:number-columns-repeated="4"/>
        </table:table-row>
        <table:table-row table:style-name="ro1">
          <table:table-cell office:value-type="float" office:value="457.978515625">
            <text:p>457.978515625</text:p>
          </table:table-cell>
          <table:table-cell office:value-type="float" office:value="-0.001412998">
            <text:p>-0.001412998</text:p>
          </table:table-cell>
          <table:table-cell table:number-columns-repeated="4"/>
        </table:table-row>
        <table:table-row table:style-name="ro1">
          <table:table-cell office:value-type="float" office:value="458.093200683594">
            <text:p>458.0932006836</text:p>
          </table:table-cell>
          <table:table-cell office:value-type="float" office:value="-0.001445048">
            <text:p>-0.001445048</text:p>
          </table:table-cell>
          <table:table-cell table:number-columns-repeated="4"/>
        </table:table-row>
        <table:table-row table:style-name="ro1">
          <table:table-cell office:value-type="float" office:value="458.207855224609">
            <text:p>458.2078552246</text:p>
          </table:table-cell>
          <table:table-cell office:value-type="float" office:value="0.005948104">
            <text:p>0.005948104</text:p>
          </table:table-cell>
          <table:table-cell table:number-columns-repeated="4"/>
        </table:table-row>
        <table:table-row table:style-name="ro1">
          <table:table-cell office:value-type="float" office:value="458.322540283203">
            <text:p>458.3225402832</text:p>
          </table:table-cell>
          <table:table-cell office:value-type="float" office:value="0.01288265">
            <text:p>0.01288265</text:p>
          </table:table-cell>
          <table:table-cell table:number-columns-repeated="4"/>
        </table:table-row>
        <table:table-row table:style-name="ro1">
          <table:table-cell office:value-type="float" office:value="458.437225341797">
            <text:p>458.4372253418</text:p>
          </table:table-cell>
          <table:table-cell office:value-type="float" office:value="0.0006059084">
            <text:p>0.0006059084</text:p>
          </table:table-cell>
          <table:table-cell table:number-columns-repeated="4"/>
        </table:table-row>
        <table:table-row table:style-name="ro1">
          <table:table-cell office:value-type="float" office:value="458.551910400391">
            <text:p>458.5519104004</text:p>
          </table:table-cell>
          <table:table-cell office:value-type="float" office:value="0.00804999">
            <text:p>0.00804999</text:p>
          </table:table-cell>
          <table:table-cell table:number-columns-repeated="4"/>
        </table:table-row>
        <table:table-row table:style-name="ro1">
          <table:table-cell office:value-type="float" office:value="458.666595458984">
            <text:p>458.666595459</text:p>
          </table:table-cell>
          <table:table-cell office:value-type="float" office:value="0.01717979">
            <text:p>0.01717979</text:p>
          </table:table-cell>
          <table:table-cell table:number-columns-repeated="4"/>
        </table:table-row>
        <table:table-row table:style-name="ro1">
          <table:table-cell office:value-type="float" office:value="458.781280517578">
            <text:p>458.7812805176</text:p>
          </table:table-cell>
          <table:table-cell office:value-type="float" office:value="-0.006012463">
            <text:p>-0.006012463</text:p>
          </table:table-cell>
          <table:table-cell table:number-columns-repeated="4"/>
        </table:table-row>
        <table:table-row table:style-name="ro1">
          <table:table-cell office:value-type="float" office:value="458.89599609375">
            <text:p>458.8959960938</text:p>
          </table:table-cell>
          <table:table-cell office:value-type="float" office:value="-0.001278684">
            <text:p>-0.001278684</text:p>
          </table:table-cell>
          <table:table-cell table:number-columns-repeated="4"/>
        </table:table-row>
        <table:table-row table:style-name="ro1">
          <table:table-cell office:value-type="float" office:value="459.010681152344">
            <text:p>459.0106811523</text:p>
          </table:table-cell>
          <table:table-cell office:value-type="float" office:value="0.0104966">
            <text:p>0.0104966</text:p>
          </table:table-cell>
          <table:table-cell table:number-columns-repeated="4"/>
        </table:table-row>
        <table:table-row table:style-name="ro1">
          <table:table-cell office:value-type="float" office:value="459.125396728516">
            <text:p>459.1253967285</text:p>
          </table:table-cell>
          <table:table-cell office:value-type="float" office:value="0.03444558">
            <text:p>0.03444558</text:p>
          </table:table-cell>
          <table:table-cell table:number-columns-repeated="4"/>
        </table:table-row>
        <table:table-row table:style-name="ro1">
          <table:table-cell office:value-type="float" office:value="459.240112304688">
            <text:p>459.2401123047</text:p>
          </table:table-cell>
          <table:table-cell office:value-type="float" office:value="0.01073518">
            <text:p>0.01073518</text:p>
          </table:table-cell>
          <table:table-cell table:number-columns-repeated="4"/>
        </table:table-row>
        <table:table-row table:style-name="ro1">
          <table:table-cell office:value-type="float" office:value="459.354827880859">
            <text:p>459.3548278809</text:p>
          </table:table-cell>
          <table:table-cell office:value-type="float" office:value="-0.007658351">
            <text:p>-0.007658351</text:p>
          </table:table-cell>
          <table:table-cell table:number-columns-repeated="4"/>
        </table:table-row>
        <table:table-row table:style-name="ro1">
          <table:table-cell office:value-type="float" office:value="459.469543457031">
            <text:p>459.469543457</text:p>
          </table:table-cell>
          <table:table-cell office:value-type="float" office:value="0.003306649">
            <text:p>0.003306649</text:p>
          </table:table-cell>
          <table:table-cell table:number-columns-repeated="4"/>
        </table:table-row>
        <table:table-row table:style-name="ro1">
          <table:table-cell office:value-type="float" office:value="459.584289550781">
            <text:p>459.5842895508</text:p>
          </table:table-cell>
          <table:table-cell office:value-type="float" office:value="-0.001447487">
            <text:p>-0.001447487</text:p>
          </table:table-cell>
          <table:table-cell table:number-columns-repeated="4"/>
        </table:table-row>
        <table:table-row table:style-name="ro1">
          <table:table-cell office:value-type="float" office:value="459.699005126953">
            <text:p>459.699005127</text:p>
          </table:table-cell>
          <table:table-cell office:value-type="float" office:value="0.005286173">
            <text:p>0.005286173</text:p>
          </table:table-cell>
          <table:table-cell table:number-columns-repeated="4"/>
        </table:table-row>
        <table:table-row table:style-name="ro1">
          <table:table-cell office:value-type="float" office:value="459.813751220703">
            <text:p>459.8137512207</text:p>
          </table:table-cell>
          <table:table-cell office:value-type="float" office:value="-0.005356481">
            <text:p>-0.005356481</text:p>
          </table:table-cell>
          <table:table-cell table:number-columns-repeated="4"/>
        </table:table-row>
        <table:table-row table:style-name="ro1">
          <table:table-cell office:value-type="float" office:value="459.928497314453">
            <text:p>459.9284973145</text:p>
          </table:table-cell>
          <table:table-cell office:value-type="float" office:value="0.007817358">
            <text:p>0.007817358</text:p>
          </table:table-cell>
          <table:table-cell table:number-columns-repeated="4"/>
        </table:table-row>
        <table:table-row table:style-name="ro1">
          <table:table-cell office:value-type="float" office:value="460.043243408203">
            <text:p>460.0432434082</text:p>
          </table:table-cell>
          <table:table-cell office:value-type="float" office:value="0.03754012">
            <text:p>0.03754012</text:p>
          </table:table-cell>
          <table:table-cell table:number-columns-repeated="4"/>
        </table:table-row>
        <table:table-row table:style-name="ro1">
          <table:table-cell office:value-type="float" office:value="460.157989501953">
            <text:p>460.157989502</text:p>
          </table:table-cell>
          <table:table-cell office:value-type="float" office:value="0.0149063">
            <text:p>0.0149063</text:p>
          </table:table-cell>
          <table:table-cell table:number-columns-repeated="4"/>
        </table:table-row>
        <table:table-row table:style-name="ro1">
          <table:table-cell office:value-type="float" office:value="460.272735595703">
            <text:p>460.2727355957</text:p>
          </table:table-cell>
          <table:table-cell office:value-type="float" office:value="-0.01053326">
            <text:p>-0.01053326</text:p>
          </table:table-cell>
          <table:table-cell table:number-columns-repeated="4"/>
        </table:table-row>
        <table:table-row table:style-name="ro1">
          <table:table-cell office:value-type="float" office:value="460.387512207031">
            <text:p>460.387512207</text:p>
          </table:table-cell>
          <table:table-cell office:value-type="float" office:value="-0.002778521">
            <text:p>-0.002778521</text:p>
          </table:table-cell>
          <table:table-cell table:number-columns-repeated="4"/>
        </table:table-row>
        <table:table-row table:style-name="ro1">
          <table:table-cell office:value-type="float" office:value="460.502258300781">
            <text:p>460.5022583008</text:p>
          </table:table-cell>
          <table:table-cell office:value-type="float" office:value="0.01109037">
            <text:p>0.01109037</text:p>
          </table:table-cell>
          <table:table-cell table:number-columns-repeated="4"/>
        </table:table-row>
        <table:table-row table:style-name="ro1">
          <table:table-cell office:value-type="float" office:value="460.617034912109">
            <text:p>460.6170349121</text:p>
          </table:table-cell>
          <table:table-cell office:value-type="float" office:value="-0.001696743">
            <text:p>-0.001696743</text:p>
          </table:table-cell>
          <table:table-cell table:number-columns-repeated="4"/>
        </table:table-row>
        <table:table-row table:style-name="ro1">
          <table:table-cell office:value-type="float" office:value="460.731811523438">
            <text:p>460.7318115234</text:p>
          </table:table-cell>
          <table:table-cell office:value-type="float" office:value="0.008677833">
            <text:p>0.008677833</text:p>
          </table:table-cell>
          <table:table-cell table:number-columns-repeated="4"/>
        </table:table-row>
        <table:table-row table:style-name="ro1">
          <table:table-cell office:value-type="float" office:value="460.846588134766">
            <text:p>460.8465881348</text:p>
          </table:table-cell>
          <table:table-cell office:value-type="float" office:value="0.01454391">
            <text:p>0.01454391</text:p>
          </table:table-cell>
          <table:table-cell table:number-columns-repeated="4"/>
        </table:table-row>
        <table:table-row table:style-name="ro1">
          <table:table-cell office:value-type="float" office:value="460.961364746094">
            <text:p>460.9613647461</text:p>
          </table:table-cell>
          <table:table-cell office:value-type="float" office:value="-0.0004756216">
            <text:p>-0.0004756216</text:p>
          </table:table-cell>
          <table:table-cell table:number-columns-repeated="4"/>
        </table:table-row>
        <table:table-row table:style-name="ro1">
          <table:table-cell office:value-type="float" office:value="461.076171875">
            <text:p>461.076171875</text:p>
          </table:table-cell>
          <table:table-cell office:value-type="float" office:value="-0.01084877">
            <text:p>-0.01084877</text:p>
          </table:table-cell>
          <table:table-cell table:number-columns-repeated="4"/>
        </table:table-row>
        <table:table-row table:style-name="ro1">
          <table:table-cell office:value-type="float" office:value="461.190948486328">
            <text:p>461.1909484863</text:p>
          </table:table-cell>
          <table:table-cell office:value-type="float" office:value="-0.0006635255">
            <text:p>-0.0006635255</text:p>
          </table:table-cell>
          <table:table-cell table:number-columns-repeated="4"/>
        </table:table-row>
        <table:table-row table:style-name="ro1">
          <table:table-cell office:value-type="float" office:value="461.305755615234">
            <text:p>461.3057556152</text:p>
          </table:table-cell>
          <table:table-cell office:value-type="float" office:value="0.005382869">
            <text:p>0.005382869</text:p>
          </table:table-cell>
          <table:table-cell table:number-columns-repeated="4"/>
        </table:table-row>
        <table:table-row table:style-name="ro1">
          <table:table-cell office:value-type="float" office:value="461.420562744141">
            <text:p>461.4205627441</text:p>
          </table:table-cell>
          <table:table-cell office:value-type="float" office:value="-0.001277715">
            <text:p>-0.001277715</text:p>
          </table:table-cell>
          <table:table-cell table:number-columns-repeated="4"/>
        </table:table-row>
        <table:table-row table:style-name="ro1">
          <table:table-cell office:value-type="float" office:value="461.535369873047">
            <text:p>461.535369873</text:p>
          </table:table-cell>
          <table:table-cell office:value-type="float" office:value="-0.01025517">
            <text:p>-0.01025517</text:p>
          </table:table-cell>
          <table:table-cell table:number-columns-repeated="4"/>
        </table:table-row>
        <table:table-row table:style-name="ro1">
          <table:table-cell office:value-type="float" office:value="461.650177001953">
            <text:p>461.650177002</text:p>
          </table:table-cell>
          <table:table-cell office:value-type="float" office:value="0.00820551">
            <text:p>0.00820551</text:p>
          </table:table-cell>
          <table:table-cell table:number-columns-repeated="4"/>
        </table:table-row>
        <table:table-row table:style-name="ro1">
          <table:table-cell office:value-type="float" office:value="461.764984130859">
            <text:p>461.7649841309</text:p>
          </table:table-cell>
          <table:table-cell office:value-type="float" office:value="0.002552281">
            <text:p>0.002552281</text:p>
          </table:table-cell>
          <table:table-cell table:number-columns-repeated="4"/>
        </table:table-row>
        <table:table-row table:style-name="ro1">
          <table:table-cell office:value-type="float" office:value="461.879791259766">
            <text:p>461.8797912598</text:p>
          </table:table-cell>
          <table:table-cell office:value-type="float" office:value="0.005978309">
            <text:p>0.005978309</text:p>
          </table:table-cell>
          <table:table-cell table:number-columns-repeated="4"/>
        </table:table-row>
        <table:table-row table:style-name="ro1">
          <table:table-cell office:value-type="float" office:value="461.99462890625">
            <text:p>461.9946289063</text:p>
          </table:table-cell>
          <table:table-cell office:value-type="float" office:value="-0.003186074">
            <text:p>-0.003186074</text:p>
          </table:table-cell>
          <table:table-cell table:number-columns-repeated="4"/>
        </table:table-row>
        <table:table-row table:style-name="ro1">
          <table:table-cell office:value-type="float" office:value="462.109466552734">
            <text:p>462.1094665527</text:p>
          </table:table-cell>
          <table:table-cell office:value-type="float" office:value="0.005937365">
            <text:p>0.005937365</text:p>
          </table:table-cell>
          <table:table-cell table:number-columns-repeated="4"/>
        </table:table-row>
        <table:table-row table:style-name="ro1">
          <table:table-cell office:value-type="float" office:value="462.224304199219">
            <text:p>462.2243041992</text:p>
          </table:table-cell>
          <table:table-cell office:value-type="float" office:value="0.001153558">
            <text:p>0.001153558</text:p>
          </table:table-cell>
          <table:table-cell table:number-columns-repeated="4"/>
        </table:table-row>
        <table:table-row table:style-name="ro1">
          <table:table-cell office:value-type="float" office:value="462.339141845703">
            <text:p>462.3391418457</text:p>
          </table:table-cell>
          <table:table-cell office:value-type="float" office:value="0.01022472">
            <text:p>0.01022472</text:p>
          </table:table-cell>
          <table:table-cell table:number-columns-repeated="4"/>
        </table:table-row>
        <table:table-row table:style-name="ro1">
          <table:table-cell office:value-type="float" office:value="462.453979492188">
            <text:p>462.4539794922</text:p>
          </table:table-cell>
          <table:table-cell office:value-type="float" office:value="-0.0006297042">
            <text:p>-0.0006297042</text:p>
          </table:table-cell>
          <table:table-cell table:number-columns-repeated="4"/>
        </table:table-row>
        <table:table-row table:style-name="ro1">
          <table:table-cell office:value-type="float" office:value="462.568817138672">
            <text:p>462.5688171387</text:p>
          </table:table-cell>
          <table:table-cell office:value-type="float" office:value="0.00335531">
            <text:p>0.00335531</text:p>
          </table:table-cell>
          <table:table-cell table:number-columns-repeated="4"/>
        </table:table-row>
        <table:table-row table:style-name="ro1">
          <table:table-cell office:value-type="float" office:value="462.683654785156">
            <text:p>462.6836547852</text:p>
          </table:table-cell>
          <table:table-cell office:value-type="float" office:value="0.01260743">
            <text:p>0.01260743</text:p>
          </table:table-cell>
          <table:table-cell table:number-columns-repeated="4"/>
        </table:table-row>
        <table:table-row table:style-name="ro1">
          <table:table-cell office:value-type="float" office:value="462.798522949219">
            <text:p>462.7985229492</text:p>
          </table:table-cell>
          <table:table-cell office:value-type="float" office:value="-0.007518117">
            <text:p>-0.007518117</text:p>
          </table:table-cell>
          <table:table-cell table:number-columns-repeated="4"/>
        </table:table-row>
        <table:table-row table:style-name="ro1">
          <table:table-cell office:value-type="float" office:value="462.913391113281">
            <text:p>462.9133911133</text:p>
          </table:table-cell>
          <table:table-cell office:value-type="float" office:value="-0.00457019">
            <text:p>-0.00457019</text:p>
          </table:table-cell>
          <table:table-cell table:number-columns-repeated="4"/>
        </table:table-row>
        <table:table-row table:style-name="ro1">
          <table:table-cell office:value-type="float" office:value="463.028259277344">
            <text:p>463.0282592773</text:p>
          </table:table-cell>
          <table:table-cell office:value-type="float" office:value="0.007187478">
            <text:p>0.007187478</text:p>
          </table:table-cell>
          <table:table-cell table:number-columns-repeated="4"/>
        </table:table-row>
        <table:table-row table:style-name="ro1">
          <table:table-cell office:value-type="float" office:value="463.143127441406">
            <text:p>463.1431274414</text:p>
          </table:table-cell>
          <table:table-cell office:value-type="float" office:value="0.005558586">
            <text:p>0.005558586</text:p>
          </table:table-cell>
          <table:table-cell table:number-columns-repeated="4"/>
        </table:table-row>
        <table:table-row table:style-name="ro1">
          <table:table-cell office:value-type="float" office:value="463.257995605469">
            <text:p>463.2579956055</text:p>
          </table:table-cell>
          <table:table-cell office:value-type="float" office:value="-0.008161827">
            <text:p>-0.008161827</text:p>
          </table:table-cell>
          <table:table-cell table:number-columns-repeated="4"/>
        </table:table-row>
        <table:table-row table:style-name="ro1">
          <table:table-cell office:value-type="float" office:value="463.372863769531">
            <text:p>463.3728637695</text:p>
          </table:table-cell>
          <table:table-cell office:value-type="float" office:value="0.01353139">
            <text:p>0.01353139</text:p>
          </table:table-cell>
          <table:table-cell table:number-columns-repeated="4"/>
        </table:table-row>
        <table:table-row table:style-name="ro1">
          <table:table-cell office:value-type="float" office:value="463.487762451172">
            <text:p>463.4877624512</text:p>
          </table:table-cell>
          <table:table-cell office:value-type="float" office:value="0.00648094">
            <text:p>0.00648094</text:p>
          </table:table-cell>
          <table:table-cell table:number-columns-repeated="4"/>
        </table:table-row>
        <table:table-row table:style-name="ro1">
          <table:table-cell office:value-type="float" office:value="463.602661132813">
            <text:p>463.6026611328</text:p>
          </table:table-cell>
          <table:table-cell office:value-type="float" office:value="0.005262719">
            <text:p>0.005262719</text:p>
          </table:table-cell>
          <table:table-cell table:number-columns-repeated="4"/>
        </table:table-row>
        <table:table-row table:style-name="ro1">
          <table:table-cell office:value-type="float" office:value="463.717529296875">
            <text:p>463.7175292969</text:p>
          </table:table-cell>
          <table:table-cell office:value-type="float" office:value="-0.001119715">
            <text:p>-0.001119715</text:p>
          </table:table-cell>
          <table:table-cell table:number-columns-repeated="4"/>
        </table:table-row>
        <table:table-row table:style-name="ro1">
          <table:table-cell office:value-type="float" office:value="463.832427978516">
            <text:p>463.8324279785</text:p>
          </table:table-cell>
          <table:table-cell office:value-type="float" office:value="-0.01176586">
            <text:p>-0.01176586</text:p>
          </table:table-cell>
          <table:table-cell table:number-columns-repeated="4"/>
        </table:table-row>
        <table:table-row table:style-name="ro1">
          <table:table-cell office:value-type="float" office:value="463.947326660156">
            <text:p>463.9473266602</text:p>
          </table:table-cell>
          <table:table-cell office:value-type="float" office:value="0.001333339">
            <text:p>0.001333339</text:p>
          </table:table-cell>
          <table:table-cell table:number-columns-repeated="4"/>
        </table:table-row>
        <table:table-row table:style-name="ro1">
          <table:table-cell office:value-type="float" office:value="464.062255859375">
            <text:p>464.0622558594</text:p>
          </table:table-cell>
          <table:table-cell office:value-type="float" office:value="-0.004694691">
            <text:p>-0.004694691</text:p>
          </table:table-cell>
          <table:table-cell table:number-columns-repeated="4"/>
        </table:table-row>
        <table:table-row table:style-name="ro1">
          <table:table-cell office:value-type="float" office:value="464.177154541016">
            <text:p>464.177154541</text:p>
          </table:table-cell>
          <table:table-cell office:value-type="float" office:value="-0.006043973">
            <text:p>-0.006043973</text:p>
          </table:table-cell>
          <table:table-cell table:number-columns-repeated="4"/>
        </table:table-row>
        <table:table-row table:style-name="ro1">
          <table:table-cell office:value-type="float" office:value="464.292083740234">
            <text:p>464.2920837402</text:p>
          </table:table-cell>
          <table:table-cell office:value-type="float" office:value="-0.009448051">
            <text:p>-0.009448051</text:p>
          </table:table-cell>
          <table:table-cell table:number-columns-repeated="4"/>
        </table:table-row>
        <table:table-row table:style-name="ro1">
          <table:table-cell office:value-type="float" office:value="464.406982421875">
            <text:p>464.4069824219</text:p>
          </table:table-cell>
          <table:table-cell office:value-type="float" office:value="0.006704352">
            <text:p>0.006704352</text:p>
          </table:table-cell>
          <table:table-cell table:number-columns-repeated="4"/>
        </table:table-row>
        <table:table-row table:style-name="ro1">
          <table:table-cell office:value-type="float" office:value="464.521911621094">
            <text:p>464.5219116211</text:p>
          </table:table-cell>
          <table:table-cell office:value-type="float" office:value="-0.004372615">
            <text:p>-0.004372615</text:p>
          </table:table-cell>
          <table:table-cell table:number-columns-repeated="4"/>
        </table:table-row>
        <table:table-row table:style-name="ro1">
          <table:table-cell office:value-type="float" office:value="464.636840820313">
            <text:p>464.6368408203</text:p>
          </table:table-cell>
          <table:table-cell office:value-type="float" office:value="-0.002579322">
            <text:p>-0.002579322</text:p>
          </table:table-cell>
          <table:table-cell table:number-columns-repeated="4"/>
        </table:table-row>
        <table:table-row table:style-name="ro1">
          <table:table-cell office:value-type="float" office:value="464.751770019531">
            <text:p>464.7517700195</text:p>
          </table:table-cell>
          <table:table-cell office:value-type="float" office:value="-0.007305983">
            <text:p>-0.007305983</text:p>
          </table:table-cell>
          <table:table-cell table:number-columns-repeated="4"/>
        </table:table-row>
        <table:table-row table:style-name="ro1">
          <table:table-cell office:value-type="float" office:value="464.866729736328">
            <text:p>464.8667297363</text:p>
          </table:table-cell>
          <table:table-cell office:value-type="float" office:value="0.003782736">
            <text:p>0.003782736</text:p>
          </table:table-cell>
          <table:table-cell table:number-columns-repeated="4"/>
        </table:table-row>
        <table:table-row table:style-name="ro1">
          <table:table-cell office:value-type="float" office:value="464.981658935547">
            <text:p>464.9816589355</text:p>
          </table:table-cell>
          <table:table-cell office:value-type="float" office:value="0.01481644">
            <text:p>0.01481644</text:p>
          </table:table-cell>
          <table:table-cell table:number-columns-repeated="4"/>
        </table:table-row>
        <table:table-row table:style-name="ro1">
          <table:table-cell office:value-type="float" office:value="465.096618652344">
            <text:p>465.0966186523</text:p>
          </table:table-cell>
          <table:table-cell office:value-type="float" office:value="-0.006666029">
            <text:p>-0.006666029</text:p>
          </table:table-cell>
          <table:table-cell table:number-columns-repeated="4"/>
        </table:table-row>
        <table:table-row table:style-name="ro1">
          <table:table-cell office:value-type="float" office:value="465.211547851563">
            <text:p>465.2115478516</text:p>
          </table:table-cell>
          <table:table-cell office:value-type="float" office:value="-0.01329595">
            <text:p>-0.01329595</text:p>
          </table:table-cell>
          <table:table-cell table:number-columns-repeated="4"/>
        </table:table-row>
        <table:table-row table:style-name="ro1">
          <table:table-cell office:value-type="float" office:value="465.326507568359">
            <text:p>465.3265075684</text:p>
          </table:table-cell>
          <table:table-cell office:value-type="float" office:value="-0.008426986">
            <text:p>-0.008426986</text:p>
          </table:table-cell>
          <table:table-cell table:number-columns-repeated="4"/>
        </table:table-row>
        <table:table-row table:style-name="ro1">
          <table:table-cell office:value-type="float" office:value="465.441467285156">
            <text:p>465.4414672852</text:p>
          </table:table-cell>
          <table:table-cell office:value-type="float" office:value="0.00156047">
            <text:p>0.00156047</text:p>
          </table:table-cell>
          <table:table-cell table:number-columns-repeated="4"/>
        </table:table-row>
        <table:table-row table:style-name="ro1">
          <table:table-cell office:value-type="float" office:value="465.556427001953">
            <text:p>465.556427002</text:p>
          </table:table-cell>
          <table:table-cell office:value-type="float" office:value="-0.004847868">
            <text:p>-0.004847868</text:p>
          </table:table-cell>
          <table:table-cell table:number-columns-repeated="4"/>
        </table:table-row>
        <table:table-row table:style-name="ro1">
          <table:table-cell office:value-type="float" office:value="465.671417236328">
            <text:p>465.6714172363</text:p>
          </table:table-cell>
          <table:table-cell office:value-type="float" office:value="-0.007524328">
            <text:p>-0.007524328</text:p>
          </table:table-cell>
          <table:table-cell table:number-columns-repeated="4"/>
        </table:table-row>
        <table:table-row table:style-name="ro1">
          <table:table-cell office:value-type="float" office:value="465.786376953125">
            <text:p>465.7863769531</text:p>
          </table:table-cell>
          <table:table-cell office:value-type="float" office:value="0.003631646">
            <text:p>0.003631646</text:p>
          </table:table-cell>
          <table:table-cell table:number-columns-repeated="4"/>
        </table:table-row>
        <table:table-row table:style-name="ro1">
          <table:table-cell office:value-type="float" office:value="465.9013671875">
            <text:p>465.9013671875</text:p>
          </table:table-cell>
          <table:table-cell office:value-type="float" office:value="0.004088793">
            <text:p>0.004088793</text:p>
          </table:table-cell>
          <table:table-cell table:number-columns-repeated="4"/>
        </table:table-row>
        <table:table-row table:style-name="ro1">
          <table:table-cell office:value-type="float" office:value="466.016357421875">
            <text:p>466.0163574219</text:p>
          </table:table-cell>
          <table:table-cell office:value-type="float" office:value="-0.002195726">
            <text:p>-0.002195726</text:p>
          </table:table-cell>
          <table:table-cell table:number-columns-repeated="4"/>
        </table:table-row>
        <table:table-row table:style-name="ro1">
          <table:table-cell office:value-type="float" office:value="466.13134765625">
            <text:p>466.1313476563</text:p>
          </table:table-cell>
          <table:table-cell office:value-type="float" office:value="-0.01257996">
            <text:p>-0.01257996</text:p>
          </table:table-cell>
          <table:table-cell table:number-columns-repeated="4"/>
        </table:table-row>
        <table:table-row table:style-name="ro1">
          <table:table-cell office:value-type="float" office:value="466.246337890625">
            <text:p>466.2463378906</text:p>
          </table:table-cell>
          <table:table-cell office:value-type="float" office:value="0.01601936">
            <text:p>0.01601936</text:p>
          </table:table-cell>
          <table:table-cell table:number-columns-repeated="4"/>
        </table:table-row>
        <table:table-row table:style-name="ro1">
          <table:table-cell office:value-type="float" office:value="466.361328125">
            <text:p>466.361328125</text:p>
          </table:table-cell>
          <table:table-cell office:value-type="float" office:value="-0.002971948">
            <text:p>-0.002971948</text:p>
          </table:table-cell>
          <table:table-cell table:number-columns-repeated="4"/>
        </table:table-row>
        <table:table-row table:style-name="ro1">
          <table:table-cell office:value-type="float" office:value="466.476318359375">
            <text:p>466.4763183594</text:p>
          </table:table-cell>
          <table:table-cell office:value-type="float" office:value="-0.01276857">
            <text:p>-0.01276857</text:p>
          </table:table-cell>
          <table:table-cell table:number-columns-repeated="4"/>
        </table:table-row>
        <table:table-row table:style-name="ro1">
          <table:table-cell office:value-type="float" office:value="466.591339111328">
            <text:p>466.5913391113</text:p>
          </table:table-cell>
          <table:table-cell office:value-type="float" office:value="0.004309241">
            <text:p>0.004309241</text:p>
          </table:table-cell>
          <table:table-cell table:number-columns-repeated="4"/>
        </table:table-row>
        <table:table-row table:style-name="ro1">
          <table:table-cell office:value-type="float" office:value="466.706329345703">
            <text:p>466.7063293457</text:p>
          </table:table-cell>
          <table:table-cell office:value-type="float" office:value="0.02589314">
            <text:p>0.02589314</text:p>
          </table:table-cell>
          <table:table-cell table:number-columns-repeated="4"/>
        </table:table-row>
        <table:table-row table:style-name="ro1">
          <table:table-cell office:value-type="float" office:value="466.821350097656">
            <text:p>466.8213500977</text:p>
          </table:table-cell>
          <table:table-cell office:value-type="float" office:value="-0.0006772559">
            <text:p>-0.0006772559</text:p>
          </table:table-cell>
          <table:table-cell table:number-columns-repeated="4"/>
        </table:table-row>
        <table:table-row table:style-name="ro1">
          <table:table-cell office:value-type="float" office:value="466.936370849609">
            <text:p>466.9363708496</text:p>
          </table:table-cell>
          <table:table-cell office:value-type="float" office:value="-0.005794953">
            <text:p>-0.005794953</text:p>
          </table:table-cell>
          <table:table-cell table:number-columns-repeated="4"/>
        </table:table-row>
        <table:table-row table:style-name="ro1">
          <table:table-cell office:value-type="float" office:value="467.051391601563">
            <text:p>467.0513916016</text:p>
          </table:table-cell>
          <table:table-cell office:value-type="float" office:value="0.009047925">
            <text:p>0.009047925</text:p>
          </table:table-cell>
          <table:table-cell table:number-columns-repeated="4"/>
        </table:table-row>
        <table:table-row table:style-name="ro1">
          <table:table-cell office:value-type="float" office:value="467.166442871094">
            <text:p>467.1664428711</text:p>
          </table:table-cell>
          <table:table-cell office:value-type="float" office:value="-0.004162516">
            <text:p>-0.004162516</text:p>
          </table:table-cell>
          <table:table-cell table:number-columns-repeated="4"/>
        </table:table-row>
        <table:table-row table:style-name="ro1">
          <table:table-cell office:value-type="float" office:value="467.281463623047">
            <text:p>467.281463623</text:p>
          </table:table-cell>
          <table:table-cell office:value-type="float" office:value="0.002130885">
            <text:p>0.002130885</text:p>
          </table:table-cell>
          <table:table-cell table:number-columns-repeated="4"/>
        </table:table-row>
        <table:table-row table:style-name="ro1">
          <table:table-cell office:value-type="float" office:value="467.396484375">
            <text:p>467.396484375</text:p>
          </table:table-cell>
          <table:table-cell office:value-type="float" office:value="-0.006560792">
            <text:p>-0.006560792</text:p>
          </table:table-cell>
          <table:table-cell table:number-columns-repeated="4"/>
        </table:table-row>
        <table:table-row table:style-name="ro1">
          <table:table-cell office:value-type="float" office:value="467.511535644531">
            <text:p>467.5115356445</text:p>
          </table:table-cell>
          <table:table-cell office:value-type="float" office:value="-0.009182779">
            <text:p>-0.009182779</text:p>
          </table:table-cell>
          <table:table-cell table:number-columns-repeated="4"/>
        </table:table-row>
        <table:table-row table:style-name="ro1">
          <table:table-cell office:value-type="float" office:value="467.626586914063">
            <text:p>467.6265869141</text:p>
          </table:table-cell>
          <table:table-cell office:value-type="float" office:value="0.001732085">
            <text:p>0.001732085</text:p>
          </table:table-cell>
          <table:table-cell table:number-columns-repeated="4"/>
        </table:table-row>
        <table:table-row table:style-name="ro1">
          <table:table-cell office:value-type="float" office:value="467.741638183594">
            <text:p>467.7416381836</text:p>
          </table:table-cell>
          <table:table-cell office:value-type="float" office:value="-0.01054614">
            <text:p>-0.01054614</text:p>
          </table:table-cell>
          <table:table-cell table:number-columns-repeated="4"/>
        </table:table-row>
        <table:table-row table:style-name="ro1">
          <table:table-cell office:value-type="float" office:value="467.856689453125">
            <text:p>467.8566894531</text:p>
          </table:table-cell>
          <table:table-cell office:value-type="float" office:value="-0.006617197">
            <text:p>-0.006617197</text:p>
          </table:table-cell>
          <table:table-cell table:number-columns-repeated="4"/>
        </table:table-row>
        <table:table-row table:style-name="ro1">
          <table:table-cell office:value-type="float" office:value="467.971740722656">
            <text:p>467.9717407227</text:p>
          </table:table-cell>
          <table:table-cell office:value-type="float" office:value="-0.008315987">
            <text:p>-0.008315987</text:p>
          </table:table-cell>
          <table:table-cell table:number-columns-repeated="4"/>
        </table:table-row>
        <table:table-row table:style-name="ro1">
          <table:table-cell office:value-type="float" office:value="468.086822509766">
            <text:p>468.0868225098</text:p>
          </table:table-cell>
          <table:table-cell office:value-type="float" office:value="-0.00173488">
            <text:p>-0.00173488</text:p>
          </table:table-cell>
          <table:table-cell table:number-columns-repeated="4"/>
        </table:table-row>
        <table:table-row table:style-name="ro1">
          <table:table-cell office:value-type="float" office:value="468.201873779297">
            <text:p>468.2018737793</text:p>
          </table:table-cell>
          <table:table-cell office:value-type="float" office:value="0.009147355">
            <text:p>0.009147355</text:p>
          </table:table-cell>
          <table:table-cell table:number-columns-repeated="4"/>
        </table:table-row>
        <table:table-row table:style-name="ro1">
          <table:table-cell office:value-type="float" office:value="468.316955566406">
            <text:p>468.3169555664</text:p>
          </table:table-cell>
          <table:table-cell office:value-type="float" office:value="-0.002676841">
            <text:p>-0.002676841</text:p>
          </table:table-cell>
          <table:table-cell table:number-columns-repeated="4"/>
        </table:table-row>
        <table:table-row table:style-name="ro1">
          <table:table-cell office:value-type="float" office:value="468.432037353516">
            <text:p>468.4320373535</text:p>
          </table:table-cell>
          <table:table-cell office:value-type="float" office:value="-0.003920761">
            <text:p>-0.003920761</text:p>
          </table:table-cell>
          <table:table-cell table:number-columns-repeated="4"/>
        </table:table-row>
        <table:table-row table:style-name="ro1">
          <table:table-cell office:value-type="float" office:value="468.547119140625">
            <text:p>468.5471191406</text:p>
          </table:table-cell>
          <table:table-cell office:value-type="float" office:value="-0.0006779758">
            <text:p>-0.0006779758</text:p>
          </table:table-cell>
          <table:table-cell table:number-columns-repeated="4"/>
        </table:table-row>
        <table:table-row table:style-name="ro1">
          <table:table-cell office:value-type="float" office:value="468.662200927734">
            <text:p>468.6622009277</text:p>
          </table:table-cell>
          <table:table-cell office:value-type="float" office:value="-0.007165574">
            <text:p>-0.007165574</text:p>
          </table:table-cell>
          <table:table-cell table:number-columns-repeated="4"/>
        </table:table-row>
        <table:table-row table:style-name="ro1">
          <table:table-cell office:value-type="float" office:value="468.777282714844">
            <text:p>468.7772827148</text:p>
          </table:table-cell>
          <table:table-cell office:value-type="float" office:value="-0.006958161">
            <text:p>-0.006958161</text:p>
          </table:table-cell>
          <table:table-cell table:number-columns-repeated="4"/>
        </table:table-row>
        <table:table-row table:style-name="ro1">
          <table:table-cell office:value-type="float" office:value="468.892395019531">
            <text:p>468.8923950195</text:p>
          </table:table-cell>
          <table:table-cell office:value-type="float" office:value="-0.005369547">
            <text:p>-0.005369547</text:p>
          </table:table-cell>
          <table:table-cell table:number-columns-repeated="4"/>
        </table:table-row>
        <table:table-row table:style-name="ro1">
          <table:table-cell office:value-type="float" office:value="469.007476806641">
            <text:p>469.0074768066</text:p>
          </table:table-cell>
          <table:table-cell office:value-type="float" office:value="0.026717">
            <text:p>0.026717</text:p>
          </table:table-cell>
          <table:table-cell table:number-columns-repeated="4"/>
        </table:table-row>
        <table:table-row table:style-name="ro1">
          <table:table-cell office:value-type="float" office:value="469.122589111328">
            <text:p>469.1225891113</text:p>
          </table:table-cell>
          <table:table-cell office:value-type="float" office:value="-0.0001004415">
            <text:p>-0.0001004415</text:p>
          </table:table-cell>
          <table:table-cell table:number-columns-repeated="4"/>
        </table:table-row>
        <table:table-row table:style-name="ro1">
          <table:table-cell office:value-type="float" office:value="469.237701416016">
            <text:p>469.237701416</text:p>
          </table:table-cell>
          <table:table-cell office:value-type="float" office:value="0.003958433">
            <text:p>0.003958433</text:p>
          </table:table-cell>
          <table:table-cell table:number-columns-repeated="4"/>
        </table:table-row>
        <table:table-row table:style-name="ro1">
          <table:table-cell office:value-type="float" office:value="469.352813720703">
            <text:p>469.3528137207</text:p>
          </table:table-cell>
          <table:table-cell office:value-type="float" office:value="0.01098956">
            <text:p>0.01098956</text:p>
          </table:table-cell>
          <table:table-cell table:number-columns-repeated="4"/>
        </table:table-row>
        <table:table-row table:style-name="ro1">
          <table:table-cell office:value-type="float" office:value="469.467926025391">
            <text:p>469.4679260254</text:p>
          </table:table-cell>
          <table:table-cell office:value-type="float" office:value="0.009123041">
            <text:p>0.009123041</text:p>
          </table:table-cell>
          <table:table-cell table:number-columns-repeated="4"/>
        </table:table-row>
        <table:table-row table:style-name="ro1">
          <table:table-cell office:value-type="float" office:value="469.583068847656">
            <text:p>469.5830688477</text:p>
          </table:table-cell>
          <table:table-cell office:value-type="float" office:value="0.009389683">
            <text:p>0.009389683</text:p>
          </table:table-cell>
          <table:table-cell table:number-columns-repeated="4"/>
        </table:table-row>
        <table:table-row table:style-name="ro1">
          <table:table-cell office:value-type="float" office:value="469.698181152344">
            <text:p>469.6981811523</text:p>
          </table:table-cell>
          <table:table-cell office:value-type="float" office:value="0.001364865">
            <text:p>0.001364865</text:p>
          </table:table-cell>
          <table:table-cell table:number-columns-repeated="4"/>
        </table:table-row>
        <table:table-row table:style-name="ro1">
          <table:table-cell office:value-type="float" office:value="469.813323974609">
            <text:p>469.8133239746</text:p>
          </table:table-cell>
          <table:table-cell office:value-type="float" office:value="-0.0054261">
            <text:p>-0.0054261</text:p>
          </table:table-cell>
          <table:table-cell table:number-columns-repeated="4"/>
        </table:table-row>
        <table:table-row table:style-name="ro1">
          <table:table-cell office:value-type="float" office:value="469.928436279297">
            <text:p>469.9284362793</text:p>
          </table:table-cell>
          <table:table-cell office:value-type="float" office:value="-0.003749339">
            <text:p>-0.003749339</text:p>
          </table:table-cell>
          <table:table-cell table:number-columns-repeated="4"/>
        </table:table-row>
        <table:table-row table:style-name="ro1">
          <table:table-cell office:value-type="float" office:value="470.043579101563">
            <text:p>470.0435791016</text:p>
          </table:table-cell>
          <table:table-cell office:value-type="float" office:value="0.003995586">
            <text:p>0.003995586</text:p>
          </table:table-cell>
          <table:table-cell table:number-columns-repeated="4"/>
        </table:table-row>
        <table:table-row table:style-name="ro1">
          <table:table-cell office:value-type="float" office:value="470.158721923828">
            <text:p>470.1587219238</text:p>
          </table:table-cell>
          <table:table-cell office:value-type="float" office:value="-0.01100076">
            <text:p>-0.01100076</text:p>
          </table:table-cell>
          <table:table-cell table:number-columns-repeated="4"/>
        </table:table-row>
        <table:table-row table:style-name="ro1">
          <table:table-cell office:value-type="float" office:value="470.273895263672">
            <text:p>470.2738952637</text:p>
          </table:table-cell>
          <table:table-cell office:value-type="float" office:value="0.004163286">
            <text:p>0.004163286</text:p>
          </table:table-cell>
          <table:table-cell table:number-columns-repeated="4"/>
        </table:table-row>
        <table:table-row table:style-name="ro1">
          <table:table-cell office:value-type="float" office:value="470.389038085938">
            <text:p>470.3890380859</text:p>
          </table:table-cell>
          <table:table-cell office:value-type="float" office:value="0.00452835">
            <text:p>0.00452835</text:p>
          </table:table-cell>
          <table:table-cell table:number-columns-repeated="4"/>
        </table:table-row>
        <table:table-row table:style-name="ro1">
          <table:table-cell office:value-type="float" office:value="470.504180908203">
            <text:p>470.5041809082</text:p>
          </table:table-cell>
          <table:table-cell office:value-type="float" office:value="-0.001544733">
            <text:p>-0.001544733</text:p>
          </table:table-cell>
          <table:table-cell table:number-columns-repeated="4"/>
        </table:table-row>
        <table:table-row table:style-name="ro1">
          <table:table-cell office:value-type="float" office:value="470.619354248047">
            <text:p>470.619354248</text:p>
          </table:table-cell>
          <table:table-cell office:value-type="float" office:value="-0.009814231">
            <text:p>-0.009814231</text:p>
          </table:table-cell>
          <table:table-cell table:number-columns-repeated="4"/>
        </table:table-row>
        <table:table-row table:style-name="ro1">
          <table:table-cell office:value-type="float" office:value="470.734527587891">
            <text:p>470.7345275879</text:p>
          </table:table-cell>
          <table:table-cell office:value-type="float" office:value="0.0102655">
            <text:p>0.0102655</text:p>
          </table:table-cell>
          <table:table-cell table:number-columns-repeated="4"/>
        </table:table-row>
        <table:table-row table:style-name="ro1">
          <table:table-cell office:value-type="float" office:value="470.849700927734">
            <text:p>470.8497009277</text:p>
          </table:table-cell>
          <table:table-cell office:value-type="float" office:value="0.0447893">
            <text:p>0.0447893</text:p>
          </table:table-cell>
          <table:table-cell table:number-columns-repeated="4"/>
        </table:table-row>
        <table:table-row table:style-name="ro1">
          <table:table-cell office:value-type="float" office:value="470.964874267578">
            <text:p>470.9648742676</text:p>
          </table:table-cell>
          <table:table-cell office:value-type="float" office:value="0.001832232">
            <text:p>0.001832232</text:p>
          </table:table-cell>
          <table:table-cell table:number-columns-repeated="4"/>
        </table:table-row>
        <table:table-row table:style-name="ro1">
          <table:table-cell office:value-type="float" office:value="471.080047607422">
            <text:p>471.0800476074</text:p>
          </table:table-cell>
          <table:table-cell office:value-type="float" office:value="0.01728268">
            <text:p>0.01728268</text:p>
          </table:table-cell>
          <table:table-cell table:number-columns-repeated="4"/>
        </table:table-row>
        <table:table-row table:style-name="ro1">
          <table:table-cell office:value-type="float" office:value="471.195220947266">
            <text:p>471.1952209473</text:p>
          </table:table-cell>
          <table:table-cell office:value-type="float" office:value="-0.01154053">
            <text:p>-0.01154053</text:p>
          </table:table-cell>
          <table:table-cell table:number-columns-repeated="4"/>
        </table:table-row>
        <table:table-row table:style-name="ro1">
          <table:table-cell office:value-type="float" office:value="471.310424804688">
            <text:p>471.3104248047</text:p>
          </table:table-cell>
          <table:table-cell office:value-type="float" office:value="0.007038701">
            <text:p>0.007038701</text:p>
          </table:table-cell>
          <table:table-cell table:number-columns-repeated="4"/>
        </table:table-row>
        <table:table-row table:style-name="ro1">
          <table:table-cell office:value-type="float" office:value="471.425628662109">
            <text:p>471.4256286621</text:p>
          </table:table-cell>
          <table:table-cell office:value-type="float" office:value="0.003420869">
            <text:p>0.003420869</text:p>
          </table:table-cell>
          <table:table-cell table:number-columns-repeated="4"/>
        </table:table-row>
        <table:table-row table:style-name="ro1">
          <table:table-cell office:value-type="float" office:value="471.540802001953">
            <text:p>471.540802002</text:p>
          </table:table-cell>
          <table:table-cell office:value-type="float" office:value="0.01780415">
            <text:p>0.01780415</text:p>
          </table:table-cell>
          <table:table-cell table:number-columns-repeated="4"/>
        </table:table-row>
        <table:table-row table:style-name="ro1">
          <table:table-cell office:value-type="float" office:value="471.656005859375">
            <text:p>471.6560058594</text:p>
          </table:table-cell>
          <table:table-cell office:value-type="float" office:value="-0.001139408">
            <text:p>-0.001139408</text:p>
          </table:table-cell>
          <table:table-cell table:number-columns-repeated="4"/>
        </table:table-row>
        <table:table-row table:style-name="ro1">
          <table:table-cell office:value-type="float" office:value="471.771209716797">
            <text:p>471.7712097168</text:p>
          </table:table-cell>
          <table:table-cell office:value-type="float" office:value="0.02051299">
            <text:p>0.02051299</text:p>
          </table:table-cell>
          <table:table-cell table:number-columns-repeated="4"/>
        </table:table-row>
        <table:table-row table:style-name="ro1">
          <table:table-cell office:value-type="float" office:value="471.886444091797">
            <text:p>471.8864440918</text:p>
          </table:table-cell>
          <table:table-cell office:value-type="float" office:value="0.01442437">
            <text:p>0.01442437</text:p>
          </table:table-cell>
          <table:table-cell table:number-columns-repeated="4"/>
        </table:table-row>
        <table:table-row table:style-name="ro1">
          <table:table-cell office:value-type="float" office:value="472.001647949219">
            <text:p>472.0016479492</text:p>
          </table:table-cell>
          <table:table-cell office:value-type="float" office:value="0.005529383">
            <text:p>0.005529383</text:p>
          </table:table-cell>
          <table:table-cell table:number-columns-repeated="4"/>
        </table:table-row>
        <table:table-row table:style-name="ro1">
          <table:table-cell office:value-type="float" office:value="472.116882324219">
            <text:p>472.1168823242</text:p>
          </table:table-cell>
          <table:table-cell office:value-type="float" office:value="-0.008776687">
            <text:p>-0.008776687</text:p>
          </table:table-cell>
          <table:table-cell table:number-columns-repeated="4"/>
        </table:table-row>
        <table:table-row table:style-name="ro1">
          <table:table-cell office:value-type="float" office:value="472.232086181641">
            <text:p>472.2320861816</text:p>
          </table:table-cell>
          <table:table-cell office:value-type="float" office:value="0.002834131">
            <text:p>0.002834131</text:p>
          </table:table-cell>
          <table:table-cell table:number-columns-repeated="4"/>
        </table:table-row>
        <table:table-row table:style-name="ro1">
          <table:table-cell office:value-type="float" office:value="472.347320556641">
            <text:p>472.3473205566</text:p>
          </table:table-cell>
          <table:table-cell office:value-type="float" office:value="0.001110414">
            <text:p>0.001110414</text:p>
          </table:table-cell>
          <table:table-cell table:number-columns-repeated="4"/>
        </table:table-row>
        <table:table-row table:style-name="ro1">
          <table:table-cell office:value-type="float" office:value="472.462554931641">
            <text:p>472.4625549316</text:p>
          </table:table-cell>
          <table:table-cell office:value-type="float" office:value="-0.01412898">
            <text:p>-0.01412898</text:p>
          </table:table-cell>
          <table:table-cell table:number-columns-repeated="4"/>
        </table:table-row>
        <table:table-row table:style-name="ro1">
          <table:table-cell office:value-type="float" office:value="472.577789306641">
            <text:p>472.5777893066</text:p>
          </table:table-cell>
          <table:table-cell office:value-type="float" office:value="-0.01025402">
            <text:p>-0.01025402</text:p>
          </table:table-cell>
          <table:table-cell table:number-columns-repeated="4"/>
        </table:table-row>
        <table:table-row table:style-name="ro1">
          <table:table-cell office:value-type="float" office:value="472.693023681641">
            <text:p>472.6930236816</text:p>
          </table:table-cell>
          <table:table-cell office:value-type="float" office:value="0.007812037">
            <text:p>0.007812037</text:p>
          </table:table-cell>
          <table:table-cell table:number-columns-repeated="4"/>
        </table:table-row>
        <table:table-row table:style-name="ro1">
          <table:table-cell office:value-type="float" office:value="472.808288574219">
            <text:p>472.8082885742</text:p>
          </table:table-cell>
          <table:table-cell office:value-type="float" office:value="-0.001729763">
            <text:p>-0.001729763</text:p>
          </table:table-cell>
          <table:table-cell table:number-columns-repeated="4"/>
        </table:table-row>
        <table:table-row table:style-name="ro1">
          <table:table-cell office:value-type="float" office:value="472.923522949219">
            <text:p>472.9235229492</text:p>
          </table:table-cell>
          <table:table-cell office:value-type="float" office:value="-0.007348171">
            <text:p>-0.007348171</text:p>
          </table:table-cell>
          <table:table-cell table:number-columns-repeated="4"/>
        </table:table-row>
        <table:table-row table:style-name="ro1">
          <table:table-cell office:value-type="float" office:value="473.038787841797">
            <text:p>473.0387878418</text:p>
          </table:table-cell>
          <table:table-cell office:value-type="float" office:value="-0.01140959">
            <text:p>-0.01140959</text:p>
          </table:table-cell>
          <table:table-cell table:number-columns-repeated="4"/>
        </table:table-row>
        <table:table-row table:style-name="ro1">
          <table:table-cell office:value-type="float" office:value="473.154052734375">
            <text:p>473.1540527344</text:p>
          </table:table-cell>
          <table:table-cell office:value-type="float" office:value="0.01364258">
            <text:p>0.01364258</text:p>
          </table:table-cell>
          <table:table-cell table:number-columns-repeated="4"/>
        </table:table-row>
        <table:table-row table:style-name="ro1">
          <table:table-cell office:value-type="float" office:value="473.269317626953">
            <text:p>473.269317627</text:p>
          </table:table-cell>
          <table:table-cell office:value-type="float" office:value="0.006566604">
            <text:p>0.006566604</text:p>
          </table:table-cell>
          <table:table-cell table:number-columns-repeated="4"/>
        </table:table-row>
        <table:table-row table:style-name="ro1">
          <table:table-cell office:value-type="float" office:value="473.384582519531">
            <text:p>473.3845825195</text:p>
          </table:table-cell>
          <table:table-cell office:value-type="float" office:value="-0.005216519">
            <text:p>-0.005216519</text:p>
          </table:table-cell>
          <table:table-cell table:number-columns-repeated="4"/>
        </table:table-row>
        <table:table-row table:style-name="ro1">
          <table:table-cell office:value-type="float" office:value="473.499847412109">
            <text:p>473.4998474121</text:p>
          </table:table-cell>
          <table:table-cell office:value-type="float" office:value="-0.001751419">
            <text:p>-0.001751419</text:p>
          </table:table-cell>
          <table:table-cell table:number-columns-repeated="4"/>
        </table:table-row>
        <table:table-row table:style-name="ro1">
          <table:table-cell office:value-type="float" office:value="473.615112304688">
            <text:p>473.6151123047</text:p>
          </table:table-cell>
          <table:table-cell office:value-type="float" office:value="0.0163091">
            <text:p>0.0163091</text:p>
          </table:table-cell>
          <table:table-cell table:number-columns-repeated="4"/>
        </table:table-row>
        <table:table-row table:style-name="ro1">
          <table:table-cell office:value-type="float" office:value="473.730407714844">
            <text:p>473.7304077148</text:p>
          </table:table-cell>
          <table:table-cell office:value-type="float" office:value="0.02650089">
            <text:p>0.02650089</text:p>
          </table:table-cell>
          <table:table-cell table:number-columns-repeated="4"/>
        </table:table-row>
        <table:table-row table:style-name="ro1">
          <table:table-cell office:value-type="float" office:value="473.845703125">
            <text:p>473.845703125</text:p>
          </table:table-cell>
          <table:table-cell office:value-type="float" office:value="-0.004368757">
            <text:p>-0.004368757</text:p>
          </table:table-cell>
          <table:table-cell table:number-columns-repeated="4"/>
        </table:table-row>
        <table:table-row table:style-name="ro1">
          <table:table-cell office:value-type="float" office:value="473.960998535156">
            <text:p>473.9609985352</text:p>
          </table:table-cell>
          <table:table-cell office:value-type="float" office:value="0.002928899">
            <text:p>0.002928899</text:p>
          </table:table-cell>
          <table:table-cell table:number-columns-repeated="4"/>
        </table:table-row>
        <table:table-row table:style-name="ro1">
          <table:table-cell office:value-type="float" office:value="474.076263427734">
            <text:p>474.0762634277</text:p>
          </table:table-cell>
          <table:table-cell office:value-type="float" office:value="0.001882215">
            <text:p>0.001882215</text:p>
          </table:table-cell>
          <table:table-cell table:number-columns-repeated="4"/>
        </table:table-row>
        <table:table-row table:style-name="ro1">
          <table:table-cell office:value-type="float" office:value="474.191589355469">
            <text:p>474.1915893555</text:p>
          </table:table-cell>
          <table:table-cell office:value-type="float" office:value="0.01882415">
            <text:p>0.01882415</text:p>
          </table:table-cell>
          <table:table-cell table:number-columns-repeated="4"/>
        </table:table-row>
        <table:table-row table:style-name="ro1">
          <table:table-cell office:value-type="float" office:value="474.306884765625">
            <text:p>474.3068847656</text:p>
          </table:table-cell>
          <table:table-cell office:value-type="float" office:value="0.0216276">
            <text:p>0.0216276</text:p>
          </table:table-cell>
          <table:table-cell table:number-columns-repeated="4"/>
        </table:table-row>
        <table:table-row table:style-name="ro1">
          <table:table-cell office:value-type="float" office:value="474.422180175781">
            <text:p>474.4221801758</text:p>
          </table:table-cell>
          <table:table-cell office:value-type="float" office:value="-0.01292618">
            <text:p>-0.01292618</text:p>
          </table:table-cell>
          <table:table-cell table:number-columns-repeated="4"/>
        </table:table-row>
        <table:table-row table:style-name="ro1">
          <table:table-cell office:value-type="float" office:value="474.537506103516">
            <text:p>474.5375061035</text:p>
          </table:table-cell>
          <table:table-cell office:value-type="float" office:value="0.005562367">
            <text:p>0.005562367</text:p>
          </table:table-cell>
          <table:table-cell table:number-columns-repeated="4"/>
        </table:table-row>
        <table:table-row table:style-name="ro1">
          <table:table-cell office:value-type="float" office:value="474.652801513672">
            <text:p>474.6528015137</text:p>
          </table:table-cell>
          <table:table-cell office:value-type="float" office:value="-0.005278447">
            <text:p>-0.005278447</text:p>
          </table:table-cell>
          <table:table-cell table:number-columns-repeated="4"/>
        </table:table-row>
        <table:table-row table:style-name="ro1">
          <table:table-cell office:value-type="float" office:value="474.768127441406">
            <text:p>474.7681274414</text:p>
          </table:table-cell>
          <table:table-cell office:value-type="float" office:value="-0.009421125">
            <text:p>-0.009421125</text:p>
          </table:table-cell>
          <table:table-cell table:number-columns-repeated="4"/>
        </table:table-row>
        <table:table-row table:style-name="ro1">
          <table:table-cell office:value-type="float" office:value="474.883453369141">
            <text:p>474.8834533691</text:p>
          </table:table-cell>
          <table:table-cell office:value-type="float" office:value="-0.007128335">
            <text:p>-0.007128335</text:p>
          </table:table-cell>
          <table:table-cell table:number-columns-repeated="4"/>
        </table:table-row>
        <table:table-row table:style-name="ro1">
          <table:table-cell office:value-type="float" office:value="474.998779296875">
            <text:p>474.9987792969</text:p>
          </table:table-cell>
          <table:table-cell office:value-type="float" office:value="0.004229985">
            <text:p>0.004229985</text:p>
          </table:table-cell>
          <table:table-cell table:number-columns-repeated="4"/>
        </table:table-row>
        <table:table-row table:style-name="ro1">
          <table:table-cell office:value-type="float" office:value="475.114135742188">
            <text:p>475.1141357422</text:p>
          </table:table-cell>
          <table:table-cell office:value-type="float" office:value="-0.006439574">
            <text:p>-0.006439574</text:p>
          </table:table-cell>
          <table:table-cell table:number-columns-repeated="4"/>
        </table:table-row>
        <table:table-row table:style-name="ro1">
          <table:table-cell office:value-type="float" office:value="475.229461669922">
            <text:p>475.2294616699</text:p>
          </table:table-cell>
          <table:table-cell office:value-type="float" office:value="-0.005834016">
            <text:p>-0.005834016</text:p>
          </table:table-cell>
          <table:table-cell table:number-columns-repeated="4"/>
        </table:table-row>
        <table:table-row table:style-name="ro1">
          <table:table-cell office:value-type="float" office:value="475.344818115234">
            <text:p>475.3448181152</text:p>
          </table:table-cell>
          <table:table-cell office:value-type="float" office:value="0.002314253">
            <text:p>0.002314253</text:p>
          </table:table-cell>
          <table:table-cell table:number-columns-repeated="4"/>
        </table:table-row>
        <table:table-row table:style-name="ro1">
          <table:table-cell office:value-type="float" office:value="475.460144042969">
            <text:p>475.460144043</text:p>
          </table:table-cell>
          <table:table-cell office:value-type="float" office:value="0.00909913">
            <text:p>0.00909913</text:p>
          </table:table-cell>
          <table:table-cell table:number-columns-repeated="4"/>
        </table:table-row>
        <table:table-row table:style-name="ro1">
          <table:table-cell office:value-type="float" office:value="475.575500488281">
            <text:p>475.5755004883</text:p>
          </table:table-cell>
          <table:table-cell office:value-type="float" office:value="0.00191308">
            <text:p>0.00191308</text:p>
          </table:table-cell>
          <table:table-cell table:number-columns-repeated="4"/>
        </table:table-row>
        <table:table-row table:style-name="ro1">
          <table:table-cell office:value-type="float" office:value="475.690856933594">
            <text:p>475.6908569336</text:p>
          </table:table-cell>
          <table:table-cell office:value-type="float" office:value="-0.01093683">
            <text:p>-0.01093683</text:p>
          </table:table-cell>
          <table:table-cell table:number-columns-repeated="4"/>
        </table:table-row>
        <table:table-row table:style-name="ro1">
          <table:table-cell office:value-type="float" office:value="475.806213378906">
            <text:p>475.8062133789</text:p>
          </table:table-cell>
          <table:table-cell office:value-type="float" office:value="-0.01177768">
            <text:p>-0.01177768</text:p>
          </table:table-cell>
          <table:table-cell table:number-columns-repeated="4"/>
        </table:table-row>
        <table:table-row table:style-name="ro1">
          <table:table-cell office:value-type="float" office:value="475.921569824219">
            <text:p>475.9215698242</text:p>
          </table:table-cell>
          <table:table-cell office:value-type="float" office:value="0.001648091">
            <text:p>0.001648091</text:p>
          </table:table-cell>
          <table:table-cell table:number-columns-repeated="4"/>
        </table:table-row>
        <table:table-row table:style-name="ro1">
          <table:table-cell office:value-type="float" office:value="476.036956787109">
            <text:p>476.0369567871</text:p>
          </table:table-cell>
          <table:table-cell office:value-type="float" office:value="0.007065962">
            <text:p>0.007065962</text:p>
          </table:table-cell>
          <table:table-cell table:number-columns-repeated="4"/>
        </table:table-row>
        <table:table-row table:style-name="ro1">
          <table:table-cell office:value-type="float" office:value="476.152313232422">
            <text:p>476.1523132324</text:p>
          </table:table-cell>
          <table:table-cell office:value-type="float" office:value="0.00650063">
            <text:p>0.00650063</text:p>
          </table:table-cell>
          <table:table-cell table:number-columns-repeated="4"/>
        </table:table-row>
        <table:table-row table:style-name="ro1">
          <table:table-cell office:value-type="float" office:value="476.267700195313">
            <text:p>476.2677001953</text:p>
          </table:table-cell>
          <table:table-cell office:value-type="float" office:value="-0.01242266">
            <text:p>-0.01242266</text:p>
          </table:table-cell>
          <table:table-cell table:number-columns-repeated="4"/>
        </table:table-row>
        <table:table-row table:style-name="ro1">
          <table:table-cell office:value-type="float" office:value="476.383087158203">
            <text:p>476.3830871582</text:p>
          </table:table-cell>
          <table:table-cell office:value-type="float" office:value="0.01409964">
            <text:p>0.01409964</text:p>
          </table:table-cell>
          <table:table-cell table:number-columns-repeated="4"/>
        </table:table-row>
        <table:table-row table:style-name="ro1">
          <table:table-cell office:value-type="float" office:value="476.498474121094">
            <text:p>476.4984741211</text:p>
          </table:table-cell>
          <table:table-cell office:value-type="string">
            <text:p>1.589827E-05</text:p>
          </table:table-cell>
          <table:table-cell table:number-columns-repeated="4"/>
        </table:table-row>
        <table:table-row table:style-name="ro1">
          <table:table-cell office:value-type="float" office:value="476.613861083984">
            <text:p>476.613861084</text:p>
          </table:table-cell>
          <table:table-cell office:value-type="float" office:value="-0.009219873">
            <text:p>-0.009219873</text:p>
          </table:table-cell>
          <table:table-cell table:number-columns-repeated="4"/>
        </table:table-row>
        <table:table-row table:style-name="ro1">
          <table:table-cell office:value-type="float" office:value="476.729248046875">
            <text:p>476.7292480469</text:p>
          </table:table-cell>
          <table:table-cell office:value-type="float" office:value="-0.007238764">
            <text:p>-0.007238764</text:p>
          </table:table-cell>
          <table:table-cell table:number-columns-repeated="4"/>
        </table:table-row>
        <table:table-row table:style-name="ro1">
          <table:table-cell office:value-type="float" office:value="476.844665527344">
            <text:p>476.8446655273</text:p>
          </table:table-cell>
          <table:table-cell office:value-type="float" office:value="0.01542262">
            <text:p>0.01542262</text:p>
          </table:table-cell>
          <table:table-cell table:number-columns-repeated="4"/>
        </table:table-row>
        <table:table-row table:style-name="ro1">
          <table:table-cell office:value-type="float" office:value="476.960052490234">
            <text:p>476.9600524902</text:p>
          </table:table-cell>
          <table:table-cell office:value-type="float" office:value="0.001497909">
            <text:p>0.001497909</text:p>
          </table:table-cell>
          <table:table-cell table:number-columns-repeated="4"/>
        </table:table-row>
        <table:table-row table:style-name="ro1">
          <table:table-cell office:value-type="float" office:value="477.075469970703">
            <text:p>477.0754699707</text:p>
          </table:table-cell>
          <table:table-cell office:value-type="float" office:value="-0.01326253">
            <text:p>-0.01326253</text:p>
          </table:table-cell>
          <table:table-cell table:number-columns-repeated="4"/>
        </table:table-row>
        <table:table-row table:style-name="ro1">
          <table:table-cell office:value-type="float" office:value="477.190887451172">
            <text:p>477.1908874512</text:p>
          </table:table-cell>
          <table:table-cell office:value-type="float" office:value="-0.007593178">
            <text:p>-0.007593178</text:p>
          </table:table-cell>
          <table:table-cell table:number-columns-repeated="4"/>
        </table:table-row>
        <table:table-row table:style-name="ro1">
          <table:table-cell office:value-type="float" office:value="477.306304931641">
            <text:p>477.3063049316</text:p>
          </table:table-cell>
          <table:table-cell office:value-type="float" office:value="0.01603232">
            <text:p>0.01603232</text:p>
          </table:table-cell>
          <table:table-cell table:number-columns-repeated="4"/>
        </table:table-row>
        <table:table-row table:style-name="ro1">
          <table:table-cell office:value-type="float" office:value="477.421722412109">
            <text:p>477.4217224121</text:p>
          </table:table-cell>
          <table:table-cell office:value-type="float" office:value="-0.008248338">
            <text:p>-0.008248338</text:p>
          </table:table-cell>
          <table:table-cell table:number-columns-repeated="4"/>
        </table:table-row>
        <table:table-row table:style-name="ro1">
          <table:table-cell office:value-type="float" office:value="477.537139892578">
            <text:p>477.5371398926</text:p>
          </table:table-cell>
          <table:table-cell office:value-type="float" office:value="-0.004722904">
            <text:p>-0.004722904</text:p>
          </table:table-cell>
          <table:table-cell table:number-columns-repeated="4"/>
        </table:table-row>
        <table:table-row table:style-name="ro1">
          <table:table-cell office:value-type="float" office:value="477.652557373047">
            <text:p>477.652557373</text:p>
          </table:table-cell>
          <table:table-cell office:value-type="float" office:value="-0.01317561">
            <text:p>-0.01317561</text:p>
          </table:table-cell>
          <table:table-cell table:number-columns-repeated="4"/>
        </table:table-row>
        <table:table-row table:style-name="ro1">
          <table:table-cell office:value-type="float" office:value="477.768005371094">
            <text:p>477.7680053711</text:p>
          </table:table-cell>
          <table:table-cell office:value-type="float" office:value="-0.006076104">
            <text:p>-0.006076104</text:p>
          </table:table-cell>
          <table:table-cell table:number-columns-repeated="4"/>
        </table:table-row>
        <table:table-row table:style-name="ro1">
          <table:table-cell office:value-type="float" office:value="477.883422851563">
            <text:p>477.8834228516</text:p>
          </table:table-cell>
          <table:table-cell office:value-type="float" office:value="0.0112539">
            <text:p>0.0112539</text:p>
          </table:table-cell>
          <table:table-cell table:number-columns-repeated="4"/>
        </table:table-row>
        <table:table-row table:style-name="ro1">
          <table:table-cell office:value-type="float" office:value="477.998870849609">
            <text:p>477.9988708496</text:p>
          </table:table-cell>
          <table:table-cell office:value-type="float" office:value="-0.01413175">
            <text:p>-0.01413175</text:p>
          </table:table-cell>
          <table:table-cell table:number-columns-repeated="4"/>
        </table:table-row>
        <table:table-row table:style-name="ro1">
          <table:table-cell office:value-type="float" office:value="478.114318847656">
            <text:p>478.1143188477</text:p>
          </table:table-cell>
          <table:table-cell office:value-type="float" office:value="-0.005001226">
            <text:p>-0.005001226</text:p>
          </table:table-cell>
          <table:table-cell table:number-columns-repeated="4"/>
        </table:table-row>
        <table:table-row table:style-name="ro1">
          <table:table-cell office:value-type="float" office:value="478.229766845703">
            <text:p>478.2297668457</text:p>
          </table:table-cell>
          <table:table-cell office:value-type="float" office:value="0.002492846">
            <text:p>0.002492846</text:p>
          </table:table-cell>
          <table:table-cell table:number-columns-repeated="4"/>
        </table:table-row>
        <table:table-row table:style-name="ro1">
          <table:table-cell office:value-type="float" office:value="478.345245361328">
            <text:p>478.3452453613</text:p>
          </table:table-cell>
          <table:table-cell office:value-type="string">
            <text:p>4.557252E-05</text:p>
          </table:table-cell>
          <table:table-cell table:number-columns-repeated="4"/>
        </table:table-row>
        <table:table-row table:style-name="ro1">
          <table:table-cell office:value-type="float" office:value="478.460693359375">
            <text:p>478.4606933594</text:p>
          </table:table-cell>
          <table:table-cell office:value-type="float" office:value="-0.01303391">
            <text:p>-0.01303391</text:p>
          </table:table-cell>
          <table:table-cell table:number-columns-repeated="4"/>
        </table:table-row>
        <table:table-row table:style-name="ro1">
          <table:table-cell office:value-type="float" office:value="478.576141357422">
            <text:p>478.5761413574</text:p>
          </table:table-cell>
          <table:table-cell office:value-type="float" office:value="-0.006381243">
            <text:p>-0.006381243</text:p>
          </table:table-cell>
          <table:table-cell table:number-columns-repeated="4"/>
        </table:table-row>
        <table:table-row table:style-name="ro1">
          <table:table-cell office:value-type="float" office:value="478.691619873047">
            <text:p>478.691619873</text:p>
          </table:table-cell>
          <table:table-cell office:value-type="float" office:value="0.01162729">
            <text:p>0.01162729</text:p>
          </table:table-cell>
          <table:table-cell table:number-columns-repeated="4"/>
        </table:table-row>
        <table:table-row table:style-name="ro1">
          <table:table-cell office:value-type="float" office:value="478.807098388672">
            <text:p>478.8070983887</text:p>
          </table:table-cell>
          <table:table-cell office:value-type="float" office:value="-0.003508356">
            <text:p>-0.003508356</text:p>
          </table:table-cell>
          <table:table-cell table:number-columns-repeated="4"/>
        </table:table-row>
        <table:table-row table:style-name="ro1">
          <table:table-cell office:value-type="float" office:value="478.922576904297">
            <text:p>478.9225769043</text:p>
          </table:table-cell>
          <table:table-cell office:value-type="float" office:value="-0.00424924">
            <text:p>-0.00424924</text:p>
          </table:table-cell>
          <table:table-cell table:number-columns-repeated="4"/>
        </table:table-row>
        <table:table-row table:style-name="ro1">
          <table:table-cell office:value-type="float" office:value="479.038055419922">
            <text:p>479.0380554199</text:p>
          </table:table-cell>
          <table:table-cell office:value-type="float" office:value="-0.01254044">
            <text:p>-0.01254044</text:p>
          </table:table-cell>
          <table:table-cell table:number-columns-repeated="4"/>
        </table:table-row>
        <table:table-row table:style-name="ro1">
          <table:table-cell office:value-type="float" office:value="479.153533935547">
            <text:p>479.1535339355</text:p>
          </table:table-cell>
          <table:table-cell office:value-type="float" office:value="-0.003053686">
            <text:p>-0.003053686</text:p>
          </table:table-cell>
          <table:table-cell table:number-columns-repeated="4"/>
        </table:table-row>
        <table:table-row table:style-name="ro1">
          <table:table-cell office:value-type="float" office:value="479.269012451172">
            <text:p>479.2690124512</text:p>
          </table:table-cell>
          <table:table-cell office:value-type="float" office:value="0.01992342">
            <text:p>0.01992342</text:p>
          </table:table-cell>
          <table:table-cell table:number-columns-repeated="4"/>
        </table:table-row>
        <table:table-row table:style-name="ro1">
          <table:table-cell office:value-type="float" office:value="479.384521484375">
            <text:p>479.3845214844</text:p>
          </table:table-cell>
          <table:table-cell office:value-type="float" office:value="-0.009655163">
            <text:p>-0.009655163</text:p>
          </table:table-cell>
          <table:table-cell table:number-columns-repeated="4"/>
        </table:table-row>
        <table:table-row table:style-name="ro1">
          <table:table-cell office:value-type="float" office:value="479.500030517578">
            <text:p>479.5000305176</text:p>
          </table:table-cell>
          <table:table-cell office:value-type="float" office:value="-0.007047126">
            <text:p>-0.007047126</text:p>
          </table:table-cell>
          <table:table-cell table:number-columns-repeated="4"/>
        </table:table-row>
        <table:table-row table:style-name="ro1">
          <table:table-cell office:value-type="float" office:value="479.615509033203">
            <text:p>479.6155090332</text:p>
          </table:table-cell>
          <table:table-cell office:value-type="float" office:value="0.002674795">
            <text:p>0.002674795</text:p>
          </table:table-cell>
          <table:table-cell table:number-columns-repeated="4"/>
        </table:table-row>
        <table:table-row table:style-name="ro1">
          <table:table-cell office:value-type="float" office:value="479.731018066406">
            <text:p>479.7310180664</text:p>
          </table:table-cell>
          <table:table-cell office:value-type="float" office:value="0.001289068">
            <text:p>0.001289068</text:p>
          </table:table-cell>
          <table:table-cell table:number-columns-repeated="4"/>
        </table:table-row>
        <table:table-row table:style-name="ro1">
          <table:table-cell office:value-type="float" office:value="479.846527099609">
            <text:p>479.8465270996</text:p>
          </table:table-cell>
          <table:table-cell office:value-type="float" office:value="-0.00586313">
            <text:p>-0.00586313</text:p>
          </table:table-cell>
          <table:table-cell table:number-columns-repeated="4"/>
        </table:table-row>
        <table:table-row table:style-name="ro1">
          <table:table-cell office:value-type="float" office:value="479.962066650391">
            <text:p>479.9620666504</text:p>
          </table:table-cell>
          <table:table-cell office:value-type="float" office:value="-0.003319264">
            <text:p>-0.003319264</text:p>
          </table:table-cell>
          <table:table-cell table:number-columns-repeated="4"/>
        </table:table-row>
        <table:table-row table:style-name="ro1">
          <table:table-cell office:value-type="float" office:value="480.077575683594">
            <text:p>480.0775756836</text:p>
          </table:table-cell>
          <table:table-cell office:value-type="float" office:value="0.003126406">
            <text:p>0.003126406</text:p>
          </table:table-cell>
          <table:table-cell table:number-columns-repeated="4"/>
        </table:table-row>
        <table:table-row table:style-name="ro1">
          <table:table-cell office:value-type="float" office:value="480.193084716797">
            <text:p>480.1930847168</text:p>
          </table:table-cell>
          <table:table-cell office:value-type="float" office:value="0.01426292">
            <text:p>0.01426292</text:p>
          </table:table-cell>
          <table:table-cell table:number-columns-repeated="4"/>
        </table:table-row>
        <table:table-row table:style-name="ro1">
          <table:table-cell office:value-type="float" office:value="480.308624267578">
            <text:p>480.3086242676</text:p>
          </table:table-cell>
          <table:table-cell office:value-type="float" office:value="-0.005339677">
            <text:p>-0.005339677</text:p>
          </table:table-cell>
          <table:table-cell table:number-columns-repeated="4"/>
        </table:table-row>
        <table:table-row table:style-name="ro1">
          <table:table-cell office:value-type="float" office:value="480.424163818359">
            <text:p>480.4241638184</text:p>
          </table:table-cell>
          <table:table-cell office:value-type="float" office:value="-0.006340796">
            <text:p>-0.006340796</text:p>
          </table:table-cell>
          <table:table-cell table:number-columns-repeated="4"/>
        </table:table-row>
        <table:table-row table:style-name="ro1">
          <table:table-cell office:value-type="float" office:value="480.539703369141">
            <text:p>480.5397033691</text:p>
          </table:table-cell>
          <table:table-cell office:value-type="float" office:value="0.006471334">
            <text:p>0.006471334</text:p>
          </table:table-cell>
          <table:table-cell table:number-columns-repeated="4"/>
        </table:table-row>
        <table:table-row table:style-name="ro1">
          <table:table-cell office:value-type="float" office:value="480.655242919922">
            <text:p>480.6552429199</text:p>
          </table:table-cell>
          <table:table-cell office:value-type="float" office:value="-0.004956874">
            <text:p>-0.004956874</text:p>
          </table:table-cell>
          <table:table-cell table:number-columns-repeated="4"/>
        </table:table-row>
        <table:table-row table:style-name="ro1">
          <table:table-cell office:value-type="float" office:value="480.770782470703">
            <text:p>480.7707824707</text:p>
          </table:table-cell>
          <table:table-cell office:value-type="float" office:value="-0.01065027">
            <text:p>-0.01065027</text:p>
          </table:table-cell>
          <table:table-cell table:number-columns-repeated="4"/>
        </table:table-row>
        <table:table-row table:style-name="ro1">
          <table:table-cell office:value-type="float" office:value="480.886322021484">
            <text:p>480.8863220215</text:p>
          </table:table-cell>
          <table:table-cell office:value-type="float" office:value="-0.006952164">
            <text:p>-0.006952164</text:p>
          </table:table-cell>
          <table:table-cell table:number-columns-repeated="4"/>
        </table:table-row>
        <table:table-row table:style-name="ro1">
          <table:table-cell office:value-type="float" office:value="481.001892089844">
            <text:p>481.0018920898</text:p>
          </table:table-cell>
          <table:table-cell office:value-type="float" office:value="0.0003560374">
            <text:p>0.0003560374</text:p>
          </table:table-cell>
          <table:table-cell table:number-columns-repeated="4"/>
        </table:table-row>
        <table:table-row table:style-name="ro1">
          <table:table-cell office:value-type="float" office:value="481.117431640625">
            <text:p>481.1174316406</text:p>
          </table:table-cell>
          <table:table-cell office:value-type="float" office:value="0.002969062">
            <text:p>0.002969062</text:p>
          </table:table-cell>
          <table:table-cell table:number-columns-repeated="4"/>
        </table:table-row>
        <table:table-row table:style-name="ro1">
          <table:table-cell office:value-type="float" office:value="481.233001708984">
            <text:p>481.233001709</text:p>
          </table:table-cell>
          <table:table-cell office:value-type="float" office:value="0.003427353">
            <text:p>0.003427353</text:p>
          </table:table-cell>
          <table:table-cell table:number-columns-repeated="4"/>
        </table:table-row>
        <table:table-row table:style-name="ro1">
          <table:table-cell office:value-type="float" office:value="481.348571777344">
            <text:p>481.3485717773</text:p>
          </table:table-cell>
          <table:table-cell office:value-type="float" office:value="-0.01147657">
            <text:p>-0.01147657</text:p>
          </table:table-cell>
          <table:table-cell table:number-columns-repeated="4"/>
        </table:table-row>
        <table:table-row table:style-name="ro1">
          <table:table-cell office:value-type="float" office:value="481.464141845703">
            <text:p>481.4641418457</text:p>
          </table:table-cell>
          <table:table-cell office:value-type="float" office:value="-0.005850277">
            <text:p>-0.005850277</text:p>
          </table:table-cell>
          <table:table-cell table:number-columns-repeated="4"/>
        </table:table-row>
        <table:table-row table:style-name="ro1">
          <table:table-cell office:value-type="float" office:value="481.579711914063">
            <text:p>481.5797119141</text:p>
          </table:table-cell>
          <table:table-cell office:value-type="float" office:value="0.003164978">
            <text:p>0.003164978</text:p>
          </table:table-cell>
          <table:table-cell table:number-columns-repeated="4"/>
        </table:table-row>
        <table:table-row table:style-name="ro1">
          <table:table-cell office:value-type="float" office:value="481.695281982422">
            <text:p>481.6952819824</text:p>
          </table:table-cell>
          <table:table-cell office:value-type="float" office:value="-0.01030537">
            <text:p>-0.01030537</text:p>
          </table:table-cell>
          <table:table-cell table:number-columns-repeated="4"/>
        </table:table-row>
        <table:table-row table:style-name="ro1">
          <table:table-cell office:value-type="float" office:value="481.810882568359">
            <text:p>481.8108825684</text:p>
          </table:table-cell>
          <table:table-cell office:value-type="float" office:value="-0.004989084">
            <text:p>-0.004989084</text:p>
          </table:table-cell>
          <table:table-cell table:number-columns-repeated="4"/>
        </table:table-row>
        <table:table-row table:style-name="ro1">
          <table:table-cell office:value-type="float" office:value="481.926452636719">
            <text:p>481.9264526367</text:p>
          </table:table-cell>
          <table:table-cell office:value-type="float" office:value="-0.003339173">
            <text:p>-0.003339173</text:p>
          </table:table-cell>
          <table:table-cell table:number-columns-repeated="4"/>
        </table:table-row>
        <table:table-row table:style-name="ro1">
          <table:table-cell office:value-type="float" office:value="482.042053222656">
            <text:p>482.0420532227</text:p>
          </table:table-cell>
          <table:table-cell office:value-type="float" office:value="0.01569555">
            <text:p>0.01569555</text:p>
          </table:table-cell>
          <table:table-cell table:number-columns-repeated="4"/>
        </table:table-row>
        <table:table-row table:style-name="ro1">
          <table:table-cell office:value-type="float" office:value="482.157653808594">
            <text:p>482.1576538086</text:p>
          </table:table-cell>
          <table:table-cell office:value-type="float" office:value="-0.008112952">
            <text:p>-0.008112952</text:p>
          </table:table-cell>
          <table:table-cell table:number-columns-repeated="4"/>
        </table:table-row>
        <table:table-row table:style-name="ro1">
          <table:table-cell office:value-type="float" office:value="482.273254394531">
            <text:p>482.2732543945</text:p>
          </table:table-cell>
          <table:table-cell office:value-type="float" office:value="-0.003136605">
            <text:p>-0.003136605</text:p>
          </table:table-cell>
          <table:table-cell table:number-columns-repeated="4"/>
        </table:table-row>
        <table:table-row table:style-name="ro1">
          <table:table-cell office:value-type="float" office:value="482.388854980469">
            <text:p>482.3888549805</text:p>
          </table:table-cell>
          <table:table-cell office:value-type="float" office:value="0.01211784">
            <text:p>0.01211784</text:p>
          </table:table-cell>
          <table:table-cell table:number-columns-repeated="4"/>
        </table:table-row>
        <table:table-row table:style-name="ro1">
          <table:table-cell office:value-type="float" office:value="482.504455566406">
            <text:p>482.5044555664</text:p>
          </table:table-cell>
          <table:table-cell office:value-type="float" office:value="0.01584007">
            <text:p>0.01584007</text:p>
          </table:table-cell>
          <table:table-cell table:number-columns-repeated="4"/>
        </table:table-row>
        <table:table-row table:style-name="ro1">
          <table:table-cell office:value-type="float" office:value="482.620086669922">
            <text:p>482.6200866699</text:p>
          </table:table-cell>
          <table:table-cell office:value-type="float" office:value="-0.007642293">
            <text:p>-0.007642293</text:p>
          </table:table-cell>
          <table:table-cell table:number-columns-repeated="4"/>
        </table:table-row>
        <table:table-row table:style-name="ro1">
          <table:table-cell office:value-type="float" office:value="482.735687255859">
            <text:p>482.7356872559</text:p>
          </table:table-cell>
          <table:table-cell office:value-type="float" office:value="0.00232343">
            <text:p>0.00232343</text:p>
          </table:table-cell>
          <table:table-cell table:number-columns-repeated="4"/>
        </table:table-row>
        <table:table-row table:style-name="ro1">
          <table:table-cell office:value-type="float" office:value="482.851318359375">
            <text:p>482.8513183594</text:p>
          </table:table-cell>
          <table:table-cell office:value-type="float" office:value="-0.006468318">
            <text:p>-0.006468318</text:p>
          </table:table-cell>
          <table:table-cell table:number-columns-repeated="4"/>
        </table:table-row>
        <table:table-row table:style-name="ro1">
          <table:table-cell office:value-type="float" office:value="482.966949462891">
            <text:p>482.9669494629</text:p>
          </table:table-cell>
          <table:table-cell office:value-type="float" office:value="0.007151415">
            <text:p>0.007151415</text:p>
          </table:table-cell>
          <table:table-cell table:number-columns-repeated="4"/>
        </table:table-row>
        <table:table-row table:style-name="ro1">
          <table:table-cell office:value-type="float" office:value="483.082580566406">
            <text:p>483.0825805664</text:p>
          </table:table-cell>
          <table:table-cell office:value-type="float" office:value="-0.01641278">
            <text:p>-0.01641278</text:p>
          </table:table-cell>
          <table:table-cell table:number-columns-repeated="4"/>
        </table:table-row>
        <table:table-row table:style-name="ro1">
          <table:table-cell office:value-type="float" office:value="483.198211669922">
            <text:p>483.1982116699</text:p>
          </table:table-cell>
          <table:table-cell office:value-type="float" office:value="0.0002927718">
            <text:p>0.0002927718</text:p>
          </table:table-cell>
          <table:table-cell table:number-columns-repeated="4"/>
        </table:table-row>
        <table:table-row table:style-name="ro1">
          <table:table-cell office:value-type="float" office:value="483.313842773438">
            <text:p>483.3138427734</text:p>
          </table:table-cell>
          <table:table-cell office:value-type="float" office:value="0.003856096">
            <text:p>0.003856096</text:p>
          </table:table-cell>
          <table:table-cell table:number-columns-repeated="4"/>
        </table:table-row>
        <table:table-row table:style-name="ro1">
          <table:table-cell office:value-type="float" office:value="483.429473876953">
            <text:p>483.429473877</text:p>
          </table:table-cell>
          <table:table-cell office:value-type="float" office:value="0.009870457">
            <text:p>0.009870457</text:p>
          </table:table-cell>
          <table:table-cell table:number-columns-repeated="4"/>
        </table:table-row>
        <table:table-row table:style-name="ro1">
          <table:table-cell office:value-type="float" office:value="483.545135498047">
            <text:p>483.545135498</text:p>
          </table:table-cell>
          <table:table-cell office:value-type="float" office:value="-0.002302767">
            <text:p>-0.002302767</text:p>
          </table:table-cell>
          <table:table-cell table:number-columns-repeated="4"/>
        </table:table-row>
        <table:table-row table:style-name="ro1">
          <table:table-cell office:value-type="float" office:value="483.660797119141">
            <text:p>483.6607971191</text:p>
          </table:table-cell>
          <table:table-cell office:value-type="float" office:value="-0.008798136">
            <text:p>-0.008798136</text:p>
          </table:table-cell>
          <table:table-cell table:number-columns-repeated="4"/>
        </table:table-row>
        <table:table-row table:style-name="ro1">
          <table:table-cell office:value-type="float" office:value="483.776428222656">
            <text:p>483.7764282227</text:p>
          </table:table-cell>
          <table:table-cell office:value-type="float" office:value="0.001970921">
            <text:p>0.001970921</text:p>
          </table:table-cell>
          <table:table-cell table:number-columns-repeated="4"/>
        </table:table-row>
        <table:table-row table:style-name="ro1">
          <table:table-cell office:value-type="float" office:value="483.89208984375">
            <text:p>483.8920898438</text:p>
          </table:table-cell>
          <table:table-cell office:value-type="float" office:value="0.01684866">
            <text:p>0.01684866</text:p>
          </table:table-cell>
          <table:table-cell table:number-columns-repeated="4"/>
        </table:table-row>
        <table:table-row table:style-name="ro1">
          <table:table-cell office:value-type="float" office:value="484.007751464844">
            <text:p>484.0077514648</text:p>
          </table:table-cell>
          <table:table-cell office:value-type="float" office:value="-0.01153058">
            <text:p>-0.01153058</text:p>
          </table:table-cell>
          <table:table-cell table:number-columns-repeated="4"/>
        </table:table-row>
        <table:table-row table:style-name="ro1">
          <table:table-cell office:value-type="float" office:value="484.123413085938">
            <text:p>484.1234130859</text:p>
          </table:table-cell>
          <table:table-cell office:value-type="float" office:value="-0.01492566">
            <text:p>-0.01492566</text:p>
          </table:table-cell>
          <table:table-cell table:number-columns-repeated="4"/>
        </table:table-row>
        <table:table-row table:style-name="ro1">
          <table:table-cell office:value-type="float" office:value="484.239105224609">
            <text:p>484.2391052246</text:p>
          </table:table-cell>
          <table:table-cell office:value-type="float" office:value="0.008077606">
            <text:p>0.008077606</text:p>
          </table:table-cell>
          <table:table-cell table:number-columns-repeated="4"/>
        </table:table-row>
        <table:table-row table:style-name="ro1">
          <table:table-cell office:value-type="float" office:value="484.354766845703">
            <text:p>484.3547668457</text:p>
          </table:table-cell>
          <table:table-cell office:value-type="float" office:value="-0.001160742">
            <text:p>-0.001160742</text:p>
          </table:table-cell>
          <table:table-cell table:number-columns-repeated="4"/>
        </table:table-row>
        <table:table-row table:style-name="ro1">
          <table:table-cell office:value-type="float" office:value="484.470458984375">
            <text:p>484.4704589844</text:p>
          </table:table-cell>
          <table:table-cell office:value-type="float" office:value="-0.003346705">
            <text:p>-0.003346705</text:p>
          </table:table-cell>
          <table:table-cell table:number-columns-repeated="4"/>
        </table:table-row>
        <table:table-row table:style-name="ro1">
          <table:table-cell office:value-type="float" office:value="484.586151123047">
            <text:p>484.586151123</text:p>
          </table:table-cell>
          <table:table-cell office:value-type="float" office:value="-0.01075231">
            <text:p>-0.01075231</text:p>
          </table:table-cell>
          <table:table-cell table:number-columns-repeated="4"/>
        </table:table-row>
        <table:table-row table:style-name="ro1">
          <table:table-cell office:value-type="float" office:value="484.701843261719">
            <text:p>484.7018432617</text:p>
          </table:table-cell>
          <table:table-cell office:value-type="float" office:value="-0.003032484">
            <text:p>-0.003032484</text:p>
          </table:table-cell>
          <table:table-cell table:number-columns-repeated="4"/>
        </table:table-row>
        <table:table-row table:style-name="ro1">
          <table:table-cell office:value-type="float" office:value="484.817535400391">
            <text:p>484.8175354004</text:p>
          </table:table-cell>
          <table:table-cell office:value-type="float" office:value="0.002958966">
            <text:p>0.002958966</text:p>
          </table:table-cell>
          <table:table-cell table:number-columns-repeated="4"/>
        </table:table-row>
        <table:table-row table:style-name="ro1">
          <table:table-cell office:value-type="float" office:value="484.933227539063">
            <text:p>484.9332275391</text:p>
          </table:table-cell>
          <table:table-cell office:value-type="float" office:value="-0.01371927">
            <text:p>-0.01371927</text:p>
          </table:table-cell>
          <table:table-cell table:number-columns-repeated="4"/>
        </table:table-row>
        <table:table-row table:style-name="ro1">
          <table:table-cell office:value-type="float" office:value="485.048919677734">
            <text:p>485.0489196777</text:p>
          </table:table-cell>
          <table:table-cell office:value-type="float" office:value="-0.006326522">
            <text:p>-0.006326522</text:p>
          </table:table-cell>
          <table:table-cell table:number-columns-repeated="4"/>
        </table:table-row>
        <table:table-row table:style-name="ro1">
          <table:table-cell office:value-type="float" office:value="485.164642333984">
            <text:p>485.164642334</text:p>
          </table:table-cell>
          <table:table-cell office:value-type="float" office:value="0.01275814">
            <text:p>0.01275814</text:p>
          </table:table-cell>
          <table:table-cell table:number-columns-repeated="4"/>
        </table:table-row>
        <table:table-row table:style-name="ro1">
          <table:table-cell office:value-type="float" office:value="485.280334472656">
            <text:p>485.2803344727</text:p>
          </table:table-cell>
          <table:table-cell office:value-type="float" office:value="0.0006618932">
            <text:p>0.0006618932</text:p>
          </table:table-cell>
          <table:table-cell table:number-columns-repeated="4"/>
        </table:table-row>
        <table:table-row table:style-name="ro1">
          <table:table-cell office:value-type="float" office:value="485.396057128906">
            <text:p>485.3960571289</text:p>
          </table:table-cell>
          <table:table-cell office:value-type="float" office:value="0.006082768">
            <text:p>0.006082768</text:p>
          </table:table-cell>
          <table:table-cell table:number-columns-repeated="4"/>
        </table:table-row>
        <table:table-row table:style-name="ro1">
          <table:table-cell office:value-type="float" office:value="485.511779785156">
            <text:p>485.5117797852</text:p>
          </table:table-cell>
          <table:table-cell office:value-type="float" office:value="-0.00878257">
            <text:p>-0.00878257</text:p>
          </table:table-cell>
          <table:table-cell table:number-columns-repeated="4"/>
        </table:table-row>
        <table:table-row table:style-name="ro1">
          <table:table-cell office:value-type="float" office:value="485.627502441406">
            <text:p>485.6275024414</text:p>
          </table:table-cell>
          <table:table-cell office:value-type="float" office:value="-0.001564354">
            <text:p>-0.001564354</text:p>
          </table:table-cell>
          <table:table-cell table:number-columns-repeated="4"/>
        </table:table-row>
        <table:table-row table:style-name="ro1">
          <table:table-cell office:value-type="float" office:value="485.743225097656">
            <text:p>485.7432250977</text:p>
          </table:table-cell>
          <table:table-cell office:value-type="float" office:value="0.02263439">
            <text:p>0.02263439</text:p>
          </table:table-cell>
          <table:table-cell table:number-columns-repeated="4"/>
        </table:table-row>
        <table:table-row table:style-name="ro1">
          <table:table-cell office:value-type="float" office:value="485.858947753906">
            <text:p>485.8589477539</text:p>
          </table:table-cell>
          <table:table-cell office:value-type="float" office:value="-0.01164795">
            <text:p>-0.01164795</text:p>
          </table:table-cell>
          <table:table-cell table:number-columns-repeated="4"/>
        </table:table-row>
        <table:table-row table:style-name="ro1">
          <table:table-cell office:value-type="float" office:value="485.974670410156">
            <text:p>485.9746704102</text:p>
          </table:table-cell>
          <table:table-cell office:value-type="float" office:value="-0.008309686">
            <text:p>-0.008309686</text:p>
          </table:table-cell>
          <table:table-cell table:number-columns-repeated="4"/>
        </table:table-row>
        <table:table-row table:style-name="ro1">
          <table:table-cell office:value-type="float" office:value="486.090423583984">
            <text:p>486.090423584</text:p>
          </table:table-cell>
          <table:table-cell office:value-type="float" office:value="0.02158112">
            <text:p>0.02158112</text:p>
          </table:table-cell>
          <table:table-cell table:number-columns-repeated="4"/>
        </table:table-row>
        <table:table-row table:style-name="ro1">
          <table:table-cell office:value-type="float" office:value="486.206176757813">
            <text:p>486.2061767578</text:p>
          </table:table-cell>
          <table:table-cell office:value-type="float" office:value="0.001273422">
            <text:p>0.001273422</text:p>
          </table:table-cell>
          <table:table-cell table:number-columns-repeated="4"/>
        </table:table-row>
        <table:table-row table:style-name="ro1">
          <table:table-cell office:value-type="float" office:value="486.321899414063">
            <text:p>486.3218994141</text:p>
          </table:table-cell>
          <table:table-cell office:value-type="float" office:value="-0.002208885">
            <text:p>-0.002208885</text:p>
          </table:table-cell>
          <table:table-cell table:number-columns-repeated="4"/>
        </table:table-row>
        <table:table-row table:style-name="ro1">
          <table:table-cell office:value-type="float" office:value="486.437652587891">
            <text:p>486.4376525879</text:p>
          </table:table-cell>
          <table:table-cell office:value-type="float" office:value="-0.001526283">
            <text:p>-0.001526283</text:p>
          </table:table-cell>
          <table:table-cell table:number-columns-repeated="4"/>
        </table:table-row>
        <table:table-row table:style-name="ro1">
          <table:table-cell office:value-type="float" office:value="486.553436279297">
            <text:p>486.5534362793</text:p>
          </table:table-cell>
          <table:table-cell office:value-type="float" office:value="0.005123975">
            <text:p>0.005123975</text:p>
          </table:table-cell>
          <table:table-cell table:number-columns-repeated="4"/>
        </table:table-row>
        <table:table-row table:style-name="ro1">
          <table:table-cell office:value-type="float" office:value="486.669189453125">
            <text:p>486.6691894531</text:p>
          </table:table-cell>
          <table:table-cell office:value-type="float" office:value="0.001689298">
            <text:p>0.001689298</text:p>
          </table:table-cell>
          <table:table-cell table:number-columns-repeated="4"/>
        </table:table-row>
        <table:table-row table:style-name="ro1">
          <table:table-cell office:value-type="float" office:value="486.784942626953">
            <text:p>486.784942627</text:p>
          </table:table-cell>
          <table:table-cell office:value-type="float" office:value="0.0006761933">
            <text:p>0.0006761933</text:p>
          </table:table-cell>
          <table:table-cell table:number-columns-repeated="4"/>
        </table:table-row>
        <table:table-row table:style-name="ro1">
          <table:table-cell office:value-type="float" office:value="486.900726318359">
            <text:p>486.9007263184</text:p>
          </table:table-cell>
          <table:table-cell office:value-type="float" office:value="-0.005396542">
            <text:p>-0.005396542</text:p>
          </table:table-cell>
          <table:table-cell table:number-columns-repeated="4"/>
        </table:table-row>
        <table:table-row table:style-name="ro1">
          <table:table-cell office:value-type="float" office:value="487.016479492188">
            <text:p>487.0164794922</text:p>
          </table:table-cell>
          <table:table-cell office:value-type="float" office:value="0.008546419">
            <text:p>0.008546419</text:p>
          </table:table-cell>
          <table:table-cell table:number-columns-repeated="4"/>
        </table:table-row>
        <table:table-row table:style-name="ro1">
          <table:table-cell office:value-type="float" office:value="487.132263183594">
            <text:p>487.1322631836</text:p>
          </table:table-cell>
          <table:table-cell office:value-type="float" office:value="-0.004255939">
            <text:p>-0.004255939</text:p>
          </table:table-cell>
          <table:table-cell table:number-columns-repeated="4"/>
        </table:table-row>
        <table:table-row table:style-name="ro1">
          <table:table-cell office:value-type="float" office:value="487.248046875">
            <text:p>487.248046875</text:p>
          </table:table-cell>
          <table:table-cell office:value-type="float" office:value="0.01070287">
            <text:p>0.01070287</text:p>
          </table:table-cell>
          <table:table-cell table:number-columns-repeated="4"/>
        </table:table-row>
        <table:table-row table:style-name="ro1">
          <table:table-cell office:value-type="float" office:value="487.363830566406">
            <text:p>487.3638305664</text:p>
          </table:table-cell>
          <table:table-cell office:value-type="float" office:value="0.001453619">
            <text:p>0.001453619</text:p>
          </table:table-cell>
          <table:table-cell table:number-columns-repeated="4"/>
        </table:table-row>
        <table:table-row table:style-name="ro1">
          <table:table-cell office:value-type="float" office:value="487.479614257813">
            <text:p>487.4796142578</text:p>
          </table:table-cell>
          <table:table-cell office:value-type="float" office:value="0.006434721">
            <text:p>0.006434721</text:p>
          </table:table-cell>
          <table:table-cell table:number-columns-repeated="4"/>
        </table:table-row>
        <table:table-row table:style-name="ro1">
          <table:table-cell office:value-type="float" office:value="487.595397949219">
            <text:p>487.5953979492</text:p>
          </table:table-cell>
          <table:table-cell office:value-type="float" office:value="0.006364055">
            <text:p>0.006364055</text:p>
          </table:table-cell>
          <table:table-cell table:number-columns-repeated="4"/>
        </table:table-row>
        <table:table-row table:style-name="ro1">
          <table:table-cell office:value-type="float" office:value="487.711212158203">
            <text:p>487.7112121582</text:p>
          </table:table-cell>
          <table:table-cell office:value-type="float" office:value="0.006689254">
            <text:p>0.006689254</text:p>
          </table:table-cell>
          <table:table-cell table:number-columns-repeated="4"/>
        </table:table-row>
        <table:table-row table:style-name="ro1">
          <table:table-cell office:value-type="float" office:value="487.826995849609">
            <text:p>487.8269958496</text:p>
          </table:table-cell>
          <table:table-cell office:value-type="float" office:value="-0.01026813">
            <text:p>-0.01026813</text:p>
          </table:table-cell>
          <table:table-cell table:number-columns-repeated="4"/>
        </table:table-row>
        <table:table-row table:style-name="ro1">
          <table:table-cell office:value-type="float" office:value="487.942810058594">
            <text:p>487.9428100586</text:p>
          </table:table-cell>
          <table:table-cell office:value-type="float" office:value="0.003922146">
            <text:p>0.003922146</text:p>
          </table:table-cell>
          <table:table-cell table:number-columns-repeated="4"/>
        </table:table-row>
        <table:table-row table:style-name="ro1">
          <table:table-cell office:value-type="float" office:value="488.058624267578">
            <text:p>488.0586242676</text:p>
          </table:table-cell>
          <table:table-cell office:value-type="float" office:value="0.01787709">
            <text:p>0.01787709</text:p>
          </table:table-cell>
          <table:table-cell table:number-columns-repeated="4"/>
        </table:table-row>
        <table:table-row table:style-name="ro1">
          <table:table-cell office:value-type="float" office:value="488.174438476563">
            <text:p>488.1744384766</text:p>
          </table:table-cell>
          <table:table-cell office:value-type="float" office:value="-0.005061382">
            <text:p>-0.005061382</text:p>
          </table:table-cell>
          <table:table-cell table:number-columns-repeated="4"/>
        </table:table-row>
        <table:table-row table:style-name="ro1">
          <table:table-cell office:value-type="float" office:value="488.290252685547">
            <text:p>488.2902526855</text:p>
          </table:table-cell>
          <table:table-cell office:value-type="float" office:value="-0.01178704">
            <text:p>-0.01178704</text:p>
          </table:table-cell>
          <table:table-cell table:number-columns-repeated="4"/>
        </table:table-row>
        <table:table-row table:style-name="ro1">
          <table:table-cell office:value-type="float" office:value="488.406066894531">
            <text:p>488.4060668945</text:p>
          </table:table-cell>
          <table:table-cell office:value-type="float" office:value="0.006436087">
            <text:p>0.006436087</text:p>
          </table:table-cell>
          <table:table-cell table:number-columns-repeated="4"/>
        </table:table-row>
        <table:table-row table:style-name="ro1">
          <table:table-cell office:value-type="float" office:value="488.521911621094">
            <text:p>488.5219116211</text:p>
          </table:table-cell>
          <table:table-cell office:value-type="float" office:value="-0.002429277">
            <text:p>-0.002429277</text:p>
          </table:table-cell>
          <table:table-cell table:number-columns-repeated="4"/>
        </table:table-row>
        <table:table-row table:style-name="ro1">
          <table:table-cell office:value-type="float" office:value="488.637725830078">
            <text:p>488.6377258301</text:p>
          </table:table-cell>
          <table:table-cell office:value-type="float" office:value="-0.01373926">
            <text:p>-0.01373926</text:p>
          </table:table-cell>
          <table:table-cell table:number-columns-repeated="4"/>
        </table:table-row>
        <table:table-row table:style-name="ro1">
          <table:table-cell office:value-type="float" office:value="488.753570556641">
            <text:p>488.7535705566</text:p>
          </table:table-cell>
          <table:table-cell office:value-type="float" office:value="-0.01298108">
            <text:p>-0.01298108</text:p>
          </table:table-cell>
          <table:table-cell table:number-columns-repeated="4"/>
        </table:table-row>
        <table:table-row table:style-name="ro1">
          <table:table-cell office:value-type="float" office:value="488.869415283203">
            <text:p>488.8694152832</text:p>
          </table:table-cell>
          <table:table-cell office:value-type="float" office:value="0.006735309">
            <text:p>0.006735309</text:p>
          </table:table-cell>
          <table:table-cell table:number-columns-repeated="4"/>
        </table:table-row>
        <table:table-row table:style-name="ro1">
          <table:table-cell office:value-type="float" office:value="488.985260009766">
            <text:p>488.9852600098</text:p>
          </table:table-cell>
          <table:table-cell office:value-type="float" office:value="-0.003603847">
            <text:p>-0.003603847</text:p>
          </table:table-cell>
          <table:table-cell table:number-columns-repeated="4"/>
        </table:table-row>
        <table:table-row table:style-name="ro1">
          <table:table-cell office:value-type="float" office:value="489.101104736328">
            <text:p>489.1011047363</text:p>
          </table:table-cell>
          <table:table-cell office:value-type="float" office:value="-0.001922821">
            <text:p>-0.001922821</text:p>
          </table:table-cell>
          <table:table-cell table:number-columns-repeated="4"/>
        </table:table-row>
        <table:table-row table:style-name="ro1">
          <table:table-cell office:value-type="float" office:value="489.216949462891">
            <text:p>489.2169494629</text:p>
          </table:table-cell>
          <table:table-cell office:value-type="float" office:value="-0.00876687">
            <text:p>-0.00876687</text:p>
          </table:table-cell>
          <table:table-cell table:number-columns-repeated="4"/>
        </table:table-row>
        <table:table-row table:style-name="ro1">
          <table:table-cell office:value-type="float" office:value="489.332794189453">
            <text:p>489.3327941895</text:p>
          </table:table-cell>
          <table:table-cell office:value-type="float" office:value="0.003357477">
            <text:p>0.003357477</text:p>
          </table:table-cell>
          <table:table-cell table:number-columns-repeated="4"/>
        </table:table-row>
        <table:table-row table:style-name="ro1">
          <table:table-cell office:value-type="float" office:value="489.448669433594">
            <text:p>489.4486694336</text:p>
          </table:table-cell>
          <table:table-cell office:value-type="float" office:value="0.00337214">
            <text:p>0.00337214</text:p>
          </table:table-cell>
          <table:table-cell table:number-columns-repeated="4"/>
        </table:table-row>
        <table:table-row table:style-name="ro1">
          <table:table-cell office:value-type="float" office:value="489.564544677734">
            <text:p>489.5645446777</text:p>
          </table:table-cell>
          <table:table-cell office:value-type="float" office:value="-0.01525513">
            <text:p>-0.01525513</text:p>
          </table:table-cell>
          <table:table-cell table:number-columns-repeated="4"/>
        </table:table-row>
        <table:table-row table:style-name="ro1">
          <table:table-cell office:value-type="float" office:value="489.680389404297">
            <text:p>489.6803894043</text:p>
          </table:table-cell>
          <table:table-cell office:value-type="float" office:value="-0.006457946">
            <text:p>-0.006457946</text:p>
          </table:table-cell>
          <table:table-cell table:number-columns-repeated="4"/>
        </table:table-row>
        <table:table-row table:style-name="ro1">
          <table:table-cell office:value-type="float" office:value="489.796264648438">
            <text:p>489.7962646484</text:p>
          </table:table-cell>
          <table:table-cell office:value-type="float" office:value="0.00671939">
            <text:p>0.00671939</text:p>
          </table:table-cell>
          <table:table-cell table:number-columns-repeated="4"/>
        </table:table-row>
        <table:table-row table:style-name="ro1">
          <table:table-cell office:value-type="float" office:value="489.912139892578">
            <text:p>489.9121398926</text:p>
          </table:table-cell>
          <table:table-cell office:value-type="float" office:value="0.000170932">
            <text:p>0.000170932</text:p>
          </table:table-cell>
          <table:table-cell table:number-columns-repeated="4"/>
        </table:table-row>
        <table:table-row table:style-name="ro1">
          <table:table-cell office:value-type="float" office:value="490.028015136719">
            <text:p>490.0280151367</text:p>
          </table:table-cell>
          <table:table-cell office:value-type="float" office:value="-0.01210035">
            <text:p>-0.01210035</text:p>
          </table:table-cell>
          <table:table-cell table:number-columns-repeated="4"/>
        </table:table-row>
        <table:table-row table:style-name="ro1">
          <table:table-cell office:value-type="float" office:value="490.143920898438">
            <text:p>490.1439208984</text:p>
          </table:table-cell>
          <table:table-cell office:value-type="float" office:value="0.01354193">
            <text:p>0.01354193</text:p>
          </table:table-cell>
          <table:table-cell table:number-columns-repeated="4"/>
        </table:table-row>
        <table:table-row table:style-name="ro1">
          <table:table-cell office:value-type="float" office:value="490.259796142578">
            <text:p>490.2597961426</text:p>
          </table:table-cell>
          <table:table-cell office:value-type="float" office:value="0.004901818">
            <text:p>0.004901818</text:p>
          </table:table-cell>
          <table:table-cell table:number-columns-repeated="4"/>
        </table:table-row>
        <table:table-row table:style-name="ro1">
          <table:table-cell office:value-type="float" office:value="490.375701904297">
            <text:p>490.3757019043</text:p>
          </table:table-cell>
          <table:table-cell office:value-type="float" office:value="-0.01270345">
            <text:p>-0.01270345</text:p>
          </table:table-cell>
          <table:table-cell table:number-columns-repeated="4"/>
        </table:table-row>
        <table:table-row table:style-name="ro1">
          <table:table-cell office:value-type="float" office:value="490.491577148438">
            <text:p>490.4915771484</text:p>
          </table:table-cell>
          <table:table-cell office:value-type="float" office:value="-0.001653903">
            <text:p>-0.001653903</text:p>
          </table:table-cell>
          <table:table-cell table:number-columns-repeated="4"/>
        </table:table-row>
        <table:table-row table:style-name="ro1">
          <table:table-cell office:value-type="float" office:value="490.607482910156">
            <text:p>490.6074829102</text:p>
          </table:table-cell>
          <table:table-cell office:value-type="float" office:value="-0.004558557">
            <text:p>-0.004558557</text:p>
          </table:table-cell>
          <table:table-cell table:number-columns-repeated="4"/>
        </table:table-row>
        <table:table-row table:style-name="ro1">
          <table:table-cell office:value-type="float" office:value="490.723388671875">
            <text:p>490.7233886719</text:p>
          </table:table-cell>
          <table:table-cell office:value-type="float" office:value="0.009500712">
            <text:p>0.009500712</text:p>
          </table:table-cell>
          <table:table-cell table:number-columns-repeated="4"/>
        </table:table-row>
        <table:table-row table:style-name="ro1">
          <table:table-cell office:value-type="float" office:value="490.839294433594">
            <text:p>490.8392944336</text:p>
          </table:table-cell>
          <table:table-cell office:value-type="float" office:value="-0.0001912642">
            <text:p>-0.0001912642</text:p>
          </table:table-cell>
          <table:table-cell table:number-columns-repeated="4"/>
        </table:table-row>
        <table:table-row table:style-name="ro1">
          <table:table-cell office:value-type="float" office:value="490.955200195313">
            <text:p>490.9552001953</text:p>
          </table:table-cell>
          <table:table-cell office:value-type="float" office:value="-0.00393005">
            <text:p>-0.00393005</text:p>
          </table:table-cell>
          <table:table-cell table:number-columns-repeated="4"/>
        </table:table-row>
        <table:table-row table:style-name="ro1">
          <table:table-cell office:value-type="float" office:value="491.071136474609">
            <text:p>491.0711364746</text:p>
          </table:table-cell>
          <table:table-cell office:value-type="float" office:value="0.0003432317">
            <text:p>0.0003432317</text:p>
          </table:table-cell>
          <table:table-cell table:number-columns-repeated="4"/>
        </table:table-row>
        <table:table-row table:style-name="ro1">
          <table:table-cell office:value-type="float" office:value="491.187042236328">
            <text:p>491.1870422363</text:p>
          </table:table-cell>
          <table:table-cell office:value-type="float" office:value="0.009826113">
            <text:p>0.009826113</text:p>
          </table:table-cell>
          <table:table-cell table:number-columns-repeated="4"/>
        </table:table-row>
        <table:table-row table:style-name="ro1">
          <table:table-cell office:value-type="float" office:value="491.302978515625">
            <text:p>491.3029785156</text:p>
          </table:table-cell>
          <table:table-cell office:value-type="float" office:value="-0.004898315">
            <text:p>-0.004898315</text:p>
          </table:table-cell>
          <table:table-cell table:number-columns-repeated="4"/>
        </table:table-row>
        <table:table-row table:style-name="ro1">
          <table:table-cell office:value-type="float" office:value="491.418914794922">
            <text:p>491.4189147949</text:p>
          </table:table-cell>
          <table:table-cell office:value-type="float" office:value="-0.0107126">
            <text:p>-0.0107126</text:p>
          </table:table-cell>
          <table:table-cell table:number-columns-repeated="4"/>
        </table:table-row>
        <table:table-row table:style-name="ro1">
          <table:table-cell office:value-type="float" office:value="491.534851074219">
            <text:p>491.5348510742</text:p>
          </table:table-cell>
          <table:table-cell office:value-type="float" office:value="0.008812">
            <text:p>0.008812</text:p>
          </table:table-cell>
          <table:table-cell table:number-columns-repeated="4"/>
        </table:table-row>
        <table:table-row table:style-name="ro1">
          <table:table-cell office:value-type="float" office:value="491.650787353516">
            <text:p>491.6507873535</text:p>
          </table:table-cell>
          <table:table-cell office:value-type="float" office:value="-0.0008275455">
            <text:p>-0.0008275455</text:p>
          </table:table-cell>
          <table:table-cell table:number-columns-repeated="4"/>
        </table:table-row>
        <table:table-row table:style-name="ro1">
          <table:table-cell office:value-type="float" office:value="491.766723632813">
            <text:p>491.7667236328</text:p>
          </table:table-cell>
          <table:table-cell office:value-type="float" office:value="-0.005099203">
            <text:p>-0.005099203</text:p>
          </table:table-cell>
          <table:table-cell table:number-columns-repeated="4"/>
        </table:table-row>
        <table:table-row table:style-name="ro1">
          <table:table-cell office:value-type="float" office:value="491.882659912109">
            <text:p>491.8826599121</text:p>
          </table:table-cell>
          <table:table-cell office:value-type="float" office:value="-0.01249778">
            <text:p>-0.01249778</text:p>
          </table:table-cell>
          <table:table-cell table:number-columns-repeated="4"/>
        </table:table-row>
        <table:table-row table:style-name="ro1">
          <table:table-cell office:value-type="float" office:value="491.998596191406">
            <text:p>491.9985961914</text:p>
          </table:table-cell>
          <table:table-cell office:value-type="float" office:value="0.003257353">
            <text:p>0.003257353</text:p>
          </table:table-cell>
          <table:table-cell table:number-columns-repeated="4"/>
        </table:table-row>
        <table:table-row table:style-name="ro1">
          <table:table-cell office:value-type="float" office:value="492.114562988281">
            <text:p>492.1145629883</text:p>
          </table:table-cell>
          <table:table-cell office:value-type="float" office:value="0.003856685">
            <text:p>0.003856685</text:p>
          </table:table-cell>
          <table:table-cell table:number-columns-repeated="4"/>
        </table:table-row>
        <table:table-row table:style-name="ro1">
          <table:table-cell office:value-type="float" office:value="492.230529785156">
            <text:p>492.2305297852</text:p>
          </table:table-cell>
          <table:table-cell office:value-type="float" office:value="-0.01231615">
            <text:p>-0.01231615</text:p>
          </table:table-cell>
          <table:table-cell table:number-columns-repeated="4"/>
        </table:table-row>
        <table:table-row table:style-name="ro1">
          <table:table-cell office:value-type="float" office:value="492.346496582031">
            <text:p>492.346496582</text:p>
          </table:table-cell>
          <table:table-cell office:value-type="float" office:value="0.001724825">
            <text:p>0.001724825</text:p>
          </table:table-cell>
          <table:table-cell table:number-columns-repeated="4"/>
        </table:table-row>
        <table:table-row table:style-name="ro1">
          <table:table-cell office:value-type="float" office:value="492.462463378906">
            <text:p>492.4624633789</text:p>
          </table:table-cell>
          <table:table-cell office:value-type="float" office:value="0.00112728">
            <text:p>0.00112728</text:p>
          </table:table-cell>
          <table:table-cell table:number-columns-repeated="4"/>
        </table:table-row>
        <table:table-row table:style-name="ro1">
          <table:table-cell office:value-type="float" office:value="492.578430175781">
            <text:p>492.5784301758</text:p>
          </table:table-cell>
          <table:table-cell office:value-type="float" office:value="0.001756386">
            <text:p>0.001756386</text:p>
          </table:table-cell>
          <table:table-cell table:number-columns-repeated="4"/>
        </table:table-row>
        <table:table-row table:style-name="ro1">
          <table:table-cell office:value-type="float" office:value="492.694396972656">
            <text:p>492.6943969727</text:p>
          </table:table-cell>
          <table:table-cell office:value-type="float" office:value="-0.005273856">
            <text:p>-0.005273856</text:p>
          </table:table-cell>
          <table:table-cell table:number-columns-repeated="4"/>
        </table:table-row>
        <table:table-row table:style-name="ro1">
          <table:table-cell office:value-type="float" office:value="492.810363769531">
            <text:p>492.8103637695</text:p>
          </table:table-cell>
          <table:table-cell office:value-type="float" office:value="-0.008491637">
            <text:p>-0.008491637</text:p>
          </table:table-cell>
          <table:table-cell table:number-columns-repeated="4"/>
        </table:table-row>
        <table:table-row table:style-name="ro1">
          <table:table-cell office:value-type="float" office:value="492.926361083984">
            <text:p>492.926361084</text:p>
          </table:table-cell>
          <table:table-cell office:value-type="float" office:value="0.0103455">
            <text:p>0.0103455</text:p>
          </table:table-cell>
          <table:table-cell table:number-columns-repeated="4"/>
        </table:table-row>
        <table:table-row table:style-name="ro1">
          <table:table-cell office:value-type="float" office:value="493.042327880859">
            <text:p>493.0423278809</text:p>
          </table:table-cell>
          <table:table-cell office:value-type="float" office:value="-0.004800554">
            <text:p>-0.004800554</text:p>
          </table:table-cell>
          <table:table-cell table:number-columns-repeated="4"/>
        </table:table-row>
        <table:table-row table:style-name="ro1">
          <table:table-cell office:value-type="float" office:value="493.158325195313">
            <text:p>493.1583251953</text:p>
          </table:table-cell>
          <table:table-cell office:value-type="float" office:value="-0.008826307">
            <text:p>-0.008826307</text:p>
          </table:table-cell>
          <table:table-cell table:number-columns-repeated="4"/>
        </table:table-row>
        <table:table-row table:style-name="ro1">
          <table:table-cell office:value-type="float" office:value="493.274322509766">
            <text:p>493.2743225098</text:p>
          </table:table-cell>
          <table:table-cell office:value-type="float" office:value="-0.001297109">
            <text:p>-0.001297109</text:p>
          </table:table-cell>
          <table:table-cell table:number-columns-repeated="4"/>
        </table:table-row>
        <table:table-row table:style-name="ro1">
          <table:table-cell office:value-type="float" office:value="493.390319824219">
            <text:p>493.3903198242</text:p>
          </table:table-cell>
          <table:table-cell office:value-type="float" office:value="0.01097953">
            <text:p>0.01097953</text:p>
          </table:table-cell>
          <table:table-cell table:number-columns-repeated="4"/>
        </table:table-row>
        <table:table-row table:style-name="ro1">
          <table:table-cell office:value-type="float" office:value="493.506317138672">
            <text:p>493.5063171387</text:p>
          </table:table-cell>
          <table:table-cell office:value-type="float" office:value="0.002633716">
            <text:p>0.002633716</text:p>
          </table:table-cell>
          <table:table-cell table:number-columns-repeated="4"/>
        </table:table-row>
        <table:table-row table:style-name="ro1">
          <table:table-cell office:value-type="float" office:value="493.622344970703">
            <text:p>493.6223449707</text:p>
          </table:table-cell>
          <table:table-cell office:value-type="float" office:value="0.0004647369">
            <text:p>0.0004647369</text:p>
          </table:table-cell>
          <table:table-cell table:number-columns-repeated="4"/>
        </table:table-row>
        <table:table-row table:style-name="ro1">
          <table:table-cell office:value-type="float" office:value="493.738342285156">
            <text:p>493.7383422852</text:p>
          </table:table-cell>
          <table:table-cell office:value-type="float" office:value="-0.01235849">
            <text:p>-0.01235849</text:p>
          </table:table-cell>
          <table:table-cell table:number-columns-repeated="4"/>
        </table:table-row>
        <table:table-row table:style-name="ro1">
          <table:table-cell office:value-type="float" office:value="493.854370117188">
            <text:p>493.8543701172</text:p>
          </table:table-cell>
          <table:table-cell office:value-type="float" office:value="-0.005496685">
            <text:p>-0.005496685</text:p>
          </table:table-cell>
          <table:table-cell table:number-columns-repeated="4"/>
        </table:table-row>
        <table:table-row table:style-name="ro1">
          <table:table-cell office:value-type="float" office:value="493.970367431641">
            <text:p>493.9703674316</text:p>
          </table:table-cell>
          <table:table-cell office:value-type="float" office:value="0.005495196">
            <text:p>0.005495196</text:p>
          </table:table-cell>
          <table:table-cell table:number-columns-repeated="4"/>
        </table:table-row>
        <table:table-row table:style-name="ro1">
          <table:table-cell office:value-type="float" office:value="494.086395263672">
            <text:p>494.0863952637</text:p>
          </table:table-cell>
          <table:table-cell office:value-type="float" office:value="0.0005990912">
            <text:p>0.0005990912</text:p>
          </table:table-cell>
          <table:table-cell table:number-columns-repeated="4"/>
        </table:table-row>
        <table:table-row table:style-name="ro1">
          <table:table-cell office:value-type="float" office:value="494.202423095703">
            <text:p>494.2024230957</text:p>
          </table:table-cell>
          <table:table-cell office:value-type="float" office:value="-0.001840713">
            <text:p>-0.001840713</text:p>
          </table:table-cell>
          <table:table-cell table:number-columns-repeated="4"/>
        </table:table-row>
        <table:table-row table:style-name="ro1">
          <table:table-cell office:value-type="float" office:value="494.318450927734">
            <text:p>494.3184509277</text:p>
          </table:table-cell>
          <table:table-cell office:value-type="float" office:value="-0.004700139">
            <text:p>-0.004700139</text:p>
          </table:table-cell>
          <table:table-cell table:number-columns-repeated="4"/>
        </table:table-row>
        <table:table-row table:style-name="ro1">
          <table:table-cell office:value-type="float" office:value="494.434478759766">
            <text:p>494.4344787598</text:p>
          </table:table-cell>
          <table:table-cell office:value-type="float" office:value="-0.0009325705">
            <text:p>-0.0009325705</text:p>
          </table:table-cell>
          <table:table-cell table:number-columns-repeated="4"/>
        </table:table-row>
        <table:table-row table:style-name="ro1">
          <table:table-cell office:value-type="float" office:value="494.550537109375">
            <text:p>494.5505371094</text:p>
          </table:table-cell>
          <table:table-cell office:value-type="float" office:value="-0.006298962">
            <text:p>-0.006298962</text:p>
          </table:table-cell>
          <table:table-cell table:number-columns-repeated="4"/>
        </table:table-row>
        <table:table-row table:style-name="ro1">
          <table:table-cell office:value-type="float" office:value="494.666564941406">
            <text:p>494.6665649414</text:p>
          </table:table-cell>
          <table:table-cell office:value-type="float" office:value="-0.00598413">
            <text:p>-0.00598413</text:p>
          </table:table-cell>
          <table:table-cell table:number-columns-repeated="4"/>
        </table:table-row>
        <table:table-row table:style-name="ro1">
          <table:table-cell office:value-type="float" office:value="494.782623291016">
            <text:p>494.782623291</text:p>
          </table:table-cell>
          <table:table-cell office:value-type="float" office:value="-0.002351949">
            <text:p>-0.002351949</text:p>
          </table:table-cell>
          <table:table-cell table:number-columns-repeated="4"/>
        </table:table-row>
        <table:table-row table:style-name="ro1">
          <table:table-cell office:value-type="float" office:value="494.898681640625">
            <text:p>494.8986816406</text:p>
          </table:table-cell>
          <table:table-cell office:value-type="float" office:value="0.006142328">
            <text:p>0.006142328</text:p>
          </table:table-cell>
          <table:table-cell table:number-columns-repeated="4"/>
        </table:table-row>
        <table:table-row table:style-name="ro1">
          <table:table-cell office:value-type="float" office:value="495.014739990234">
            <text:p>495.0147399902</text:p>
          </table:table-cell>
          <table:table-cell office:value-type="float" office:value="-0.01265356">
            <text:p>-0.01265356</text:p>
          </table:table-cell>
          <table:table-cell table:number-columns-repeated="4"/>
        </table:table-row>
        <table:table-row table:style-name="ro1">
          <table:table-cell office:value-type="float" office:value="495.130798339844">
            <text:p>495.1307983398</text:p>
          </table:table-cell>
          <table:table-cell office:value-type="float" office:value="-0.01091075">
            <text:p>-0.01091075</text:p>
          </table:table-cell>
          <table:table-cell table:number-columns-repeated="4"/>
        </table:table-row>
        <table:table-row table:style-name="ro1">
          <table:table-cell office:value-type="float" office:value="495.246856689453">
            <text:p>495.2468566895</text:p>
          </table:table-cell>
          <table:table-cell office:value-type="float" office:value="0.003179129">
            <text:p>0.003179129</text:p>
          </table:table-cell>
          <table:table-cell table:number-columns-repeated="4"/>
        </table:table-row>
        <table:table-row table:style-name="ro1">
          <table:table-cell office:value-type="float" office:value="495.362915039063">
            <text:p>495.3629150391</text:p>
          </table:table-cell>
          <table:table-cell office:value-type="float" office:value="0.007515383">
            <text:p>0.007515383</text:p>
          </table:table-cell>
          <table:table-cell table:number-columns-repeated="4"/>
        </table:table-row>
        <table:table-row table:style-name="ro1">
          <table:table-cell office:value-type="float" office:value="495.478973388672">
            <text:p>495.4789733887</text:p>
          </table:table-cell>
          <table:table-cell office:value-type="float" office:value="-0.01368003">
            <text:p>-0.01368003</text:p>
          </table:table-cell>
          <table:table-cell table:number-columns-repeated="4"/>
        </table:table-row>
        <table:table-row table:style-name="ro1">
          <table:table-cell office:value-type="float" office:value="495.595062255859">
            <text:p>495.5950622559</text:p>
          </table:table-cell>
          <table:table-cell office:value-type="float" office:value="0.003760579">
            <text:p>0.003760579</text:p>
          </table:table-cell>
          <table:table-cell table:number-columns-repeated="4"/>
        </table:table-row>
        <table:table-row table:style-name="ro1">
          <table:table-cell office:value-type="float" office:value="495.711151123047">
            <text:p>495.711151123</text:p>
          </table:table-cell>
          <table:table-cell office:value-type="float" office:value="-0.004789439">
            <text:p>-0.004789439</text:p>
          </table:table-cell>
          <table:table-cell table:number-columns-repeated="4"/>
        </table:table-row>
        <table:table-row table:style-name="ro1">
          <table:table-cell office:value-type="float" office:value="495.827209472656">
            <text:p>495.8272094727</text:p>
          </table:table-cell>
          <table:table-cell office:value-type="float" office:value="0.02572921">
            <text:p>0.02572921</text:p>
          </table:table-cell>
          <table:table-cell table:number-columns-repeated="4"/>
        </table:table-row>
        <table:table-row table:style-name="ro1">
          <table:table-cell office:value-type="float" office:value="495.943298339844">
            <text:p>495.9432983398</text:p>
          </table:table-cell>
          <table:table-cell office:value-type="float" office:value="-0.002225326">
            <text:p>-0.002225326</text:p>
          </table:table-cell>
          <table:table-cell table:number-columns-repeated="4"/>
        </table:table-row>
        <table:table-row table:style-name="ro1">
          <table:table-cell office:value-type="float" office:value="496.059387207031">
            <text:p>496.059387207</text:p>
          </table:table-cell>
          <table:table-cell office:value-type="float" office:value="0.008790068">
            <text:p>0.008790068</text:p>
          </table:table-cell>
          <table:table-cell table:number-columns-repeated="4"/>
        </table:table-row>
        <table:table-row table:style-name="ro1">
          <table:table-cell office:value-type="float" office:value="496.175506591797">
            <text:p>496.1755065918</text:p>
          </table:table-cell>
          <table:table-cell office:value-type="float" office:value="-0.005059873">
            <text:p>-0.005059873</text:p>
          </table:table-cell>
          <table:table-cell table:number-columns-repeated="4"/>
        </table:table-row>
        <table:table-row table:style-name="ro1">
          <table:table-cell office:value-type="float" office:value="496.291595458984">
            <text:p>496.291595459</text:p>
          </table:table-cell>
          <table:table-cell office:value-type="float" office:value="-0.007391675">
            <text:p>-0.007391675</text:p>
          </table:table-cell>
          <table:table-cell table:number-columns-repeated="4"/>
        </table:table-row>
        <table:table-row table:style-name="ro1">
          <table:table-cell office:value-type="float" office:value="496.407684326172">
            <text:p>496.4076843262</text:p>
          </table:table-cell>
          <table:table-cell office:value-type="float" office:value="0.01290249">
            <text:p>0.01290249</text:p>
          </table:table-cell>
          <table:table-cell table:number-columns-repeated="4"/>
        </table:table-row>
        <table:table-row table:style-name="ro1">
          <table:table-cell office:value-type="float" office:value="496.523803710938">
            <text:p>496.5238037109</text:p>
          </table:table-cell>
          <table:table-cell office:value-type="float" office:value="-0.01054346">
            <text:p>-0.01054346</text:p>
          </table:table-cell>
          <table:table-cell table:number-columns-repeated="4"/>
        </table:table-row>
        <table:table-row table:style-name="ro1">
          <table:table-cell office:value-type="float" office:value="496.639923095703">
            <text:p>496.6399230957</text:p>
          </table:table-cell>
          <table:table-cell office:value-type="float" office:value="0.008415677">
            <text:p>0.008415677</text:p>
          </table:table-cell>
          <table:table-cell table:number-columns-repeated="4"/>
        </table:table-row>
        <table:table-row table:style-name="ro1">
          <table:table-cell office:value-type="float" office:value="496.756042480469">
            <text:p>496.7560424805</text:p>
          </table:table-cell>
          <table:table-cell office:value-type="float" office:value="0.005181111">
            <text:p>0.005181111</text:p>
          </table:table-cell>
          <table:table-cell table:number-columns-repeated="4"/>
        </table:table-row>
        <table:table-row table:style-name="ro1">
          <table:table-cell office:value-type="float" office:value="496.872161865234">
            <text:p>496.8721618652</text:p>
          </table:table-cell>
          <table:table-cell office:value-type="float" office:value="-0.004517218">
            <text:p>-0.004517218</text:p>
          </table:table-cell>
          <table:table-cell table:number-columns-repeated="4"/>
        </table:table-row>
        <table:table-row table:style-name="ro1">
          <table:table-cell office:value-type="float" office:value="496.98828125">
            <text:p>496.98828125</text:p>
          </table:table-cell>
          <table:table-cell office:value-type="float" office:value="0.003358258">
            <text:p>0.003358258</text:p>
          </table:table-cell>
          <table:table-cell table:number-columns-repeated="4"/>
        </table:table-row>
        <table:table-row table:style-name="ro1">
          <table:table-cell office:value-type="float" office:value="497.104400634766">
            <text:p>497.1044006348</text:p>
          </table:table-cell>
          <table:table-cell office:value-type="float" office:value="0.02255857">
            <text:p>0.02255857</text:p>
          </table:table-cell>
          <table:table-cell table:number-columns-repeated="4"/>
        </table:table-row>
        <table:table-row table:style-name="ro1">
          <table:table-cell office:value-type="float" office:value="497.220520019531">
            <text:p>497.2205200195</text:p>
          </table:table-cell>
          <table:table-cell office:value-type="float" office:value="0.003241815">
            <text:p>0.003241815</text:p>
          </table:table-cell>
          <table:table-cell table:number-columns-repeated="4"/>
        </table:table-row>
        <table:table-row table:style-name="ro1">
          <table:table-cell office:value-type="float" office:value="497.336669921875">
            <text:p>497.3366699219</text:p>
          </table:table-cell>
          <table:table-cell office:value-type="float" office:value="-0.002733637">
            <text:p>-0.002733637</text:p>
          </table:table-cell>
          <table:table-cell table:number-columns-repeated="4"/>
        </table:table-row>
        <table:table-row table:style-name="ro1">
          <table:table-cell office:value-type="float" office:value="497.452819824219">
            <text:p>497.4528198242</text:p>
          </table:table-cell>
          <table:table-cell office:value-type="float" office:value="-0.01012885">
            <text:p>-0.01012885</text:p>
          </table:table-cell>
          <table:table-cell table:number-columns-repeated="4"/>
        </table:table-row>
        <table:table-row table:style-name="ro1">
          <table:table-cell office:value-type="float" office:value="497.568939208984">
            <text:p>497.568939209</text:p>
          </table:table-cell>
          <table:table-cell office:value-type="float" office:value="0.003823697">
            <text:p>0.003823697</text:p>
          </table:table-cell>
          <table:table-cell table:number-columns-repeated="4"/>
        </table:table-row>
        <table:table-row table:style-name="ro1">
          <table:table-cell office:value-type="float" office:value="497.685089111328">
            <text:p>497.6850891113</text:p>
          </table:table-cell>
          <table:table-cell office:value-type="float" office:value="0.005623932">
            <text:p>0.005623932</text:p>
          </table:table-cell>
          <table:table-cell table:number-columns-repeated="4"/>
        </table:table-row>
        <table:table-row table:style-name="ro1">
          <table:table-cell office:value-type="float" office:value="497.801239013672">
            <text:p>497.8012390137</text:p>
          </table:table-cell>
          <table:table-cell office:value-type="string">
            <text:p>-9.709461E-05</text:p>
          </table:table-cell>
          <table:table-cell table:number-columns-repeated="4"/>
        </table:table-row>
        <table:table-row table:style-name="ro1">
          <table:table-cell office:value-type="float" office:value="497.917388916016">
            <text:p>497.917388916</text:p>
          </table:table-cell>
          <table:table-cell office:value-type="float" office:value="-0.01169377">
            <text:p>-0.01169377</text:p>
          </table:table-cell>
          <table:table-cell table:number-columns-repeated="4"/>
        </table:table-row>
        <table:table-row table:style-name="ro1">
          <table:table-cell office:value-type="float" office:value="498.033569335938">
            <text:p>498.0335693359</text:p>
          </table:table-cell>
          <table:table-cell office:value-type="float" office:value="0.005798182">
            <text:p>0.005798182</text:p>
          </table:table-cell>
          <table:table-cell table:number-columns-repeated="4"/>
        </table:table-row>
        <table:table-row table:style-name="ro1">
          <table:table-cell office:value-type="float" office:value="498.149719238281">
            <text:p>498.1497192383</text:p>
          </table:table-cell>
          <table:table-cell office:value-type="float" office:value="0.01668625">
            <text:p>0.01668625</text:p>
          </table:table-cell>
          <table:table-cell table:number-columns-repeated="4"/>
        </table:table-row>
        <table:table-row table:style-name="ro1">
          <table:table-cell office:value-type="float" office:value="498.265899658203">
            <text:p>498.2658996582</text:p>
          </table:table-cell>
          <table:table-cell office:value-type="float" office:value="-0.004330416">
            <text:p>-0.004330416</text:p>
          </table:table-cell>
          <table:table-cell table:number-columns-repeated="4"/>
        </table:table-row>
        <table:table-row table:style-name="ro1">
          <table:table-cell office:value-type="float" office:value="498.382049560547">
            <text:p>498.3820495605</text:p>
          </table:table-cell>
          <table:table-cell office:value-type="float" office:value="-0.002076043">
            <text:p>-0.002076043</text:p>
          </table:table-cell>
          <table:table-cell table:number-columns-repeated="4"/>
        </table:table-row>
        <table:table-row table:style-name="ro1">
          <table:table-cell office:value-type="float" office:value="498.498229980469">
            <text:p>498.4982299805</text:p>
          </table:table-cell>
          <table:table-cell office:value-type="float" office:value="0.01424506">
            <text:p>0.01424506</text:p>
          </table:table-cell>
          <table:table-cell table:number-columns-repeated="4"/>
        </table:table-row>
        <table:table-row table:style-name="ro1">
          <table:table-cell office:value-type="float" office:value="498.614410400391">
            <text:p>498.6144104004</text:p>
          </table:table-cell>
          <table:table-cell office:value-type="float" office:value="-0.0003547222">
            <text:p>-0.0003547222</text:p>
          </table:table-cell>
          <table:table-cell table:number-columns-repeated="4"/>
        </table:table-row>
        <table:table-row table:style-name="ro1">
          <table:table-cell office:value-type="float" office:value="498.730590820313">
            <text:p>498.7305908203</text:p>
          </table:table-cell>
          <table:table-cell office:value-type="float" office:value="0.003292547">
            <text:p>0.003292547</text:p>
          </table:table-cell>
          <table:table-cell table:number-columns-repeated="4"/>
        </table:table-row>
        <table:table-row table:style-name="ro1">
          <table:table-cell office:value-type="float" office:value="498.846771240234">
            <text:p>498.8467712402</text:p>
          </table:table-cell>
          <table:table-cell office:value-type="float" office:value="-0.01323579">
            <text:p>-0.01323579</text:p>
          </table:table-cell>
          <table:table-cell table:number-columns-repeated="4"/>
        </table:table-row>
        <table:table-row table:style-name="ro1">
          <table:table-cell office:value-type="float" office:value="498.962982177734">
            <text:p>498.9629821777</text:p>
          </table:table-cell>
          <table:table-cell office:value-type="float" office:value="0.003713245">
            <text:p>0.003713245</text:p>
          </table:table-cell>
          <table:table-cell table:number-columns-repeated="4"/>
        </table:table-row>
        <table:table-row table:style-name="ro1">
          <table:table-cell office:value-type="float" office:value="499.079162597656">
            <text:p>499.0791625977</text:p>
          </table:table-cell>
          <table:table-cell office:value-type="float" office:value="0.02758772">
            <text:p>0.02758772</text:p>
          </table:table-cell>
          <table:table-cell table:number-columns-repeated="4"/>
        </table:table-row>
        <table:table-row table:style-name="ro1">
          <table:table-cell office:value-type="float" office:value="499.195373535156">
            <text:p>499.1953735352</text:p>
          </table:table-cell>
          <table:table-cell office:value-type="float" office:value="-0.007136488">
            <text:p>-0.007136488</text:p>
          </table:table-cell>
          <table:table-cell table:number-columns-repeated="4"/>
        </table:table-row>
        <table:table-row table:style-name="ro1">
          <table:table-cell office:value-type="float" office:value="499.311584472656">
            <text:p>499.3115844727</text:p>
          </table:table-cell>
          <table:table-cell office:value-type="float" office:value="-0.005850062">
            <text:p>-0.005850062</text:p>
          </table:table-cell>
          <table:table-cell table:number-columns-repeated="4"/>
        </table:table-row>
        <table:table-row table:style-name="ro1">
          <table:table-cell office:value-type="float" office:value="499.427764892578">
            <text:p>499.4277648926</text:p>
          </table:table-cell>
          <table:table-cell office:value-type="float" office:value="0.007766533">
            <text:p>0.007766533</text:p>
          </table:table-cell>
          <table:table-cell table:number-columns-repeated="4"/>
        </table:table-row>
        <table:table-row table:style-name="ro1">
          <table:table-cell office:value-type="float" office:value="499.543975830078">
            <text:p>499.5439758301</text:p>
          </table:table-cell>
          <table:table-cell office:value-type="float" office:value="-0.002175244">
            <text:p>-0.002175244</text:p>
          </table:table-cell>
          <table:table-cell table:number-columns-repeated="4"/>
        </table:table-row>
        <table:table-row table:style-name="ro1">
          <table:table-cell office:value-type="float" office:value="499.660217285156">
            <text:p>499.6602172852</text:p>
          </table:table-cell>
          <table:table-cell office:value-type="float" office:value="-0.008004807">
            <text:p>-0.008004807</text:p>
          </table:table-cell>
          <table:table-cell table:number-columns-repeated="4"/>
        </table:table-row>
        <table:table-row table:style-name="ro1">
          <table:table-cell office:value-type="float" office:value="499.776428222656">
            <text:p>499.7764282227</text:p>
          </table:table-cell>
          <table:table-cell office:value-type="float" office:value="-0.01477931">
            <text:p>-0.01477931</text:p>
          </table:table-cell>
          <table:table-cell table:number-columns-repeated="4"/>
        </table:table-row>
        <table:table-row table:style-name="ro1">
          <table:table-cell office:value-type="float" office:value="499.892639160156">
            <text:p>499.8926391602</text:p>
          </table:table-cell>
          <table:table-cell office:value-type="float" office:value="0.0002466275">
            <text:p>0.0002466275</text:p>
          </table:table-cell>
          <table:table-cell table:number-columns-repeated="4"/>
        </table:table-row>
        <table:table-row table:style-name="ro1">
          <table:table-cell office:value-type="float" office:value="500.008880615234">
            <text:p>500.0088806152</text:p>
          </table:table-cell>
          <table:table-cell office:value-type="float" office:value="0.02607822">
            <text:p>0.02607822</text:p>
          </table:table-cell>
          <table:table-cell table:number-columns-repeated="4"/>
        </table:table-row>
        <table:table-row table:style-name="ro1">
          <table:table-cell office:value-type="float" office:value="500.125091552734">
            <text:p>500.1250915527</text:p>
          </table:table-cell>
          <table:table-cell office:value-type="float" office:value="-0.00390707">
            <text:p>-0.00390707</text:p>
          </table:table-cell>
          <table:table-cell table:number-columns-repeated="4"/>
        </table:table-row>
        <table:table-row table:style-name="ro1">
          <table:table-cell office:value-type="float" office:value="500.241333007813">
            <text:p>500.2413330078</text:p>
          </table:table-cell>
          <table:table-cell office:value-type="float" office:value="0.001489165">
            <text:p>0.001489165</text:p>
          </table:table-cell>
          <table:table-cell table:number-columns-repeated="4"/>
        </table:table-row>
        <table:table-row table:style-name="ro1">
          <table:table-cell office:value-type="float" office:value="500.357574462891">
            <text:p>500.3575744629</text:p>
          </table:table-cell>
          <table:table-cell office:value-type="float" office:value="0.001330301">
            <text:p>0.001330301</text:p>
          </table:table-cell>
          <table:table-cell table:number-columns-repeated="4"/>
        </table:table-row>
        <table:table-row table:style-name="ro1">
          <table:table-cell office:value-type="float" office:value="500.473815917969">
            <text:p>500.473815918</text:p>
          </table:table-cell>
          <table:table-cell office:value-type="float" office:value="0.0005812888">
            <text:p>0.0005812888</text:p>
          </table:table-cell>
          <table:table-cell table:number-columns-repeated="4"/>
        </table:table-row>
        <table:table-row table:style-name="ro1">
          <table:table-cell office:value-type="float" office:value="500.590057373047">
            <text:p>500.590057373</text:p>
          </table:table-cell>
          <table:table-cell office:value-type="float" office:value="-0.009501132">
            <text:p>-0.009501132</text:p>
          </table:table-cell>
          <table:table-cell table:number-columns-repeated="4"/>
        </table:table-row>
        <table:table-row table:style-name="ro1">
          <table:table-cell office:value-type="float" office:value="500.706298828125">
            <text:p>500.7062988281</text:p>
          </table:table-cell>
          <table:table-cell office:value-type="float" office:value="-0.01115323">
            <text:p>-0.01115323</text:p>
          </table:table-cell>
          <table:table-cell table:number-columns-repeated="4"/>
        </table:table-row>
        <table:table-row table:style-name="ro1">
          <table:table-cell office:value-type="float" office:value="500.822570800781">
            <text:p>500.8225708008</text:p>
          </table:table-cell>
          <table:table-cell office:value-type="string">
            <text:p>3.362257E-06</text:p>
          </table:table-cell>
          <table:table-cell table:number-columns-repeated="4"/>
        </table:table-row>
        <table:table-row table:style-name="ro1">
          <table:table-cell office:value-type="float" office:value="500.938812255859">
            <text:p>500.9388122559</text:p>
          </table:table-cell>
          <table:table-cell office:value-type="float" office:value="0.001851439">
            <text:p>0.001851439</text:p>
          </table:table-cell>
          <table:table-cell table:number-columns-repeated="4"/>
        </table:table-row>
        <table:table-row table:style-name="ro1">
          <table:table-cell office:value-type="float" office:value="501.055084228516">
            <text:p>501.0550842285</text:p>
          </table:table-cell>
          <table:table-cell office:value-type="float" office:value="-0.01278036">
            <text:p>-0.01278036</text:p>
          </table:table-cell>
          <table:table-cell table:number-columns-repeated="4"/>
        </table:table-row>
        <table:table-row table:style-name="ro1">
          <table:table-cell office:value-type="float" office:value="501.171356201172">
            <text:p>501.1713562012</text:p>
          </table:table-cell>
          <table:table-cell office:value-type="float" office:value="-0.004664253">
            <text:p>-0.004664253</text:p>
          </table:table-cell>
          <table:table-cell table:number-columns-repeated="4"/>
        </table:table-row>
        <table:table-row table:style-name="ro1">
          <table:table-cell office:value-type="float" office:value="501.287628173828">
            <text:p>501.2876281738</text:p>
          </table:table-cell>
          <table:table-cell office:value-type="float" office:value="0.007640931">
            <text:p>0.007640931</text:p>
          </table:table-cell>
          <table:table-cell table:number-columns-repeated="4"/>
        </table:table-row>
        <table:table-row table:style-name="ro1">
          <table:table-cell office:value-type="float" office:value="501.403900146484">
            <text:p>501.4039001465</text:p>
          </table:table-cell>
          <table:table-cell office:value-type="float" office:value="0.001076817">
            <text:p>0.001076817</text:p>
          </table:table-cell>
          <table:table-cell table:number-columns-repeated="4"/>
        </table:table-row>
        <table:table-row table:style-name="ro1">
          <table:table-cell office:value-type="float" office:value="501.520172119141">
            <text:p>501.5201721191</text:p>
          </table:table-cell>
          <table:table-cell office:value-type="float" office:value="-0.002529979">
            <text:p>-0.002529979</text:p>
          </table:table-cell>
          <table:table-cell table:number-columns-repeated="4"/>
        </table:table-row>
        <table:table-row table:style-name="ro1">
          <table:table-cell office:value-type="float" office:value="501.636444091797">
            <text:p>501.6364440918</text:p>
          </table:table-cell>
          <table:table-cell office:value-type="float" office:value="0.0665113">
            <text:p>0.0665113</text:p>
          </table:table-cell>
          <table:table-cell table:number-columns-repeated="4"/>
        </table:table-row>
        <table:table-row table:style-name="ro1">
          <table:table-cell office:value-type="float" office:value="501.752746582031">
            <text:p>501.752746582</text:p>
          </table:table-cell>
          <table:table-cell office:value-type="float" office:value="-0.0002514473">
            <text:p>-0.0002514473</text:p>
          </table:table-cell>
          <table:table-cell table:number-columns-repeated="4"/>
        </table:table-row>
        <table:table-row table:style-name="ro1">
          <table:table-cell office:value-type="float" office:value="501.869018554688">
            <text:p>501.8690185547</text:p>
          </table:table-cell>
          <table:table-cell office:value-type="float" office:value="-0.002666073">
            <text:p>-0.002666073</text:p>
          </table:table-cell>
          <table:table-cell table:number-columns-repeated="4"/>
        </table:table-row>
        <table:table-row table:style-name="ro1">
          <table:table-cell office:value-type="float" office:value="501.985321044922">
            <text:p>501.9853210449</text:p>
          </table:table-cell>
          <table:table-cell office:value-type="float" office:value="0.002457931">
            <text:p>0.002457931</text:p>
          </table:table-cell>
          <table:table-cell table:number-columns-repeated="4"/>
        </table:table-row>
        <table:table-row table:style-name="ro1">
          <table:table-cell office:value-type="float" office:value="502.101623535156">
            <text:p>502.1016235352</text:p>
          </table:table-cell>
          <table:table-cell office:value-type="float" office:value="-0.01210205">
            <text:p>-0.01210205</text:p>
          </table:table-cell>
          <table:table-cell table:number-columns-repeated="4"/>
        </table:table-row>
        <table:table-row table:style-name="ro1">
          <table:table-cell office:value-type="float" office:value="502.217926025391">
            <text:p>502.2179260254</text:p>
          </table:table-cell>
          <table:table-cell office:value-type="float" office:value="0.001530293">
            <text:p>0.001530293</text:p>
          </table:table-cell>
          <table:table-cell table:number-columns-repeated="4"/>
        </table:table-row>
        <table:table-row table:style-name="ro1">
          <table:table-cell office:value-type="float" office:value="502.334228515625">
            <text:p>502.3342285156</text:p>
          </table:table-cell>
          <table:table-cell office:value-type="float" office:value="-0.004288643">
            <text:p>-0.004288643</text:p>
          </table:table-cell>
          <table:table-cell table:number-columns-repeated="4"/>
        </table:table-row>
        <table:table-row table:style-name="ro1">
          <table:table-cell office:value-type="float" office:value="502.450531005859">
            <text:p>502.4505310059</text:p>
          </table:table-cell>
          <table:table-cell office:value-type="float" office:value="-0.00965427">
            <text:p>-0.00965427</text:p>
          </table:table-cell>
          <table:table-cell table:number-columns-repeated="4"/>
        </table:table-row>
        <table:table-row table:style-name="ro1">
          <table:table-cell office:value-type="float" office:value="502.566833496094">
            <text:p>502.5668334961</text:p>
          </table:table-cell>
          <table:table-cell office:value-type="float" office:value="-0.0001571231">
            <text:p>-0.0001571231</text:p>
          </table:table-cell>
          <table:table-cell table:number-columns-repeated="4"/>
        </table:table-row>
        <table:table-row table:style-name="ro1">
          <table:table-cell office:value-type="float" office:value="502.683166503906">
            <text:p>502.6831665039</text:p>
          </table:table-cell>
          <table:table-cell office:value-type="float" office:value="0.003861604">
            <text:p>0.003861604</text:p>
          </table:table-cell>
          <table:table-cell table:number-columns-repeated="4"/>
        </table:table-row>
        <table:table-row table:style-name="ro1">
          <table:table-cell office:value-type="float" office:value="502.799468994141">
            <text:p>502.7994689941</text:p>
          </table:table-cell>
          <table:table-cell office:value-type="float" office:value="-0.001361122">
            <text:p>-0.001361122</text:p>
          </table:table-cell>
          <table:table-cell table:number-columns-repeated="4"/>
        </table:table-row>
        <table:table-row table:style-name="ro1">
          <table:table-cell office:value-type="float" office:value="502.915802001953">
            <text:p>502.915802002</text:p>
          </table:table-cell>
          <table:table-cell office:value-type="float" office:value="-0.005910493">
            <text:p>-0.005910493</text:p>
          </table:table-cell>
          <table:table-cell table:number-columns-repeated="4"/>
        </table:table-row>
        <table:table-row table:style-name="ro1">
          <table:table-cell office:value-type="float" office:value="503.032135009766">
            <text:p>503.0321350098</text:p>
          </table:table-cell>
          <table:table-cell office:value-type="float" office:value="-0.009370637">
            <text:p>-0.009370637</text:p>
          </table:table-cell>
          <table:table-cell table:number-columns-repeated="4"/>
        </table:table-row>
        <table:table-row table:style-name="ro1">
          <table:table-cell office:value-type="float" office:value="503.148468017578">
            <text:p>503.1484680176</text:p>
          </table:table-cell>
          <table:table-cell office:value-type="float" office:value="-0.002559708">
            <text:p>-0.002559708</text:p>
          </table:table-cell>
          <table:table-cell table:number-columns-repeated="4"/>
        </table:table-row>
        <table:table-row table:style-name="ro1">
          <table:table-cell office:value-type="float" office:value="503.264801025391">
            <text:p>503.2648010254</text:p>
          </table:table-cell>
          <table:table-cell office:value-type="float" office:value="0.006408677">
            <text:p>0.006408677</text:p>
          </table:table-cell>
          <table:table-cell table:number-columns-repeated="4"/>
        </table:table-row>
        <table:table-row table:style-name="ro1">
          <table:table-cell office:value-type="float" office:value="503.381134033203">
            <text:p>503.3811340332</text:p>
          </table:table-cell>
          <table:table-cell office:value-type="float" office:value="-0.009835124">
            <text:p>-0.009835124</text:p>
          </table:table-cell>
          <table:table-cell table:number-columns-repeated="4"/>
        </table:table-row>
        <table:table-row table:style-name="ro1">
          <table:table-cell office:value-type="float" office:value="503.497497558594">
            <text:p>503.4974975586</text:p>
          </table:table-cell>
          <table:table-cell office:value-type="float" office:value="-0.006696944">
            <text:p>-0.006696944</text:p>
          </table:table-cell>
          <table:table-cell table:number-columns-repeated="4"/>
        </table:table-row>
        <table:table-row table:style-name="ro1">
          <table:table-cell office:value-type="float" office:value="503.613830566406">
            <text:p>503.6138305664</text:p>
          </table:table-cell>
          <table:table-cell office:value-type="float" office:value="-0.0003925071">
            <text:p>-0.0003925071</text:p>
          </table:table-cell>
          <table:table-cell table:number-columns-repeated="4"/>
        </table:table-row>
        <table:table-row table:style-name="ro1">
          <table:table-cell office:value-type="float" office:value="503.730194091797">
            <text:p>503.7301940918</text:p>
          </table:table-cell>
          <table:table-cell office:value-type="float" office:value="-0.003383145">
            <text:p>-0.003383145</text:p>
          </table:table-cell>
          <table:table-cell table:number-columns-repeated="4"/>
        </table:table-row>
        <table:table-row table:style-name="ro1">
          <table:table-cell office:value-type="float" office:value="503.846527099609">
            <text:p>503.8465270996</text:p>
          </table:table-cell>
          <table:table-cell office:value-type="float" office:value="-0.001601659">
            <text:p>-0.001601659</text:p>
          </table:table-cell>
          <table:table-cell table:number-columns-repeated="4"/>
        </table:table-row>
        <table:table-row table:style-name="ro1">
          <table:table-cell office:value-type="float" office:value="503.962890625">
            <text:p>503.962890625</text:p>
          </table:table-cell>
          <table:table-cell office:value-type="float" office:value="-0.01208914">
            <text:p>-0.01208914</text:p>
          </table:table-cell>
          <table:table-cell table:number-columns-repeated="4"/>
        </table:table-row>
        <table:table-row table:style-name="ro1">
          <table:table-cell office:value-type="float" office:value="504.079254150391">
            <text:p>504.0792541504</text:p>
          </table:table-cell>
          <table:table-cell office:value-type="float" office:value="-0.001266097">
            <text:p>-0.001266097</text:p>
          </table:table-cell>
          <table:table-cell table:number-columns-repeated="4"/>
        </table:table-row>
        <table:table-row table:style-name="ro1">
          <table:table-cell office:value-type="float" office:value="504.195617675781">
            <text:p>504.1956176758</text:p>
          </table:table-cell>
          <table:table-cell office:value-type="float" office:value="0.004404043">
            <text:p>0.004404043</text:p>
          </table:table-cell>
          <table:table-cell table:number-columns-repeated="4"/>
        </table:table-row>
        <table:table-row table:style-name="ro1">
          <table:table-cell office:value-type="float" office:value="504.31201171875">
            <text:p>504.3120117188</text:p>
          </table:table-cell>
          <table:table-cell office:value-type="float" office:value="0.004403136">
            <text:p>0.004403136</text:p>
          </table:table-cell>
          <table:table-cell table:number-columns-repeated="4"/>
        </table:table-row>
        <table:table-row table:style-name="ro1">
          <table:table-cell office:value-type="float" office:value="504.428375244141">
            <text:p>504.4283752441</text:p>
          </table:table-cell>
          <table:table-cell office:value-type="float" office:value="-0.008768687">
            <text:p>-0.008768687</text:p>
          </table:table-cell>
          <table:table-cell table:number-columns-repeated="4"/>
        </table:table-row>
        <table:table-row table:style-name="ro1">
          <table:table-cell office:value-type="float" office:value="504.544738769531">
            <text:p>504.5447387695</text:p>
          </table:table-cell>
          <table:table-cell office:value-type="float" office:value="-0.003359901">
            <text:p>-0.003359901</text:p>
          </table:table-cell>
          <table:table-cell table:number-columns-repeated="4"/>
        </table:table-row>
        <table:table-row table:style-name="ro1">
          <table:table-cell office:value-type="float" office:value="504.6611328125">
            <text:p>504.6611328125</text:p>
          </table:table-cell>
          <table:table-cell office:value-type="float" office:value="-0.000667632">
            <text:p>-0.000667632</text:p>
          </table:table-cell>
          <table:table-cell table:number-columns-repeated="4"/>
        </table:table-row>
        <table:table-row table:style-name="ro1">
          <table:table-cell office:value-type="float" office:value="504.777526855469">
            <text:p>504.7775268555</text:p>
          </table:table-cell>
          <table:table-cell office:value-type="float" office:value="-0.002810909">
            <text:p>-0.002810909</text:p>
          </table:table-cell>
          <table:table-cell table:number-columns-repeated="4"/>
        </table:table-row>
        <table:table-row table:style-name="ro1">
          <table:table-cell office:value-type="float" office:value="504.893920898438">
            <text:p>504.8939208984</text:p>
          </table:table-cell>
          <table:table-cell office:value-type="float" office:value="-0.002741789">
            <text:p>-0.002741789</text:p>
          </table:table-cell>
          <table:table-cell table:number-columns-repeated="4"/>
        </table:table-row>
        <table:table-row table:style-name="ro1">
          <table:table-cell office:value-type="float" office:value="505.010314941406">
            <text:p>505.0103149414</text:p>
          </table:table-cell>
          <table:table-cell office:value-type="float" office:value="0.0080877">
            <text:p>0.0080877</text:p>
          </table:table-cell>
          <table:table-cell table:number-columns-repeated="4"/>
        </table:table-row>
        <table:table-row table:style-name="ro1">
          <table:table-cell office:value-type="float" office:value="505.126708984375">
            <text:p>505.1267089844</text:p>
          </table:table-cell>
          <table:table-cell office:value-type="float" office:value="0.02349433">
            <text:p>0.02349433</text:p>
          </table:table-cell>
          <table:table-cell table:number-columns-repeated="4"/>
        </table:table-row>
        <table:table-row table:style-name="ro1">
          <table:table-cell office:value-type="float" office:value="505.243103027344">
            <text:p>505.2431030273</text:p>
          </table:table-cell>
          <table:table-cell office:value-type="float" office:value="-0.0002731585">
            <text:p>-0.0002731585</text:p>
          </table:table-cell>
          <table:table-cell table:number-columns-repeated="4"/>
        </table:table-row>
        <table:table-row table:style-name="ro1">
          <table:table-cell office:value-type="float" office:value="505.359497070313">
            <text:p>505.3594970703</text:p>
          </table:table-cell>
          <table:table-cell office:value-type="float" office:value="-0.005994479">
            <text:p>-0.005994479</text:p>
          </table:table-cell>
          <table:table-cell table:number-columns-repeated="4"/>
        </table:table-row>
        <table:table-row table:style-name="ro1">
          <table:table-cell office:value-type="float" office:value="505.475921630859">
            <text:p>505.4759216309</text:p>
          </table:table-cell>
          <table:table-cell office:value-type="float" office:value="0.002776953">
            <text:p>0.002776953</text:p>
          </table:table-cell>
          <table:table-cell table:number-columns-repeated="4"/>
        </table:table-row>
        <table:table-row table:style-name="ro1">
          <table:table-cell office:value-type="float" office:value="505.592346191406">
            <text:p>505.5923461914</text:p>
          </table:table-cell>
          <table:table-cell office:value-type="float" office:value="0.01106787">
            <text:p>0.01106787</text:p>
          </table:table-cell>
          <table:table-cell table:number-columns-repeated="4"/>
        </table:table-row>
        <table:table-row table:style-name="ro1">
          <table:table-cell office:value-type="float" office:value="505.708740234375">
            <text:p>505.7087402344</text:p>
          </table:table-cell>
          <table:table-cell office:value-type="float" office:value="-0.007967764">
            <text:p>-0.007967764</text:p>
          </table:table-cell>
          <table:table-cell table:number-columns-repeated="4"/>
        </table:table-row>
        <table:table-row table:style-name="ro1">
          <table:table-cell office:value-type="float" office:value="505.825164794922">
            <text:p>505.8251647949</text:p>
          </table:table-cell>
          <table:table-cell office:value-type="float" office:value="-0.005485067">
            <text:p>-0.005485067</text:p>
          </table:table-cell>
          <table:table-cell table:number-columns-repeated="4"/>
        </table:table-row>
        <table:table-row table:style-name="ro1">
          <table:table-cell office:value-type="float" office:value="505.941589355469">
            <text:p>505.9415893555</text:p>
          </table:table-cell>
          <table:table-cell office:value-type="float" office:value="0.001771329">
            <text:p>0.001771329</text:p>
          </table:table-cell>
          <table:table-cell table:number-columns-repeated="4"/>
        </table:table-row>
        <table:table-row table:style-name="ro1">
          <table:table-cell office:value-type="float" office:value="506.058013916016">
            <text:p>506.058013916</text:p>
          </table:table-cell>
          <table:table-cell office:value-type="float" office:value="0.0007411371">
            <text:p>0.0007411371</text:p>
          </table:table-cell>
          <table:table-cell table:number-columns-repeated="4"/>
        </table:table-row>
        <table:table-row table:style-name="ro1">
          <table:table-cell office:value-type="float" office:value="506.174468994141">
            <text:p>506.1744689941</text:p>
          </table:table-cell>
          <table:table-cell office:value-type="float" office:value="0.000740379">
            <text:p>0.000740379</text:p>
          </table:table-cell>
          <table:table-cell table:number-columns-repeated="4"/>
        </table:table-row>
        <table:table-row table:style-name="ro1">
          <table:table-cell office:value-type="float" office:value="506.290893554688">
            <text:p>506.2908935547</text:p>
          </table:table-cell>
          <table:table-cell office:value-type="float" office:value="-0.004266402">
            <text:p>-0.004266402</text:p>
          </table:table-cell>
          <table:table-cell table:number-columns-repeated="4"/>
        </table:table-row>
        <table:table-row table:style-name="ro1">
          <table:table-cell office:value-type="float" office:value="506.407348632813">
            <text:p>506.4073486328</text:p>
          </table:table-cell>
          <table:table-cell office:value-type="float" office:value="0.007008695">
            <text:p>0.007008695</text:p>
          </table:table-cell>
          <table:table-cell table:number-columns-repeated="4"/>
        </table:table-row>
        <table:table-row table:style-name="ro1">
          <table:table-cell office:value-type="float" office:value="506.523773193359">
            <text:p>506.5237731934</text:p>
          </table:table-cell>
          <table:table-cell office:value-type="string">
            <text:p>3.373189E-05</text:p>
          </table:table-cell>
          <table:table-cell table:number-columns-repeated="4"/>
        </table:table-row>
        <table:table-row table:style-name="ro1">
          <table:table-cell office:value-type="float" office:value="506.640228271484">
            <text:p>506.6402282715</text:p>
          </table:table-cell>
          <table:table-cell office:value-type="float" office:value="0.001035759">
            <text:p>0.001035759</text:p>
          </table:table-cell>
          <table:table-cell table:number-columns-repeated="4"/>
        </table:table-row>
        <table:table-row table:style-name="ro1">
          <table:table-cell office:value-type="float" office:value="506.756683349609">
            <text:p>506.7566833496</text:p>
          </table:table-cell>
          <table:table-cell office:value-type="float" office:value="0.004298468">
            <text:p>0.004298468</text:p>
          </table:table-cell>
          <table:table-cell table:number-columns-repeated="4"/>
        </table:table-row>
        <table:table-row table:style-name="ro1">
          <table:table-cell office:value-type="float" office:value="506.873138427734">
            <text:p>506.8731384277</text:p>
          </table:table-cell>
          <table:table-cell office:value-type="float" office:value="0.008604582">
            <text:p>0.008604582</text:p>
          </table:table-cell>
          <table:table-cell table:number-columns-repeated="4"/>
        </table:table-row>
        <table:table-row table:style-name="ro1">
          <table:table-cell office:value-type="float" office:value="506.989593505859">
            <text:p>506.9895935059</text:p>
          </table:table-cell>
          <table:table-cell office:value-type="float" office:value="-0.002456344">
            <text:p>-0.002456344</text:p>
          </table:table-cell>
          <table:table-cell table:number-columns-repeated="4"/>
        </table:table-row>
        <table:table-row table:style-name="ro1">
          <table:table-cell office:value-type="float" office:value="507.106048583984">
            <text:p>507.106048584</text:p>
          </table:table-cell>
          <table:table-cell office:value-type="float" office:value="-0.005828691">
            <text:p>-0.005828691</text:p>
          </table:table-cell>
          <table:table-cell table:number-columns-repeated="4"/>
        </table:table-row>
        <table:table-row table:style-name="ro1">
          <table:table-cell office:value-type="float" office:value="507.222534179688">
            <text:p>507.2225341797</text:p>
          </table:table-cell>
          <table:table-cell office:value-type="float" office:value="-0.01370871">
            <text:p>-0.01370871</text:p>
          </table:table-cell>
          <table:table-cell table:number-columns-repeated="4"/>
        </table:table-row>
        <table:table-row table:style-name="ro1">
          <table:table-cell office:value-type="float" office:value="507.338989257813">
            <text:p>507.3389892578</text:p>
          </table:table-cell>
          <table:table-cell office:value-type="float" office:value="-0.006091278">
            <text:p>-0.006091278</text:p>
          </table:table-cell>
          <table:table-cell table:number-columns-repeated="4"/>
        </table:table-row>
        <table:table-row table:style-name="ro1">
          <table:table-cell office:value-type="float" office:value="507.455474853516">
            <text:p>507.4554748535</text:p>
          </table:table-cell>
          <table:table-cell office:value-type="float" office:value="-0.0005746489">
            <text:p>-0.0005746489</text:p>
          </table:table-cell>
          <table:table-cell table:number-columns-repeated="4"/>
        </table:table-row>
        <table:table-row table:style-name="ro1">
          <table:table-cell office:value-type="float" office:value="507.571960449219">
            <text:p>507.5719604492</text:p>
          </table:table-cell>
          <table:table-cell office:value-type="float" office:value="-0.01293172">
            <text:p>-0.01293172</text:p>
          </table:table-cell>
          <table:table-cell table:number-columns-repeated="4"/>
        </table:table-row>
        <table:table-row table:style-name="ro1">
          <table:table-cell office:value-type="float" office:value="507.688446044922">
            <text:p>507.6884460449</text:p>
          </table:table-cell>
          <table:table-cell office:value-type="float" office:value="-0.00948171">
            <text:p>-0.00948171</text:p>
          </table:table-cell>
          <table:table-cell table:number-columns-repeated="4"/>
        </table:table-row>
        <table:table-row table:style-name="ro1">
          <table:table-cell office:value-type="float" office:value="507.804931640625">
            <text:p>507.8049316406</text:p>
          </table:table-cell>
          <table:table-cell office:value-type="float" office:value="-0.001414787">
            <text:p>-0.001414787</text:p>
          </table:table-cell>
          <table:table-cell table:number-columns-repeated="4"/>
        </table:table-row>
        <table:table-row table:style-name="ro1">
          <table:table-cell office:value-type="float" office:value="507.921417236328">
            <text:p>507.9214172363</text:p>
          </table:table-cell>
          <table:table-cell office:value-type="float" office:value="-0.001514104">
            <text:p>-0.001514104</text:p>
          </table:table-cell>
          <table:table-cell table:number-columns-repeated="4"/>
        </table:table-row>
        <table:table-row table:style-name="ro1">
          <table:table-cell office:value-type="float" office:value="508.037902832031">
            <text:p>508.037902832</text:p>
          </table:table-cell>
          <table:table-cell office:value-type="float" office:value="-0.005760043">
            <text:p>-0.005760043</text:p>
          </table:table-cell>
          <table:table-cell table:number-columns-repeated="4"/>
        </table:table-row>
        <table:table-row table:style-name="ro1">
          <table:table-cell office:value-type="float" office:value="508.154388427734">
            <text:p>508.1543884277</text:p>
          </table:table-cell>
          <table:table-cell office:value-type="float" office:value="0.0002027442">
            <text:p>0.0002027442</text:p>
          </table:table-cell>
          <table:table-cell table:number-columns-repeated="4"/>
        </table:table-row>
        <table:table-row table:style-name="ro1">
          <table:table-cell office:value-type="float" office:value="508.270904541016">
            <text:p>508.270904541</text:p>
          </table:table-cell>
          <table:table-cell office:value-type="float" office:value="0.001101615">
            <text:p>0.001101615</text:p>
          </table:table-cell>
          <table:table-cell table:number-columns-repeated="4"/>
        </table:table-row>
        <table:table-row table:style-name="ro1">
          <table:table-cell office:value-type="float" office:value="508.387420654297">
            <text:p>508.3874206543</text:p>
          </table:table-cell>
          <table:table-cell office:value-type="float" office:value="-0.006147681">
            <text:p>-0.006147681</text:p>
          </table:table-cell>
          <table:table-cell table:number-columns-repeated="4"/>
        </table:table-row>
        <table:table-row table:style-name="ro1">
          <table:table-cell office:value-type="float" office:value="508.50390625">
            <text:p>508.50390625</text:p>
          </table:table-cell>
          <table:table-cell office:value-type="float" office:value="-0.008051148">
            <text:p>-0.008051148</text:p>
          </table:table-cell>
          <table:table-cell table:number-columns-repeated="4"/>
        </table:table-row>
        <table:table-row table:style-name="ro1">
          <table:table-cell office:value-type="float" office:value="508.620422363281">
            <text:p>508.6204223633</text:p>
          </table:table-cell>
          <table:table-cell office:value-type="float" office:value="-0.009547757">
            <text:p>-0.009547757</text:p>
          </table:table-cell>
          <table:table-cell table:number-columns-repeated="4"/>
        </table:table-row>
        <table:table-row table:style-name="ro1">
          <table:table-cell office:value-type="float" office:value="508.736938476563">
            <text:p>508.7369384766</text:p>
          </table:table-cell>
          <table:table-cell office:value-type="float" office:value="0.01749794">
            <text:p>0.01749794</text:p>
          </table:table-cell>
          <table:table-cell table:number-columns-repeated="4"/>
        </table:table-row>
        <table:table-row table:style-name="ro1">
          <table:table-cell office:value-type="float" office:value="508.853454589844">
            <text:p>508.8534545898</text:p>
          </table:table-cell>
          <table:table-cell office:value-type="float" office:value="0.004176744">
            <text:p>0.004176744</text:p>
          </table:table-cell>
          <table:table-cell table:number-columns-repeated="4"/>
        </table:table-row>
        <table:table-row table:style-name="ro1">
          <table:table-cell office:value-type="float" office:value="508.970001220703">
            <text:p>508.9700012207</text:p>
          </table:table-cell>
          <table:table-cell office:value-type="float" office:value="-0.006832887">
            <text:p>-0.006832887</text:p>
          </table:table-cell>
          <table:table-cell table:number-columns-repeated="4"/>
        </table:table-row>
        <table:table-row table:style-name="ro1">
          <table:table-cell office:value-type="float" office:value="509.086517333984">
            <text:p>509.086517334</text:p>
          </table:table-cell>
          <table:table-cell office:value-type="float" office:value="-0.002467447">
            <text:p>-0.002467447</text:p>
          </table:table-cell>
          <table:table-cell table:number-columns-repeated="4"/>
        </table:table-row>
        <table:table-row table:style-name="ro1">
          <table:table-cell office:value-type="float" office:value="509.203063964844">
            <text:p>509.2030639648</text:p>
          </table:table-cell>
          <table:table-cell office:value-type="float" office:value="0.01395986">
            <text:p>0.01395986</text:p>
          </table:table-cell>
          <table:table-cell table:number-columns-repeated="4"/>
        </table:table-row>
        <table:table-row table:style-name="ro1">
          <table:table-cell office:value-type="float" office:value="509.319580078125">
            <text:p>509.3195800781</text:p>
          </table:table-cell>
          <table:table-cell office:value-type="float" office:value="-0.003429207">
            <text:p>-0.003429207</text:p>
          </table:table-cell>
          <table:table-cell table:number-columns-repeated="4"/>
        </table:table-row>
        <table:table-row table:style-name="ro1">
          <table:table-cell office:value-type="float" office:value="509.436126708984">
            <text:p>509.436126709</text:p>
          </table:table-cell>
          <table:table-cell office:value-type="float" office:value="-0.004274464">
            <text:p>-0.004274464</text:p>
          </table:table-cell>
          <table:table-cell table:number-columns-repeated="4"/>
        </table:table-row>
        <table:table-row table:style-name="ro1">
          <table:table-cell office:value-type="float" office:value="509.552673339844">
            <text:p>509.5526733398</text:p>
          </table:table-cell>
          <table:table-cell office:value-type="float" office:value="-0.006513092">
            <text:p>-0.006513092</text:p>
          </table:table-cell>
          <table:table-cell table:number-columns-repeated="4"/>
        </table:table-row>
        <table:table-row table:style-name="ro1">
          <table:table-cell office:value-type="float" office:value="509.669219970703">
            <text:p>509.6692199707</text:p>
          </table:table-cell>
          <table:table-cell office:value-type="float" office:value="0.007583095">
            <text:p>0.007583095</text:p>
          </table:table-cell>
          <table:table-cell table:number-columns-repeated="4"/>
        </table:table-row>
        <table:table-row table:style-name="ro1">
          <table:table-cell office:value-type="float" office:value="509.785766601563">
            <text:p>509.7857666016</text:p>
          </table:table-cell>
          <table:table-cell office:value-type="float" office:value="0.003447609">
            <text:p>0.003447609</text:p>
          </table:table-cell>
          <table:table-cell table:number-columns-repeated="4"/>
        </table:table-row>
        <table:table-row table:style-name="ro1">
          <table:table-cell office:value-type="float" office:value="509.902313232422">
            <text:p>509.9023132324</text:p>
          </table:table-cell>
          <table:table-cell office:value-type="float" office:value="-0.00161597">
            <text:p>-0.00161597</text:p>
          </table:table-cell>
          <table:table-cell table:number-columns-repeated="4"/>
        </table:table-row>
        <table:table-row table:style-name="ro1">
          <table:table-cell office:value-type="float" office:value="510.018890380859">
            <text:p>510.0188903809</text:p>
          </table:table-cell>
          <table:table-cell office:value-type="float" office:value="-0.008817383">
            <text:p>-0.008817383</text:p>
          </table:table-cell>
          <table:table-cell table:number-columns-repeated="4"/>
        </table:table-row>
        <table:table-row table:style-name="ro1">
          <table:table-cell office:value-type="float" office:value="510.135437011719">
            <text:p>510.1354370117</text:p>
          </table:table-cell>
          <table:table-cell office:value-type="float" office:value="-0.002884766">
            <text:p>-0.002884766</text:p>
          </table:table-cell>
          <table:table-cell table:number-columns-repeated="4"/>
        </table:table-row>
        <table:table-row table:style-name="ro1">
          <table:table-cell office:value-type="float" office:value="510.252014160156">
            <text:p>510.2520141602</text:p>
          </table:table-cell>
          <table:table-cell office:value-type="float" office:value="0.004203172">
            <text:p>0.004203172</text:p>
          </table:table-cell>
          <table:table-cell table:number-columns-repeated="4"/>
        </table:table-row>
        <table:table-row table:style-name="ro1">
          <table:table-cell office:value-type="float" office:value="510.368560791016">
            <text:p>510.368560791</text:p>
          </table:table-cell>
          <table:table-cell office:value-type="float" office:value="-0.004138123">
            <text:p>-0.004138123</text:p>
          </table:table-cell>
          <table:table-cell table:number-columns-repeated="4"/>
        </table:table-row>
        <table:table-row table:style-name="ro1">
          <table:table-cell office:value-type="float" office:value="510.485137939453">
            <text:p>510.4851379395</text:p>
          </table:table-cell>
          <table:table-cell office:value-type="float" office:value="-0.01186728">
            <text:p>-0.01186728</text:p>
          </table:table-cell>
          <table:table-cell table:number-columns-repeated="4"/>
        </table:table-row>
        <table:table-row table:style-name="ro1">
          <table:table-cell office:value-type="float" office:value="510.601715087891">
            <text:p>510.6017150879</text:p>
          </table:table-cell>
          <table:table-cell office:value-type="float" office:value="0.004947679">
            <text:p>0.004947679</text:p>
          </table:table-cell>
          <table:table-cell table:number-columns-repeated="4"/>
        </table:table-row>
        <table:table-row table:style-name="ro1">
          <table:table-cell office:value-type="float" office:value="510.718322753906">
            <text:p>510.7183227539</text:p>
          </table:table-cell>
          <table:table-cell office:value-type="float" office:value="0.001283331">
            <text:p>0.001283331</text:p>
          </table:table-cell>
          <table:table-cell table:number-columns-repeated="4"/>
        </table:table-row>
        <table:table-row table:style-name="ro1">
          <table:table-cell office:value-type="float" office:value="510.834899902344">
            <text:p>510.8348999023</text:p>
          </table:table-cell>
          <table:table-cell office:value-type="float" office:value="-0.01350321">
            <text:p>-0.01350321</text:p>
          </table:table-cell>
          <table:table-cell table:number-columns-repeated="4"/>
        </table:table-row>
        <table:table-row table:style-name="ro1">
          <table:table-cell office:value-type="float" office:value="510.951477050781">
            <text:p>510.9514770508</text:p>
          </table:table-cell>
          <table:table-cell office:value-type="float" office:value="0.00836187">
            <text:p>0.00836187</text:p>
          </table:table-cell>
          <table:table-cell table:number-columns-repeated="4"/>
        </table:table-row>
        <table:table-row table:style-name="ro1">
          <table:table-cell office:value-type="float" office:value="511.068084716797">
            <text:p>511.0680847168</text:p>
          </table:table-cell>
          <table:table-cell office:value-type="float" office:value="-0.004152766">
            <text:p>-0.004152766</text:p>
          </table:table-cell>
          <table:table-cell table:number-columns-repeated="4"/>
        </table:table-row>
        <table:table-row table:style-name="ro1">
          <table:table-cell office:value-type="float" office:value="511.184661865234">
            <text:p>511.1846618652</text:p>
          </table:table-cell>
          <table:table-cell office:value-type="float" office:value="-0.006123755">
            <text:p>-0.006123755</text:p>
          </table:table-cell>
          <table:table-cell table:number-columns-repeated="4"/>
        </table:table-row>
        <table:table-row table:style-name="ro1">
          <table:table-cell office:value-type="float" office:value="511.30126953125">
            <text:p>511.3012695313</text:p>
          </table:table-cell>
          <table:table-cell office:value-type="float" office:value="-0.01207536">
            <text:p>-0.01207536</text:p>
          </table:table-cell>
          <table:table-cell table:number-columns-repeated="4"/>
        </table:table-row>
        <table:table-row table:style-name="ro1">
          <table:table-cell office:value-type="float" office:value="511.417877197266">
            <text:p>511.4178771973</text:p>
          </table:table-cell>
          <table:table-cell office:value-type="float" office:value="-0.01383133">
            <text:p>-0.01383133</text:p>
          </table:table-cell>
          <table:table-cell table:number-columns-repeated="4"/>
        </table:table-row>
        <table:table-row table:style-name="ro1">
          <table:table-cell office:value-type="float" office:value="511.534484863281">
            <text:p>511.5344848633</text:p>
          </table:table-cell>
          <table:table-cell office:value-type="float" office:value="-0.004321743">
            <text:p>-0.004321743</text:p>
          </table:table-cell>
          <table:table-cell table:number-columns-repeated="4"/>
        </table:table-row>
        <table:table-row table:style-name="ro1">
          <table:table-cell office:value-type="float" office:value="511.651092529297">
            <text:p>511.6510925293</text:p>
          </table:table-cell>
          <table:table-cell office:value-type="float" office:value="-0.006399543">
            <text:p>-0.006399543</text:p>
          </table:table-cell>
          <table:table-cell table:number-columns-repeated="4"/>
        </table:table-row>
        <table:table-row table:style-name="ro1">
          <table:table-cell office:value-type="float" office:value="511.767700195313">
            <text:p>511.7677001953</text:p>
          </table:table-cell>
          <table:table-cell office:value-type="float" office:value="-0.003089065">
            <text:p>-0.003089065</text:p>
          </table:table-cell>
          <table:table-cell table:number-columns-repeated="4"/>
        </table:table-row>
        <table:table-row table:style-name="ro1">
          <table:table-cell office:value-type="float" office:value="511.884338378906">
            <text:p>511.8843383789</text:p>
          </table:table-cell>
          <table:table-cell office:value-type="float" office:value="-0.003417505">
            <text:p>-0.003417505</text:p>
          </table:table-cell>
          <table:table-cell table:number-columns-repeated="4"/>
        </table:table-row>
        <table:table-row table:style-name="ro1">
          <table:table-cell office:value-type="float" office:value="512.0009765625">
            <text:p>512.0009765625</text:p>
          </table:table-cell>
          <table:table-cell office:value-type="float" office:value="-0.003383169">
            <text:p>-0.003383169</text:p>
          </table:table-cell>
          <table:table-cell table:number-columns-repeated="4"/>
        </table:table-row>
        <table:table-row table:style-name="ro1">
          <table:table-cell office:value-type="float" office:value="512.117553710938">
            <text:p>512.1175537109</text:p>
          </table:table-cell>
          <table:table-cell office:value-type="float" office:value="0.004631704">
            <text:p>0.004631704</text:p>
          </table:table-cell>
          <table:table-cell table:number-columns-repeated="4"/>
        </table:table-row>
        <table:table-row table:style-name="ro1">
          <table:table-cell office:value-type="float" office:value="512.234191894531">
            <text:p>512.2341918945</text:p>
          </table:table-cell>
          <table:table-cell office:value-type="float" office:value="0.003983033">
            <text:p>0.003983033</text:p>
          </table:table-cell>
          <table:table-cell table:number-columns-repeated="4"/>
        </table:table-row>
        <table:table-row table:style-name="ro1">
          <table:table-cell office:value-type="float" office:value="512.350830078125">
            <text:p>512.3508300781</text:p>
          </table:table-cell>
          <table:table-cell office:value-type="float" office:value="-0.0008199407">
            <text:p>-0.0008199407</text:p>
          </table:table-cell>
          <table:table-cell table:number-columns-repeated="4"/>
        </table:table-row>
        <table:table-row table:style-name="ro1">
          <table:table-cell office:value-type="float" office:value="512.467468261719">
            <text:p>512.4674682617</text:p>
          </table:table-cell>
          <table:table-cell office:value-type="float" office:value="0.008718024">
            <text:p>0.008718024</text:p>
          </table:table-cell>
          <table:table-cell table:number-columns-repeated="4"/>
        </table:table-row>
        <table:table-row table:style-name="ro1">
          <table:table-cell office:value-type="float" office:value="512.584106445313">
            <text:p>512.5841064453</text:p>
          </table:table-cell>
          <table:table-cell office:value-type="float" office:value="-0.002916779">
            <text:p>-0.002916779</text:p>
          </table:table-cell>
          <table:table-cell table:number-columns-repeated="4"/>
        </table:table-row>
        <table:table-row table:style-name="ro1">
          <table:table-cell office:value-type="float" office:value="512.700744628906">
            <text:p>512.7007446289</text:p>
          </table:table-cell>
          <table:table-cell office:value-type="float" office:value="0.0200759">
            <text:p>0.0200759</text:p>
          </table:table-cell>
          <table:table-cell table:number-columns-repeated="4"/>
        </table:table-row>
        <table:table-row table:style-name="ro1">
          <table:table-cell office:value-type="float" office:value="512.8173828125">
            <text:p>512.8173828125</text:p>
          </table:table-cell>
          <table:table-cell office:value-type="float" office:value="-0.01119102">
            <text:p>-0.01119102</text:p>
          </table:table-cell>
          <table:table-cell table:number-columns-repeated="4"/>
        </table:table-row>
        <table:table-row table:style-name="ro1">
          <table:table-cell office:value-type="float" office:value="512.93408203125">
            <text:p>512.9340820313</text:p>
          </table:table-cell>
          <table:table-cell office:value-type="float" office:value="0.005304141">
            <text:p>0.005304141</text:p>
          </table:table-cell>
          <table:table-cell table:number-columns-repeated="4"/>
        </table:table-row>
        <table:table-row table:style-name="ro1">
          <table:table-cell office:value-type="float" office:value="513.050720214844">
            <text:p>513.0507202148</text:p>
          </table:table-cell>
          <table:table-cell office:value-type="float" office:value="0.003510695">
            <text:p>0.003510695</text:p>
          </table:table-cell>
          <table:table-cell table:number-columns-repeated="4"/>
        </table:table-row>
        <table:table-row table:style-name="ro1">
          <table:table-cell office:value-type="float" office:value="513.167358398438">
            <text:p>513.1673583984</text:p>
          </table:table-cell>
          <table:table-cell office:value-type="float" office:value="-0.0101865">
            <text:p>-0.0101865</text:p>
          </table:table-cell>
          <table:table-cell table:number-columns-repeated="4"/>
        </table:table-row>
        <table:table-row table:style-name="ro1">
          <table:table-cell office:value-type="float" office:value="513.284057617188">
            <text:p>513.2840576172</text:p>
          </table:table-cell>
          <table:table-cell office:value-type="float" office:value="-0.01124434">
            <text:p>-0.01124434</text:p>
          </table:table-cell>
          <table:table-cell table:number-columns-repeated="4"/>
        </table:table-row>
        <table:table-row table:style-name="ro1">
          <table:table-cell office:value-type="float" office:value="513.400695800781">
            <text:p>513.4006958008</text:p>
          </table:table-cell>
          <table:table-cell office:value-type="float" office:value="0.008103522">
            <text:p>0.008103522</text:p>
          </table:table-cell>
          <table:table-cell table:number-columns-repeated="4"/>
        </table:table-row>
        <table:table-row table:style-name="ro1">
          <table:table-cell office:value-type="float" office:value="513.517395019531">
            <text:p>513.5173950195</text:p>
          </table:table-cell>
          <table:table-cell office:value-type="float" office:value="0.003823954">
            <text:p>0.003823954</text:p>
          </table:table-cell>
          <table:table-cell table:number-columns-repeated="4"/>
        </table:table-row>
        <table:table-row table:style-name="ro1">
          <table:table-cell office:value-type="float" office:value="513.634033203125">
            <text:p>513.6340332031</text:p>
          </table:table-cell>
          <table:table-cell office:value-type="float" office:value="-0.005444525">
            <text:p>-0.005444525</text:p>
          </table:table-cell>
          <table:table-cell table:number-columns-repeated="4"/>
        </table:table-row>
        <table:table-row table:style-name="ro1">
          <table:table-cell office:value-type="float" office:value="513.750732421875">
            <text:p>513.7507324219</text:p>
          </table:table-cell>
          <table:table-cell office:value-type="float" office:value="0.005875058">
            <text:p>0.005875058</text:p>
          </table:table-cell>
          <table:table-cell table:number-columns-repeated="4"/>
        </table:table-row>
        <table:table-row table:style-name="ro1">
          <table:table-cell office:value-type="float" office:value="513.867431640625">
            <text:p>513.8674316406</text:p>
          </table:table-cell>
          <table:table-cell office:value-type="float" office:value="0.004965921">
            <text:p>0.004965921</text:p>
          </table:table-cell>
          <table:table-cell table:number-columns-repeated="4"/>
        </table:table-row>
        <table:table-row table:style-name="ro1">
          <table:table-cell office:value-type="float" office:value="513.984069824219">
            <text:p>513.9840698242</text:p>
          </table:table-cell>
          <table:table-cell office:value-type="float" office:value="0.006275806">
            <text:p>0.006275806</text:p>
          </table:table-cell>
          <table:table-cell table:number-columns-repeated="4"/>
        </table:table-row>
        <table:table-row table:style-name="ro1">
          <table:table-cell office:value-type="float" office:value="514.100769042969">
            <text:p>514.100769043</text:p>
          </table:table-cell>
          <table:table-cell office:value-type="float" office:value="0.009335444">
            <text:p>0.009335444</text:p>
          </table:table-cell>
          <table:table-cell table:number-columns-repeated="4"/>
        </table:table-row>
        <table:table-row table:style-name="ro1">
          <table:table-cell office:value-type="float" office:value="514.217468261719">
            <text:p>514.2174682617</text:p>
          </table:table-cell>
          <table:table-cell office:value-type="float" office:value="-0.0041985">
            <text:p>-0.0041985</text:p>
          </table:table-cell>
          <table:table-cell table:number-columns-repeated="4"/>
        </table:table-row>
        <table:table-row table:style-name="ro1">
          <table:table-cell office:value-type="float" office:value="514.334167480469">
            <text:p>514.3341674805</text:p>
          </table:table-cell>
          <table:table-cell office:value-type="float" office:value="0.0001284242">
            <text:p>0.0001284242</text:p>
          </table:table-cell>
          <table:table-cell table:number-columns-repeated="4"/>
        </table:table-row>
        <table:table-row table:style-name="ro1">
          <table:table-cell office:value-type="float" office:value="514.450866699219">
            <text:p>514.4508666992</text:p>
          </table:table-cell>
          <table:table-cell office:value-type="float" office:value="0.007518164">
            <text:p>0.007518164</text:p>
          </table:table-cell>
          <table:table-cell table:number-columns-repeated="4"/>
        </table:table-row>
        <table:table-row table:style-name="ro1">
          <table:table-cell office:value-type="float" office:value="514.567565917969">
            <text:p>514.567565918</text:p>
          </table:table-cell>
          <table:table-cell office:value-type="float" office:value="-0.006772223">
            <text:p>-0.006772223</text:p>
          </table:table-cell>
          <table:table-cell table:number-columns-repeated="4"/>
        </table:table-row>
        <table:table-row table:style-name="ro1">
          <table:table-cell office:value-type="float" office:value="514.684265136719">
            <text:p>514.6842651367</text:p>
          </table:table-cell>
          <table:table-cell office:value-type="float" office:value="0.002004778">
            <text:p>0.002004778</text:p>
          </table:table-cell>
          <table:table-cell table:number-columns-repeated="4"/>
        </table:table-row>
        <table:table-row table:style-name="ro1">
          <table:table-cell office:value-type="float" office:value="514.801025390625">
            <text:p>514.8010253906</text:p>
          </table:table-cell>
          <table:table-cell office:value-type="float" office:value="-0.0001625897">
            <text:p>-0.0001625897</text:p>
          </table:table-cell>
          <table:table-cell table:number-columns-repeated="4"/>
        </table:table-row>
        <table:table-row table:style-name="ro1">
          <table:table-cell office:value-type="float" office:value="514.917724609375">
            <text:p>514.9177246094</text:p>
          </table:table-cell>
          <table:table-cell office:value-type="float" office:value="0.004121575">
            <text:p>0.004121575</text:p>
          </table:table-cell>
          <table:table-cell table:number-columns-repeated="4"/>
        </table:table-row>
        <table:table-row table:style-name="ro1">
          <table:table-cell office:value-type="float" office:value="515.034423828125">
            <text:p>515.0344238281</text:p>
          </table:table-cell>
          <table:table-cell office:value-type="float" office:value="-0.004908648">
            <text:p>-0.004908648</text:p>
          </table:table-cell>
          <table:table-cell table:number-columns-repeated="4"/>
        </table:table-row>
        <table:table-row table:style-name="ro1">
          <table:table-cell office:value-type="float" office:value="515.151184082031">
            <text:p>515.151184082</text:p>
          </table:table-cell>
          <table:table-cell office:value-type="float" office:value="-0.01309633">
            <text:p>-0.01309633</text:p>
          </table:table-cell>
          <table:table-cell table:number-columns-repeated="4"/>
        </table:table-row>
        <table:table-row table:style-name="ro1">
          <table:table-cell office:value-type="float" office:value="515.267883300781">
            <text:p>515.2678833008</text:p>
          </table:table-cell>
          <table:table-cell office:value-type="float" office:value="-0.002693108">
            <text:p>-0.002693108</text:p>
          </table:table-cell>
          <table:table-cell table:number-columns-repeated="4"/>
        </table:table-row>
        <table:table-row table:style-name="ro1">
          <table:table-cell office:value-type="float" office:value="515.384643554688">
            <text:p>515.3846435547</text:p>
          </table:table-cell>
          <table:table-cell office:value-type="float" office:value="0.004309751">
            <text:p>0.004309751</text:p>
          </table:table-cell>
          <table:table-cell table:number-columns-repeated="4"/>
        </table:table-row>
        <table:table-row table:style-name="ro1">
          <table:table-cell office:value-type="float" office:value="515.501342773438">
            <text:p>515.5013427734</text:p>
          </table:table-cell>
          <table:table-cell office:value-type="float" office:value="-0.001709407">
            <text:p>-0.001709407</text:p>
          </table:table-cell>
          <table:table-cell table:number-columns-repeated="4"/>
        </table:table-row>
        <table:table-row table:style-name="ro1">
          <table:table-cell office:value-type="float" office:value="515.618103027344">
            <text:p>515.6181030273</text:p>
          </table:table-cell>
          <table:table-cell office:value-type="float" office:value="0.001322142">
            <text:p>0.001322142</text:p>
          </table:table-cell>
          <table:table-cell table:number-columns-repeated="4"/>
        </table:table-row>
        <table:table-row table:style-name="ro1">
          <table:table-cell office:value-type="float" office:value="515.734802246094">
            <text:p>515.7348022461</text:p>
          </table:table-cell>
          <table:table-cell office:value-type="float" office:value="-0.002832935">
            <text:p>-0.002832935</text:p>
          </table:table-cell>
          <table:table-cell table:number-columns-repeated="4"/>
        </table:table-row>
        <table:table-row table:style-name="ro1">
          <table:table-cell office:value-type="float" office:value="515.8515625">
            <text:p>515.8515625</text:p>
          </table:table-cell>
          <table:table-cell office:value-type="float" office:value="0.01286917">
            <text:p>0.01286917</text:p>
          </table:table-cell>
          <table:table-cell table:number-columns-repeated="4"/>
        </table:table-row>
        <table:table-row table:style-name="ro1">
          <table:table-cell office:value-type="float" office:value="515.968322753906">
            <text:p>515.9683227539</text:p>
          </table:table-cell>
          <table:table-cell office:value-type="float" office:value="-0.0001224587">
            <text:p>-0.0001224587</text:p>
          </table:table-cell>
          <table:table-cell table:number-columns-repeated="4"/>
        </table:table-row>
        <table:table-row table:style-name="ro1">
          <table:table-cell office:value-type="float" office:value="516.085083007813">
            <text:p>516.0850830078</text:p>
          </table:table-cell>
          <table:table-cell office:value-type="float" office:value="0.001678875">
            <text:p>0.001678875</text:p>
          </table:table-cell>
          <table:table-cell table:number-columns-repeated="4"/>
        </table:table-row>
        <table:table-row table:style-name="ro1">
          <table:table-cell office:value-type="float" office:value="516.201843261719">
            <text:p>516.2018432617</text:p>
          </table:table-cell>
          <table:table-cell office:value-type="float" office:value="-0.002553832">
            <text:p>-0.002553832</text:p>
          </table:table-cell>
          <table:table-cell table:number-columns-repeated="4"/>
        </table:table-row>
        <table:table-row table:style-name="ro1">
          <table:table-cell office:value-type="float" office:value="516.318603515625">
            <text:p>516.3186035156</text:p>
          </table:table-cell>
          <table:table-cell office:value-type="float" office:value="-0.005187607">
            <text:p>-0.005187607</text:p>
          </table:table-cell>
          <table:table-cell table:number-columns-repeated="4"/>
        </table:table-row>
        <table:table-row table:style-name="ro1">
          <table:table-cell office:value-type="float" office:value="516.435363769531">
            <text:p>516.4353637695</text:p>
          </table:table-cell>
          <table:table-cell office:value-type="float" office:value="-0.007214935">
            <text:p>-0.007214935</text:p>
          </table:table-cell>
          <table:table-cell table:number-columns-repeated="4"/>
        </table:table-row>
        <table:table-row table:style-name="ro1">
          <table:table-cell office:value-type="float" office:value="516.552124023438">
            <text:p>516.5521240234</text:p>
          </table:table-cell>
          <table:table-cell office:value-type="float" office:value="-0.002366012">
            <text:p>-0.002366012</text:p>
          </table:table-cell>
          <table:table-cell table:number-columns-repeated="4"/>
        </table:table-row>
        <table:table-row table:style-name="ro1">
          <table:table-cell office:value-type="float" office:value="516.668884277344">
            <text:p>516.6688842773</text:p>
          </table:table-cell>
          <table:table-cell office:value-type="float" office:value="-0.002338185">
            <text:p>-0.002338185</text:p>
          </table:table-cell>
          <table:table-cell table:number-columns-repeated="4"/>
        </table:table-row>
        <table:table-row table:style-name="ro1">
          <table:table-cell office:value-type="float" office:value="516.78564453125">
            <text:p>516.7856445313</text:p>
          </table:table-cell>
          <table:table-cell office:value-type="float" office:value="0.01283821">
            <text:p>0.01283821</text:p>
          </table:table-cell>
          <table:table-cell table:number-columns-repeated="4"/>
        </table:table-row>
        <table:table-row table:style-name="ro1">
          <table:table-cell office:value-type="float" office:value="516.902465820313">
            <text:p>516.9024658203</text:p>
          </table:table-cell>
          <table:table-cell office:value-type="float" office:value="0.03037601">
            <text:p>0.03037601</text:p>
          </table:table-cell>
          <table:table-cell table:number-columns-repeated="4"/>
        </table:table-row>
        <table:table-row table:style-name="ro1">
          <table:table-cell office:value-type="float" office:value="517.019226074219">
            <text:p>517.0192260742</text:p>
          </table:table-cell>
          <table:table-cell office:value-type="float" office:value="-0.006550846">
            <text:p>-0.006550846</text:p>
          </table:table-cell>
          <table:table-cell table:number-columns-repeated="4"/>
        </table:table-row>
        <table:table-row table:style-name="ro1">
          <table:table-cell office:value-type="float" office:value="517.135986328125">
            <text:p>517.1359863281</text:p>
          </table:table-cell>
          <table:table-cell office:value-type="string">
            <text:p>-7.98522E-05</text:p>
          </table:table-cell>
          <table:table-cell table:number-columns-repeated="4"/>
        </table:table-row>
        <table:table-row table:style-name="ro1">
          <table:table-cell office:value-type="float" office:value="517.252807617188">
            <text:p>517.2528076172</text:p>
          </table:table-cell>
          <table:table-cell office:value-type="float" office:value="0.004987234">
            <text:p>0.004987234</text:p>
          </table:table-cell>
          <table:table-cell table:number-columns-repeated="4"/>
        </table:table-row>
        <table:table-row table:style-name="ro1">
          <table:table-cell office:value-type="float" office:value="517.369567871094">
            <text:p>517.3695678711</text:p>
          </table:table-cell>
          <table:table-cell office:value-type="float" office:value="-0.007109641">
            <text:p>-0.007109641</text:p>
          </table:table-cell>
          <table:table-cell table:number-columns-repeated="4"/>
        </table:table-row>
        <table:table-row table:style-name="ro1">
          <table:table-cell office:value-type="float" office:value="517.486389160156">
            <text:p>517.4863891602</text:p>
          </table:table-cell>
          <table:table-cell office:value-type="float" office:value="0.0004102344">
            <text:p>0.0004102344</text:p>
          </table:table-cell>
          <table:table-cell table:number-columns-repeated="4"/>
        </table:table-row>
        <table:table-row table:style-name="ro1">
          <table:table-cell office:value-type="float" office:value="517.603210449219">
            <text:p>517.6032104492</text:p>
          </table:table-cell>
          <table:table-cell office:value-type="float" office:value="0.01203765">
            <text:p>0.01203765</text:p>
          </table:table-cell>
          <table:table-cell table:number-columns-repeated="4"/>
        </table:table-row>
        <table:table-row table:style-name="ro1">
          <table:table-cell office:value-type="float" office:value="517.719970703125">
            <text:p>517.7199707031</text:p>
          </table:table-cell>
          <table:table-cell office:value-type="float" office:value="0.0006037541">
            <text:p>0.0006037541</text:p>
          </table:table-cell>
          <table:table-cell table:number-columns-repeated="4"/>
        </table:table-row>
        <table:table-row table:style-name="ro1">
          <table:table-cell office:value-type="float" office:value="517.836791992188">
            <text:p>517.8367919922</text:p>
          </table:table-cell>
          <table:table-cell office:value-type="float" office:value="0.003261917">
            <text:p>0.003261917</text:p>
          </table:table-cell>
          <table:table-cell table:number-columns-repeated="4"/>
        </table:table-row>
        <table:table-row table:style-name="ro1">
          <table:table-cell office:value-type="float" office:value="517.95361328125">
            <text:p>517.9536132813</text:p>
          </table:table-cell>
          <table:table-cell office:value-type="float" office:value="-0.0001989382">
            <text:p>-0.0001989382</text:p>
          </table:table-cell>
          <table:table-cell table:number-columns-repeated="4"/>
        </table:table-row>
        <table:table-row table:style-name="ro1">
          <table:table-cell office:value-type="float" office:value="518.070434570313">
            <text:p>518.0704345703</text:p>
          </table:table-cell>
          <table:table-cell office:value-type="float" office:value="-0.00422087">
            <text:p>-0.00422087</text:p>
          </table:table-cell>
          <table:table-cell table:number-columns-repeated="4"/>
        </table:table-row>
        <table:table-row table:style-name="ro1">
          <table:table-cell office:value-type="float" office:value="518.187255859375">
            <text:p>518.1872558594</text:p>
          </table:table-cell>
          <table:table-cell office:value-type="float" office:value="0.005148678">
            <text:p>0.005148678</text:p>
          </table:table-cell>
          <table:table-cell table:number-columns-repeated="4"/>
        </table:table-row>
        <table:table-row table:style-name="ro1">
          <table:table-cell office:value-type="float" office:value="518.304077148438">
            <text:p>518.3040771484</text:p>
          </table:table-cell>
          <table:table-cell office:value-type="float" office:value="0.01305889">
            <text:p>0.01305889</text:p>
          </table:table-cell>
          <table:table-cell table:number-columns-repeated="4"/>
        </table:table-row>
        <table:table-row table:style-name="ro1">
          <table:table-cell office:value-type="float" office:value="518.4208984375">
            <text:p>518.4208984375</text:p>
          </table:table-cell>
          <table:table-cell office:value-type="float" office:value="0.004702345">
            <text:p>0.004702345</text:p>
          </table:table-cell>
          <table:table-cell table:number-columns-repeated="4"/>
        </table:table-row>
        <table:table-row table:style-name="ro1">
          <table:table-cell office:value-type="float" office:value="518.537719726563">
            <text:p>518.5377197266</text:p>
          </table:table-cell>
          <table:table-cell office:value-type="float" office:value="0.02030686">
            <text:p>0.02030686</text:p>
          </table:table-cell>
          <table:table-cell table:number-columns-repeated="4"/>
        </table:table-row>
        <table:table-row table:style-name="ro1">
          <table:table-cell office:value-type="float" office:value="518.654541015625">
            <text:p>518.6545410156</text:p>
          </table:table-cell>
          <table:table-cell office:value-type="float" office:value="0.007480477">
            <text:p>0.007480477</text:p>
          </table:table-cell>
          <table:table-cell table:number-columns-repeated="4"/>
        </table:table-row>
        <table:table-row table:style-name="ro1">
          <table:table-cell office:value-type="float" office:value="518.771362304688">
            <text:p>518.7713623047</text:p>
          </table:table-cell>
          <table:table-cell office:value-type="float" office:value="-0.00894023">
            <text:p>-0.00894023</text:p>
          </table:table-cell>
          <table:table-cell table:number-columns-repeated="4"/>
        </table:table-row>
        <table:table-row table:style-name="ro1">
          <table:table-cell office:value-type="float" office:value="518.888244628906">
            <text:p>518.8882446289</text:p>
          </table:table-cell>
          <table:table-cell office:value-type="float" office:value="-0.009765274">
            <text:p>-0.009765274</text:p>
          </table:table-cell>
          <table:table-cell table:number-columns-repeated="4"/>
        </table:table-row>
        <table:table-row table:style-name="ro1">
          <table:table-cell office:value-type="float" office:value="519.005065917969">
            <text:p>519.005065918</text:p>
          </table:table-cell>
          <table:table-cell office:value-type="float" office:value="0.002385833">
            <text:p>0.002385833</text:p>
          </table:table-cell>
          <table:table-cell table:number-columns-repeated="4"/>
        </table:table-row>
        <table:table-row table:style-name="ro1">
          <table:table-cell office:value-type="float" office:value="519.121887207031">
            <text:p>519.121887207</text:p>
          </table:table-cell>
          <table:table-cell office:value-type="float" office:value="-0.001445312">
            <text:p>-0.001445312</text:p>
          </table:table-cell>
          <table:table-cell table:number-columns-repeated="4"/>
        </table:table-row>
        <table:table-row table:style-name="ro1">
          <table:table-cell office:value-type="float" office:value="519.23876953125">
            <text:p>519.2387695313</text:p>
          </table:table-cell>
          <table:table-cell office:value-type="float" office:value="0.004530614">
            <text:p>0.004530614</text:p>
          </table:table-cell>
          <table:table-cell table:number-columns-repeated="4"/>
        </table:table-row>
        <table:table-row table:style-name="ro1">
          <table:table-cell office:value-type="float" office:value="519.355590820313">
            <text:p>519.3555908203</text:p>
          </table:table-cell>
          <table:table-cell office:value-type="float" office:value="-0.003296793">
            <text:p>-0.003296793</text:p>
          </table:table-cell>
          <table:table-cell table:number-columns-repeated="4"/>
        </table:table-row>
        <table:table-row table:style-name="ro1">
          <table:table-cell office:value-type="float" office:value="519.472473144531">
            <text:p>519.4724731445</text:p>
          </table:table-cell>
          <table:table-cell office:value-type="float" office:value="0.002964067">
            <text:p>0.002964067</text:p>
          </table:table-cell>
          <table:table-cell table:number-columns-repeated="4"/>
        </table:table-row>
        <table:table-row table:style-name="ro1">
          <table:table-cell office:value-type="float" office:value="519.58935546875">
            <text:p>519.5893554688</text:p>
          </table:table-cell>
          <table:table-cell office:value-type="float" office:value="0.0002284614">
            <text:p>0.0002284614</text:p>
          </table:table-cell>
          <table:table-cell table:number-columns-repeated="4"/>
        </table:table-row>
        <table:table-row table:style-name="ro1">
          <table:table-cell office:value-type="float" office:value="519.706176757813">
            <text:p>519.7061767578</text:p>
          </table:table-cell>
          <table:table-cell office:value-type="float" office:value="-0.004755891">
            <text:p>-0.004755891</text:p>
          </table:table-cell>
          <table:table-cell table:number-columns-repeated="4"/>
        </table:table-row>
        <table:table-row table:style-name="ro1">
          <table:table-cell office:value-type="float" office:value="519.823059082031">
            <text:p>519.823059082</text:p>
          </table:table-cell>
          <table:table-cell office:value-type="float" office:value="-0.007375778">
            <text:p>-0.007375778</text:p>
          </table:table-cell>
          <table:table-cell table:number-columns-repeated="4"/>
        </table:table-row>
        <table:table-row table:style-name="ro1">
          <table:table-cell office:value-type="float" office:value="519.93994140625">
            <text:p>519.9399414063</text:p>
          </table:table-cell>
          <table:table-cell office:value-type="float" office:value="0.01505235">
            <text:p>0.01505235</text:p>
          </table:table-cell>
          <table:table-cell table:number-columns-repeated="4"/>
        </table:table-row>
        <table:table-row table:style-name="ro1">
          <table:table-cell office:value-type="float" office:value="520.056823730469">
            <text:p>520.0568237305</text:p>
          </table:table-cell>
          <table:table-cell office:value-type="float" office:value="-0.005770642">
            <text:p>-0.005770642</text:p>
          </table:table-cell>
          <table:table-cell table:number-columns-repeated="4"/>
        </table:table-row>
        <table:table-row table:style-name="ro1">
          <table:table-cell office:value-type="float" office:value="520.173706054688">
            <text:p>520.1737060547</text:p>
          </table:table-cell>
          <table:table-cell office:value-type="string">
            <text:p>8.537588E-05</text:p>
          </table:table-cell>
          <table:table-cell table:number-columns-repeated="4"/>
        </table:table-row>
        <table:table-row table:style-name="ro1">
          <table:table-cell office:value-type="float" office:value="520.290588378906">
            <text:p>520.2905883789</text:p>
          </table:table-cell>
          <table:table-cell office:value-type="float" office:value="-0.006382958">
            <text:p>-0.006382958</text:p>
          </table:table-cell>
          <table:table-cell table:number-columns-repeated="4"/>
        </table:table-row>
        <table:table-row table:style-name="ro1">
          <table:table-cell office:value-type="float" office:value="520.407470703125">
            <text:p>520.4074707031</text:p>
          </table:table-cell>
          <table:table-cell office:value-type="float" office:value="-0.002928464">
            <text:p>-0.002928464</text:p>
          </table:table-cell>
          <table:table-cell table:number-columns-repeated="4"/>
        </table:table-row>
        <table:table-row table:style-name="ro1">
          <table:table-cell office:value-type="float" office:value="520.524353027344">
            <text:p>520.5243530273</text:p>
          </table:table-cell>
          <table:table-cell office:value-type="float" office:value="-0.004847465">
            <text:p>-0.004847465</text:p>
          </table:table-cell>
          <table:table-cell table:number-columns-repeated="4"/>
        </table:table-row>
        <table:table-row table:style-name="ro1">
          <table:table-cell office:value-type="float" office:value="520.641235351563">
            <text:p>520.6412353516</text:p>
          </table:table-cell>
          <table:table-cell office:value-type="float" office:value="-0.007282151">
            <text:p>-0.007282151</text:p>
          </table:table-cell>
          <table:table-cell table:number-columns-repeated="4"/>
        </table:table-row>
        <table:table-row table:style-name="ro1">
          <table:table-cell office:value-type="float" office:value="520.758178710938">
            <text:p>520.7581787109</text:p>
          </table:table-cell>
          <table:table-cell office:value-type="float" office:value="-0.002251428">
            <text:p>-0.002251428</text:p>
          </table:table-cell>
          <table:table-cell table:number-columns-repeated="4"/>
        </table:table-row>
        <table:table-row table:style-name="ro1">
          <table:table-cell office:value-type="float" office:value="520.875061035156">
            <text:p>520.8750610352</text:p>
          </table:table-cell>
          <table:table-cell office:value-type="float" office:value="0.02224492">
            <text:p>0.02224492</text:p>
          </table:table-cell>
          <table:table-cell table:number-columns-repeated="4"/>
        </table:table-row>
        <table:table-row table:style-name="ro1">
          <table:table-cell office:value-type="float" office:value="520.991943359375">
            <text:p>520.9919433594</text:p>
          </table:table-cell>
          <table:table-cell office:value-type="float" office:value="0.002087117">
            <text:p>0.002087117</text:p>
          </table:table-cell>
          <table:table-cell table:number-columns-repeated="4"/>
        </table:table-row>
        <table:table-row table:style-name="ro1">
          <table:table-cell office:value-type="float" office:value="521.10888671875">
            <text:p>521.1088867188</text:p>
          </table:table-cell>
          <table:table-cell office:value-type="float" office:value="-0.008486728">
            <text:p>-0.008486728</text:p>
          </table:table-cell>
          <table:table-cell table:number-columns-repeated="4"/>
        </table:table-row>
        <table:table-row table:style-name="ro1">
          <table:table-cell office:value-type="float" office:value="521.225769042969">
            <text:p>521.225769043</text:p>
          </table:table-cell>
          <table:table-cell office:value-type="float" office:value="0.001487648">
            <text:p>0.001487648</text:p>
          </table:table-cell>
          <table:table-cell table:number-columns-repeated="4"/>
        </table:table-row>
        <table:table-row table:style-name="ro1">
          <table:table-cell office:value-type="float" office:value="521.342712402344">
            <text:p>521.3427124023</text:p>
          </table:table-cell>
          <table:table-cell office:value-type="float" office:value="0.006674373">
            <text:p>0.006674373</text:p>
          </table:table-cell>
          <table:table-cell table:number-columns-repeated="4"/>
        </table:table-row>
        <table:table-row table:style-name="ro1">
          <table:table-cell office:value-type="float" office:value="521.459594726563">
            <text:p>521.4595947266</text:p>
          </table:table-cell>
          <table:table-cell office:value-type="float" office:value="-0.006484573">
            <text:p>-0.006484573</text:p>
          </table:table-cell>
          <table:table-cell table:number-columns-repeated="4"/>
        </table:table-row>
        <table:table-row table:style-name="ro1">
          <table:table-cell office:value-type="float" office:value="521.576538085938">
            <text:p>521.5765380859</text:p>
          </table:table-cell>
          <table:table-cell office:value-type="float" office:value="-0.006522991">
            <text:p>-0.006522991</text:p>
          </table:table-cell>
          <table:table-cell table:number-columns-repeated="4"/>
        </table:table-row>
        <table:table-row table:style-name="ro1">
          <table:table-cell office:value-type="float" office:value="521.693481445313">
            <text:p>521.6934814453</text:p>
          </table:table-cell>
          <table:table-cell office:value-type="float" office:value="-0.002666242">
            <text:p>-0.002666242</text:p>
          </table:table-cell>
          <table:table-cell table:number-columns-repeated="4"/>
        </table:table-row>
        <table:table-row table:style-name="ro1">
          <table:table-cell office:value-type="float" office:value="521.810424804688">
            <text:p>521.8104248047</text:p>
          </table:table-cell>
          <table:table-cell office:value-type="float" office:value="-0.007008895">
            <text:p>-0.007008895</text:p>
          </table:table-cell>
          <table:table-cell table:number-columns-repeated="4"/>
        </table:table-row>
        <table:table-row table:style-name="ro1">
          <table:table-cell office:value-type="float" office:value="521.927307128906">
            <text:p>521.9273071289</text:p>
          </table:table-cell>
          <table:table-cell office:value-type="float" office:value="0.01045596">
            <text:p>0.01045596</text:p>
          </table:table-cell>
          <table:table-cell table:number-columns-repeated="4"/>
        </table:table-row>
        <table:table-row table:style-name="ro1">
          <table:table-cell office:value-type="float" office:value="522.044250488281">
            <text:p>522.0442504883</text:p>
          </table:table-cell>
          <table:table-cell office:value-type="float" office:value="0.0009887277">
            <text:p>0.0009887277</text:p>
          </table:table-cell>
          <table:table-cell table:number-columns-repeated="4"/>
        </table:table-row>
        <table:table-row table:style-name="ro1">
          <table:table-cell office:value-type="float" office:value="522.161193847656">
            <text:p>522.1611938477</text:p>
          </table:table-cell>
          <table:table-cell office:value-type="float" office:value="0.03898071">
            <text:p>0.03898071</text:p>
          </table:table-cell>
          <table:table-cell table:number-columns-repeated="4"/>
        </table:table-row>
        <table:table-row table:style-name="ro1">
          <table:table-cell office:value-type="float" office:value="522.278137207031">
            <text:p>522.278137207</text:p>
          </table:table-cell>
          <table:table-cell office:value-type="float" office:value="0.009283635">
            <text:p>0.009283635</text:p>
          </table:table-cell>
          <table:table-cell table:number-columns-repeated="4"/>
        </table:table-row>
        <table:table-row table:style-name="ro1">
          <table:table-cell office:value-type="float" office:value="522.395080566406">
            <text:p>522.3950805664</text:p>
          </table:table-cell>
          <table:table-cell office:value-type="float" office:value="0.0005753232">
            <text:p>0.0005753232</text:p>
          </table:table-cell>
          <table:table-cell table:number-columns-repeated="4"/>
        </table:table-row>
        <table:table-row table:style-name="ro1">
          <table:table-cell office:value-type="float" office:value="522.512023925781">
            <text:p>522.5120239258</text:p>
          </table:table-cell>
          <table:table-cell office:value-type="float" office:value="-0.005325261">
            <text:p>-0.005325261</text:p>
          </table:table-cell>
          <table:table-cell table:number-columns-repeated="4"/>
        </table:table-row>
        <table:table-row table:style-name="ro1">
          <table:table-cell office:value-type="float" office:value="522.629028320313">
            <text:p>522.6290283203</text:p>
          </table:table-cell>
          <table:table-cell office:value-type="float" office:value="0.002531788">
            <text:p>0.002531788</text:p>
          </table:table-cell>
          <table:table-cell table:number-columns-repeated="4"/>
        </table:table-row>
        <table:table-row table:style-name="ro1">
          <table:table-cell office:value-type="float" office:value="522.745971679688">
            <text:p>522.7459716797</text:p>
          </table:table-cell>
          <table:table-cell office:value-type="float" office:value="0.0003743223">
            <text:p>0.0003743223</text:p>
          </table:table-cell>
          <table:table-cell table:number-columns-repeated="4"/>
        </table:table-row>
        <table:table-row table:style-name="ro1">
          <table:table-cell office:value-type="float" office:value="522.862915039063">
            <text:p>522.8629150391</text:p>
          </table:table-cell>
          <table:table-cell office:value-type="float" office:value="0.01676898">
            <text:p>0.01676898</text:p>
          </table:table-cell>
          <table:table-cell table:number-columns-repeated="4"/>
        </table:table-row>
        <table:table-row table:style-name="ro1">
          <table:table-cell office:value-type="float" office:value="522.979919433594">
            <text:p>522.9799194336</text:p>
          </table:table-cell>
          <table:table-cell office:value-type="float" office:value="-0.01005775">
            <text:p>-0.01005775</text:p>
          </table:table-cell>
          <table:table-cell table:number-columns-repeated="4"/>
        </table:table-row>
        <table:table-row table:style-name="ro1">
          <table:table-cell office:value-type="float" office:value="523.096862792969">
            <text:p>523.096862793</text:p>
          </table:table-cell>
          <table:table-cell office:value-type="float" office:value="0.01622942">
            <text:p>0.01622942</text:p>
          </table:table-cell>
          <table:table-cell table:number-columns-repeated="4"/>
        </table:table-row>
        <table:table-row table:style-name="ro1">
          <table:table-cell office:value-type="float" office:value="523.2138671875">
            <text:p>523.2138671875</text:p>
          </table:table-cell>
          <table:table-cell office:value-type="float" office:value="0.006180757">
            <text:p>0.006180757</text:p>
          </table:table-cell>
          <table:table-cell table:number-columns-repeated="4"/>
        </table:table-row>
        <table:table-row table:style-name="ro1">
          <table:table-cell office:value-type="float" office:value="523.330810546875">
            <text:p>523.3308105469</text:p>
          </table:table-cell>
          <table:table-cell office:value-type="float" office:value="0.002314305">
            <text:p>0.002314305</text:p>
          </table:table-cell>
          <table:table-cell table:number-columns-repeated="4"/>
        </table:table-row>
        <table:table-row table:style-name="ro1">
          <table:table-cell office:value-type="float" office:value="523.447814941406">
            <text:p>523.4478149414</text:p>
          </table:table-cell>
          <table:table-cell office:value-type="float" office:value="0.001976166">
            <text:p>0.001976166</text:p>
          </table:table-cell>
          <table:table-cell table:number-columns-repeated="4"/>
        </table:table-row>
        <table:table-row table:style-name="ro1">
          <table:table-cell office:value-type="float" office:value="523.564758300781">
            <text:p>523.5647583008</text:p>
          </table:table-cell>
          <table:table-cell office:value-type="float" office:value="0.001448149">
            <text:p>0.001448149</text:p>
          </table:table-cell>
          <table:table-cell table:number-columns-repeated="4"/>
        </table:table-row>
        <table:table-row table:style-name="ro1">
          <table:table-cell office:value-type="float" office:value="523.681762695313">
            <text:p>523.6817626953</text:p>
          </table:table-cell>
          <table:table-cell office:value-type="float" office:value="-0.003767818">
            <text:p>-0.003767818</text:p>
          </table:table-cell>
          <table:table-cell table:number-columns-repeated="4"/>
        </table:table-row>
        <table:table-row table:style-name="ro1">
          <table:table-cell office:value-type="float" office:value="523.798767089844">
            <text:p>523.7987670898</text:p>
          </table:table-cell>
          <table:table-cell office:value-type="float" office:value="-0.007059531">
            <text:p>-0.007059531</text:p>
          </table:table-cell>
          <table:table-cell table:number-columns-repeated="4"/>
        </table:table-row>
        <table:table-row table:style-name="ro1">
          <table:table-cell office:value-type="float" office:value="523.915771484375">
            <text:p>523.9157714844</text:p>
          </table:table-cell>
          <table:table-cell office:value-type="float" office:value="-0.01072562">
            <text:p>-0.01072562</text:p>
          </table:table-cell>
          <table:table-cell table:number-columns-repeated="4"/>
        </table:table-row>
        <table:table-row table:style-name="ro1">
          <table:table-cell office:value-type="float" office:value="524.032775878906">
            <text:p>524.0327758789</text:p>
          </table:table-cell>
          <table:table-cell office:value-type="float" office:value="0.006966146">
            <text:p>0.006966146</text:p>
          </table:table-cell>
          <table:table-cell table:number-columns-repeated="4"/>
        </table:table-row>
        <table:table-row table:style-name="ro1">
          <table:table-cell office:value-type="float" office:value="524.149719238281">
            <text:p>524.1497192383</text:p>
          </table:table-cell>
          <table:table-cell office:value-type="float" office:value="0.001942142">
            <text:p>0.001942142</text:p>
          </table:table-cell>
          <table:table-cell table:number-columns-repeated="4"/>
        </table:table-row>
        <table:table-row table:style-name="ro1">
          <table:table-cell office:value-type="float" office:value="524.266723632813">
            <text:p>524.2667236328</text:p>
          </table:table-cell>
          <table:table-cell office:value-type="float" office:value="0.004532698">
            <text:p>0.004532698</text:p>
          </table:table-cell>
          <table:table-cell table:number-columns-repeated="4"/>
        </table:table-row>
        <table:table-row table:style-name="ro1">
          <table:table-cell office:value-type="float" office:value="524.3837890625">
            <text:p>524.3837890625</text:p>
          </table:table-cell>
          <table:table-cell office:value-type="float" office:value="-0.01139157">
            <text:p>-0.01139157</text:p>
          </table:table-cell>
          <table:table-cell table:number-columns-repeated="4"/>
        </table:table-row>
        <table:table-row table:style-name="ro1">
          <table:table-cell office:value-type="float" office:value="524.500793457031">
            <text:p>524.500793457</text:p>
          </table:table-cell>
          <table:table-cell office:value-type="float" office:value="0.01920231">
            <text:p>0.01920231</text:p>
          </table:table-cell>
          <table:table-cell table:number-columns-repeated="4"/>
        </table:table-row>
        <table:table-row table:style-name="ro1">
          <table:table-cell office:value-type="float" office:value="524.617797851563">
            <text:p>524.6177978516</text:p>
          </table:table-cell>
          <table:table-cell office:value-type="float" office:value="0.00612911">
            <text:p>0.00612911</text:p>
          </table:table-cell>
          <table:table-cell table:number-columns-repeated="4"/>
        </table:table-row>
        <table:table-row table:style-name="ro1">
          <table:table-cell office:value-type="float" office:value="524.734802246094">
            <text:p>524.7348022461</text:p>
          </table:table-cell>
          <table:table-cell office:value-type="float" office:value="-0.00881908">
            <text:p>-0.00881908</text:p>
          </table:table-cell>
          <table:table-cell table:number-columns-repeated="4"/>
        </table:table-row>
        <table:table-row table:style-name="ro1">
          <table:table-cell office:value-type="float" office:value="524.851806640625">
            <text:p>524.8518066406</text:p>
          </table:table-cell>
          <table:table-cell office:value-type="float" office:value="-0.007306676">
            <text:p>-0.007306676</text:p>
          </table:table-cell>
          <table:table-cell table:number-columns-repeated="4"/>
        </table:table-row>
        <table:table-row table:style-name="ro1">
          <table:table-cell office:value-type="float" office:value="524.968872070313">
            <text:p>524.9688720703</text:p>
          </table:table-cell>
          <table:table-cell office:value-type="float" office:value="0.001377209">
            <text:p>0.001377209</text:p>
          </table:table-cell>
          <table:table-cell table:number-columns-repeated="4"/>
        </table:table-row>
        <table:table-row table:style-name="ro1">
          <table:table-cell office:value-type="float" office:value="525.085876464844">
            <text:p>525.0858764648</text:p>
          </table:table-cell>
          <table:table-cell office:value-type="float" office:value="0.02021041">
            <text:p>0.02021041</text:p>
          </table:table-cell>
          <table:table-cell table:number-columns-repeated="4"/>
        </table:table-row>
        <table:table-row table:style-name="ro1">
          <table:table-cell office:value-type="float" office:value="525.202941894531">
            <text:p>525.2029418945</text:p>
          </table:table-cell>
          <table:table-cell office:value-type="float" office:value="-0.004946052">
            <text:p>-0.004946052</text:p>
          </table:table-cell>
          <table:table-cell table:number-columns-repeated="4"/>
        </table:table-row>
        <table:table-row table:style-name="ro1">
          <table:table-cell office:value-type="float" office:value="525.319946289063">
            <text:p>525.3199462891</text:p>
          </table:table-cell>
          <table:table-cell office:value-type="float" office:value="-0.003770628">
            <text:p>-0.003770628</text:p>
          </table:table-cell>
          <table:table-cell table:number-columns-repeated="4"/>
        </table:table-row>
        <table:table-row table:style-name="ro1">
          <table:table-cell office:value-type="float" office:value="525.43701171875">
            <text:p>525.4370117188</text:p>
          </table:table-cell>
          <table:table-cell office:value-type="float" office:value="0.00655377">
            <text:p>0.00655377</text:p>
          </table:table-cell>
          <table:table-cell table:number-columns-repeated="4"/>
        </table:table-row>
        <table:table-row table:style-name="ro1">
          <table:table-cell office:value-type="float" office:value="525.554016113281">
            <text:p>525.5540161133</text:p>
          </table:table-cell>
          <table:table-cell office:value-type="float" office:value="0.005619516">
            <text:p>0.005619516</text:p>
          </table:table-cell>
          <table:table-cell table:number-columns-repeated="4"/>
        </table:table-row>
        <table:table-row table:style-name="ro1">
          <table:table-cell office:value-type="float" office:value="525.671081542969">
            <text:p>525.671081543</text:p>
          </table:table-cell>
          <table:table-cell office:value-type="float" office:value="-0.005266713">
            <text:p>-0.005266713</text:p>
          </table:table-cell>
          <table:table-cell table:number-columns-repeated="4"/>
        </table:table-row>
        <table:table-row table:style-name="ro1">
          <table:table-cell office:value-type="float" office:value="525.788146972656">
            <text:p>525.7881469727</text:p>
          </table:table-cell>
          <table:table-cell office:value-type="float" office:value="-0.01394506">
            <text:p>-0.01394506</text:p>
          </table:table-cell>
          <table:table-cell table:number-columns-repeated="4"/>
        </table:table-row>
        <table:table-row table:style-name="ro1">
          <table:table-cell office:value-type="float" office:value="525.905212402344">
            <text:p>525.9052124023</text:p>
          </table:table-cell>
          <table:table-cell office:value-type="float" office:value="-0.002735441">
            <text:p>-0.002735441</text:p>
          </table:table-cell>
          <table:table-cell table:number-columns-repeated="4"/>
        </table:table-row>
        <table:table-row table:style-name="ro1">
          <table:table-cell office:value-type="float" office:value="526.022277832031">
            <text:p>526.022277832</text:p>
          </table:table-cell>
          <table:table-cell office:value-type="float" office:value="-0.006883529">
            <text:p>-0.006883529</text:p>
          </table:table-cell>
          <table:table-cell table:number-columns-repeated="4"/>
        </table:table-row>
        <table:table-row table:style-name="ro1">
          <table:table-cell office:value-type="float" office:value="526.139282226563">
            <text:p>526.1392822266</text:p>
          </table:table-cell>
          <table:table-cell office:value-type="float" office:value="-0.005450271">
            <text:p>-0.005450271</text:p>
          </table:table-cell>
          <table:table-cell table:number-columns-repeated="4"/>
        </table:table-row>
        <table:table-row table:style-name="ro1">
          <table:table-cell office:value-type="float" office:value="526.25634765625">
            <text:p>526.2563476563</text:p>
          </table:table-cell>
          <table:table-cell office:value-type="float" office:value="0.01238984">
            <text:p>0.01238984</text:p>
          </table:table-cell>
          <table:table-cell table:number-columns-repeated="4"/>
        </table:table-row>
        <table:table-row table:style-name="ro1">
          <table:table-cell office:value-type="float" office:value="526.373474121094">
            <text:p>526.3734741211</text:p>
          </table:table-cell>
          <table:table-cell office:value-type="float" office:value="-0.007267265">
            <text:p>-0.007267265</text:p>
          </table:table-cell>
          <table:table-cell table:number-columns-repeated="4"/>
        </table:table-row>
        <table:table-row table:style-name="ro1">
          <table:table-cell office:value-type="float" office:value="526.490539550781">
            <text:p>526.4905395508</text:p>
          </table:table-cell>
          <table:table-cell office:value-type="float" office:value="0.01141691">
            <text:p>0.01141691</text:p>
          </table:table-cell>
          <table:table-cell table:number-columns-repeated="4"/>
        </table:table-row>
        <table:table-row table:style-name="ro1">
          <table:table-cell office:value-type="float" office:value="526.607604980469">
            <text:p>526.6076049805</text:p>
          </table:table-cell>
          <table:table-cell office:value-type="float" office:value="-0.007125061">
            <text:p>-0.007125061</text:p>
          </table:table-cell>
          <table:table-cell table:number-columns-repeated="4"/>
        </table:table-row>
        <table:table-row table:style-name="ro1">
          <table:table-cell office:value-type="float" office:value="526.724670410156">
            <text:p>526.7246704102</text:p>
          </table:table-cell>
          <table:table-cell office:value-type="float" office:value="0.006554309">
            <text:p>0.006554309</text:p>
          </table:table-cell>
          <table:table-cell table:number-columns-repeated="4"/>
        </table:table-row>
        <table:table-row table:style-name="ro1">
          <table:table-cell office:value-type="float" office:value="526.841735839844">
            <text:p>526.8417358398</text:p>
          </table:table-cell>
          <table:table-cell office:value-type="float" office:value="0.01157085">
            <text:p>0.01157085</text:p>
          </table:table-cell>
          <table:table-cell table:number-columns-repeated="4"/>
        </table:table-row>
        <table:table-row table:style-name="ro1">
          <table:table-cell office:value-type="float" office:value="526.958862304688">
            <text:p>526.9588623047</text:p>
          </table:table-cell>
          <table:table-cell office:value-type="float" office:value="0.00108011">
            <text:p>0.00108011</text:p>
          </table:table-cell>
          <table:table-cell table:number-columns-repeated="4"/>
        </table:table-row>
        <table:table-row table:style-name="ro1">
          <table:table-cell office:value-type="float" office:value="527.075927734375">
            <text:p>527.0759277344</text:p>
          </table:table-cell>
          <table:table-cell office:value-type="float" office:value="0.01730037">
            <text:p>0.01730037</text:p>
          </table:table-cell>
          <table:table-cell table:number-columns-repeated="4"/>
        </table:table-row>
        <table:table-row table:style-name="ro1">
          <table:table-cell office:value-type="float" office:value="527.192993164063">
            <text:p>527.1929931641</text:p>
          </table:table-cell>
          <table:table-cell office:value-type="float" office:value="-0.007852561">
            <text:p>-0.007852561</text:p>
          </table:table-cell>
          <table:table-cell table:number-columns-repeated="4"/>
        </table:table-row>
        <table:table-row table:style-name="ro1">
          <table:table-cell office:value-type="float" office:value="527.310119628906">
            <text:p>527.3101196289</text:p>
          </table:table-cell>
          <table:table-cell office:value-type="float" office:value="0.003278342">
            <text:p>0.003278342</text:p>
          </table:table-cell>
          <table:table-cell table:number-columns-repeated="4"/>
        </table:table-row>
        <table:table-row table:style-name="ro1">
          <table:table-cell office:value-type="float" office:value="527.42724609375">
            <text:p>527.4272460938</text:p>
          </table:table-cell>
          <table:table-cell office:value-type="float" office:value="-0.002515976">
            <text:p>-0.002515976</text:p>
          </table:table-cell>
          <table:table-cell table:number-columns-repeated="4"/>
        </table:table-row>
        <table:table-row table:style-name="ro1">
          <table:table-cell office:value-type="float" office:value="527.544311523438">
            <text:p>527.5443115234</text:p>
          </table:table-cell>
          <table:table-cell office:value-type="float" office:value="-0.008201594">
            <text:p>-0.008201594</text:p>
          </table:table-cell>
          <table:table-cell table:number-columns-repeated="4"/>
        </table:table-row>
        <table:table-row table:style-name="ro1">
          <table:table-cell office:value-type="float" office:value="527.661437988281">
            <text:p>527.6614379883</text:p>
          </table:table-cell>
          <table:table-cell office:value-type="float" office:value="-0.01286459">
            <text:p>-0.01286459</text:p>
          </table:table-cell>
          <table:table-cell table:number-columns-repeated="4"/>
        </table:table-row>
        <table:table-row table:style-name="ro1">
          <table:table-cell office:value-type="float" office:value="527.778564453125">
            <text:p>527.7785644531</text:p>
          </table:table-cell>
          <table:table-cell office:value-type="float" office:value="0.00638914">
            <text:p>0.00638914</text:p>
          </table:table-cell>
          <table:table-cell table:number-columns-repeated="4"/>
        </table:table-row>
        <table:table-row table:style-name="ro1">
          <table:table-cell office:value-type="float" office:value="527.895629882813">
            <text:p>527.8956298828</text:p>
          </table:table-cell>
          <table:table-cell office:value-type="float" office:value="0.003434076">
            <text:p>0.003434076</text:p>
          </table:table-cell>
          <table:table-cell table:number-columns-repeated="4"/>
        </table:table-row>
        <table:table-row table:style-name="ro1">
          <table:table-cell office:value-type="float" office:value="528.012756347656">
            <text:p>528.0127563477</text:p>
          </table:table-cell>
          <table:table-cell office:value-type="float" office:value="-0.0086845">
            <text:p>-0.0086845</text:p>
          </table:table-cell>
          <table:table-cell table:number-columns-repeated="4"/>
        </table:table-row>
        <table:table-row table:style-name="ro1">
          <table:table-cell office:value-type="float" office:value="528.1298828125">
            <text:p>528.1298828125</text:p>
          </table:table-cell>
          <table:table-cell office:value-type="float" office:value="-0.003393535">
            <text:p>-0.003393535</text:p>
          </table:table-cell>
          <table:table-cell table:number-columns-repeated="4"/>
        </table:table-row>
        <table:table-row table:style-name="ro1">
          <table:table-cell office:value-type="float" office:value="528.247009277344">
            <text:p>528.2470092773</text:p>
          </table:table-cell>
          <table:table-cell office:value-type="float" office:value="0.008983964">
            <text:p>0.008983964</text:p>
          </table:table-cell>
          <table:table-cell table:number-columns-repeated="4"/>
        </table:table-row>
        <table:table-row table:style-name="ro1">
          <table:table-cell office:value-type="float" office:value="528.364135742188">
            <text:p>528.3641357422</text:p>
          </table:table-cell>
          <table:table-cell office:value-type="float" office:value="-0.00844331">
            <text:p>-0.00844331</text:p>
          </table:table-cell>
          <table:table-cell table:number-columns-repeated="4"/>
        </table:table-row>
        <table:table-row table:style-name="ro1">
          <table:table-cell office:value-type="float" office:value="528.481262207031">
            <text:p>528.481262207</text:p>
          </table:table-cell>
          <table:table-cell office:value-type="float" office:value="0.01751086">
            <text:p>0.01751086</text:p>
          </table:table-cell>
          <table:table-cell table:number-columns-repeated="4"/>
        </table:table-row>
        <table:table-row table:style-name="ro1">
          <table:table-cell office:value-type="float" office:value="528.598388671875">
            <text:p>528.5983886719</text:p>
          </table:table-cell>
          <table:table-cell office:value-type="float" office:value="0.0106348">
            <text:p>0.0106348</text:p>
          </table:table-cell>
          <table:table-cell table:number-columns-repeated="4"/>
        </table:table-row>
        <table:table-row table:style-name="ro1">
          <table:table-cell office:value-type="float" office:value="528.715576171875">
            <text:p>528.7155761719</text:p>
          </table:table-cell>
          <table:table-cell office:value-type="float" office:value="0.00230882">
            <text:p>0.00230882</text:p>
          </table:table-cell>
          <table:table-cell table:number-columns-repeated="4"/>
        </table:table-row>
        <table:table-row table:style-name="ro1">
          <table:table-cell office:value-type="float" office:value="528.832702636719">
            <text:p>528.8327026367</text:p>
          </table:table-cell>
          <table:table-cell office:value-type="string">
            <text:p>7.439313E-05</text:p>
          </table:table-cell>
          <table:table-cell table:number-columns-repeated="4"/>
        </table:table-row>
        <table:table-row table:style-name="ro1">
          <table:table-cell office:value-type="float" office:value="528.949829101563">
            <text:p>528.9498291016</text:p>
          </table:table-cell>
          <table:table-cell office:value-type="float" office:value="-0.00436671">
            <text:p>-0.00436671</text:p>
          </table:table-cell>
          <table:table-cell table:number-columns-repeated="4"/>
        </table:table-row>
        <table:table-row table:style-name="ro1">
          <table:table-cell office:value-type="float" office:value="529.066955566406">
            <text:p>529.0669555664</text:p>
          </table:table-cell>
          <table:table-cell office:value-type="float" office:value="-0.01343238">
            <text:p>-0.01343238</text:p>
          </table:table-cell>
          <table:table-cell table:number-columns-repeated="4"/>
        </table:table-row>
        <table:table-row table:style-name="ro1">
          <table:table-cell office:value-type="float" office:value="529.184143066406">
            <text:p>529.1841430664</text:p>
          </table:table-cell>
          <table:table-cell office:value-type="float" office:value="0.004380842">
            <text:p>0.004380842</text:p>
          </table:table-cell>
          <table:table-cell table:number-columns-repeated="4"/>
        </table:table-row>
        <table:table-row table:style-name="ro1">
          <table:table-cell office:value-type="float" office:value="529.30126953125">
            <text:p>529.3012695313</text:p>
          </table:table-cell>
          <table:table-cell office:value-type="float" office:value="0.01194313">
            <text:p>0.01194313</text:p>
          </table:table-cell>
          <table:table-cell table:number-columns-repeated="4"/>
        </table:table-row>
        <table:table-row table:style-name="ro1">
          <table:table-cell office:value-type="float" office:value="529.41845703125">
            <text:p>529.4184570313</text:p>
          </table:table-cell>
          <table:table-cell office:value-type="float" office:value="-0.003462261">
            <text:p>-0.003462261</text:p>
          </table:table-cell>
          <table:table-cell table:number-columns-repeated="4"/>
        </table:table-row>
        <table:table-row table:style-name="ro1">
          <table:table-cell office:value-type="float" office:value="529.535583496094">
            <text:p>529.5355834961</text:p>
          </table:table-cell>
          <table:table-cell office:value-type="float" office:value="0.002212317">
            <text:p>0.002212317</text:p>
          </table:table-cell>
          <table:table-cell table:number-columns-repeated="4"/>
        </table:table-row>
        <table:table-row table:style-name="ro1">
          <table:table-cell office:value-type="float" office:value="529.652770996094">
            <text:p>529.6527709961</text:p>
          </table:table-cell>
          <table:table-cell office:value-type="float" office:value="0.0007445185">
            <text:p>0.0007445185</text:p>
          </table:table-cell>
          <table:table-cell table:number-columns-repeated="4"/>
        </table:table-row>
        <table:table-row table:style-name="ro1">
          <table:table-cell office:value-type="float" office:value="529.769958496094">
            <text:p>529.7699584961</text:p>
          </table:table-cell>
          <table:table-cell office:value-type="float" office:value="-0.0001574648">
            <text:p>-0.0001574648</text:p>
          </table:table-cell>
          <table:table-cell table:number-columns-repeated="4"/>
        </table:table-row>
        <table:table-row table:style-name="ro1">
          <table:table-cell office:value-type="float" office:value="529.887145996094">
            <text:p>529.8871459961</text:p>
          </table:table-cell>
          <table:table-cell office:value-type="float" office:value="-0.0006147393">
            <text:p>-0.0006147393</text:p>
          </table:table-cell>
          <table:table-cell table:number-columns-repeated="4"/>
        </table:table-row>
        <table:table-row table:style-name="ro1">
          <table:table-cell office:value-type="float" office:value="530.004272460938">
            <text:p>530.0042724609</text:p>
          </table:table-cell>
          <table:table-cell office:value-type="float" office:value="0.0003772643">
            <text:p>0.0003772643</text:p>
          </table:table-cell>
          <table:table-cell table:number-columns-repeated="4"/>
        </table:table-row>
        <table:table-row table:style-name="ro1">
          <table:table-cell office:value-type="float" office:value="530.121459960938">
            <text:p>530.1214599609</text:p>
          </table:table-cell>
          <table:table-cell office:value-type="float" office:value="0.00143132">
            <text:p>0.00143132</text:p>
          </table:table-cell>
          <table:table-cell table:number-columns-repeated="4"/>
        </table:table-row>
        <table:table-row table:style-name="ro1">
          <table:table-cell office:value-type="float" office:value="530.238647460938">
            <text:p>530.2386474609</text:p>
          </table:table-cell>
          <table:table-cell office:value-type="float" office:value="-0.002403724">
            <text:p>-0.002403724</text:p>
          </table:table-cell>
          <table:table-cell table:number-columns-repeated="4"/>
        </table:table-row>
        <table:table-row table:style-name="ro1">
          <table:table-cell office:value-type="float" office:value="530.355834960938">
            <text:p>530.3558349609</text:p>
          </table:table-cell>
          <table:table-cell office:value-type="float" office:value="-0.008780166">
            <text:p>-0.008780166</text:p>
          </table:table-cell>
          <table:table-cell table:number-columns-repeated="4"/>
        </table:table-row>
        <table:table-row table:style-name="ro1">
          <table:table-cell office:value-type="float" office:value="530.473022460938">
            <text:p>530.4730224609</text:p>
          </table:table-cell>
          <table:table-cell office:value-type="float" office:value="-0.01123836">
            <text:p>-0.01123836</text:p>
          </table:table-cell>
          <table:table-cell table:number-columns-repeated="4"/>
        </table:table-row>
        <table:table-row table:style-name="ro1">
          <table:table-cell office:value-type="float" office:value="530.590209960938">
            <text:p>530.5902099609</text:p>
          </table:table-cell>
          <table:table-cell office:value-type="float" office:value="0.001739702">
            <text:p>0.001739702</text:p>
          </table:table-cell>
          <table:table-cell table:number-columns-repeated="4"/>
        </table:table-row>
        <table:table-row table:style-name="ro1">
          <table:table-cell office:value-type="float" office:value="530.707397460938">
            <text:p>530.7073974609</text:p>
          </table:table-cell>
          <table:table-cell office:value-type="float" office:value="0.04926825">
            <text:p>0.04926825</text:p>
          </table:table-cell>
          <table:table-cell table:number-columns-repeated="4"/>
        </table:table-row>
        <table:table-row table:style-name="ro1">
          <table:table-cell office:value-type="float" office:value="530.824645996094">
            <text:p>530.8246459961</text:p>
          </table:table-cell>
          <table:table-cell office:value-type="float" office:value="0.00665359">
            <text:p>0.00665359</text:p>
          </table:table-cell>
          <table:table-cell table:number-columns-repeated="4"/>
        </table:table-row>
        <table:table-row table:style-name="ro1">
          <table:table-cell office:value-type="float" office:value="530.941833496094">
            <text:p>530.9418334961</text:p>
          </table:table-cell>
          <table:table-cell office:value-type="float" office:value="0.001486078">
            <text:p>0.001486078</text:p>
          </table:table-cell>
          <table:table-cell table:number-columns-repeated="4"/>
        </table:table-row>
        <table:table-row table:style-name="ro1">
          <table:table-cell office:value-type="float" office:value="531.059020996094">
            <text:p>531.0590209961</text:p>
          </table:table-cell>
          <table:table-cell office:value-type="float" office:value="0.001461943">
            <text:p>0.001461943</text:p>
          </table:table-cell>
          <table:table-cell table:number-columns-repeated="4"/>
        </table:table-row>
        <table:table-row table:style-name="ro1">
          <table:table-cell office:value-type="float" office:value="531.17626953125">
            <text:p>531.1762695313</text:p>
          </table:table-cell>
          <table:table-cell office:value-type="float" office:value="-0.002372696">
            <text:p>-0.002372696</text:p>
          </table:table-cell>
          <table:table-cell table:number-columns-repeated="4"/>
        </table:table-row>
        <table:table-row table:style-name="ro1">
          <table:table-cell office:value-type="float" office:value="531.29345703125">
            <text:p>531.2934570313</text:p>
          </table:table-cell>
          <table:table-cell office:value-type="float" office:value="0.001098064">
            <text:p>0.001098064</text:p>
          </table:table-cell>
          <table:table-cell table:number-columns-repeated="4"/>
        </table:table-row>
        <table:table-row table:style-name="ro1">
          <table:table-cell office:value-type="float" office:value="531.410705566406">
            <text:p>531.4107055664</text:p>
          </table:table-cell>
          <table:table-cell office:value-type="float" office:value="0.002657734">
            <text:p>0.002657734</text:p>
          </table:table-cell>
          <table:table-cell table:number-columns-repeated="4"/>
        </table:table-row>
        <table:table-row table:style-name="ro1">
          <table:table-cell office:value-type="float" office:value="531.527893066406">
            <text:p>531.5278930664</text:p>
          </table:table-cell>
          <table:table-cell office:value-type="float" office:value="-0.003579911">
            <text:p>-0.003579911</text:p>
          </table:table-cell>
          <table:table-cell table:number-columns-repeated="4"/>
        </table:table-row>
        <table:table-row table:style-name="ro1">
          <table:table-cell office:value-type="float" office:value="531.645141601563">
            <text:p>531.6451416016</text:p>
          </table:table-cell>
          <table:table-cell office:value-type="float" office:value="-0.002110409">
            <text:p>-0.002110409</text:p>
          </table:table-cell>
          <table:table-cell table:number-columns-repeated="4"/>
        </table:table-row>
        <table:table-row table:style-name="ro1">
          <table:table-cell office:value-type="float" office:value="531.762329101563">
            <text:p>531.7623291016</text:p>
          </table:table-cell>
          <table:table-cell office:value-type="string">
            <text:p>-7.170883E-05</text:p>
          </table:table-cell>
          <table:table-cell table:number-columns-repeated="4"/>
        </table:table-row>
        <table:table-row table:style-name="ro1">
          <table:table-cell office:value-type="float" office:value="531.879577636719">
            <text:p>531.8795776367</text:p>
          </table:table-cell>
          <table:table-cell office:value-type="float" office:value="-0.004724374">
            <text:p>-0.004724374</text:p>
          </table:table-cell>
          <table:table-cell table:number-columns-repeated="4"/>
        </table:table-row>
        <table:table-row table:style-name="ro1">
          <table:table-cell office:value-type="float" office:value="531.996826171875">
            <text:p>531.9968261719</text:p>
          </table:table-cell>
          <table:table-cell office:value-type="float" office:value="0.003372192">
            <text:p>0.003372192</text:p>
          </table:table-cell>
          <table:table-cell table:number-columns-repeated="4"/>
        </table:table-row>
        <table:table-row table:style-name="ro1">
          <table:table-cell office:value-type="float" office:value="532.114074707031">
            <text:p>532.114074707</text:p>
          </table:table-cell>
          <table:table-cell office:value-type="float" office:value="0.02514373">
            <text:p>0.02514373</text:p>
          </table:table-cell>
          <table:table-cell table:number-columns-repeated="4"/>
        </table:table-row>
        <table:table-row table:style-name="ro1">
          <table:table-cell office:value-type="float" office:value="532.231323242188">
            <text:p>532.2313232422</text:p>
          </table:table-cell>
          <table:table-cell office:value-type="float" office:value="0.003615154">
            <text:p>0.003615154</text:p>
          </table:table-cell>
          <table:table-cell table:number-columns-repeated="4"/>
        </table:table-row>
        <table:table-row table:style-name="ro1">
          <table:table-cell office:value-type="float" office:value="532.348510742188">
            <text:p>532.3485107422</text:p>
          </table:table-cell>
          <table:table-cell office:value-type="float" office:value="0.01800719">
            <text:p>0.01800719</text:p>
          </table:table-cell>
          <table:table-cell table:number-columns-repeated="4"/>
        </table:table-row>
        <table:table-row table:style-name="ro1">
          <table:table-cell office:value-type="float" office:value="532.465759277344">
            <text:p>532.4657592773</text:p>
          </table:table-cell>
          <table:table-cell office:value-type="float" office:value="-0.006700049">
            <text:p>-0.006700049</text:p>
          </table:table-cell>
          <table:table-cell table:number-columns-repeated="4"/>
        </table:table-row>
        <table:table-row table:style-name="ro1">
          <table:table-cell office:value-type="float" office:value="532.583068847656">
            <text:p>532.5830688477</text:p>
          </table:table-cell>
          <table:table-cell office:value-type="float" office:value="-0.002769821">
            <text:p>-0.002769821</text:p>
          </table:table-cell>
          <table:table-cell table:number-columns-repeated="4"/>
        </table:table-row>
        <table:table-row table:style-name="ro1">
          <table:table-cell office:value-type="float" office:value="532.700317382813">
            <text:p>532.7003173828</text:p>
          </table:table-cell>
          <table:table-cell office:value-type="float" office:value="-0.0007586701">
            <text:p>-0.0007586701</text:p>
          </table:table-cell>
          <table:table-cell table:number-columns-repeated="4"/>
        </table:table-row>
        <table:table-row table:style-name="ro1">
          <table:table-cell office:value-type="float" office:value="532.817565917969">
            <text:p>532.817565918</text:p>
          </table:table-cell>
          <table:table-cell office:value-type="float" office:value="-0.0105158">
            <text:p>-0.0105158</text:p>
          </table:table-cell>
          <table:table-cell table:number-columns-repeated="4"/>
        </table:table-row>
        <table:table-row table:style-name="ro1">
          <table:table-cell office:value-type="float" office:value="532.934814453125">
            <text:p>532.9348144531</text:p>
          </table:table-cell>
          <table:table-cell office:value-type="float" office:value="0.007117369">
            <text:p>0.007117369</text:p>
          </table:table-cell>
          <table:table-cell table:number-columns-repeated="4"/>
        </table:table-row>
        <table:table-row table:style-name="ro1">
          <table:table-cell office:value-type="float" office:value="533.052062988281">
            <text:p>533.0520629883</text:p>
          </table:table-cell>
          <table:table-cell office:value-type="float" office:value="-0.00572982">
            <text:p>-0.00572982</text:p>
          </table:table-cell>
          <table:table-cell table:number-columns-repeated="4"/>
        </table:table-row>
        <table:table-row table:style-name="ro1">
          <table:table-cell office:value-type="float" office:value="533.169372558594">
            <text:p>533.1693725586</text:p>
          </table:table-cell>
          <table:table-cell office:value-type="float" office:value="-0.005964813">
            <text:p>-0.005964813</text:p>
          </table:table-cell>
          <table:table-cell table:number-columns-repeated="4"/>
        </table:table-row>
        <table:table-row table:style-name="ro1">
          <table:table-cell office:value-type="float" office:value="533.28662109375">
            <text:p>533.2866210938</text:p>
          </table:table-cell>
          <table:table-cell office:value-type="float" office:value="0.02226016">
            <text:p>0.02226016</text:p>
          </table:table-cell>
          <table:table-cell table:number-columns-repeated="4"/>
        </table:table-row>
        <table:table-row table:style-name="ro1">
          <table:table-cell office:value-type="float" office:value="533.403869628906">
            <text:p>533.4038696289</text:p>
          </table:table-cell>
          <table:table-cell office:value-type="float" office:value="-0.00158716">
            <text:p>-0.00158716</text:p>
          </table:table-cell>
          <table:table-cell table:number-columns-repeated="4"/>
        </table:table-row>
        <table:table-row table:style-name="ro1">
          <table:table-cell office:value-type="float" office:value="533.521179199219">
            <text:p>533.5211791992</text:p>
          </table:table-cell>
          <table:table-cell office:value-type="float" office:value="0.006956881">
            <text:p>0.006956881</text:p>
          </table:table-cell>
          <table:table-cell table:number-columns-repeated="4"/>
        </table:table-row>
        <table:table-row table:style-name="ro1">
          <table:table-cell office:value-type="float" office:value="533.638427734375">
            <text:p>533.6384277344</text:p>
          </table:table-cell>
          <table:table-cell office:value-type="float" office:value="0.004945533">
            <text:p>0.004945533</text:p>
          </table:table-cell>
          <table:table-cell table:number-columns-repeated="4"/>
        </table:table-row>
        <table:table-row table:style-name="ro1">
          <table:table-cell office:value-type="float" office:value="533.755737304688">
            <text:p>533.7557373047</text:p>
          </table:table-cell>
          <table:table-cell office:value-type="float" office:value="-0.008957657">
            <text:p>-0.008957657</text:p>
          </table:table-cell>
          <table:table-cell table:number-columns-repeated="4"/>
        </table:table-row>
        <table:table-row table:style-name="ro1">
          <table:table-cell office:value-type="float" office:value="533.873046875">
            <text:p>533.873046875</text:p>
          </table:table-cell>
          <table:table-cell office:value-type="float" office:value="0.01311291">
            <text:p>0.01311291</text:p>
          </table:table-cell>
          <table:table-cell table:number-columns-repeated="4"/>
        </table:table-row>
        <table:table-row table:style-name="ro1">
          <table:table-cell office:value-type="float" office:value="533.990295410156">
            <text:p>533.9902954102</text:p>
          </table:table-cell>
          <table:table-cell office:value-type="float" office:value="0.007987505">
            <text:p>0.007987505</text:p>
          </table:table-cell>
          <table:table-cell table:number-columns-repeated="4"/>
        </table:table-row>
        <table:table-row table:style-name="ro1">
          <table:table-cell office:value-type="float" office:value="534.107604980469">
            <text:p>534.1076049805</text:p>
          </table:table-cell>
          <table:table-cell office:value-type="string">
            <text:p>-7.185192E-05</text:p>
          </table:table-cell>
          <table:table-cell table:number-columns-repeated="4"/>
        </table:table-row>
        <table:table-row table:style-name="ro1">
          <table:table-cell office:value-type="float" office:value="534.224914550781">
            <text:p>534.2249145508</text:p>
          </table:table-cell>
          <table:table-cell office:value-type="float" office:value="0.005815723">
            <text:p>0.005815723</text:p>
          </table:table-cell>
          <table:table-cell table:number-columns-repeated="4"/>
        </table:table-row>
        <table:table-row table:style-name="ro1">
          <table:table-cell office:value-type="float" office:value="534.342224121094">
            <text:p>534.3422241211</text:p>
          </table:table-cell>
          <table:table-cell office:value-type="float" office:value="-0.004736213">
            <text:p>-0.004736213</text:p>
          </table:table-cell>
          <table:table-cell table:number-columns-repeated="4"/>
        </table:table-row>
        <table:table-row table:style-name="ro1">
          <table:table-cell office:value-type="float" office:value="534.459533691406">
            <text:p>534.4595336914</text:p>
          </table:table-cell>
          <table:table-cell office:value-type="float" office:value="-0.003789551">
            <text:p>-0.003789551</text:p>
          </table:table-cell>
          <table:table-cell table:number-columns-repeated="4"/>
        </table:table-row>
        <table:table-row table:style-name="ro1">
          <table:table-cell office:value-type="float" office:value="534.576843261719">
            <text:p>534.5768432617</text:p>
          </table:table-cell>
          <table:table-cell office:value-type="float" office:value="0.007153348">
            <text:p>0.007153348</text:p>
          </table:table-cell>
          <table:table-cell table:number-columns-repeated="4"/>
        </table:table-row>
        <table:table-row table:style-name="ro1">
          <table:table-cell office:value-type="float" office:value="534.694152832031">
            <text:p>534.694152832</text:p>
          </table:table-cell>
          <table:table-cell office:value-type="float" office:value="-0.009665913">
            <text:p>-0.009665913</text:p>
          </table:table-cell>
          <table:table-cell table:number-columns-repeated="4"/>
        </table:table-row>
        <table:table-row table:style-name="ro1">
          <table:table-cell office:value-type="float" office:value="534.811462402344">
            <text:p>534.8114624023</text:p>
          </table:table-cell>
          <table:table-cell office:value-type="float" office:value="-0.002381763">
            <text:p>-0.002381763</text:p>
          </table:table-cell>
          <table:table-cell table:number-columns-repeated="4"/>
        </table:table-row>
        <table:table-row table:style-name="ro1">
          <table:table-cell office:value-type="float" office:value="534.928771972656">
            <text:p>534.9287719727</text:p>
          </table:table-cell>
          <table:table-cell office:value-type="float" office:value="-0.006041068">
            <text:p>-0.006041068</text:p>
          </table:table-cell>
          <table:table-cell table:number-columns-repeated="4"/>
        </table:table-row>
        <table:table-row table:style-name="ro1">
          <table:table-cell office:value-type="float" office:value="535.046081542969">
            <text:p>535.046081543</text:p>
          </table:table-cell>
          <table:table-cell office:value-type="float" office:value="-0.008795427">
            <text:p>-0.008795427</text:p>
          </table:table-cell>
          <table:table-cell table:number-columns-repeated="4"/>
        </table:table-row>
        <table:table-row table:style-name="ro1">
          <table:table-cell office:value-type="float" office:value="535.163452148438">
            <text:p>535.1634521484</text:p>
          </table:table-cell>
          <table:table-cell office:value-type="float" office:value="0.00352871">
            <text:p>0.00352871</text:p>
          </table:table-cell>
          <table:table-cell table:number-columns-repeated="4"/>
        </table:table-row>
        <table:table-row table:style-name="ro1">
          <table:table-cell office:value-type="float" office:value="535.28076171875">
            <text:p>535.2807617188</text:p>
          </table:table-cell>
          <table:table-cell office:value-type="float" office:value="0.0004084382">
            <text:p>0.0004084382</text:p>
          </table:table-cell>
          <table:table-cell table:number-columns-repeated="4"/>
        </table:table-row>
        <table:table-row table:style-name="ro1">
          <table:table-cell office:value-type="float" office:value="535.398071289063">
            <text:p>535.3980712891</text:p>
          </table:table-cell>
          <table:table-cell office:value-type="float" office:value="0.001263222">
            <text:p>0.001263222</text:p>
          </table:table-cell>
          <table:table-cell table:number-columns-repeated="4"/>
        </table:table-row>
        <table:table-row table:style-name="ro1">
          <table:table-cell office:value-type="float" office:value="535.515441894531">
            <text:p>535.5154418945</text:p>
          </table:table-cell>
          <table:table-cell office:value-type="float" office:value="-0.009316203">
            <text:p>-0.009316203</text:p>
          </table:table-cell>
          <table:table-cell table:number-columns-repeated="4"/>
        </table:table-row>
        <table:table-row table:style-name="ro1">
          <table:table-cell office:value-type="float" office:value="535.632751464844">
            <text:p>535.6327514648</text:p>
          </table:table-cell>
          <table:table-cell office:value-type="float" office:value="-0.004818813">
            <text:p>-0.004818813</text:p>
          </table:table-cell>
          <table:table-cell table:number-columns-repeated="4"/>
        </table:table-row>
        <table:table-row table:style-name="ro1">
          <table:table-cell office:value-type="float" office:value="535.750122070313">
            <text:p>535.7501220703</text:p>
          </table:table-cell>
          <table:table-cell office:value-type="float" office:value="-0.003470472">
            <text:p>-0.003470472</text:p>
          </table:table-cell>
          <table:table-cell table:number-columns-repeated="4"/>
        </table:table-row>
        <table:table-row table:style-name="ro1">
          <table:table-cell office:value-type="float" office:value="535.867431640625">
            <text:p>535.8674316406</text:p>
          </table:table-cell>
          <table:table-cell office:value-type="float" office:value="0.00513817">
            <text:p>0.00513817</text:p>
          </table:table-cell>
          <table:table-cell table:number-columns-repeated="4"/>
        </table:table-row>
        <table:table-row table:style-name="ro1">
          <table:table-cell office:value-type="float" office:value="535.984802246094">
            <text:p>535.9848022461</text:p>
          </table:table-cell>
          <table:table-cell office:value-type="float" office:value="0.009190432">
            <text:p>0.009190432</text:p>
          </table:table-cell>
          <table:table-cell table:number-columns-repeated="4"/>
        </table:table-row>
        <table:table-row table:style-name="ro1">
          <table:table-cell office:value-type="float" office:value="536.102172851563">
            <text:p>536.1021728516</text:p>
          </table:table-cell>
          <table:table-cell office:value-type="float" office:value="0.007622583">
            <text:p>0.007622583</text:p>
          </table:table-cell>
          <table:table-cell table:number-columns-repeated="4"/>
        </table:table-row>
        <table:table-row table:style-name="ro1">
          <table:table-cell office:value-type="float" office:value="536.219543457031">
            <text:p>536.219543457</text:p>
          </table:table-cell>
          <table:table-cell office:value-type="float" office:value="-0.0008131694">
            <text:p>-0.0008131694</text:p>
          </table:table-cell>
          <table:table-cell table:number-columns-repeated="4"/>
        </table:table-row>
        <table:table-row table:style-name="ro1">
          <table:table-cell office:value-type="float" office:value="536.336853027344">
            <text:p>536.3368530273</text:p>
          </table:table-cell>
          <table:table-cell office:value-type="float" office:value="-0.003985072">
            <text:p>-0.003985072</text:p>
          </table:table-cell>
          <table:table-cell table:number-columns-repeated="4"/>
        </table:table-row>
        <table:table-row table:style-name="ro1">
          <table:table-cell office:value-type="float" office:value="536.454223632813">
            <text:p>536.4542236328</text:p>
          </table:table-cell>
          <table:table-cell office:value-type="float" office:value="-0.01203469">
            <text:p>-0.01203469</text:p>
          </table:table-cell>
          <table:table-cell table:number-columns-repeated="4"/>
        </table:table-row>
        <table:table-row table:style-name="ro1">
          <table:table-cell office:value-type="float" office:value="536.571594238281">
            <text:p>536.5715942383</text:p>
          </table:table-cell>
          <table:table-cell office:value-type="float" office:value="-0.009628977">
            <text:p>-0.009628977</text:p>
          </table:table-cell>
          <table:table-cell table:number-columns-repeated="4"/>
        </table:table-row>
        <table:table-row table:style-name="ro1">
          <table:table-cell office:value-type="float" office:value="536.68896484375">
            <text:p>536.6889648438</text:p>
          </table:table-cell>
          <table:table-cell office:value-type="float" office:value="-0.003472855">
            <text:p>-0.003472855</text:p>
          </table:table-cell>
          <table:table-cell table:number-columns-repeated="4"/>
        </table:table-row>
        <table:table-row table:style-name="ro1">
          <table:table-cell office:value-type="float" office:value="536.806335449219">
            <text:p>536.8063354492</text:p>
          </table:table-cell>
          <table:table-cell office:value-type="float" office:value="-0.0009492299">
            <text:p>-0.0009492299</text:p>
          </table:table-cell>
          <table:table-cell table:number-columns-repeated="4"/>
        </table:table-row>
        <table:table-row table:style-name="ro1">
          <table:table-cell office:value-type="float" office:value="536.923706054688">
            <text:p>536.9237060547</text:p>
          </table:table-cell>
          <table:table-cell office:value-type="float" office:value="0.01988691">
            <text:p>0.01988691</text:p>
          </table:table-cell>
          <table:table-cell table:number-columns-repeated="4"/>
        </table:table-row>
        <table:table-row table:style-name="ro1">
          <table:table-cell office:value-type="float" office:value="537.041076660156">
            <text:p>537.0410766602</text:p>
          </table:table-cell>
          <table:table-cell office:value-type="float" office:value="-0.002671118">
            <text:p>-0.002671118</text:p>
          </table:table-cell>
          <table:table-cell table:number-columns-repeated="4"/>
        </table:table-row>
        <table:table-row table:style-name="ro1">
          <table:table-cell office:value-type="float" office:value="537.158508300781">
            <text:p>537.1585083008</text:p>
          </table:table-cell>
          <table:table-cell office:value-type="float" office:value="0.001567677">
            <text:p>0.001567677</text:p>
          </table:table-cell>
          <table:table-cell table:number-columns-repeated="4"/>
        </table:table-row>
        <table:table-row table:style-name="ro1">
          <table:table-cell office:value-type="float" office:value="537.27587890625">
            <text:p>537.2758789063</text:p>
          </table:table-cell>
          <table:table-cell office:value-type="float" office:value="-0.000839214">
            <text:p>-0.000839214</text:p>
          </table:table-cell>
          <table:table-cell table:number-columns-repeated="4"/>
        </table:table-row>
        <table:table-row table:style-name="ro1">
          <table:table-cell office:value-type="float" office:value="537.393249511719">
            <text:p>537.3932495117</text:p>
          </table:table-cell>
          <table:table-cell office:value-type="float" office:value="0.001850942">
            <text:p>0.001850942</text:p>
          </table:table-cell>
          <table:table-cell table:number-columns-repeated="4"/>
        </table:table-row>
        <table:table-row table:style-name="ro1">
          <table:table-cell office:value-type="float" office:value="537.510681152344">
            <text:p>537.5106811523</text:p>
          </table:table-cell>
          <table:table-cell office:value-type="float" office:value="-0.005305389">
            <text:p>-0.005305389</text:p>
          </table:table-cell>
          <table:table-cell table:number-columns-repeated="4"/>
        </table:table-row>
        <table:table-row table:style-name="ro1">
          <table:table-cell office:value-type="float" office:value="537.628051757813">
            <text:p>537.6280517578</text:p>
          </table:table-cell>
          <table:table-cell office:value-type="float" office:value="0.001452342">
            <text:p>0.001452342</text:p>
          </table:table-cell>
          <table:table-cell table:number-columns-repeated="4"/>
        </table:table-row>
        <table:table-row table:style-name="ro1">
          <table:table-cell office:value-type="float" office:value="537.745483398438">
            <text:p>537.7454833984</text:p>
          </table:table-cell>
          <table:table-cell office:value-type="float" office:value="-0.002802084">
            <text:p>-0.002802084</text:p>
          </table:table-cell>
          <table:table-cell table:number-columns-repeated="4"/>
        </table:table-row>
        <table:table-row table:style-name="ro1">
          <table:table-cell office:value-type="float" office:value="537.862854003906">
            <text:p>537.8628540039</text:p>
          </table:table-cell>
          <table:table-cell office:value-type="float" office:value="0.00110746">
            <text:p>0.00110746</text:p>
          </table:table-cell>
          <table:table-cell table:number-columns-repeated="4"/>
        </table:table-row>
        <table:table-row table:style-name="ro1">
          <table:table-cell office:value-type="float" office:value="537.980285644531">
            <text:p>537.9802856445</text:p>
          </table:table-cell>
          <table:table-cell office:value-type="float" office:value="-0.01316406">
            <text:p>-0.01316406</text:p>
          </table:table-cell>
          <table:table-cell table:number-columns-repeated="4"/>
        </table:table-row>
        <table:table-row table:style-name="ro1">
          <table:table-cell office:value-type="float" office:value="538.09765625">
            <text:p>538.09765625</text:p>
          </table:table-cell>
          <table:table-cell office:value-type="float" office:value="0.03272936">
            <text:p>0.03272936</text:p>
          </table:table-cell>
          <table:table-cell table:number-columns-repeated="4"/>
        </table:table-row>
        <table:table-row table:style-name="ro1">
          <table:table-cell office:value-type="float" office:value="538.215087890625">
            <text:p>538.2150878906</text:p>
          </table:table-cell>
          <table:table-cell office:value-type="float" office:value="0.001734423">
            <text:p>0.001734423</text:p>
          </table:table-cell>
          <table:table-cell table:number-columns-repeated="4"/>
        </table:table-row>
        <table:table-row table:style-name="ro1">
          <table:table-cell office:value-type="float" office:value="538.33251953125">
            <text:p>538.3325195313</text:p>
          </table:table-cell>
          <table:table-cell office:value-type="float" office:value="0.02762011">
            <text:p>0.02762011</text:p>
          </table:table-cell>
          <table:table-cell table:number-columns-repeated="4"/>
        </table:table-row>
        <table:table-row table:style-name="ro1">
          <table:table-cell office:value-type="float" office:value="538.449890136719">
            <text:p>538.4498901367</text:p>
          </table:table-cell>
          <table:table-cell office:value-type="float" office:value="0.0008345645">
            <text:p>0.0008345645</text:p>
          </table:table-cell>
          <table:table-cell table:number-columns-repeated="4"/>
        </table:table-row>
        <table:table-row table:style-name="ro1">
          <table:table-cell office:value-type="float" office:value="538.567321777344">
            <text:p>538.5673217773</text:p>
          </table:table-cell>
          <table:table-cell office:value-type="float" office:value="0.03194784">
            <text:p>0.03194784</text:p>
          </table:table-cell>
          <table:table-cell table:number-columns-repeated="4"/>
        </table:table-row>
        <table:table-row table:style-name="ro1">
          <table:table-cell office:value-type="float" office:value="538.684753417969">
            <text:p>538.684753418</text:p>
          </table:table-cell>
          <table:table-cell office:value-type="float" office:value="-0.001505903">
            <text:p>-0.001505903</text:p>
          </table:table-cell>
          <table:table-cell table:number-columns-repeated="4"/>
        </table:table-row>
        <table:table-row table:style-name="ro1">
          <table:table-cell office:value-type="float" office:value="538.802185058594">
            <text:p>538.8021850586</text:p>
          </table:table-cell>
          <table:table-cell office:value-type="float" office:value="0.004491338">
            <text:p>0.004491338</text:p>
          </table:table-cell>
          <table:table-cell table:number-columns-repeated="4"/>
        </table:table-row>
        <table:table-row table:style-name="ro1">
          <table:table-cell office:value-type="float" office:value="538.919616699219">
            <text:p>538.9196166992</text:p>
          </table:table-cell>
          <table:table-cell office:value-type="float" office:value="-0.01025539">
            <text:p>-0.01025539</text:p>
          </table:table-cell>
          <table:table-cell table:number-columns-repeated="4"/>
        </table:table-row>
        <table:table-row table:style-name="ro1">
          <table:table-cell office:value-type="float" office:value="539.037048339844">
            <text:p>539.0370483398</text:p>
          </table:table-cell>
          <table:table-cell office:value-type="float" office:value="0.007004344">
            <text:p>0.007004344</text:p>
          </table:table-cell>
          <table:table-cell table:number-columns-repeated="4"/>
        </table:table-row>
        <table:table-row table:style-name="ro1">
          <table:table-cell office:value-type="float" office:value="539.154479980469">
            <text:p>539.1544799805</text:p>
          </table:table-cell>
          <table:table-cell office:value-type="float" office:value="0.000460711">
            <text:p>0.000460711</text:p>
          </table:table-cell>
          <table:table-cell table:number-columns-repeated="4"/>
        </table:table-row>
        <table:table-row table:style-name="ro1">
          <table:table-cell office:value-type="float" office:value="539.27197265625">
            <text:p>539.2719726563</text:p>
          </table:table-cell>
          <table:table-cell office:value-type="float" office:value="-0.009019189">
            <text:p>-0.009019189</text:p>
          </table:table-cell>
          <table:table-cell table:number-columns-repeated="4"/>
        </table:table-row>
        <table:table-row table:style-name="ro1">
          <table:table-cell office:value-type="float" office:value="539.389404296875">
            <text:p>539.3894042969</text:p>
          </table:table-cell>
          <table:table-cell office:value-type="string">
            <text:p>-6.670417E-05</text:p>
          </table:table-cell>
          <table:table-cell table:number-columns-repeated="4"/>
        </table:table-row>
        <table:table-row table:style-name="ro1">
          <table:table-cell office:value-type="float" office:value="539.5068359375">
            <text:p>539.5068359375</text:p>
          </table:table-cell>
          <table:table-cell office:value-type="float" office:value="-0.003214795">
            <text:p>-0.003214795</text:p>
          </table:table-cell>
          <table:table-cell table:number-columns-repeated="4"/>
        </table:table-row>
        <table:table-row table:style-name="ro1">
          <table:table-cell office:value-type="float" office:value="539.624267578125">
            <text:p>539.6242675781</text:p>
          </table:table-cell>
          <table:table-cell office:value-type="float" office:value="-0.002977061">
            <text:p>-0.002977061</text:p>
          </table:table-cell>
          <table:table-cell table:number-columns-repeated="4"/>
        </table:table-row>
        <table:table-row table:style-name="ro1">
          <table:table-cell office:value-type="float" office:value="539.741760253906">
            <text:p>539.7417602539</text:p>
          </table:table-cell>
          <table:table-cell office:value-type="float" office:value="-0.004641052">
            <text:p>-0.004641052</text:p>
          </table:table-cell>
          <table:table-cell table:number-columns-repeated="4"/>
        </table:table-row>
        <table:table-row table:style-name="ro1">
          <table:table-cell office:value-type="float" office:value="539.859191894531">
            <text:p>539.8591918945</text:p>
          </table:table-cell>
          <table:table-cell office:value-type="float" office:value="-0.01178565">
            <text:p>-0.01178565</text:p>
          </table:table-cell>
          <table:table-cell table:number-columns-repeated="4"/>
        </table:table-row>
        <table:table-row table:style-name="ro1">
          <table:table-cell office:value-type="float" office:value="539.976684570313">
            <text:p>539.9766845703</text:p>
          </table:table-cell>
          <table:table-cell office:value-type="float" office:value="0.005735709">
            <text:p>0.005735709</text:p>
          </table:table-cell>
          <table:table-cell table:number-columns-repeated="4"/>
        </table:table-row>
        <table:table-row table:style-name="ro1">
          <table:table-cell office:value-type="float" office:value="540.094116210938">
            <text:p>540.0941162109</text:p>
          </table:table-cell>
          <table:table-cell office:value-type="float" office:value="-0.008960352">
            <text:p>-0.008960352</text:p>
          </table:table-cell>
          <table:table-cell table:number-columns-repeated="4"/>
        </table:table-row>
        <table:table-row table:style-name="ro1">
          <table:table-cell office:value-type="float" office:value="540.211608886719">
            <text:p>540.2116088867</text:p>
          </table:table-cell>
          <table:table-cell office:value-type="float" office:value="-0.009290469">
            <text:p>-0.009290469</text:p>
          </table:table-cell>
          <table:table-cell table:number-columns-repeated="4"/>
        </table:table-row>
        <table:table-row table:style-name="ro1">
          <table:table-cell office:value-type="float" office:value="540.3291015625">
            <text:p>540.3291015625</text:p>
          </table:table-cell>
          <table:table-cell office:value-type="float" office:value="-0.002146099">
            <text:p>-0.002146099</text:p>
          </table:table-cell>
          <table:table-cell table:number-columns-repeated="4"/>
        </table:table-row>
        <table:table-row table:style-name="ro1">
          <table:table-cell office:value-type="float" office:value="540.446533203125">
            <text:p>540.4465332031</text:p>
          </table:table-cell>
          <table:table-cell office:value-type="float" office:value="-0.003985329">
            <text:p>-0.003985329</text:p>
          </table:table-cell>
          <table:table-cell table:number-columns-repeated="4"/>
        </table:table-row>
        <table:table-row table:style-name="ro1">
          <table:table-cell office:value-type="float" office:value="540.564025878906">
            <text:p>540.5640258789</text:p>
          </table:table-cell>
          <table:table-cell office:value-type="float" office:value="0.01221144">
            <text:p>0.01221144</text:p>
          </table:table-cell>
          <table:table-cell table:number-columns-repeated="4"/>
        </table:table-row>
        <table:table-row table:style-name="ro1">
          <table:table-cell office:value-type="float" office:value="540.681518554688">
            <text:p>540.6815185547</text:p>
          </table:table-cell>
          <table:table-cell office:value-type="float" office:value="-0.003819244">
            <text:p>-0.003819244</text:p>
          </table:table-cell>
          <table:table-cell table:number-columns-repeated="4"/>
        </table:table-row>
        <table:table-row table:style-name="ro1">
          <table:table-cell office:value-type="float" office:value="540.799011230469">
            <text:p>540.7990112305</text:p>
          </table:table-cell>
          <table:table-cell office:value-type="float" office:value="-0.004771356">
            <text:p>-0.004771356</text:p>
          </table:table-cell>
          <table:table-cell table:number-columns-repeated="4"/>
        </table:table-row>
        <table:table-row table:style-name="ro1">
          <table:table-cell office:value-type="float" office:value="540.91650390625">
            <text:p>540.9165039063</text:p>
          </table:table-cell>
          <table:table-cell office:value-type="float" office:value="-0.009364727">
            <text:p>-0.009364727</text:p>
          </table:table-cell>
          <table:table-cell table:number-columns-repeated="4"/>
        </table:table-row>
        <table:table-row table:style-name="ro1">
          <table:table-cell office:value-type="float" office:value="541.033996582031">
            <text:p>541.033996582</text:p>
          </table:table-cell>
          <table:table-cell office:value-type="float" office:value="-0.001488221">
            <text:p>-0.001488221</text:p>
          </table:table-cell>
          <table:table-cell table:number-columns-repeated="4"/>
        </table:table-row>
        <table:table-row table:style-name="ro1">
          <table:table-cell office:value-type="float" office:value="541.151489257813">
            <text:p>541.1514892578</text:p>
          </table:table-cell>
          <table:table-cell office:value-type="float" office:value="0.001103485">
            <text:p>0.001103485</text:p>
          </table:table-cell>
          <table:table-cell table:number-columns-repeated="4"/>
        </table:table-row>
        <table:table-row table:style-name="ro1">
          <table:table-cell office:value-type="float" office:value="541.268981933594">
            <text:p>541.2689819336</text:p>
          </table:table-cell>
          <table:table-cell office:value-type="float" office:value="-0.004455918">
            <text:p>-0.004455918</text:p>
          </table:table-cell>
          <table:table-cell table:number-columns-repeated="4"/>
        </table:table-row>
        <table:table-row table:style-name="ro1">
          <table:table-cell office:value-type="float" office:value="541.386474609375">
            <text:p>541.3864746094</text:p>
          </table:table-cell>
          <table:table-cell office:value-type="float" office:value="0.007407127">
            <text:p>0.007407127</text:p>
          </table:table-cell>
          <table:table-cell table:number-columns-repeated="4"/>
        </table:table-row>
        <table:table-row table:style-name="ro1">
          <table:table-cell office:value-type="float" office:value="541.503967285156">
            <text:p>541.5039672852</text:p>
          </table:table-cell>
          <table:table-cell office:value-type="float" office:value="-0.004258954">
            <text:p>-0.004258954</text:p>
          </table:table-cell>
          <table:table-cell table:number-columns-repeated="4"/>
        </table:table-row>
        <table:table-row table:style-name="ro1">
          <table:table-cell office:value-type="float" office:value="541.621459960938">
            <text:p>541.6214599609</text:p>
          </table:table-cell>
          <table:table-cell office:value-type="string">
            <text:p>9.764836E-05</text:p>
          </table:table-cell>
          <table:table-cell table:number-columns-repeated="4"/>
        </table:table-row>
        <table:table-row table:style-name="ro1">
          <table:table-cell office:value-type="float" office:value="541.739013671875">
            <text:p>541.7390136719</text:p>
          </table:table-cell>
          <table:table-cell office:value-type="float" office:value="0.01233146">
            <text:p>0.01233146</text:p>
          </table:table-cell>
          <table:table-cell table:number-columns-repeated="4"/>
        </table:table-row>
        <table:table-row table:style-name="ro1">
          <table:table-cell office:value-type="float" office:value="541.856506347656">
            <text:p>541.8565063477</text:p>
          </table:table-cell>
          <table:table-cell office:value-type="float" office:value="-0.002352834">
            <text:p>-0.002352834</text:p>
          </table:table-cell>
          <table:table-cell table:number-columns-repeated="4"/>
        </table:table-row>
        <table:table-row table:style-name="ro1">
          <table:table-cell office:value-type="float" office:value="541.974060058594">
            <text:p>541.9740600586</text:p>
          </table:table-cell>
          <table:table-cell office:value-type="float" office:value="-0.01130431">
            <text:p>-0.01130431</text:p>
          </table:table-cell>
          <table:table-cell table:number-columns-repeated="4"/>
        </table:table-row>
        <table:table-row table:style-name="ro1">
          <table:table-cell office:value-type="float" office:value="542.091552734375">
            <text:p>542.0915527344</text:p>
          </table:table-cell>
          <table:table-cell office:value-type="float" office:value="0.001948518">
            <text:p>0.001948518</text:p>
          </table:table-cell>
          <table:table-cell table:number-columns-repeated="4"/>
        </table:table-row>
        <table:table-row table:style-name="ro1">
          <table:table-cell office:value-type="float" office:value="542.209106445313">
            <text:p>542.2091064453</text:p>
          </table:table-cell>
          <table:table-cell office:value-type="float" office:value="0.0009329288">
            <text:p>0.0009329288</text:p>
          </table:table-cell>
          <table:table-cell table:number-columns-repeated="4"/>
        </table:table-row>
        <table:table-row table:style-name="ro1">
          <table:table-cell office:value-type="float" office:value="542.326599121094">
            <text:p>542.3265991211</text:p>
          </table:table-cell>
          <table:table-cell office:value-type="float" office:value="-0.007471025">
            <text:p>-0.007471025</text:p>
          </table:table-cell>
          <table:table-cell table:number-columns-repeated="4"/>
        </table:table-row>
        <table:table-row table:style-name="ro1">
          <table:table-cell office:value-type="float" office:value="542.444152832031">
            <text:p>542.444152832</text:p>
          </table:table-cell>
          <table:table-cell office:value-type="float" office:value="0.008349075">
            <text:p>0.008349075</text:p>
          </table:table-cell>
          <table:table-cell table:number-columns-repeated="4"/>
        </table:table-row>
        <table:table-row table:style-name="ro1">
          <table:table-cell office:value-type="float" office:value="542.561645507813">
            <text:p>542.5616455078</text:p>
          </table:table-cell>
          <table:table-cell office:value-type="float" office:value="-0.002637175">
            <text:p>-0.002637175</text:p>
          </table:table-cell>
          <table:table-cell table:number-columns-repeated="4"/>
        </table:table-row>
        <table:table-row table:style-name="ro1">
          <table:table-cell office:value-type="float" office:value="542.67919921875">
            <text:p>542.6791992188</text:p>
          </table:table-cell>
          <table:table-cell office:value-type="float" office:value="-0.00750144">
            <text:p>-0.00750144</text:p>
          </table:table-cell>
          <table:table-cell table:number-columns-repeated="4"/>
        </table:table-row>
        <table:table-row table:style-name="ro1">
          <table:table-cell office:value-type="float" office:value="542.796752929688">
            <text:p>542.7967529297</text:p>
          </table:table-cell>
          <table:table-cell office:value-type="float" office:value="0.008018564">
            <text:p>0.008018564</text:p>
          </table:table-cell>
          <table:table-cell table:number-columns-repeated="4"/>
        </table:table-row>
        <table:table-row table:style-name="ro1">
          <table:table-cell office:value-type="float" office:value="542.914306640625">
            <text:p>542.9143066406</text:p>
          </table:table-cell>
          <table:table-cell office:value-type="float" office:value="-0.003805645">
            <text:p>-0.003805645</text:p>
          </table:table-cell>
          <table:table-cell table:number-columns-repeated="4"/>
        </table:table-row>
        <table:table-row table:style-name="ro1">
          <table:table-cell office:value-type="float" office:value="543.031860351563">
            <text:p>543.0318603516</text:p>
          </table:table-cell>
          <table:table-cell office:value-type="float" office:value="0.005124066">
            <text:p>0.005124066</text:p>
          </table:table-cell>
          <table:table-cell table:number-columns-repeated="4"/>
        </table:table-row>
        <table:table-row table:style-name="ro1">
          <table:table-cell office:value-type="float" office:value="543.1494140625">
            <text:p>543.1494140625</text:p>
          </table:table-cell>
          <table:table-cell office:value-type="float" office:value="-0.01242382">
            <text:p>-0.01242382</text:p>
          </table:table-cell>
          <table:table-cell table:number-columns-repeated="4"/>
        </table:table-row>
        <table:table-row table:style-name="ro1">
          <table:table-cell office:value-type="float" office:value="543.266967773438">
            <text:p>543.2669677734</text:p>
          </table:table-cell>
          <table:table-cell office:value-type="float" office:value="0.001259626">
            <text:p>0.001259626</text:p>
          </table:table-cell>
          <table:table-cell table:number-columns-repeated="4"/>
        </table:table-row>
        <table:table-row table:style-name="ro1">
          <table:table-cell office:value-type="float" office:value="543.384521484375">
            <text:p>543.3845214844</text:p>
          </table:table-cell>
          <table:table-cell office:value-type="float" office:value="0.004565897">
            <text:p>0.004565897</text:p>
          </table:table-cell>
          <table:table-cell table:number-columns-repeated="4"/>
        </table:table-row>
        <table:table-row table:style-name="ro1">
          <table:table-cell office:value-type="float" office:value="543.502075195313">
            <text:p>543.5020751953</text:p>
          </table:table-cell>
          <table:table-cell office:value-type="float" office:value="-0.00885902">
            <text:p>-0.00885902</text:p>
          </table:table-cell>
          <table:table-cell table:number-columns-repeated="4"/>
        </table:table-row>
        <table:table-row table:style-name="ro1">
          <table:table-cell office:value-type="float" office:value="543.61962890625">
            <text:p>543.6196289063</text:p>
          </table:table-cell>
          <table:table-cell office:value-type="float" office:value="0.0006415096">
            <text:p>0.0006415096</text:p>
          </table:table-cell>
          <table:table-cell table:number-columns-repeated="4"/>
        </table:table-row>
        <table:table-row table:style-name="ro1">
          <table:table-cell office:value-type="float" office:value="543.737182617188">
            <text:p>543.7371826172</text:p>
          </table:table-cell>
          <table:table-cell office:value-type="float" office:value="-0.007176833">
            <text:p>-0.007176833</text:p>
          </table:table-cell>
          <table:table-cell table:number-columns-repeated="4"/>
        </table:table-row>
        <table:table-row table:style-name="ro1">
          <table:table-cell office:value-type="float" office:value="543.854736328125">
            <text:p>543.8547363281</text:p>
          </table:table-cell>
          <table:table-cell office:value-type="float" office:value="-0.005544494">
            <text:p>-0.005544494</text:p>
          </table:table-cell>
          <table:table-cell table:number-columns-repeated="4"/>
        </table:table-row>
        <table:table-row table:style-name="ro1">
          <table:table-cell office:value-type="float" office:value="543.972351074219">
            <text:p>543.9723510742</text:p>
          </table:table-cell>
          <table:table-cell office:value-type="float" office:value="0.0003191464">
            <text:p>0.0003191464</text:p>
          </table:table-cell>
          <table:table-cell table:number-columns-repeated="4"/>
        </table:table-row>
        <table:table-row table:style-name="ro1">
          <table:table-cell office:value-type="float" office:value="544.089904785156">
            <text:p>544.0899047852</text:p>
          </table:table-cell>
          <table:table-cell office:value-type="float" office:value="-0.0038381">
            <text:p>-0.0038381</text:p>
          </table:table-cell>
          <table:table-cell table:number-columns-repeated="4"/>
        </table:table-row>
        <table:table-row table:style-name="ro1">
          <table:table-cell office:value-type="float" office:value="544.207458496094">
            <text:p>544.2074584961</text:p>
          </table:table-cell>
          <table:table-cell office:value-type="float" office:value="-0.0003338222">
            <text:p>-0.0003338222</text:p>
          </table:table-cell>
          <table:table-cell table:number-columns-repeated="4"/>
        </table:table-row>
        <table:table-row table:style-name="ro1">
          <table:table-cell office:value-type="float" office:value="544.325073242188">
            <text:p>544.3250732422</text:p>
          </table:table-cell>
          <table:table-cell office:value-type="float" office:value="0.004956537">
            <text:p>0.004956537</text:p>
          </table:table-cell>
          <table:table-cell table:number-columns-repeated="4"/>
        </table:table-row>
        <table:table-row table:style-name="ro1">
          <table:table-cell office:value-type="float" office:value="544.442626953125">
            <text:p>544.4426269531</text:p>
          </table:table-cell>
          <table:table-cell office:value-type="float" office:value="-0.008414599">
            <text:p>-0.008414599</text:p>
          </table:table-cell>
          <table:table-cell table:number-columns-repeated="4"/>
        </table:table-row>
        <table:table-row table:style-name="ro1">
          <table:table-cell office:value-type="float" office:value="544.560241699219">
            <text:p>544.5602416992</text:p>
          </table:table-cell>
          <table:table-cell office:value-type="float" office:value="0.001625101">
            <text:p>0.001625101</text:p>
          </table:table-cell>
          <table:table-cell table:number-columns-repeated="4"/>
        </table:table-row>
        <table:table-row table:style-name="ro1">
          <table:table-cell office:value-type="float" office:value="544.677856445313">
            <text:p>544.6778564453</text:p>
          </table:table-cell>
          <table:table-cell office:value-type="float" office:value="0.001699142">
            <text:p>0.001699142</text:p>
          </table:table-cell>
          <table:table-cell table:number-columns-repeated="4"/>
        </table:table-row>
        <table:table-row table:style-name="ro1">
          <table:table-cell office:value-type="float" office:value="544.79541015625">
            <text:p>544.7954101563</text:p>
          </table:table-cell>
          <table:table-cell office:value-type="float" office:value="0.002624796">
            <text:p>0.002624796</text:p>
          </table:table-cell>
          <table:table-cell table:number-columns-repeated="4"/>
        </table:table-row>
        <table:table-row table:style-name="ro1">
          <table:table-cell office:value-type="float" office:value="544.913024902344">
            <text:p>544.9130249023</text:p>
          </table:table-cell>
          <table:table-cell office:value-type="float" office:value="-0.009473539">
            <text:p>-0.009473539</text:p>
          </table:table-cell>
          <table:table-cell table:number-columns-repeated="4"/>
        </table:table-row>
        <table:table-row table:style-name="ro1">
          <table:table-cell office:value-type="float" office:value="545.030639648438">
            <text:p>545.0306396484</text:p>
          </table:table-cell>
          <table:table-cell office:value-type="float" office:value="-0.0002603317">
            <text:p>-0.0002603317</text:p>
          </table:table-cell>
          <table:table-cell table:number-columns-repeated="4"/>
        </table:table-row>
        <table:table-row table:style-name="ro1">
          <table:table-cell office:value-type="float" office:value="545.148254394531">
            <text:p>545.1482543945</text:p>
          </table:table-cell>
          <table:table-cell office:value-type="float" office:value="0.001838509">
            <text:p>0.001838509</text:p>
          </table:table-cell>
          <table:table-cell table:number-columns-repeated="4"/>
        </table:table-row>
        <table:table-row table:style-name="ro1">
          <table:table-cell office:value-type="float" office:value="545.265869140625">
            <text:p>545.2658691406</text:p>
          </table:table-cell>
          <table:table-cell office:value-type="float" office:value="0.001608821">
            <text:p>0.001608821</text:p>
          </table:table-cell>
          <table:table-cell table:number-columns-repeated="4"/>
        </table:table-row>
        <table:table-row table:style-name="ro1">
          <table:table-cell office:value-type="float" office:value="545.383483886719">
            <text:p>545.3834838867</text:p>
          </table:table-cell>
          <table:table-cell office:value-type="float" office:value="-0.01301661">
            <text:p>-0.01301661</text:p>
          </table:table-cell>
          <table:table-cell table:number-columns-repeated="4"/>
        </table:table-row>
        <table:table-row table:style-name="ro1">
          <table:table-cell office:value-type="float" office:value="545.501098632813">
            <text:p>545.5010986328</text:p>
          </table:table-cell>
          <table:table-cell office:value-type="float" office:value="-0.0011309">
            <text:p>-0.0011309</text:p>
          </table:table-cell>
          <table:table-cell table:number-columns-repeated="4"/>
        </table:table-row>
        <table:table-row table:style-name="ro1">
          <table:table-cell office:value-type="float" office:value="545.618713378906">
            <text:p>545.6187133789</text:p>
          </table:table-cell>
          <table:table-cell office:value-type="float" office:value="0.005955467">
            <text:p>0.005955467</text:p>
          </table:table-cell>
          <table:table-cell table:number-columns-repeated="4"/>
        </table:table-row>
        <table:table-row table:style-name="ro1">
          <table:table-cell office:value-type="float" office:value="545.736328125">
            <text:p>545.736328125</text:p>
          </table:table-cell>
          <table:table-cell office:value-type="float" office:value="0.003484637">
            <text:p>0.003484637</text:p>
          </table:table-cell>
          <table:table-cell table:number-columns-repeated="4"/>
        </table:table-row>
        <table:table-row table:style-name="ro1">
          <table:table-cell office:value-type="float" office:value="545.853942871094">
            <text:p>545.8539428711</text:p>
          </table:table-cell>
          <table:table-cell office:value-type="string">
            <text:p>7.22908E-05</text:p>
          </table:table-cell>
          <table:table-cell table:number-columns-repeated="4"/>
        </table:table-row>
        <table:table-row table:style-name="ro1">
          <table:table-cell office:value-type="float" office:value="545.971557617188">
            <text:p>545.9715576172</text:p>
          </table:table-cell>
          <table:table-cell office:value-type="float" office:value="0.009277222">
            <text:p>0.009277222</text:p>
          </table:table-cell>
          <table:table-cell table:number-columns-repeated="4"/>
        </table:table-row>
        <table:table-row table:style-name="ro1">
          <table:table-cell office:value-type="float" office:value="546.089172363281">
            <text:p>546.0891723633</text:p>
          </table:table-cell>
          <table:table-cell office:value-type="float" office:value="0.01038618">
            <text:p>0.01038618</text:p>
          </table:table-cell>
          <table:table-cell table:number-columns-repeated="4"/>
        </table:table-row>
        <table:table-row table:style-name="ro1">
          <table:table-cell office:value-type="float" office:value="546.206848144531">
            <text:p>546.2068481445</text:p>
          </table:table-cell>
          <table:table-cell office:value-type="float" office:value="0.009797204">
            <text:p>0.009797204</text:p>
          </table:table-cell>
          <table:table-cell table:number-columns-repeated="4"/>
        </table:table-row>
        <table:table-row table:style-name="ro1">
          <table:table-cell office:value-type="float" office:value="546.324462890625">
            <text:p>546.3244628906</text:p>
          </table:table-cell>
          <table:table-cell office:value-type="float" office:value="-0.005482538">
            <text:p>-0.005482538</text:p>
          </table:table-cell>
          <table:table-cell table:number-columns-repeated="4"/>
        </table:table-row>
        <table:table-row table:style-name="ro1">
          <table:table-cell office:value-type="float" office:value="546.442077636719">
            <text:p>546.4420776367</text:p>
          </table:table-cell>
          <table:table-cell office:value-type="float" office:value="0.003290794">
            <text:p>0.003290794</text:p>
          </table:table-cell>
          <table:table-cell table:number-columns-repeated="4"/>
        </table:table-row>
        <table:table-row table:style-name="ro1">
          <table:table-cell office:value-type="float" office:value="546.559753417969">
            <text:p>546.559753418</text:p>
          </table:table-cell>
          <table:table-cell office:value-type="float" office:value="0.00419348">
            <text:p>0.00419348</text:p>
          </table:table-cell>
          <table:table-cell table:number-columns-repeated="4"/>
        </table:table-row>
        <table:table-row table:style-name="ro1">
          <table:table-cell office:value-type="float" office:value="546.677368164063">
            <text:p>546.6773681641</text:p>
          </table:table-cell>
          <table:table-cell office:value-type="float" office:value="0.0006184953">
            <text:p>0.0006184953</text:p>
          </table:table-cell>
          <table:table-cell table:number-columns-repeated="4"/>
        </table:table-row>
        <table:table-row table:style-name="ro1">
          <table:table-cell office:value-type="float" office:value="546.795043945313">
            <text:p>546.7950439453</text:p>
          </table:table-cell>
          <table:table-cell office:value-type="float" office:value="0.001689642">
            <text:p>0.001689642</text:p>
          </table:table-cell>
          <table:table-cell table:number-columns-repeated="4"/>
        </table:table-row>
        <table:table-row table:style-name="ro1">
          <table:table-cell office:value-type="float" office:value="546.912719726563">
            <text:p>546.9127197266</text:p>
          </table:table-cell>
          <table:table-cell office:value-type="float" office:value="0.005887587">
            <text:p>0.005887587</text:p>
          </table:table-cell>
          <table:table-cell table:number-columns-repeated="4"/>
        </table:table-row>
        <table:table-row table:style-name="ro1">
          <table:table-cell office:value-type="float" office:value="547.030334472656">
            <text:p>547.0303344727</text:p>
          </table:table-cell>
          <table:table-cell office:value-type="float" office:value="-0.003334666">
            <text:p>-0.003334666</text:p>
          </table:table-cell>
          <table:table-cell table:number-columns-repeated="4"/>
        </table:table-row>
        <table:table-row table:style-name="ro1">
          <table:table-cell office:value-type="float" office:value="547.148010253906">
            <text:p>547.1480102539</text:p>
          </table:table-cell>
          <table:table-cell office:value-type="float" office:value="0.003677677">
            <text:p>0.003677677</text:p>
          </table:table-cell>
          <table:table-cell table:number-columns-repeated="4"/>
        </table:table-row>
        <table:table-row table:style-name="ro1">
          <table:table-cell office:value-type="float" office:value="547.265686035156">
            <text:p>547.2656860352</text:p>
          </table:table-cell>
          <table:table-cell office:value-type="float" office:value="0.004384374">
            <text:p>0.004384374</text:p>
          </table:table-cell>
          <table:table-cell table:number-columns-repeated="4"/>
        </table:table-row>
        <table:table-row table:style-name="ro1">
          <table:table-cell office:value-type="float" office:value="547.383361816406">
            <text:p>547.3833618164</text:p>
          </table:table-cell>
          <table:table-cell office:value-type="float" office:value="0.005601531">
            <text:p>0.005601531</text:p>
          </table:table-cell>
          <table:table-cell table:number-columns-repeated="4"/>
        </table:table-row>
        <table:table-row table:style-name="ro1">
          <table:table-cell office:value-type="float" office:value="547.5009765625">
            <text:p>547.5009765625</text:p>
          </table:table-cell>
          <table:table-cell office:value-type="float" office:value="-0.007552009">
            <text:p>-0.007552009</text:p>
          </table:table-cell>
          <table:table-cell table:number-columns-repeated="4"/>
        </table:table-row>
        <table:table-row table:style-name="ro1">
          <table:table-cell office:value-type="float" office:value="547.61865234375">
            <text:p>547.6186523438</text:p>
          </table:table-cell>
          <table:table-cell office:value-type="float" office:value="0.0008819517">
            <text:p>0.0008819517</text:p>
          </table:table-cell>
          <table:table-cell table:number-columns-repeated="4"/>
        </table:table-row>
        <table:table-row table:style-name="ro1">
          <table:table-cell office:value-type="float" office:value="547.736328125">
            <text:p>547.736328125</text:p>
          </table:table-cell>
          <table:table-cell office:value-type="float" office:value="0.002401754">
            <text:p>0.002401754</text:p>
          </table:table-cell>
          <table:table-cell table:number-columns-repeated="4"/>
        </table:table-row>
        <table:table-row table:style-name="ro1">
          <table:table-cell office:value-type="float" office:value="547.85400390625">
            <text:p>547.8540039063</text:p>
          </table:table-cell>
          <table:table-cell office:value-type="float" office:value="-0.003167809">
            <text:p>-0.003167809</text:p>
          </table:table-cell>
          <table:table-cell table:number-columns-repeated="4"/>
        </table:table-row>
        <table:table-row table:style-name="ro1">
          <table:table-cell office:value-type="float" office:value="547.971740722656">
            <text:p>547.9717407227</text:p>
          </table:table-cell>
          <table:table-cell office:value-type="float" office:value="-0.01124524">
            <text:p>-0.01124524</text:p>
          </table:table-cell>
          <table:table-cell table:number-columns-repeated="4"/>
        </table:table-row>
        <table:table-row table:style-name="ro1">
          <table:table-cell office:value-type="float" office:value="548.089416503906">
            <text:p>548.0894165039</text:p>
          </table:table-cell>
          <table:table-cell office:value-type="float" office:value="-0.007222908">
            <text:p>-0.007222908</text:p>
          </table:table-cell>
          <table:table-cell table:number-columns-repeated="4"/>
        </table:table-row>
        <table:table-row table:style-name="ro1">
          <table:table-cell office:value-type="float" office:value="548.207092285156">
            <text:p>548.2070922852</text:p>
          </table:table-cell>
          <table:table-cell office:value-type="float" office:value="0.007549234">
            <text:p>0.007549234</text:p>
          </table:table-cell>
          <table:table-cell table:number-columns-repeated="4"/>
        </table:table-row>
        <table:table-row table:style-name="ro1">
          <table:table-cell office:value-type="float" office:value="548.324768066406">
            <text:p>548.3247680664</text:p>
          </table:table-cell>
          <table:table-cell office:value-type="float" office:value="-0.008488647">
            <text:p>-0.008488647</text:p>
          </table:table-cell>
          <table:table-cell table:number-columns-repeated="4"/>
        </table:table-row>
        <table:table-row table:style-name="ro1">
          <table:table-cell office:value-type="float" office:value="548.442443847656">
            <text:p>548.4424438477</text:p>
          </table:table-cell>
          <table:table-cell office:value-type="float" office:value="0.001796942">
            <text:p>0.001796942</text:p>
          </table:table-cell>
          <table:table-cell table:number-columns-repeated="4"/>
        </table:table-row>
        <table:table-row table:style-name="ro1">
          <table:table-cell office:value-type="float" office:value="548.560180664063">
            <text:p>548.5601806641</text:p>
          </table:table-cell>
          <table:table-cell office:value-type="float" office:value="-0.002977531">
            <text:p>-0.002977531</text:p>
          </table:table-cell>
          <table:table-cell table:number-columns-repeated="4"/>
        </table:table-row>
        <table:table-row table:style-name="ro1">
          <table:table-cell office:value-type="float" office:value="548.677856445313">
            <text:p>548.6778564453</text:p>
          </table:table-cell>
          <table:table-cell office:value-type="float" office:value="0.006681892">
            <text:p>0.006681892</text:p>
          </table:table-cell>
          <table:table-cell table:number-columns-repeated="4"/>
        </table:table-row>
        <table:table-row table:style-name="ro1">
          <table:table-cell office:value-type="float" office:value="548.795593261719">
            <text:p>548.7955932617</text:p>
          </table:table-cell>
          <table:table-cell office:value-type="float" office:value="-0.004839163">
            <text:p>-0.004839163</text:p>
          </table:table-cell>
          <table:table-cell table:number-columns-repeated="4"/>
        </table:table-row>
        <table:table-row table:style-name="ro1">
          <table:table-cell office:value-type="float" office:value="548.913269042969">
            <text:p>548.913269043</text:p>
          </table:table-cell>
          <table:table-cell office:value-type="float" office:value="-0.005698211">
            <text:p>-0.005698211</text:p>
          </table:table-cell>
          <table:table-cell table:number-columns-repeated="4"/>
        </table:table-row>
        <table:table-row table:style-name="ro1">
          <table:table-cell office:value-type="float" office:value="549.031005859375">
            <text:p>549.0310058594</text:p>
          </table:table-cell>
          <table:table-cell office:value-type="float" office:value="-0.003118099">
            <text:p>-0.003118099</text:p>
          </table:table-cell>
          <table:table-cell table:number-columns-repeated="4"/>
        </table:table-row>
        <table:table-row table:style-name="ro1">
          <table:table-cell office:value-type="float" office:value="549.148681640625">
            <text:p>549.1486816406</text:p>
          </table:table-cell>
          <table:table-cell office:value-type="float" office:value="-0.004741257">
            <text:p>-0.004741257</text:p>
          </table:table-cell>
          <table:table-cell table:number-columns-repeated="4"/>
        </table:table-row>
        <table:table-row table:style-name="ro1">
          <table:table-cell office:value-type="float" office:value="549.266418457031">
            <text:p>549.266418457</text:p>
          </table:table-cell>
          <table:table-cell office:value-type="float" office:value="0.005598371">
            <text:p>0.005598371</text:p>
          </table:table-cell>
          <table:table-cell table:number-columns-repeated="4"/>
        </table:table-row>
        <table:table-row table:style-name="ro1">
          <table:table-cell office:value-type="float" office:value="549.384155273438">
            <text:p>549.3841552734</text:p>
          </table:table-cell>
          <table:table-cell office:value-type="float" office:value="-0.001792623">
            <text:p>-0.001792623</text:p>
          </table:table-cell>
          <table:table-cell table:number-columns-repeated="4"/>
        </table:table-row>
        <table:table-row table:style-name="ro1">
          <table:table-cell office:value-type="float" office:value="549.501831054688">
            <text:p>549.5018310547</text:p>
          </table:table-cell>
          <table:table-cell office:value-type="float" office:value="0.003540542">
            <text:p>0.003540542</text:p>
          </table:table-cell>
          <table:table-cell table:number-columns-repeated="4"/>
        </table:table-row>
        <table:table-row table:style-name="ro1">
          <table:table-cell office:value-type="float" office:value="549.619567871094">
            <text:p>549.6195678711</text:p>
          </table:table-cell>
          <table:table-cell office:value-type="float" office:value="0.01554634">
            <text:p>0.01554634</text:p>
          </table:table-cell>
          <table:table-cell table:number-columns-repeated="4"/>
        </table:table-row>
        <table:table-row table:style-name="ro1">
          <table:table-cell office:value-type="float" office:value="549.7373046875">
            <text:p>549.7373046875</text:p>
          </table:table-cell>
          <table:table-cell office:value-type="float" office:value="0.007280099">
            <text:p>0.007280099</text:p>
          </table:table-cell>
          <table:table-cell table:number-columns-repeated="4"/>
        </table:table-row>
        <table:table-row table:style-name="ro1">
          <table:table-cell office:value-type="float" office:value="549.855041503906">
            <text:p>549.8550415039</text:p>
          </table:table-cell>
          <table:table-cell office:value-type="float" office:value="0.002017298">
            <text:p>0.002017298</text:p>
          </table:table-cell>
          <table:table-cell table:number-columns-repeated="4"/>
        </table:table-row>
        <table:table-row table:style-name="ro1">
          <table:table-cell office:value-type="float" office:value="549.972778320313">
            <text:p>549.9727783203</text:p>
          </table:table-cell>
          <table:table-cell office:value-type="float" office:value="0.007774671">
            <text:p>0.007774671</text:p>
          </table:table-cell>
          <table:table-cell table:number-columns-repeated="4"/>
        </table:table-row>
        <table:table-row table:style-name="ro1">
          <table:table-cell office:value-type="float" office:value="550.090515136719">
            <text:p>550.0905151367</text:p>
          </table:table-cell>
          <table:table-cell office:value-type="float" office:value="-0.01088724">
            <text:p>-0.01088724</text:p>
          </table:table-cell>
          <table:table-cell table:number-columns-repeated="4"/>
        </table:table-row>
        <table:table-row table:style-name="ro1">
          <table:table-cell office:value-type="float" office:value="550.208251953125">
            <text:p>550.2082519531</text:p>
          </table:table-cell>
          <table:table-cell office:value-type="float" office:value="0.001778386">
            <text:p>0.001778386</text:p>
          </table:table-cell>
          <table:table-cell table:number-columns-repeated="4"/>
        </table:table-row>
        <table:table-row table:style-name="ro1">
          <table:table-cell office:value-type="float" office:value="550.325988769531">
            <text:p>550.3259887695</text:p>
          </table:table-cell>
          <table:table-cell office:value-type="float" office:value="-0.00531794">
            <text:p>-0.00531794</text:p>
          </table:table-cell>
          <table:table-cell table:number-columns-repeated="4"/>
        </table:table-row>
        <table:table-row table:style-name="ro1">
          <table:table-cell office:value-type="float" office:value="550.443725585938">
            <text:p>550.4437255859</text:p>
          </table:table-cell>
          <table:table-cell office:value-type="float" office:value="-0.0002314929">
            <text:p>-0.0002314929</text:p>
          </table:table-cell>
          <table:table-cell table:number-columns-repeated="4"/>
        </table:table-row>
        <table:table-row table:style-name="ro1">
          <table:table-cell office:value-type="float" office:value="550.561462402344">
            <text:p>550.5614624023</text:p>
          </table:table-cell>
          <table:table-cell office:value-type="float" office:value="0.009316876">
            <text:p>0.009316876</text:p>
          </table:table-cell>
          <table:table-cell table:number-columns-repeated="4"/>
        </table:table-row>
        <table:table-row table:style-name="ro1">
          <table:table-cell office:value-type="float" office:value="550.679260253906">
            <text:p>550.6792602539</text:p>
          </table:table-cell>
          <table:table-cell office:value-type="float" office:value="0.004422029">
            <text:p>0.004422029</text:p>
          </table:table-cell>
          <table:table-cell table:number-columns-repeated="4"/>
        </table:table-row>
        <table:table-row table:style-name="ro1">
          <table:table-cell office:value-type="float" office:value="550.796997070313">
            <text:p>550.7969970703</text:p>
          </table:table-cell>
          <table:table-cell office:value-type="float" office:value="0.0002150934">
            <text:p>0.0002150934</text:p>
          </table:table-cell>
          <table:table-cell table:number-columns-repeated="4"/>
        </table:table-row>
        <table:table-row table:style-name="ro1">
          <table:table-cell office:value-type="float" office:value="550.914733886719">
            <text:p>550.9147338867</text:p>
          </table:table-cell>
          <table:table-cell office:value-type="float" office:value="0.002958827">
            <text:p>0.002958827</text:p>
          </table:table-cell>
          <table:table-cell table:number-columns-repeated="4"/>
        </table:table-row>
        <table:table-row table:style-name="ro1">
          <table:table-cell office:value-type="float" office:value="551.032531738281">
            <text:p>551.0325317383</text:p>
          </table:table-cell>
          <table:table-cell office:value-type="float" office:value="-0.003431918">
            <text:p>-0.003431918</text:p>
          </table:table-cell>
          <table:table-cell table:number-columns-repeated="4"/>
        </table:table-row>
        <table:table-row table:style-name="ro1">
          <table:table-cell office:value-type="float" office:value="551.150268554688">
            <text:p>551.1502685547</text:p>
          </table:table-cell>
          <table:table-cell office:value-type="float" office:value="0.005440169">
            <text:p>0.005440169</text:p>
          </table:table-cell>
          <table:table-cell table:number-columns-repeated="4"/>
        </table:table-row>
        <table:table-row table:style-name="ro1">
          <table:table-cell office:value-type="float" office:value="551.26806640625">
            <text:p>551.2680664063</text:p>
          </table:table-cell>
          <table:table-cell office:value-type="float" office:value="-0.008170637">
            <text:p>-0.008170637</text:p>
          </table:table-cell>
          <table:table-cell table:number-columns-repeated="4"/>
        </table:table-row>
        <table:table-row table:style-name="ro1">
          <table:table-cell office:value-type="float" office:value="551.385803222656">
            <text:p>551.3858032227</text:p>
          </table:table-cell>
          <table:table-cell office:value-type="float" office:value="0.005202678">
            <text:p>0.005202678</text:p>
          </table:table-cell>
          <table:table-cell table:number-columns-repeated="4"/>
        </table:table-row>
        <table:table-row table:style-name="ro1">
          <table:table-cell office:value-type="float" office:value="551.503601074219">
            <text:p>551.5036010742</text:p>
          </table:table-cell>
          <table:table-cell office:value-type="float" office:value="-0.008633316">
            <text:p>-0.008633316</text:p>
          </table:table-cell>
          <table:table-cell table:number-columns-repeated="4"/>
        </table:table-row>
        <table:table-row table:style-name="ro1">
          <table:table-cell office:value-type="float" office:value="551.621398925781">
            <text:p>551.6213989258</text:p>
          </table:table-cell>
          <table:table-cell office:value-type="float" office:value="0.01488634">
            <text:p>0.01488634</text:p>
          </table:table-cell>
          <table:table-cell table:number-columns-repeated="4"/>
        </table:table-row>
        <table:table-row table:style-name="ro1">
          <table:table-cell office:value-type="float" office:value="551.739135742188">
            <text:p>551.7391357422</text:p>
          </table:table-cell>
          <table:table-cell office:value-type="float" office:value="-0.001497701">
            <text:p>-0.001497701</text:p>
          </table:table-cell>
          <table:table-cell table:number-columns-repeated="4"/>
        </table:table-row>
        <table:table-row table:style-name="ro1">
          <table:table-cell office:value-type="float" office:value="551.85693359375">
            <text:p>551.8569335938</text:p>
          </table:table-cell>
          <table:table-cell office:value-type="float" office:value="-0.005535174">
            <text:p>-0.005535174</text:p>
          </table:table-cell>
          <table:table-cell table:number-columns-repeated="4"/>
        </table:table-row>
        <table:table-row table:style-name="ro1">
          <table:table-cell office:value-type="float" office:value="551.974731445313">
            <text:p>551.9747314453</text:p>
          </table:table-cell>
          <table:table-cell office:value-type="float" office:value="0.004285989">
            <text:p>0.004285989</text:p>
          </table:table-cell>
          <table:table-cell table:number-columns-repeated="4"/>
        </table:table-row>
        <table:table-row table:style-name="ro1">
          <table:table-cell office:value-type="float" office:value="552.092529296875">
            <text:p>552.0925292969</text:p>
          </table:table-cell>
          <table:table-cell office:value-type="float" office:value="-0.005723184">
            <text:p>-0.005723184</text:p>
          </table:table-cell>
          <table:table-cell table:number-columns-repeated="4"/>
        </table:table-row>
        <table:table-row table:style-name="ro1">
          <table:table-cell office:value-type="float" office:value="552.210327148438">
            <text:p>552.2103271484</text:p>
          </table:table-cell>
          <table:table-cell office:value-type="float" office:value="0.01066373">
            <text:p>0.01066373</text:p>
          </table:table-cell>
          <table:table-cell table:number-columns-repeated="4"/>
        </table:table-row>
        <table:table-row table:style-name="ro1">
          <table:table-cell office:value-type="float" office:value="552.328125">
            <text:p>552.328125</text:p>
          </table:table-cell>
          <table:table-cell office:value-type="float" office:value="-0.002226179">
            <text:p>-0.002226179</text:p>
          </table:table-cell>
          <table:table-cell table:number-columns-repeated="4"/>
        </table:table-row>
        <table:table-row table:style-name="ro1">
          <table:table-cell office:value-type="float" office:value="552.445922851563">
            <text:p>552.4459228516</text:p>
          </table:table-cell>
          <table:table-cell office:value-type="float" office:value="0.0006290706">
            <text:p>0.0006290706</text:p>
          </table:table-cell>
          <table:table-cell table:number-columns-repeated="4"/>
        </table:table-row>
        <table:table-row table:style-name="ro1">
          <table:table-cell office:value-type="float" office:value="552.563720703125">
            <text:p>552.5637207031</text:p>
          </table:table-cell>
          <table:table-cell office:value-type="float" office:value="0.01383999">
            <text:p>0.01383999</text:p>
          </table:table-cell>
          <table:table-cell table:number-columns-repeated="4"/>
        </table:table-row>
        <table:table-row table:style-name="ro1">
          <table:table-cell office:value-type="float" office:value="552.681518554688">
            <text:p>552.6815185547</text:p>
          </table:table-cell>
          <table:table-cell office:value-type="float" office:value="-0.002530704">
            <text:p>-0.002530704</text:p>
          </table:table-cell>
          <table:table-cell table:number-columns-repeated="4"/>
        </table:table-row>
        <table:table-row table:style-name="ro1">
          <table:table-cell office:value-type="float" office:value="552.79931640625">
            <text:p>552.7993164063</text:p>
          </table:table-cell>
          <table:table-cell office:value-type="float" office:value="-0.002290832">
            <text:p>-0.002290832</text:p>
          </table:table-cell>
          <table:table-cell table:number-columns-repeated="4"/>
        </table:table-row>
        <table:table-row table:style-name="ro1">
          <table:table-cell office:value-type="float" office:value="552.917114257813">
            <text:p>552.9171142578</text:p>
          </table:table-cell>
          <table:table-cell office:value-type="float" office:value="-0.004084717">
            <text:p>-0.004084717</text:p>
          </table:table-cell>
          <table:table-cell table:number-columns-repeated="4"/>
        </table:table-row>
        <table:table-row table:style-name="ro1">
          <table:table-cell office:value-type="float" office:value="553.034973144531">
            <text:p>553.0349731445</text:p>
          </table:table-cell>
          <table:table-cell office:value-type="float" office:value="-0.002142464">
            <text:p>-0.002142464</text:p>
          </table:table-cell>
          <table:table-cell table:number-columns-repeated="4"/>
        </table:table-row>
        <table:table-row table:style-name="ro1">
          <table:table-cell office:value-type="float" office:value="553.152770996094">
            <text:p>553.1527709961</text:p>
          </table:table-cell>
          <table:table-cell office:value-type="float" office:value="0.003275666">
            <text:p>0.003275666</text:p>
          </table:table-cell>
          <table:table-cell table:number-columns-repeated="4"/>
        </table:table-row>
        <table:table-row table:style-name="ro1">
          <table:table-cell office:value-type="float" office:value="553.270568847656">
            <text:p>553.2705688477</text:p>
          </table:table-cell>
          <table:table-cell office:value-type="float" office:value="0.01959667">
            <text:p>0.01959667</text:p>
          </table:table-cell>
          <table:table-cell table:number-columns-repeated="4"/>
        </table:table-row>
        <table:table-row table:style-name="ro1">
          <table:table-cell office:value-type="float" office:value="553.388427734375">
            <text:p>553.3884277344</text:p>
          </table:table-cell>
          <table:table-cell office:value-type="float" office:value="-0.006883956">
            <text:p>-0.006883956</text:p>
          </table:table-cell>
          <table:table-cell table:number-columns-repeated="4"/>
        </table:table-row>
        <table:table-row table:style-name="ro1">
          <table:table-cell office:value-type="float" office:value="553.506225585938">
            <text:p>553.5062255859</text:p>
          </table:table-cell>
          <table:table-cell office:value-type="float" office:value="0.01235186">
            <text:p>0.01235186</text:p>
          </table:table-cell>
          <table:table-cell table:number-columns-repeated="4"/>
        </table:table-row>
        <table:table-row table:style-name="ro1">
          <table:table-cell office:value-type="float" office:value="553.624084472656">
            <text:p>553.6240844727</text:p>
          </table:table-cell>
          <table:table-cell office:value-type="float" office:value="0.001925376">
            <text:p>0.001925376</text:p>
          </table:table-cell>
          <table:table-cell table:number-columns-repeated="4"/>
        </table:table-row>
        <table:table-row table:style-name="ro1">
          <table:table-cell office:value-type="float" office:value="553.741882324219">
            <text:p>553.7418823242</text:p>
          </table:table-cell>
          <table:table-cell office:value-type="float" office:value="-0.001866559">
            <text:p>-0.001866559</text:p>
          </table:table-cell>
          <table:table-cell table:number-columns-repeated="4"/>
        </table:table-row>
        <table:table-row table:style-name="ro1">
          <table:table-cell office:value-type="float" office:value="553.859741210938">
            <text:p>553.8597412109</text:p>
          </table:table-cell>
          <table:table-cell office:value-type="float" office:value="-0.01007308">
            <text:p>-0.01007308</text:p>
          </table:table-cell>
          <table:table-cell table:number-columns-repeated="4"/>
        </table:table-row>
        <table:table-row table:style-name="ro1">
          <table:table-cell office:value-type="float" office:value="553.977600097656">
            <text:p>553.9776000977</text:p>
          </table:table-cell>
          <table:table-cell office:value-type="float" office:value="0.001340108">
            <text:p>0.001340108</text:p>
          </table:table-cell>
          <table:table-cell table:number-columns-repeated="4"/>
        </table:table-row>
        <table:table-row table:style-name="ro1">
          <table:table-cell office:value-type="float" office:value="554.095458984375">
            <text:p>554.0954589844</text:p>
          </table:table-cell>
          <table:table-cell office:value-type="float" office:value="-0.003014279">
            <text:p>-0.003014279</text:p>
          </table:table-cell>
          <table:table-cell table:number-columns-repeated="4"/>
        </table:table-row>
        <table:table-row table:style-name="ro1">
          <table:table-cell office:value-type="float" office:value="554.213256835938">
            <text:p>554.2132568359</text:p>
          </table:table-cell>
          <table:table-cell office:value-type="float" office:value="0.01888015">
            <text:p>0.01888015</text:p>
          </table:table-cell>
          <table:table-cell table:number-columns-repeated="4"/>
        </table:table-row>
        <table:table-row table:style-name="ro1">
          <table:table-cell office:value-type="float" office:value="554.331115722656">
            <text:p>554.3311157227</text:p>
          </table:table-cell>
          <table:table-cell office:value-type="float" office:value="0.002197372">
            <text:p>0.002197372</text:p>
          </table:table-cell>
          <table:table-cell table:number-columns-repeated="4"/>
        </table:table-row>
        <table:table-row table:style-name="ro1">
          <table:table-cell office:value-type="float" office:value="554.448974609375">
            <text:p>554.4489746094</text:p>
          </table:table-cell>
          <table:table-cell office:value-type="float" office:value="0.000394272">
            <text:p>0.000394272</text:p>
          </table:table-cell>
          <table:table-cell table:number-columns-repeated="4"/>
        </table:table-row>
        <table:table-row table:style-name="ro1">
          <table:table-cell office:value-type="float" office:value="554.566833496094">
            <text:p>554.5668334961</text:p>
          </table:table-cell>
          <table:table-cell office:value-type="float" office:value="0.0006685885">
            <text:p>0.0006685885</text:p>
          </table:table-cell>
          <table:table-cell table:number-columns-repeated="4"/>
        </table:table-row>
        <table:table-row table:style-name="ro1">
          <table:table-cell office:value-type="float" office:value="554.684692382813">
            <text:p>554.6846923828</text:p>
          </table:table-cell>
          <table:table-cell office:value-type="float" office:value="-0.005088398">
            <text:p>-0.005088398</text:p>
          </table:table-cell>
          <table:table-cell table:number-columns-repeated="4"/>
        </table:table-row>
        <table:table-row table:style-name="ro1">
          <table:table-cell office:value-type="float" office:value="554.802551269531">
            <text:p>554.8025512695</text:p>
          </table:table-cell>
          <table:table-cell office:value-type="float" office:value="-0.004077252">
            <text:p>-0.004077252</text:p>
          </table:table-cell>
          <table:table-cell table:number-columns-repeated="4"/>
        </table:table-row>
        <table:table-row table:style-name="ro1">
          <table:table-cell office:value-type="float" office:value="554.92041015625">
            <text:p>554.9204101563</text:p>
          </table:table-cell>
          <table:table-cell office:value-type="float" office:value="-0.007125426">
            <text:p>-0.007125426</text:p>
          </table:table-cell>
          <table:table-cell table:number-columns-repeated="4"/>
        </table:table-row>
        <table:table-row table:style-name="ro1">
          <table:table-cell office:value-type="float" office:value="555.038269042969">
            <text:p>555.038269043</text:p>
          </table:table-cell>
          <table:table-cell office:value-type="float" office:value="-0.0008198204">
            <text:p>-0.0008198204</text:p>
          </table:table-cell>
          <table:table-cell table:number-columns-repeated="4"/>
        </table:table-row>
        <table:table-row table:style-name="ro1">
          <table:table-cell office:value-type="float" office:value="555.156127929688">
            <text:p>555.1561279297</text:p>
          </table:table-cell>
          <table:table-cell office:value-type="float" office:value="-0.001799461">
            <text:p>-0.001799461</text:p>
          </table:table-cell>
          <table:table-cell table:number-columns-repeated="4"/>
        </table:table-row>
        <table:table-row table:style-name="ro1">
          <table:table-cell office:value-type="float" office:value="555.274047851563">
            <text:p>555.2740478516</text:p>
          </table:table-cell>
          <table:table-cell office:value-type="float" office:value="0.0001421804">
            <text:p>0.0001421804</text:p>
          </table:table-cell>
          <table:table-cell table:number-columns-repeated="4"/>
        </table:table-row>
        <table:table-row table:style-name="ro1">
          <table:table-cell office:value-type="float" office:value="555.391906738281">
            <text:p>555.3919067383</text:p>
          </table:table-cell>
          <table:table-cell office:value-type="float" office:value="0.002574085">
            <text:p>0.002574085</text:p>
          </table:table-cell>
          <table:table-cell table:number-columns-repeated="4"/>
        </table:table-row>
        <table:table-row table:style-name="ro1">
          <table:table-cell office:value-type="float" office:value="555.509765625">
            <text:p>555.509765625</text:p>
          </table:table-cell>
          <table:table-cell office:value-type="float" office:value="0.001295816">
            <text:p>0.001295816</text:p>
          </table:table-cell>
          <table:table-cell table:number-columns-repeated="4"/>
        </table:table-row>
        <table:table-row table:style-name="ro1">
          <table:table-cell office:value-type="float" office:value="555.627685546875">
            <text:p>555.6276855469</text:p>
          </table:table-cell>
          <table:table-cell office:value-type="float" office:value="0.008444927">
            <text:p>0.008444927</text:p>
          </table:table-cell>
          <table:table-cell table:number-columns-repeated="4"/>
        </table:table-row>
        <table:table-row table:style-name="ro1">
          <table:table-cell office:value-type="float" office:value="555.745544433594">
            <text:p>555.7455444336</text:p>
          </table:table-cell>
          <table:table-cell office:value-type="float" office:value="0.005481919">
            <text:p>0.005481919</text:p>
          </table:table-cell>
          <table:table-cell table:number-columns-repeated="4"/>
        </table:table-row>
        <table:table-row table:style-name="ro1">
          <table:table-cell office:value-type="float" office:value="555.863403320313">
            <text:p>555.8634033203</text:p>
          </table:table-cell>
          <table:table-cell office:value-type="float" office:value="-0.004883912">
            <text:p>-0.004883912</text:p>
          </table:table-cell>
          <table:table-cell table:number-columns-repeated="4"/>
        </table:table-row>
        <table:table-row table:style-name="ro1">
          <table:table-cell office:value-type="float" office:value="555.981323242188">
            <text:p>555.9813232422</text:p>
          </table:table-cell>
          <table:table-cell office:value-type="float" office:value="0.003018574">
            <text:p>0.003018574</text:p>
          </table:table-cell>
          <table:table-cell table:number-columns-repeated="4"/>
        </table:table-row>
        <table:table-row table:style-name="ro1">
          <table:table-cell office:value-type="float" office:value="556.099243164063">
            <text:p>556.0992431641</text:p>
          </table:table-cell>
          <table:table-cell office:value-type="float" office:value="-0.002824267">
            <text:p>-0.002824267</text:p>
          </table:table-cell>
          <table:table-cell table:number-columns-repeated="4"/>
        </table:table-row>
        <table:table-row table:style-name="ro1">
          <table:table-cell office:value-type="float" office:value="556.217102050781">
            <text:p>556.2171020508</text:p>
          </table:table-cell>
          <table:table-cell office:value-type="float" office:value="0.01067908">
            <text:p>0.01067908</text:p>
          </table:table-cell>
          <table:table-cell table:number-columns-repeated="4"/>
        </table:table-row>
        <table:table-row table:style-name="ro1">
          <table:table-cell office:value-type="float" office:value="556.335021972656">
            <text:p>556.3350219727</text:p>
          </table:table-cell>
          <table:table-cell office:value-type="float" office:value="0.01152096">
            <text:p>0.01152096</text:p>
          </table:table-cell>
          <table:table-cell table:number-columns-repeated="4"/>
        </table:table-row>
        <table:table-row table:style-name="ro1">
          <table:table-cell office:value-type="float" office:value="556.452941894531">
            <text:p>556.4529418945</text:p>
          </table:table-cell>
          <table:table-cell office:value-type="float" office:value="0.003939092">
            <text:p>0.003939092</text:p>
          </table:table-cell>
          <table:table-cell table:number-columns-repeated="4"/>
        </table:table-row>
        <table:table-row table:style-name="ro1">
          <table:table-cell office:value-type="float" office:value="556.57080078125">
            <text:p>556.5708007813</text:p>
          </table:table-cell>
          <table:table-cell office:value-type="float" office:value="0.002906348">
            <text:p>0.002906348</text:p>
          </table:table-cell>
          <table:table-cell table:number-columns-repeated="4"/>
        </table:table-row>
        <table:table-row table:style-name="ro1">
          <table:table-cell office:value-type="float" office:value="556.688720703125">
            <text:p>556.6887207031</text:p>
          </table:table-cell>
          <table:table-cell office:value-type="float" office:value="0.001628962">
            <text:p>0.001628962</text:p>
          </table:table-cell>
          <table:table-cell table:number-columns-repeated="4"/>
        </table:table-row>
        <table:table-row table:style-name="ro1">
          <table:table-cell office:value-type="float" office:value="556.806640625">
            <text:p>556.806640625</text:p>
          </table:table-cell>
          <table:table-cell office:value-type="float" office:value="0.0002262988">
            <text:p>0.0002262988</text:p>
          </table:table-cell>
          <table:table-cell table:number-columns-repeated="4"/>
        </table:table-row>
        <table:table-row table:style-name="ro1">
          <table:table-cell office:value-type="float" office:value="556.924560546875">
            <text:p>556.9245605469</text:p>
          </table:table-cell>
          <table:table-cell office:value-type="float" office:value="0.006628902">
            <text:p>0.006628902</text:p>
          </table:table-cell>
          <table:table-cell table:number-columns-repeated="4"/>
        </table:table-row>
        <table:table-row table:style-name="ro1">
          <table:table-cell office:value-type="float" office:value="557.04248046875">
            <text:p>557.0424804688</text:p>
          </table:table-cell>
          <table:table-cell office:value-type="float" office:value="0.001079783">
            <text:p>0.001079783</text:p>
          </table:table-cell>
          <table:table-cell table:number-columns-repeated="4"/>
        </table:table-row>
        <table:table-row table:style-name="ro1">
          <table:table-cell office:value-type="float" office:value="557.160400390625">
            <text:p>557.1604003906</text:p>
          </table:table-cell>
          <table:table-cell office:value-type="float" office:value="-0.004976039">
            <text:p>-0.004976039</text:p>
          </table:table-cell>
          <table:table-cell table:number-columns-repeated="4"/>
        </table:table-row>
        <table:table-row table:style-name="ro1">
          <table:table-cell office:value-type="float" office:value="557.2783203125">
            <text:p>557.2783203125</text:p>
          </table:table-cell>
          <table:table-cell office:value-type="float" office:value="0.01643455">
            <text:p>0.01643455</text:p>
          </table:table-cell>
          <table:table-cell table:number-columns-repeated="4"/>
        </table:table-row>
        <table:table-row table:style-name="ro1">
          <table:table-cell office:value-type="float" office:value="557.396240234375">
            <text:p>557.3962402344</text:p>
          </table:table-cell>
          <table:table-cell office:value-type="float" office:value="0.001098388">
            <text:p>0.001098388</text:p>
          </table:table-cell>
          <table:table-cell table:number-columns-repeated="4"/>
        </table:table-row>
        <table:table-row table:style-name="ro1">
          <table:table-cell office:value-type="float" office:value="557.51416015625">
            <text:p>557.5141601563</text:p>
          </table:table-cell>
          <table:table-cell office:value-type="float" office:value="-0.008583892">
            <text:p>-0.008583892</text:p>
          </table:table-cell>
          <table:table-cell table:number-columns-repeated="4"/>
        </table:table-row>
        <table:table-row table:style-name="ro1">
          <table:table-cell office:value-type="float" office:value="557.632141113281">
            <text:p>557.6321411133</text:p>
          </table:table-cell>
          <table:table-cell office:value-type="float" office:value="0.002606335">
            <text:p>0.002606335</text:p>
          </table:table-cell>
          <table:table-cell table:number-columns-repeated="4"/>
        </table:table-row>
        <table:table-row table:style-name="ro1">
          <table:table-cell office:value-type="float" office:value="557.750061035156">
            <text:p>557.7500610352</text:p>
          </table:table-cell>
          <table:table-cell office:value-type="float" office:value="-0.0009950175">
            <text:p>-0.0009950175</text:p>
          </table:table-cell>
          <table:table-cell table:number-columns-repeated="4"/>
        </table:table-row>
        <table:table-row table:style-name="ro1">
          <table:table-cell office:value-type="float" office:value="557.867980957031">
            <text:p>557.867980957</text:p>
          </table:table-cell>
          <table:table-cell office:value-type="float" office:value="0.003103248">
            <text:p>0.003103248</text:p>
          </table:table-cell>
          <table:table-cell table:number-columns-repeated="4"/>
        </table:table-row>
        <table:table-row table:style-name="ro1">
          <table:table-cell office:value-type="float" office:value="557.985961914063">
            <text:p>557.9859619141</text:p>
          </table:table-cell>
          <table:table-cell office:value-type="float" office:value="-0.009531598">
            <text:p>-0.009531598</text:p>
          </table:table-cell>
          <table:table-cell table:number-columns-repeated="4"/>
        </table:table-row>
        <table:table-row table:style-name="ro1">
          <table:table-cell office:value-type="float" office:value="558.103881835938">
            <text:p>558.1038818359</text:p>
          </table:table-cell>
          <table:table-cell office:value-type="float" office:value="-0.006736774">
            <text:p>-0.006736774</text:p>
          </table:table-cell>
          <table:table-cell table:number-columns-repeated="4"/>
        </table:table-row>
        <table:table-row table:style-name="ro1">
          <table:table-cell office:value-type="float" office:value="558.221801757813">
            <text:p>558.2218017578</text:p>
          </table:table-cell>
          <table:table-cell office:value-type="float" office:value="-0.00242148">
            <text:p>-0.00242148</text:p>
          </table:table-cell>
          <table:table-cell table:number-columns-repeated="4"/>
        </table:table-row>
        <table:table-row table:style-name="ro1">
          <table:table-cell office:value-type="float" office:value="558.339782714844">
            <text:p>558.3397827148</text:p>
          </table:table-cell>
          <table:table-cell office:value-type="float" office:value="0.008962624">
            <text:p>0.008962624</text:p>
          </table:table-cell>
          <table:table-cell table:number-columns-repeated="4"/>
        </table:table-row>
        <table:table-row table:style-name="ro1">
          <table:table-cell office:value-type="float" office:value="558.457702636719">
            <text:p>558.4577026367</text:p>
          </table:table-cell>
          <table:table-cell office:value-type="float" office:value="-0.003061778">
            <text:p>-0.003061778</text:p>
          </table:table-cell>
          <table:table-cell table:number-columns-repeated="4"/>
        </table:table-row>
        <table:table-row table:style-name="ro1">
          <table:table-cell office:value-type="float" office:value="558.57568359375">
            <text:p>558.5756835938</text:p>
          </table:table-cell>
          <table:table-cell office:value-type="float" office:value="0.001395035">
            <text:p>0.001395035</text:p>
          </table:table-cell>
          <table:table-cell table:number-columns-repeated="4"/>
        </table:table-row>
        <table:table-row table:style-name="ro1">
          <table:table-cell office:value-type="float" office:value="558.693664550781">
            <text:p>558.6936645508</text:p>
          </table:table-cell>
          <table:table-cell office:value-type="float" office:value="0.005582398">
            <text:p>0.005582398</text:p>
          </table:table-cell>
          <table:table-cell table:number-columns-repeated="4"/>
        </table:table-row>
        <table:table-row table:style-name="ro1">
          <table:table-cell office:value-type="float" office:value="558.811584472656">
            <text:p>558.8115844727</text:p>
          </table:table-cell>
          <table:table-cell office:value-type="float" office:value="0.007955747">
            <text:p>0.007955747</text:p>
          </table:table-cell>
          <table:table-cell table:number-columns-repeated="4"/>
        </table:table-row>
        <table:table-row table:style-name="ro1">
          <table:table-cell office:value-type="float" office:value="558.929565429688">
            <text:p>558.9295654297</text:p>
          </table:table-cell>
          <table:table-cell office:value-type="float" office:value="-0.003332066">
            <text:p>-0.003332066</text:p>
          </table:table-cell>
          <table:table-cell table:number-columns-repeated="4"/>
        </table:table-row>
        <table:table-row table:style-name="ro1">
          <table:table-cell office:value-type="float" office:value="559.047546386719">
            <text:p>559.0475463867</text:p>
          </table:table-cell>
          <table:table-cell office:value-type="float" office:value="0.003718572">
            <text:p>0.003718572</text:p>
          </table:table-cell>
          <table:table-cell table:number-columns-repeated="4"/>
        </table:table-row>
        <table:table-row table:style-name="ro1">
          <table:table-cell office:value-type="float" office:value="559.16552734375">
            <text:p>559.1655273438</text:p>
          </table:table-cell>
          <table:table-cell office:value-type="float" office:value="0.002298791">
            <text:p>0.002298791</text:p>
          </table:table-cell>
          <table:table-cell table:number-columns-repeated="4"/>
        </table:table-row>
        <table:table-row table:style-name="ro1">
          <table:table-cell office:value-type="float" office:value="559.283508300781">
            <text:p>559.2835083008</text:p>
          </table:table-cell>
          <table:table-cell office:value-type="float" office:value="0.0005392443">
            <text:p>0.0005392443</text:p>
          </table:table-cell>
          <table:table-cell table:number-columns-repeated="4"/>
        </table:table-row>
        <table:table-row table:style-name="ro1">
          <table:table-cell office:value-type="float" office:value="559.401489257813">
            <text:p>559.4014892578</text:p>
          </table:table-cell>
          <table:table-cell office:value-type="float" office:value="0.007271282">
            <text:p>0.007271282</text:p>
          </table:table-cell>
          <table:table-cell table:number-columns-repeated="4"/>
        </table:table-row>
        <table:table-row table:style-name="ro1">
          <table:table-cell office:value-type="float" office:value="559.519470214844">
            <text:p>559.5194702148</text:p>
          </table:table-cell>
          <table:table-cell office:value-type="float" office:value="-0.009097866">
            <text:p>-0.009097866</text:p>
          </table:table-cell>
          <table:table-cell table:number-columns-repeated="4"/>
        </table:table-row>
        <table:table-row table:style-name="ro1">
          <table:table-cell office:value-type="float" office:value="559.637451171875">
            <text:p>559.6374511719</text:p>
          </table:table-cell>
          <table:table-cell office:value-type="float" office:value="0.003646609">
            <text:p>0.003646609</text:p>
          </table:table-cell>
          <table:table-cell table:number-columns-repeated="4"/>
        </table:table-row>
        <table:table-row table:style-name="ro1">
          <table:table-cell office:value-type="float" office:value="559.755432128906">
            <text:p>559.7554321289</text:p>
          </table:table-cell>
          <table:table-cell office:value-type="float" office:value="0.009698554">
            <text:p>0.009698554</text:p>
          </table:table-cell>
          <table:table-cell table:number-columns-repeated="4"/>
        </table:table-row>
        <table:table-row table:style-name="ro1">
          <table:table-cell office:value-type="float" office:value="559.873413085938">
            <text:p>559.8734130859</text:p>
          </table:table-cell>
          <table:table-cell office:value-type="float" office:value="-0.0008771151">
            <text:p>-0.0008771151</text:p>
          </table:table-cell>
          <table:table-cell table:number-columns-repeated="4"/>
        </table:table-row>
        <table:table-row table:style-name="ro1">
          <table:table-cell office:value-type="float" office:value="559.991394042969">
            <text:p>559.991394043</text:p>
          </table:table-cell>
          <table:table-cell office:value-type="float" office:value="0.004332649">
            <text:p>0.004332649</text:p>
          </table:table-cell>
          <table:table-cell table:number-columns-repeated="4"/>
        </table:table-row>
        <table:table-row table:style-name="ro1">
          <table:table-cell office:value-type="float" office:value="560.109375">
            <text:p>560.109375</text:p>
          </table:table-cell>
          <table:table-cell office:value-type="float" office:value="0.007356243">
            <text:p>0.007356243</text:p>
          </table:table-cell>
          <table:table-cell table:number-columns-repeated="4"/>
        </table:table-row>
        <table:table-row table:style-name="ro1">
          <table:table-cell office:value-type="float" office:value="560.227416992188">
            <text:p>560.2274169922</text:p>
          </table:table-cell>
          <table:table-cell office:value-type="float" office:value="0.0006489306">
            <text:p>0.0006489306</text:p>
          </table:table-cell>
          <table:table-cell table:number-columns-repeated="4"/>
        </table:table-row>
        <table:table-row table:style-name="ro1">
          <table:table-cell office:value-type="float" office:value="560.345397949219">
            <text:p>560.3453979492</text:p>
          </table:table-cell>
          <table:table-cell office:value-type="float" office:value="-0.005533678">
            <text:p>-0.005533678</text:p>
          </table:table-cell>
          <table:table-cell table:number-columns-repeated="4"/>
        </table:table-row>
        <table:table-row table:style-name="ro1">
          <table:table-cell office:value-type="float" office:value="560.46337890625">
            <text:p>560.4633789063</text:p>
          </table:table-cell>
          <table:table-cell office:value-type="float" office:value="0.007461363">
            <text:p>0.007461363</text:p>
          </table:table-cell>
          <table:table-cell table:number-columns-repeated="4"/>
        </table:table-row>
        <table:table-row table:style-name="ro1">
          <table:table-cell office:value-type="float" office:value="560.581420898438">
            <text:p>560.5814208984</text:p>
          </table:table-cell>
          <table:table-cell office:value-type="float" office:value="0.02694477">
            <text:p>0.02694477</text:p>
          </table:table-cell>
          <table:table-cell table:number-columns-repeated="4"/>
        </table:table-row>
        <table:table-row table:style-name="ro1">
          <table:table-cell office:value-type="float" office:value="560.699401855469">
            <text:p>560.6994018555</text:p>
          </table:table-cell>
          <table:table-cell office:value-type="float" office:value="-0.004820873">
            <text:p>-0.004820873</text:p>
          </table:table-cell>
          <table:table-cell table:number-columns-repeated="4"/>
        </table:table-row>
        <table:table-row table:style-name="ro1">
          <table:table-cell office:value-type="float" office:value="560.817443847656">
            <text:p>560.8174438477</text:p>
          </table:table-cell>
          <table:table-cell office:value-type="float" office:value="-0.003399227">
            <text:p>-0.003399227</text:p>
          </table:table-cell>
          <table:table-cell table:number-columns-repeated="4"/>
        </table:table-row>
        <table:table-row table:style-name="ro1">
          <table:table-cell office:value-type="float" office:value="560.935424804688">
            <text:p>560.9354248047</text:p>
          </table:table-cell>
          <table:table-cell office:value-type="float" office:value="0.007864164">
            <text:p>0.007864164</text:p>
          </table:table-cell>
          <table:table-cell table:number-columns-repeated="4"/>
        </table:table-row>
        <table:table-row table:style-name="ro1">
          <table:table-cell office:value-type="float" office:value="561.053466796875">
            <text:p>561.0534667969</text:p>
          </table:table-cell>
          <table:table-cell office:value-type="float" office:value="0.001105797">
            <text:p>0.001105797</text:p>
          </table:table-cell>
          <table:table-cell table:number-columns-repeated="4"/>
        </table:table-row>
        <table:table-row table:style-name="ro1">
          <table:table-cell office:value-type="float" office:value="561.171508789063">
            <text:p>561.1715087891</text:p>
          </table:table-cell>
          <table:table-cell office:value-type="float" office:value="-0.00202399">
            <text:p>-0.00202399</text:p>
          </table:table-cell>
          <table:table-cell table:number-columns-repeated="4"/>
        </table:table-row>
        <table:table-row table:style-name="ro1">
          <table:table-cell office:value-type="float" office:value="561.289489746094">
            <text:p>561.2894897461</text:p>
          </table:table-cell>
          <table:table-cell office:value-type="float" office:value="0.008683967">
            <text:p>0.008683967</text:p>
          </table:table-cell>
          <table:table-cell table:number-columns-repeated="4"/>
        </table:table-row>
        <table:table-row table:style-name="ro1">
          <table:table-cell office:value-type="float" office:value="561.407531738281">
            <text:p>561.4075317383</text:p>
          </table:table-cell>
          <table:table-cell office:value-type="float" office:value="-0.0003229837">
            <text:p>-0.0003229837</text:p>
          </table:table-cell>
          <table:table-cell table:number-columns-repeated="4"/>
        </table:table-row>
        <table:table-row table:style-name="ro1">
          <table:table-cell office:value-type="float" office:value="561.525573730469">
            <text:p>561.5255737305</text:p>
          </table:table-cell>
          <table:table-cell office:value-type="float" office:value="0.01483421">
            <text:p>0.01483421</text:p>
          </table:table-cell>
          <table:table-cell table:number-columns-repeated="4"/>
        </table:table-row>
        <table:table-row table:style-name="ro1">
          <table:table-cell office:value-type="float" office:value="561.643615722656">
            <text:p>561.6436157227</text:p>
          </table:table-cell>
          <table:table-cell office:value-type="float" office:value="-0.002155563">
            <text:p>-0.002155563</text:p>
          </table:table-cell>
          <table:table-cell table:number-columns-repeated="4"/>
        </table:table-row>
        <table:table-row table:style-name="ro1">
          <table:table-cell office:value-type="float" office:value="561.761657714844">
            <text:p>561.7616577148</text:p>
          </table:table-cell>
          <table:table-cell office:value-type="float" office:value="-0.006232536">
            <text:p>-0.006232536</text:p>
          </table:table-cell>
          <table:table-cell table:number-columns-repeated="4"/>
        </table:table-row>
        <table:table-row table:style-name="ro1">
          <table:table-cell office:value-type="float" office:value="561.879699707031">
            <text:p>561.879699707</text:p>
          </table:table-cell>
          <table:table-cell office:value-type="float" office:value="0.01166998">
            <text:p>0.01166998</text:p>
          </table:table-cell>
          <table:table-cell table:number-columns-repeated="4"/>
        </table:table-row>
        <table:table-row table:style-name="ro1">
          <table:table-cell office:value-type="float" office:value="561.997741699219">
            <text:p>561.9977416992</text:p>
          </table:table-cell>
          <table:table-cell office:value-type="float" office:value="0.02022015">
            <text:p>0.02022015</text:p>
          </table:table-cell>
          <table:table-cell table:number-columns-repeated="4"/>
        </table:table-row>
        <table:table-row table:style-name="ro1">
          <table:table-cell office:value-type="float" office:value="562.115783691406">
            <text:p>562.1157836914</text:p>
          </table:table-cell>
          <table:table-cell office:value-type="float" office:value="-0.002877204">
            <text:p>-0.002877204</text:p>
          </table:table-cell>
          <table:table-cell table:number-columns-repeated="4"/>
        </table:table-row>
        <table:table-row table:style-name="ro1">
          <table:table-cell office:value-type="float" office:value="562.233825683594">
            <text:p>562.2338256836</text:p>
          </table:table-cell>
          <table:table-cell office:value-type="float" office:value="0.01163947">
            <text:p>0.01163947</text:p>
          </table:table-cell>
          <table:table-cell table:number-columns-repeated="4"/>
        </table:table-row>
        <table:table-row table:style-name="ro1">
          <table:table-cell office:value-type="float" office:value="562.351867675781">
            <text:p>562.3518676758</text:p>
          </table:table-cell>
          <table:table-cell office:value-type="float" office:value="0.007689091">
            <text:p>0.007689091</text:p>
          </table:table-cell>
          <table:table-cell table:number-columns-repeated="4"/>
        </table:table-row>
        <table:table-row table:style-name="ro1">
          <table:table-cell office:value-type="float" office:value="562.469909667969">
            <text:p>562.469909668</text:p>
          </table:table-cell>
          <table:table-cell office:value-type="float" office:value="0.006772597">
            <text:p>0.006772597</text:p>
          </table:table-cell>
          <table:table-cell table:number-columns-repeated="4"/>
        </table:table-row>
        <table:table-row table:style-name="ro1">
          <table:table-cell office:value-type="float" office:value="562.588012695313">
            <text:p>562.5880126953</text:p>
          </table:table-cell>
          <table:table-cell office:value-type="float" office:value="0.005189736">
            <text:p>0.005189736</text:p>
          </table:table-cell>
          <table:table-cell table:number-columns-repeated="4"/>
        </table:table-row>
        <table:table-row table:style-name="ro1">
          <table:table-cell office:value-type="float" office:value="562.7060546875">
            <text:p>562.7060546875</text:p>
          </table:table-cell>
          <table:table-cell office:value-type="float" office:value="-0.006585458">
            <text:p>-0.006585458</text:p>
          </table:table-cell>
          <table:table-cell table:number-columns-repeated="4"/>
        </table:table-row>
        <table:table-row table:style-name="ro1">
          <table:table-cell office:value-type="float" office:value="562.824096679688">
            <text:p>562.8240966797</text:p>
          </table:table-cell>
          <table:table-cell office:value-type="float" office:value="-0.002730421">
            <text:p>-0.002730421</text:p>
          </table:table-cell>
          <table:table-cell table:number-columns-repeated="4"/>
        </table:table-row>
        <table:table-row table:style-name="ro1">
          <table:table-cell office:value-type="float" office:value="562.942199707031">
            <text:p>562.942199707</text:p>
          </table:table-cell>
          <table:table-cell office:value-type="float" office:value="-0.003033905">
            <text:p>-0.003033905</text:p>
          </table:table-cell>
          <table:table-cell table:number-columns-repeated="4"/>
        </table:table-row>
        <table:table-row table:style-name="ro1">
          <table:table-cell office:value-type="float" office:value="563.060241699219">
            <text:p>563.0602416992</text:p>
          </table:table-cell>
          <table:table-cell office:value-type="float" office:value="0.006079706">
            <text:p>0.006079706</text:p>
          </table:table-cell>
          <table:table-cell table:number-columns-repeated="4"/>
        </table:table-row>
        <table:table-row table:style-name="ro1">
          <table:table-cell office:value-type="float" office:value="563.178344726563">
            <text:p>563.1783447266</text:p>
          </table:table-cell>
          <table:table-cell office:value-type="float" office:value="0.01721143">
            <text:p>0.01721143</text:p>
          </table:table-cell>
          <table:table-cell table:number-columns-repeated="4"/>
        </table:table-row>
        <table:table-row table:style-name="ro1">
          <table:table-cell office:value-type="float" office:value="563.29638671875">
            <text:p>563.2963867188</text:p>
          </table:table-cell>
          <table:table-cell office:value-type="float" office:value="-0.003029573">
            <text:p>-0.003029573</text:p>
          </table:table-cell>
          <table:table-cell table:number-columns-repeated="4"/>
        </table:table-row>
        <table:table-row table:style-name="ro1">
          <table:table-cell office:value-type="float" office:value="563.414489746094">
            <text:p>563.4144897461</text:p>
          </table:table-cell>
          <table:table-cell office:value-type="float" office:value="0.007644945">
            <text:p>0.007644945</text:p>
          </table:table-cell>
          <table:table-cell table:number-columns-repeated="4"/>
        </table:table-row>
        <table:table-row table:style-name="ro1">
          <table:table-cell office:value-type="float" office:value="563.532531738281">
            <text:p>563.5325317383</text:p>
          </table:table-cell>
          <table:table-cell office:value-type="float" office:value="0.01806094">
            <text:p>0.01806094</text:p>
          </table:table-cell>
          <table:table-cell table:number-columns-repeated="4"/>
        </table:table-row>
        <table:table-row table:style-name="ro1">
          <table:table-cell office:value-type="float" office:value="563.650634765625">
            <text:p>563.6506347656</text:p>
          </table:table-cell>
          <table:table-cell office:value-type="float" office:value="-0.001774533">
            <text:p>-0.001774533</text:p>
          </table:table-cell>
          <table:table-cell table:number-columns-repeated="4"/>
        </table:table-row>
        <table:table-row table:style-name="ro1">
          <table:table-cell office:value-type="float" office:value="563.768737792969">
            <text:p>563.768737793</text:p>
          </table:table-cell>
          <table:table-cell office:value-type="float" office:value="-0.001476011">
            <text:p>-0.001476011</text:p>
          </table:table-cell>
          <table:table-cell table:number-columns-repeated="4"/>
        </table:table-row>
        <table:table-row table:style-name="ro1">
          <table:table-cell office:value-type="float" office:value="563.886779785156">
            <text:p>563.8867797852</text:p>
          </table:table-cell>
          <table:table-cell office:value-type="float" office:value="0.006051754">
            <text:p>0.006051754</text:p>
          </table:table-cell>
          <table:table-cell table:number-columns-repeated="4"/>
        </table:table-row>
        <table:table-row table:style-name="ro1">
          <table:table-cell office:value-type="float" office:value="564.0048828125">
            <text:p>564.0048828125</text:p>
          </table:table-cell>
          <table:table-cell office:value-type="float" office:value="-0.0001048713">
            <text:p>-0.0001048713</text:p>
          </table:table-cell>
          <table:table-cell table:number-columns-repeated="4"/>
        </table:table-row>
        <table:table-row table:style-name="ro1">
          <table:table-cell office:value-type="float" office:value="564.122985839844">
            <text:p>564.1229858398</text:p>
          </table:table-cell>
          <table:table-cell office:value-type="float" office:value="-0.005753116">
            <text:p>-0.005753116</text:p>
          </table:table-cell>
          <table:table-cell table:number-columns-repeated="4"/>
        </table:table-row>
        <table:table-row table:style-name="ro1">
          <table:table-cell office:value-type="float" office:value="564.241088867188">
            <text:p>564.2410888672</text:p>
          </table:table-cell>
          <table:table-cell office:value-type="float" office:value="0.01485607">
            <text:p>0.01485607</text:p>
          </table:table-cell>
          <table:table-cell table:number-columns-repeated="4"/>
        </table:table-row>
        <table:table-row table:style-name="ro1">
          <table:table-cell office:value-type="float" office:value="564.359191894531">
            <text:p>564.3591918945</text:p>
          </table:table-cell>
          <table:table-cell office:value-type="float" office:value="0.01209884">
            <text:p>0.01209884</text:p>
          </table:table-cell>
          <table:table-cell table:number-columns-repeated="4"/>
        </table:table-row>
        <table:table-row table:style-name="ro1">
          <table:table-cell office:value-type="float" office:value="564.477294921875">
            <text:p>564.4772949219</text:p>
          </table:table-cell>
          <table:table-cell office:value-type="float" office:value="0.005865328">
            <text:p>0.005865328</text:p>
          </table:table-cell>
          <table:table-cell table:number-columns-repeated="4"/>
        </table:table-row>
        <table:table-row table:style-name="ro1">
          <table:table-cell office:value-type="float" office:value="564.595397949219">
            <text:p>564.5953979492</text:p>
          </table:table-cell>
          <table:table-cell office:value-type="float" office:value="0.01358817">
            <text:p>0.01358817</text:p>
          </table:table-cell>
          <table:table-cell table:number-columns-repeated="4"/>
        </table:table-row>
        <table:table-row table:style-name="ro1">
          <table:table-cell office:value-type="float" office:value="564.713500976563">
            <text:p>564.7135009766</text:p>
          </table:table-cell>
          <table:table-cell office:value-type="float" office:value="0.04140519">
            <text:p>0.04140519</text:p>
          </table:table-cell>
          <table:table-cell table:number-columns-repeated="4"/>
        </table:table-row>
        <table:table-row table:style-name="ro1">
          <table:table-cell office:value-type="float" office:value="564.831604003906">
            <text:p>564.8316040039</text:p>
          </table:table-cell>
          <table:table-cell office:value-type="float" office:value="0.006719291">
            <text:p>0.006719291</text:p>
          </table:table-cell>
          <table:table-cell table:number-columns-repeated="4"/>
        </table:table-row>
        <table:table-row table:style-name="ro1">
          <table:table-cell office:value-type="float" office:value="564.949768066406">
            <text:p>564.9497680664</text:p>
          </table:table-cell>
          <table:table-cell office:value-type="float" office:value="0.008323635">
            <text:p>0.008323635</text:p>
          </table:table-cell>
          <table:table-cell table:number-columns-repeated="4"/>
        </table:table-row>
        <table:table-row table:style-name="ro1">
          <table:table-cell office:value-type="float" office:value="565.06787109375">
            <text:p>565.0678710938</text:p>
          </table:table-cell>
          <table:table-cell office:value-type="float" office:value="0.01439262">
            <text:p>0.01439262</text:p>
          </table:table-cell>
          <table:table-cell table:number-columns-repeated="4"/>
        </table:table-row>
        <table:table-row table:style-name="ro1">
          <table:table-cell office:value-type="float" office:value="565.185974121094">
            <text:p>565.1859741211</text:p>
          </table:table-cell>
          <table:table-cell office:value-type="float" office:value="0.01051643">
            <text:p>0.01051643</text:p>
          </table:table-cell>
          <table:table-cell table:number-columns-repeated="4"/>
        </table:table-row>
        <table:table-row table:style-name="ro1">
          <table:table-cell office:value-type="float" office:value="565.304077148438">
            <text:p>565.3040771484</text:p>
          </table:table-cell>
          <table:table-cell office:value-type="float" office:value="-0.002271704">
            <text:p>-0.002271704</text:p>
          </table:table-cell>
          <table:table-cell table:number-columns-repeated="4"/>
        </table:table-row>
        <table:table-row table:style-name="ro1">
          <table:table-cell office:value-type="float" office:value="565.422241210938">
            <text:p>565.4222412109</text:p>
          </table:table-cell>
          <table:table-cell office:value-type="float" office:value="0.006006491">
            <text:p>0.006006491</text:p>
          </table:table-cell>
          <table:table-cell table:number-columns-repeated="4"/>
        </table:table-row>
        <table:table-row table:style-name="ro1">
          <table:table-cell office:value-type="float" office:value="565.540344238281">
            <text:p>565.5403442383</text:p>
          </table:table-cell>
          <table:table-cell office:value-type="float" office:value="0.0003376666">
            <text:p>0.0003376666</text:p>
          </table:table-cell>
          <table:table-cell table:number-columns-repeated="4"/>
        </table:table-row>
        <table:table-row table:style-name="ro1">
          <table:table-cell office:value-type="float" office:value="565.658508300781">
            <text:p>565.6585083008</text:p>
          </table:table-cell>
          <table:table-cell office:value-type="float" office:value="0.01310738">
            <text:p>0.01310738</text:p>
          </table:table-cell>
          <table:table-cell table:number-columns-repeated="4"/>
        </table:table-row>
        <table:table-row table:style-name="ro1">
          <table:table-cell office:value-type="float" office:value="565.776611328125">
            <text:p>565.7766113281</text:p>
          </table:table-cell>
          <table:table-cell office:value-type="float" office:value="0.009035913">
            <text:p>0.009035913</text:p>
          </table:table-cell>
          <table:table-cell table:number-columns-repeated="4"/>
        </table:table-row>
        <table:table-row table:style-name="ro1">
          <table:table-cell office:value-type="float" office:value="565.894775390625">
            <text:p>565.8947753906</text:p>
          </table:table-cell>
          <table:table-cell office:value-type="float" office:value="0.02167601">
            <text:p>0.02167601</text:p>
          </table:table-cell>
          <table:table-cell table:number-columns-repeated="4"/>
        </table:table-row>
        <table:table-row table:style-name="ro1">
          <table:table-cell office:value-type="float" office:value="566.012878417969">
            <text:p>566.012878418</text:p>
          </table:table-cell>
          <table:table-cell office:value-type="float" office:value="0.01030864">
            <text:p>0.01030864</text:p>
          </table:table-cell>
          <table:table-cell table:number-columns-repeated="4"/>
        </table:table-row>
        <table:table-row table:style-name="ro1">
          <table:table-cell office:value-type="float" office:value="566.131042480469">
            <text:p>566.1310424805</text:p>
          </table:table-cell>
          <table:table-cell office:value-type="float" office:value="0.008354921">
            <text:p>0.008354921</text:p>
          </table:table-cell>
          <table:table-cell table:number-columns-repeated="4"/>
        </table:table-row>
        <table:table-row table:style-name="ro1">
          <table:table-cell office:value-type="float" office:value="566.249206542969">
            <text:p>566.249206543</text:p>
          </table:table-cell>
          <table:table-cell office:value-type="float" office:value="0.01064203">
            <text:p>0.01064203</text:p>
          </table:table-cell>
          <table:table-cell table:number-columns-repeated="4"/>
        </table:table-row>
        <table:table-row table:style-name="ro1">
          <table:table-cell office:value-type="float" office:value="566.367370605469">
            <text:p>566.3673706055</text:p>
          </table:table-cell>
          <table:table-cell office:value-type="float" office:value="0.01388923">
            <text:p>0.01388923</text:p>
          </table:table-cell>
          <table:table-cell table:number-columns-repeated="4"/>
        </table:table-row>
        <table:table-row table:style-name="ro1">
          <table:table-cell office:value-type="float" office:value="566.485473632813">
            <text:p>566.4854736328</text:p>
          </table:table-cell>
          <table:table-cell office:value-type="float" office:value="0.001306836">
            <text:p>0.001306836</text:p>
          </table:table-cell>
          <table:table-cell table:number-columns-repeated="4"/>
        </table:table-row>
        <table:table-row table:style-name="ro1">
          <table:table-cell office:value-type="float" office:value="566.603637695313">
            <text:p>566.6036376953</text:p>
          </table:table-cell>
          <table:table-cell office:value-type="float" office:value="0.02817874">
            <text:p>0.02817874</text:p>
          </table:table-cell>
          <table:table-cell table:number-columns-repeated="4"/>
        </table:table-row>
        <table:table-row table:style-name="ro1">
          <table:table-cell office:value-type="float" office:value="566.721801757813">
            <text:p>566.7218017578</text:p>
          </table:table-cell>
          <table:table-cell office:value-type="float" office:value="0.01500909">
            <text:p>0.01500909</text:p>
          </table:table-cell>
          <table:table-cell table:number-columns-repeated="4"/>
        </table:table-row>
        <table:table-row table:style-name="ro1">
          <table:table-cell office:value-type="float" office:value="566.839965820313">
            <text:p>566.8399658203</text:p>
          </table:table-cell>
          <table:table-cell office:value-type="float" office:value="0.007877576">
            <text:p>0.007877576</text:p>
          </table:table-cell>
          <table:table-cell table:number-columns-repeated="4"/>
        </table:table-row>
        <table:table-row table:style-name="ro1">
          <table:table-cell office:value-type="float" office:value="566.958129882813">
            <text:p>566.9581298828</text:p>
          </table:table-cell>
          <table:table-cell office:value-type="float" office:value="0.0174401">
            <text:p>0.0174401</text:p>
          </table:table-cell>
          <table:table-cell table:number-columns-repeated="4"/>
        </table:table-row>
        <table:table-row table:style-name="ro1">
          <table:table-cell office:value-type="float" office:value="567.076293945313">
            <text:p>567.0762939453</text:p>
          </table:table-cell>
          <table:table-cell office:value-type="float" office:value="0.03138116">
            <text:p>0.03138116</text:p>
          </table:table-cell>
          <table:table-cell table:number-columns-repeated="4"/>
        </table:table-row>
        <table:table-row table:style-name="ro1">
          <table:table-cell office:value-type="float" office:value="567.194458007813">
            <text:p>567.1944580078</text:p>
          </table:table-cell>
          <table:table-cell office:value-type="float" office:value="0.02026858">
            <text:p>0.02026858</text:p>
          </table:table-cell>
          <table:table-cell table:number-columns-repeated="4"/>
        </table:table-row>
        <table:table-row table:style-name="ro1">
          <table:table-cell office:value-type="float" office:value="567.312622070313">
            <text:p>567.3126220703</text:p>
          </table:table-cell>
          <table:table-cell office:value-type="float" office:value="0.01422234">
            <text:p>0.01422234</text:p>
          </table:table-cell>
          <table:table-cell table:number-columns-repeated="4"/>
        </table:table-row>
        <table:table-row table:style-name="ro1">
          <table:table-cell office:value-type="float" office:value="567.430847167969">
            <text:p>567.430847168</text:p>
          </table:table-cell>
          <table:table-cell office:value-type="float" office:value="0.009362064">
            <text:p>0.009362064</text:p>
          </table:table-cell>
          <table:table-cell table:number-columns-repeated="4"/>
        </table:table-row>
        <table:table-row table:style-name="ro1">
          <table:table-cell office:value-type="float" office:value="567.549011230469">
            <text:p>567.5490112305</text:p>
          </table:table-cell>
          <table:table-cell office:value-type="float" office:value="0.02460131">
            <text:p>0.02460131</text:p>
          </table:table-cell>
          <table:table-cell table:number-columns-repeated="4"/>
        </table:table-row>
        <table:table-row table:style-name="ro1">
          <table:table-cell office:value-type="float" office:value="567.667175292969">
            <text:p>567.667175293</text:p>
          </table:table-cell>
          <table:table-cell office:value-type="float" office:value="0.0167166">
            <text:p>0.0167166</text:p>
          </table:table-cell>
          <table:table-cell table:number-columns-repeated="4"/>
        </table:table-row>
        <table:table-row table:style-name="ro1">
          <table:table-cell office:value-type="float" office:value="567.785339355469">
            <text:p>567.7853393555</text:p>
          </table:table-cell>
          <table:table-cell office:value-type="float" office:value="0.01853633">
            <text:p>0.01853633</text:p>
          </table:table-cell>
          <table:table-cell table:number-columns-repeated="4"/>
        </table:table-row>
        <table:table-row table:style-name="ro1">
          <table:table-cell office:value-type="float" office:value="567.903564453125">
            <text:p>567.9035644531</text:p>
          </table:table-cell>
          <table:table-cell office:value-type="float" office:value="0.01198898">
            <text:p>0.01198898</text:p>
          </table:table-cell>
          <table:table-cell table:number-columns-repeated="4"/>
        </table:table-row>
        <table:table-row table:style-name="ro1">
          <table:table-cell office:value-type="float" office:value="568.021728515625">
            <text:p>568.0217285156</text:p>
          </table:table-cell>
          <table:table-cell office:value-type="float" office:value="0.03945509">
            <text:p>0.03945509</text:p>
          </table:table-cell>
          <table:table-cell table:number-columns-repeated="4"/>
        </table:table-row>
        <table:table-row table:style-name="ro1">
          <table:table-cell office:value-type="float" office:value="568.139953613281">
            <text:p>568.1399536133</text:p>
          </table:table-cell>
          <table:table-cell office:value-type="float" office:value="0.04161564">
            <text:p>0.04161564</text:p>
          </table:table-cell>
          <table:table-cell table:number-columns-repeated="4"/>
        </table:table-row>
        <table:table-row table:style-name="ro1">
          <table:table-cell office:value-type="float" office:value="568.258117675781">
            <text:p>568.2581176758</text:p>
          </table:table-cell>
          <table:table-cell office:value-type="float" office:value="0.007165486">
            <text:p>0.007165486</text:p>
          </table:table-cell>
          <table:table-cell table:number-columns-repeated="4"/>
        </table:table-row>
        <table:table-row table:style-name="ro1">
          <table:table-cell office:value-type="float" office:value="568.376342773438">
            <text:p>568.3763427734</text:p>
          </table:table-cell>
          <table:table-cell office:value-type="float" office:value="0.01304909">
            <text:p>0.01304909</text:p>
          </table:table-cell>
          <table:table-cell table:number-columns-repeated="4"/>
        </table:table-row>
        <table:table-row table:style-name="ro1">
          <table:table-cell office:value-type="float" office:value="568.494506835938">
            <text:p>568.4945068359</text:p>
          </table:table-cell>
          <table:table-cell office:value-type="float" office:value="0.02427332">
            <text:p>0.02427332</text:p>
          </table:table-cell>
          <table:table-cell table:number-columns-repeated="4"/>
        </table:table-row>
        <table:table-row table:style-name="ro1">
          <table:table-cell office:value-type="float" office:value="568.612731933594">
            <text:p>568.6127319336</text:p>
          </table:table-cell>
          <table:table-cell office:value-type="float" office:value="0.02547637">
            <text:p>0.02547637</text:p>
          </table:table-cell>
          <table:table-cell table:number-columns-repeated="4"/>
        </table:table-row>
        <table:table-row table:style-name="ro1">
          <table:table-cell office:value-type="float" office:value="568.73095703125">
            <text:p>568.7309570313</text:p>
          </table:table-cell>
          <table:table-cell office:value-type="float" office:value="0.002516791">
            <text:p>0.002516791</text:p>
          </table:table-cell>
          <table:table-cell table:number-columns-repeated="4"/>
        </table:table-row>
        <table:table-row table:style-name="ro1">
          <table:table-cell office:value-type="float" office:value="568.84912109375">
            <text:p>568.8491210938</text:p>
          </table:table-cell>
          <table:table-cell office:value-type="float" office:value="0.02137536">
            <text:p>0.02137536</text:p>
          </table:table-cell>
          <table:table-cell table:number-columns-repeated="4"/>
        </table:table-row>
        <table:table-row table:style-name="ro1">
          <table:table-cell office:value-type="float" office:value="568.967346191406">
            <text:p>568.9673461914</text:p>
          </table:table-cell>
          <table:table-cell office:value-type="float" office:value="0.0239387">
            <text:p>0.0239387</text:p>
          </table:table-cell>
          <table:table-cell table:number-columns-repeated="4"/>
        </table:table-row>
        <table:table-row table:style-name="ro1">
          <table:table-cell office:value-type="float" office:value="569.085571289063">
            <text:p>569.0855712891</text:p>
          </table:table-cell>
          <table:table-cell office:value-type="float" office:value="0.03779409">
            <text:p>0.03779409</text:p>
          </table:table-cell>
          <table:table-cell table:number-columns-repeated="4"/>
        </table:table-row>
        <table:table-row table:style-name="ro1">
          <table:table-cell office:value-type="float" office:value="569.203796386719">
            <text:p>569.2037963867</text:p>
          </table:table-cell>
          <table:table-cell office:value-type="float" office:value="0.005332797">
            <text:p>0.005332797</text:p>
          </table:table-cell>
          <table:table-cell table:number-columns-repeated="4"/>
        </table:table-row>
        <table:table-row table:style-name="ro1">
          <table:table-cell office:value-type="float" office:value="569.322021484375">
            <text:p>569.3220214844</text:p>
          </table:table-cell>
          <table:table-cell office:value-type="float" office:value="0.02021636">
            <text:p>0.02021636</text:p>
          </table:table-cell>
          <table:table-cell table:number-columns-repeated="4"/>
        </table:table-row>
        <table:table-row table:style-name="ro1">
          <table:table-cell office:value-type="float" office:value="569.440246582031">
            <text:p>569.440246582</text:p>
          </table:table-cell>
          <table:table-cell office:value-type="float" office:value="0.02062581">
            <text:p>0.02062581</text:p>
          </table:table-cell>
          <table:table-cell table:number-columns-repeated="4"/>
        </table:table-row>
        <table:table-row table:style-name="ro1">
          <table:table-cell office:value-type="float" office:value="569.558471679688">
            <text:p>569.5584716797</text:p>
          </table:table-cell>
          <table:table-cell office:value-type="float" office:value="0.02768888">
            <text:p>0.02768888</text:p>
          </table:table-cell>
          <table:table-cell table:number-columns-repeated="4"/>
        </table:table-row>
        <table:table-row table:style-name="ro1">
          <table:table-cell office:value-type="float" office:value="569.676696777344">
            <text:p>569.6766967773</text:p>
          </table:table-cell>
          <table:table-cell office:value-type="float" office:value="0.02127819">
            <text:p>0.02127819</text:p>
          </table:table-cell>
          <table:table-cell table:number-columns-repeated="4"/>
        </table:table-row>
        <table:table-row table:style-name="ro1">
          <table:table-cell office:value-type="float" office:value="569.794921875">
            <text:p>569.794921875</text:p>
          </table:table-cell>
          <table:table-cell office:value-type="float" office:value="0.008577935">
            <text:p>0.008577935</text:p>
          </table:table-cell>
          <table:table-cell table:number-columns-repeated="4"/>
        </table:table-row>
        <table:table-row table:style-name="ro1">
          <table:table-cell office:value-type="float" office:value="569.913146972656">
            <text:p>569.9131469727</text:p>
          </table:table-cell>
          <table:table-cell office:value-type="float" office:value="0.008531942">
            <text:p>0.008531942</text:p>
          </table:table-cell>
          <table:table-cell table:number-columns-repeated="4"/>
        </table:table-row>
        <table:table-row table:style-name="ro1">
          <table:table-cell office:value-type="float" office:value="570.031372070313">
            <text:p>570.0313720703</text:p>
          </table:table-cell>
          <table:table-cell office:value-type="float" office:value="0.0159655">
            <text:p>0.0159655</text:p>
          </table:table-cell>
          <table:table-cell table:number-columns-repeated="4"/>
        </table:table-row>
        <table:table-row table:style-name="ro1">
          <table:table-cell office:value-type="float" office:value="570.149597167969">
            <text:p>570.149597168</text:p>
          </table:table-cell>
          <table:table-cell office:value-type="float" office:value="0.01865351">
            <text:p>0.01865351</text:p>
          </table:table-cell>
          <table:table-cell table:number-columns-repeated="4"/>
        </table:table-row>
        <table:table-row table:style-name="ro1">
          <table:table-cell office:value-type="float" office:value="570.267883300781">
            <text:p>570.2678833008</text:p>
          </table:table-cell>
          <table:table-cell office:value-type="float" office:value="0.004459498">
            <text:p>0.004459498</text:p>
          </table:table-cell>
          <table:table-cell table:number-columns-repeated="4"/>
        </table:table-row>
        <table:table-row table:style-name="ro1">
          <table:table-cell office:value-type="float" office:value="570.386108398438">
            <text:p>570.3861083984</text:p>
          </table:table-cell>
          <table:table-cell office:value-type="float" office:value="0.01675177">
            <text:p>0.01675177</text:p>
          </table:table-cell>
          <table:table-cell table:number-columns-repeated="4"/>
        </table:table-row>
        <table:table-row table:style-name="ro1">
          <table:table-cell office:value-type="float" office:value="570.504333496094">
            <text:p>570.5043334961</text:p>
          </table:table-cell>
          <table:table-cell office:value-type="float" office:value="0.03072931">
            <text:p>0.03072931</text:p>
          </table:table-cell>
          <table:table-cell table:number-columns-repeated="4"/>
        </table:table-row>
        <table:table-row table:style-name="ro1">
          <table:table-cell office:value-type="float" office:value="570.622619628906">
            <text:p>570.6226196289</text:p>
          </table:table-cell>
          <table:table-cell office:value-type="float" office:value="0.03211421">
            <text:p>0.03211421</text:p>
          </table:table-cell>
          <table:table-cell table:number-columns-repeated="4"/>
        </table:table-row>
        <table:table-row table:style-name="ro1">
          <table:table-cell office:value-type="float" office:value="570.740844726563">
            <text:p>570.7408447266</text:p>
          </table:table-cell>
          <table:table-cell office:value-type="float" office:value="0.01772573">
            <text:p>0.01772573</text:p>
          </table:table-cell>
          <table:table-cell table:number-columns-repeated="4"/>
        </table:table-row>
        <table:table-row table:style-name="ro1">
          <table:table-cell office:value-type="float" office:value="570.859130859375">
            <text:p>570.8591308594</text:p>
          </table:table-cell>
          <table:table-cell office:value-type="float" office:value="0.01403237">
            <text:p>0.01403237</text:p>
          </table:table-cell>
          <table:table-cell table:number-columns-repeated="4"/>
        </table:table-row>
        <table:table-row table:style-name="ro1">
          <table:table-cell office:value-type="float" office:value="570.977355957031">
            <text:p>570.977355957</text:p>
          </table:table-cell>
          <table:table-cell office:value-type="float" office:value="0.02283518">
            <text:p>0.02283518</text:p>
          </table:table-cell>
          <table:table-cell table:number-columns-repeated="4"/>
        </table:table-row>
        <table:table-row table:style-name="ro1">
          <table:table-cell office:value-type="float" office:value="571.095642089844">
            <text:p>571.0956420898</text:p>
          </table:table-cell>
          <table:table-cell office:value-type="float" office:value="0.01226733">
            <text:p>0.01226733</text:p>
          </table:table-cell>
          <table:table-cell table:number-columns-repeated="4"/>
        </table:table-row>
        <table:table-row table:style-name="ro1">
          <table:table-cell office:value-type="float" office:value="571.213928222656">
            <text:p>571.2139282227</text:p>
          </table:table-cell>
          <table:table-cell office:value-type="float" office:value="0.02217551">
            <text:p>0.02217551</text:p>
          </table:table-cell>
          <table:table-cell table:number-columns-repeated="4"/>
        </table:table-row>
        <table:table-row table:style-name="ro1">
          <table:table-cell office:value-type="float" office:value="571.332153320313">
            <text:p>571.3321533203</text:p>
          </table:table-cell>
          <table:table-cell office:value-type="float" office:value="0.02372712">
            <text:p>0.02372712</text:p>
          </table:table-cell>
          <table:table-cell table:number-columns-repeated="4"/>
        </table:table-row>
        <table:table-row table:style-name="ro1">
          <table:table-cell office:value-type="float" office:value="571.450439453125">
            <text:p>571.4504394531</text:p>
          </table:table-cell>
          <table:table-cell office:value-type="float" office:value="0.02146394">
            <text:p>0.02146394</text:p>
          </table:table-cell>
          <table:table-cell table:number-columns-repeated="4"/>
        </table:table-row>
        <table:table-row table:style-name="ro1">
          <table:table-cell office:value-type="float" office:value="571.568725585938">
            <text:p>571.5687255859</text:p>
          </table:table-cell>
          <table:table-cell office:value-type="float" office:value="0.01076291">
            <text:p>0.01076291</text:p>
          </table:table-cell>
          <table:table-cell table:number-columns-repeated="4"/>
        </table:table-row>
        <table:table-row table:style-name="ro1">
          <table:table-cell office:value-type="float" office:value="571.68701171875">
            <text:p>571.6870117188</text:p>
          </table:table-cell>
          <table:table-cell office:value-type="float" office:value="0.02816538">
            <text:p>0.02816538</text:p>
          </table:table-cell>
          <table:table-cell table:number-columns-repeated="4"/>
        </table:table-row>
        <table:table-row table:style-name="ro1">
          <table:table-cell office:value-type="float" office:value="571.805297851563">
            <text:p>571.8052978516</text:p>
          </table:table-cell>
          <table:table-cell office:value-type="float" office:value="0.01681696">
            <text:p>0.01681696</text:p>
          </table:table-cell>
          <table:table-cell table:number-columns-repeated="4"/>
        </table:table-row>
        <table:table-row table:style-name="ro1">
          <table:table-cell office:value-type="float" office:value="571.923583984375">
            <text:p>571.9235839844</text:p>
          </table:table-cell>
          <table:table-cell office:value-type="float" office:value="0.04061412">
            <text:p>0.04061412</text:p>
          </table:table-cell>
          <table:table-cell table:number-columns-repeated="4"/>
        </table:table-row>
        <table:table-row table:style-name="ro1">
          <table:table-cell office:value-type="float" office:value="572.041870117188">
            <text:p>572.0418701172</text:p>
          </table:table-cell>
          <table:table-cell office:value-type="float" office:value="0.01818286">
            <text:p>0.01818286</text:p>
          </table:table-cell>
          <table:table-cell table:number-columns-repeated="4"/>
        </table:table-row>
        <table:table-row table:style-name="ro1">
          <table:table-cell office:value-type="float" office:value="572.16015625">
            <text:p>572.16015625</text:p>
          </table:table-cell>
          <table:table-cell office:value-type="float" office:value="0.03052302">
            <text:p>0.03052302</text:p>
          </table:table-cell>
          <table:table-cell table:number-columns-repeated="4"/>
        </table:table-row>
        <table:table-row table:style-name="ro1">
          <table:table-cell office:value-type="float" office:value="572.278442382813">
            <text:p>572.2784423828</text:p>
          </table:table-cell>
          <table:table-cell office:value-type="float" office:value="0.01663405">
            <text:p>0.01663405</text:p>
          </table:table-cell>
          <table:table-cell table:number-columns-repeated="4"/>
        </table:table-row>
        <table:table-row table:style-name="ro1">
          <table:table-cell office:value-type="float" office:value="572.396728515625">
            <text:p>572.3967285156</text:p>
          </table:table-cell>
          <table:table-cell office:value-type="float" office:value="0.01639739">
            <text:p>0.01639739</text:p>
          </table:table-cell>
          <table:table-cell table:number-columns-repeated="4"/>
        </table:table-row>
        <table:table-row table:style-name="ro1">
          <table:table-cell office:value-type="float" office:value="572.515014648438">
            <text:p>572.5150146484</text:p>
          </table:table-cell>
          <table:table-cell office:value-type="float" office:value="0.01421214">
            <text:p>0.01421214</text:p>
          </table:table-cell>
          <table:table-cell table:number-columns-repeated="4"/>
        </table:table-row>
        <table:table-row table:style-name="ro1">
          <table:table-cell office:value-type="float" office:value="572.63330078125">
            <text:p>572.6333007813</text:p>
          </table:table-cell>
          <table:table-cell office:value-type="float" office:value="0.02045506">
            <text:p>0.02045506</text:p>
          </table:table-cell>
          <table:table-cell table:number-columns-repeated="4"/>
        </table:table-row>
        <table:table-row table:style-name="ro1">
          <table:table-cell office:value-type="float" office:value="572.751586914063">
            <text:p>572.7515869141</text:p>
          </table:table-cell>
          <table:table-cell office:value-type="float" office:value="0.02529662">
            <text:p>0.02529662</text:p>
          </table:table-cell>
          <table:table-cell table:number-columns-repeated="4"/>
        </table:table-row>
        <table:table-row table:style-name="ro1">
          <table:table-cell office:value-type="float" office:value="572.869934082031">
            <text:p>572.869934082</text:p>
          </table:table-cell>
          <table:table-cell office:value-type="float" office:value="0.01603592">
            <text:p>0.01603592</text:p>
          </table:table-cell>
          <table:table-cell table:number-columns-repeated="4"/>
        </table:table-row>
        <table:table-row table:style-name="ro1">
          <table:table-cell office:value-type="float" office:value="572.988220214844">
            <text:p>572.9882202148</text:p>
          </table:table-cell>
          <table:table-cell office:value-type="float" office:value="0.01489312">
            <text:p>0.01489312</text:p>
          </table:table-cell>
          <table:table-cell table:number-columns-repeated="4"/>
        </table:table-row>
        <table:table-row table:style-name="ro1">
          <table:table-cell office:value-type="float" office:value="573.106506347656">
            <text:p>573.1065063477</text:p>
          </table:table-cell>
          <table:table-cell office:value-type="float" office:value="0.02948615">
            <text:p>0.02948615</text:p>
          </table:table-cell>
          <table:table-cell table:number-columns-repeated="4"/>
        </table:table-row>
        <table:table-row table:style-name="ro1">
          <table:table-cell office:value-type="float" office:value="573.224853515625">
            <text:p>573.2248535156</text:p>
          </table:table-cell>
          <table:table-cell office:value-type="float" office:value="0.02217394">
            <text:p>0.02217394</text:p>
          </table:table-cell>
          <table:table-cell table:number-columns-repeated="4"/>
        </table:table-row>
        <table:table-row table:style-name="ro1">
          <table:table-cell office:value-type="float" office:value="573.343139648438">
            <text:p>573.3431396484</text:p>
          </table:table-cell>
          <table:table-cell office:value-type="float" office:value="0.02384781">
            <text:p>0.02384781</text:p>
          </table:table-cell>
          <table:table-cell table:number-columns-repeated="4"/>
        </table:table-row>
        <table:table-row table:style-name="ro1">
          <table:table-cell office:value-type="float" office:value="573.461486816406">
            <text:p>573.4614868164</text:p>
          </table:table-cell>
          <table:table-cell office:value-type="float" office:value="0.03331537">
            <text:p>0.03331537</text:p>
          </table:table-cell>
          <table:table-cell table:number-columns-repeated="4"/>
        </table:table-row>
        <table:table-row table:style-name="ro1">
          <table:table-cell office:value-type="float" office:value="573.579772949219">
            <text:p>573.5797729492</text:p>
          </table:table-cell>
          <table:table-cell office:value-type="float" office:value="0.02199276">
            <text:p>0.02199276</text:p>
          </table:table-cell>
          <table:table-cell table:number-columns-repeated="4"/>
        </table:table-row>
        <table:table-row table:style-name="ro1">
          <table:table-cell office:value-type="float" office:value="573.698120117188">
            <text:p>573.6981201172</text:p>
          </table:table-cell>
          <table:table-cell office:value-type="float" office:value="0.02737216">
            <text:p>0.02737216</text:p>
          </table:table-cell>
          <table:table-cell table:number-columns-repeated="4"/>
        </table:table-row>
        <table:table-row table:style-name="ro1">
          <table:table-cell office:value-type="float" office:value="573.81640625">
            <text:p>573.81640625</text:p>
          </table:table-cell>
          <table:table-cell office:value-type="float" office:value="0.02110909">
            <text:p>0.02110909</text:p>
          </table:table-cell>
          <table:table-cell table:number-columns-repeated="4"/>
        </table:table-row>
        <table:table-row table:style-name="ro1">
          <table:table-cell office:value-type="float" office:value="573.934753417969">
            <text:p>573.934753418</text:p>
          </table:table-cell>
          <table:table-cell office:value-type="float" office:value="0.02412132">
            <text:p>0.02412132</text:p>
          </table:table-cell>
          <table:table-cell table:number-columns-repeated="4"/>
        </table:table-row>
        <table:table-row table:style-name="ro1">
          <table:table-cell office:value-type="float" office:value="574.053100585938">
            <text:p>574.0531005859</text:p>
          </table:table-cell>
          <table:table-cell office:value-type="float" office:value="0.02127773">
            <text:p>0.02127773</text:p>
          </table:table-cell>
          <table:table-cell table:number-columns-repeated="4"/>
        </table:table-row>
        <table:table-row table:style-name="ro1">
          <table:table-cell office:value-type="float" office:value="574.171447753906">
            <text:p>574.1714477539</text:p>
          </table:table-cell>
          <table:table-cell office:value-type="float" office:value="0.02212011">
            <text:p>0.02212011</text:p>
          </table:table-cell>
          <table:table-cell table:number-columns-repeated="4"/>
        </table:table-row>
        <table:table-row table:style-name="ro1">
          <table:table-cell office:value-type="float" office:value="574.289733886719">
            <text:p>574.2897338867</text:p>
          </table:table-cell>
          <table:table-cell office:value-type="float" office:value="0.02022603">
            <text:p>0.02022603</text:p>
          </table:table-cell>
          <table:table-cell table:number-columns-repeated="4"/>
        </table:table-row>
        <table:table-row table:style-name="ro1">
          <table:table-cell office:value-type="float" office:value="574.408081054688">
            <text:p>574.4080810547</text:p>
          </table:table-cell>
          <table:table-cell office:value-type="float" office:value="0.02958162">
            <text:p>0.02958162</text:p>
          </table:table-cell>
          <table:table-cell table:number-columns-repeated="4"/>
        </table:table-row>
        <table:table-row table:style-name="ro1">
          <table:table-cell office:value-type="float" office:value="574.526428222656">
            <text:p>574.5264282227</text:p>
          </table:table-cell>
          <table:table-cell office:value-type="float" office:value="0.02830537">
            <text:p>0.02830537</text:p>
          </table:table-cell>
          <table:table-cell table:number-columns-repeated="4"/>
        </table:table-row>
        <table:table-row table:style-name="ro1">
          <table:table-cell office:value-type="float" office:value="574.644775390625">
            <text:p>574.6447753906</text:p>
          </table:table-cell>
          <table:table-cell office:value-type="float" office:value="0.02788259">
            <text:p>0.02788259</text:p>
          </table:table-cell>
          <table:table-cell table:number-columns-repeated="4"/>
        </table:table-row>
        <table:table-row table:style-name="ro1">
          <table:table-cell office:value-type="float" office:value="574.763122558594">
            <text:p>574.7631225586</text:p>
          </table:table-cell>
          <table:table-cell office:value-type="float" office:value="0.03161294">
            <text:p>0.03161294</text:p>
          </table:table-cell>
          <table:table-cell table:number-columns-repeated="4"/>
        </table:table-row>
        <table:table-row table:style-name="ro1">
          <table:table-cell office:value-type="float" office:value="574.881469726563">
            <text:p>574.8814697266</text:p>
          </table:table-cell>
          <table:table-cell office:value-type="float" office:value="0.03404423">
            <text:p>0.03404423</text:p>
          </table:table-cell>
          <table:table-cell table:number-columns-repeated="4"/>
        </table:table-row>
        <table:table-row table:style-name="ro1">
          <table:table-cell office:value-type="float" office:value="574.999816894531">
            <text:p>574.9998168945</text:p>
          </table:table-cell>
          <table:table-cell office:value-type="float" office:value="0.02364516">
            <text:p>0.02364516</text:p>
          </table:table-cell>
          <table:table-cell table:number-columns-repeated="4"/>
        </table:table-row>
        <table:table-row table:style-name="ro1">
          <table:table-cell office:value-type="float" office:value="575.1181640625">
            <text:p>575.1181640625</text:p>
          </table:table-cell>
          <table:table-cell office:value-type="float" office:value="0.04836864">
            <text:p>0.04836864</text:p>
          </table:table-cell>
          <table:table-cell table:number-columns-repeated="4"/>
        </table:table-row>
        <table:table-row table:style-name="ro1">
          <table:table-cell office:value-type="float" office:value="575.236572265625">
            <text:p>575.2365722656</text:p>
          </table:table-cell>
          <table:table-cell office:value-type="float" office:value="0.02379821">
            <text:p>0.02379821</text:p>
          </table:table-cell>
          <table:table-cell table:number-columns-repeated="4"/>
        </table:table-row>
        <table:table-row table:style-name="ro1">
          <table:table-cell office:value-type="float" office:value="575.354919433594">
            <text:p>575.3549194336</text:p>
          </table:table-cell>
          <table:table-cell office:value-type="float" office:value="0.03989418">
            <text:p>0.03989418</text:p>
          </table:table-cell>
          <table:table-cell table:number-columns-repeated="4"/>
        </table:table-row>
        <table:table-row table:style-name="ro1">
          <table:table-cell office:value-type="float" office:value="575.473266601563">
            <text:p>575.4732666016</text:p>
          </table:table-cell>
          <table:table-cell office:value-type="float" office:value="0.02345228">
            <text:p>0.02345228</text:p>
          </table:table-cell>
          <table:table-cell table:number-columns-repeated="4"/>
        </table:table-row>
        <table:table-row table:style-name="ro1">
          <table:table-cell office:value-type="float" office:value="575.591613769531">
            <text:p>575.5916137695</text:p>
          </table:table-cell>
          <table:table-cell office:value-type="float" office:value="0.02387463">
            <text:p>0.02387463</text:p>
          </table:table-cell>
          <table:table-cell table:number-columns-repeated="4"/>
        </table:table-row>
        <table:table-row table:style-name="ro1">
          <table:table-cell office:value-type="float" office:value="575.710021972656">
            <text:p>575.7100219727</text:p>
          </table:table-cell>
          <table:table-cell office:value-type="float" office:value="0.02458495">
            <text:p>0.02458495</text:p>
          </table:table-cell>
          <table:table-cell table:number-columns-repeated="4"/>
        </table:table-row>
        <table:table-row table:style-name="ro1">
          <table:table-cell office:value-type="float" office:value="575.828369140625">
            <text:p>575.8283691406</text:p>
          </table:table-cell>
          <table:table-cell office:value-type="float" office:value="0.02639344">
            <text:p>0.02639344</text:p>
          </table:table-cell>
          <table:table-cell table:number-columns-repeated="4"/>
        </table:table-row>
        <table:table-row table:style-name="ro1">
          <table:table-cell office:value-type="float" office:value="575.94677734375">
            <text:p>575.9467773438</text:p>
          </table:table-cell>
          <table:table-cell office:value-type="float" office:value="0.03511708">
            <text:p>0.03511708</text:p>
          </table:table-cell>
          <table:table-cell table:number-columns-repeated="4"/>
        </table:table-row>
        <table:table-row table:style-name="ro1">
          <table:table-cell office:value-type="float" office:value="576.065124511719">
            <text:p>576.0651245117</text:p>
          </table:table-cell>
          <table:table-cell office:value-type="float" office:value="0.03275334">
            <text:p>0.03275334</text:p>
          </table:table-cell>
          <table:table-cell table:number-columns-repeated="4"/>
        </table:table-row>
        <table:table-row table:style-name="ro1">
          <table:table-cell office:value-type="float" office:value="576.183532714844">
            <text:p>576.1835327148</text:p>
          </table:table-cell>
          <table:table-cell office:value-type="float" office:value="0.02486831">
            <text:p>0.02486831</text:p>
          </table:table-cell>
          <table:table-cell table:number-columns-repeated="4"/>
        </table:table-row>
        <table:table-row table:style-name="ro1">
          <table:table-cell office:value-type="float" office:value="576.301879882813">
            <text:p>576.3018798828</text:p>
          </table:table-cell>
          <table:table-cell office:value-type="float" office:value="0.03883235">
            <text:p>0.03883235</text:p>
          </table:table-cell>
          <table:table-cell table:number-columns-repeated="4"/>
        </table:table-row>
        <table:table-row table:style-name="ro1">
          <table:table-cell office:value-type="float" office:value="576.420288085938">
            <text:p>576.4202880859</text:p>
          </table:table-cell>
          <table:table-cell office:value-type="float" office:value="0.04145585">
            <text:p>0.04145585</text:p>
          </table:table-cell>
          <table:table-cell table:number-columns-repeated="4"/>
        </table:table-row>
        <table:table-row table:style-name="ro1">
          <table:table-cell office:value-type="float" office:value="576.538635253906">
            <text:p>576.5386352539</text:p>
          </table:table-cell>
          <table:table-cell office:value-type="float" office:value="0.02885832">
            <text:p>0.02885832</text:p>
          </table:table-cell>
          <table:table-cell table:number-columns-repeated="4"/>
        </table:table-row>
        <table:table-row table:style-name="ro1">
          <table:table-cell office:value-type="float" office:value="576.657043457031">
            <text:p>576.657043457</text:p>
          </table:table-cell>
          <table:table-cell office:value-type="float" office:value="0.04657962">
            <text:p>0.04657962</text:p>
          </table:table-cell>
          <table:table-cell table:number-columns-repeated="4"/>
        </table:table-row>
        <table:table-row table:style-name="ro1">
          <table:table-cell office:value-type="float" office:value="576.775451660156">
            <text:p>576.7754516602</text:p>
          </table:table-cell>
          <table:table-cell office:value-type="float" office:value="0.0247267">
            <text:p>0.0247267</text:p>
          </table:table-cell>
          <table:table-cell table:number-columns-repeated="4"/>
        </table:table-row>
        <table:table-row table:style-name="ro1">
          <table:table-cell office:value-type="float" office:value="576.893859863281">
            <text:p>576.8938598633</text:p>
          </table:table-cell>
          <table:table-cell office:value-type="float" office:value="0.03060858">
            <text:p>0.03060858</text:p>
          </table:table-cell>
          <table:table-cell table:number-columns-repeated="4"/>
        </table:table-row>
        <table:table-row table:style-name="ro1">
          <table:table-cell office:value-type="float" office:value="577.012268066406">
            <text:p>577.0122680664</text:p>
          </table:table-cell>
          <table:table-cell office:value-type="float" office:value="0.04165418">
            <text:p>0.04165418</text:p>
          </table:table-cell>
          <table:table-cell table:number-columns-repeated="4"/>
        </table:table-row>
        <table:table-row table:style-name="ro1">
          <table:table-cell office:value-type="float" office:value="577.130615234375">
            <text:p>577.1306152344</text:p>
          </table:table-cell>
          <table:table-cell office:value-type="float" office:value="0.03540963">
            <text:p>0.03540963</text:p>
          </table:table-cell>
          <table:table-cell table:number-columns-repeated="4"/>
        </table:table-row>
        <table:table-row table:style-name="ro1">
          <table:table-cell office:value-type="float" office:value="577.2490234375">
            <text:p>577.2490234375</text:p>
          </table:table-cell>
          <table:table-cell office:value-type="float" office:value="0.04009482">
            <text:p>0.04009482</text:p>
          </table:table-cell>
          <table:table-cell table:number-columns-repeated="4"/>
        </table:table-row>
        <table:table-row table:style-name="ro1">
          <table:table-cell office:value-type="float" office:value="577.367431640625">
            <text:p>577.3674316406</text:p>
          </table:table-cell>
          <table:table-cell office:value-type="float" office:value="0.02601592">
            <text:p>0.02601592</text:p>
          </table:table-cell>
          <table:table-cell table:number-columns-repeated="4"/>
        </table:table-row>
        <table:table-row table:style-name="ro1">
          <table:table-cell office:value-type="float" office:value="577.48583984375">
            <text:p>577.4858398438</text:p>
          </table:table-cell>
          <table:table-cell office:value-type="float" office:value="0.04058742">
            <text:p>0.04058742</text:p>
          </table:table-cell>
          <table:table-cell table:number-columns-repeated="4"/>
        </table:table-row>
        <table:table-row table:style-name="ro1">
          <table:table-cell office:value-type="float" office:value="577.604248046875">
            <text:p>577.6042480469</text:p>
          </table:table-cell>
          <table:table-cell office:value-type="float" office:value="0.02763785">
            <text:p>0.02763785</text:p>
          </table:table-cell>
          <table:table-cell table:number-columns-repeated="4"/>
        </table:table-row>
        <table:table-row table:style-name="ro1">
          <table:table-cell office:value-type="float" office:value="577.722717285156">
            <text:p>577.7227172852</text:p>
          </table:table-cell>
          <table:table-cell office:value-type="float" office:value="0.03141243">
            <text:p>0.03141243</text:p>
          </table:table-cell>
          <table:table-cell table:number-columns-repeated="4"/>
        </table:table-row>
        <table:table-row table:style-name="ro1">
          <table:table-cell office:value-type="float" office:value="577.841125488281">
            <text:p>577.8411254883</text:p>
          </table:table-cell>
          <table:table-cell office:value-type="float" office:value="0.03576389">
            <text:p>0.03576389</text:p>
          </table:table-cell>
          <table:table-cell table:number-columns-repeated="4"/>
        </table:table-row>
        <table:table-row table:style-name="ro1">
          <table:table-cell office:value-type="float" office:value="577.959533691406">
            <text:p>577.9595336914</text:p>
          </table:table-cell>
          <table:table-cell office:value-type="float" office:value="0.03174853">
            <text:p>0.03174853</text:p>
          </table:table-cell>
          <table:table-cell table:number-columns-repeated="4"/>
        </table:table-row>
        <table:table-row table:style-name="ro1">
          <table:table-cell office:value-type="float" office:value="578.077941894531">
            <text:p>578.0779418945</text:p>
          </table:table-cell>
          <table:table-cell office:value-type="float" office:value="0.0514696">
            <text:p>0.0514696</text:p>
          </table:table-cell>
          <table:table-cell table:number-columns-repeated="4"/>
        </table:table-row>
        <table:table-row table:style-name="ro1">
          <table:table-cell office:value-type="float" office:value="578.196350097656">
            <text:p>578.1963500977</text:p>
          </table:table-cell>
          <table:table-cell office:value-type="float" office:value="0.03230654">
            <text:p>0.03230654</text:p>
          </table:table-cell>
          <table:table-cell table:number-columns-repeated="4"/>
        </table:table-row>
        <table:table-row table:style-name="ro1">
          <table:table-cell office:value-type="float" office:value="578.314819335938">
            <text:p>578.3148193359</text:p>
          </table:table-cell>
          <table:table-cell office:value-type="float" office:value="0.03263739">
            <text:p>0.03263739</text:p>
          </table:table-cell>
          <table:table-cell table:number-columns-repeated="4"/>
        </table:table-row>
        <table:table-row table:style-name="ro1">
          <table:table-cell office:value-type="float" office:value="578.433227539063">
            <text:p>578.4332275391</text:p>
          </table:table-cell>
          <table:table-cell office:value-type="float" office:value="0.03493097">
            <text:p>0.03493097</text:p>
          </table:table-cell>
          <table:table-cell table:number-columns-repeated="4"/>
        </table:table-row>
        <table:table-row table:style-name="ro1">
          <table:table-cell office:value-type="float" office:value="578.551635742188">
            <text:p>578.5516357422</text:p>
          </table:table-cell>
          <table:table-cell office:value-type="float" office:value="0.03610075">
            <text:p>0.03610075</text:p>
          </table:table-cell>
          <table:table-cell table:number-columns-repeated="4"/>
        </table:table-row>
        <table:table-row table:style-name="ro1">
          <table:table-cell office:value-type="float" office:value="578.670104980469">
            <text:p>578.6701049805</text:p>
          </table:table-cell>
          <table:table-cell office:value-type="float" office:value="0.04684584">
            <text:p>0.04684584</text:p>
          </table:table-cell>
          <table:table-cell table:number-columns-repeated="4"/>
        </table:table-row>
        <table:table-row table:style-name="ro1">
          <table:table-cell office:value-type="float" office:value="578.788513183594">
            <text:p>578.7885131836</text:p>
          </table:table-cell>
          <table:table-cell office:value-type="float" office:value="0.06562133">
            <text:p>0.06562133</text:p>
          </table:table-cell>
          <table:table-cell table:number-columns-repeated="4"/>
        </table:table-row>
        <table:table-row table:style-name="ro1">
          <table:table-cell office:value-type="float" office:value="578.906982421875">
            <text:p>578.9069824219</text:p>
          </table:table-cell>
          <table:table-cell office:value-type="float" office:value="0.02996487">
            <text:p>0.02996487</text:p>
          </table:table-cell>
          <table:table-cell table:number-columns-repeated="4"/>
        </table:table-row>
        <table:table-row table:style-name="ro1">
          <table:table-cell office:value-type="float" office:value="579.025451660156">
            <text:p>579.0254516602</text:p>
          </table:table-cell>
          <table:table-cell office:value-type="float" office:value="0.03676038">
            <text:p>0.03676038</text:p>
          </table:table-cell>
          <table:table-cell table:number-columns-repeated="4"/>
        </table:table-row>
        <table:table-row table:style-name="ro1">
          <table:table-cell office:value-type="float" office:value="579.143859863281">
            <text:p>579.1438598633</text:p>
          </table:table-cell>
          <table:table-cell office:value-type="float" office:value="0.04208477">
            <text:p>0.04208477</text:p>
          </table:table-cell>
          <table:table-cell table:number-columns-repeated="4"/>
        </table:table-row>
        <table:table-row table:style-name="ro1">
          <table:table-cell office:value-type="float" office:value="579.262329101563">
            <text:p>579.2623291016</text:p>
          </table:table-cell>
          <table:table-cell office:value-type="float" office:value="0.03615757">
            <text:p>0.03615757</text:p>
          </table:table-cell>
          <table:table-cell table:number-columns-repeated="4"/>
        </table:table-row>
        <table:table-row table:style-name="ro1">
          <table:table-cell office:value-type="float" office:value="579.380798339844">
            <text:p>579.3807983398</text:p>
          </table:table-cell>
          <table:table-cell office:value-type="float" office:value="0.04069564">
            <text:p>0.04069564</text:p>
          </table:table-cell>
          <table:table-cell table:number-columns-repeated="4"/>
        </table:table-row>
        <table:table-row table:style-name="ro1">
          <table:table-cell office:value-type="float" office:value="579.499206542969">
            <text:p>579.499206543</text:p>
          </table:table-cell>
          <table:table-cell office:value-type="float" office:value="0.03455324">
            <text:p>0.03455324</text:p>
          </table:table-cell>
          <table:table-cell table:number-columns-repeated="4"/>
        </table:table-row>
        <table:table-row table:style-name="ro1">
          <table:table-cell office:value-type="float" office:value="579.61767578125">
            <text:p>579.6176757813</text:p>
          </table:table-cell>
          <table:table-cell office:value-type="float" office:value="0.03583046">
            <text:p>0.03583046</text:p>
          </table:table-cell>
          <table:table-cell table:number-columns-repeated="4"/>
        </table:table-row>
        <table:table-row table:style-name="ro1">
          <table:table-cell office:value-type="float" office:value="579.736145019531">
            <text:p>579.7361450195</text:p>
          </table:table-cell>
          <table:table-cell office:value-type="float" office:value="0.03857794">
            <text:p>0.03857794</text:p>
          </table:table-cell>
          <table:table-cell table:number-columns-repeated="4"/>
        </table:table-row>
        <table:table-row table:style-name="ro1">
          <table:table-cell office:value-type="float" office:value="579.854614257813">
            <text:p>579.8546142578</text:p>
          </table:table-cell>
          <table:table-cell office:value-type="float" office:value="0.03216387">
            <text:p>0.03216387</text:p>
          </table:table-cell>
          <table:table-cell table:number-columns-repeated="4"/>
        </table:table-row>
        <table:table-row table:style-name="ro1">
          <table:table-cell office:value-type="float" office:value="579.973083496094">
            <text:p>579.9730834961</text:p>
          </table:table-cell>
          <table:table-cell office:value-type="float" office:value="0.03455036">
            <text:p>0.03455036</text:p>
          </table:table-cell>
          <table:table-cell table:number-columns-repeated="4"/>
        </table:table-row>
        <table:table-row table:style-name="ro1">
          <table:table-cell office:value-type="float" office:value="580.091552734375">
            <text:p>580.0915527344</text:p>
          </table:table-cell>
          <table:table-cell office:value-type="float" office:value="0.04500944">
            <text:p>0.04500944</text:p>
          </table:table-cell>
          <table:table-cell table:number-columns-repeated="4"/>
        </table:table-row>
        <table:table-row table:style-name="ro1">
          <table:table-cell office:value-type="float" office:value="580.210021972656">
            <text:p>580.2100219727</text:p>
          </table:table-cell>
          <table:table-cell office:value-type="float" office:value="0.05513754">
            <text:p>0.05513754</text:p>
          </table:table-cell>
          <table:table-cell table:number-columns-repeated="4"/>
        </table:table-row>
        <table:table-row table:style-name="ro1">
          <table:table-cell office:value-type="float" office:value="580.328491210938">
            <text:p>580.3284912109</text:p>
          </table:table-cell>
          <table:table-cell office:value-type="float" office:value="0.04502122">
            <text:p>0.04502122</text:p>
          </table:table-cell>
          <table:table-cell table:number-columns-repeated="4"/>
        </table:table-row>
        <table:table-row table:style-name="ro1">
          <table:table-cell office:value-type="float" office:value="580.446960449219">
            <text:p>580.4469604492</text:p>
          </table:table-cell>
          <table:table-cell office:value-type="float" office:value="0.04000947">
            <text:p>0.04000947</text:p>
          </table:table-cell>
          <table:table-cell table:number-columns-repeated="4"/>
        </table:table-row>
        <table:table-row table:style-name="ro1">
          <table:table-cell office:value-type="float" office:value="580.5654296875">
            <text:p>580.5654296875</text:p>
          </table:table-cell>
          <table:table-cell office:value-type="float" office:value="0.03948479">
            <text:p>0.03948479</text:p>
          </table:table-cell>
          <table:table-cell table:number-columns-repeated="4"/>
        </table:table-row>
        <table:table-row table:style-name="ro1">
          <table:table-cell office:value-type="float" office:value="580.683898925781">
            <text:p>580.6838989258</text:p>
          </table:table-cell>
          <table:table-cell office:value-type="float" office:value="0.05179858">
            <text:p>0.05179858</text:p>
          </table:table-cell>
          <table:table-cell table:number-columns-repeated="4"/>
        </table:table-row>
        <table:table-row table:style-name="ro1">
          <table:table-cell office:value-type="float" office:value="580.802368164063">
            <text:p>580.8023681641</text:p>
          </table:table-cell>
          <table:table-cell office:value-type="float" office:value="0.04506882">
            <text:p>0.04506882</text:p>
          </table:table-cell>
          <table:table-cell table:number-columns-repeated="4"/>
        </table:table-row>
        <table:table-row table:style-name="ro1">
          <table:table-cell office:value-type="float" office:value="580.9208984375">
            <text:p>580.9208984375</text:p>
          </table:table-cell>
          <table:table-cell office:value-type="float" office:value="0.0424371">
            <text:p>0.0424371</text:p>
          </table:table-cell>
          <table:table-cell table:number-columns-repeated="4"/>
        </table:table-row>
        <table:table-row table:style-name="ro1">
          <table:table-cell office:value-type="float" office:value="581.039367675781">
            <text:p>581.0393676758</text:p>
          </table:table-cell>
          <table:table-cell office:value-type="float" office:value="0.04115867">
            <text:p>0.04115867</text:p>
          </table:table-cell>
          <table:table-cell table:number-columns-repeated="4"/>
        </table:table-row>
        <table:table-row table:style-name="ro1">
          <table:table-cell office:value-type="float" office:value="581.157836914063">
            <text:p>581.1578369141</text:p>
          </table:table-cell>
          <table:table-cell office:value-type="float" office:value="0.05284372">
            <text:p>0.05284372</text:p>
          </table:table-cell>
          <table:table-cell table:number-columns-repeated="4"/>
        </table:table-row>
        <table:table-row table:style-name="ro1">
          <table:table-cell office:value-type="float" office:value="581.2763671875">
            <text:p>581.2763671875</text:p>
          </table:table-cell>
          <table:table-cell office:value-type="float" office:value="0.0568631">
            <text:p>0.0568631</text:p>
          </table:table-cell>
          <table:table-cell table:number-columns-repeated="4"/>
        </table:table-row>
        <table:table-row table:style-name="ro1">
          <table:table-cell office:value-type="float" office:value="581.394836425781">
            <text:p>581.3948364258</text:p>
          </table:table-cell>
          <table:table-cell office:value-type="float" office:value="0.04750898">
            <text:p>0.04750898</text:p>
          </table:table-cell>
          <table:table-cell table:number-columns-repeated="4"/>
        </table:table-row>
        <table:table-row table:style-name="ro1">
          <table:table-cell office:value-type="float" office:value="581.513366699219">
            <text:p>581.5133666992</text:p>
          </table:table-cell>
          <table:table-cell office:value-type="float" office:value="0.05422754">
            <text:p>0.05422754</text:p>
          </table:table-cell>
          <table:table-cell table:number-columns-repeated="4"/>
        </table:table-row>
        <table:table-row table:style-name="ro1">
          <table:table-cell office:value-type="float" office:value="581.6318359375">
            <text:p>581.6318359375</text:p>
          </table:table-cell>
          <table:table-cell office:value-type="float" office:value="0.04182768">
            <text:p>0.04182768</text:p>
          </table:table-cell>
          <table:table-cell table:number-columns-repeated="4"/>
        </table:table-row>
        <table:table-row table:style-name="ro1">
          <table:table-cell office:value-type="float" office:value="581.750366210938">
            <text:p>581.7503662109</text:p>
          </table:table-cell>
          <table:table-cell office:value-type="float" office:value="0.03750562">
            <text:p>0.03750562</text:p>
          </table:table-cell>
          <table:table-cell table:number-columns-repeated="4"/>
        </table:table-row>
        <table:table-row table:style-name="ro1">
          <table:table-cell office:value-type="float" office:value="581.868835449219">
            <text:p>581.8688354492</text:p>
          </table:table-cell>
          <table:table-cell office:value-type="float" office:value="0.04190793">
            <text:p>0.04190793</text:p>
          </table:table-cell>
          <table:table-cell table:number-columns-repeated="4"/>
        </table:table-row>
        <table:table-row table:style-name="ro1">
          <table:table-cell office:value-type="float" office:value="581.987365722656">
            <text:p>581.9873657227</text:p>
          </table:table-cell>
          <table:table-cell office:value-type="float" office:value="0.04311868">
            <text:p>0.04311868</text:p>
          </table:table-cell>
          <table:table-cell table:number-columns-repeated="4"/>
        </table:table-row>
        <table:table-row table:style-name="ro1">
          <table:table-cell office:value-type="float" office:value="582.105895996094">
            <text:p>582.1058959961</text:p>
          </table:table-cell>
          <table:table-cell office:value-type="float" office:value="0.04616073">
            <text:p>0.04616073</text:p>
          </table:table-cell>
          <table:table-cell table:number-columns-repeated="4"/>
        </table:table-row>
        <table:table-row table:style-name="ro1">
          <table:table-cell office:value-type="float" office:value="582.224365234375">
            <text:p>582.2243652344</text:p>
          </table:table-cell>
          <table:table-cell office:value-type="float" office:value="0.04910393">
            <text:p>0.04910393</text:p>
          </table:table-cell>
          <table:table-cell table:number-columns-repeated="4"/>
        </table:table-row>
        <table:table-row table:style-name="ro1">
          <table:table-cell office:value-type="float" office:value="582.342895507813">
            <text:p>582.3428955078</text:p>
          </table:table-cell>
          <table:table-cell office:value-type="float" office:value="0.04375469">
            <text:p>0.04375469</text:p>
          </table:table-cell>
          <table:table-cell table:number-columns-repeated="4"/>
        </table:table-row>
        <table:table-row table:style-name="ro1">
          <table:table-cell office:value-type="float" office:value="582.46142578125">
            <text:p>582.4614257813</text:p>
          </table:table-cell>
          <table:table-cell office:value-type="float" office:value="0.04744834">
            <text:p>0.04744834</text:p>
          </table:table-cell>
          <table:table-cell table:number-columns-repeated="4"/>
        </table:table-row>
        <table:table-row table:style-name="ro1">
          <table:table-cell office:value-type="float" office:value="582.579956054688">
            <text:p>582.5799560547</text:p>
          </table:table-cell>
          <table:table-cell office:value-type="float" office:value="0.04240366">
            <text:p>0.04240366</text:p>
          </table:table-cell>
          <table:table-cell table:number-columns-repeated="4"/>
        </table:table-row>
        <table:table-row table:style-name="ro1">
          <table:table-cell office:value-type="float" office:value="582.698486328125">
            <text:p>582.6984863281</text:p>
          </table:table-cell>
          <table:table-cell office:value-type="float" office:value="0.04010118">
            <text:p>0.04010118</text:p>
          </table:table-cell>
          <table:table-cell table:number-columns-repeated="4"/>
        </table:table-row>
        <table:table-row table:style-name="ro1">
          <table:table-cell office:value-type="float" office:value="582.817016601563">
            <text:p>582.8170166016</text:p>
          </table:table-cell>
          <table:table-cell office:value-type="float" office:value="0.04870084">
            <text:p>0.04870084</text:p>
          </table:table-cell>
          <table:table-cell table:number-columns-repeated="4"/>
        </table:table-row>
        <table:table-row table:style-name="ro1">
          <table:table-cell office:value-type="float" office:value="582.935546875">
            <text:p>582.935546875</text:p>
          </table:table-cell>
          <table:table-cell office:value-type="float" office:value="0.03803461">
            <text:p>0.03803461</text:p>
          </table:table-cell>
          <table:table-cell table:number-columns-repeated="4"/>
        </table:table-row>
        <table:table-row table:style-name="ro1">
          <table:table-cell office:value-type="float" office:value="583.054077148438">
            <text:p>583.0540771484</text:p>
          </table:table-cell>
          <table:table-cell office:value-type="float" office:value="0.04244874">
            <text:p>0.04244874</text:p>
          </table:table-cell>
          <table:table-cell table:number-columns-repeated="4"/>
        </table:table-row>
        <table:table-row table:style-name="ro1">
          <table:table-cell office:value-type="float" office:value="583.172607421875">
            <text:p>583.1726074219</text:p>
          </table:table-cell>
          <table:table-cell office:value-type="float" office:value="0.07300084">
            <text:p>0.07300084</text:p>
          </table:table-cell>
          <table:table-cell table:number-columns-repeated="4"/>
        </table:table-row>
        <table:table-row table:style-name="ro1">
          <table:table-cell office:value-type="float" office:value="583.291137695313">
            <text:p>583.2911376953</text:p>
          </table:table-cell>
          <table:table-cell office:value-type="float" office:value="0.04566813">
            <text:p>0.04566813</text:p>
          </table:table-cell>
          <table:table-cell table:number-columns-repeated="4"/>
        </table:table-row>
        <table:table-row table:style-name="ro1">
          <table:table-cell office:value-type="float" office:value="583.40966796875">
            <text:p>583.4096679688</text:p>
          </table:table-cell>
          <table:table-cell office:value-type="float" office:value="0.04043759">
            <text:p>0.04043759</text:p>
          </table:table-cell>
          <table:table-cell table:number-columns-repeated="4"/>
        </table:table-row>
        <table:table-row table:style-name="ro1">
          <table:table-cell office:value-type="float" office:value="583.528198242188">
            <text:p>583.5281982422</text:p>
          </table:table-cell>
          <table:table-cell office:value-type="float" office:value="0.04613262">
            <text:p>0.04613262</text:p>
          </table:table-cell>
          <table:table-cell table:number-columns-repeated="4"/>
        </table:table-row>
        <table:table-row table:style-name="ro1">
          <table:table-cell office:value-type="float" office:value="583.646789550781">
            <text:p>583.6467895508</text:p>
          </table:table-cell>
          <table:table-cell office:value-type="float" office:value="0.04108874">
            <text:p>0.04108874</text:p>
          </table:table-cell>
          <table:table-cell table:number-columns-repeated="4"/>
        </table:table-row>
        <table:table-row table:style-name="ro1">
          <table:table-cell office:value-type="float" office:value="583.765319824219">
            <text:p>583.7653198242</text:p>
          </table:table-cell>
          <table:table-cell office:value-type="float" office:value="0.03961689">
            <text:p>0.03961689</text:p>
          </table:table-cell>
          <table:table-cell table:number-columns-repeated="4"/>
        </table:table-row>
        <table:table-row table:style-name="ro1">
          <table:table-cell office:value-type="float" office:value="583.883850097656">
            <text:p>583.8838500977</text:p>
          </table:table-cell>
          <table:table-cell office:value-type="float" office:value="0.05212591">
            <text:p>0.05212591</text:p>
          </table:table-cell>
          <table:table-cell table:number-columns-repeated="4"/>
        </table:table-row>
        <table:table-row table:style-name="ro1">
          <table:table-cell office:value-type="float" office:value="584.00244140625">
            <text:p>584.0024414063</text:p>
          </table:table-cell>
          <table:table-cell office:value-type="float" office:value="0.03667344">
            <text:p>0.03667344</text:p>
          </table:table-cell>
          <table:table-cell table:number-columns-repeated="4"/>
        </table:table-row>
        <table:table-row table:style-name="ro1">
          <table:table-cell office:value-type="float" office:value="584.120971679688">
            <text:p>584.1209716797</text:p>
          </table:table-cell>
          <table:table-cell office:value-type="float" office:value="0.052891">
            <text:p>0.052891</text:p>
          </table:table-cell>
          <table:table-cell table:number-columns-repeated="4"/>
        </table:table-row>
        <table:table-row table:style-name="ro1">
          <table:table-cell office:value-type="float" office:value="584.239501953125">
            <text:p>584.2395019531</text:p>
          </table:table-cell>
          <table:table-cell office:value-type="float" office:value="0.04900713">
            <text:p>0.04900713</text:p>
          </table:table-cell>
          <table:table-cell table:number-columns-repeated="4"/>
        </table:table-row>
        <table:table-row table:style-name="ro1">
          <table:table-cell office:value-type="float" office:value="584.358093261719">
            <text:p>584.3580932617</text:p>
          </table:table-cell>
          <table:table-cell office:value-type="float" office:value="0.04421486">
            <text:p>0.04421486</text:p>
          </table:table-cell>
          <table:table-cell table:number-columns-repeated="4"/>
        </table:table-row>
        <table:table-row table:style-name="ro1">
          <table:table-cell office:value-type="float" office:value="584.476623535156">
            <text:p>584.4766235352</text:p>
          </table:table-cell>
          <table:table-cell office:value-type="float" office:value="0.05159625">
            <text:p>0.05159625</text:p>
          </table:table-cell>
          <table:table-cell table:number-columns-repeated="4"/>
        </table:table-row>
        <table:table-row table:style-name="ro1">
          <table:table-cell office:value-type="float" office:value="584.59521484375">
            <text:p>584.5952148438</text:p>
          </table:table-cell>
          <table:table-cell office:value-type="float" office:value="0.05430703">
            <text:p>0.05430703</text:p>
          </table:table-cell>
          <table:table-cell table:number-columns-repeated="4"/>
        </table:table-row>
        <table:table-row table:style-name="ro1">
          <table:table-cell office:value-type="float" office:value="584.713806152344">
            <text:p>584.7138061523</text:p>
          </table:table-cell>
          <table:table-cell office:value-type="float" office:value="0.04735486">
            <text:p>0.04735486</text:p>
          </table:table-cell>
          <table:table-cell table:number-columns-repeated="4"/>
        </table:table-row>
        <table:table-row table:style-name="ro1">
          <table:table-cell office:value-type="float" office:value="584.832336425781">
            <text:p>584.8323364258</text:p>
          </table:table-cell>
          <table:table-cell office:value-type="float" office:value="0.04797153">
            <text:p>0.04797153</text:p>
          </table:table-cell>
          <table:table-cell table:number-columns-repeated="4"/>
        </table:table-row>
        <table:table-row table:style-name="ro1">
          <table:table-cell office:value-type="float" office:value="584.950927734375">
            <text:p>584.9509277344</text:p>
          </table:table-cell>
          <table:table-cell office:value-type="float" office:value="0.04450079">
            <text:p>0.04450079</text:p>
          </table:table-cell>
          <table:table-cell table:number-columns-repeated="4"/>
        </table:table-row>
        <table:table-row table:style-name="ro1">
          <table:table-cell office:value-type="float" office:value="585.069519042969">
            <text:p>585.069519043</text:p>
          </table:table-cell>
          <table:table-cell office:value-type="float" office:value="0.03597213">
            <text:p>0.03597213</text:p>
          </table:table-cell>
          <table:table-cell table:number-columns-repeated="4"/>
        </table:table-row>
        <table:table-row table:style-name="ro1">
          <table:table-cell office:value-type="float" office:value="585.188110351563">
            <text:p>585.1881103516</text:p>
          </table:table-cell>
          <table:table-cell office:value-type="float" office:value="0.05033754">
            <text:p>0.05033754</text:p>
          </table:table-cell>
          <table:table-cell table:number-columns-repeated="4"/>
        </table:table-row>
        <table:table-row table:style-name="ro1">
          <table:table-cell office:value-type="float" office:value="585.306640625">
            <text:p>585.306640625</text:p>
          </table:table-cell>
          <table:table-cell office:value-type="float" office:value="0.05285322">
            <text:p>0.05285322</text:p>
          </table:table-cell>
          <table:table-cell table:number-columns-repeated="4"/>
        </table:table-row>
        <table:table-row table:style-name="ro1">
          <table:table-cell office:value-type="float" office:value="585.425231933594">
            <text:p>585.4252319336</text:p>
          </table:table-cell>
          <table:table-cell office:value-type="float" office:value="0.04365758">
            <text:p>0.04365758</text:p>
          </table:table-cell>
          <table:table-cell table:number-columns-repeated="4"/>
        </table:table-row>
        <table:table-row table:style-name="ro1">
          <table:table-cell office:value-type="float" office:value="585.543823242188">
            <text:p>585.5438232422</text:p>
          </table:table-cell>
          <table:table-cell office:value-type="float" office:value="0.06803139">
            <text:p>0.06803139</text:p>
          </table:table-cell>
          <table:table-cell table:number-columns-repeated="4"/>
        </table:table-row>
        <table:table-row table:style-name="ro1">
          <table:table-cell office:value-type="float" office:value="585.662414550781">
            <text:p>585.6624145508</text:p>
          </table:table-cell>
          <table:table-cell office:value-type="float" office:value="0.03764842">
            <text:p>0.03764842</text:p>
          </table:table-cell>
          <table:table-cell table:number-columns-repeated="4"/>
        </table:table-row>
        <table:table-row table:style-name="ro1">
          <table:table-cell office:value-type="float" office:value="585.781005859375">
            <text:p>585.7810058594</text:p>
          </table:table-cell>
          <table:table-cell office:value-type="float" office:value="0.04673442">
            <text:p>0.04673442</text:p>
          </table:table-cell>
          <table:table-cell table:number-columns-repeated="4"/>
        </table:table-row>
        <table:table-row table:style-name="ro1">
          <table:table-cell office:value-type="float" office:value="585.899597167969">
            <text:p>585.899597168</text:p>
          </table:table-cell>
          <table:table-cell office:value-type="float" office:value="0.05162077">
            <text:p>0.05162077</text:p>
          </table:table-cell>
          <table:table-cell table:number-columns-repeated="4"/>
        </table:table-row>
        <table:table-row table:style-name="ro1">
          <table:table-cell office:value-type="float" office:value="586.018188476563">
            <text:p>586.0181884766</text:p>
          </table:table-cell>
          <table:table-cell office:value-type="float" office:value="0.03845003">
            <text:p>0.03845003</text:p>
          </table:table-cell>
          <table:table-cell table:number-columns-repeated="4"/>
        </table:table-row>
        <table:table-row table:style-name="ro1">
          <table:table-cell office:value-type="float" office:value="586.136779785156">
            <text:p>586.1367797852</text:p>
          </table:table-cell>
          <table:table-cell office:value-type="float" office:value="0.04045988">
            <text:p>0.04045988</text:p>
          </table:table-cell>
          <table:table-cell table:number-columns-repeated="4"/>
        </table:table-row>
        <table:table-row table:style-name="ro1">
          <table:table-cell office:value-type="float" office:value="586.255432128906">
            <text:p>586.2554321289</text:p>
          </table:table-cell>
          <table:table-cell office:value-type="float" office:value="0.04902415">
            <text:p>0.04902415</text:p>
          </table:table-cell>
          <table:table-cell table:number-columns-repeated="4"/>
        </table:table-row>
        <table:table-row table:style-name="ro1">
          <table:table-cell office:value-type="float" office:value="586.3740234375">
            <text:p>586.3740234375</text:p>
          </table:table-cell>
          <table:table-cell office:value-type="float" office:value="0.05016042">
            <text:p>0.05016042</text:p>
          </table:table-cell>
          <table:table-cell table:number-columns-repeated="4"/>
        </table:table-row>
        <table:table-row table:style-name="ro1">
          <table:table-cell office:value-type="float" office:value="586.492614746094">
            <text:p>586.4926147461</text:p>
          </table:table-cell>
          <table:table-cell office:value-type="float" office:value="0.04888985">
            <text:p>0.04888985</text:p>
          </table:table-cell>
          <table:table-cell table:number-columns-repeated="4"/>
        </table:table-row>
        <table:table-row table:style-name="ro1">
          <table:table-cell office:value-type="float" office:value="586.611206054688">
            <text:p>586.6112060547</text:p>
          </table:table-cell>
          <table:table-cell office:value-type="float" office:value="0.05741125">
            <text:p>0.05741125</text:p>
          </table:table-cell>
          <table:table-cell table:number-columns-repeated="4"/>
        </table:table-row>
        <table:table-row table:style-name="ro1">
          <table:table-cell office:value-type="float" office:value="586.729858398438">
            <text:p>586.7298583984</text:p>
          </table:table-cell>
          <table:table-cell office:value-type="float" office:value="0.05307242">
            <text:p>0.05307242</text:p>
          </table:table-cell>
          <table:table-cell table:number-columns-repeated="4"/>
        </table:table-row>
        <table:table-row table:style-name="ro1">
          <table:table-cell office:value-type="float" office:value="586.848449707031">
            <text:p>586.848449707</text:p>
          </table:table-cell>
          <table:table-cell office:value-type="float" office:value="0.05600079">
            <text:p>0.05600079</text:p>
          </table:table-cell>
          <table:table-cell table:number-columns-repeated="4"/>
        </table:table-row>
        <table:table-row table:style-name="ro1">
          <table:table-cell office:value-type="float" office:value="586.967041015625">
            <text:p>586.9670410156</text:p>
          </table:table-cell>
          <table:table-cell office:value-type="float" office:value="0.0423112">
            <text:p>0.0423112</text:p>
          </table:table-cell>
          <table:table-cell table:number-columns-repeated="4"/>
        </table:table-row>
        <table:table-row table:style-name="ro1">
          <table:table-cell office:value-type="float" office:value="587.085693359375">
            <text:p>587.0856933594</text:p>
          </table:table-cell>
          <table:table-cell office:value-type="float" office:value="0.04380921">
            <text:p>0.04380921</text:p>
          </table:table-cell>
          <table:table-cell table:number-columns-repeated="4"/>
        </table:table-row>
        <table:table-row table:style-name="ro1">
          <table:table-cell office:value-type="float" office:value="587.204284667969">
            <text:p>587.204284668</text:p>
          </table:table-cell>
          <table:table-cell office:value-type="float" office:value="0.05588272">
            <text:p>0.05588272</text:p>
          </table:table-cell>
          <table:table-cell table:number-columns-repeated="4"/>
        </table:table-row>
        <table:table-row table:style-name="ro1">
          <table:table-cell office:value-type="float" office:value="587.322937011719">
            <text:p>587.3229370117</text:p>
          </table:table-cell>
          <table:table-cell office:value-type="float" office:value="0.04952605">
            <text:p>0.04952605</text:p>
          </table:table-cell>
          <table:table-cell table:number-columns-repeated="4"/>
        </table:table-row>
        <table:table-row table:style-name="ro1">
          <table:table-cell office:value-type="float" office:value="587.441589355469">
            <text:p>587.4415893555</text:p>
          </table:table-cell>
          <table:table-cell office:value-type="float" office:value="0.05540685">
            <text:p>0.05540685</text:p>
          </table:table-cell>
          <table:table-cell table:number-columns-repeated="4"/>
        </table:table-row>
        <table:table-row table:style-name="ro1">
          <table:table-cell office:value-type="float" office:value="587.560180664063">
            <text:p>587.5601806641</text:p>
          </table:table-cell>
          <table:table-cell office:value-type="float" office:value="0.03880394">
            <text:p>0.03880394</text:p>
          </table:table-cell>
          <table:table-cell table:number-columns-repeated="4"/>
        </table:table-row>
        <table:table-row table:style-name="ro1">
          <table:table-cell office:value-type="float" office:value="587.678833007813">
            <text:p>587.6788330078</text:p>
          </table:table-cell>
          <table:table-cell office:value-type="float" office:value="0.04970084">
            <text:p>0.04970084</text:p>
          </table:table-cell>
          <table:table-cell table:number-columns-repeated="4"/>
        </table:table-row>
        <table:table-row table:style-name="ro1">
          <table:table-cell office:value-type="float" office:value="587.797424316406">
            <text:p>587.7974243164</text:p>
          </table:table-cell>
          <table:table-cell office:value-type="float" office:value="0.05415235">
            <text:p>0.05415235</text:p>
          </table:table-cell>
          <table:table-cell table:number-columns-repeated="4"/>
        </table:table-row>
        <table:table-row table:style-name="ro1">
          <table:table-cell office:value-type="float" office:value="587.916076660156">
            <text:p>587.9160766602</text:p>
          </table:table-cell>
          <table:table-cell office:value-type="float" office:value="0.05742804">
            <text:p>0.05742804</text:p>
          </table:table-cell>
          <table:table-cell table:number-columns-repeated="4"/>
        </table:table-row>
        <table:table-row table:style-name="ro1">
          <table:table-cell office:value-type="float" office:value="588.034729003906">
            <text:p>588.0347290039</text:p>
          </table:table-cell>
          <table:table-cell office:value-type="float" office:value="0.04978712">
            <text:p>0.04978712</text:p>
          </table:table-cell>
          <table:table-cell table:number-columns-repeated="4"/>
        </table:table-row>
        <table:table-row table:style-name="ro1">
          <table:table-cell office:value-type="float" office:value="588.153381347656">
            <text:p>588.1533813477</text:p>
          </table:table-cell>
          <table:table-cell office:value-type="float" office:value="0.04907065">
            <text:p>0.04907065</text:p>
          </table:table-cell>
          <table:table-cell table:number-columns-repeated="4"/>
        </table:table-row>
        <table:table-row table:style-name="ro1">
          <table:table-cell office:value-type="float" office:value="588.272033691406">
            <text:p>588.2720336914</text:p>
          </table:table-cell>
          <table:table-cell office:value-type="float" office:value="0.05135238">
            <text:p>0.05135238</text:p>
          </table:table-cell>
          <table:table-cell table:number-columns-repeated="4"/>
        </table:table-row>
        <table:table-row table:style-name="ro1">
          <table:table-cell office:value-type="float" office:value="588.390686035156">
            <text:p>588.3906860352</text:p>
          </table:table-cell>
          <table:table-cell office:value-type="float" office:value="0.06025155">
            <text:p>0.06025155</text:p>
          </table:table-cell>
          <table:table-cell table:number-columns-repeated="4"/>
        </table:table-row>
        <table:table-row table:style-name="ro1">
          <table:table-cell office:value-type="float" office:value="588.509338378906">
            <text:p>588.5093383789</text:p>
          </table:table-cell>
          <table:table-cell office:value-type="float" office:value="0.04784577">
            <text:p>0.04784577</text:p>
          </table:table-cell>
          <table:table-cell table:number-columns-repeated="4"/>
        </table:table-row>
        <table:table-row table:style-name="ro1">
          <table:table-cell office:value-type="float" office:value="588.627990722656">
            <text:p>588.6279907227</text:p>
          </table:table-cell>
          <table:table-cell office:value-type="float" office:value="0.04274376">
            <text:p>0.04274376</text:p>
          </table:table-cell>
          <table:table-cell table:number-columns-repeated="4"/>
        </table:table-row>
        <table:table-row table:style-name="ro1">
          <table:table-cell office:value-type="float" office:value="588.746643066406">
            <text:p>588.7466430664</text:p>
          </table:table-cell>
          <table:table-cell office:value-type="float" office:value="0.04105941">
            <text:p>0.04105941</text:p>
          </table:table-cell>
          <table:table-cell table:number-columns-repeated="4"/>
        </table:table-row>
        <table:table-row table:style-name="ro1">
          <table:table-cell office:value-type="float" office:value="588.865295410156">
            <text:p>588.8652954102</text:p>
          </table:table-cell>
          <table:table-cell office:value-type="float" office:value="0.04619792">
            <text:p>0.04619792</text:p>
          </table:table-cell>
          <table:table-cell table:number-columns-repeated="4"/>
        </table:table-row>
        <table:table-row table:style-name="ro1">
          <table:table-cell office:value-type="float" office:value="588.983947753906">
            <text:p>588.9839477539</text:p>
          </table:table-cell>
          <table:table-cell office:value-type="float" office:value="0.04208411">
            <text:p>0.04208411</text:p>
          </table:table-cell>
          <table:table-cell table:number-columns-repeated="4"/>
        </table:table-row>
        <table:table-row table:style-name="ro1">
          <table:table-cell office:value-type="float" office:value="589.102600097656">
            <text:p>589.1026000977</text:p>
          </table:table-cell>
          <table:table-cell office:value-type="float" office:value="0.05273552">
            <text:p>0.05273552</text:p>
          </table:table-cell>
          <table:table-cell table:number-columns-repeated="4"/>
        </table:table-row>
        <table:table-row table:style-name="ro1">
          <table:table-cell office:value-type="float" office:value="589.221252441406">
            <text:p>589.2212524414</text:p>
          </table:table-cell>
          <table:table-cell office:value-type="float" office:value="0.03908562">
            <text:p>0.03908562</text:p>
          </table:table-cell>
          <table:table-cell table:number-columns-repeated="4"/>
        </table:table-row>
        <table:table-row table:style-name="ro1">
          <table:table-cell office:value-type="float" office:value="589.339904785156">
            <text:p>589.3399047852</text:p>
          </table:table-cell>
          <table:table-cell office:value-type="float" office:value="0.04387987">
            <text:p>0.04387987</text:p>
          </table:table-cell>
          <table:table-cell table:number-columns-repeated="4"/>
        </table:table-row>
        <table:table-row table:style-name="ro1">
          <table:table-cell office:value-type="float" office:value="589.458618164063">
            <text:p>589.4586181641</text:p>
          </table:table-cell>
          <table:table-cell office:value-type="float" office:value="0.04256644">
            <text:p>0.04256644</text:p>
          </table:table-cell>
          <table:table-cell table:number-columns-repeated="4"/>
        </table:table-row>
        <table:table-row table:style-name="ro1">
          <table:table-cell office:value-type="float" office:value="589.577270507813">
            <text:p>589.5772705078</text:p>
          </table:table-cell>
          <table:table-cell office:value-type="float" office:value="0.03807724">
            <text:p>0.03807724</text:p>
          </table:table-cell>
          <table:table-cell table:number-columns-repeated="4"/>
        </table:table-row>
        <table:table-row table:style-name="ro1">
          <table:table-cell office:value-type="float" office:value="589.695922851563">
            <text:p>589.6959228516</text:p>
          </table:table-cell>
          <table:table-cell office:value-type="float" office:value="0.05202462">
            <text:p>0.05202462</text:p>
          </table:table-cell>
          <table:table-cell table:number-columns-repeated="4"/>
        </table:table-row>
        <table:table-row table:style-name="ro1">
          <table:table-cell office:value-type="float" office:value="589.814636230469">
            <text:p>589.8146362305</text:p>
          </table:table-cell>
          <table:table-cell office:value-type="float" office:value="0.03912751">
            <text:p>0.03912751</text:p>
          </table:table-cell>
          <table:table-cell table:number-columns-repeated="4"/>
        </table:table-row>
        <table:table-row table:style-name="ro1">
          <table:table-cell office:value-type="float" office:value="589.933288574219">
            <text:p>589.9332885742</text:p>
          </table:table-cell>
          <table:table-cell office:value-type="float" office:value="0.04617858">
            <text:p>0.04617858</text:p>
          </table:table-cell>
          <table:table-cell table:number-columns-repeated="4"/>
        </table:table-row>
        <table:table-row table:style-name="ro1">
          <table:table-cell office:value-type="float" office:value="590.052001953125">
            <text:p>590.0520019531</text:p>
          </table:table-cell>
          <table:table-cell office:value-type="float" office:value="0.04042599">
            <text:p>0.04042599</text:p>
          </table:table-cell>
          <table:table-cell table:number-columns-repeated="4"/>
        </table:table-row>
        <table:table-row table:style-name="ro1">
          <table:table-cell office:value-type="float" office:value="590.170654296875">
            <text:p>590.1706542969</text:p>
          </table:table-cell>
          <table:table-cell office:value-type="float" office:value="0.0456641">
            <text:p>0.0456641</text:p>
          </table:table-cell>
          <table:table-cell table:number-columns-repeated="4"/>
        </table:table-row>
        <table:table-row table:style-name="ro1">
          <table:table-cell office:value-type="float" office:value="590.289367675781">
            <text:p>590.2893676758</text:p>
          </table:table-cell>
          <table:table-cell office:value-type="float" office:value="0.03709556">
            <text:p>0.03709556</text:p>
          </table:table-cell>
          <table:table-cell table:number-columns-repeated="4"/>
        </table:table-row>
        <table:table-row table:style-name="ro1">
          <table:table-cell office:value-type="float" office:value="590.408020019531">
            <text:p>590.4080200195</text:p>
          </table:table-cell>
          <table:table-cell office:value-type="float" office:value="0.08399249">
            <text:p>0.08399249</text:p>
          </table:table-cell>
          <table:table-cell table:number-columns-repeated="4"/>
        </table:table-row>
        <table:table-row table:style-name="ro1">
          <table:table-cell office:value-type="float" office:value="590.526733398438">
            <text:p>590.5267333984</text:p>
          </table:table-cell>
          <table:table-cell office:value-type="float" office:value="0.05169294">
            <text:p>0.05169294</text:p>
          </table:table-cell>
          <table:table-cell table:number-columns-repeated="4"/>
        </table:table-row>
        <table:table-row table:style-name="ro1">
          <table:table-cell office:value-type="float" office:value="590.645446777344">
            <text:p>590.6454467773</text:p>
          </table:table-cell>
          <table:table-cell office:value-type="float" office:value="0.03865507">
            <text:p>0.03865507</text:p>
          </table:table-cell>
          <table:table-cell table:number-columns-repeated="4"/>
        </table:table-row>
        <table:table-row table:style-name="ro1">
          <table:table-cell office:value-type="float" office:value="590.764099121094">
            <text:p>590.7640991211</text:p>
          </table:table-cell>
          <table:table-cell office:value-type="float" office:value="0.04017843">
            <text:p>0.04017843</text:p>
          </table:table-cell>
          <table:table-cell table:number-columns-repeated="4"/>
        </table:table-row>
        <table:table-row table:style-name="ro1">
          <table:table-cell office:value-type="float" office:value="590.8828125">
            <text:p>590.8828125</text:p>
          </table:table-cell>
          <table:table-cell office:value-type="float" office:value="0.05061047">
            <text:p>0.05061047</text:p>
          </table:table-cell>
          <table:table-cell table:number-columns-repeated="4"/>
        </table:table-row>
        <table:table-row table:style-name="ro1">
          <table:table-cell office:value-type="float" office:value="591.001525878906">
            <text:p>591.0015258789</text:p>
          </table:table-cell>
          <table:table-cell office:value-type="float" office:value="0.05303752">
            <text:p>0.05303752</text:p>
          </table:table-cell>
          <table:table-cell table:number-columns-repeated="4"/>
        </table:table-row>
        <table:table-row table:style-name="ro1">
          <table:table-cell office:value-type="float" office:value="591.120239257813">
            <text:p>591.1202392578</text:p>
          </table:table-cell>
          <table:table-cell office:value-type="float" office:value="0.03950573">
            <text:p>0.03950573</text:p>
          </table:table-cell>
          <table:table-cell table:number-columns-repeated="4"/>
        </table:table-row>
        <table:table-row table:style-name="ro1">
          <table:table-cell office:value-type="float" office:value="591.238891601563">
            <text:p>591.2388916016</text:p>
          </table:table-cell>
          <table:table-cell office:value-type="float" office:value="0.03898382">
            <text:p>0.03898382</text:p>
          </table:table-cell>
          <table:table-cell table:number-columns-repeated="4"/>
        </table:table-row>
        <table:table-row table:style-name="ro1">
          <table:table-cell office:value-type="float" office:value="591.357604980469">
            <text:p>591.3576049805</text:p>
          </table:table-cell>
          <table:table-cell office:value-type="float" office:value="0.049072">
            <text:p>0.049072</text:p>
          </table:table-cell>
          <table:table-cell table:number-columns-repeated="4"/>
        </table:table-row>
        <table:table-row table:style-name="ro1">
          <table:table-cell office:value-type="float" office:value="591.476318359375">
            <text:p>591.4763183594</text:p>
          </table:table-cell>
          <table:table-cell office:value-type="float" office:value="0.04086078">
            <text:p>0.04086078</text:p>
          </table:table-cell>
          <table:table-cell table:number-columns-repeated="4"/>
        </table:table-row>
        <table:table-row table:style-name="ro1">
          <table:table-cell office:value-type="float" office:value="591.595031738281">
            <text:p>591.5950317383</text:p>
          </table:table-cell>
          <table:table-cell office:value-type="float" office:value="0.05661986">
            <text:p>0.05661986</text:p>
          </table:table-cell>
          <table:table-cell table:number-columns-repeated="4"/>
        </table:table-row>
        <table:table-row table:style-name="ro1">
          <table:table-cell office:value-type="float" office:value="591.713745117188">
            <text:p>591.7137451172</text:p>
          </table:table-cell>
          <table:table-cell office:value-type="float" office:value="0.04308109">
            <text:p>0.04308109</text:p>
          </table:table-cell>
          <table:table-cell table:number-columns-repeated="4"/>
        </table:table-row>
        <table:table-row table:style-name="ro1">
          <table:table-cell office:value-type="float" office:value="591.832458496094">
            <text:p>591.8324584961</text:p>
          </table:table-cell>
          <table:table-cell office:value-type="float" office:value="0.05555413">
            <text:p>0.05555413</text:p>
          </table:table-cell>
          <table:table-cell table:number-columns-repeated="4"/>
        </table:table-row>
        <table:table-row table:style-name="ro1">
          <table:table-cell office:value-type="float" office:value="591.951232910156">
            <text:p>591.9512329102</text:p>
          </table:table-cell>
          <table:table-cell office:value-type="float" office:value="0.04297845">
            <text:p>0.04297845</text:p>
          </table:table-cell>
          <table:table-cell table:number-columns-repeated="4"/>
        </table:table-row>
        <table:table-row table:style-name="ro1">
          <table:table-cell office:value-type="float" office:value="592.069946289063">
            <text:p>592.0699462891</text:p>
          </table:table-cell>
          <table:table-cell office:value-type="float" office:value="0.04776141">
            <text:p>0.04776141</text:p>
          </table:table-cell>
          <table:table-cell table:number-columns-repeated="4"/>
        </table:table-row>
        <table:table-row table:style-name="ro1">
          <table:table-cell office:value-type="float" office:value="592.188659667969">
            <text:p>592.188659668</text:p>
          </table:table-cell>
          <table:table-cell office:value-type="float" office:value="0.03661172">
            <text:p>0.03661172</text:p>
          </table:table-cell>
          <table:table-cell table:number-columns-repeated="4"/>
        </table:table-row>
        <table:table-row table:style-name="ro1">
          <table:table-cell office:value-type="float" office:value="592.307373046875">
            <text:p>592.3073730469</text:p>
          </table:table-cell>
          <table:table-cell office:value-type="float" office:value="0.03714456">
            <text:p>0.03714456</text:p>
          </table:table-cell>
          <table:table-cell table:number-columns-repeated="4"/>
        </table:table-row>
        <table:table-row table:style-name="ro1">
          <table:table-cell office:value-type="float" office:value="592.426086425781">
            <text:p>592.4260864258</text:p>
          </table:table-cell>
          <table:table-cell office:value-type="float" office:value="0.06017533">
            <text:p>0.06017533</text:p>
          </table:table-cell>
          <table:table-cell table:number-columns-repeated="4"/>
        </table:table-row>
        <table:table-row table:style-name="ro1">
          <table:table-cell office:value-type="float" office:value="592.544860839844">
            <text:p>592.5448608398</text:p>
          </table:table-cell>
          <table:table-cell office:value-type="float" office:value="0.03711977">
            <text:p>0.03711977</text:p>
          </table:table-cell>
          <table:table-cell table:number-columns-repeated="4"/>
        </table:table-row>
        <table:table-row table:style-name="ro1">
          <table:table-cell office:value-type="float" office:value="592.66357421875">
            <text:p>592.6635742188</text:p>
          </table:table-cell>
          <table:table-cell office:value-type="float" office:value="0.03606366">
            <text:p>0.03606366</text:p>
          </table:table-cell>
          <table:table-cell table:number-columns-repeated="4"/>
        </table:table-row>
        <table:table-row table:style-name="ro1">
          <table:table-cell office:value-type="float" office:value="592.782348632813">
            <text:p>592.7823486328</text:p>
          </table:table-cell>
          <table:table-cell office:value-type="float" office:value="0.03579972">
            <text:p>0.03579972</text:p>
          </table:table-cell>
          <table:table-cell table:number-columns-repeated="4"/>
        </table:table-row>
        <table:table-row table:style-name="ro1">
          <table:table-cell office:value-type="float" office:value="592.901062011719">
            <text:p>592.9010620117</text:p>
          </table:table-cell>
          <table:table-cell office:value-type="float" office:value="0.0406591">
            <text:p>0.0406591</text:p>
          </table:table-cell>
          <table:table-cell table:number-columns-repeated="4"/>
        </table:table-row>
        <table:table-row table:style-name="ro1">
          <table:table-cell office:value-type="float" office:value="593.019775390625">
            <text:p>593.0197753906</text:p>
          </table:table-cell>
          <table:table-cell office:value-type="float" office:value="0.035426">
            <text:p>0.035426</text:p>
          </table:table-cell>
          <table:table-cell table:number-columns-repeated="4"/>
        </table:table-row>
        <table:table-row table:style-name="ro1">
          <table:table-cell office:value-type="float" office:value="593.138549804688">
            <text:p>593.1385498047</text:p>
          </table:table-cell>
          <table:table-cell office:value-type="float" office:value="0.03318584">
            <text:p>0.03318584</text:p>
          </table:table-cell>
          <table:table-cell table:number-columns-repeated="4"/>
        </table:table-row>
        <table:table-row table:style-name="ro1">
          <table:table-cell office:value-type="float" office:value="593.257263183594">
            <text:p>593.2572631836</text:p>
          </table:table-cell>
          <table:table-cell office:value-type="float" office:value="0.03181082">
            <text:p>0.03181082</text:p>
          </table:table-cell>
          <table:table-cell table:number-columns-repeated="4"/>
        </table:table-row>
        <table:table-row table:style-name="ro1">
          <table:table-cell office:value-type="float" office:value="593.376037597656">
            <text:p>593.3760375977</text:p>
          </table:table-cell>
          <table:table-cell office:value-type="float" office:value="0.0287078">
            <text:p>0.0287078</text:p>
          </table:table-cell>
          <table:table-cell table:number-columns-repeated="4"/>
        </table:table-row>
        <table:table-row table:style-name="ro1">
          <table:table-cell office:value-type="float" office:value="593.494812011719">
            <text:p>593.4948120117</text:p>
          </table:table-cell>
          <table:table-cell office:value-type="float" office:value="0.0459458">
            <text:p>0.0459458</text:p>
          </table:table-cell>
          <table:table-cell table:number-columns-repeated="4"/>
        </table:table-row>
        <table:table-row table:style-name="ro1">
          <table:table-cell office:value-type="float" office:value="593.613525390625">
            <text:p>593.6135253906</text:p>
          </table:table-cell>
          <table:table-cell office:value-type="float" office:value="0.03450427">
            <text:p>0.03450427</text:p>
          </table:table-cell>
          <table:table-cell table:number-columns-repeated="4"/>
        </table:table-row>
        <table:table-row table:style-name="ro1">
          <table:table-cell office:value-type="float" office:value="593.732299804688">
            <text:p>593.7322998047</text:p>
          </table:table-cell>
          <table:table-cell office:value-type="float" office:value="0.03689798">
            <text:p>0.03689798</text:p>
          </table:table-cell>
          <table:table-cell table:number-columns-repeated="4"/>
        </table:table-row>
        <table:table-row table:style-name="ro1">
          <table:table-cell office:value-type="float" office:value="593.85107421875">
            <text:p>593.8510742188</text:p>
          </table:table-cell>
          <table:table-cell office:value-type="float" office:value="0.03797778">
            <text:p>0.03797778</text:p>
          </table:table-cell>
          <table:table-cell table:number-columns-repeated="4"/>
        </table:table-row>
        <table:table-row table:style-name="ro1">
          <table:table-cell office:value-type="float" office:value="593.969848632813">
            <text:p>593.9698486328</text:p>
          </table:table-cell>
          <table:table-cell office:value-type="float" office:value="0.03600129">
            <text:p>0.03600129</text:p>
          </table:table-cell>
          <table:table-cell table:number-columns-repeated="4"/>
        </table:table-row>
        <table:table-row table:style-name="ro1">
          <table:table-cell office:value-type="float" office:value="594.088562011719">
            <text:p>594.0885620117</text:p>
          </table:table-cell>
          <table:table-cell office:value-type="float" office:value="0.03494311">
            <text:p>0.03494311</text:p>
          </table:table-cell>
          <table:table-cell table:number-columns-repeated="4"/>
        </table:table-row>
        <table:table-row table:style-name="ro1">
          <table:table-cell office:value-type="float" office:value="594.207336425781">
            <text:p>594.2073364258</text:p>
          </table:table-cell>
          <table:table-cell office:value-type="float" office:value="0.03849901">
            <text:p>0.03849901</text:p>
          </table:table-cell>
          <table:table-cell table:number-columns-repeated="4"/>
        </table:table-row>
        <table:table-row table:style-name="ro1">
          <table:table-cell office:value-type="float" office:value="594.326110839844">
            <text:p>594.3261108398</text:p>
          </table:table-cell>
          <table:table-cell office:value-type="float" office:value="0.04293739">
            <text:p>0.04293739</text:p>
          </table:table-cell>
          <table:table-cell table:number-columns-repeated="4"/>
        </table:table-row>
        <table:table-row table:style-name="ro1">
          <table:table-cell office:value-type="float" office:value="594.444885253906">
            <text:p>594.4448852539</text:p>
          </table:table-cell>
          <table:table-cell office:value-type="float" office:value="0.0313203">
            <text:p>0.0313203</text:p>
          </table:table-cell>
          <table:table-cell table:number-columns-repeated="4"/>
        </table:table-row>
        <table:table-row table:style-name="ro1">
          <table:table-cell office:value-type="float" office:value="594.563659667969">
            <text:p>594.563659668</text:p>
          </table:table-cell>
          <table:table-cell office:value-type="float" office:value="0.03525754">
            <text:p>0.03525754</text:p>
          </table:table-cell>
          <table:table-cell table:number-columns-repeated="4"/>
        </table:table-row>
        <table:table-row table:style-name="ro1">
          <table:table-cell office:value-type="float" office:value="594.682434082031">
            <text:p>594.682434082</text:p>
          </table:table-cell>
          <table:table-cell office:value-type="float" office:value="0.04043788">
            <text:p>0.04043788</text:p>
          </table:table-cell>
          <table:table-cell table:number-columns-repeated="4"/>
        </table:table-row>
        <table:table-row table:style-name="ro1">
          <table:table-cell office:value-type="float" office:value="594.801208496094">
            <text:p>594.8012084961</text:p>
          </table:table-cell>
          <table:table-cell office:value-type="float" office:value="0.0371217">
            <text:p>0.0371217</text:p>
          </table:table-cell>
          <table:table-cell table:number-columns-repeated="4"/>
        </table:table-row>
        <table:table-row table:style-name="ro1">
          <table:table-cell office:value-type="float" office:value="594.919982910156">
            <text:p>594.9199829102</text:p>
          </table:table-cell>
          <table:table-cell office:value-type="float" office:value="0.03449475">
            <text:p>0.03449475</text:p>
          </table:table-cell>
          <table:table-cell table:number-columns-repeated="4"/>
        </table:table-row>
        <table:table-row table:style-name="ro1">
          <table:table-cell office:value-type="float" office:value="595.038818359375">
            <text:p>595.0388183594</text:p>
          </table:table-cell>
          <table:table-cell office:value-type="float" office:value="0.03932664">
            <text:p>0.03932664</text:p>
          </table:table-cell>
          <table:table-cell table:number-columns-repeated="4"/>
        </table:table-row>
        <table:table-row table:style-name="ro1">
          <table:table-cell office:value-type="float" office:value="595.157592773438">
            <text:p>595.1575927734</text:p>
          </table:table-cell>
          <table:table-cell office:value-type="float" office:value="0.04999144">
            <text:p>0.04999144</text:p>
          </table:table-cell>
          <table:table-cell table:number-columns-repeated="4"/>
        </table:table-row>
        <table:table-row table:style-name="ro1">
          <table:table-cell office:value-type="float" office:value="595.2763671875">
            <text:p>595.2763671875</text:p>
          </table:table-cell>
          <table:table-cell office:value-type="float" office:value="0.0631806">
            <text:p>0.0631806</text:p>
          </table:table-cell>
          <table:table-cell table:number-columns-repeated="4"/>
        </table:table-row>
        <table:table-row table:style-name="ro1">
          <table:table-cell office:value-type="float" office:value="595.395141601563">
            <text:p>595.3951416016</text:p>
          </table:table-cell>
          <table:table-cell office:value-type="float" office:value="0.03960947">
            <text:p>0.03960947</text:p>
          </table:table-cell>
          <table:table-cell table:number-columns-repeated="4"/>
        </table:table-row>
        <table:table-row table:style-name="ro1">
          <table:table-cell office:value-type="float" office:value="595.513916015625">
            <text:p>595.5139160156</text:p>
          </table:table-cell>
          <table:table-cell office:value-type="float" office:value="0.0478858">
            <text:p>0.0478858</text:p>
          </table:table-cell>
          <table:table-cell table:number-columns-repeated="4"/>
        </table:table-row>
        <table:table-row table:style-name="ro1">
          <table:table-cell office:value-type="float" office:value="595.632751464844">
            <text:p>595.6327514648</text:p>
          </table:table-cell>
          <table:table-cell office:value-type="float" office:value="0.0308542">
            <text:p>0.0308542</text:p>
          </table:table-cell>
          <table:table-cell table:number-columns-repeated="4"/>
        </table:table-row>
        <table:table-row table:style-name="ro1">
          <table:table-cell office:value-type="float" office:value="595.751525878906">
            <text:p>595.7515258789</text:p>
          </table:table-cell>
          <table:table-cell office:value-type="float" office:value="0.03613156">
            <text:p>0.03613156</text:p>
          </table:table-cell>
          <table:table-cell table:number-columns-repeated="4"/>
        </table:table-row>
        <table:table-row table:style-name="ro1">
          <table:table-cell office:value-type="float" office:value="595.870361328125">
            <text:p>595.8703613281</text:p>
          </table:table-cell>
          <table:table-cell office:value-type="float" office:value="0.03490805">
            <text:p>0.03490805</text:p>
          </table:table-cell>
          <table:table-cell table:number-columns-repeated="4"/>
        </table:table-row>
        <table:table-row table:style-name="ro1">
          <table:table-cell office:value-type="float" office:value="595.989135742188">
            <text:p>595.9891357422</text:p>
          </table:table-cell>
          <table:table-cell office:value-type="float" office:value="0.04483182">
            <text:p>0.04483182</text:p>
          </table:table-cell>
          <table:table-cell table:number-columns-repeated="4"/>
        </table:table-row>
        <table:table-row table:style-name="ro1">
          <table:table-cell office:value-type="float" office:value="596.107971191406">
            <text:p>596.1079711914</text:p>
          </table:table-cell>
          <table:table-cell office:value-type="float" office:value="0.03689303">
            <text:p>0.03689303</text:p>
          </table:table-cell>
          <table:table-cell table:number-columns-repeated="4"/>
        </table:table-row>
        <table:table-row table:style-name="ro1">
          <table:table-cell office:value-type="float" office:value="596.226745605469">
            <text:p>596.2267456055</text:p>
          </table:table-cell>
          <table:table-cell office:value-type="float" office:value="0.0415233">
            <text:p>0.0415233</text:p>
          </table:table-cell>
          <table:table-cell table:number-columns-repeated="4"/>
        </table:table-row>
        <table:table-row table:style-name="ro1">
          <table:table-cell office:value-type="float" office:value="596.345581054688">
            <text:p>596.3455810547</text:p>
          </table:table-cell>
          <table:table-cell office:value-type="float" office:value="0.03450643">
            <text:p>0.03450643</text:p>
          </table:table-cell>
          <table:table-cell table:number-columns-repeated="4"/>
        </table:table-row>
        <table:table-row table:style-name="ro1">
          <table:table-cell office:value-type="float" office:value="596.46435546875">
            <text:p>596.4643554688</text:p>
          </table:table-cell>
          <table:table-cell office:value-type="float" office:value="0.04990047">
            <text:p>0.04990047</text:p>
          </table:table-cell>
          <table:table-cell table:number-columns-repeated="4"/>
        </table:table-row>
        <table:table-row table:style-name="ro1">
          <table:table-cell office:value-type="float" office:value="596.583190917969">
            <text:p>596.583190918</text:p>
          </table:table-cell>
          <table:table-cell office:value-type="float" office:value="0.03486912">
            <text:p>0.03486912</text:p>
          </table:table-cell>
          <table:table-cell table:number-columns-repeated="4"/>
        </table:table-row>
        <table:table-row table:style-name="ro1">
          <table:table-cell office:value-type="float" office:value="596.702026367188">
            <text:p>596.7020263672</text:p>
          </table:table-cell>
          <table:table-cell office:value-type="float" office:value="0.03919427">
            <text:p>0.03919427</text:p>
          </table:table-cell>
          <table:table-cell table:number-columns-repeated="4"/>
        </table:table-row>
        <table:table-row table:style-name="ro1">
          <table:table-cell office:value-type="float" office:value="596.82080078125">
            <text:p>596.8208007813</text:p>
          </table:table-cell>
          <table:table-cell office:value-type="float" office:value="0.03577431">
            <text:p>0.03577431</text:p>
          </table:table-cell>
          <table:table-cell table:number-columns-repeated="4"/>
        </table:table-row>
        <table:table-row table:style-name="ro1">
          <table:table-cell office:value-type="float" office:value="596.939636230469">
            <text:p>596.9396362305</text:p>
          </table:table-cell>
          <table:table-cell office:value-type="float" office:value="0.0324037">
            <text:p>0.0324037</text:p>
          </table:table-cell>
          <table:table-cell table:number-columns-repeated="4"/>
        </table:table-row>
        <table:table-row table:style-name="ro1">
          <table:table-cell office:value-type="float" office:value="597.058471679688">
            <text:p>597.0584716797</text:p>
          </table:table-cell>
          <table:table-cell office:value-type="float" office:value="0.03695567">
            <text:p>0.03695567</text:p>
          </table:table-cell>
          <table:table-cell table:number-columns-repeated="4"/>
        </table:table-row>
        <table:table-row table:style-name="ro1">
          <table:table-cell office:value-type="float" office:value="597.177307128906">
            <text:p>597.1773071289</text:p>
          </table:table-cell>
          <table:table-cell office:value-type="float" office:value="0.03421612">
            <text:p>0.03421612</text:p>
          </table:table-cell>
          <table:table-cell table:number-columns-repeated="4"/>
        </table:table-row>
        <table:table-row table:style-name="ro1">
          <table:table-cell office:value-type="float" office:value="597.296142578125">
            <text:p>597.2961425781</text:p>
          </table:table-cell>
          <table:table-cell office:value-type="float" office:value="0.04831388">
            <text:p>0.04831388</text:p>
          </table:table-cell>
          <table:table-cell table:number-columns-repeated="4"/>
        </table:table-row>
        <table:table-row table:style-name="ro1">
          <table:table-cell office:value-type="float" office:value="597.414978027344">
            <text:p>597.4149780273</text:p>
          </table:table-cell>
          <table:table-cell office:value-type="float" office:value="0.03504361">
            <text:p>0.03504361</text:p>
          </table:table-cell>
          <table:table-cell table:number-columns-repeated="4"/>
        </table:table-row>
        <table:table-row table:style-name="ro1">
          <table:table-cell office:value-type="float" office:value="597.533752441406">
            <text:p>597.5337524414</text:p>
          </table:table-cell>
          <table:table-cell office:value-type="float" office:value="0.02886068">
            <text:p>0.02886068</text:p>
          </table:table-cell>
          <table:table-cell table:number-columns-repeated="4"/>
        </table:table-row>
        <table:table-row table:style-name="ro1">
          <table:table-cell office:value-type="float" office:value="597.652587890625">
            <text:p>597.6525878906</text:p>
          </table:table-cell>
          <table:table-cell office:value-type="float" office:value="0.05711151">
            <text:p>0.05711151</text:p>
          </table:table-cell>
          <table:table-cell table:number-columns-repeated="4"/>
        </table:table-row>
        <table:table-row table:style-name="ro1">
          <table:table-cell office:value-type="float" office:value="597.771423339844">
            <text:p>597.7714233398</text:p>
          </table:table-cell>
          <table:table-cell office:value-type="float" office:value="0.03957182">
            <text:p>0.03957182</text:p>
          </table:table-cell>
          <table:table-cell table:number-columns-repeated="4"/>
        </table:table-row>
        <table:table-row table:style-name="ro1">
          <table:table-cell office:value-type="float" office:value="597.890319824219">
            <text:p>597.8903198242</text:p>
          </table:table-cell>
          <table:table-cell office:value-type="float" office:value="0.04169816">
            <text:p>0.04169816</text:p>
          </table:table-cell>
          <table:table-cell table:number-columns-repeated="4"/>
        </table:table-row>
        <table:table-row table:style-name="ro1">
          <table:table-cell office:value-type="float" office:value="598.009155273438">
            <text:p>598.0091552734</text:p>
          </table:table-cell>
          <table:table-cell office:value-type="float" office:value="0.03440027">
            <text:p>0.03440027</text:p>
          </table:table-cell>
          <table:table-cell table:number-columns-repeated="4"/>
        </table:table-row>
        <table:table-row table:style-name="ro1">
          <table:table-cell office:value-type="float" office:value="598.127990722656">
            <text:p>598.1279907227</text:p>
          </table:table-cell>
          <table:table-cell office:value-type="float" office:value="0.03040247">
            <text:p>0.03040247</text:p>
          </table:table-cell>
          <table:table-cell table:number-columns-repeated="4"/>
        </table:table-row>
        <table:table-row table:style-name="ro1">
          <table:table-cell office:value-type="float" office:value="598.246826171875">
            <text:p>598.2468261719</text:p>
          </table:table-cell>
          <table:table-cell office:value-type="float" office:value="0.04285029">
            <text:p>0.04285029</text:p>
          </table:table-cell>
          <table:table-cell table:number-columns-repeated="4"/>
        </table:table-row>
        <table:table-row table:style-name="ro1">
          <table:table-cell office:value-type="float" office:value="598.365661621094">
            <text:p>598.3656616211</text:p>
          </table:table-cell>
          <table:table-cell office:value-type="float" office:value="0.0372622">
            <text:p>0.0372622</text:p>
          </table:table-cell>
          <table:table-cell table:number-columns-repeated="4"/>
        </table:table-row>
        <table:table-row table:style-name="ro1">
          <table:table-cell office:value-type="float" office:value="598.484497070313">
            <text:p>598.4844970703</text:p>
          </table:table-cell>
          <table:table-cell office:value-type="float" office:value="0.0329406">
            <text:p>0.0329406</text:p>
          </table:table-cell>
          <table:table-cell table:number-columns-repeated="4"/>
        </table:table-row>
        <table:table-row table:style-name="ro1">
          <table:table-cell office:value-type="float" office:value="598.603393554688">
            <text:p>598.6033935547</text:p>
          </table:table-cell>
          <table:table-cell office:value-type="float" office:value="0.04155453">
            <text:p>0.04155453</text:p>
          </table:table-cell>
          <table:table-cell table:number-columns-repeated="4"/>
        </table:table-row>
        <table:table-row table:style-name="ro1">
          <table:table-cell office:value-type="float" office:value="598.722229003906">
            <text:p>598.7222290039</text:p>
          </table:table-cell>
          <table:table-cell office:value-type="float" office:value="0.02907451">
            <text:p>0.02907451</text:p>
          </table:table-cell>
          <table:table-cell table:number-columns-repeated="4"/>
        </table:table-row>
        <table:table-row table:style-name="ro1">
          <table:table-cell office:value-type="float" office:value="598.841064453125">
            <text:p>598.8410644531</text:p>
          </table:table-cell>
          <table:table-cell office:value-type="float" office:value="0.03230562">
            <text:p>0.03230562</text:p>
          </table:table-cell>
          <table:table-cell table:number-columns-repeated="4"/>
        </table:table-row>
        <table:table-row table:style-name="ro1">
          <table:table-cell office:value-type="float" office:value="598.9599609375">
            <text:p>598.9599609375</text:p>
          </table:table-cell>
          <table:table-cell office:value-type="float" office:value="0.04547882">
            <text:p>0.04547882</text:p>
          </table:table-cell>
          <table:table-cell table:number-columns-repeated="4"/>
        </table:table-row>
        <table:table-row table:style-name="ro1">
          <table:table-cell office:value-type="float" office:value="599.078796386719">
            <text:p>599.0787963867</text:p>
          </table:table-cell>
          <table:table-cell office:value-type="float" office:value="0.04568696">
            <text:p>0.04568696</text:p>
          </table:table-cell>
          <table:table-cell table:number-columns-repeated="4"/>
        </table:table-row>
        <table:table-row table:style-name="ro1">
          <table:table-cell office:value-type="float" office:value="599.197692871094">
            <text:p>599.1976928711</text:p>
          </table:table-cell>
          <table:table-cell office:value-type="float" office:value="0.0366137">
            <text:p>0.0366137</text:p>
          </table:table-cell>
          <table:table-cell table:number-columns-repeated="4"/>
        </table:table-row>
        <table:table-row table:style-name="ro1">
          <table:table-cell office:value-type="float" office:value="599.316528320313">
            <text:p>599.3165283203</text:p>
          </table:table-cell>
          <table:table-cell office:value-type="float" office:value="0.02190009">
            <text:p>0.02190009</text:p>
          </table:table-cell>
          <table:table-cell table:number-columns-repeated="4"/>
        </table:table-row>
        <table:table-row table:style-name="ro1">
          <table:table-cell office:value-type="float" office:value="599.435424804688">
            <text:p>599.4354248047</text:p>
          </table:table-cell>
          <table:table-cell office:value-type="float" office:value="0.04064655">
            <text:p>0.04064655</text:p>
          </table:table-cell>
          <table:table-cell table:number-columns-repeated="4"/>
        </table:table-row>
        <table:table-row table:style-name="ro1">
          <table:table-cell office:value-type="float" office:value="599.554321289063">
            <text:p>599.5543212891</text:p>
          </table:table-cell>
          <table:table-cell office:value-type="float" office:value="0.02690322">
            <text:p>0.02690322</text:p>
          </table:table-cell>
          <table:table-cell table:number-columns-repeated="4"/>
        </table:table-row>
        <table:table-row table:style-name="ro1">
          <table:table-cell office:value-type="float" office:value="599.673156738281">
            <text:p>599.6731567383</text:p>
          </table:table-cell>
          <table:table-cell office:value-type="float" office:value="0.0299789">
            <text:p>0.0299789</text:p>
          </table:table-cell>
          <table:table-cell table:number-columns-repeated="4"/>
        </table:table-row>
        <table:table-row table:style-name="ro1">
          <table:table-cell office:value-type="float" office:value="599.792053222656">
            <text:p>599.7920532227</text:p>
          </table:table-cell>
          <table:table-cell office:value-type="float" office:value="0.03677924">
            <text:p>0.03677924</text:p>
          </table:table-cell>
          <table:table-cell table:number-columns-repeated="4"/>
        </table:table-row>
        <table:table-row table:style-name="ro1">
          <table:table-cell office:value-type="float" office:value="599.910949707031">
            <text:p>599.910949707</text:p>
          </table:table-cell>
          <table:table-cell office:value-type="float" office:value="0.03873828">
            <text:p>0.03873828</text:p>
          </table:table-cell>
          <table:table-cell table:number-columns-repeated="4"/>
        </table:table-row>
        <table:table-row table:style-name="ro1">
          <table:table-cell office:value-type="float" office:value="600.02978515625">
            <text:p>600.0297851563</text:p>
          </table:table-cell>
          <table:table-cell office:value-type="float" office:value="0.02983661">
            <text:p>0.02983661</text:p>
          </table:table-cell>
          <table:table-cell table:number-columns-repeated="4"/>
        </table:table-row>
        <table:table-row table:style-name="ro1">
          <table:table-cell office:value-type="float" office:value="600.148681640625">
            <text:p>600.1486816406</text:p>
          </table:table-cell>
          <table:table-cell office:value-type="float" office:value="0.03830654">
            <text:p>0.03830654</text:p>
          </table:table-cell>
          <table:table-cell table:number-columns-repeated="4"/>
        </table:table-row>
        <table:table-row table:style-name="ro1">
          <table:table-cell office:value-type="float" office:value="600.267578125">
            <text:p>600.267578125</text:p>
          </table:table-cell>
          <table:table-cell office:value-type="float" office:value="0.02867834">
            <text:p>0.02867834</text:p>
          </table:table-cell>
          <table:table-cell table:number-columns-repeated="4"/>
        </table:table-row>
        <table:table-row table:style-name="ro1">
          <table:table-cell office:value-type="float" office:value="600.386474609375">
            <text:p>600.3864746094</text:p>
          </table:table-cell>
          <table:table-cell office:value-type="float" office:value="0.0253226">
            <text:p>0.0253226</text:p>
          </table:table-cell>
          <table:table-cell table:number-columns-repeated="4"/>
        </table:table-row>
        <table:table-row table:style-name="ro1">
          <table:table-cell office:value-type="float" office:value="600.50537109375">
            <text:p>600.5053710938</text:p>
          </table:table-cell>
          <table:table-cell office:value-type="float" office:value="0.05496502">
            <text:p>0.05496502</text:p>
          </table:table-cell>
          <table:table-cell table:number-columns-repeated="4"/>
        </table:table-row>
        <table:table-row table:style-name="ro1">
          <table:table-cell office:value-type="float" office:value="600.624267578125">
            <text:p>600.6242675781</text:p>
          </table:table-cell>
          <table:table-cell office:value-type="float" office:value="0.02432779">
            <text:p>0.02432779</text:p>
          </table:table-cell>
          <table:table-cell table:number-columns-repeated="4"/>
        </table:table-row>
        <table:table-row table:style-name="ro1">
          <table:table-cell office:value-type="float" office:value="600.7431640625">
            <text:p>600.7431640625</text:p>
          </table:table-cell>
          <table:table-cell office:value-type="float" office:value="0.02936729">
            <text:p>0.02936729</text:p>
          </table:table-cell>
          <table:table-cell table:number-columns-repeated="4"/>
        </table:table-row>
        <table:table-row table:style-name="ro1">
          <table:table-cell office:value-type="float" office:value="600.862060546875">
            <text:p>600.8620605469</text:p>
          </table:table-cell>
          <table:table-cell office:value-type="float" office:value="0.02070575">
            <text:p>0.02070575</text:p>
          </table:table-cell>
          <table:table-cell table:number-columns-repeated="4"/>
        </table:table-row>
        <table:table-row table:style-name="ro1">
          <table:table-cell office:value-type="float" office:value="600.98095703125">
            <text:p>600.9809570313</text:p>
          </table:table-cell>
          <table:table-cell office:value-type="float" office:value="0.03238922">
            <text:p>0.03238922</text:p>
          </table:table-cell>
          <table:table-cell table:number-columns-repeated="4"/>
        </table:table-row>
        <table:table-row table:style-name="ro1">
          <table:table-cell office:value-type="float" office:value="601.099853515625">
            <text:p>601.0998535156</text:p>
          </table:table-cell>
          <table:table-cell office:value-type="float" office:value="0.02098872">
            <text:p>0.02098872</text:p>
          </table:table-cell>
          <table:table-cell table:number-columns-repeated="4"/>
        </table:table-row>
        <table:table-row table:style-name="ro1">
          <table:table-cell office:value-type="float" office:value="601.21875">
            <text:p>601.21875</text:p>
          </table:table-cell>
          <table:table-cell office:value-type="float" office:value="0.03234525">
            <text:p>0.03234525</text:p>
          </table:table-cell>
          <table:table-cell table:number-columns-repeated="4"/>
        </table:table-row>
        <table:table-row table:style-name="ro1">
          <table:table-cell office:value-type="float" office:value="601.337646484375">
            <text:p>601.3376464844</text:p>
          </table:table-cell>
          <table:table-cell office:value-type="float" office:value="0.03253861">
            <text:p>0.03253861</text:p>
          </table:table-cell>
          <table:table-cell table:number-columns-repeated="4"/>
        </table:table-row>
        <table:table-row table:style-name="ro1">
          <table:table-cell office:value-type="float" office:value="601.45654296875">
            <text:p>601.4565429688</text:p>
          </table:table-cell>
          <table:table-cell office:value-type="float" office:value="0.02952866">
            <text:p>0.02952866</text:p>
          </table:table-cell>
          <table:table-cell table:number-columns-repeated="4"/>
        </table:table-row>
        <table:table-row table:style-name="ro1">
          <table:table-cell office:value-type="float" office:value="601.575500488281">
            <text:p>601.5755004883</text:p>
          </table:table-cell>
          <table:table-cell office:value-type="float" office:value="0.0267152">
            <text:p>0.0267152</text:p>
          </table:table-cell>
          <table:table-cell table:number-columns-repeated="4"/>
        </table:table-row>
        <table:table-row table:style-name="ro1">
          <table:table-cell office:value-type="float" office:value="601.694396972656">
            <text:p>601.6943969727</text:p>
          </table:table-cell>
          <table:table-cell office:value-type="float" office:value="0.03084935">
            <text:p>0.03084935</text:p>
          </table:table-cell>
          <table:table-cell table:number-columns-repeated="4"/>
        </table:table-row>
        <table:table-row table:style-name="ro1">
          <table:table-cell office:value-type="float" office:value="601.813293457031">
            <text:p>601.813293457</text:p>
          </table:table-cell>
          <table:table-cell office:value-type="float" office:value="0.03096004">
            <text:p>0.03096004</text:p>
          </table:table-cell>
          <table:table-cell table:number-columns-repeated="4"/>
        </table:table-row>
        <table:table-row table:style-name="ro1">
          <table:table-cell office:value-type="float" office:value="601.932250976563">
            <text:p>601.9322509766</text:p>
          </table:table-cell>
          <table:table-cell office:value-type="float" office:value="0.02564978">
            <text:p>0.02564978</text:p>
          </table:table-cell>
          <table:table-cell table:number-columns-repeated="4"/>
        </table:table-row>
        <table:table-row table:style-name="ro1">
          <table:table-cell office:value-type="float" office:value="602.051147460938">
            <text:p>602.0511474609</text:p>
          </table:table-cell>
          <table:table-cell office:value-type="float" office:value="0.03400851">
            <text:p>0.03400851</text:p>
          </table:table-cell>
          <table:table-cell table:number-columns-repeated="4"/>
        </table:table-row>
        <table:table-row table:style-name="ro1">
          <table:table-cell office:value-type="float" office:value="602.170043945313">
            <text:p>602.1700439453</text:p>
          </table:table-cell>
          <table:table-cell office:value-type="float" office:value="0.03719096">
            <text:p>0.03719096</text:p>
          </table:table-cell>
          <table:table-cell table:number-columns-repeated="4"/>
        </table:table-row>
        <table:table-row table:style-name="ro1">
          <table:table-cell office:value-type="float" office:value="602.289001464844">
            <text:p>602.2890014648</text:p>
          </table:table-cell>
          <table:table-cell office:value-type="float" office:value="0.01959272">
            <text:p>0.01959272</text:p>
          </table:table-cell>
          <table:table-cell table:number-columns-repeated="4"/>
        </table:table-row>
        <table:table-row table:style-name="ro1">
          <table:table-cell office:value-type="float" office:value="602.407897949219">
            <text:p>602.4078979492</text:p>
          </table:table-cell>
          <table:table-cell office:value-type="float" office:value="0.03268209">
            <text:p>0.03268209</text:p>
          </table:table-cell>
          <table:table-cell table:number-columns-repeated="4"/>
        </table:table-row>
        <table:table-row table:style-name="ro1">
          <table:table-cell office:value-type="float" office:value="602.52685546875">
            <text:p>602.5268554688</text:p>
          </table:table-cell>
          <table:table-cell office:value-type="float" office:value="0.03422034">
            <text:p>0.03422034</text:p>
          </table:table-cell>
          <table:table-cell table:number-columns-repeated="4"/>
        </table:table-row>
        <table:table-row table:style-name="ro1">
          <table:table-cell office:value-type="float" office:value="602.645751953125">
            <text:p>602.6457519531</text:p>
          </table:table-cell>
          <table:table-cell office:value-type="float" office:value="0.01965682">
            <text:p>0.01965682</text:p>
          </table:table-cell>
          <table:table-cell table:number-columns-repeated="4"/>
        </table:table-row>
        <table:table-row table:style-name="ro1">
          <table:table-cell office:value-type="float" office:value="602.764709472656">
            <text:p>602.7647094727</text:p>
          </table:table-cell>
          <table:table-cell office:value-type="float" office:value="0.02260624">
            <text:p>0.02260624</text:p>
          </table:table-cell>
          <table:table-cell table:number-columns-repeated="4"/>
        </table:table-row>
        <table:table-row table:style-name="ro1">
          <table:table-cell office:value-type="float" office:value="602.883666992188">
            <text:p>602.8836669922</text:p>
          </table:table-cell>
          <table:table-cell office:value-type="float" office:value="0.01339398">
            <text:p>0.01339398</text:p>
          </table:table-cell>
          <table:table-cell table:number-columns-repeated="4"/>
        </table:table-row>
        <table:table-row table:style-name="ro1">
          <table:table-cell office:value-type="float" office:value="603.002563476563">
            <text:p>603.0025634766</text:p>
          </table:table-cell>
          <table:table-cell office:value-type="float" office:value="0.02624774">
            <text:p>0.02624774</text:p>
          </table:table-cell>
          <table:table-cell table:number-columns-repeated="4"/>
        </table:table-row>
        <table:table-row table:style-name="ro1">
          <table:table-cell office:value-type="float" office:value="603.121520996094">
            <text:p>603.1215209961</text:p>
          </table:table-cell>
          <table:table-cell office:value-type="float" office:value="0.0292872">
            <text:p>0.0292872</text:p>
          </table:table-cell>
          <table:table-cell table:number-columns-repeated="4"/>
        </table:table-row>
        <table:table-row table:style-name="ro1">
          <table:table-cell office:value-type="float" office:value="603.240478515625">
            <text:p>603.2404785156</text:p>
          </table:table-cell>
          <table:table-cell office:value-type="float" office:value="0.03516763">
            <text:p>0.03516763</text:p>
          </table:table-cell>
          <table:table-cell table:number-columns-repeated="4"/>
        </table:table-row>
        <table:table-row table:style-name="ro1">
          <table:table-cell office:value-type="float" office:value="603.359436035156">
            <text:p>603.3594360352</text:p>
          </table:table-cell>
          <table:table-cell office:value-type="float" office:value="0.03437725">
            <text:p>0.03437725</text:p>
          </table:table-cell>
          <table:table-cell table:number-columns-repeated="4"/>
        </table:table-row>
        <table:table-row table:style-name="ro1">
          <table:table-cell office:value-type="float" office:value="603.478393554688">
            <text:p>603.4783935547</text:p>
          </table:table-cell>
          <table:table-cell office:value-type="float" office:value="0.02759279">
            <text:p>0.02759279</text:p>
          </table:table-cell>
          <table:table-cell table:number-columns-repeated="4"/>
        </table:table-row>
        <table:table-row table:style-name="ro1">
          <table:table-cell office:value-type="float" office:value="603.597290039063">
            <text:p>603.5972900391</text:p>
          </table:table-cell>
          <table:table-cell office:value-type="float" office:value="0.02632273">
            <text:p>0.02632273</text:p>
          </table:table-cell>
          <table:table-cell table:number-columns-repeated="4"/>
        </table:table-row>
        <table:table-row table:style-name="ro1">
          <table:table-cell office:value-type="float" office:value="603.716247558594">
            <text:p>603.7162475586</text:p>
          </table:table-cell>
          <table:table-cell office:value-type="float" office:value="0.02466922">
            <text:p>0.02466922</text:p>
          </table:table-cell>
          <table:table-cell table:number-columns-repeated="4"/>
        </table:table-row>
        <table:table-row table:style-name="ro1">
          <table:table-cell office:value-type="float" office:value="603.835205078125">
            <text:p>603.8352050781</text:p>
          </table:table-cell>
          <table:table-cell office:value-type="float" office:value="0.01766544">
            <text:p>0.01766544</text:p>
          </table:table-cell>
          <table:table-cell table:number-columns-repeated="4"/>
        </table:table-row>
        <table:table-row table:style-name="ro1">
          <table:table-cell office:value-type="float" office:value="603.954162597656">
            <text:p>603.9541625977</text:p>
          </table:table-cell>
          <table:table-cell office:value-type="float" office:value="0.02046579">
            <text:p>0.02046579</text:p>
          </table:table-cell>
          <table:table-cell table:number-columns-repeated="4"/>
        </table:table-row>
        <table:table-row table:style-name="ro1">
          <table:table-cell office:value-type="float" office:value="604.073120117188">
            <text:p>604.0731201172</text:p>
          </table:table-cell>
          <table:table-cell office:value-type="float" office:value="0.02181679">
            <text:p>0.02181679</text:p>
          </table:table-cell>
          <table:table-cell table:number-columns-repeated="4"/>
        </table:table-row>
        <table:table-row table:style-name="ro1">
          <table:table-cell office:value-type="float" office:value="604.192077636719">
            <text:p>604.1920776367</text:p>
          </table:table-cell>
          <table:table-cell office:value-type="float" office:value="0.01845416">
            <text:p>0.01845416</text:p>
          </table:table-cell>
          <table:table-cell table:number-columns-repeated="4"/>
        </table:table-row>
        <table:table-row table:style-name="ro1">
          <table:table-cell office:value-type="float" office:value="604.31103515625">
            <text:p>604.3110351563</text:p>
          </table:table-cell>
          <table:table-cell office:value-type="float" office:value="0.04104508">
            <text:p>0.04104508</text:p>
          </table:table-cell>
          <table:table-cell table:number-columns-repeated="4"/>
        </table:table-row>
        <table:table-row table:style-name="ro1">
          <table:table-cell office:value-type="float" office:value="604.430053710938">
            <text:p>604.4300537109</text:p>
          </table:table-cell>
          <table:table-cell office:value-type="float" office:value="0.0251378">
            <text:p>0.0251378</text:p>
          </table:table-cell>
          <table:table-cell table:number-columns-repeated="4"/>
        </table:table-row>
        <table:table-row table:style-name="ro1">
          <table:table-cell office:value-type="float" office:value="604.549011230469">
            <text:p>604.5490112305</text:p>
          </table:table-cell>
          <table:table-cell office:value-type="float" office:value="0.02127745">
            <text:p>0.02127745</text:p>
          </table:table-cell>
          <table:table-cell table:number-columns-repeated="4"/>
        </table:table-row>
        <table:table-row table:style-name="ro1">
          <table:table-cell office:value-type="float" office:value="604.66796875">
            <text:p>604.66796875</text:p>
          </table:table-cell>
          <table:table-cell office:value-type="float" office:value="0.02472644">
            <text:p>0.02472644</text:p>
          </table:table-cell>
          <table:table-cell table:number-columns-repeated="4"/>
        </table:table-row>
        <table:table-row table:style-name="ro1">
          <table:table-cell office:value-type="float" office:value="604.786926269531">
            <text:p>604.7869262695</text:p>
          </table:table-cell>
          <table:table-cell office:value-type="float" office:value="0.03727662">
            <text:p>0.03727662</text:p>
          </table:table-cell>
          <table:table-cell table:number-columns-repeated="4"/>
        </table:table-row>
        <table:table-row table:style-name="ro1">
          <table:table-cell office:value-type="float" office:value="604.905883789063">
            <text:p>604.9058837891</text:p>
          </table:table-cell>
          <table:table-cell office:value-type="float" office:value="0.03446753">
            <text:p>0.03446753</text:p>
          </table:table-cell>
          <table:table-cell table:number-columns-repeated="4"/>
        </table:table-row>
        <table:table-row table:style-name="ro1">
          <table:table-cell office:value-type="float" office:value="605.02490234375">
            <text:p>605.0249023438</text:p>
          </table:table-cell>
          <table:table-cell office:value-type="float" office:value="0.02191509">
            <text:p>0.02191509</text:p>
          </table:table-cell>
          <table:table-cell table:number-columns-repeated="4"/>
        </table:table-row>
        <table:table-row table:style-name="ro1">
          <table:table-cell office:value-type="float" office:value="605.143859863281">
            <text:p>605.1438598633</text:p>
          </table:table-cell>
          <table:table-cell office:value-type="float" office:value="0.01836494">
            <text:p>0.01836494</text:p>
          </table:table-cell>
          <table:table-cell table:number-columns-repeated="4"/>
        </table:table-row>
        <table:table-row table:style-name="ro1">
          <table:table-cell office:value-type="float" office:value="605.262817382813">
            <text:p>605.2628173828</text:p>
          </table:table-cell>
          <table:table-cell office:value-type="float" office:value="0.01686609">
            <text:p>0.01686609</text:p>
          </table:table-cell>
          <table:table-cell table:number-columns-repeated="4"/>
        </table:table-row>
        <table:table-row table:style-name="ro1">
          <table:table-cell office:value-type="float" office:value="605.3818359375">
            <text:p>605.3818359375</text:p>
          </table:table-cell>
          <table:table-cell office:value-type="float" office:value="0.02660089">
            <text:p>0.02660089</text:p>
          </table:table-cell>
          <table:table-cell table:number-columns-repeated="4"/>
        </table:table-row>
        <table:table-row table:style-name="ro1">
          <table:table-cell office:value-type="float" office:value="605.500793457031">
            <text:p>605.500793457</text:p>
          </table:table-cell>
          <table:table-cell office:value-type="float" office:value="0.02305748">
            <text:p>0.02305748</text:p>
          </table:table-cell>
          <table:table-cell table:number-columns-repeated="4"/>
        </table:table-row>
        <table:table-row table:style-name="ro1">
          <table:table-cell office:value-type="float" office:value="605.619812011719">
            <text:p>605.6198120117</text:p>
          </table:table-cell>
          <table:table-cell office:value-type="float" office:value="0.02500957">
            <text:p>0.02500957</text:p>
          </table:table-cell>
          <table:table-cell table:number-columns-repeated="4"/>
        </table:table-row>
        <table:table-row table:style-name="ro1">
          <table:table-cell office:value-type="float" office:value="605.73876953125">
            <text:p>605.7387695313</text:p>
          </table:table-cell>
          <table:table-cell office:value-type="float" office:value="0.01941831">
            <text:p>0.01941831</text:p>
          </table:table-cell>
          <table:table-cell table:number-columns-repeated="4"/>
        </table:table-row>
        <table:table-row table:style-name="ro1">
          <table:table-cell office:value-type="float" office:value="605.857788085938">
            <text:p>605.8577880859</text:p>
          </table:table-cell>
          <table:table-cell office:value-type="float" office:value="0.03425608">
            <text:p>0.03425608</text:p>
          </table:table-cell>
          <table:table-cell table:number-columns-repeated="4"/>
        </table:table-row>
        <table:table-row table:style-name="ro1">
          <table:table-cell office:value-type="float" office:value="605.976806640625">
            <text:p>605.9768066406</text:p>
          </table:table-cell>
          <table:table-cell office:value-type="float" office:value="0.03538922">
            <text:p>0.03538922</text:p>
          </table:table-cell>
          <table:table-cell table:number-columns-repeated="4"/>
        </table:table-row>
        <table:table-row table:style-name="ro1">
          <table:table-cell office:value-type="float" office:value="606.095764160156">
            <text:p>606.0957641602</text:p>
          </table:table-cell>
          <table:table-cell office:value-type="float" office:value="0.02771395">
            <text:p>0.02771395</text:p>
          </table:table-cell>
          <table:table-cell table:number-columns-repeated="4"/>
        </table:table-row>
        <table:table-row table:style-name="ro1">
          <table:table-cell office:value-type="float" office:value="606.214782714844">
            <text:p>606.2147827148</text:p>
          </table:table-cell>
          <table:table-cell office:value-type="float" office:value="0.03563158">
            <text:p>0.03563158</text:p>
          </table:table-cell>
          <table:table-cell table:number-columns-repeated="4"/>
        </table:table-row>
        <table:table-row table:style-name="ro1">
          <table:table-cell office:value-type="float" office:value="606.333801269531">
            <text:p>606.3338012695</text:p>
          </table:table-cell>
          <table:table-cell office:value-type="float" office:value="0.01822617">
            <text:p>0.01822617</text:p>
          </table:table-cell>
          <table:table-cell table:number-columns-repeated="4"/>
        </table:table-row>
        <table:table-row table:style-name="ro1">
          <table:table-cell office:value-type="float" office:value="606.452758789063">
            <text:p>606.4527587891</text:p>
          </table:table-cell>
          <table:table-cell office:value-type="float" office:value="0.032492">
            <text:p>0.032492</text:p>
          </table:table-cell>
          <table:table-cell table:number-columns-repeated="4"/>
        </table:table-row>
        <table:table-row table:style-name="ro1">
          <table:table-cell office:value-type="float" office:value="606.57177734375">
            <text:p>606.5717773438</text:p>
          </table:table-cell>
          <table:table-cell office:value-type="float" office:value="0.01853739">
            <text:p>0.01853739</text:p>
          </table:table-cell>
          <table:table-cell table:number-columns-repeated="4"/>
        </table:table-row>
        <table:table-row table:style-name="ro1">
          <table:table-cell office:value-type="float" office:value="606.690795898438">
            <text:p>606.6907958984</text:p>
          </table:table-cell>
          <table:table-cell office:value-type="float" office:value="0.02489636">
            <text:p>0.02489636</text:p>
          </table:table-cell>
          <table:table-cell table:number-columns-repeated="4"/>
        </table:table-row>
        <table:table-row table:style-name="ro1">
          <table:table-cell office:value-type="float" office:value="606.809814453125">
            <text:p>606.8098144531</text:p>
          </table:table-cell>
          <table:table-cell office:value-type="float" office:value="0.0174248">
            <text:p>0.0174248</text:p>
          </table:table-cell>
          <table:table-cell table:number-columns-repeated="4"/>
        </table:table-row>
        <table:table-row table:style-name="ro1">
          <table:table-cell office:value-type="float" office:value="606.928833007813">
            <text:p>606.9288330078</text:p>
          </table:table-cell>
          <table:table-cell office:value-type="float" office:value="0.01871268">
            <text:p>0.01871268</text:p>
          </table:table-cell>
          <table:table-cell table:number-columns-repeated="4"/>
        </table:table-row>
        <table:table-row table:style-name="ro1">
          <table:table-cell office:value-type="float" office:value="607.0478515625">
            <text:p>607.0478515625</text:p>
          </table:table-cell>
          <table:table-cell office:value-type="float" office:value="0.01628582">
            <text:p>0.01628582</text:p>
          </table:table-cell>
          <table:table-cell table:number-columns-repeated="4"/>
        </table:table-row>
        <table:table-row table:style-name="ro1">
          <table:table-cell office:value-type="float" office:value="607.166870117188">
            <text:p>607.1668701172</text:p>
          </table:table-cell>
          <table:table-cell office:value-type="float" office:value="0.04082143">
            <text:p>0.04082143</text:p>
          </table:table-cell>
          <table:table-cell table:number-columns-repeated="4"/>
        </table:table-row>
        <table:table-row table:style-name="ro1">
          <table:table-cell office:value-type="float" office:value="607.285888671875">
            <text:p>607.2858886719</text:p>
          </table:table-cell>
          <table:table-cell office:value-type="float" office:value="0.03252744">
            <text:p>0.03252744</text:p>
          </table:table-cell>
          <table:table-cell table:number-columns-repeated="4"/>
        </table:table-row>
        <table:table-row table:style-name="ro1">
          <table:table-cell office:value-type="float" office:value="607.404907226563">
            <text:p>607.4049072266</text:p>
          </table:table-cell>
          <table:table-cell office:value-type="float" office:value="0.02655748">
            <text:p>0.02655748</text:p>
          </table:table-cell>
          <table:table-cell table:number-columns-repeated="4"/>
        </table:table-row>
        <table:table-row table:style-name="ro1">
          <table:table-cell office:value-type="float" office:value="607.52392578125">
            <text:p>607.5239257813</text:p>
          </table:table-cell>
          <table:table-cell office:value-type="float" office:value="0.0242745">
            <text:p>0.0242745</text:p>
          </table:table-cell>
          <table:table-cell table:number-columns-repeated="4"/>
        </table:table-row>
        <table:table-row table:style-name="ro1">
          <table:table-cell office:value-type="float" office:value="607.642944335938">
            <text:p>607.6429443359</text:p>
          </table:table-cell>
          <table:table-cell office:value-type="float" office:value="0.02945345">
            <text:p>0.02945345</text:p>
          </table:table-cell>
          <table:table-cell table:number-columns-repeated="4"/>
        </table:table-row>
        <table:table-row table:style-name="ro1">
          <table:table-cell office:value-type="float" office:value="607.761962890625">
            <text:p>607.7619628906</text:p>
          </table:table-cell>
          <table:table-cell office:value-type="float" office:value="0.04265222">
            <text:p>0.04265222</text:p>
          </table:table-cell>
          <table:table-cell table:number-columns-repeated="4"/>
        </table:table-row>
        <table:table-row table:style-name="ro1">
          <table:table-cell office:value-type="float" office:value="607.880981445313">
            <text:p>607.8809814453</text:p>
          </table:table-cell>
          <table:table-cell office:value-type="float" office:value="0.03180748">
            <text:p>0.03180748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01572086">
            <text:p>0.01572086</text:p>
          </table:table-cell>
          <table:table-cell table:number-columns-repeated="4"/>
        </table:table-row>
        <table:table-row table:style-name="ro1">
          <table:table-cell office:value-type="float" office:value="608.119079589844">
            <text:p>608.1190795898</text:p>
          </table:table-cell>
          <table:table-cell office:value-type="float" office:value="0.02177029">
            <text:p>0.02177029</text:p>
          </table:table-cell>
          <table:table-cell table:number-columns-repeated="4"/>
        </table:table-row>
        <table:table-row table:style-name="ro1">
          <table:table-cell office:value-type="float" office:value="608.238098144531">
            <text:p>608.2380981445</text:p>
          </table:table-cell>
          <table:table-cell office:value-type="float" office:value="0.02152762">
            <text:p>0.02152762</text:p>
          </table:table-cell>
          <table:table-cell table:number-columns-repeated="4"/>
        </table:table-row>
        <table:table-row table:style-name="ro1">
          <table:table-cell office:value-type="float" office:value="608.357116699219">
            <text:p>608.3571166992</text:p>
          </table:table-cell>
          <table:table-cell office:value-type="float" office:value="0.020155">
            <text:p>0.020155</text:p>
          </table:table-cell>
          <table:table-cell table:number-columns-repeated="4"/>
        </table:table-row>
        <table:table-row table:style-name="ro1">
          <table:table-cell office:value-type="float" office:value="608.476196289063">
            <text:p>608.4761962891</text:p>
          </table:table-cell>
          <table:table-cell office:value-type="float" office:value="0.02689891">
            <text:p>0.02689891</text:p>
          </table:table-cell>
          <table:table-cell table:number-columns-repeated="4"/>
        </table:table-row>
        <table:table-row table:style-name="ro1">
          <table:table-cell office:value-type="float" office:value="608.59521484375">
            <text:p>608.5952148438</text:p>
          </table:table-cell>
          <table:table-cell office:value-type="float" office:value="0.03734742">
            <text:p>0.03734742</text:p>
          </table:table-cell>
          <table:table-cell table:number-columns-repeated="4"/>
        </table:table-row>
        <table:table-row table:style-name="ro1">
          <table:table-cell office:value-type="float" office:value="608.714233398438">
            <text:p>608.7142333984</text:p>
          </table:table-cell>
          <table:table-cell office:value-type="float" office:value="0.02517927">
            <text:p>0.02517927</text:p>
          </table:table-cell>
          <table:table-cell table:number-columns-repeated="4"/>
        </table:table-row>
        <table:table-row table:style-name="ro1">
          <table:table-cell office:value-type="float" office:value="608.833312988281">
            <text:p>608.8333129883</text:p>
          </table:table-cell>
          <table:table-cell office:value-type="float" office:value="0.02498113">
            <text:p>0.02498113</text:p>
          </table:table-cell>
          <table:table-cell table:number-columns-repeated="4"/>
        </table:table-row>
        <table:table-row table:style-name="ro1">
          <table:table-cell office:value-type="float" office:value="608.952331542969">
            <text:p>608.952331543</text:p>
          </table:table-cell>
          <table:table-cell office:value-type="float" office:value="0.01277811">
            <text:p>0.01277811</text:p>
          </table:table-cell>
          <table:table-cell table:number-columns-repeated="4"/>
        </table:table-row>
        <table:table-row table:style-name="ro1">
          <table:table-cell office:value-type="float" office:value="609.071411132813">
            <text:p>609.0714111328</text:p>
          </table:table-cell>
          <table:table-cell office:value-type="float" office:value="0.01657846">
            <text:p>0.01657846</text:p>
          </table:table-cell>
          <table:table-cell table:number-columns-repeated="4"/>
        </table:table-row>
        <table:table-row table:style-name="ro1">
          <table:table-cell office:value-type="float" office:value="609.1904296875">
            <text:p>609.1904296875</text:p>
          </table:table-cell>
          <table:table-cell office:value-type="float" office:value="0.01455125">
            <text:p>0.01455125</text:p>
          </table:table-cell>
          <table:table-cell table:number-columns-repeated="4"/>
        </table:table-row>
        <table:table-row table:style-name="ro1">
          <table:table-cell office:value-type="float" office:value="609.309509277344">
            <text:p>609.3095092773</text:p>
          </table:table-cell>
          <table:table-cell office:value-type="float" office:value="0.03509172">
            <text:p>0.03509172</text:p>
          </table:table-cell>
          <table:table-cell table:number-columns-repeated="4"/>
        </table:table-row>
        <table:table-row table:style-name="ro1">
          <table:table-cell office:value-type="float" office:value="609.428588867188">
            <text:p>609.4285888672</text:p>
          </table:table-cell>
          <table:table-cell office:value-type="float" office:value="0.02512291">
            <text:p>0.02512291</text:p>
          </table:table-cell>
          <table:table-cell table:number-columns-repeated="4"/>
        </table:table-row>
        <table:table-row table:style-name="ro1">
          <table:table-cell office:value-type="float" office:value="609.547607421875">
            <text:p>609.5476074219</text:p>
          </table:table-cell>
          <table:table-cell office:value-type="float" office:value="0.02388744">
            <text:p>0.02388744</text:p>
          </table:table-cell>
          <table:table-cell table:number-columns-repeated="4"/>
        </table:table-row>
        <table:table-row table:style-name="ro1">
          <table:table-cell office:value-type="float" office:value="609.666687011719">
            <text:p>609.6666870117</text:p>
          </table:table-cell>
          <table:table-cell office:value-type="float" office:value="0.02024621">
            <text:p>0.02024621</text:p>
          </table:table-cell>
          <table:table-cell table:number-columns-repeated="4"/>
        </table:table-row>
        <table:table-row table:style-name="ro1">
          <table:table-cell office:value-type="float" office:value="609.785766601563">
            <text:p>609.7857666016</text:p>
          </table:table-cell>
          <table:table-cell office:value-type="float" office:value="0.01986282">
            <text:p>0.01986282</text:p>
          </table:table-cell>
          <table:table-cell table:number-columns-repeated="4"/>
        </table:table-row>
        <table:table-row table:style-name="ro1">
          <table:table-cell office:value-type="float" office:value="609.904846191406">
            <text:p>609.9048461914</text:p>
          </table:table-cell>
          <table:table-cell office:value-type="float" office:value="0.02299276">
            <text:p>0.02299276</text:p>
          </table:table-cell>
          <table:table-cell table:number-columns-repeated="4"/>
        </table:table-row>
        <table:table-row table:style-name="ro1">
          <table:table-cell office:value-type="float" office:value="610.023864746094">
            <text:p>610.0238647461</text:p>
          </table:table-cell>
          <table:table-cell office:value-type="float" office:value="0.01870862">
            <text:p>0.01870862</text:p>
          </table:table-cell>
          <table:table-cell table:number-columns-repeated="4"/>
        </table:table-row>
        <table:table-row table:style-name="ro1">
          <table:table-cell office:value-type="float" office:value="610.142944335938">
            <text:p>610.1429443359</text:p>
          </table:table-cell>
          <table:table-cell office:value-type="float" office:value="0.0184357">
            <text:p>0.0184357</text:p>
          </table:table-cell>
          <table:table-cell table:number-columns-repeated="4"/>
        </table:table-row>
        <table:table-row table:style-name="ro1">
          <table:table-cell office:value-type="float" office:value="610.262023925781">
            <text:p>610.2620239258</text:p>
          </table:table-cell>
          <table:table-cell office:value-type="float" office:value="0.03762139">
            <text:p>0.03762139</text:p>
          </table:table-cell>
          <table:table-cell table:number-columns-repeated="4"/>
        </table:table-row>
        <table:table-row table:style-name="ro1">
          <table:table-cell office:value-type="float" office:value="610.381103515625">
            <text:p>610.3811035156</text:p>
          </table:table-cell>
          <table:table-cell office:value-type="float" office:value="0.02476114">
            <text:p>0.02476114</text:p>
          </table:table-cell>
          <table:table-cell table:number-columns-repeated="4"/>
        </table:table-row>
        <table:table-row table:style-name="ro1">
          <table:table-cell office:value-type="float" office:value="610.500183105469">
            <text:p>610.5001831055</text:p>
          </table:table-cell>
          <table:table-cell office:value-type="float" office:value="0.02048329">
            <text:p>0.02048329</text:p>
          </table:table-cell>
          <table:table-cell table:number-columns-repeated="4"/>
        </table:table-row>
        <table:table-row table:style-name="ro1">
          <table:table-cell office:value-type="float" office:value="610.619262695313">
            <text:p>610.6192626953</text:p>
          </table:table-cell>
          <table:table-cell office:value-type="float" office:value="0.01546334">
            <text:p>0.01546334</text:p>
          </table:table-cell>
          <table:table-cell table:number-columns-repeated="4"/>
        </table:table-row>
        <table:table-row table:style-name="ro1">
          <table:table-cell office:value-type="float" office:value="610.738342285156">
            <text:p>610.7383422852</text:p>
          </table:table-cell>
          <table:table-cell office:value-type="float" office:value="0.02378043">
            <text:p>0.02378043</text:p>
          </table:table-cell>
          <table:table-cell table:number-columns-repeated="4"/>
        </table:table-row>
        <table:table-row table:style-name="ro1">
          <table:table-cell office:value-type="float" office:value="610.857421875">
            <text:p>610.857421875</text:p>
          </table:table-cell>
          <table:table-cell office:value-type="float" office:value="0.01651883">
            <text:p>0.01651883</text:p>
          </table:table-cell>
          <table:table-cell table:number-columns-repeated="4"/>
        </table:table-row>
        <table:table-row table:style-name="ro1">
          <table:table-cell office:value-type="float" office:value="610.976501464844">
            <text:p>610.9765014648</text:p>
          </table:table-cell>
          <table:table-cell office:value-type="float" office:value="0.02757399">
            <text:p>0.02757399</text:p>
          </table:table-cell>
          <table:table-cell table:number-columns-repeated="4"/>
        </table:table-row>
        <table:table-row table:style-name="ro1">
          <table:table-cell office:value-type="float" office:value="611.095581054688">
            <text:p>611.0955810547</text:p>
          </table:table-cell>
          <table:table-cell office:value-type="float" office:value="0.02324194">
            <text:p>0.02324194</text:p>
          </table:table-cell>
          <table:table-cell table:number-columns-repeated="4"/>
        </table:table-row>
        <table:table-row table:style-name="ro1">
          <table:table-cell office:value-type="float" office:value="611.214660644531">
            <text:p>611.2146606445</text:p>
          </table:table-cell>
          <table:table-cell office:value-type="float" office:value="0.02010469">
            <text:p>0.02010469</text:p>
          </table:table-cell>
          <table:table-cell table:number-columns-repeated="4"/>
        </table:table-row>
        <table:table-row table:style-name="ro1">
          <table:table-cell office:value-type="float" office:value="611.333801269531">
            <text:p>611.3338012695</text:p>
          </table:table-cell>
          <table:table-cell office:value-type="float" office:value="0.01694147">
            <text:p>0.01694147</text:p>
          </table:table-cell>
          <table:table-cell table:number-columns-repeated="4"/>
        </table:table-row>
        <table:table-row table:style-name="ro1">
          <table:table-cell office:value-type="float" office:value="611.452880859375">
            <text:p>611.4528808594</text:p>
          </table:table-cell>
          <table:table-cell office:value-type="float" office:value="0.01038771">
            <text:p>0.01038771</text:p>
          </table:table-cell>
          <table:table-cell table:number-columns-repeated="4"/>
        </table:table-row>
        <table:table-row table:style-name="ro1">
          <table:table-cell office:value-type="float" office:value="611.571960449219">
            <text:p>611.5719604492</text:p>
          </table:table-cell>
          <table:table-cell office:value-type="float" office:value="0.02329312">
            <text:p>0.02329312</text:p>
          </table:table-cell>
          <table:table-cell table:number-columns-repeated="4"/>
        </table:table-row>
        <table:table-row table:style-name="ro1">
          <table:table-cell office:value-type="float" office:value="611.691040039063">
            <text:p>611.6910400391</text:p>
          </table:table-cell>
          <table:table-cell office:value-type="float" office:value="0.02331121">
            <text:p>0.02331121</text:p>
          </table:table-cell>
          <table:table-cell table:number-columns-repeated="4"/>
        </table:table-row>
        <table:table-row table:style-name="ro1">
          <table:table-cell office:value-type="float" office:value="611.810180664063">
            <text:p>611.8101806641</text:p>
          </table:table-cell>
          <table:table-cell office:value-type="float" office:value="0.02231883">
            <text:p>0.02231883</text:p>
          </table:table-cell>
          <table:table-cell table:number-columns-repeated="4"/>
        </table:table-row>
        <table:table-row table:style-name="ro1">
          <table:table-cell office:value-type="float" office:value="611.929260253906">
            <text:p>611.9292602539</text:p>
          </table:table-cell>
          <table:table-cell office:value-type="float" office:value="0.02091423">
            <text:p>0.02091423</text:p>
          </table:table-cell>
          <table:table-cell table:number-columns-repeated="4"/>
        </table:table-row>
        <table:table-row table:style-name="ro1">
          <table:table-cell office:value-type="float" office:value="612.048400878906">
            <text:p>612.0484008789</text:p>
          </table:table-cell>
          <table:table-cell office:value-type="float" office:value="0.0233556">
            <text:p>0.0233556</text:p>
          </table:table-cell>
          <table:table-cell table:number-columns-repeated="4"/>
        </table:table-row>
        <table:table-row table:style-name="ro1">
          <table:table-cell office:value-type="float" office:value="612.16748046875">
            <text:p>612.1674804688</text:p>
          </table:table-cell>
          <table:table-cell office:value-type="float" office:value="0.01521324">
            <text:p>0.01521324</text:p>
          </table:table-cell>
          <table:table-cell table:number-columns-repeated="4"/>
        </table:table-row>
        <table:table-row table:style-name="ro1">
          <table:table-cell office:value-type="float" office:value="612.286560058594">
            <text:p>612.2865600586</text:p>
          </table:table-cell>
          <table:table-cell office:value-type="float" office:value="0.02872101">
            <text:p>0.02872101</text:p>
          </table:table-cell>
          <table:table-cell table:number-columns-repeated="4"/>
        </table:table-row>
        <table:table-row table:style-name="ro1">
          <table:table-cell office:value-type="float" office:value="612.405700683594">
            <text:p>612.4057006836</text:p>
          </table:table-cell>
          <table:table-cell office:value-type="float" office:value="0.02907076">
            <text:p>0.02907076</text:p>
          </table:table-cell>
          <table:table-cell table:number-columns-repeated="4"/>
        </table:table-row>
        <table:table-row table:style-name="ro1">
          <table:table-cell office:value-type="float" office:value="612.524780273438">
            <text:p>612.5247802734</text:p>
          </table:table-cell>
          <table:table-cell office:value-type="float" office:value="0.01793735">
            <text:p>0.01793735</text:p>
          </table:table-cell>
          <table:table-cell table:number-columns-repeated="4"/>
        </table:table-row>
        <table:table-row table:style-name="ro1">
          <table:table-cell office:value-type="float" office:value="612.643920898438">
            <text:p>612.6439208984</text:p>
          </table:table-cell>
          <table:table-cell office:value-type="float" office:value="0.01223315">
            <text:p>0.01223315</text:p>
          </table:table-cell>
          <table:table-cell table:number-columns-repeated="4"/>
        </table:table-row>
        <table:table-row table:style-name="ro1">
          <table:table-cell office:value-type="float" office:value="612.763061523438">
            <text:p>612.7630615234</text:p>
          </table:table-cell>
          <table:table-cell office:value-type="float" office:value="0.03114057">
            <text:p>0.03114057</text:p>
          </table:table-cell>
          <table:table-cell table:number-columns-repeated="4"/>
        </table:table-row>
        <table:table-row table:style-name="ro1">
          <table:table-cell office:value-type="float" office:value="612.882141113281">
            <text:p>612.8821411133</text:p>
          </table:table-cell>
          <table:table-cell office:value-type="float" office:value="0.01487461">
            <text:p>0.01487461</text:p>
          </table:table-cell>
          <table:table-cell table:number-columns-repeated="4"/>
        </table:table-row>
        <table:table-row table:style-name="ro1">
          <table:table-cell office:value-type="float" office:value="613.001281738281">
            <text:p>613.0012817383</text:p>
          </table:table-cell>
          <table:table-cell office:value-type="float" office:value="0.02217426">
            <text:p>0.02217426</text:p>
          </table:table-cell>
          <table:table-cell table:number-columns-repeated="4"/>
        </table:table-row>
        <table:table-row table:style-name="ro1">
          <table:table-cell office:value-type="float" office:value="613.120422363281">
            <text:p>613.1204223633</text:p>
          </table:table-cell>
          <table:table-cell office:value-type="float" office:value="0.01646274">
            <text:p>0.01646274</text:p>
          </table:table-cell>
          <table:table-cell table:number-columns-repeated="4"/>
        </table:table-row>
        <table:table-row table:style-name="ro1">
          <table:table-cell office:value-type="float" office:value="613.239501953125">
            <text:p>613.2395019531</text:p>
          </table:table-cell>
          <table:table-cell office:value-type="float" office:value="0.02104142">
            <text:p>0.02104142</text:p>
          </table:table-cell>
          <table:table-cell table:number-columns-repeated="4"/>
        </table:table-row>
        <table:table-row table:style-name="ro1">
          <table:table-cell office:value-type="float" office:value="613.358642578125">
            <text:p>613.3586425781</text:p>
          </table:table-cell>
          <table:table-cell office:value-type="float" office:value="0.02415848">
            <text:p>0.02415848</text:p>
          </table:table-cell>
          <table:table-cell table:number-columns-repeated="4"/>
        </table:table-row>
        <table:table-row table:style-name="ro1">
          <table:table-cell office:value-type="float" office:value="613.477783203125">
            <text:p>613.4777832031</text:p>
          </table:table-cell>
          <table:table-cell office:value-type="float" office:value="0.01479598">
            <text:p>0.01479598</text:p>
          </table:table-cell>
          <table:table-cell table:number-columns-repeated="4"/>
        </table:table-row>
        <table:table-row table:style-name="ro1">
          <table:table-cell office:value-type="float" office:value="613.596923828125">
            <text:p>613.5969238281</text:p>
          </table:table-cell>
          <table:table-cell office:value-type="float" office:value="0.009387637">
            <text:p>0.009387637</text:p>
          </table:table-cell>
          <table:table-cell table:number-columns-repeated="4"/>
        </table:table-row>
        <table:table-row table:style-name="ro1">
          <table:table-cell office:value-type="float" office:value="613.716064453125">
            <text:p>613.7160644531</text:p>
          </table:table-cell>
          <table:table-cell office:value-type="float" office:value="0.01448438">
            <text:p>0.01448438</text:p>
          </table:table-cell>
          <table:table-cell table:number-columns-repeated="4"/>
        </table:table-row>
        <table:table-row table:style-name="ro1">
          <table:table-cell office:value-type="float" office:value="613.835205078125">
            <text:p>613.8352050781</text:p>
          </table:table-cell>
          <table:table-cell office:value-type="float" office:value="0.01242532">
            <text:p>0.01242532</text:p>
          </table:table-cell>
          <table:table-cell table:number-columns-repeated="4"/>
        </table:table-row>
        <table:table-row table:style-name="ro1">
          <table:table-cell office:value-type="float" office:value="613.954345703125">
            <text:p>613.9543457031</text:p>
          </table:table-cell>
          <table:table-cell office:value-type="float" office:value="0.007200511">
            <text:p>0.007200511</text:p>
          </table:table-cell>
          <table:table-cell table:number-columns-repeated="4"/>
        </table:table-row>
        <table:table-row table:style-name="ro1">
          <table:table-cell office:value-type="float" office:value="614.073486328125">
            <text:p>614.0734863281</text:p>
          </table:table-cell>
          <table:table-cell office:value-type="float" office:value="0.01517149">
            <text:p>0.01517149</text:p>
          </table:table-cell>
          <table:table-cell table:number-columns-repeated="4"/>
        </table:table-row>
        <table:table-row table:style-name="ro1">
          <table:table-cell office:value-type="float" office:value="614.192626953125">
            <text:p>614.1926269531</text:p>
          </table:table-cell>
          <table:table-cell office:value-type="float" office:value="0.03484605">
            <text:p>0.03484605</text:p>
          </table:table-cell>
          <table:table-cell table:number-columns-repeated="4"/>
        </table:table-row>
        <table:table-row table:style-name="ro1">
          <table:table-cell office:value-type="float" office:value="614.311767578125">
            <text:p>614.3117675781</text:p>
          </table:table-cell>
          <table:table-cell office:value-type="float" office:value="0.01273673">
            <text:p>0.01273673</text:p>
          </table:table-cell>
          <table:table-cell table:number-columns-repeated="4"/>
        </table:table-row>
        <table:table-row table:style-name="ro1">
          <table:table-cell office:value-type="float" office:value="614.430908203125">
            <text:p>614.4309082031</text:p>
          </table:table-cell>
          <table:table-cell office:value-type="float" office:value="0.01298216">
            <text:p>0.01298216</text:p>
          </table:table-cell>
          <table:table-cell table:number-columns-repeated="4"/>
        </table:table-row>
        <table:table-row table:style-name="ro1">
          <table:table-cell office:value-type="float" office:value="614.550048828125">
            <text:p>614.5500488281</text:p>
          </table:table-cell>
          <table:table-cell office:value-type="float" office:value="0.01214875">
            <text:p>0.01214875</text:p>
          </table:table-cell>
          <table:table-cell table:number-columns-repeated="4"/>
        </table:table-row>
        <table:table-row table:style-name="ro1">
          <table:table-cell office:value-type="float" office:value="614.669189453125">
            <text:p>614.6691894531</text:p>
          </table:table-cell>
          <table:table-cell office:value-type="float" office:value="0.02479331">
            <text:p>0.02479331</text:p>
          </table:table-cell>
          <table:table-cell table:number-columns-repeated="4"/>
        </table:table-row>
        <table:table-row table:style-name="ro1">
          <table:table-cell office:value-type="float" office:value="614.788330078125">
            <text:p>614.7883300781</text:p>
          </table:table-cell>
          <table:table-cell office:value-type="float" office:value="0.01444647">
            <text:p>0.01444647</text:p>
          </table:table-cell>
          <table:table-cell table:number-columns-repeated="4"/>
        </table:table-row>
        <table:table-row table:style-name="ro1">
          <table:table-cell office:value-type="float" office:value="614.907531738281">
            <text:p>614.9075317383</text:p>
          </table:table-cell>
          <table:table-cell office:value-type="float" office:value="0.02097438">
            <text:p>0.02097438</text:p>
          </table:table-cell>
          <table:table-cell table:number-columns-repeated="4"/>
        </table:table-row>
        <table:table-row table:style-name="ro1">
          <table:table-cell office:value-type="float" office:value="615.026672363281">
            <text:p>615.0266723633</text:p>
          </table:table-cell>
          <table:table-cell office:value-type="float" office:value="0.01938319">
            <text:p>0.01938319</text:p>
          </table:table-cell>
          <table:table-cell table:number-columns-repeated="4"/>
        </table:table-row>
        <table:table-row table:style-name="ro1">
          <table:table-cell office:value-type="float" office:value="615.145812988281">
            <text:p>615.1458129883</text:p>
          </table:table-cell>
          <table:table-cell office:value-type="float" office:value="0.04351994">
            <text:p>0.04351994</text:p>
          </table:table-cell>
          <table:table-cell table:number-columns-repeated="4"/>
        </table:table-row>
        <table:table-row table:style-name="ro1">
          <table:table-cell office:value-type="float" office:value="615.264953613281">
            <text:p>615.2649536133</text:p>
          </table:table-cell>
          <table:table-cell office:value-type="float" office:value="0.02182516">
            <text:p>0.02182516</text:p>
          </table:table-cell>
          <table:table-cell table:number-columns-repeated="4"/>
        </table:table-row>
        <table:table-row table:style-name="ro1">
          <table:table-cell office:value-type="float" office:value="615.384155273438">
            <text:p>615.3841552734</text:p>
          </table:table-cell>
          <table:table-cell office:value-type="float" office:value="0.02124138">
            <text:p>0.02124138</text:p>
          </table:table-cell>
          <table:table-cell table:number-columns-repeated="4"/>
        </table:table-row>
        <table:table-row table:style-name="ro1">
          <table:table-cell office:value-type="float" office:value="615.503295898438">
            <text:p>615.5032958984</text:p>
          </table:table-cell>
          <table:table-cell office:value-type="float" office:value="0.01425401">
            <text:p>0.01425401</text:p>
          </table:table-cell>
          <table:table-cell table:number-columns-repeated="4"/>
        </table:table-row>
        <table:table-row table:style-name="ro1">
          <table:table-cell office:value-type="float" office:value="615.622497558594">
            <text:p>615.6224975586</text:p>
          </table:table-cell>
          <table:table-cell office:value-type="float" office:value="0.0261264">
            <text:p>0.0261264</text:p>
          </table:table-cell>
          <table:table-cell table:number-columns-repeated="4"/>
        </table:table-row>
        <table:table-row table:style-name="ro1">
          <table:table-cell office:value-type="float" office:value="615.741638183594">
            <text:p>615.7416381836</text:p>
          </table:table-cell>
          <table:table-cell office:value-type="float" office:value="0.01488864">
            <text:p>0.01488864</text:p>
          </table:table-cell>
          <table:table-cell table:number-columns-repeated="4"/>
        </table:table-row>
        <table:table-row table:style-name="ro1">
          <table:table-cell office:value-type="float" office:value="615.86083984375">
            <text:p>615.8608398438</text:p>
          </table:table-cell>
          <table:table-cell office:value-type="float" office:value="0.01813095">
            <text:p>0.01813095</text:p>
          </table:table-cell>
          <table:table-cell table:number-columns-repeated="4"/>
        </table:table-row>
        <table:table-row table:style-name="ro1">
          <table:table-cell office:value-type="float" office:value="615.97998046875">
            <text:p>615.9799804688</text:p>
          </table:table-cell>
          <table:table-cell office:value-type="float" office:value="0.01407814">
            <text:p>0.01407814</text:p>
          </table:table-cell>
          <table:table-cell table:number-columns-repeated="4"/>
        </table:table-row>
        <table:table-row table:style-name="ro1">
          <table:table-cell office:value-type="float" office:value="616.099182128906">
            <text:p>616.0991821289</text:p>
          </table:table-cell>
          <table:table-cell office:value-type="float" office:value="0.01695316">
            <text:p>0.01695316</text:p>
          </table:table-cell>
          <table:table-cell table:number-columns-repeated="4"/>
        </table:table-row>
        <table:table-row table:style-name="ro1">
          <table:table-cell office:value-type="float" office:value="616.218322753906">
            <text:p>616.2183227539</text:p>
          </table:table-cell>
          <table:table-cell office:value-type="float" office:value="0.023523">
            <text:p>0.023523</text:p>
          </table:table-cell>
          <table:table-cell table:number-columns-repeated="4"/>
        </table:table-row>
        <table:table-row table:style-name="ro1">
          <table:table-cell office:value-type="float" office:value="616.337524414063">
            <text:p>616.3375244141</text:p>
          </table:table-cell>
          <table:table-cell office:value-type="float" office:value="0.0121127">
            <text:p>0.0121127</text:p>
          </table:table-cell>
          <table:table-cell table:number-columns-repeated="4"/>
        </table:table-row>
        <table:table-row table:style-name="ro1">
          <table:table-cell office:value-type="float" office:value="616.456726074219">
            <text:p>616.4567260742</text:p>
          </table:table-cell>
          <table:table-cell office:value-type="float" office:value="0.03146277">
            <text:p>0.03146277</text:p>
          </table:table-cell>
          <table:table-cell table:number-columns-repeated="4"/>
        </table:table-row>
        <table:table-row table:style-name="ro1">
          <table:table-cell office:value-type="float" office:value="616.575866699219">
            <text:p>616.5758666992</text:p>
          </table:table-cell>
          <table:table-cell office:value-type="float" office:value="0.01277218">
            <text:p>0.01277218</text:p>
          </table:table-cell>
          <table:table-cell table:number-columns-repeated="4"/>
        </table:table-row>
        <table:table-row table:style-name="ro1">
          <table:table-cell office:value-type="float" office:value="616.695068359375">
            <text:p>616.6950683594</text:p>
          </table:table-cell>
          <table:table-cell office:value-type="float" office:value="0.008253695">
            <text:p>0.008253695</text:p>
          </table:table-cell>
          <table:table-cell table:number-columns-repeated="4"/>
        </table:table-row>
        <table:table-row table:style-name="ro1">
          <table:table-cell office:value-type="float" office:value="616.814270019531">
            <text:p>616.8142700195</text:p>
          </table:table-cell>
          <table:table-cell office:value-type="float" office:value="0.01307753">
            <text:p>0.01307753</text:p>
          </table:table-cell>
          <table:table-cell table:number-columns-repeated="4"/>
        </table:table-row>
        <table:table-row table:style-name="ro1">
          <table:table-cell office:value-type="float" office:value="616.933471679688">
            <text:p>616.9334716797</text:p>
          </table:table-cell>
          <table:table-cell office:value-type="float" office:value="0.01922144">
            <text:p>0.01922144</text:p>
          </table:table-cell>
          <table:table-cell table:number-columns-repeated="4"/>
        </table:table-row>
        <table:table-row table:style-name="ro1">
          <table:table-cell office:value-type="float" office:value="617.052612304688">
            <text:p>617.0526123047</text:p>
          </table:table-cell>
          <table:table-cell office:value-type="float" office:value="0.01508144">
            <text:p>0.01508144</text:p>
          </table:table-cell>
          <table:table-cell table:number-columns-repeated="4"/>
        </table:table-row>
        <table:table-row table:style-name="ro1">
          <table:table-cell office:value-type="float" office:value="617.171813964844">
            <text:p>617.1718139648</text:p>
          </table:table-cell>
          <table:table-cell office:value-type="float" office:value="0.02646718">
            <text:p>0.02646718</text:p>
          </table:table-cell>
          <table:table-cell table:number-columns-repeated="4"/>
        </table:table-row>
        <table:table-row table:style-name="ro1">
          <table:table-cell office:value-type="float" office:value="617.291015625">
            <text:p>617.291015625</text:p>
          </table:table-cell>
          <table:table-cell office:value-type="float" office:value="0.01194646">
            <text:p>0.01194646</text:p>
          </table:table-cell>
          <table:table-cell table:number-columns-repeated="4"/>
        </table:table-row>
        <table:table-row table:style-name="ro1">
          <table:table-cell office:value-type="float" office:value="617.410217285156">
            <text:p>617.4102172852</text:p>
          </table:table-cell>
          <table:table-cell office:value-type="float" office:value="0.01757366">
            <text:p>0.01757366</text:p>
          </table:table-cell>
          <table:table-cell table:number-columns-repeated="4"/>
        </table:table-row>
        <table:table-row table:style-name="ro1">
          <table:table-cell office:value-type="float" office:value="617.529418945313">
            <text:p>617.5294189453</text:p>
          </table:table-cell>
          <table:table-cell office:value-type="float" office:value="0.02440175">
            <text:p>0.02440175</text:p>
          </table:table-cell>
          <table:table-cell table:number-columns-repeated="4"/>
        </table:table-row>
        <table:table-row table:style-name="ro1">
          <table:table-cell office:value-type="float" office:value="617.648620605469">
            <text:p>617.6486206055</text:p>
          </table:table-cell>
          <table:table-cell office:value-type="float" office:value="0.01591423">
            <text:p>0.01591423</text:p>
          </table:table-cell>
          <table:table-cell table:number-columns-repeated="4"/>
        </table:table-row>
        <table:table-row table:style-name="ro1">
          <table:table-cell office:value-type="float" office:value="617.767822265625">
            <text:p>617.7678222656</text:p>
          </table:table-cell>
          <table:table-cell office:value-type="float" office:value="0.03961438">
            <text:p>0.03961438</text:p>
          </table:table-cell>
          <table:table-cell table:number-columns-repeated="4"/>
        </table:table-row>
        <table:table-row table:style-name="ro1">
          <table:table-cell office:value-type="float" office:value="617.887023925781">
            <text:p>617.8870239258</text:p>
          </table:table-cell>
          <table:table-cell office:value-type="float" office:value="0.02319045">
            <text:p>0.02319045</text:p>
          </table:table-cell>
          <table:table-cell table:number-columns-repeated="4"/>
        </table:table-row>
        <table:table-row table:style-name="ro1">
          <table:table-cell office:value-type="float" office:value="618.006225585938">
            <text:p>618.0062255859</text:p>
          </table:table-cell>
          <table:table-cell office:value-type="float" office:value="0.01521398">
            <text:p>0.01521398</text:p>
          </table:table-cell>
          <table:table-cell table:number-columns-repeated="4"/>
        </table:table-row>
        <table:table-row table:style-name="ro1">
          <table:table-cell office:value-type="float" office:value="618.125427246094">
            <text:p>618.1254272461</text:p>
          </table:table-cell>
          <table:table-cell office:value-type="float" office:value="0.02200514">
            <text:p>0.02200514</text:p>
          </table:table-cell>
          <table:table-cell table:number-columns-repeated="4"/>
        </table:table-row>
        <table:table-row table:style-name="ro1">
          <table:table-cell office:value-type="float" office:value="618.24462890625">
            <text:p>618.2446289063</text:p>
          </table:table-cell>
          <table:table-cell office:value-type="float" office:value="0.02500005">
            <text:p>0.02500005</text:p>
          </table:table-cell>
          <table:table-cell table:number-columns-repeated="4"/>
        </table:table-row>
        <table:table-row table:style-name="ro1">
          <table:table-cell office:value-type="float" office:value="618.363891601563">
            <text:p>618.3638916016</text:p>
          </table:table-cell>
          <table:table-cell office:value-type="float" office:value="0.02447901">
            <text:p>0.02447901</text:p>
          </table:table-cell>
          <table:table-cell table:number-columns-repeated="4"/>
        </table:table-row>
        <table:table-row table:style-name="ro1">
          <table:table-cell office:value-type="float" office:value="618.483093261719">
            <text:p>618.4830932617</text:p>
          </table:table-cell>
          <table:table-cell office:value-type="float" office:value="0.01438054">
            <text:p>0.01438054</text:p>
          </table:table-cell>
          <table:table-cell table:number-columns-repeated="4"/>
        </table:table-row>
        <table:table-row table:style-name="ro1">
          <table:table-cell office:value-type="float" office:value="618.602294921875">
            <text:p>618.6022949219</text:p>
          </table:table-cell>
          <table:table-cell office:value-type="float" office:value="0.01909113">
            <text:p>0.01909113</text:p>
          </table:table-cell>
          <table:table-cell table:number-columns-repeated="4"/>
        </table:table-row>
        <table:table-row table:style-name="ro1">
          <table:table-cell office:value-type="float" office:value="618.721496582031">
            <text:p>618.721496582</text:p>
          </table:table-cell>
          <table:table-cell office:value-type="float" office:value="0.03250472">
            <text:p>0.03250472</text:p>
          </table:table-cell>
          <table:table-cell table:number-columns-repeated="4"/>
        </table:table-row>
        <table:table-row table:style-name="ro1">
          <table:table-cell office:value-type="float" office:value="618.840759277344">
            <text:p>618.8407592773</text:p>
          </table:table-cell>
          <table:table-cell office:value-type="float" office:value="0.01187312">
            <text:p>0.01187312</text:p>
          </table:table-cell>
          <table:table-cell table:number-columns-repeated="4"/>
        </table:table-row>
        <table:table-row table:style-name="ro1">
          <table:table-cell office:value-type="float" office:value="618.9599609375">
            <text:p>618.9599609375</text:p>
          </table:table-cell>
          <table:table-cell office:value-type="float" office:value="0.02470299">
            <text:p>0.02470299</text:p>
          </table:table-cell>
          <table:table-cell table:number-columns-repeated="4"/>
        </table:table-row>
        <table:table-row table:style-name="ro1">
          <table:table-cell office:value-type="float" office:value="619.079162597656">
            <text:p>619.0791625977</text:p>
          </table:table-cell>
          <table:table-cell office:value-type="float" office:value="0.00754199">
            <text:p>0.00754199</text:p>
          </table:table-cell>
          <table:table-cell table:number-columns-repeated="4"/>
        </table:table-row>
        <table:table-row table:style-name="ro1">
          <table:table-cell office:value-type="float" office:value="619.198425292969">
            <text:p>619.198425293</text:p>
          </table:table-cell>
          <table:table-cell office:value-type="float" office:value="0.030316">
            <text:p>0.030316</text:p>
          </table:table-cell>
          <table:table-cell table:number-columns-repeated="4"/>
        </table:table-row>
        <table:table-row table:style-name="ro1">
          <table:table-cell office:value-type="float" office:value="619.317626953125">
            <text:p>619.3176269531</text:p>
          </table:table-cell>
          <table:table-cell office:value-type="float" office:value="0.01291984">
            <text:p>0.01291984</text:p>
          </table:table-cell>
          <table:table-cell table:number-columns-repeated="4"/>
        </table:table-row>
        <table:table-row table:style-name="ro1">
          <table:table-cell office:value-type="float" office:value="619.436889648438">
            <text:p>619.4368896484</text:p>
          </table:table-cell>
          <table:table-cell office:value-type="float" office:value="0.02368474">
            <text:p>0.02368474</text:p>
          </table:table-cell>
          <table:table-cell table:number-columns-repeated="4"/>
        </table:table-row>
        <table:table-row table:style-name="ro1">
          <table:table-cell office:value-type="float" office:value="619.556091308594">
            <text:p>619.5560913086</text:p>
          </table:table-cell>
          <table:table-cell office:value-type="float" office:value="0.01815274">
            <text:p>0.01815274</text:p>
          </table:table-cell>
          <table:table-cell table:number-columns-repeated="4"/>
        </table:table-row>
        <table:table-row table:style-name="ro1">
          <table:table-cell office:value-type="float" office:value="619.675354003906">
            <text:p>619.6753540039</text:p>
          </table:table-cell>
          <table:table-cell office:value-type="float" office:value="0.0127569">
            <text:p>0.0127569</text:p>
          </table:table-cell>
          <table:table-cell table:number-columns-repeated="4"/>
        </table:table-row>
        <table:table-row table:style-name="ro1">
          <table:table-cell office:value-type="float" office:value="619.794616699219">
            <text:p>619.7946166992</text:p>
          </table:table-cell>
          <table:table-cell office:value-type="float" office:value="0.02012436">
            <text:p>0.02012436</text:p>
          </table:table-cell>
          <table:table-cell table:number-columns-repeated="4"/>
        </table:table-row>
        <table:table-row table:style-name="ro1">
          <table:table-cell office:value-type="float" office:value="619.913818359375">
            <text:p>619.9138183594</text:p>
          </table:table-cell>
          <table:table-cell office:value-type="float" office:value="0.007549491">
            <text:p>0.007549491</text:p>
          </table:table-cell>
          <table:table-cell table:number-columns-repeated="4"/>
        </table:table-row>
        <table:table-row table:style-name="ro1">
          <table:table-cell office:value-type="float" office:value="620.033081054688">
            <text:p>620.0330810547</text:p>
          </table:table-cell>
          <table:table-cell office:value-type="float" office:value="0.03540682">
            <text:p>0.03540682</text:p>
          </table:table-cell>
          <table:table-cell table:number-columns-repeated="4"/>
        </table:table-row>
        <table:table-row table:style-name="ro1">
          <table:table-cell office:value-type="float" office:value="620.152282714844">
            <text:p>620.1522827148</text:p>
          </table:table-cell>
          <table:table-cell office:value-type="float" office:value="0.02251519">
            <text:p>0.02251519</text:p>
          </table:table-cell>
          <table:table-cell table:number-columns-repeated="4"/>
        </table:table-row>
        <table:table-row table:style-name="ro1">
          <table:table-cell office:value-type="float" office:value="620.271545410156">
            <text:p>620.2715454102</text:p>
          </table:table-cell>
          <table:table-cell office:value-type="float" office:value="0.01955939">
            <text:p>0.01955939</text:p>
          </table:table-cell>
          <table:table-cell table:number-columns-repeated="4"/>
        </table:table-row>
        <table:table-row table:style-name="ro1">
          <table:table-cell office:value-type="float" office:value="620.390808105469">
            <text:p>620.3908081055</text:p>
          </table:table-cell>
          <table:table-cell office:value-type="float" office:value="0.009707405">
            <text:p>0.009707405</text:p>
          </table:table-cell>
          <table:table-cell table:number-columns-repeated="4"/>
        </table:table-row>
        <table:table-row table:style-name="ro1">
          <table:table-cell office:value-type="float" office:value="620.510070800781">
            <text:p>620.5100708008</text:p>
          </table:table-cell>
          <table:table-cell office:value-type="float" office:value="0.01359647">
            <text:p>0.01359647</text:p>
          </table:table-cell>
          <table:table-cell table:number-columns-repeated="4"/>
        </table:table-row>
        <table:table-row table:style-name="ro1">
          <table:table-cell office:value-type="float" office:value="620.629333496094">
            <text:p>620.6293334961</text:p>
          </table:table-cell>
          <table:table-cell office:value-type="float" office:value="0.01290221">
            <text:p>0.01290221</text:p>
          </table:table-cell>
          <table:table-cell table:number-columns-repeated="4"/>
        </table:table-row>
        <table:table-row table:style-name="ro1">
          <table:table-cell office:value-type="float" office:value="620.74853515625">
            <text:p>620.7485351563</text:p>
          </table:table-cell>
          <table:table-cell office:value-type="float" office:value="0.006579024">
            <text:p>0.006579024</text:p>
          </table:table-cell>
          <table:table-cell table:number-columns-repeated="4"/>
        </table:table-row>
        <table:table-row table:style-name="ro1">
          <table:table-cell office:value-type="float" office:value="620.867797851563">
            <text:p>620.8677978516</text:p>
          </table:table-cell>
          <table:table-cell office:value-type="float" office:value="0.0416293">
            <text:p>0.0416293</text:p>
          </table:table-cell>
          <table:table-cell table:number-columns-repeated="4"/>
        </table:table-row>
        <table:table-row table:style-name="ro1">
          <table:table-cell office:value-type="float" office:value="620.987060546875">
            <text:p>620.9870605469</text:p>
          </table:table-cell>
          <table:table-cell office:value-type="float" office:value="0.01164767">
            <text:p>0.01164767</text:p>
          </table:table-cell>
          <table:table-cell table:number-columns-repeated="4"/>
        </table:table-row>
        <table:table-row table:style-name="ro1">
          <table:table-cell office:value-type="float" office:value="621.106323242188">
            <text:p>621.1063232422</text:p>
          </table:table-cell>
          <table:table-cell office:value-type="float" office:value="0.01186243">
            <text:p>0.01186243</text:p>
          </table:table-cell>
          <table:table-cell table:number-columns-repeated="4"/>
        </table:table-row>
        <table:table-row table:style-name="ro1">
          <table:table-cell office:value-type="float" office:value="621.2255859375">
            <text:p>621.2255859375</text:p>
          </table:table-cell>
          <table:table-cell office:value-type="float" office:value="0.01690304">
            <text:p>0.01690304</text:p>
          </table:table-cell>
          <table:table-cell table:number-columns-repeated="4"/>
        </table:table-row>
        <table:table-row table:style-name="ro1">
          <table:table-cell office:value-type="float" office:value="621.344848632813">
            <text:p>621.3448486328</text:p>
          </table:table-cell>
          <table:table-cell office:value-type="float" office:value="0.008484157">
            <text:p>0.008484157</text:p>
          </table:table-cell>
          <table:table-cell table:number-columns-repeated="4"/>
        </table:table-row>
        <table:table-row table:style-name="ro1">
          <table:table-cell office:value-type="float" office:value="621.464111328125">
            <text:p>621.4641113281</text:p>
          </table:table-cell>
          <table:table-cell office:value-type="float" office:value="0.01121781">
            <text:p>0.01121781</text:p>
          </table:table-cell>
          <table:table-cell table:number-columns-repeated="4"/>
        </table:table-row>
        <table:table-row table:style-name="ro1">
          <table:table-cell office:value-type="float" office:value="621.583374023438">
            <text:p>621.5833740234</text:p>
          </table:table-cell>
          <table:table-cell office:value-type="float" office:value="0.03701556">
            <text:p>0.03701556</text:p>
          </table:table-cell>
          <table:table-cell table:number-columns-repeated="4"/>
        </table:table-row>
        <table:table-row table:style-name="ro1">
          <table:table-cell office:value-type="float" office:value="621.70263671875">
            <text:p>621.7026367188</text:p>
          </table:table-cell>
          <table:table-cell office:value-type="float" office:value="0.01687645">
            <text:p>0.01687645</text:p>
          </table:table-cell>
          <table:table-cell table:number-columns-repeated="4"/>
        </table:table-row>
        <table:table-row table:style-name="ro1">
          <table:table-cell office:value-type="float" office:value="621.821899414063">
            <text:p>621.8218994141</text:p>
          </table:table-cell>
          <table:table-cell office:value-type="float" office:value="0.04179711">
            <text:p>0.04179711</text:p>
          </table:table-cell>
          <table:table-cell table:number-columns-repeated="4"/>
        </table:table-row>
        <table:table-row table:style-name="ro1">
          <table:table-cell office:value-type="float" office:value="621.941223144531">
            <text:p>621.9412231445</text:p>
          </table:table-cell>
          <table:table-cell office:value-type="float" office:value="0.005875264">
            <text:p>0.005875264</text:p>
          </table:table-cell>
          <table:table-cell table:number-columns-repeated="4"/>
        </table:table-row>
        <table:table-row table:style-name="ro1">
          <table:table-cell office:value-type="float" office:value="622.060485839844">
            <text:p>622.0604858398</text:p>
          </table:table-cell>
          <table:table-cell office:value-type="float" office:value="0.02483417">
            <text:p>0.02483417</text:p>
          </table:table-cell>
          <table:table-cell table:number-columns-repeated="4"/>
        </table:table-row>
        <table:table-row table:style-name="ro1">
          <table:table-cell office:value-type="float" office:value="622.179748535156">
            <text:p>622.1797485352</text:p>
          </table:table-cell>
          <table:table-cell office:value-type="float" office:value="0.02878355">
            <text:p>0.02878355</text:p>
          </table:table-cell>
          <table:table-cell table:number-columns-repeated="4"/>
        </table:table-row>
        <table:table-row table:style-name="ro1">
          <table:table-cell office:value-type="float" office:value="622.299011230469">
            <text:p>622.2990112305</text:p>
          </table:table-cell>
          <table:table-cell office:value-type="float" office:value="0.01204191">
            <text:p>0.01204191</text:p>
          </table:table-cell>
          <table:table-cell table:number-columns-repeated="4"/>
        </table:table-row>
        <table:table-row table:style-name="ro1">
          <table:table-cell office:value-type="float" office:value="622.418334960938">
            <text:p>622.4183349609</text:p>
          </table:table-cell>
          <table:table-cell office:value-type="float" office:value="0.01443482">
            <text:p>0.01443482</text:p>
          </table:table-cell>
          <table:table-cell table:number-columns-repeated="4"/>
        </table:table-row>
        <table:table-row table:style-name="ro1">
          <table:table-cell office:value-type="float" office:value="622.53759765625">
            <text:p>622.5375976563</text:p>
          </table:table-cell>
          <table:table-cell office:value-type="float" office:value="0.01332869">
            <text:p>0.01332869</text:p>
          </table:table-cell>
          <table:table-cell table:number-columns-repeated="4"/>
        </table:table-row>
        <table:table-row table:style-name="ro1">
          <table:table-cell office:value-type="float" office:value="622.656860351563">
            <text:p>622.6568603516</text:p>
          </table:table-cell>
          <table:table-cell office:value-type="float" office:value="0.009587841">
            <text:p>0.009587841</text:p>
          </table:table-cell>
          <table:table-cell table:number-columns-repeated="4"/>
        </table:table-row>
        <table:table-row table:style-name="ro1">
          <table:table-cell office:value-type="float" office:value="622.776184082031">
            <text:p>622.776184082</text:p>
          </table:table-cell>
          <table:table-cell office:value-type="float" office:value="0.01712756">
            <text:p>0.01712756</text:p>
          </table:table-cell>
          <table:table-cell table:number-columns-repeated="4"/>
        </table:table-row>
        <table:table-row table:style-name="ro1">
          <table:table-cell office:value-type="float" office:value="622.895446777344">
            <text:p>622.8954467773</text:p>
          </table:table-cell>
          <table:table-cell office:value-type="float" office:value="0.01807578">
            <text:p>0.01807578</text:p>
          </table:table-cell>
          <table:table-cell table:number-columns-repeated="4"/>
        </table:table-row>
        <table:table-row table:style-name="ro1">
          <table:table-cell office:value-type="float" office:value="623.014709472656">
            <text:p>623.0147094727</text:p>
          </table:table-cell>
          <table:table-cell office:value-type="float" office:value="0.01549426">
            <text:p>0.01549426</text:p>
          </table:table-cell>
          <table:table-cell table:number-columns-repeated="4"/>
        </table:table-row>
        <table:table-row table:style-name="ro1">
          <table:table-cell office:value-type="float" office:value="623.134033203125">
            <text:p>623.1340332031</text:p>
          </table:table-cell>
          <table:table-cell office:value-type="float" office:value="0.006325591">
            <text:p>0.006325591</text:p>
          </table:table-cell>
          <table:table-cell table:number-columns-repeated="4"/>
        </table:table-row>
        <table:table-row table:style-name="ro1">
          <table:table-cell office:value-type="float" office:value="623.253295898438">
            <text:p>623.2532958984</text:p>
          </table:table-cell>
          <table:table-cell office:value-type="float" office:value="0.009475817">
            <text:p>0.009475817</text:p>
          </table:table-cell>
          <table:table-cell table:number-columns-repeated="4"/>
        </table:table-row>
        <table:table-row table:style-name="ro1">
          <table:table-cell office:value-type="float" office:value="623.372619628906">
            <text:p>623.3726196289</text:p>
          </table:table-cell>
          <table:table-cell office:value-type="float" office:value="0.02101451">
            <text:p>0.02101451</text:p>
          </table:table-cell>
          <table:table-cell table:number-columns-repeated="4"/>
        </table:table-row>
        <table:table-row table:style-name="ro1">
          <table:table-cell office:value-type="float" office:value="623.491943359375">
            <text:p>623.4919433594</text:p>
          </table:table-cell>
          <table:table-cell office:value-type="float" office:value="0.01449657">
            <text:p>0.01449657</text:p>
          </table:table-cell>
          <table:table-cell table:number-columns-repeated="4"/>
        </table:table-row>
        <table:table-row table:style-name="ro1">
          <table:table-cell office:value-type="float" office:value="623.611206054688">
            <text:p>623.6112060547</text:p>
          </table:table-cell>
          <table:table-cell office:value-type="float" office:value="0.009316346">
            <text:p>0.009316346</text:p>
          </table:table-cell>
          <table:table-cell table:number-columns-repeated="4"/>
        </table:table-row>
        <table:table-row table:style-name="ro1">
          <table:table-cell office:value-type="float" office:value="623.730529785156">
            <text:p>623.7305297852</text:p>
          </table:table-cell>
          <table:table-cell office:value-type="float" office:value="0.01671401">
            <text:p>0.01671401</text:p>
          </table:table-cell>
          <table:table-cell table:number-columns-repeated="4"/>
        </table:table-row>
        <table:table-row table:style-name="ro1">
          <table:table-cell office:value-type="float" office:value="623.849853515625">
            <text:p>623.8498535156</text:p>
          </table:table-cell>
          <table:table-cell office:value-type="float" office:value="0.01485974">
            <text:p>0.01485974</text:p>
          </table:table-cell>
          <table:table-cell table:number-columns-repeated="4"/>
        </table:table-row>
        <table:table-row table:style-name="ro1">
          <table:table-cell office:value-type="float" office:value="623.969116210938">
            <text:p>623.9691162109</text:p>
          </table:table-cell>
          <table:table-cell office:value-type="float" office:value="0.01340577">
            <text:p>0.01340577</text:p>
          </table:table-cell>
          <table:table-cell table:number-columns-repeated="4"/>
        </table:table-row>
        <table:table-row table:style-name="ro1">
          <table:table-cell office:value-type="float" office:value="624.088439941406">
            <text:p>624.0884399414</text:p>
          </table:table-cell>
          <table:table-cell office:value-type="float" office:value="0.004447126">
            <text:p>0.004447126</text:p>
          </table:table-cell>
          <table:table-cell table:number-columns-repeated="4"/>
        </table:table-row>
        <table:table-row table:style-name="ro1">
          <table:table-cell office:value-type="float" office:value="624.207763671875">
            <text:p>624.2077636719</text:p>
          </table:table-cell>
          <table:table-cell office:value-type="float" office:value="0.00532894">
            <text:p>0.00532894</text:p>
          </table:table-cell>
          <table:table-cell table:number-columns-repeated="4"/>
        </table:table-row>
        <table:table-row table:style-name="ro1">
          <table:table-cell office:value-type="float" office:value="624.327087402344">
            <text:p>624.3270874023</text:p>
          </table:table-cell>
          <table:table-cell office:value-type="float" office:value="0.01377642">
            <text:p>0.01377642</text:p>
          </table:table-cell>
          <table:table-cell table:number-columns-repeated="4"/>
        </table:table-row>
        <table:table-row table:style-name="ro1">
          <table:table-cell office:value-type="float" office:value="624.446350097656">
            <text:p>624.4463500977</text:p>
          </table:table-cell>
          <table:table-cell office:value-type="float" office:value="0.02863384">
            <text:p>0.02863384</text:p>
          </table:table-cell>
          <table:table-cell table:number-columns-repeated="4"/>
        </table:table-row>
        <table:table-row table:style-name="ro1">
          <table:table-cell office:value-type="float" office:value="624.565673828125">
            <text:p>624.5656738281</text:p>
          </table:table-cell>
          <table:table-cell office:value-type="float" office:value="0.02027019">
            <text:p>0.02027019</text:p>
          </table:table-cell>
          <table:table-cell table:number-columns-repeated="4"/>
        </table:table-row>
        <table:table-row table:style-name="ro1">
          <table:table-cell office:value-type="float" office:value="624.684997558594">
            <text:p>624.6849975586</text:p>
          </table:table-cell>
          <table:table-cell office:value-type="float" office:value="0.0161458">
            <text:p>0.0161458</text:p>
          </table:table-cell>
          <table:table-cell table:number-columns-repeated="4"/>
        </table:table-row>
        <table:table-row table:style-name="ro1">
          <table:table-cell office:value-type="float" office:value="624.804321289063">
            <text:p>624.8043212891</text:p>
          </table:table-cell>
          <table:table-cell office:value-type="float" office:value="0.0135398">
            <text:p>0.0135398</text:p>
          </table:table-cell>
          <table:table-cell table:number-columns-repeated="4"/>
        </table:table-row>
        <table:table-row table:style-name="ro1">
          <table:table-cell office:value-type="float" office:value="624.923645019531">
            <text:p>624.9236450195</text:p>
          </table:table-cell>
          <table:table-cell office:value-type="float" office:value="0.01858709">
            <text:p>0.01858709</text:p>
          </table:table-cell>
          <table:table-cell table:number-columns-repeated="4"/>
        </table:table-row>
        <table:table-row table:style-name="ro1">
          <table:table-cell office:value-type="float" office:value="625.04296875">
            <text:p>625.04296875</text:p>
          </table:table-cell>
          <table:table-cell office:value-type="float" office:value="0.005074349">
            <text:p>0.005074349</text:p>
          </table:table-cell>
          <table:table-cell table:number-columns-repeated="4"/>
        </table:table-row>
        <table:table-row table:style-name="ro1">
          <table:table-cell office:value-type="float" office:value="625.162292480469">
            <text:p>625.1622924805</text:p>
          </table:table-cell>
          <table:table-cell office:value-type="float" office:value="0.011271">
            <text:p>0.011271</text:p>
          </table:table-cell>
          <table:table-cell table:number-columns-repeated="4"/>
        </table:table-row>
        <table:table-row table:style-name="ro1">
          <table:table-cell office:value-type="float" office:value="625.281616210938">
            <text:p>625.2816162109</text:p>
          </table:table-cell>
          <table:table-cell office:value-type="float" office:value="0.0179755">
            <text:p>0.0179755</text:p>
          </table:table-cell>
          <table:table-cell table:number-columns-repeated="4"/>
        </table:table-row>
        <table:table-row table:style-name="ro1">
          <table:table-cell office:value-type="float" office:value="625.400939941406">
            <text:p>625.4009399414</text:p>
          </table:table-cell>
          <table:table-cell office:value-type="float" office:value="0.01264641">
            <text:p>0.01264641</text:p>
          </table:table-cell>
          <table:table-cell table:number-columns-repeated="4"/>
        </table:table-row>
        <table:table-row table:style-name="ro1">
          <table:table-cell office:value-type="float" office:value="625.520263671875">
            <text:p>625.5202636719</text:p>
          </table:table-cell>
          <table:table-cell office:value-type="float" office:value="0.0110415">
            <text:p>0.0110415</text:p>
          </table:table-cell>
          <table:table-cell table:number-columns-repeated="4"/>
        </table:table-row>
        <table:table-row table:style-name="ro1">
          <table:table-cell office:value-type="float" office:value="625.639587402344">
            <text:p>625.6395874023</text:p>
          </table:table-cell>
          <table:table-cell office:value-type="float" office:value="0.01663393">
            <text:p>0.01663393</text:p>
          </table:table-cell>
          <table:table-cell table:number-columns-repeated="4"/>
        </table:table-row>
        <table:table-row table:style-name="ro1">
          <table:table-cell office:value-type="float" office:value="625.758911132813">
            <text:p>625.7589111328</text:p>
          </table:table-cell>
          <table:table-cell office:value-type="float" office:value="0.0191243">
            <text:p>0.0191243</text:p>
          </table:table-cell>
          <table:table-cell table:number-columns-repeated="4"/>
        </table:table-row>
        <table:table-row table:style-name="ro1">
          <table:table-cell office:value-type="float" office:value="625.878295898438">
            <text:p>625.8782958984</text:p>
          </table:table-cell>
          <table:table-cell office:value-type="float" office:value="0.008490375">
            <text:p>0.008490375</text:p>
          </table:table-cell>
          <table:table-cell table:number-columns-repeated="4"/>
        </table:table-row>
        <table:table-row table:style-name="ro1">
          <table:table-cell office:value-type="float" office:value="625.997619628906">
            <text:p>625.9976196289</text:p>
          </table:table-cell>
          <table:table-cell office:value-type="float" office:value="0.006664411">
            <text:p>0.006664411</text:p>
          </table:table-cell>
          <table:table-cell table:number-columns-repeated="4"/>
        </table:table-row>
        <table:table-row table:style-name="ro1">
          <table:table-cell office:value-type="float" office:value="626.116943359375">
            <text:p>626.1169433594</text:p>
          </table:table-cell>
          <table:table-cell office:value-type="float" office:value="0.01654912">
            <text:p>0.01654912</text:p>
          </table:table-cell>
          <table:table-cell table:number-columns-repeated="4"/>
        </table:table-row>
        <table:table-row table:style-name="ro1">
          <table:table-cell office:value-type="float" office:value="626.236267089844">
            <text:p>626.2362670898</text:p>
          </table:table-cell>
          <table:table-cell office:value-type="float" office:value="0.01849065">
            <text:p>0.01849065</text:p>
          </table:table-cell>
          <table:table-cell table:number-columns-repeated="4"/>
        </table:table-row>
        <table:table-row table:style-name="ro1">
          <table:table-cell office:value-type="float" office:value="626.355651855469">
            <text:p>626.3556518555</text:p>
          </table:table-cell>
          <table:table-cell office:value-type="float" office:value="0.03154177">
            <text:p>0.03154177</text:p>
          </table:table-cell>
          <table:table-cell table:number-columns-repeated="4"/>
        </table:table-row>
        <table:table-row table:style-name="ro1">
          <table:table-cell office:value-type="float" office:value="626.474975585938">
            <text:p>626.4749755859</text:p>
          </table:table-cell>
          <table:table-cell office:value-type="float" office:value="0.005658295">
            <text:p>0.005658295</text:p>
          </table:table-cell>
          <table:table-cell table:number-columns-repeated="4"/>
        </table:table-row>
        <table:table-row table:style-name="ro1">
          <table:table-cell office:value-type="float" office:value="626.594360351563">
            <text:p>626.5943603516</text:p>
          </table:table-cell>
          <table:table-cell office:value-type="float" office:value="0.02787594">
            <text:p>0.02787594</text:p>
          </table:table-cell>
          <table:table-cell table:number-columns-repeated="4"/>
        </table:table-row>
        <table:table-row table:style-name="ro1">
          <table:table-cell office:value-type="float" office:value="626.713684082031">
            <text:p>626.713684082</text:p>
          </table:table-cell>
          <table:table-cell office:value-type="float" office:value="0.01358014">
            <text:p>0.01358014</text:p>
          </table:table-cell>
          <table:table-cell table:number-columns-repeated="4"/>
        </table:table-row>
        <table:table-row table:style-name="ro1">
          <table:table-cell office:value-type="float" office:value="626.8330078125">
            <text:p>626.8330078125</text:p>
          </table:table-cell>
          <table:table-cell office:value-type="float" office:value="0.02901321">
            <text:p>0.02901321</text:p>
          </table:table-cell>
          <table:table-cell table:number-columns-repeated="4"/>
        </table:table-row>
        <table:table-row table:style-name="ro1">
          <table:table-cell office:value-type="float" office:value="626.952392578125">
            <text:p>626.9523925781</text:p>
          </table:table-cell>
          <table:table-cell office:value-type="float" office:value="0.02028399">
            <text:p>0.02028399</text:p>
          </table:table-cell>
          <table:table-cell table:number-columns-repeated="4"/>
        </table:table-row>
        <table:table-row table:style-name="ro1">
          <table:table-cell office:value-type="float" office:value="627.071716308594">
            <text:p>627.0717163086</text:p>
          </table:table-cell>
          <table:table-cell office:value-type="float" office:value="0.02206679">
            <text:p>0.02206679</text:p>
          </table:table-cell>
          <table:table-cell table:number-columns-repeated="4"/>
        </table:table-row>
        <table:table-row table:style-name="ro1">
          <table:table-cell office:value-type="float" office:value="627.191101074219">
            <text:p>627.1911010742</text:p>
          </table:table-cell>
          <table:table-cell office:value-type="float" office:value="0.02564096">
            <text:p>0.02564096</text:p>
          </table:table-cell>
          <table:table-cell table:number-columns-repeated="4"/>
        </table:table-row>
        <table:table-row table:style-name="ro1">
          <table:table-cell office:value-type="float" office:value="627.310424804688">
            <text:p>627.3104248047</text:p>
          </table:table-cell>
          <table:table-cell office:value-type="float" office:value="0.0151519">
            <text:p>0.0151519</text:p>
          </table:table-cell>
          <table:table-cell table:number-columns-repeated="4"/>
        </table:table-row>
        <table:table-row table:style-name="ro1">
          <table:table-cell office:value-type="float" office:value="627.429809570313">
            <text:p>627.4298095703</text:p>
          </table:table-cell>
          <table:table-cell office:value-type="float" office:value="0.005064589">
            <text:p>0.005064589</text:p>
          </table:table-cell>
          <table:table-cell table:number-columns-repeated="4"/>
        </table:table-row>
        <table:table-row table:style-name="ro1">
          <table:table-cell office:value-type="float" office:value="627.549194335938">
            <text:p>627.5491943359</text:p>
          </table:table-cell>
          <table:table-cell office:value-type="float" office:value="0.008290948">
            <text:p>0.008290948</text:p>
          </table:table-cell>
          <table:table-cell table:number-columns-repeated="4"/>
        </table:table-row>
        <table:table-row table:style-name="ro1">
          <table:table-cell office:value-type="float" office:value="627.668518066406">
            <text:p>627.6685180664</text:p>
          </table:table-cell>
          <table:table-cell office:value-type="float" office:value="0.02167958">
            <text:p>0.02167958</text:p>
          </table:table-cell>
          <table:table-cell table:number-columns-repeated="4"/>
        </table:table-row>
        <table:table-row table:style-name="ro1">
          <table:table-cell office:value-type="float" office:value="627.787902832031">
            <text:p>627.787902832</text:p>
          </table:table-cell>
          <table:table-cell office:value-type="float" office:value="0.02017608">
            <text:p>0.02017608</text:p>
          </table:table-cell>
          <table:table-cell table:number-columns-repeated="4"/>
        </table:table-row>
        <table:table-row table:style-name="ro1">
          <table:table-cell office:value-type="float" office:value="627.907287597656">
            <text:p>627.9072875977</text:p>
          </table:table-cell>
          <table:table-cell office:value-type="float" office:value="0.01081954">
            <text:p>0.01081954</text:p>
          </table:table-cell>
          <table:table-cell table:number-columns-repeated="4"/>
        </table:table-row>
        <table:table-row table:style-name="ro1">
          <table:table-cell office:value-type="float" office:value="628.026672363281">
            <text:p>628.0266723633</text:p>
          </table:table-cell>
          <table:table-cell office:value-type="float" office:value="0.00837372">
            <text:p>0.00837372</text:p>
          </table:table-cell>
          <table:table-cell table:number-columns-repeated="4"/>
        </table:table-row>
        <table:table-row table:style-name="ro1">
          <table:table-cell office:value-type="float" office:value="628.14599609375">
            <text:p>628.1459960938</text:p>
          </table:table-cell>
          <table:table-cell office:value-type="float" office:value="0.006194247">
            <text:p>0.006194247</text:p>
          </table:table-cell>
          <table:table-cell table:number-columns-repeated="4"/>
        </table:table-row>
        <table:table-row table:style-name="ro1">
          <table:table-cell office:value-type="float" office:value="628.265380859375">
            <text:p>628.2653808594</text:p>
          </table:table-cell>
          <table:table-cell office:value-type="float" office:value="0.02119882">
            <text:p>0.02119882</text:p>
          </table:table-cell>
          <table:table-cell table:number-columns-repeated="4"/>
        </table:table-row>
        <table:table-row table:style-name="ro1">
          <table:table-cell office:value-type="float" office:value="628.384765625">
            <text:p>628.384765625</text:p>
          </table:table-cell>
          <table:table-cell office:value-type="float" office:value="0.02460198">
            <text:p>0.02460198</text:p>
          </table:table-cell>
          <table:table-cell table:number-columns-repeated="4"/>
        </table:table-row>
        <table:table-row table:style-name="ro1">
          <table:table-cell office:value-type="float" office:value="628.504150390625">
            <text:p>628.5041503906</text:p>
          </table:table-cell>
          <table:table-cell office:value-type="float" office:value="0.003254694">
            <text:p>0.003254694</text:p>
          </table:table-cell>
          <table:table-cell table:number-columns-repeated="4"/>
        </table:table-row>
        <table:table-row table:style-name="ro1">
          <table:table-cell office:value-type="float" office:value="628.62353515625">
            <text:p>628.6235351563</text:p>
          </table:table-cell>
          <table:table-cell office:value-type="float" office:value="0.01643016">
            <text:p>0.01643016</text:p>
          </table:table-cell>
          <table:table-cell table:number-columns-repeated="4"/>
        </table:table-row>
        <table:table-row table:style-name="ro1">
          <table:table-cell office:value-type="float" office:value="628.742919921875">
            <text:p>628.7429199219</text:p>
          </table:table-cell>
          <table:table-cell office:value-type="float" office:value="0.004159837">
            <text:p>0.004159837</text:p>
          </table:table-cell>
          <table:table-cell table:number-columns-repeated="4"/>
        </table:table-row>
        <table:table-row table:style-name="ro1">
          <table:table-cell office:value-type="float" office:value="628.8623046875">
            <text:p>628.8623046875</text:p>
          </table:table-cell>
          <table:table-cell office:value-type="float" office:value="0.009017609">
            <text:p>0.009017609</text:p>
          </table:table-cell>
          <table:table-cell table:number-columns-repeated="4"/>
        </table:table-row>
        <table:table-row table:style-name="ro1">
          <table:table-cell office:value-type="float" office:value="628.981689453125">
            <text:p>628.9816894531</text:p>
          </table:table-cell>
          <table:table-cell office:value-type="float" office:value="0.008495819">
            <text:p>0.008495819</text:p>
          </table:table-cell>
          <table:table-cell table:number-columns-repeated="4"/>
        </table:table-row>
        <table:table-row table:style-name="ro1">
          <table:table-cell office:value-type="float" office:value="629.10107421875">
            <text:p>629.1010742188</text:p>
          </table:table-cell>
          <table:table-cell office:value-type="float" office:value="0.006828475">
            <text:p>0.006828475</text:p>
          </table:table-cell>
          <table:table-cell table:number-columns-repeated="4"/>
        </table:table-row>
        <table:table-row table:style-name="ro1">
          <table:table-cell office:value-type="float" office:value="629.220458984375">
            <text:p>629.2204589844</text:p>
          </table:table-cell>
          <table:table-cell office:value-type="float" office:value="0.03347194">
            <text:p>0.03347194</text:p>
          </table:table-cell>
          <table:table-cell table:number-columns-repeated="4"/>
        </table:table-row>
        <table:table-row table:style-name="ro1">
          <table:table-cell office:value-type="float" office:value="629.33984375">
            <text:p>629.33984375</text:p>
          </table:table-cell>
          <table:table-cell office:value-type="float" office:value="0.02307933">
            <text:p>0.02307933</text:p>
          </table:table-cell>
          <table:table-cell table:number-columns-repeated="4"/>
        </table:table-row>
        <table:table-row table:style-name="ro1">
          <table:table-cell office:value-type="float" office:value="629.459228515625">
            <text:p>629.4592285156</text:p>
          </table:table-cell>
          <table:table-cell office:value-type="float" office:value="0.02319832">
            <text:p>0.02319832</text:p>
          </table:table-cell>
          <table:table-cell table:number-columns-repeated="4"/>
        </table:table-row>
        <table:table-row table:style-name="ro1">
          <table:table-cell office:value-type="float" office:value="629.57861328125">
            <text:p>629.5786132813</text:p>
          </table:table-cell>
          <table:table-cell office:value-type="float" office:value="0.005424736">
            <text:p>0.005424736</text:p>
          </table:table-cell>
          <table:table-cell table:number-columns-repeated="4"/>
        </table:table-row>
        <table:table-row table:style-name="ro1">
          <table:table-cell office:value-type="float" office:value="629.697998046875">
            <text:p>629.6979980469</text:p>
          </table:table-cell>
          <table:table-cell office:value-type="float" office:value="0.009969882">
            <text:p>0.009969882</text:p>
          </table:table-cell>
          <table:table-cell table:number-columns-repeated="4"/>
        </table:table-row>
        <table:table-row table:style-name="ro1">
          <table:table-cell office:value-type="float" office:value="629.8173828125">
            <text:p>629.8173828125</text:p>
          </table:table-cell>
          <table:table-cell office:value-type="float" office:value="0.01327699">
            <text:p>0.01327699</text:p>
          </table:table-cell>
          <table:table-cell table:number-columns-repeated="4"/>
        </table:table-row>
        <table:table-row table:style-name="ro1">
          <table:table-cell office:value-type="float" office:value="629.936828613281">
            <text:p>629.9368286133</text:p>
          </table:table-cell>
          <table:table-cell office:value-type="float" office:value="0.04093082">
            <text:p>0.04093082</text:p>
          </table:table-cell>
          <table:table-cell table:number-columns-repeated="4"/>
        </table:table-row>
        <table:table-row table:style-name="ro1">
          <table:table-cell office:value-type="float" office:value="630.056213378906">
            <text:p>630.0562133789</text:p>
          </table:table-cell>
          <table:table-cell office:value-type="float" office:value="0.0249151">
            <text:p>0.0249151</text:p>
          </table:table-cell>
          <table:table-cell table:number-columns-repeated="4"/>
        </table:table-row>
        <table:table-row table:style-name="ro1">
          <table:table-cell office:value-type="float" office:value="630.175598144531">
            <text:p>630.1755981445</text:p>
          </table:table-cell>
          <table:table-cell office:value-type="float" office:value="0.0229648">
            <text:p>0.0229648</text:p>
          </table:table-cell>
          <table:table-cell table:number-columns-repeated="4"/>
        </table:table-row>
        <table:table-row table:style-name="ro1">
          <table:table-cell office:value-type="float" office:value="630.295043945313">
            <text:p>630.2950439453</text:p>
          </table:table-cell>
          <table:table-cell office:value-type="float" office:value="0.006680559">
            <text:p>0.006680559</text:p>
          </table:table-cell>
          <table:table-cell table:number-columns-repeated="4"/>
        </table:table-row>
        <table:table-row table:style-name="ro1">
          <table:table-cell office:value-type="float" office:value="630.414428710938">
            <text:p>630.4144287109</text:p>
          </table:table-cell>
          <table:table-cell office:value-type="float" office:value="0.02004351">
            <text:p>0.02004351</text:p>
          </table:table-cell>
          <table:table-cell table:number-columns-repeated="4"/>
        </table:table-row>
        <table:table-row table:style-name="ro1">
          <table:table-cell office:value-type="float" office:value="630.533813476563">
            <text:p>630.5338134766</text:p>
          </table:table-cell>
          <table:table-cell office:value-type="float" office:value="0.01101603">
            <text:p>0.01101603</text:p>
          </table:table-cell>
          <table:table-cell table:number-columns-repeated="4"/>
        </table:table-row>
        <table:table-row table:style-name="ro1">
          <table:table-cell office:value-type="float" office:value="630.653259277344">
            <text:p>630.6532592773</text:p>
          </table:table-cell>
          <table:table-cell office:value-type="float" office:value="0.005629858">
            <text:p>0.005629858</text:p>
          </table:table-cell>
          <table:table-cell table:number-columns-repeated="4"/>
        </table:table-row>
        <table:table-row table:style-name="ro1">
          <table:table-cell office:value-type="float" office:value="630.772644042969">
            <text:p>630.772644043</text:p>
          </table:table-cell>
          <table:table-cell office:value-type="float" office:value="0.01086932">
            <text:p>0.01086932</text:p>
          </table:table-cell>
          <table:table-cell table:number-columns-repeated="4"/>
        </table:table-row>
        <table:table-row table:style-name="ro1">
          <table:table-cell office:value-type="float" office:value="630.89208984375">
            <text:p>630.8920898438</text:p>
          </table:table-cell>
          <table:table-cell office:value-type="float" office:value="0.01607233">
            <text:p>0.01607233</text:p>
          </table:table-cell>
          <table:table-cell table:number-columns-repeated="4"/>
        </table:table-row>
        <table:table-row table:style-name="ro1">
          <table:table-cell office:value-type="float" office:value="631.011474609375">
            <text:p>631.0114746094</text:p>
          </table:table-cell>
          <table:table-cell office:value-type="float" office:value="0.02247822">
            <text:p>0.02247822</text:p>
          </table:table-cell>
          <table:table-cell table:number-columns-repeated="4"/>
        </table:table-row>
        <table:table-row table:style-name="ro1">
          <table:table-cell office:value-type="float" office:value="631.130920410156">
            <text:p>631.1309204102</text:p>
          </table:table-cell>
          <table:table-cell office:value-type="float" office:value="0.01330303">
            <text:p>0.01330303</text:p>
          </table:table-cell>
          <table:table-cell table:number-columns-repeated="4"/>
        </table:table-row>
        <table:table-row table:style-name="ro1">
          <table:table-cell office:value-type="float" office:value="631.250305175781">
            <text:p>631.2503051758</text:p>
          </table:table-cell>
          <table:table-cell office:value-type="float" office:value="0.01126269">
            <text:p>0.01126269</text:p>
          </table:table-cell>
          <table:table-cell table:number-columns-repeated="4"/>
        </table:table-row>
        <table:table-row table:style-name="ro1">
          <table:table-cell office:value-type="float" office:value="631.369750976563">
            <text:p>631.3697509766</text:p>
          </table:table-cell>
          <table:table-cell office:value-type="float" office:value="0.01901563">
            <text:p>0.01901563</text:p>
          </table:table-cell>
          <table:table-cell table:number-columns-repeated="4"/>
        </table:table-row>
        <table:table-row table:style-name="ro1">
          <table:table-cell office:value-type="float" office:value="631.489135742188">
            <text:p>631.4891357422</text:p>
          </table:table-cell>
          <table:table-cell office:value-type="float" office:value="0.02464367">
            <text:p>0.02464367</text:p>
          </table:table-cell>
          <table:table-cell table:number-columns-repeated="4"/>
        </table:table-row>
        <table:table-row table:style-name="ro1">
          <table:table-cell office:value-type="float" office:value="631.608581542969">
            <text:p>631.608581543</text:p>
          </table:table-cell>
          <table:table-cell office:value-type="float" office:value="0.006589038">
            <text:p>0.006589038</text:p>
          </table:table-cell>
          <table:table-cell table:number-columns-repeated="4"/>
        </table:table-row>
        <table:table-row table:style-name="ro1">
          <table:table-cell office:value-type="float" office:value="631.72802734375">
            <text:p>631.7280273438</text:p>
          </table:table-cell>
          <table:table-cell office:value-type="float" office:value="0.02043292">
            <text:p>0.02043292</text:p>
          </table:table-cell>
          <table:table-cell table:number-columns-repeated="4"/>
        </table:table-row>
        <table:table-row table:style-name="ro1">
          <table:table-cell office:value-type="float" office:value="631.847412109375">
            <text:p>631.8474121094</text:p>
          </table:table-cell>
          <table:table-cell office:value-type="float" office:value="0.009751735">
            <text:p>0.009751735</text:p>
          </table:table-cell>
          <table:table-cell table:number-columns-repeated="4"/>
        </table:table-row>
        <table:table-row table:style-name="ro1">
          <table:table-cell office:value-type="float" office:value="631.966857910156">
            <text:p>631.9668579102</text:p>
          </table:table-cell>
          <table:table-cell office:value-type="float" office:value="0.027955">
            <text:p>0.027955</text:p>
          </table:table-cell>
          <table:table-cell table:number-columns-repeated="4"/>
        </table:table-row>
        <table:table-row table:style-name="ro1">
          <table:table-cell office:value-type="float" office:value="632.086303710938">
            <text:p>632.0863037109</text:p>
          </table:table-cell>
          <table:table-cell office:value-type="float" office:value="0.004463952">
            <text:p>0.004463952</text:p>
          </table:table-cell>
          <table:table-cell table:number-columns-repeated="4"/>
        </table:table-row>
        <table:table-row table:style-name="ro1">
          <table:table-cell office:value-type="float" office:value="632.205749511719">
            <text:p>632.2057495117</text:p>
          </table:table-cell>
          <table:table-cell office:value-type="float" office:value="0.01243585">
            <text:p>0.01243585</text:p>
          </table:table-cell>
          <table:table-cell table:number-columns-repeated="4"/>
        </table:table-row>
        <table:table-row table:style-name="ro1">
          <table:table-cell office:value-type="float" office:value="632.3251953125">
            <text:p>632.3251953125</text:p>
          </table:table-cell>
          <table:table-cell office:value-type="float" office:value="0.012414">
            <text:p>0.012414</text:p>
          </table:table-cell>
          <table:table-cell table:number-columns-repeated="4"/>
        </table:table-row>
        <table:table-row table:style-name="ro1">
          <table:table-cell office:value-type="float" office:value="632.444580078125">
            <text:p>632.4445800781</text:p>
          </table:table-cell>
          <table:table-cell office:value-type="float" office:value="0.02346756">
            <text:p>0.02346756</text:p>
          </table:table-cell>
          <table:table-cell table:number-columns-repeated="4"/>
        </table:table-row>
        <table:table-row table:style-name="ro1">
          <table:table-cell office:value-type="float" office:value="632.564025878906">
            <text:p>632.5640258789</text:p>
          </table:table-cell>
          <table:table-cell office:value-type="float" office:value="0.01166287">
            <text:p>0.01166287</text:p>
          </table:table-cell>
          <table:table-cell table:number-columns-repeated="4"/>
        </table:table-row>
        <table:table-row table:style-name="ro1">
          <table:table-cell office:value-type="float" office:value="632.683471679688">
            <text:p>632.6834716797</text:p>
          </table:table-cell>
          <table:table-cell office:value-type="float" office:value="0.01315494">
            <text:p>0.01315494</text:p>
          </table:table-cell>
          <table:table-cell table:number-columns-repeated="4"/>
        </table:table-row>
        <table:table-row table:style-name="ro1">
          <table:table-cell office:value-type="float" office:value="632.802917480469">
            <text:p>632.8029174805</text:p>
          </table:table-cell>
          <table:table-cell office:value-type="float" office:value="0.009608968">
            <text:p>0.009608968</text:p>
          </table:table-cell>
          <table:table-cell table:number-columns-repeated="4"/>
        </table:table-row>
        <table:table-row table:style-name="ro1">
          <table:table-cell office:value-type="float" office:value="632.92236328125">
            <text:p>632.9223632813</text:p>
          </table:table-cell>
          <table:table-cell office:value-type="float" office:value="0.004309487">
            <text:p>0.004309487</text:p>
          </table:table-cell>
          <table:table-cell table:number-columns-repeated="4"/>
        </table:table-row>
        <table:table-row table:style-name="ro1">
          <table:table-cell office:value-type="float" office:value="633.041809082031">
            <text:p>633.041809082</text:p>
          </table:table-cell>
          <table:table-cell office:value-type="float" office:value="0.01902556">
            <text:p>0.01902556</text:p>
          </table:table-cell>
          <table:table-cell table:number-columns-repeated="4"/>
        </table:table-row>
        <table:table-row table:style-name="ro1">
          <table:table-cell office:value-type="float" office:value="633.161254882813">
            <text:p>633.1612548828</text:p>
          </table:table-cell>
          <table:table-cell office:value-type="float" office:value="0.04233594">
            <text:p>0.04233594</text:p>
          </table:table-cell>
          <table:table-cell table:number-columns-repeated="4"/>
        </table:table-row>
        <table:table-row table:style-name="ro1">
          <table:table-cell office:value-type="float" office:value="633.280700683594">
            <text:p>633.2807006836</text:p>
          </table:table-cell>
          <table:table-cell office:value-type="float" office:value="0.005277951">
            <text:p>0.005277951</text:p>
          </table:table-cell>
          <table:table-cell table:number-columns-repeated="4"/>
        </table:table-row>
        <table:table-row table:style-name="ro1">
          <table:table-cell office:value-type="float" office:value="633.400146484375">
            <text:p>633.4001464844</text:p>
          </table:table-cell>
          <table:table-cell office:value-type="float" office:value="0.009881572">
            <text:p>0.009881572</text:p>
          </table:table-cell>
          <table:table-cell table:number-columns-repeated="4"/>
        </table:table-row>
        <table:table-row table:style-name="ro1">
          <table:table-cell office:value-type="float" office:value="633.519592285156">
            <text:p>633.5195922852</text:p>
          </table:table-cell>
          <table:table-cell office:value-type="float" office:value="0.007597423">
            <text:p>0.007597423</text:p>
          </table:table-cell>
          <table:table-cell table:number-columns-repeated="4"/>
        </table:table-row>
        <table:table-row table:style-name="ro1">
          <table:table-cell office:value-type="float" office:value="633.639038085938">
            <text:p>633.6390380859</text:p>
          </table:table-cell>
          <table:table-cell office:value-type="float" office:value="0.02204548">
            <text:p>0.02204548</text:p>
          </table:table-cell>
          <table:table-cell table:number-columns-repeated="4"/>
        </table:table-row>
        <table:table-row table:style-name="ro1">
          <table:table-cell office:value-type="float" office:value="633.758544921875">
            <text:p>633.7585449219</text:p>
          </table:table-cell>
          <table:table-cell office:value-type="float" office:value="0.002850322">
            <text:p>0.002850322</text:p>
          </table:table-cell>
          <table:table-cell table:number-columns-repeated="4"/>
        </table:table-row>
        <table:table-row table:style-name="ro1">
          <table:table-cell office:value-type="float" office:value="633.877990722656">
            <text:p>633.8779907227</text:p>
          </table:table-cell>
          <table:table-cell office:value-type="float" office:value="0.01131022">
            <text:p>0.01131022</text:p>
          </table:table-cell>
          <table:table-cell table:number-columns-repeated="4"/>
        </table:table-row>
        <table:table-row table:style-name="ro1">
          <table:table-cell office:value-type="float" office:value="633.997436523438">
            <text:p>633.9974365234</text:p>
          </table:table-cell>
          <table:table-cell office:value-type="float" office:value="0.008977882">
            <text:p>0.008977882</text:p>
          </table:table-cell>
          <table:table-cell table:number-columns-repeated="4"/>
        </table:table-row>
        <table:table-row table:style-name="ro1">
          <table:table-cell office:value-type="float" office:value="634.116882324219">
            <text:p>634.1168823242</text:p>
          </table:table-cell>
          <table:table-cell office:value-type="float" office:value="0.005521359">
            <text:p>0.005521359</text:p>
          </table:table-cell>
          <table:table-cell table:number-columns-repeated="4"/>
        </table:table-row>
        <table:table-row table:style-name="ro1">
          <table:table-cell office:value-type="float" office:value="634.236389160156">
            <text:p>634.2363891602</text:p>
          </table:table-cell>
          <table:table-cell office:value-type="float" office:value="0.005408608">
            <text:p>0.005408608</text:p>
          </table:table-cell>
          <table:table-cell table:number-columns-repeated="4"/>
        </table:table-row>
        <table:table-row table:style-name="ro1">
          <table:table-cell office:value-type="float" office:value="634.355834960938">
            <text:p>634.3558349609</text:p>
          </table:table-cell>
          <table:table-cell office:value-type="float" office:value="0.01097831">
            <text:p>0.01097831</text:p>
          </table:table-cell>
          <table:table-cell table:number-columns-repeated="4"/>
        </table:table-row>
        <table:table-row table:style-name="ro1">
          <table:table-cell office:value-type="float" office:value="634.475280761719">
            <text:p>634.4752807617</text:p>
          </table:table-cell>
          <table:table-cell office:value-type="float" office:value="0.007176077">
            <text:p>0.007176077</text:p>
          </table:table-cell>
          <table:table-cell table:number-columns-repeated="4"/>
        </table:table-row>
        <table:table-row table:style-name="ro1">
          <table:table-cell office:value-type="float" office:value="634.594787597656">
            <text:p>634.5947875977</text:p>
          </table:table-cell>
          <table:table-cell office:value-type="float" office:value="0.03215375">
            <text:p>0.03215375</text:p>
          </table:table-cell>
          <table:table-cell table:number-columns-repeated="4"/>
        </table:table-row>
        <table:table-row table:style-name="ro1">
          <table:table-cell office:value-type="float" office:value="634.714233398438">
            <text:p>634.7142333984</text:p>
          </table:table-cell>
          <table:table-cell office:value-type="float" office:value="0.006298415">
            <text:p>0.006298415</text:p>
          </table:table-cell>
          <table:table-cell table:number-columns-repeated="4"/>
        </table:table-row>
        <table:table-row table:style-name="ro1">
          <table:table-cell office:value-type="float" office:value="634.833679199219">
            <text:p>634.8336791992</text:p>
          </table:table-cell>
          <table:table-cell office:value-type="float" office:value="0.003761163">
            <text:p>0.003761163</text:p>
          </table:table-cell>
          <table:table-cell table:number-columns-repeated="4"/>
        </table:table-row>
        <table:table-row table:style-name="ro1">
          <table:table-cell office:value-type="float" office:value="634.953186035156">
            <text:p>634.9531860352</text:p>
          </table:table-cell>
          <table:table-cell office:value-type="float" office:value="0.01730255">
            <text:p>0.01730255</text:p>
          </table:table-cell>
          <table:table-cell table:number-columns-repeated="4"/>
        </table:table-row>
        <table:table-row table:style-name="ro1">
          <table:table-cell office:value-type="float" office:value="635.072631835938">
            <text:p>635.0726318359</text:p>
          </table:table-cell>
          <table:table-cell office:value-type="float" office:value="0.01961221">
            <text:p>0.01961221</text:p>
          </table:table-cell>
          <table:table-cell table:number-columns-repeated="4"/>
        </table:table-row>
        <table:table-row table:style-name="ro1">
          <table:table-cell office:value-type="float" office:value="635.192138671875">
            <text:p>635.1921386719</text:p>
          </table:table-cell>
          <table:table-cell office:value-type="float" office:value="0.009571431">
            <text:p>0.009571431</text:p>
          </table:table-cell>
          <table:table-cell table:number-columns-repeated="4"/>
        </table:table-row>
        <table:table-row table:style-name="ro1">
          <table:table-cell office:value-type="float" office:value="635.311584472656">
            <text:p>635.3115844727</text:p>
          </table:table-cell>
          <table:table-cell office:value-type="float" office:value="-0.0004712152">
            <text:p>-0.0004712152</text:p>
          </table:table-cell>
          <table:table-cell table:number-columns-repeated="4"/>
        </table:table-row>
        <table:table-row table:style-name="ro1">
          <table:table-cell office:value-type="float" office:value="635.431091308594">
            <text:p>635.4310913086</text:p>
          </table:table-cell>
          <table:table-cell office:value-type="float" office:value="0.02818391">
            <text:p>0.02818391</text:p>
          </table:table-cell>
          <table:table-cell table:number-columns-repeated="4"/>
        </table:table-row>
        <table:table-row table:style-name="ro1">
          <table:table-cell office:value-type="float" office:value="635.550598144531">
            <text:p>635.5505981445</text:p>
          </table:table-cell>
          <table:table-cell office:value-type="float" office:value="0.01641083">
            <text:p>0.01641083</text:p>
          </table:table-cell>
          <table:table-cell table:number-columns-repeated="4"/>
        </table:table-row>
        <table:table-row table:style-name="ro1">
          <table:table-cell office:value-type="float" office:value="635.670043945313">
            <text:p>635.6700439453</text:p>
          </table:table-cell>
          <table:table-cell office:value-type="float" office:value="0.003285001">
            <text:p>0.003285001</text:p>
          </table:table-cell>
          <table:table-cell table:number-columns-repeated="4"/>
        </table:table-row>
        <table:table-row table:style-name="ro1">
          <table:table-cell office:value-type="float" office:value="635.78955078125">
            <text:p>635.7895507813</text:p>
          </table:table-cell>
          <table:table-cell office:value-type="float" office:value="0.01287501">
            <text:p>0.01287501</text:p>
          </table:table-cell>
          <table:table-cell table:number-columns-repeated="4"/>
        </table:table-row>
        <table:table-row table:style-name="ro1">
          <table:table-cell office:value-type="float" office:value="635.909057617188">
            <text:p>635.9090576172</text:p>
          </table:table-cell>
          <table:table-cell office:value-type="float" office:value="0.00977801">
            <text:p>0.00977801</text:p>
          </table:table-cell>
          <table:table-cell table:number-columns-repeated="4"/>
        </table:table-row>
        <table:table-row table:style-name="ro1">
          <table:table-cell office:value-type="float" office:value="636.028503417969">
            <text:p>636.028503418</text:p>
          </table:table-cell>
          <table:table-cell office:value-type="float" office:value="0.004990987">
            <text:p>0.004990987</text:p>
          </table:table-cell>
          <table:table-cell table:number-columns-repeated="4"/>
        </table:table-row>
        <table:table-row table:style-name="ro1">
          <table:table-cell office:value-type="float" office:value="636.148010253906">
            <text:p>636.1480102539</text:p>
          </table:table-cell>
          <table:table-cell office:value-type="float" office:value="0.005533592">
            <text:p>0.005533592</text:p>
          </table:table-cell>
          <table:table-cell table:number-columns-repeated="4"/>
        </table:table-row>
        <table:table-row table:style-name="ro1">
          <table:table-cell office:value-type="float" office:value="636.267517089844">
            <text:p>636.2675170898</text:p>
          </table:table-cell>
          <table:table-cell office:value-type="float" office:value="0.01900166">
            <text:p>0.01900166</text:p>
          </table:table-cell>
          <table:table-cell table:number-columns-repeated="4"/>
        </table:table-row>
        <table:table-row table:style-name="ro1">
          <table:table-cell office:value-type="float" office:value="636.387023925781">
            <text:p>636.3870239258</text:p>
          </table:table-cell>
          <table:table-cell office:value-type="float" office:value="0.02091335">
            <text:p>0.02091335</text:p>
          </table:table-cell>
          <table:table-cell table:number-columns-repeated="4"/>
        </table:table-row>
        <table:table-row table:style-name="ro1">
          <table:table-cell office:value-type="float" office:value="636.506469726563">
            <text:p>636.5064697266</text:p>
          </table:table-cell>
          <table:table-cell office:value-type="float" office:value="0.01183871">
            <text:p>0.01183871</text:p>
          </table:table-cell>
          <table:table-cell table:number-columns-repeated="4"/>
        </table:table-row>
        <table:table-row table:style-name="ro1">
          <table:table-cell office:value-type="float" office:value="636.6259765625">
            <text:p>636.6259765625</text:p>
          </table:table-cell>
          <table:table-cell office:value-type="float" office:value="0.02016344">
            <text:p>0.02016344</text:p>
          </table:table-cell>
          <table:table-cell table:number-columns-repeated="4"/>
        </table:table-row>
        <table:table-row table:style-name="ro1">
          <table:table-cell office:value-type="float" office:value="636.745483398438">
            <text:p>636.7454833984</text:p>
          </table:table-cell>
          <table:table-cell office:value-type="float" office:value="0.002824666">
            <text:p>0.002824666</text:p>
          </table:table-cell>
          <table:table-cell table:number-columns-repeated="4"/>
        </table:table-row>
        <table:table-row table:style-name="ro1">
          <table:table-cell office:value-type="float" office:value="636.864990234375">
            <text:p>636.8649902344</text:p>
          </table:table-cell>
          <table:table-cell office:value-type="float" office:value="0.008214695">
            <text:p>0.008214695</text:p>
          </table:table-cell>
          <table:table-cell table:number-columns-repeated="4"/>
        </table:table-row>
        <table:table-row table:style-name="ro1">
          <table:table-cell office:value-type="float" office:value="636.984497070313">
            <text:p>636.9844970703</text:p>
          </table:table-cell>
          <table:table-cell office:value-type="float" office:value="0.002999514">
            <text:p>0.002999514</text:p>
          </table:table-cell>
          <table:table-cell table:number-columns-repeated="4"/>
        </table:table-row>
        <table:table-row table:style-name="ro1">
          <table:table-cell office:value-type="float" office:value="637.10400390625">
            <text:p>637.1040039063</text:p>
          </table:table-cell>
          <table:table-cell office:value-type="float" office:value="0.002247801">
            <text:p>0.002247801</text:p>
          </table:table-cell>
          <table:table-cell table:number-columns-repeated="4"/>
        </table:table-row>
        <table:table-row table:style-name="ro1">
          <table:table-cell office:value-type="float" office:value="637.223510742188">
            <text:p>637.2235107422</text:p>
          </table:table-cell>
          <table:table-cell office:value-type="float" office:value="0.01266256">
            <text:p>0.01266256</text:p>
          </table:table-cell>
          <table:table-cell table:number-columns-repeated="4"/>
        </table:table-row>
        <table:table-row table:style-name="ro1">
          <table:table-cell office:value-type="float" office:value="637.343017578125">
            <text:p>637.3430175781</text:p>
          </table:table-cell>
          <table:table-cell office:value-type="float" office:value="0.0218173">
            <text:p>0.0218173</text:p>
          </table:table-cell>
          <table:table-cell table:number-columns-repeated="4"/>
        </table:table-row>
        <table:table-row table:style-name="ro1">
          <table:table-cell office:value-type="float" office:value="637.462524414063">
            <text:p>637.4625244141</text:p>
          </table:table-cell>
          <table:table-cell office:value-type="float" office:value="0.002608763">
            <text:p>0.002608763</text:p>
          </table:table-cell>
          <table:table-cell table:number-columns-repeated="4"/>
        </table:table-row>
        <table:table-row table:style-name="ro1">
          <table:table-cell office:value-type="float" office:value="637.58203125">
            <text:p>637.58203125</text:p>
          </table:table-cell>
          <table:table-cell office:value-type="float" office:value="0.03108947">
            <text:p>0.03108947</text:p>
          </table:table-cell>
          <table:table-cell table:number-columns-repeated="4"/>
        </table:table-row>
        <table:table-row table:style-name="ro1">
          <table:table-cell office:value-type="float" office:value="637.701538085938">
            <text:p>637.7015380859</text:p>
          </table:table-cell>
          <table:table-cell office:value-type="float" office:value="0.01104518">
            <text:p>0.01104518</text:p>
          </table:table-cell>
          <table:table-cell table:number-columns-repeated="4"/>
        </table:table-row>
        <table:table-row table:style-name="ro1">
          <table:table-cell office:value-type="float" office:value="637.821044921875">
            <text:p>637.8210449219</text:p>
          </table:table-cell>
          <table:table-cell office:value-type="float" office:value="0.007396756">
            <text:p>0.007396756</text:p>
          </table:table-cell>
          <table:table-cell table:number-columns-repeated="4"/>
        </table:table-row>
        <table:table-row table:style-name="ro1">
          <table:table-cell office:value-type="float" office:value="637.940551757813">
            <text:p>637.9405517578</text:p>
          </table:table-cell>
          <table:table-cell office:value-type="float" office:value="0.001677358">
            <text:p>0.001677358</text:p>
          </table:table-cell>
          <table:table-cell table:number-columns-repeated="4"/>
        </table:table-row>
        <table:table-row table:style-name="ro1">
          <table:table-cell office:value-type="float" office:value="638.060119628906">
            <text:p>638.0601196289</text:p>
          </table:table-cell>
          <table:table-cell office:value-type="float" office:value="0.000204055">
            <text:p>0.000204055</text:p>
          </table:table-cell>
          <table:table-cell table:number-columns-repeated="4"/>
        </table:table-row>
        <table:table-row table:style-name="ro1">
          <table:table-cell office:value-type="float" office:value="638.179626464844">
            <text:p>638.1796264648</text:p>
          </table:table-cell>
          <table:table-cell office:value-type="float" office:value="0.003418911">
            <text:p>0.003418911</text:p>
          </table:table-cell>
          <table:table-cell table:number-columns-repeated="4"/>
        </table:table-row>
        <table:table-row table:style-name="ro1">
          <table:table-cell office:value-type="float" office:value="638.299133300781">
            <text:p>638.2991333008</text:p>
          </table:table-cell>
          <table:table-cell office:value-type="float" office:value="0.02066157">
            <text:p>0.02066157</text:p>
          </table:table-cell>
          <table:table-cell table:number-columns-repeated="4"/>
        </table:table-row>
        <table:table-row table:style-name="ro1">
          <table:table-cell office:value-type="float" office:value="638.418640136719">
            <text:p>638.4186401367</text:p>
          </table:table-cell>
          <table:table-cell office:value-type="float" office:value="0.02486693">
            <text:p>0.02486693</text:p>
          </table:table-cell>
          <table:table-cell table:number-columns-repeated="4"/>
        </table:table-row>
        <table:table-row table:style-name="ro1">
          <table:table-cell office:value-type="float" office:value="638.538208007813">
            <text:p>638.5382080078</text:p>
          </table:table-cell>
          <table:table-cell office:value-type="float" office:value="0.006300989">
            <text:p>0.006300989</text:p>
          </table:table-cell>
          <table:table-cell table:number-columns-repeated="4"/>
        </table:table-row>
        <table:table-row table:style-name="ro1">
          <table:table-cell office:value-type="float" office:value="638.65771484375">
            <text:p>638.6577148438</text:p>
          </table:table-cell>
          <table:table-cell office:value-type="float" office:value="0.006466154">
            <text:p>0.006466154</text:p>
          </table:table-cell>
          <table:table-cell table:number-columns-repeated="4"/>
        </table:table-row>
        <table:table-row table:style-name="ro1">
          <table:table-cell office:value-type="float" office:value="638.777221679688">
            <text:p>638.7772216797</text:p>
          </table:table-cell>
          <table:table-cell office:value-type="float" office:value="0.003078587">
            <text:p>0.003078587</text:p>
          </table:table-cell>
          <table:table-cell table:number-columns-repeated="4"/>
        </table:table-row>
        <table:table-row table:style-name="ro1">
          <table:table-cell office:value-type="float" office:value="638.896789550781">
            <text:p>638.8967895508</text:p>
          </table:table-cell>
          <table:table-cell office:value-type="float" office:value="0.02225739">
            <text:p>0.02225739</text:p>
          </table:table-cell>
          <table:table-cell table:number-columns-repeated="4"/>
        </table:table-row>
        <table:table-row table:style-name="ro1">
          <table:table-cell office:value-type="float" office:value="639.016296386719">
            <text:p>639.0162963867</text:p>
          </table:table-cell>
          <table:table-cell office:value-type="float" office:value="0.01183239">
            <text:p>0.01183239</text:p>
          </table:table-cell>
          <table:table-cell table:number-columns-repeated="4"/>
        </table:table-row>
        <table:table-row table:style-name="ro1">
          <table:table-cell office:value-type="float" office:value="639.135864257813">
            <text:p>639.1358642578</text:p>
          </table:table-cell>
          <table:table-cell office:value-type="float" office:value="-0.001488473">
            <text:p>-0.001488473</text:p>
          </table:table-cell>
          <table:table-cell table:number-columns-repeated="4"/>
        </table:table-row>
        <table:table-row table:style-name="ro1">
          <table:table-cell office:value-type="float" office:value="639.25537109375">
            <text:p>639.2553710938</text:p>
          </table:table-cell>
          <table:table-cell office:value-type="float" office:value="0.006203784">
            <text:p>0.006203784</text:p>
          </table:table-cell>
          <table:table-cell table:number-columns-repeated="4"/>
        </table:table-row>
        <table:table-row table:style-name="ro1">
          <table:table-cell office:value-type="float" office:value="639.374938964844">
            <text:p>639.3749389648</text:p>
          </table:table-cell>
          <table:table-cell office:value-type="float" office:value="0.01133875">
            <text:p>0.01133875</text:p>
          </table:table-cell>
          <table:table-cell table:number-columns-repeated="4"/>
        </table:table-row>
        <table:table-row table:style-name="ro1">
          <table:table-cell office:value-type="float" office:value="639.494445800781">
            <text:p>639.4944458008</text:p>
          </table:table-cell>
          <table:table-cell office:value-type="float" office:value="0.005938872">
            <text:p>0.005938872</text:p>
          </table:table-cell>
          <table:table-cell table:number-columns-repeated="4"/>
        </table:table-row>
        <table:table-row table:style-name="ro1">
          <table:table-cell office:value-type="float" office:value="639.614013671875">
            <text:p>639.6140136719</text:p>
          </table:table-cell>
          <table:table-cell office:value-type="float" office:value="0.006989551">
            <text:p>0.006989551</text:p>
          </table:table-cell>
          <table:table-cell table:number-columns-repeated="4"/>
        </table:table-row>
        <table:table-row table:style-name="ro1">
          <table:table-cell office:value-type="float" office:value="639.733520507813">
            <text:p>639.7335205078</text:p>
          </table:table-cell>
          <table:table-cell office:value-type="float" office:value="0.0234102">
            <text:p>0.0234102</text:p>
          </table:table-cell>
          <table:table-cell table:number-columns-repeated="4"/>
        </table:table-row>
        <table:table-row table:style-name="ro1">
          <table:table-cell office:value-type="float" office:value="639.853088378906">
            <text:p>639.8530883789</text:p>
          </table:table-cell>
          <table:table-cell office:value-type="float" office:value="0.00275984">
            <text:p>0.00275984</text:p>
          </table:table-cell>
          <table:table-cell table:number-columns-repeated="4"/>
        </table:table-row>
        <table:table-row table:style-name="ro1">
          <table:table-cell office:value-type="float" office:value="639.972595214844">
            <text:p>639.9725952148</text:p>
          </table:table-cell>
          <table:table-cell office:value-type="float" office:value="0.0221271">
            <text:p>0.0221271</text:p>
          </table:table-cell>
          <table:table-cell table:number-columns-repeated="4"/>
        </table:table-row>
        <table:table-row table:style-name="ro1">
          <table:table-cell office:value-type="float" office:value="640.092163085938">
            <text:p>640.0921630859</text:p>
          </table:table-cell>
          <table:table-cell office:value-type="float" office:value="0.00379281">
            <text:p>0.00379281</text:p>
          </table:table-cell>
          <table:table-cell table:number-columns-repeated="4"/>
        </table:table-row>
        <table:table-row table:style-name="ro1">
          <table:table-cell office:value-type="float" office:value="640.211730957031">
            <text:p>640.211730957</text:p>
          </table:table-cell>
          <table:table-cell office:value-type="float" office:value="0.019307">
            <text:p>0.019307</text:p>
          </table:table-cell>
          <table:table-cell table:number-columns-repeated="4"/>
        </table:table-row>
        <table:table-row table:style-name="ro1">
          <table:table-cell office:value-type="float" office:value="640.331237792969">
            <text:p>640.331237793</text:p>
          </table:table-cell>
          <table:table-cell office:value-type="float" office:value="0.008681478">
            <text:p>0.008681478</text:p>
          </table:table-cell>
          <table:table-cell table:number-columns-repeated="4"/>
        </table:table-row>
        <table:table-row table:style-name="ro1">
          <table:table-cell office:value-type="float" office:value="640.450805664063">
            <text:p>640.4508056641</text:p>
          </table:table-cell>
          <table:table-cell office:value-type="float" office:value="0.002250684">
            <text:p>0.002250684</text:p>
          </table:table-cell>
          <table:table-cell table:number-columns-repeated="4"/>
        </table:table-row>
        <table:table-row table:style-name="ro1">
          <table:table-cell office:value-type="float" office:value="640.570373535156">
            <text:p>640.5703735352</text:p>
          </table:table-cell>
          <table:table-cell office:value-type="float" office:value="0.01605449">
            <text:p>0.01605449</text:p>
          </table:table-cell>
          <table:table-cell table:number-columns-repeated="4"/>
        </table:table-row>
        <table:table-row table:style-name="ro1">
          <table:table-cell office:value-type="float" office:value="640.68994140625">
            <text:p>640.6899414063</text:p>
          </table:table-cell>
          <table:table-cell office:value-type="float" office:value="0.01624732">
            <text:p>0.01624732</text:p>
          </table:table-cell>
          <table:table-cell table:number-columns-repeated="4"/>
        </table:table-row>
        <table:table-row table:style-name="ro1">
          <table:table-cell office:value-type="float" office:value="640.809509277344">
            <text:p>640.8095092773</text:p>
          </table:table-cell>
          <table:table-cell office:value-type="float" office:value="0.002671017">
            <text:p>0.002671017</text:p>
          </table:table-cell>
          <table:table-cell table:number-columns-repeated="4"/>
        </table:table-row>
        <table:table-row table:style-name="ro1">
          <table:table-cell office:value-type="float" office:value="640.929016113281">
            <text:p>640.9290161133</text:p>
          </table:table-cell>
          <table:table-cell office:value-type="float" office:value="-0.001944445">
            <text:p>-0.001944445</text:p>
          </table:table-cell>
          <table:table-cell table:number-columns-repeated="4"/>
        </table:table-row>
        <table:table-row table:style-name="ro1">
          <table:table-cell office:value-type="float" office:value="641.048583984375">
            <text:p>641.0485839844</text:p>
          </table:table-cell>
          <table:table-cell office:value-type="float" office:value="-0.002626755">
            <text:p>-0.002626755</text:p>
          </table:table-cell>
          <table:table-cell table:number-columns-repeated="4"/>
        </table:table-row>
        <table:table-row table:style-name="ro1">
          <table:table-cell office:value-type="float" office:value="641.168151855469">
            <text:p>641.1681518555</text:p>
          </table:table-cell>
          <table:table-cell office:value-type="float" office:value="0.003316071">
            <text:p>0.003316071</text:p>
          </table:table-cell>
          <table:table-cell table:number-columns-repeated="4"/>
        </table:table-row>
        <table:table-row table:style-name="ro1">
          <table:table-cell office:value-type="float" office:value="641.287719726563">
            <text:p>641.2877197266</text:p>
          </table:table-cell>
          <table:table-cell office:value-type="float" office:value="0.004373829">
            <text:p>0.004373829</text:p>
          </table:table-cell>
          <table:table-cell table:number-columns-repeated="4"/>
        </table:table-row>
        <table:table-row table:style-name="ro1">
          <table:table-cell office:value-type="float" office:value="641.407287597656">
            <text:p>641.4072875977</text:p>
          </table:table-cell>
          <table:table-cell office:value-type="float" office:value="0.0101852">
            <text:p>0.0101852</text:p>
          </table:table-cell>
          <table:table-cell table:number-columns-repeated="4"/>
        </table:table-row>
        <table:table-row table:style-name="ro1">
          <table:table-cell office:value-type="float" office:value="641.52685546875">
            <text:p>641.5268554688</text:p>
          </table:table-cell>
          <table:table-cell office:value-type="float" office:value="0.01647597">
            <text:p>0.01647597</text:p>
          </table:table-cell>
          <table:table-cell table:number-columns-repeated="4"/>
        </table:table-row>
        <table:table-row table:style-name="ro1">
          <table:table-cell office:value-type="float" office:value="641.646423339844">
            <text:p>641.6464233398</text:p>
          </table:table-cell>
          <table:table-cell office:value-type="float" office:value="0.007325527">
            <text:p>0.007325527</text:p>
          </table:table-cell>
          <table:table-cell table:number-columns-repeated="4"/>
        </table:table-row>
        <table:table-row table:style-name="ro1">
          <table:table-cell office:value-type="float" office:value="641.765991210938">
            <text:p>641.7659912109</text:p>
          </table:table-cell>
          <table:table-cell office:value-type="float" office:value="0.001550952">
            <text:p>0.001550952</text:p>
          </table:table-cell>
          <table:table-cell table:number-columns-repeated="4"/>
        </table:table-row>
        <table:table-row table:style-name="ro1">
          <table:table-cell office:value-type="float" office:value="641.885559082031">
            <text:p>641.885559082</text:p>
          </table:table-cell>
          <table:table-cell office:value-type="float" office:value="0.01262148">
            <text:p>0.01262148</text:p>
          </table:table-cell>
          <table:table-cell table:number-columns-repeated="4"/>
        </table:table-row>
        <table:table-row table:style-name="ro1">
          <table:table-cell office:value-type="float" office:value="642.005126953125">
            <text:p>642.0051269531</text:p>
          </table:table-cell>
          <table:table-cell office:value-type="float" office:value="0.005901838">
            <text:p>0.005901838</text:p>
          </table:table-cell>
          <table:table-cell table:number-columns-repeated="4"/>
        </table:table-row>
        <table:table-row table:style-name="ro1">
          <table:table-cell office:value-type="float" office:value="642.124694824219">
            <text:p>642.1246948242</text:p>
          </table:table-cell>
          <table:table-cell office:value-type="float" office:value="0.009049562">
            <text:p>0.009049562</text:p>
          </table:table-cell>
          <table:table-cell table:number-columns-repeated="4"/>
        </table:table-row>
        <table:table-row table:style-name="ro1">
          <table:table-cell office:value-type="float" office:value="642.244262695313">
            <text:p>642.2442626953</text:p>
          </table:table-cell>
          <table:table-cell office:value-type="float" office:value="0.003561176">
            <text:p>0.003561176</text:p>
          </table:table-cell>
          <table:table-cell table:number-columns-repeated="4"/>
        </table:table-row>
        <table:table-row table:style-name="ro1">
          <table:table-cell office:value-type="float" office:value="642.363891601563">
            <text:p>642.3638916016</text:p>
          </table:table-cell>
          <table:table-cell office:value-type="float" office:value="0.001307493">
            <text:p>0.001307493</text:p>
          </table:table-cell>
          <table:table-cell table:number-columns-repeated="4"/>
        </table:table-row>
        <table:table-row table:style-name="ro1">
          <table:table-cell office:value-type="float" office:value="642.483459472656">
            <text:p>642.4834594727</text:p>
          </table:table-cell>
          <table:table-cell office:value-type="float" office:value="0.004271926">
            <text:p>0.004271926</text:p>
          </table:table-cell>
          <table:table-cell table:number-columns-repeated="4"/>
        </table:table-row>
        <table:table-row table:style-name="ro1">
          <table:table-cell office:value-type="float" office:value="642.60302734375">
            <text:p>642.6030273438</text:p>
          </table:table-cell>
          <table:table-cell office:value-type="float" office:value="0.01573603">
            <text:p>0.01573603</text:p>
          </table:table-cell>
          <table:table-cell table:number-columns-repeated="4"/>
        </table:table-row>
        <table:table-row table:style-name="ro1">
          <table:table-cell office:value-type="float" office:value="642.722595214844">
            <text:p>642.7225952148</text:p>
          </table:table-cell>
          <table:table-cell office:value-type="float" office:value="-0.0005615887">
            <text:p>-0.0005615887</text:p>
          </table:table-cell>
          <table:table-cell table:number-columns-repeated="4"/>
        </table:table-row>
        <table:table-row table:style-name="ro1">
          <table:table-cell office:value-type="float" office:value="642.842163085938">
            <text:p>642.8421630859</text:p>
          </table:table-cell>
          <table:table-cell office:value-type="float" office:value="0.00353106">
            <text:p>0.00353106</text:p>
          </table:table-cell>
          <table:table-cell table:number-columns-repeated="4"/>
        </table:table-row>
        <table:table-row table:style-name="ro1">
          <table:table-cell office:value-type="float" office:value="642.961791992188">
            <text:p>642.9617919922</text:p>
          </table:table-cell>
          <table:table-cell office:value-type="float" office:value="0.005645241">
            <text:p>0.005645241</text:p>
          </table:table-cell>
          <table:table-cell table:number-columns-repeated="4"/>
        </table:table-row>
        <table:table-row table:style-name="ro1">
          <table:table-cell office:value-type="float" office:value="643.081359863281">
            <text:p>643.0813598633</text:p>
          </table:table-cell>
          <table:table-cell office:value-type="float" office:value="0.01471223">
            <text:p>0.01471223</text:p>
          </table:table-cell>
          <table:table-cell table:number-columns-repeated="4"/>
        </table:table-row>
        <table:table-row table:style-name="ro1">
          <table:table-cell office:value-type="float" office:value="643.200927734375">
            <text:p>643.2009277344</text:p>
          </table:table-cell>
          <table:table-cell office:value-type="float" office:value="0.009906106">
            <text:p>0.009906106</text:p>
          </table:table-cell>
          <table:table-cell table:number-columns-repeated="4"/>
        </table:table-row>
        <table:table-row table:style-name="ro1">
          <table:table-cell office:value-type="float" office:value="643.320556640625">
            <text:p>643.3205566406</text:p>
          </table:table-cell>
          <table:table-cell office:value-type="float" office:value="0.006937785">
            <text:p>0.006937785</text:p>
          </table:table-cell>
          <table:table-cell table:number-columns-repeated="4"/>
        </table:table-row>
        <table:table-row table:style-name="ro1">
          <table:table-cell office:value-type="float" office:value="643.440124511719">
            <text:p>643.4401245117</text:p>
          </table:table-cell>
          <table:table-cell office:value-type="float" office:value="0.01876408">
            <text:p>0.01876408</text:p>
          </table:table-cell>
          <table:table-cell table:number-columns-repeated="4"/>
        </table:table-row>
        <table:table-row table:style-name="ro1">
          <table:table-cell office:value-type="float" office:value="643.559753417969">
            <text:p>643.559753418</text:p>
          </table:table-cell>
          <table:table-cell office:value-type="float" office:value="0.01646265">
            <text:p>0.01646265</text:p>
          </table:table-cell>
          <table:table-cell table:number-columns-repeated="4"/>
        </table:table-row>
        <table:table-row table:style-name="ro1">
          <table:table-cell office:value-type="float" office:value="643.679321289063">
            <text:p>643.6793212891</text:p>
          </table:table-cell>
          <table:table-cell office:value-type="float" office:value="0.012163">
            <text:p>0.012163</text:p>
          </table:table-cell>
          <table:table-cell table:number-columns-repeated="4"/>
        </table:table-row>
        <table:table-row table:style-name="ro1">
          <table:table-cell office:value-type="float" office:value="643.798950195313">
            <text:p>643.7989501953</text:p>
          </table:table-cell>
          <table:table-cell office:value-type="float" office:value="0.00836381">
            <text:p>0.00836381</text:p>
          </table:table-cell>
          <table:table-cell table:number-columns-repeated="4"/>
        </table:table-row>
        <table:table-row table:style-name="ro1">
          <table:table-cell office:value-type="float" office:value="643.918518066406">
            <text:p>643.9185180664</text:p>
          </table:table-cell>
          <table:table-cell office:value-type="float" office:value="0.005913958">
            <text:p>0.005913958</text:p>
          </table:table-cell>
          <table:table-cell table:number-columns-repeated="4"/>
        </table:table-row>
        <table:table-row table:style-name="ro1">
          <table:table-cell office:value-type="float" office:value="644.038146972656">
            <text:p>644.0381469727</text:p>
          </table:table-cell>
          <table:table-cell office:value-type="float" office:value="0.02505183">
            <text:p>0.02505183</text:p>
          </table:table-cell>
          <table:table-cell table:number-columns-repeated="4"/>
        </table:table-row>
        <table:table-row table:style-name="ro1">
          <table:table-cell office:value-type="float" office:value="644.15771484375">
            <text:p>644.1577148438</text:p>
          </table:table-cell>
          <table:table-cell office:value-type="float" office:value="0.000957602">
            <text:p>0.000957602</text:p>
          </table:table-cell>
          <table:table-cell table:number-columns-repeated="4"/>
        </table:table-row>
        <table:table-row table:style-name="ro1">
          <table:table-cell office:value-type="float" office:value="644.27734375">
            <text:p>644.27734375</text:p>
          </table:table-cell>
          <table:table-cell office:value-type="float" office:value="0.001353787">
            <text:p>0.001353787</text:p>
          </table:table-cell>
          <table:table-cell table:number-columns-repeated="4"/>
        </table:table-row>
        <table:table-row table:style-name="ro1">
          <table:table-cell office:value-type="float" office:value="644.396911621094">
            <text:p>644.3969116211</text:p>
          </table:table-cell>
          <table:table-cell office:value-type="float" office:value="0.004866382">
            <text:p>0.004866382</text:p>
          </table:table-cell>
          <table:table-cell table:number-columns-repeated="4"/>
        </table:table-row>
        <table:table-row table:style-name="ro1">
          <table:table-cell office:value-type="float" office:value="644.516540527344">
            <text:p>644.5165405273</text:p>
          </table:table-cell>
          <table:table-cell office:value-type="float" office:value="0.004719944">
            <text:p>0.004719944</text:p>
          </table:table-cell>
          <table:table-cell table:number-columns-repeated="4"/>
        </table:table-row>
        <table:table-row table:style-name="ro1">
          <table:table-cell office:value-type="float" office:value="644.636169433594">
            <text:p>644.6361694336</text:p>
          </table:table-cell>
          <table:table-cell office:value-type="float" office:value="0.002650985">
            <text:p>0.002650985</text:p>
          </table:table-cell>
          <table:table-cell table:number-columns-repeated="4"/>
        </table:table-row>
        <table:table-row table:style-name="ro1">
          <table:table-cell office:value-type="float" office:value="644.755737304688">
            <text:p>644.7557373047</text:p>
          </table:table-cell>
          <table:table-cell office:value-type="float" office:value="0.002918182">
            <text:p>0.002918182</text:p>
          </table:table-cell>
          <table:table-cell table:number-columns-repeated="4"/>
        </table:table-row>
        <table:table-row table:style-name="ro1">
          <table:table-cell office:value-type="float" office:value="644.875366210938">
            <text:p>644.8753662109</text:p>
          </table:table-cell>
          <table:table-cell office:value-type="float" office:value="0.01331366">
            <text:p>0.01331366</text:p>
          </table:table-cell>
          <table:table-cell table:number-columns-repeated="4"/>
        </table:table-row>
        <table:table-row table:style-name="ro1">
          <table:table-cell office:value-type="float" office:value="644.994995117188">
            <text:p>644.9949951172</text:p>
          </table:table-cell>
          <table:table-cell office:value-type="float" office:value="0.01317137">
            <text:p>0.01317137</text:p>
          </table:table-cell>
          <table:table-cell table:number-columns-repeated="4"/>
        </table:table-row>
        <table:table-row table:style-name="ro1">
          <table:table-cell office:value-type="float" office:value="645.114562988281">
            <text:p>645.1145629883</text:p>
          </table:table-cell>
          <table:table-cell office:value-type="float" office:value="0.01739217">
            <text:p>0.01739217</text:p>
          </table:table-cell>
          <table:table-cell table:number-columns-repeated="4"/>
        </table:table-row>
        <table:table-row table:style-name="ro1">
          <table:table-cell office:value-type="float" office:value="645.234191894531">
            <text:p>645.2341918945</text:p>
          </table:table-cell>
          <table:table-cell office:value-type="float" office:value="0.01529542">
            <text:p>0.01529542</text:p>
          </table:table-cell>
          <table:table-cell table:number-columns-repeated="4"/>
        </table:table-row>
        <table:table-row table:style-name="ro1">
          <table:table-cell office:value-type="float" office:value="645.353820800781">
            <text:p>645.3538208008</text:p>
          </table:table-cell>
          <table:table-cell office:value-type="float" office:value="0.007206395">
            <text:p>0.007206395</text:p>
          </table:table-cell>
          <table:table-cell table:number-columns-repeated="4"/>
        </table:table-row>
        <table:table-row table:style-name="ro1">
          <table:table-cell office:value-type="float" office:value="645.473449707031">
            <text:p>645.473449707</text:p>
          </table:table-cell>
          <table:table-cell office:value-type="float" office:value="0.001942441">
            <text:p>0.001942441</text:p>
          </table:table-cell>
          <table:table-cell table:number-columns-repeated="4"/>
        </table:table-row>
        <table:table-row table:style-name="ro1">
          <table:table-cell office:value-type="float" office:value="645.593078613281">
            <text:p>645.5930786133</text:p>
          </table:table-cell>
          <table:table-cell office:value-type="float" office:value="0.007067492">
            <text:p>0.007067492</text:p>
          </table:table-cell>
          <table:table-cell table:number-columns-repeated="4"/>
        </table:table-row>
        <table:table-row table:style-name="ro1">
          <table:table-cell office:value-type="float" office:value="645.712707519531">
            <text:p>645.7127075195</text:p>
          </table:table-cell>
          <table:table-cell office:value-type="float" office:value="0.003809638">
            <text:p>0.003809638</text:p>
          </table:table-cell>
          <table:table-cell table:number-columns-repeated="4"/>
        </table:table-row>
        <table:table-row table:style-name="ro1">
          <table:table-cell office:value-type="float" office:value="645.832336425781">
            <text:p>645.8323364258</text:p>
          </table:table-cell>
          <table:table-cell office:value-type="float" office:value="0.002160764">
            <text:p>0.002160764</text:p>
          </table:table-cell>
          <table:table-cell table:number-columns-repeated="4"/>
        </table:table-row>
        <table:table-row table:style-name="ro1">
          <table:table-cell office:value-type="float" office:value="645.951965332031">
            <text:p>645.951965332</text:p>
          </table:table-cell>
          <table:table-cell office:value-type="float" office:value="0.006093511">
            <text:p>0.006093511</text:p>
          </table:table-cell>
          <table:table-cell table:number-columns-repeated="4"/>
        </table:table-row>
        <table:table-row table:style-name="ro1">
          <table:table-cell office:value-type="float" office:value="646.071533203125">
            <text:p>646.0715332031</text:p>
          </table:table-cell>
          <table:table-cell office:value-type="float" office:value="0.004129027">
            <text:p>0.004129027</text:p>
          </table:table-cell>
          <table:table-cell table:number-columns-repeated="4"/>
        </table:table-row>
        <table:table-row table:style-name="ro1">
          <table:table-cell office:value-type="float" office:value="646.191162109375">
            <text:p>646.1911621094</text:p>
          </table:table-cell>
          <table:table-cell office:value-type="float" office:value="-0.0008079552">
            <text:p>-0.0008079552</text:p>
          </table:table-cell>
          <table:table-cell table:number-columns-repeated="4"/>
        </table:table-row>
        <table:table-row table:style-name="ro1">
          <table:table-cell office:value-type="float" office:value="646.310852050781">
            <text:p>646.3108520508</text:p>
          </table:table-cell>
          <table:table-cell office:value-type="float" office:value="0.01412489">
            <text:p>0.01412489</text:p>
          </table:table-cell>
          <table:table-cell table:number-columns-repeated="4"/>
        </table:table-row>
        <table:table-row table:style-name="ro1">
          <table:table-cell office:value-type="float" office:value="646.430480957031">
            <text:p>646.430480957</text:p>
          </table:table-cell>
          <table:table-cell office:value-type="float" office:value="0.008394333">
            <text:p>0.008394333</text:p>
          </table:table-cell>
          <table:table-cell table:number-columns-repeated="4"/>
        </table:table-row>
        <table:table-row table:style-name="ro1">
          <table:table-cell office:value-type="float" office:value="646.550109863281">
            <text:p>646.5501098633</text:p>
          </table:table-cell>
          <table:table-cell office:value-type="float" office:value="0.01797191">
            <text:p>0.01797191</text:p>
          </table:table-cell>
          <table:table-cell table:number-columns-repeated="4"/>
        </table:table-row>
        <table:table-row table:style-name="ro1">
          <table:table-cell office:value-type="float" office:value="646.669738769531">
            <text:p>646.6697387695</text:p>
          </table:table-cell>
          <table:table-cell office:value-type="float" office:value="0.003659821">
            <text:p>0.003659821</text:p>
          </table:table-cell>
          <table:table-cell table:number-columns-repeated="4"/>
        </table:table-row>
        <table:table-row table:style-name="ro1">
          <table:table-cell office:value-type="float" office:value="646.789367675781">
            <text:p>646.7893676758</text:p>
          </table:table-cell>
          <table:table-cell office:value-type="float" office:value="0.01155723">
            <text:p>0.01155723</text:p>
          </table:table-cell>
          <table:table-cell table:number-columns-repeated="4"/>
        </table:table-row>
        <table:table-row table:style-name="ro1">
          <table:table-cell office:value-type="float" office:value="646.908996582031">
            <text:p>646.908996582</text:p>
          </table:table-cell>
          <table:table-cell office:value-type="float" office:value="0.02968155">
            <text:p>0.02968155</text:p>
          </table:table-cell>
          <table:table-cell table:number-columns-repeated="4"/>
        </table:table-row>
        <table:table-row table:style-name="ro1">
          <table:table-cell office:value-type="float" office:value="647.028625488281">
            <text:p>647.0286254883</text:p>
          </table:table-cell>
          <table:table-cell office:value-type="float" office:value="0.01095341">
            <text:p>0.01095341</text:p>
          </table:table-cell>
          <table:table-cell table:number-columns-repeated="4"/>
        </table:table-row>
        <table:table-row table:style-name="ro1">
          <table:table-cell office:value-type="float" office:value="647.148254394531">
            <text:p>647.1482543945</text:p>
          </table:table-cell>
          <table:table-cell office:value-type="float" office:value="0.004867078">
            <text:p>0.004867078</text:p>
          </table:table-cell>
          <table:table-cell table:number-columns-repeated="4"/>
        </table:table-row>
        <table:table-row table:style-name="ro1">
          <table:table-cell office:value-type="float" office:value="647.267944335938">
            <text:p>647.2679443359</text:p>
          </table:table-cell>
          <table:table-cell office:value-type="float" office:value="0.003995966">
            <text:p>0.003995966</text:p>
          </table:table-cell>
          <table:table-cell table:number-columns-repeated="4"/>
        </table:table-row>
        <table:table-row table:style-name="ro1">
          <table:table-cell office:value-type="float" office:value="647.387573242188">
            <text:p>647.3875732422</text:p>
          </table:table-cell>
          <table:table-cell office:value-type="float" office:value="0.01108829">
            <text:p>0.01108829</text:p>
          </table:table-cell>
          <table:table-cell table:number-columns-repeated="4"/>
        </table:table-row>
        <table:table-row table:style-name="ro1">
          <table:table-cell office:value-type="float" office:value="647.507202148438">
            <text:p>647.5072021484</text:p>
          </table:table-cell>
          <table:table-cell office:value-type="float" office:value="0.003811517">
            <text:p>0.003811517</text:p>
          </table:table-cell>
          <table:table-cell table:number-columns-repeated="4"/>
        </table:table-row>
        <table:table-row table:style-name="ro1">
          <table:table-cell office:value-type="float" office:value="647.626831054688">
            <text:p>647.6268310547</text:p>
          </table:table-cell>
          <table:table-cell office:value-type="float" office:value="0.009035579">
            <text:p>0.009035579</text:p>
          </table:table-cell>
          <table:table-cell table:number-columns-repeated="4"/>
        </table:table-row>
        <table:table-row table:style-name="ro1">
          <table:table-cell office:value-type="float" office:value="647.746520996094">
            <text:p>647.7465209961</text:p>
          </table:table-cell>
          <table:table-cell office:value-type="float" office:value="0.03105379">
            <text:p>0.03105379</text:p>
          </table:table-cell>
          <table:table-cell table:number-columns-repeated="4"/>
        </table:table-row>
        <table:table-row table:style-name="ro1">
          <table:table-cell office:value-type="float" office:value="647.866149902344">
            <text:p>647.8661499023</text:p>
          </table:table-cell>
          <table:table-cell office:value-type="float" office:value="-0.0006318216">
            <text:p>-0.0006318216</text:p>
          </table:table-cell>
          <table:table-cell table:number-columns-repeated="4"/>
        </table:table-row>
        <table:table-row table:style-name="ro1">
          <table:table-cell office:value-type="float" office:value="647.985778808594">
            <text:p>647.9857788086</text:p>
          </table:table-cell>
          <table:table-cell office:value-type="float" office:value="0.02904487">
            <text:p>0.02904487</text:p>
          </table:table-cell>
          <table:table-cell table:number-columns-repeated="4"/>
        </table:table-row>
        <table:table-row table:style-name="ro1">
          <table:table-cell office:value-type="float" office:value="648.10546875">
            <text:p>648.10546875</text:p>
          </table:table-cell>
          <table:table-cell office:value-type="float" office:value="-0.0005950255">
            <text:p>-0.0005950255</text:p>
          </table:table-cell>
          <table:table-cell table:number-columns-repeated="4"/>
        </table:table-row>
        <table:table-row table:style-name="ro1">
          <table:table-cell office:value-type="float" office:value="648.22509765625">
            <text:p>648.2250976563</text:p>
          </table:table-cell>
          <table:table-cell office:value-type="float" office:value="0.02491439">
            <text:p>0.02491439</text:p>
          </table:table-cell>
          <table:table-cell table:number-columns-repeated="4"/>
        </table:table-row>
        <table:table-row table:style-name="ro1">
          <table:table-cell office:value-type="float" office:value="648.344787597656">
            <text:p>648.3447875977</text:p>
          </table:table-cell>
          <table:table-cell office:value-type="float" office:value="0.01377189">
            <text:p>0.01377189</text:p>
          </table:table-cell>
          <table:table-cell table:number-columns-repeated="4"/>
        </table:table-row>
        <table:table-row table:style-name="ro1">
          <table:table-cell office:value-type="float" office:value="648.464416503906">
            <text:p>648.4644165039</text:p>
          </table:table-cell>
          <table:table-cell office:value-type="float" office:value="0.005883252">
            <text:p>0.005883252</text:p>
          </table:table-cell>
          <table:table-cell table:number-columns-repeated="4"/>
        </table:table-row>
        <table:table-row table:style-name="ro1">
          <table:table-cell office:value-type="float" office:value="648.584106445313">
            <text:p>648.5841064453</text:p>
          </table:table-cell>
          <table:table-cell office:value-type="float" office:value="0.009167187">
            <text:p>0.009167187</text:p>
          </table:table-cell>
          <table:table-cell table:number-columns-repeated="4"/>
        </table:table-row>
        <table:table-row table:style-name="ro1">
          <table:table-cell office:value-type="float" office:value="648.703735351563">
            <text:p>648.7037353516</text:p>
          </table:table-cell>
          <table:table-cell office:value-type="float" office:value="0.007213143">
            <text:p>0.007213143</text:p>
          </table:table-cell>
          <table:table-cell table:number-columns-repeated="4"/>
        </table:table-row>
        <table:table-row table:style-name="ro1">
          <table:table-cell office:value-type="float" office:value="648.823425292969">
            <text:p>648.823425293</text:p>
          </table:table-cell>
          <table:table-cell office:value-type="float" office:value="-0.004273628">
            <text:p>-0.004273628</text:p>
          </table:table-cell>
          <table:table-cell table:number-columns-repeated="4"/>
        </table:table-row>
        <table:table-row table:style-name="ro1">
          <table:table-cell office:value-type="float" office:value="648.943054199219">
            <text:p>648.9430541992</text:p>
          </table:table-cell>
          <table:table-cell office:value-type="float" office:value="0.002514909">
            <text:p>0.002514909</text:p>
          </table:table-cell>
          <table:table-cell table:number-columns-repeated="4"/>
        </table:table-row>
        <table:table-row table:style-name="ro1">
          <table:table-cell office:value-type="float" office:value="649.062744140625">
            <text:p>649.0627441406</text:p>
          </table:table-cell>
          <table:table-cell office:value-type="float" office:value="0.005126569">
            <text:p>0.005126569</text:p>
          </table:table-cell>
          <table:table-cell table:number-columns-repeated="4"/>
        </table:table-row>
        <table:table-row table:style-name="ro1">
          <table:table-cell office:value-type="float" office:value="649.182434082031">
            <text:p>649.182434082</text:p>
          </table:table-cell>
          <table:table-cell office:value-type="float" office:value="0.006753576">
            <text:p>0.006753576</text:p>
          </table:table-cell>
          <table:table-cell table:number-columns-repeated="4"/>
        </table:table-row>
        <table:table-row table:style-name="ro1">
          <table:table-cell office:value-type="float" office:value="649.302062988281">
            <text:p>649.3020629883</text:p>
          </table:table-cell>
          <table:table-cell office:value-type="float" office:value="0.01111651">
            <text:p>0.01111651</text:p>
          </table:table-cell>
          <table:table-cell table:number-columns-repeated="4"/>
        </table:table-row>
        <table:table-row table:style-name="ro1">
          <table:table-cell office:value-type="float" office:value="649.421752929688">
            <text:p>649.4217529297</text:p>
          </table:table-cell>
          <table:table-cell office:value-type="float" office:value="-0.002214789">
            <text:p>-0.002214789</text:p>
          </table:table-cell>
          <table:table-cell table:number-columns-repeated="4"/>
        </table:table-row>
        <table:table-row table:style-name="ro1">
          <table:table-cell office:value-type="float" office:value="649.541442871094">
            <text:p>649.5414428711</text:p>
          </table:table-cell>
          <table:table-cell office:value-type="float" office:value="0.00281476">
            <text:p>0.00281476</text:p>
          </table:table-cell>
          <table:table-cell table:number-columns-repeated="4"/>
        </table:table-row>
        <table:table-row table:style-name="ro1">
          <table:table-cell office:value-type="float" office:value="649.661071777344">
            <text:p>649.6610717773</text:p>
          </table:table-cell>
          <table:table-cell office:value-type="float" office:value="0.0227333">
            <text:p>0.0227333</text:p>
          </table:table-cell>
          <table:table-cell table:number-columns-repeated="4"/>
        </table:table-row>
        <table:table-row table:style-name="ro1">
          <table:table-cell office:value-type="float" office:value="649.78076171875">
            <text:p>649.7807617188</text:p>
          </table:table-cell>
          <table:table-cell office:value-type="float" office:value="0.008636995">
            <text:p>0.008636995</text:p>
          </table:table-cell>
          <table:table-cell table:number-columns-repeated="4"/>
        </table:table-row>
        <table:table-row table:style-name="ro1">
          <table:table-cell office:value-type="float" office:value="649.900451660156">
            <text:p>649.9004516602</text:p>
          </table:table-cell>
          <table:table-cell office:value-type="float" office:value="0.009550964">
            <text:p>0.009550964</text:p>
          </table:table-cell>
          <table:table-cell table:number-columns-repeated="4"/>
        </table:table-row>
        <table:table-row table:style-name="ro1">
          <table:table-cell office:value-type="float" office:value="650.020141601563">
            <text:p>650.0201416016</text:p>
          </table:table-cell>
          <table:table-cell office:value-type="float" office:value="0.0009320453">
            <text:p>0.0009320453</text:p>
          </table:table-cell>
          <table:table-cell table:number-columns-repeated="4"/>
        </table:table-row>
        <table:table-row table:style-name="ro1">
          <table:table-cell office:value-type="float" office:value="650.139770507813">
            <text:p>650.1397705078</text:p>
          </table:table-cell>
          <table:table-cell office:value-type="float" office:value="-0.002667592">
            <text:p>-0.002667592</text:p>
          </table:table-cell>
          <table:table-cell table:number-columns-repeated="4"/>
        </table:table-row>
        <table:table-row table:style-name="ro1">
          <table:table-cell office:value-type="float" office:value="650.259460449219">
            <text:p>650.2594604492</text:p>
          </table:table-cell>
          <table:table-cell office:value-type="float" office:value="-0.0002768541">
            <text:p>-0.0002768541</text:p>
          </table:table-cell>
          <table:table-cell table:number-columns-repeated="4"/>
        </table:table-row>
        <table:table-row table:style-name="ro1">
          <table:table-cell office:value-type="float" office:value="650.379150390625">
            <text:p>650.3791503906</text:p>
          </table:table-cell>
          <table:table-cell office:value-type="float" office:value="0.005607947">
            <text:p>0.005607947</text:p>
          </table:table-cell>
          <table:table-cell table:number-columns-repeated="4"/>
        </table:table-row>
        <table:table-row table:style-name="ro1">
          <table:table-cell office:value-type="float" office:value="650.498840332031">
            <text:p>650.498840332</text:p>
          </table:table-cell>
          <table:table-cell office:value-type="float" office:value="0.001690442">
            <text:p>0.001690442</text:p>
          </table:table-cell>
          <table:table-cell table:number-columns-repeated="4"/>
        </table:table-row>
        <table:table-row table:style-name="ro1">
          <table:table-cell office:value-type="float" office:value="650.618530273438">
            <text:p>650.6185302734</text:p>
          </table:table-cell>
          <table:table-cell office:value-type="float" office:value="0.009633635">
            <text:p>0.009633635</text:p>
          </table:table-cell>
          <table:table-cell table:number-columns-repeated="4"/>
        </table:table-row>
        <table:table-row table:style-name="ro1">
          <table:table-cell office:value-type="float" office:value="650.738220214844">
            <text:p>650.7382202148</text:p>
          </table:table-cell>
          <table:table-cell office:value-type="float" office:value="0.00337201">
            <text:p>0.00337201</text:p>
          </table:table-cell>
          <table:table-cell table:number-columns-repeated="4"/>
        </table:table-row>
        <table:table-row table:style-name="ro1">
          <table:table-cell office:value-type="float" office:value="650.85791015625">
            <text:p>650.8579101563</text:p>
          </table:table-cell>
          <table:table-cell office:value-type="float" office:value="0.01158891">
            <text:p>0.01158891</text:p>
          </table:table-cell>
          <table:table-cell table:number-columns-repeated="4"/>
        </table:table-row>
        <table:table-row table:style-name="ro1">
          <table:table-cell office:value-type="float" office:value="650.977600097656">
            <text:p>650.9776000977</text:p>
          </table:table-cell>
          <table:table-cell office:value-type="float" office:value="0.01400452">
            <text:p>0.01400452</text:p>
          </table:table-cell>
          <table:table-cell table:number-columns-repeated="4"/>
        </table:table-row>
        <table:table-row table:style-name="ro1">
          <table:table-cell office:value-type="float" office:value="651.097290039063">
            <text:p>651.0972900391</text:p>
          </table:table-cell>
          <table:table-cell office:value-type="float" office:value="0.005884518">
            <text:p>0.005884518</text:p>
          </table:table-cell>
          <table:table-cell table:number-columns-repeated="4"/>
        </table:table-row>
        <table:table-row table:style-name="ro1">
          <table:table-cell office:value-type="float" office:value="651.216979980469">
            <text:p>651.2169799805</text:p>
          </table:table-cell>
          <table:table-cell office:value-type="float" office:value="0.01556944">
            <text:p>0.01556944</text:p>
          </table:table-cell>
          <table:table-cell table:number-columns-repeated="4"/>
        </table:table-row>
        <table:table-row table:style-name="ro1">
          <table:table-cell office:value-type="float" office:value="651.336669921875">
            <text:p>651.3366699219</text:p>
          </table:table-cell>
          <table:table-cell office:value-type="float" office:value="0.005355292">
            <text:p>0.005355292</text:p>
          </table:table-cell>
          <table:table-cell table:number-columns-repeated="4"/>
        </table:table-row>
        <table:table-row table:style-name="ro1">
          <table:table-cell office:value-type="float" office:value="651.456359863281">
            <text:p>651.4563598633</text:p>
          </table:table-cell>
          <table:table-cell office:value-type="float" office:value="0.005188093">
            <text:p>0.005188093</text:p>
          </table:table-cell>
          <table:table-cell table:number-columns-repeated="4"/>
        </table:table-row>
        <table:table-row table:style-name="ro1">
          <table:table-cell office:value-type="float" office:value="651.576049804688">
            <text:p>651.5760498047</text:p>
          </table:table-cell>
          <table:table-cell office:value-type="float" office:value="0.00228372">
            <text:p>0.00228372</text:p>
          </table:table-cell>
          <table:table-cell table:number-columns-repeated="4"/>
        </table:table-row>
        <table:table-row table:style-name="ro1">
          <table:table-cell office:value-type="float" office:value="651.695739746094">
            <text:p>651.6957397461</text:p>
          </table:table-cell>
          <table:table-cell office:value-type="float" office:value="0.01105528">
            <text:p>0.01105528</text:p>
          </table:table-cell>
          <table:table-cell table:number-columns-repeated="4"/>
        </table:table-row>
        <table:table-row table:style-name="ro1">
          <table:table-cell office:value-type="float" office:value="651.8154296875">
            <text:p>651.8154296875</text:p>
          </table:table-cell>
          <table:table-cell office:value-type="float" office:value="0.003188901">
            <text:p>0.003188901</text:p>
          </table:table-cell>
          <table:table-cell table:number-columns-repeated="4"/>
        </table:table-row>
        <table:table-row table:style-name="ro1">
          <table:table-cell office:value-type="float" office:value="651.935180664063">
            <text:p>651.9351806641</text:p>
          </table:table-cell>
          <table:table-cell office:value-type="float" office:value="-0.001308848">
            <text:p>-0.001308848</text:p>
          </table:table-cell>
          <table:table-cell table:number-columns-repeated="4"/>
        </table:table-row>
        <table:table-row table:style-name="ro1">
          <table:table-cell office:value-type="float" office:value="652.054870605469">
            <text:p>652.0548706055</text:p>
          </table:table-cell>
          <table:table-cell office:value-type="float" office:value="0.007674418">
            <text:p>0.007674418</text:p>
          </table:table-cell>
          <table:table-cell table:number-columns-repeated="4"/>
        </table:table-row>
        <table:table-row table:style-name="ro1">
          <table:table-cell office:value-type="float" office:value="652.174560546875">
            <text:p>652.1745605469</text:p>
          </table:table-cell>
          <table:table-cell office:value-type="float" office:value="0.001000252">
            <text:p>0.001000252</text:p>
          </table:table-cell>
          <table:table-cell table:number-columns-repeated="4"/>
        </table:table-row>
        <table:table-row table:style-name="ro1">
          <table:table-cell office:value-type="float" office:value="652.294250488281">
            <text:p>652.2942504883</text:p>
          </table:table-cell>
          <table:table-cell office:value-type="float" office:value="0.002493353">
            <text:p>0.002493353</text:p>
          </table:table-cell>
          <table:table-cell table:number-columns-repeated="4"/>
        </table:table-row>
        <table:table-row table:style-name="ro1">
          <table:table-cell office:value-type="float" office:value="652.414001464844">
            <text:p>652.4140014648</text:p>
          </table:table-cell>
          <table:table-cell office:value-type="float" office:value="0.008059117">
            <text:p>0.008059117</text:p>
          </table:table-cell>
          <table:table-cell table:number-columns-repeated="4"/>
        </table:table-row>
        <table:table-row table:style-name="ro1">
          <table:table-cell office:value-type="float" office:value="652.53369140625">
            <text:p>652.5336914063</text:p>
          </table:table-cell>
          <table:table-cell office:value-type="float" office:value="-0.001486656">
            <text:p>-0.001486656</text:p>
          </table:table-cell>
          <table:table-cell table:number-columns-repeated="4"/>
        </table:table-row>
        <table:table-row table:style-name="ro1">
          <table:table-cell office:value-type="float" office:value="652.653381347656">
            <text:p>652.6533813477</text:p>
          </table:table-cell>
          <table:table-cell office:value-type="float" office:value="0.004583277">
            <text:p>0.004583277</text:p>
          </table:table-cell>
          <table:table-cell table:number-columns-repeated="4"/>
        </table:table-row>
        <table:table-row table:style-name="ro1">
          <table:table-cell office:value-type="float" office:value="652.773071289063">
            <text:p>652.7730712891</text:p>
          </table:table-cell>
          <table:table-cell office:value-type="float" office:value="-0.002975522">
            <text:p>-0.002975522</text:p>
          </table:table-cell>
          <table:table-cell table:number-columns-repeated="4"/>
        </table:table-row>
        <table:table-row table:style-name="ro1">
          <table:table-cell office:value-type="float" office:value="652.892822265625">
            <text:p>652.8928222656</text:p>
          </table:table-cell>
          <table:table-cell office:value-type="float" office:value="0.01007385">
            <text:p>0.01007385</text:p>
          </table:table-cell>
          <table:table-cell table:number-columns-repeated="4"/>
        </table:table-row>
        <table:table-row table:style-name="ro1">
          <table:table-cell office:value-type="float" office:value="653.012512207031">
            <text:p>653.012512207</text:p>
          </table:table-cell>
          <table:table-cell office:value-type="float" office:value="-0.0001504971">
            <text:p>-0.0001504971</text:p>
          </table:table-cell>
          <table:table-cell table:number-columns-repeated="4"/>
        </table:table-row>
        <table:table-row table:style-name="ro1">
          <table:table-cell office:value-type="float" office:value="653.132263183594">
            <text:p>653.1322631836</text:p>
          </table:table-cell>
          <table:table-cell office:value-type="float" office:value="0.007532927">
            <text:p>0.007532927</text:p>
          </table:table-cell>
          <table:table-cell table:number-columns-repeated="4"/>
        </table:table-row>
        <table:table-row table:style-name="ro1">
          <table:table-cell office:value-type="float" office:value="653.251953125">
            <text:p>653.251953125</text:p>
          </table:table-cell>
          <table:table-cell office:value-type="float" office:value="-0.0008107101">
            <text:p>-0.0008107101</text:p>
          </table:table-cell>
          <table:table-cell table:number-columns-repeated="4"/>
        </table:table-row>
        <table:table-row table:style-name="ro1">
          <table:table-cell office:value-type="float" office:value="653.371704101563">
            <text:p>653.3717041016</text:p>
          </table:table-cell>
          <table:table-cell office:value-type="float" office:value="0.008159909">
            <text:p>0.008159909</text:p>
          </table:table-cell>
          <table:table-cell table:number-columns-repeated="4"/>
        </table:table-row>
        <table:table-row table:style-name="ro1">
          <table:table-cell office:value-type="float" office:value="653.491394042969">
            <text:p>653.491394043</text:p>
          </table:table-cell>
          <table:table-cell office:value-type="float" office:value="0.02254607">
            <text:p>0.02254607</text:p>
          </table:table-cell>
          <table:table-cell table:number-columns-repeated="4"/>
        </table:table-row>
        <table:table-row table:style-name="ro1">
          <table:table-cell office:value-type="float" office:value="653.611145019531">
            <text:p>653.6111450195</text:p>
          </table:table-cell>
          <table:table-cell office:value-type="float" office:value="0.008555336">
            <text:p>0.008555336</text:p>
          </table:table-cell>
          <table:table-cell table:number-columns-repeated="4"/>
        </table:table-row>
        <table:table-row table:style-name="ro1">
          <table:table-cell office:value-type="float" office:value="653.730834960938">
            <text:p>653.7308349609</text:p>
          </table:table-cell>
          <table:table-cell office:value-type="float" office:value="0.02628286">
            <text:p>0.02628286</text:p>
          </table:table-cell>
          <table:table-cell table:number-columns-repeated="4"/>
        </table:table-row>
        <table:table-row table:style-name="ro1">
          <table:table-cell office:value-type="float" office:value="653.8505859375">
            <text:p>653.8505859375</text:p>
          </table:table-cell>
          <table:table-cell office:value-type="float" office:value="0.007752305">
            <text:p>0.007752305</text:p>
          </table:table-cell>
          <table:table-cell table:number-columns-repeated="4"/>
        </table:table-row>
        <table:table-row table:style-name="ro1">
          <table:table-cell office:value-type="float" office:value="653.970275878906">
            <text:p>653.9702758789</text:p>
          </table:table-cell>
          <table:table-cell office:value-type="float" office:value="0.02080343">
            <text:p>0.02080343</text:p>
          </table:table-cell>
          <table:table-cell table:number-columns-repeated="4"/>
        </table:table-row>
        <table:table-row table:style-name="ro1">
          <table:table-cell office:value-type="float" office:value="654.090026855469">
            <text:p>654.0900268555</text:p>
          </table:table-cell>
          <table:table-cell office:value-type="float" office:value="-0.003163839">
            <text:p>-0.003163839</text:p>
          </table:table-cell>
          <table:table-cell table:number-columns-repeated="4"/>
        </table:table-row>
        <table:table-row table:style-name="ro1">
          <table:table-cell office:value-type="float" office:value="654.209716796875">
            <text:p>654.2097167969</text:p>
          </table:table-cell>
          <table:table-cell office:value-type="float" office:value="-0.0008725235">
            <text:p>-0.0008725235</text:p>
          </table:table-cell>
          <table:table-cell table:number-columns-repeated="4"/>
        </table:table-row>
        <table:table-row table:style-name="ro1">
          <table:table-cell office:value-type="float" office:value="654.329467773438">
            <text:p>654.3294677734</text:p>
          </table:table-cell>
          <table:table-cell office:value-type="float" office:value="-0.006740981">
            <text:p>-0.006740981</text:p>
          </table:table-cell>
          <table:table-cell table:number-columns-repeated="4"/>
        </table:table-row>
        <table:table-row table:style-name="ro1">
          <table:table-cell office:value-type="float" office:value="654.44921875">
            <text:p>654.44921875</text:p>
          </table:table-cell>
          <table:table-cell office:value-type="float" office:value="0.01206589">
            <text:p>0.01206589</text:p>
          </table:table-cell>
          <table:table-cell table:number-columns-repeated="4"/>
        </table:table-row>
        <table:table-row table:style-name="ro1">
          <table:table-cell office:value-type="float" office:value="654.568969726563">
            <text:p>654.5689697266</text:p>
          </table:table-cell>
          <table:table-cell office:value-type="float" office:value="-0.0005955399">
            <text:p>-0.0005955399</text:p>
          </table:table-cell>
          <table:table-cell table:number-columns-repeated="4"/>
        </table:table-row>
        <table:table-row table:style-name="ro1">
          <table:table-cell office:value-type="float" office:value="654.688659667969">
            <text:p>654.688659668</text:p>
          </table:table-cell>
          <table:table-cell office:value-type="float" office:value="0.009731471">
            <text:p>0.009731471</text:p>
          </table:table-cell>
          <table:table-cell table:number-columns-repeated="4"/>
        </table:table-row>
        <table:table-row table:style-name="ro1">
          <table:table-cell office:value-type="float" office:value="654.808410644531">
            <text:p>654.8084106445</text:p>
          </table:table-cell>
          <table:table-cell office:value-type="float" office:value="0.003488672">
            <text:p>0.003488672</text:p>
          </table:table-cell>
          <table:table-cell table:number-columns-repeated="4"/>
        </table:table-row>
        <table:table-row table:style-name="ro1">
          <table:table-cell office:value-type="float" office:value="654.928161621094">
            <text:p>654.9281616211</text:p>
          </table:table-cell>
          <table:table-cell office:value-type="float" office:value="0.002552497">
            <text:p>0.002552497</text:p>
          </table:table-cell>
          <table:table-cell table:number-columns-repeated="4"/>
        </table:table-row>
        <table:table-row table:style-name="ro1">
          <table:table-cell office:value-type="float" office:value="655.047912597656">
            <text:p>655.0479125977</text:p>
          </table:table-cell>
          <table:table-cell office:value-type="float" office:value="0.01991218">
            <text:p>0.01991218</text:p>
          </table:table-cell>
          <table:table-cell table:number-columns-repeated="4"/>
        </table:table-row>
        <table:table-row table:style-name="ro1">
          <table:table-cell office:value-type="float" office:value="655.167602539063">
            <text:p>655.1676025391</text:p>
          </table:table-cell>
          <table:table-cell office:value-type="float" office:value="0.002354636">
            <text:p>0.002354636</text:p>
          </table:table-cell>
          <table:table-cell table:number-columns-repeated="4"/>
        </table:table-row>
        <table:table-row table:style-name="ro1">
          <table:table-cell office:value-type="float" office:value="655.287353515625">
            <text:p>655.2873535156</text:p>
          </table:table-cell>
          <table:table-cell office:value-type="float" office:value="0.0123858">
            <text:p>0.0123858</text:p>
          </table:table-cell>
          <table:table-cell table:number-columns-repeated="4"/>
        </table:table-row>
        <table:table-row table:style-name="ro1">
          <table:table-cell office:value-type="float" office:value="655.407104492188">
            <text:p>655.4071044922</text:p>
          </table:table-cell>
          <table:table-cell office:value-type="float" office:value="-0.004523132">
            <text:p>-0.004523132</text:p>
          </table:table-cell>
          <table:table-cell table:number-columns-repeated="4"/>
        </table:table-row>
        <table:table-row table:style-name="ro1">
          <table:table-cell office:value-type="float" office:value="655.52685546875">
            <text:p>655.5268554688</text:p>
          </table:table-cell>
          <table:table-cell office:value-type="float" office:value="0.004429173">
            <text:p>0.004429173</text:p>
          </table:table-cell>
          <table:table-cell table:number-columns-repeated="4"/>
        </table:table-row>
        <table:table-row table:style-name="ro1">
          <table:table-cell office:value-type="float" office:value="655.646606445313">
            <text:p>655.6466064453</text:p>
          </table:table-cell>
          <table:table-cell office:value-type="float" office:value="-0.005753993">
            <text:p>-0.005753993</text:p>
          </table:table-cell>
          <table:table-cell table:number-columns-repeated="4"/>
        </table:table-row>
        <table:table-row table:style-name="ro1">
          <table:table-cell office:value-type="float" office:value="655.766357421875">
            <text:p>655.7663574219</text:p>
          </table:table-cell>
          <table:table-cell office:value-type="float" office:value="0.004918303">
            <text:p>0.004918303</text:p>
          </table:table-cell>
          <table:table-cell table:number-columns-repeated="4"/>
        </table:table-row>
        <table:table-row table:style-name="ro1">
          <table:table-cell office:value-type="float" office:value="655.886108398438">
            <text:p>655.8861083984</text:p>
          </table:table-cell>
          <table:table-cell office:value-type="float" office:value="-0.003559741">
            <text:p>-0.003559741</text:p>
          </table:table-cell>
          <table:table-cell table:number-columns-repeated="4"/>
        </table:table-row>
        <table:table-row table:style-name="ro1">
          <table:table-cell office:value-type="float" office:value="656.005859375">
            <text:p>656.005859375</text:p>
          </table:table-cell>
          <table:table-cell office:value-type="float" office:value="-0.004702469">
            <text:p>-0.004702469</text:p>
          </table:table-cell>
          <table:table-cell table:number-columns-repeated="4"/>
        </table:table-row>
        <table:table-row table:style-name="ro1">
          <table:table-cell office:value-type="float" office:value="656.125610351563">
            <text:p>656.1256103516</text:p>
          </table:table-cell>
          <table:table-cell office:value-type="float" office:value="0.005579998">
            <text:p>0.005579998</text:p>
          </table:table-cell>
          <table:table-cell table:number-columns-repeated="4"/>
        </table:table-row>
        <table:table-row table:style-name="ro1">
          <table:table-cell office:value-type="float" office:value="656.245361328125">
            <text:p>656.2453613281</text:p>
          </table:table-cell>
          <table:table-cell office:value-type="float" office:value="0.001463267">
            <text:p>0.001463267</text:p>
          </table:table-cell>
          <table:table-cell table:number-columns-repeated="4"/>
        </table:table-row>
        <table:table-row table:style-name="ro1">
          <table:table-cell office:value-type="float" office:value="656.365112304688">
            <text:p>656.3651123047</text:p>
          </table:table-cell>
          <table:table-cell office:value-type="float" office:value="0.01989377">
            <text:p>0.01989377</text:p>
          </table:table-cell>
          <table:table-cell table:number-columns-repeated="4"/>
        </table:table-row>
        <table:table-row table:style-name="ro1">
          <table:table-cell office:value-type="float" office:value="656.48486328125">
            <text:p>656.4848632813</text:p>
          </table:table-cell>
          <table:table-cell office:value-type="float" office:value="0.001881928">
            <text:p>0.001881928</text:p>
          </table:table-cell>
          <table:table-cell table:number-columns-repeated="4"/>
        </table:table-row>
        <table:table-row table:style-name="ro1">
          <table:table-cell office:value-type="float" office:value="656.604614257813">
            <text:p>656.6046142578</text:p>
          </table:table-cell>
          <table:table-cell office:value-type="float" office:value="0.00545602">
            <text:p>0.00545602</text:p>
          </table:table-cell>
          <table:table-cell table:number-columns-repeated="4"/>
        </table:table-row>
        <table:table-row table:style-name="ro1">
          <table:table-cell office:value-type="float" office:value="656.724365234375">
            <text:p>656.7243652344</text:p>
          </table:table-cell>
          <table:table-cell office:value-type="float" office:value="0.02210936">
            <text:p>0.02210936</text:p>
          </table:table-cell>
          <table:table-cell table:number-columns-repeated="4"/>
        </table:table-row>
        <table:table-row table:style-name="ro1">
          <table:table-cell office:value-type="float" office:value="656.844116210938">
            <text:p>656.8441162109</text:p>
          </table:table-cell>
          <table:table-cell office:value-type="float" office:value="0.0045226">
            <text:p>0.0045226</text:p>
          </table:table-cell>
          <table:table-cell table:number-columns-repeated="4"/>
        </table:table-row>
        <table:table-row table:style-name="ro1">
          <table:table-cell office:value-type="float" office:value="656.9638671875">
            <text:p>656.9638671875</text:p>
          </table:table-cell>
          <table:table-cell office:value-type="float" office:value="0.001407375">
            <text:p>0.001407375</text:p>
          </table:table-cell>
          <table:table-cell table:number-columns-repeated="4"/>
        </table:table-row>
        <table:table-row table:style-name="ro1">
          <table:table-cell office:value-type="float" office:value="657.083679199219">
            <text:p>657.0836791992</text:p>
          </table:table-cell>
          <table:table-cell office:value-type="float" office:value="0.006186589">
            <text:p>0.006186589</text:p>
          </table:table-cell>
          <table:table-cell table:number-columns-repeated="4"/>
        </table:table-row>
        <table:table-row table:style-name="ro1">
          <table:table-cell office:value-type="float" office:value="657.203430175781">
            <text:p>657.2034301758</text:p>
          </table:table-cell>
          <table:table-cell office:value-type="float" office:value="-0.0003431604">
            <text:p>-0.0003431604</text:p>
          </table:table-cell>
          <table:table-cell table:number-columns-repeated="4"/>
        </table:table-row>
        <table:table-row table:style-name="ro1">
          <table:table-cell office:value-type="float" office:value="657.323181152344">
            <text:p>657.3231811523</text:p>
          </table:table-cell>
          <table:table-cell office:value-type="float" office:value="0.0178559">
            <text:p>0.0178559</text:p>
          </table:table-cell>
          <table:table-cell table:number-columns-repeated="4"/>
        </table:table-row>
        <table:table-row table:style-name="ro1">
          <table:table-cell office:value-type="float" office:value="657.442932128906">
            <text:p>657.4429321289</text:p>
          </table:table-cell>
          <table:table-cell office:value-type="float" office:value="0.0122828">
            <text:p>0.0122828</text:p>
          </table:table-cell>
          <table:table-cell table:number-columns-repeated="4"/>
        </table:table-row>
        <table:table-row table:style-name="ro1">
          <table:table-cell office:value-type="float" office:value="657.562744140625">
            <text:p>657.5627441406</text:p>
          </table:table-cell>
          <table:table-cell office:value-type="float" office:value="0.008457645">
            <text:p>0.008457645</text:p>
          </table:table-cell>
          <table:table-cell table:number-columns-repeated="4"/>
        </table:table-row>
        <table:table-row table:style-name="ro1">
          <table:table-cell office:value-type="float" office:value="657.682495117188">
            <text:p>657.6824951172</text:p>
          </table:table-cell>
          <table:table-cell office:value-type="float" office:value="0.01750004">
            <text:p>0.01750004</text:p>
          </table:table-cell>
          <table:table-cell table:number-columns-repeated="4"/>
        </table:table-row>
        <table:table-row table:style-name="ro1">
          <table:table-cell office:value-type="float" office:value="657.80224609375">
            <text:p>657.8022460938</text:p>
          </table:table-cell>
          <table:table-cell office:value-type="float" office:value="0.0121092">
            <text:p>0.0121092</text:p>
          </table:table-cell>
          <table:table-cell table:number-columns-repeated="4"/>
        </table:table-row>
        <table:table-row table:style-name="ro1">
          <table:table-cell office:value-type="float" office:value="657.921997070313">
            <text:p>657.9219970703</text:p>
          </table:table-cell>
          <table:table-cell office:value-type="float" office:value="-0.002510505">
            <text:p>-0.002510505</text:p>
          </table:table-cell>
          <table:table-cell table:number-columns-repeated="4"/>
        </table:table-row>
        <table:table-row table:style-name="ro1">
          <table:table-cell office:value-type="float" office:value="658.041809082031">
            <text:p>658.041809082</text:p>
          </table:table-cell>
          <table:table-cell office:value-type="float" office:value="-0.0008714621">
            <text:p>-0.0008714621</text:p>
          </table:table-cell>
          <table:table-cell table:number-columns-repeated="4"/>
        </table:table-row>
        <table:table-row table:style-name="ro1">
          <table:table-cell office:value-type="float" office:value="658.161560058594">
            <text:p>658.1615600586</text:p>
          </table:table-cell>
          <table:table-cell office:value-type="float" office:value="-0.005022109">
            <text:p>-0.005022109</text:p>
          </table:table-cell>
          <table:table-cell table:number-columns-repeated="4"/>
        </table:table-row>
        <table:table-row table:style-name="ro1">
          <table:table-cell office:value-type="float" office:value="658.281372070313">
            <text:p>658.2813720703</text:p>
          </table:table-cell>
          <table:table-cell office:value-type="float" office:value="0.01629167">
            <text:p>0.01629167</text:p>
          </table:table-cell>
          <table:table-cell table:number-columns-repeated="4"/>
        </table:table-row>
        <table:table-row table:style-name="ro1">
          <table:table-cell office:value-type="float" office:value="658.401123046875">
            <text:p>658.4011230469</text:p>
          </table:table-cell>
          <table:table-cell office:value-type="float" office:value="0.0321609">
            <text:p>0.0321609</text:p>
          </table:table-cell>
          <table:table-cell table:number-columns-repeated="4"/>
        </table:table-row>
        <table:table-row table:style-name="ro1">
          <table:table-cell office:value-type="float" office:value="658.520935058594">
            <text:p>658.5209350586</text:p>
          </table:table-cell>
          <table:table-cell office:value-type="float" office:value="-0.0007510705">
            <text:p>-0.0007510705</text:p>
          </table:table-cell>
          <table:table-cell table:number-columns-repeated="4"/>
        </table:table-row>
        <table:table-row table:style-name="ro1">
          <table:table-cell office:value-type="float" office:value="658.640686035156">
            <text:p>658.6406860352</text:p>
          </table:table-cell>
          <table:table-cell office:value-type="float" office:value="-0.002232987">
            <text:p>-0.002232987</text:p>
          </table:table-cell>
          <table:table-cell table:number-columns-repeated="4"/>
        </table:table-row>
        <table:table-row table:style-name="ro1">
          <table:table-cell office:value-type="float" office:value="658.760437011719">
            <text:p>658.7604370117</text:p>
          </table:table-cell>
          <table:table-cell office:value-type="float" office:value="0.002206614">
            <text:p>0.002206614</text:p>
          </table:table-cell>
          <table:table-cell table:number-columns-repeated="4"/>
        </table:table-row>
        <table:table-row table:style-name="ro1">
          <table:table-cell office:value-type="float" office:value="658.880249023438">
            <text:p>658.8802490234</text:p>
          </table:table-cell>
          <table:table-cell office:value-type="float" office:value="-0.002534604">
            <text:p>-0.002534604</text:p>
          </table:table-cell>
          <table:table-cell table:number-columns-repeated="4"/>
        </table:table-row>
        <table:table-row table:style-name="ro1">
          <table:table-cell office:value-type="float" office:value="659.000061035156">
            <text:p>659.0000610352</text:p>
          </table:table-cell>
          <table:table-cell office:value-type="float" office:value="-0.0001207608">
            <text:p>-0.0001207608</text:p>
          </table:table-cell>
          <table:table-cell table:number-columns-repeated="4"/>
        </table:table-row>
        <table:table-row table:style-name="ro1">
          <table:table-cell office:value-type="float" office:value="659.119812011719">
            <text:p>659.1198120117</text:p>
          </table:table-cell>
          <table:table-cell office:value-type="float" office:value="-0.003855932">
            <text:p>-0.003855932</text:p>
          </table:table-cell>
          <table:table-cell table:number-columns-repeated="4"/>
        </table:table-row>
        <table:table-row table:style-name="ro1">
          <table:table-cell office:value-type="float" office:value="659.239624023438">
            <text:p>659.2396240234</text:p>
          </table:table-cell>
          <table:table-cell office:value-type="float" office:value="0.007729601">
            <text:p>0.007729601</text:p>
          </table:table-cell>
          <table:table-cell table:number-columns-repeated="4"/>
        </table:table-row>
        <table:table-row table:style-name="ro1">
          <table:table-cell office:value-type="float" office:value="659.359375">
            <text:p>659.359375</text:p>
          </table:table-cell>
          <table:table-cell office:value-type="float" office:value="0.007158517">
            <text:p>0.007158517</text:p>
          </table:table-cell>
          <table:table-cell table:number-columns-repeated="4"/>
        </table:table-row>
        <table:table-row table:style-name="ro1">
          <table:table-cell office:value-type="float" office:value="659.479187011719">
            <text:p>659.4791870117</text:p>
          </table:table-cell>
          <table:table-cell office:value-type="float" office:value="0.003907882">
            <text:p>0.003907882</text:p>
          </table:table-cell>
          <table:table-cell table:number-columns-repeated="4"/>
        </table:table-row>
        <table:table-row table:style-name="ro1">
          <table:table-cell office:value-type="float" office:value="659.598999023438">
            <text:p>659.5989990234</text:p>
          </table:table-cell>
          <table:table-cell office:value-type="float" office:value="0.004695891">
            <text:p>0.004695891</text:p>
          </table:table-cell>
          <table:table-cell table:number-columns-repeated="4"/>
        </table:table-row>
        <table:table-row table:style-name="ro1">
          <table:table-cell office:value-type="float" office:value="659.71875">
            <text:p>659.71875</text:p>
          </table:table-cell>
          <table:table-cell office:value-type="float" office:value="0.006501478">
            <text:p>0.006501478</text:p>
          </table:table-cell>
          <table:table-cell table:number-columns-repeated="4"/>
        </table:table-row>
        <table:table-row table:style-name="ro1">
          <table:table-cell office:value-type="float" office:value="659.838562011719">
            <text:p>659.8385620117</text:p>
          </table:table-cell>
          <table:table-cell office:value-type="float" office:value="-0.003336246">
            <text:p>-0.003336246</text:p>
          </table:table-cell>
          <table:table-cell table:number-columns-repeated="4"/>
        </table:table-row>
        <table:table-row table:style-name="ro1">
          <table:table-cell office:value-type="float" office:value="659.958374023438">
            <text:p>659.9583740234</text:p>
          </table:table-cell>
          <table:table-cell office:value-type="float" office:value="0.000118228">
            <text:p>0.000118228</text:p>
          </table:table-cell>
          <table:table-cell table:number-columns-repeated="4"/>
        </table:table-row>
        <table:table-row table:style-name="ro1">
          <table:table-cell office:value-type="float" office:value="660.078125">
            <text:p>660.078125</text:p>
          </table:table-cell>
          <table:table-cell office:value-type="float" office:value="-0.004636686">
            <text:p>-0.004636686</text:p>
          </table:table-cell>
          <table:table-cell table:number-columns-repeated="4"/>
        </table:table-row>
        <table:table-row table:style-name="ro1">
          <table:table-cell office:value-type="float" office:value="660.197937011719">
            <text:p>660.1979370117</text:p>
          </table:table-cell>
          <table:table-cell office:value-type="float" office:value="0.008464742">
            <text:p>0.008464742</text:p>
          </table:table-cell>
          <table:table-cell table:number-columns-repeated="4"/>
        </table:table-row>
        <table:table-row table:style-name="ro1">
          <table:table-cell office:value-type="float" office:value="660.317749023438">
            <text:p>660.3177490234</text:p>
          </table:table-cell>
          <table:table-cell office:value-type="float" office:value="0.006019138">
            <text:p>0.006019138</text:p>
          </table:table-cell>
          <table:table-cell table:number-columns-repeated="4"/>
        </table:table-row>
        <table:table-row table:style-name="ro1">
          <table:table-cell office:value-type="float" office:value="660.437561035156">
            <text:p>660.4375610352</text:p>
          </table:table-cell>
          <table:table-cell office:value-type="float" office:value="0.01646292">
            <text:p>0.01646292</text:p>
          </table:table-cell>
          <table:table-cell table:number-columns-repeated="4"/>
        </table:table-row>
        <table:table-row table:style-name="ro1">
          <table:table-cell office:value-type="float" office:value="660.557373046875">
            <text:p>660.5573730469</text:p>
          </table:table-cell>
          <table:table-cell office:value-type="float" office:value="-0.007760006">
            <text:p>-0.007760006</text:p>
          </table:table-cell>
          <table:table-cell table:number-columns-repeated="4"/>
        </table:table-row>
        <table:table-row table:style-name="ro1">
          <table:table-cell office:value-type="float" office:value="660.677124023438">
            <text:p>660.6771240234</text:p>
          </table:table-cell>
          <table:table-cell office:value-type="float" office:value="-0.003259403">
            <text:p>-0.003259403</text:p>
          </table:table-cell>
          <table:table-cell table:number-columns-repeated="4"/>
        </table:table-row>
        <table:table-row table:style-name="ro1">
          <table:table-cell office:value-type="float" office:value="660.796936035156">
            <text:p>660.7969360352</text:p>
          </table:table-cell>
          <table:table-cell office:value-type="float" office:value="0.001797545">
            <text:p>0.001797545</text:p>
          </table:table-cell>
          <table:table-cell table:number-columns-repeated="4"/>
        </table:table-row>
        <table:table-row table:style-name="ro1">
          <table:table-cell office:value-type="float" office:value="660.916748046875">
            <text:p>660.9167480469</text:p>
          </table:table-cell>
          <table:table-cell office:value-type="float" office:value="-0.005699678">
            <text:p>-0.005699678</text:p>
          </table:table-cell>
          <table:table-cell table:number-columns-repeated="4"/>
        </table:table-row>
        <table:table-row table:style-name="ro1">
          <table:table-cell office:value-type="float" office:value="661.036560058594">
            <text:p>661.0365600586</text:p>
          </table:table-cell>
          <table:table-cell office:value-type="float" office:value="0.006376002">
            <text:p>0.006376002</text:p>
          </table:table-cell>
          <table:table-cell table:number-columns-repeated="4"/>
        </table:table-row>
        <table:table-row table:style-name="ro1">
          <table:table-cell office:value-type="float" office:value="661.156372070313">
            <text:p>661.1563720703</text:p>
          </table:table-cell>
          <table:table-cell office:value-type="float" office:value="0.007714163">
            <text:p>0.007714163</text:p>
          </table:table-cell>
          <table:table-cell table:number-columns-repeated="4"/>
        </table:table-row>
        <table:table-row table:style-name="ro1">
          <table:table-cell office:value-type="float" office:value="661.276184082031">
            <text:p>661.276184082</text:p>
          </table:table-cell>
          <table:table-cell office:value-type="float" office:value="0.001552517">
            <text:p>0.001552517</text:p>
          </table:table-cell>
          <table:table-cell table:number-columns-repeated="4"/>
        </table:table-row>
        <table:table-row table:style-name="ro1">
          <table:table-cell office:value-type="float" office:value="661.39599609375">
            <text:p>661.3959960938</text:p>
          </table:table-cell>
          <table:table-cell office:value-type="float" office:value="0.003419582">
            <text:p>0.003419582</text:p>
          </table:table-cell>
          <table:table-cell table:number-columns-repeated="4"/>
        </table:table-row>
        <table:table-row table:style-name="ro1">
          <table:table-cell office:value-type="float" office:value="661.515808105469">
            <text:p>661.5158081055</text:p>
          </table:table-cell>
          <table:table-cell office:value-type="float" office:value="0.0127575">
            <text:p>0.0127575</text:p>
          </table:table-cell>
          <table:table-cell table:number-columns-repeated="4"/>
        </table:table-row>
        <table:table-row table:style-name="ro1">
          <table:table-cell office:value-type="float" office:value="661.635620117188">
            <text:p>661.6356201172</text:p>
          </table:table-cell>
          <table:table-cell office:value-type="float" office:value="-0.001110441">
            <text:p>-0.001110441</text:p>
          </table:table-cell>
          <table:table-cell table:number-columns-repeated="4"/>
        </table:table-row>
        <table:table-row table:style-name="ro1">
          <table:table-cell office:value-type="float" office:value="661.755432128906">
            <text:p>661.7554321289</text:p>
          </table:table-cell>
          <table:table-cell office:value-type="float" office:value="0.006405078">
            <text:p>0.006405078</text:p>
          </table:table-cell>
          <table:table-cell table:number-columns-repeated="4"/>
        </table:table-row>
        <table:table-row table:style-name="ro1">
          <table:table-cell office:value-type="float" office:value="661.875244140625">
            <text:p>661.8752441406</text:p>
          </table:table-cell>
          <table:table-cell office:value-type="float" office:value="0.01226549">
            <text:p>0.01226549</text:p>
          </table:table-cell>
          <table:table-cell table:number-columns-repeated="4"/>
        </table:table-row>
        <table:table-row table:style-name="ro1">
          <table:table-cell office:value-type="float" office:value="661.995056152344">
            <text:p>661.9950561523</text:p>
          </table:table-cell>
          <table:table-cell office:value-type="float" office:value="0.004927655">
            <text:p>0.004927655</text:p>
          </table:table-cell>
          <table:table-cell table:number-columns-repeated="4"/>
        </table:table-row>
        <table:table-row table:style-name="ro1">
          <table:table-cell office:value-type="float" office:value="662.114868164063">
            <text:p>662.1148681641</text:p>
          </table:table-cell>
          <table:table-cell office:value-type="float" office:value="-0.0003096284">
            <text:p>-0.0003096284</text:p>
          </table:table-cell>
          <table:table-cell table:number-columns-repeated="4"/>
        </table:table-row>
        <table:table-row table:style-name="ro1">
          <table:table-cell office:value-type="float" office:value="662.234680175781">
            <text:p>662.2346801758</text:p>
          </table:table-cell>
          <table:table-cell office:value-type="float" office:value="-0.002812006">
            <text:p>-0.002812006</text:p>
          </table:table-cell>
          <table:table-cell table:number-columns-repeated="4"/>
        </table:table-row>
        <table:table-row table:style-name="ro1">
          <table:table-cell office:value-type="float" office:value="662.354553222656">
            <text:p>662.3545532227</text:p>
          </table:table-cell>
          <table:table-cell office:value-type="float" office:value="-0.00234899">
            <text:p>-0.00234899</text:p>
          </table:table-cell>
          <table:table-cell table:number-columns-repeated="4"/>
        </table:table-row>
        <table:table-row table:style-name="ro1">
          <table:table-cell office:value-type="float" office:value="662.474365234375">
            <text:p>662.4743652344</text:p>
          </table:table-cell>
          <table:table-cell office:value-type="float" office:value="0.002096466">
            <text:p>0.002096466</text:p>
          </table:table-cell>
          <table:table-cell table:number-columns-repeated="4"/>
        </table:table-row>
        <table:table-row table:style-name="ro1">
          <table:table-cell office:value-type="float" office:value="662.594177246094">
            <text:p>662.5941772461</text:p>
          </table:table-cell>
          <table:table-cell office:value-type="float" office:value="0.004721218">
            <text:p>0.004721218</text:p>
          </table:table-cell>
          <table:table-cell table:number-columns-repeated="4"/>
        </table:table-row>
        <table:table-row table:style-name="ro1">
          <table:table-cell office:value-type="float" office:value="662.713989257813">
            <text:p>662.7139892578</text:p>
          </table:table-cell>
          <table:table-cell office:value-type="float" office:value="0.008545459">
            <text:p>0.008545459</text:p>
          </table:table-cell>
          <table:table-cell table:number-columns-repeated="4"/>
        </table:table-row>
        <table:table-row table:style-name="ro1">
          <table:table-cell office:value-type="float" office:value="662.833801269531">
            <text:p>662.8338012695</text:p>
          </table:table-cell>
          <table:table-cell office:value-type="float" office:value="-0.006967167">
            <text:p>-0.006967167</text:p>
          </table:table-cell>
          <table:table-cell table:number-columns-repeated="4"/>
        </table:table-row>
        <table:table-row table:style-name="ro1">
          <table:table-cell office:value-type="float" office:value="662.953674316406">
            <text:p>662.9536743164</text:p>
          </table:table-cell>
          <table:table-cell office:value-type="float" office:value="-0.0004198176">
            <text:p>-0.0004198176</text:p>
          </table:table-cell>
          <table:table-cell table:number-columns-repeated="4"/>
        </table:table-row>
        <table:table-row table:style-name="ro1">
          <table:table-cell office:value-type="float" office:value="663.073486328125">
            <text:p>663.0734863281</text:p>
          </table:table-cell>
          <table:table-cell office:value-type="float" office:value="0.001720461">
            <text:p>0.001720461</text:p>
          </table:table-cell>
          <table:table-cell table:number-columns-repeated="4"/>
        </table:table-row>
        <table:table-row table:style-name="ro1">
          <table:table-cell office:value-type="float" office:value="663.193298339844">
            <text:p>663.1932983398</text:p>
          </table:table-cell>
          <table:table-cell office:value-type="float" office:value="0.00125602">
            <text:p>0.00125602</text:p>
          </table:table-cell>
          <table:table-cell table:number-columns-repeated="4"/>
        </table:table-row>
        <table:table-row table:style-name="ro1">
          <table:table-cell office:value-type="float" office:value="663.313110351563">
            <text:p>663.3131103516</text:p>
          </table:table-cell>
          <table:table-cell office:value-type="float" office:value="0.004392156">
            <text:p>0.004392156</text:p>
          </table:table-cell>
          <table:table-cell table:number-columns-repeated="4"/>
        </table:table-row>
        <table:table-row table:style-name="ro1">
          <table:table-cell office:value-type="float" office:value="663.432983398438">
            <text:p>663.4329833984</text:p>
          </table:table-cell>
          <table:table-cell office:value-type="float" office:value="0.001842939">
            <text:p>0.001842939</text:p>
          </table:table-cell>
          <table:table-cell table:number-columns-repeated="4"/>
        </table:table-row>
        <table:table-row table:style-name="ro1">
          <table:table-cell office:value-type="float" office:value="663.552795410156">
            <text:p>663.5527954102</text:p>
          </table:table-cell>
          <table:table-cell office:value-type="float" office:value="0.005213928">
            <text:p>0.005213928</text:p>
          </table:table-cell>
          <table:table-cell table:number-columns-repeated="4"/>
        </table:table-row>
        <table:table-row table:style-name="ro1">
          <table:table-cell office:value-type="float" office:value="663.672668457031">
            <text:p>663.672668457</text:p>
          </table:table-cell>
          <table:table-cell office:value-type="float" office:value="0.001780251">
            <text:p>0.001780251</text:p>
          </table:table-cell>
          <table:table-cell table:number-columns-repeated="4"/>
        </table:table-row>
        <table:table-row table:style-name="ro1">
          <table:table-cell office:value-type="float" office:value="663.79248046875">
            <text:p>663.7924804688</text:p>
          </table:table-cell>
          <table:table-cell office:value-type="float" office:value="0.003830206">
            <text:p>0.003830206</text:p>
          </table:table-cell>
          <table:table-cell table:number-columns-repeated="4"/>
        </table:table-row>
        <table:table-row table:style-name="ro1">
          <table:table-cell office:value-type="float" office:value="663.912292480469">
            <text:p>663.9122924805</text:p>
          </table:table-cell>
          <table:table-cell office:value-type="float" office:value="0.001795538">
            <text:p>0.001795538</text:p>
          </table:table-cell>
          <table:table-cell table:number-columns-repeated="4"/>
        </table:table-row>
        <table:table-row table:style-name="ro1">
          <table:table-cell office:value-type="float" office:value="664.032165527344">
            <text:p>664.0321655273</text:p>
          </table:table-cell>
          <table:table-cell office:value-type="float" office:value="0.00678727">
            <text:p>0.00678727</text:p>
          </table:table-cell>
          <table:table-cell table:number-columns-repeated="4"/>
        </table:table-row>
        <table:table-row table:style-name="ro1">
          <table:table-cell office:value-type="float" office:value="664.151977539063">
            <text:p>664.1519775391</text:p>
          </table:table-cell>
          <table:table-cell office:value-type="float" office:value="0.001141103">
            <text:p>0.001141103</text:p>
          </table:table-cell>
          <table:table-cell table:number-columns-repeated="4"/>
        </table:table-row>
        <table:table-row table:style-name="ro1">
          <table:table-cell office:value-type="float" office:value="664.271850585938">
            <text:p>664.2718505859</text:p>
          </table:table-cell>
          <table:table-cell office:value-type="float" office:value="-0.004777161">
            <text:p>-0.004777161</text:p>
          </table:table-cell>
          <table:table-cell table:number-columns-repeated="4"/>
        </table:table-row>
        <table:table-row table:style-name="ro1">
          <table:table-cell office:value-type="float" office:value="664.391662597656">
            <text:p>664.3916625977</text:p>
          </table:table-cell>
          <table:table-cell office:value-type="float" office:value="0.0009204326">
            <text:p>0.0009204326</text:p>
          </table:table-cell>
          <table:table-cell table:number-columns-repeated="4"/>
        </table:table-row>
        <table:table-row table:style-name="ro1">
          <table:table-cell office:value-type="float" office:value="664.511535644531">
            <text:p>664.5115356445</text:p>
          </table:table-cell>
          <table:table-cell office:value-type="float" office:value="0.006413821">
            <text:p>0.006413821</text:p>
          </table:table-cell>
          <table:table-cell table:number-columns-repeated="4"/>
        </table:table-row>
        <table:table-row table:style-name="ro1">
          <table:table-cell office:value-type="float" office:value="664.63134765625">
            <text:p>664.6313476563</text:p>
          </table:table-cell>
          <table:table-cell office:value-type="float" office:value="0.0009306461">
            <text:p>0.0009306461</text:p>
          </table:table-cell>
          <table:table-cell table:number-columns-repeated="4"/>
        </table:table-row>
        <table:table-row table:style-name="ro1">
          <table:table-cell office:value-type="float" office:value="664.751220703125">
            <text:p>664.7512207031</text:p>
          </table:table-cell>
          <table:table-cell office:value-type="float" office:value="-0.004699139">
            <text:p>-0.004699139</text:p>
          </table:table-cell>
          <table:table-cell table:number-columns-repeated="4"/>
        </table:table-row>
        <table:table-row table:style-name="ro1">
          <table:table-cell office:value-type="float" office:value="664.87109375">
            <text:p>664.87109375</text:p>
          </table:table-cell>
          <table:table-cell office:value-type="float" office:value="0.007797064">
            <text:p>0.007797064</text:p>
          </table:table-cell>
          <table:table-cell table:number-columns-repeated="4"/>
        </table:table-row>
        <table:table-row table:style-name="ro1">
          <table:table-cell office:value-type="float" office:value="664.990905761719">
            <text:p>664.9909057617</text:p>
          </table:table-cell>
          <table:table-cell office:value-type="float" office:value="0.008114113">
            <text:p>0.008114113</text:p>
          </table:table-cell>
          <table:table-cell table:number-columns-repeated="4"/>
        </table:table-row>
        <table:table-row table:style-name="ro1">
          <table:table-cell office:value-type="float" office:value="665.110778808594">
            <text:p>665.1107788086</text:p>
          </table:table-cell>
          <table:table-cell office:value-type="float" office:value="0.001192099">
            <text:p>0.001192099</text:p>
          </table:table-cell>
          <table:table-cell table:number-columns-repeated="4"/>
        </table:table-row>
        <table:table-row table:style-name="ro1">
          <table:table-cell office:value-type="float" office:value="665.230590820313">
            <text:p>665.2305908203</text:p>
          </table:table-cell>
          <table:table-cell office:value-type="float" office:value="0.007823297">
            <text:p>0.007823297</text:p>
          </table:table-cell>
          <table:table-cell table:number-columns-repeated="4"/>
        </table:table-row>
        <table:table-row table:style-name="ro1">
          <table:table-cell office:value-type="float" office:value="665.350463867188">
            <text:p>665.3504638672</text:p>
          </table:table-cell>
          <table:table-cell office:value-type="float" office:value="-0.005319598">
            <text:p>-0.005319598</text:p>
          </table:table-cell>
          <table:table-cell table:number-columns-repeated="4"/>
        </table:table-row>
        <table:table-row table:style-name="ro1">
          <table:table-cell office:value-type="float" office:value="665.470336914063">
            <text:p>665.4703369141</text:p>
          </table:table-cell>
          <table:table-cell office:value-type="float" office:value="0.01435084">
            <text:p>0.01435084</text:p>
          </table:table-cell>
          <table:table-cell table:number-columns-repeated="4"/>
        </table:table-row>
        <table:table-row table:style-name="ro1">
          <table:table-cell office:value-type="float" office:value="665.590148925781">
            <text:p>665.5901489258</text:p>
          </table:table-cell>
          <table:table-cell office:value-type="float" office:value="0.01023165">
            <text:p>0.01023165</text:p>
          </table:table-cell>
          <table:table-cell table:number-columns-repeated="4"/>
        </table:table-row>
        <table:table-row table:style-name="ro1">
          <table:table-cell office:value-type="float" office:value="665.710021972656">
            <text:p>665.7100219727</text:p>
          </table:table-cell>
          <table:table-cell office:value-type="float" office:value="0.002084427">
            <text:p>0.002084427</text:p>
          </table:table-cell>
          <table:table-cell table:number-columns-repeated="4"/>
        </table:table-row>
        <table:table-row table:style-name="ro1">
          <table:table-cell office:value-type="float" office:value="665.829895019531">
            <text:p>665.8298950195</text:p>
          </table:table-cell>
          <table:table-cell office:value-type="float" office:value="-0.003247476">
            <text:p>-0.003247476</text:p>
          </table:table-cell>
          <table:table-cell table:number-columns-repeated="4"/>
        </table:table-row>
        <table:table-row table:style-name="ro1">
          <table:table-cell office:value-type="float" office:value="665.949768066406">
            <text:p>665.9497680664</text:p>
          </table:table-cell>
          <table:table-cell office:value-type="float" office:value="0.01677334">
            <text:p>0.01677334</text:p>
          </table:table-cell>
          <table:table-cell table:number-columns-repeated="4"/>
        </table:table-row>
        <table:table-row table:style-name="ro1">
          <table:table-cell office:value-type="float" office:value="666.069580078125">
            <text:p>666.0695800781</text:p>
          </table:table-cell>
          <table:table-cell office:value-type="float" office:value="-0.003155499">
            <text:p>-0.003155499</text:p>
          </table:table-cell>
          <table:table-cell table:number-columns-repeated="4"/>
        </table:table-row>
        <table:table-row table:style-name="ro1">
          <table:table-cell office:value-type="float" office:value="666.189453125">
            <text:p>666.189453125</text:p>
          </table:table-cell>
          <table:table-cell office:value-type="float" office:value="0.01842767">
            <text:p>0.01842767</text:p>
          </table:table-cell>
          <table:table-cell table:number-columns-repeated="4"/>
        </table:table-row>
        <table:table-row table:style-name="ro1">
          <table:table-cell office:value-type="float" office:value="666.309326171875">
            <text:p>666.3093261719</text:p>
          </table:table-cell>
          <table:table-cell office:value-type="float" office:value="-0.0008174257">
            <text:p>-0.0008174257</text:p>
          </table:table-cell>
          <table:table-cell table:number-columns-repeated="4"/>
        </table:table-row>
        <table:table-row table:style-name="ro1">
          <table:table-cell office:value-type="float" office:value="666.42919921875">
            <text:p>666.4291992188</text:p>
          </table:table-cell>
          <table:table-cell office:value-type="float" office:value="0.01028864">
            <text:p>0.01028864</text:p>
          </table:table-cell>
          <table:table-cell table:number-columns-repeated="4"/>
        </table:table-row>
        <table:table-row table:style-name="ro1">
          <table:table-cell office:value-type="float" office:value="666.549072265625">
            <text:p>666.5490722656</text:p>
          </table:table-cell>
          <table:table-cell office:value-type="float" office:value="0.008552853">
            <text:p>0.008552853</text:p>
          </table:table-cell>
          <table:table-cell table:number-columns-repeated="4"/>
        </table:table-row>
        <table:table-row table:style-name="ro1">
          <table:table-cell office:value-type="float" office:value="666.6689453125">
            <text:p>666.6689453125</text:p>
          </table:table-cell>
          <table:table-cell office:value-type="float" office:value="0.00308106">
            <text:p>0.00308106</text:p>
          </table:table-cell>
          <table:table-cell table:number-columns-repeated="4"/>
        </table:table-row>
        <table:table-row table:style-name="ro1">
          <table:table-cell office:value-type="float" office:value="666.788818359375">
            <text:p>666.7888183594</text:p>
          </table:table-cell>
          <table:table-cell office:value-type="float" office:value="0.00210086">
            <text:p>0.00210086</text:p>
          </table:table-cell>
          <table:table-cell table:number-columns-repeated="4"/>
        </table:table-row>
        <table:table-row table:style-name="ro1">
          <table:table-cell office:value-type="float" office:value="666.90869140625">
            <text:p>666.9086914063</text:p>
          </table:table-cell>
          <table:table-cell office:value-type="float" office:value="-0.001755217">
            <text:p>-0.001755217</text:p>
          </table:table-cell>
          <table:table-cell table:number-columns-repeated="4"/>
        </table:table-row>
        <table:table-row table:style-name="ro1">
          <table:table-cell office:value-type="float" office:value="667.028564453125">
            <text:p>667.0285644531</text:p>
          </table:table-cell>
          <table:table-cell office:value-type="float" office:value="0.003490845">
            <text:p>0.003490845</text:p>
          </table:table-cell>
          <table:table-cell table:number-columns-repeated="4"/>
        </table:table-row>
        <table:table-row table:style-name="ro1">
          <table:table-cell office:value-type="float" office:value="667.1484375">
            <text:p>667.1484375</text:p>
          </table:table-cell>
          <table:table-cell office:value-type="float" office:value="0.00397274">
            <text:p>0.00397274</text:p>
          </table:table-cell>
          <table:table-cell table:number-columns-repeated="4"/>
        </table:table-row>
        <table:table-row table:style-name="ro1">
          <table:table-cell office:value-type="float" office:value="667.268310546875">
            <text:p>667.2683105469</text:p>
          </table:table-cell>
          <table:table-cell office:value-type="float" office:value="0.003332606">
            <text:p>0.003332606</text:p>
          </table:table-cell>
          <table:table-cell table:number-columns-repeated="4"/>
        </table:table-row>
        <table:table-row table:style-name="ro1">
          <table:table-cell office:value-type="float" office:value="667.38818359375">
            <text:p>667.3881835938</text:p>
          </table:table-cell>
          <table:table-cell office:value-type="float" office:value="0.01082179">
            <text:p>0.01082179</text:p>
          </table:table-cell>
          <table:table-cell table:number-columns-repeated="4"/>
        </table:table-row>
        <table:table-row table:style-name="ro1">
          <table:table-cell office:value-type="float" office:value="667.508056640625">
            <text:p>667.5080566406</text:p>
          </table:table-cell>
          <table:table-cell office:value-type="float" office:value="-0.002092997">
            <text:p>-0.002092997</text:p>
          </table:table-cell>
          <table:table-cell table:number-columns-repeated="4"/>
        </table:table-row>
        <table:table-row table:style-name="ro1">
          <table:table-cell office:value-type="float" office:value="667.6279296875">
            <text:p>667.6279296875</text:p>
          </table:table-cell>
          <table:table-cell office:value-type="float" office:value="-0.004128703">
            <text:p>-0.004128703</text:p>
          </table:table-cell>
          <table:table-cell table:number-columns-repeated="4"/>
        </table:table-row>
        <table:table-row table:style-name="ro1">
          <table:table-cell office:value-type="float" office:value="667.747802734375">
            <text:p>667.7478027344</text:p>
          </table:table-cell>
          <table:table-cell office:value-type="float" office:value="-0.004190115">
            <text:p>-0.004190115</text:p>
          </table:table-cell>
          <table:table-cell table:number-columns-repeated="4"/>
        </table:table-row>
        <table:table-row table:style-name="ro1">
          <table:table-cell office:value-type="float" office:value="667.86767578125">
            <text:p>667.8676757813</text:p>
          </table:table-cell>
          <table:table-cell office:value-type="float" office:value="-0.01005352">
            <text:p>-0.01005352</text:p>
          </table:table-cell>
          <table:table-cell table:number-columns-repeated="4"/>
        </table:table-row>
        <table:table-row table:style-name="ro1">
          <table:table-cell office:value-type="float" office:value="667.987548828125">
            <text:p>667.9875488281</text:p>
          </table:table-cell>
          <table:table-cell office:value-type="float" office:value="0.007616926">
            <text:p>0.007616926</text:p>
          </table:table-cell>
          <table:table-cell table:number-columns-repeated="4"/>
        </table:table-row>
        <table:table-row table:style-name="ro1">
          <table:table-cell office:value-type="float" office:value="668.107421875">
            <text:p>668.107421875</text:p>
          </table:table-cell>
          <table:table-cell office:value-type="float" office:value="-0.009372662">
            <text:p>-0.009372662</text:p>
          </table:table-cell>
          <table:table-cell table:number-columns-repeated="4"/>
        </table:table-row>
        <table:table-row table:style-name="ro1">
          <table:table-cell office:value-type="float" office:value="668.227294921875">
            <text:p>668.2272949219</text:p>
          </table:table-cell>
          <table:table-cell office:value-type="float" office:value="0.002103389">
            <text:p>0.002103389</text:p>
          </table:table-cell>
          <table:table-cell table:number-columns-repeated="4"/>
        </table:table-row>
        <table:table-row table:style-name="ro1">
          <table:table-cell office:value-type="float" office:value="668.34716796875">
            <text:p>668.3471679688</text:p>
          </table:table-cell>
          <table:table-cell office:value-type="float" office:value="0.00639476">
            <text:p>0.00639476</text:p>
          </table:table-cell>
          <table:table-cell table:number-columns-repeated="4"/>
        </table:table-row>
        <table:table-row table:style-name="ro1">
          <table:table-cell office:value-type="float" office:value="668.467102050781">
            <text:p>668.4671020508</text:p>
          </table:table-cell>
          <table:table-cell office:value-type="float" office:value="0.00198749">
            <text:p>0.00198749</text:p>
          </table:table-cell>
          <table:table-cell table:number-columns-repeated="4"/>
        </table:table-row>
        <table:table-row table:style-name="ro1">
          <table:table-cell office:value-type="float" office:value="668.586975097656">
            <text:p>668.5869750977</text:p>
          </table:table-cell>
          <table:table-cell office:value-type="float" office:value="-0.0002535177">
            <text:p>-0.0002535177</text:p>
          </table:table-cell>
          <table:table-cell table:number-columns-repeated="4"/>
        </table:table-row>
        <table:table-row table:style-name="ro1">
          <table:table-cell office:value-type="float" office:value="668.706848144531">
            <text:p>668.7068481445</text:p>
          </table:table-cell>
          <table:table-cell office:value-type="float" office:value="-0.001003907">
            <text:p>-0.001003907</text:p>
          </table:table-cell>
          <table:table-cell table:number-columns-repeated="4"/>
        </table:table-row>
        <table:table-row table:style-name="ro1">
          <table:table-cell office:value-type="float" office:value="668.826721191406">
            <text:p>668.8267211914</text:p>
          </table:table-cell>
          <table:table-cell office:value-type="float" office:value="-0.0006070807">
            <text:p>-0.0006070807</text:p>
          </table:table-cell>
          <table:table-cell table:number-columns-repeated="4"/>
        </table:table-row>
        <table:table-row table:style-name="ro1">
          <table:table-cell office:value-type="float" office:value="668.946594238281">
            <text:p>668.9465942383</text:p>
          </table:table-cell>
          <table:table-cell office:value-type="float" office:value="0.008601065">
            <text:p>0.008601065</text:p>
          </table:table-cell>
          <table:table-cell table:number-columns-repeated="4"/>
        </table:table-row>
        <table:table-row table:style-name="ro1">
          <table:table-cell office:value-type="float" office:value="669.066528320313">
            <text:p>669.0665283203</text:p>
          </table:table-cell>
          <table:table-cell office:value-type="float" office:value="0.004515126">
            <text:p>0.004515126</text:p>
          </table:table-cell>
          <table:table-cell table:number-columns-repeated="4"/>
        </table:table-row>
        <table:table-row table:style-name="ro1">
          <table:table-cell office:value-type="float" office:value="669.186401367188">
            <text:p>669.1864013672</text:p>
          </table:table-cell>
          <table:table-cell office:value-type="float" office:value="-0.005212917">
            <text:p>-0.005212917</text:p>
          </table:table-cell>
          <table:table-cell table:number-columns-repeated="4"/>
        </table:table-row>
        <table:table-row table:style-name="ro1">
          <table:table-cell office:value-type="float" office:value="669.306274414063">
            <text:p>669.3062744141</text:p>
          </table:table-cell>
          <table:table-cell office:value-type="float" office:value="0.01401351">
            <text:p>0.01401351</text:p>
          </table:table-cell>
          <table:table-cell table:number-columns-repeated="4"/>
        </table:table-row>
        <table:table-row table:style-name="ro1">
          <table:table-cell office:value-type="float" office:value="669.426208496094">
            <text:p>669.4262084961</text:p>
          </table:table-cell>
          <table:table-cell office:value-type="float" office:value="0.004877238">
            <text:p>0.004877238</text:p>
          </table:table-cell>
          <table:table-cell table:number-columns-repeated="4"/>
        </table:table-row>
        <table:table-row table:style-name="ro1">
          <table:table-cell office:value-type="float" office:value="669.546081542969">
            <text:p>669.546081543</text:p>
          </table:table-cell>
          <table:table-cell office:value-type="float" office:value="-0.003720578">
            <text:p>-0.003720578</text:p>
          </table:table-cell>
          <table:table-cell table:number-columns-repeated="4"/>
        </table:table-row>
        <table:table-row table:style-name="ro1">
          <table:table-cell office:value-type="float" office:value="669.665954589844">
            <text:p>669.6659545898</text:p>
          </table:table-cell>
          <table:table-cell office:value-type="float" office:value="-0.003462232">
            <text:p>-0.003462232</text:p>
          </table:table-cell>
          <table:table-cell table:number-columns-repeated="4"/>
        </table:table-row>
        <table:table-row table:style-name="ro1">
          <table:table-cell office:value-type="float" office:value="669.785888671875">
            <text:p>669.7858886719</text:p>
          </table:table-cell>
          <table:table-cell office:value-type="float" office:value="0.001936053">
            <text:p>0.001936053</text:p>
          </table:table-cell>
          <table:table-cell table:number-columns-repeated="4"/>
        </table:table-row>
        <table:table-row table:style-name="ro1">
          <table:table-cell office:value-type="float" office:value="669.90576171875">
            <text:p>669.9057617188</text:p>
          </table:table-cell>
          <table:table-cell office:value-type="float" office:value="0.0016025">
            <text:p>0.0016025</text:p>
          </table:table-cell>
          <table:table-cell table:number-columns-repeated="4"/>
        </table:table-row>
        <table:table-row table:style-name="ro1">
          <table:table-cell office:value-type="float" office:value="670.025695800781">
            <text:p>670.0256958008</text:p>
          </table:table-cell>
          <table:table-cell office:value-type="float" office:value="-0.005808658">
            <text:p>-0.005808658</text:p>
          </table:table-cell>
          <table:table-cell table:number-columns-repeated="4"/>
        </table:table-row>
        <table:table-row table:style-name="ro1">
          <table:table-cell office:value-type="float" office:value="670.145568847656">
            <text:p>670.1455688477</text:p>
          </table:table-cell>
          <table:table-cell office:value-type="float" office:value="0.01477336">
            <text:p>0.01477336</text:p>
          </table:table-cell>
          <table:table-cell table:number-columns-repeated="4"/>
        </table:table-row>
        <table:table-row table:style-name="ro1">
          <table:table-cell office:value-type="float" office:value="670.265502929688">
            <text:p>670.2655029297</text:p>
          </table:table-cell>
          <table:table-cell office:value-type="float" office:value="0.005343053">
            <text:p>0.005343053</text:p>
          </table:table-cell>
          <table:table-cell table:number-columns-repeated="4"/>
        </table:table-row>
        <table:table-row table:style-name="ro1">
          <table:table-cell office:value-type="float" office:value="670.385375976563">
            <text:p>670.3853759766</text:p>
          </table:table-cell>
          <table:table-cell office:value-type="float" office:value="0.01325987">
            <text:p>0.01325987</text:p>
          </table:table-cell>
          <table:table-cell table:number-columns-repeated="4"/>
        </table:table-row>
        <table:table-row table:style-name="ro1">
          <table:table-cell office:value-type="float" office:value="670.505310058594">
            <text:p>670.5053100586</text:p>
          </table:table-cell>
          <table:table-cell office:value-type="float" office:value="0.005154479">
            <text:p>0.005154479</text:p>
          </table:table-cell>
          <table:table-cell table:number-columns-repeated="4"/>
        </table:table-row>
        <table:table-row table:style-name="ro1">
          <table:table-cell office:value-type="float" office:value="670.625183105469">
            <text:p>670.6251831055</text:p>
          </table:table-cell>
          <table:table-cell office:value-type="float" office:value="0.008306161">
            <text:p>0.008306161</text:p>
          </table:table-cell>
          <table:table-cell table:number-columns-repeated="4"/>
        </table:table-row>
        <table:table-row table:style-name="ro1">
          <table:table-cell office:value-type="float" office:value="670.7451171875">
            <text:p>670.7451171875</text:p>
          </table:table-cell>
          <table:table-cell office:value-type="float" office:value="0.001573562">
            <text:p>0.001573562</text:p>
          </table:table-cell>
          <table:table-cell table:number-columns-repeated="4"/>
        </table:table-row>
        <table:table-row table:style-name="ro1">
          <table:table-cell office:value-type="float" office:value="670.864990234375">
            <text:p>670.8649902344</text:p>
          </table:table-cell>
          <table:table-cell office:value-type="float" office:value="0.01030648">
            <text:p>0.01030648</text:p>
          </table:table-cell>
          <table:table-cell table:number-columns-repeated="4"/>
        </table:table-row>
        <table:table-row table:style-name="ro1">
          <table:table-cell office:value-type="float" office:value="670.984924316406">
            <text:p>670.9849243164</text:p>
          </table:table-cell>
          <table:table-cell office:value-type="float" office:value="0.00960066">
            <text:p>0.00960066</text:p>
          </table:table-cell>
          <table:table-cell table:number-columns-repeated="4"/>
        </table:table-row>
        <table:table-row table:style-name="ro1">
          <table:table-cell office:value-type="float" office:value="671.104858398438">
            <text:p>671.1048583984</text:p>
          </table:table-cell>
          <table:table-cell office:value-type="float" office:value="-0.004890479">
            <text:p>-0.004890479</text:p>
          </table:table-cell>
          <table:table-cell table:number-columns-repeated="4"/>
        </table:table-row>
        <table:table-row table:style-name="ro1">
          <table:table-cell office:value-type="float" office:value="671.224731445313">
            <text:p>671.2247314453</text:p>
          </table:table-cell>
          <table:table-cell office:value-type="float" office:value="0.002571296">
            <text:p>0.002571296</text:p>
          </table:table-cell>
          <table:table-cell table:number-columns-repeated="4"/>
        </table:table-row>
        <table:table-row table:style-name="ro1">
          <table:table-cell office:value-type="float" office:value="671.344665527344">
            <text:p>671.3446655273</text:p>
          </table:table-cell>
          <table:table-cell office:value-type="float" office:value="0.009558608">
            <text:p>0.009558608</text:p>
          </table:table-cell>
          <table:table-cell table:number-columns-repeated="4"/>
        </table:table-row>
        <table:table-row table:style-name="ro1">
          <table:table-cell office:value-type="float" office:value="671.464599609375">
            <text:p>671.4645996094</text:p>
          </table:table-cell>
          <table:table-cell office:value-type="float" office:value="-0.006089505">
            <text:p>-0.006089505</text:p>
          </table:table-cell>
          <table:table-cell table:number-columns-repeated="4"/>
        </table:table-row>
        <table:table-row table:style-name="ro1">
          <table:table-cell office:value-type="float" office:value="671.58447265625">
            <text:p>671.5844726563</text:p>
          </table:table-cell>
          <table:table-cell office:value-type="float" office:value="-0.002424678">
            <text:p>-0.002424678</text:p>
          </table:table-cell>
          <table:table-cell table:number-columns-repeated="4"/>
        </table:table-row>
        <table:table-row table:style-name="ro1">
          <table:table-cell office:value-type="float" office:value="671.704406738281">
            <text:p>671.7044067383</text:p>
          </table:table-cell>
          <table:table-cell office:value-type="float" office:value="0.01037896">
            <text:p>0.01037896</text:p>
          </table:table-cell>
          <table:table-cell table:number-columns-repeated="4"/>
        </table:table-row>
        <table:table-row table:style-name="ro1">
          <table:table-cell office:value-type="float" office:value="671.824340820313">
            <text:p>671.8243408203</text:p>
          </table:table-cell>
          <table:table-cell office:value-type="float" office:value="0.0006763997">
            <text:p>0.0006763997</text:p>
          </table:table-cell>
          <table:table-cell table:number-columns-repeated="4"/>
        </table:table-row>
        <table:table-row table:style-name="ro1">
          <table:table-cell office:value-type="float" office:value="671.944213867188">
            <text:p>671.9442138672</text:p>
          </table:table-cell>
          <table:table-cell office:value-type="float" office:value="0.001035486">
            <text:p>0.001035486</text:p>
          </table:table-cell>
          <table:table-cell table:number-columns-repeated="4"/>
        </table:table-row>
        <table:table-row table:style-name="ro1">
          <table:table-cell office:value-type="float" office:value="672.064147949219">
            <text:p>672.0641479492</text:p>
          </table:table-cell>
          <table:table-cell office:value-type="float" office:value="-0.001738292">
            <text:p>-0.001738292</text:p>
          </table:table-cell>
          <table:table-cell table:number-columns-repeated="4"/>
        </table:table-row>
        <table:table-row table:style-name="ro1">
          <table:table-cell office:value-type="float" office:value="672.18408203125">
            <text:p>672.1840820313</text:p>
          </table:table-cell>
          <table:table-cell office:value-type="float" office:value="-0.0008464084">
            <text:p>-0.0008464084</text:p>
          </table:table-cell>
          <table:table-cell table:number-columns-repeated="4"/>
        </table:table-row>
        <table:table-row table:style-name="ro1">
          <table:table-cell office:value-type="float" office:value="672.304016113281">
            <text:p>672.3040161133</text:p>
          </table:table-cell>
          <table:table-cell office:value-type="float" office:value="-0.004300121">
            <text:p>-0.004300121</text:p>
          </table:table-cell>
          <table:table-cell table:number-columns-repeated="4"/>
        </table:table-row>
        <table:table-row table:style-name="ro1">
          <table:table-cell office:value-type="float" office:value="672.423950195313">
            <text:p>672.4239501953</text:p>
          </table:table-cell>
          <table:table-cell office:value-type="float" office:value="-0.008456277">
            <text:p>-0.008456277</text:p>
          </table:table-cell>
          <table:table-cell table:number-columns-repeated="4"/>
        </table:table-row>
        <table:table-row table:style-name="ro1">
          <table:table-cell office:value-type="float" office:value="672.543823242188">
            <text:p>672.5438232422</text:p>
          </table:table-cell>
          <table:table-cell office:value-type="float" office:value="-0.004315559">
            <text:p>-0.004315559</text:p>
          </table:table-cell>
          <table:table-cell table:number-columns-repeated="4"/>
        </table:table-row>
        <table:table-row table:style-name="ro1">
          <table:table-cell office:value-type="float" office:value="672.663757324219">
            <text:p>672.6637573242</text:p>
          </table:table-cell>
          <table:table-cell office:value-type="float" office:value="0.004700112">
            <text:p>0.004700112</text:p>
          </table:table-cell>
          <table:table-cell table:number-columns-repeated="4"/>
        </table:table-row>
        <table:table-row table:style-name="ro1">
          <table:table-cell office:value-type="float" office:value="672.78369140625">
            <text:p>672.7836914063</text:p>
          </table:table-cell>
          <table:table-cell office:value-type="float" office:value="0.002800863">
            <text:p>0.002800863</text:p>
          </table:table-cell>
          <table:table-cell table:number-columns-repeated="4"/>
        </table:table-row>
        <table:table-row table:style-name="ro1">
          <table:table-cell office:value-type="float" office:value="672.903625488281">
            <text:p>672.9036254883</text:p>
          </table:table-cell>
          <table:table-cell office:value-type="float" office:value="0.0150703">
            <text:p>0.0150703</text:p>
          </table:table-cell>
          <table:table-cell table:number-columns-repeated="4"/>
        </table:table-row>
        <table:table-row table:style-name="ro1">
          <table:table-cell office:value-type="float" office:value="673.023559570313">
            <text:p>673.0235595703</text:p>
          </table:table-cell>
          <table:table-cell office:value-type="float" office:value="0.01072262">
            <text:p>0.01072262</text:p>
          </table:table-cell>
          <table:table-cell table:number-columns-repeated="4"/>
        </table:table-row>
        <table:table-row table:style-name="ro1">
          <table:table-cell office:value-type="float" office:value="673.143493652344">
            <text:p>673.1434936523</text:p>
          </table:table-cell>
          <table:table-cell office:value-type="float" office:value="0.003490806">
            <text:p>0.003490806</text:p>
          </table:table-cell>
          <table:table-cell table:number-columns-repeated="4"/>
        </table:table-row>
        <table:table-row table:style-name="ro1">
          <table:table-cell office:value-type="float" office:value="673.263427734375">
            <text:p>673.2634277344</text:p>
          </table:table-cell>
          <table:table-cell office:value-type="float" office:value="-0.008628772">
            <text:p>-0.008628772</text:p>
          </table:table-cell>
          <table:table-cell table:number-columns-repeated="4"/>
        </table:table-row>
        <table:table-row table:style-name="ro1">
          <table:table-cell office:value-type="float" office:value="673.383361816406">
            <text:p>673.3833618164</text:p>
          </table:table-cell>
          <table:table-cell office:value-type="float" office:value="0.01958797">
            <text:p>0.01958797</text:p>
          </table:table-cell>
          <table:table-cell table:number-columns-repeated="4"/>
        </table:table-row>
        <table:table-row table:style-name="ro1">
          <table:table-cell office:value-type="float" office:value="673.503295898438">
            <text:p>673.5032958984</text:p>
          </table:table-cell>
          <table:table-cell office:value-type="float" office:value="-0.00864214">
            <text:p>-0.00864214</text:p>
          </table:table-cell>
          <table:table-cell table:number-columns-repeated="4"/>
        </table:table-row>
        <table:table-row table:style-name="ro1">
          <table:table-cell office:value-type="float" office:value="673.623229980469">
            <text:p>673.6232299805</text:p>
          </table:table-cell>
          <table:table-cell office:value-type="float" office:value="-0.001640794">
            <text:p>-0.001640794</text:p>
          </table:table-cell>
          <table:table-cell table:number-columns-repeated="4"/>
        </table:table-row>
        <table:table-row table:style-name="ro1">
          <table:table-cell office:value-type="float" office:value="673.7431640625">
            <text:p>673.7431640625</text:p>
          </table:table-cell>
          <table:table-cell office:value-type="float" office:value="-0.0008676392">
            <text:p>-0.0008676392</text:p>
          </table:table-cell>
          <table:table-cell table:number-columns-repeated="4"/>
        </table:table-row>
        <table:table-row table:style-name="ro1">
          <table:table-cell office:value-type="float" office:value="673.863098144531">
            <text:p>673.8630981445</text:p>
          </table:table-cell>
          <table:table-cell office:value-type="float" office:value="0.003948764">
            <text:p>0.003948764</text:p>
          </table:table-cell>
          <table:table-cell table:number-columns-repeated="4"/>
        </table:table-row>
        <table:table-row table:style-name="ro1">
          <table:table-cell office:value-type="float" office:value="673.983032226563">
            <text:p>673.9830322266</text:p>
          </table:table-cell>
          <table:table-cell office:value-type="float" office:value="-0.0006627591">
            <text:p>-0.0006627591</text:p>
          </table:table-cell>
          <table:table-cell table:number-columns-repeated="4"/>
        </table:table-row>
        <table:table-row table:style-name="ro1">
          <table:table-cell office:value-type="float" office:value="674.102966308594">
            <text:p>674.1029663086</text:p>
          </table:table-cell>
          <table:table-cell office:value-type="float" office:value="0.006964949">
            <text:p>0.006964949</text:p>
          </table:table-cell>
          <table:table-cell table:number-columns-repeated="4"/>
        </table:table-row>
        <table:table-row table:style-name="ro1">
          <table:table-cell office:value-type="float" office:value="674.222900390625">
            <text:p>674.2229003906</text:p>
          </table:table-cell>
          <table:table-cell office:value-type="float" office:value="-0.006352838">
            <text:p>-0.006352838</text:p>
          </table:table-cell>
          <table:table-cell table:number-columns-repeated="4"/>
        </table:table-row>
        <table:table-row table:style-name="ro1">
          <table:table-cell office:value-type="float" office:value="674.342834472656">
            <text:p>674.3428344727</text:p>
          </table:table-cell>
          <table:table-cell office:value-type="float" office:value="-0.008337539">
            <text:p>-0.008337539</text:p>
          </table:table-cell>
          <table:table-cell table:number-columns-repeated="4"/>
        </table:table-row>
        <table:table-row table:style-name="ro1">
          <table:table-cell office:value-type="float" office:value="674.462768554688">
            <text:p>674.4627685547</text:p>
          </table:table-cell>
          <table:table-cell office:value-type="float" office:value="0.002652444">
            <text:p>0.002652444</text:p>
          </table:table-cell>
          <table:table-cell table:number-columns-repeated="4"/>
        </table:table-row>
        <table:table-row table:style-name="ro1">
          <table:table-cell office:value-type="float" office:value="674.582702636719">
            <text:p>674.5827026367</text:p>
          </table:table-cell>
          <table:table-cell office:value-type="float" office:value="0.004503271">
            <text:p>0.004503271</text:p>
          </table:table-cell>
          <table:table-cell table:number-columns-repeated="4"/>
        </table:table-row>
        <table:table-row table:style-name="ro1">
          <table:table-cell office:value-type="float" office:value="674.702697753906">
            <text:p>674.7026977539</text:p>
          </table:table-cell>
          <table:table-cell office:value-type="float" office:value="0.007081007">
            <text:p>0.007081007</text:p>
          </table:table-cell>
          <table:table-cell table:number-columns-repeated="4"/>
        </table:table-row>
        <table:table-row table:style-name="ro1">
          <table:table-cell office:value-type="float" office:value="674.822631835938">
            <text:p>674.8226318359</text:p>
          </table:table-cell>
          <table:table-cell office:value-type="float" office:value="-0.003224801">
            <text:p>-0.003224801</text:p>
          </table:table-cell>
          <table:table-cell table:number-columns-repeated="4"/>
        </table:table-row>
        <table:table-row table:style-name="ro1">
          <table:table-cell office:value-type="float" office:value="674.942565917969">
            <text:p>674.942565918</text:p>
          </table:table-cell>
          <table:table-cell office:value-type="float" office:value="0.01155277">
            <text:p>0.01155277</text:p>
          </table:table-cell>
          <table:table-cell table:number-columns-repeated="4"/>
        </table:table-row>
        <table:table-row table:style-name="ro1">
          <table:table-cell office:value-type="float" office:value="675.0625">
            <text:p>675.0625</text:p>
          </table:table-cell>
          <table:table-cell office:value-type="float" office:value="-0.004870077">
            <text:p>-0.004870077</text:p>
          </table:table-cell>
          <table:table-cell table:number-columns-repeated="4"/>
        </table:table-row>
        <table:table-row table:style-name="ro1">
          <table:table-cell office:value-type="float" office:value="675.182495117188">
            <text:p>675.1824951172</text:p>
          </table:table-cell>
          <table:table-cell office:value-type="float" office:value="-0.003729321">
            <text:p>-0.003729321</text:p>
          </table:table-cell>
          <table:table-cell table:number-columns-repeated="4"/>
        </table:table-row>
        <table:table-row table:style-name="ro1">
          <table:table-cell office:value-type="float" office:value="675.302429199219">
            <text:p>675.3024291992</text:p>
          </table:table-cell>
          <table:table-cell office:value-type="float" office:value="0.004971046">
            <text:p>0.004971046</text:p>
          </table:table-cell>
          <table:table-cell table:number-columns-repeated="4"/>
        </table:table-row>
        <table:table-row table:style-name="ro1">
          <table:table-cell office:value-type="float" office:value="675.42236328125">
            <text:p>675.4223632813</text:p>
          </table:table-cell>
          <table:table-cell office:value-type="float" office:value="0.01294659">
            <text:p>0.01294659</text:p>
          </table:table-cell>
          <table:table-cell table:number-columns-repeated="4"/>
        </table:table-row>
        <table:table-row table:style-name="ro1">
          <table:table-cell office:value-type="float" office:value="675.542297363281">
            <text:p>675.5422973633</text:p>
          </table:table-cell>
          <table:table-cell office:value-type="float" office:value="0.01054899">
            <text:p>0.01054899</text:p>
          </table:table-cell>
          <table:table-cell table:number-columns-repeated="4"/>
        </table:table-row>
        <table:table-row table:style-name="ro1">
          <table:table-cell office:value-type="float" office:value="675.662292480469">
            <text:p>675.6622924805</text:p>
          </table:table-cell>
          <table:table-cell office:value-type="float" office:value="0.006062847">
            <text:p>0.006062847</text:p>
          </table:table-cell>
          <table:table-cell table:number-columns-repeated="4"/>
        </table:table-row>
        <table:table-row table:style-name="ro1">
          <table:table-cell office:value-type="float" office:value="675.7822265625">
            <text:p>675.7822265625</text:p>
          </table:table-cell>
          <table:table-cell office:value-type="float" office:value="0.007961239">
            <text:p>0.007961239</text:p>
          </table:table-cell>
          <table:table-cell table:number-columns-repeated="4"/>
        </table:table-row>
        <table:table-row table:style-name="ro1">
          <table:table-cell office:value-type="float" office:value="675.902160644531">
            <text:p>675.9021606445</text:p>
          </table:table-cell>
          <table:table-cell office:value-type="float" office:value="-0.007266704">
            <text:p>-0.007266704</text:p>
          </table:table-cell>
          <table:table-cell table:number-columns-repeated="4"/>
        </table:table-row>
        <table:table-row table:style-name="ro1">
          <table:table-cell office:value-type="float" office:value="676.022155761719">
            <text:p>676.0221557617</text:p>
          </table:table-cell>
          <table:table-cell office:value-type="float" office:value="0.009089537">
            <text:p>0.009089537</text:p>
          </table:table-cell>
          <table:table-cell table:number-columns-repeated="4"/>
        </table:table-row>
        <table:table-row table:style-name="ro1">
          <table:table-cell office:value-type="float" office:value="676.14208984375">
            <text:p>676.1420898438</text:p>
          </table:table-cell>
          <table:table-cell office:value-type="float" office:value="0.0008132293">
            <text:p>0.0008132293</text:p>
          </table:table-cell>
          <table:table-cell table:number-columns-repeated="4"/>
        </table:table-row>
        <table:table-row table:style-name="ro1">
          <table:table-cell office:value-type="float" office:value="676.262023925781">
            <text:p>676.2620239258</text:p>
          </table:table-cell>
          <table:table-cell office:value-type="float" office:value="-0.005879443">
            <text:p>-0.005879443</text:p>
          </table:table-cell>
          <table:table-cell table:number-columns-repeated="4"/>
        </table:table-row>
        <table:table-row table:style-name="ro1">
          <table:table-cell office:value-type="float" office:value="676.382019042969">
            <text:p>676.382019043</text:p>
          </table:table-cell>
          <table:table-cell office:value-type="float" office:value="0.009822294">
            <text:p>0.009822294</text:p>
          </table:table-cell>
          <table:table-cell table:number-columns-repeated="4"/>
        </table:table-row>
        <table:table-row table:style-name="ro1">
          <table:table-cell office:value-type="float" office:value="676.501953125">
            <text:p>676.501953125</text:p>
          </table:table-cell>
          <table:table-cell office:value-type="float" office:value="0.001519719">
            <text:p>0.001519719</text:p>
          </table:table-cell>
          <table:table-cell table:number-columns-repeated="4"/>
        </table:table-row>
        <table:table-row table:style-name="ro1">
          <table:table-cell office:value-type="float" office:value="676.621948242188">
            <text:p>676.6219482422</text:p>
          </table:table-cell>
          <table:table-cell office:value-type="float" office:value="-0.006368456">
            <text:p>-0.006368456</text:p>
          </table:table-cell>
          <table:table-cell table:number-columns-repeated="4"/>
        </table:table-row>
        <table:table-row table:style-name="ro1">
          <table:table-cell office:value-type="float" office:value="676.741882324219">
            <text:p>676.7418823242</text:p>
          </table:table-cell>
          <table:table-cell office:value-type="float" office:value="-0.01039039">
            <text:p>-0.01039039</text:p>
          </table:table-cell>
          <table:table-cell table:number-columns-repeated="4"/>
        </table:table-row>
        <table:table-row table:style-name="ro1">
          <table:table-cell office:value-type="float" office:value="676.861877441406">
            <text:p>676.8618774414</text:p>
          </table:table-cell>
          <table:table-cell office:value-type="float" office:value="-0.001143348">
            <text:p>-0.001143348</text:p>
          </table:table-cell>
          <table:table-cell table:number-columns-repeated="4"/>
        </table:table-row>
        <table:table-row table:style-name="ro1">
          <table:table-cell office:value-type="float" office:value="676.981811523438">
            <text:p>676.9818115234</text:p>
          </table:table-cell>
          <table:table-cell office:value-type="float" office:value="0.002586655">
            <text:p>0.002586655</text:p>
          </table:table-cell>
          <table:table-cell table:number-columns-repeated="4"/>
        </table:table-row>
        <table:table-row table:style-name="ro1">
          <table:table-cell office:value-type="float" office:value="677.101806640625">
            <text:p>677.1018066406</text:p>
          </table:table-cell>
          <table:table-cell office:value-type="float" office:value="0.001330841">
            <text:p>0.001330841</text:p>
          </table:table-cell>
          <table:table-cell table:number-columns-repeated="4"/>
        </table:table-row>
        <table:table-row table:style-name="ro1">
          <table:table-cell office:value-type="float" office:value="677.221740722656">
            <text:p>677.2217407227</text:p>
          </table:table-cell>
          <table:table-cell office:value-type="float" office:value="-0.004260314">
            <text:p>-0.004260314</text:p>
          </table:table-cell>
          <table:table-cell table:number-columns-repeated="4"/>
        </table:table-row>
        <table:table-row table:style-name="ro1">
          <table:table-cell office:value-type="float" office:value="677.341735839844">
            <text:p>677.3417358398</text:p>
          </table:table-cell>
          <table:table-cell office:value-type="float" office:value="0.009207695">
            <text:p>0.009207695</text:p>
          </table:table-cell>
          <table:table-cell table:number-columns-repeated="4"/>
        </table:table-row>
        <table:table-row table:style-name="ro1">
          <table:table-cell office:value-type="float" office:value="677.461669921875">
            <text:p>677.4616699219</text:p>
          </table:table-cell>
          <table:table-cell office:value-type="float" office:value="-0.002367706">
            <text:p>-0.002367706</text:p>
          </table:table-cell>
          <table:table-cell table:number-columns-repeated="4"/>
        </table:table-row>
        <table:table-row table:style-name="ro1">
          <table:table-cell office:value-type="float" office:value="677.581665039063">
            <text:p>677.5816650391</text:p>
          </table:table-cell>
          <table:table-cell office:value-type="float" office:value="0.004646197">
            <text:p>0.004646197</text:p>
          </table:table-cell>
          <table:table-cell table:number-columns-repeated="4"/>
        </table:table-row>
        <table:table-row table:style-name="ro1">
          <table:table-cell office:value-type="float" office:value="677.70166015625">
            <text:p>677.7016601563</text:p>
          </table:table-cell>
          <table:table-cell office:value-type="float" office:value="-0.002792138">
            <text:p>-0.002792138</text:p>
          </table:table-cell>
          <table:table-cell table:number-columns-repeated="4"/>
        </table:table-row>
        <table:table-row table:style-name="ro1">
          <table:table-cell office:value-type="float" office:value="677.821594238281">
            <text:p>677.8215942383</text:p>
          </table:table-cell>
          <table:table-cell office:value-type="float" office:value="0.004651535">
            <text:p>0.004651535</text:p>
          </table:table-cell>
          <table:table-cell table:number-columns-repeated="4"/>
        </table:table-row>
        <table:table-row table:style-name="ro1">
          <table:table-cell office:value-type="float" office:value="677.941589355469">
            <text:p>677.9415893555</text:p>
          </table:table-cell>
          <table:table-cell office:value-type="float" office:value="0.00148444">
            <text:p>0.00148444</text:p>
          </table:table-cell>
          <table:table-cell table:number-columns-repeated="4"/>
        </table:table-row>
        <table:table-row table:style-name="ro1">
          <table:table-cell office:value-type="float" office:value="678.061584472656">
            <text:p>678.0615844727</text:p>
          </table:table-cell>
          <table:table-cell office:value-type="float" office:value="-0.001822135">
            <text:p>-0.001822135</text:p>
          </table:table-cell>
          <table:table-cell table:number-columns-repeated="4"/>
        </table:table-row>
        <table:table-row table:style-name="ro1">
          <table:table-cell office:value-type="float" office:value="678.181518554688">
            <text:p>678.1815185547</text:p>
          </table:table-cell>
          <table:table-cell office:value-type="float" office:value="-0.001918669">
            <text:p>-0.001918669</text:p>
          </table:table-cell>
          <table:table-cell table:number-columns-repeated="4"/>
        </table:table-row>
        <table:table-row table:style-name="ro1">
          <table:table-cell office:value-type="float" office:value="678.301513671875">
            <text:p>678.3015136719</text:p>
          </table:table-cell>
          <table:table-cell office:value-type="float" office:value="0.002048109">
            <text:p>0.002048109</text:p>
          </table:table-cell>
          <table:table-cell table:number-columns-repeated="4"/>
        </table:table-row>
        <table:table-row table:style-name="ro1">
          <table:table-cell office:value-type="float" office:value="678.421508789063">
            <text:p>678.4215087891</text:p>
          </table:table-cell>
          <table:table-cell office:value-type="float" office:value="-0.004439652">
            <text:p>-0.004439652</text:p>
          </table:table-cell>
          <table:table-cell table:number-columns-repeated="4"/>
        </table:table-row>
        <table:table-row table:style-name="ro1">
          <table:table-cell office:value-type="float" office:value="678.541442871094">
            <text:p>678.5414428711</text:p>
          </table:table-cell>
          <table:table-cell office:value-type="float" office:value="0.01595753">
            <text:p>0.01595753</text:p>
          </table:table-cell>
          <table:table-cell table:number-columns-repeated="4"/>
        </table:table-row>
        <table:table-row table:style-name="ro1">
          <table:table-cell office:value-type="float" office:value="678.661437988281">
            <text:p>678.6614379883</text:p>
          </table:table-cell>
          <table:table-cell office:value-type="float" office:value="-0.001551723">
            <text:p>-0.001551723</text:p>
          </table:table-cell>
          <table:table-cell table:number-columns-repeated="4"/>
        </table:table-row>
        <table:table-row table:style-name="ro1">
          <table:table-cell office:value-type="float" office:value="678.781433105469">
            <text:p>678.7814331055</text:p>
          </table:table-cell>
          <table:table-cell office:value-type="float" office:value="0.003667921">
            <text:p>0.003667921</text:p>
          </table:table-cell>
          <table:table-cell table:number-columns-repeated="4"/>
        </table:table-row>
        <table:table-row table:style-name="ro1">
          <table:table-cell office:value-type="float" office:value="678.901428222656">
            <text:p>678.9014282227</text:p>
          </table:table-cell>
          <table:table-cell office:value-type="float" office:value="0.005977254">
            <text:p>0.005977254</text:p>
          </table:table-cell>
          <table:table-cell table:number-columns-repeated="4"/>
        </table:table-row>
        <table:table-row table:style-name="ro1">
          <table:table-cell office:value-type="float" office:value="679.021362304688">
            <text:p>679.0213623047</text:p>
          </table:table-cell>
          <table:table-cell office:value-type="float" office:value="0.003692686">
            <text:p>0.003692686</text:p>
          </table:table-cell>
          <table:table-cell table:number-columns-repeated="4"/>
        </table:table-row>
        <table:table-row table:style-name="ro1">
          <table:table-cell office:value-type="float" office:value="679.141357421875">
            <text:p>679.1413574219</text:p>
          </table:table-cell>
          <table:table-cell office:value-type="float" office:value="0.000412453">
            <text:p>0.000412453</text:p>
          </table:table-cell>
          <table:table-cell table:number-columns-repeated="4"/>
        </table:table-row>
        <table:table-row table:style-name="ro1">
          <table:table-cell office:value-type="float" office:value="679.261352539063">
            <text:p>679.2613525391</text:p>
          </table:table-cell>
          <table:table-cell office:value-type="float" office:value="0.007706628">
            <text:p>0.007706628</text:p>
          </table:table-cell>
          <table:table-cell table:number-columns-repeated="4"/>
        </table:table-row>
        <table:table-row table:style-name="ro1">
          <table:table-cell office:value-type="float" office:value="679.38134765625">
            <text:p>679.3813476563</text:p>
          </table:table-cell>
          <table:table-cell office:value-type="float" office:value="0.008957678">
            <text:p>0.008957678</text:p>
          </table:table-cell>
          <table:table-cell table:number-columns-repeated="4"/>
        </table:table-row>
        <table:table-row table:style-name="ro1">
          <table:table-cell office:value-type="float" office:value="679.501342773438">
            <text:p>679.5013427734</text:p>
          </table:table-cell>
          <table:table-cell office:value-type="float" office:value="-0.003567322">
            <text:p>-0.003567322</text:p>
          </table:table-cell>
          <table:table-cell table:number-columns-repeated="4"/>
        </table:table-row>
        <table:table-row table:style-name="ro1">
          <table:table-cell office:value-type="float" office:value="679.621337890625">
            <text:p>679.6213378906</text:p>
          </table:table-cell>
          <table:table-cell office:value-type="float" office:value="0.005599053">
            <text:p>0.005599053</text:p>
          </table:table-cell>
          <table:table-cell table:number-columns-repeated="4"/>
        </table:table-row>
        <table:table-row table:style-name="ro1">
          <table:table-cell office:value-type="float" office:value="679.741333007813">
            <text:p>679.7413330078</text:p>
          </table:table-cell>
          <table:table-cell office:value-type="float" office:value="0.0008028009">
            <text:p>0.0008028009</text:p>
          </table:table-cell>
          <table:table-cell table:number-columns-repeated="4"/>
        </table:table-row>
        <table:table-row table:style-name="ro1">
          <table:table-cell office:value-type="float" office:value="679.861267089844">
            <text:p>679.8612670898</text:p>
          </table:table-cell>
          <table:table-cell office:value-type="float" office:value="0.003702877">
            <text:p>0.003702877</text:p>
          </table:table-cell>
          <table:table-cell table:number-columns-repeated="4"/>
        </table:table-row>
        <table:table-row table:style-name="ro1">
          <table:table-cell office:value-type="float" office:value="679.981262207031">
            <text:p>679.981262207</text:p>
          </table:table-cell>
          <table:table-cell office:value-type="float" office:value="-0.0006907429">
            <text:p>-0.0006907429</text:p>
          </table:table-cell>
          <table:table-cell table:number-columns-repeated="4"/>
        </table:table-row>
        <table:table-row table:style-name="ro1">
          <table:table-cell office:value-type="float" office:value="680.101257324219">
            <text:p>680.1012573242</text:p>
          </table:table-cell>
          <table:table-cell office:value-type="float" office:value="-0.005157254">
            <text:p>-0.005157254</text:p>
          </table:table-cell>
          <table:table-cell table:number-columns-repeated="4"/>
        </table:table-row>
        <table:table-row table:style-name="ro1">
          <table:table-cell office:value-type="float" office:value="680.221252441406">
            <text:p>680.2212524414</text:p>
          </table:table-cell>
          <table:table-cell office:value-type="float" office:value="0.009327483">
            <text:p>0.009327483</text:p>
          </table:table-cell>
          <table:table-cell table:number-columns-repeated="4"/>
        </table:table-row>
        <table:table-row table:style-name="ro1">
          <table:table-cell office:value-type="float" office:value="680.341247558594">
            <text:p>680.3412475586</text:p>
          </table:table-cell>
          <table:table-cell office:value-type="float" office:value="-0.003671382">
            <text:p>-0.003671382</text:p>
          </table:table-cell>
          <table:table-cell table:number-columns-repeated="4"/>
        </table:table-row>
        <table:table-row table:style-name="ro1">
          <table:table-cell office:value-type="float" office:value="680.461242675781">
            <text:p>680.4612426758</text:p>
          </table:table-cell>
          <table:table-cell office:value-type="float" office:value="-0.002603291">
            <text:p>-0.002603291</text:p>
          </table:table-cell>
          <table:table-cell table:number-columns-repeated="4"/>
        </table:table-row>
        <table:table-row table:style-name="ro1">
          <table:table-cell office:value-type="float" office:value="680.581237792969">
            <text:p>680.581237793</text:p>
          </table:table-cell>
          <table:table-cell office:value-type="string">
            <text:p>7.972169E-05</text:p>
          </table:table-cell>
          <table:table-cell table:number-columns-repeated="4"/>
        </table:table-row>
        <table:table-row table:style-name="ro1">
          <table:table-cell office:value-type="float" office:value="680.701232910156">
            <text:p>680.7012329102</text:p>
          </table:table-cell>
          <table:table-cell office:value-type="float" office:value="0.003820589">
            <text:p>0.003820589</text:p>
          </table:table-cell>
          <table:table-cell table:number-columns-repeated="4"/>
        </table:table-row>
        <table:table-row table:style-name="ro1">
          <table:table-cell office:value-type="float" office:value="680.821228027344">
            <text:p>680.8212280273</text:p>
          </table:table-cell>
          <table:table-cell office:value-type="float" office:value="0.003764704">
            <text:p>0.003764704</text:p>
          </table:table-cell>
          <table:table-cell table:number-columns-repeated="4"/>
        </table:table-row>
        <table:table-row table:style-name="ro1">
          <table:table-cell office:value-type="float" office:value="680.941223144531">
            <text:p>680.9412231445</text:p>
          </table:table-cell>
          <table:table-cell office:value-type="float" office:value="-0.0001518014">
            <text:p>-0.0001518014</text:p>
          </table:table-cell>
          <table:table-cell table:number-columns-repeated="4"/>
        </table:table-row>
        <table:table-row table:style-name="ro1">
          <table:table-cell office:value-type="float" office:value="681.061218261719">
            <text:p>681.0612182617</text:p>
          </table:table-cell>
          <table:table-cell office:value-type="float" office:value="-0.001608987">
            <text:p>-0.001608987</text:p>
          </table:table-cell>
          <table:table-cell table:number-columns-repeated="4"/>
        </table:table-row>
        <table:table-row table:style-name="ro1">
          <table:table-cell office:value-type="float" office:value="681.181274414063">
            <text:p>681.1812744141</text:p>
          </table:table-cell>
          <table:table-cell office:value-type="float" office:value="-0.00141672">
            <text:p>-0.00141672</text:p>
          </table:table-cell>
          <table:table-cell table:number-columns-repeated="4"/>
        </table:table-row>
        <table:table-row table:style-name="ro1">
          <table:table-cell office:value-type="float" office:value="681.30126953125">
            <text:p>681.3012695313</text:p>
          </table:table-cell>
          <table:table-cell office:value-type="float" office:value="0.003399071">
            <text:p>0.003399071</text:p>
          </table:table-cell>
          <table:table-cell table:number-columns-repeated="4"/>
        </table:table-row>
        <table:table-row table:style-name="ro1">
          <table:table-cell office:value-type="float" office:value="681.421264648438">
            <text:p>681.4212646484</text:p>
          </table:table-cell>
          <table:table-cell office:value-type="float" office:value="0.005524585">
            <text:p>0.005524585</text:p>
          </table:table-cell>
          <table:table-cell table:number-columns-repeated="4"/>
        </table:table-row>
        <table:table-row table:style-name="ro1">
          <table:table-cell office:value-type="float" office:value="681.541259765625">
            <text:p>681.5412597656</text:p>
          </table:table-cell>
          <table:table-cell office:value-type="float" office:value="-0.009260162">
            <text:p>-0.009260162</text:p>
          </table:table-cell>
          <table:table-cell table:number-columns-repeated="4"/>
        </table:table-row>
        <table:table-row table:style-name="ro1">
          <table:table-cell office:value-type="float" office:value="681.661254882813">
            <text:p>681.6612548828</text:p>
          </table:table-cell>
          <table:table-cell office:value-type="float" office:value="0.00208636">
            <text:p>0.00208636</text:p>
          </table:table-cell>
          <table:table-cell table:number-columns-repeated="4"/>
        </table:table-row>
        <table:table-row table:style-name="ro1">
          <table:table-cell office:value-type="float" office:value="681.78125">
            <text:p>681.78125</text:p>
          </table:table-cell>
          <table:table-cell office:value-type="float" office:value="-0.005484589">
            <text:p>-0.005484589</text:p>
          </table:table-cell>
          <table:table-cell table:number-columns-repeated="4"/>
        </table:table-row>
        <table:table-row table:style-name="ro1">
          <table:table-cell office:value-type="float" office:value="681.901245117188">
            <text:p>681.9012451172</text:p>
          </table:table-cell>
          <table:table-cell office:value-type="float" office:value="0.002894006">
            <text:p>0.002894006</text:p>
          </table:table-cell>
          <table:table-cell table:number-columns-repeated="4"/>
        </table:table-row>
        <table:table-row table:style-name="ro1">
          <table:table-cell office:value-type="float" office:value="682.021301269531">
            <text:p>682.0213012695</text:p>
          </table:table-cell>
          <table:table-cell office:value-type="float" office:value="-0.0026083">
            <text:p>-0.0026083</text:p>
          </table:table-cell>
          <table:table-cell table:number-columns-repeated="4"/>
        </table:table-row>
        <table:table-row table:style-name="ro1">
          <table:table-cell office:value-type="float" office:value="682.141296386719">
            <text:p>682.1412963867</text:p>
          </table:table-cell>
          <table:table-cell office:value-type="float" office:value="-0.004386345">
            <text:p>-0.004386345</text:p>
          </table:table-cell>
          <table:table-cell table:number-columns-repeated="4"/>
        </table:table-row>
        <table:table-row table:style-name="ro1">
          <table:table-cell office:value-type="float" office:value="682.261291503906">
            <text:p>682.2612915039</text:p>
          </table:table-cell>
          <table:table-cell office:value-type="float" office:value="-0.003816282">
            <text:p>-0.003816282</text:p>
          </table:table-cell>
          <table:table-cell table:number-columns-repeated="4"/>
        </table:table-row>
        <table:table-row table:style-name="ro1">
          <table:table-cell office:value-type="float" office:value="682.381286621094">
            <text:p>682.3812866211</text:p>
          </table:table-cell>
          <table:table-cell office:value-type="float" office:value="-0.0003379838">
            <text:p>-0.0003379838</text:p>
          </table:table-cell>
          <table:table-cell table:number-columns-repeated="4"/>
        </table:table-row>
        <table:table-row table:style-name="ro1">
          <table:table-cell office:value-type="float" office:value="682.501342773438">
            <text:p>682.5013427734</text:p>
          </table:table-cell>
          <table:table-cell office:value-type="float" office:value="0.003129747">
            <text:p>0.003129747</text:p>
          </table:table-cell>
          <table:table-cell table:number-columns-repeated="4"/>
        </table:table-row>
        <table:table-row table:style-name="ro1">
          <table:table-cell office:value-type="float" office:value="682.621337890625">
            <text:p>682.6213378906</text:p>
          </table:table-cell>
          <table:table-cell office:value-type="float" office:value="-0.001491627">
            <text:p>-0.001491627</text:p>
          </table:table-cell>
          <table:table-cell table:number-columns-repeated="4"/>
        </table:table-row>
        <table:table-row table:style-name="ro1">
          <table:table-cell office:value-type="float" office:value="682.741333007813">
            <text:p>682.7413330078</text:p>
          </table:table-cell>
          <table:table-cell office:value-type="float" office:value="-0.002906991">
            <text:p>-0.002906991</text:p>
          </table:table-cell>
          <table:table-cell table:number-columns-repeated="4"/>
        </table:table-row>
        <table:table-row table:style-name="ro1">
          <table:table-cell office:value-type="float" office:value="682.861389160156">
            <text:p>682.8613891602</text:p>
          </table:table-cell>
          <table:table-cell office:value-type="float" office:value="-0.0003753524">
            <text:p>-0.0003753524</text:p>
          </table:table-cell>
          <table:table-cell table:number-columns-repeated="4"/>
        </table:table-row>
        <table:table-row table:style-name="ro1">
          <table:table-cell office:value-type="float" office:value="682.981384277344">
            <text:p>682.9813842773</text:p>
          </table:table-cell>
          <table:table-cell office:value-type="float" office:value="0.001525814">
            <text:p>0.001525814</text:p>
          </table:table-cell>
          <table:table-cell table:number-columns-repeated="4"/>
        </table:table-row>
        <table:table-row table:style-name="ro1">
          <table:table-cell office:value-type="float" office:value="683.101379394531">
            <text:p>683.1013793945</text:p>
          </table:table-cell>
          <table:table-cell office:value-type="float" office:value="-0.006390247">
            <text:p>-0.006390247</text:p>
          </table:table-cell>
          <table:table-cell table:number-columns-repeated="4"/>
        </table:table-row>
        <table:table-row table:style-name="ro1">
          <table:table-cell office:value-type="float" office:value="683.221435546875">
            <text:p>683.2214355469</text:p>
          </table:table-cell>
          <table:table-cell office:value-type="float" office:value="-0.0004300101">
            <text:p>-0.0004300101</text:p>
          </table:table-cell>
          <table:table-cell table:number-columns-repeated="4"/>
        </table:table-row>
        <table:table-row table:style-name="ro1">
          <table:table-cell office:value-type="float" office:value="683.341430664063">
            <text:p>683.3414306641</text:p>
          </table:table-cell>
          <table:table-cell office:value-type="float" office:value="-0.009187753">
            <text:p>-0.009187753</text:p>
          </table:table-cell>
          <table:table-cell table:number-columns-repeated="4"/>
        </table:table-row>
        <table:table-row table:style-name="ro1">
          <table:table-cell office:value-type="float" office:value="683.46142578125">
            <text:p>683.4614257813</text:p>
          </table:table-cell>
          <table:table-cell office:value-type="float" office:value="-0.005983317">
            <text:p>-0.005983317</text:p>
          </table:table-cell>
          <table:table-cell table:number-columns-repeated="4"/>
        </table:table-row>
        <table:table-row table:style-name="ro1">
          <table:table-cell office:value-type="float" office:value="683.581481933594">
            <text:p>683.5814819336</text:p>
          </table:table-cell>
          <table:table-cell office:value-type="float" office:value="-0.004399826">
            <text:p>-0.004399826</text:p>
          </table:table-cell>
          <table:table-cell table:number-columns-repeated="4"/>
        </table:table-row>
        <table:table-row table:style-name="ro1">
          <table:table-cell office:value-type="float" office:value="683.701477050781">
            <text:p>683.7014770508</text:p>
          </table:table-cell>
          <table:table-cell office:value-type="float" office:value="-0.001585558">
            <text:p>-0.001585558</text:p>
          </table:table-cell>
          <table:table-cell table:number-columns-repeated="4"/>
        </table:table-row>
        <table:table-row table:style-name="ro1">
          <table:table-cell office:value-type="float" office:value="683.821533203125">
            <text:p>683.8215332031</text:p>
          </table:table-cell>
          <table:table-cell office:value-type="float" office:value="-0.004868876">
            <text:p>-0.004868876</text:p>
          </table:table-cell>
          <table:table-cell table:number-columns-repeated="4"/>
        </table:table-row>
        <table:table-row table:style-name="ro1">
          <table:table-cell office:value-type="float" office:value="683.941528320313">
            <text:p>683.9415283203</text:p>
          </table:table-cell>
          <table:table-cell office:value-type="float" office:value="-0.0055968">
            <text:p>-0.0055968</text:p>
          </table:table-cell>
          <table:table-cell table:number-columns-repeated="4"/>
        </table:table-row>
        <table:table-row table:style-name="ro1">
          <table:table-cell office:value-type="float" office:value="684.061584472656">
            <text:p>684.0615844727</text:p>
          </table:table-cell>
          <table:table-cell office:value-type="float" office:value="0.00441975">
            <text:p>0.00441975</text:p>
          </table:table-cell>
          <table:table-cell table:number-columns-repeated="4"/>
        </table:table-row>
        <table:table-row table:style-name="ro1">
          <table:table-cell office:value-type="float" office:value="684.181579589844">
            <text:p>684.1815795898</text:p>
          </table:table-cell>
          <table:table-cell office:value-type="float" office:value="-0.01105909">
            <text:p>-0.01105909</text:p>
          </table:table-cell>
          <table:table-cell table:number-columns-repeated="4"/>
        </table:table-row>
        <table:table-row table:style-name="ro1">
          <table:table-cell office:value-type="float" office:value="684.301635742188">
            <text:p>684.3016357422</text:p>
          </table:table-cell>
          <table:table-cell office:value-type="float" office:value="-0.004571408">
            <text:p>-0.004571408</text:p>
          </table:table-cell>
          <table:table-cell table:number-columns-repeated="4"/>
        </table:table-row>
        <table:table-row table:style-name="ro1">
          <table:table-cell office:value-type="float" office:value="684.421630859375">
            <text:p>684.4216308594</text:p>
          </table:table-cell>
          <table:table-cell office:value-type="float" office:value="-0.00807342">
            <text:p>-0.00807342</text:p>
          </table:table-cell>
          <table:table-cell table:number-columns-repeated="4"/>
        </table:table-row>
        <table:table-row table:style-name="ro1">
          <table:table-cell office:value-type="float" office:value="684.541687011719">
            <text:p>684.5416870117</text:p>
          </table:table-cell>
          <table:table-cell office:value-type="float" office:value="0.005378397">
            <text:p>0.005378397</text:p>
          </table:table-cell>
          <table:table-cell table:number-columns-repeated="4"/>
        </table:table-row>
        <table:table-row table:style-name="ro1">
          <table:table-cell office:value-type="float" office:value="684.661682128906">
            <text:p>684.6616821289</text:p>
          </table:table-cell>
          <table:table-cell office:value-type="float" office:value="-0.004681476">
            <text:p>-0.004681476</text:p>
          </table:table-cell>
          <table:table-cell table:number-columns-repeated="4"/>
        </table:table-row>
        <table:table-row table:style-name="ro1">
          <table:table-cell office:value-type="float" office:value="684.78173828125">
            <text:p>684.7817382813</text:p>
          </table:table-cell>
          <table:table-cell office:value-type="float" office:value="0.007591062">
            <text:p>0.007591062</text:p>
          </table:table-cell>
          <table:table-cell table:number-columns-repeated="4"/>
        </table:table-row>
        <table:table-row table:style-name="ro1">
          <table:table-cell office:value-type="float" office:value="684.901733398438">
            <text:p>684.9017333984</text:p>
          </table:table-cell>
          <table:table-cell office:value-type="float" office:value="0.008247105">
            <text:p>0.008247105</text:p>
          </table:table-cell>
          <table:table-cell table:number-columns-repeated="4"/>
        </table:table-row>
        <table:table-row table:style-name="ro1">
          <table:table-cell office:value-type="float" office:value="685.021789550781">
            <text:p>685.0217895508</text:p>
          </table:table-cell>
          <table:table-cell office:value-type="float" office:value="-0.003760337">
            <text:p>-0.003760337</text:p>
          </table:table-cell>
          <table:table-cell table:number-columns-repeated="4"/>
        </table:table-row>
        <table:table-row table:style-name="ro1">
          <table:table-cell office:value-type="float" office:value="685.141784667969">
            <text:p>685.141784668</text:p>
          </table:table-cell>
          <table:table-cell office:value-type="float" office:value="0.001685087">
            <text:p>0.001685087</text:p>
          </table:table-cell>
          <table:table-cell table:number-columns-repeated="4"/>
        </table:table-row>
        <table:table-row table:style-name="ro1">
          <table:table-cell office:value-type="float" office:value="685.261840820313">
            <text:p>685.2618408203</text:p>
          </table:table-cell>
          <table:table-cell office:value-type="float" office:value="0.01025171">
            <text:p>0.01025171</text:p>
          </table:table-cell>
          <table:table-cell table:number-columns-repeated="4"/>
        </table:table-row>
        <table:table-row table:style-name="ro1">
          <table:table-cell office:value-type="float" office:value="685.381896972656">
            <text:p>685.3818969727</text:p>
          </table:table-cell>
          <table:table-cell office:value-type="float" office:value="0.002821385">
            <text:p>0.002821385</text:p>
          </table:table-cell>
          <table:table-cell table:number-columns-repeated="4"/>
        </table:table-row>
        <table:table-row table:style-name="ro1">
          <table:table-cell office:value-type="float" office:value="685.501892089844">
            <text:p>685.5018920898</text:p>
          </table:table-cell>
          <table:table-cell office:value-type="float" office:value="-0.003867108">
            <text:p>-0.003867108</text:p>
          </table:table-cell>
          <table:table-cell table:number-columns-repeated="4"/>
        </table:table-row>
        <table:table-row table:style-name="ro1">
          <table:table-cell office:value-type="float" office:value="685.621948242188">
            <text:p>685.6219482422</text:p>
          </table:table-cell>
          <table:table-cell office:value-type="float" office:value="0.01241804">
            <text:p>0.01241804</text:p>
          </table:table-cell>
          <table:table-cell table:number-columns-repeated="4"/>
        </table:table-row>
        <table:table-row table:style-name="ro1">
          <table:table-cell office:value-type="float" office:value="685.742004394531">
            <text:p>685.7420043945</text:p>
          </table:table-cell>
          <table:table-cell office:value-type="float" office:value="-0.0004840973">
            <text:p>-0.0004840973</text:p>
          </table:table-cell>
          <table:table-cell table:number-columns-repeated="4"/>
        </table:table-row>
        <table:table-row table:style-name="ro1">
          <table:table-cell office:value-type="float" office:value="685.861999511719">
            <text:p>685.8619995117</text:p>
          </table:table-cell>
          <table:table-cell office:value-type="float" office:value="0.0009527472">
            <text:p>0.0009527472</text:p>
          </table:table-cell>
          <table:table-cell table:number-columns-repeated="4"/>
        </table:table-row>
        <table:table-row table:style-name="ro1">
          <table:table-cell office:value-type="float" office:value="685.982055664063">
            <text:p>685.9820556641</text:p>
          </table:table-cell>
          <table:table-cell office:value-type="float" office:value="-0.002741864">
            <text:p>-0.002741864</text:p>
          </table:table-cell>
          <table:table-cell table:number-columns-repeated="4"/>
        </table:table-row>
        <table:table-row table:style-name="ro1">
          <table:table-cell office:value-type="float" office:value="686.102111816406">
            <text:p>686.1021118164</text:p>
          </table:table-cell>
          <table:table-cell office:value-type="float" office:value="0.002216232">
            <text:p>0.002216232</text:p>
          </table:table-cell>
          <table:table-cell table:number-columns-repeated="4"/>
        </table:table-row>
        <table:table-row table:style-name="ro1">
          <table:table-cell office:value-type="float" office:value="686.22216796875">
            <text:p>686.2221679688</text:p>
          </table:table-cell>
          <table:table-cell office:value-type="float" office:value="-0.007587574">
            <text:p>-0.007587574</text:p>
          </table:table-cell>
          <table:table-cell table:number-columns-repeated="4"/>
        </table:table-row>
        <table:table-row table:style-name="ro1">
          <table:table-cell office:value-type="float" office:value="686.342163085938">
            <text:p>686.3421630859</text:p>
          </table:table-cell>
          <table:table-cell office:value-type="float" office:value="-0.006193366">
            <text:p>-0.006193366</text:p>
          </table:table-cell>
          <table:table-cell table:number-columns-repeated="4"/>
        </table:table-row>
        <table:table-row table:style-name="ro1">
          <table:table-cell office:value-type="float" office:value="686.462219238281">
            <text:p>686.4622192383</text:p>
          </table:table-cell>
          <table:table-cell office:value-type="float" office:value="0.001539657">
            <text:p>0.001539657</text:p>
          </table:table-cell>
          <table:table-cell table:number-columns-repeated="4"/>
        </table:table-row>
        <table:table-row table:style-name="ro1">
          <table:table-cell office:value-type="float" office:value="686.582275390625">
            <text:p>686.5822753906</text:p>
          </table:table-cell>
          <table:table-cell office:value-type="float" office:value="-0.0006789641">
            <text:p>-0.0006789641</text:p>
          </table:table-cell>
          <table:table-cell table:number-columns-repeated="4"/>
        </table:table-row>
        <table:table-row table:style-name="ro1">
          <table:table-cell office:value-type="float" office:value="686.702331542969">
            <text:p>686.702331543</text:p>
          </table:table-cell>
          <table:table-cell office:value-type="float" office:value="0.002939999">
            <text:p>0.002939999</text:p>
          </table:table-cell>
          <table:table-cell table:number-columns-repeated="4"/>
        </table:table-row>
        <table:table-row table:style-name="ro1">
          <table:table-cell office:value-type="float" office:value="686.822387695313">
            <text:p>686.8223876953</text:p>
          </table:table-cell>
          <table:table-cell office:value-type="float" office:value="-0.001635163">
            <text:p>-0.001635163</text:p>
          </table:table-cell>
          <table:table-cell table:number-columns-repeated="4"/>
        </table:table-row>
        <table:table-row table:style-name="ro1">
          <table:table-cell office:value-type="float" office:value="686.9423828125">
            <text:p>686.9423828125</text:p>
          </table:table-cell>
          <table:table-cell office:value-type="float" office:value="0.007590909">
            <text:p>0.007590909</text:p>
          </table:table-cell>
          <table:table-cell table:number-columns-repeated="4"/>
        </table:table-row>
        <table:table-row table:style-name="ro1">
          <table:table-cell office:value-type="float" office:value="687.062438964844">
            <text:p>687.0624389648</text:p>
          </table:table-cell>
          <table:table-cell office:value-type="float" office:value="0.002941216">
            <text:p>0.002941216</text:p>
          </table:table-cell>
          <table:table-cell table:number-columns-repeated="4"/>
        </table:table-row>
        <table:table-row table:style-name="ro1">
          <table:table-cell office:value-type="float" office:value="687.182495117188">
            <text:p>687.1824951172</text:p>
          </table:table-cell>
          <table:table-cell office:value-type="float" office:value="-0.009101212">
            <text:p>-0.009101212</text:p>
          </table:table-cell>
          <table:table-cell table:number-columns-repeated="4"/>
        </table:table-row>
        <table:table-row table:style-name="ro1">
          <table:table-cell office:value-type="float" office:value="687.302551269531">
            <text:p>687.3025512695</text:p>
          </table:table-cell>
          <table:table-cell office:value-type="float" office:value="0.001789447">
            <text:p>0.001789447</text:p>
          </table:table-cell>
          <table:table-cell table:number-columns-repeated="4"/>
        </table:table-row>
        <table:table-row table:style-name="ro1">
          <table:table-cell office:value-type="float" office:value="687.422607421875">
            <text:p>687.4226074219</text:p>
          </table:table-cell>
          <table:table-cell office:value-type="float" office:value="-0.006010068">
            <text:p>-0.006010068</text:p>
          </table:table-cell>
          <table:table-cell table:number-columns-repeated="4"/>
        </table:table-row>
        <table:table-row table:style-name="ro1">
          <table:table-cell office:value-type="float" office:value="687.542663574219">
            <text:p>687.5426635742</text:p>
          </table:table-cell>
          <table:table-cell office:value-type="float" office:value="-0.008307162">
            <text:p>-0.008307162</text:p>
          </table:table-cell>
          <table:table-cell table:number-columns-repeated="4"/>
        </table:table-row>
        <table:table-row table:style-name="ro1">
          <table:table-cell office:value-type="float" office:value="687.662719726563">
            <text:p>687.6627197266</text:p>
          </table:table-cell>
          <table:table-cell office:value-type="float" office:value="0.01094849">
            <text:p>0.01094849</text:p>
          </table:table-cell>
          <table:table-cell table:number-columns-repeated="4"/>
        </table:table-row>
        <table:table-row table:style-name="ro1">
          <table:table-cell office:value-type="float" office:value="687.782775878906">
            <text:p>687.7827758789</text:p>
          </table:table-cell>
          <table:table-cell office:value-type="float" office:value="-0.000192503">
            <text:p>-0.000192503</text:p>
          </table:table-cell>
          <table:table-cell table:number-columns-repeated="4"/>
        </table:table-row>
        <table:table-row table:style-name="ro1">
          <table:table-cell office:value-type="float" office:value="687.90283203125">
            <text:p>687.9028320313</text:p>
          </table:table-cell>
          <table:table-cell office:value-type="float" office:value="0.006754745">
            <text:p>0.006754745</text:p>
          </table:table-cell>
          <table:table-cell table:number-columns-repeated="4"/>
        </table:table-row>
        <table:table-row table:style-name="ro1">
          <table:table-cell office:value-type="float" office:value="688.022888183594">
            <text:p>688.0228881836</text:p>
          </table:table-cell>
          <table:table-cell office:value-type="float" office:value="0.008305038">
            <text:p>0.008305038</text:p>
          </table:table-cell>
          <table:table-cell table:number-columns-repeated="4"/>
        </table:table-row>
        <table:table-row table:style-name="ro1">
          <table:table-cell office:value-type="float" office:value="688.142944335938">
            <text:p>688.1429443359</text:p>
          </table:table-cell>
          <table:table-cell office:value-type="float" office:value="0.004044792">
            <text:p>0.004044792</text:p>
          </table:table-cell>
          <table:table-cell table:number-columns-repeated="4"/>
        </table:table-row>
        <table:table-row table:style-name="ro1">
          <table:table-cell office:value-type="float" office:value="688.263000488281">
            <text:p>688.2630004883</text:p>
          </table:table-cell>
          <table:table-cell office:value-type="float" office:value="-0.004474357">
            <text:p>-0.004474357</text:p>
          </table:table-cell>
          <table:table-cell table:number-columns-repeated="4"/>
        </table:table-row>
        <table:table-row table:style-name="ro1">
          <table:table-cell office:value-type="float" office:value="688.383056640625">
            <text:p>688.3830566406</text:p>
          </table:table-cell>
          <table:table-cell office:value-type="float" office:value="-0.002432642">
            <text:p>-0.002432642</text:p>
          </table:table-cell>
          <table:table-cell table:number-columns-repeated="4"/>
        </table:table-row>
        <table:table-row table:style-name="ro1">
          <table:table-cell office:value-type="float" office:value="688.503112792969">
            <text:p>688.503112793</text:p>
          </table:table-cell>
          <table:table-cell office:value-type="float" office:value="-0.004424706">
            <text:p>-0.004424706</text:p>
          </table:table-cell>
          <table:table-cell table:number-columns-repeated="4"/>
        </table:table-row>
        <table:table-row table:style-name="ro1">
          <table:table-cell office:value-type="float" office:value="688.623168945313">
            <text:p>688.6231689453</text:p>
          </table:table-cell>
          <table:table-cell office:value-type="float" office:value="-0.005984248">
            <text:p>-0.005984248</text:p>
          </table:table-cell>
          <table:table-cell table:number-columns-repeated="4"/>
        </table:table-row>
        <table:table-row table:style-name="ro1">
          <table:table-cell office:value-type="float" office:value="688.743225097656">
            <text:p>688.7432250977</text:p>
          </table:table-cell>
          <table:table-cell office:value-type="float" office:value="-0.004634287">
            <text:p>-0.004634287</text:p>
          </table:table-cell>
          <table:table-cell table:number-columns-repeated="4"/>
        </table:table-row>
        <table:table-row table:style-name="ro1">
          <table:table-cell office:value-type="float" office:value="688.86328125">
            <text:p>688.86328125</text:p>
          </table:table-cell>
          <table:table-cell office:value-type="float" office:value="-0.003282591">
            <text:p>-0.003282591</text:p>
          </table:table-cell>
          <table:table-cell table:number-columns-repeated="4"/>
        </table:table-row>
        <table:table-row table:style-name="ro1">
          <table:table-cell office:value-type="float" office:value="688.983337402344">
            <text:p>688.9833374023</text:p>
          </table:table-cell>
          <table:table-cell office:value-type="float" office:value="-0.003904442">
            <text:p>-0.003904442</text:p>
          </table:table-cell>
          <table:table-cell table:number-columns-repeated="4"/>
        </table:table-row>
        <table:table-row table:style-name="ro1">
          <table:table-cell office:value-type="float" office:value="689.103393554688">
            <text:p>689.1033935547</text:p>
          </table:table-cell>
          <table:table-cell office:value-type="float" office:value="0.0003779672">
            <text:p>0.0003779672</text:p>
          </table:table-cell>
          <table:table-cell table:number-columns-repeated="4"/>
        </table:table-row>
        <table:table-row table:style-name="ro1">
          <table:table-cell office:value-type="float" office:value="689.223449707031">
            <text:p>689.223449707</text:p>
          </table:table-cell>
          <table:table-cell office:value-type="float" office:value="-0.0003309055">
            <text:p>-0.0003309055</text:p>
          </table:table-cell>
          <table:table-cell table:number-columns-repeated="4"/>
        </table:table-row>
        <table:table-row table:style-name="ro1">
          <table:table-cell office:value-type="float" office:value="689.343505859375">
            <text:p>689.3435058594</text:p>
          </table:table-cell>
          <table:table-cell office:value-type="float" office:value="0.01599688">
            <text:p>0.01599688</text:p>
          </table:table-cell>
          <table:table-cell table:number-columns-repeated="4"/>
        </table:table-row>
        <table:table-row table:style-name="ro1">
          <table:table-cell office:value-type="float" office:value="689.463562011719">
            <text:p>689.4635620117</text:p>
          </table:table-cell>
          <table:table-cell office:value-type="float" office:value="0.003978289">
            <text:p>0.003978289</text:p>
          </table:table-cell>
          <table:table-cell table:number-columns-repeated="4"/>
        </table:table-row>
        <table:table-row table:style-name="ro1">
          <table:table-cell office:value-type="float" office:value="689.583679199219">
            <text:p>689.5836791992</text:p>
          </table:table-cell>
          <table:table-cell office:value-type="float" office:value="0.004587677">
            <text:p>0.004587677</text:p>
          </table:table-cell>
          <table:table-cell table:number-columns-repeated="4"/>
        </table:table-row>
        <table:table-row table:style-name="ro1">
          <table:table-cell office:value-type="float" office:value="689.703735351563">
            <text:p>689.7037353516</text:p>
          </table:table-cell>
          <table:table-cell office:value-type="float" office:value="0.004636545">
            <text:p>0.004636545</text:p>
          </table:table-cell>
          <table:table-cell table:number-columns-repeated="4"/>
        </table:table-row>
        <table:table-row table:style-name="ro1">
          <table:table-cell office:value-type="float" office:value="689.823791503906">
            <text:p>689.8237915039</text:p>
          </table:table-cell>
          <table:table-cell office:value-type="float" office:value="-0.00338157">
            <text:p>-0.00338157</text:p>
          </table:table-cell>
          <table:table-cell table:number-columns-repeated="4"/>
        </table:table-row>
        <table:table-row table:style-name="ro1">
          <table:table-cell office:value-type="float" office:value="689.94384765625">
            <text:p>689.9438476563</text:p>
          </table:table-cell>
          <table:table-cell office:value-type="float" office:value="-0.004298276">
            <text:p>-0.004298276</text:p>
          </table:table-cell>
          <table:table-cell table:number-columns-repeated="4"/>
        </table:table-row>
        <table:table-row table:style-name="ro1">
          <table:table-cell office:value-type="float" office:value="690.063903808594">
            <text:p>690.0639038086</text:p>
          </table:table-cell>
          <table:table-cell office:value-type="float" office:value="0.003960391">
            <text:p>0.003960391</text:p>
          </table:table-cell>
          <table:table-cell table:number-columns-repeated="4"/>
        </table:table-row>
        <table:table-row table:style-name="ro1">
          <table:table-cell office:value-type="float" office:value="690.184020996094">
            <text:p>690.1840209961</text:p>
          </table:table-cell>
          <table:table-cell office:value-type="float" office:value="0.001966664">
            <text:p>0.001966664</text:p>
          </table:table-cell>
          <table:table-cell table:number-columns-repeated="4"/>
        </table:table-row>
        <table:table-row table:style-name="ro1">
          <table:table-cell office:value-type="float" office:value="690.304077148438">
            <text:p>690.3040771484</text:p>
          </table:table-cell>
          <table:table-cell office:value-type="string">
            <text:p>9.410459E-05</text:p>
          </table:table-cell>
          <table:table-cell table:number-columns-repeated="4"/>
        </table:table-row>
        <table:table-row table:style-name="ro1">
          <table:table-cell office:value-type="float" office:value="690.424133300781">
            <text:p>690.4241333008</text:p>
          </table:table-cell>
          <table:table-cell office:value-type="float" office:value="0.003401624">
            <text:p>0.003401624</text:p>
          </table:table-cell>
          <table:table-cell table:number-columns-repeated="4"/>
        </table:table-row>
        <table:table-row table:style-name="ro1">
          <table:table-cell office:value-type="float" office:value="690.544189453125">
            <text:p>690.5441894531</text:p>
          </table:table-cell>
          <table:table-cell office:value-type="float" office:value="0.02120343">
            <text:p>0.02120343</text:p>
          </table:table-cell>
          <table:table-cell table:number-columns-repeated="4"/>
        </table:table-row>
        <table:table-row table:style-name="ro1">
          <table:table-cell office:value-type="float" office:value="690.664306640625">
            <text:p>690.6643066406</text:p>
          </table:table-cell>
          <table:table-cell office:value-type="float" office:value="-0.007129406">
            <text:p>-0.007129406</text:p>
          </table:table-cell>
          <table:table-cell table:number-columns-repeated="4"/>
        </table:table-row>
        <table:table-row table:style-name="ro1">
          <table:table-cell office:value-type="float" office:value="690.784362792969">
            <text:p>690.784362793</text:p>
          </table:table-cell>
          <table:table-cell office:value-type="float" office:value="-0.0002359099">
            <text:p>-0.0002359099</text:p>
          </table:table-cell>
          <table:table-cell table:number-columns-repeated="4"/>
        </table:table-row>
        <table:table-row table:style-name="ro1">
          <table:table-cell office:value-type="float" office:value="690.904418945313">
            <text:p>690.9044189453</text:p>
          </table:table-cell>
          <table:table-cell office:value-type="float" office:value="0.03832134">
            <text:p>0.03832134</text:p>
          </table:table-cell>
          <table:table-cell table:number-columns-repeated="4"/>
        </table:table-row>
        <table:table-row table:style-name="ro1">
          <table:table-cell office:value-type="float" office:value="691.024475097656">
            <text:p>691.0244750977</text:p>
          </table:table-cell>
          <table:table-cell office:value-type="float" office:value="0.002790495">
            <text:p>0.002790495</text:p>
          </table:table-cell>
          <table:table-cell table:number-columns-repeated="4"/>
        </table:table-row>
        <table:table-row table:style-name="ro1">
          <table:table-cell office:value-type="float" office:value="691.144592285156">
            <text:p>691.1445922852</text:p>
          </table:table-cell>
          <table:table-cell office:value-type="float" office:value="0.003387585">
            <text:p>0.003387585</text:p>
          </table:table-cell>
          <table:table-cell table:number-columns-repeated="4"/>
        </table:table-row>
        <table:table-row table:style-name="ro1">
          <table:table-cell office:value-type="float" office:value="691.2646484375">
            <text:p>691.2646484375</text:p>
          </table:table-cell>
          <table:table-cell office:value-type="float" office:value="-0.002122496">
            <text:p>-0.002122496</text:p>
          </table:table-cell>
          <table:table-cell table:number-columns-repeated="4"/>
        </table:table-row>
        <table:table-row table:style-name="ro1">
          <table:table-cell office:value-type="float" office:value="691.384765625">
            <text:p>691.384765625</text:p>
          </table:table-cell>
          <table:table-cell office:value-type="float" office:value="0.01186511">
            <text:p>0.01186511</text:p>
          </table:table-cell>
          <table:table-cell table:number-columns-repeated="4"/>
        </table:table-row>
        <table:table-row table:style-name="ro1">
          <table:table-cell office:value-type="float" office:value="691.504821777344">
            <text:p>691.5048217773</text:p>
          </table:table-cell>
          <table:table-cell office:value-type="float" office:value="0.002646782">
            <text:p>0.002646782</text:p>
          </table:table-cell>
          <table:table-cell table:number-columns-repeated="4"/>
        </table:table-row>
        <table:table-row table:style-name="ro1">
          <table:table-cell office:value-type="float" office:value="691.624877929688">
            <text:p>691.6248779297</text:p>
          </table:table-cell>
          <table:table-cell office:value-type="float" office:value="-0.009451076">
            <text:p>-0.009451076</text:p>
          </table:table-cell>
          <table:table-cell table:number-columns-repeated="4"/>
        </table:table-row>
        <table:table-row table:style-name="ro1">
          <table:table-cell office:value-type="float" office:value="691.744995117188">
            <text:p>691.7449951172</text:p>
          </table:table-cell>
          <table:table-cell office:value-type="float" office:value="0.009242243">
            <text:p>0.009242243</text:p>
          </table:table-cell>
          <table:table-cell table:number-columns-repeated="4"/>
        </table:table-row>
        <table:table-row table:style-name="ro1">
          <table:table-cell office:value-type="float" office:value="691.865051269531">
            <text:p>691.8650512695</text:p>
          </table:table-cell>
          <table:table-cell office:value-type="float" office:value="-0.006170606">
            <text:p>-0.006170606</text:p>
          </table:table-cell>
          <table:table-cell table:number-columns-repeated="4"/>
        </table:table-row>
        <table:table-row table:style-name="ro1">
          <table:table-cell office:value-type="float" office:value="691.985168457031">
            <text:p>691.985168457</text:p>
          </table:table-cell>
          <table:table-cell office:value-type="float" office:value="-0.004450469">
            <text:p>-0.004450469</text:p>
          </table:table-cell>
          <table:table-cell table:number-columns-repeated="4"/>
        </table:table-row>
        <table:table-row table:style-name="ro1">
          <table:table-cell office:value-type="float" office:value="692.105224609375">
            <text:p>692.1052246094</text:p>
          </table:table-cell>
          <table:table-cell office:value-type="float" office:value="0.008573688">
            <text:p>0.008573688</text:p>
          </table:table-cell>
          <table:table-cell table:number-columns-repeated="4"/>
        </table:table-row>
        <table:table-row table:style-name="ro1">
          <table:table-cell office:value-type="float" office:value="692.225280761719">
            <text:p>692.2252807617</text:p>
          </table:table-cell>
          <table:table-cell office:value-type="float" office:value="0.003950301">
            <text:p>0.003950301</text:p>
          </table:table-cell>
          <table:table-cell table:number-columns-repeated="4"/>
        </table:table-row>
        <table:table-row table:style-name="ro1">
          <table:table-cell office:value-type="float" office:value="692.345397949219">
            <text:p>692.3453979492</text:p>
          </table:table-cell>
          <table:table-cell office:value-type="float" office:value="0.01285423">
            <text:p>0.01285423</text:p>
          </table:table-cell>
          <table:table-cell table:number-columns-repeated="4"/>
        </table:table-row>
        <table:table-row table:style-name="ro1">
          <table:table-cell office:value-type="float" office:value="692.465454101563">
            <text:p>692.4654541016</text:p>
          </table:table-cell>
          <table:table-cell office:value-type="float" office:value="0.004128915">
            <text:p>0.004128915</text:p>
          </table:table-cell>
          <table:table-cell table:number-columns-repeated="4"/>
        </table:table-row>
        <table:table-row table:style-name="ro1">
          <table:table-cell office:value-type="float" office:value="692.585571289063">
            <text:p>692.5855712891</text:p>
          </table:table-cell>
          <table:table-cell office:value-type="float" office:value="0.006086351">
            <text:p>0.006086351</text:p>
          </table:table-cell>
          <table:table-cell table:number-columns-repeated="4"/>
        </table:table-row>
        <table:table-row table:style-name="ro1">
          <table:table-cell office:value-type="float" office:value="692.705627441406">
            <text:p>692.7056274414</text:p>
          </table:table-cell>
          <table:table-cell office:value-type="float" office:value="-0.0005074386">
            <text:p>-0.0005074386</text:p>
          </table:table-cell>
          <table:table-cell table:number-columns-repeated="4"/>
        </table:table-row>
        <table:table-row table:style-name="ro1">
          <table:table-cell office:value-type="float" office:value="692.825744628906">
            <text:p>692.8257446289</text:p>
          </table:table-cell>
          <table:table-cell office:value-type="float" office:value="0.001646811">
            <text:p>0.001646811</text:p>
          </table:table-cell>
          <table:table-cell table:number-columns-repeated="4"/>
        </table:table-row>
        <table:table-row table:style-name="ro1">
          <table:table-cell office:value-type="float" office:value="692.94580078125">
            <text:p>692.9458007813</text:p>
          </table:table-cell>
          <table:table-cell office:value-type="float" office:value="-0.0001442697">
            <text:p>-0.0001442697</text:p>
          </table:table-cell>
          <table:table-cell table:number-columns-repeated="4"/>
        </table:table-row>
        <table:table-row table:style-name="ro1">
          <table:table-cell office:value-type="float" office:value="693.06591796875">
            <text:p>693.0659179688</text:p>
          </table:table-cell>
          <table:table-cell office:value-type="float" office:value="0.0002425881">
            <text:p>0.0002425881</text:p>
          </table:table-cell>
          <table:table-cell table:number-columns-repeated="4"/>
        </table:table-row>
        <table:table-row table:style-name="ro1">
          <table:table-cell office:value-type="float" office:value="693.18603515625">
            <text:p>693.1860351563</text:p>
          </table:table-cell>
          <table:table-cell office:value-type="float" office:value="-0.007640386">
            <text:p>-0.007640386</text:p>
          </table:table-cell>
          <table:table-cell table:number-columns-repeated="4"/>
        </table:table-row>
        <table:table-row table:style-name="ro1">
          <table:table-cell office:value-type="float" office:value="693.306091308594">
            <text:p>693.3060913086</text:p>
          </table:table-cell>
          <table:table-cell office:value-type="float" office:value="-0.005272881">
            <text:p>-0.005272881</text:p>
          </table:table-cell>
          <table:table-cell table:number-columns-repeated="4"/>
        </table:table-row>
        <table:table-row table:style-name="ro1">
          <table:table-cell office:value-type="float" office:value="693.426208496094">
            <text:p>693.4262084961</text:p>
          </table:table-cell>
          <table:table-cell office:value-type="float" office:value="-0.01064345">
            <text:p>-0.01064345</text:p>
          </table:table-cell>
          <table:table-cell table:number-columns-repeated="4"/>
        </table:table-row>
        <table:table-row table:style-name="ro1">
          <table:table-cell office:value-type="float" office:value="693.546264648438">
            <text:p>693.5462646484</text:p>
          </table:table-cell>
          <table:table-cell office:value-type="float" office:value="-0.001039259">
            <text:p>-0.001039259</text:p>
          </table:table-cell>
          <table:table-cell table:number-columns-repeated="4"/>
        </table:table-row>
        <table:table-row table:style-name="ro1">
          <table:table-cell office:value-type="float" office:value="693.666381835938">
            <text:p>693.6663818359</text:p>
          </table:table-cell>
          <table:table-cell office:value-type="float" office:value="-0.004441417">
            <text:p>-0.004441417</text:p>
          </table:table-cell>
          <table:table-cell table:number-columns-repeated="4"/>
        </table:table-row>
        <table:table-row table:style-name="ro1">
          <table:table-cell office:value-type="float" office:value="693.786499023438">
            <text:p>693.7864990234</text:p>
          </table:table-cell>
          <table:table-cell office:value-type="float" office:value="0.01173486">
            <text:p>0.01173486</text:p>
          </table:table-cell>
          <table:table-cell table:number-columns-repeated="4"/>
        </table:table-row>
        <table:table-row table:style-name="ro1">
          <table:table-cell office:value-type="float" office:value="693.906555175781">
            <text:p>693.9065551758</text:p>
          </table:table-cell>
          <table:table-cell office:value-type="float" office:value="-0.006098024">
            <text:p>-0.006098024</text:p>
          </table:table-cell>
          <table:table-cell table:number-columns-repeated="4"/>
        </table:table-row>
        <table:table-row table:style-name="ro1">
          <table:table-cell office:value-type="float" office:value="694.026672363281">
            <text:p>694.0266723633</text:p>
          </table:table-cell>
          <table:table-cell office:value-type="float" office:value="-0.0008723715">
            <text:p>-0.0008723715</text:p>
          </table:table-cell>
          <table:table-cell table:number-columns-repeated="4"/>
        </table:table-row>
        <table:table-row table:style-name="ro1">
          <table:table-cell office:value-type="float" office:value="694.146728515625">
            <text:p>694.1467285156</text:p>
          </table:table-cell>
          <table:table-cell office:value-type="string">
            <text:p>-2.35149E-05</text:p>
          </table:table-cell>
          <table:table-cell table:number-columns-repeated="4"/>
        </table:table-row>
        <table:table-row table:style-name="ro1">
          <table:table-cell office:value-type="float" office:value="694.266845703125">
            <text:p>694.2668457031</text:p>
          </table:table-cell>
          <table:table-cell office:value-type="float" office:value="-0.0003102079">
            <text:p>-0.0003102079</text:p>
          </table:table-cell>
          <table:table-cell table:number-columns-repeated="4"/>
        </table:table-row>
        <table:table-row table:style-name="ro1">
          <table:table-cell office:value-type="float" office:value="694.386962890625">
            <text:p>694.3869628906</text:p>
          </table:table-cell>
          <table:table-cell office:value-type="float" office:value="-0.001600016">
            <text:p>-0.001600016</text:p>
          </table:table-cell>
          <table:table-cell table:number-columns-repeated="4"/>
        </table:table-row>
        <table:table-row table:style-name="ro1">
          <table:table-cell office:value-type="float" office:value="694.507080078125">
            <text:p>694.5070800781</text:p>
          </table:table-cell>
          <table:table-cell office:value-type="float" office:value="0.008633047">
            <text:p>0.008633047</text:p>
          </table:table-cell>
          <table:table-cell table:number-columns-repeated="4"/>
        </table:table-row>
        <table:table-row table:style-name="ro1">
          <table:table-cell office:value-type="float" office:value="694.627136230469">
            <text:p>694.6271362305</text:p>
          </table:table-cell>
          <table:table-cell office:value-type="float" office:value="-0.0008686142">
            <text:p>-0.0008686142</text:p>
          </table:table-cell>
          <table:table-cell table:number-columns-repeated="4"/>
        </table:table-row>
        <table:table-row table:style-name="ro1">
          <table:table-cell office:value-type="float" office:value="694.747253417969">
            <text:p>694.747253418</text:p>
          </table:table-cell>
          <table:table-cell office:value-type="float" office:value="-0.00355527">
            <text:p>-0.00355527</text:p>
          </table:table-cell>
          <table:table-cell table:number-columns-repeated="4"/>
        </table:table-row>
        <table:table-row table:style-name="ro1">
          <table:table-cell office:value-type="float" office:value="694.867370605469">
            <text:p>694.8673706055</text:p>
          </table:table-cell>
          <table:table-cell office:value-type="float" office:value="-0.009325877">
            <text:p>-0.009325877</text:p>
          </table:table-cell>
          <table:table-cell table:number-columns-repeated="4"/>
        </table:table-row>
        <table:table-row table:style-name="ro1">
          <table:table-cell office:value-type="float" office:value="694.987426757813">
            <text:p>694.9874267578</text:p>
          </table:table-cell>
          <table:table-cell office:value-type="float" office:value="-0.001120722">
            <text:p>-0.001120722</text:p>
          </table:table-cell>
          <table:table-cell table:number-columns-repeated="4"/>
        </table:table-row>
        <table:table-row table:style-name="ro1">
          <table:table-cell office:value-type="float" office:value="695.107543945313">
            <text:p>695.1075439453</text:p>
          </table:table-cell>
          <table:table-cell office:value-type="float" office:value="0.001228867">
            <text:p>0.001228867</text:p>
          </table:table-cell>
          <table:table-cell table:number-columns-repeated="4"/>
        </table:table-row>
        <table:table-row table:style-name="ro1">
          <table:table-cell office:value-type="float" office:value="695.227661132813">
            <text:p>695.2276611328</text:p>
          </table:table-cell>
          <table:table-cell office:value-type="float" office:value="0.002893866">
            <text:p>0.002893866</text:p>
          </table:table-cell>
          <table:table-cell table:number-columns-repeated="4"/>
        </table:table-row>
        <table:table-row table:style-name="ro1">
          <table:table-cell office:value-type="float" office:value="695.347778320313">
            <text:p>695.3477783203</text:p>
          </table:table-cell>
          <table:table-cell office:value-type="float" office:value="-0.006636728">
            <text:p>-0.006636728</text:p>
          </table:table-cell>
          <table:table-cell table:number-columns-repeated="4"/>
        </table:table-row>
        <table:table-row table:style-name="ro1">
          <table:table-cell office:value-type="float" office:value="695.467895507813">
            <text:p>695.4678955078</text:p>
          </table:table-cell>
          <table:table-cell office:value-type="float" office:value="-0.008394942">
            <text:p>-0.008394942</text:p>
          </table:table-cell>
          <table:table-cell table:number-columns-repeated="4"/>
        </table:table-row>
        <table:table-row table:style-name="ro1">
          <table:table-cell office:value-type="float" office:value="695.587951660156">
            <text:p>695.5879516602</text:p>
          </table:table-cell>
          <table:table-cell office:value-type="float" office:value="0.009192589">
            <text:p>0.009192589</text:p>
          </table:table-cell>
          <table:table-cell table:number-columns-repeated="4"/>
        </table:table-row>
        <table:table-row table:style-name="ro1">
          <table:table-cell office:value-type="float" office:value="695.708068847656">
            <text:p>695.7080688477</text:p>
          </table:table-cell>
          <table:table-cell office:value-type="float" office:value="0.001903899">
            <text:p>0.001903899</text:p>
          </table:table-cell>
          <table:table-cell table:number-columns-repeated="4"/>
        </table:table-row>
        <table:table-row table:style-name="ro1">
          <table:table-cell office:value-type="float" office:value="695.828186035156">
            <text:p>695.8281860352</text:p>
          </table:table-cell>
          <table:table-cell office:value-type="float" office:value="-0.003536246">
            <text:p>-0.003536246</text:p>
          </table:table-cell>
          <table:table-cell table:number-columns-repeated="4"/>
        </table:table-row>
        <table:table-row table:style-name="ro1">
          <table:table-cell office:value-type="float" office:value="695.948303222656">
            <text:p>695.9483032227</text:p>
          </table:table-cell>
          <table:table-cell office:value-type="float" office:value="-0.001335199">
            <text:p>-0.001335199</text:p>
          </table:table-cell>
          <table:table-cell table:number-columns-repeated="4"/>
        </table:table-row>
        <table:table-row table:style-name="ro1">
          <table:table-cell office:value-type="float" office:value="696.068420410156">
            <text:p>696.0684204102</text:p>
          </table:table-cell>
          <table:table-cell office:value-type="float" office:value="-0.006514739">
            <text:p>-0.006514739</text:p>
          </table:table-cell>
          <table:table-cell table:number-columns-repeated="4"/>
        </table:table-row>
        <table:table-row table:style-name="ro1">
          <table:table-cell office:value-type="float" office:value="696.188537597656">
            <text:p>696.1885375977</text:p>
          </table:table-cell>
          <table:table-cell office:value-type="float" office:value="0.02435203">
            <text:p>0.02435203</text:p>
          </table:table-cell>
          <table:table-cell table:number-columns-repeated="4"/>
        </table:table-row>
        <table:table-row table:style-name="ro1">
          <table:table-cell office:value-type="float" office:value="696.308654785156">
            <text:p>696.3086547852</text:p>
          </table:table-cell>
          <table:table-cell office:value-type="float" office:value="-0.007642453">
            <text:p>-0.007642453</text:p>
          </table:table-cell>
          <table:table-cell table:number-columns-repeated="4"/>
        </table:table-row>
        <table:table-row table:style-name="ro1">
          <table:table-cell office:value-type="float" office:value="696.428771972656">
            <text:p>696.4287719727</text:p>
          </table:table-cell>
          <table:table-cell office:value-type="float" office:value="0.01350789">
            <text:p>0.01350789</text:p>
          </table:table-cell>
          <table:table-cell table:number-columns-repeated="4"/>
        </table:table-row>
        <table:table-row table:style-name="ro1">
          <table:table-cell office:value-type="float" office:value="696.548828125">
            <text:p>696.548828125</text:p>
          </table:table-cell>
          <table:table-cell office:value-type="float" office:value="-0.006094016">
            <text:p>-0.006094016</text:p>
          </table:table-cell>
          <table:table-cell table:number-columns-repeated="4"/>
        </table:table-row>
        <table:table-row table:style-name="ro1">
          <table:table-cell office:value-type="float" office:value="696.6689453125">
            <text:p>696.6689453125</text:p>
          </table:table-cell>
          <table:table-cell office:value-type="float" office:value="-0.005694879">
            <text:p>-0.005694879</text:p>
          </table:table-cell>
          <table:table-cell table:number-columns-repeated="4"/>
        </table:table-row>
        <table:table-row table:style-name="ro1">
          <table:table-cell office:value-type="float" office:value="696.7890625">
            <text:p>696.7890625</text:p>
          </table:table-cell>
          <table:table-cell office:value-type="float" office:value="-0.008430011">
            <text:p>-0.008430011</text:p>
          </table:table-cell>
          <table:table-cell table:number-columns-repeated="4"/>
        </table:table-row>
        <table:table-row table:style-name="ro1">
          <table:table-cell office:value-type="float" office:value="696.9091796875">
            <text:p>696.9091796875</text:p>
          </table:table-cell>
          <table:table-cell office:value-type="float" office:value="-0.006773237">
            <text:p>-0.006773237</text:p>
          </table:table-cell>
          <table:table-cell table:number-columns-repeated="4"/>
        </table:table-row>
        <table:table-row table:style-name="ro1">
          <table:table-cell office:value-type="float" office:value="697.029296875">
            <text:p>697.029296875</text:p>
          </table:table-cell>
          <table:table-cell office:value-type="float" office:value="-0.01150499">
            <text:p>-0.01150499</text:p>
          </table:table-cell>
          <table:table-cell table:number-columns-repeated="4"/>
        </table:table-row>
        <table:table-row table:style-name="ro1">
          <table:table-cell office:value-type="float" office:value="697.1494140625">
            <text:p>697.1494140625</text:p>
          </table:table-cell>
          <table:table-cell office:value-type="float" office:value="0.008065136">
            <text:p>0.008065136</text:p>
          </table:table-cell>
          <table:table-cell table:number-columns-repeated="4"/>
        </table:table-row>
        <table:table-row table:style-name="ro1">
          <table:table-cell office:value-type="float" office:value="697.26953125">
            <text:p>697.26953125</text:p>
          </table:table-cell>
          <table:table-cell office:value-type="float" office:value="0.003638027">
            <text:p>0.003638027</text:p>
          </table:table-cell>
          <table:table-cell table:number-columns-repeated="4"/>
        </table:table-row>
        <table:table-row table:style-name="ro1">
          <table:table-cell office:value-type="float" office:value="697.3896484375">
            <text:p>697.3896484375</text:p>
          </table:table-cell>
          <table:table-cell office:value-type="float" office:value="-0.00742465">
            <text:p>-0.00742465</text:p>
          </table:table-cell>
          <table:table-cell table:number-columns-repeated="4"/>
        </table:table-row>
        <table:table-row table:style-name="ro1">
          <table:table-cell office:value-type="float" office:value="697.509765625">
            <text:p>697.509765625</text:p>
          </table:table-cell>
          <table:table-cell office:value-type="float" office:value="0.0004960756">
            <text:p>0.0004960756</text:p>
          </table:table-cell>
          <table:table-cell table:number-columns-repeated="4"/>
        </table:table-row>
        <table:table-row table:style-name="ro1">
          <table:table-cell office:value-type="float" office:value="697.6298828125">
            <text:p>697.6298828125</text:p>
          </table:table-cell>
          <table:table-cell office:value-type="float" office:value="-0.005979717">
            <text:p>-0.005979717</text:p>
          </table:table-cell>
          <table:table-cell table:number-columns-repeated="4"/>
        </table:table-row>
        <table:table-row table:style-name="ro1">
          <table:table-cell office:value-type="float" office:value="697.75">
            <text:p>697.75</text:p>
          </table:table-cell>
          <table:table-cell office:value-type="float" office:value="0.02530288">
            <text:p>0.02530288</text:p>
          </table:table-cell>
          <table:table-cell table:number-columns-repeated="4"/>
        </table:table-row>
        <table:table-row table:style-name="ro1">
          <table:table-cell office:value-type="float" office:value="697.8701171875">
            <text:p>697.8701171875</text:p>
          </table:table-cell>
          <table:table-cell office:value-type="float" office:value="0.006052123">
            <text:p>0.006052123</text:p>
          </table:table-cell>
          <table:table-cell table:number-columns-repeated="4"/>
        </table:table-row>
        <table:table-row table:style-name="ro1">
          <table:table-cell office:value-type="float" office:value="697.990234375">
            <text:p>697.990234375</text:p>
          </table:table-cell>
          <table:table-cell office:value-type="float" office:value="0.01320505">
            <text:p>0.01320505</text:p>
          </table:table-cell>
          <table:table-cell table:number-columns-repeated="4"/>
        </table:table-row>
        <table:table-row table:style-name="ro1">
          <table:table-cell office:value-type="float" office:value="698.1103515625">
            <text:p>698.1103515625</text:p>
          </table:table-cell>
          <table:table-cell office:value-type="float" office:value="0.002618684">
            <text:p>0.002618684</text:p>
          </table:table-cell>
          <table:table-cell table:number-columns-repeated="4"/>
        </table:table-row>
        <table:table-row table:style-name="ro1">
          <table:table-cell office:value-type="float" office:value="698.23046875">
            <text:p>698.23046875</text:p>
          </table:table-cell>
          <table:table-cell office:value-type="float" office:value="-0.008485815">
            <text:p>-0.008485815</text:p>
          </table:table-cell>
          <table:table-cell table:number-columns-repeated="4"/>
        </table:table-row>
        <table:table-row table:style-name="ro1">
          <table:table-cell office:value-type="float" office:value="698.350646972656">
            <text:p>698.3506469727</text:p>
          </table:table-cell>
          <table:table-cell office:value-type="float" office:value="-0.003704303">
            <text:p>-0.003704303</text:p>
          </table:table-cell>
          <table:table-cell table:number-columns-repeated="4"/>
        </table:table-row>
        <table:table-row table:style-name="ro1">
          <table:table-cell office:value-type="float" office:value="698.470764160156">
            <text:p>698.4707641602</text:p>
          </table:table-cell>
          <table:table-cell office:value-type="float" office:value="0.003623476">
            <text:p>0.003623476</text:p>
          </table:table-cell>
          <table:table-cell table:number-columns-repeated="4"/>
        </table:table-row>
        <table:table-row table:style-name="ro1">
          <table:table-cell office:value-type="float" office:value="698.590881347656">
            <text:p>698.5908813477</text:p>
          </table:table-cell>
          <table:table-cell office:value-type="float" office:value="0.002227238">
            <text:p>0.002227238</text:p>
          </table:table-cell>
          <table:table-cell table:number-columns-repeated="4"/>
        </table:table-row>
        <table:table-row table:style-name="ro1">
          <table:table-cell office:value-type="float" office:value="698.710998535156">
            <text:p>698.7109985352</text:p>
          </table:table-cell>
          <table:table-cell office:value-type="float" office:value="0.0245971">
            <text:p>0.0245971</text:p>
          </table:table-cell>
          <table:table-cell table:number-columns-repeated="4"/>
        </table:table-row>
        <table:table-row table:style-name="ro1">
          <table:table-cell office:value-type="float" office:value="698.831115722656">
            <text:p>698.8311157227</text:p>
          </table:table-cell>
          <table:table-cell office:value-type="float" office:value="-0.001832621">
            <text:p>-0.001832621</text:p>
          </table:table-cell>
          <table:table-cell table:number-columns-repeated="4"/>
        </table:table-row>
        <table:table-row table:style-name="ro1">
          <table:table-cell office:value-type="float" office:value="698.951232910156">
            <text:p>698.9512329102</text:p>
          </table:table-cell>
          <table:table-cell office:value-type="float" office:value="0.0002109457">
            <text:p>0.0002109457</text:p>
          </table:table-cell>
          <table:table-cell table:number-columns-repeated="4"/>
        </table:table-row>
        <table:table-row table:style-name="ro1">
          <table:table-cell office:value-type="float" office:value="699.071350097656">
            <text:p>699.0713500977</text:p>
          </table:table-cell>
          <table:table-cell office:value-type="float" office:value="0.00468119">
            <text:p>0.00468119</text:p>
          </table:table-cell>
          <table:table-cell table:number-columns-repeated="4"/>
        </table:table-row>
        <table:table-row table:style-name="ro1">
          <table:table-cell office:value-type="float" office:value="699.191528320313">
            <text:p>699.1915283203</text:p>
          </table:table-cell>
          <table:table-cell office:value-type="float" office:value="-0.0003340685">
            <text:p>-0.0003340685</text:p>
          </table:table-cell>
          <table:table-cell table:number-columns-repeated="4"/>
        </table:table-row>
        <table:table-row table:style-name="ro1">
          <table:table-cell office:value-type="float" office:value="699.311645507813">
            <text:p>699.3116455078</text:p>
          </table:table-cell>
          <table:table-cell office:value-type="float" office:value="0.002064393">
            <text:p>0.002064393</text:p>
          </table:table-cell>
          <table:table-cell table:number-columns-repeated="4"/>
        </table:table-row>
        <table:table-row table:style-name="ro1">
          <table:table-cell office:value-type="float" office:value="699.431762695313">
            <text:p>699.4317626953</text:p>
          </table:table-cell>
          <table:table-cell office:value-type="float" office:value="0.004810562">
            <text:p>0.004810562</text:p>
          </table:table-cell>
          <table:table-cell table:number-columns-repeated="4"/>
        </table:table-row>
        <table:table-row table:style-name="ro1">
          <table:table-cell office:value-type="float" office:value="699.551879882813">
            <text:p>699.5518798828</text:p>
          </table:table-cell>
          <table:table-cell office:value-type="float" office:value="0.0105506">
            <text:p>0.0105506</text:p>
          </table:table-cell>
          <table:table-cell table:number-columns-repeated="4"/>
        </table:table-row>
        <table:table-row table:style-name="ro1">
          <table:table-cell office:value-type="float" office:value="699.671997070313">
            <text:p>699.6719970703</text:p>
          </table:table-cell>
          <table:table-cell office:value-type="float" office:value="-0.0009837616">
            <text:p>-0.0009837616</text:p>
          </table:table-cell>
          <table:table-cell table:number-columns-repeated="4"/>
        </table:table-row>
        <table:table-row table:style-name="ro1">
          <table:table-cell office:value-type="float" office:value="699.792175292969">
            <text:p>699.792175293</text:p>
          </table:table-cell>
          <table:table-cell office:value-type="float" office:value="-0.002171045">
            <text:p>-0.002171045</text:p>
          </table:table-cell>
          <table:table-cell table:number-columns-repeated="4"/>
        </table:table-row>
        <table:table-row table:style-name="ro1">
          <table:table-cell office:value-type="float" office:value="699.912292480469">
            <text:p>699.9122924805</text:p>
          </table:table-cell>
          <table:table-cell office:value-type="float" office:value="0.02508754">
            <text:p>0.02508754</text:p>
          </table:table-cell>
          <table:table-cell table:number-columns-repeated="4"/>
        </table:table-row>
        <table:table-row table:style-name="ro1">
          <table:table-cell office:value-type="float" office:value="700.032409667969">
            <text:p>700.032409668</text:p>
          </table:table-cell>
          <table:table-cell office:value-type="float" office:value="0.01027471">
            <text:p>0.01027471</text:p>
          </table:table-cell>
          <table:table-cell table:number-columns-repeated="4"/>
        </table:table-row>
        <table:table-row table:style-name="ro1">
          <table:table-cell office:value-type="float" office:value="700.152526855469">
            <text:p>700.1525268555</text:p>
          </table:table-cell>
          <table:table-cell office:value-type="float" office:value="0.001142718">
            <text:p>0.001142718</text:p>
          </table:table-cell>
          <table:table-cell table:number-columns-repeated="4"/>
        </table:table-row>
        <table:table-row table:style-name="ro1">
          <table:table-cell office:value-type="float" office:value="700.272705078125">
            <text:p>700.2727050781</text:p>
          </table:table-cell>
          <table:table-cell office:value-type="float" office:value="-0.001345493">
            <text:p>-0.001345493</text:p>
          </table:table-cell>
          <table:table-cell table:number-columns-repeated="4"/>
        </table:table-row>
        <table:table-row table:style-name="ro1">
          <table:table-cell office:value-type="float" office:value="700.392822265625">
            <text:p>700.3928222656</text:p>
          </table:table-cell>
          <table:table-cell office:value-type="float" office:value="0.003191684">
            <text:p>0.003191684</text:p>
          </table:table-cell>
          <table:table-cell table:number-columns-repeated="4"/>
        </table:table-row>
        <table:table-row table:style-name="ro1">
          <table:table-cell office:value-type="float" office:value="700.512939453125">
            <text:p>700.5129394531</text:p>
          </table:table-cell>
          <table:table-cell office:value-type="float" office:value="0.01075919">
            <text:p>0.01075919</text:p>
          </table:table-cell>
          <table:table-cell table:number-columns-repeated="4"/>
        </table:table-row>
        <table:table-row table:style-name="ro1">
          <table:table-cell office:value-type="float" office:value="700.633117675781">
            <text:p>700.6331176758</text:p>
          </table:table-cell>
          <table:table-cell office:value-type="float" office:value="0.001779741">
            <text:p>0.001779741</text:p>
          </table:table-cell>
          <table:table-cell table:number-columns-repeated="4"/>
        </table:table-row>
        <table:table-row table:style-name="ro1">
          <table:table-cell office:value-type="float" office:value="700.753234863281">
            <text:p>700.7532348633</text:p>
          </table:table-cell>
          <table:table-cell office:value-type="float" office:value="0.001178927">
            <text:p>0.001178927</text:p>
          </table:table-cell>
          <table:table-cell table:number-columns-repeated="4"/>
        </table:table-row>
        <table:table-row table:style-name="ro1">
          <table:table-cell office:value-type="float" office:value="700.873352050781">
            <text:p>700.8733520508</text:p>
          </table:table-cell>
          <table:table-cell office:value-type="float" office:value="-0.006209283">
            <text:p>-0.006209283</text:p>
          </table:table-cell>
          <table:table-cell table:number-columns-repeated="4"/>
        </table:table-row>
        <table:table-row table:style-name="ro1">
          <table:table-cell office:value-type="float" office:value="700.993530273438">
            <text:p>700.9935302734</text:p>
          </table:table-cell>
          <table:table-cell office:value-type="float" office:value="-0.003093918">
            <text:p>-0.003093918</text:p>
          </table:table-cell>
          <table:table-cell table:number-columns-repeated="4"/>
        </table:table-row>
        <table:table-row table:style-name="ro1">
          <table:table-cell office:value-type="float" office:value="701.113647460938">
            <text:p>701.1136474609</text:p>
          </table:table-cell>
          <table:table-cell office:value-type="float" office:value="0.00317708">
            <text:p>0.00317708</text:p>
          </table:table-cell>
          <table:table-cell table:number-columns-repeated="4"/>
        </table:table-row>
        <table:table-row table:style-name="ro1">
          <table:table-cell office:value-type="float" office:value="701.233764648438">
            <text:p>701.2337646484</text:p>
          </table:table-cell>
          <table:table-cell office:value-type="float" office:value="-0.00383637">
            <text:p>-0.00383637</text:p>
          </table:table-cell>
          <table:table-cell table:number-columns-repeated="4"/>
        </table:table-row>
        <table:table-row table:style-name="ro1">
          <table:table-cell office:value-type="float" office:value="701.353942871094">
            <text:p>701.3539428711</text:p>
          </table:table-cell>
          <table:table-cell office:value-type="float" office:value="0.01470097">
            <text:p>0.01470097</text:p>
          </table:table-cell>
          <table:table-cell table:number-columns-repeated="4"/>
        </table:table-row>
        <table:table-row table:style-name="ro1">
          <table:table-cell office:value-type="float" office:value="701.474060058594">
            <text:p>701.4740600586</text:p>
          </table:table-cell>
          <table:table-cell office:value-type="float" office:value="0.006476635">
            <text:p>0.006476635</text:p>
          </table:table-cell>
          <table:table-cell table:number-columns-repeated="4"/>
        </table:table-row>
        <table:table-row table:style-name="ro1">
          <table:table-cell office:value-type="float" office:value="701.594177246094">
            <text:p>701.5941772461</text:p>
          </table:table-cell>
          <table:table-cell office:value-type="float" office:value="-0.004981491">
            <text:p>-0.004981491</text:p>
          </table:table-cell>
          <table:table-cell table:number-columns-repeated="4"/>
        </table:table-row>
        <table:table-row table:style-name="ro1">
          <table:table-cell office:value-type="float" office:value="701.71435546875">
            <text:p>701.7143554688</text:p>
          </table:table-cell>
          <table:table-cell office:value-type="float" office:value="0.005263224">
            <text:p>0.005263224</text:p>
          </table:table-cell>
          <table:table-cell table:number-columns-repeated="4"/>
        </table:table-row>
        <table:table-row table:style-name="ro1">
          <table:table-cell office:value-type="float" office:value="701.83447265625">
            <text:p>701.8344726563</text:p>
          </table:table-cell>
          <table:table-cell office:value-type="float" office:value="-0.009378245">
            <text:p>-0.009378245</text:p>
          </table:table-cell>
          <table:table-cell table:number-columns-repeated="4"/>
        </table:table-row>
        <table:table-row table:style-name="ro1">
          <table:table-cell office:value-type="float" office:value="701.954650878906">
            <text:p>701.9546508789</text:p>
          </table:table-cell>
          <table:table-cell office:value-type="float" office:value="-0.005101995">
            <text:p>-0.005101995</text:p>
          </table:table-cell>
          <table:table-cell table:number-columns-repeated="4"/>
        </table:table-row>
        <table:table-row table:style-name="ro1">
          <table:table-cell office:value-type="float" office:value="702.074768066406">
            <text:p>702.0747680664</text:p>
          </table:table-cell>
          <table:table-cell office:value-type="float" office:value="0.004761761">
            <text:p>0.004761761</text:p>
          </table:table-cell>
          <table:table-cell table:number-columns-repeated="4"/>
        </table:table-row>
        <table:table-row table:style-name="ro1">
          <table:table-cell office:value-type="float" office:value="702.194946289063">
            <text:p>702.1949462891</text:p>
          </table:table-cell>
          <table:table-cell office:value-type="float" office:value="0.01006454">
            <text:p>0.01006454</text:p>
          </table:table-cell>
          <table:table-cell table:number-columns-repeated="4"/>
        </table:table-row>
        <table:table-row table:style-name="ro1">
          <table:table-cell office:value-type="float" office:value="702.315063476563">
            <text:p>702.3150634766</text:p>
          </table:table-cell>
          <table:table-cell office:value-type="float" office:value="-0.005276235">
            <text:p>-0.005276235</text:p>
          </table:table-cell>
          <table:table-cell table:number-columns-repeated="4"/>
        </table:table-row>
        <table:table-row table:style-name="ro1">
          <table:table-cell office:value-type="float" office:value="702.435241699219">
            <text:p>702.4352416992</text:p>
          </table:table-cell>
          <table:table-cell office:value-type="float" office:value="-0.004545948">
            <text:p>-0.004545948</text:p>
          </table:table-cell>
          <table:table-cell table:number-columns-repeated="4"/>
        </table:table-row>
        <table:table-row table:style-name="ro1">
          <table:table-cell office:value-type="float" office:value="702.555358886719">
            <text:p>702.5553588867</text:p>
          </table:table-cell>
          <table:table-cell office:value-type="float" office:value="0.008320224">
            <text:p>0.008320224</text:p>
          </table:table-cell>
          <table:table-cell table:number-columns-repeated="4"/>
        </table:table-row>
        <table:table-row table:style-name="ro1">
          <table:table-cell office:value-type="float" office:value="702.675537109375">
            <text:p>702.6755371094</text:p>
          </table:table-cell>
          <table:table-cell office:value-type="float" office:value="0.01671683">
            <text:p>0.01671683</text:p>
          </table:table-cell>
          <table:table-cell table:number-columns-repeated="4"/>
        </table:table-row>
        <table:table-row table:style-name="ro1">
          <table:table-cell office:value-type="float" office:value="702.795654296875">
            <text:p>702.7956542969</text:p>
          </table:table-cell>
          <table:table-cell office:value-type="float" office:value="-0.000905728">
            <text:p>-0.000905728</text:p>
          </table:table-cell>
          <table:table-cell table:number-columns-repeated="4"/>
        </table:table-row>
        <table:table-row table:style-name="ro1">
          <table:table-cell office:value-type="float" office:value="702.915832519531">
            <text:p>702.9158325195</text:p>
          </table:table-cell>
          <table:table-cell office:value-type="float" office:value="0.001401236">
            <text:p>0.001401236</text:p>
          </table:table-cell>
          <table:table-cell table:number-columns-repeated="4"/>
        </table:table-row>
        <table:table-row table:style-name="ro1">
          <table:table-cell office:value-type="float" office:value="703.035949707031">
            <text:p>703.035949707</text:p>
          </table:table-cell>
          <table:table-cell office:value-type="float" office:value="-0.003001224">
            <text:p>-0.003001224</text:p>
          </table:table-cell>
          <table:table-cell table:number-columns-repeated="4"/>
        </table:table-row>
        <table:table-row table:style-name="ro1">
          <table:table-cell office:value-type="float" office:value="703.156127929688">
            <text:p>703.1561279297</text:p>
          </table:table-cell>
          <table:table-cell office:value-type="float" office:value="-0.0009014957">
            <text:p>-0.0009014957</text:p>
          </table:table-cell>
          <table:table-cell table:number-columns-repeated="4"/>
        </table:table-row>
        <table:table-row table:style-name="ro1">
          <table:table-cell office:value-type="float" office:value="703.276245117188">
            <text:p>703.2762451172</text:p>
          </table:table-cell>
          <table:table-cell office:value-type="float" office:value="-0.002033382">
            <text:p>-0.002033382</text:p>
          </table:table-cell>
          <table:table-cell table:number-columns-repeated="4"/>
        </table:table-row>
        <table:table-row table:style-name="ro1">
          <table:table-cell office:value-type="float" office:value="703.396423339844">
            <text:p>703.3964233398</text:p>
          </table:table-cell>
          <table:table-cell office:value-type="float" office:value="-0.00562016">
            <text:p>-0.00562016</text:p>
          </table:table-cell>
          <table:table-cell table:number-columns-repeated="4"/>
        </table:table-row>
        <table:table-row table:style-name="ro1">
          <table:table-cell office:value-type="float" office:value="703.516540527344">
            <text:p>703.5165405273</text:p>
          </table:table-cell>
          <table:table-cell office:value-type="float" office:value="0.0001565838">
            <text:p>0.0001565838</text:p>
          </table:table-cell>
          <table:table-cell table:number-columns-repeated="4"/>
        </table:table-row>
        <table:table-row table:style-name="ro1">
          <table:table-cell office:value-type="float" office:value="703.63671875">
            <text:p>703.63671875</text:p>
          </table:table-cell>
          <table:table-cell office:value-type="float" office:value="0.01231857">
            <text:p>0.01231857</text:p>
          </table:table-cell>
          <table:table-cell table:number-columns-repeated="4"/>
        </table:table-row>
        <table:table-row table:style-name="ro1">
          <table:table-cell office:value-type="float" office:value="703.756896972656">
            <text:p>703.7568969727</text:p>
          </table:table-cell>
          <table:table-cell office:value-type="float" office:value="-0.009399026">
            <text:p>-0.009399026</text:p>
          </table:table-cell>
          <table:table-cell table:number-columns-repeated="4"/>
        </table:table-row>
        <table:table-row table:style-name="ro1">
          <table:table-cell office:value-type="float" office:value="703.877014160156">
            <text:p>703.8770141602</text:p>
          </table:table-cell>
          <table:table-cell office:value-type="float" office:value="0.007262225">
            <text:p>0.007262225</text:p>
          </table:table-cell>
          <table:table-cell table:number-columns-repeated="4"/>
        </table:table-row>
        <table:table-row table:style-name="ro1">
          <table:table-cell office:value-type="float" office:value="703.997192382813">
            <text:p>703.9971923828</text:p>
          </table:table-cell>
          <table:table-cell office:value-type="float" office:value="-0.005344467">
            <text:p>-0.005344467</text:p>
          </table:table-cell>
          <table:table-cell table:number-columns-repeated="4"/>
        </table:table-row>
        <table:table-row table:style-name="ro1">
          <table:table-cell office:value-type="float" office:value="704.117309570313">
            <text:p>704.1173095703</text:p>
          </table:table-cell>
          <table:table-cell office:value-type="float" office:value="-0.001836631">
            <text:p>-0.001836631</text:p>
          </table:table-cell>
          <table:table-cell table:number-columns-repeated="4"/>
        </table:table-row>
        <table:table-row table:style-name="ro1">
          <table:table-cell office:value-type="float" office:value="704.237487792969">
            <text:p>704.237487793</text:p>
          </table:table-cell>
          <table:table-cell office:value-type="float" office:value="-0.005142494">
            <text:p>-0.005142494</text:p>
          </table:table-cell>
          <table:table-cell table:number-columns-repeated="4"/>
        </table:table-row>
        <table:table-row table:style-name="ro1">
          <table:table-cell office:value-type="float" office:value="704.357666015625">
            <text:p>704.3576660156</text:p>
          </table:table-cell>
          <table:table-cell office:value-type="float" office:value="-0.005224704">
            <text:p>-0.005224704</text:p>
          </table:table-cell>
          <table:table-cell table:number-columns-repeated="4"/>
        </table:table-row>
        <table:table-row table:style-name="ro1">
          <table:table-cell office:value-type="float" office:value="704.477783203125">
            <text:p>704.4777832031</text:p>
          </table:table-cell>
          <table:table-cell office:value-type="float" office:value="0.0102542">
            <text:p>0.0102542</text:p>
          </table:table-cell>
          <table:table-cell table:number-columns-repeated="4"/>
        </table:table-row>
        <table:table-row table:style-name="ro1">
          <table:table-cell office:value-type="float" office:value="704.597961425781">
            <text:p>704.5979614258</text:p>
          </table:table-cell>
          <table:table-cell office:value-type="float" office:value="-0.0041482">
            <text:p>-0.0041482</text:p>
          </table:table-cell>
          <table:table-cell table:number-columns-repeated="4"/>
        </table:table-row>
        <table:table-row table:style-name="ro1">
          <table:table-cell office:value-type="float" office:value="704.718139648438">
            <text:p>704.7181396484</text:p>
          </table:table-cell>
          <table:table-cell office:value-type="float" office:value="-0.006409157">
            <text:p>-0.006409157</text:p>
          </table:table-cell>
          <table:table-cell table:number-columns-repeated="4"/>
        </table:table-row>
        <table:table-row table:style-name="ro1">
          <table:table-cell office:value-type="float" office:value="704.838256835938">
            <text:p>704.8382568359</text:p>
          </table:table-cell>
          <table:table-cell office:value-type="float" office:value="-0.009056055">
            <text:p>-0.009056055</text:p>
          </table:table-cell>
          <table:table-cell table:number-columns-repeated="4"/>
        </table:table-row>
        <table:table-row table:style-name="ro1">
          <table:table-cell office:value-type="float" office:value="704.958435058594">
            <text:p>704.9584350586</text:p>
          </table:table-cell>
          <table:table-cell office:value-type="float" office:value="-0.008439599">
            <text:p>-0.008439599</text:p>
          </table:table-cell>
          <table:table-cell table:number-columns-repeated="4"/>
        </table:table-row>
        <table:table-row table:style-name="ro1">
          <table:table-cell office:value-type="float" office:value="705.07861328125">
            <text:p>705.0786132813</text:p>
          </table:table-cell>
          <table:table-cell office:value-type="float" office:value="0.002219016">
            <text:p>0.002219016</text:p>
          </table:table-cell>
          <table:table-cell table:number-columns-repeated="4"/>
        </table:table-row>
        <table:table-row table:style-name="ro1">
          <table:table-cell office:value-type="float" office:value="705.19873046875">
            <text:p>705.1987304688</text:p>
          </table:table-cell>
          <table:table-cell office:value-type="float" office:value="-0.0004039504">
            <text:p>-0.0004039504</text:p>
          </table:table-cell>
          <table:table-cell table:number-columns-repeated="4"/>
        </table:table-row>
        <table:table-row table:style-name="ro1">
          <table:table-cell office:value-type="float" office:value="705.318908691406">
            <text:p>705.3189086914</text:p>
          </table:table-cell>
          <table:table-cell office:value-type="float" office:value="-0.003237381">
            <text:p>-0.003237381</text:p>
          </table:table-cell>
          <table:table-cell table:number-columns-repeated="4"/>
        </table:table-row>
        <table:table-row table:style-name="ro1">
          <table:table-cell office:value-type="float" office:value="705.439086914063">
            <text:p>705.4390869141</text:p>
          </table:table-cell>
          <table:table-cell office:value-type="float" office:value="0.01049409">
            <text:p>0.01049409</text:p>
          </table:table-cell>
          <table:table-cell table:number-columns-repeated="4"/>
        </table:table-row>
        <table:table-row table:style-name="ro1">
          <table:table-cell office:value-type="float" office:value="705.559265136719">
            <text:p>705.5592651367</text:p>
          </table:table-cell>
          <table:table-cell office:value-type="float" office:value="-0.001953185">
            <text:p>-0.001953185</text:p>
          </table:table-cell>
          <table:table-cell table:number-columns-repeated="4"/>
        </table:table-row>
        <table:table-row table:style-name="ro1">
          <table:table-cell office:value-type="float" office:value="705.679382324219">
            <text:p>705.6793823242</text:p>
          </table:table-cell>
          <table:table-cell office:value-type="float" office:value="0.001757935">
            <text:p>0.001757935</text:p>
          </table:table-cell>
          <table:table-cell table:number-columns-repeated="4"/>
        </table:table-row>
        <table:table-row table:style-name="ro1">
          <table:table-cell office:value-type="float" office:value="705.799560546875">
            <text:p>705.7995605469</text:p>
          </table:table-cell>
          <table:table-cell office:value-type="float" office:value="0.01187904">
            <text:p>0.01187904</text:p>
          </table:table-cell>
          <table:table-cell table:number-columns-repeated="4"/>
        </table:table-row>
        <table:table-row table:style-name="ro1">
          <table:table-cell office:value-type="float" office:value="705.919738769531">
            <text:p>705.9197387695</text:p>
          </table:table-cell>
          <table:table-cell office:value-type="float" office:value="-0.002536169">
            <text:p>-0.002536169</text:p>
          </table:table-cell>
          <table:table-cell table:number-columns-repeated="4"/>
        </table:table-row>
        <table:table-row table:style-name="ro1">
          <table:table-cell office:value-type="float" office:value="706.039916992188">
            <text:p>706.0399169922</text:p>
          </table:table-cell>
          <table:table-cell office:value-type="float" office:value="-0.002270157">
            <text:p>-0.002270157</text:p>
          </table:table-cell>
          <table:table-cell table:number-columns-repeated="4"/>
        </table:table-row>
        <table:table-row table:style-name="ro1">
          <table:table-cell office:value-type="float" office:value="706.160034179688">
            <text:p>706.1600341797</text:p>
          </table:table-cell>
          <table:table-cell office:value-type="float" office:value="0.01949313">
            <text:p>0.01949313</text:p>
          </table:table-cell>
          <table:table-cell table:number-columns-repeated="4"/>
        </table:table-row>
        <table:table-row table:style-name="ro1">
          <table:table-cell office:value-type="float" office:value="706.280212402344">
            <text:p>706.2802124023</text:p>
          </table:table-cell>
          <table:table-cell office:value-type="float" office:value="-0.001787757">
            <text:p>-0.001787757</text:p>
          </table:table-cell>
          <table:table-cell table:number-columns-repeated="4"/>
        </table:table-row>
        <table:table-row table:style-name="ro1">
          <table:table-cell office:value-type="float" office:value="706.400390625">
            <text:p>706.400390625</text:p>
          </table:table-cell>
          <table:table-cell office:value-type="float" office:value="0.002995107">
            <text:p>0.002995107</text:p>
          </table:table-cell>
          <table:table-cell table:number-columns-repeated="4"/>
        </table:table-row>
        <table:table-row table:style-name="ro1">
          <table:table-cell office:value-type="float" office:value="706.520568847656">
            <text:p>706.5205688477</text:p>
          </table:table-cell>
          <table:table-cell office:value-type="float" office:value="0.004336087">
            <text:p>0.004336087</text:p>
          </table:table-cell>
          <table:table-cell table:number-columns-repeated="4"/>
        </table:table-row>
        <table:table-row table:style-name="ro1">
          <table:table-cell office:value-type="float" office:value="706.640747070313">
            <text:p>706.6407470703</text:p>
          </table:table-cell>
          <table:table-cell office:value-type="float" office:value="-0.003816297">
            <text:p>-0.003816297</text:p>
          </table:table-cell>
          <table:table-cell table:number-columns-repeated="4"/>
        </table:table-row>
        <table:table-row table:style-name="ro1">
          <table:table-cell office:value-type="float" office:value="706.760925292969">
            <text:p>706.760925293</text:p>
          </table:table-cell>
          <table:table-cell office:value-type="float" office:value="0.008635296">
            <text:p>0.008635296</text:p>
          </table:table-cell>
          <table:table-cell table:number-columns-repeated="4"/>
        </table:table-row>
        <table:table-row table:style-name="ro1">
          <table:table-cell office:value-type="float" office:value="706.881042480469">
            <text:p>706.8810424805</text:p>
          </table:table-cell>
          <table:table-cell office:value-type="float" office:value="0.0009612857">
            <text:p>0.0009612857</text:p>
          </table:table-cell>
          <table:table-cell table:number-columns-repeated="4"/>
        </table:table-row>
        <table:table-row table:style-name="ro1">
          <table:table-cell office:value-type="float" office:value="707.001220703125">
            <text:p>707.0012207031</text:p>
          </table:table-cell>
          <table:table-cell office:value-type="float" office:value="-0.008369799">
            <text:p>-0.008369799</text:p>
          </table:table-cell>
          <table:table-cell table:number-columns-repeated="4"/>
        </table:table-row>
        <table:table-row table:style-name="ro1">
          <table:table-cell office:value-type="float" office:value="707.121398925781">
            <text:p>707.1213989258</text:p>
          </table:table-cell>
          <table:table-cell office:value-type="float" office:value="-0.009123865">
            <text:p>-0.009123865</text:p>
          </table:table-cell>
          <table:table-cell table:number-columns-repeated="4"/>
        </table:table-row>
        <table:table-row table:style-name="ro1">
          <table:table-cell office:value-type="float" office:value="707.241577148438">
            <text:p>707.2415771484</text:p>
          </table:table-cell>
          <table:table-cell office:value-type="float" office:value="0.002332091">
            <text:p>0.002332091</text:p>
          </table:table-cell>
          <table:table-cell table:number-columns-repeated="4"/>
        </table:table-row>
        <table:table-row table:style-name="ro1">
          <table:table-cell office:value-type="float" office:value="707.361755371094">
            <text:p>707.3617553711</text:p>
          </table:table-cell>
          <table:table-cell office:value-type="float" office:value="0.00430857">
            <text:p>0.00430857</text:p>
          </table:table-cell>
          <table:table-cell table:number-columns-repeated="4"/>
        </table:table-row>
        <table:table-row table:style-name="ro1">
          <table:table-cell office:value-type="float" office:value="707.48193359375">
            <text:p>707.4819335938</text:p>
          </table:table-cell>
          <table:table-cell office:value-type="float" office:value="0.004600003">
            <text:p>0.004600003</text:p>
          </table:table-cell>
          <table:table-cell table:number-columns-repeated="4"/>
        </table:table-row>
        <table:table-row table:style-name="ro1">
          <table:table-cell office:value-type="float" office:value="707.602111816406">
            <text:p>707.6021118164</text:p>
          </table:table-cell>
          <table:table-cell office:value-type="float" office:value="-0.006950659">
            <text:p>-0.006950659</text:p>
          </table:table-cell>
          <table:table-cell table:number-columns-repeated="4"/>
        </table:table-row>
        <table:table-row table:style-name="ro1">
          <table:table-cell office:value-type="float" office:value="707.722290039063">
            <text:p>707.7222900391</text:p>
          </table:table-cell>
          <table:table-cell office:value-type="float" office:value="0.002227523">
            <text:p>0.002227523</text:p>
          </table:table-cell>
          <table:table-cell table:number-columns-repeated="4"/>
        </table:table-row>
        <table:table-row table:style-name="ro1">
          <table:table-cell office:value-type="float" office:value="707.842468261719">
            <text:p>707.8424682617</text:p>
          </table:table-cell>
          <table:table-cell office:value-type="float" office:value="0.004232629">
            <text:p>0.004232629</text:p>
          </table:table-cell>
          <table:table-cell table:number-columns-repeated="4"/>
        </table:table-row>
        <table:table-row table:style-name="ro1">
          <table:table-cell office:value-type="float" office:value="707.962646484375">
            <text:p>707.9626464844</text:p>
          </table:table-cell>
          <table:table-cell office:value-type="float" office:value="0.008144701">
            <text:p>0.008144701</text:p>
          </table:table-cell>
          <table:table-cell table:number-columns-repeated="4"/>
        </table:table-row>
        <table:table-row table:style-name="ro1">
          <table:table-cell office:value-type="float" office:value="708.082763671875">
            <text:p>708.0827636719</text:p>
          </table:table-cell>
          <table:table-cell office:value-type="float" office:value="-0.002071719">
            <text:p>-0.002071719</text:p>
          </table:table-cell>
          <table:table-cell table:number-columns-repeated="4"/>
        </table:table-row>
        <table:table-row table:style-name="ro1">
          <table:table-cell office:value-type="float" office:value="708.202941894531">
            <text:p>708.2029418945</text:p>
          </table:table-cell>
          <table:table-cell office:value-type="float" office:value="0.001453822">
            <text:p>0.001453822</text:p>
          </table:table-cell>
          <table:table-cell table:number-columns-repeated="4"/>
        </table:table-row>
        <table:table-row table:style-name="ro1">
          <table:table-cell office:value-type="float" office:value="708.323120117188">
            <text:p>708.3231201172</text:p>
          </table:table-cell>
          <table:table-cell office:value-type="float" office:value="0.003822271">
            <text:p>0.003822271</text:p>
          </table:table-cell>
          <table:table-cell table:number-columns-repeated="4"/>
        </table:table-row>
        <table:table-row table:style-name="ro1">
          <table:table-cell office:value-type="float" office:value="708.443298339844">
            <text:p>708.4432983398</text:p>
          </table:table-cell>
          <table:table-cell office:value-type="float" office:value="-0.004697387">
            <text:p>-0.004697387</text:p>
          </table:table-cell>
          <table:table-cell table:number-columns-repeated="4"/>
        </table:table-row>
        <table:table-row table:style-name="ro1">
          <table:table-cell office:value-type="float" office:value="708.5634765625">
            <text:p>708.5634765625</text:p>
          </table:table-cell>
          <table:table-cell office:value-type="float" office:value="-0.00230291">
            <text:p>-0.00230291</text:p>
          </table:table-cell>
          <table:table-cell table:number-columns-repeated="4"/>
        </table:table-row>
        <table:table-row table:style-name="ro1">
          <table:table-cell office:value-type="float" office:value="708.683654785156">
            <text:p>708.6836547852</text:p>
          </table:table-cell>
          <table:table-cell office:value-type="float" office:value="-0.003889836">
            <text:p>-0.003889836</text:p>
          </table:table-cell>
          <table:table-cell table:number-columns-repeated="4"/>
        </table:table-row>
        <table:table-row table:style-name="ro1">
          <table:table-cell office:value-type="float" office:value="708.803833007813">
            <text:p>708.8038330078</text:p>
          </table:table-cell>
          <table:table-cell office:value-type="float" office:value="0.01226103">
            <text:p>0.01226103</text:p>
          </table:table-cell>
          <table:table-cell table:number-columns-repeated="4"/>
        </table:table-row>
        <table:table-row table:style-name="ro1">
          <table:table-cell office:value-type="float" office:value="708.924011230469">
            <text:p>708.9240112305</text:p>
          </table:table-cell>
          <table:table-cell office:value-type="float" office:value="-0.009174937">
            <text:p>-0.009174937</text:p>
          </table:table-cell>
          <table:table-cell table:number-columns-repeated="4"/>
        </table:table-row>
        <table:table-row table:style-name="ro1">
          <table:table-cell office:value-type="float" office:value="709.044189453125">
            <text:p>709.0441894531</text:p>
          </table:table-cell>
          <table:table-cell office:value-type="float" office:value="-0.001609618">
            <text:p>-0.001609618</text:p>
          </table:table-cell>
          <table:table-cell table:number-columns-repeated="4"/>
        </table:table-row>
        <table:table-row table:style-name="ro1">
          <table:table-cell office:value-type="float" office:value="709.164367675781">
            <text:p>709.1643676758</text:p>
          </table:table-cell>
          <table:table-cell office:value-type="float" office:value="0.002138029">
            <text:p>0.002138029</text:p>
          </table:table-cell>
          <table:table-cell table:number-columns-repeated="4"/>
        </table:table-row>
        <table:table-row table:style-name="ro1">
          <table:table-cell office:value-type="float" office:value="709.284545898438">
            <text:p>709.2845458984</text:p>
          </table:table-cell>
          <table:table-cell office:value-type="float" office:value="0.002519537">
            <text:p>0.002519537</text:p>
          </table:table-cell>
          <table:table-cell table:number-columns-repeated="4"/>
        </table:table-row>
        <table:table-row table:style-name="ro1">
          <table:table-cell office:value-type="float" office:value="709.404724121094">
            <text:p>709.4047241211</text:p>
          </table:table-cell>
          <table:table-cell office:value-type="float" office:value="0.001238779">
            <text:p>0.001238779</text:p>
          </table:table-cell>
          <table:table-cell table:number-columns-repeated="4"/>
        </table:table-row>
        <table:table-row table:style-name="ro1">
          <table:table-cell office:value-type="float" office:value="709.52490234375">
            <text:p>709.5249023438</text:p>
          </table:table-cell>
          <table:table-cell office:value-type="float" office:value="-0.00542176">
            <text:p>-0.00542176</text:p>
          </table:table-cell>
          <table:table-cell table:number-columns-repeated="4"/>
        </table:table-row>
        <table:table-row table:style-name="ro1">
          <table:table-cell office:value-type="float" office:value="709.645141601563">
            <text:p>709.6451416016</text:p>
          </table:table-cell>
          <table:table-cell office:value-type="float" office:value="-0.006330262">
            <text:p>-0.006330262</text:p>
          </table:table-cell>
          <table:table-cell table:number-columns-repeated="4"/>
        </table:table-row>
        <table:table-row table:style-name="ro1">
          <table:table-cell office:value-type="float" office:value="709.765319824219">
            <text:p>709.7653198242</text:p>
          </table:table-cell>
          <table:table-cell office:value-type="float" office:value="0.002690328">
            <text:p>0.002690328</text:p>
          </table:table-cell>
          <table:table-cell table:number-columns-repeated="4"/>
        </table:table-row>
        <table:table-row table:style-name="ro1">
          <table:table-cell office:value-type="float" office:value="709.885498046875">
            <text:p>709.8854980469</text:p>
          </table:table-cell>
          <table:table-cell office:value-type="float" office:value="-0.001424475">
            <text:p>-0.001424475</text:p>
          </table:table-cell>
          <table:table-cell table:number-columns-repeated="4"/>
        </table:table-row>
        <table:table-row table:style-name="ro1">
          <table:table-cell office:value-type="float" office:value="710.005676269531">
            <text:p>710.0056762695</text:p>
          </table:table-cell>
          <table:table-cell office:value-type="float" office:value="-0.002944539">
            <text:p>-0.002944539</text:p>
          </table:table-cell>
          <table:table-cell table:number-columns-repeated="4"/>
        </table:table-row>
        <table:table-row table:style-name="ro1">
          <table:table-cell office:value-type="float" office:value="710.125854492188">
            <text:p>710.1258544922</text:p>
          </table:table-cell>
          <table:table-cell office:value-type="float" office:value="0.006179226">
            <text:p>0.006179226</text:p>
          </table:table-cell>
          <table:table-cell table:number-columns-repeated="4"/>
        </table:table-row>
        <table:table-row table:style-name="ro1">
          <table:table-cell office:value-type="float" office:value="710.246032714844">
            <text:p>710.2460327148</text:p>
          </table:table-cell>
          <table:table-cell office:value-type="float" office:value="0.001648555">
            <text:p>0.001648555</text:p>
          </table:table-cell>
          <table:table-cell table:number-columns-repeated="4"/>
        </table:table-row>
        <table:table-row table:style-name="ro1">
          <table:table-cell office:value-type="float" office:value="710.3662109375">
            <text:p>710.3662109375</text:p>
          </table:table-cell>
          <table:table-cell office:value-type="float" office:value="-0.00815606">
            <text:p>-0.00815606</text:p>
          </table:table-cell>
          <table:table-cell table:number-columns-repeated="4"/>
        </table:table-row>
        <table:table-row table:style-name="ro1">
          <table:table-cell office:value-type="float" office:value="710.486389160156">
            <text:p>710.4863891602</text:p>
          </table:table-cell>
          <table:table-cell office:value-type="float" office:value="0.00917578">
            <text:p>0.00917578</text:p>
          </table:table-cell>
          <table:table-cell table:number-columns-repeated="4"/>
        </table:table-row>
        <table:table-row table:style-name="ro1">
          <table:table-cell office:value-type="float" office:value="710.606567382813">
            <text:p>710.6065673828</text:p>
          </table:table-cell>
          <table:table-cell office:value-type="float" office:value="-0.001424894">
            <text:p>-0.001424894</text:p>
          </table:table-cell>
          <table:table-cell table:number-columns-repeated="4"/>
        </table:table-row>
        <table:table-row table:style-name="ro1">
          <table:table-cell office:value-type="float" office:value="710.726745605469">
            <text:p>710.7267456055</text:p>
          </table:table-cell>
          <table:table-cell office:value-type="float" office:value="-0.006976043">
            <text:p>-0.006976043</text:p>
          </table:table-cell>
          <table:table-cell table:number-columns-repeated="4"/>
        </table:table-row>
        <table:table-row table:style-name="ro1">
          <table:table-cell office:value-type="float" office:value="710.846984863281">
            <text:p>710.8469848633</text:p>
          </table:table-cell>
          <table:table-cell office:value-type="float" office:value="0.001779472">
            <text:p>0.001779472</text:p>
          </table:table-cell>
          <table:table-cell table:number-columns-repeated="4"/>
        </table:table-row>
        <table:table-row table:style-name="ro1">
          <table:table-cell office:value-type="float" office:value="710.967163085938">
            <text:p>710.9671630859</text:p>
          </table:table-cell>
          <table:table-cell office:value-type="float" office:value="0.0003206024">
            <text:p>0.0003206024</text:p>
          </table:table-cell>
          <table:table-cell table:number-columns-repeated="4"/>
        </table:table-row>
        <table:table-row table:style-name="ro1">
          <table:table-cell office:value-type="float" office:value="711.087341308594">
            <text:p>711.0873413086</text:p>
          </table:table-cell>
          <table:table-cell office:value-type="float" office:value="0.000103468">
            <text:p>0.000103468</text:p>
          </table:table-cell>
          <table:table-cell table:number-columns-repeated="4"/>
        </table:table-row>
        <table:table-row table:style-name="ro1">
          <table:table-cell office:value-type="float" office:value="711.20751953125">
            <text:p>711.2075195313</text:p>
          </table:table-cell>
          <table:table-cell office:value-type="float" office:value="-0.009344232">
            <text:p>-0.009344232</text:p>
          </table:table-cell>
          <table:table-cell table:number-columns-repeated="4"/>
        </table:table-row>
        <table:table-row table:style-name="ro1">
          <table:table-cell office:value-type="float" office:value="711.327697753906">
            <text:p>711.3276977539</text:p>
          </table:table-cell>
          <table:table-cell office:value-type="float" office:value="-0.007595935">
            <text:p>-0.007595935</text:p>
          </table:table-cell>
          <table:table-cell table:number-columns-repeated="4"/>
        </table:table-row>
        <table:table-row table:style-name="ro1">
          <table:table-cell office:value-type="float" office:value="711.447875976563">
            <text:p>711.4478759766</text:p>
          </table:table-cell>
          <table:table-cell office:value-type="float" office:value="0.002983775">
            <text:p>0.002983775</text:p>
          </table:table-cell>
          <table:table-cell table:number-columns-repeated="4"/>
        </table:table-row>
        <table:table-row table:style-name="ro1">
          <table:table-cell office:value-type="float" office:value="711.568115234375">
            <text:p>711.5681152344</text:p>
          </table:table-cell>
          <table:table-cell office:value-type="float" office:value="-0.003520612">
            <text:p>-0.003520612</text:p>
          </table:table-cell>
          <table:table-cell table:number-columns-repeated="4"/>
        </table:table-row>
        <table:table-row table:style-name="ro1">
          <table:table-cell office:value-type="float" office:value="711.688293457031">
            <text:p>711.688293457</text:p>
          </table:table-cell>
          <table:table-cell office:value-type="float" office:value="0.01238224">
            <text:p>0.01238224</text:p>
          </table:table-cell>
          <table:table-cell table:number-columns-repeated="4"/>
        </table:table-row>
        <table:table-row table:style-name="ro1">
          <table:table-cell office:value-type="float" office:value="711.808471679688">
            <text:p>711.8084716797</text:p>
          </table:table-cell>
          <table:table-cell office:value-type="float" office:value="-0.008260281">
            <text:p>-0.008260281</text:p>
          </table:table-cell>
          <table:table-cell table:number-columns-repeated="4"/>
        </table:table-row>
        <table:table-row table:style-name="ro1">
          <table:table-cell office:value-type="float" office:value="711.928649902344">
            <text:p>711.9286499023</text:p>
          </table:table-cell>
          <table:table-cell office:value-type="float" office:value="-0.003930212">
            <text:p>-0.003930212</text:p>
          </table:table-cell>
          <table:table-cell table:number-columns-repeated="4"/>
        </table:table-row>
        <table:table-row table:style-name="ro1">
          <table:table-cell office:value-type="float" office:value="712.048889160156">
            <text:p>712.0488891602</text:p>
          </table:table-cell>
          <table:table-cell office:value-type="float" office:value="-0.001065471">
            <text:p>-0.001065471</text:p>
          </table:table-cell>
          <table:table-cell table:number-columns-repeated="4"/>
        </table:table-row>
        <table:table-row table:style-name="ro1">
          <table:table-cell office:value-type="float" office:value="712.169067382813">
            <text:p>712.1690673828</text:p>
          </table:table-cell>
          <table:table-cell office:value-type="float" office:value="0.00741733">
            <text:p>0.00741733</text:p>
          </table:table-cell>
          <table:table-cell table:number-columns-repeated="4"/>
        </table:table-row>
        <table:table-row table:style-name="ro1">
          <table:table-cell office:value-type="float" office:value="712.289245605469">
            <text:p>712.2892456055</text:p>
          </table:table-cell>
          <table:table-cell office:value-type="float" office:value="0.004088067">
            <text:p>0.004088067</text:p>
          </table:table-cell>
          <table:table-cell table:number-columns-repeated="4"/>
        </table:table-row>
        <table:table-row table:style-name="ro1">
          <table:table-cell office:value-type="float" office:value="712.409423828125">
            <text:p>712.4094238281</text:p>
          </table:table-cell>
          <table:table-cell office:value-type="float" office:value="-0.006253154">
            <text:p>-0.006253154</text:p>
          </table:table-cell>
          <table:table-cell table:number-columns-repeated="4"/>
        </table:table-row>
        <table:table-row table:style-name="ro1">
          <table:table-cell office:value-type="float" office:value="712.529663085938">
            <text:p>712.5296630859</text:p>
          </table:table-cell>
          <table:table-cell office:value-type="float" office:value="0.006523957">
            <text:p>0.006523957</text:p>
          </table:table-cell>
          <table:table-cell table:number-columns-repeated="4"/>
        </table:table-row>
        <table:table-row table:style-name="ro1">
          <table:table-cell office:value-type="float" office:value="712.649841308594">
            <text:p>712.6498413086</text:p>
          </table:table-cell>
          <table:table-cell office:value-type="float" office:value="-0.004750619">
            <text:p>-0.004750619</text:p>
          </table:table-cell>
          <table:table-cell table:number-columns-repeated="4"/>
        </table:table-row>
        <table:table-row table:style-name="ro1">
          <table:table-cell office:value-type="float" office:value="712.77001953125">
            <text:p>712.7700195313</text:p>
          </table:table-cell>
          <table:table-cell office:value-type="float" office:value="-0.01008968">
            <text:p>-0.01008968</text:p>
          </table:table-cell>
          <table:table-cell table:number-columns-repeated="4"/>
        </table:table-row>
        <table:table-row table:style-name="ro1">
          <table:table-cell office:value-type="float" office:value="712.890197753906">
            <text:p>712.8901977539</text:p>
          </table:table-cell>
          <table:table-cell office:value-type="float" office:value="-0.004130197">
            <text:p>-0.004130197</text:p>
          </table:table-cell>
          <table:table-cell table:number-columns-repeated="4"/>
        </table:table-row>
        <table:table-row table:style-name="ro1">
          <table:table-cell office:value-type="float" office:value="713.010437011719">
            <text:p>713.0104370117</text:p>
          </table:table-cell>
          <table:table-cell office:value-type="float" office:value="0.01697574">
            <text:p>0.01697574</text:p>
          </table:table-cell>
          <table:table-cell table:number-columns-repeated="4"/>
        </table:table-row>
        <table:table-row table:style-name="ro1">
          <table:table-cell office:value-type="float" office:value="713.130615234375">
            <text:p>713.1306152344</text:p>
          </table:table-cell>
          <table:table-cell office:value-type="float" office:value="0.01668858">
            <text:p>0.01668858</text:p>
          </table:table-cell>
          <table:table-cell table:number-columns-repeated="4"/>
        </table:table-row>
        <table:table-row table:style-name="ro1">
          <table:table-cell office:value-type="float" office:value="713.250793457031">
            <text:p>713.250793457</text:p>
          </table:table-cell>
          <table:table-cell office:value-type="float" office:value="0.01668402">
            <text:p>0.01668402</text:p>
          </table:table-cell>
          <table:table-cell table:number-columns-repeated="4"/>
        </table:table-row>
        <table:table-row table:style-name="ro1">
          <table:table-cell office:value-type="float" office:value="713.371032714844">
            <text:p>713.3710327148</text:p>
          </table:table-cell>
          <table:table-cell office:value-type="float" office:value="-0.009523815">
            <text:p>-0.009523815</text:p>
          </table:table-cell>
          <table:table-cell table:number-columns-repeated="4"/>
        </table:table-row>
        <table:table-row table:style-name="ro1">
          <table:table-cell office:value-type="float" office:value="713.4912109375">
            <text:p>713.4912109375</text:p>
          </table:table-cell>
          <table:table-cell office:value-type="float" office:value="-0.0004265501">
            <text:p>-0.0004265501</text:p>
          </table:table-cell>
          <table:table-cell table:number-columns-repeated="4"/>
        </table:table-row>
        <table:table-row table:style-name="ro1">
          <table:table-cell office:value-type="float" office:value="713.611389160156">
            <text:p>713.6113891602</text:p>
          </table:table-cell>
          <table:table-cell office:value-type="float" office:value="0.004926555">
            <text:p>0.004926555</text:p>
          </table:table-cell>
          <table:table-cell table:number-columns-repeated="4"/>
        </table:table-row>
        <table:table-row table:style-name="ro1">
          <table:table-cell office:value-type="float" office:value="713.731628417969">
            <text:p>713.731628418</text:p>
          </table:table-cell>
          <table:table-cell office:value-type="float" office:value="0.004315399">
            <text:p>0.004315399</text:p>
          </table:table-cell>
          <table:table-cell table:number-columns-repeated="4"/>
        </table:table-row>
        <table:table-row table:style-name="ro1">
          <table:table-cell office:value-type="float" office:value="713.851806640625">
            <text:p>713.8518066406</text:p>
          </table:table-cell>
          <table:table-cell office:value-type="float" office:value="-0.007318683">
            <text:p>-0.007318683</text:p>
          </table:table-cell>
          <table:table-cell table:number-columns-repeated="4"/>
        </table:table-row>
        <table:table-row table:style-name="ro1">
          <table:table-cell office:value-type="float" office:value="713.971984863281">
            <text:p>713.9719848633</text:p>
          </table:table-cell>
          <table:table-cell office:value-type="float" office:value="-0.002621681">
            <text:p>-0.002621681</text:p>
          </table:table-cell>
          <table:table-cell table:number-columns-repeated="4"/>
        </table:table-row>
        <table:table-row table:style-name="ro1">
          <table:table-cell office:value-type="float" office:value="714.092224121094">
            <text:p>714.0922241211</text:p>
          </table:table-cell>
          <table:table-cell office:value-type="float" office:value="-0.01029403">
            <text:p>-0.01029403</text:p>
          </table:table-cell>
          <table:table-cell table:number-columns-repeated="4"/>
        </table:table-row>
        <table:table-row table:style-name="ro1">
          <table:table-cell office:value-type="float" office:value="714.21240234375">
            <text:p>714.2124023438</text:p>
          </table:table-cell>
          <table:table-cell office:value-type="float" office:value="0.009420456">
            <text:p>0.009420456</text:p>
          </table:table-cell>
          <table:table-cell table:number-columns-repeated="4"/>
        </table:table-row>
        <table:table-row table:style-name="ro1">
          <table:table-cell office:value-type="float" office:value="714.332580566406">
            <text:p>714.3325805664</text:p>
          </table:table-cell>
          <table:table-cell office:value-type="float" office:value="0.00475195">
            <text:p>0.00475195</text:p>
          </table:table-cell>
          <table:table-cell table:number-columns-repeated="4"/>
        </table:table-row>
        <table:table-row table:style-name="ro1">
          <table:table-cell office:value-type="float" office:value="714.452819824219">
            <text:p>714.4528198242</text:p>
          </table:table-cell>
          <table:table-cell office:value-type="float" office:value="-0.0002759297">
            <text:p>-0.0002759297</text:p>
          </table:table-cell>
          <table:table-cell table:number-columns-repeated="4"/>
        </table:table-row>
        <table:table-row table:style-name="ro1">
          <table:table-cell office:value-type="float" office:value="714.572998046875">
            <text:p>714.5729980469</text:p>
          </table:table-cell>
          <table:table-cell office:value-type="float" office:value="0.004568111">
            <text:p>0.004568111</text:p>
          </table:table-cell>
          <table:table-cell table:number-columns-repeated="4"/>
        </table:table-row>
        <table:table-row table:style-name="ro1">
          <table:table-cell office:value-type="float" office:value="714.693237304688">
            <text:p>714.6932373047</text:p>
          </table:table-cell>
          <table:table-cell office:value-type="float" office:value="0.01356432">
            <text:p>0.01356432</text:p>
          </table:table-cell>
          <table:table-cell table:number-columns-repeated="4"/>
        </table:table-row>
        <table:table-row table:style-name="ro1">
          <table:table-cell office:value-type="float" office:value="714.813415527344">
            <text:p>714.8134155273</text:p>
          </table:table-cell>
          <table:table-cell office:value-type="float" office:value="-0.003703824">
            <text:p>-0.003703824</text:p>
          </table:table-cell>
          <table:table-cell table:number-columns-repeated="4"/>
        </table:table-row>
        <table:table-row table:style-name="ro1">
          <table:table-cell office:value-type="float" office:value="714.93359375">
            <text:p>714.93359375</text:p>
          </table:table-cell>
          <table:table-cell office:value-type="float" office:value="0.004141712">
            <text:p>0.004141712</text:p>
          </table:table-cell>
          <table:table-cell table:number-columns-repeated="4"/>
        </table:table-row>
        <table:table-row table:style-name="ro1">
          <table:table-cell office:value-type="float" office:value="715.053833007813">
            <text:p>715.0538330078</text:p>
          </table:table-cell>
          <table:table-cell office:value-type="float" office:value="0.002798731">
            <text:p>0.002798731</text:p>
          </table:table-cell>
          <table:table-cell table:number-columns-repeated="4"/>
        </table:table-row>
        <table:table-row table:style-name="ro1">
          <table:table-cell office:value-type="float" office:value="715.174011230469">
            <text:p>715.1740112305</text:p>
          </table:table-cell>
          <table:table-cell office:value-type="float" office:value="0.004381148">
            <text:p>0.004381148</text:p>
          </table:table-cell>
          <table:table-cell table:number-columns-repeated="4"/>
        </table:table-row>
        <table:table-row table:style-name="ro1">
          <table:table-cell office:value-type="float" office:value="715.294250488281">
            <text:p>715.2942504883</text:p>
          </table:table-cell>
          <table:table-cell office:value-type="float" office:value="-0.009174644">
            <text:p>-0.009174644</text:p>
          </table:table-cell>
          <table:table-cell table:number-columns-repeated="4"/>
        </table:table-row>
        <table:table-row table:style-name="ro1">
          <table:table-cell office:value-type="float" office:value="715.414428710938">
            <text:p>715.4144287109</text:p>
          </table:table-cell>
          <table:table-cell office:value-type="float" office:value="-0.003517021">
            <text:p>-0.003517021</text:p>
          </table:table-cell>
          <table:table-cell table:number-columns-repeated="4"/>
        </table:table-row>
        <table:table-row table:style-name="ro1">
          <table:table-cell office:value-type="float" office:value="715.53466796875">
            <text:p>715.5346679688</text:p>
          </table:table-cell>
          <table:table-cell office:value-type="float" office:value="0.001437271">
            <text:p>0.001437271</text:p>
          </table:table-cell>
          <table:table-cell table:number-columns-repeated="4"/>
        </table:table-row>
        <table:table-row table:style-name="ro1">
          <table:table-cell office:value-type="float" office:value="715.654846191406">
            <text:p>715.6548461914</text:p>
          </table:table-cell>
          <table:table-cell office:value-type="float" office:value="-0.006806087">
            <text:p>-0.006806087</text:p>
          </table:table-cell>
          <table:table-cell table:number-columns-repeated="4"/>
        </table:table-row>
        <table:table-row table:style-name="ro1">
          <table:table-cell office:value-type="float" office:value="715.775024414063">
            <text:p>715.7750244141</text:p>
          </table:table-cell>
          <table:table-cell office:value-type="float" office:value="0.001804836">
            <text:p>0.001804836</text:p>
          </table:table-cell>
          <table:table-cell table:number-columns-repeated="4"/>
        </table:table-row>
        <table:table-row table:style-name="ro1">
          <table:table-cell office:value-type="float" office:value="715.895263671875">
            <text:p>715.8952636719</text:p>
          </table:table-cell>
          <table:table-cell office:value-type="float" office:value="-0.001987935">
            <text:p>-0.001987935</text:p>
          </table:table-cell>
          <table:table-cell table:number-columns-repeated="4"/>
        </table:table-row>
        <table:table-row table:style-name="ro1">
          <table:table-cell office:value-type="float" office:value="716.015441894531">
            <text:p>716.0154418945</text:p>
          </table:table-cell>
          <table:table-cell office:value-type="float" office:value="-0.005236696">
            <text:p>-0.005236696</text:p>
          </table:table-cell>
          <table:table-cell table:number-columns-repeated="4"/>
        </table:table-row>
        <table:table-row table:style-name="ro1">
          <table:table-cell office:value-type="float" office:value="716.135681152344">
            <text:p>716.1356811523</text:p>
          </table:table-cell>
          <table:table-cell office:value-type="float" office:value="-0.0003441191">
            <text:p>-0.0003441191</text:p>
          </table:table-cell>
          <table:table-cell table:number-columns-repeated="4"/>
        </table:table-row>
        <table:table-row table:style-name="ro1">
          <table:table-cell office:value-type="float" office:value="716.255859375">
            <text:p>716.255859375</text:p>
          </table:table-cell>
          <table:table-cell office:value-type="float" office:value="-0.008386726">
            <text:p>-0.008386726</text:p>
          </table:table-cell>
          <table:table-cell table:number-columns-repeated="4"/>
        </table:table-row>
        <table:table-row table:style-name="ro1">
          <table:table-cell office:value-type="float" office:value="716.376098632813">
            <text:p>716.3760986328</text:p>
          </table:table-cell>
          <table:table-cell office:value-type="float" office:value="-0.01029844">
            <text:p>-0.01029844</text:p>
          </table:table-cell>
          <table:table-cell table:number-columns-repeated="4"/>
        </table:table-row>
        <table:table-row table:style-name="ro1">
          <table:table-cell office:value-type="float" office:value="716.496276855469">
            <text:p>716.4962768555</text:p>
          </table:table-cell>
          <table:table-cell office:value-type="float" office:value="0.006081596">
            <text:p>0.006081596</text:p>
          </table:table-cell>
          <table:table-cell table:number-columns-repeated="4"/>
        </table:table-row>
        <table:table-row table:style-name="ro1">
          <table:table-cell office:value-type="float" office:value="716.616516113281">
            <text:p>716.6165161133</text:p>
          </table:table-cell>
          <table:table-cell office:value-type="float" office:value="0.001610054">
            <text:p>0.001610054</text:p>
          </table:table-cell>
          <table:table-cell table:number-columns-repeated="4"/>
        </table:table-row>
        <table:table-row table:style-name="ro1">
          <table:table-cell office:value-type="float" office:value="716.736694335938">
            <text:p>716.7366943359</text:p>
          </table:table-cell>
          <table:table-cell office:value-type="float" office:value="0.0006574577">
            <text:p>0.0006574577</text:p>
          </table:table-cell>
          <table:table-cell table:number-columns-repeated="4"/>
        </table:table-row>
        <table:table-row table:style-name="ro1">
          <table:table-cell office:value-type="float" office:value="716.85693359375">
            <text:p>716.8569335938</text:p>
          </table:table-cell>
          <table:table-cell office:value-type="float" office:value="0.000247722">
            <text:p>0.000247722</text:p>
          </table:table-cell>
          <table:table-cell table:number-columns-repeated="4"/>
        </table:table-row>
        <table:table-row table:style-name="ro1">
          <table:table-cell office:value-type="float" office:value="716.977172851563">
            <text:p>716.9771728516</text:p>
          </table:table-cell>
          <table:table-cell office:value-type="float" office:value="0.00123596">
            <text:p>0.00123596</text:p>
          </table:table-cell>
          <table:table-cell table:number-columns-repeated="4"/>
        </table:table-row>
        <table:table-row table:style-name="ro1">
          <table:table-cell office:value-type="float" office:value="717.097351074219">
            <text:p>717.0973510742</text:p>
          </table:table-cell>
          <table:table-cell office:value-type="float" office:value="0.006063021">
            <text:p>0.006063021</text:p>
          </table:table-cell>
          <table:table-cell table:number-columns-repeated="4"/>
        </table:table-row>
        <table:table-row table:style-name="ro1">
          <table:table-cell office:value-type="float" office:value="717.217590332031">
            <text:p>717.217590332</text:p>
          </table:table-cell>
          <table:table-cell office:value-type="float" office:value="-0.005650129">
            <text:p>-0.005650129</text:p>
          </table:table-cell>
          <table:table-cell table:number-columns-repeated="4"/>
        </table:table-row>
        <table:table-row table:style-name="ro1">
          <table:table-cell office:value-type="float" office:value="717.337768554688">
            <text:p>717.3377685547</text:p>
          </table:table-cell>
          <table:table-cell office:value-type="float" office:value="-0.009462844">
            <text:p>-0.009462844</text:p>
          </table:table-cell>
          <table:table-cell table:number-columns-repeated="4"/>
        </table:table-row>
        <table:table-row table:style-name="ro1">
          <table:table-cell office:value-type="float" office:value="717.4580078125">
            <text:p>717.4580078125</text:p>
          </table:table-cell>
          <table:table-cell office:value-type="float" office:value="0.00191108">
            <text:p>0.00191108</text:p>
          </table:table-cell>
          <table:table-cell table:number-columns-repeated="4"/>
        </table:table-row>
        <table:table-row table:style-name="ro1">
          <table:table-cell office:value-type="float" office:value="717.578186035156">
            <text:p>717.5781860352</text:p>
          </table:table-cell>
          <table:table-cell office:value-type="float" office:value="-0.001893781">
            <text:p>-0.001893781</text:p>
          </table:table-cell>
          <table:table-cell table:number-columns-repeated="4"/>
        </table:table-row>
        <table:table-row table:style-name="ro1">
          <table:table-cell office:value-type="float" office:value="717.698425292969">
            <text:p>717.698425293</text:p>
          </table:table-cell>
          <table:table-cell office:value-type="float" office:value="0.0006860704">
            <text:p>0.0006860704</text:p>
          </table:table-cell>
          <table:table-cell table:number-columns-repeated="4"/>
        </table:table-row>
        <table:table-row table:style-name="ro1">
          <table:table-cell office:value-type="float" office:value="717.818603515625">
            <text:p>717.8186035156</text:p>
          </table:table-cell>
          <table:table-cell office:value-type="float" office:value="0.0002855133">
            <text:p>0.0002855133</text:p>
          </table:table-cell>
          <table:table-cell table:number-columns-repeated="4"/>
        </table:table-row>
        <table:table-row table:style-name="ro1">
          <table:table-cell office:value-type="float" office:value="717.938842773438">
            <text:p>717.9388427734</text:p>
          </table:table-cell>
          <table:table-cell office:value-type="float" office:value="-0.002316252">
            <text:p>-0.002316252</text:p>
          </table:table-cell>
          <table:table-cell table:number-columns-repeated="4"/>
        </table:table-row>
        <table:table-row table:style-name="ro1">
          <table:table-cell office:value-type="float" office:value="718.05908203125">
            <text:p>718.0590820313</text:p>
          </table:table-cell>
          <table:table-cell office:value-type="float" office:value="0.001034351">
            <text:p>0.001034351</text:p>
          </table:table-cell>
          <table:table-cell table:number-columns-repeated="4"/>
        </table:table-row>
        <table:table-row table:style-name="ro1">
          <table:table-cell office:value-type="float" office:value="718.179260253906">
            <text:p>718.1792602539</text:p>
          </table:table-cell>
          <table:table-cell office:value-type="float" office:value="-0.006173067">
            <text:p>-0.006173067</text:p>
          </table:table-cell>
          <table:table-cell table:number-columns-repeated="4"/>
        </table:table-row>
        <table:table-row table:style-name="ro1">
          <table:table-cell office:value-type="float" office:value="718.299499511719">
            <text:p>718.2994995117</text:p>
          </table:table-cell>
          <table:table-cell office:value-type="float" office:value="0.004846761">
            <text:p>0.004846761</text:p>
          </table:table-cell>
          <table:table-cell table:number-columns-repeated="4"/>
        </table:table-row>
        <table:table-row table:style-name="ro1">
          <table:table-cell office:value-type="float" office:value="718.419677734375">
            <text:p>718.4196777344</text:p>
          </table:table-cell>
          <table:table-cell office:value-type="float" office:value="-0.001839811">
            <text:p>-0.001839811</text:p>
          </table:table-cell>
          <table:table-cell table:number-columns-repeated="4"/>
        </table:table-row>
        <table:table-row table:style-name="ro1">
          <table:table-cell office:value-type="float" office:value="718.539916992188">
            <text:p>718.5399169922</text:p>
          </table:table-cell>
          <table:table-cell office:value-type="float" office:value="-0.003126285">
            <text:p>-0.003126285</text:p>
          </table:table-cell>
          <table:table-cell table:number-columns-repeated="4"/>
        </table:table-row>
        <table:table-row table:style-name="ro1">
          <table:table-cell office:value-type="float" office:value="718.66015625">
            <text:p>718.66015625</text:p>
          </table:table-cell>
          <table:table-cell office:value-type="float" office:value="0.0008590133">
            <text:p>0.0008590133</text:p>
          </table:table-cell>
          <table:table-cell table:number-columns-repeated="4"/>
        </table:table-row>
        <table:table-row table:style-name="ro1">
          <table:table-cell office:value-type="float" office:value="718.780334472656">
            <text:p>718.7803344727</text:p>
          </table:table-cell>
          <table:table-cell office:value-type="float" office:value="-0.002644471">
            <text:p>-0.002644471</text:p>
          </table:table-cell>
          <table:table-cell table:number-columns-repeated="4"/>
        </table:table-row>
        <table:table-row table:style-name="ro1">
          <table:table-cell office:value-type="float" office:value="718.900573730469">
            <text:p>718.9005737305</text:p>
          </table:table-cell>
          <table:table-cell office:value-type="float" office:value="0.001725062">
            <text:p>0.001725062</text:p>
          </table:table-cell>
          <table:table-cell table:number-columns-repeated="4"/>
        </table:table-row>
        <table:table-row table:style-name="ro1">
          <table:table-cell office:value-type="float" office:value="719.020812988281">
            <text:p>719.0208129883</text:p>
          </table:table-cell>
          <table:table-cell office:value-type="float" office:value="0.004309331">
            <text:p>0.004309331</text:p>
          </table:table-cell>
          <table:table-cell table:number-columns-repeated="4"/>
        </table:table-row>
        <table:table-row table:style-name="ro1">
          <table:table-cell office:value-type="float" office:value="719.140991210938">
            <text:p>719.1409912109</text:p>
          </table:table-cell>
          <table:table-cell office:value-type="float" office:value="0.007713735">
            <text:p>0.007713735</text:p>
          </table:table-cell>
          <table:table-cell table:number-columns-repeated="4"/>
        </table:table-row>
        <table:table-row table:style-name="ro1">
          <table:table-cell office:value-type="float" office:value="719.26123046875">
            <text:p>719.2612304688</text:p>
          </table:table-cell>
          <table:table-cell office:value-type="float" office:value="-0.0004098316">
            <text:p>-0.0004098316</text:p>
          </table:table-cell>
          <table:table-cell table:number-columns-repeated="4"/>
        </table:table-row>
        <table:table-row table:style-name="ro1">
          <table:table-cell office:value-type="float" office:value="719.381469726563">
            <text:p>719.3814697266</text:p>
          </table:table-cell>
          <table:table-cell office:value-type="float" office:value="-0.004559164">
            <text:p>-0.004559164</text:p>
          </table:table-cell>
          <table:table-cell table:number-columns-repeated="4"/>
        </table:table-row>
        <table:table-row table:style-name="ro1">
          <table:table-cell office:value-type="float" office:value="719.501647949219">
            <text:p>719.5016479492</text:p>
          </table:table-cell>
          <table:table-cell office:value-type="float" office:value="0.008907229">
            <text:p>0.008907229</text:p>
          </table:table-cell>
          <table:table-cell table:number-columns-repeated="4"/>
        </table:table-row>
        <table:table-row table:style-name="ro1">
          <table:table-cell office:value-type="float" office:value="719.621887207031">
            <text:p>719.621887207</text:p>
          </table:table-cell>
          <table:table-cell office:value-type="float" office:value="-0.003083307">
            <text:p>-0.003083307</text:p>
          </table:table-cell>
          <table:table-cell table:number-columns-repeated="4"/>
        </table:table-row>
        <table:table-row table:style-name="ro1">
          <table:table-cell office:value-type="float" office:value="719.742126464844">
            <text:p>719.7421264648</text:p>
          </table:table-cell>
          <table:table-cell office:value-type="float" office:value="-0.008728409">
            <text:p>-0.008728409</text:p>
          </table:table-cell>
          <table:table-cell table:number-columns-repeated="4"/>
        </table:table-row>
        <table:table-row table:style-name="ro1">
          <table:table-cell office:value-type="float" office:value="719.8623046875">
            <text:p>719.8623046875</text:p>
          </table:table-cell>
          <table:table-cell office:value-type="float" office:value="-0.009064701">
            <text:p>-0.009064701</text:p>
          </table:table-cell>
          <table:table-cell table:number-columns-repeated="4"/>
        </table:table-row>
        <table:table-row table:style-name="ro1">
          <table:table-cell office:value-type="float" office:value="719.982543945313">
            <text:p>719.9825439453</text:p>
          </table:table-cell>
          <table:table-cell office:value-type="float" office:value="0.004222888">
            <text:p>0.004222888</text:p>
          </table:table-cell>
          <table:table-cell table:number-columns-repeated="4"/>
        </table:table-row>
        <table:table-row table:style-name="ro1">
          <table:table-cell office:value-type="float" office:value="720.102783203125">
            <text:p>720.1027832031</text:p>
          </table:table-cell>
          <table:table-cell office:value-type="float" office:value="-0.006073539">
            <text:p>-0.006073539</text:p>
          </table:table-cell>
          <table:table-cell table:number-columns-repeated="4"/>
        </table:table-row>
        <table:table-row table:style-name="ro1">
          <table:table-cell office:value-type="float" office:value="720.222961425781">
            <text:p>720.2229614258</text:p>
          </table:table-cell>
          <table:table-cell office:value-type="float" office:value="0.008599556">
            <text:p>0.008599556</text:p>
          </table:table-cell>
          <table:table-cell table:number-columns-repeated="4"/>
        </table:table-row>
        <table:table-row table:style-name="ro1">
          <table:table-cell office:value-type="float" office:value="720.343200683594">
            <text:p>720.3432006836</text:p>
          </table:table-cell>
          <table:table-cell office:value-type="float" office:value="-0.009360357">
            <text:p>-0.009360357</text:p>
          </table:table-cell>
          <table:table-cell table:number-columns-repeated="4"/>
        </table:table-row>
        <table:table-row table:style-name="ro1">
          <table:table-cell office:value-type="float" office:value="720.463439941406">
            <text:p>720.4634399414</text:p>
          </table:table-cell>
          <table:table-cell office:value-type="float" office:value="0.0007853663">
            <text:p>0.0007853663</text:p>
          </table:table-cell>
          <table:table-cell table:number-columns-repeated="4"/>
        </table:table-row>
        <table:table-row table:style-name="ro1">
          <table:table-cell office:value-type="float" office:value="720.583679199219">
            <text:p>720.5836791992</text:p>
          </table:table-cell>
          <table:table-cell office:value-type="float" office:value="0.02246147">
            <text:p>0.02246147</text:p>
          </table:table-cell>
          <table:table-cell table:number-columns-repeated="4"/>
        </table:table-row>
        <table:table-row table:style-name="ro1">
          <table:table-cell office:value-type="float" office:value="720.703857421875">
            <text:p>720.7038574219</text:p>
          </table:table-cell>
          <table:table-cell office:value-type="float" office:value="0.001166432">
            <text:p>0.001166432</text:p>
          </table:table-cell>
          <table:table-cell table:number-columns-repeated="4"/>
        </table:table-row>
        <table:table-row table:style-name="ro1">
          <table:table-cell office:value-type="float" office:value="720.824096679688">
            <text:p>720.8240966797</text:p>
          </table:table-cell>
          <table:table-cell office:value-type="float" office:value="0.0009469601">
            <text:p>0.0009469601</text:p>
          </table:table-cell>
          <table:table-cell table:number-columns-repeated="4"/>
        </table:table-row>
        <table:table-row table:style-name="ro1">
          <table:table-cell office:value-type="float" office:value="720.9443359375">
            <text:p>720.9443359375</text:p>
          </table:table-cell>
          <table:table-cell office:value-type="float" office:value="0.005644531">
            <text:p>0.005644531</text:p>
          </table:table-cell>
          <table:table-cell table:number-columns-repeated="4"/>
        </table:table-row>
        <table:table-row table:style-name="ro1">
          <table:table-cell office:value-type="float" office:value="721.064575195313">
            <text:p>721.0645751953</text:p>
          </table:table-cell>
          <table:table-cell office:value-type="float" office:value="0.005221842">
            <text:p>0.005221842</text:p>
          </table:table-cell>
          <table:table-cell table:number-columns-repeated="4"/>
        </table:table-row>
        <table:table-row table:style-name="ro1">
          <table:table-cell office:value-type="float" office:value="721.184753417969">
            <text:p>721.184753418</text:p>
          </table:table-cell>
          <table:table-cell office:value-type="float" office:value="-0.003578748">
            <text:p>-0.003578748</text:p>
          </table:table-cell>
          <table:table-cell table:number-columns-repeated="4"/>
        </table:table-row>
        <table:table-row table:style-name="ro1">
          <table:table-cell office:value-type="float" office:value="721.304992675781">
            <text:p>721.3049926758</text:p>
          </table:table-cell>
          <table:table-cell office:value-type="float" office:value="0.0003725752">
            <text:p>0.0003725752</text:p>
          </table:table-cell>
          <table:table-cell table:number-columns-repeated="4"/>
        </table:table-row>
        <table:table-row table:style-name="ro1">
          <table:table-cell office:value-type="float" office:value="721.425231933594">
            <text:p>721.4252319336</text:p>
          </table:table-cell>
          <table:table-cell office:value-type="float" office:value="0.001116363">
            <text:p>0.001116363</text:p>
          </table:table-cell>
          <table:table-cell table:number-columns-repeated="4"/>
        </table:table-row>
        <table:table-row table:style-name="ro1">
          <table:table-cell office:value-type="float" office:value="721.545471191406">
            <text:p>721.5454711914</text:p>
          </table:table-cell>
          <table:table-cell office:value-type="float" office:value="0.01835034">
            <text:p>0.01835034</text:p>
          </table:table-cell>
          <table:table-cell table:number-columns-repeated="4"/>
        </table:table-row>
        <table:table-row table:style-name="ro1">
          <table:table-cell office:value-type="float" office:value="721.665649414063">
            <text:p>721.6656494141</text:p>
          </table:table-cell>
          <table:table-cell office:value-type="float" office:value="-0.009173918">
            <text:p>-0.009173918</text:p>
          </table:table-cell>
          <table:table-cell table:number-columns-repeated="4"/>
        </table:table-row>
        <table:table-row table:style-name="ro1">
          <table:table-cell office:value-type="float" office:value="721.785888671875">
            <text:p>721.7858886719</text:p>
          </table:table-cell>
          <table:table-cell office:value-type="float" office:value="0.01625698">
            <text:p>0.01625698</text:p>
          </table:table-cell>
          <table:table-cell table:number-columns-repeated="4"/>
        </table:table-row>
        <table:table-row table:style-name="ro1">
          <table:table-cell office:value-type="float" office:value="721.906127929688">
            <text:p>721.9061279297</text:p>
          </table:table-cell>
          <table:table-cell office:value-type="float" office:value="-0.001839685">
            <text:p>-0.001839685</text:p>
          </table:table-cell>
          <table:table-cell table:number-columns-repeated="4"/>
        </table:table-row>
        <table:table-row table:style-name="ro1">
          <table:table-cell office:value-type="float" office:value="722.0263671875">
            <text:p>722.0263671875</text:p>
          </table:table-cell>
          <table:table-cell office:value-type="float" office:value="-0.007435061">
            <text:p>-0.007435061</text:p>
          </table:table-cell>
          <table:table-cell table:number-columns-repeated="4"/>
        </table:table-row>
        <table:table-row table:style-name="ro1">
          <table:table-cell office:value-type="float" office:value="722.146606445313">
            <text:p>722.1466064453</text:p>
          </table:table-cell>
          <table:table-cell office:value-type="float" office:value="0.01415561">
            <text:p>0.01415561</text:p>
          </table:table-cell>
          <table:table-cell table:number-columns-repeated="4"/>
        </table:table-row>
        <table:table-row table:style-name="ro1">
          <table:table-cell office:value-type="float" office:value="722.266784667969">
            <text:p>722.266784668</text:p>
          </table:table-cell>
          <table:table-cell office:value-type="float" office:value="-0.003024356">
            <text:p>-0.003024356</text:p>
          </table:table-cell>
          <table:table-cell table:number-columns-repeated="4"/>
        </table:table-row>
        <table:table-row table:style-name="ro1">
          <table:table-cell office:value-type="float" office:value="722.387023925781">
            <text:p>722.3870239258</text:p>
          </table:table-cell>
          <table:table-cell office:value-type="float" office:value="-0.007712159">
            <text:p>-0.007712159</text:p>
          </table:table-cell>
          <table:table-cell table:number-columns-repeated="4"/>
        </table:table-row>
        <table:table-row table:style-name="ro1">
          <table:table-cell office:value-type="float" office:value="722.507263183594">
            <text:p>722.5072631836</text:p>
          </table:table-cell>
          <table:table-cell office:value-type="float" office:value="-0.009556985">
            <text:p>-0.009556985</text:p>
          </table:table-cell>
          <table:table-cell table:number-columns-repeated="4"/>
        </table:table-row>
        <table:table-row table:style-name="ro1">
          <table:table-cell office:value-type="float" office:value="722.627502441406">
            <text:p>722.6275024414</text:p>
          </table:table-cell>
          <table:table-cell office:value-type="float" office:value="-0.00639349">
            <text:p>-0.00639349</text:p>
          </table:table-cell>
          <table:table-cell table:number-columns-repeated="4"/>
        </table:table-row>
        <table:table-row table:style-name="ro1">
          <table:table-cell office:value-type="float" office:value="722.747741699219">
            <text:p>722.7477416992</text:p>
          </table:table-cell>
          <table:table-cell office:value-type="float" office:value="0.002128063">
            <text:p>0.002128063</text:p>
          </table:table-cell>
          <table:table-cell table:number-columns-repeated="4"/>
        </table:table-row>
        <table:table-row table:style-name="ro1">
          <table:table-cell office:value-type="float" office:value="722.867980957031">
            <text:p>722.867980957</text:p>
          </table:table-cell>
          <table:table-cell office:value-type="float" office:value="-0.007665283">
            <text:p>-0.007665283</text:p>
          </table:table-cell>
          <table:table-cell table:number-columns-repeated="4"/>
        </table:table-row>
        <table:table-row table:style-name="ro1">
          <table:table-cell office:value-type="float" office:value="722.988159179688">
            <text:p>722.9881591797</text:p>
          </table:table-cell>
          <table:table-cell office:value-type="float" office:value="0.0008888471">
            <text:p>0.0008888471</text:p>
          </table:table-cell>
          <table:table-cell table:number-columns-repeated="4"/>
        </table:table-row>
        <table:table-row table:style-name="ro1">
          <table:table-cell office:value-type="float" office:value="723.1083984375">
            <text:p>723.1083984375</text:p>
          </table:table-cell>
          <table:table-cell office:value-type="float" office:value="0.003916375">
            <text:p>0.003916375</text:p>
          </table:table-cell>
          <table:table-cell table:number-columns-repeated="4"/>
        </table:table-row>
        <table:table-row table:style-name="ro1">
          <table:table-cell office:value-type="float" office:value="723.228637695313">
            <text:p>723.2286376953</text:p>
          </table:table-cell>
          <table:table-cell office:value-type="float" office:value="0.01651949">
            <text:p>0.01651949</text:p>
          </table:table-cell>
          <table:table-cell table:number-columns-repeated="4"/>
        </table:table-row>
        <table:table-row table:style-name="ro1">
          <table:table-cell office:value-type="float" office:value="723.348876953125">
            <text:p>723.3488769531</text:p>
          </table:table-cell>
          <table:table-cell office:value-type="float" office:value="0.001057914">
            <text:p>0.001057914</text:p>
          </table:table-cell>
          <table:table-cell table:number-columns-repeated="4"/>
        </table:table-row>
        <table:table-row table:style-name="ro1">
          <table:table-cell office:value-type="float" office:value="723.469116210938">
            <text:p>723.4691162109</text:p>
          </table:table-cell>
          <table:table-cell office:value-type="float" office:value="-0.005281717">
            <text:p>-0.005281717</text:p>
          </table:table-cell>
          <table:table-cell table:number-columns-repeated="4"/>
        </table:table-row>
        <table:table-row table:style-name="ro1">
          <table:table-cell office:value-type="float" office:value="723.58935546875">
            <text:p>723.5893554688</text:p>
          </table:table-cell>
          <table:table-cell office:value-type="float" office:value="0.001273402">
            <text:p>0.001273402</text:p>
          </table:table-cell>
          <table:table-cell table:number-columns-repeated="4"/>
        </table:table-row>
        <table:table-row table:style-name="ro1">
          <table:table-cell office:value-type="float" office:value="723.709594726563">
            <text:p>723.7095947266</text:p>
          </table:table-cell>
          <table:table-cell office:value-type="float" office:value="-0.005115237">
            <text:p>-0.005115237</text:p>
          </table:table-cell>
          <table:table-cell table:number-columns-repeated="4"/>
        </table:table-row>
        <table:table-row table:style-name="ro1">
          <table:table-cell office:value-type="float" office:value="723.829772949219">
            <text:p>723.8297729492</text:p>
          </table:table-cell>
          <table:table-cell office:value-type="float" office:value="-0.005876656">
            <text:p>-0.005876656</text:p>
          </table:table-cell>
          <table:table-cell table:number-columns-repeated="4"/>
        </table:table-row>
        <table:table-row table:style-name="ro1">
          <table:table-cell office:value-type="float" office:value="723.950012207031">
            <text:p>723.950012207</text:p>
          </table:table-cell>
          <table:table-cell office:value-type="float" office:value="0.002755931">
            <text:p>0.002755931</text:p>
          </table:table-cell>
          <table:table-cell table:number-columns-repeated="4"/>
        </table:table-row>
        <table:table-row table:style-name="ro1">
          <table:table-cell office:value-type="float" office:value="724.070251464844">
            <text:p>724.0702514648</text:p>
          </table:table-cell>
          <table:table-cell office:value-type="float" office:value="-0.0004284369">
            <text:p>-0.0004284369</text:p>
          </table:table-cell>
          <table:table-cell table:number-columns-repeated="4"/>
        </table:table-row>
        <table:table-row table:style-name="ro1">
          <table:table-cell office:value-type="float" office:value="724.190490722656">
            <text:p>724.1904907227</text:p>
          </table:table-cell>
          <table:table-cell office:value-type="float" office:value="-0.01230936">
            <text:p>-0.01230936</text:p>
          </table:table-cell>
          <table:table-cell table:number-columns-repeated="4"/>
        </table:table-row>
        <table:table-row table:style-name="ro1">
          <table:table-cell office:value-type="float" office:value="724.310729980469">
            <text:p>724.3107299805</text:p>
          </table:table-cell>
          <table:table-cell office:value-type="float" office:value="-0.007708619">
            <text:p>-0.007708619</text:p>
          </table:table-cell>
          <table:table-cell table:number-columns-repeated="4"/>
        </table:table-row>
        <table:table-row table:style-name="ro1">
          <table:table-cell office:value-type="float" office:value="724.430969238281">
            <text:p>724.4309692383</text:p>
          </table:table-cell>
          <table:table-cell office:value-type="float" office:value="-0.008241115">
            <text:p>-0.008241115</text:p>
          </table:table-cell>
          <table:table-cell table:number-columns-repeated="4"/>
        </table:table-row>
        <table:table-row table:style-name="ro1">
          <table:table-cell office:value-type="float" office:value="724.551208496094">
            <text:p>724.5512084961</text:p>
          </table:table-cell>
          <table:table-cell office:value-type="float" office:value="-0.01039299">
            <text:p>-0.01039299</text:p>
          </table:table-cell>
          <table:table-cell table:number-columns-repeated="4"/>
        </table:table-row>
        <table:table-row table:style-name="ro1">
          <table:table-cell office:value-type="float" office:value="724.671447753906">
            <text:p>724.6714477539</text:p>
          </table:table-cell>
          <table:table-cell office:value-type="float" office:value="0.006025808">
            <text:p>0.006025808</text:p>
          </table:table-cell>
          <table:table-cell table:number-columns-repeated="4"/>
        </table:table-row>
        <table:table-row table:style-name="ro1">
          <table:table-cell office:value-type="float" office:value="724.791687011719">
            <text:p>724.7916870117</text:p>
          </table:table-cell>
          <table:table-cell office:value-type="float" office:value="-0.009689196">
            <text:p>-0.009689196</text:p>
          </table:table-cell>
          <table:table-cell table:number-columns-repeated="4"/>
        </table:table-row>
        <table:table-row table:style-name="ro1">
          <table:table-cell office:value-type="float" office:value="724.911865234375">
            <text:p>724.9118652344</text:p>
          </table:table-cell>
          <table:table-cell office:value-type="float" office:value="-0.009029334">
            <text:p>-0.009029334</text:p>
          </table:table-cell>
          <table:table-cell table:number-columns-repeated="4"/>
        </table:table-row>
        <table:table-row table:style-name="ro1">
          <table:table-cell office:value-type="float" office:value="725.032104492188">
            <text:p>725.0321044922</text:p>
          </table:table-cell>
          <table:table-cell office:value-type="float" office:value="0.002219507">
            <text:p>0.002219507</text:p>
          </table:table-cell>
          <table:table-cell table:number-columns-repeated="4"/>
        </table:table-row>
        <table:table-row table:style-name="ro1">
          <table:table-cell office:value-type="float" office:value="725.15234375">
            <text:p>725.15234375</text:p>
          </table:table-cell>
          <table:table-cell office:value-type="float" office:value="-0.006816852">
            <text:p>-0.006816852</text:p>
          </table:table-cell>
          <table:table-cell table:number-columns-repeated="4"/>
        </table:table-row>
        <table:table-row table:style-name="ro1">
          <table:table-cell office:value-type="float" office:value="725.272583007813">
            <text:p>725.2725830078</text:p>
          </table:table-cell>
          <table:table-cell office:value-type="float" office:value="-0.007932546">
            <text:p>-0.007932546</text:p>
          </table:table-cell>
          <table:table-cell table:number-columns-repeated="4"/>
        </table:table-row>
        <table:table-row table:style-name="ro1">
          <table:table-cell office:value-type="float" office:value="725.392822265625">
            <text:p>725.3928222656</text:p>
          </table:table-cell>
          <table:table-cell office:value-type="float" office:value="0.02601653">
            <text:p>0.02601653</text:p>
          </table:table-cell>
          <table:table-cell table:number-columns-repeated="4"/>
        </table:table-row>
        <table:table-row table:style-name="ro1">
          <table:table-cell office:value-type="float" office:value="725.513061523438">
            <text:p>725.5130615234</text:p>
          </table:table-cell>
          <table:table-cell office:value-type="float" office:value="-0.002128992">
            <text:p>-0.002128992</text:p>
          </table:table-cell>
          <table:table-cell table:number-columns-repeated="4"/>
        </table:table-row>
        <table:table-row table:style-name="ro1">
          <table:table-cell office:value-type="float" office:value="725.63330078125">
            <text:p>725.6333007813</text:p>
          </table:table-cell>
          <table:table-cell office:value-type="float" office:value="-0.001355301">
            <text:p>-0.001355301</text:p>
          </table:table-cell>
          <table:table-cell table:number-columns-repeated="4"/>
        </table:table-row>
        <table:table-row table:style-name="ro1">
          <table:table-cell office:value-type="float" office:value="725.753540039063">
            <text:p>725.7535400391</text:p>
          </table:table-cell>
          <table:table-cell office:value-type="float" office:value="-0.006391385">
            <text:p>-0.006391385</text:p>
          </table:table-cell>
          <table:table-cell table:number-columns-repeated="4"/>
        </table:table-row>
        <table:table-row table:style-name="ro1">
          <table:table-cell office:value-type="float" office:value="725.873779296875">
            <text:p>725.8737792969</text:p>
          </table:table-cell>
          <table:table-cell office:value-type="float" office:value="0.002621428">
            <text:p>0.002621428</text:p>
          </table:table-cell>
          <table:table-cell table:number-columns-repeated="4"/>
        </table:table-row>
        <table:table-row table:style-name="ro1">
          <table:table-cell office:value-type="float" office:value="725.994018554688">
            <text:p>725.9940185547</text:p>
          </table:table-cell>
          <table:table-cell office:value-type="float" office:value="-0.0016047">
            <text:p>-0.0016047</text:p>
          </table:table-cell>
          <table:table-cell table:number-columns-repeated="4"/>
        </table:table-row>
        <table:table-row table:style-name="ro1">
          <table:table-cell office:value-type="float" office:value="726.1142578125">
            <text:p>726.1142578125</text:p>
          </table:table-cell>
          <table:table-cell office:value-type="float" office:value="0.0004009297">
            <text:p>0.0004009297</text:p>
          </table:table-cell>
          <table:table-cell table:number-columns-repeated="4"/>
        </table:table-row>
        <table:table-row table:style-name="ro1">
          <table:table-cell office:value-type="float" office:value="726.234497070313">
            <text:p>726.2344970703</text:p>
          </table:table-cell>
          <table:table-cell office:value-type="float" office:value="-0.002929673">
            <text:p>-0.002929673</text:p>
          </table:table-cell>
          <table:table-cell table:number-columns-repeated="4"/>
        </table:table-row>
        <table:table-row table:style-name="ro1">
          <table:table-cell office:value-type="float" office:value="726.354736328125">
            <text:p>726.3547363281</text:p>
          </table:table-cell>
          <table:table-cell office:value-type="float" office:value="0.008115436">
            <text:p>0.008115436</text:p>
          </table:table-cell>
          <table:table-cell table:number-columns-repeated="4"/>
        </table:table-row>
        <table:table-row table:style-name="ro1">
          <table:table-cell office:value-type="float" office:value="726.474975585938">
            <text:p>726.4749755859</text:p>
          </table:table-cell>
          <table:table-cell office:value-type="string">
            <text:p>-1.002483E-05</text:p>
          </table:table-cell>
          <table:table-cell table:number-columns-repeated="4"/>
        </table:table-row>
        <table:table-row table:style-name="ro1">
          <table:table-cell office:value-type="float" office:value="726.59521484375">
            <text:p>726.5952148438</text:p>
          </table:table-cell>
          <table:table-cell office:value-type="float" office:value="0.0008953186">
            <text:p>0.0008953186</text:p>
          </table:table-cell>
          <table:table-cell table:number-columns-repeated="4"/>
        </table:table-row>
        <table:table-row table:style-name="ro1">
          <table:table-cell office:value-type="float" office:value="726.715454101563">
            <text:p>726.7154541016</text:p>
          </table:table-cell>
          <table:table-cell office:value-type="float" office:value="-0.004028455">
            <text:p>-0.004028455</text:p>
          </table:table-cell>
          <table:table-cell table:number-columns-repeated="4"/>
        </table:table-row>
        <table:table-row table:style-name="ro1">
          <table:table-cell office:value-type="float" office:value="726.835693359375">
            <text:p>726.8356933594</text:p>
          </table:table-cell>
          <table:table-cell office:value-type="float" office:value="-0.005243289">
            <text:p>-0.005243289</text:p>
          </table:table-cell>
          <table:table-cell table:number-columns-repeated="4"/>
        </table:table-row>
        <table:table-row table:style-name="ro1">
          <table:table-cell office:value-type="float" office:value="726.955932617188">
            <text:p>726.9559326172</text:p>
          </table:table-cell>
          <table:table-cell office:value-type="float" office:value="-0.01073127">
            <text:p>-0.01073127</text:p>
          </table:table-cell>
          <table:table-cell table:number-columns-repeated="4"/>
        </table:table-row>
        <table:table-row table:style-name="ro1">
          <table:table-cell office:value-type="float" office:value="727.076171875">
            <text:p>727.076171875</text:p>
          </table:table-cell>
          <table:table-cell office:value-type="float" office:value="0.00584153">
            <text:p>0.00584153</text:p>
          </table:table-cell>
          <table:table-cell table:number-columns-repeated="4"/>
        </table:table-row>
        <table:table-row table:style-name="ro1">
          <table:table-cell office:value-type="float" office:value="727.196411132813">
            <text:p>727.1964111328</text:p>
          </table:table-cell>
          <table:table-cell office:value-type="float" office:value="-0.001768958">
            <text:p>-0.001768958</text:p>
          </table:table-cell>
          <table:table-cell table:number-columns-repeated="4"/>
        </table:table-row>
        <table:table-row table:style-name="ro1">
          <table:table-cell office:value-type="float" office:value="727.316650390625">
            <text:p>727.3166503906</text:p>
          </table:table-cell>
          <table:table-cell office:value-type="float" office:value="0.0117264">
            <text:p>0.0117264</text:p>
          </table:table-cell>
          <table:table-cell table:number-columns-repeated="4"/>
        </table:table-row>
        <table:table-row table:style-name="ro1">
          <table:table-cell office:value-type="float" office:value="727.436889648438">
            <text:p>727.4368896484</text:p>
          </table:table-cell>
          <table:table-cell office:value-type="float" office:value="-0.001574963">
            <text:p>-0.001574963</text:p>
          </table:table-cell>
          <table:table-cell table:number-columns-repeated="4"/>
        </table:table-row>
        <table:table-row table:style-name="ro1">
          <table:table-cell office:value-type="float" office:value="727.55712890625">
            <text:p>727.5571289063</text:p>
          </table:table-cell>
          <table:table-cell office:value-type="float" office:value="-0.0001152566">
            <text:p>-0.0001152566</text:p>
          </table:table-cell>
          <table:table-cell table:number-columns-repeated="4"/>
        </table:table-row>
        <table:table-row table:style-name="ro1">
          <table:table-cell office:value-type="float" office:value="727.677368164063">
            <text:p>727.6773681641</text:p>
          </table:table-cell>
          <table:table-cell office:value-type="float" office:value="-0.001724017">
            <text:p>-0.001724017</text:p>
          </table:table-cell>
          <table:table-cell table:number-columns-repeated="4"/>
        </table:table-row>
        <table:table-row table:style-name="ro1">
          <table:table-cell office:value-type="float" office:value="727.797607421875">
            <text:p>727.7976074219</text:p>
          </table:table-cell>
          <table:table-cell office:value-type="float" office:value="-0.00816922">
            <text:p>-0.00816922</text:p>
          </table:table-cell>
          <table:table-cell table:number-columns-repeated="4"/>
        </table:table-row>
        <table:table-row table:style-name="ro1">
          <table:table-cell office:value-type="float" office:value="727.917846679688">
            <text:p>727.9178466797</text:p>
          </table:table-cell>
          <table:table-cell office:value-type="float" office:value="-0.01159066">
            <text:p>-0.01159066</text:p>
          </table:table-cell>
          <table:table-cell table:number-columns-repeated="4"/>
        </table:table-row>
        <table:table-row table:style-name="ro1">
          <table:table-cell office:value-type="float" office:value="728.0380859375">
            <text:p>728.0380859375</text:p>
          </table:table-cell>
          <table:table-cell office:value-type="float" office:value="0.002335357">
            <text:p>0.002335357</text:p>
          </table:table-cell>
          <table:table-cell table:number-columns-repeated="4"/>
        </table:table-row>
        <table:table-row table:style-name="ro1">
          <table:table-cell office:value-type="float" office:value="728.158325195313">
            <text:p>728.1583251953</text:p>
          </table:table-cell>
          <table:table-cell office:value-type="float" office:value="-0.01067552">
            <text:p>-0.01067552</text:p>
          </table:table-cell>
          <table:table-cell table:number-columns-repeated="4"/>
        </table:table-row>
        <table:table-row table:style-name="ro1">
          <table:table-cell office:value-type="float" office:value="728.278564453125">
            <text:p>728.2785644531</text:p>
          </table:table-cell>
          <table:table-cell office:value-type="float" office:value="-0.005299168">
            <text:p>-0.005299168</text:p>
          </table:table-cell>
          <table:table-cell table:number-columns-repeated="4"/>
        </table:table-row>
        <table:table-row table:style-name="ro1">
          <table:table-cell office:value-type="float" office:value="728.398803710938">
            <text:p>728.3988037109</text:p>
          </table:table-cell>
          <table:table-cell office:value-type="float" office:value="-0.008943696">
            <text:p>-0.008943696</text:p>
          </table:table-cell>
          <table:table-cell table:number-columns-repeated="4"/>
        </table:table-row>
        <table:table-row table:style-name="ro1">
          <table:table-cell office:value-type="float" office:value="728.51904296875">
            <text:p>728.5190429688</text:p>
          </table:table-cell>
          <table:table-cell office:value-type="float" office:value="0.005307393">
            <text:p>0.005307393</text:p>
          </table:table-cell>
          <table:table-cell table:number-columns-repeated="4"/>
        </table:table-row>
        <table:table-row table:style-name="ro1">
          <table:table-cell office:value-type="float" office:value="728.639282226563">
            <text:p>728.6392822266</text:p>
          </table:table-cell>
          <table:table-cell office:value-type="float" office:value="-0.009849091">
            <text:p>-0.009849091</text:p>
          </table:table-cell>
          <table:table-cell table:number-columns-repeated="4"/>
        </table:table-row>
        <table:table-row table:style-name="ro1">
          <table:table-cell office:value-type="float" office:value="728.759521484375">
            <text:p>728.7595214844</text:p>
          </table:table-cell>
          <table:table-cell office:value-type="float" office:value="0.0001593284">
            <text:p>0.0001593284</text:p>
          </table:table-cell>
          <table:table-cell table:number-columns-repeated="4"/>
        </table:table-row>
        <table:table-row table:style-name="ro1">
          <table:table-cell office:value-type="float" office:value="728.879760742188">
            <text:p>728.8797607422</text:p>
          </table:table-cell>
          <table:table-cell office:value-type="float" office:value="0.00322313">
            <text:p>0.00322313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007242193">
            <text:p>-0.007242193</text:p>
          </table:table-cell>
          <table:table-cell table:number-columns-repeated="4"/>
        </table:table-row>
        <table:table-row table:style-name="ro1">
          <table:table-cell office:value-type="float" office:value="729.120239257813">
            <text:p>729.1202392578</text:p>
          </table:table-cell>
          <table:table-cell office:value-type="float" office:value="0.000100017">
            <text:p>0.000100017</text:p>
          </table:table-cell>
          <table:table-cell table:number-columns-repeated="4"/>
        </table:table-row>
        <table:table-row table:style-name="ro1">
          <table:table-cell office:value-type="float" office:value="729.240478515625">
            <text:p>729.2404785156</text:p>
          </table:table-cell>
          <table:table-cell office:value-type="float" office:value="0.007854071">
            <text:p>0.007854071</text:p>
          </table:table-cell>
          <table:table-cell table:number-columns-repeated="4"/>
        </table:table-row>
        <table:table-row table:style-name="ro1">
          <table:table-cell office:value-type="float" office:value="729.360778808594">
            <text:p>729.3607788086</text:p>
          </table:table-cell>
          <table:table-cell office:value-type="float" office:value="0.002911447">
            <text:p>0.002911447</text:p>
          </table:table-cell>
          <table:table-cell table:number-columns-repeated="4"/>
        </table:table-row>
        <table:table-row table:style-name="ro1">
          <table:table-cell office:value-type="float" office:value="729.481018066406">
            <text:p>729.4810180664</text:p>
          </table:table-cell>
          <table:table-cell office:value-type="float" office:value="-0.0008384844">
            <text:p>-0.0008384844</text:p>
          </table:table-cell>
          <table:table-cell table:number-columns-repeated="4"/>
        </table:table-row>
        <table:table-row table:style-name="ro1">
          <table:table-cell office:value-type="float" office:value="729.601257324219">
            <text:p>729.6012573242</text:p>
          </table:table-cell>
          <table:table-cell office:value-type="float" office:value="0.005846353">
            <text:p>0.005846353</text:p>
          </table:table-cell>
          <table:table-cell table:number-columns-repeated="4"/>
        </table:table-row>
        <table:table-row table:style-name="ro1">
          <table:table-cell office:value-type="float" office:value="729.721496582031">
            <text:p>729.721496582</text:p>
          </table:table-cell>
          <table:table-cell office:value-type="float" office:value="0.02233941">
            <text:p>0.02233941</text:p>
          </table:table-cell>
          <table:table-cell table:number-columns-repeated="4"/>
        </table:table-row>
        <table:table-row table:style-name="ro1">
          <table:table-cell office:value-type="float" office:value="729.841735839844">
            <text:p>729.8417358398</text:p>
          </table:table-cell>
          <table:table-cell office:value-type="float" office:value="-0.0070231">
            <text:p>-0.0070231</text:p>
          </table:table-cell>
          <table:table-cell table:number-columns-repeated="4"/>
        </table:table-row>
        <table:table-row table:style-name="ro1">
          <table:table-cell office:value-type="float" office:value="729.961975097656">
            <text:p>729.9619750977</text:p>
          </table:table-cell>
          <table:table-cell office:value-type="float" office:value="-0.007847368">
            <text:p>-0.007847368</text:p>
          </table:table-cell>
          <table:table-cell table:number-columns-repeated="4"/>
        </table:table-row>
        <table:table-row table:style-name="ro1">
          <table:table-cell office:value-type="float" office:value="730.082214355469">
            <text:p>730.0822143555</text:p>
          </table:table-cell>
          <table:table-cell office:value-type="float" office:value="0.0116056">
            <text:p>0.0116056</text:p>
          </table:table-cell>
          <table:table-cell table:number-columns-repeated="4"/>
        </table:table-row>
        <table:table-row table:style-name="ro1">
          <table:table-cell office:value-type="float" office:value="730.202453613281">
            <text:p>730.2024536133</text:p>
          </table:table-cell>
          <table:table-cell office:value-type="float" office:value="0.004546143">
            <text:p>0.004546143</text:p>
          </table:table-cell>
          <table:table-cell table:number-columns-repeated="4"/>
        </table:table-row>
        <table:table-row table:style-name="ro1">
          <table:table-cell office:value-type="float" office:value="730.322692871094">
            <text:p>730.3226928711</text:p>
          </table:table-cell>
          <table:table-cell office:value-type="float" office:value="-0.001937753">
            <text:p>-0.001937753</text:p>
          </table:table-cell>
          <table:table-cell table:number-columns-repeated="4"/>
        </table:table-row>
        <table:table-row table:style-name="ro1">
          <table:table-cell office:value-type="float" office:value="730.442932128906">
            <text:p>730.4429321289</text:p>
          </table:table-cell>
          <table:table-cell office:value-type="float" office:value="0.00241304">
            <text:p>0.00241304</text:p>
          </table:table-cell>
          <table:table-cell table:number-columns-repeated="4"/>
        </table:table-row>
        <table:table-row table:style-name="ro1">
          <table:table-cell office:value-type="float" office:value="730.563171386719">
            <text:p>730.5631713867</text:p>
          </table:table-cell>
          <table:table-cell office:value-type="float" office:value="0.005864298">
            <text:p>0.005864298</text:p>
          </table:table-cell>
          <table:table-cell table:number-columns-repeated="4"/>
        </table:table-row>
        <table:table-row table:style-name="ro1">
          <table:table-cell office:value-type="float" office:value="730.683471679688">
            <text:p>730.6834716797</text:p>
          </table:table-cell>
          <table:table-cell office:value-type="float" office:value="-0.001612005">
            <text:p>-0.001612005</text:p>
          </table:table-cell>
          <table:table-cell table:number-columns-repeated="4"/>
        </table:table-row>
        <table:table-row table:style-name="ro1">
          <table:table-cell office:value-type="float" office:value="730.8037109375">
            <text:p>730.8037109375</text:p>
          </table:table-cell>
          <table:table-cell office:value-type="float" office:value="0.01145038">
            <text:p>0.01145038</text:p>
          </table:table-cell>
          <table:table-cell table:number-columns-repeated="4"/>
        </table:table-row>
        <table:table-row table:style-name="ro1">
          <table:table-cell office:value-type="float" office:value="730.923950195313">
            <text:p>730.9239501953</text:p>
          </table:table-cell>
          <table:table-cell office:value-type="float" office:value="0.005979804">
            <text:p>0.005979804</text:p>
          </table:table-cell>
          <table:table-cell table:number-columns-repeated="4"/>
        </table:table-row>
        <table:table-row table:style-name="ro1">
          <table:table-cell office:value-type="float" office:value="731.044189453125">
            <text:p>731.0441894531</text:p>
          </table:table-cell>
          <table:table-cell office:value-type="float" office:value="0.01376751">
            <text:p>0.01376751</text:p>
          </table:table-cell>
          <table:table-cell table:number-columns-repeated="4"/>
        </table:table-row>
        <table:table-row table:style-name="ro1">
          <table:table-cell office:value-type="float" office:value="731.164428710938">
            <text:p>731.1644287109</text:p>
          </table:table-cell>
          <table:table-cell office:value-type="float" office:value="-0.004946354">
            <text:p>-0.004946354</text:p>
          </table:table-cell>
          <table:table-cell table:number-columns-repeated="4"/>
        </table:table-row>
        <table:table-row table:style-name="ro1">
          <table:table-cell office:value-type="float" office:value="731.28466796875">
            <text:p>731.2846679688</text:p>
          </table:table-cell>
          <table:table-cell office:value-type="float" office:value="0.0009835184">
            <text:p>0.0009835184</text:p>
          </table:table-cell>
          <table:table-cell table:number-columns-repeated="4"/>
        </table:table-row>
        <table:table-row table:style-name="ro1">
          <table:table-cell office:value-type="float" office:value="731.404907226563">
            <text:p>731.4049072266</text:p>
          </table:table-cell>
          <table:table-cell office:value-type="float" office:value="-0.007353842">
            <text:p>-0.007353842</text:p>
          </table:table-cell>
          <table:table-cell table:number-columns-repeated="4"/>
        </table:table-row>
        <table:table-row table:style-name="ro1">
          <table:table-cell office:value-type="float" office:value="731.525146484375">
            <text:p>731.5251464844</text:p>
          </table:table-cell>
          <table:table-cell office:value-type="float" office:value="-0.003177403">
            <text:p>-0.003177403</text:p>
          </table:table-cell>
          <table:table-cell table:number-columns-repeated="4"/>
        </table:table-row>
        <table:table-row table:style-name="ro1">
          <table:table-cell office:value-type="float" office:value="731.645446777344">
            <text:p>731.6454467773</text:p>
          </table:table-cell>
          <table:table-cell office:value-type="float" office:value="0.007462989">
            <text:p>0.007462989</text:p>
          </table:table-cell>
          <table:table-cell table:number-columns-repeated="4"/>
        </table:table-row>
        <table:table-row table:style-name="ro1">
          <table:table-cell office:value-type="float" office:value="731.765686035156">
            <text:p>731.7656860352</text:p>
          </table:table-cell>
          <table:table-cell office:value-type="float" office:value="0.008131559">
            <text:p>0.008131559</text:p>
          </table:table-cell>
          <table:table-cell table:number-columns-repeated="4"/>
        </table:table-row>
        <table:table-row table:style-name="ro1">
          <table:table-cell office:value-type="float" office:value="731.885925292969">
            <text:p>731.885925293</text:p>
          </table:table-cell>
          <table:table-cell office:value-type="float" office:value="0.005173843">
            <text:p>0.005173843</text:p>
          </table:table-cell>
          <table:table-cell table:number-columns-repeated="4"/>
        </table:table-row>
        <table:table-row table:style-name="ro1">
          <table:table-cell office:value-type="float" office:value="732.006164550781">
            <text:p>732.0061645508</text:p>
          </table:table-cell>
          <table:table-cell office:value-type="float" office:value="-0.002971679">
            <text:p>-0.002971679</text:p>
          </table:table-cell>
          <table:table-cell table:number-columns-repeated="4"/>
        </table:table-row>
        <table:table-row table:style-name="ro1">
          <table:table-cell office:value-type="float" office:value="732.126403808594">
            <text:p>732.1264038086</text:p>
          </table:table-cell>
          <table:table-cell office:value-type="float" office:value="0.01753643">
            <text:p>0.01753643</text:p>
          </table:table-cell>
          <table:table-cell table:number-columns-repeated="4"/>
        </table:table-row>
        <table:table-row table:style-name="ro1">
          <table:table-cell office:value-type="float" office:value="732.246643066406">
            <text:p>732.2466430664</text:p>
          </table:table-cell>
          <table:table-cell office:value-type="float" office:value="-0.004375815">
            <text:p>-0.004375815</text:p>
          </table:table-cell>
          <table:table-cell table:number-columns-repeated="4"/>
        </table:table-row>
        <table:table-row table:style-name="ro1">
          <table:table-cell office:value-type="float" office:value="732.366882324219">
            <text:p>732.3668823242</text:p>
          </table:table-cell>
          <table:table-cell office:value-type="float" office:value="-0.005550454">
            <text:p>-0.005550454</text:p>
          </table:table-cell>
          <table:table-cell table:number-columns-repeated="4"/>
        </table:table-row>
        <table:table-row table:style-name="ro1">
          <table:table-cell office:value-type="float" office:value="732.487182617188">
            <text:p>732.4871826172</text:p>
          </table:table-cell>
          <table:table-cell office:value-type="float" office:value="-0.006204735">
            <text:p>-0.006204735</text:p>
          </table:table-cell>
          <table:table-cell table:number-columns-repeated="4"/>
        </table:table-row>
        <table:table-row table:style-name="ro1">
          <table:table-cell office:value-type="float" office:value="732.607421875">
            <text:p>732.607421875</text:p>
          </table:table-cell>
          <table:table-cell office:value-type="float" office:value="-0.002437521">
            <text:p>-0.002437521</text:p>
          </table:table-cell>
          <table:table-cell table:number-columns-repeated="4"/>
        </table:table-row>
        <table:table-row table:style-name="ro1">
          <table:table-cell office:value-type="float" office:value="732.727661132813">
            <text:p>732.7276611328</text:p>
          </table:table-cell>
          <table:table-cell office:value-type="float" office:value="0.003280248">
            <text:p>0.003280248</text:p>
          </table:table-cell>
          <table:table-cell table:number-columns-repeated="4"/>
        </table:table-row>
        <table:table-row table:style-name="ro1">
          <table:table-cell office:value-type="float" office:value="732.847900390625">
            <text:p>732.8479003906</text:p>
          </table:table-cell>
          <table:table-cell office:value-type="float" office:value="-0.003806187">
            <text:p>-0.003806187</text:p>
          </table:table-cell>
          <table:table-cell table:number-columns-repeated="4"/>
        </table:table-row>
        <table:table-row table:style-name="ro1">
          <table:table-cell office:value-type="float" office:value="732.968139648438">
            <text:p>732.9681396484</text:p>
          </table:table-cell>
          <table:table-cell office:value-type="float" office:value="-0.002143952">
            <text:p>-0.002143952</text:p>
          </table:table-cell>
          <table:table-cell table:number-columns-repeated="4"/>
        </table:table-row>
        <table:table-row table:style-name="ro1">
          <table:table-cell office:value-type="float" office:value="733.08837890625">
            <text:p>733.0883789063</text:p>
          </table:table-cell>
          <table:table-cell office:value-type="float" office:value="-0.005484563">
            <text:p>-0.005484563</text:p>
          </table:table-cell>
          <table:table-cell table:number-columns-repeated="4"/>
        </table:table-row>
        <table:table-row table:style-name="ro1">
          <table:table-cell office:value-type="float" office:value="733.208679199219">
            <text:p>733.2086791992</text:p>
          </table:table-cell>
          <table:table-cell office:value-type="float" office:value="-0.008521277">
            <text:p>-0.008521277</text:p>
          </table:table-cell>
          <table:table-cell table:number-columns-repeated="4"/>
        </table:table-row>
        <table:table-row table:style-name="ro1">
          <table:table-cell office:value-type="float" office:value="733.328918457031">
            <text:p>733.328918457</text:p>
          </table:table-cell>
          <table:table-cell office:value-type="float" office:value="-0.003877764">
            <text:p>-0.003877764</text:p>
          </table:table-cell>
          <table:table-cell table:number-columns-repeated="4"/>
        </table:table-row>
        <table:table-row table:style-name="ro1">
          <table:table-cell office:value-type="float" office:value="733.449157714844">
            <text:p>733.4491577148</text:p>
          </table:table-cell>
          <table:table-cell office:value-type="float" office:value="-0.001250978">
            <text:p>-0.001250978</text:p>
          </table:table-cell>
          <table:table-cell table:number-columns-repeated="4"/>
        </table:table-row>
        <table:table-row table:style-name="ro1">
          <table:table-cell office:value-type="float" office:value="733.569396972656">
            <text:p>733.5693969727</text:p>
          </table:table-cell>
          <table:table-cell office:value-type="float" office:value="0.002062992">
            <text:p>0.002062992</text:p>
          </table:table-cell>
          <table:table-cell table:number-columns-repeated="4"/>
        </table:table-row>
        <table:table-row table:style-name="ro1">
          <table:table-cell office:value-type="float" office:value="733.689636230469">
            <text:p>733.6896362305</text:p>
          </table:table-cell>
          <table:table-cell office:value-type="float" office:value="-0.002751318">
            <text:p>-0.002751318</text:p>
          </table:table-cell>
          <table:table-cell table:number-columns-repeated="4"/>
        </table:table-row>
        <table:table-row table:style-name="ro1">
          <table:table-cell office:value-type="float" office:value="733.809936523438">
            <text:p>733.8099365234</text:p>
          </table:table-cell>
          <table:table-cell office:value-type="float" office:value="-0.001081789">
            <text:p>-0.001081789</text:p>
          </table:table-cell>
          <table:table-cell table:number-columns-repeated="4"/>
        </table:table-row>
        <table:table-row table:style-name="ro1">
          <table:table-cell office:value-type="float" office:value="733.93017578125">
            <text:p>733.9301757813</text:p>
          </table:table-cell>
          <table:table-cell office:value-type="float" office:value="0.006866451">
            <text:p>0.006866451</text:p>
          </table:table-cell>
          <table:table-cell table:number-columns-repeated="4"/>
        </table:table-row>
        <table:table-row table:style-name="ro1">
          <table:table-cell office:value-type="float" office:value="734.050415039063">
            <text:p>734.0504150391</text:p>
          </table:table-cell>
          <table:table-cell office:value-type="float" office:value="0.0008312922">
            <text:p>0.0008312922</text:p>
          </table:table-cell>
          <table:table-cell table:number-columns-repeated="4"/>
        </table:table-row>
        <table:table-row table:style-name="ro1">
          <table:table-cell office:value-type="float" office:value="734.170654296875">
            <text:p>734.1706542969</text:p>
          </table:table-cell>
          <table:table-cell office:value-type="float" office:value="0.006049385">
            <text:p>0.006049385</text:p>
          </table:table-cell>
          <table:table-cell table:number-columns-repeated="4"/>
        </table:table-row>
        <table:table-row table:style-name="ro1">
          <table:table-cell office:value-type="float" office:value="734.290893554688">
            <text:p>734.2908935547</text:p>
          </table:table-cell>
          <table:table-cell office:value-type="float" office:value="-0.007365116">
            <text:p>-0.007365116</text:p>
          </table:table-cell>
          <table:table-cell table:number-columns-repeated="4"/>
        </table:table-row>
        <table:table-row table:style-name="ro1">
          <table:table-cell office:value-type="float" office:value="734.4111328125">
            <text:p>734.4111328125</text:p>
          </table:table-cell>
          <table:table-cell office:value-type="float" office:value="-0.009549687">
            <text:p>-0.009549687</text:p>
          </table:table-cell>
          <table:table-cell table:number-columns-repeated="4"/>
        </table:table-row>
        <table:table-row table:style-name="ro1">
          <table:table-cell office:value-type="float" office:value="734.531433105469">
            <text:p>734.5314331055</text:p>
          </table:table-cell>
          <table:table-cell office:value-type="float" office:value="-0.002232895">
            <text:p>-0.002232895</text:p>
          </table:table-cell>
          <table:table-cell table:number-columns-repeated="4"/>
        </table:table-row>
        <table:table-row table:style-name="ro1">
          <table:table-cell office:value-type="float" office:value="734.651672363281">
            <text:p>734.6516723633</text:p>
          </table:table-cell>
          <table:table-cell office:value-type="float" office:value="0.005428861">
            <text:p>0.005428861</text:p>
          </table:table-cell>
          <table:table-cell table:number-columns-repeated="4"/>
        </table:table-row>
        <table:table-row table:style-name="ro1">
          <table:table-cell office:value-type="float" office:value="734.771911621094">
            <text:p>734.7719116211</text:p>
          </table:table-cell>
          <table:table-cell office:value-type="float" office:value="-0.0008457323">
            <text:p>-0.0008457323</text:p>
          </table:table-cell>
          <table:table-cell table:number-columns-repeated="4"/>
        </table:table-row>
        <table:table-row table:style-name="ro1">
          <table:table-cell office:value-type="float" office:value="734.892150878906">
            <text:p>734.8921508789</text:p>
          </table:table-cell>
          <table:table-cell office:value-type="float" office:value="-0.007605467">
            <text:p>-0.007605467</text:p>
          </table:table-cell>
          <table:table-cell table:number-columns-repeated="4"/>
        </table:table-row>
        <table:table-row table:style-name="ro1">
          <table:table-cell office:value-type="float" office:value="735.012451171875">
            <text:p>735.0124511719</text:p>
          </table:table-cell>
          <table:table-cell office:value-type="float" office:value="-0.006582703">
            <text:p>-0.006582703</text:p>
          </table:table-cell>
          <table:table-cell table:number-columns-repeated="4"/>
        </table:table-row>
        <table:table-row table:style-name="ro1">
          <table:table-cell office:value-type="float" office:value="735.132690429688">
            <text:p>735.1326904297</text:p>
          </table:table-cell>
          <table:table-cell office:value-type="float" office:value="-0.001171972">
            <text:p>-0.001171972</text:p>
          </table:table-cell>
          <table:table-cell table:number-columns-repeated="4"/>
        </table:table-row>
        <table:table-row table:style-name="ro1">
          <table:table-cell office:value-type="float" office:value="735.2529296875">
            <text:p>735.2529296875</text:p>
          </table:table-cell>
          <table:table-cell office:value-type="float" office:value="0.01770977">
            <text:p>0.01770977</text:p>
          </table:table-cell>
          <table:table-cell table:number-columns-repeated="4"/>
        </table:table-row>
        <table:table-row table:style-name="ro1">
          <table:table-cell office:value-type="float" office:value="735.373168945313">
            <text:p>735.3731689453</text:p>
          </table:table-cell>
          <table:table-cell office:value-type="float" office:value="0.003937132">
            <text:p>0.003937132</text:p>
          </table:table-cell>
          <table:table-cell table:number-columns-repeated="4"/>
        </table:table-row>
        <table:table-row table:style-name="ro1">
          <table:table-cell office:value-type="float" office:value="735.493408203125">
            <text:p>735.4934082031</text:p>
          </table:table-cell>
          <table:table-cell office:value-type="float" office:value="-0.001507866">
            <text:p>-0.001507866</text:p>
          </table:table-cell>
          <table:table-cell table:number-columns-repeated="4"/>
        </table:table-row>
        <table:table-row table:style-name="ro1">
          <table:table-cell office:value-type="float" office:value="735.613708496094">
            <text:p>735.6137084961</text:p>
          </table:table-cell>
          <table:table-cell office:value-type="float" office:value="0.00317519">
            <text:p>0.00317519</text:p>
          </table:table-cell>
          <table:table-cell table:number-columns-repeated="4"/>
        </table:table-row>
        <table:table-row table:style-name="ro1">
          <table:table-cell office:value-type="float" office:value="735.733947753906">
            <text:p>735.7339477539</text:p>
          </table:table-cell>
          <table:table-cell office:value-type="float" office:value="0.005349671">
            <text:p>0.005349671</text:p>
          </table:table-cell>
          <table:table-cell table:number-columns-repeated="4"/>
        </table:table-row>
        <table:table-row table:style-name="ro1">
          <table:table-cell office:value-type="float" office:value="735.854187011719">
            <text:p>735.8541870117</text:p>
          </table:table-cell>
          <table:table-cell office:value-type="float" office:value="0.008636107">
            <text:p>0.008636107</text:p>
          </table:table-cell>
          <table:table-cell table:number-columns-repeated="4"/>
        </table:table-row>
        <table:table-row table:style-name="ro1">
          <table:table-cell office:value-type="float" office:value="735.974426269531">
            <text:p>735.9744262695</text:p>
          </table:table-cell>
          <table:table-cell office:value-type="float" office:value="0.002625522">
            <text:p>0.002625522</text:p>
          </table:table-cell>
          <table:table-cell table:number-columns-repeated="4"/>
        </table:table-row>
        <table:table-row table:style-name="ro1">
          <table:table-cell office:value-type="float" office:value="736.094665527344">
            <text:p>736.0946655273</text:p>
          </table:table-cell>
          <table:table-cell office:value-type="float" office:value="0.003019633">
            <text:p>0.003019633</text:p>
          </table:table-cell>
          <table:table-cell table:number-columns-repeated="4"/>
        </table:table-row>
        <table:table-row table:style-name="ro1">
          <table:table-cell office:value-type="float" office:value="736.214965820313">
            <text:p>736.2149658203</text:p>
          </table:table-cell>
          <table:table-cell office:value-type="float" office:value="-0.006210044">
            <text:p>-0.006210044</text:p>
          </table:table-cell>
          <table:table-cell table:number-columns-repeated="4"/>
        </table:table-row>
        <table:table-row table:style-name="ro1">
          <table:table-cell office:value-type="float" office:value="736.335205078125">
            <text:p>736.3352050781</text:p>
          </table:table-cell>
          <table:table-cell office:value-type="float" office:value="0.000719509">
            <text:p>0.000719509</text:p>
          </table:table-cell>
          <table:table-cell table:number-columns-repeated="4"/>
        </table:table-row>
        <table:table-row table:style-name="ro1">
          <table:table-cell office:value-type="float" office:value="736.455444335938">
            <text:p>736.4554443359</text:p>
          </table:table-cell>
          <table:table-cell office:value-type="float" office:value="0.005191003">
            <text:p>0.005191003</text:p>
          </table:table-cell>
          <table:table-cell table:number-columns-repeated="4"/>
        </table:table-row>
        <table:table-row table:style-name="ro1">
          <table:table-cell office:value-type="float" office:value="736.57568359375">
            <text:p>736.5756835938</text:p>
          </table:table-cell>
          <table:table-cell office:value-type="float" office:value="0.003410092">
            <text:p>0.003410092</text:p>
          </table:table-cell>
          <table:table-cell table:number-columns-repeated="4"/>
        </table:table-row>
        <table:table-row table:style-name="ro1">
          <table:table-cell office:value-type="float" office:value="736.695983886719">
            <text:p>736.6959838867</text:p>
          </table:table-cell>
          <table:table-cell office:value-type="float" office:value="0.01198655">
            <text:p>0.01198655</text:p>
          </table:table-cell>
          <table:table-cell table:number-columns-repeated="4"/>
        </table:table-row>
        <table:table-row table:style-name="ro1">
          <table:table-cell office:value-type="float" office:value="736.816223144531">
            <text:p>736.8162231445</text:p>
          </table:table-cell>
          <table:table-cell office:value-type="float" office:value="0.007613282">
            <text:p>0.007613282</text:p>
          </table:table-cell>
          <table:table-cell table:number-columns-repeated="4"/>
        </table:table-row>
        <table:table-row table:style-name="ro1">
          <table:table-cell office:value-type="float" office:value="736.936462402344">
            <text:p>736.9364624023</text:p>
          </table:table-cell>
          <table:table-cell office:value-type="float" office:value="0.01080122">
            <text:p>0.01080122</text:p>
          </table:table-cell>
          <table:table-cell table:number-columns-repeated="4"/>
        </table:table-row>
        <table:table-row table:style-name="ro1">
          <table:table-cell office:value-type="float" office:value="737.056701660156">
            <text:p>737.0567016602</text:p>
          </table:table-cell>
          <table:table-cell office:value-type="float" office:value="-0.0006534734">
            <text:p>-0.0006534734</text:p>
          </table:table-cell>
          <table:table-cell table:number-columns-repeated="4"/>
        </table:table-row>
        <table:table-row table:style-name="ro1">
          <table:table-cell office:value-type="float" office:value="737.177001953125">
            <text:p>737.1770019531</text:p>
          </table:table-cell>
          <table:table-cell office:value-type="float" office:value="0.004599835">
            <text:p>0.004599835</text:p>
          </table:table-cell>
          <table:table-cell table:number-columns-repeated="4"/>
        </table:table-row>
        <table:table-row table:style-name="ro1">
          <table:table-cell office:value-type="float" office:value="737.297241210938">
            <text:p>737.2972412109</text:p>
          </table:table-cell>
          <table:table-cell office:value-type="float" office:value="0.005585133">
            <text:p>0.005585133</text:p>
          </table:table-cell>
          <table:table-cell table:number-columns-repeated="4"/>
        </table:table-row>
        <table:table-row table:style-name="ro1">
          <table:table-cell office:value-type="float" office:value="737.41748046875">
            <text:p>737.4174804688</text:p>
          </table:table-cell>
          <table:table-cell office:value-type="float" office:value="0.003750761">
            <text:p>0.003750761</text:p>
          </table:table-cell>
          <table:table-cell table:number-columns-repeated="4"/>
        </table:table-row>
        <table:table-row table:style-name="ro1">
          <table:table-cell office:value-type="float" office:value="737.537719726563">
            <text:p>737.5377197266</text:p>
          </table:table-cell>
          <table:table-cell office:value-type="float" office:value="0.003644883">
            <text:p>0.003644883</text:p>
          </table:table-cell>
          <table:table-cell table:number-columns-repeated="4"/>
        </table:table-row>
        <table:table-row table:style-name="ro1">
          <table:table-cell office:value-type="float" office:value="737.658020019531">
            <text:p>737.6580200195</text:p>
          </table:table-cell>
          <table:table-cell office:value-type="float" office:value="-0.0083458">
            <text:p>-0.0083458</text:p>
          </table:table-cell>
          <table:table-cell table:number-columns-repeated="4"/>
        </table:table-row>
        <table:table-row table:style-name="ro1">
          <table:table-cell office:value-type="float" office:value="737.778259277344">
            <text:p>737.7782592773</text:p>
          </table:table-cell>
          <table:table-cell office:value-type="float" office:value="0.004929548">
            <text:p>0.004929548</text:p>
          </table:table-cell>
          <table:table-cell table:number-columns-repeated="4"/>
        </table:table-row>
        <table:table-row table:style-name="ro1">
          <table:table-cell office:value-type="float" office:value="737.898498535156">
            <text:p>737.8984985352</text:p>
          </table:table-cell>
          <table:table-cell office:value-type="float" office:value="0.002106727">
            <text:p>0.002106727</text:p>
          </table:table-cell>
          <table:table-cell table:number-columns-repeated="4"/>
        </table:table-row>
        <table:table-row table:style-name="ro1">
          <table:table-cell office:value-type="float" office:value="738.018737792969">
            <text:p>738.018737793</text:p>
          </table:table-cell>
          <table:table-cell office:value-type="float" office:value="0.004652026">
            <text:p>0.004652026</text:p>
          </table:table-cell>
          <table:table-cell table:number-columns-repeated="4"/>
        </table:table-row>
        <table:table-row table:style-name="ro1">
          <table:table-cell office:value-type="float" office:value="738.139038085938">
            <text:p>738.1390380859</text:p>
          </table:table-cell>
          <table:table-cell office:value-type="float" office:value="0.00454322">
            <text:p>0.00454322</text:p>
          </table:table-cell>
          <table:table-cell table:number-columns-repeated="4"/>
        </table:table-row>
        <table:table-row table:style-name="ro1">
          <table:table-cell office:value-type="float" office:value="738.25927734375">
            <text:p>738.2592773438</text:p>
          </table:table-cell>
          <table:table-cell office:value-type="float" office:value="-0.002288834">
            <text:p>-0.002288834</text:p>
          </table:table-cell>
          <table:table-cell table:number-columns-repeated="4"/>
        </table:table-row>
        <table:table-row table:style-name="ro1">
          <table:table-cell office:value-type="float" office:value="738.379516601563">
            <text:p>738.3795166016</text:p>
          </table:table-cell>
          <table:table-cell office:value-type="float" office:value="0.01465216">
            <text:p>0.01465216</text:p>
          </table:table-cell>
          <table:table-cell table:number-columns-repeated="4"/>
        </table:table-row>
        <table:table-row table:style-name="ro1">
          <table:table-cell office:value-type="float" office:value="738.499755859375">
            <text:p>738.4997558594</text:p>
          </table:table-cell>
          <table:table-cell office:value-type="float" office:value="0.004959431">
            <text:p>0.004959431</text:p>
          </table:table-cell>
          <table:table-cell table:number-columns-repeated="4"/>
        </table:table-row>
        <table:table-row table:style-name="ro1">
          <table:table-cell office:value-type="float" office:value="738.620056152344">
            <text:p>738.6200561523</text:p>
          </table:table-cell>
          <table:table-cell office:value-type="float" office:value="-0.004759015">
            <text:p>-0.004759015</text:p>
          </table:table-cell>
          <table:table-cell table:number-columns-repeated="4"/>
        </table:table-row>
        <table:table-row table:style-name="ro1">
          <table:table-cell office:value-type="float" office:value="738.740295410156">
            <text:p>738.7402954102</text:p>
          </table:table-cell>
          <table:table-cell office:value-type="float" office:value="-0.001804231">
            <text:p>-0.001804231</text:p>
          </table:table-cell>
          <table:table-cell table:number-columns-repeated="4"/>
        </table:table-row>
        <table:table-row table:style-name="ro1">
          <table:table-cell office:value-type="float" office:value="738.860534667969">
            <text:p>738.860534668</text:p>
          </table:table-cell>
          <table:table-cell office:value-type="float" office:value="-0.0054452">
            <text:p>-0.0054452</text:p>
          </table:table-cell>
          <table:table-cell table:number-columns-repeated="4"/>
        </table:table-row>
        <table:table-row table:style-name="ro1">
          <table:table-cell office:value-type="float" office:value="738.980773925781">
            <text:p>738.9807739258</text:p>
          </table:table-cell>
          <table:table-cell office:value-type="float" office:value="0.01204968">
            <text:p>0.01204968</text:p>
          </table:table-cell>
          <table:table-cell table:number-columns-repeated="4"/>
        </table:table-row>
        <table:table-row table:style-name="ro1">
          <table:table-cell office:value-type="float" office:value="739.10107421875">
            <text:p>739.1010742188</text:p>
          </table:table-cell>
          <table:table-cell office:value-type="float" office:value="-0.002934093">
            <text:p>-0.002934093</text:p>
          </table:table-cell>
          <table:table-cell table:number-columns-repeated="4"/>
        </table:table-row>
        <table:table-row table:style-name="ro1">
          <table:table-cell office:value-type="float" office:value="739.221313476563">
            <text:p>739.2213134766</text:p>
          </table:table-cell>
          <table:table-cell office:value-type="float" office:value="0.007838189">
            <text:p>0.007838189</text:p>
          </table:table-cell>
          <table:table-cell table:number-columns-repeated="4"/>
        </table:table-row>
        <table:table-row table:style-name="ro1">
          <table:table-cell office:value-type="float" office:value="739.341552734375">
            <text:p>739.3415527344</text:p>
          </table:table-cell>
          <table:table-cell office:value-type="float" office:value="0.0001392403">
            <text:p>0.0001392403</text:p>
          </table:table-cell>
          <table:table-cell table:number-columns-repeated="4"/>
        </table:table-row>
        <table:table-row table:style-name="ro1">
          <table:table-cell office:value-type="float" office:value="739.461791992188">
            <text:p>739.4617919922</text:p>
          </table:table-cell>
          <table:table-cell office:value-type="float" office:value="0.0001869727">
            <text:p>0.0001869727</text:p>
          </table:table-cell>
          <table:table-cell table:number-columns-repeated="4"/>
        </table:table-row>
        <table:table-row table:style-name="ro1">
          <table:table-cell office:value-type="float" office:value="739.582092285156">
            <text:p>739.5820922852</text:p>
          </table:table-cell>
          <table:table-cell office:value-type="float" office:value="-0.004446852">
            <text:p>-0.004446852</text:p>
          </table:table-cell>
          <table:table-cell table:number-columns-repeated="4"/>
        </table:table-row>
        <table:table-row table:style-name="ro1">
          <table:table-cell office:value-type="float" office:value="739.702331542969">
            <text:p>739.702331543</text:p>
          </table:table-cell>
          <table:table-cell office:value-type="float" office:value="-0.010832">
            <text:p>-0.010832</text:p>
          </table:table-cell>
          <table:table-cell table:number-columns-repeated="4"/>
        </table:table-row>
        <table:table-row table:style-name="ro1">
          <table:table-cell office:value-type="float" office:value="739.822570800781">
            <text:p>739.8225708008</text:p>
          </table:table-cell>
          <table:table-cell office:value-type="float" office:value="-0.003171968">
            <text:p>-0.003171968</text:p>
          </table:table-cell>
          <table:table-cell table:number-columns-repeated="4"/>
        </table:table-row>
        <table:table-row table:style-name="ro1">
          <table:table-cell office:value-type="float" office:value="739.942810058594">
            <text:p>739.9428100586</text:p>
          </table:table-cell>
          <table:table-cell office:value-type="float" office:value="-0.01062759">
            <text:p>-0.01062759</text:p>
          </table:table-cell>
          <table:table-cell table:number-columns-repeated="4"/>
        </table:table-row>
        <table:table-row table:style-name="ro1">
          <table:table-cell office:value-type="float" office:value="740.063110351563">
            <text:p>740.0631103516</text:p>
          </table:table-cell>
          <table:table-cell office:value-type="float" office:value="-0.004471465">
            <text:p>-0.004471465</text:p>
          </table:table-cell>
          <table:table-cell table:number-columns-repeated="4"/>
        </table:table-row>
        <table:table-row table:style-name="ro1">
          <table:table-cell office:value-type="float" office:value="740.183349609375">
            <text:p>740.1833496094</text:p>
          </table:table-cell>
          <table:table-cell office:value-type="float" office:value="-0.003319074">
            <text:p>-0.003319074</text:p>
          </table:table-cell>
          <table:table-cell table:number-columns-repeated="4"/>
        </table:table-row>
        <table:table-row table:style-name="ro1">
          <table:table-cell office:value-type="float" office:value="740.303588867188">
            <text:p>740.3035888672</text:p>
          </table:table-cell>
          <table:table-cell office:value-type="float" office:value="-0.001759241">
            <text:p>-0.001759241</text:p>
          </table:table-cell>
          <table:table-cell table:number-columns-repeated="4"/>
        </table:table-row>
        <table:table-row table:style-name="ro1">
          <table:table-cell office:value-type="float" office:value="740.423889160156">
            <text:p>740.4238891602</text:p>
          </table:table-cell>
          <table:table-cell office:value-type="float" office:value="0.009361626">
            <text:p>0.009361626</text:p>
          </table:table-cell>
          <table:table-cell table:number-columns-repeated="4"/>
        </table:table-row>
        <table:table-row table:style-name="ro1">
          <table:table-cell office:value-type="float" office:value="740.544128417969">
            <text:p>740.544128418</text:p>
          </table:table-cell>
          <table:table-cell office:value-type="float" office:value="0.01330029">
            <text:p>0.01330029</text:p>
          </table:table-cell>
          <table:table-cell table:number-columns-repeated="4"/>
        </table:table-row>
        <table:table-row table:style-name="ro1">
          <table:table-cell office:value-type="float" office:value="740.664367675781">
            <text:p>740.6643676758</text:p>
          </table:table-cell>
          <table:table-cell office:value-type="float" office:value="-0.007786127">
            <text:p>-0.007786127</text:p>
          </table:table-cell>
          <table:table-cell table:number-columns-repeated="4"/>
        </table:table-row>
        <table:table-row table:style-name="ro1">
          <table:table-cell office:value-type="float" office:value="740.784606933594">
            <text:p>740.7846069336</text:p>
          </table:table-cell>
          <table:table-cell office:value-type="float" office:value="0.008815344">
            <text:p>0.008815344</text:p>
          </table:table-cell>
          <table:table-cell table:number-columns-repeated="4"/>
        </table:table-row>
        <table:table-row table:style-name="ro1">
          <table:table-cell office:value-type="float" office:value="740.904907226563">
            <text:p>740.9049072266</text:p>
          </table:table-cell>
          <table:table-cell office:value-type="float" office:value="0.0006252871">
            <text:p>0.0006252871</text:p>
          </table:table-cell>
          <table:table-cell table:number-columns-repeated="4"/>
        </table:table-row>
        <table:table-row table:style-name="ro1">
          <table:table-cell office:value-type="float" office:value="741.025146484375">
            <text:p>741.0251464844</text:p>
          </table:table-cell>
          <table:table-cell office:value-type="float" office:value="-0.006956109">
            <text:p>-0.006956109</text:p>
          </table:table-cell>
          <table:table-cell table:number-columns-repeated="4"/>
        </table:table-row>
        <table:table-row table:style-name="ro1">
          <table:table-cell office:value-type="float" office:value="741.145385742188">
            <text:p>741.1453857422</text:p>
          </table:table-cell>
          <table:table-cell office:value-type="float" office:value="-0.005377127">
            <text:p>-0.005377127</text:p>
          </table:table-cell>
          <table:table-cell table:number-columns-repeated="4"/>
        </table:table-row>
        <table:table-row table:style-name="ro1">
          <table:table-cell office:value-type="float" office:value="741.265625">
            <text:p>741.265625</text:p>
          </table:table-cell>
          <table:table-cell office:value-type="float" office:value="0.02303711">
            <text:p>0.02303711</text:p>
          </table:table-cell>
          <table:table-cell table:number-columns-repeated="4"/>
        </table:table-row>
        <table:table-row table:style-name="ro1">
          <table:table-cell office:value-type="float" office:value="741.385925292969">
            <text:p>741.385925293</text:p>
          </table:table-cell>
          <table:table-cell office:value-type="float" office:value="-0.006359055">
            <text:p>-0.006359055</text:p>
          </table:table-cell>
          <table:table-cell table:number-columns-repeated="4"/>
        </table:table-row>
        <table:table-row table:style-name="ro1">
          <table:table-cell office:value-type="float" office:value="741.506164550781">
            <text:p>741.5061645508</text:p>
          </table:table-cell>
          <table:table-cell office:value-type="float" office:value="-0.0004662034">
            <text:p>-0.0004662034</text:p>
          </table:table-cell>
          <table:table-cell table:number-columns-repeated="4"/>
        </table:table-row>
        <table:table-row table:style-name="ro1">
          <table:table-cell office:value-type="float" office:value="741.626403808594">
            <text:p>741.6264038086</text:p>
          </table:table-cell>
          <table:table-cell office:value-type="float" office:value="0.008114714">
            <text:p>0.008114714</text:p>
          </table:table-cell>
          <table:table-cell table:number-columns-repeated="4"/>
        </table:table-row>
        <table:table-row table:style-name="ro1">
          <table:table-cell office:value-type="float" office:value="741.746704101563">
            <text:p>741.7467041016</text:p>
          </table:table-cell>
          <table:table-cell office:value-type="float" office:value="-0.0007460083">
            <text:p>-0.0007460083</text:p>
          </table:table-cell>
          <table:table-cell table:number-columns-repeated="4"/>
        </table:table-row>
        <table:table-row table:style-name="ro1">
          <table:table-cell office:value-type="float" office:value="741.866943359375">
            <text:p>741.8669433594</text:p>
          </table:table-cell>
          <table:table-cell office:value-type="float" office:value="0.01807014">
            <text:p>0.01807014</text:p>
          </table:table-cell>
          <table:table-cell table:number-columns-repeated="4"/>
        </table:table-row>
        <table:table-row table:style-name="ro1">
          <table:table-cell office:value-type="float" office:value="741.987182617188">
            <text:p>741.9871826172</text:p>
          </table:table-cell>
          <table:table-cell office:value-type="float" office:value="-0.002856797">
            <text:p>-0.002856797</text:p>
          </table:table-cell>
          <table:table-cell table:number-columns-repeated="4"/>
        </table:table-row>
        <table:table-row table:style-name="ro1">
          <table:table-cell office:value-type="float" office:value="742.107421875">
            <text:p>742.107421875</text:p>
          </table:table-cell>
          <table:table-cell office:value-type="float" office:value="0.005488954">
            <text:p>0.005488954</text:p>
          </table:table-cell>
          <table:table-cell table:number-columns-repeated="4"/>
        </table:table-row>
        <table:table-row table:style-name="ro1">
          <table:table-cell office:value-type="float" office:value="742.227722167969">
            <text:p>742.227722168</text:p>
          </table:table-cell>
          <table:table-cell office:value-type="float" office:value="0.007592935">
            <text:p>0.007592935</text:p>
          </table:table-cell>
          <table:table-cell table:number-columns-repeated="4"/>
        </table:table-row>
        <table:table-row table:style-name="ro1">
          <table:table-cell office:value-type="float" office:value="742.347961425781">
            <text:p>742.3479614258</text:p>
          </table:table-cell>
          <table:table-cell office:value-type="float" office:value="0.0016598">
            <text:p>0.0016598</text:p>
          </table:table-cell>
          <table:table-cell table:number-columns-repeated="4"/>
        </table:table-row>
        <table:table-row table:style-name="ro1">
          <table:table-cell office:value-type="float" office:value="742.468200683594">
            <text:p>742.4682006836</text:p>
          </table:table-cell>
          <table:table-cell office:value-type="float" office:value="-0.005604157">
            <text:p>-0.005604157</text:p>
          </table:table-cell>
          <table:table-cell table:number-columns-repeated="4"/>
        </table:table-row>
        <table:table-row table:style-name="ro1">
          <table:table-cell office:value-type="float" office:value="742.588439941406">
            <text:p>742.5884399414</text:p>
          </table:table-cell>
          <table:table-cell office:value-type="float" office:value="-0.000822446">
            <text:p>-0.000822446</text:p>
          </table:table-cell>
          <table:table-cell table:number-columns-repeated="4"/>
        </table:table-row>
        <table:table-row table:style-name="ro1">
          <table:table-cell office:value-type="float" office:value="742.708740234375">
            <text:p>742.7087402344</text:p>
          </table:table-cell>
          <table:table-cell office:value-type="float" office:value="-0.002800248">
            <text:p>-0.002800248</text:p>
          </table:table-cell>
          <table:table-cell table:number-columns-repeated="4"/>
        </table:table-row>
        <table:table-row table:style-name="ro1">
          <table:table-cell office:value-type="float" office:value="742.828979492188">
            <text:p>742.8289794922</text:p>
          </table:table-cell>
          <table:table-cell office:value-type="float" office:value="-0.003666008">
            <text:p>-0.003666008</text:p>
          </table:table-cell>
          <table:table-cell table:number-columns-repeated="4"/>
        </table:table-row>
        <table:table-row table:style-name="ro1">
          <table:table-cell office:value-type="float" office:value="742.94921875">
            <text:p>742.94921875</text:p>
          </table:table-cell>
          <table:table-cell office:value-type="float" office:value="0.004711824">
            <text:p>0.004711824</text:p>
          </table:table-cell>
          <table:table-cell table:number-columns-repeated="4"/>
        </table:table-row>
        <table:table-row table:style-name="ro1">
          <table:table-cell office:value-type="float" office:value="743.069519042969">
            <text:p>743.069519043</text:p>
          </table:table-cell>
          <table:table-cell office:value-type="float" office:value="0.01225116">
            <text:p>0.01225116</text:p>
          </table:table-cell>
          <table:table-cell table:number-columns-repeated="4"/>
        </table:table-row>
        <table:table-row table:style-name="ro1">
          <table:table-cell office:value-type="float" office:value="743.189758300781">
            <text:p>743.1897583008</text:p>
          </table:table-cell>
          <table:table-cell office:value-type="float" office:value="0.001644346">
            <text:p>0.001644346</text:p>
          </table:table-cell>
          <table:table-cell table:number-columns-repeated="4"/>
        </table:table-row>
        <table:table-row table:style-name="ro1">
          <table:table-cell office:value-type="float" office:value="743.309997558594">
            <text:p>743.3099975586</text:p>
          </table:table-cell>
          <table:table-cell office:value-type="float" office:value="-0.01006322">
            <text:p>-0.01006322</text:p>
          </table:table-cell>
          <table:table-cell table:number-columns-repeated="4"/>
        </table:table-row>
        <table:table-row table:style-name="ro1">
          <table:table-cell office:value-type="float" office:value="743.430236816406">
            <text:p>743.4302368164</text:p>
          </table:table-cell>
          <table:table-cell office:value-type="float" office:value="0.003095068">
            <text:p>0.003095068</text:p>
          </table:table-cell>
          <table:table-cell table:number-columns-repeated="4"/>
        </table:table-row>
        <table:table-row table:style-name="ro1">
          <table:table-cell office:value-type="float" office:value="743.550537109375">
            <text:p>743.5505371094</text:p>
          </table:table-cell>
          <table:table-cell office:value-type="float" office:value="-0.009058437">
            <text:p>-0.009058437</text:p>
          </table:table-cell>
          <table:table-cell table:number-columns-repeated="4"/>
        </table:table-row>
        <table:table-row table:style-name="ro1">
          <table:table-cell office:value-type="float" office:value="743.670776367188">
            <text:p>743.6707763672</text:p>
          </table:table-cell>
          <table:table-cell office:value-type="float" office:value="-0.006312653">
            <text:p>-0.006312653</text:p>
          </table:table-cell>
          <table:table-cell table:number-columns-repeated="4"/>
        </table:table-row>
        <table:table-row table:style-name="ro1">
          <table:table-cell office:value-type="float" office:value="743.791015625">
            <text:p>743.791015625</text:p>
          </table:table-cell>
          <table:table-cell office:value-type="float" office:value="-0.007240695">
            <text:p>-0.007240695</text:p>
          </table:table-cell>
          <table:table-cell table:number-columns-repeated="4"/>
        </table:table-row>
        <table:table-row table:style-name="ro1">
          <table:table-cell office:value-type="float" office:value="743.911254882813">
            <text:p>743.9112548828</text:p>
          </table:table-cell>
          <table:table-cell office:value-type="float" office:value="0.03127024">
            <text:p>0.03127024</text:p>
          </table:table-cell>
          <table:table-cell table:number-columns-repeated="4"/>
        </table:table-row>
        <table:table-row table:style-name="ro1">
          <table:table-cell office:value-type="float" office:value="744.031555175781">
            <text:p>744.0315551758</text:p>
          </table:table-cell>
          <table:table-cell office:value-type="float" office:value="-0.007922564">
            <text:p>-0.007922564</text:p>
          </table:table-cell>
          <table:table-cell table:number-columns-repeated="4"/>
        </table:table-row>
        <table:table-row table:style-name="ro1">
          <table:table-cell office:value-type="float" office:value="744.151794433594">
            <text:p>744.1517944336</text:p>
          </table:table-cell>
          <table:table-cell office:value-type="float" office:value="-0.05800999">
            <text:p>-0.05800999</text:p>
          </table:table-cell>
          <table:table-cell table:number-columns-repeated="4"/>
        </table:table-row>
        <table:table-row table:style-name="ro1">
          <table:table-cell office:value-type="float" office:value="744.272033691406">
            <text:p>744.2720336914</text:p>
          </table:table-cell>
          <table:table-cell office:value-type="float" office:value="-0.0596058">
            <text:p>-0.0596058</text:p>
          </table:table-cell>
          <table:table-cell table:number-columns-repeated="4"/>
        </table:table-row>
        <table:table-row table:style-name="ro1">
          <table:table-cell office:value-type="float" office:value="744.392333984375">
            <text:p>744.3923339844</text:p>
          </table:table-cell>
          <table:table-cell office:value-type="float" office:value="-0.06142367">
            <text:p>-0.06142367</text:p>
          </table:table-cell>
          <table:table-cell table:number-columns-repeated="4"/>
        </table:table-row>
        <table:table-row table:style-name="ro1">
          <table:table-cell office:value-type="float" office:value="744.512573242188">
            <text:p>744.5125732422</text:p>
          </table:table-cell>
          <table:table-cell office:value-type="float" office:value="-0.06115067">
            <text:p>-0.06115067</text:p>
          </table:table-cell>
          <table:table-cell table:number-columns-repeated="4"/>
        </table:table-row>
        <table:table-row table:style-name="ro1">
          <table:table-cell office:value-type="float" office:value="744.6328125">
            <text:p>744.6328125</text:p>
          </table:table-cell>
          <table:table-cell office:value-type="float" office:value="-0.0623581">
            <text:p>-0.0623581</text:p>
          </table:table-cell>
          <table:table-cell table:number-columns-repeated="4"/>
        </table:table-row>
        <table:table-row table:style-name="ro1">
          <table:table-cell office:value-type="float" office:value="744.753051757813">
            <text:p>744.7530517578</text:p>
          </table:table-cell>
          <table:table-cell office:value-type="float" office:value="-0.06214746">
            <text:p>-0.0621474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9">06/29/2026</text:date>, <text:time>12:4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9T12:04:29.74</meta:creation-date>
    <dc:date>2026-06-29T12:49:11</dc:date>
    <meta:editing-duration>PT7M20S</meta:editing-duration>
    <meta:editing-cycles>1</meta:editing-cycles>
    <meta:generator>OpenOffice/4.1.10$Win32 OpenOffice.org_project/4110m2$Build-9807</meta:generator>
    <meta:document-statistic meta:table-count="3" meta:cell-count="7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3cm" svg:y="4.188cm" style:legend-expansion="high" chart:style-name="ch2"/>
        <chart:plot-area chart:style-name="ch3" table:cell-range-address="Sheet1.A1:Sheet1.B3649" chart:data-source-has-labels="row" svg:x="0.77cm" svg:y="0.855cm" svg:width="11.983cm" svg:height="7.545cm">
          <chartooo:coordinate-region svg:x="1.788cm" svg:y="1.067cm" svg:width="10.68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49" chart:label-cell-address="Sheet1.B1:Sheet1.B1" chart:class="chart:scatter">
            <chart:domain table:cell-range-address="Sheet1.A2:Sheet1.A3649"/>
            <chart:data-point chart:repeated="3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[Intensity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.5908203125">
                <text:p>321.5908203125</text:p>
                <draw:g>
                  <svg:desc>Sheet1.A2:Sheet1.A3649</svg:desc>
                </draw:g>
              </table:table-cell>
              <table:table-cell office:value-type="float" office:value="0.006633598">
                <text:p>0.006633598</text:p>
                <draw:g>
                  <svg:desc>Sheet1.B2:Sheet1.B3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1.698333740234">
                <text:p>321.698333740234</text:p>
              </table:table-cell>
              <table:table-cell office:value-type="float" office:value="0.002889248">
                <text:p>0.002889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805877685547">
                <text:p>321.805877685547</text:p>
              </table:table-cell>
              <table:table-cell office:value-type="float" office:value="0.003788146">
                <text:p>0.003788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913421630859">
                <text:p>321.913421630859</text:p>
              </table:table-cell>
              <table:table-cell office:value-type="float" office:value="0.01283257">
                <text:p>0.01283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2.020965576172">
                <text:p>322.020965576172</text:p>
              </table:table-cell>
              <table:table-cell office:value-type="float" office:value="0.008145528">
                <text:p>0.008145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128540039063">
                <text:p>322.128540039063</text:p>
              </table:table-cell>
              <table:table-cell office:value-type="float" office:value="0.00460327">
                <text:p>0.00460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.236083984375">
                <text:p>322.236083984375</text:p>
              </table:table-cell>
              <table:table-cell office:value-type="float" office:value="0.01709387">
                <text:p>0.01709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.343658447266">
                <text:p>322.343658447266</text:p>
              </table:table-cell>
              <table:table-cell office:value-type="float" office:value="-0.001533004">
                <text:p>-0.001533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451232910156">
                <text:p>322.451232910156</text:p>
              </table:table-cell>
              <table:table-cell office:value-type="float" office:value="-0.0003246236">
                <text:p>-0.0003246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.558837890625">
                <text:p>322.558837890625</text:p>
              </table:table-cell>
              <table:table-cell office:value-type="float" office:value="0.006966604">
                <text:p>0.006966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666412353516">
                <text:p>322.666412353516</text:p>
              </table:table-cell>
              <table:table-cell office:value-type="float" office:value="0.009895044">
                <text:p>0.009895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774017333984">
                <text:p>322.774017333984</text:p>
              </table:table-cell>
              <table:table-cell office:value-type="float" office:value="0.01197758">
                <text:p>0.01197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.881622314453">
                <text:p>322.881622314453</text:p>
              </table:table-cell>
              <table:table-cell office:value-type="float" office:value="-0.002711107">
                <text:p>-0.002711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.989227294922">
                <text:p>322.989227294922</text:p>
              </table:table-cell>
              <table:table-cell office:value-type="float" office:value="0.003110009">
                <text:p>0.003110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.096862792969">
                <text:p>323.096862792969</text:p>
              </table:table-cell>
              <table:table-cell office:value-type="float" office:value="0.001061948">
                <text:p>0.001061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.204498291016">
                <text:p>323.204498291016</text:p>
              </table:table-cell>
              <table:table-cell office:value-type="float" office:value="0.006604338">
                <text:p>0.0066043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312133789063">
                <text:p>323.312133789063</text:p>
              </table:table-cell>
              <table:table-cell office:value-type="float" office:value="-0.002226956">
                <text:p>-0.002226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.419769287109">
                <text:p>323.419769287109</text:p>
              </table:table-cell>
              <table:table-cell office:value-type="float" office:value="0.003827022">
                <text:p>0.003827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.527404785156">
                <text:p>323.527404785156</text:p>
              </table:table-cell>
              <table:table-cell office:value-type="float" office:value="0.04100899">
                <text:p>0.041008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635070800781">
                <text:p>323.635070800781</text:p>
              </table:table-cell>
              <table:table-cell office:value-type="float" office:value="-0.006658774">
                <text:p>-0.006658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.742736816406">
                <text:p>323.742736816406</text:p>
              </table:table-cell>
              <table:table-cell office:value-type="float" office:value="-0.003551021">
                <text:p>-0.003551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.850402832031">
                <text:p>323.850402832031</text:p>
              </table:table-cell>
              <table:table-cell office:value-type="float" office:value="0.0118152">
                <text:p>0.0118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958068847656">
                <text:p>323.958068847656</text:p>
              </table:table-cell>
              <table:table-cell office:value-type="float" office:value="0.01911346">
                <text:p>0.01911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065765380859">
                <text:p>324.065765380859</text:p>
              </table:table-cell>
              <table:table-cell office:value-type="float" office:value="-0.001240793">
                <text:p>-0.0012407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.173461914063">
                <text:p>324.173461914063</text:p>
              </table:table-cell>
              <table:table-cell office:value-type="float" office:value="-0.005823247">
                <text:p>-0.0058232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.281158447266">
                <text:p>324.281158447266</text:p>
              </table:table-cell>
              <table:table-cell office:value-type="float" office:value="0.004437591">
                <text:p>0.0044375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388854980469">
                <text:p>324.388854980469</text:p>
              </table:table-cell>
              <table:table-cell office:value-type="float" office:value="-0.003818965">
                <text:p>-0.0038189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.496551513672">
                <text:p>324.496551513672</text:p>
              </table:table-cell>
              <table:table-cell office:value-type="float" office:value="0.003352616">
                <text:p>0.003352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.604278564453">
                <text:p>324.604278564453</text:p>
              </table:table-cell>
              <table:table-cell office:value-type="float" office:value="0.00821708">
                <text:p>0.008217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712005615234">
                <text:p>324.712005615234</text:p>
              </table:table-cell>
              <table:table-cell office:value-type="float" office:value="0.003592107">
                <text:p>0.003592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.819732666016">
                <text:p>324.819732666016</text:p>
              </table:table-cell>
              <table:table-cell office:value-type="float" office:value="0.001369642">
                <text:p>0.0013696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4.927490234375">
                <text:p>324.927490234375</text:p>
              </table:table-cell>
              <table:table-cell office:value-type="float" office:value="0.01689675">
                <text:p>0.016896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5.035217285156">
                <text:p>325.035217285156</text:p>
              </table:table-cell>
              <table:table-cell office:value-type="float" office:value="-0.008480207">
                <text:p>-0.0084802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.142974853516">
                <text:p>325.142974853516</text:p>
              </table:table-cell>
              <table:table-cell office:value-type="float" office:value="0.001833447">
                <text:p>0.001833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.250732421875">
                <text:p>325.250732421875</text:p>
              </table:table-cell>
              <table:table-cell office:value-type="float" office:value="0.0008489772">
                <text:p>0.0008489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.358489990234">
                <text:p>325.358489990234</text:p>
              </table:table-cell>
              <table:table-cell office:value-type="float" office:value="-0.003776472">
                <text:p>-0.0037764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.466278076172">
                <text:p>325.466278076172</text:p>
              </table:table-cell>
              <table:table-cell office:value-type="float" office:value="0.002519314">
                <text:p>0.0025193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.574066162109">
                <text:p>325.574066162109</text:p>
              </table:table-cell>
              <table:table-cell office:value-type="float" office:value="0.005526546">
                <text:p>0.0055265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.681854248047">
                <text:p>325.681854248047</text:p>
              </table:table-cell>
              <table:table-cell office:value-type="float" office:value="0.003862127">
                <text:p>0.003862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.789642333984">
                <text:p>325.789642333984</text:p>
              </table:table-cell>
              <table:table-cell office:value-type="float" office:value="0.005610921">
                <text:p>0.0056109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.897430419922">
                <text:p>325.897430419922</text:p>
              </table:table-cell>
              <table:table-cell office:value-type="float" office:value="0.00386668">
                <text:p>0.003866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6.005249023438">
                <text:p>326.005249023438</text:p>
              </table:table-cell>
              <table:table-cell office:value-type="float" office:value="0.001509076">
                <text:p>0.001509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113067626953">
                <text:p>326.113067626953</text:p>
              </table:table-cell>
              <table:table-cell office:value-type="float" office:value="0.008136901">
                <text:p>0.008136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6.220886230469">
                <text:p>326.220886230469</text:p>
              </table:table-cell>
              <table:table-cell office:value-type="float" office:value="0.01740996">
                <text:p>0.017409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.328704833984">
                <text:p>326.328704833984</text:p>
              </table:table-cell>
              <table:table-cell office:value-type="float" office:value="-0.004520986">
                <text:p>-0.0045209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.436553955078">
                <text:p>326.436553955078</text:p>
              </table:table-cell>
              <table:table-cell office:value-type="float" office:value="0.009940187">
                <text:p>0.0099401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.544403076172">
                <text:p>326.544403076172</text:p>
              </table:table-cell>
              <table:table-cell office:value-type="float" office:value="0.0244963">
                <text:p>0.02449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.652252197266">
                <text:p>326.652252197266</text:p>
              </table:table-cell>
              <table:table-cell office:value-type="float" office:value="0.01856223">
                <text:p>0.01856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.760101318359">
                <text:p>326.760101318359</text:p>
              </table:table-cell>
              <table:table-cell office:value-type="float" office:value="0.005699103">
                <text:p>0.005699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.867950439453">
                <text:p>326.867950439453</text:p>
              </table:table-cell>
              <table:table-cell office:value-type="float" office:value="0.009738255">
                <text:p>0.0097382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.975830078125">
                <text:p>326.975830078125</text:p>
              </table:table-cell>
              <table:table-cell office:value-type="float" office:value="0.003988258">
                <text:p>0.0039882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.083709716797">
                <text:p>327.083709716797</text:p>
              </table:table-cell>
              <table:table-cell office:value-type="float" office:value="0.007029164">
                <text:p>0.007029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.191589355469">
                <text:p>327.191589355469</text:p>
              </table:table-cell>
              <table:table-cell office:value-type="float" office:value="-0.001784059">
                <text:p>-0.0017840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299499511719">
                <text:p>327.299499511719</text:p>
              </table:table-cell>
              <table:table-cell office:value-type="float" office:value="0.005473457">
                <text:p>0.0054734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407379150391">
                <text:p>327.407379150391</text:p>
              </table:table-cell>
              <table:table-cell office:value-type="float" office:value="0.01959198">
                <text:p>0.019591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515289306641">
                <text:p>327.515289306641</text:p>
              </table:table-cell>
              <table:table-cell office:value-type="float" office:value="-0.003346804">
                <text:p>-0.0033468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.623199462891">
                <text:p>327.623199462891</text:p>
              </table:table-cell>
              <table:table-cell office:value-type="float" office:value="0.01020987">
                <text:p>0.010209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.731109619141">
                <text:p>327.731109619141</text:p>
              </table:table-cell>
              <table:table-cell office:value-type="float" office:value="-0.003135254">
                <text:p>-0.0031352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.839050292969">
                <text:p>327.839050292969</text:p>
              </table:table-cell>
              <table:table-cell office:value-type="float" office:value="-0.006971035">
                <text:p>-0.0069710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.946990966797">
                <text:p>327.946990966797</text:p>
              </table:table-cell>
              <table:table-cell office:value-type="float" office:value="-0.000120816">
                <text:p>-0.000120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.054931640625">
                <text:p>328.054931640625</text:p>
              </table:table-cell>
              <table:table-cell office:value-type="float" office:value="0.004200836">
                <text:p>0.0042008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8.162872314453">
                <text:p>328.162872314453</text:p>
              </table:table-cell>
              <table:table-cell office:value-type="float" office:value="0.006933776">
                <text:p>0.006933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.270812988281">
                <text:p>328.270812988281</text:p>
              </table:table-cell>
              <table:table-cell office:value-type="float" office:value="-0.003127952">
                <text:p>-0.0031279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.378784179688">
                <text:p>328.378784179688</text:p>
              </table:table-cell>
              <table:table-cell office:value-type="float" office:value="-0.001352674">
                <text:p>-0.0013526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486755371094">
                <text:p>328.486755371094</text:p>
              </table:table-cell>
              <table:table-cell office:value-type="float" office:value="-0.009085423">
                <text:p>-0.0090854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.5947265625">
                <text:p>328.5947265625</text:p>
              </table:table-cell>
              <table:table-cell office:value-type="float" office:value="0.00306123">
                <text:p>0.00306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.702697753906">
                <text:p>328.702697753906</text:p>
              </table:table-cell>
              <table:table-cell office:value-type="float" office:value="0.02327563">
                <text:p>0.023275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8.810699462891">
                <text:p>328.810699462891</text:p>
              </table:table-cell>
              <table:table-cell office:value-type="float" office:value="0.001530248">
                <text:p>0.0015302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.918670654297">
                <text:p>328.918670654297</text:p>
              </table:table-cell>
              <table:table-cell office:value-type="float" office:value="0.008821449">
                <text:p>0.0088214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.026672363281">
                <text:p>329.026672363281</text:p>
              </table:table-cell>
              <table:table-cell office:value-type="float" office:value="0.008814553">
                <text:p>0.0088145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.134704589844">
                <text:p>329.134704589844</text:p>
              </table:table-cell>
              <table:table-cell office:value-type="float" office:value="0.01692944">
                <text:p>0.016929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242706298828">
                <text:p>329.242706298828</text:p>
              </table:table-cell>
              <table:table-cell office:value-type="float" office:value="-0.002318544">
                <text:p>-0.0023185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9.350738525391">
                <text:p>329.350738525391</text:p>
              </table:table-cell>
              <table:table-cell office:value-type="float" office:value="-0.003676968">
                <text:p>-0.0036769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.458770751953">
                <text:p>329.458770751953</text:p>
              </table:table-cell>
              <table:table-cell office:value-type="float" office:value="0.001782966">
                <text:p>0.0017829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9.566802978516">
                <text:p>329.566802978516</text:p>
              </table:table-cell>
              <table:table-cell office:value-type="float" office:value="0.003091095">
                <text:p>0.0030910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.674835205078">
                <text:p>329.674835205078</text:p>
              </table:table-cell>
              <table:table-cell office:value-type="float" office:value="-0.002489517">
                <text:p>-0.002489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9.782897949219">
                <text:p>329.782897949219</text:p>
              </table:table-cell>
              <table:table-cell office:value-type="float" office:value="0.008082417">
                <text:p>0.0080824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.890960693359">
                <text:p>329.890960693359</text:p>
              </table:table-cell>
              <table:table-cell office:value-type="float" office:value="0.04332095">
                <text:p>0.043320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9.9990234375">
                <text:p>329.9990234375</text:p>
              </table:table-cell>
              <table:table-cell office:value-type="float" office:value="0.00275565">
                <text:p>0.002755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107086181641">
                <text:p>330.107086181641</text:p>
              </table:table-cell>
              <table:table-cell office:value-type="float" office:value="0.001689764">
                <text:p>0.0016897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.215148925781">
                <text:p>330.215148925781</text:p>
              </table:table-cell>
              <table:table-cell office:value-type="float" office:value="-0.007268459">
                <text:p>-0.007268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3232421875">
                <text:p>330.3232421875</text:p>
              </table:table-cell>
              <table:table-cell office:value-type="float" office:value="0.01728653">
                <text:p>0.017286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.431335449219">
                <text:p>330.431335449219</text:p>
              </table:table-cell>
              <table:table-cell office:value-type="float" office:value="0.00916073">
                <text:p>0.009160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.539428710938">
                <text:p>330.539428710938</text:p>
              </table:table-cell>
              <table:table-cell office:value-type="float" office:value="0.009219321">
                <text:p>0.0092193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.647521972656">
                <text:p>330.647521972656</text:p>
              </table:table-cell>
              <table:table-cell office:value-type="float" office:value="-0.003056032">
                <text:p>-0.0030560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.755645751953">
                <text:p>330.755645751953</text:p>
              </table:table-cell>
              <table:table-cell office:value-type="float" office:value="0.006368544">
                <text:p>0.0063685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.86376953125">
                <text:p>330.86376953125</text:p>
              </table:table-cell>
              <table:table-cell office:value-type="float" office:value="0.01685665">
                <text:p>0.016856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.971893310547">
                <text:p>330.971893310547</text:p>
              </table:table-cell>
              <table:table-cell office:value-type="float" office:value="0.01232661">
                <text:p>0.012326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1.080017089844">
                <text:p>331.080017089844</text:p>
              </table:table-cell>
              <table:table-cell office:value-type="float" office:value="0.03023081">
                <text:p>0.030230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.188171386719">
                <text:p>331.188171386719</text:p>
              </table:table-cell>
              <table:table-cell office:value-type="float" office:value="0.009500972">
                <text:p>0.0095009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.296295166016">
                <text:p>331.296295166016</text:p>
              </table:table-cell>
              <table:table-cell office:value-type="float" office:value="0.02021951">
                <text:p>0.02021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.404449462891">
                <text:p>331.404449462891</text:p>
              </table:table-cell>
              <table:table-cell office:value-type="float" office:value="-0.0038998">
                <text:p>-0.0038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.512603759766">
                <text:p>331.512603759766</text:p>
              </table:table-cell>
              <table:table-cell office:value-type="float" office:value="-0.004483832">
                <text:p>-0.0044838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620788574219">
                <text:p>331.620788574219</text:p>
              </table:table-cell>
              <table:table-cell office:value-type="float" office:value="0.003683876">
                <text:p>0.0036838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.728942871094">
                <text:p>331.728942871094</text:p>
              </table:table-cell>
              <table:table-cell office:value-type="float" office:value="0.00935006">
                <text:p>0.00935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1.837127685547">
                <text:p>331.837127685547</text:p>
              </table:table-cell>
              <table:table-cell office:value-type="float" office:value="-0.0009010628">
                <text:p>-0.00090106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1.9453125">
                <text:p>331.9453125</text:p>
              </table:table-cell>
              <table:table-cell office:value-type="float" office:value="-0.003013965">
                <text:p>-0.003013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.053527832031">
                <text:p>332.053527832031</text:p>
              </table:table-cell>
              <table:table-cell office:value-type="float" office:value="0.007384525">
                <text:p>0.007384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.161712646484">
                <text:p>332.161712646484</text:p>
              </table:table-cell>
              <table:table-cell office:value-type="float" office:value="-0.0002719252">
                <text:p>-0.0002719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2.269927978516">
                <text:p>332.269927978516</text:p>
              </table:table-cell>
              <table:table-cell office:value-type="float" office:value="-0.009327843">
                <text:p>-0.0093278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.378143310547">
                <text:p>332.378143310547</text:p>
              </table:table-cell>
              <table:table-cell office:value-type="float" office:value="-0.002946661">
                <text:p>-0.0029466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.486358642578">
                <text:p>332.486358642578</text:p>
              </table:table-cell>
              <table:table-cell office:value-type="float" office:value="0.02052438">
                <text:p>0.020524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.594573974609">
                <text:p>332.594573974609</text:p>
              </table:table-cell>
              <table:table-cell office:value-type="float" office:value="0.0138881">
                <text:p>0.01388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.702819824219">
                <text:p>332.702819824219</text:p>
              </table:table-cell>
              <table:table-cell office:value-type="float" office:value="0.00435674">
                <text:p>0.004356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.811065673828">
                <text:p>332.811065673828</text:p>
              </table:table-cell>
              <table:table-cell office:value-type="float" office:value="-0.008198136">
                <text:p>-0.0081981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.919311523438">
                <text:p>332.919311523438</text:p>
              </table:table-cell>
              <table:table-cell office:value-type="float" office:value="0.0008159722">
                <text:p>0.00081597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.027557373047">
                <text:p>333.02755737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.135833740234">
                <text:p>333.135833740234</text:p>
              </table:table-cell>
              <table:table-cell office:value-type="float" office:value="0.005314921">
                <text:p>0.0053149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.244079589844">
                <text:p>333.244079589844</text:p>
              </table:table-cell>
              <table:table-cell office:value-type="float" office:value="0.05011484">
                <text:p>0.050114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.352355957031">
                <text:p>333.352355957031</text:p>
              </table:table-cell>
              <table:table-cell office:value-type="float" office:value="-0.002422715">
                <text:p>-0.0024227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.460662841797">
                <text:p>333.460662841797</text:p>
              </table:table-cell>
              <table:table-cell office:value-type="float" office:value="0.001210929">
                <text:p>0.0012109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.568939208984">
                <text:p>333.568939208984</text:p>
              </table:table-cell>
              <table:table-cell office:value-type="float" office:value="0.001770697">
                <text:p>0.0017706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.67724609375">
                <text:p>333.67724609375</text:p>
              </table:table-cell>
              <table:table-cell office:value-type="float" office:value="-0.007321039">
                <text:p>-0.0073210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.785552978516">
                <text:p>333.785552978516</text:p>
              </table:table-cell>
              <table:table-cell office:value-type="float" office:value="0.008788014">
                <text:p>0.0087880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.893859863281">
                <text:p>333.893859863281</text:p>
              </table:table-cell>
              <table:table-cell office:value-type="float" office:value="0.003330369">
                <text:p>0.0033303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002166748047">
                <text:p>334.002166748047</text:p>
              </table:table-cell>
              <table:table-cell office:value-type="float" office:value="-0.01149153">
                <text:p>-0.011491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.110473632813">
                <text:p>334.110473632813</text:p>
              </table:table-cell>
              <table:table-cell office:value-type="float" office:value="0.001169592">
                <text:p>0.0011695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.218811035156">
                <text:p>334.218811035156</text:p>
              </table:table-cell>
              <table:table-cell office:value-type="float" office:value="0.004765469">
                <text:p>0.0047654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4.3271484375">
                <text:p>334.3271484375</text:p>
              </table:table-cell>
              <table:table-cell office:value-type="float" office:value="-0.0006322923">
                <text:p>-0.00063229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4.435485839844">
                <text:p>334.435485839844</text:p>
              </table:table-cell>
              <table:table-cell office:value-type="float" office:value="0.0008433579">
                <text:p>0.00084335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.543853759766">
                <text:p>334.543853759766</text:p>
              </table:table-cell>
              <table:table-cell office:value-type="float" office:value="-0.00545069">
                <text:p>-0.005450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4.652191162109">
                <text:p>334.652191162109</text:p>
              </table:table-cell>
              <table:table-cell office:value-type="float" office:value="0.0169998">
                <text:p>0.01699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4.760559082031">
                <text:p>334.760559082031</text:p>
              </table:table-cell>
              <table:table-cell office:value-type="float" office:value="-0.0001867768">
                <text:p>-0.00018677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4.868927001953">
                <text:p>334.868927001953</text:p>
              </table:table-cell>
              <table:table-cell office:value-type="float" office:value="0.009133531">
                <text:p>0.0091335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.977325439453">
                <text:p>334.977325439453</text:p>
              </table:table-cell>
              <table:table-cell office:value-type="float" office:value="0.007620829">
                <text:p>0.0076208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5.085693359375">
                <text:p>335.085693359375</text:p>
              </table:table-cell>
              <table:table-cell office:value-type="float" office:value="0.009323714">
                <text:p>0.0093237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.194091796875">
                <text:p>335.194091796875</text:p>
              </table:table-cell>
              <table:table-cell office:value-type="float" office:value="0.0002919112">
                <text:p>0.0002919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.302490234375">
                <text:p>335.302490234375</text:p>
              </table:table-cell>
              <table:table-cell office:value-type="float" office:value="0.007360746">
                <text:p>0.007360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5.410888671875">
                <text:p>335.410888671875</text:p>
              </table:table-cell>
              <table:table-cell office:value-type="float" office:value="0.007250173">
                <text:p>0.0072501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5.519287109375">
                <text:p>335.519287109375</text:p>
              </table:table-cell>
              <table:table-cell office:value-type="float" office:value="0.03136897">
                <text:p>0.031368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5.627716064453">
                <text:p>335.627716064453</text:p>
              </table:table-cell>
              <table:table-cell office:value-type="float" office:value="0.00981797">
                <text:p>0.009817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5.736145019531">
                <text:p>335.736145019531</text:p>
              </table:table-cell>
              <table:table-cell office:value-type="float" office:value="0.007104755">
                <text:p>0.0071047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.844573974609">
                <text:p>335.844573974609</text:p>
              </table:table-cell>
              <table:table-cell office:value-type="float" office:value="-0.001146849">
                <text:p>-0.0011468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.953002929688">
                <text:p>335.953002929688</text:p>
              </table:table-cell>
              <table:table-cell office:value-type="float" office:value="0.01056444">
                <text:p>0.010564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6.061462402344">
                <text:p>336.061462402344</text:p>
              </table:table-cell>
              <table:table-cell office:value-type="float" office:value="0.02203013">
                <text:p>0.022030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6.169891357422">
                <text:p>336.169891357422</text:p>
              </table:table-cell>
              <table:table-cell office:value-type="float" office:value="-0.005822995">
                <text:p>-0.0058229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.278350830078">
                <text:p>336.278350830078</text:p>
              </table:table-cell>
              <table:table-cell office:value-type="float" office:value="0.002972414">
                <text:p>0.0029724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6.386840820313">
                <text:p>336.386840820313</text:p>
              </table:table-cell>
              <table:table-cell office:value-type="float" office:value="0.01908881">
                <text:p>0.019088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6.495300292969">
                <text:p>336.495300292969</text:p>
              </table:table-cell>
              <table:table-cell office:value-type="float" office:value="0.004178282">
                <text:p>0.0041782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6.603790283203">
                <text:p>336.603790283203</text:p>
              </table:table-cell>
              <table:table-cell office:value-type="float" office:value="-0.004780014">
                <text:p>-0.0047800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6.712249755859">
                <text:p>336.712249755859</text:p>
              </table:table-cell>
              <table:table-cell office:value-type="float" office:value="-0.002588507">
                <text:p>-0.0025885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6.820770263672">
                <text:p>336.820770263672</text:p>
              </table:table-cell>
              <table:table-cell office:value-type="float" office:value="-0.000776583">
                <text:p>-0.0007765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6.929260253906">
                <text:p>336.929260253906</text:p>
              </table:table-cell>
              <table:table-cell office:value-type="float" office:value="0.00202536">
                <text:p>0.002025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7.037750244141">
                <text:p>337.037750244141</text:p>
              </table:table-cell>
              <table:table-cell office:value-type="float" office:value="-0.006903297">
                <text:p>-0.0069032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.146270751953">
                <text:p>337.146270751953</text:p>
              </table:table-cell>
              <table:table-cell office:value-type="float" office:value="-0.009142403">
                <text:p>-0.0091424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7.254791259766">
                <text:p>337.254791259766</text:p>
              </table:table-cell>
              <table:table-cell office:value-type="float" office:value="0.02570326">
                <text:p>0.025703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7.363311767578">
                <text:p>337.363311767578</text:p>
              </table:table-cell>
              <table:table-cell office:value-type="float" office:value="0.0008240984">
                <text:p>0.0008240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.471862792969">
                <text:p>337.471862792969</text:p>
              </table:table-cell>
              <table:table-cell office:value-type="float" office:value="0.003501966">
                <text:p>0.0035019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.580383300781">
                <text:p>337.580383300781</text:p>
              </table:table-cell>
              <table:table-cell office:value-type="float" office:value="-0.003259953">
                <text:p>-0.0032599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.688934326172">
                <text:p>337.688934326172</text:p>
              </table:table-cell>
              <table:table-cell office:value-type="float" office:value="-0.001635226">
                <text:p>-0.0016352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7.797485351563">
                <text:p>337.797485351563</text:p>
              </table:table-cell>
              <table:table-cell office:value-type="float" office:value="-0.003906505">
                <text:p>-0.0039065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.906036376953">
                <text:p>337.906036376953</text:p>
              </table:table-cell>
              <table:table-cell office:value-type="float" office:value="-0.003282076">
                <text:p>-0.0032820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8.014617919922">
                <text:p>338.014617919922</text:p>
              </table:table-cell>
              <table:table-cell office:value-type="float" office:value="-0.002604684">
                <text:p>-0.0026046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.123168945313">
                <text:p>338.123168945313</text:p>
              </table:table-cell>
              <table:table-cell office:value-type="float" office:value="0.01313602">
                <text:p>0.013136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8.231750488281">
                <text:p>338.231750488281</text:p>
              </table:table-cell>
              <table:table-cell office:value-type="float" office:value="0.01152978">
                <text:p>0.011529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8.340362548828">
                <text:p>338.340362548828</text:p>
              </table:table-cell>
              <table:table-cell office:value-type="float" office:value="-0.002399744">
                <text:p>-0.0023997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8.448944091797">
                <text:p>338.448944091797</text:p>
              </table:table-cell>
              <table:table-cell office:value-type="float" office:value="0.02681981">
                <text:p>0.026819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8.557525634766">
                <text:p>338.557525634766</text:p>
              </table:table-cell>
              <table:table-cell office:value-type="float" office:value="0.005946919">
                <text:p>0.0059469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8.666137695313">
                <text:p>338.666137695313</text:p>
              </table:table-cell>
              <table:table-cell office:value-type="float" office:value="0.01244501">
                <text:p>0.012445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.774749755859">
                <text:p>338.774749755859</text:p>
              </table:table-cell>
              <table:table-cell office:value-type="float" office:value="-0.00420818">
                <text:p>-0.004208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.883392333984">
                <text:p>338.883392333984</text:p>
              </table:table-cell>
              <table:table-cell office:value-type="float" office:value="-0.002725706">
                <text:p>-0.0027257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8.992004394531">
                <text:p>338.992004394531</text:p>
              </table:table-cell>
              <table:table-cell office:value-type="float" office:value="0.003713368">
                <text:p>0.0037133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9.100646972656">
                <text:p>339.100646972656</text:p>
              </table:table-cell>
              <table:table-cell office:value-type="float" office:value="0.009654918">
                <text:p>0.0096549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9.209289550781">
                <text:p>339.209289550781</text:p>
              </table:table-cell>
              <table:table-cell office:value-type="float" office:value="-0.004962437">
                <text:p>-0.0049624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.317932128906">
                <text:p>339.317932128906</text:p>
              </table:table-cell>
              <table:table-cell office:value-type="float" office:value="0.01025955">
                <text:p>0.010259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9.426574707031">
                <text:p>339.426574707031</text:p>
              </table:table-cell>
              <table:table-cell office:value-type="float" office:value="0.00235228">
                <text:p>0.002352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9.535247802734">
                <text:p>339.535247802734</text:p>
              </table:table-cell>
              <table:table-cell office:value-type="float" office:value="0.0107119">
                <text:p>0.01071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9.643890380859">
                <text:p>339.643890380859</text:p>
              </table:table-cell>
              <table:table-cell office:value-type="float" office:value="0.003090548">
                <text:p>0.0030905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9.752563476563">
                <text:p>339.752563476563</text:p>
              </table:table-cell>
              <table:table-cell office:value-type="float" office:value="0.003546316">
                <text:p>0.0035463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.861267089844">
                <text:p>339.86126708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.969940185547">
                <text:p>339.969940185547</text:p>
              </table:table-cell>
              <table:table-cell office:value-type="float" office:value="0.01767801">
                <text:p>0.017678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.078643798828">
                <text:p>340.078643798828</text:p>
              </table:table-cell>
              <table:table-cell office:value-type="float" office:value="0.002193148">
                <text:p>0.0021931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0.187347412109">
                <text:p>340.187347412109</text:p>
              </table:table-cell>
              <table:table-cell office:value-type="float" office:value="0.01893912">
                <text:p>0.018939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0.296051025391">
                <text:p>340.296051025391</text:p>
              </table:table-cell>
              <table:table-cell office:value-type="float" office:value="0.006321493">
                <text:p>0.0063214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.404754638672">
                <text:p>340.404754638672</text:p>
              </table:table-cell>
              <table:table-cell office:value-type="float" office:value="0.009135314">
                <text:p>0.0091353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.513488769531">
                <text:p>340.513488769531</text:p>
              </table:table-cell>
              <table:table-cell office:value-type="float" office:value="-0.008378968">
                <text:p>-0.0083789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0.622192382813">
                <text:p>340.622192382813</text:p>
              </table:table-cell>
              <table:table-cell office:value-type="float" office:value="0.01916627">
                <text:p>0.019166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730926513672">
                <text:p>340.730926513672</text:p>
              </table:table-cell>
              <table:table-cell office:value-type="float" office:value="0.016979">
                <text:p>0.0169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.839660644531">
                <text:p>340.839660644531</text:p>
              </table:table-cell>
              <table:table-cell office:value-type="float" office:value="0.01590648">
                <text:p>0.015906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.948425292969">
                <text:p>340.948425292969</text:p>
              </table:table-cell>
              <table:table-cell office:value-type="float" office:value="-0.004307983">
                <text:p>-0.0043079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.057159423828">
                <text:p>341.057159423828</text:p>
              </table:table-cell>
              <table:table-cell office:value-type="float" office:value="-0.0003073168">
                <text:p>-0.00030731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1.165924072266">
                <text:p>341.165924072266</text:p>
              </table:table-cell>
              <table:table-cell office:value-type="float" office:value="-0.002343707">
                <text:p>-0.0023437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1.274688720703">
                <text:p>341.274688720703</text:p>
              </table:table-cell>
              <table:table-cell office:value-type="float" office:value="-0.003488448">
                <text:p>-0.0034884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1.383483886719">
                <text:p>341.383483886719</text:p>
              </table:table-cell>
              <table:table-cell office:value-type="float" office:value="0.01662268">
                <text:p>0.016622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.492248535156">
                <text:p>341.492248535156</text:p>
              </table:table-cell>
              <table:table-cell office:value-type="float" office:value="0.004856588">
                <text:p>0.0048565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1.601043701172">
                <text:p>341.601043701172</text:p>
              </table:table-cell>
              <table:table-cell office:value-type="float" office:value="0.02397807">
                <text:p>0.023978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1.709838867188">
                <text:p>341.709838867188</text:p>
              </table:table-cell>
              <table:table-cell office:value-type="float" office:value="0.02090504">
                <text:p>0.020905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.818634033203">
                <text:p>341.818634033203</text:p>
              </table:table-cell>
              <table:table-cell office:value-type="float" office:value="0.01519674">
                <text:p>0.015196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1.927429199219">
                <text:p>341.927429199219</text:p>
              </table:table-cell>
              <table:table-cell office:value-type="float" office:value="-0.001961926">
                <text:p>-0.0019619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.036254882813">
                <text:p>342.036254882813</text:p>
              </table:table-cell>
              <table:table-cell office:value-type="float" office:value="-0.002851514">
                <text:p>-0.0028515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.145080566406">
                <text:p>342.145080566406</text:p>
              </table:table-cell>
              <table:table-cell office:value-type="float" office:value="0.0006181262">
                <text:p>0.00061812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25390625">
                <text:p>342.25390625</text:p>
              </table:table-cell>
              <table:table-cell office:value-type="float" office:value="0.01086501">
                <text:p>0.010865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.362731933594">
                <text:p>342.362731933594</text:p>
              </table:table-cell>
              <table:table-cell office:value-type="float" office:value="0.004912429">
                <text:p>0.0049124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2.471557617188">
                <text:p>342.471557617188</text:p>
              </table:table-cell>
              <table:table-cell office:value-type="float" office:value="-0.0002965055">
                <text:p>-0.00029650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2.580413818359">
                <text:p>342.580413818359</text:p>
              </table:table-cell>
              <table:table-cell office:value-type="float" office:value="0.01179403">
                <text:p>0.011794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2.689270019531">
                <text:p>342.689270019531</text:p>
              </table:table-cell>
              <table:table-cell office:value-type="float" office:value="-0.004514199">
                <text:p>-0.0045141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2.798126220703">
                <text:p>342.798126220703</text:p>
              </table:table-cell>
              <table:table-cell office:value-type="float" office:value="0.008429361">
                <text:p>0.0084293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2.906982421875">
                <text:p>342.906982421875</text:p>
              </table:table-cell>
              <table:table-cell office:value-type="float" office:value="0.01654417">
                <text:p>0.016544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.015869140625">
                <text:p>343.015869140625</text:p>
              </table:table-cell>
              <table:table-cell office:value-type="float" office:value="0.01336043">
                <text:p>0.013360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.124755859375">
                <text:p>343.124755859375</text:p>
              </table:table-cell>
              <table:table-cell office:value-type="float" office:value="-0.002844066">
                <text:p>-0.0028440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.233642578125">
                <text:p>343.233642578125</text:p>
              </table:table-cell>
              <table:table-cell office:value-type="float" office:value="-0.007689068">
                <text:p>-0.0076890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.342529296875">
                <text:p>343.342529296875</text:p>
              </table:table-cell>
              <table:table-cell office:value-type="float" office:value="0.009578574">
                <text:p>0.0095785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3.451416015625">
                <text:p>343.451416015625</text:p>
              </table:table-cell>
              <table:table-cell office:value-type="float" office:value="0.001218894">
                <text:p>0.0012188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.560333251953">
                <text:p>343.560333251953</text:p>
              </table:table-cell>
              <table:table-cell office:value-type="float" office:value="-0.00289254">
                <text:p>-0.002892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3.669250488281">
                <text:p>343.669250488281</text:p>
              </table:table-cell>
              <table:table-cell office:value-type="float" office:value="-0.004529978">
                <text:p>-0.0045299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.778167724609">
                <text:p>343.778167724609</text:p>
              </table:table-cell>
              <table:table-cell office:value-type="float" office:value="0.001082073">
                <text:p>0.0010820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3.887084960938">
                <text:p>343.887084960938</text:p>
              </table:table-cell>
              <table:table-cell office:value-type="float" office:value="0.004076856">
                <text:p>0.0040768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.996032714844">
                <text:p>343.996032714844</text:p>
              </table:table-cell>
              <table:table-cell office:value-type="float" office:value="-0.008474383">
                <text:p>-0.0084743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.104949951172">
                <text:p>344.104949951172</text:p>
              </table:table-cell>
              <table:table-cell office:value-type="float" office:value="0.01065174">
                <text:p>0.010651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4.213897705078">
                <text:p>344.213897705078</text:p>
              </table:table-cell>
              <table:table-cell office:value-type="float" office:value="-0.002735723">
                <text:p>-0.0027357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4.322845458984">
                <text:p>344.322845458984</text:p>
              </table:table-cell>
              <table:table-cell office:value-type="float" office:value="0.007324839">
                <text:p>0.0073248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4.431823730469">
                <text:p>344.431823730469</text:p>
              </table:table-cell>
              <table:table-cell office:value-type="float" office:value="-0.00404207">
                <text:p>-0.004042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4.540771484375">
                <text:p>344.540771484375</text:p>
              </table:table-cell>
              <table:table-cell office:value-type="float" office:value="-0.0002079452">
                <text:p>-0.00020794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4.649749755859">
                <text:p>344.649749755859</text:p>
              </table:table-cell>
              <table:table-cell office:value-type="float" office:value="-0.0004925509">
                <text:p>-0.00049255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4.758728027344">
                <text:p>344.758728027344</text:p>
              </table:table-cell>
              <table:table-cell office:value-type="float" office:value="0.0009322755">
                <text:p>0.00093227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.867706298828">
                <text:p>344.867706298828</text:p>
              </table:table-cell>
              <table:table-cell office:value-type="float" office:value="0.006614653">
                <text:p>0.0066146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.976715087891">
                <text:p>344.976715087891</text:p>
              </table:table-cell>
              <table:table-cell office:value-type="float" office:value="0.01136393">
                <text:p>0.011363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5.085723876953">
                <text:p>345.085723876953</text:p>
              </table:table-cell>
              <table:table-cell office:value-type="float" office:value="-0.001173289">
                <text:p>-0.0011732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5.194702148438">
                <text:p>345.194702148438</text:p>
              </table:table-cell>
              <table:table-cell office:value-type="float" office:value="0.002549817">
                <text:p>0.0025498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5.303741455078">
                <text:p>345.303741455078</text:p>
              </table:table-cell>
              <table:table-cell office:value-type="float" office:value="0.02480588">
                <text:p>0.024805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5.412750244141">
                <text:p>345.412750244141</text:p>
              </table:table-cell>
              <table:table-cell office:value-type="float" office:value="-0.006728298">
                <text:p>-0.0067282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521759033203">
                <text:p>345.521759033203</text:p>
              </table:table-cell>
              <table:table-cell office:value-type="float" office:value="-0.005211751">
                <text:p>-0.0052117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.630798339844">
                <text:p>345.630798339844</text:p>
              </table:table-cell>
              <table:table-cell office:value-type="float" office:value="0.003068138">
                <text:p>0.0030681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.739837646484">
                <text:p>345.739837646484</text:p>
              </table:table-cell>
              <table:table-cell office:value-type="float" office:value="-0.001277579">
                <text:p>-0.0012775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.848876953125">
                <text:p>345.848876953125</text:p>
              </table:table-cell>
              <table:table-cell office:value-type="float" office:value="0.01136998">
                <text:p>0.011369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5.957946777344">
                <text:p>345.957946777344</text:p>
              </table:table-cell>
              <table:table-cell office:value-type="float" office:value="0.01203132">
                <text:p>0.012031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6.066986083984">
                <text:p>346.066986083984</text:p>
              </table:table-cell>
              <table:table-cell office:value-type="float" office:value="-0.001547018">
                <text:p>-0.0015470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6.176055908203">
                <text:p>346.176055908203</text:p>
              </table:table-cell>
              <table:table-cell office:value-type="float" office:value="-0.002813395">
                <text:p>-0.0028133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.285125732422">
                <text:p>346.285125732422</text:p>
              </table:table-cell>
              <table:table-cell office:value-type="float" office:value="-0.004779035">
                <text:p>-0.0047790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6.394195556641">
                <text:p>346.394195556641</text:p>
              </table:table-cell>
              <table:table-cell office:value-type="float" office:value="0.003425203">
                <text:p>0.0034252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6.503295898438">
                <text:p>346.503295898438</text:p>
              </table:table-cell>
              <table:table-cell office:value-type="float" office:value="-0.002169623">
                <text:p>-0.0021696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6.612365722656">
                <text:p>346.612365722656</text:p>
              </table:table-cell>
              <table:table-cell office:value-type="float" office:value="-0.004065851">
                <text:p>-0.0040658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6.721466064453">
                <text:p>346.721466064453</text:p>
              </table:table-cell>
              <table:table-cell office:value-type="float" office:value="0.00145762">
                <text:p>0.001457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.83056640625">
                <text:p>346.83056640625</text:p>
              </table:table-cell>
              <table:table-cell office:value-type="float" office:value="0.01242508">
                <text:p>0.012425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.939697265625">
                <text:p>346.939697265625</text:p>
              </table:table-cell>
              <table:table-cell office:value-type="float" office:value="0.03114718">
                <text:p>0.031147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.048797607422">
                <text:p>347.048797607422</text:p>
              </table:table-cell>
              <table:table-cell office:value-type="float" office:value="-0.008753757">
                <text:p>-0.0087537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.157928466797">
                <text:p>347.157928466797</text:p>
              </table:table-cell>
              <table:table-cell office:value-type="float" office:value="-0.00871776">
                <text:p>-0.008717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.267059326172">
                <text:p>347.267059326172</text:p>
              </table:table-cell>
              <table:table-cell office:value-type="float" office:value="0.004241815">
                <text:p>0.0042418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7.376190185547">
                <text:p>347.376190185547</text:p>
              </table:table-cell>
              <table:table-cell office:value-type="float" office:value="-0.00194481">
                <text:p>-0.001944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7.4853515625">
                <text:p>347.4853515625</text:p>
              </table:table-cell>
              <table:table-cell office:value-type="float" office:value="0.005839883">
                <text:p>0.0058398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7.594482421875">
                <text:p>347.594482421875</text:p>
              </table:table-cell>
              <table:table-cell office:value-type="float" office:value="-0.01270081">
                <text:p>-0.012700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7.703643798828">
                <text:p>347.703643798828</text:p>
              </table:table-cell>
              <table:table-cell office:value-type="float" office:value="0.004429605">
                <text:p>0.0044296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.812805175781">
                <text:p>347.812805175781</text:p>
              </table:table-cell>
              <table:table-cell office:value-type="float" office:value="-0.001439996">
                <text:p>-0.0014399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7.921966552734">
                <text:p>347.921966552734</text:p>
              </table:table-cell>
              <table:table-cell office:value-type="float" office:value="0.00172809">
                <text:p>0.001728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.031158447266">
                <text:p>348.031158447266</text:p>
              </table:table-cell>
              <table:table-cell office:value-type="float" office:value="0.007483876">
                <text:p>0.0074838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8.140319824219">
                <text:p>348.140319824219</text:p>
              </table:table-cell>
              <table:table-cell office:value-type="float" office:value="0.001087223">
                <text:p>0.0010872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8.24951171875">
                <text:p>348.24951171875</text:p>
              </table:table-cell>
              <table:table-cell office:value-type="float" office:value="0.01294159">
                <text:p>0.012941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8.358703613281">
                <text:p>348.358703613281</text:p>
              </table:table-cell>
              <table:table-cell office:value-type="float" office:value="-0.008707291">
                <text:p>-0.0087072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467926025391">
                <text:p>348.467926025391</text:p>
              </table:table-cell>
              <table:table-cell office:value-type="float" office:value="-0.0004639985">
                <text:p>-0.00046399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.577117919922">
                <text:p>348.577117919922</text:p>
              </table:table-cell>
              <table:table-cell office:value-type="float" office:value="-0.001213198">
                <text:p>-0.0012131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8.686340332031">
                <text:p>348.686340332031</text:p>
              </table:table-cell>
              <table:table-cell office:value-type="float" office:value="0.02145853">
                <text:p>0.021458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.795562744141">
                <text:p>348.795562744141</text:p>
              </table:table-cell>
              <table:table-cell office:value-type="float" office:value="0.0007879569">
                <text:p>0.00078795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.90478515625">
                <text:p>348.90478515625</text:p>
              </table:table-cell>
              <table:table-cell office:value-type="float" office:value="0.006048647">
                <text:p>0.0060486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9.014038085938">
                <text:p>349.014038085938</text:p>
              </table:table-cell>
              <table:table-cell office:value-type="float" office:value="0.000787486">
                <text:p>0.0007874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.123260498047">
                <text:p>349.123260498047</text:p>
              </table:table-cell>
              <table:table-cell office:value-type="float" office:value="0.011272">
                <text:p>0.0112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.232513427734">
                <text:p>349.232513427734</text:p>
              </table:table-cell>
              <table:table-cell office:value-type="float" office:value="-0.008184201">
                <text:p>-0.0081842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9.341766357422">
                <text:p>349.341766357422</text:p>
              </table:table-cell>
              <table:table-cell office:value-type="float" office:value="-0.009266685">
                <text:p>-0.0092666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9.451019287109">
                <text:p>349.451019287109</text:p>
              </table:table-cell>
              <table:table-cell office:value-type="float" office:value="0.009383939">
                <text:p>0.0093839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.560302734375">
                <text:p>349.560302734375</text:p>
              </table:table-cell>
              <table:table-cell office:value-type="float" office:value="0.003183956">
                <text:p>0.0031839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669586181641">
                <text:p>349.669586181641</text:p>
              </table:table-cell>
              <table:table-cell office:value-type="float" office:value="-0.007341891">
                <text:p>-0.0073418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9.778839111328">
                <text:p>349.778839111328</text:p>
              </table:table-cell>
              <table:table-cell office:value-type="float" office:value="-0.004863418">
                <text:p>-0.0048634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9.888153076172">
                <text:p>349.888153076172</text:p>
              </table:table-cell>
              <table:table-cell office:value-type="float" office:value="0.01455947">
                <text:p>0.014559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.997436523438">
                <text:p>349.997436523438</text:p>
              </table:table-cell>
              <table:table-cell office:value-type="float" office:value="0.01042214">
                <text:p>0.010422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.106719970703">
                <text:p>350.106719970703</text:p>
              </table:table-cell>
              <table:table-cell office:value-type="float" office:value="0.01035129">
                <text:p>0.010351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.216033935547">
                <text:p>350.216033935547</text:p>
              </table:table-cell>
              <table:table-cell office:value-type="float" office:value="-0.008089722">
                <text:p>-0.0080897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.325347900391">
                <text:p>350.325347900391</text:p>
              </table:table-cell>
              <table:table-cell office:value-type="float" office:value="-0.001390258">
                <text:p>-0.0013902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0.434661865234">
                <text:p>350.434661865234</text:p>
              </table:table-cell>
              <table:table-cell office:value-type="float" office:value="0.00531325">
                <text:p>0.005313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0.544006347656">
                <text:p>350.544006347656</text:p>
              </table:table-cell>
              <table:table-cell office:value-type="float" office:value="0.003061961">
                <text:p>0.0030619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.6533203125">
                <text:p>350.6533203125</text:p>
              </table:table-cell>
              <table:table-cell office:value-type="float" office:value="0.00555822">
                <text:p>0.005558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.762664794922">
                <text:p>350.762664794922</text:p>
              </table:table-cell>
              <table:table-cell office:value-type="float" office:value="0.004862636">
                <text:p>0.0048626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.872009277344">
                <text:p>350.872009277344</text:p>
              </table:table-cell>
              <table:table-cell office:value-type="float" office:value="0.0151525">
                <text:p>0.01515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.981353759766">
                <text:p>350.981353759766</text:p>
              </table:table-cell>
              <table:table-cell office:value-type="float" office:value="-0.01080867">
                <text:p>-0.010808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1.090728759766">
                <text:p>351.090728759766</text:p>
              </table:table-cell>
              <table:table-cell office:value-type="float" office:value="0.003436131">
                <text:p>0.0034361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1.200073242188">
                <text:p>351.200073242188</text:p>
              </table:table-cell>
              <table:table-cell office:value-type="float" office:value="0.002533924">
                <text:p>0.0025339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1.309448242188">
                <text:p>351.309448242188</text:p>
              </table:table-cell>
              <table:table-cell office:value-type="float" office:value="0.01240638">
                <text:p>0.012406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.418823242188">
                <text:p>351.418823242188</text:p>
              </table:table-cell>
              <table:table-cell office:value-type="float" office:value="0.009505238">
                <text:p>0.0095052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1.528228759766">
                <text:p>351.528228759766</text:p>
              </table:table-cell>
              <table:table-cell office:value-type="float" office:value="-0.009544713">
                <text:p>-0.0095447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1.637603759766">
                <text:p>351.637603759766</text:p>
              </table:table-cell>
              <table:table-cell office:value-type="float" office:value="0.01110757">
                <text:p>0.011107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.747009277344">
                <text:p>351.747009277344</text:p>
              </table:table-cell>
              <table:table-cell office:value-type="float" office:value="0.001213237">
                <text:p>0.0012132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1.856414794922">
                <text:p>351.856414794922</text:p>
              </table:table-cell>
              <table:table-cell office:value-type="float" office:value="-0.008995879">
                <text:p>-0.0089958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1.9658203125">
                <text:p>351.9658203125</text:p>
              </table:table-cell>
              <table:table-cell office:value-type="float" office:value="0.001828007">
                <text:p>0.0018280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2.075225830078">
                <text:p>352.075225830078</text:p>
              </table:table-cell>
              <table:table-cell office:value-type="float" office:value="-0.0008824295">
                <text:p>-0.00088242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2.184661865234">
                <text:p>352.184661865234</text:p>
              </table:table-cell>
              <table:table-cell office:value-type="float" office:value="0.002725606">
                <text:p>0.0027256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2.294097900391">
                <text:p>352.294097900391</text:p>
              </table:table-cell>
              <table:table-cell office:value-type="float" office:value="0.004826259">
                <text:p>0.0048262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.403533935547">
                <text:p>352.403533935547</text:p>
              </table:table-cell>
              <table:table-cell office:value-type="float" office:value="-0.002615777">
                <text:p>-0.0026157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2.512969970703">
                <text:p>352.512969970703</text:p>
              </table:table-cell>
              <table:table-cell office:value-type="float" office:value="0.002237036">
                <text:p>0.0022370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2.622406005859">
                <text:p>352.622406005859</text:p>
              </table:table-cell>
              <table:table-cell office:value-type="float" office:value="0.01872138">
                <text:p>0.018721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2.731872558594">
                <text:p>352.731872558594</text:p>
              </table:table-cell>
              <table:table-cell office:value-type="float" office:value="-0.004421472">
                <text:p>-0.0044214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2.841339111328">
                <text:p>352.841339111328</text:p>
              </table:table-cell>
              <table:table-cell office:value-type="float" office:value="-0.007357235">
                <text:p>-0.0073572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2.950805664063">
                <text:p>352.950805664063</text:p>
              </table:table-cell>
              <table:table-cell office:value-type="float" office:value="0.01691626">
                <text:p>0.016916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3.060272216797">
                <text:p>353.060272216797</text:p>
              </table:table-cell>
              <table:table-cell office:value-type="float" office:value="0.01176444">
                <text:p>0.011764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3.169738769531">
                <text:p>353.169738769531</text:p>
              </table:table-cell>
              <table:table-cell office:value-type="float" office:value="-0.0008073385">
                <text:p>-0.00080733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3.279235839844">
                <text:p>353.279235839844</text:p>
              </table:table-cell>
              <table:table-cell office:value-type="float" office:value="-0.001838158">
                <text:p>-0.0018381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.388732910156">
                <text:p>353.388732910156</text:p>
              </table:table-cell>
              <table:table-cell office:value-type="float" office:value="0.0058513">
                <text:p>0.00585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3.498229980469">
                <text:p>353.498229980469</text:p>
              </table:table-cell>
              <table:table-cell office:value-type="float" office:value="0.004979355">
                <text:p>0.0049793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.607727050781">
                <text:p>353.607727050781</text:p>
              </table:table-cell>
              <table:table-cell office:value-type="float" office:value="0.009280181">
                <text:p>0.0092801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.717254638672">
                <text:p>353.717254638672</text:p>
              </table:table-cell>
              <table:table-cell office:value-type="float" office:value="-0.001634018">
                <text:p>-0.0016340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.826782226563">
                <text:p>353.826782226563</text:p>
              </table:table-cell>
              <table:table-cell office:value-type="float" office:value="-0.004412352">
                <text:p>-0.0044123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3.936309814453">
                <text:p>353.936309814453</text:p>
              </table:table-cell>
              <table:table-cell office:value-type="float" office:value="0.01649481">
                <text:p>0.016494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045837402344">
                <text:p>354.045837402344</text:p>
              </table:table-cell>
              <table:table-cell office:value-type="float" office:value="-0.004990804">
                <text:p>-0.0049908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4.155364990234">
                <text:p>354.155364990234</text:p>
              </table:table-cell>
              <table:table-cell office:value-type="float" office:value="0.004575399">
                <text:p>0.0045753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4.264923095703">
                <text:p>354.264923095703</text:p>
              </table:table-cell>
              <table:table-cell office:value-type="float" office:value="0.002373856">
                <text:p>0.0023738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4.374481201172">
                <text:p>354.374481201172</text:p>
              </table:table-cell>
              <table:table-cell office:value-type="float" office:value="0.005198263">
                <text:p>0.0051982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4.484039306641">
                <text:p>354.484039306641</text:p>
              </table:table-cell>
              <table:table-cell office:value-type="float" office:value="0.004250232">
                <text:p>0.0042502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.593597412109">
                <text:p>354.593597412109</text:p>
              </table:table-cell>
              <table:table-cell office:value-type="float" office:value="0.004781985">
                <text:p>0.0047819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.703155517578">
                <text:p>354.703155517578</text:p>
              </table:table-cell>
              <table:table-cell office:value-type="float" office:value="0.00250354">
                <text:p>0.002503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4.812744140625">
                <text:p>354.812744140625</text:p>
              </table:table-cell>
              <table:table-cell office:value-type="float" office:value="0.01223232">
                <text:p>0.012232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.922332763672">
                <text:p>354.922332763672</text:p>
              </table:table-cell>
              <table:table-cell office:value-type="float" office:value="0.00170294">
                <text:p>0.001702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5.031921386719">
                <text:p>355.031921386719</text:p>
              </table:table-cell>
              <table:table-cell office:value-type="float" office:value="0.007809261">
                <text:p>0.0078092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.141510009766">
                <text:p>355.141510009766</text:p>
              </table:table-cell>
              <table:table-cell office:value-type="float" office:value="-0.002000728">
                <text:p>-0.0020007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5.251129150391">
                <text:p>355.251129150391</text:p>
              </table:table-cell>
              <table:table-cell office:value-type="float" office:value="0.004219124">
                <text:p>0.0042191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.360717773438">
                <text:p>355.360717773438</text:p>
              </table:table-cell>
              <table:table-cell office:value-type="float" office:value="0.003750375">
                <text:p>0.0037503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5.470336914063">
                <text:p>355.470336914063</text:p>
              </table:table-cell>
              <table:table-cell office:value-type="float" office:value="0.0008391561">
                <text:p>0.000839156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5.579956054688">
                <text:p>355.579956054688</text:p>
              </table:table-cell>
              <table:table-cell office:value-type="float" office:value="0.009179863">
                <text:p>0.0091798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5.689605712891">
                <text:p>355.689605712891</text:p>
              </table:table-cell>
              <table:table-cell office:value-type="float" office:value="0.01391636">
                <text:p>0.013916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5.799224853516">
                <text:p>355.799224853516</text:p>
              </table:table-cell>
              <table:table-cell office:value-type="float" office:value="0.01457885">
                <text:p>0.014578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5.908874511719">
                <text:p>355.908874511719</text:p>
              </table:table-cell>
              <table:table-cell office:value-type="float" office:value="-0.006595103">
                <text:p>-0.0065951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018524169922">
                <text:p>356.018524169922</text:p>
              </table:table-cell>
              <table:table-cell office:value-type="float" office:value="0.01047315">
                <text:p>0.010473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128173828125">
                <text:p>356.128173828125</text:p>
              </table:table-cell>
              <table:table-cell office:value-type="float" office:value="-0.003226324">
                <text:p>-0.0032263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6.237823486328">
                <text:p>356.237823486328</text:p>
              </table:table-cell>
              <table:table-cell office:value-type="float" office:value="-0.00575662">
                <text:p>-0.005756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347503662109">
                <text:p>356.347503662109</text:p>
              </table:table-cell>
              <table:table-cell office:value-type="float" office:value="0.003577163">
                <text:p>0.0035771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457183837891">
                <text:p>356.457183837891</text:p>
              </table:table-cell>
              <table:table-cell office:value-type="float" office:value="0.002449682">
                <text:p>0.0024496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566864013672">
                <text:p>356.566864013672</text:p>
              </table:table-cell>
              <table:table-cell office:value-type="float" office:value="-0.0002533141">
                <text:p>-0.00025331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.676544189453">
                <text:p>356.676544189453</text:p>
              </table:table-cell>
              <table:table-cell office:value-type="float" office:value="-0.006263275">
                <text:p>-0.0062632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786224365234">
                <text:p>356.786224365234</text:p>
              </table:table-cell>
              <table:table-cell office:value-type="float" office:value="-0.005944601">
                <text:p>-0.0059446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95935058594">
                <text:p>356.895935058594</text:p>
              </table:table-cell>
              <table:table-cell office:value-type="float" office:value="-0.006816398">
                <text:p>-0.0068163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05645751953">
                <text:p>357.005645751953</text:p>
              </table:table-cell>
              <table:table-cell office:value-type="float" office:value="-0.009410129">
                <text:p>-0.0094101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115356445313">
                <text:p>357.115356445313</text:p>
              </table:table-cell>
              <table:table-cell office:value-type="float" office:value="0.0002181401">
                <text:p>0.00021814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.225067138672">
                <text:p>357.225067138672</text:p>
              </table:table-cell>
              <table:table-cell office:value-type="float" office:value="0.005477905">
                <text:p>0.0054779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7.334777832031">
                <text:p>357.334777832031</text:p>
              </table:table-cell>
              <table:table-cell office:value-type="float" office:value="0.004093537">
                <text:p>0.0040935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444519042969">
                <text:p>357.444519042969</text:p>
              </table:table-cell>
              <table:table-cell office:value-type="float" office:value="0.008150487">
                <text:p>0.0081504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554260253906">
                <text:p>357.554260253906</text:p>
              </table:table-cell>
              <table:table-cell office:value-type="float" office:value="-0.003641653">
                <text:p>-0.0036416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.664001464844">
                <text:p>357.664001464844</text:p>
              </table:table-cell>
              <table:table-cell office:value-type="float" office:value="-0.000903605">
                <text:p>-0.0009036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773742675781">
                <text:p>357.773742675781</text:p>
              </table:table-cell>
              <table:table-cell office:value-type="float" office:value="0.01641667">
                <text:p>0.01641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883514404297">
                <text:p>357.883514404297</text:p>
              </table:table-cell>
              <table:table-cell office:value-type="float" office:value="0.0009488664">
                <text:p>0.00094886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993286132813">
                <text:p>357.993286132813</text:p>
              </table:table-cell>
              <table:table-cell office:value-type="float" office:value="-0.001653329">
                <text:p>-0.0016533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10302734375">
                <text:p>358.10302734375</text:p>
              </table:table-cell>
              <table:table-cell office:value-type="float" office:value="0.009905946">
                <text:p>0.0099059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.212829589844">
                <text:p>358.212829589844</text:p>
              </table:table-cell>
              <table:table-cell office:value-type="float" office:value="0.01082639">
                <text:p>0.010826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322601318359">
                <text:p>358.322601318359</text:p>
              </table:table-cell>
              <table:table-cell office:value-type="float" office:value="0.001810054">
                <text:p>0.0018100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.432373046875">
                <text:p>358.432373046875</text:p>
              </table:table-cell>
              <table:table-cell office:value-type="float" office:value="0.007426285">
                <text:p>0.0074262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542175292969">
                <text:p>358.542175292969</text:p>
              </table:table-cell>
              <table:table-cell office:value-type="float" office:value="-0.005413832">
                <text:p>-0.0054138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8.651977539063">
                <text:p>358.651977539063</text:p>
              </table:table-cell>
              <table:table-cell office:value-type="float" office:value="0.001470443">
                <text:p>0.0014704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.761779785156">
                <text:p>358.761779785156</text:p>
              </table:table-cell>
              <table:table-cell office:value-type="float" office:value="0.010342">
                <text:p>0.0103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8.871612548828">
                <text:p>358.871612548828</text:p>
              </table:table-cell>
              <table:table-cell office:value-type="float" office:value="-0.005602581">
                <text:p>-0.0056025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.981414794922">
                <text:p>358.981414794922</text:p>
              </table:table-cell>
              <table:table-cell office:value-type="float" office:value="0.003502237">
                <text:p>0.0035022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9.091247558594">
                <text:p>359.091247558594</text:p>
              </table:table-cell>
              <table:table-cell office:value-type="float" office:value="0.01546083">
                <text:p>0.015460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9.201080322266">
                <text:p>359.201080322266</text:p>
              </table:table-cell>
              <table:table-cell office:value-type="float" office:value="0.005875281">
                <text:p>0.0058752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.310913085938">
                <text:p>359.310913085938</text:p>
              </table:table-cell>
              <table:table-cell office:value-type="float" office:value="0.002133033">
                <text:p>0.0021330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.420776367188">
                <text:p>359.420776367188</text:p>
              </table:table-cell>
              <table:table-cell office:value-type="float" office:value="-0.01004291">
                <text:p>-0.010042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.530609130859">
                <text:p>359.530609130859</text:p>
              </table:table-cell>
              <table:table-cell office:value-type="float" office:value="0.01314302">
                <text:p>0.013143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.640472412109">
                <text:p>359.640472412109</text:p>
              </table:table-cell>
              <table:table-cell office:value-type="float" office:value="-0.0001372089">
                <text:p>-0.00013720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.750335693359">
                <text:p>359.750335693359</text:p>
              </table:table-cell>
              <table:table-cell office:value-type="float" office:value="-0.001659479">
                <text:p>-0.0016594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.860198974609">
                <text:p>359.860198974609</text:p>
              </table:table-cell>
              <table:table-cell office:value-type="float" office:value="0.000323459">
                <text:p>0.0003234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.970092773438">
                <text:p>359.970092773438</text:p>
              </table:table-cell>
              <table:table-cell office:value-type="float" office:value="0.006907609">
                <text:p>0.0069076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.079986572266">
                <text:p>360.079986572266</text:p>
              </table:table-cell>
              <table:table-cell office:value-type="float" office:value="-0.006675743">
                <text:p>-0.0066757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189849853516">
                <text:p>360.189849853516</text:p>
              </table:table-cell>
              <table:table-cell office:value-type="float" office:value="0.01248182">
                <text:p>0.012481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299743652344">
                <text:p>360.299743652344</text:p>
              </table:table-cell>
              <table:table-cell office:value-type="float" office:value="0.01153227">
                <text:p>0.011532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.40966796875">
                <text:p>360.40966796875</text:p>
              </table:table-cell>
              <table:table-cell office:value-type="float" office:value="0.009537775">
                <text:p>0.0095377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.519561767578">
                <text:p>360.519561767578</text:p>
              </table:table-cell>
              <table:table-cell office:value-type="float" office:value="0.003350078">
                <text:p>0.0033500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.629486083984">
                <text:p>360.629486083984</text:p>
              </table:table-cell>
              <table:table-cell office:value-type="float" office:value="0.003113319">
                <text:p>0.0031133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.739410400391">
                <text:p>360.739410400391</text:p>
              </table:table-cell>
              <table:table-cell office:value-type="float" office:value="-0.003108263">
                <text:p>-0.0031082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49334716797">
                <text:p>360.849334716797</text:p>
              </table:table-cell>
              <table:table-cell office:value-type="float" office:value="0.006422913">
                <text:p>0.0064229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.959259033203">
                <text:p>360.959259033203</text:p>
              </table:table-cell>
              <table:table-cell office:value-type="float" office:value="-0.007831322">
                <text:p>-0.0078313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069213867188">
                <text:p>361.069213867188</text:p>
              </table:table-cell>
              <table:table-cell office:value-type="float" office:value="0.0007206852">
                <text:p>0.00072068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.179168701172">
                <text:p>361.179168701172</text:p>
              </table:table-cell>
              <table:table-cell office:value-type="float" office:value="0.0007806194">
                <text:p>0.00078061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.289093017578">
                <text:p>361.289093017578</text:p>
              </table:table-cell>
              <table:table-cell office:value-type="float" office:value="0.002254388">
                <text:p>0.0022543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.399078369141">
                <text:p>361.399078369141</text:p>
              </table:table-cell>
              <table:table-cell office:value-type="float" office:value="0.003326203">
                <text:p>0.0033262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509033203125">
                <text:p>361.509033203125</text:p>
              </table:table-cell>
              <table:table-cell office:value-type="float" office:value="-0.005962112">
                <text:p>-0.0059621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619018554688">
                <text:p>361.619018554688</text:p>
              </table:table-cell>
              <table:table-cell office:value-type="float" office:value="-0.00528988">
                <text:p>-0.005289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.728973388672">
                <text:p>361.728973388672</text:p>
              </table:table-cell>
              <table:table-cell office:value-type="float" office:value="0.008498705">
                <text:p>0.0084987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.838958740234">
                <text:p>361.838958740234</text:p>
              </table:table-cell>
              <table:table-cell office:value-type="float" office:value="0.002369031">
                <text:p>0.0023690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.948944091797">
                <text:p>361.948944091797</text:p>
              </table:table-cell>
              <table:table-cell office:value-type="float" office:value="0.0002387065">
                <text:p>0.00023870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.058959960938">
                <text:p>362.058959960938</text:p>
              </table:table-cell>
              <table:table-cell office:value-type="float" office:value="-0.001513499">
                <text:p>-0.0015134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2.1689453125">
                <text:p>362.1689453125</text:p>
              </table:table-cell>
              <table:table-cell office:value-type="float" office:value="0.00326536">
                <text:p>0.003265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2.278961181641">
                <text:p>362.278961181641</text:p>
              </table:table-cell>
              <table:table-cell office:value-type="float" office:value="0.01850847">
                <text:p>0.018508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388977050781">
                <text:p>362.388977050781</text:p>
              </table:table-cell>
              <table:table-cell office:value-type="float" office:value="0.01062765">
                <text:p>0.010627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2.498992919922">
                <text:p>362.498992919922</text:p>
              </table:table-cell>
              <table:table-cell office:value-type="float" office:value="-0.002279438">
                <text:p>-0.00227943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.609039306641">
                <text:p>362.609039306641</text:p>
              </table:table-cell>
              <table:table-cell office:value-type="float" office:value="-0.002452605">
                <text:p>-0.0024526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2.719055175781">
                <text:p>362.719055175781</text:p>
              </table:table-cell>
              <table:table-cell office:value-type="float" office:value="0.008196532">
                <text:p>0.0081965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2.8291015625">
                <text:p>362.8291015625</text:p>
              </table:table-cell>
              <table:table-cell office:value-type="float" office:value="0.01274283">
                <text:p>0.012742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2.939147949219">
                <text:p>362.939147949219</text:p>
              </table:table-cell>
              <table:table-cell office:value-type="float" office:value="0.001461797">
                <text:p>0.0014617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3.049224853516">
                <text:p>363.049224853516</text:p>
              </table:table-cell>
              <table:table-cell office:value-type="float" office:value="-0.001300946">
                <text:p>-0.0013009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.159271240234">
                <text:p>363.159271240234</text:p>
              </table:table-cell>
              <table:table-cell office:value-type="float" office:value="-0.0006351495">
                <text:p>-0.00063514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.269348144531">
                <text:p>363.269348144531</text:p>
              </table:table-cell>
              <table:table-cell office:value-type="float" office:value="0.006659418">
                <text:p>0.0066594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3.37939453125">
                <text:p>363.37939453125</text:p>
              </table:table-cell>
              <table:table-cell office:value-type="float" office:value="0.006803073">
                <text:p>0.0068030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3.489501953125">
                <text:p>363.489501953125</text:p>
              </table:table-cell>
              <table:table-cell office:value-type="float" office:value="-0.006309646">
                <text:p>-0.0063096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.599578857422">
                <text:p>363.599578857422</text:p>
              </table:table-cell>
              <table:table-cell office:value-type="float" office:value="0.01453447">
                <text:p>0.014534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3.709655761719">
                <text:p>363.709655761719</text:p>
              </table:table-cell>
              <table:table-cell office:value-type="float" office:value="0.008714032">
                <text:p>0.0087140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.819763183594">
                <text:p>363.819763183594</text:p>
              </table:table-cell>
              <table:table-cell office:value-type="float" office:value="0.00562245">
                <text:p>0.005622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3.929870605469">
                <text:p>363.929870605469</text:p>
              </table:table-cell>
              <table:table-cell office:value-type="float" office:value="-0.006696374">
                <text:p>-0.0066963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4.039978027344">
                <text:p>364.039978027344</text:p>
              </table:table-cell>
              <table:table-cell office:value-type="float" office:value="-0.00745143">
                <text:p>-0.007451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.150085449219">
                <text:p>364.150085449219</text:p>
              </table:table-cell>
              <table:table-cell office:value-type="float" office:value="-0.004631709">
                <text:p>-0.0046317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4.260223388672">
                <text:p>364.260223388672</text:p>
              </table:table-cell>
              <table:table-cell office:value-type="float" office:value="-0.002732802">
                <text:p>-0.0027328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4.370330810547">
                <text:p>364.370330810547</text:p>
              </table:table-cell>
              <table:table-cell office:value-type="float" office:value="-0.00553824">
                <text:p>-0.005538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.48046875">
                <text:p>364.48046875</text:p>
              </table:table-cell>
              <table:table-cell office:value-type="float" office:value="0.006955812">
                <text:p>0.0069558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4.590606689453">
                <text:p>364.590606689453</text:p>
              </table:table-cell>
              <table:table-cell office:value-type="float" office:value="0.0116093">
                <text:p>0.01160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.700775146484">
                <text:p>364.700775146484</text:p>
              </table:table-cell>
              <table:table-cell office:value-type="float" office:value="0.003360508">
                <text:p>0.0033605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4.810913085938">
                <text:p>364.810913085938</text:p>
              </table:table-cell>
              <table:table-cell office:value-type="float" office:value="0.006302217">
                <text:p>0.0063022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.921081542969">
                <text:p>364.921081542969</text:p>
              </table:table-cell>
              <table:table-cell office:value-type="float" office:value="-0.003567717">
                <text:p>-0.0035677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5.03125">
                <text:p>365.03125</text:p>
              </table:table-cell>
              <table:table-cell office:value-type="float" office:value="-0.006023728">
                <text:p>-0.0060237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.141418457031">
                <text:p>365.141418457031</text:p>
              </table:table-cell>
              <table:table-cell office:value-type="float" office:value="-0.008957">
                <text:p>-0.0089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.251586914063">
                <text:p>365.251586914063</text:p>
              </table:table-cell>
              <table:table-cell office:value-type="float" office:value="0.01031767">
                <text:p>0.0103176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.361785888672">
                <text:p>365.361785888672</text:p>
              </table:table-cell>
              <table:table-cell office:value-type="float" office:value="0.02966298">
                <text:p>0.029662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5.471984863281">
                <text:p>365.471984863281</text:p>
              </table:table-cell>
              <table:table-cell office:value-type="float" office:value="0.00480073">
                <text:p>0.004800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.582183837891">
                <text:p>365.582183837891</text:p>
              </table:table-cell>
              <table:table-cell office:value-type="float" office:value="0.00861555">
                <text:p>0.008615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5.6923828125">
                <text:p>365.6923828125</text:p>
              </table:table-cell>
              <table:table-cell office:value-type="float" office:value="0.009441358">
                <text:p>0.0094413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5.802581787109">
                <text:p>365.802581787109</text:p>
              </table:table-cell>
              <table:table-cell office:value-type="float" office:value="-0.0008446686">
                <text:p>-0.00084466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5.912811279297">
                <text:p>365.912811279297</text:p>
              </table:table-cell>
              <table:table-cell office:value-type="float" office:value="0.009577835">
                <text:p>0.0095778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6.023010253906">
                <text:p>366.023010253906</text:p>
              </table:table-cell>
              <table:table-cell office:value-type="float" office:value="0.003853276">
                <text:p>0.0038532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6.133239746094">
                <text:p>366.133239746094</text:p>
              </table:table-cell>
              <table:table-cell office:value-type="float" office:value="0.004449168">
                <text:p>0.0044491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6.243499755859">
                <text:p>366.243499755859</text:p>
              </table:table-cell>
              <table:table-cell office:value-type="float" office:value="-0.002762512">
                <text:p>-0.0027625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6.353729248047">
                <text:p>366.353729248047</text:p>
              </table:table-cell>
              <table:table-cell office:value-type="float" office:value="-0.0006205959">
                <text:p>-0.00062059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6.463989257813">
                <text:p>366.463989257813</text:p>
              </table:table-cell>
              <table:table-cell office:value-type="float" office:value="-0.0007753328">
                <text:p>-0.00077533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6.57421875">
                <text:p>366.57421875</text:p>
              </table:table-cell>
              <table:table-cell office:value-type="float" office:value="0.001876101">
                <text:p>0.0018761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6.684478759766">
                <text:p>366.684478759766</text:p>
              </table:table-cell>
              <table:table-cell office:value-type="float" office:value="-0.001486711">
                <text:p>-0.0014867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.794738769531">
                <text:p>366.794738769531</text:p>
              </table:table-cell>
              <table:table-cell office:value-type="float" office:value="0.0100783">
                <text:p>0.01007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6.905029296875">
                <text:p>366.905029296875</text:p>
              </table:table-cell>
              <table:table-cell office:value-type="float" office:value="-0.002993159">
                <text:p>-0.0029931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7.015289306641">
                <text:p>367.015289306641</text:p>
              </table:table-cell>
              <table:table-cell office:value-type="float" office:value="0.0007360757">
                <text:p>0.00073607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7.125579833984">
                <text:p>367.125579833984</text:p>
              </table:table-cell>
              <table:table-cell office:value-type="float" office:value="0.01316913">
                <text:p>0.013169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.235870361328">
                <text:p>367.235870361328</text:p>
              </table:table-cell>
              <table:table-cell office:value-type="float" office:value="0.01611075">
                <text:p>0.016110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7.346160888672">
                <text:p>367.346160888672</text:p>
              </table:table-cell>
              <table:table-cell office:value-type="float" office:value="0.02030856">
                <text:p>0.020308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7.456481933594">
                <text:p>367.456481933594</text:p>
              </table:table-cell>
              <table:table-cell office:value-type="float" office:value="0.01004394">
                <text:p>0.010043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7.566772460938">
                <text:p>367.566772460938</text:p>
              </table:table-cell>
              <table:table-cell office:value-type="float" office:value="-0.00592927">
                <text:p>-0.005929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677093505859">
                <text:p>367.677093505859</text:p>
              </table:table-cell>
              <table:table-cell office:value-type="float" office:value="-0.003045841">
                <text:p>-0.0030458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7.787414550781">
                <text:p>367.787414550781</text:p>
              </table:table-cell>
              <table:table-cell office:value-type="float" office:value="-0.008325241">
                <text:p>-0.0083252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.897766113281">
                <text:p>367.897766113281</text:p>
              </table:table-cell>
              <table:table-cell office:value-type="float" office:value="-0.008833534">
                <text:p>-0.0088335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8.008087158203">
                <text:p>368.008087158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8.118438720703">
                <text:p>368.118438720703</text:p>
              </table:table-cell>
              <table:table-cell office:value-type="float" office:value="-0.003217273">
                <text:p>-0.00321727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.228759765625">
                <text:p>368.228759765625</text:p>
              </table:table-cell>
              <table:table-cell office:value-type="float" office:value="0.0001434464">
                <text:p>0.00014344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8.339111328125">
                <text:p>368.339111328125</text:p>
              </table:table-cell>
              <table:table-cell office:value-type="float" office:value="-0.001044328">
                <text:p>-0.0010443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8.449493408203">
                <text:p>368.449493408203</text:p>
              </table:table-cell>
              <table:table-cell office:value-type="float" office:value="0.002882064">
                <text:p>0.00288206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8.559844970703">
                <text:p>368.559844970703</text:p>
              </table:table-cell>
              <table:table-cell office:value-type="float" office:value="0.00835109">
                <text:p>0.008351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.670227050781">
                <text:p>368.670227050781</text:p>
              </table:table-cell>
              <table:table-cell office:value-type="float" office:value="-0.006550615">
                <text:p>-0.0065506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.780609130859">
                <text:p>368.780609130859</text:p>
              </table:table-cell>
              <table:table-cell office:value-type="float" office:value="-0.003530797">
                <text:p>-0.0035307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8.890991210938">
                <text:p>368.890991210938</text:p>
              </table:table-cell>
              <table:table-cell office:value-type="float" office:value="-0.01011254">
                <text:p>-0.010112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9.001373291016">
                <text:p>369.001373291016</text:p>
              </table:table-cell>
              <table:table-cell office:value-type="float" office:value="0.0006881307">
                <text:p>0.00068813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9.111755371094">
                <text:p>369.111755371094</text:p>
              </table:table-cell>
              <table:table-cell office:value-type="float" office:value="-0.008030651">
                <text:p>-0.0080306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22216796875">
                <text:p>369.22216796875</text:p>
              </table:table-cell>
              <table:table-cell office:value-type="float" office:value="-0.008453229">
                <text:p>-0.0084532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9.332580566406">
                <text:p>369.332580566406</text:p>
              </table:table-cell>
              <table:table-cell office:value-type="float" office:value="-0.008426443">
                <text:p>-0.0084264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.442993164063">
                <text:p>369.442993164063</text:p>
              </table:table-cell>
              <table:table-cell office:value-type="float" office:value="-0.0005568189">
                <text:p>-0.00055681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.553405761719">
                <text:p>369.553405761719</text:p>
              </table:table-cell>
              <table:table-cell office:value-type="float" office:value="0.004165764">
                <text:p>0.0041657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.663848876953">
                <text:p>369.663848876953</text:p>
              </table:table-cell>
              <table:table-cell office:value-type="float" office:value="0.007046624">
                <text:p>0.0070466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.774261474609">
                <text:p>369.774261474609</text:p>
              </table:table-cell>
              <table:table-cell office:value-type="float" office:value="-0.004215473">
                <text:p>-0.0042154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.884704589844">
                <text:p>369.884704589844</text:p>
              </table:table-cell>
              <table:table-cell office:value-type="float" office:value="0.002779544">
                <text:p>0.0027795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.995147705078">
                <text:p>369.995147705078</text:p>
              </table:table-cell>
              <table:table-cell office:value-type="float" office:value="-0.006252792">
                <text:p>-0.0062527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0.105621337891">
                <text:p>370.105621337891</text:p>
              </table:table-cell>
              <table:table-cell office:value-type="float" office:value="0.01075776">
                <text:p>0.010757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0.216064453125">
                <text:p>370.216064453125</text:p>
              </table:table-cell>
              <table:table-cell office:value-type="float" office:value="0.007544273">
                <text:p>0.0075442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0.326538085938">
                <text:p>370.326538085938</text:p>
              </table:table-cell>
              <table:table-cell office:value-type="float" office:value="0.02032174">
                <text:p>0.020321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.43701171875">
                <text:p>370.43701171875</text:p>
              </table:table-cell>
              <table:table-cell office:value-type="float" office:value="0.01178832">
                <text:p>0.011788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0.547485351563">
                <text:p>370.547485351563</text:p>
              </table:table-cell>
              <table:table-cell office:value-type="float" office:value="0.00240486">
                <text:p>0.002404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.657958984375">
                <text:p>370.657958984375</text:p>
              </table:table-cell>
              <table:table-cell office:value-type="float" office:value="-0.004557325">
                <text:p>-0.0045573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0.768432617188">
                <text:p>370.768432617188</text:p>
              </table:table-cell>
              <table:table-cell office:value-type="float" office:value="-0.01027698">
                <text:p>-0.010276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0.878936767578">
                <text:p>370.878936767578</text:p>
              </table:table-cell>
              <table:table-cell office:value-type="float" office:value="0.007249857">
                <text:p>0.0072498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0.989440917969">
                <text:p>370.989440917969</text:p>
              </table:table-cell>
              <table:table-cell office:value-type="float" office:value="-0.007159048">
                <text:p>-0.0071590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1.099945068359">
                <text:p>371.099945068359</text:p>
              </table:table-cell>
              <table:table-cell office:value-type="float" office:value="0.004879286">
                <text:p>0.0048792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1.21044921875">
                <text:p>371.21044921875</text:p>
              </table:table-cell>
              <table:table-cell office:value-type="float" office:value="-0.005309272">
                <text:p>-0.0053092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1.320983886719">
                <text:p>371.320983886719</text:p>
              </table:table-cell>
              <table:table-cell office:value-type="float" office:value="-0.004728318">
                <text:p>-0.0047283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.431488037109">
                <text:p>371.431488037109</text:p>
              </table:table-cell>
              <table:table-cell office:value-type="float" office:value="0.001854537">
                <text:p>0.0018545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.542022705078">
                <text:p>371.542022705078</text:p>
              </table:table-cell>
              <table:table-cell office:value-type="float" office:value="0.01341918">
                <text:p>0.013419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1.652557373047">
                <text:p>371.652557373047</text:p>
              </table:table-cell>
              <table:table-cell office:value-type="float" office:value="-0.007629526">
                <text:p>-0.0076295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1.763122558594">
                <text:p>371.763122558594</text:p>
              </table:table-cell>
              <table:table-cell office:value-type="float" office:value="-0.004839507">
                <text:p>-0.0048395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.873657226563">
                <text:p>371.873657226563</text:p>
              </table:table-cell>
              <table:table-cell office:value-type="float" office:value="-0.008307681">
                <text:p>-0.00830768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.984222412109">
                <text:p>371.984222412109</text:p>
              </table:table-cell>
              <table:table-cell office:value-type="float" office:value="0.003398918">
                <text:p>0.0033989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2.094787597656">
                <text:p>372.094787597656</text:p>
              </table:table-cell>
              <table:table-cell office:value-type="float" office:value="-0.005598886">
                <text:p>-0.0055988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.205352783203">
                <text:p>372.205352783203</text:p>
              </table:table-cell>
              <table:table-cell office:value-type="float" office:value="-0.006488933">
                <text:p>-0.0064889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.31591796875">
                <text:p>372.31591796875</text:p>
              </table:table-cell>
              <table:table-cell office:value-type="float" office:value="-0.005207733">
                <text:p>-0.0052077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.426513671875">
                <text:p>372.426513671875</text:p>
              </table:table-cell>
              <table:table-cell office:value-type="float" office:value="-0.001049041">
                <text:p>-0.0010490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2.537078857422">
                <text:p>372.537078857422</text:p>
              </table:table-cell>
              <table:table-cell office:value-type="float" office:value="0.002408085">
                <text:p>0.0024080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.647674560547">
                <text:p>372.647674560547</text:p>
              </table:table-cell>
              <table:table-cell office:value-type="float" office:value="-0.01064472">
                <text:p>-0.010644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2.758270263672">
                <text:p>372.758270263672</text:p>
              </table:table-cell>
              <table:table-cell office:value-type="float" office:value="0.0003367566">
                <text:p>0.00033675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.868896484375">
                <text:p>372.868896484375</text:p>
              </table:table-cell>
              <table:table-cell office:value-type="float" office:value="0.006321796">
                <text:p>0.0063217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.9794921875">
                <text:p>372.9794921875</text:p>
              </table:table-cell>
              <table:table-cell office:value-type="float" office:value="-0.01051965">
                <text:p>-0.010519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3.090118408203">
                <text:p>373.090118408203</text:p>
              </table:table-cell>
              <table:table-cell office:value-type="float" office:value="-0.001236132">
                <text:p>-0.0012361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3.200744628906">
                <text:p>373.200744628906</text:p>
              </table:table-cell>
              <table:table-cell office:value-type="float" office:value="0.03046968">
                <text:p>0.030469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3.311370849609">
                <text:p>373.311370849609</text:p>
              </table:table-cell>
              <table:table-cell office:value-type="float" office:value="-0.001355214">
                <text:p>-0.0013552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.421997070313">
                <text:p>373.421997070313</text:p>
              </table:table-cell>
              <table:table-cell office:value-type="float" office:value="0.00169891">
                <text:p>0.001698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3.532623291016">
                <text:p>373.532623291016</text:p>
              </table:table-cell>
              <table:table-cell office:value-type="float" office:value="-0.006872395">
                <text:p>-0.0068723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.643280029297">
                <text:p>373.643280029297</text:p>
              </table:table-cell>
              <table:table-cell office:value-type="float" office:value="0.0114242">
                <text:p>0.01142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.753936767578">
                <text:p>373.753936767578</text:p>
              </table:table-cell>
              <table:table-cell office:value-type="float" office:value="0.006629608">
                <text:p>0.0066296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3.864593505859">
                <text:p>373.864593505859</text:p>
              </table:table-cell>
              <table:table-cell office:value-type="float" office:value="-0.005160256">
                <text:p>-0.0051602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3.975250244141">
                <text:p>373.975250244141</text:p>
              </table:table-cell>
              <table:table-cell office:value-type="float" office:value="-0.0002738815">
                <text:p>-0.00027388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4.0859375">
                <text:p>374.0859375</text:p>
              </table:table-cell>
              <table:table-cell office:value-type="float" office:value="-0.00475263">
                <text:p>-0.004752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4.196624755859">
                <text:p>374.196624755859</text:p>
              </table:table-cell>
              <table:table-cell office:value-type="float" office:value="-0.009210437">
                <text:p>-0.0092104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4.307281494141">
                <text:p>374.307281494141</text:p>
              </table:table-cell>
              <table:table-cell office:value-type="float" office:value="-0.003071812">
                <text:p>-0.0030718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4.417999267578">
                <text:p>374.417999267578</text:p>
              </table:table-cell>
              <table:table-cell office:value-type="float" office:value="-0.006341137">
                <text:p>-0.0063411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4.528686523438">
                <text:p>374.528686523438</text:p>
              </table:table-cell>
              <table:table-cell office:value-type="float" office:value="0.006049452">
                <text:p>0.0060494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4.639373779297">
                <text:p>374.639373779297</text:p>
              </table:table-cell>
              <table:table-cell office:value-type="float" office:value="0.009093779">
                <text:p>0.0090937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4.750091552734">
                <text:p>374.750091552734</text:p>
              </table:table-cell>
              <table:table-cell office:value-type="float" office:value="-0.00504826">
                <text:p>-0.005048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.860809326172">
                <text:p>374.860809326172</text:p>
              </table:table-cell>
              <table:table-cell office:value-type="float" office:value="-0.001906432">
                <text:p>-0.0019064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4.971527099609">
                <text:p>374.971527099609</text:p>
              </table:table-cell>
              <table:table-cell office:value-type="float" office:value="-0.0002755743">
                <text:p>-0.000275574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5.082244873047">
                <text:p>375.082244873047</text:p>
              </table:table-cell>
              <table:table-cell office:value-type="float" office:value="-0.0008715886">
                <text:p>-0.00087158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5.192993164063">
                <text:p>375.192993164063</text:p>
              </table:table-cell>
              <table:table-cell office:value-type="float" office:value="-0.0031218">
                <text:p>-0.00312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5.3037109375">
                <text:p>375.3037109375</text:p>
              </table:table-cell>
              <table:table-cell office:value-type="float" office:value="-0.008283277">
                <text:p>-0.0082832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5.414459228516">
                <text:p>375.414459228516</text:p>
              </table:table-cell>
              <table:table-cell office:value-type="float" office:value="0.003386438">
                <text:p>0.0033864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5.525207519531">
                <text:p>375.525207519531</text:p>
              </table:table-cell>
              <table:table-cell office:value-type="float" office:value="-0.001612988">
                <text:p>-0.0016129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5.635986328125">
                <text:p>375.635986328125</text:p>
              </table:table-cell>
              <table:table-cell office:value-type="float" office:value="0.007954383">
                <text:p>0.0079543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5.746734619141">
                <text:p>375.746734619141</text:p>
              </table:table-cell>
              <table:table-cell office:value-type="float" office:value="-0.0006398848">
                <text:p>-0.00063988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5.857513427734">
                <text:p>375.857513427734</text:p>
              </table:table-cell>
              <table:table-cell office:value-type="float" office:value="-0.003673121">
                <text:p>-0.0036731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.968292236328">
                <text:p>375.968292236328</text:p>
              </table:table-cell>
              <table:table-cell office:value-type="float" office:value="-0.002822639">
                <text:p>-0.0028226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.079071044922">
                <text:p>376.079071044922</text:p>
              </table:table-cell>
              <table:table-cell office:value-type="float" office:value="-0.00653531">
                <text:p>-0.006535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.189849853516">
                <text:p>376.189849853516</text:p>
              </table:table-cell>
              <table:table-cell office:value-type="float" office:value="0.0009518825">
                <text:p>0.00095188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.300628662109">
                <text:p>376.300628662109</text:p>
              </table:table-cell>
              <table:table-cell office:value-type="float" office:value="-0.002089037">
                <text:p>-0.0020890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6.411437988281">
                <text:p>376.411437988281</text:p>
              </table:table-cell>
              <table:table-cell office:value-type="float" office:value="-0.01099194">
                <text:p>-0.010991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6.522247314453">
                <text:p>376.522247314453</text:p>
              </table:table-cell>
              <table:table-cell office:value-type="float" office:value="-0.0008239076">
                <text:p>-0.00082390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633056640625">
                <text:p>376.633056640625</text:p>
              </table:table-cell>
              <table:table-cell office:value-type="float" office:value="-0.002399389">
                <text:p>-0.0023993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6.743865966797">
                <text:p>376.743865966797</text:p>
              </table:table-cell>
              <table:table-cell office:value-type="float" office:value="0.001762732">
                <text:p>0.0017627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6.854705810547">
                <text:p>376.854705810547</text:p>
              </table:table-cell>
              <table:table-cell office:value-type="float" office:value="0.01304573">
                <text:p>0.013045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6.965515136719">
                <text:p>376.965515136719</text:p>
              </table:table-cell>
              <table:table-cell office:value-type="float" office:value="0.01554718">
                <text:p>0.015547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7.076354980469">
                <text:p>377.076354980469</text:p>
              </table:table-cell>
              <table:table-cell office:value-type="float" office:value="-0.004869612">
                <text:p>-0.0048696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7.187194824219">
                <text:p>377.187194824219</text:p>
              </table:table-cell>
              <table:table-cell office:value-type="float" office:value="0.003898218">
                <text:p>0.0038982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.298034667969">
                <text:p>377.298034667969</text:p>
              </table:table-cell>
              <table:table-cell office:value-type="float" office:value="-0.00721706">
                <text:p>-0.007217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.408905029297">
                <text:p>377.408905029297</text:p>
              </table:table-cell>
              <table:table-cell office:value-type="float" office:value="0.007035878">
                <text:p>0.00703587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.519744873047">
                <text:p>377.519744873047</text:p>
              </table:table-cell>
              <table:table-cell office:value-type="float" office:value="-0.00364854">
                <text:p>-0.0036485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.630615234375">
                <text:p>377.630615234375</text:p>
              </table:table-cell>
              <table:table-cell office:value-type="float" office:value="0.002668983">
                <text:p>0.00266898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.741485595703">
                <text:p>377.741485595703</text:p>
              </table:table-cell>
              <table:table-cell office:value-type="float" office:value="-0.005786588">
                <text:p>-0.0057865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.852355957031">
                <text:p>377.852355957031</text:p>
              </table:table-cell>
              <table:table-cell office:value-type="float" office:value="-0.006406432">
                <text:p>-0.0064064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.963256835938">
                <text:p>377.963256835938</text:p>
              </table:table-cell>
              <table:table-cell office:value-type="float" office:value="-0.003521074">
                <text:p>-0.00352107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8.074157714844">
                <text:p>378.074157714844</text:p>
              </table:table-cell>
              <table:table-cell office:value-type="float" office:value="0.01166791">
                <text:p>0.011667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8.185028076172">
                <text:p>378.185028076172</text:p>
              </table:table-cell>
              <table:table-cell office:value-type="float" office:value="0.01014248">
                <text:p>0.010142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8.295928955078">
                <text:p>378.295928955078</text:p>
              </table:table-cell>
              <table:table-cell office:value-type="float" office:value="-0.007288689">
                <text:p>-0.00728868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8.406860351563">
                <text:p>378.406860351563</text:p>
              </table:table-cell>
              <table:table-cell office:value-type="float" office:value="-0.001359381">
                <text:p>-0.0013593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8.517761230469">
                <text:p>378.517761230469</text:p>
              </table:table-cell>
              <table:table-cell office:value-type="float" office:value="0.004338545">
                <text:p>0.0043385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8.628692626953">
                <text:p>378.628692626953</text:p>
              </table:table-cell>
              <table:table-cell office:value-type="float" office:value="0.0005127144">
                <text:p>0.00051271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8.739593505859">
                <text:p>378.739593505859</text:p>
              </table:table-cell>
              <table:table-cell office:value-type="float" office:value="0.001115029">
                <text:p>0.0011150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8.850524902344">
                <text:p>378.850524902344</text:p>
              </table:table-cell>
              <table:table-cell office:value-type="float" office:value="0.002707368">
                <text:p>0.00270736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8.961486816406">
                <text:p>378.961486816406</text:p>
              </table:table-cell>
              <table:table-cell office:value-type="float" office:value="0.004385261">
                <text:p>0.00438526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9.072418212891">
                <text:p>379.072418212891</text:p>
              </table:table-cell>
              <table:table-cell office:value-type="float" office:value="0.009879011">
                <text:p>0.0098790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9.183380126953">
                <text:p>379.183380126953</text:p>
              </table:table-cell>
              <table:table-cell office:value-type="float" office:value="-0.007252206">
                <text:p>-0.0072522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9.294311523438">
                <text:p>379.294311523438</text:p>
              </table:table-cell>
              <table:table-cell office:value-type="float" office:value="0.005956415">
                <text:p>0.0059564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9.4052734375">
                <text:p>379.4052734375</text:p>
              </table:table-cell>
              <table:table-cell office:value-type="float" office:value="-0.009678422">
                <text:p>-0.0096784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9.516235351563">
                <text:p>379.516235351563</text:p>
              </table:table-cell>
              <table:table-cell office:value-type="float" office:value="-0.006949804">
                <text:p>-0.0069498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9.627227783203">
                <text:p>379.627227783203</text:p>
              </table:table-cell>
              <table:table-cell office:value-type="float" office:value="-0.001915979">
                <text:p>-0.0019159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9.738189697266">
                <text:p>379.738189697266</text:p>
              </table:table-cell>
              <table:table-cell office:value-type="float" office:value="0.01175953">
                <text:p>0.011759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9.849182128906">
                <text:p>379.849182128906</text:p>
              </table:table-cell>
              <table:table-cell office:value-type="float" office:value="-0.005272818">
                <text:p>-0.0052728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9.960174560547">
                <text:p>379.960174560547</text:p>
              </table:table-cell>
              <table:table-cell office:value-type="float" office:value="-0.002355219">
                <text:p>-0.0023552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0.071166992188">
                <text:p>380.071166992188</text:p>
              </table:table-cell>
              <table:table-cell office:value-type="float" office:value="-0.005333526">
                <text:p>-0.0053335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.182189941406">
                <text:p>380.182189941406</text:p>
              </table:table-cell>
              <table:table-cell office:value-type="float" office:value="0.01105132">
                <text:p>0.011051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0.293182373047">
                <text:p>380.293182373047</text:p>
              </table:table-cell>
              <table:table-cell office:value-type="float" office:value="0.006883189">
                <text:p>0.0068831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0.404205322266">
                <text:p>380.404205322266</text:p>
              </table:table-cell>
              <table:table-cell office:value-type="float" office:value="-0.01260963">
                <text:p>-0.012609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.515228271484">
                <text:p>380.515228271484</text:p>
              </table:table-cell>
              <table:table-cell office:value-type="float" office:value="-0.008873795">
                <text:p>-0.0088737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.626251220703">
                <text:p>380.626251220703</text:p>
              </table:table-cell>
              <table:table-cell office:value-type="float" office:value="-0.001475817">
                <text:p>-0.0014758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.737274169922">
                <text:p>380.737274169922</text:p>
              </table:table-cell>
              <table:table-cell office:value-type="float" office:value="-0.0107249">
                <text:p>-0.010724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.848327636719">
                <text:p>380.848327636719</text:p>
              </table:table-cell>
              <table:table-cell office:value-type="float" office:value="0.01502462">
                <text:p>0.0150246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0.959381103516">
                <text:p>380.959381103516</text:p>
              </table:table-cell>
              <table:table-cell office:value-type="float" office:value="-0.00150739">
                <text:p>-0.0015073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1.070404052734">
                <text:p>381.070404052734</text:p>
              </table:table-cell>
              <table:table-cell office:value-type="float" office:value="-0.005831989">
                <text:p>-0.0058319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1.181488037109">
                <text:p>381.181488037109</text:p>
              </table:table-cell>
              <table:table-cell office:value-type="float" office:value="0.001727279">
                <text:p>0.00172727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1.292541503906">
                <text:p>381.292541503906</text:p>
              </table:table-cell>
              <table:table-cell office:value-type="float" office:value="-0.005136741">
                <text:p>-0.00513674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1.403594970703">
                <text:p>381.403594970703</text:p>
              </table:table-cell>
              <table:table-cell office:value-type="float" office:value="0.01231385">
                <text:p>0.0123138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1.514678955078">
                <text:p>381.514678955078</text:p>
              </table:table-cell>
              <table:table-cell office:value-type="float" office:value="0.01120383">
                <text:p>0.011203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1.625762939453">
                <text:p>381.625762939453</text:p>
              </table:table-cell>
              <table:table-cell office:value-type="float" office:value="0.01314389">
                <text:p>0.013143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1.736846923828">
                <text:p>381.736846923828</text:p>
              </table:table-cell>
              <table:table-cell office:value-type="float" office:value="0.009746639">
                <text:p>0.00974663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1.847930908203">
                <text:p>381.847930908203</text:p>
              </table:table-cell>
              <table:table-cell office:value-type="float" office:value="-0.005781002">
                <text:p>-0.0057810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1.959045410156">
                <text:p>381.959045410156</text:p>
              </table:table-cell>
              <table:table-cell office:value-type="float" office:value="0.00889968">
                <text:p>0.008899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2.070129394531">
                <text:p>382.070129394531</text:p>
              </table:table-cell>
              <table:table-cell office:value-type="float" office:value="0.0008985199">
                <text:p>0.000898519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2.181243896484">
                <text:p>382.181243896484</text:p>
              </table:table-cell>
              <table:table-cell office:value-type="float" office:value="0.0052179">
                <text:p>0.00521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2.292358398438">
                <text:p>382.292358398438</text:p>
              </table:table-cell>
              <table:table-cell office:value-type="float" office:value="-0.005169506">
                <text:p>-0.00516950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2.403503417969">
                <text:p>382.403503417969</text:p>
              </table:table-cell>
              <table:table-cell office:value-type="float" office:value="0.004474175">
                <text:p>0.0044741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2.514617919922">
                <text:p>382.514617919922</text:p>
              </table:table-cell>
              <table:table-cell office:value-type="float" office:value="0.01677292">
                <text:p>0.0167729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2.625762939453">
                <text:p>382.625762939453</text:p>
              </table:table-cell>
              <table:table-cell office:value-type="float" office:value="-0.002829721">
                <text:p>-0.0028297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2.736907958984">
                <text:p>382.736907958984</text:p>
              </table:table-cell>
              <table:table-cell office:value-type="float" office:value="0.0065542">
                <text:p>0.00655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2.848052978516">
                <text:p>382.848052978516</text:p>
              </table:table-cell>
              <table:table-cell office:value-type="float" office:value="0.003774532">
                <text:p>0.00377453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2.959197998047">
                <text:p>382.959197998047</text:p>
              </table:table-cell>
              <table:table-cell office:value-type="float" office:value="0.009240808">
                <text:p>0.0092408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3.070343017578">
                <text:p>383.070343017578</text:p>
              </table:table-cell>
              <table:table-cell office:value-type="float" office:value="0.003713477">
                <text:p>0.00371347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3.181518554688">
                <text:p>383.181518554688</text:p>
              </table:table-cell>
              <table:table-cell office:value-type="float" office:value="0.01365884">
                <text:p>0.013658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3.292694091797">
                <text:p>383.292694091797</text:p>
              </table:table-cell>
              <table:table-cell office:value-type="float" office:value="0.003221892">
                <text:p>0.00322189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.403869628906">
                <text:p>383.403869628906</text:p>
              </table:table-cell>
              <table:table-cell office:value-type="float" office:value="-0.001503286">
                <text:p>-0.0015032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3.515045166016">
                <text:p>383.515045166016</text:p>
              </table:table-cell>
              <table:table-cell office:value-type="float" office:value="-0.001180413">
                <text:p>-0.0011804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3.626220703125">
                <text:p>383.626220703125</text:p>
              </table:table-cell>
              <table:table-cell office:value-type="float" office:value="0.01234565">
                <text:p>0.012345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3.737426757813">
                <text:p>383.737426757813</text:p>
              </table:table-cell>
              <table:table-cell office:value-type="float" office:value="0.0136975">
                <text:p>0.01369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3.8486328125">
                <text:p>383.8486328125</text:p>
              </table:table-cell>
              <table:table-cell office:value-type="float" office:value="-0.0002284833">
                <text:p>-0.00022848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3.959838867188">
                <text:p>383.959838867188</text:p>
              </table:table-cell>
              <table:table-cell office:value-type="float" office:value="-0.0009825112">
                <text:p>-0.00098251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4.071044921875">
                <text:p>384.071044921875</text:p>
              </table:table-cell>
              <table:table-cell office:value-type="float" office:value="-0.008645377">
                <text:p>-0.00864537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4.182250976563">
                <text:p>384.182250976563</text:p>
              </table:table-cell>
              <table:table-cell office:value-type="float" office:value="0.01127582">
                <text:p>0.011275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4.293487548828">
                <text:p>384.293487548828</text:p>
              </table:table-cell>
              <table:table-cell office:value-type="float" office:value="-0.007832539">
                <text:p>-0.0078325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4.404693603516">
                <text:p>384.404693603516</text:p>
              </table:table-cell>
              <table:table-cell office:value-type="float" office:value="0.0115223">
                <text:p>0.01152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4.515930175781">
                <text:p>384.515930175781</text:p>
              </table:table-cell>
              <table:table-cell office:value-type="float" office:value="0.01240729">
                <text:p>0.0124072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4.627197265625">
                <text:p>384.627197265625</text:p>
              </table:table-cell>
              <table:table-cell office:value-type="float" office:value="-0.009875837">
                <text:p>-0.0098758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4.738433837891">
                <text:p>384.738433837891</text:p>
              </table:table-cell>
              <table:table-cell office:value-type="float" office:value="-0.004482382">
                <text:p>-0.0044823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4.849670410156">
                <text:p>384.849670410156</text:p>
              </table:table-cell>
              <table:table-cell office:value-type="float" office:value="0.01650831">
                <text:p>0.0165083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4.9609375">
                <text:p>384.9609375</text:p>
              </table:table-cell>
              <table:table-cell office:value-type="float" office:value="0.01364036">
                <text:p>0.013640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5.072204589844">
                <text:p>385.072204589844</text:p>
              </table:table-cell>
              <table:table-cell office:value-type="float" office:value="-0.006237119">
                <text:p>-0.0062371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5.183471679688">
                <text:p>385.183471679688</text:p>
              </table:table-cell>
              <table:table-cell office:value-type="float" office:value="0.01387064">
                <text:p>0.0138706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5.294738769531">
                <text:p>385.294738769531</text:p>
              </table:table-cell>
              <table:table-cell office:value-type="float" office:value="0.008470399">
                <text:p>0.0084703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5.406036376953">
                <text:p>385.406036376953</text:p>
              </table:table-cell>
              <table:table-cell office:value-type="float" office:value="-0.002661438">
                <text:p>-0.0026614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5.517333984375">
                <text:p>385.517333984375</text:p>
              </table:table-cell>
              <table:table-cell office:value-type="float" office:value="0.004385749">
                <text:p>0.0043857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5.628601074219">
                <text:p>385.628601074219</text:p>
              </table:table-cell>
              <table:table-cell office:value-type="float" office:value="-0.004015415">
                <text:p>-0.0040154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5.739898681641">
                <text:p>385.739898681641</text:p>
              </table:table-cell>
              <table:table-cell office:value-type="float" office:value="-0.007850381">
                <text:p>-0.0078503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5.851226806641">
                <text:p>385.851226806641</text:p>
              </table:table-cell>
              <table:table-cell office:value-type="float" office:value="0.01303278">
                <text:p>0.013032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5.962524414063">
                <text:p>385.962524414063</text:p>
              </table:table-cell>
              <table:table-cell office:value-type="float" office:value="-0.003451243">
                <text:p>-0.0034512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6.073852539063">
                <text:p>386.073852539063</text:p>
              </table:table-cell>
              <table:table-cell office:value-type="float" office:value="0.01346878">
                <text:p>0.0134687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6.185180664063">
                <text:p>386.185180664063</text:p>
              </table:table-cell>
              <table:table-cell office:value-type="float" office:value="0.0009238591">
                <text:p>0.00092385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6.296508789063">
                <text:p>386.296508789063</text:p>
              </table:table-cell>
              <table:table-cell office:value-type="float" office:value="0.007399801">
                <text:p>0.0073998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6.407836914063">
                <text:p>386.407836914063</text:p>
              </table:table-cell>
              <table:table-cell office:value-type="float" office:value="0.002162221">
                <text:p>0.0021622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6.519165039063">
                <text:p>386.519165039063</text:p>
              </table:table-cell>
              <table:table-cell office:value-type="float" office:value="0.003595523">
                <text:p>0.00359552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6.630523681641">
                <text:p>386.630523681641</text:p>
              </table:table-cell>
              <table:table-cell office:value-type="float" office:value="0.003054399">
                <text:p>0.0030543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6.741882324219">
                <text:p>386.741882324219</text:p>
              </table:table-cell>
              <table:table-cell office:value-type="float" office:value="0.0009198532">
                <text:p>0.00091985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6.853240966797">
                <text:p>386.853240966797</text:p>
              </table:table-cell>
              <table:table-cell office:value-type="float" office:value="-0.003601717">
                <text:p>-0.0036017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6.964599609375">
                <text:p>386.964599609375</text:p>
              </table:table-cell>
              <table:table-cell office:value-type="float" office:value="-0.005581487">
                <text:p>-0.00558148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7.075958251953">
                <text:p>387.075958251953</text:p>
              </table:table-cell>
              <table:table-cell office:value-type="float" office:value="0.008063002">
                <text:p>0.0080630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7.187347412109">
                <text:p>387.187347412109</text:p>
              </table:table-cell>
              <table:table-cell office:value-type="float" office:value="-0.005571512">
                <text:p>-0.0055715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7.298736572266">
                <text:p>387.298736572266</text:p>
              </table:table-cell>
              <table:table-cell office:value-type="float" office:value="0.01507243">
                <text:p>0.0150724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7.410095214844">
                <text:p>387.410095214844</text:p>
              </table:table-cell>
              <table:table-cell office:value-type="float" office:value="0.0038972">
                <text:p>0.003897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7.521514892578">
                <text:p>387.521514892578</text:p>
              </table:table-cell>
              <table:table-cell office:value-type="float" office:value="-0.0006043543">
                <text:p>-0.000604354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7.632904052734">
                <text:p>387.632904052734</text:p>
              </table:table-cell>
              <table:table-cell office:value-type="float" office:value="0.0006582212">
                <text:p>0.00065822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7.744293212891">
                <text:p>387.744293212891</text:p>
              </table:table-cell>
              <table:table-cell office:value-type="float" office:value="0.01396008">
                <text:p>0.013960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7.855712890625">
                <text:p>387.855712890625</text:p>
              </table:table-cell>
              <table:table-cell office:value-type="float" office:value="0.002641956">
                <text:p>0.0026419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7.967132568359">
                <text:p>387.967132568359</text:p>
              </table:table-cell>
              <table:table-cell office:value-type="float" office:value="0.005103338">
                <text:p>0.0051033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8.078552246094">
                <text:p>388.078552246094</text:p>
              </table:table-cell>
              <table:table-cell office:value-type="float" office:value="0.00217135">
                <text:p>0.002171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8.189971923828">
                <text:p>388.189971923828</text:p>
              </table:table-cell>
              <table:table-cell office:value-type="float" office:value="0.001587919">
                <text:p>0.0015879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8.301422119141">
                <text:p>388.301422119141</text:p>
              </table:table-cell>
              <table:table-cell office:value-type="float" office:value="-0.004581164">
                <text:p>-0.00458116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8.412872314453">
                <text:p>388.412872314453</text:p>
              </table:table-cell>
              <table:table-cell office:value-type="float" office:value="-0.00796071">
                <text:p>-0.0079607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8.524291992188">
                <text:p>388.524291992188</text:p>
              </table:table-cell>
              <table:table-cell office:value-type="float" office:value="0.006181448">
                <text:p>0.0061814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.635772705078">
                <text:p>388.635772705078</text:p>
              </table:table-cell>
              <table:table-cell office:value-type="float" office:value="0.004428688">
                <text:p>0.0044286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8.747222900391">
                <text:p>388.747222900391</text:p>
              </table:table-cell>
              <table:table-cell office:value-type="float" office:value="-0.0007571847">
                <text:p>-0.000757184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8.858673095703">
                <text:p>388.858673095703</text:p>
              </table:table-cell>
              <table:table-cell office:value-type="float" office:value="-0.008451517">
                <text:p>-0.00845151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8.970153808594">
                <text:p>388.970153808594</text:p>
              </table:table-cell>
              <table:table-cell office:value-type="float" office:value="0.002528015">
                <text:p>0.0025280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9.081634521484">
                <text:p>389.081634521484</text:p>
              </table:table-cell>
              <table:table-cell office:value-type="float" office:value="-0.001505915">
                <text:p>-0.0015059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9.193115234375">
                <text:p>389.193115234375</text:p>
              </table:table-cell>
              <table:table-cell office:value-type="float" office:value="0.001299911">
                <text:p>0.0012999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9.304595947266">
                <text:p>389.304595947266</text:p>
              </table:table-cell>
              <table:table-cell office:value-type="float" office:value="-0.00221556">
                <text:p>-0.002215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9.416076660156">
                <text:p>389.416076660156</text:p>
              </table:table-cell>
              <table:table-cell office:value-type="float" office:value="0.004320651">
                <text:p>0.00432065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.527587890625">
                <text:p>389.527587890625</text:p>
              </table:table-cell>
              <table:table-cell office:value-type="float" office:value="-0.003139973">
                <text:p>-0.0031399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.639099121094">
                <text:p>389.639099121094</text:p>
              </table:table-cell>
              <table:table-cell office:value-type="float" office:value="0.01409106">
                <text:p>0.014091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9.750610351563">
                <text:p>389.750610351563</text:p>
              </table:table-cell>
              <table:table-cell office:value-type="float" office:value="-0.003310428">
                <text:p>-0.0033104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9.862121582031">
                <text:p>389.862121582031</text:p>
              </table:table-cell>
              <table:table-cell office:value-type="float" office:value="-0.0028836">
                <text:p>-0.002883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9.9736328125">
                <text:p>389.9736328125</text:p>
              </table:table-cell>
              <table:table-cell office:value-type="float" office:value="-0.001393726">
                <text:p>-0.00139372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0.085174560547">
                <text:p>390.085174560547</text:p>
              </table:table-cell>
              <table:table-cell office:value-type="float" office:value="-0.002685087">
                <text:p>-0.0026850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0.196685791016">
                <text:p>390.196685791016</text:p>
              </table:table-cell>
              <table:table-cell office:value-type="float" office:value="0.01472548">
                <text:p>0.0147254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0.308227539063">
                <text:p>390.308227539063</text:p>
              </table:table-cell>
              <table:table-cell office:value-type="float" office:value="0.0001102471">
                <text:p>0.000110247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0.419769287109">
                <text:p>390.419769287109</text:p>
              </table:table-cell>
              <table:table-cell office:value-type="float" office:value="0.0005978962">
                <text:p>0.000597896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.531341552734">
                <text:p>390.531341552734</text:p>
              </table:table-cell>
              <table:table-cell office:value-type="float" office:value="0.001600372">
                <text:p>0.00160037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0.642883300781">
                <text:p>390.642883300781</text:p>
              </table:table-cell>
              <table:table-cell office:value-type="float" office:value="-0.003867771">
                <text:p>-0.0038677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0.754455566406">
                <text:p>390.754455566406</text:p>
              </table:table-cell>
              <table:table-cell office:value-type="float" office:value="0.01458897">
                <text:p>0.014588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0.866027832031">
                <text:p>390.866027832031</text:p>
              </table:table-cell>
              <table:table-cell office:value-type="float" office:value="0.0008961246">
                <text:p>0.000896124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0.977600097656">
                <text:p>390.977600097656</text:p>
              </table:table-cell>
              <table:table-cell office:value-type="float" office:value="0.00040883">
                <text:p>0.0004088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1.089172363281">
                <text:p>391.089172363281</text:p>
              </table:table-cell>
              <table:table-cell office:value-type="float" office:value="-0.007009082">
                <text:p>-0.00700908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1.200744628906">
                <text:p>391.200744628906</text:p>
              </table:table-cell>
              <table:table-cell office:value-type="float" office:value="0.0160732">
                <text:p>0.016073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1.312347412109">
                <text:p>391.312347412109</text:p>
              </table:table-cell>
              <table:table-cell office:value-type="float" office:value="-0.001679944">
                <text:p>-0.0016799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1.423950195313">
                <text:p>391.423950195313</text:p>
              </table:table-cell>
              <table:table-cell office:value-type="float" office:value="0.01231186">
                <text:p>0.0123118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1.535552978516">
                <text:p>391.535552978516</text:p>
              </table:table-cell>
              <table:table-cell office:value-type="float" office:value="-0.009381955">
                <text:p>-0.0093819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1.647155761719">
                <text:p>391.647155761719</text:p>
              </table:table-cell>
              <table:table-cell office:value-type="float" office:value="0.003902981">
                <text:p>0.00390298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1.758758544922">
                <text:p>391.758758544922</text:p>
              </table:table-cell>
              <table:table-cell office:value-type="float" office:value="-0.009954171">
                <text:p>-0.00995417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1.870391845703">
                <text:p>391.870391845703</text:p>
              </table:table-cell>
              <table:table-cell office:value-type="float" office:value="0.01249375">
                <text:p>0.012493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1.982025146484">
                <text:p>391.982025146484</text:p>
              </table:table-cell>
              <table:table-cell office:value-type="float" office:value="0.002392685">
                <text:p>0.00239268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2.093658447266">
                <text:p>392.093658447266</text:p>
              </table:table-cell>
              <table:table-cell office:value-type="float" office:value="-0.008207048">
                <text:p>-0.00820704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2.205291748047">
                <text:p>392.205291748047</text:p>
              </table:table-cell>
              <table:table-cell office:value-type="float" office:value="0.0007750069">
                <text:p>0.000775006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2.316925048828">
                <text:p>392.316925048828</text:p>
              </table:table-cell>
              <table:table-cell office:value-type="float" office:value="0.01667764">
                <text:p>0.0166776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2.428558349609">
                <text:p>392.428558349609</text:p>
              </table:table-cell>
              <table:table-cell office:value-type="float" office:value="0.01138807">
                <text:p>0.011388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.540222167969">
                <text:p>392.540222167969</text:p>
              </table:table-cell>
              <table:table-cell office:value-type="float" office:value="-0.004607955">
                <text:p>-0.0046079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.651885986328">
                <text:p>392.651885986328</text:p>
              </table:table-cell>
              <table:table-cell office:value-type="float" office:value="-0.007684313">
                <text:p>-0.0076843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.763549804688">
                <text:p>392.763549804688</text:p>
              </table:table-cell>
              <table:table-cell office:value-type="float" office:value="-0.0002232914">
                <text:p>-0.00022329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.875213623047">
                <text:p>392.875213623047</text:p>
              </table:table-cell>
              <table:table-cell office:value-type="float" office:value="0.0007379391">
                <text:p>0.00073793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.986907958984">
                <text:p>392.986907958984</text:p>
              </table:table-cell>
              <table:table-cell office:value-type="float" office:value="0.003986406">
                <text:p>0.00398640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3.098602294922">
                <text:p>393.098602294922</text:p>
              </table:table-cell>
              <table:table-cell office:value-type="float" office:value="0.01393706">
                <text:p>0.0139370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.210266113281">
                <text:p>393.210266113281</text:p>
              </table:table-cell>
              <table:table-cell office:value-type="float" office:value="-0.003638733">
                <text:p>-0.0036387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3.321960449219">
                <text:p>393.321960449219</text:p>
              </table:table-cell>
              <table:table-cell office:value-type="float" office:value="-0.002285779">
                <text:p>-0.00228577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3.433685302734">
                <text:p>393.433685302734</text:p>
              </table:table-cell>
              <table:table-cell office:value-type="float" office:value="-0.00612667">
                <text:p>-0.006126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3.545379638672">
                <text:p>393.545379638672</text:p>
              </table:table-cell>
              <table:table-cell office:value-type="float" office:value="-0.01029963">
                <text:p>-0.010299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3.657104492188">
                <text:p>393.657104492188</text:p>
              </table:table-cell>
              <table:table-cell office:value-type="float" office:value="0.0004373128">
                <text:p>0.00043731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3.768798828125">
                <text:p>393.768798828125</text:p>
              </table:table-cell>
              <table:table-cell office:value-type="float" office:value="-0.006278546">
                <text:p>-0.0062785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3.880523681641">
                <text:p>393.880523681641</text:p>
              </table:table-cell>
              <table:table-cell office:value-type="float" office:value="0.01200364">
                <text:p>0.012003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3.992248535156">
                <text:p>393.992248535156</text:p>
              </table:table-cell>
              <table:table-cell office:value-type="float" office:value="0.02191984">
                <text:p>0.021919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4.10400390625">
                <text:p>394.10400390625</text:p>
              </table:table-cell>
              <table:table-cell office:value-type="float" office:value="-0.005925564">
                <text:p>-0.0059255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4.215728759766">
                <text:p>394.215728759766</text:p>
              </table:table-cell>
              <table:table-cell office:value-type="float" office:value="0.001915159">
                <text:p>0.00191515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4.327484130859">
                <text:p>394.327484130859</text:p>
              </table:table-cell>
              <table:table-cell office:value-type="float" office:value="0.00641993">
                <text:p>0.0064199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4.439239501953">
                <text:p>394.439239501953</text:p>
              </table:table-cell>
              <table:table-cell office:value-type="float" office:value="-0.001761794">
                <text:p>-0.0017617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4.550994873047">
                <text:p>394.550994873047</text:p>
              </table:table-cell>
              <table:table-cell office:value-type="float" office:value="-0.007840494">
                <text:p>-0.00784049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4.662750244141">
                <text:p>394.662750244141</text:p>
              </table:table-cell>
              <table:table-cell office:value-type="float" office:value="0.003927822">
                <text:p>0.0039278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4.774536132813">
                <text:p>394.774536132813</text:p>
              </table:table-cell>
              <table:table-cell office:value-type="float" office:value="-0.002957985">
                <text:p>-0.0029579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4.886291503906">
                <text:p>394.886291503906</text:p>
              </table:table-cell>
              <table:table-cell office:value-type="float" office:value="0.007953324">
                <text:p>0.0079533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4.998077392578">
                <text:p>394.998077392578</text:p>
              </table:table-cell>
              <table:table-cell office:value-type="float" office:value="-0.002870357">
                <text:p>-0.00287035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5.10986328125">
                <text:p>395.10986328125</text:p>
              </table:table-cell>
              <table:table-cell office:value-type="float" office:value="0.009588307">
                <text:p>0.0095883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5.221649169922">
                <text:p>395.221649169922</text:p>
              </table:table-cell>
              <table:table-cell office:value-type="float" office:value="-0.003627539">
                <text:p>-0.00362753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5.333465576172">
                <text:p>395.333465576172</text:p>
              </table:table-cell>
              <table:table-cell office:value-type="float" office:value="-0.008872228">
                <text:p>-0.0088722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5.445251464844">
                <text:p>395.445251464844</text:p>
              </table:table-cell>
              <table:table-cell office:value-type="float" office:value="-0.003105602">
                <text:p>-0.0031056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557067871094">
                <text:p>395.557067871094</text:p>
              </table:table-cell>
              <table:table-cell office:value-type="float" office:value="-0.006162853">
                <text:p>-0.0061628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5.668884277344">
                <text:p>395.668884277344</text:p>
              </table:table-cell>
              <table:table-cell office:value-type="float" office:value="0.04389344">
                <text:p>0.043893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5.780700683594">
                <text:p>395.780700683594</text:p>
              </table:table-cell>
              <table:table-cell office:value-type="float" office:value="-0.003126439">
                <text:p>-0.00312643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5.892547607422">
                <text:p>395.892547607422</text:p>
              </table:table-cell>
              <table:table-cell office:value-type="float" office:value="0.002717341">
                <text:p>0.0027173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6.004364013672">
                <text:p>396.004364013672</text:p>
              </table:table-cell>
              <table:table-cell office:value-type="float" office:value="0.002500009">
                <text:p>0.0025000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6.1162109375">
                <text:p>396.1162109375</text:p>
              </table:table-cell>
              <table:table-cell office:value-type="float" office:value="0.04775495">
                <text:p>0.0477549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6.228057861328">
                <text:p>396.228057861328</text:p>
              </table:table-cell>
              <table:table-cell office:value-type="float" office:value="0.0004268414">
                <text:p>0.00042684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6.339904785156">
                <text:p>396.339904785156</text:p>
              </table:table-cell>
              <table:table-cell office:value-type="float" office:value="-0.001527188">
                <text:p>-0.00152718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6.451751708984">
                <text:p>396.451751708984</text:p>
              </table:table-cell>
              <table:table-cell office:value-type="float" office:value="-0.004322811">
                <text:p>-0.0043228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6.563629150391">
                <text:p>396.563629150391</text:p>
              </table:table-cell>
              <table:table-cell office:value-type="float" office:value="-0.007342211">
                <text:p>-0.0073422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6.675476074219">
                <text:p>396.675476074219</text:p>
              </table:table-cell>
              <table:table-cell office:value-type="float" office:value="-0.002705093">
                <text:p>-0.0027050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6.787353515625">
                <text:p>396.787353515625</text:p>
              </table:table-cell>
              <table:table-cell office:value-type="float" office:value="0.01146033">
                <text:p>0.011460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6.899230957031">
                <text:p>396.899230957031</text:p>
              </table:table-cell>
              <table:table-cell office:value-type="float" office:value="-0.004204408">
                <text:p>-0.0042044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7.011108398438">
                <text:p>397.011108398438</text:p>
              </table:table-cell>
              <table:table-cell office:value-type="float" office:value="0.001905519">
                <text:p>0.0019055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7.123016357422">
                <text:p>397.123016357422</text:p>
              </table:table-cell>
              <table:table-cell office:value-type="float" office:value="-0.004661118">
                <text:p>-0.0046611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7.234893798828">
                <text:p>397.234893798828</text:p>
              </table:table-cell>
              <table:table-cell office:value-type="float" office:value="0.005498847">
                <text:p>0.00549884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7.346801757813">
                <text:p>397.346801757813</text:p>
              </table:table-cell>
              <table:table-cell office:value-type="float" office:value="0.002508689">
                <text:p>0.0025086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7.458709716797">
                <text:p>397.458709716797</text:p>
              </table:table-cell>
              <table:table-cell office:value-type="float" office:value="-0.002904254">
                <text:p>-0.00290425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7.570617675781">
                <text:p>397.570617675781</text:p>
              </table:table-cell>
              <table:table-cell office:value-type="float" office:value="0.00505428">
                <text:p>0.005054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7.682525634766">
                <text:p>397.682525634766</text:p>
              </table:table-cell>
              <table:table-cell office:value-type="float" office:value="-0.002478734">
                <text:p>-0.0024787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7.794464111328">
                <text:p>397.794464111328</text:p>
              </table:table-cell>
              <table:table-cell office:value-type="float" office:value="0.001595337">
                <text:p>0.00159533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7.906402587891">
                <text:p>397.906402587891</text:p>
              </table:table-cell>
              <table:table-cell office:value-type="float" office:value="0.0007693572">
                <text:p>0.000769357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8.018310546875">
                <text:p>398.018310546875</text:p>
              </table:table-cell>
              <table:table-cell office:value-type="float" office:value="0.006269809">
                <text:p>0.00626980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8.130249023438">
                <text:p>398.130249023438</text:p>
              </table:table-cell>
              <table:table-cell office:value-type="float" office:value="-0.002665886">
                <text:p>-0.0026658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8.242218017578">
                <text:p>398.242218017578</text:p>
              </table:table-cell>
              <table:table-cell office:value-type="float" office:value="-0.0003331692">
                <text:p>-0.00033316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8.354156494141">
                <text:p>398.354156494141</text:p>
              </table:table-cell>
              <table:table-cell office:value-type="float" office:value="-0.002229175">
                <text:p>-0.0022291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8.466125488281">
                <text:p>398.466125488281</text:p>
              </table:table-cell>
              <table:table-cell office:value-type="float" office:value="-0.001411724">
                <text:p>-0.00141172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8.578094482422">
                <text:p>398.578094482422</text:p>
              </table:table-cell>
              <table:table-cell office:value-type="float" office:value="-0.001592741">
                <text:p>-0.00159274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8.690063476563">
                <text:p>398.690063476563</text:p>
              </table:table-cell>
              <table:table-cell office:value-type="float" office:value="-0.006726391">
                <text:p>-0.0067263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8.802032470703">
                <text:p>398.802032470703</text:p>
              </table:table-cell>
              <table:table-cell office:value-type="float" office:value="-0.005551233">
                <text:p>-0.0055512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8.914001464844">
                <text:p>398.914001464844</text:p>
              </table:table-cell>
              <table:table-cell office:value-type="float" office:value="-0.003804219">
                <text:p>-0.0038042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9.026000976563">
                <text:p>399.026000976563</text:p>
              </table:table-cell>
              <table:table-cell office:value-type="float" office:value="0.02145736">
                <text:p>0.021457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9.137969970703">
                <text:p>399.137969970703</text:p>
              </table:table-cell>
              <table:table-cell office:value-type="float" office:value="-0.002631201">
                <text:p>-0.0026312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9.249969482422">
                <text:p>399.249969482422</text:p>
              </table:table-cell>
              <table:table-cell office:value-type="float" office:value="0.0162617">
                <text:p>0.016261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9.361968994141">
                <text:p>399.361968994141</text:p>
              </table:table-cell>
              <table:table-cell office:value-type="float" office:value="-0.003531387">
                <text:p>-0.0035313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9.473999023438">
                <text:p>399.473999023438</text:p>
              </table:table-cell>
              <table:table-cell office:value-type="float" office:value="0.009070625">
                <text:p>0.0090706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9.585998535156">
                <text:p>399.585998535156</text:p>
              </table:table-cell>
              <table:table-cell office:value-type="float" office:value="-0.0003830136">
                <text:p>-0.000383013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9.698028564453">
                <text:p>399.698028564453</text:p>
              </table:table-cell>
              <table:table-cell office:value-type="float" office:value="-0.002560906">
                <text:p>-0.0025609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9.81005859375">
                <text:p>399.81005859375</text:p>
              </table:table-cell>
              <table:table-cell office:value-type="float" office:value="-0.007214855">
                <text:p>-0.0072148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9.922088623047">
                <text:p>399.922088623047</text:p>
              </table:table-cell>
              <table:table-cell office:value-type="float" office:value="-0.002970036">
                <text:p>-0.0029700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0.034118652344">
                <text:p>400.034118652344</text:p>
              </table:table-cell>
              <table:table-cell office:value-type="float" office:value="-0.006663259">
                <text:p>-0.00666325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0.146148681641">
                <text:p>400.146148681641</text:p>
              </table:table-cell>
              <table:table-cell office:value-type="float" office:value="-0.0003959536">
                <text:p>-0.000395953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0.258209228516">
                <text:p>400.258209228516</text:p>
              </table:table-cell>
              <table:table-cell office:value-type="float" office:value="-0.002878191">
                <text:p>-0.0028781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00.370269775391">
                <text:p>400.370269775391</text:p>
              </table:table-cell>
              <table:table-cell office:value-type="float" office:value="0.002490611">
                <text:p>0.0024906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0.482330322266">
                <text:p>400.482330322266</text:p>
              </table:table-cell>
              <table:table-cell office:value-type="float" office:value="-0.002037864">
                <text:p>-0.00203786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.594390869141">
                <text:p>400.594390869141</text:p>
              </table:table-cell>
              <table:table-cell office:value-type="float" office:value="0.006342154">
                <text:p>0.00634215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0.706451416016">
                <text:p>400.706451416016</text:p>
              </table:table-cell>
              <table:table-cell office:value-type="float" office:value="-0.003968223">
                <text:p>-0.00396822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00.818511962891">
                <text:p>400.818511962891</text:p>
              </table:table-cell>
              <table:table-cell office:value-type="float" office:value="0.00608433">
                <text:p>0.006084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00.930603027344">
                <text:p>400.930603027344</text:p>
              </table:table-cell>
              <table:table-cell office:value-type="float" office:value="0.006649504">
                <text:p>0.0066495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01.042694091797">
                <text:p>401.042694091797</text:p>
              </table:table-cell>
              <table:table-cell office:value-type="float" office:value="-0.0005579174">
                <text:p>-0.000557917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01.15478515625">
                <text:p>401.15478515625</text:p>
              </table:table-cell>
              <table:table-cell office:value-type="float" office:value="0.005811685">
                <text:p>0.00581168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1.266876220703">
                <text:p>401.266876220703</text:p>
              </table:table-cell>
              <table:table-cell office:value-type="float" office:value="0.005225659">
                <text:p>0.0052256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1.378997802734">
                <text:p>401.378997802734</text:p>
              </table:table-cell>
              <table:table-cell office:value-type="float" office:value="0.001002481">
                <text:p>0.00100248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1.491088867188">
                <text:p>401.491088867188</text:p>
              </table:table-cell>
              <table:table-cell office:value-type="float" office:value="-0.0018129">
                <text:p>-0.001812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1.603210449219">
                <text:p>401.603210449219</text:p>
              </table:table-cell>
              <table:table-cell office:value-type="float" office:value="-0.0005062087">
                <text:p>-0.000506208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01.71533203125">
                <text:p>401.71533203125</text:p>
              </table:table-cell>
              <table:table-cell office:value-type="float" office:value="-0.003652536">
                <text:p>-0.00365253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1.827453613281">
                <text:p>401.827453613281</text:p>
              </table:table-cell>
              <table:table-cell office:value-type="float" office:value="0.0005867228">
                <text:p>0.000586722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1.939605712891">
                <text:p>401.939605712891</text:p>
              </table:table-cell>
              <table:table-cell office:value-type="float" office:value="0.002595068">
                <text:p>0.00259506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2.051727294922">
                <text:p>402.051727294922</text:p>
              </table:table-cell>
              <table:table-cell office:value-type="float" office:value="-0.006022473">
                <text:p>-0.00602247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2.163879394531">
                <text:p>402.163879394531</text:p>
              </table:table-cell>
              <table:table-cell office:value-type="float" office:value="0.01056245">
                <text:p>0.010562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2.276031494141">
                <text:p>402.276031494141</text:p>
              </table:table-cell>
              <table:table-cell office:value-type="float" office:value="-0.002326349">
                <text:p>-0.00232634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2.38818359375">
                <text:p>402.38818359375</text:p>
              </table:table-cell>
              <table:table-cell office:value-type="float" office:value="-0.001278637">
                <text:p>-0.0012786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.500335693359">
                <text:p>402.500335693359</text:p>
              </table:table-cell>
              <table:table-cell office:value-type="float" office:value="0.0006176832">
                <text:p>0.00061768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2.612487792969">
                <text:p>402.612487792969</text:p>
              </table:table-cell>
              <table:table-cell office:value-type="float" office:value="0.005899705">
                <text:p>0.00589970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2.724670410156">
                <text:p>402.724670410156</text:p>
              </table:table-cell>
              <table:table-cell office:value-type="float" office:value="0.006051911">
                <text:p>0.0060519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2.836853027344">
                <text:p>402.836853027344</text:p>
              </table:table-cell>
              <table:table-cell office:value-type="float" office:value="0.004730646">
                <text:p>0.0047306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2.949035644531">
                <text:p>402.949035644531</text:p>
              </table:table-cell>
              <table:table-cell office:value-type="float" office:value="0.0132353">
                <text:p>0.013235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3.061218261719">
                <text:p>403.061218261719</text:p>
              </table:table-cell>
              <table:table-cell office:value-type="float" office:value="0.002956697">
                <text:p>0.00295669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3.173400878906">
                <text:p>403.173400878906</text:p>
              </table:table-cell>
              <table:table-cell office:value-type="float" office:value="0.01260429">
                <text:p>0.012604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3.285614013672">
                <text:p>403.285614013672</text:p>
              </table:table-cell>
              <table:table-cell office:value-type="float" office:value="-0.0004609792">
                <text:p>-0.000460979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3.397827148438">
                <text:p>403.397827148438</text:p>
              </table:table-cell>
              <table:table-cell office:value-type="float" office:value="-0.005936795">
                <text:p>-0.0059367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3.510040283203">
                <text:p>403.510040283203</text:p>
              </table:table-cell>
              <table:table-cell office:value-type="float" office:value="0.001635134">
                <text:p>0.00163513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3.622253417969">
                <text:p>403.622253417969</text:p>
              </table:table-cell>
              <table:table-cell office:value-type="float" office:value="-0.00803104">
                <text:p>-0.008031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3.734466552734">
                <text:p>403.734466552734</text:p>
              </table:table-cell>
              <table:table-cell office:value-type="float" office:value="0.002668507">
                <text:p>0.0026685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3.8466796875">
                <text:p>403.8466796875</text:p>
              </table:table-cell>
              <table:table-cell office:value-type="float" office:value="-0.002696947">
                <text:p>-0.00269694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3.958923339844">
                <text:p>403.958923339844</text:p>
              </table:table-cell>
              <table:table-cell office:value-type="float" office:value="-0.00127392">
                <text:p>-0.0012739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4.071166992188">
                <text:p>404.071166992188</text:p>
              </table:table-cell>
              <table:table-cell office:value-type="float" office:value="-0.0006848316">
                <text:p>-0.00068483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4.183410644531">
                <text:p>404.183410644531</text:p>
              </table:table-cell>
              <table:table-cell office:value-type="float" office:value="-0.009392937">
                <text:p>-0.00939293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4.295654296875">
                <text:p>404.295654296875</text:p>
              </table:table-cell>
              <table:table-cell office:value-type="float" office:value="0.01026023">
                <text:p>0.0102602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4.407897949219">
                <text:p>404.407897949219</text:p>
              </table:table-cell>
              <table:table-cell office:value-type="float" office:value="-0.009625173">
                <text:p>-0.00962517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4.520172119141">
                <text:p>404.520172119141</text:p>
              </table:table-cell>
              <table:table-cell office:value-type="float" office:value="0.005832538">
                <text:p>0.00583253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4.632446289063">
                <text:p>404.632446289063</text:p>
              </table:table-cell>
              <table:table-cell office:value-type="float" office:value="0.005332847">
                <text:p>0.00533284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4.744689941406">
                <text:p>404.744689941406</text:p>
              </table:table-cell>
              <table:table-cell office:value-type="float" office:value="0.005590582">
                <text:p>0.00559058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4.856994628906">
                <text:p>404.856994628906</text:p>
              </table:table-cell>
              <table:table-cell office:value-type="float" office:value="-0.008972347">
                <text:p>-0.00897234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4.969268798828">
                <text:p>404.969268798828</text:p>
              </table:table-cell>
              <table:table-cell office:value-type="float" office:value="0.002929033">
                <text:p>0.0029290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5.08154296875">
                <text:p>405.08154296875</text:p>
              </table:table-cell>
              <table:table-cell office:value-type="float" office:value="0.01495417">
                <text:p>0.014954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5.19384765625">
                <text:p>405.19384765625</text:p>
              </table:table-cell>
              <table:table-cell office:value-type="float" office:value="-0.004803774">
                <text:p>-0.00480377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5.30615234375">
                <text:p>405.30615234375</text:p>
              </table:table-cell>
              <table:table-cell office:value-type="float" office:value="0.001738991">
                <text:p>0.0017389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5.41845703125">
                <text:p>405.41845703125</text:p>
              </table:table-cell>
              <table:table-cell office:value-type="float" office:value="-0.0004925455">
                <text:p>-0.000492545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5.53076171875">
                <text:p>405.53076171875</text:p>
              </table:table-cell>
              <table:table-cell office:value-type="float" office:value="0.00952237">
                <text:p>0.0095223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5.64306640625">
                <text:p>405.64306640625</text:p>
              </table:table-cell>
              <table:table-cell office:value-type="float" office:value="-0.002887802">
                <text:p>-0.00288780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5.755401611328">
                <text:p>405.755401611328</text:p>
              </table:table-cell>
              <table:table-cell office:value-type="float" office:value="-0.002396626">
                <text:p>-0.00239662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5.867706298828">
                <text:p>405.867706298828</text:p>
              </table:table-cell>
              <table:table-cell office:value-type="float" office:value="-0.00331852">
                <text:p>-0.003318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.980041503906">
                <text:p>405.980041503906</text:p>
              </table:table-cell>
              <table:table-cell office:value-type="float" office:value="0.016873">
                <text:p>0.01687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6.092376708984">
                <text:p>406.092376708984</text:p>
              </table:table-cell>
              <table:table-cell office:value-type="float" office:value="-0.00773868">
                <text:p>-0.007738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6.204742431641">
                <text:p>406.204742431641</text:p>
              </table:table-cell>
              <table:table-cell office:value-type="float" office:value="0.00632454">
                <text:p>0.0063245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6.317077636719">
                <text:p>406.317077636719</text:p>
              </table:table-cell>
              <table:table-cell office:value-type="float" office:value="-0.0004669489">
                <text:p>-0.000466948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6.429443359375">
                <text:p>406.429443359375</text:p>
              </table:table-cell>
              <table:table-cell office:value-type="float" office:value="-0.006973189">
                <text:p>-0.00697318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6.541809082031">
                <text:p>406.541809082031</text:p>
              </table:table-cell>
              <table:table-cell office:value-type="float" office:value="0.0006643547">
                <text:p>0.000664354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6.654174804688">
                <text:p>406.654174804688</text:p>
              </table:table-cell>
              <table:table-cell office:value-type="float" office:value="-0.006988942">
                <text:p>-0.00698894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6.766540527344">
                <text:p>406.766540527344</text:p>
              </table:table-cell>
              <table:table-cell office:value-type="float" office:value="-0.008252449">
                <text:p>-0.00825244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6.87890625">
                <text:p>406.87890625</text:p>
              </table:table-cell>
              <table:table-cell office:value-type="float" office:value="-0.005045434">
                <text:p>-0.00504543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6.991302490234">
                <text:p>406.991302490234</text:p>
              </table:table-cell>
              <table:table-cell office:value-type="float" office:value="0.001659737">
                <text:p>0.00165973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7.103668212891">
                <text:p>407.103668212891</text:p>
              </table:table-cell>
              <table:table-cell office:value-type="float" office:value="-0.005040873">
                <text:p>-0.00504087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7.216064453125">
                <text:p>407.216064453125</text:p>
              </table:table-cell>
              <table:table-cell office:value-type="float" office:value="0.01708172">
                <text:p>0.017081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7.328460693359">
                <text:p>407.328460693359</text:p>
              </table:table-cell>
              <table:table-cell office:value-type="float" office:value="0.004725292">
                <text:p>0.00472529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7.440887451172">
                <text:p>407.440887451172</text:p>
              </table:table-cell>
              <table:table-cell office:value-type="float" office:value="-0.001871991">
                <text:p>-0.00187199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7.553283691406">
                <text:p>407.553283691406</text:p>
              </table:table-cell>
              <table:table-cell office:value-type="float" office:value="0.00908317">
                <text:p>0.009083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7.665710449219">
                <text:p>407.665710449219</text:p>
              </table:table-cell>
              <table:table-cell office:value-type="float" office:value="-0.0027064">
                <text:p>-0.00270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7.778106689453">
                <text:p>407.778106689453</text:p>
              </table:table-cell>
              <table:table-cell office:value-type="float" office:value="0.01227703">
                <text:p>0.012277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.890533447266">
                <text:p>407.890533447266</text:p>
              </table:table-cell>
              <table:table-cell office:value-type="float" office:value="0.005813523">
                <text:p>0.0058135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8.002990722656">
                <text:p>408.002990722656</text:p>
              </table:table-cell>
              <table:table-cell office:value-type="float" office:value="0.008000596">
                <text:p>0.00800059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8.115417480469">
                <text:p>408.115417480469</text:p>
              </table:table-cell>
              <table:table-cell office:value-type="float" office:value="0.00316854">
                <text:p>0.0031685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8.227844238281">
                <text:p>408.227844238281</text:p>
              </table:table-cell>
              <table:table-cell office:value-type="float" office:value="0.02004536">
                <text:p>0.0200453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8.340301513672">
                <text:p>408.340301513672</text:p>
              </table:table-cell>
              <table:table-cell office:value-type="float" office:value="-0.01124873">
                <text:p>-0.0112487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8.452758789063">
                <text:p>408.452758789063</text:p>
              </table:table-cell>
              <table:table-cell office:value-type="float" office:value="-0.002798624">
                <text:p>-0.00279862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8.565216064453">
                <text:p>408.565216064453</text:p>
              </table:table-cell>
              <table:table-cell office:value-type="float" office:value="-0.005781165">
                <text:p>-0.00578116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8.677673339844">
                <text:p>408.677673339844</text:p>
              </table:table-cell>
              <table:table-cell office:value-type="float" office:value="-0.001546956">
                <text:p>-0.00154695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8.790161132813">
                <text:p>408.790161132813</text:p>
              </table:table-cell>
              <table:table-cell office:value-type="float" office:value="-0.003841167">
                <text:p>-0.00384116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8.902618408203">
                <text:p>408.902618408203</text:p>
              </table:table-cell>
              <table:table-cell office:value-type="float" office:value="-0.002421586">
                <text:p>-0.0024215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9.015106201172">
                <text:p>409.015106201172</text:p>
              </table:table-cell>
              <table:table-cell office:value-type="float" office:value="-0.006551124">
                <text:p>-0.0065511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9.127593994141">
                <text:p>409.127593994141</text:p>
              </table:table-cell>
              <table:table-cell office:value-type="float" office:value="0.001545604">
                <text:p>0.00154560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9.240081787109">
                <text:p>409.240081787109</text:p>
              </table:table-cell>
              <table:table-cell office:value-type="float" office:value="0.002133694">
                <text:p>0.00213369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9.352569580078">
                <text:p>409.352569580078</text:p>
              </table:table-cell>
              <table:table-cell office:value-type="float" office:value="-0.008776065">
                <text:p>-0.00877606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9.465087890625">
                <text:p>409.465087890625</text:p>
              </table:table-cell>
              <table:table-cell office:value-type="float" office:value="-0.00219598">
                <text:p>-0.0021959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.577606201172">
                <text:p>409.577606201172</text:p>
              </table:table-cell>
              <table:table-cell office:value-type="float" office:value="-0.005980355">
                <text:p>-0.00598035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9.690093994141">
                <text:p>409.690093994141</text:p>
              </table:table-cell>
              <table:table-cell office:value-type="float" office:value="0.00131536">
                <text:p>0.0013153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9.802612304688">
                <text:p>409.802612304688</text:p>
              </table:table-cell>
              <table:table-cell office:value-type="float" office:value="-0.0003140388">
                <text:p>-0.00031403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9.915161132813">
                <text:p>409.915161132813</text:p>
              </table:table-cell>
              <table:table-cell office:value-type="float" office:value="0.001429026">
                <text:p>0.0014290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0.027679443359">
                <text:p>410.027679443359</text:p>
              </table:table-cell>
              <table:table-cell office:value-type="float" office:value="-0.001501004">
                <text:p>-0.0015010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0.140228271484">
                <text:p>410.140228271484</text:p>
              </table:table-cell>
              <table:table-cell office:value-type="float" office:value="0.003524943">
                <text:p>0.00352494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.252746582031">
                <text:p>410.252746582031</text:p>
              </table:table-cell>
              <table:table-cell office:value-type="float" office:value="0.001579052">
                <text:p>0.0015790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.365295410156">
                <text:p>410.365295410156</text:p>
              </table:table-cell>
              <table:table-cell office:value-type="float" office:value="-0.002396934">
                <text:p>-0.00239693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0.477844238281">
                <text:p>410.477844238281</text:p>
              </table:table-cell>
              <table:table-cell office:value-type="float" office:value="0.01937173">
                <text:p>0.0193717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0.590423583984">
                <text:p>410.590423583984</text:p>
              </table:table-cell>
              <table:table-cell office:value-type="float" office:value="0.007685856">
                <text:p>0.00768585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0.702972412109">
                <text:p>410.702972412109</text:p>
              </table:table-cell>
              <table:table-cell office:value-type="float" office:value="-0.004091782">
                <text:p>-0.00409178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0.815551757813">
                <text:p>410.815551757813</text:p>
              </table:table-cell>
              <table:table-cell office:value-type="float" office:value="0.002061659">
                <text:p>0.00206165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0.928131103516">
                <text:p>410.928131103516</text:p>
              </table:table-cell>
              <table:table-cell office:value-type="float" office:value="0.02700286">
                <text:p>0.0270028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1.040679931641">
                <text:p>411.040679931641</text:p>
              </table:table-cell>
              <table:table-cell office:value-type="float" office:value="0.006623222">
                <text:p>0.00662322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1.153289794922">
                <text:p>411.153289794922</text:p>
              </table:table-cell>
              <table:table-cell office:value-type="float" office:value="0.01443326">
                <text:p>0.0144332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1.265869140625">
                <text:p>411.265869140625</text:p>
              </table:table-cell>
              <table:table-cell office:value-type="float" office:value="0.007059324">
                <text:p>0.00705932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1.378479003906">
                <text:p>411.378479003906</text:p>
              </table:table-cell>
              <table:table-cell office:value-type="float" office:value="0.003369825">
                <text:p>0.0033698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1.491058349609">
                <text:p>411.491058349609</text:p>
              </table:table-cell>
              <table:table-cell office:value-type="float" office:value="0.02550936">
                <text:p>0.0255093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1.603668212891">
                <text:p>411.603668212891</text:p>
              </table:table-cell>
              <table:table-cell office:value-type="float" office:value="0.004287634">
                <text:p>0.00428763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1.716278076172">
                <text:p>411.716278076172</text:p>
              </table:table-cell>
              <table:table-cell office:value-type="float" office:value="0.02342527">
                <text:p>0.0234252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1.828887939453">
                <text:p>411.828887939453</text:p>
              </table:table-cell>
              <table:table-cell office:value-type="float" office:value="0.001348485">
                <text:p>0.0013484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1.941528320313">
                <text:p>411.941528320313</text:p>
              </table:table-cell>
              <table:table-cell office:value-type="float" office:value="0.002280778">
                <text:p>0.00228077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.054138183594">
                <text:p>412.054138183594</text:p>
              </table:table-cell>
              <table:table-cell office:value-type="float" office:value="0.0009701462">
                <text:p>0.000970146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.166778564453">
                <text:p>412.166778564453</text:p>
              </table:table-cell>
              <table:table-cell office:value-type="float" office:value="-0.007770743">
                <text:p>-0.00777074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2.279418945313">
                <text:p>412.279418945313</text:p>
              </table:table-cell>
              <table:table-cell office:value-type="float" office:value="0.008724854">
                <text:p>0.0087248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.392059326172">
                <text:p>412.392059326172</text:p>
              </table:table-cell>
              <table:table-cell office:value-type="float" office:value="0.002240441">
                <text:p>0.00224044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4730224609">
                <text:p>412.504730224609</text:p>
              </table:table-cell>
              <table:table-cell office:value-type="float" office:value="-0.008923532">
                <text:p>-0.00892353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617370605469">
                <text:p>412.617370605469</text:p>
              </table:table-cell>
              <table:table-cell office:value-type="float" office:value="-0.003269504">
                <text:p>-0.00326950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2.730041503906">
                <text:p>412.730041503906</text:p>
              </table:table-cell>
              <table:table-cell office:value-type="float" office:value="-0.0009188884">
                <text:p>-0.000918888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2.842712402344">
                <text:p>412.842712402344</text:p>
              </table:table-cell>
              <table:table-cell office:value-type="float" office:value="-0.001279027">
                <text:p>-0.00127902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2.955383300781">
                <text:p>412.955383300781</text:p>
              </table:table-cell>
              <table:table-cell office:value-type="float" office:value="-0.009700381">
                <text:p>-0.00970038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3.068054199219">
                <text:p>413.068054199219</text:p>
              </table:table-cell>
              <table:table-cell office:value-type="float" office:value="-0.006771096">
                <text:p>-0.00677109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3.180725097656">
                <text:p>413.180725097656</text:p>
              </table:table-cell>
              <table:table-cell office:value-type="float" office:value="-0.0005521766">
                <text:p>-0.000552176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3.293426513672">
                <text:p>413.29342651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3.406097412109">
                <text:p>413.406097412109</text:p>
              </table:table-cell>
              <table:table-cell office:value-type="float" office:value="-0.003078666">
                <text:p>-0.00307866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3.518798828125">
                <text:p>413.518798828125</text:p>
              </table:table-cell>
              <table:table-cell office:value-type="float" office:value="-0.001827848">
                <text:p>-0.00182784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3.631500244141">
                <text:p>413.631500244141</text:p>
              </table:table-cell>
              <table:table-cell office:value-type="float" office:value="-0.006692001">
                <text:p>-0.0066920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3.744232177734">
                <text:p>413.744232177734</text:p>
              </table:table-cell>
              <table:table-cell office:value-type="float" office:value="0.00210466">
                <text:p>0.0021046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3.85693359375">
                <text:p>413.85693359375</text:p>
              </table:table-cell>
              <table:table-cell office:value-type="float" office:value="0.002808252">
                <text:p>0.00280825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3.969665527344">
                <text:p>413.969665527344</text:p>
              </table:table-cell>
              <table:table-cell office:value-type="float" office:value="-0.003372063">
                <text:p>-0.00337206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4.082366943359">
                <text:p>414.082366943359</text:p>
              </table:table-cell>
              <table:table-cell office:value-type="float" office:value="0.01230138">
                <text:p>0.0123013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4.195098876953">
                <text:p>414.195098876953</text:p>
              </table:table-cell>
              <table:table-cell office:value-type="float" office:value="0.001184421">
                <text:p>0.00118442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4.307861328125">
                <text:p>414.307861328125</text:p>
              </table:table-cell>
              <table:table-cell office:value-type="float" office:value="0.008697125">
                <text:p>0.0086971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.420593261719">
                <text:p>414.420593261719</text:p>
              </table:table-cell>
              <table:table-cell office:value-type="float" office:value="-0.010094">
                <text:p>-0.01009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4.533325195313">
                <text:p>414.533325195313</text:p>
              </table:table-cell>
              <table:table-cell office:value-type="float" office:value="0.007398704">
                <text:p>0.00739870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4.646087646484">
                <text:p>414.646087646484</text:p>
              </table:table-cell>
              <table:table-cell office:value-type="float" office:value="-0.004802979">
                <text:p>-0.00480297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4.758850097656">
                <text:p>414.758850097656</text:p>
              </table:table-cell>
              <table:table-cell office:value-type="float" office:value="-0.003420528">
                <text:p>-0.0034205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4.871612548828">
                <text:p>414.871612548828</text:p>
              </table:table-cell>
              <table:table-cell office:value-type="float" office:value="0.004507768">
                <text:p>0.00450776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4.984375">
                <text:p>414.984375</text:p>
              </table:table-cell>
              <table:table-cell office:value-type="float" office:value="0.002741648">
                <text:p>0.00274164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.09716796875">
                <text:p>415.097167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5.209930419922">
                <text:p>415.209930419922</text:p>
              </table:table-cell>
              <table:table-cell office:value-type="float" office:value="-0.004518707">
                <text:p>-0.00451870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5.322723388672">
                <text:p>415.322723388672</text:p>
              </table:table-cell>
              <table:table-cell office:value-type="float" office:value="-0.002950583">
                <text:p>-0.0029505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5.435516357422">
                <text:p>415.435516357422</text:p>
              </table:table-cell>
              <table:table-cell office:value-type="float" office:value="-0.004309512">
                <text:p>-0.0043095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5.548309326172">
                <text:p>415.548309326172</text:p>
              </table:table-cell>
              <table:table-cell office:value-type="float" office:value="0.0007689908">
                <text:p>0.00076899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5.661102294922">
                <text:p>415.661102294922</text:p>
              </table:table-cell>
              <table:table-cell office:value-type="float" office:value="-0.006183531">
                <text:p>-0.00618353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15.773895263672">
                <text:p>415.773895263672</text:p>
              </table:table-cell>
              <table:table-cell office:value-type="float" office:value="0.006025364">
                <text:p>0.00602536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5.88671875">
                <text:p>415.88671875</text:p>
              </table:table-cell>
              <table:table-cell office:value-type="float" office:value="-0.004647098">
                <text:p>-0.00464709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5.999542236328">
                <text:p>415.999542236328</text:p>
              </table:table-cell>
              <table:table-cell office:value-type="float" office:value="-0.009045297">
                <text:p>-0.00904529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6.112365722656">
                <text:p>416.112365722656</text:p>
              </table:table-cell>
              <table:table-cell office:value-type="float" office:value="-0.00878836">
                <text:p>-0.0087883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6.225189208984">
                <text:p>416.225189208984</text:p>
              </table:table-cell>
              <table:table-cell office:value-type="float" office:value="-0.0002010738">
                <text:p>-0.000201073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6.338012695313">
                <text:p>416.338012695313</text:p>
              </table:table-cell>
              <table:table-cell office:value-type="float" office:value="-0.002900541">
                <text:p>-0.00290054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6.450866699219">
                <text:p>416.450866699219</text:p>
              </table:table-cell>
              <table:table-cell office:value-type="float" office:value="0.0003872488">
                <text:p>0.00038724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6.563690185547">
                <text:p>416.563690185547</text:p>
              </table:table-cell>
              <table:table-cell office:value-type="float" office:value="-0.004597381">
                <text:p>-0.00459738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6.676544189453">
                <text:p>416.676544189453</text:p>
              </table:table-cell>
              <table:table-cell office:value-type="float" office:value="-0.005046128">
                <text:p>-0.00504612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6.789398193359">
                <text:p>416.78939819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6.902252197266">
                <text:p>416.902252197266</text:p>
              </table:table-cell>
              <table:table-cell office:value-type="float" office:value="-0.003278393">
                <text:p>-0.00327839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7.01513671875">
                <text:p>417.01513671875</text:p>
              </table:table-cell>
              <table:table-cell office:value-type="float" office:value="-0.003075092">
                <text:p>-0.00307509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7.127990722656">
                <text:p>417.127990722656</text:p>
              </table:table-cell>
              <table:table-cell office:value-type="float" office:value="0.01231424">
                <text:p>0.012314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7.240875244141">
                <text:p>417.240875244141</text:p>
              </table:table-cell>
              <table:table-cell office:value-type="float" office:value="0.002685191">
                <text:p>0.0026851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7.353759765625">
                <text:p>417.353759765625</text:p>
              </table:table-cell>
              <table:table-cell office:value-type="float" office:value="0.02112189">
                <text:p>0.0211218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7.466644287109">
                <text:p>417.466644287109</text:p>
              </table:table-cell>
              <table:table-cell office:value-type="float" office:value="-0.0104138">
                <text:p>-0.010413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7.579528808594">
                <text:p>417.579528808594</text:p>
              </table:table-cell>
              <table:table-cell office:value-type="float" office:value="-0.005587594">
                <text:p>-0.00558759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7.692443847656">
                <text:p>417.692443847656</text:p>
              </table:table-cell>
              <table:table-cell office:value-type="float" office:value="0.0009104851">
                <text:p>0.00091048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7.805328369141">
                <text:p>417.805328369141</text:p>
              </table:table-cell>
              <table:table-cell office:value-type="float" office:value="0.002893388">
                <text:p>0.00289338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7.918243408203">
                <text:p>417.918243408203</text:p>
              </table:table-cell>
              <table:table-cell office:value-type="float" office:value="-0.01542159">
                <text:p>-0.0154215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8.031158447266">
                <text:p>418.031158447266</text:p>
              </table:table-cell>
              <table:table-cell office:value-type="float" office:value="-0.008690248">
                <text:p>-0.0086902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8.144073486328">
                <text:p>418.144073486328</text:p>
              </table:table-cell>
              <table:table-cell office:value-type="float" office:value="0.03123377">
                <text:p>0.0312337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8.256988525391">
                <text:p>418.256988525391</text:p>
              </table:table-cell>
              <table:table-cell office:value-type="float" office:value="0.01569343">
                <text:p>0.015693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8.369934082031">
                <text:p>418.369934082031</text:p>
              </table:table-cell>
              <table:table-cell office:value-type="float" office:value="0.005280911">
                <text:p>0.0052809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8.482849121094">
                <text:p>418.482849121094</text:p>
              </table:table-cell>
              <table:table-cell office:value-type="float" office:value="0.004762172">
                <text:p>0.00476217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8.595794677734">
                <text:p>418.595794677734</text:p>
              </table:table-cell>
              <table:table-cell office:value-type="float" office:value="0.01250834">
                <text:p>0.0125083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8.708740234375">
                <text:p>418.708740234375</text:p>
              </table:table-cell>
              <table:table-cell office:value-type="float" office:value="0.0005312041">
                <text:p>0.000531204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8.821685791016">
                <text:p>418.821685791016</text:p>
              </table:table-cell>
              <table:table-cell office:value-type="float" office:value="0.001510141">
                <text:p>0.0015101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8.934661865234">
                <text:p>418.934661865234</text:p>
              </table:table-cell>
              <table:table-cell office:value-type="float" office:value="0.003876136">
                <text:p>0.00387613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9.047607421875">
                <text:p>419.047607421875</text:p>
              </table:table-cell>
              <table:table-cell office:value-type="float" office:value="-0.004719929">
                <text:p>-0.00471992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9.160583496094">
                <text:p>419.160583496094</text:p>
              </table:table-cell>
              <table:table-cell office:value-type="float" office:value="-0.009449346">
                <text:p>-0.00944934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9.273559570313">
                <text:p>419.273559570313</text:p>
              </table:table-cell>
              <table:table-cell office:value-type="float" office:value="-0.006841034">
                <text:p>-0.00684103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9.386535644531">
                <text:p>419.386535644531</text:p>
              </table:table-cell>
              <table:table-cell office:value-type="float" office:value="-0.0009555885">
                <text:p>-0.000955588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9.49951171875">
                <text:p>419.49951171875</text:p>
              </table:table-cell>
              <table:table-cell office:value-type="float" office:value="0.01052739">
                <text:p>0.0105273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.612487792969">
                <text:p>419.612487792969</text:p>
              </table:table-cell>
              <table:table-cell office:value-type="float" office:value="0.005961216">
                <text:p>0.0059612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9.725494384766">
                <text:p>419.725494384766</text:p>
              </table:table-cell>
              <table:table-cell office:value-type="float" office:value="0.009192368">
                <text:p>0.00919236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9.838470458984">
                <text:p>419.838470458984</text:p>
              </table:table-cell>
              <table:table-cell office:value-type="float" office:value="0.0009051297">
                <text:p>0.000905129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9.951477050781">
                <text:p>419.951477050781</text:p>
              </table:table-cell>
              <table:table-cell office:value-type="float" office:value="0.01362405">
                <text:p>0.013624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0.064483642578">
                <text:p>420.064483642578</text:p>
              </table:table-cell>
              <table:table-cell office:value-type="float" office:value="-0.002825367">
                <text:p>-0.0028253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0.177520751953">
                <text:p>420.177520751953</text:p>
              </table:table-cell>
              <table:table-cell office:value-type="float" office:value="-0.004531045">
                <text:p>-0.00453104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0.29052734375">
                <text:p>420.29052734375</text:p>
              </table:table-cell>
              <table:table-cell office:value-type="float" office:value="-0.007293383">
                <text:p>-0.00729338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0.403564453125">
                <text:p>420.403564453125</text:p>
              </table:table-cell>
              <table:table-cell office:value-type="float" office:value="-0.006093252">
                <text:p>-0.00609325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0.516571044922">
                <text:p>420.516571044922</text:p>
              </table:table-cell>
              <table:table-cell office:value-type="float" office:value="-0.004971431">
                <text:p>-0.00497143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0.629608154297">
                <text:p>420.629608154297</text:p>
              </table:table-cell>
              <table:table-cell office:value-type="float" office:value="0.002127042">
                <text:p>0.00212704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0.742645263672">
                <text:p>420.742645263672</text:p>
              </table:table-cell>
              <table:table-cell office:value-type="float" office:value="0.004364666">
                <text:p>0.00436466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0.855712890625">
                <text:p>420.855712890625</text:p>
              </table:table-cell>
              <table:table-cell office:value-type="float" office:value="0.005015123">
                <text:p>0.0050151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0.96875">
                <text:p>420.96875</text:p>
              </table:table-cell>
              <table:table-cell office:value-type="float" office:value="0.01404127">
                <text:p>0.0140412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1.081817626953">
                <text:p>421.081817626953</text:p>
              </table:table-cell>
              <table:table-cell office:value-type="float" office:value="-0.003459768">
                <text:p>-0.00345976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1.194854736328">
                <text:p>421.194854736328</text:p>
              </table:table-cell>
              <table:table-cell office:value-type="float" office:value="-0.005428411">
                <text:p>-0.0054284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1.307922363281">
                <text:p>421.307922363281</text:p>
              </table:table-cell>
              <table:table-cell office:value-type="float" office:value="0.001325939">
                <text:p>0.00132593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1.421020507813">
                <text:p>421.421020507813</text:p>
              </table:table-cell>
              <table:table-cell office:value-type="float" office:value="0.01082288">
                <text:p>0.0108228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1.534088134766">
                <text:p>421.534088134766</text:p>
              </table:table-cell>
              <table:table-cell office:value-type="float" office:value="-0.00946648">
                <text:p>-0.0094664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1.647155761719">
                <text:p>421.647155761719</text:p>
              </table:table-cell>
              <table:table-cell office:value-type="float" office:value="0.003989483">
                <text:p>0.00398948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1.76025390625">
                <text:p>421.76025390625</text:p>
              </table:table-cell>
              <table:table-cell office:value-type="float" office:value="-0.002771426">
                <text:p>-0.00277142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.873352050781">
                <text:p>421.873352050781</text:p>
              </table:table-cell>
              <table:table-cell office:value-type="float" office:value="0.008123767">
                <text:p>0.00812376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1.986450195313">
                <text:p>421.986450195313</text:p>
              </table:table-cell>
              <table:table-cell office:value-type="float" office:value="0.006344699">
                <text:p>0.00634469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2.099548339844">
                <text:p>422.099548339844</text:p>
              </table:table-cell>
              <table:table-cell office:value-type="float" office:value="-0.001908359">
                <text:p>-0.00190835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2.212646484375">
                <text:p>422.212646484375</text:p>
              </table:table-cell>
              <table:table-cell office:value-type="float" office:value="0.02287369">
                <text:p>0.0228736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2.325775146484">
                <text:p>422.325775146484</text:p>
              </table:table-cell>
              <table:table-cell office:value-type="float" office:value="-0.003245563">
                <text:p>-0.0032455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2.438903808594">
                <text:p>422.438903808594</text:p>
              </table:table-cell>
              <table:table-cell office:value-type="float" office:value="-0.007932858">
                <text:p>-0.00793285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2.552001953125">
                <text:p>422.552001953125</text:p>
              </table:table-cell>
              <table:table-cell office:value-type="float" office:value="-0.008304183">
                <text:p>-0.0083041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2.665130615234">
                <text:p>422.665130615234</text:p>
              </table:table-cell>
              <table:table-cell office:value-type="float" office:value="0.009088709">
                <text:p>0.00908870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2.778289794922">
                <text:p>422.778289794922</text:p>
              </table:table-cell>
              <table:table-cell office:value-type="float" office:value="-0.005875554">
                <text:p>-0.0058755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2.891418457031">
                <text:p>422.891418457031</text:p>
              </table:table-cell>
              <table:table-cell office:value-type="float" office:value="0.01161192">
                <text:p>0.0116119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3.004577636719">
                <text:p>423.004577636719</text:p>
              </table:table-cell>
              <table:table-cell office:value-type="float" office:value="0.006623576">
                <text:p>0.00662357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3.117706298828">
                <text:p>423.117706298828</text:p>
              </table:table-cell>
              <table:table-cell office:value-type="float" office:value="-0.002296611">
                <text:p>-0.00229661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3.230865478516">
                <text:p>423.230865478516</text:p>
              </table:table-cell>
              <table:table-cell office:value-type="float" office:value="-0.005056168">
                <text:p>-0.00505616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.344024658203">
                <text:p>423.344024658203</text:p>
              </table:table-cell>
              <table:table-cell office:value-type="float" office:value="0.001997305">
                <text:p>0.00199730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.457183837891">
                <text:p>423.457183837891</text:p>
              </table:table-cell>
              <table:table-cell office:value-type="float" office:value="-0.009768444">
                <text:p>-0.00976844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3.570373535156">
                <text:p>423.570373535156</text:p>
              </table:table-cell>
              <table:table-cell office:value-type="float" office:value="0.01027482">
                <text:p>0.0102748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3.683532714844">
                <text:p>423.683532714844</text:p>
              </table:table-cell>
              <table:table-cell office:value-type="float" office:value="-0.0004498261">
                <text:p>-0.000449826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3.796722412109">
                <text:p>423.796722412109</text:p>
              </table:table-cell>
              <table:table-cell office:value-type="float" office:value="-0.003997019">
                <text:p>-0.00399701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3.909912109375">
                <text:p>423.909912109375</text:p>
              </table:table-cell>
              <table:table-cell office:value-type="float" office:value="-0.01081964">
                <text:p>-0.010819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4.023101806641">
                <text:p>424.023101806641</text:p>
              </table:table-cell>
              <table:table-cell office:value-type="float" office:value="0.004856274">
                <text:p>0.00485627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4.136291503906">
                <text:p>424.136291503906</text:p>
              </table:table-cell>
              <table:table-cell office:value-type="float" office:value="0.01012984">
                <text:p>0.0101298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4.24951171875">
                <text:p>424.24951171875</text:p>
              </table:table-cell>
              <table:table-cell office:value-type="float" office:value="0.006695336">
                <text:p>0.00669533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4.362701416016">
                <text:p>424.362701416016</text:p>
              </table:table-cell>
              <table:table-cell office:value-type="float" office:value="-0.004189676">
                <text:p>-0.0041896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4.475921630859">
                <text:p>424.475921630859</text:p>
              </table:table-cell>
              <table:table-cell office:value-type="float" office:value="0.003024944">
                <text:p>0.00302494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4.589141845703">
                <text:p>424.589141845703</text:p>
              </table:table-cell>
              <table:table-cell office:value-type="float" office:value="-0.0007869502">
                <text:p>-0.000786950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4.702362060547">
                <text:p>424.702362060547</text:p>
              </table:table-cell>
              <table:table-cell office:value-type="float" office:value="-0.006943111">
                <text:p>-0.0069431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4.815612792969">
                <text:p>424.815612792969</text:p>
              </table:table-cell>
              <table:table-cell office:value-type="float" office:value="-0.002406648">
                <text:p>-0.00240664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4.928833007813">
                <text:p>424.928833007813</text:p>
              </table:table-cell>
              <table:table-cell office:value-type="float" office:value="0.01521718">
                <text:p>0.0152171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5.042083740234">
                <text:p>425.042083740234</text:p>
              </table:table-cell>
              <table:table-cell office:value-type="float" office:value="-0.005316579">
                <text:p>-0.00531657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5.155303955078">
                <text:p>425.155303955078</text:p>
              </table:table-cell>
              <table:table-cell office:value-type="float" office:value="-0.003524555">
                <text:p>-0.00352455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5.2685546875">
                <text:p>425.2685546875</text:p>
              </table:table-cell>
              <table:table-cell office:value-type="float" office:value="-0.01452253">
                <text:p>-0.0145225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5.3818359375">
                <text:p>425.3818359375</text:p>
              </table:table-cell>
              <table:table-cell office:value-type="float" office:value="-0.001970197">
                <text:p>-0.00197019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5.495086669922">
                <text:p>425.495086669922</text:p>
              </table:table-cell>
              <table:table-cell office:value-type="float" office:value="0.005494957">
                <text:p>0.00549495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5.608337402344">
                <text:p>425.608337402344</text:p>
              </table:table-cell>
              <table:table-cell office:value-type="float" office:value="0.005320088">
                <text:p>0.00532008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5.721618652344">
                <text:p>425.721618652344</text:p>
              </table:table-cell>
              <table:table-cell office:value-type="float" office:value="-0.005709361">
                <text:p>-0.00570936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5.834899902344">
                <text:p>425.834899902344</text:p>
              </table:table-cell>
              <table:table-cell office:value-type="float" office:value="-0.007630948">
                <text:p>-0.00763094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5.948181152344">
                <text:p>425.948181152344</text:p>
              </table:table-cell>
              <table:table-cell office:value-type="float" office:value="0.003415446">
                <text:p>0.00341544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6.061462402344">
                <text:p>426.061462402344</text:p>
              </table:table-cell>
              <table:table-cell office:value-type="float" office:value="0.01141191">
                <text:p>0.0114119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6.174743652344">
                <text:p>426.174743652344</text:p>
              </table:table-cell>
              <table:table-cell office:value-type="float" office:value="-0.005580805">
                <text:p>-0.0055808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.288055419922">
                <text:p>426.288055419922</text:p>
              </table:table-cell>
              <table:table-cell office:value-type="float" office:value="0.01025301">
                <text:p>0.010253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.401336669922">
                <text:p>426.401336669922</text:p>
              </table:table-cell>
              <table:table-cell office:value-type="float" office:value="-0.0003839112">
                <text:p>-0.00038391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6.5146484375">
                <text:p>426.5146484375</text:p>
              </table:table-cell>
              <table:table-cell office:value-type="float" office:value="-0.001541435">
                <text:p>-0.00154143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6.627960205078">
                <text:p>426.627960205078</text:p>
              </table:table-cell>
              <table:table-cell office:value-type="float" office:value="0.003090237">
                <text:p>0.0030902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6.741271972656">
                <text:p>426.741271972656</text:p>
              </table:table-cell>
              <table:table-cell office:value-type="float" office:value="0.0084721">
                <text:p>0.00847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6.854614257813">
                <text:p>426.854614257813</text:p>
              </table:table-cell>
              <table:table-cell office:value-type="float" office:value="0.009295519">
                <text:p>0.0092955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6.967926025391">
                <text:p>426.967926025391</text:p>
              </table:table-cell>
              <table:table-cell office:value-type="float" office:value="-0.004039877">
                <text:p>-0.00403987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7.081268310547">
                <text:p>427.081268310547</text:p>
              </table:table-cell>
              <table:table-cell office:value-type="float" office:value="-0.004626142">
                <text:p>-0.00462614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7.194610595703">
                <text:p>427.194610595703</text:p>
              </table:table-cell>
              <table:table-cell office:value-type="float" office:value="0.004068657">
                <text:p>0.00406865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7.307952880859">
                <text:p>427.307952880859</text:p>
              </table:table-cell>
              <table:table-cell office:value-type="float" office:value="0.002469227">
                <text:p>0.00246922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7.421295166016">
                <text:p>427.421295166016</text:p>
              </table:table-cell>
              <table:table-cell office:value-type="float" office:value="0.000464003">
                <text:p>0.00046400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7.534637451172">
                <text:p>427.534637451172</text:p>
              </table:table-cell>
              <table:table-cell office:value-type="float" office:value="-0.0101131">
                <text:p>-0.010113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7.648010253906">
                <text:p>427.648010253906</text:p>
              </table:table-cell>
              <table:table-cell office:value-type="float" office:value="0.002063085">
                <text:p>0.00206308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7.761383056641">
                <text:p>427.761383056641</text:p>
              </table:table-cell>
              <table:table-cell office:value-type="float" office:value="0.005010234">
                <text:p>0.0050102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7.874755859375">
                <text:p>427.874755859375</text:p>
              </table:table-cell>
              <table:table-cell office:value-type="float" office:value="-0.007465993">
                <text:p>-0.00746599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7.988128662109">
                <text:p>427.988128662109</text:p>
              </table:table-cell>
              <table:table-cell office:value-type="float" office:value="-0.01004182">
                <text:p>-0.0100418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8.101501464844">
                <text:p>428.101501464844</text:p>
              </table:table-cell>
              <table:table-cell office:value-type="float" office:value="-0.002621243">
                <text:p>-0.00262124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8.214874267578">
                <text:p>428.214874267578</text:p>
              </table:table-cell>
              <table:table-cell office:value-type="float" office:value="0.008145892">
                <text:p>0.00814589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8.328277587891">
                <text:p>428.328277587891</text:p>
              </table:table-cell>
              <table:table-cell office:value-type="float" office:value="-0.002711243">
                <text:p>-0.00271124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8.441650390625">
                <text:p>428.441650390625</text:p>
              </table:table-cell>
              <table:table-cell office:value-type="float" office:value="-0.006704796">
                <text:p>-0.00670479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8.555053710938">
                <text:p>428.555053710938</text:p>
              </table:table-cell>
              <table:table-cell office:value-type="float" office:value="-0.003876141">
                <text:p>-0.00387614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8.66845703125">
                <text:p>428.66845703125</text:p>
              </table:table-cell>
              <table:table-cell office:value-type="float" office:value="0.003786866">
                <text:p>0.00378686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.781890869141">
                <text:p>428.781890869141</text:p>
              </table:table-cell>
              <table:table-cell office:value-type="float" office:value="-0.0003381002">
                <text:p>-0.00033810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.895294189453">
                <text:p>428.895294189453</text:p>
              </table:table-cell>
              <table:table-cell office:value-type="float" office:value="0.007702813">
                <text:p>0.0077028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.008728027344">
                <text:p>429.008728027344</text:p>
              </table:table-cell>
              <table:table-cell office:value-type="float" office:value="-0.006524614">
                <text:p>-0.00652461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.122131347656">
                <text:p>429.122131347656</text:p>
              </table:table-cell>
              <table:table-cell office:value-type="float" office:value="-0.004594743">
                <text:p>-0.00459474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.235565185547">
                <text:p>429.235565185547</text:p>
              </table:table-cell>
              <table:table-cell office:value-type="float" office:value="-0.005601637">
                <text:p>-0.00560163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9.348999023438">
                <text:p>429.348999023438</text:p>
              </table:table-cell>
              <table:table-cell office:value-type="float" office:value="0.01699505">
                <text:p>0.016995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9.462432861328">
                <text:p>429.462432861328</text:p>
              </table:table-cell>
              <table:table-cell office:value-type="float" office:value="0.02551323">
                <text:p>0.0255132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29.575897216797">
                <text:p>429.575897216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9.689331054688">
                <text:p>429.689331054688</text:p>
              </table:table-cell>
              <table:table-cell office:value-type="float" office:value="-0.005775164">
                <text:p>-0.00577516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9.802795410156">
                <text:p>429.802795410156</text:p>
              </table:table-cell>
              <table:table-cell office:value-type="float" office:value="0.00753891">
                <text:p>0.007538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9.916259765625">
                <text:p>429.916259765625</text:p>
              </table:table-cell>
              <table:table-cell office:value-type="float" office:value="-0.001140254">
                <text:p>-0.00114025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0.029724121094">
                <text:p>430.029724121094</text:p>
              </table:table-cell>
              <table:table-cell office:value-type="float" office:value="0.007622736">
                <text:p>0.00762273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0.143188476563">
                <text:p>430.143188476563</text:p>
              </table:table-cell>
              <table:table-cell office:value-type="float" office:value="0.007993262">
                <text:p>0.0079932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0.256683349609">
                <text:p>430.256683349609</text:p>
              </table:table-cell>
              <table:table-cell office:value-type="float" office:value="-0.004218978">
                <text:p>-0.00421897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0.370147705078">
                <text:p>430.370147705078</text:p>
              </table:table-cell>
              <table:table-cell office:value-type="float" office:value="0.01216062">
                <text:p>0.0121606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0.483642578125">
                <text:p>430.483642578125</text:p>
              </table:table-cell>
              <table:table-cell office:value-type="float" office:value="-0.002816889">
                <text:p>-0.00281688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0.597137451172">
                <text:p>430.59713745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0.710632324219">
                <text:p>430.710632324219</text:p>
              </table:table-cell>
              <table:table-cell office:value-type="float" office:value="-0.003116786">
                <text:p>-0.00311678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0.824127197266">
                <text:p>430.824127197266</text:p>
              </table:table-cell>
              <table:table-cell office:value-type="float" office:value="0.006249283">
                <text:p>0.00624928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0.937652587891">
                <text:p>430.937652587891</text:p>
              </table:table-cell>
              <table:table-cell office:value-type="float" office:value="-0.001422123">
                <text:p>-0.00142212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1.051147460938">
                <text:p>431.051147460938</text:p>
              </table:table-cell>
              <table:table-cell office:value-type="float" office:value="-0.003843797">
                <text:p>-0.0038437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1.164672851563">
                <text:p>431.164672851563</text:p>
              </table:table-cell>
              <table:table-cell office:value-type="float" office:value="-0.005771199">
                <text:p>-0.00577119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1.278198242188">
                <text:p>431.278198242188</text:p>
              </table:table-cell>
              <table:table-cell office:value-type="float" office:value="0.004141913">
                <text:p>0.00414191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1.391723632813">
                <text:p>431.391723632813</text:p>
              </table:table-cell>
              <table:table-cell office:value-type="float" office:value="-0.005095949">
                <text:p>-0.00509594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1.505249023438">
                <text:p>431.505249023438</text:p>
              </table:table-cell>
              <table:table-cell office:value-type="float" office:value="-0.002042573">
                <text:p>-0.0020425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1.618804931641">
                <text:p>431.618804931641</text:p>
              </table:table-cell>
              <table:table-cell office:value-type="float" office:value="-0.003041495">
                <text:p>-0.00304149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1.732330322266">
                <text:p>431.732330322266</text:p>
              </table:table-cell>
              <table:table-cell office:value-type="float" office:value="0.008457165">
                <text:p>0.0084571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1.845886230469">
                <text:p>431.845886230469</text:p>
              </table:table-cell>
              <table:table-cell office:value-type="float" office:value="0.01033142">
                <text:p>0.0103314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1.959442138672">
                <text:p>431.959442138672</text:p>
              </table:table-cell>
              <table:table-cell office:value-type="float" office:value="0.007021063">
                <text:p>0.00702106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2.072998046875">
                <text:p>432.072998046875</text:p>
              </table:table-cell>
              <table:table-cell office:value-type="float" office:value="0.01967669">
                <text:p>0.019676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2.186553955078">
                <text:p>432.186553955078</text:p>
              </table:table-cell>
              <table:table-cell office:value-type="float" office:value="-0.006260596">
                <text:p>-0.00626059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32.300140380859">
                <text:p>432.300140380859</text:p>
              </table:table-cell>
              <table:table-cell office:value-type="float" office:value="-0.002633144">
                <text:p>-0.00263314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32.413696289063">
                <text:p>432.413696289063</text:p>
              </table:table-cell>
              <table:table-cell office:value-type="float" office:value="0.0002506219">
                <text:p>0.000250621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2.527282714844">
                <text:p>432.527282714844</text:p>
              </table:table-cell>
              <table:table-cell office:value-type="float" office:value="0.004469314">
                <text:p>0.00446931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32.640869140625">
                <text:p>432.640869140625</text:p>
              </table:table-cell>
              <table:table-cell office:value-type="float" office:value="-0.004351395">
                <text:p>-0.00435139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2.754455566406">
                <text:p>432.754455566406</text:p>
              </table:table-cell>
              <table:table-cell office:value-type="float" office:value="0.01239326">
                <text:p>0.0123932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32.868041992188">
                <text:p>432.868041992188</text:p>
              </table:table-cell>
              <table:table-cell office:value-type="float" office:value="0.01772843">
                <text:p>0.0177284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2.981658935547">
                <text:p>432.981658935547</text:p>
              </table:table-cell>
              <table:table-cell office:value-type="float" office:value="0.00807489">
                <text:p>0.0080748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3.095245361328">
                <text:p>433.095245361328</text:p>
              </table:table-cell>
              <table:table-cell office:value-type="float" office:value="0.003161446">
                <text:p>0.00316144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33.208862304688">
                <text:p>433.208862304688</text:p>
              </table:table-cell>
              <table:table-cell office:value-type="float" office:value="0.003616423">
                <text:p>0.00361642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33.322479248047">
                <text:p>433.322479248047</text:p>
              </table:table-cell>
              <table:table-cell office:value-type="float" office:value="-0.001443392">
                <text:p>-0.00144339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33.436096191406">
                <text:p>433.436096191406</text:p>
              </table:table-cell>
              <table:table-cell office:value-type="float" office:value="0.004643036">
                <text:p>0.00464303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33.549713134766">
                <text:p>433.549713134766</text:p>
              </table:table-cell>
              <table:table-cell office:value-type="float" office:value="-0.00297107">
                <text:p>-0.0029710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33.663330078125">
                <text:p>433.663330078125</text:p>
              </table:table-cell>
              <table:table-cell office:value-type="float" office:value="-0.004784667">
                <text:p>-0.00478466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33.776977539063">
                <text:p>433.776977539063</text:p>
              </table:table-cell>
              <table:table-cell office:value-type="float" office:value="-0.00537006">
                <text:p>-0.0053700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33.890625">
                <text:p>433.890625</text:p>
              </table:table-cell>
              <table:table-cell office:value-type="float" office:value="0.01476104">
                <text:p>0.0147610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34.004272460938">
                <text:p>434.004272460938</text:p>
              </table:table-cell>
              <table:table-cell office:value-type="float" office:value="-0.001648683">
                <text:p>-0.00164868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34.117919921875">
                <text:p>434.117919921875</text:p>
              </table:table-cell>
              <table:table-cell office:value-type="float" office:value="0.002683022">
                <text:p>0.00268302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34.231567382813">
                <text:p>434.231567382813</text:p>
              </table:table-cell>
              <table:table-cell office:value-type="float" office:value="-0.008248267">
                <text:p>-0.00824826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4.34521484375">
                <text:p>434.34521484375</text:p>
              </table:table-cell>
              <table:table-cell office:value-type="float" office:value="-0.006127032">
                <text:p>-0.00612703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34.458892822266">
                <text:p>434.458892822266</text:p>
              </table:table-cell>
              <table:table-cell office:value-type="float" office:value="0.02195816">
                <text:p>0.0219581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34.572570800781">
                <text:p>434.572570800781</text:p>
              </table:table-cell>
              <table:table-cell office:value-type="float" office:value="-0.004079598">
                <text:p>-0.00407959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4.686248779297">
                <text:p>434.686248779297</text:p>
              </table:table-cell>
              <table:table-cell office:value-type="float" office:value="-0.00267013">
                <text:p>-0.0026701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4.799926757813">
                <text:p>434.799926757813</text:p>
              </table:table-cell>
              <table:table-cell office:value-type="float" office:value="-0.003514898">
                <text:p>-0.00351489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34.913604736328">
                <text:p>434.913604736328</text:p>
              </table:table-cell>
              <table:table-cell office:value-type="float" office:value="0.002712782">
                <text:p>0.00271278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35.027282714844">
                <text:p>435.027282714844</text:p>
              </table:table-cell>
              <table:table-cell office:value-type="float" office:value="-0.002330412">
                <text:p>-0.00233041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35.140991210938">
                <text:p>435.140991210938</text:p>
              </table:table-cell>
              <table:table-cell office:value-type="float" office:value="-0.001644226">
                <text:p>-0.00164422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35.254669189453">
                <text:p>435.254669189453</text:p>
              </table:table-cell>
              <table:table-cell office:value-type="float" office:value="0.006363191">
                <text:p>0.00636319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35.368377685547">
                <text:p>435.368377685547</text:p>
              </table:table-cell>
              <table:table-cell office:value-type="float" office:value="-0.008023026">
                <text:p>-0.00802302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35.482086181641">
                <text:p>435.482086181641</text:p>
              </table:table-cell>
              <table:table-cell office:value-type="float" office:value="-0.00819084">
                <text:p>-0.0081908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35.595825195313">
                <text:p>435.595825195313</text:p>
              </table:table-cell>
              <table:table-cell office:value-type="float" office:value="-0.004887749">
                <text:p>-0.00488774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35.709533691406">
                <text:p>435.709533691406</text:p>
              </table:table-cell>
              <table:table-cell office:value-type="float" office:value="0.01228636">
                <text:p>0.0122863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35.823272705078">
                <text:p>435.823272705078</text:p>
              </table:table-cell>
              <table:table-cell office:value-type="float" office:value="0.002679841">
                <text:p>0.00267984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35.936981201172">
                <text:p>435.936981201172</text:p>
              </table:table-cell>
              <table:table-cell office:value-type="float" office:value="-0.009767308">
                <text:p>-0.00976730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36.050720214844">
                <text:p>436.050720214844</text:p>
              </table:table-cell>
              <table:table-cell office:value-type="float" office:value="0.003059708">
                <text:p>0.00305970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36.164459228516">
                <text:p>436.164459228516</text:p>
              </table:table-cell>
              <table:table-cell office:value-type="float" office:value="-0.002727986">
                <text:p>-0.00272798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36.278198242188">
                <text:p>436.278198242188</text:p>
              </table:table-cell>
              <table:table-cell office:value-type="float" office:value="0.02625166">
                <text:p>0.0262516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36.391967773438">
                <text:p>436.391967773438</text:p>
              </table:table-cell>
              <table:table-cell office:value-type="float" office:value="-0.0007228992">
                <text:p>-0.000722899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36.505706787109">
                <text:p>436.505706787109</text:p>
              </table:table-cell>
              <table:table-cell office:value-type="float" office:value="-0.001716455">
                <text:p>-0.00171645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6.619476318359">
                <text:p>436.619476318359</text:p>
              </table:table-cell>
              <table:table-cell office:value-type="float" office:value="0.004709457">
                <text:p>0.00470945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36.733245849609">
                <text:p>436.733245849609</text:p>
              </table:table-cell>
              <table:table-cell office:value-type="float" office:value="0.002744865">
                <text:p>0.00274486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36.847015380859">
                <text:p>436.847015380859</text:p>
              </table:table-cell>
              <table:table-cell office:value-type="float" office:value="-0.009681031">
                <text:p>-0.00968103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36.960784912109">
                <text:p>436.960784912109</text:p>
              </table:table-cell>
              <table:table-cell office:value-type="float" office:value="0.005431454">
                <text:p>0.00543145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37.074554443359">
                <text:p>437.074554443359</text:p>
              </table:table-cell>
              <table:table-cell office:value-type="float" office:value="0.003040711">
                <text:p>0.00304071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37.188354492188">
                <text:p>437.188354492188</text:p>
              </table:table-cell>
              <table:table-cell office:value-type="float" office:value="-0.0008208938">
                <text:p>-0.000820893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37.302154541016">
                <text:p>437.302154541016</text:p>
              </table:table-cell>
              <table:table-cell office:value-type="float" office:value="0.003272811">
                <text:p>0.00327281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37.415924072266">
                <text:p>437.415924072266</text:p>
              </table:table-cell>
              <table:table-cell office:value-type="float" office:value="0.003895759">
                <text:p>0.00389575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37.529724121094">
                <text:p>437.52972412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37.6435546875">
                <text:p>437.6435546875</text:p>
              </table:table-cell>
              <table:table-cell office:value-type="float" office:value="-0.0006688982">
                <text:p>-0.000668898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7.757354736328">
                <text:p>437.757354736328</text:p>
              </table:table-cell>
              <table:table-cell office:value-type="float" office:value="0.004219047">
                <text:p>0.00421904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37.871154785156">
                <text:p>437.871154785156</text:p>
              </table:table-cell>
              <table:table-cell office:value-type="float" office:value="-0.003906944">
                <text:p>-0.00390694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37.984985351563">
                <text:p>437.984985351563</text:p>
              </table:table-cell>
              <table:table-cell office:value-type="float" office:value="0.01489087">
                <text:p>0.0148908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38.098815917969">
                <text:p>438.098815917969</text:p>
              </table:table-cell>
              <table:table-cell office:value-type="float" office:value="0.004294663">
                <text:p>0.00429466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38.212646484375">
                <text:p>438.212646484375</text:p>
              </table:table-cell>
              <table:table-cell office:value-type="float" office:value="-0.007044431">
                <text:p>-0.00704443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38.326477050781">
                <text:p>438.326477050781</text:p>
              </table:table-cell>
              <table:table-cell office:value-type="float" office:value="-0.01051952">
                <text:p>-0.0105195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38.440307617188">
                <text:p>438.440307617188</text:p>
              </table:table-cell>
              <table:table-cell office:value-type="float" office:value="-0.001157335">
                <text:p>-0.00115733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8.554168701172">
                <text:p>438.554168701172</text:p>
              </table:table-cell>
              <table:table-cell office:value-type="float" office:value="0.007115511">
                <text:p>0.00711551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38.667999267578">
                <text:p>438.667999267578</text:p>
              </table:table-cell>
              <table:table-cell office:value-type="float" office:value="-0.008852866">
                <text:p>-0.00885286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38.781860351563">
                <text:p>438.781860351563</text:p>
              </table:table-cell>
              <table:table-cell office:value-type="float" office:value="-0.01225667">
                <text:p>-0.0122566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38.895721435547">
                <text:p>438.895721435547</text:p>
              </table:table-cell>
              <table:table-cell office:value-type="float" office:value="-0.003069658">
                <text:p>-0.00306965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9.009582519531">
                <text:p>439.009582519531</text:p>
              </table:table-cell>
              <table:table-cell office:value-type="float" office:value="0.002782297">
                <text:p>0.00278229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39.123474121094">
                <text:p>439.123474121094</text:p>
              </table:table-cell>
              <table:table-cell office:value-type="float" office:value="-0.009272358">
                <text:p>-0.00927235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39.237335205078">
                <text:p>439.237335205078</text:p>
              </table:table-cell>
              <table:table-cell office:value-type="float" office:value="-0.007511495">
                <text:p>-0.00751149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39.351226806641">
                <text:p>439.351226806641</text:p>
              </table:table-cell>
              <table:table-cell office:value-type="float" office:value="0.00381881">
                <text:p>0.0038188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39.465087890625">
                <text:p>439.465087890625</text:p>
              </table:table-cell>
              <table:table-cell office:value-type="float" office:value="0.02121494">
                <text:p>0.0212149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39.578979492188">
                <text:p>439.578979492188</text:p>
              </table:table-cell>
              <table:table-cell office:value-type="float" office:value="-0.005043818">
                <text:p>-0.00504381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9.69287109375">
                <text:p>439.69287109375</text:p>
              </table:table-cell>
              <table:table-cell office:value-type="float" office:value="-0.009194559">
                <text:p>-0.00919455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9.806793212891">
                <text:p>439.806793212891</text:p>
              </table:table-cell>
              <table:table-cell office:value-type="float" office:value="-0.006985533">
                <text:p>-0.00698553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39.920684814453">
                <text:p>439.920684814453</text:p>
              </table:table-cell>
              <table:table-cell office:value-type="float" office:value="0.05979371">
                <text:p>0.0597937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40.034606933594">
                <text:p>440.034606933594</text:p>
              </table:table-cell>
              <table:table-cell office:value-type="float" office:value="-0.0008705214">
                <text:p>-0.000870521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0.148498535156">
                <text:p>440.148498535156</text:p>
              </table:table-cell>
              <table:table-cell office:value-type="float" office:value="-0.003386632">
                <text:p>-0.00338663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40.262420654297">
                <text:p>440.262420654297</text:p>
              </table:table-cell>
              <table:table-cell office:value-type="float" office:value="0.00707591">
                <text:p>0.0070759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40.376342773438">
                <text:p>440.376342773438</text:p>
              </table:table-cell>
              <table:table-cell office:value-type="float" office:value="0.03197754">
                <text:p>0.0319775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0.490295410156">
                <text:p>440.490295410156</text:p>
              </table:table-cell>
              <table:table-cell office:value-type="float" office:value="-0.0009471286">
                <text:p>-0.000947128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0.604217529297">
                <text:p>440.604217529297</text:p>
              </table:table-cell>
              <table:table-cell office:value-type="float" office:value="-0.01683324">
                <text:p>-0.0168332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40.718170166016">
                <text:p>440.718170166016</text:p>
              </table:table-cell>
              <table:table-cell office:value-type="float" office:value="0.02064874">
                <text:p>0.0206487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40.832092285156">
                <text:p>440.832092285156</text:p>
              </table:table-cell>
              <table:table-cell office:value-type="float" office:value="0.01074459">
                <text:p>0.0107445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40.946044921875">
                <text:p>440.946044921875</text:p>
              </table:table-cell>
              <table:table-cell office:value-type="float" office:value="-0.002608904">
                <text:p>-0.00260890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41.059997558594">
                <text:p>441.059997558594</text:p>
              </table:table-cell>
              <table:table-cell office:value-type="float" office:value="-0.002348454">
                <text:p>-0.00234845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1.173950195313">
                <text:p>441.173950195313</text:p>
              </table:table-cell>
              <table:table-cell office:value-type="float" office:value="0.005385718">
                <text:p>0.00538571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41.287933349609">
                <text:p>441.287933349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41.401885986328">
                <text:p>441.401885986328</text:p>
              </table:table-cell>
              <table:table-cell office:value-type="float" office:value="0.0006423462">
                <text:p>0.000642346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41.515869140625">
                <text:p>441.515869140625</text:p>
              </table:table-cell>
              <table:table-cell office:value-type="float" office:value="0.01586471">
                <text:p>0.0158647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41.629852294922">
                <text:p>441.629852294922</text:p>
              </table:table-cell>
              <table:table-cell office:value-type="float" office:value="0.00182429">
                <text:p>0.0018242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41.743835449219">
                <text:p>441.743835449219</text:p>
              </table:table-cell>
              <table:table-cell office:value-type="float" office:value="0.006514091">
                <text:p>0.00651409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41.857818603516">
                <text:p>441.857818603516</text:p>
              </table:table-cell>
              <table:table-cell office:value-type="float" office:value="-0.01115356">
                <text:p>-0.0111535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1.971801757813">
                <text:p>441.971801757813</text:p>
              </table:table-cell>
              <table:table-cell office:value-type="float" office:value="0.00179298">
                <text:p>0.0017929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42.085815429688">
                <text:p>442.085815429688</text:p>
              </table:table-cell>
              <table:table-cell office:value-type="float" office:value="0.008877264">
                <text:p>0.00887726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2.199829101563">
                <text:p>442.199829101563</text:p>
              </table:table-cell>
              <table:table-cell office:value-type="float" office:value="-0.005338493">
                <text:p>-0.00533849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42.313812255859">
                <text:p>442.313812255859</text:p>
              </table:table-cell>
              <table:table-cell office:value-type="float" office:value="-0.0003389123">
                <text:p>-0.000338912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42.427825927734">
                <text:p>442.427825927734</text:p>
              </table:table-cell>
              <table:table-cell office:value-type="float" office:value="0.02015454">
                <text:p>0.0201545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42.541839599609">
                <text:p>442.541839599609</text:p>
              </table:table-cell>
              <table:table-cell office:value-type="float" office:value="0.001588914">
                <text:p>0.00158891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2.655883789063">
                <text:p>442.655883789063</text:p>
              </table:table-cell>
              <table:table-cell office:value-type="float" office:value="-0.002702881">
                <text:p>-0.00270288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42.769897460938">
                <text:p>442.769897460938</text:p>
              </table:table-cell>
              <table:table-cell office:value-type="float" office:value="-0.0005448221">
                <text:p>-0.000544822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42.883941650391">
                <text:p>442.883941650391</text:p>
              </table:table-cell>
              <table:table-cell office:value-type="float" office:value="-0.003303847">
                <text:p>-0.00330384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42.997985839844">
                <text:p>442.997985839844</text:p>
              </table:table-cell>
              <table:table-cell office:value-type="float" office:value="0.00795102">
                <text:p>0.0079510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43.112030029297">
                <text:p>443.112030029297</text:p>
              </table:table-cell>
              <table:table-cell office:value-type="float" office:value="0.0035035">
                <text:p>0.003503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43.22607421875">
                <text:p>443.22607421875</text:p>
              </table:table-cell>
              <table:table-cell office:value-type="float" office:value="-0.005208674">
                <text:p>-0.00520867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43.340118408203">
                <text:p>443.340118408203</text:p>
              </table:table-cell>
              <table:table-cell office:value-type="float" office:value="-0.0002714571">
                <text:p>-0.000271457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43.454162597656">
                <text:p>443.454162597656</text:p>
              </table:table-cell>
              <table:table-cell office:value-type="float" office:value="0.003460696">
                <text:p>0.00346069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43.568237304688">
                <text:p>443.568237304688</text:p>
              </table:table-cell>
              <table:table-cell office:value-type="float" office:value="-0.00564506">
                <text:p>-0.0056450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43.682312011719">
                <text:p>443.682312011719</text:p>
              </table:table-cell>
              <table:table-cell office:value-type="float" office:value="-0.009630001">
                <text:p>-0.00963000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43.79638671875">
                <text:p>443.79638671875</text:p>
              </table:table-cell>
              <table:table-cell office:value-type="float" office:value="0.002228089">
                <text:p>0.00222808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43.910461425781">
                <text:p>443.910461425781</text:p>
              </table:table-cell>
              <table:table-cell office:value-type="float" office:value="-0.0036938">
                <text:p>-0.003693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44.024536132813">
                <text:p>444.024536132813</text:p>
              </table:table-cell>
              <table:table-cell office:value-type="float" office:value="0.004397541">
                <text:p>0.00439754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44.138610839844">
                <text:p>444.138610839844</text:p>
              </table:table-cell>
              <table:table-cell office:value-type="float" office:value="0.02563432">
                <text:p>0.0256343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44.252716064453">
                <text:p>444.252716064453</text:p>
              </table:table-cell>
              <table:table-cell office:value-type="float" office:value="-0.004526269">
                <text:p>-0.00452626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44.366821289063">
                <text:p>444.366821289063</text:p>
              </table:table-cell>
              <table:table-cell office:value-type="float" office:value="-0.0001671418">
                <text:p>-0.000167141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44.480895996094">
                <text:p>444.480895996094</text:p>
              </table:table-cell>
              <table:table-cell office:value-type="float" office:value="0.001131944">
                <text:p>0.00113194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4.595001220703">
                <text:p>444.595001220703</text:p>
              </table:table-cell>
              <table:table-cell office:value-type="float" office:value="-0.004605077">
                <text:p>-0.00460507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4.709136962891">
                <text:p>444.709136962891</text:p>
              </table:table-cell>
              <table:table-cell office:value-type="float" office:value="-0.003244645">
                <text:p>-0.00324464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4.8232421875">
                <text:p>444.8232421875</text:p>
              </table:table-cell>
              <table:table-cell office:value-type="float" office:value="0.003981415">
                <text:p>0.00398141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4.937347412109">
                <text:p>444.937347412109</text:p>
              </table:table-cell>
              <table:table-cell office:value-type="float" office:value="0.006735835">
                <text:p>0.00673583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45.051483154297">
                <text:p>445.051483154297</text:p>
              </table:table-cell>
              <table:table-cell office:value-type="float" office:value="-0.003341534">
                <text:p>-0.00334153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45.165618896484">
                <text:p>445.165618896484</text:p>
              </table:table-cell>
              <table:table-cell office:value-type="float" office:value="-0.01018039">
                <text:p>-0.0101803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45.279754638672">
                <text:p>445.279754638672</text:p>
              </table:table-cell>
              <table:table-cell office:value-type="float" office:value="0.006302206">
                <text:p>0.00630220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5.393890380859">
                <text:p>445.393890380859</text:p>
              </table:table-cell>
              <table:table-cell office:value-type="float" office:value="-0.0009039361">
                <text:p>-0.000903936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45.508026123047">
                <text:p>445.508026123047</text:p>
              </table:table-cell>
              <table:table-cell office:value-type="float" office:value="-0.005433103">
                <text:p>-0.00543310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45.622192382813">
                <text:p>445.622192382813</text:p>
              </table:table-cell>
              <table:table-cell office:value-type="float" office:value="0.00147544">
                <text:p>0.0014754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45.736328125">
                <text:p>445.736328125</text:p>
              </table:table-cell>
              <table:table-cell office:value-type="float" office:value="0.001821717">
                <text:p>0.00182171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45.850494384766">
                <text:p>445.850494384766</text:p>
              </table:table-cell>
              <table:table-cell office:value-type="float" office:value="0.004816364">
                <text:p>0.00481636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45.964660644531">
                <text:p>445.964660644531</text:p>
              </table:table-cell>
              <table:table-cell office:value-type="float" office:value="-0.004626085">
                <text:p>-0.00462608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46.078826904297">
                <text:p>446.078826904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46.192993164063">
                <text:p>446.192993164063</text:p>
              </table:table-cell>
              <table:table-cell office:value-type="float" office:value="0.004606787">
                <text:p>0.00460678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46.307189941406">
                <text:p>446.307189941406</text:p>
              </table:table-cell>
              <table:table-cell office:value-type="float" office:value="0.003712367">
                <text:p>0.00371236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46.421356201172">
                <text:p>446.421356201172</text:p>
              </table:table-cell>
              <table:table-cell office:value-type="float" office:value="-0.004620066">
                <text:p>-0.00462006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46.535552978516">
                <text:p>446.535552978516</text:p>
              </table:table-cell>
              <table:table-cell office:value-type="float" office:value="0.0005643199">
                <text:p>0.000564319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46.649749755859">
                <text:p>446.649749755859</text:p>
              </table:table-cell>
              <table:table-cell office:value-type="float" office:value="0.01293073">
                <text:p>0.0129307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46.763946533203">
                <text:p>446.763946533203</text:p>
              </table:table-cell>
              <table:table-cell office:value-type="float" office:value="-0.003295182">
                <text:p>-0.00329518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46.878143310547">
                <text:p>446.878143310547</text:p>
              </table:table-cell>
              <table:table-cell office:value-type="float" office:value="-0.001861133">
                <text:p>-0.00186113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6.992370605469">
                <text:p>446.992370605469</text:p>
              </table:table-cell>
              <table:table-cell office:value-type="float" office:value="-0.003696974">
                <text:p>-0.00369697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47.106567382813">
                <text:p>447.106567382813</text:p>
              </table:table-cell>
              <table:table-cell office:value-type="float" office:value="0.01415076">
                <text:p>0.0141507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47.220794677734">
                <text:p>447.220794677734</text:p>
              </table:table-cell>
              <table:table-cell office:value-type="float" office:value="0.002402792">
                <text:p>0.00240279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7.335021972656">
                <text:p>447.335021972656</text:p>
              </table:table-cell>
              <table:table-cell office:value-type="float" office:value="0.003734251">
                <text:p>0.00373425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7.449249267578">
                <text:p>447.449249267578</text:p>
              </table:table-cell>
              <table:table-cell office:value-type="float" office:value="0.008662864">
                <text:p>0.00866286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47.5634765625">
                <text:p>447.5634765625</text:p>
              </table:table-cell>
              <table:table-cell office:value-type="float" office:value="0.001753819">
                <text:p>0.00175381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47.677703857422">
                <text:p>447.677703857422</text:p>
              </table:table-cell>
              <table:table-cell office:value-type="float" office:value="0.004056124">
                <text:p>0.00405612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47.791961669922">
                <text:p>447.791961669922</text:p>
              </table:table-cell>
              <table:table-cell office:value-type="float" office:value="-0.005542804">
                <text:p>-0.00554280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47.906188964844">
                <text:p>447.906188964844</text:p>
              </table:table-cell>
              <table:table-cell office:value-type="float" office:value="-0.008503168">
                <text:p>-0.00850316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8.020446777344">
                <text:p>448.020446777344</text:p>
              </table:table-cell>
              <table:table-cell office:value-type="float" office:value="-0.006057428">
                <text:p>-0.00605742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48.134704589844">
                <text:p>448.134704589844</text:p>
              </table:table-cell>
              <table:table-cell office:value-type="float" office:value="0.01217135">
                <text:p>0.0121713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48.248962402344">
                <text:p>448.248962402344</text:p>
              </table:table-cell>
              <table:table-cell office:value-type="float" office:value="-0.007776252">
                <text:p>-0.00777625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48.363220214844">
                <text:p>448.363220214844</text:p>
              </table:table-cell>
              <table:table-cell office:value-type="float" office:value="-0.002471786">
                <text:p>-0.00247178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48.477508544922">
                <text:p>448.477508544922</text:p>
              </table:table-cell>
              <table:table-cell office:value-type="float" office:value="0.006644785">
                <text:p>0.00664478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48.591766357422">
                <text:p>448.591766357422</text:p>
              </table:table-cell>
              <table:table-cell office:value-type="float" office:value="0.01044013">
                <text:p>0.0104401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48.7060546875">
                <text:p>448.7060546875</text:p>
              </table:table-cell>
              <table:table-cell office:value-type="float" office:value="0.01018292">
                <text:p>0.010182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8.820343017578">
                <text:p>448.820343017578</text:p>
              </table:table-cell>
              <table:table-cell office:value-type="float" office:value="-0.008540745">
                <text:p>-0.00854074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.934631347656">
                <text:p>448.934631347656</text:p>
              </table:table-cell>
              <table:table-cell office:value-type="float" office:value="-0.001318544">
                <text:p>-0.00131854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49.048919677734">
                <text:p>449.048919677734</text:p>
              </table:table-cell>
              <table:table-cell office:value-type="float" office:value="-0.00196989">
                <text:p>-0.0019698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49.163238525391">
                <text:p>449.163238525391</text:p>
              </table:table-cell>
              <table:table-cell office:value-type="float" office:value="-0.01159021">
                <text:p>-0.0115902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49.277526855469">
                <text:p>449.277526855469</text:p>
              </table:table-cell>
              <table:table-cell office:value-type="float" office:value="0.0005923345">
                <text:p>0.000592334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9.391845703125">
                <text:p>449.391845703125</text:p>
              </table:table-cell>
              <table:table-cell office:value-type="float" office:value="0.01482492">
                <text:p>0.0148249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49.506164550781">
                <text:p>449.506164550781</text:p>
              </table:table-cell>
              <table:table-cell office:value-type="float" office:value="0.001357784">
                <text:p>0.00135778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49.620483398438">
                <text:p>449.620483398438</text:p>
              </table:table-cell>
              <table:table-cell office:value-type="float" office:value="0.01058859">
                <text:p>0.0105885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49.734802246094">
                <text:p>449.734802246094</text:p>
              </table:table-cell>
              <table:table-cell office:value-type="float" office:value="-0.01004524">
                <text:p>-0.0100452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9.84912109375">
                <text:p>449.84912109375</text:p>
              </table:table-cell>
              <table:table-cell office:value-type="float" office:value="0.007632442">
                <text:p>0.00763244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9.963439941406">
                <text:p>449.963439941406</text:p>
              </table:table-cell>
              <table:table-cell office:value-type="float" office:value="-0.003497042">
                <text:p>-0.00349704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50.077789306641">
                <text:p>450.077789306641</text:p>
              </table:table-cell>
              <table:table-cell office:value-type="float" office:value="-0.001493698">
                <text:p>-0.00149369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50.192138671875">
                <text:p>450.192138671875</text:p>
              </table:table-cell>
              <table:table-cell office:value-type="float" office:value="-0.0124068">
                <text:p>-0.012406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50.306488037109">
                <text:p>450.306488037109</text:p>
              </table:table-cell>
              <table:table-cell office:value-type="float" office:value="0.007009082">
                <text:p>0.00700908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0.420837402344">
                <text:p>450.420837402344</text:p>
              </table:table-cell>
              <table:table-cell office:value-type="float" office:value="0.003151573">
                <text:p>0.00315157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50.535186767578">
                <text:p>450.535186767578</text:p>
              </table:table-cell>
              <table:table-cell office:value-type="float" office:value="0.0006779217">
                <text:p>0.000677921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50.649536132813">
                <text:p>450.649536132813</text:p>
              </table:table-cell>
              <table:table-cell office:value-type="float" office:value="-0.01262772">
                <text:p>-0.0126277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0.763916015625">
                <text:p>450.763916015625</text:p>
              </table:table-cell>
              <table:table-cell office:value-type="float" office:value="0.00867147">
                <text:p>0.0086714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50.878295898438">
                <text:p>450.878295898438</text:p>
              </table:table-cell>
              <table:table-cell office:value-type="float" office:value="-0.006024386">
                <text:p>-0.00602438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50.99267578125">
                <text:p>450.99267578125</text:p>
              </table:table-cell>
              <table:table-cell office:value-type="float" office:value="-0.001519079">
                <text:p>-0.00151907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1.107055664063">
                <text:p>451.107055664063</text:p>
              </table:table-cell>
              <table:table-cell office:value-type="float" office:value="-0.01415166">
                <text:p>-0.0141516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51.221435546875">
                <text:p>451.221435546875</text:p>
              </table:table-cell>
              <table:table-cell office:value-type="float" office:value="0.000278218">
                <text:p>0.00027821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51.335815429688">
                <text:p>451.335815429688</text:p>
              </table:table-cell>
              <table:table-cell office:value-type="float" office:value="0.01216315">
                <text:p>0.0121631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51.450225830078">
                <text:p>451.450225830078</text:p>
              </table:table-cell>
              <table:table-cell office:value-type="float" office:value="0.001935651">
                <text:p>0.00193565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51.564605712891">
                <text:p>451.564605712891</text:p>
              </table:table-cell>
              <table:table-cell office:value-type="float" office:value="-0.01275293">
                <text:p>-0.0127529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51.679016113281">
                <text:p>451.679016113281</text:p>
              </table:table-cell>
              <table:table-cell office:value-type="float" office:value="0.007695225">
                <text:p>0.00769522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1.793426513672">
                <text:p>451.793426513672</text:p>
              </table:table-cell>
              <table:table-cell office:value-type="float" office:value="0.01122526">
                <text:p>0.0112252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51.907836914063">
                <text:p>451.907836914063</text:p>
              </table:table-cell>
              <table:table-cell office:value-type="float" office:value="-0.006696718">
                <text:p>-0.00669671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52.022247314453">
                <text:p>452.022247314453</text:p>
              </table:table-cell>
              <table:table-cell office:value-type="float" office:value="-0.00220316">
                <text:p>-0.0022031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2.136688232422">
                <text:p>452.136688232422</text:p>
              </table:table-cell>
              <table:table-cell office:value-type="float" office:value="0.003387463">
                <text:p>0.00338746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2.251098632813">
                <text:p>452.251098632813</text:p>
              </table:table-cell>
              <table:table-cell office:value-type="float" office:value="0.009057035">
                <text:p>0.00905703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52.365539550781">
                <text:p>452.365539550781</text:p>
              </table:table-cell>
              <table:table-cell office:value-type="float" office:value="-0.00952978">
                <text:p>-0.0095297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52.47998046875">
                <text:p>452.47998046875</text:p>
              </table:table-cell>
              <table:table-cell office:value-type="float" office:value="0.003043616">
                <text:p>0.00304361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52.594421386719">
                <text:p>452.594421386719</text:p>
              </table:table-cell>
              <table:table-cell office:value-type="float" office:value="0.009923716">
                <text:p>0.00992371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52.708862304688">
                <text:p>452.708862304688</text:p>
              </table:table-cell>
              <table:table-cell office:value-type="float" office:value="0.006275399">
                <text:p>0.00627539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52.823333740234">
                <text:p>452.823333740234</text:p>
              </table:table-cell>
              <table:table-cell office:value-type="float" office:value="0.009301028">
                <text:p>0.00930102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52.937774658203">
                <text:p>452.937774658203</text:p>
              </table:table-cell>
              <table:table-cell office:value-type="float" office:value="-0.007232691">
                <text:p>-0.00723269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53.05224609375">
                <text:p>453.05224609375</text:p>
              </table:table-cell>
              <table:table-cell office:value-type="float" office:value="-0.002403071">
                <text:p>-0.00240307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53.166717529297">
                <text:p>453.166717529297</text:p>
              </table:table-cell>
              <table:table-cell office:value-type="float" office:value="0.005588928">
                <text:p>0.00558892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53.281188964844">
                <text:p>453.281188964844</text:p>
              </table:table-cell>
              <table:table-cell office:value-type="float" office:value="-0.01040061">
                <text:p>-0.0104006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3.395660400391">
                <text:p>453.395660400391</text:p>
              </table:table-cell>
              <table:table-cell office:value-type="float" office:value="-0.003329359">
                <text:p>-0.00332935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53.510131835938">
                <text:p>453.510131835938</text:p>
              </table:table-cell>
              <table:table-cell office:value-type="float" office:value="0.01649828">
                <text:p>0.0164982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53.624603271484">
                <text:p>453.624603271484</text:p>
              </table:table-cell>
              <table:table-cell office:value-type="float" office:value="-0.005759771">
                <text:p>-0.00575977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3.739105224609">
                <text:p>453.739105224609</text:p>
              </table:table-cell>
              <table:table-cell office:value-type="float" office:value="-0.0030459">
                <text:p>-0.003045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53.853607177734">
                <text:p>453.853607177734</text:p>
              </table:table-cell>
              <table:table-cell office:value-type="float" office:value="-0.003454701">
                <text:p>-0.00345470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53.968109130859">
                <text:p>453.968109130859</text:p>
              </table:table-cell>
              <table:table-cell office:value-type="float" office:value="0.002542226">
                <text:p>0.00254222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54.082611083984">
                <text:p>454.082611083984</text:p>
              </table:table-cell>
              <table:table-cell office:value-type="float" office:value="-0.001199882">
                <text:p>-0.00119988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4.197113037109">
                <text:p>454.197113037109</text:p>
              </table:table-cell>
              <table:table-cell office:value-type="float" office:value="-0.01101455">
                <text:p>-0.0110145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54.311614990234">
                <text:p>454.311614990234</text:p>
              </table:table-cell>
              <table:table-cell office:value-type="float" office:value="-0.01453665">
                <text:p>-0.0145366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54.426147460938">
                <text:p>454.426147460938</text:p>
              </table:table-cell>
              <table:table-cell office:value-type="float" office:value="0.007345875">
                <text:p>0.00734587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54.540649414063">
                <text:p>454.540649414063</text:p>
              </table:table-cell>
              <table:table-cell office:value-type="float" office:value="0.01010056">
                <text:p>0.0101005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54.655181884766">
                <text:p>454.655181884766</text:p>
              </table:table-cell>
              <table:table-cell office:value-type="float" office:value="-0.006067786">
                <text:p>-0.00606778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4.769714355469">
                <text:p>454.769714355469</text:p>
              </table:table-cell>
              <table:table-cell office:value-type="float" office:value="-0.002538952">
                <text:p>-0.00253895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54.884246826172">
                <text:p>454.884246826172</text:p>
              </table:table-cell>
              <table:table-cell office:value-type="float" office:value="0.00994135">
                <text:p>0.0099413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4.998809814453">
                <text:p>454.998809814453</text:p>
              </table:table-cell>
              <table:table-cell office:value-type="float" office:value="0.01159937">
                <text:p>0.0115993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5.113342285156">
                <text:p>455.113342285156</text:p>
              </table:table-cell>
              <table:table-cell office:value-type="float" office:value="-0.007483373">
                <text:p>-0.00748337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55.227905273438">
                <text:p>455.227905273438</text:p>
              </table:table-cell>
              <table:table-cell office:value-type="float" office:value="-0.005526342">
                <text:p>-0.00552634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5.342468261719">
                <text:p>455.342468261719</text:p>
              </table:table-cell>
              <table:table-cell office:value-type="float" office:value="0.00683476">
                <text:p>0.0068347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5.457000732422">
                <text:p>455.457000732422</text:p>
              </table:table-cell>
              <table:table-cell office:value-type="float" office:value="0.007887262">
                <text:p>0.00788726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55.571563720703">
                <text:p>455.571563720703</text:p>
              </table:table-cell>
              <table:table-cell office:value-type="float" office:value="-0.009444555">
                <text:p>-0.00944455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55.686157226563">
                <text:p>455.686157226563</text:p>
              </table:table-cell>
              <table:table-cell office:value-type="float" office:value="-0.01010775">
                <text:p>-0.0101077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55.800720214844">
                <text:p>455.800720214844</text:p>
              </table:table-cell>
              <table:table-cell office:value-type="float" office:value="0.01097522">
                <text:p>0.0109752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55.915313720703">
                <text:p>455.915313720703</text:p>
              </table:table-cell>
              <table:table-cell office:value-type="float" office:value="-0.0005865601">
                <text:p>-0.000586560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56.029876708984">
                <text:p>456.029876708984</text:p>
              </table:table-cell>
              <table:table-cell office:value-type="float" office:value="-0.00681825">
                <text:p>-0.0068182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56.144470214844">
                <text:p>456.144470214844</text:p>
              </table:table-cell>
              <table:table-cell office:value-type="float" office:value="-0.003770465">
                <text:p>-0.00377046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56.259063720703">
                <text:p>456.259063720703</text:p>
              </table:table-cell>
              <table:table-cell office:value-type="float" office:value="-0.004241146">
                <text:p>-0.00424114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6.373657226563">
                <text:p>456.373657226563</text:p>
              </table:table-cell>
              <table:table-cell office:value-type="float" office:value="0.008704997">
                <text:p>0.00870499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56.488250732422">
                <text:p>456.488250732422</text:p>
              </table:table-cell>
              <table:table-cell office:value-type="float" office:value="-0.006252227">
                <text:p>-0.00625222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56.602874755859">
                <text:p>456.602874755859</text:p>
              </table:table-cell>
              <table:table-cell office:value-type="float" office:value="-0.01403819">
                <text:p>-0.0140381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6.717468261719">
                <text:p>456.717468261719</text:p>
              </table:table-cell>
              <table:table-cell office:value-type="float" office:value="0.01539105">
                <text:p>0.0153910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56.832092285156">
                <text:p>456.832092285156</text:p>
              </table:table-cell>
              <table:table-cell office:value-type="float" office:value="0.0004551723">
                <text:p>0.000455172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56.946716308594">
                <text:p>456.946716308594</text:p>
              </table:table-cell>
              <table:table-cell office:value-type="float" office:value="-0.01044128">
                <text:p>-0.0104412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7.061340332031">
                <text:p>457.061340332031</text:p>
              </table:table-cell>
              <table:table-cell office:value-type="float" office:value="0.008498439">
                <text:p>0.00849843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57.175964355469">
                <text:p>457.175964355469</text:p>
              </table:table-cell>
              <table:table-cell office:value-type="float" office:value="0.002806969">
                <text:p>0.00280696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57.290618896484">
                <text:p>457.290618896484</text:p>
              </table:table-cell>
              <table:table-cell office:value-type="float" office:value="0.002358828">
                <text:p>0.00235882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57.405242919922">
                <text:p>457.405242919922</text:p>
              </table:table-cell>
              <table:table-cell office:value-type="float" office:value="-0.01443423">
                <text:p>-0.0144342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57.519897460938">
                <text:p>457.519897460938</text:p>
              </table:table-cell>
              <table:table-cell office:value-type="float" office:value="0.01718184">
                <text:p>0.0171818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57.634552001953">
                <text:p>457.634552001953</text:p>
              </table:table-cell>
              <table:table-cell office:value-type="float" office:value="0.009065214">
                <text:p>0.00906521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57.749206542969">
                <text:p>457.749206542969</text:p>
              </table:table-cell>
              <table:table-cell office:value-type="float" office:value="0.01183826">
                <text:p>0.0118382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57.863861083984">
                <text:p>457.863861083984</text:p>
              </table:table-cell>
              <table:table-cell office:value-type="float" office:value="-0.0008521579">
                <text:p>-0.000852157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57.978515625">
                <text:p>457.978515625</text:p>
              </table:table-cell>
              <table:table-cell office:value-type="float" office:value="-0.001412998">
                <text:p>-0.00141299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58.093200683594">
                <text:p>458.093200683594</text:p>
              </table:table-cell>
              <table:table-cell office:value-type="float" office:value="-0.001445048">
                <text:p>-0.00144504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58.207855224609">
                <text:p>458.207855224609</text:p>
              </table:table-cell>
              <table:table-cell office:value-type="float" office:value="0.005948104">
                <text:p>0.00594810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58.322540283203">
                <text:p>458.322540283203</text:p>
              </table:table-cell>
              <table:table-cell office:value-type="float" office:value="0.01288265">
                <text:p>0.0128826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58.437225341797">
                <text:p>458.437225341797</text:p>
              </table:table-cell>
              <table:table-cell office:value-type="float" office:value="0.0006059084">
                <text:p>0.000605908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58.551910400391">
                <text:p>458.551910400391</text:p>
              </table:table-cell>
              <table:table-cell office:value-type="float" office:value="0.00804999">
                <text:p>0.0080499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58.666595458984">
                <text:p>458.666595458984</text:p>
              </table:table-cell>
              <table:table-cell office:value-type="float" office:value="0.01717979">
                <text:p>0.0171797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58.781280517578">
                <text:p>458.781280517578</text:p>
              </table:table-cell>
              <table:table-cell office:value-type="float" office:value="-0.006012463">
                <text:p>-0.00601246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58.89599609375">
                <text:p>458.89599609375</text:p>
              </table:table-cell>
              <table:table-cell office:value-type="float" office:value="-0.001278684">
                <text:p>-0.00127868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59.010681152344">
                <text:p>459.010681152344</text:p>
              </table:table-cell>
              <table:table-cell office:value-type="float" office:value="0.0104966">
                <text:p>0.010496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9.125396728516">
                <text:p>459.125396728516</text:p>
              </table:table-cell>
              <table:table-cell office:value-type="float" office:value="0.03444558">
                <text:p>0.0344455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59.240112304688">
                <text:p>459.240112304688</text:p>
              </table:table-cell>
              <table:table-cell office:value-type="float" office:value="0.01073518">
                <text:p>0.0107351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59.354827880859">
                <text:p>459.354827880859</text:p>
              </table:table-cell>
              <table:table-cell office:value-type="float" office:value="-0.007658351">
                <text:p>-0.00765835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59.469543457031">
                <text:p>459.469543457031</text:p>
              </table:table-cell>
              <table:table-cell office:value-type="float" office:value="0.003306649">
                <text:p>0.00330664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59.584289550781">
                <text:p>459.584289550781</text:p>
              </table:table-cell>
              <table:table-cell office:value-type="float" office:value="-0.001447487">
                <text:p>-0.00144748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59.699005126953">
                <text:p>459.699005126953</text:p>
              </table:table-cell>
              <table:table-cell office:value-type="float" office:value="0.005286173">
                <text:p>0.00528617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59.813751220703">
                <text:p>459.813751220703</text:p>
              </table:table-cell>
              <table:table-cell office:value-type="float" office:value="-0.005356481">
                <text:p>-0.00535648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59.928497314453">
                <text:p>459.928497314453</text:p>
              </table:table-cell>
              <table:table-cell office:value-type="float" office:value="0.007817358">
                <text:p>0.00781735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60.043243408203">
                <text:p>460.043243408203</text:p>
              </table:table-cell>
              <table:table-cell office:value-type="float" office:value="0.03754012">
                <text:p>0.0375401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0.157989501953">
                <text:p>460.157989501953</text:p>
              </table:table-cell>
              <table:table-cell office:value-type="float" office:value="0.0149063">
                <text:p>0.014906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60.272735595703">
                <text:p>460.272735595703</text:p>
              </table:table-cell>
              <table:table-cell office:value-type="float" office:value="-0.01053326">
                <text:p>-0.0105332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60.387512207031">
                <text:p>460.387512207031</text:p>
              </table:table-cell>
              <table:table-cell office:value-type="float" office:value="-0.002778521">
                <text:p>-0.00277852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0.502258300781">
                <text:p>460.502258300781</text:p>
              </table:table-cell>
              <table:table-cell office:value-type="float" office:value="0.01109037">
                <text:p>0.0110903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60.617034912109">
                <text:p>460.617034912109</text:p>
              </table:table-cell>
              <table:table-cell office:value-type="float" office:value="-0.001696743">
                <text:p>-0.00169674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60.731811523438">
                <text:p>460.731811523438</text:p>
              </table:table-cell>
              <table:table-cell office:value-type="float" office:value="0.008677833">
                <text:p>0.00867783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0.846588134766">
                <text:p>460.846588134766</text:p>
              </table:table-cell>
              <table:table-cell office:value-type="float" office:value="0.01454391">
                <text:p>0.0145439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60.961364746094">
                <text:p>460.961364746094</text:p>
              </table:table-cell>
              <table:table-cell office:value-type="float" office:value="-0.0004756216">
                <text:p>-0.000475621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1.076171875">
                <text:p>461.076171875</text:p>
              </table:table-cell>
              <table:table-cell office:value-type="float" office:value="-0.01084877">
                <text:p>-0.0108487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1.190948486328">
                <text:p>461.190948486328</text:p>
              </table:table-cell>
              <table:table-cell office:value-type="float" office:value="-0.0006635255">
                <text:p>-0.000663525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61.305755615234">
                <text:p>461.305755615234</text:p>
              </table:table-cell>
              <table:table-cell office:value-type="float" office:value="0.005382869">
                <text:p>0.00538286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1.420562744141">
                <text:p>461.420562744141</text:p>
              </table:table-cell>
              <table:table-cell office:value-type="float" office:value="-0.001277715">
                <text:p>-0.00127771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61.535369873047">
                <text:p>461.535369873047</text:p>
              </table:table-cell>
              <table:table-cell office:value-type="float" office:value="-0.01025517">
                <text:p>-0.0102551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61.650177001953">
                <text:p>461.650177001953</text:p>
              </table:table-cell>
              <table:table-cell office:value-type="float" office:value="0.00820551">
                <text:p>0.0082055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61.764984130859">
                <text:p>461.764984130859</text:p>
              </table:table-cell>
              <table:table-cell office:value-type="float" office:value="0.002552281">
                <text:p>0.00255228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61.879791259766">
                <text:p>461.879791259766</text:p>
              </table:table-cell>
              <table:table-cell office:value-type="float" office:value="0.005978309">
                <text:p>0.00597830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61.99462890625">
                <text:p>461.99462890625</text:p>
              </table:table-cell>
              <table:table-cell office:value-type="float" office:value="-0.003186074">
                <text:p>-0.00318607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62.109466552734">
                <text:p>462.109466552734</text:p>
              </table:table-cell>
              <table:table-cell office:value-type="float" office:value="0.005937365">
                <text:p>0.00593736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62.224304199219">
                <text:p>462.224304199219</text:p>
              </table:table-cell>
              <table:table-cell office:value-type="float" office:value="0.001153558">
                <text:p>0.00115355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2.339141845703">
                <text:p>462.339141845703</text:p>
              </table:table-cell>
              <table:table-cell office:value-type="float" office:value="0.01022472">
                <text:p>0.0102247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62.453979492188">
                <text:p>462.453979492188</text:p>
              </table:table-cell>
              <table:table-cell office:value-type="float" office:value="-0.0006297042">
                <text:p>-0.000629704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62.568817138672">
                <text:p>462.568817138672</text:p>
              </table:table-cell>
              <table:table-cell office:value-type="float" office:value="0.00335531">
                <text:p>0.0033553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2.683654785156">
                <text:p>462.683654785156</text:p>
              </table:table-cell>
              <table:table-cell office:value-type="float" office:value="0.01260743">
                <text:p>0.0126074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62.798522949219">
                <text:p>462.798522949219</text:p>
              </table:table-cell>
              <table:table-cell office:value-type="float" office:value="-0.007518117">
                <text:p>-0.00751811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62.913391113281">
                <text:p>462.913391113281</text:p>
              </table:table-cell>
              <table:table-cell office:value-type="float" office:value="-0.00457019">
                <text:p>-0.0045701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63.028259277344">
                <text:p>463.028259277344</text:p>
              </table:table-cell>
              <table:table-cell office:value-type="float" office:value="0.007187478">
                <text:p>0.00718747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3.143127441406">
                <text:p>463.143127441406</text:p>
              </table:table-cell>
              <table:table-cell office:value-type="float" office:value="0.005558586">
                <text:p>0.00555858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63.257995605469">
                <text:p>463.257995605469</text:p>
              </table:table-cell>
              <table:table-cell office:value-type="float" office:value="-0.008161827">
                <text:p>-0.00816182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3.372863769531">
                <text:p>463.372863769531</text:p>
              </table:table-cell>
              <table:table-cell office:value-type="float" office:value="0.01353139">
                <text:p>0.0135313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63.487762451172">
                <text:p>463.487762451172</text:p>
              </table:table-cell>
              <table:table-cell office:value-type="float" office:value="0.00648094">
                <text:p>0.0064809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63.602661132813">
                <text:p>463.602661132813</text:p>
              </table:table-cell>
              <table:table-cell office:value-type="float" office:value="0.005262719">
                <text:p>0.00526271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63.717529296875">
                <text:p>463.717529296875</text:p>
              </table:table-cell>
              <table:table-cell office:value-type="float" office:value="-0.001119715">
                <text:p>-0.00111971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3.832427978516">
                <text:p>463.832427978516</text:p>
              </table:table-cell>
              <table:table-cell office:value-type="float" office:value="-0.01176586">
                <text:p>-0.0117658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63.947326660156">
                <text:p>463.947326660156</text:p>
              </table:table-cell>
              <table:table-cell office:value-type="float" office:value="0.001333339">
                <text:p>0.00133333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64.062255859375">
                <text:p>464.062255859375</text:p>
              </table:table-cell>
              <table:table-cell office:value-type="float" office:value="-0.004694691">
                <text:p>-0.00469469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64.177154541016">
                <text:p>464.177154541016</text:p>
              </table:table-cell>
              <table:table-cell office:value-type="float" office:value="-0.006043973">
                <text:p>-0.00604397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64.292083740234">
                <text:p>464.292083740234</text:p>
              </table:table-cell>
              <table:table-cell office:value-type="float" office:value="-0.009448051">
                <text:p>-0.00944805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64.406982421875">
                <text:p>464.406982421875</text:p>
              </table:table-cell>
              <table:table-cell office:value-type="float" office:value="0.006704352">
                <text:p>0.00670435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4.521911621094">
                <text:p>464.521911621094</text:p>
              </table:table-cell>
              <table:table-cell office:value-type="float" office:value="-0.004372615">
                <text:p>-0.00437261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4.636840820313">
                <text:p>464.636840820313</text:p>
              </table:table-cell>
              <table:table-cell office:value-type="float" office:value="-0.002579322">
                <text:p>-0.00257932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4.751770019531">
                <text:p>464.751770019531</text:p>
              </table:table-cell>
              <table:table-cell office:value-type="float" office:value="-0.007305983">
                <text:p>-0.00730598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64.866729736328">
                <text:p>464.866729736328</text:p>
              </table:table-cell>
              <table:table-cell office:value-type="float" office:value="0.003782736">
                <text:p>0.00378273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64.981658935547">
                <text:p>464.981658935547</text:p>
              </table:table-cell>
              <table:table-cell office:value-type="float" office:value="0.01481644">
                <text:p>0.0148164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5.096618652344">
                <text:p>465.096618652344</text:p>
              </table:table-cell>
              <table:table-cell office:value-type="float" office:value="-0.006666029">
                <text:p>-0.00666602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65.211547851563">
                <text:p>465.211547851563</text:p>
              </table:table-cell>
              <table:table-cell office:value-type="float" office:value="-0.01329595">
                <text:p>-0.0132959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65.326507568359">
                <text:p>465.326507568359</text:p>
              </table:table-cell>
              <table:table-cell office:value-type="float" office:value="-0.008426986">
                <text:p>-0.00842698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65.441467285156">
                <text:p>465.441467285156</text:p>
              </table:table-cell>
              <table:table-cell office:value-type="float" office:value="0.00156047">
                <text:p>0.0015604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65.556427001953">
                <text:p>465.556427001953</text:p>
              </table:table-cell>
              <table:table-cell office:value-type="float" office:value="-0.004847868">
                <text:p>-0.00484786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5.671417236328">
                <text:p>465.671417236328</text:p>
              </table:table-cell>
              <table:table-cell office:value-type="float" office:value="-0.007524328">
                <text:p>-0.00752432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65.786376953125">
                <text:p>465.786376953125</text:p>
              </table:table-cell>
              <table:table-cell office:value-type="float" office:value="0.003631646">
                <text:p>0.00363164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65.9013671875">
                <text:p>465.9013671875</text:p>
              </table:table-cell>
              <table:table-cell office:value-type="float" office:value="0.004088793">
                <text:p>0.00408879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6.016357421875">
                <text:p>466.016357421875</text:p>
              </table:table-cell>
              <table:table-cell office:value-type="float" office:value="-0.002195726">
                <text:p>-0.00219572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66.13134765625">
                <text:p>466.13134765625</text:p>
              </table:table-cell>
              <table:table-cell office:value-type="float" office:value="-0.01257996">
                <text:p>-0.0125799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66.246337890625">
                <text:p>466.246337890625</text:p>
              </table:table-cell>
              <table:table-cell office:value-type="float" office:value="0.01601936">
                <text:p>0.0160193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66.361328125">
                <text:p>466.361328125</text:p>
              </table:table-cell>
              <table:table-cell office:value-type="float" office:value="-0.002971948">
                <text:p>-0.00297194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6.476318359375">
                <text:p>466.476318359375</text:p>
              </table:table-cell>
              <table:table-cell office:value-type="float" office:value="-0.01276857">
                <text:p>-0.0127685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66.591339111328">
                <text:p>466.591339111328</text:p>
              </table:table-cell>
              <table:table-cell office:value-type="float" office:value="0.004309241">
                <text:p>0.00430924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66.706329345703">
                <text:p>466.706329345703</text:p>
              </table:table-cell>
              <table:table-cell office:value-type="float" office:value="0.02589314">
                <text:p>0.0258931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66.821350097656">
                <text:p>466.821350097656</text:p>
              </table:table-cell>
              <table:table-cell office:value-type="float" office:value="-0.0006772559">
                <text:p>-0.000677255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66.936370849609">
                <text:p>466.936370849609</text:p>
              </table:table-cell>
              <table:table-cell office:value-type="float" office:value="-0.005794953">
                <text:p>-0.00579495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67.051391601563">
                <text:p>467.051391601563</text:p>
              </table:table-cell>
              <table:table-cell office:value-type="float" office:value="0.009047925">
                <text:p>0.00904792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67.166442871094">
                <text:p>467.166442871094</text:p>
              </table:table-cell>
              <table:table-cell office:value-type="float" office:value="-0.004162516">
                <text:p>-0.00416251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67.281463623047">
                <text:p>467.281463623047</text:p>
              </table:table-cell>
              <table:table-cell office:value-type="float" office:value="0.002130885">
                <text:p>0.00213088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67.396484375">
                <text:p>467.396484375</text:p>
              </table:table-cell>
              <table:table-cell office:value-type="float" office:value="-0.006560792">
                <text:p>-0.00656079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67.511535644531">
                <text:p>467.511535644531</text:p>
              </table:table-cell>
              <table:table-cell office:value-type="float" office:value="-0.009182779">
                <text:p>-0.00918277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67.626586914063">
                <text:p>467.626586914063</text:p>
              </table:table-cell>
              <table:table-cell office:value-type="float" office:value="0.001732085">
                <text:p>0.00173208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67.741638183594">
                <text:p>467.741638183594</text:p>
              </table:table-cell>
              <table:table-cell office:value-type="float" office:value="-0.01054614">
                <text:p>-0.0105461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67.856689453125">
                <text:p>467.856689453125</text:p>
              </table:table-cell>
              <table:table-cell office:value-type="float" office:value="-0.006617197">
                <text:p>-0.00661719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7.971740722656">
                <text:p>467.971740722656</text:p>
              </table:table-cell>
              <table:table-cell office:value-type="float" office:value="-0.008315987">
                <text:p>-0.00831598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68.086822509766">
                <text:p>468.086822509766</text:p>
              </table:table-cell>
              <table:table-cell office:value-type="float" office:value="-0.00173488">
                <text:p>-0.0017348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68.201873779297">
                <text:p>468.201873779297</text:p>
              </table:table-cell>
              <table:table-cell office:value-type="float" office:value="0.009147355">
                <text:p>0.00914735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8.316955566406">
                <text:p>468.316955566406</text:p>
              </table:table-cell>
              <table:table-cell office:value-type="float" office:value="-0.002676841">
                <text:p>-0.00267684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68.432037353516">
                <text:p>468.432037353516</text:p>
              </table:table-cell>
              <table:table-cell office:value-type="float" office:value="-0.003920761">
                <text:p>-0.00392076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68.547119140625">
                <text:p>468.547119140625</text:p>
              </table:table-cell>
              <table:table-cell office:value-type="float" office:value="-0.0006779758">
                <text:p>-0.000677975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68.662200927734">
                <text:p>468.662200927734</text:p>
              </table:table-cell>
              <table:table-cell office:value-type="float" office:value="-0.007165574">
                <text:p>-0.00716557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8.777282714844">
                <text:p>468.777282714844</text:p>
              </table:table-cell>
              <table:table-cell office:value-type="float" office:value="-0.006958161">
                <text:p>-0.00695816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68.892395019531">
                <text:p>468.892395019531</text:p>
              </table:table-cell>
              <table:table-cell office:value-type="float" office:value="-0.005369547">
                <text:p>-0.00536954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69.007476806641">
                <text:p>469.007476806641</text:p>
              </table:table-cell>
              <table:table-cell office:value-type="float" office:value="0.026717">
                <text:p>0.02671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9.122589111328">
                <text:p>469.122589111328</text:p>
              </table:table-cell>
              <table:table-cell office:value-type="float" office:value="-0.0001004415">
                <text:p>-0.000100441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9.237701416016">
                <text:p>469.237701416016</text:p>
              </table:table-cell>
              <table:table-cell office:value-type="float" office:value="0.003958433">
                <text:p>0.00395843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69.352813720703">
                <text:p>469.352813720703</text:p>
              </table:table-cell>
              <table:table-cell office:value-type="float" office:value="0.01098956">
                <text:p>0.0109895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69.467926025391">
                <text:p>469.467926025391</text:p>
              </table:table-cell>
              <table:table-cell office:value-type="float" office:value="0.009123041">
                <text:p>0.00912304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9.583068847656">
                <text:p>469.583068847656</text:p>
              </table:table-cell>
              <table:table-cell office:value-type="float" office:value="0.009389683">
                <text:p>0.00938968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69.698181152344">
                <text:p>469.698181152344</text:p>
              </table:table-cell>
              <table:table-cell office:value-type="float" office:value="0.001364865">
                <text:p>0.00136486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69.813323974609">
                <text:p>469.813323974609</text:p>
              </table:table-cell>
              <table:table-cell office:value-type="float" office:value="-0.0054261">
                <text:p>-0.005426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69.928436279297">
                <text:p>469.928436279297</text:p>
              </table:table-cell>
              <table:table-cell office:value-type="float" office:value="-0.003749339">
                <text:p>-0.00374933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0.043579101563">
                <text:p>470.043579101563</text:p>
              </table:table-cell>
              <table:table-cell office:value-type="float" office:value="0.003995586">
                <text:p>0.00399558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0.158721923828">
                <text:p>470.158721923828</text:p>
              </table:table-cell>
              <table:table-cell office:value-type="float" office:value="-0.01100076">
                <text:p>-0.0110007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0.273895263672">
                <text:p>470.273895263672</text:p>
              </table:table-cell>
              <table:table-cell office:value-type="float" office:value="0.004163286">
                <text:p>0.00416328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0.389038085938">
                <text:p>470.389038085938</text:p>
              </table:table-cell>
              <table:table-cell office:value-type="float" office:value="0.00452835">
                <text:p>0.0045283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70.504180908203">
                <text:p>470.504180908203</text:p>
              </table:table-cell>
              <table:table-cell office:value-type="float" office:value="-0.001544733">
                <text:p>-0.00154473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0.619354248047">
                <text:p>470.619354248047</text:p>
              </table:table-cell>
              <table:table-cell office:value-type="float" office:value="-0.009814231">
                <text:p>-0.00981423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70.734527587891">
                <text:p>470.734527587891</text:p>
              </table:table-cell>
              <table:table-cell office:value-type="float" office:value="0.0102655">
                <text:p>0.010265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70.849700927734">
                <text:p>470.849700927734</text:p>
              </table:table-cell>
              <table:table-cell office:value-type="float" office:value="0.0447893">
                <text:p>0.044789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0.964874267578">
                <text:p>470.964874267578</text:p>
              </table:table-cell>
              <table:table-cell office:value-type="float" office:value="0.001832232">
                <text:p>0.00183223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1.080047607422">
                <text:p>471.080047607422</text:p>
              </table:table-cell>
              <table:table-cell office:value-type="float" office:value="0.01728268">
                <text:p>0.0172826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1.195220947266">
                <text:p>471.195220947266</text:p>
              </table:table-cell>
              <table:table-cell office:value-type="float" office:value="-0.01154053">
                <text:p>-0.0115405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1.310424804688">
                <text:p>471.310424804688</text:p>
              </table:table-cell>
              <table:table-cell office:value-type="float" office:value="0.007038701">
                <text:p>0.00703870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1.425628662109">
                <text:p>471.425628662109</text:p>
              </table:table-cell>
              <table:table-cell office:value-type="float" office:value="0.003420869">
                <text:p>0.00342086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1.540802001953">
                <text:p>471.540802001953</text:p>
              </table:table-cell>
              <table:table-cell office:value-type="float" office:value="0.01780415">
                <text:p>0.0178041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71.656005859375">
                <text:p>471.656005859375</text:p>
              </table:table-cell>
              <table:table-cell office:value-type="float" office:value="-0.001139408">
                <text:p>-0.00113940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1.771209716797">
                <text:p>471.771209716797</text:p>
              </table:table-cell>
              <table:table-cell office:value-type="float" office:value="0.02051299">
                <text:p>0.0205129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1.886444091797">
                <text:p>471.886444091797</text:p>
              </table:table-cell>
              <table:table-cell office:value-type="float" office:value="0.01442437">
                <text:p>0.0144243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72.001647949219">
                <text:p>472.001647949219</text:p>
              </table:table-cell>
              <table:table-cell office:value-type="float" office:value="0.005529383">
                <text:p>0.00552938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2.116882324219">
                <text:p>472.116882324219</text:p>
              </table:table-cell>
              <table:table-cell office:value-type="float" office:value="-0.008776687">
                <text:p>-0.00877668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2.232086181641">
                <text:p>472.232086181641</text:p>
              </table:table-cell>
              <table:table-cell office:value-type="float" office:value="0.002834131">
                <text:p>0.00283413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2.347320556641">
                <text:p>472.347320556641</text:p>
              </table:table-cell>
              <table:table-cell office:value-type="float" office:value="0.001110414">
                <text:p>0.00111041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2.462554931641">
                <text:p>472.462554931641</text:p>
              </table:table-cell>
              <table:table-cell office:value-type="float" office:value="-0.01412898">
                <text:p>-0.0141289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72.577789306641">
                <text:p>472.577789306641</text:p>
              </table:table-cell>
              <table:table-cell office:value-type="float" office:value="-0.01025402">
                <text:p>-0.0102540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2.693023681641">
                <text:p>472.693023681641</text:p>
              </table:table-cell>
              <table:table-cell office:value-type="float" office:value="0.007812037">
                <text:p>0.00781203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2.808288574219">
                <text:p>472.808288574219</text:p>
              </table:table-cell>
              <table:table-cell office:value-type="float" office:value="-0.001729763">
                <text:p>-0.00172976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2.923522949219">
                <text:p>472.923522949219</text:p>
              </table:table-cell>
              <table:table-cell office:value-type="float" office:value="-0.007348171">
                <text:p>-0.00734817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3.038787841797">
                <text:p>473.038787841797</text:p>
              </table:table-cell>
              <table:table-cell office:value-type="float" office:value="-0.01140959">
                <text:p>-0.0114095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73.154052734375">
                <text:p>473.154052734375</text:p>
              </table:table-cell>
              <table:table-cell office:value-type="float" office:value="0.01364258">
                <text:p>0.0136425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73.269317626953">
                <text:p>473.269317626953</text:p>
              </table:table-cell>
              <table:table-cell office:value-type="float" office:value="0.006566604">
                <text:p>0.00656660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3.384582519531">
                <text:p>473.384582519531</text:p>
              </table:table-cell>
              <table:table-cell office:value-type="float" office:value="-0.005216519">
                <text:p>-0.00521651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73.499847412109">
                <text:p>473.499847412109</text:p>
              </table:table-cell>
              <table:table-cell office:value-type="float" office:value="-0.001751419">
                <text:p>-0.00175141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3.615112304688">
                <text:p>473.615112304688</text:p>
              </table:table-cell>
              <table:table-cell office:value-type="float" office:value="0.0163091">
                <text:p>0.016309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3.730407714844">
                <text:p>473.730407714844</text:p>
              </table:table-cell>
              <table:table-cell office:value-type="float" office:value="0.02650089">
                <text:p>0.0265008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3.845703125">
                <text:p>473.845703125</text:p>
              </table:table-cell>
              <table:table-cell office:value-type="float" office:value="-0.004368757">
                <text:p>-0.00436875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73.960998535156">
                <text:p>473.960998535156</text:p>
              </table:table-cell>
              <table:table-cell office:value-type="float" office:value="0.002928899">
                <text:p>0.00292889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4.076263427734">
                <text:p>474.076263427734</text:p>
              </table:table-cell>
              <table:table-cell office:value-type="float" office:value="0.001882215">
                <text:p>0.00188221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4.191589355469">
                <text:p>474.191589355469</text:p>
              </table:table-cell>
              <table:table-cell office:value-type="float" office:value="0.01882415">
                <text:p>0.0188241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4.306884765625">
                <text:p>474.306884765625</text:p>
              </table:table-cell>
              <table:table-cell office:value-type="float" office:value="0.0216276">
                <text:p>0.021627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4.422180175781">
                <text:p>474.422180175781</text:p>
              </table:table-cell>
              <table:table-cell office:value-type="float" office:value="-0.01292618">
                <text:p>-0.0129261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74.537506103516">
                <text:p>474.537506103516</text:p>
              </table:table-cell>
              <table:table-cell office:value-type="float" office:value="0.005562367">
                <text:p>0.00556236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4.652801513672">
                <text:p>474.652801513672</text:p>
              </table:table-cell>
              <table:table-cell office:value-type="float" office:value="-0.005278447">
                <text:p>-0.00527844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4.768127441406">
                <text:p>474.768127441406</text:p>
              </table:table-cell>
              <table:table-cell office:value-type="float" office:value="-0.009421125">
                <text:p>-0.00942112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4.883453369141">
                <text:p>474.883453369141</text:p>
              </table:table-cell>
              <table:table-cell office:value-type="float" office:value="-0.007128335">
                <text:p>-0.00712833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4.998779296875">
                <text:p>474.998779296875</text:p>
              </table:table-cell>
              <table:table-cell office:value-type="float" office:value="0.004229985">
                <text:p>0.00422998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5.114135742188">
                <text:p>475.114135742188</text:p>
              </table:table-cell>
              <table:table-cell office:value-type="float" office:value="-0.006439574">
                <text:p>-0.00643957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75.229461669922">
                <text:p>475.229461669922</text:p>
              </table:table-cell>
              <table:table-cell office:value-type="float" office:value="-0.005834016">
                <text:p>-0.00583401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.344818115234">
                <text:p>475.344818115234</text:p>
              </table:table-cell>
              <table:table-cell office:value-type="float" office:value="0.002314253">
                <text:p>0.00231425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5.460144042969">
                <text:p>475.460144042969</text:p>
              </table:table-cell>
              <table:table-cell office:value-type="float" office:value="0.00909913">
                <text:p>0.0090991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5.575500488281">
                <text:p>475.575500488281</text:p>
              </table:table-cell>
              <table:table-cell office:value-type="float" office:value="0.00191308">
                <text:p>0.0019130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5.690856933594">
                <text:p>475.690856933594</text:p>
              </table:table-cell>
              <table:table-cell office:value-type="float" office:value="-0.01093683">
                <text:p>-0.0109368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5.806213378906">
                <text:p>475.806213378906</text:p>
              </table:table-cell>
              <table:table-cell office:value-type="float" office:value="-0.01177768">
                <text:p>-0.0117776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5.921569824219">
                <text:p>475.921569824219</text:p>
              </table:table-cell>
              <table:table-cell office:value-type="float" office:value="0.001648091">
                <text:p>0.00164809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6.036956787109">
                <text:p>476.036956787109</text:p>
              </table:table-cell>
              <table:table-cell office:value-type="float" office:value="0.007065962">
                <text:p>0.00706596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6.152313232422">
                <text:p>476.152313232422</text:p>
              </table:table-cell>
              <table:table-cell office:value-type="float" office:value="0.00650063">
                <text:p>0.0065006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76.267700195313">
                <text:p>476.267700195313</text:p>
              </table:table-cell>
              <table:table-cell office:value-type="float" office:value="-0.01242266">
                <text:p>-0.0124226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6.383087158203">
                <text:p>476.383087158203</text:p>
              </table:table-cell>
              <table:table-cell office:value-type="float" office:value="0.01409964">
                <text:p>0.0140996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6.498474121094">
                <text:p>476.49847412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6.613861083984">
                <text:p>476.613861083984</text:p>
              </table:table-cell>
              <table:table-cell office:value-type="float" office:value="-0.009219873">
                <text:p>-0.00921987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6.729248046875">
                <text:p>476.729248046875</text:p>
              </table:table-cell>
              <table:table-cell office:value-type="float" office:value="-0.007238764">
                <text:p>-0.00723876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6.844665527344">
                <text:p>476.844665527344</text:p>
              </table:table-cell>
              <table:table-cell office:value-type="float" office:value="0.01542262">
                <text:p>0.0154226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6.960052490234">
                <text:p>476.960052490234</text:p>
              </table:table-cell>
              <table:table-cell office:value-type="float" office:value="0.001497909">
                <text:p>0.00149790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77.075469970703">
                <text:p>477.075469970703</text:p>
              </table:table-cell>
              <table:table-cell office:value-type="float" office:value="-0.01326253">
                <text:p>-0.0132625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7.190887451172">
                <text:p>477.190887451172</text:p>
              </table:table-cell>
              <table:table-cell office:value-type="float" office:value="-0.007593178">
                <text:p>-0.00759317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7.306304931641">
                <text:p>477.306304931641</text:p>
              </table:table-cell>
              <table:table-cell office:value-type="float" office:value="0.01603232">
                <text:p>0.0160323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7.421722412109">
                <text:p>477.421722412109</text:p>
              </table:table-cell>
              <table:table-cell office:value-type="float" office:value="-0.008248338">
                <text:p>-0.00824833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77.537139892578">
                <text:p>477.537139892578</text:p>
              </table:table-cell>
              <table:table-cell office:value-type="float" office:value="-0.004722904">
                <text:p>-0.00472290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7.652557373047">
                <text:p>477.652557373047</text:p>
              </table:table-cell>
              <table:table-cell office:value-type="float" office:value="-0.01317561">
                <text:p>-0.0131756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7.768005371094">
                <text:p>477.768005371094</text:p>
              </table:table-cell>
              <table:table-cell office:value-type="float" office:value="-0.006076104">
                <text:p>-0.00607610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7.883422851563">
                <text:p>477.883422851563</text:p>
              </table:table-cell>
              <table:table-cell office:value-type="float" office:value="0.0112539">
                <text:p>0.011253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7.998870849609">
                <text:p>477.998870849609</text:p>
              </table:table-cell>
              <table:table-cell office:value-type="float" office:value="-0.01413175">
                <text:p>-0.0141317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8.114318847656">
                <text:p>478.114318847656</text:p>
              </table:table-cell>
              <table:table-cell office:value-type="float" office:value="-0.005001226">
                <text:p>-0.00500122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78.229766845703">
                <text:p>478.229766845703</text:p>
              </table:table-cell>
              <table:table-cell office:value-type="float" office:value="0.002492846">
                <text:p>0.00249284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78.345245361328">
                <text:p>478.34524536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8.460693359375">
                <text:p>478.460693359375</text:p>
              </table:table-cell>
              <table:table-cell office:value-type="float" office:value="-0.01303391">
                <text:p>-0.0130339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8.576141357422">
                <text:p>478.576141357422</text:p>
              </table:table-cell>
              <table:table-cell office:value-type="float" office:value="-0.006381243">
                <text:p>-0.00638124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8.691619873047">
                <text:p>478.691619873047</text:p>
              </table:table-cell>
              <table:table-cell office:value-type="float" office:value="0.01162729">
                <text:p>0.0116272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8.807098388672">
                <text:p>478.807098388672</text:p>
              </table:table-cell>
              <table:table-cell office:value-type="float" office:value="-0.003508356">
                <text:p>-0.00350835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8.922576904297">
                <text:p>478.922576904297</text:p>
              </table:table-cell>
              <table:table-cell office:value-type="float" office:value="-0.00424924">
                <text:p>-0.0042492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9.038055419922">
                <text:p>479.038055419922</text:p>
              </table:table-cell>
              <table:table-cell office:value-type="float" office:value="-0.01254044">
                <text:p>-0.0125404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9.153533935547">
                <text:p>479.153533935547</text:p>
              </table:table-cell>
              <table:table-cell office:value-type="float" office:value="-0.003053686">
                <text:p>-0.00305368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9.269012451172">
                <text:p>479.269012451172</text:p>
              </table:table-cell>
              <table:table-cell office:value-type="float" office:value="0.01992342">
                <text:p>0.0199234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9.384521484375">
                <text:p>479.384521484375</text:p>
              </table:table-cell>
              <table:table-cell office:value-type="float" office:value="-0.009655163">
                <text:p>-0.00965516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9.500030517578">
                <text:p>479.500030517578</text:p>
              </table:table-cell>
              <table:table-cell office:value-type="float" office:value="-0.007047126">
                <text:p>-0.00704712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9.615509033203">
                <text:p>479.615509033203</text:p>
              </table:table-cell>
              <table:table-cell office:value-type="float" office:value="0.002674795">
                <text:p>0.00267479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9.731018066406">
                <text:p>479.731018066406</text:p>
              </table:table-cell>
              <table:table-cell office:value-type="float" office:value="0.001289068">
                <text:p>0.00128906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9.846527099609">
                <text:p>479.846527099609</text:p>
              </table:table-cell>
              <table:table-cell office:value-type="float" office:value="-0.00586313">
                <text:p>-0.0058631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9.962066650391">
                <text:p>479.962066650391</text:p>
              </table:table-cell>
              <table:table-cell office:value-type="float" office:value="-0.003319264">
                <text:p>-0.00331926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80.077575683594">
                <text:p>480.077575683594</text:p>
              </table:table-cell>
              <table:table-cell office:value-type="float" office:value="0.003126406">
                <text:p>0.00312640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80.193084716797">
                <text:p>480.193084716797</text:p>
              </table:table-cell>
              <table:table-cell office:value-type="float" office:value="0.01426292">
                <text:p>0.0142629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80.308624267578">
                <text:p>480.308624267578</text:p>
              </table:table-cell>
              <table:table-cell office:value-type="float" office:value="-0.005339677">
                <text:p>-0.00533967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80.424163818359">
                <text:p>480.424163818359</text:p>
              </table:table-cell>
              <table:table-cell office:value-type="float" office:value="-0.006340796">
                <text:p>-0.00634079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0.539703369141">
                <text:p>480.539703369141</text:p>
              </table:table-cell>
              <table:table-cell office:value-type="float" office:value="0.006471334">
                <text:p>0.00647133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80.655242919922">
                <text:p>480.655242919922</text:p>
              </table:table-cell>
              <table:table-cell office:value-type="float" office:value="-0.004956874">
                <text:p>-0.00495687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80.770782470703">
                <text:p>480.770782470703</text:p>
              </table:table-cell>
              <table:table-cell office:value-type="float" office:value="-0.01065027">
                <text:p>-0.0106502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0.886322021484">
                <text:p>480.886322021484</text:p>
              </table:table-cell>
              <table:table-cell office:value-type="float" office:value="-0.006952164">
                <text:p>-0.00695216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81.001892089844">
                <text:p>481.001892089844</text:p>
              </table:table-cell>
              <table:table-cell office:value-type="float" office:value="0.0003560374">
                <text:p>0.000356037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81.117431640625">
                <text:p>481.117431640625</text:p>
              </table:table-cell>
              <table:table-cell office:value-type="float" office:value="0.002969062">
                <text:p>0.00296906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81.233001708984">
                <text:p>481.233001708984</text:p>
              </table:table-cell>
              <table:table-cell office:value-type="float" office:value="0.003427353">
                <text:p>0.00342735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81.348571777344">
                <text:p>481.348571777344</text:p>
              </table:table-cell>
              <table:table-cell office:value-type="float" office:value="-0.01147657">
                <text:p>-0.0114765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81.464141845703">
                <text:p>481.464141845703</text:p>
              </table:table-cell>
              <table:table-cell office:value-type="float" office:value="-0.005850277">
                <text:p>-0.00585027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81.579711914063">
                <text:p>481.579711914063</text:p>
              </table:table-cell>
              <table:table-cell office:value-type="float" office:value="0.003164978">
                <text:p>0.00316497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1.695281982422">
                <text:p>481.695281982422</text:p>
              </table:table-cell>
              <table:table-cell office:value-type="float" office:value="-0.01030537">
                <text:p>-0.0103053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81.810882568359">
                <text:p>481.810882568359</text:p>
              </table:table-cell>
              <table:table-cell office:value-type="float" office:value="-0.004989084">
                <text:p>-0.00498908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81.926452636719">
                <text:p>481.926452636719</text:p>
              </table:table-cell>
              <table:table-cell office:value-type="float" office:value="-0.003339173">
                <text:p>-0.00333917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82.042053222656">
                <text:p>482.042053222656</text:p>
              </table:table-cell>
              <table:table-cell office:value-type="float" office:value="0.01569555">
                <text:p>0.0156955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82.157653808594">
                <text:p>482.157653808594</text:p>
              </table:table-cell>
              <table:table-cell office:value-type="float" office:value="-0.008112952">
                <text:p>-0.00811295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82.273254394531">
                <text:p>482.273254394531</text:p>
              </table:table-cell>
              <table:table-cell office:value-type="float" office:value="-0.003136605">
                <text:p>-0.00313660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82.388854980469">
                <text:p>482.388854980469</text:p>
              </table:table-cell>
              <table:table-cell office:value-type="float" office:value="0.01211784">
                <text:p>0.0121178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82.504455566406">
                <text:p>482.504455566406</text:p>
              </table:table-cell>
              <table:table-cell office:value-type="float" office:value="0.01584007">
                <text:p>0.0158400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2.620086669922">
                <text:p>482.620086669922</text:p>
              </table:table-cell>
              <table:table-cell office:value-type="float" office:value="-0.007642293">
                <text:p>-0.00764229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2.735687255859">
                <text:p>482.735687255859</text:p>
              </table:table-cell>
              <table:table-cell office:value-type="float" office:value="0.00232343">
                <text:p>0.0023234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2.851318359375">
                <text:p>482.851318359375</text:p>
              </table:table-cell>
              <table:table-cell office:value-type="float" office:value="-0.006468318">
                <text:p>-0.00646831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2.966949462891">
                <text:p>482.966949462891</text:p>
              </table:table-cell>
              <table:table-cell office:value-type="float" office:value="0.007151415">
                <text:p>0.00715141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3.082580566406">
                <text:p>483.082580566406</text:p>
              </table:table-cell>
              <table:table-cell office:value-type="float" office:value="-0.01641278">
                <text:p>-0.0164127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3.198211669922">
                <text:p>483.198211669922</text:p>
              </table:table-cell>
              <table:table-cell office:value-type="float" office:value="0.0002927718">
                <text:p>0.000292771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3.313842773438">
                <text:p>483.313842773438</text:p>
              </table:table-cell>
              <table:table-cell office:value-type="float" office:value="0.003856096">
                <text:p>0.00385609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3.429473876953">
                <text:p>483.429473876953</text:p>
              </table:table-cell>
              <table:table-cell office:value-type="float" office:value="0.009870457">
                <text:p>0.00987045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3.545135498047">
                <text:p>483.545135498047</text:p>
              </table:table-cell>
              <table:table-cell office:value-type="float" office:value="-0.002302767">
                <text:p>-0.00230276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3.660797119141">
                <text:p>483.660797119141</text:p>
              </table:table-cell>
              <table:table-cell office:value-type="float" office:value="-0.008798136">
                <text:p>-0.00879813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3.776428222656">
                <text:p>483.776428222656</text:p>
              </table:table-cell>
              <table:table-cell office:value-type="float" office:value="0.001970921">
                <text:p>0.00197092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3.89208984375">
                <text:p>483.89208984375</text:p>
              </table:table-cell>
              <table:table-cell office:value-type="float" office:value="0.01684866">
                <text:p>0.0168486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4.007751464844">
                <text:p>484.007751464844</text:p>
              </table:table-cell>
              <table:table-cell office:value-type="float" office:value="-0.01153058">
                <text:p>-0.0115305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4.123413085938">
                <text:p>484.123413085938</text:p>
              </table:table-cell>
              <table:table-cell office:value-type="float" office:value="-0.01492566">
                <text:p>-0.0149256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4.239105224609">
                <text:p>484.239105224609</text:p>
              </table:table-cell>
              <table:table-cell office:value-type="float" office:value="0.008077606">
                <text:p>0.00807760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4.354766845703">
                <text:p>484.354766845703</text:p>
              </table:table-cell>
              <table:table-cell office:value-type="float" office:value="-0.001160742">
                <text:p>-0.00116074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4.470458984375">
                <text:p>484.470458984375</text:p>
              </table:table-cell>
              <table:table-cell office:value-type="float" office:value="-0.003346705">
                <text:p>-0.00334670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4.586151123047">
                <text:p>484.586151123047</text:p>
              </table:table-cell>
              <table:table-cell office:value-type="float" office:value="-0.01075231">
                <text:p>-0.0107523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4.701843261719">
                <text:p>484.701843261719</text:p>
              </table:table-cell>
              <table:table-cell office:value-type="float" office:value="-0.003032484">
                <text:p>-0.00303248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4.817535400391">
                <text:p>484.817535400391</text:p>
              </table:table-cell>
              <table:table-cell office:value-type="float" office:value="0.002958966">
                <text:p>0.00295896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4.933227539063">
                <text:p>484.933227539063</text:p>
              </table:table-cell>
              <table:table-cell office:value-type="float" office:value="-0.01371927">
                <text:p>-0.0137192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5.048919677734">
                <text:p>485.048919677734</text:p>
              </table:table-cell>
              <table:table-cell office:value-type="float" office:value="-0.006326522">
                <text:p>-0.00632652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5.164642333984">
                <text:p>485.164642333984</text:p>
              </table:table-cell>
              <table:table-cell office:value-type="float" office:value="0.01275814">
                <text:p>0.0127581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5.280334472656">
                <text:p>485.280334472656</text:p>
              </table:table-cell>
              <table:table-cell office:value-type="float" office:value="0.0006618932">
                <text:p>0.000661893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5.396057128906">
                <text:p>485.396057128906</text:p>
              </table:table-cell>
              <table:table-cell office:value-type="float" office:value="0.006082768">
                <text:p>0.00608276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5.511779785156">
                <text:p>485.511779785156</text:p>
              </table:table-cell>
              <table:table-cell office:value-type="float" office:value="-0.00878257">
                <text:p>-0.0087825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5.627502441406">
                <text:p>485.627502441406</text:p>
              </table:table-cell>
              <table:table-cell office:value-type="float" office:value="-0.001564354">
                <text:p>-0.00156435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5.743225097656">
                <text:p>485.743225097656</text:p>
              </table:table-cell>
              <table:table-cell office:value-type="float" office:value="0.02263439">
                <text:p>0.0226343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5.858947753906">
                <text:p>485.858947753906</text:p>
              </table:table-cell>
              <table:table-cell office:value-type="float" office:value="-0.01164795">
                <text:p>-0.0116479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5.974670410156">
                <text:p>485.974670410156</text:p>
              </table:table-cell>
              <table:table-cell office:value-type="float" office:value="-0.008309686">
                <text:p>-0.00830968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6.090423583984">
                <text:p>486.090423583984</text:p>
              </table:table-cell>
              <table:table-cell office:value-type="float" office:value="0.02158112">
                <text:p>0.0215811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6.206176757813">
                <text:p>486.206176757813</text:p>
              </table:table-cell>
              <table:table-cell office:value-type="float" office:value="0.001273422">
                <text:p>0.00127342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6.321899414063">
                <text:p>486.321899414063</text:p>
              </table:table-cell>
              <table:table-cell office:value-type="float" office:value="-0.002208885">
                <text:p>-0.00220888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86.437652587891">
                <text:p>486.437652587891</text:p>
              </table:table-cell>
              <table:table-cell office:value-type="float" office:value="-0.001526283">
                <text:p>-0.00152628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86.553436279297">
                <text:p>486.553436279297</text:p>
              </table:table-cell>
              <table:table-cell office:value-type="float" office:value="0.005123975">
                <text:p>0.00512397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86.669189453125">
                <text:p>486.669189453125</text:p>
              </table:table-cell>
              <table:table-cell office:value-type="float" office:value="0.001689298">
                <text:p>0.00168929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6.784942626953">
                <text:p>486.784942626953</text:p>
              </table:table-cell>
              <table:table-cell office:value-type="float" office:value="0.0006761933">
                <text:p>0.000676193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6.900726318359">
                <text:p>486.900726318359</text:p>
              </table:table-cell>
              <table:table-cell office:value-type="float" office:value="-0.005396542">
                <text:p>-0.00539654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7.016479492188">
                <text:p>487.016479492188</text:p>
              </table:table-cell>
              <table:table-cell office:value-type="float" office:value="0.008546419">
                <text:p>0.00854641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7.132263183594">
                <text:p>487.132263183594</text:p>
              </table:table-cell>
              <table:table-cell office:value-type="float" office:value="-0.004255939">
                <text:p>-0.00425593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7.248046875">
                <text:p>487.248046875</text:p>
              </table:table-cell>
              <table:table-cell office:value-type="float" office:value="0.01070287">
                <text:p>0.0107028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7.363830566406">
                <text:p>487.363830566406</text:p>
              </table:table-cell>
              <table:table-cell office:value-type="float" office:value="0.001453619">
                <text:p>0.00145361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7.479614257813">
                <text:p>487.479614257813</text:p>
              </table:table-cell>
              <table:table-cell office:value-type="float" office:value="0.006434721">
                <text:p>0.00643472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7.595397949219">
                <text:p>487.595397949219</text:p>
              </table:table-cell>
              <table:table-cell office:value-type="float" office:value="0.006364055">
                <text:p>0.00636405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7.711212158203">
                <text:p>487.711212158203</text:p>
              </table:table-cell>
              <table:table-cell office:value-type="float" office:value="0.006689254">
                <text:p>0.00668925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7.826995849609">
                <text:p>487.826995849609</text:p>
              </table:table-cell>
              <table:table-cell office:value-type="float" office:value="-0.01026813">
                <text:p>-0.0102681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7.942810058594">
                <text:p>487.942810058594</text:p>
              </table:table-cell>
              <table:table-cell office:value-type="float" office:value="0.003922146">
                <text:p>0.00392214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8.058624267578">
                <text:p>488.058624267578</text:p>
              </table:table-cell>
              <table:table-cell office:value-type="float" office:value="0.01787709">
                <text:p>0.0178770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8.174438476563">
                <text:p>488.174438476563</text:p>
              </table:table-cell>
              <table:table-cell office:value-type="float" office:value="-0.005061382">
                <text:p>-0.00506138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8.290252685547">
                <text:p>488.290252685547</text:p>
              </table:table-cell>
              <table:table-cell office:value-type="float" office:value="-0.01178704">
                <text:p>-0.0117870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8.406066894531">
                <text:p>488.406066894531</text:p>
              </table:table-cell>
              <table:table-cell office:value-type="float" office:value="0.006436087">
                <text:p>0.00643608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8.521911621094">
                <text:p>488.521911621094</text:p>
              </table:table-cell>
              <table:table-cell office:value-type="float" office:value="-0.002429277">
                <text:p>-0.00242927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.637725830078">
                <text:p>488.637725830078</text:p>
              </table:table-cell>
              <table:table-cell office:value-type="float" office:value="-0.01373926">
                <text:p>-0.0137392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.753570556641">
                <text:p>488.753570556641</text:p>
              </table:table-cell>
              <table:table-cell office:value-type="float" office:value="-0.01298108">
                <text:p>-0.0129810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8.869415283203">
                <text:p>488.869415283203</text:p>
              </table:table-cell>
              <table:table-cell office:value-type="float" office:value="0.006735309">
                <text:p>0.00673530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8.985260009766">
                <text:p>488.985260009766</text:p>
              </table:table-cell>
              <table:table-cell office:value-type="float" office:value="-0.003603847">
                <text:p>-0.00360384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89.101104736328">
                <text:p>489.101104736328</text:p>
              </table:table-cell>
              <table:table-cell office:value-type="float" office:value="-0.001922821">
                <text:p>-0.00192282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89.216949462891">
                <text:p>489.216949462891</text:p>
              </table:table-cell>
              <table:table-cell office:value-type="float" office:value="-0.00876687">
                <text:p>-0.0087668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89.332794189453">
                <text:p>489.332794189453</text:p>
              </table:table-cell>
              <table:table-cell office:value-type="float" office:value="0.003357477">
                <text:p>0.00335747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89.448669433594">
                <text:p>489.448669433594</text:p>
              </table:table-cell>
              <table:table-cell office:value-type="float" office:value="0.00337214">
                <text:p>0.0033721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89.564544677734">
                <text:p>489.564544677734</text:p>
              </table:table-cell>
              <table:table-cell office:value-type="float" office:value="-0.01525513">
                <text:p>-0.0152551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89.680389404297">
                <text:p>489.680389404297</text:p>
              </table:table-cell>
              <table:table-cell office:value-type="float" office:value="-0.006457946">
                <text:p>-0.00645794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89.796264648438">
                <text:p>489.796264648438</text:p>
              </table:table-cell>
              <table:table-cell office:value-type="float" office:value="0.00671939">
                <text:p>0.0067193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89.912139892578">
                <text:p>489.912139892578</text:p>
              </table:table-cell>
              <table:table-cell office:value-type="float" office:value="0.000170932">
                <text:p>0.00017093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0.028015136719">
                <text:p>490.028015136719</text:p>
              </table:table-cell>
              <table:table-cell office:value-type="float" office:value="-0.01210035">
                <text:p>-0.0121003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0.143920898438">
                <text:p>490.143920898438</text:p>
              </table:table-cell>
              <table:table-cell office:value-type="float" office:value="0.01354193">
                <text:p>0.0135419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0.259796142578">
                <text:p>490.259796142578</text:p>
              </table:table-cell>
              <table:table-cell office:value-type="float" office:value="0.004901818">
                <text:p>0.00490181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0.375701904297">
                <text:p>490.375701904297</text:p>
              </table:table-cell>
              <table:table-cell office:value-type="float" office:value="-0.01270345">
                <text:p>-0.0127034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0.491577148438">
                <text:p>490.491577148438</text:p>
              </table:table-cell>
              <table:table-cell office:value-type="float" office:value="-0.001653903">
                <text:p>-0.00165390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0.607482910156">
                <text:p>490.607482910156</text:p>
              </table:table-cell>
              <table:table-cell office:value-type="float" office:value="-0.004558557">
                <text:p>-0.00455855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0.723388671875">
                <text:p>490.723388671875</text:p>
              </table:table-cell>
              <table:table-cell office:value-type="float" office:value="0.009500712">
                <text:p>0.00950071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0.839294433594">
                <text:p>490.839294433594</text:p>
              </table:table-cell>
              <table:table-cell office:value-type="float" office:value="-0.0001912642">
                <text:p>-0.000191264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0.955200195313">
                <text:p>490.955200195313</text:p>
              </table:table-cell>
              <table:table-cell office:value-type="float" office:value="-0.00393005">
                <text:p>-0.0039300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1.071136474609">
                <text:p>491.071136474609</text:p>
              </table:table-cell>
              <table:table-cell office:value-type="float" office:value="0.0003432317">
                <text:p>0.000343231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1.187042236328">
                <text:p>491.187042236328</text:p>
              </table:table-cell>
              <table:table-cell office:value-type="float" office:value="0.009826113">
                <text:p>0.00982611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1.302978515625">
                <text:p>491.302978515625</text:p>
              </table:table-cell>
              <table:table-cell office:value-type="float" office:value="-0.004898315">
                <text:p>-0.00489831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1.418914794922">
                <text:p>491.418914794922</text:p>
              </table:table-cell>
              <table:table-cell office:value-type="float" office:value="-0.0107126">
                <text:p>-0.010712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1.534851074219">
                <text:p>491.534851074219</text:p>
              </table:table-cell>
              <table:table-cell office:value-type="float" office:value="0.008812">
                <text:p>0.00881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1.650787353516">
                <text:p>491.650787353516</text:p>
              </table:table-cell>
              <table:table-cell office:value-type="float" office:value="-0.0008275455">
                <text:p>-0.000827545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1.766723632813">
                <text:p>491.766723632813</text:p>
              </table:table-cell>
              <table:table-cell office:value-type="float" office:value="-0.005099203">
                <text:p>-0.00509920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1.882659912109">
                <text:p>491.882659912109</text:p>
              </table:table-cell>
              <table:table-cell office:value-type="float" office:value="-0.01249778">
                <text:p>-0.0124977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1.998596191406">
                <text:p>491.998596191406</text:p>
              </table:table-cell>
              <table:table-cell office:value-type="float" office:value="0.003257353">
                <text:p>0.00325735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2.114562988281">
                <text:p>492.114562988281</text:p>
              </table:table-cell>
              <table:table-cell office:value-type="float" office:value="0.003856685">
                <text:p>0.00385668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2.230529785156">
                <text:p>492.230529785156</text:p>
              </table:table-cell>
              <table:table-cell office:value-type="float" office:value="-0.01231615">
                <text:p>-0.0123161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2.346496582031">
                <text:p>492.346496582031</text:p>
              </table:table-cell>
              <table:table-cell office:value-type="float" office:value="0.001724825">
                <text:p>0.00172482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462463378906">
                <text:p>492.462463378906</text:p>
              </table:table-cell>
              <table:table-cell office:value-type="float" office:value="0.00112728">
                <text:p>0.0011272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2.578430175781">
                <text:p>492.578430175781</text:p>
              </table:table-cell>
              <table:table-cell office:value-type="float" office:value="0.001756386">
                <text:p>0.00175638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2.694396972656">
                <text:p>492.694396972656</text:p>
              </table:table-cell>
              <table:table-cell office:value-type="float" office:value="-0.005273856">
                <text:p>-0.00527385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2.810363769531">
                <text:p>492.810363769531</text:p>
              </table:table-cell>
              <table:table-cell office:value-type="float" office:value="-0.008491637">
                <text:p>-0.00849163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2.926361083984">
                <text:p>492.926361083984</text:p>
              </table:table-cell>
              <table:table-cell office:value-type="float" office:value="0.0103455">
                <text:p>0.010345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3.042327880859">
                <text:p>493.042327880859</text:p>
              </table:table-cell>
              <table:table-cell office:value-type="float" office:value="-0.004800554">
                <text:p>-0.00480055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3.158325195313">
                <text:p>493.158325195313</text:p>
              </table:table-cell>
              <table:table-cell office:value-type="float" office:value="-0.008826307">
                <text:p>-0.00882630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3.274322509766">
                <text:p>493.274322509766</text:p>
              </table:table-cell>
              <table:table-cell office:value-type="float" office:value="-0.001297109">
                <text:p>-0.00129710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93.390319824219">
                <text:p>493.390319824219</text:p>
              </table:table-cell>
              <table:table-cell office:value-type="float" office:value="0.01097953">
                <text:p>0.0109795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93.506317138672">
                <text:p>493.506317138672</text:p>
              </table:table-cell>
              <table:table-cell office:value-type="float" office:value="0.002633716">
                <text:p>0.00263371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93.622344970703">
                <text:p>493.622344970703</text:p>
              </table:table-cell>
              <table:table-cell office:value-type="float" office:value="0.0004647369">
                <text:p>0.000464736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93.738342285156">
                <text:p>493.738342285156</text:p>
              </table:table-cell>
              <table:table-cell office:value-type="float" office:value="-0.01235849">
                <text:p>-0.0123584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93.854370117188">
                <text:p>493.854370117188</text:p>
              </table:table-cell>
              <table:table-cell office:value-type="float" office:value="-0.005496685">
                <text:p>-0.00549668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93.970367431641">
                <text:p>493.970367431641</text:p>
              </table:table-cell>
              <table:table-cell office:value-type="float" office:value="0.005495196">
                <text:p>0.00549519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94.086395263672">
                <text:p>494.086395263672</text:p>
              </table:table-cell>
              <table:table-cell office:value-type="float" office:value="0.0005990912">
                <text:p>0.000599091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94.202423095703">
                <text:p>494.202423095703</text:p>
              </table:table-cell>
              <table:table-cell office:value-type="float" office:value="-0.001840713">
                <text:p>-0.00184071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94.318450927734">
                <text:p>494.318450927734</text:p>
              </table:table-cell>
              <table:table-cell office:value-type="float" office:value="-0.004700139">
                <text:p>-0.00470013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4.434478759766">
                <text:p>494.434478759766</text:p>
              </table:table-cell>
              <table:table-cell office:value-type="float" office:value="-0.0009325705">
                <text:p>-0.000932570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94.550537109375">
                <text:p>494.550537109375</text:p>
              </table:table-cell>
              <table:table-cell office:value-type="float" office:value="-0.006298962">
                <text:p>-0.00629896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94.666564941406">
                <text:p>494.666564941406</text:p>
              </table:table-cell>
              <table:table-cell office:value-type="float" office:value="-0.00598413">
                <text:p>-0.0059841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94.782623291016">
                <text:p>494.782623291016</text:p>
              </table:table-cell>
              <table:table-cell office:value-type="float" office:value="-0.002351949">
                <text:p>-0.00235194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94.898681640625">
                <text:p>494.898681640625</text:p>
              </table:table-cell>
              <table:table-cell office:value-type="float" office:value="0.006142328">
                <text:p>0.00614232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95.014739990234">
                <text:p>495.014739990234</text:p>
              </table:table-cell>
              <table:table-cell office:value-type="float" office:value="-0.01265356">
                <text:p>-0.0126535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95.130798339844">
                <text:p>495.130798339844</text:p>
              </table:table-cell>
              <table:table-cell office:value-type="float" office:value="-0.01091075">
                <text:p>-0.0109107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95.246856689453">
                <text:p>495.246856689453</text:p>
              </table:table-cell>
              <table:table-cell office:value-type="float" office:value="0.003179129">
                <text:p>0.00317912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95.362915039063">
                <text:p>495.362915039063</text:p>
              </table:table-cell>
              <table:table-cell office:value-type="float" office:value="0.007515383">
                <text:p>0.00751538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95.478973388672">
                <text:p>495.478973388672</text:p>
              </table:table-cell>
              <table:table-cell office:value-type="float" office:value="-0.01368003">
                <text:p>-0.0136800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95.595062255859">
                <text:p>495.595062255859</text:p>
              </table:table-cell>
              <table:table-cell office:value-type="float" office:value="0.003760579">
                <text:p>0.00376057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95.711151123047">
                <text:p>495.711151123047</text:p>
              </table:table-cell>
              <table:table-cell office:value-type="float" office:value="-0.004789439">
                <text:p>-0.00478943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95.827209472656">
                <text:p>495.827209472656</text:p>
              </table:table-cell>
              <table:table-cell office:value-type="float" office:value="0.02572921">
                <text:p>0.0257292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95.943298339844">
                <text:p>495.943298339844</text:p>
              </table:table-cell>
              <table:table-cell office:value-type="float" office:value="-0.002225326">
                <text:p>-0.00222532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96.059387207031">
                <text:p>496.059387207031</text:p>
              </table:table-cell>
              <table:table-cell office:value-type="float" office:value="0.008790068">
                <text:p>0.00879006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96.175506591797">
                <text:p>496.175506591797</text:p>
              </table:table-cell>
              <table:table-cell office:value-type="float" office:value="-0.005059873">
                <text:p>-0.00505987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96.291595458984">
                <text:p>496.291595458984</text:p>
              </table:table-cell>
              <table:table-cell office:value-type="float" office:value="-0.007391675">
                <text:p>-0.00739167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96.407684326172">
                <text:p>496.407684326172</text:p>
              </table:table-cell>
              <table:table-cell office:value-type="float" office:value="0.01290249">
                <text:p>0.0129024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96.523803710938">
                <text:p>496.523803710938</text:p>
              </table:table-cell>
              <table:table-cell office:value-type="float" office:value="-0.01054346">
                <text:p>-0.0105434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96.639923095703">
                <text:p>496.639923095703</text:p>
              </table:table-cell>
              <table:table-cell office:value-type="float" office:value="0.008415677">
                <text:p>0.00841567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6.756042480469">
                <text:p>496.756042480469</text:p>
              </table:table-cell>
              <table:table-cell office:value-type="float" office:value="0.005181111">
                <text:p>0.00518111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96.872161865234">
                <text:p>496.872161865234</text:p>
              </table:table-cell>
              <table:table-cell office:value-type="float" office:value="-0.004517218">
                <text:p>-0.00451721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96.98828125">
                <text:p>496.98828125</text:p>
              </table:table-cell>
              <table:table-cell office:value-type="float" office:value="0.003358258">
                <text:p>0.00335825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97.104400634766">
                <text:p>497.104400634766</text:p>
              </table:table-cell>
              <table:table-cell office:value-type="float" office:value="0.02255857">
                <text:p>0.0225585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97.220520019531">
                <text:p>497.220520019531</text:p>
              </table:table-cell>
              <table:table-cell office:value-type="float" office:value="0.003241815">
                <text:p>0.00324181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97.336669921875">
                <text:p>497.336669921875</text:p>
              </table:table-cell>
              <table:table-cell office:value-type="float" office:value="-0.002733637">
                <text:p>-0.00273363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7.452819824219">
                <text:p>497.452819824219</text:p>
              </table:table-cell>
              <table:table-cell office:value-type="float" office:value="-0.01012885">
                <text:p>-0.0101288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97.568939208984">
                <text:p>497.568939208984</text:p>
              </table:table-cell>
              <table:table-cell office:value-type="float" office:value="0.003823697">
                <text:p>0.00382369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7.685089111328">
                <text:p>497.685089111328</text:p>
              </table:table-cell>
              <table:table-cell office:value-type="float" office:value="0.005623932">
                <text:p>0.00562393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97.801239013672">
                <text:p>497.80123901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97.917388916016">
                <text:p>497.917388916016</text:p>
              </table:table-cell>
              <table:table-cell office:value-type="float" office:value="-0.01169377">
                <text:p>-0.0116937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98.033569335938">
                <text:p>498.033569335938</text:p>
              </table:table-cell>
              <table:table-cell office:value-type="float" office:value="0.005798182">
                <text:p>0.00579818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98.149719238281">
                <text:p>498.149719238281</text:p>
              </table:table-cell>
              <table:table-cell office:value-type="float" office:value="0.01668625">
                <text:p>0.0166862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98.265899658203">
                <text:p>498.265899658203</text:p>
              </table:table-cell>
              <table:table-cell office:value-type="float" office:value="-0.004330416">
                <text:p>-0.00433041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98.382049560547">
                <text:p>498.382049560547</text:p>
              </table:table-cell>
              <table:table-cell office:value-type="float" office:value="-0.002076043">
                <text:p>-0.00207604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98.498229980469">
                <text:p>498.498229980469</text:p>
              </table:table-cell>
              <table:table-cell office:value-type="float" office:value="0.01424506">
                <text:p>0.0142450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98.614410400391">
                <text:p>498.614410400391</text:p>
              </table:table-cell>
              <table:table-cell office:value-type="float" office:value="-0.0003547222">
                <text:p>-0.000354722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98.730590820313">
                <text:p>498.730590820313</text:p>
              </table:table-cell>
              <table:table-cell office:value-type="float" office:value="0.003292547">
                <text:p>0.00329254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98.846771240234">
                <text:p>498.846771240234</text:p>
              </table:table-cell>
              <table:table-cell office:value-type="float" office:value="-0.01323579">
                <text:p>-0.0132357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98.962982177734">
                <text:p>498.962982177734</text:p>
              </table:table-cell>
              <table:table-cell office:value-type="float" office:value="0.003713245">
                <text:p>0.00371324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99.079162597656">
                <text:p>499.079162597656</text:p>
              </table:table-cell>
              <table:table-cell office:value-type="float" office:value="0.02758772">
                <text:p>0.0275877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99.195373535156">
                <text:p>499.195373535156</text:p>
              </table:table-cell>
              <table:table-cell office:value-type="float" office:value="-0.007136488">
                <text:p>-0.00713648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99.311584472656">
                <text:p>499.311584472656</text:p>
              </table:table-cell>
              <table:table-cell office:value-type="float" office:value="-0.005850062">
                <text:p>-0.00585006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99.427764892578">
                <text:p>499.427764892578</text:p>
              </table:table-cell>
              <table:table-cell office:value-type="float" office:value="0.007766533">
                <text:p>0.00776653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99.543975830078">
                <text:p>499.543975830078</text:p>
              </table:table-cell>
              <table:table-cell office:value-type="float" office:value="-0.002175244">
                <text:p>-0.00217524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99.660217285156">
                <text:p>499.660217285156</text:p>
              </table:table-cell>
              <table:table-cell office:value-type="float" office:value="-0.008004807">
                <text:p>-0.00800480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99.776428222656">
                <text:p>499.776428222656</text:p>
              </table:table-cell>
              <table:table-cell office:value-type="float" office:value="-0.01477931">
                <text:p>-0.0147793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99.892639160156">
                <text:p>499.892639160156</text:p>
              </table:table-cell>
              <table:table-cell office:value-type="float" office:value="0.0002466275">
                <text:p>0.000246627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0.008880615234">
                <text:p>500.008880615234</text:p>
              </table:table-cell>
              <table:table-cell office:value-type="float" office:value="0.02607822">
                <text:p>0.0260782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0.125091552734">
                <text:p>500.125091552734</text:p>
              </table:table-cell>
              <table:table-cell office:value-type="float" office:value="-0.00390707">
                <text:p>-0.0039070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00.241333007813">
                <text:p>500.241333007813</text:p>
              </table:table-cell>
              <table:table-cell office:value-type="float" office:value="0.001489165">
                <text:p>0.00148916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00.357574462891">
                <text:p>500.357574462891</text:p>
              </table:table-cell>
              <table:table-cell office:value-type="float" office:value="0.001330301">
                <text:p>0.00133030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00.473815917969">
                <text:p>500.473815917969</text:p>
              </table:table-cell>
              <table:table-cell office:value-type="float" office:value="0.0005812888">
                <text:p>0.000581288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00.590057373047">
                <text:p>500.590057373047</text:p>
              </table:table-cell>
              <table:table-cell office:value-type="float" office:value="-0.009501132">
                <text:p>-0.00950113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00.706298828125">
                <text:p>500.706298828125</text:p>
              </table:table-cell>
              <table:table-cell office:value-type="float" office:value="-0.01115323">
                <text:p>-0.0111532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0.822570800781">
                <text:p>500.822570800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0.938812255859">
                <text:p>500.938812255859</text:p>
              </table:table-cell>
              <table:table-cell office:value-type="float" office:value="0.001851439">
                <text:p>0.00185143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01.055084228516">
                <text:p>501.055084228516</text:p>
              </table:table-cell>
              <table:table-cell office:value-type="float" office:value="-0.01278036">
                <text:p>-0.0127803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1.171356201172">
                <text:p>501.171356201172</text:p>
              </table:table-cell>
              <table:table-cell office:value-type="float" office:value="-0.004664253">
                <text:p>-0.00466425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01.287628173828">
                <text:p>501.287628173828</text:p>
              </table:table-cell>
              <table:table-cell office:value-type="float" office:value="0.007640931">
                <text:p>0.00764093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01.403900146484">
                <text:p>501.403900146484</text:p>
              </table:table-cell>
              <table:table-cell office:value-type="float" office:value="0.001076817">
                <text:p>0.00107681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01.520172119141">
                <text:p>501.520172119141</text:p>
              </table:table-cell>
              <table:table-cell office:value-type="float" office:value="-0.002529979">
                <text:p>-0.00252997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01.636444091797">
                <text:p>501.636444091797</text:p>
              </table:table-cell>
              <table:table-cell office:value-type="float" office:value="0.0665113">
                <text:p>0.066511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1.752746582031">
                <text:p>501.752746582031</text:p>
              </table:table-cell>
              <table:table-cell office:value-type="float" office:value="-0.0002514473">
                <text:p>-0.000251447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01.869018554688">
                <text:p>501.869018554688</text:p>
              </table:table-cell>
              <table:table-cell office:value-type="float" office:value="-0.002666073">
                <text:p>-0.00266607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01.985321044922">
                <text:p>501.985321044922</text:p>
              </table:table-cell>
              <table:table-cell office:value-type="float" office:value="0.002457931">
                <text:p>0.00245793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02.101623535156">
                <text:p>502.101623535156</text:p>
              </table:table-cell>
              <table:table-cell office:value-type="float" office:value="-0.01210205">
                <text:p>-0.0121020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02.217926025391">
                <text:p>502.217926025391</text:p>
              </table:table-cell>
              <table:table-cell office:value-type="float" office:value="0.001530293">
                <text:p>0.00153029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02.334228515625">
                <text:p>502.334228515625</text:p>
              </table:table-cell>
              <table:table-cell office:value-type="float" office:value="-0.004288643">
                <text:p>-0.00428864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02.450531005859">
                <text:p>502.450531005859</text:p>
              </table:table-cell>
              <table:table-cell office:value-type="float" office:value="-0.00965427">
                <text:p>-0.0096542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02.566833496094">
                <text:p>502.566833496094</text:p>
              </table:table-cell>
              <table:table-cell office:value-type="float" office:value="-0.0001571231">
                <text:p>-0.000157123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02.683166503906">
                <text:p>502.683166503906</text:p>
              </table:table-cell>
              <table:table-cell office:value-type="float" office:value="0.003861604">
                <text:p>0.00386160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02.799468994141">
                <text:p>502.799468994141</text:p>
              </table:table-cell>
              <table:table-cell office:value-type="float" office:value="-0.001361122">
                <text:p>-0.00136112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2.915802001953">
                <text:p>502.915802001953</text:p>
              </table:table-cell>
              <table:table-cell office:value-type="float" office:value="-0.005910493">
                <text:p>-0.00591049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3.032135009766">
                <text:p>503.032135009766</text:p>
              </table:table-cell>
              <table:table-cell office:value-type="float" office:value="-0.009370637">
                <text:p>-0.00937063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03.148468017578">
                <text:p>503.148468017578</text:p>
              </table:table-cell>
              <table:table-cell office:value-type="float" office:value="-0.002559708">
                <text:p>-0.00255970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03.264801025391">
                <text:p>503.264801025391</text:p>
              </table:table-cell>
              <table:table-cell office:value-type="float" office:value="0.006408677">
                <text:p>0.00640867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3.381134033203">
                <text:p>503.381134033203</text:p>
              </table:table-cell>
              <table:table-cell office:value-type="float" office:value="-0.009835124">
                <text:p>-0.00983512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3.497497558594">
                <text:p>503.497497558594</text:p>
              </table:table-cell>
              <table:table-cell office:value-type="float" office:value="-0.006696944">
                <text:p>-0.00669694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03.613830566406">
                <text:p>503.613830566406</text:p>
              </table:table-cell>
              <table:table-cell office:value-type="float" office:value="-0.0003925071">
                <text:p>-0.000392507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03.730194091797">
                <text:p>503.730194091797</text:p>
              </table:table-cell>
              <table:table-cell office:value-type="float" office:value="-0.003383145">
                <text:p>-0.00338314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03.846527099609">
                <text:p>503.846527099609</text:p>
              </table:table-cell>
              <table:table-cell office:value-type="float" office:value="-0.001601659">
                <text:p>-0.00160165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03.962890625">
                <text:p>503.962890625</text:p>
              </table:table-cell>
              <table:table-cell office:value-type="float" office:value="-0.01208914">
                <text:p>-0.0120891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4.079254150391">
                <text:p>504.079254150391</text:p>
              </table:table-cell>
              <table:table-cell office:value-type="float" office:value="-0.001266097">
                <text:p>-0.00126609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04.195617675781">
                <text:p>504.195617675781</text:p>
              </table:table-cell>
              <table:table-cell office:value-type="float" office:value="0.004404043">
                <text:p>0.00440404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4.31201171875">
                <text:p>504.31201171875</text:p>
              </table:table-cell>
              <table:table-cell office:value-type="float" office:value="0.004403136">
                <text:p>0.00440313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04.428375244141">
                <text:p>504.428375244141</text:p>
              </table:table-cell>
              <table:table-cell office:value-type="float" office:value="-0.008768687">
                <text:p>-0.00876868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4.544738769531">
                <text:p>504.544738769531</text:p>
              </table:table-cell>
              <table:table-cell office:value-type="float" office:value="-0.003359901">
                <text:p>-0.00335990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4.6611328125">
                <text:p>504.6611328125</text:p>
              </table:table-cell>
              <table:table-cell office:value-type="float" office:value="-0.000667632">
                <text:p>-0.00066763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04.777526855469">
                <text:p>504.777526855469</text:p>
              </table:table-cell>
              <table:table-cell office:value-type="float" office:value="-0.002810909">
                <text:p>-0.00281090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4.893920898438">
                <text:p>504.893920898438</text:p>
              </table:table-cell>
              <table:table-cell office:value-type="float" office:value="-0.002741789">
                <text:p>-0.00274178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5.010314941406">
                <text:p>505.010314941406</text:p>
              </table:table-cell>
              <table:table-cell office:value-type="float" office:value="0.0080877">
                <text:p>0.008087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05.126708984375">
                <text:p>505.126708984375</text:p>
              </table:table-cell>
              <table:table-cell office:value-type="float" office:value="0.02349433">
                <text:p>0.0234943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05.243103027344">
                <text:p>505.243103027344</text:p>
              </table:table-cell>
              <table:table-cell office:value-type="float" office:value="-0.0002731585">
                <text:p>-0.000273158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05.359497070313">
                <text:p>505.359497070313</text:p>
              </table:table-cell>
              <table:table-cell office:value-type="float" office:value="-0.005994479">
                <text:p>-0.00599447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5.475921630859">
                <text:p>505.475921630859</text:p>
              </table:table-cell>
              <table:table-cell office:value-type="float" office:value="0.002776953">
                <text:p>0.00277695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5.592346191406">
                <text:p>505.592346191406</text:p>
              </table:table-cell>
              <table:table-cell office:value-type="float" office:value="0.01106787">
                <text:p>0.0110678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05.708740234375">
                <text:p>505.708740234375</text:p>
              </table:table-cell>
              <table:table-cell office:value-type="float" office:value="-0.007967764">
                <text:p>-0.00796776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05.825164794922">
                <text:p>505.825164794922</text:p>
              </table:table-cell>
              <table:table-cell office:value-type="float" office:value="-0.005485067">
                <text:p>-0.00548506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05.941589355469">
                <text:p>505.941589355469</text:p>
              </table:table-cell>
              <table:table-cell office:value-type="float" office:value="0.001771329">
                <text:p>0.00177132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6.058013916016">
                <text:p>506.058013916016</text:p>
              </table:table-cell>
              <table:table-cell office:value-type="float" office:value="0.0007411371">
                <text:p>0.000741137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6.174468994141">
                <text:p>506.174468994141</text:p>
              </table:table-cell>
              <table:table-cell office:value-type="float" office:value="0.000740379">
                <text:p>0.00074037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06.290893554688">
                <text:p>506.290893554688</text:p>
              </table:table-cell>
              <table:table-cell office:value-type="float" office:value="-0.004266402">
                <text:p>-0.00426640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06.407348632813">
                <text:p>506.407348632813</text:p>
              </table:table-cell>
              <table:table-cell office:value-type="float" office:value="0.007008695">
                <text:p>0.00700869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6.523773193359">
                <text:p>506.52377319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06.640228271484">
                <text:p>506.640228271484</text:p>
              </table:table-cell>
              <table:table-cell office:value-type="float" office:value="0.001035759">
                <text:p>0.00103575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06.756683349609">
                <text:p>506.756683349609</text:p>
              </table:table-cell>
              <table:table-cell office:value-type="float" office:value="0.004298468">
                <text:p>0.00429846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06.873138427734">
                <text:p>506.873138427734</text:p>
              </table:table-cell>
              <table:table-cell office:value-type="float" office:value="0.008604582">
                <text:p>0.00860458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06.989593505859">
                <text:p>506.989593505859</text:p>
              </table:table-cell>
              <table:table-cell office:value-type="float" office:value="-0.002456344">
                <text:p>-0.00245634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07.106048583984">
                <text:p>507.106048583984</text:p>
              </table:table-cell>
              <table:table-cell office:value-type="float" office:value="-0.005828691">
                <text:p>-0.00582869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07.222534179688">
                <text:p>507.222534179688</text:p>
              </table:table-cell>
              <table:table-cell office:value-type="float" office:value="-0.01370871">
                <text:p>-0.0137087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07.338989257813">
                <text:p>507.338989257813</text:p>
              </table:table-cell>
              <table:table-cell office:value-type="float" office:value="-0.006091278">
                <text:p>-0.00609127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07.455474853516">
                <text:p>507.455474853516</text:p>
              </table:table-cell>
              <table:table-cell office:value-type="float" office:value="-0.0005746489">
                <text:p>-0.000574648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07.571960449219">
                <text:p>507.571960449219</text:p>
              </table:table-cell>
              <table:table-cell office:value-type="float" office:value="-0.01293172">
                <text:p>-0.0129317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7.688446044922">
                <text:p>507.688446044922</text:p>
              </table:table-cell>
              <table:table-cell office:value-type="float" office:value="-0.00948171">
                <text:p>-0.0094817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7.804931640625">
                <text:p>507.804931640625</text:p>
              </table:table-cell>
              <table:table-cell office:value-type="float" office:value="-0.001414787">
                <text:p>-0.00141478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7.921417236328">
                <text:p>507.921417236328</text:p>
              </table:table-cell>
              <table:table-cell office:value-type="float" office:value="-0.001514104">
                <text:p>-0.00151410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8.037902832031">
                <text:p>508.037902832031</text:p>
              </table:table-cell>
              <table:table-cell office:value-type="float" office:value="-0.005760043">
                <text:p>-0.00576004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08.154388427734">
                <text:p>508.154388427734</text:p>
              </table:table-cell>
              <table:table-cell office:value-type="float" office:value="0.0002027442">
                <text:p>0.000202744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8.270904541016">
                <text:p>508.270904541016</text:p>
              </table:table-cell>
              <table:table-cell office:value-type="float" office:value="0.001101615">
                <text:p>0.00110161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08.387420654297">
                <text:p>508.387420654297</text:p>
              </table:table-cell>
              <table:table-cell office:value-type="float" office:value="-0.006147681">
                <text:p>-0.00614768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8.50390625">
                <text:p>508.50390625</text:p>
              </table:table-cell>
              <table:table-cell office:value-type="float" office:value="-0.008051148">
                <text:p>-0.00805114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08.620422363281">
                <text:p>508.620422363281</text:p>
              </table:table-cell>
              <table:table-cell office:value-type="float" office:value="-0.009547757">
                <text:p>-0.00954775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08.736938476563">
                <text:p>508.736938476563</text:p>
              </table:table-cell>
              <table:table-cell office:value-type="float" office:value="0.01749794">
                <text:p>0.0174979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8.853454589844">
                <text:p>508.853454589844</text:p>
              </table:table-cell>
              <table:table-cell office:value-type="float" office:value="0.004176744">
                <text:p>0.00417674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8.970001220703">
                <text:p>508.970001220703</text:p>
              </table:table-cell>
              <table:table-cell office:value-type="float" office:value="-0.006832887">
                <text:p>-0.00683288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9.086517333984">
                <text:p>509.086517333984</text:p>
              </table:table-cell>
              <table:table-cell office:value-type="float" office:value="-0.002467447">
                <text:p>-0.00246744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09.203063964844">
                <text:p>509.203063964844</text:p>
              </table:table-cell>
              <table:table-cell office:value-type="float" office:value="0.01395986">
                <text:p>0.0139598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09.319580078125">
                <text:p>509.319580078125</text:p>
              </table:table-cell>
              <table:table-cell office:value-type="float" office:value="-0.003429207">
                <text:p>-0.00342920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09.436126708984">
                <text:p>509.436126708984</text:p>
              </table:table-cell>
              <table:table-cell office:value-type="float" office:value="-0.004274464">
                <text:p>-0.00427446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09.552673339844">
                <text:p>509.552673339844</text:p>
              </table:table-cell>
              <table:table-cell office:value-type="float" office:value="-0.006513092">
                <text:p>-0.00651309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09.669219970703">
                <text:p>509.669219970703</text:p>
              </table:table-cell>
              <table:table-cell office:value-type="float" office:value="0.007583095">
                <text:p>0.00758309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09.785766601563">
                <text:p>509.785766601563</text:p>
              </table:table-cell>
              <table:table-cell office:value-type="float" office:value="0.003447609">
                <text:p>0.00344760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09.902313232422">
                <text:p>509.902313232422</text:p>
              </table:table-cell>
              <table:table-cell office:value-type="float" office:value="-0.00161597">
                <text:p>-0.0016159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10.018890380859">
                <text:p>510.018890380859</text:p>
              </table:table-cell>
              <table:table-cell office:value-type="float" office:value="-0.008817383">
                <text:p>-0.00881738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10.135437011719">
                <text:p>510.135437011719</text:p>
              </table:table-cell>
              <table:table-cell office:value-type="float" office:value="-0.002884766">
                <text:p>-0.00288476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10.252014160156">
                <text:p>510.252014160156</text:p>
              </table:table-cell>
              <table:table-cell office:value-type="float" office:value="0.004203172">
                <text:p>0.00420317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10.368560791016">
                <text:p>510.368560791016</text:p>
              </table:table-cell>
              <table:table-cell office:value-type="float" office:value="-0.004138123">
                <text:p>-0.00413812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10.485137939453">
                <text:p>510.485137939453</text:p>
              </table:table-cell>
              <table:table-cell office:value-type="float" office:value="-0.01186728">
                <text:p>-0.0118672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0.601715087891">
                <text:p>510.601715087891</text:p>
              </table:table-cell>
              <table:table-cell office:value-type="float" office:value="0.004947679">
                <text:p>0.00494767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0.718322753906">
                <text:p>510.718322753906</text:p>
              </table:table-cell>
              <table:table-cell office:value-type="float" office:value="0.001283331">
                <text:p>0.00128333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0.834899902344">
                <text:p>510.834899902344</text:p>
              </table:table-cell>
              <table:table-cell office:value-type="float" office:value="-0.01350321">
                <text:p>-0.0135032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0.951477050781">
                <text:p>510.951477050781</text:p>
              </table:table-cell>
              <table:table-cell office:value-type="float" office:value="0.00836187">
                <text:p>0.0083618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11.068084716797">
                <text:p>511.068084716797</text:p>
              </table:table-cell>
              <table:table-cell office:value-type="float" office:value="-0.004152766">
                <text:p>-0.00415276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11.184661865234">
                <text:p>511.184661865234</text:p>
              </table:table-cell>
              <table:table-cell office:value-type="float" office:value="-0.006123755">
                <text:p>-0.00612375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11.30126953125">
                <text:p>511.30126953125</text:p>
              </table:table-cell>
              <table:table-cell office:value-type="float" office:value="-0.01207536">
                <text:p>-0.0120753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1.417877197266">
                <text:p>511.417877197266</text:p>
              </table:table-cell>
              <table:table-cell office:value-type="float" office:value="-0.01383133">
                <text:p>-0.0138313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1.534484863281">
                <text:p>511.534484863281</text:p>
              </table:table-cell>
              <table:table-cell office:value-type="float" office:value="-0.004321743">
                <text:p>-0.00432174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1.651092529297">
                <text:p>511.651092529297</text:p>
              </table:table-cell>
              <table:table-cell office:value-type="float" office:value="-0.006399543">
                <text:p>-0.00639954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.767700195313">
                <text:p>511.767700195313</text:p>
              </table:table-cell>
              <table:table-cell office:value-type="float" office:value="-0.003089065">
                <text:p>-0.00308906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.884338378906">
                <text:p>511.884338378906</text:p>
              </table:table-cell>
              <table:table-cell office:value-type="float" office:value="-0.003417505">
                <text:p>-0.00341750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2.0009765625">
                <text:p>512.0009765625</text:p>
              </table:table-cell>
              <table:table-cell office:value-type="float" office:value="-0.003383169">
                <text:p>-0.00338316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2.117553710938">
                <text:p>512.117553710938</text:p>
              </table:table-cell>
              <table:table-cell office:value-type="float" office:value="0.004631704">
                <text:p>0.00463170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2.234191894531">
                <text:p>512.234191894531</text:p>
              </table:table-cell>
              <table:table-cell office:value-type="float" office:value="0.003983033">
                <text:p>0.00398303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.350830078125">
                <text:p>512.350830078125</text:p>
              </table:table-cell>
              <table:table-cell office:value-type="float" office:value="-0.0008199407">
                <text:p>-0.000819940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2.467468261719">
                <text:p>512.467468261719</text:p>
              </table:table-cell>
              <table:table-cell office:value-type="float" office:value="0.008718024">
                <text:p>0.00871802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.584106445313">
                <text:p>512.584106445313</text:p>
              </table:table-cell>
              <table:table-cell office:value-type="float" office:value="-0.002916779">
                <text:p>-0.00291677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2.700744628906">
                <text:p>512.700744628906</text:p>
              </table:table-cell>
              <table:table-cell office:value-type="float" office:value="0.0200759">
                <text:p>0.020075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12.8173828125">
                <text:p>512.8173828125</text:p>
              </table:table-cell>
              <table:table-cell office:value-type="float" office:value="-0.01119102">
                <text:p>-0.0111910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12.93408203125">
                <text:p>512.93408203125</text:p>
              </table:table-cell>
              <table:table-cell office:value-type="float" office:value="0.005304141">
                <text:p>0.00530414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13.050720214844">
                <text:p>513.050720214844</text:p>
              </table:table-cell>
              <table:table-cell office:value-type="float" office:value="0.003510695">
                <text:p>0.00351069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13.167358398438">
                <text:p>513.167358398438</text:p>
              </table:table-cell>
              <table:table-cell office:value-type="float" office:value="-0.0101865">
                <text:p>-0.010186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3.284057617188">
                <text:p>513.284057617188</text:p>
              </table:table-cell>
              <table:table-cell office:value-type="float" office:value="-0.01124434">
                <text:p>-0.0112443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3.400695800781">
                <text:p>513.400695800781</text:p>
              </table:table-cell>
              <table:table-cell office:value-type="float" office:value="0.008103522">
                <text:p>0.00810352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3.517395019531">
                <text:p>513.517395019531</text:p>
              </table:table-cell>
              <table:table-cell office:value-type="float" office:value="0.003823954">
                <text:p>0.00382395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3.634033203125">
                <text:p>513.634033203125</text:p>
              </table:table-cell>
              <table:table-cell office:value-type="float" office:value="-0.005444525">
                <text:p>-0.00544452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13.750732421875">
                <text:p>513.750732421875</text:p>
              </table:table-cell>
              <table:table-cell office:value-type="float" office:value="0.005875058">
                <text:p>0.00587505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13.867431640625">
                <text:p>513.867431640625</text:p>
              </table:table-cell>
              <table:table-cell office:value-type="float" office:value="0.004965921">
                <text:p>0.00496592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3.984069824219">
                <text:p>513.984069824219</text:p>
              </table:table-cell>
              <table:table-cell office:value-type="float" office:value="0.006275806">
                <text:p>0.00627580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4.100769042969">
                <text:p>514.100769042969</text:p>
              </table:table-cell>
              <table:table-cell office:value-type="float" office:value="0.009335444">
                <text:p>0.00933544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14.217468261719">
                <text:p>514.217468261719</text:p>
              </table:table-cell>
              <table:table-cell office:value-type="float" office:value="-0.0041985">
                <text:p>-0.004198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14.334167480469">
                <text:p>514.334167480469</text:p>
              </table:table-cell>
              <table:table-cell office:value-type="float" office:value="0.0001284242">
                <text:p>0.000128424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14.450866699219">
                <text:p>514.450866699219</text:p>
              </table:table-cell>
              <table:table-cell office:value-type="float" office:value="0.007518164">
                <text:p>0.00751816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14.567565917969">
                <text:p>514.567565917969</text:p>
              </table:table-cell>
              <table:table-cell office:value-type="float" office:value="-0.006772223">
                <text:p>-0.00677222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14.684265136719">
                <text:p>514.684265136719</text:p>
              </table:table-cell>
              <table:table-cell office:value-type="float" office:value="0.002004778">
                <text:p>0.00200477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4.801025390625">
                <text:p>514.801025390625</text:p>
              </table:table-cell>
              <table:table-cell office:value-type="float" office:value="-0.0001625897">
                <text:p>-0.000162589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4.917724609375">
                <text:p>514.917724609375</text:p>
              </table:table-cell>
              <table:table-cell office:value-type="float" office:value="0.004121575">
                <text:p>0.00412157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5.034423828125">
                <text:p>515.034423828125</text:p>
              </table:table-cell>
              <table:table-cell office:value-type="float" office:value="-0.004908648">
                <text:p>-0.00490864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5.151184082031">
                <text:p>515.151184082031</text:p>
              </table:table-cell>
              <table:table-cell office:value-type="float" office:value="-0.01309633">
                <text:p>-0.0130963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5.267883300781">
                <text:p>515.267883300781</text:p>
              </table:table-cell>
              <table:table-cell office:value-type="float" office:value="-0.002693108">
                <text:p>-0.00269310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.384643554688">
                <text:p>515.384643554688</text:p>
              </table:table-cell>
              <table:table-cell office:value-type="float" office:value="0.004309751">
                <text:p>0.00430975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5.501342773438">
                <text:p>515.501342773438</text:p>
              </table:table-cell>
              <table:table-cell office:value-type="float" office:value="-0.001709407">
                <text:p>-0.00170940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5.618103027344">
                <text:p>515.618103027344</text:p>
              </table:table-cell>
              <table:table-cell office:value-type="float" office:value="0.001322142">
                <text:p>0.00132214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5.734802246094">
                <text:p>515.734802246094</text:p>
              </table:table-cell>
              <table:table-cell office:value-type="float" office:value="-0.002832935">
                <text:p>-0.00283293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5.8515625">
                <text:p>515.8515625</text:p>
              </table:table-cell>
              <table:table-cell office:value-type="float" office:value="0.01286917">
                <text:p>0.0128691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15.968322753906">
                <text:p>515.968322753906</text:p>
              </table:table-cell>
              <table:table-cell office:value-type="float" office:value="-0.0001224587">
                <text:p>-0.000122458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16.085083007813">
                <text:p>516.085083007813</text:p>
              </table:table-cell>
              <table:table-cell office:value-type="float" office:value="0.001678875">
                <text:p>0.00167887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6.201843261719">
                <text:p>516.201843261719</text:p>
              </table:table-cell>
              <table:table-cell office:value-type="float" office:value="-0.002553832">
                <text:p>-0.00255383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16.318603515625">
                <text:p>516.318603515625</text:p>
              </table:table-cell>
              <table:table-cell office:value-type="float" office:value="-0.005187607">
                <text:p>-0.00518760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6.435363769531">
                <text:p>516.435363769531</text:p>
              </table:table-cell>
              <table:table-cell office:value-type="float" office:value="-0.007214935">
                <text:p>-0.00721493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16.552124023438">
                <text:p>516.552124023438</text:p>
              </table:table-cell>
              <table:table-cell office:value-type="float" office:value="-0.002366012">
                <text:p>-0.002366012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16.668884277344">
                <text:p>516.668884277344</text:p>
              </table:table-cell>
              <table:table-cell office:value-type="float" office:value="-0.002338185">
                <text:p>-0.00233818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16.78564453125">
                <text:p>516.78564453125</text:p>
              </table:table-cell>
              <table:table-cell office:value-type="float" office:value="0.01283821">
                <text:p>0.0128382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16.902465820313">
                <text:p>516.902465820313</text:p>
              </table:table-cell>
              <table:table-cell office:value-type="float" office:value="0.03037601">
                <text:p>0.0303760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17.019226074219">
                <text:p>517.019226074219</text:p>
              </table:table-cell>
              <table:table-cell office:value-type="float" office:value="-0.006550846">
                <text:p>-0.00655084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17.135986328125">
                <text:p>517.13598632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7.252807617188">
                <text:p>517.252807617188</text:p>
              </table:table-cell>
              <table:table-cell office:value-type="float" office:value="0.004987234">
                <text:p>0.00498723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.369567871094">
                <text:p>517.369567871094</text:p>
              </table:table-cell>
              <table:table-cell office:value-type="float" office:value="-0.007109641">
                <text:p>-0.00710964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7.486389160156">
                <text:p>517.486389160156</text:p>
              </table:table-cell>
              <table:table-cell office:value-type="float" office:value="0.0004102344">
                <text:p>0.000410234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17.603210449219">
                <text:p>517.603210449219</text:p>
              </table:table-cell>
              <table:table-cell office:value-type="float" office:value="0.01203765">
                <text:p>0.0120376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17.719970703125">
                <text:p>517.719970703125</text:p>
              </table:table-cell>
              <table:table-cell office:value-type="float" office:value="0.0006037541">
                <text:p>0.000603754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7.836791992188">
                <text:p>517.836791992188</text:p>
              </table:table-cell>
              <table:table-cell office:value-type="float" office:value="0.003261917">
                <text:p>0.00326191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7.95361328125">
                <text:p>517.95361328125</text:p>
              </table:table-cell>
              <table:table-cell office:value-type="float" office:value="-0.0001989382">
                <text:p>-0.000198938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.070434570313">
                <text:p>518.070434570313</text:p>
              </table:table-cell>
              <table:table-cell office:value-type="float" office:value="-0.00422087">
                <text:p>-0.0042208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8.187255859375">
                <text:p>518.187255859375</text:p>
              </table:table-cell>
              <table:table-cell office:value-type="float" office:value="0.005148678">
                <text:p>0.00514867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18.304077148438">
                <text:p>518.304077148438</text:p>
              </table:table-cell>
              <table:table-cell office:value-type="float" office:value="0.01305889">
                <text:p>0.0130588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18.4208984375">
                <text:p>518.4208984375</text:p>
              </table:table-cell>
              <table:table-cell office:value-type="float" office:value="0.004702345">
                <text:p>0.00470234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18.537719726563">
                <text:p>518.537719726563</text:p>
              </table:table-cell>
              <table:table-cell office:value-type="float" office:value="0.02030686">
                <text:p>0.0203068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18.654541015625">
                <text:p>518.654541015625</text:p>
              </table:table-cell>
              <table:table-cell office:value-type="float" office:value="0.007480477">
                <text:p>0.00748047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18.771362304688">
                <text:p>518.771362304688</text:p>
              </table:table-cell>
              <table:table-cell office:value-type="float" office:value="-0.00894023">
                <text:p>-0.0089402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18.888244628906">
                <text:p>518.888244628906</text:p>
              </table:table-cell>
              <table:table-cell office:value-type="float" office:value="-0.009765274">
                <text:p>-0.00976527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19.005065917969">
                <text:p>519.005065917969</text:p>
              </table:table-cell>
              <table:table-cell office:value-type="float" office:value="0.002385833">
                <text:p>0.00238583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19.121887207031">
                <text:p>519.121887207031</text:p>
              </table:table-cell>
              <table:table-cell office:value-type="float" office:value="-0.001445312">
                <text:p>-0.00144531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19.23876953125">
                <text:p>519.23876953125</text:p>
              </table:table-cell>
              <table:table-cell office:value-type="float" office:value="0.004530614">
                <text:p>0.00453061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19.355590820313">
                <text:p>519.355590820313</text:p>
              </table:table-cell>
              <table:table-cell office:value-type="float" office:value="-0.003296793">
                <text:p>-0.00329679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19.472473144531">
                <text:p>519.472473144531</text:p>
              </table:table-cell>
              <table:table-cell office:value-type="float" office:value="0.002964067">
                <text:p>0.00296406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19.58935546875">
                <text:p>519.58935546875</text:p>
              </table:table-cell>
              <table:table-cell office:value-type="float" office:value="0.0002284614">
                <text:p>0.000228461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9.706176757813">
                <text:p>519.706176757813</text:p>
              </table:table-cell>
              <table:table-cell office:value-type="float" office:value="-0.004755891">
                <text:p>-0.00475589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19.823059082031">
                <text:p>519.823059082031</text:p>
              </table:table-cell>
              <table:table-cell office:value-type="float" office:value="-0.007375778">
                <text:p>-0.00737577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19.93994140625">
                <text:p>519.93994140625</text:p>
              </table:table-cell>
              <table:table-cell office:value-type="float" office:value="0.01505235">
                <text:p>0.0150523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0.056823730469">
                <text:p>520.056823730469</text:p>
              </table:table-cell>
              <table:table-cell office:value-type="float" office:value="-0.005770642">
                <text:p>-0.00577064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20.173706054688">
                <text:p>520.17370605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0.290588378906">
                <text:p>520.290588378906</text:p>
              </table:table-cell>
              <table:table-cell office:value-type="float" office:value="-0.006382958">
                <text:p>-0.00638295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20.407470703125">
                <text:p>520.407470703125</text:p>
              </table:table-cell>
              <table:table-cell office:value-type="float" office:value="-0.002928464">
                <text:p>-0.00292846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20.524353027344">
                <text:p>520.524353027344</text:p>
              </table:table-cell>
              <table:table-cell office:value-type="float" office:value="-0.004847465">
                <text:p>-0.00484746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20.641235351563">
                <text:p>520.641235351563</text:p>
              </table:table-cell>
              <table:table-cell office:value-type="float" office:value="-0.007282151">
                <text:p>-0.00728215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20.758178710938">
                <text:p>520.758178710938</text:p>
              </table:table-cell>
              <table:table-cell office:value-type="float" office:value="-0.002251428">
                <text:p>-0.00225142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20.875061035156">
                <text:p>520.875061035156</text:p>
              </table:table-cell>
              <table:table-cell office:value-type="float" office:value="0.02224492">
                <text:p>0.0222449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20.991943359375">
                <text:p>520.991943359375</text:p>
              </table:table-cell>
              <table:table-cell office:value-type="float" office:value="0.002087117">
                <text:p>0.00208711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21.10888671875">
                <text:p>521.10888671875</text:p>
              </table:table-cell>
              <table:table-cell office:value-type="float" office:value="-0.008486728">
                <text:p>-0.00848672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21.225769042969">
                <text:p>521.225769042969</text:p>
              </table:table-cell>
              <table:table-cell office:value-type="float" office:value="0.001487648">
                <text:p>0.00148764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21.342712402344">
                <text:p>521.342712402344</text:p>
              </table:table-cell>
              <table:table-cell office:value-type="float" office:value="0.006674373">
                <text:p>0.00667437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21.459594726563">
                <text:p>521.459594726563</text:p>
              </table:table-cell>
              <table:table-cell office:value-type="float" office:value="-0.006484573">
                <text:p>-0.00648457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21.576538085938">
                <text:p>521.576538085938</text:p>
              </table:table-cell>
              <table:table-cell office:value-type="float" office:value="-0.006522991">
                <text:p>-0.00652299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1.693481445313">
                <text:p>521.693481445313</text:p>
              </table:table-cell>
              <table:table-cell office:value-type="float" office:value="-0.002666242">
                <text:p>-0.00266624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21.810424804688">
                <text:p>521.810424804688</text:p>
              </table:table-cell>
              <table:table-cell office:value-type="float" office:value="-0.007008895">
                <text:p>-0.00700889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21.927307128906">
                <text:p>521.927307128906</text:p>
              </table:table-cell>
              <table:table-cell office:value-type="float" office:value="0.01045596">
                <text:p>0.0104559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22.044250488281">
                <text:p>522.044250488281</text:p>
              </table:table-cell>
              <table:table-cell office:value-type="float" office:value="0.0009887277">
                <text:p>0.000988727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22.161193847656">
                <text:p>522.161193847656</text:p>
              </table:table-cell>
              <table:table-cell office:value-type="float" office:value="0.03898071">
                <text:p>0.0389807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22.278137207031">
                <text:p>522.278137207031</text:p>
              </table:table-cell>
              <table:table-cell office:value-type="float" office:value="0.009283635">
                <text:p>0.00928363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22.395080566406">
                <text:p>522.395080566406</text:p>
              </table:table-cell>
              <table:table-cell office:value-type="float" office:value="0.0005753232">
                <text:p>0.000575323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22.512023925781">
                <text:p>522.512023925781</text:p>
              </table:table-cell>
              <table:table-cell office:value-type="float" office:value="-0.005325261">
                <text:p>-0.00532526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22.629028320313">
                <text:p>522.629028320313</text:p>
              </table:table-cell>
              <table:table-cell office:value-type="float" office:value="0.002531788">
                <text:p>0.00253178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22.745971679688">
                <text:p>522.745971679688</text:p>
              </table:table-cell>
              <table:table-cell office:value-type="float" office:value="0.0003743223">
                <text:p>0.000374322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22.862915039063">
                <text:p>522.862915039063</text:p>
              </table:table-cell>
              <table:table-cell office:value-type="float" office:value="0.01676898">
                <text:p>0.0167689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22.979919433594">
                <text:p>522.979919433594</text:p>
              </table:table-cell>
              <table:table-cell office:value-type="float" office:value="-0.01005775">
                <text:p>-0.0100577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23.096862792969">
                <text:p>523.096862792969</text:p>
              </table:table-cell>
              <table:table-cell office:value-type="float" office:value="0.01622942">
                <text:p>0.0162294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23.2138671875">
                <text:p>523.2138671875</text:p>
              </table:table-cell>
              <table:table-cell office:value-type="float" office:value="0.006180757">
                <text:p>0.00618075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23.330810546875">
                <text:p>523.330810546875</text:p>
              </table:table-cell>
              <table:table-cell office:value-type="float" office:value="0.002314305">
                <text:p>0.00231430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23.447814941406">
                <text:p>523.447814941406</text:p>
              </table:table-cell>
              <table:table-cell office:value-type="float" office:value="0.001976166">
                <text:p>0.00197616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23.564758300781">
                <text:p>523.564758300781</text:p>
              </table:table-cell>
              <table:table-cell office:value-type="float" office:value="0.001448149">
                <text:p>0.00144814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23.681762695313">
                <text:p>523.681762695313</text:p>
              </table:table-cell>
              <table:table-cell office:value-type="float" office:value="-0.003767818">
                <text:p>-0.00376781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23.798767089844">
                <text:p>523.798767089844</text:p>
              </table:table-cell>
              <table:table-cell office:value-type="float" office:value="-0.007059531">
                <text:p>-0.00705953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23.915771484375">
                <text:p>523.915771484375</text:p>
              </table:table-cell>
              <table:table-cell office:value-type="float" office:value="-0.01072562">
                <text:p>-0.0107256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24.032775878906">
                <text:p>524.032775878906</text:p>
              </table:table-cell>
              <table:table-cell office:value-type="float" office:value="0.006966146">
                <text:p>0.00696614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24.149719238281">
                <text:p>524.149719238281</text:p>
              </table:table-cell>
              <table:table-cell office:value-type="float" office:value="0.001942142">
                <text:p>0.00194214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24.266723632813">
                <text:p>524.266723632813</text:p>
              </table:table-cell>
              <table:table-cell office:value-type="float" office:value="0.004532698">
                <text:p>0.00453269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24.3837890625">
                <text:p>524.3837890625</text:p>
              </table:table-cell>
              <table:table-cell office:value-type="float" office:value="-0.01139157">
                <text:p>-0.0113915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24.500793457031">
                <text:p>524.500793457031</text:p>
              </table:table-cell>
              <table:table-cell office:value-type="float" office:value="0.01920231">
                <text:p>0.0192023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24.617797851563">
                <text:p>524.617797851563</text:p>
              </table:table-cell>
              <table:table-cell office:value-type="float" office:value="0.00612911">
                <text:p>0.0061291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24.734802246094">
                <text:p>524.734802246094</text:p>
              </table:table-cell>
              <table:table-cell office:value-type="float" office:value="-0.00881908">
                <text:p>-0.0088190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24.851806640625">
                <text:p>524.851806640625</text:p>
              </table:table-cell>
              <table:table-cell office:value-type="float" office:value="-0.007306676">
                <text:p>-0.00730667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24.968872070313">
                <text:p>524.968872070313</text:p>
              </table:table-cell>
              <table:table-cell office:value-type="float" office:value="0.001377209">
                <text:p>0.00137720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25.085876464844">
                <text:p>525.085876464844</text:p>
              </table:table-cell>
              <table:table-cell office:value-type="float" office:value="0.02021041">
                <text:p>0.0202104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25.202941894531">
                <text:p>525.202941894531</text:p>
              </table:table-cell>
              <table:table-cell office:value-type="float" office:value="-0.004946052">
                <text:p>-0.00494605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25.319946289063">
                <text:p>525.319946289063</text:p>
              </table:table-cell>
              <table:table-cell office:value-type="float" office:value="-0.003770628">
                <text:p>-0.00377062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25.43701171875">
                <text:p>525.43701171875</text:p>
              </table:table-cell>
              <table:table-cell office:value-type="float" office:value="0.00655377">
                <text:p>0.0065537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25.554016113281">
                <text:p>525.554016113281</text:p>
              </table:table-cell>
              <table:table-cell office:value-type="float" office:value="0.005619516">
                <text:p>0.00561951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25.671081542969">
                <text:p>525.671081542969</text:p>
              </table:table-cell>
              <table:table-cell office:value-type="float" office:value="-0.005266713">
                <text:p>-0.00526671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5.788146972656">
                <text:p>525.788146972656</text:p>
              </table:table-cell>
              <table:table-cell office:value-type="float" office:value="-0.01394506">
                <text:p>-0.0139450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5.905212402344">
                <text:p>525.905212402344</text:p>
              </table:table-cell>
              <table:table-cell office:value-type="float" office:value="-0.002735441">
                <text:p>-0.00273544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26.022277832031">
                <text:p>526.022277832031</text:p>
              </table:table-cell>
              <table:table-cell office:value-type="float" office:value="-0.006883529">
                <text:p>-0.00688352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6.139282226563">
                <text:p>526.139282226563</text:p>
              </table:table-cell>
              <table:table-cell office:value-type="float" office:value="-0.005450271">
                <text:p>-0.00545027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6.25634765625">
                <text:p>526.25634765625</text:p>
              </table:table-cell>
              <table:table-cell office:value-type="float" office:value="0.01238984">
                <text:p>0.0123898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26.373474121094">
                <text:p>526.373474121094</text:p>
              </table:table-cell>
              <table:table-cell office:value-type="float" office:value="-0.007267265">
                <text:p>-0.00726726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6.490539550781">
                <text:p>526.490539550781</text:p>
              </table:table-cell>
              <table:table-cell office:value-type="float" office:value="0.01141691">
                <text:p>0.0114169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26.607604980469">
                <text:p>526.607604980469</text:p>
              </table:table-cell>
              <table:table-cell office:value-type="float" office:value="-0.007125061">
                <text:p>-0.00712506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26.724670410156">
                <text:p>526.724670410156</text:p>
              </table:table-cell>
              <table:table-cell office:value-type="float" office:value="0.006554309">
                <text:p>0.00655430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26.841735839844">
                <text:p>526.841735839844</text:p>
              </table:table-cell>
              <table:table-cell office:value-type="float" office:value="0.01157085">
                <text:p>0.0115708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26.958862304688">
                <text:p>526.958862304688</text:p>
              </table:table-cell>
              <table:table-cell office:value-type="float" office:value="0.00108011">
                <text:p>0.0010801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27.075927734375">
                <text:p>527.075927734375</text:p>
              </table:table-cell>
              <table:table-cell office:value-type="float" office:value="0.01730037">
                <text:p>0.0173003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27.192993164063">
                <text:p>527.192993164063</text:p>
              </table:table-cell>
              <table:table-cell office:value-type="float" office:value="-0.007852561">
                <text:p>-0.00785256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27.310119628906">
                <text:p>527.310119628906</text:p>
              </table:table-cell>
              <table:table-cell office:value-type="float" office:value="0.003278342">
                <text:p>0.00327834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27.42724609375">
                <text:p>527.42724609375</text:p>
              </table:table-cell>
              <table:table-cell office:value-type="float" office:value="-0.002515976">
                <text:p>-0.00251597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27.544311523438">
                <text:p>527.544311523438</text:p>
              </table:table-cell>
              <table:table-cell office:value-type="float" office:value="-0.008201594">
                <text:p>-0.00820159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27.661437988281">
                <text:p>527.661437988281</text:p>
              </table:table-cell>
              <table:table-cell office:value-type="float" office:value="-0.01286459">
                <text:p>-0.0128645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27.778564453125">
                <text:p>527.778564453125</text:p>
              </table:table-cell>
              <table:table-cell office:value-type="float" office:value="0.00638914">
                <text:p>0.0063891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27.895629882813">
                <text:p>527.895629882813</text:p>
              </table:table-cell>
              <table:table-cell office:value-type="float" office:value="0.003434076">
                <text:p>0.00343407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28.012756347656">
                <text:p>528.012756347656</text:p>
              </table:table-cell>
              <table:table-cell office:value-type="float" office:value="-0.0086845">
                <text:p>-0.008684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28.1298828125">
                <text:p>528.1298828125</text:p>
              </table:table-cell>
              <table:table-cell office:value-type="float" office:value="-0.003393535">
                <text:p>-0.00339353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28.247009277344">
                <text:p>528.247009277344</text:p>
              </table:table-cell>
              <table:table-cell office:value-type="float" office:value="0.008983964">
                <text:p>0.00898396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28.364135742188">
                <text:p>528.364135742188</text:p>
              </table:table-cell>
              <table:table-cell office:value-type="float" office:value="-0.00844331">
                <text:p>-0.0084433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28.481262207031">
                <text:p>528.481262207031</text:p>
              </table:table-cell>
              <table:table-cell office:value-type="float" office:value="0.01751086">
                <text:p>0.0175108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28.598388671875">
                <text:p>528.598388671875</text:p>
              </table:table-cell>
              <table:table-cell office:value-type="float" office:value="0.0106348">
                <text:p>0.010634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528.715576171875">
                <text:p>528.715576171875</text:p>
              </table:table-cell>
              <table:table-cell office:value-type="float" office:value="0.00230882">
                <text:p>0.00230882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28.832702636719">
                <text:p>528.83270263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28.949829101563">
                <text:p>528.949829101563</text:p>
              </table:table-cell>
              <table:table-cell office:value-type="float" office:value="-0.00436671">
                <text:p>-0.0043667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29.066955566406">
                <text:p>529.066955566406</text:p>
              </table:table-cell>
              <table:table-cell office:value-type="float" office:value="-0.01343238">
                <text:p>-0.0134323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29.184143066406">
                <text:p>529.184143066406</text:p>
              </table:table-cell>
              <table:table-cell office:value-type="float" office:value="0.004380842">
                <text:p>0.00438084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29.30126953125">
                <text:p>529.30126953125</text:p>
              </table:table-cell>
              <table:table-cell office:value-type="float" office:value="0.01194313">
                <text:p>0.0119431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29.41845703125">
                <text:p>529.41845703125</text:p>
              </table:table-cell>
              <table:table-cell office:value-type="float" office:value="-0.003462261">
                <text:p>-0.00346226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29.535583496094">
                <text:p>529.535583496094</text:p>
              </table:table-cell>
              <table:table-cell office:value-type="float" office:value="0.002212317">
                <text:p>0.00221231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29.652770996094">
                <text:p>529.652770996094</text:p>
              </table:table-cell>
              <table:table-cell office:value-type="float" office:value="0.0007445185">
                <text:p>0.000744518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29.769958496094">
                <text:p>529.769958496094</text:p>
              </table:table-cell>
              <table:table-cell office:value-type="float" office:value="-0.0001574648">
                <text:p>-0.000157464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529.887145996094">
                <text:p>529.887145996094</text:p>
              </table:table-cell>
              <table:table-cell office:value-type="float" office:value="-0.0006147393">
                <text:p>-0.000614739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530.004272460938">
                <text:p>530.004272460938</text:p>
              </table:table-cell>
              <table:table-cell office:value-type="float" office:value="0.0003772643">
                <text:p>0.000377264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0.121459960938">
                <text:p>530.121459960938</text:p>
              </table:table-cell>
              <table:table-cell office:value-type="float" office:value="0.00143132">
                <text:p>0.0014313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30.238647460938">
                <text:p>530.238647460938</text:p>
              </table:table-cell>
              <table:table-cell office:value-type="float" office:value="-0.002403724">
                <text:p>-0.00240372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30.355834960938">
                <text:p>530.355834960938</text:p>
              </table:table-cell>
              <table:table-cell office:value-type="float" office:value="-0.008780166">
                <text:p>-0.00878016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30.473022460938">
                <text:p>530.473022460938</text:p>
              </table:table-cell>
              <table:table-cell office:value-type="float" office:value="-0.01123836">
                <text:p>-0.0112383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30.590209960938">
                <text:p>530.590209960938</text:p>
              </table:table-cell>
              <table:table-cell office:value-type="float" office:value="0.001739702">
                <text:p>0.00173970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30.707397460938">
                <text:p>530.707397460938</text:p>
              </table:table-cell>
              <table:table-cell office:value-type="float" office:value="0.04926825">
                <text:p>0.0492682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30.824645996094">
                <text:p>530.824645996094</text:p>
              </table:table-cell>
              <table:table-cell office:value-type="float" office:value="0.00665359">
                <text:p>0.0066535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30.941833496094">
                <text:p>530.941833496094</text:p>
              </table:table-cell>
              <table:table-cell office:value-type="float" office:value="0.001486078">
                <text:p>0.00148607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31.059020996094">
                <text:p>531.059020996094</text:p>
              </table:table-cell>
              <table:table-cell office:value-type="float" office:value="0.001461943">
                <text:p>0.00146194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31.17626953125">
                <text:p>531.17626953125</text:p>
              </table:table-cell>
              <table:table-cell office:value-type="float" office:value="-0.002372696">
                <text:p>-0.00237269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31.29345703125">
                <text:p>531.29345703125</text:p>
              </table:table-cell>
              <table:table-cell office:value-type="float" office:value="0.001098064">
                <text:p>0.001098064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31.410705566406">
                <text:p>531.410705566406</text:p>
              </table:table-cell>
              <table:table-cell office:value-type="float" office:value="0.002657734">
                <text:p>0.00265773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31.527893066406">
                <text:p>531.527893066406</text:p>
              </table:table-cell>
              <table:table-cell office:value-type="float" office:value="-0.003579911">
                <text:p>-0.00357991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31.645141601563">
                <text:p>531.645141601563</text:p>
              </table:table-cell>
              <table:table-cell office:value-type="float" office:value="-0.002110409">
                <text:p>-0.00211040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31.762329101563">
                <text:p>531.762329101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31.879577636719">
                <text:p>531.879577636719</text:p>
              </table:table-cell>
              <table:table-cell office:value-type="float" office:value="-0.004724374">
                <text:p>-0.00472437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31.996826171875">
                <text:p>531.996826171875</text:p>
              </table:table-cell>
              <table:table-cell office:value-type="float" office:value="0.003372192">
                <text:p>0.00337219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32.114074707031">
                <text:p>532.114074707031</text:p>
              </table:table-cell>
              <table:table-cell office:value-type="float" office:value="0.02514373">
                <text:p>0.0251437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32.231323242188">
                <text:p>532.231323242188</text:p>
              </table:table-cell>
              <table:table-cell office:value-type="float" office:value="0.003615154">
                <text:p>0.00361515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32.348510742188">
                <text:p>532.348510742188</text:p>
              </table:table-cell>
              <table:table-cell office:value-type="float" office:value="0.01800719">
                <text:p>0.0180071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32.465759277344">
                <text:p>532.465759277344</text:p>
              </table:table-cell>
              <table:table-cell office:value-type="float" office:value="-0.006700049">
                <text:p>-0.00670004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2.583068847656">
                <text:p>532.583068847656</text:p>
              </table:table-cell>
              <table:table-cell office:value-type="float" office:value="-0.002769821">
                <text:p>-0.00276982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32.700317382813">
                <text:p>532.700317382813</text:p>
              </table:table-cell>
              <table:table-cell office:value-type="float" office:value="-0.0007586701">
                <text:p>-0.000758670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32.817565917969">
                <text:p>532.817565917969</text:p>
              </table:table-cell>
              <table:table-cell office:value-type="float" office:value="-0.0105158">
                <text:p>-0.010515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32.934814453125">
                <text:p>532.934814453125</text:p>
              </table:table-cell>
              <table:table-cell office:value-type="float" office:value="0.007117369">
                <text:p>0.00711736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33.052062988281">
                <text:p>533.052062988281</text:p>
              </table:table-cell>
              <table:table-cell office:value-type="float" office:value="-0.00572982">
                <text:p>-0.0057298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33.169372558594">
                <text:p>533.169372558594</text:p>
              </table:table-cell>
              <table:table-cell office:value-type="float" office:value="-0.005964813">
                <text:p>-0.00596481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33.28662109375">
                <text:p>533.28662109375</text:p>
              </table:table-cell>
              <table:table-cell office:value-type="float" office:value="0.02226016">
                <text:p>0.0222601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33.403869628906">
                <text:p>533.403869628906</text:p>
              </table:table-cell>
              <table:table-cell office:value-type="float" office:value="-0.00158716">
                <text:p>-0.0015871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33.521179199219">
                <text:p>533.521179199219</text:p>
              </table:table-cell>
              <table:table-cell office:value-type="float" office:value="0.006956881">
                <text:p>0.00695688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33.638427734375">
                <text:p>533.638427734375</text:p>
              </table:table-cell>
              <table:table-cell office:value-type="float" office:value="0.004945533">
                <text:p>0.00494553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33.755737304688">
                <text:p>533.755737304688</text:p>
              </table:table-cell>
              <table:table-cell office:value-type="float" office:value="-0.008957657">
                <text:p>-0.008957657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33.873046875">
                <text:p>533.873046875</text:p>
              </table:table-cell>
              <table:table-cell office:value-type="float" office:value="0.01311291">
                <text:p>0.0131129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33.990295410156">
                <text:p>533.990295410156</text:p>
              </table:table-cell>
              <table:table-cell office:value-type="float" office:value="0.007987505">
                <text:p>0.00798750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34.107604980469">
                <text:p>534.107604980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34.224914550781">
                <text:p>534.224914550781</text:p>
              </table:table-cell>
              <table:table-cell office:value-type="float" office:value="0.005815723">
                <text:p>0.00581572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34.342224121094">
                <text:p>534.342224121094</text:p>
              </table:table-cell>
              <table:table-cell office:value-type="float" office:value="-0.004736213">
                <text:p>-0.00473621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34.459533691406">
                <text:p>534.459533691406</text:p>
              </table:table-cell>
              <table:table-cell office:value-type="float" office:value="-0.003789551">
                <text:p>-0.00378955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34.576843261719">
                <text:p>534.576843261719</text:p>
              </table:table-cell>
              <table:table-cell office:value-type="float" office:value="0.007153348">
                <text:p>0.00715334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34.694152832031">
                <text:p>534.694152832031</text:p>
              </table:table-cell>
              <table:table-cell office:value-type="float" office:value="-0.009665913">
                <text:p>-0.00966591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34.811462402344">
                <text:p>534.811462402344</text:p>
              </table:table-cell>
              <table:table-cell office:value-type="float" office:value="-0.002381763">
                <text:p>-0.002381763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34.928771972656">
                <text:p>534.928771972656</text:p>
              </table:table-cell>
              <table:table-cell office:value-type="float" office:value="-0.006041068">
                <text:p>-0.00604106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35.046081542969">
                <text:p>535.046081542969</text:p>
              </table:table-cell>
              <table:table-cell office:value-type="float" office:value="-0.008795427">
                <text:p>-0.00879542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35.163452148438">
                <text:p>535.163452148438</text:p>
              </table:table-cell>
              <table:table-cell office:value-type="float" office:value="0.00352871">
                <text:p>0.0035287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35.28076171875">
                <text:p>535.28076171875</text:p>
              </table:table-cell>
              <table:table-cell office:value-type="float" office:value="0.0004084382">
                <text:p>0.000408438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35.398071289063">
                <text:p>535.398071289063</text:p>
              </table:table-cell>
              <table:table-cell office:value-type="float" office:value="0.001263222">
                <text:p>0.00126322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35.515441894531">
                <text:p>535.515441894531</text:p>
              </table:table-cell>
              <table:table-cell office:value-type="float" office:value="-0.009316203">
                <text:p>-0.00931620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35.632751464844">
                <text:p>535.632751464844</text:p>
              </table:table-cell>
              <table:table-cell office:value-type="float" office:value="-0.004818813">
                <text:p>-0.00481881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35.750122070313">
                <text:p>535.750122070313</text:p>
              </table:table-cell>
              <table:table-cell office:value-type="float" office:value="-0.003470472">
                <text:p>-0.00347047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35.867431640625">
                <text:p>535.867431640625</text:p>
              </table:table-cell>
              <table:table-cell office:value-type="float" office:value="0.00513817">
                <text:p>0.0051381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35.984802246094">
                <text:p>535.984802246094</text:p>
              </table:table-cell>
              <table:table-cell office:value-type="float" office:value="0.009190432">
                <text:p>0.00919043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36.102172851563">
                <text:p>536.102172851563</text:p>
              </table:table-cell>
              <table:table-cell office:value-type="float" office:value="0.007622583">
                <text:p>0.00762258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36.219543457031">
                <text:p>536.219543457031</text:p>
              </table:table-cell>
              <table:table-cell office:value-type="float" office:value="-0.0008131694">
                <text:p>-0.000813169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36.336853027344">
                <text:p>536.336853027344</text:p>
              </table:table-cell>
              <table:table-cell office:value-type="float" office:value="-0.003985072">
                <text:p>-0.00398507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6.454223632813">
                <text:p>536.454223632813</text:p>
              </table:table-cell>
              <table:table-cell office:value-type="float" office:value="-0.01203469">
                <text:p>-0.0120346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36.571594238281">
                <text:p>536.571594238281</text:p>
              </table:table-cell>
              <table:table-cell office:value-type="float" office:value="-0.009628977">
                <text:p>-0.00962897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36.68896484375">
                <text:p>536.68896484375</text:p>
              </table:table-cell>
              <table:table-cell office:value-type="float" office:value="-0.003472855">
                <text:p>-0.00347285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36.806335449219">
                <text:p>536.806335449219</text:p>
              </table:table-cell>
              <table:table-cell office:value-type="float" office:value="-0.0009492299">
                <text:p>-0.000949229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36.923706054688">
                <text:p>536.923706054688</text:p>
              </table:table-cell>
              <table:table-cell office:value-type="float" office:value="0.01988691">
                <text:p>0.0198869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37.041076660156">
                <text:p>537.041076660156</text:p>
              </table:table-cell>
              <table:table-cell office:value-type="float" office:value="-0.002671118">
                <text:p>-0.00267111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37.158508300781">
                <text:p>537.158508300781</text:p>
              </table:table-cell>
              <table:table-cell office:value-type="float" office:value="0.001567677">
                <text:p>0.00156767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37.27587890625">
                <text:p>537.27587890625</text:p>
              </table:table-cell>
              <table:table-cell office:value-type="float" office:value="-0.000839214">
                <text:p>-0.00083921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37.393249511719">
                <text:p>537.393249511719</text:p>
              </table:table-cell>
              <table:table-cell office:value-type="float" office:value="0.001850942">
                <text:p>0.00185094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37.510681152344">
                <text:p>537.510681152344</text:p>
              </table:table-cell>
              <table:table-cell office:value-type="float" office:value="-0.005305389">
                <text:p>-0.00530538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37.628051757813">
                <text:p>537.628051757813</text:p>
              </table:table-cell>
              <table:table-cell office:value-type="float" office:value="0.001452342">
                <text:p>0.00145234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37.745483398438">
                <text:p>537.745483398438</text:p>
              </table:table-cell>
              <table:table-cell office:value-type="float" office:value="-0.002802084">
                <text:p>-0.00280208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37.862854003906">
                <text:p>537.862854003906</text:p>
              </table:table-cell>
              <table:table-cell office:value-type="float" office:value="0.00110746">
                <text:p>0.0011074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37.980285644531">
                <text:p>537.980285644531</text:p>
              </table:table-cell>
              <table:table-cell office:value-type="float" office:value="-0.01316406">
                <text:p>-0.0131640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38.09765625">
                <text:p>538.09765625</text:p>
              </table:table-cell>
              <table:table-cell office:value-type="float" office:value="0.03272936">
                <text:p>0.0327293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38.215087890625">
                <text:p>538.215087890625</text:p>
              </table:table-cell>
              <table:table-cell office:value-type="float" office:value="0.001734423">
                <text:p>0.00173442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38.33251953125">
                <text:p>538.33251953125</text:p>
              </table:table-cell>
              <table:table-cell office:value-type="float" office:value="0.02762011">
                <text:p>0.0276201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38.449890136719">
                <text:p>538.449890136719</text:p>
              </table:table-cell>
              <table:table-cell office:value-type="float" office:value="0.0008345645">
                <text:p>0.000834564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38.567321777344">
                <text:p>538.567321777344</text:p>
              </table:table-cell>
              <table:table-cell office:value-type="float" office:value="0.03194784">
                <text:p>0.0319478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38.684753417969">
                <text:p>538.684753417969</text:p>
              </table:table-cell>
              <table:table-cell office:value-type="float" office:value="-0.001505903">
                <text:p>-0.00150590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38.802185058594">
                <text:p>538.802185058594</text:p>
              </table:table-cell>
              <table:table-cell office:value-type="float" office:value="0.004491338">
                <text:p>0.00449133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38.919616699219">
                <text:p>538.919616699219</text:p>
              </table:table-cell>
              <table:table-cell office:value-type="float" office:value="-0.01025539">
                <text:p>-0.0102553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39.037048339844">
                <text:p>539.037048339844</text:p>
              </table:table-cell>
              <table:table-cell office:value-type="float" office:value="0.007004344">
                <text:p>0.00700434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39.154479980469">
                <text:p>539.154479980469</text:p>
              </table:table-cell>
              <table:table-cell office:value-type="float" office:value="0.000460711">
                <text:p>0.00046071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39.27197265625">
                <text:p>539.27197265625</text:p>
              </table:table-cell>
              <table:table-cell office:value-type="float" office:value="-0.009019189">
                <text:p>-0.00901918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39.389404296875">
                <text:p>539.3894042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39.5068359375">
                <text:p>539.5068359375</text:p>
              </table:table-cell>
              <table:table-cell office:value-type="float" office:value="-0.003214795">
                <text:p>-0.00321479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39.624267578125">
                <text:p>539.624267578125</text:p>
              </table:table-cell>
              <table:table-cell office:value-type="float" office:value="-0.002977061">
                <text:p>-0.00297706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39.741760253906">
                <text:p>539.741760253906</text:p>
              </table:table-cell>
              <table:table-cell office:value-type="float" office:value="-0.004641052">
                <text:p>-0.00464105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39.859191894531">
                <text:p>539.859191894531</text:p>
              </table:table-cell>
              <table:table-cell office:value-type="float" office:value="-0.01178565">
                <text:p>-0.0117856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39.976684570313">
                <text:p>539.976684570313</text:p>
              </table:table-cell>
              <table:table-cell office:value-type="float" office:value="0.005735709">
                <text:p>0.00573570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40.094116210938">
                <text:p>540.094116210938</text:p>
              </table:table-cell>
              <table:table-cell office:value-type="float" office:value="-0.008960352">
                <text:p>-0.00896035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40.211608886719">
                <text:p>540.211608886719</text:p>
              </table:table-cell>
              <table:table-cell office:value-type="float" office:value="-0.009290469">
                <text:p>-0.00929046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40.3291015625">
                <text:p>540.3291015625</text:p>
              </table:table-cell>
              <table:table-cell office:value-type="float" office:value="-0.002146099">
                <text:p>-0.00214609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40.446533203125">
                <text:p>540.446533203125</text:p>
              </table:table-cell>
              <table:table-cell office:value-type="float" office:value="-0.003985329">
                <text:p>-0.00398532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40.564025878906">
                <text:p>540.564025878906</text:p>
              </table:table-cell>
              <table:table-cell office:value-type="float" office:value="0.01221144">
                <text:p>0.0122114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40.681518554688">
                <text:p>540.681518554688</text:p>
              </table:table-cell>
              <table:table-cell office:value-type="float" office:value="-0.003819244">
                <text:p>-0.00381924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40.799011230469">
                <text:p>540.799011230469</text:p>
              </table:table-cell>
              <table:table-cell office:value-type="float" office:value="-0.004771356">
                <text:p>-0.00477135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40.91650390625">
                <text:p>540.91650390625</text:p>
              </table:table-cell>
              <table:table-cell office:value-type="float" office:value="-0.009364727">
                <text:p>-0.00936472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541.033996582031">
                <text:p>541.033996582031</text:p>
              </table:table-cell>
              <table:table-cell office:value-type="float" office:value="-0.001488221">
                <text:p>-0.00148822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41.151489257813">
                <text:p>541.151489257813</text:p>
              </table:table-cell>
              <table:table-cell office:value-type="float" office:value="0.001103485">
                <text:p>0.00110348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41.268981933594">
                <text:p>541.268981933594</text:p>
              </table:table-cell>
              <table:table-cell office:value-type="float" office:value="-0.004455918">
                <text:p>-0.00445591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41.386474609375">
                <text:p>541.386474609375</text:p>
              </table:table-cell>
              <table:table-cell office:value-type="float" office:value="0.007407127">
                <text:p>0.00740712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41.503967285156">
                <text:p>541.503967285156</text:p>
              </table:table-cell>
              <table:table-cell office:value-type="float" office:value="-0.004258954">
                <text:p>-0.00425895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41.621459960938">
                <text:p>541.621459960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41.739013671875">
                <text:p>541.739013671875</text:p>
              </table:table-cell>
              <table:table-cell office:value-type="float" office:value="0.01233146">
                <text:p>0.0123314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541.856506347656">
                <text:p>541.856506347656</text:p>
              </table:table-cell>
              <table:table-cell office:value-type="float" office:value="-0.002352834">
                <text:p>-0.00235283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41.974060058594">
                <text:p>541.974060058594</text:p>
              </table:table-cell>
              <table:table-cell office:value-type="float" office:value="-0.01130431">
                <text:p>-0.0113043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542.091552734375">
                <text:p>542.091552734375</text:p>
              </table:table-cell>
              <table:table-cell office:value-type="float" office:value="0.001948518">
                <text:p>0.00194851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42.209106445313">
                <text:p>542.209106445313</text:p>
              </table:table-cell>
              <table:table-cell office:value-type="float" office:value="0.0009329288">
                <text:p>0.000932928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42.326599121094">
                <text:p>542.326599121094</text:p>
              </table:table-cell>
              <table:table-cell office:value-type="float" office:value="-0.007471025">
                <text:p>-0.00747102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42.444152832031">
                <text:p>542.444152832031</text:p>
              </table:table-cell>
              <table:table-cell office:value-type="float" office:value="0.008349075">
                <text:p>0.00834907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42.561645507813">
                <text:p>542.561645507813</text:p>
              </table:table-cell>
              <table:table-cell office:value-type="float" office:value="-0.002637175">
                <text:p>-0.00263717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42.67919921875">
                <text:p>542.67919921875</text:p>
              </table:table-cell>
              <table:table-cell office:value-type="float" office:value="-0.00750144">
                <text:p>-0.0075014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42.796752929688">
                <text:p>542.796752929688</text:p>
              </table:table-cell>
              <table:table-cell office:value-type="float" office:value="0.008018564">
                <text:p>0.00801856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42.914306640625">
                <text:p>542.914306640625</text:p>
              </table:table-cell>
              <table:table-cell office:value-type="float" office:value="-0.003805645">
                <text:p>-0.00380564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43.031860351563">
                <text:p>543.031860351563</text:p>
              </table:table-cell>
              <table:table-cell office:value-type="float" office:value="0.005124066">
                <text:p>0.00512406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3.1494140625">
                <text:p>543.1494140625</text:p>
              </table:table-cell>
              <table:table-cell office:value-type="float" office:value="-0.01242382">
                <text:p>-0.0124238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43.266967773438">
                <text:p>543.266967773438</text:p>
              </table:table-cell>
              <table:table-cell office:value-type="float" office:value="0.001259626">
                <text:p>0.00125962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43.384521484375">
                <text:p>543.384521484375</text:p>
              </table:table-cell>
              <table:table-cell office:value-type="float" office:value="0.004565897">
                <text:p>0.00456589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43.502075195313">
                <text:p>543.502075195313</text:p>
              </table:table-cell>
              <table:table-cell office:value-type="float" office:value="-0.00885902">
                <text:p>-0.0088590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43.61962890625">
                <text:p>543.61962890625</text:p>
              </table:table-cell>
              <table:table-cell office:value-type="float" office:value="0.0006415096">
                <text:p>0.000641509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43.737182617188">
                <text:p>543.737182617188</text:p>
              </table:table-cell>
              <table:table-cell office:value-type="float" office:value="-0.007176833">
                <text:p>-0.00717683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3.854736328125">
                <text:p>543.854736328125</text:p>
              </table:table-cell>
              <table:table-cell office:value-type="float" office:value="-0.005544494">
                <text:p>-0.00554449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43.972351074219">
                <text:p>543.972351074219</text:p>
              </table:table-cell>
              <table:table-cell office:value-type="float" office:value="0.0003191464">
                <text:p>0.000319146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44.089904785156">
                <text:p>544.089904785156</text:p>
              </table:table-cell>
              <table:table-cell office:value-type="float" office:value="-0.0038381">
                <text:p>-0.003838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544.207458496094">
                <text:p>544.207458496094</text:p>
              </table:table-cell>
              <table:table-cell office:value-type="float" office:value="-0.0003338222">
                <text:p>-0.000333822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44.325073242188">
                <text:p>544.325073242188</text:p>
              </table:table-cell>
              <table:table-cell office:value-type="float" office:value="0.004956537">
                <text:p>0.00495653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44.442626953125">
                <text:p>544.442626953125</text:p>
              </table:table-cell>
              <table:table-cell office:value-type="float" office:value="-0.008414599">
                <text:p>-0.00841459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44.560241699219">
                <text:p>544.560241699219</text:p>
              </table:table-cell>
              <table:table-cell office:value-type="float" office:value="0.001625101">
                <text:p>0.00162510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44.677856445313">
                <text:p>544.677856445313</text:p>
              </table:table-cell>
              <table:table-cell office:value-type="float" office:value="0.001699142">
                <text:p>0.00169914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44.79541015625">
                <text:p>544.79541015625</text:p>
              </table:table-cell>
              <table:table-cell office:value-type="float" office:value="0.002624796">
                <text:p>0.00262479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44.913024902344">
                <text:p>544.913024902344</text:p>
              </table:table-cell>
              <table:table-cell office:value-type="float" office:value="-0.009473539">
                <text:p>-0.00947353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45.030639648438">
                <text:p>545.030639648438</text:p>
              </table:table-cell>
              <table:table-cell office:value-type="float" office:value="-0.0002603317">
                <text:p>-0.000260331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45.148254394531">
                <text:p>545.148254394531</text:p>
              </table:table-cell>
              <table:table-cell office:value-type="float" office:value="0.001838509">
                <text:p>0.00183850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45.265869140625">
                <text:p>545.265869140625</text:p>
              </table:table-cell>
              <table:table-cell office:value-type="float" office:value="0.001608821">
                <text:p>0.00160882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545.383483886719">
                <text:p>545.383483886719</text:p>
              </table:table-cell>
              <table:table-cell office:value-type="float" office:value="-0.01301661">
                <text:p>-0.0130166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45.501098632813">
                <text:p>545.501098632813</text:p>
              </table:table-cell>
              <table:table-cell office:value-type="float" office:value="-0.0011309">
                <text:p>-0.001130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45.618713378906">
                <text:p>545.618713378906</text:p>
              </table:table-cell>
              <table:table-cell office:value-type="float" office:value="0.005955467">
                <text:p>0.00595546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45.736328125">
                <text:p>545.736328125</text:p>
              </table:table-cell>
              <table:table-cell office:value-type="float" office:value="0.003484637">
                <text:p>0.00348463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545.853942871094">
                <text:p>545.85394287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45.971557617188">
                <text:p>545.971557617188</text:p>
              </table:table-cell>
              <table:table-cell office:value-type="float" office:value="0.009277222">
                <text:p>0.009277222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46.089172363281">
                <text:p>546.089172363281</text:p>
              </table:table-cell>
              <table:table-cell office:value-type="float" office:value="0.01038618">
                <text:p>0.0103861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46.206848144531">
                <text:p>546.206848144531</text:p>
              </table:table-cell>
              <table:table-cell office:value-type="float" office:value="0.009797204">
                <text:p>0.00979720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46.324462890625">
                <text:p>546.324462890625</text:p>
              </table:table-cell>
              <table:table-cell office:value-type="float" office:value="-0.005482538">
                <text:p>-0.00548253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6.442077636719">
                <text:p>546.442077636719</text:p>
              </table:table-cell>
              <table:table-cell office:value-type="float" office:value="0.003290794">
                <text:p>0.00329079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46.559753417969">
                <text:p>546.559753417969</text:p>
              </table:table-cell>
              <table:table-cell office:value-type="float" office:value="0.00419348">
                <text:p>0.0041934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46.677368164063">
                <text:p>546.677368164063</text:p>
              </table:table-cell>
              <table:table-cell office:value-type="float" office:value="0.0006184953">
                <text:p>0.000618495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46.795043945313">
                <text:p>546.795043945313</text:p>
              </table:table-cell>
              <table:table-cell office:value-type="float" office:value="0.001689642">
                <text:p>0.00168964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6.912719726563">
                <text:p>546.912719726563</text:p>
              </table:table-cell>
              <table:table-cell office:value-type="float" office:value="0.005887587">
                <text:p>0.00588758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47.030334472656">
                <text:p>547.030334472656</text:p>
              </table:table-cell>
              <table:table-cell office:value-type="float" office:value="-0.003334666">
                <text:p>-0.00333466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47.148010253906">
                <text:p>547.148010253906</text:p>
              </table:table-cell>
              <table:table-cell office:value-type="float" office:value="0.003677677">
                <text:p>0.00367767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47.265686035156">
                <text:p>547.265686035156</text:p>
              </table:table-cell>
              <table:table-cell office:value-type="float" office:value="0.004384374">
                <text:p>0.00438437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47.383361816406">
                <text:p>547.383361816406</text:p>
              </table:table-cell>
              <table:table-cell office:value-type="float" office:value="0.005601531">
                <text:p>0.00560153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47.5009765625">
                <text:p>547.5009765625</text:p>
              </table:table-cell>
              <table:table-cell office:value-type="float" office:value="-0.007552009">
                <text:p>-0.00755200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47.61865234375">
                <text:p>547.61865234375</text:p>
              </table:table-cell>
              <table:table-cell office:value-type="float" office:value="0.0008819517">
                <text:p>0.000881951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47.736328125">
                <text:p>547.736328125</text:p>
              </table:table-cell>
              <table:table-cell office:value-type="float" office:value="0.002401754">
                <text:p>0.00240175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47.85400390625">
                <text:p>547.85400390625</text:p>
              </table:table-cell>
              <table:table-cell office:value-type="float" office:value="-0.003167809">
                <text:p>-0.00316780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47.971740722656">
                <text:p>547.971740722656</text:p>
              </table:table-cell>
              <table:table-cell office:value-type="float" office:value="-0.01124524">
                <text:p>-0.0112452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48.089416503906">
                <text:p>548.089416503906</text:p>
              </table:table-cell>
              <table:table-cell office:value-type="float" office:value="-0.007222908">
                <text:p>-0.00722290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48.207092285156">
                <text:p>548.207092285156</text:p>
              </table:table-cell>
              <table:table-cell office:value-type="float" office:value="0.007549234">
                <text:p>0.00754923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48.324768066406">
                <text:p>548.324768066406</text:p>
              </table:table-cell>
              <table:table-cell office:value-type="float" office:value="-0.008488647">
                <text:p>-0.00848864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48.442443847656">
                <text:p>548.442443847656</text:p>
              </table:table-cell>
              <table:table-cell office:value-type="float" office:value="0.001796942">
                <text:p>0.00179694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48.560180664063">
                <text:p>548.560180664063</text:p>
              </table:table-cell>
              <table:table-cell office:value-type="float" office:value="-0.002977531">
                <text:p>-0.00297753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8.677856445313">
                <text:p>548.677856445313</text:p>
              </table:table-cell>
              <table:table-cell office:value-type="float" office:value="0.006681892">
                <text:p>0.00668189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48.795593261719">
                <text:p>548.795593261719</text:p>
              </table:table-cell>
              <table:table-cell office:value-type="float" office:value="-0.004839163">
                <text:p>-0.00483916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48.913269042969">
                <text:p>548.913269042969</text:p>
              </table:table-cell>
              <table:table-cell office:value-type="float" office:value="-0.005698211">
                <text:p>-0.00569821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9.031005859375">
                <text:p>549.031005859375</text:p>
              </table:table-cell>
              <table:table-cell office:value-type="float" office:value="-0.003118099">
                <text:p>-0.00311809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49.148681640625">
                <text:p>549.148681640625</text:p>
              </table:table-cell>
              <table:table-cell office:value-type="float" office:value="-0.004741257">
                <text:p>-0.00474125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49.266418457031">
                <text:p>549.266418457031</text:p>
              </table:table-cell>
              <table:table-cell office:value-type="float" office:value="0.005598371">
                <text:p>0.00559837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9.384155273438">
                <text:p>549.384155273438</text:p>
              </table:table-cell>
              <table:table-cell office:value-type="float" office:value="-0.001792623">
                <text:p>-0.00179262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9.501831054688">
                <text:p>549.501831054688</text:p>
              </table:table-cell>
              <table:table-cell office:value-type="float" office:value="0.003540542">
                <text:p>0.00354054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9.619567871094">
                <text:p>549.619567871094</text:p>
              </table:table-cell>
              <table:table-cell office:value-type="float" office:value="0.01554634">
                <text:p>0.0155463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49.7373046875">
                <text:p>549.7373046875</text:p>
              </table:table-cell>
              <table:table-cell office:value-type="float" office:value="0.007280099">
                <text:p>0.00728009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49.855041503906">
                <text:p>549.855041503906</text:p>
              </table:table-cell>
              <table:table-cell office:value-type="float" office:value="0.002017298">
                <text:p>0.002017298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49.972778320313">
                <text:p>549.972778320313</text:p>
              </table:table-cell>
              <table:table-cell office:value-type="float" office:value="0.007774671">
                <text:p>0.00777467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50.090515136719">
                <text:p>550.090515136719</text:p>
              </table:table-cell>
              <table:table-cell office:value-type="float" office:value="-0.01088724">
                <text:p>-0.0108872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50.208251953125">
                <text:p>550.208251953125</text:p>
              </table:table-cell>
              <table:table-cell office:value-type="float" office:value="0.001778386">
                <text:p>0.00177838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50.325988769531">
                <text:p>550.325988769531</text:p>
              </table:table-cell>
              <table:table-cell office:value-type="float" office:value="-0.00531794">
                <text:p>-0.0053179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50.443725585938">
                <text:p>550.443725585938</text:p>
              </table:table-cell>
              <table:table-cell office:value-type="float" office:value="-0.0002314929">
                <text:p>-0.000231492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50.561462402344">
                <text:p>550.561462402344</text:p>
              </table:table-cell>
              <table:table-cell office:value-type="float" office:value="0.009316876">
                <text:p>0.00931687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50.679260253906">
                <text:p>550.679260253906</text:p>
              </table:table-cell>
              <table:table-cell office:value-type="float" office:value="0.004422029">
                <text:p>0.00442202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50.796997070313">
                <text:p>550.796997070313</text:p>
              </table:table-cell>
              <table:table-cell office:value-type="float" office:value="0.0002150934">
                <text:p>0.000215093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0.914733886719">
                <text:p>550.914733886719</text:p>
              </table:table-cell>
              <table:table-cell office:value-type="float" office:value="0.002958827">
                <text:p>0.002958827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51.032531738281">
                <text:p>551.032531738281</text:p>
              </table:table-cell>
              <table:table-cell office:value-type="float" office:value="-0.003431918">
                <text:p>-0.00343191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1.150268554688">
                <text:p>551.150268554688</text:p>
              </table:table-cell>
              <table:table-cell office:value-type="float" office:value="0.005440169">
                <text:p>0.00544016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51.26806640625">
                <text:p>551.26806640625</text:p>
              </table:table-cell>
              <table:table-cell office:value-type="float" office:value="-0.008170637">
                <text:p>-0.00817063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51.385803222656">
                <text:p>551.385803222656</text:p>
              </table:table-cell>
              <table:table-cell office:value-type="float" office:value="0.005202678">
                <text:p>0.00520267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1.503601074219">
                <text:p>551.503601074219</text:p>
              </table:table-cell>
              <table:table-cell office:value-type="float" office:value="-0.008633316">
                <text:p>-0.00863331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1.621398925781">
                <text:p>551.621398925781</text:p>
              </table:table-cell>
              <table:table-cell office:value-type="float" office:value="0.01488634">
                <text:p>0.0148863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1.739135742188">
                <text:p>551.739135742188</text:p>
              </table:table-cell>
              <table:table-cell office:value-type="float" office:value="-0.001497701">
                <text:p>-0.00149770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51.85693359375">
                <text:p>551.85693359375</text:p>
              </table:table-cell>
              <table:table-cell office:value-type="float" office:value="-0.005535174">
                <text:p>-0.00553517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51.974731445313">
                <text:p>551.974731445313</text:p>
              </table:table-cell>
              <table:table-cell office:value-type="float" office:value="0.004285989">
                <text:p>0.00428598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52.092529296875">
                <text:p>552.092529296875</text:p>
              </table:table-cell>
              <table:table-cell office:value-type="float" office:value="-0.005723184">
                <text:p>-0.00572318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2.210327148438">
                <text:p>552.210327148438</text:p>
              </table:table-cell>
              <table:table-cell office:value-type="float" office:value="0.01066373">
                <text:p>0.01066373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52.328125">
                <text:p>552.328125</text:p>
              </table:table-cell>
              <table:table-cell office:value-type="float" office:value="-0.002226179">
                <text:p>-0.00222617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52.445922851563">
                <text:p>552.445922851563</text:p>
              </table:table-cell>
              <table:table-cell office:value-type="float" office:value="0.0006290706">
                <text:p>0.000629070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52.563720703125">
                <text:p>552.563720703125</text:p>
              </table:table-cell>
              <table:table-cell office:value-type="float" office:value="0.01383999">
                <text:p>0.0138399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52.681518554688">
                <text:p>552.681518554688</text:p>
              </table:table-cell>
              <table:table-cell office:value-type="float" office:value="-0.002530704">
                <text:p>-0.00253070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2.79931640625">
                <text:p>552.79931640625</text:p>
              </table:table-cell>
              <table:table-cell office:value-type="float" office:value="-0.002290832">
                <text:p>-0.00229083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52.917114257813">
                <text:p>552.917114257813</text:p>
              </table:table-cell>
              <table:table-cell office:value-type="float" office:value="-0.004084717">
                <text:p>-0.00408471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53.034973144531">
                <text:p>553.034973144531</text:p>
              </table:table-cell>
              <table:table-cell office:value-type="float" office:value="-0.002142464">
                <text:p>-0.00214246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53.152770996094">
                <text:p>553.152770996094</text:p>
              </table:table-cell>
              <table:table-cell office:value-type="float" office:value="0.003275666">
                <text:p>0.003275666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53.270568847656">
                <text:p>553.270568847656</text:p>
              </table:table-cell>
              <table:table-cell office:value-type="float" office:value="0.01959667">
                <text:p>0.0195966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53.388427734375">
                <text:p>553.388427734375</text:p>
              </table:table-cell>
              <table:table-cell office:value-type="float" office:value="-0.006883956">
                <text:p>-0.00688395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53.506225585938">
                <text:p>553.506225585938</text:p>
              </table:table-cell>
              <table:table-cell office:value-type="float" office:value="0.01235186">
                <text:p>0.0123518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3.624084472656">
                <text:p>553.624084472656</text:p>
              </table:table-cell>
              <table:table-cell office:value-type="float" office:value="0.001925376">
                <text:p>0.00192537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53.741882324219">
                <text:p>553.741882324219</text:p>
              </table:table-cell>
              <table:table-cell office:value-type="float" office:value="-0.001866559">
                <text:p>-0.00186655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53.859741210938">
                <text:p>553.859741210938</text:p>
              </table:table-cell>
              <table:table-cell office:value-type="float" office:value="-0.01007308">
                <text:p>-0.0100730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53.977600097656">
                <text:p>553.977600097656</text:p>
              </table:table-cell>
              <table:table-cell office:value-type="float" office:value="0.001340108">
                <text:p>0.001340108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54.095458984375">
                <text:p>554.095458984375</text:p>
              </table:table-cell>
              <table:table-cell office:value-type="float" office:value="-0.003014279">
                <text:p>-0.00301427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54.213256835938">
                <text:p>554.213256835938</text:p>
              </table:table-cell>
              <table:table-cell office:value-type="float" office:value="0.01888015">
                <text:p>0.0188801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54.331115722656">
                <text:p>554.331115722656</text:p>
              </table:table-cell>
              <table:table-cell office:value-type="float" office:value="0.002197372">
                <text:p>0.00219737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54.448974609375">
                <text:p>554.448974609375</text:p>
              </table:table-cell>
              <table:table-cell office:value-type="float" office:value="0.000394272">
                <text:p>0.00039427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54.566833496094">
                <text:p>554.566833496094</text:p>
              </table:table-cell>
              <table:table-cell office:value-type="float" office:value="0.0006685885">
                <text:p>0.000668588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54.684692382813">
                <text:p>554.684692382813</text:p>
              </table:table-cell>
              <table:table-cell office:value-type="float" office:value="-0.005088398">
                <text:p>-0.00508839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54.802551269531">
                <text:p>554.802551269531</text:p>
              </table:table-cell>
              <table:table-cell office:value-type="float" office:value="-0.004077252">
                <text:p>-0.00407725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54.92041015625">
                <text:p>554.92041015625</text:p>
              </table:table-cell>
              <table:table-cell office:value-type="float" office:value="-0.007125426">
                <text:p>-0.00712542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55.038269042969">
                <text:p>555.038269042969</text:p>
              </table:table-cell>
              <table:table-cell office:value-type="float" office:value="-0.0008198204">
                <text:p>-0.000819820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55.156127929688">
                <text:p>555.156127929688</text:p>
              </table:table-cell>
              <table:table-cell office:value-type="float" office:value="-0.001799461">
                <text:p>-0.00179946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55.274047851563">
                <text:p>555.274047851563</text:p>
              </table:table-cell>
              <table:table-cell office:value-type="float" office:value="0.0001421804">
                <text:p>0.000142180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55.391906738281">
                <text:p>555.391906738281</text:p>
              </table:table-cell>
              <table:table-cell office:value-type="float" office:value="0.002574085">
                <text:p>0.00257408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5.509765625">
                <text:p>555.509765625</text:p>
              </table:table-cell>
              <table:table-cell office:value-type="float" office:value="0.001295816">
                <text:p>0.00129581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55.627685546875">
                <text:p>555.627685546875</text:p>
              </table:table-cell>
              <table:table-cell office:value-type="float" office:value="0.008444927">
                <text:p>0.008444927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55.745544433594">
                <text:p>555.745544433594</text:p>
              </table:table-cell>
              <table:table-cell office:value-type="float" office:value="0.005481919">
                <text:p>0.00548191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55.863403320313">
                <text:p>555.863403320313</text:p>
              </table:table-cell>
              <table:table-cell office:value-type="float" office:value="-0.004883912">
                <text:p>-0.00488391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55.981323242188">
                <text:p>555.981323242188</text:p>
              </table:table-cell>
              <table:table-cell office:value-type="float" office:value="0.003018574">
                <text:p>0.00301857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56.099243164063">
                <text:p>556.099243164063</text:p>
              </table:table-cell>
              <table:table-cell office:value-type="float" office:value="-0.002824267">
                <text:p>-0.002824267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56.217102050781">
                <text:p>556.217102050781</text:p>
              </table:table-cell>
              <table:table-cell office:value-type="float" office:value="0.01067908">
                <text:p>0.01067908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56.335021972656">
                <text:p>556.335021972656</text:p>
              </table:table-cell>
              <table:table-cell office:value-type="float" office:value="0.01152096">
                <text:p>0.0115209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56.452941894531">
                <text:p>556.452941894531</text:p>
              </table:table-cell>
              <table:table-cell office:value-type="float" office:value="0.003939092">
                <text:p>0.00393909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6.57080078125">
                <text:p>556.57080078125</text:p>
              </table:table-cell>
              <table:table-cell office:value-type="float" office:value="0.002906348">
                <text:p>0.002906348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.688720703125">
                <text:p>556.688720703125</text:p>
              </table:table-cell>
              <table:table-cell office:value-type="float" office:value="0.001628962">
                <text:p>0.00162896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56.806640625">
                <text:p>556.806640625</text:p>
              </table:table-cell>
              <table:table-cell office:value-type="float" office:value="0.0002262988">
                <text:p>0.000226298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56.924560546875">
                <text:p>556.924560546875</text:p>
              </table:table-cell>
              <table:table-cell office:value-type="float" office:value="0.006628902">
                <text:p>0.00662890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57.04248046875">
                <text:p>557.04248046875</text:p>
              </table:table-cell>
              <table:table-cell office:value-type="float" office:value="0.001079783">
                <text:p>0.001079783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57.160400390625">
                <text:p>557.160400390625</text:p>
              </table:table-cell>
              <table:table-cell office:value-type="float" office:value="-0.004976039">
                <text:p>-0.00497603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57.2783203125">
                <text:p>557.2783203125</text:p>
              </table:table-cell>
              <table:table-cell office:value-type="float" office:value="0.01643455">
                <text:p>0.0164345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57.396240234375">
                <text:p>557.396240234375</text:p>
              </table:table-cell>
              <table:table-cell office:value-type="float" office:value="0.001098388">
                <text:p>0.001098388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57.51416015625">
                <text:p>557.51416015625</text:p>
              </table:table-cell>
              <table:table-cell office:value-type="float" office:value="-0.008583892">
                <text:p>-0.008583892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57.632141113281">
                <text:p>557.632141113281</text:p>
              </table:table-cell>
              <table:table-cell office:value-type="float" office:value="0.002606335">
                <text:p>0.00260633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57.750061035156">
                <text:p>557.750061035156</text:p>
              </table:table-cell>
              <table:table-cell office:value-type="float" office:value="-0.0009950175">
                <text:p>-0.000995017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57.867980957031">
                <text:p>557.867980957031</text:p>
              </table:table-cell>
              <table:table-cell office:value-type="float" office:value="0.003103248">
                <text:p>0.003103248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57.985961914063">
                <text:p>557.985961914063</text:p>
              </table:table-cell>
              <table:table-cell office:value-type="float" office:value="-0.009531598">
                <text:p>-0.009531598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58.103881835938">
                <text:p>558.103881835938</text:p>
              </table:table-cell>
              <table:table-cell office:value-type="float" office:value="-0.006736774">
                <text:p>-0.00673677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58.221801757813">
                <text:p>558.221801757813</text:p>
              </table:table-cell>
              <table:table-cell office:value-type="float" office:value="-0.00242148">
                <text:p>-0.0024214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58.339782714844">
                <text:p>558.339782714844</text:p>
              </table:table-cell>
              <table:table-cell office:value-type="float" office:value="0.008962624">
                <text:p>0.00896262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58.457702636719">
                <text:p>558.457702636719</text:p>
              </table:table-cell>
              <table:table-cell office:value-type="float" office:value="-0.003061778">
                <text:p>-0.003061778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58.57568359375">
                <text:p>558.57568359375</text:p>
              </table:table-cell>
              <table:table-cell office:value-type="float" office:value="0.001395035">
                <text:p>0.00139503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58.693664550781">
                <text:p>558.693664550781</text:p>
              </table:table-cell>
              <table:table-cell office:value-type="float" office:value="0.005582398">
                <text:p>0.00558239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58.811584472656">
                <text:p>558.811584472656</text:p>
              </table:table-cell>
              <table:table-cell office:value-type="float" office:value="0.007955747">
                <text:p>0.00795574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58.929565429688">
                <text:p>558.929565429688</text:p>
              </table:table-cell>
              <table:table-cell office:value-type="float" office:value="-0.003332066">
                <text:p>-0.00333206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59.047546386719">
                <text:p>559.047546386719</text:p>
              </table:table-cell>
              <table:table-cell office:value-type="float" office:value="0.003718572">
                <text:p>0.00371857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59.16552734375">
                <text:p>559.16552734375</text:p>
              </table:table-cell>
              <table:table-cell office:value-type="float" office:value="0.002298791">
                <text:p>0.00229879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59.283508300781">
                <text:p>559.283508300781</text:p>
              </table:table-cell>
              <table:table-cell office:value-type="float" office:value="0.0005392443">
                <text:p>0.000539244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59.401489257813">
                <text:p>559.401489257813</text:p>
              </table:table-cell>
              <table:table-cell office:value-type="float" office:value="0.007271282">
                <text:p>0.007271282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59.519470214844">
                <text:p>559.519470214844</text:p>
              </table:table-cell>
              <table:table-cell office:value-type="float" office:value="-0.009097866">
                <text:p>-0.009097866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59.637451171875">
                <text:p>559.637451171875</text:p>
              </table:table-cell>
              <table:table-cell office:value-type="float" office:value="0.003646609">
                <text:p>0.003646609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59.755432128906">
                <text:p>559.755432128906</text:p>
              </table:table-cell>
              <table:table-cell office:value-type="float" office:value="0.009698554">
                <text:p>0.00969855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59.873413085938">
                <text:p>559.873413085938</text:p>
              </table:table-cell>
              <table:table-cell office:value-type="float" office:value="-0.0008771151">
                <text:p>-0.000877115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59.991394042969">
                <text:p>559.991394042969</text:p>
              </table:table-cell>
              <table:table-cell office:value-type="float" office:value="0.004332649">
                <text:p>0.00433264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60.109375">
                <text:p>560.109375</text:p>
              </table:table-cell>
              <table:table-cell office:value-type="float" office:value="0.007356243">
                <text:p>0.00735624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60.227416992188">
                <text:p>560.227416992188</text:p>
              </table:table-cell>
              <table:table-cell office:value-type="float" office:value="0.0006489306">
                <text:p>0.0006489306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60.345397949219">
                <text:p>560.345397949219</text:p>
              </table:table-cell>
              <table:table-cell office:value-type="float" office:value="-0.005533678">
                <text:p>-0.00553367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60.46337890625">
                <text:p>560.46337890625</text:p>
              </table:table-cell>
              <table:table-cell office:value-type="float" office:value="0.007461363">
                <text:p>0.00746136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60.581420898438">
                <text:p>560.581420898438</text:p>
              </table:table-cell>
              <table:table-cell office:value-type="float" office:value="0.02694477">
                <text:p>0.0269447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60.699401855469">
                <text:p>560.699401855469</text:p>
              </table:table-cell>
              <table:table-cell office:value-type="float" office:value="-0.004820873">
                <text:p>-0.004820873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60.817443847656">
                <text:p>560.817443847656</text:p>
              </table:table-cell>
              <table:table-cell office:value-type="float" office:value="-0.003399227">
                <text:p>-0.003399227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60.935424804688">
                <text:p>560.935424804688</text:p>
              </table:table-cell>
              <table:table-cell office:value-type="float" office:value="0.007864164">
                <text:p>0.00786416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61.053466796875">
                <text:p>561.053466796875</text:p>
              </table:table-cell>
              <table:table-cell office:value-type="float" office:value="0.001105797">
                <text:p>0.001105797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61.171508789063">
                <text:p>561.171508789063</text:p>
              </table:table-cell>
              <table:table-cell office:value-type="float" office:value="-0.00202399">
                <text:p>-0.0020239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61.289489746094">
                <text:p>561.289489746094</text:p>
              </table:table-cell>
              <table:table-cell office:value-type="float" office:value="0.008683967">
                <text:p>0.00868396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61.407531738281">
                <text:p>561.407531738281</text:p>
              </table:table-cell>
              <table:table-cell office:value-type="float" office:value="-0.0003229837">
                <text:p>-0.000322983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61.525573730469">
                <text:p>561.525573730469</text:p>
              </table:table-cell>
              <table:table-cell office:value-type="float" office:value="0.01483421">
                <text:p>0.0148342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61.643615722656">
                <text:p>561.643615722656</text:p>
              </table:table-cell>
              <table:table-cell office:value-type="float" office:value="-0.002155563">
                <text:p>-0.00215556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61.761657714844">
                <text:p>561.761657714844</text:p>
              </table:table-cell>
              <table:table-cell office:value-type="float" office:value="-0.006232536">
                <text:p>-0.006232536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61.879699707031">
                <text:p>561.879699707031</text:p>
              </table:table-cell>
              <table:table-cell office:value-type="float" office:value="0.01166998">
                <text:p>0.0116699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61.997741699219">
                <text:p>561.997741699219</text:p>
              </table:table-cell>
              <table:table-cell office:value-type="float" office:value="0.02022015">
                <text:p>0.0202201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62.115783691406">
                <text:p>562.115783691406</text:p>
              </table:table-cell>
              <table:table-cell office:value-type="float" office:value="-0.002877204">
                <text:p>-0.002877204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62.233825683594">
                <text:p>562.233825683594</text:p>
              </table:table-cell>
              <table:table-cell office:value-type="float" office:value="0.01163947">
                <text:p>0.01163947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62.351867675781">
                <text:p>562.351867675781</text:p>
              </table:table-cell>
              <table:table-cell office:value-type="float" office:value="0.007689091">
                <text:p>0.007689091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2.469909667969">
                <text:p>562.469909667969</text:p>
              </table:table-cell>
              <table:table-cell office:value-type="float" office:value="0.006772597">
                <text:p>0.006772597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62.588012695313">
                <text:p>562.588012695313</text:p>
              </table:table-cell>
              <table:table-cell office:value-type="float" office:value="0.005189736">
                <text:p>0.005189736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62.7060546875">
                <text:p>562.7060546875</text:p>
              </table:table-cell>
              <table:table-cell office:value-type="float" office:value="-0.006585458">
                <text:p>-0.006585458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62.824096679688">
                <text:p>562.824096679688</text:p>
              </table:table-cell>
              <table:table-cell office:value-type="float" office:value="-0.002730421">
                <text:p>-0.00273042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62.942199707031">
                <text:p>562.942199707031</text:p>
              </table:table-cell>
              <table:table-cell office:value-type="float" office:value="-0.003033905">
                <text:p>-0.00303390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63.060241699219">
                <text:p>563.060241699219</text:p>
              </table:table-cell>
              <table:table-cell office:value-type="float" office:value="0.006079706">
                <text:p>0.00607970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63.178344726563">
                <text:p>563.178344726563</text:p>
              </table:table-cell>
              <table:table-cell office:value-type="float" office:value="0.01721143">
                <text:p>0.01721143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63.29638671875">
                <text:p>563.29638671875</text:p>
              </table:table-cell>
              <table:table-cell office:value-type="float" office:value="-0.003029573">
                <text:p>-0.00302957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63.414489746094">
                <text:p>563.414489746094</text:p>
              </table:table-cell>
              <table:table-cell office:value-type="float" office:value="0.007644945">
                <text:p>0.00764494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63.532531738281">
                <text:p>563.532531738281</text:p>
              </table:table-cell>
              <table:table-cell office:value-type="float" office:value="0.01806094">
                <text:p>0.0180609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63.650634765625">
                <text:p>563.650634765625</text:p>
              </table:table-cell>
              <table:table-cell office:value-type="float" office:value="-0.001774533">
                <text:p>-0.001774533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63.768737792969">
                <text:p>563.768737792969</text:p>
              </table:table-cell>
              <table:table-cell office:value-type="float" office:value="-0.001476011">
                <text:p>-0.00147601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63.886779785156">
                <text:p>563.886779785156</text:p>
              </table:table-cell>
              <table:table-cell office:value-type="float" office:value="0.006051754">
                <text:p>0.00605175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64.0048828125">
                <text:p>564.0048828125</text:p>
              </table:table-cell>
              <table:table-cell office:value-type="float" office:value="-0.0001048713">
                <text:p>-0.0001048713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64.122985839844">
                <text:p>564.122985839844</text:p>
              </table:table-cell>
              <table:table-cell office:value-type="float" office:value="-0.005753116">
                <text:p>-0.005753116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64.241088867188">
                <text:p>564.241088867188</text:p>
              </table:table-cell>
              <table:table-cell office:value-type="float" office:value="0.01485607">
                <text:p>0.0148560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64.359191894531">
                <text:p>564.359191894531</text:p>
              </table:table-cell>
              <table:table-cell office:value-type="float" office:value="0.01209884">
                <text:p>0.01209884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64.477294921875">
                <text:p>564.477294921875</text:p>
              </table:table-cell>
              <table:table-cell office:value-type="float" office:value="0.005865328">
                <text:p>0.00586532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64.595397949219">
                <text:p>564.595397949219</text:p>
              </table:table-cell>
              <table:table-cell office:value-type="float" office:value="0.01358817">
                <text:p>0.0135881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64.713500976563">
                <text:p>564.713500976563</text:p>
              </table:table-cell>
              <table:table-cell office:value-type="float" office:value="0.04140519">
                <text:p>0.0414051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64.831604003906">
                <text:p>564.831604003906</text:p>
              </table:table-cell>
              <table:table-cell office:value-type="float" office:value="0.006719291">
                <text:p>0.006719291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64.949768066406">
                <text:p>564.949768066406</text:p>
              </table:table-cell>
              <table:table-cell office:value-type="float" office:value="0.008323635">
                <text:p>0.00832363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65.06787109375">
                <text:p>565.06787109375</text:p>
              </table:table-cell>
              <table:table-cell office:value-type="float" office:value="0.01439262">
                <text:p>0.01439262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65.185974121094">
                <text:p>565.185974121094</text:p>
              </table:table-cell>
              <table:table-cell office:value-type="float" office:value="0.01051643">
                <text:p>0.01051643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65.304077148438">
                <text:p>565.304077148438</text:p>
              </table:table-cell>
              <table:table-cell office:value-type="float" office:value="-0.002271704">
                <text:p>-0.002271704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65.422241210938">
                <text:p>565.422241210938</text:p>
              </table:table-cell>
              <table:table-cell office:value-type="float" office:value="0.006006491">
                <text:p>0.00600649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65.540344238281">
                <text:p>565.540344238281</text:p>
              </table:table-cell>
              <table:table-cell office:value-type="float" office:value="0.0003376666">
                <text:p>0.0003376666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65.658508300781">
                <text:p>565.658508300781</text:p>
              </table:table-cell>
              <table:table-cell office:value-type="float" office:value="0.01310738">
                <text:p>0.01310738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65.776611328125">
                <text:p>565.776611328125</text:p>
              </table:table-cell>
              <table:table-cell office:value-type="float" office:value="0.009035913">
                <text:p>0.009035913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65.894775390625">
                <text:p>565.894775390625</text:p>
              </table:table-cell>
              <table:table-cell office:value-type="float" office:value="0.02167601">
                <text:p>0.0216760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66.012878417969">
                <text:p>566.012878417969</text:p>
              </table:table-cell>
              <table:table-cell office:value-type="float" office:value="0.01030864">
                <text:p>0.01030864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66.131042480469">
                <text:p>566.131042480469</text:p>
              </table:table-cell>
              <table:table-cell office:value-type="float" office:value="0.008354921">
                <text:p>0.00835492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66.249206542969">
                <text:p>566.249206542969</text:p>
              </table:table-cell>
              <table:table-cell office:value-type="float" office:value="0.01064203">
                <text:p>0.01064203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66.367370605469">
                <text:p>566.367370605469</text:p>
              </table:table-cell>
              <table:table-cell office:value-type="float" office:value="0.01388923">
                <text:p>0.01388923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66.485473632813">
                <text:p>566.485473632813</text:p>
              </table:table-cell>
              <table:table-cell office:value-type="float" office:value="0.001306836">
                <text:p>0.001306836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6.603637695313">
                <text:p>566.603637695313</text:p>
              </table:table-cell>
              <table:table-cell office:value-type="float" office:value="0.02817874">
                <text:p>0.0281787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66.721801757813">
                <text:p>566.721801757813</text:p>
              </table:table-cell>
              <table:table-cell office:value-type="float" office:value="0.01500909">
                <text:p>0.0150090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66.839965820313">
                <text:p>566.839965820313</text:p>
              </table:table-cell>
              <table:table-cell office:value-type="float" office:value="0.007877576">
                <text:p>0.007877576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66.958129882813">
                <text:p>566.958129882813</text:p>
              </table:table-cell>
              <table:table-cell office:value-type="float" office:value="0.0174401">
                <text:p>0.017440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67.076293945313">
                <text:p>567.076293945313</text:p>
              </table:table-cell>
              <table:table-cell office:value-type="float" office:value="0.03138116">
                <text:p>0.0313811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67.194458007813">
                <text:p>567.194458007813</text:p>
              </table:table-cell>
              <table:table-cell office:value-type="float" office:value="0.02026858">
                <text:p>0.0202685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67.312622070313">
                <text:p>567.312622070313</text:p>
              </table:table-cell>
              <table:table-cell office:value-type="float" office:value="0.01422234">
                <text:p>0.01422234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67.430847167969">
                <text:p>567.430847167969</text:p>
              </table:table-cell>
              <table:table-cell office:value-type="float" office:value="0.009362064">
                <text:p>0.00936206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67.549011230469">
                <text:p>567.549011230469</text:p>
              </table:table-cell>
              <table:table-cell office:value-type="float" office:value="0.02460131">
                <text:p>0.0246013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67.667175292969">
                <text:p>567.667175292969</text:p>
              </table:table-cell>
              <table:table-cell office:value-type="float" office:value="0.0167166">
                <text:p>0.0167166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67.785339355469">
                <text:p>567.785339355469</text:p>
              </table:table-cell>
              <table:table-cell office:value-type="float" office:value="0.01853633">
                <text:p>0.0185363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67.903564453125">
                <text:p>567.903564453125</text:p>
              </table:table-cell>
              <table:table-cell office:value-type="float" office:value="0.01198898">
                <text:p>0.0119889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68.021728515625">
                <text:p>568.021728515625</text:p>
              </table:table-cell>
              <table:table-cell office:value-type="float" office:value="0.03945509">
                <text:p>0.03945509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68.139953613281">
                <text:p>568.139953613281</text:p>
              </table:table-cell>
              <table:table-cell office:value-type="float" office:value="0.04161564">
                <text:p>0.0416156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68.258117675781">
                <text:p>568.258117675781</text:p>
              </table:table-cell>
              <table:table-cell office:value-type="float" office:value="0.007165486">
                <text:p>0.007165486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68.376342773438">
                <text:p>568.376342773438</text:p>
              </table:table-cell>
              <table:table-cell office:value-type="float" office:value="0.01304909">
                <text:p>0.01304909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68.494506835938">
                <text:p>568.494506835938</text:p>
              </table:table-cell>
              <table:table-cell office:value-type="float" office:value="0.02427332">
                <text:p>0.0242733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68.612731933594">
                <text:p>568.612731933594</text:p>
              </table:table-cell>
              <table:table-cell office:value-type="float" office:value="0.02547637">
                <text:p>0.0254763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68.73095703125">
                <text:p>568.73095703125</text:p>
              </table:table-cell>
              <table:table-cell office:value-type="float" office:value="0.002516791">
                <text:p>0.00251679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68.84912109375">
                <text:p>568.84912109375</text:p>
              </table:table-cell>
              <table:table-cell office:value-type="float" office:value="0.02137536">
                <text:p>0.02137536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68.967346191406">
                <text:p>568.967346191406</text:p>
              </table:table-cell>
              <table:table-cell office:value-type="float" office:value="0.0239387">
                <text:p>0.0239387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69.085571289063">
                <text:p>569.085571289063</text:p>
              </table:table-cell>
              <table:table-cell office:value-type="float" office:value="0.03779409">
                <text:p>0.03779409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69.203796386719">
                <text:p>569.203796386719</text:p>
              </table:table-cell>
              <table:table-cell office:value-type="float" office:value="0.005332797">
                <text:p>0.00533279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69.322021484375">
                <text:p>569.322021484375</text:p>
              </table:table-cell>
              <table:table-cell office:value-type="float" office:value="0.02021636">
                <text:p>0.0202163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69.440246582031">
                <text:p>569.440246582031</text:p>
              </table:table-cell>
              <table:table-cell office:value-type="float" office:value="0.02062581">
                <text:p>0.0206258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69.558471679688">
                <text:p>569.558471679688</text:p>
              </table:table-cell>
              <table:table-cell office:value-type="float" office:value="0.02768888">
                <text:p>0.0276888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69.676696777344">
                <text:p>569.676696777344</text:p>
              </table:table-cell>
              <table:table-cell office:value-type="float" office:value="0.02127819">
                <text:p>0.0212781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69.794921875">
                <text:p>569.794921875</text:p>
              </table:table-cell>
              <table:table-cell office:value-type="float" office:value="0.008577935">
                <text:p>0.00857793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69.913146972656">
                <text:p>569.913146972656</text:p>
              </table:table-cell>
              <table:table-cell office:value-type="float" office:value="0.008531942">
                <text:p>0.008531942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70.031372070313">
                <text:p>570.031372070313</text:p>
              </table:table-cell>
              <table:table-cell office:value-type="float" office:value="0.0159655">
                <text:p>0.015965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70.149597167969">
                <text:p>570.149597167969</text:p>
              </table:table-cell>
              <table:table-cell office:value-type="float" office:value="0.01865351">
                <text:p>0.01865351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70.267883300781">
                <text:p>570.267883300781</text:p>
              </table:table-cell>
              <table:table-cell office:value-type="float" office:value="0.004459498">
                <text:p>0.00445949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70.386108398438">
                <text:p>570.386108398438</text:p>
              </table:table-cell>
              <table:table-cell office:value-type="float" office:value="0.01675177">
                <text:p>0.0167517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70.504333496094">
                <text:p>570.504333496094</text:p>
              </table:table-cell>
              <table:table-cell office:value-type="float" office:value="0.03072931">
                <text:p>0.03072931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70.622619628906">
                <text:p>570.622619628906</text:p>
              </table:table-cell>
              <table:table-cell office:value-type="float" office:value="0.03211421">
                <text:p>0.03211421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70.740844726563">
                <text:p>570.740844726563</text:p>
              </table:table-cell>
              <table:table-cell office:value-type="float" office:value="0.01772573">
                <text:p>0.0177257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70.859130859375">
                <text:p>570.859130859375</text:p>
              </table:table-cell>
              <table:table-cell office:value-type="float" office:value="0.01403237">
                <text:p>0.0140323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70.977355957031">
                <text:p>570.977355957031</text:p>
              </table:table-cell>
              <table:table-cell office:value-type="float" office:value="0.02283518">
                <text:p>0.02283518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1.095642089844">
                <text:p>571.095642089844</text:p>
              </table:table-cell>
              <table:table-cell office:value-type="float" office:value="0.01226733">
                <text:p>0.01226733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71.213928222656">
                <text:p>571.213928222656</text:p>
              </table:table-cell>
              <table:table-cell office:value-type="float" office:value="0.02217551">
                <text:p>0.0221755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71.332153320313">
                <text:p>571.332153320313</text:p>
              </table:table-cell>
              <table:table-cell office:value-type="float" office:value="0.02372712">
                <text:p>0.0237271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71.450439453125">
                <text:p>571.450439453125</text:p>
              </table:table-cell>
              <table:table-cell office:value-type="float" office:value="0.02146394">
                <text:p>0.0214639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71.568725585938">
                <text:p>571.568725585938</text:p>
              </table:table-cell>
              <table:table-cell office:value-type="float" office:value="0.01076291">
                <text:p>0.01076291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71.68701171875">
                <text:p>571.68701171875</text:p>
              </table:table-cell>
              <table:table-cell office:value-type="float" office:value="0.02816538">
                <text:p>0.02816538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71.805297851563">
                <text:p>571.805297851563</text:p>
              </table:table-cell>
              <table:table-cell office:value-type="float" office:value="0.01681696">
                <text:p>0.01681696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71.923583984375">
                <text:p>571.923583984375</text:p>
              </table:table-cell>
              <table:table-cell office:value-type="float" office:value="0.04061412">
                <text:p>0.04061412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72.041870117188">
                <text:p>572.041870117188</text:p>
              </table:table-cell>
              <table:table-cell office:value-type="float" office:value="0.01818286">
                <text:p>0.01818286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72.16015625">
                <text:p>572.16015625</text:p>
              </table:table-cell>
              <table:table-cell office:value-type="float" office:value="0.03052302">
                <text:p>0.0305230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72.278442382813">
                <text:p>572.278442382813</text:p>
              </table:table-cell>
              <table:table-cell office:value-type="float" office:value="0.01663405">
                <text:p>0.0166340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72.396728515625">
                <text:p>572.396728515625</text:p>
              </table:table-cell>
              <table:table-cell office:value-type="float" office:value="0.01639739">
                <text:p>0.0163973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72.515014648438">
                <text:p>572.515014648438</text:p>
              </table:table-cell>
              <table:table-cell office:value-type="float" office:value="0.01421214">
                <text:p>0.01421214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72.63330078125">
                <text:p>572.63330078125</text:p>
              </table:table-cell>
              <table:table-cell office:value-type="float" office:value="0.02045506">
                <text:p>0.02045506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72.751586914063">
                <text:p>572.751586914063</text:p>
              </table:table-cell>
              <table:table-cell office:value-type="float" office:value="0.02529662">
                <text:p>0.0252966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72.869934082031">
                <text:p>572.869934082031</text:p>
              </table:table-cell>
              <table:table-cell office:value-type="float" office:value="0.01603592">
                <text:p>0.0160359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72.988220214844">
                <text:p>572.988220214844</text:p>
              </table:table-cell>
              <table:table-cell office:value-type="float" office:value="0.01489312">
                <text:p>0.0148931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73.106506347656">
                <text:p>573.106506347656</text:p>
              </table:table-cell>
              <table:table-cell office:value-type="float" office:value="0.02948615">
                <text:p>0.0294861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73.224853515625">
                <text:p>573.224853515625</text:p>
              </table:table-cell>
              <table:table-cell office:value-type="float" office:value="0.02217394">
                <text:p>0.0221739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73.343139648438">
                <text:p>573.343139648438</text:p>
              </table:table-cell>
              <table:table-cell office:value-type="float" office:value="0.02384781">
                <text:p>0.02384781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73.461486816406">
                <text:p>573.461486816406</text:p>
              </table:table-cell>
              <table:table-cell office:value-type="float" office:value="0.03331537">
                <text:p>0.0333153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73.579772949219">
                <text:p>573.579772949219</text:p>
              </table:table-cell>
              <table:table-cell office:value-type="float" office:value="0.02199276">
                <text:p>0.0219927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73.698120117188">
                <text:p>573.698120117188</text:p>
              </table:table-cell>
              <table:table-cell office:value-type="float" office:value="0.02737216">
                <text:p>0.0273721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73.81640625">
                <text:p>573.81640625</text:p>
              </table:table-cell>
              <table:table-cell office:value-type="float" office:value="0.02110909">
                <text:p>0.02110909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73.934753417969">
                <text:p>573.934753417969</text:p>
              </table:table-cell>
              <table:table-cell office:value-type="float" office:value="0.02412132">
                <text:p>0.0241213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74.053100585938">
                <text:p>574.053100585938</text:p>
              </table:table-cell>
              <table:table-cell office:value-type="float" office:value="0.02127773">
                <text:p>0.02127773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74.171447753906">
                <text:p>574.171447753906</text:p>
              </table:table-cell>
              <table:table-cell office:value-type="float" office:value="0.02212011">
                <text:p>0.0221201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74.289733886719">
                <text:p>574.289733886719</text:p>
              </table:table-cell>
              <table:table-cell office:value-type="float" office:value="0.02022603">
                <text:p>0.0202260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74.408081054688">
                <text:p>574.408081054688</text:p>
              </table:table-cell>
              <table:table-cell office:value-type="float" office:value="0.02958162">
                <text:p>0.0295816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74.526428222656">
                <text:p>574.526428222656</text:p>
              </table:table-cell>
              <table:table-cell office:value-type="float" office:value="0.02830537">
                <text:p>0.02830537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74.644775390625">
                <text:p>574.644775390625</text:p>
              </table:table-cell>
              <table:table-cell office:value-type="float" office:value="0.02788259">
                <text:p>0.0278825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74.763122558594">
                <text:p>574.763122558594</text:p>
              </table:table-cell>
              <table:table-cell office:value-type="float" office:value="0.03161294">
                <text:p>0.0316129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74.881469726563">
                <text:p>574.881469726563</text:p>
              </table:table-cell>
              <table:table-cell office:value-type="float" office:value="0.03404423">
                <text:p>0.0340442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74.999816894531">
                <text:p>574.999816894531</text:p>
              </table:table-cell>
              <table:table-cell office:value-type="float" office:value="0.02364516">
                <text:p>0.0236451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75.1181640625">
                <text:p>575.1181640625</text:p>
              </table:table-cell>
              <table:table-cell office:value-type="float" office:value="0.04836864">
                <text:p>0.0483686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75.236572265625">
                <text:p>575.236572265625</text:p>
              </table:table-cell>
              <table:table-cell office:value-type="float" office:value="0.02379821">
                <text:p>0.0237982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75.354919433594">
                <text:p>575.354919433594</text:p>
              </table:table-cell>
              <table:table-cell office:value-type="float" office:value="0.03989418">
                <text:p>0.0398941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75.473266601563">
                <text:p>575.473266601563</text:p>
              </table:table-cell>
              <table:table-cell office:value-type="float" office:value="0.02345228">
                <text:p>0.0234522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75.591613769531">
                <text:p>575.591613769531</text:p>
              </table:table-cell>
              <table:table-cell office:value-type="float" office:value="0.02387463">
                <text:p>0.0238746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75.710021972656">
                <text:p>575.710021972656</text:p>
              </table:table-cell>
              <table:table-cell office:value-type="float" office:value="0.02458495">
                <text:p>0.0245849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75.828369140625">
                <text:p>575.828369140625</text:p>
              </table:table-cell>
              <table:table-cell office:value-type="float" office:value="0.02639344">
                <text:p>0.0263934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75.94677734375">
                <text:p>575.94677734375</text:p>
              </table:table-cell>
              <table:table-cell office:value-type="float" office:value="0.03511708">
                <text:p>0.0351170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76.065124511719">
                <text:p>576.065124511719</text:p>
              </table:table-cell>
              <table:table-cell office:value-type="float" office:value="0.03275334">
                <text:p>0.0327533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76.183532714844">
                <text:p>576.183532714844</text:p>
              </table:table-cell>
              <table:table-cell office:value-type="float" office:value="0.02486831">
                <text:p>0.02486831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76.301879882813">
                <text:p>576.301879882813</text:p>
              </table:table-cell>
              <table:table-cell office:value-type="float" office:value="0.03883235">
                <text:p>0.0388323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76.420288085938">
                <text:p>576.420288085938</text:p>
              </table:table-cell>
              <table:table-cell office:value-type="float" office:value="0.04145585">
                <text:p>0.0414558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76.538635253906">
                <text:p>576.538635253906</text:p>
              </table:table-cell>
              <table:table-cell office:value-type="float" office:value="0.02885832">
                <text:p>0.0288583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76.657043457031">
                <text:p>576.657043457031</text:p>
              </table:table-cell>
              <table:table-cell office:value-type="float" office:value="0.04657962">
                <text:p>0.0465796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6.775451660156">
                <text:p>576.775451660156</text:p>
              </table:table-cell>
              <table:table-cell office:value-type="float" office:value="0.0247267">
                <text:p>0.024726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76.893859863281">
                <text:p>576.893859863281</text:p>
              </table:table-cell>
              <table:table-cell office:value-type="float" office:value="0.03060858">
                <text:p>0.03060858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77.012268066406">
                <text:p>577.012268066406</text:p>
              </table:table-cell>
              <table:table-cell office:value-type="float" office:value="0.04165418">
                <text:p>0.04165418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77.130615234375">
                <text:p>577.130615234375</text:p>
              </table:table-cell>
              <table:table-cell office:value-type="float" office:value="0.03540963">
                <text:p>0.0354096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77.2490234375">
                <text:p>577.2490234375</text:p>
              </table:table-cell>
              <table:table-cell office:value-type="float" office:value="0.04009482">
                <text:p>0.0400948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77.367431640625">
                <text:p>577.367431640625</text:p>
              </table:table-cell>
              <table:table-cell office:value-type="float" office:value="0.02601592">
                <text:p>0.0260159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77.48583984375">
                <text:p>577.48583984375</text:p>
              </table:table-cell>
              <table:table-cell office:value-type="float" office:value="0.04058742">
                <text:p>0.0405874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577.604248046875">
                <text:p>577.604248046875</text:p>
              </table:table-cell>
              <table:table-cell office:value-type="float" office:value="0.02763785">
                <text:p>0.0276378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77.722717285156">
                <text:p>577.722717285156</text:p>
              </table:table-cell>
              <table:table-cell office:value-type="float" office:value="0.03141243">
                <text:p>0.03141243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77.841125488281">
                <text:p>577.841125488281</text:p>
              </table:table-cell>
              <table:table-cell office:value-type="float" office:value="0.03576389">
                <text:p>0.0357638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77.959533691406">
                <text:p>577.959533691406</text:p>
              </table:table-cell>
              <table:table-cell office:value-type="float" office:value="0.03174853">
                <text:p>0.03174853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78.077941894531">
                <text:p>578.077941894531</text:p>
              </table:table-cell>
              <table:table-cell office:value-type="float" office:value="0.0514696">
                <text:p>0.0514696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78.196350097656">
                <text:p>578.196350097656</text:p>
              </table:table-cell>
              <table:table-cell office:value-type="float" office:value="0.03230654">
                <text:p>0.03230654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578.314819335938">
                <text:p>578.314819335938</text:p>
              </table:table-cell>
              <table:table-cell office:value-type="float" office:value="0.03263739">
                <text:p>0.0326373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78.433227539063">
                <text:p>578.433227539063</text:p>
              </table:table-cell>
              <table:table-cell office:value-type="float" office:value="0.03493097">
                <text:p>0.03493097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78.551635742188">
                <text:p>578.551635742188</text:p>
              </table:table-cell>
              <table:table-cell office:value-type="float" office:value="0.03610075">
                <text:p>0.0361007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578.670104980469">
                <text:p>578.670104980469</text:p>
              </table:table-cell>
              <table:table-cell office:value-type="float" office:value="0.04684584">
                <text:p>0.0468458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78.788513183594">
                <text:p>578.788513183594</text:p>
              </table:table-cell>
              <table:table-cell office:value-type="float" office:value="0.06562133">
                <text:p>0.06562133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78.906982421875">
                <text:p>578.906982421875</text:p>
              </table:table-cell>
              <table:table-cell office:value-type="float" office:value="0.02996487">
                <text:p>0.0299648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79.025451660156">
                <text:p>579.025451660156</text:p>
              </table:table-cell>
              <table:table-cell office:value-type="float" office:value="0.03676038">
                <text:p>0.03676038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79.143859863281">
                <text:p>579.143859863281</text:p>
              </table:table-cell>
              <table:table-cell office:value-type="float" office:value="0.04208477">
                <text:p>0.04208477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9.262329101563">
                <text:p>579.262329101563</text:p>
              </table:table-cell>
              <table:table-cell office:value-type="float" office:value="0.03615757">
                <text:p>0.0361575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79.380798339844">
                <text:p>579.380798339844</text:p>
              </table:table-cell>
              <table:table-cell office:value-type="float" office:value="0.04069564">
                <text:p>0.0406956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79.499206542969">
                <text:p>579.499206542969</text:p>
              </table:table-cell>
              <table:table-cell office:value-type="float" office:value="0.03455324">
                <text:p>0.0345532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79.61767578125">
                <text:p>579.61767578125</text:p>
              </table:table-cell>
              <table:table-cell office:value-type="float" office:value="0.03583046">
                <text:p>0.0358304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79.736145019531">
                <text:p>579.736145019531</text:p>
              </table:table-cell>
              <table:table-cell office:value-type="float" office:value="0.03857794">
                <text:p>0.03857794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79.854614257813">
                <text:p>579.854614257813</text:p>
              </table:table-cell>
              <table:table-cell office:value-type="float" office:value="0.03216387">
                <text:p>0.03216387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79.973083496094">
                <text:p>579.973083496094</text:p>
              </table:table-cell>
              <table:table-cell office:value-type="float" office:value="0.03455036">
                <text:p>0.03455036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80.091552734375">
                <text:p>580.091552734375</text:p>
              </table:table-cell>
              <table:table-cell office:value-type="float" office:value="0.04500944">
                <text:p>0.0450094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80.210021972656">
                <text:p>580.210021972656</text:p>
              </table:table-cell>
              <table:table-cell office:value-type="float" office:value="0.05513754">
                <text:p>0.05513754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80.328491210938">
                <text:p>580.328491210938</text:p>
              </table:table-cell>
              <table:table-cell office:value-type="float" office:value="0.04502122">
                <text:p>0.0450212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80.446960449219">
                <text:p>580.446960449219</text:p>
              </table:table-cell>
              <table:table-cell office:value-type="float" office:value="0.04000947">
                <text:p>0.04000947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80.5654296875">
                <text:p>580.5654296875</text:p>
              </table:table-cell>
              <table:table-cell office:value-type="float" office:value="0.03948479">
                <text:p>0.03948479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80.683898925781">
                <text:p>580.683898925781</text:p>
              </table:table-cell>
              <table:table-cell office:value-type="float" office:value="0.05179858">
                <text:p>0.0517985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80.802368164063">
                <text:p>580.802368164063</text:p>
              </table:table-cell>
              <table:table-cell office:value-type="float" office:value="0.04506882">
                <text:p>0.0450688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80.9208984375">
                <text:p>580.9208984375</text:p>
              </table:table-cell>
              <table:table-cell office:value-type="float" office:value="0.0424371">
                <text:p>0.042437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81.039367675781">
                <text:p>581.039367675781</text:p>
              </table:table-cell>
              <table:table-cell office:value-type="float" office:value="0.04115867">
                <text:p>0.04115867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81.157836914063">
                <text:p>581.157836914063</text:p>
              </table:table-cell>
              <table:table-cell office:value-type="float" office:value="0.05284372">
                <text:p>0.0528437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1.2763671875">
                <text:p>581.2763671875</text:p>
              </table:table-cell>
              <table:table-cell office:value-type="float" office:value="0.0568631">
                <text:p>0.056863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81.394836425781">
                <text:p>581.394836425781</text:p>
              </table:table-cell>
              <table:table-cell office:value-type="float" office:value="0.04750898">
                <text:p>0.0475089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81.513366699219">
                <text:p>581.513366699219</text:p>
              </table:table-cell>
              <table:table-cell office:value-type="float" office:value="0.05422754">
                <text:p>0.05422754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81.6318359375">
                <text:p>581.6318359375</text:p>
              </table:table-cell>
              <table:table-cell office:value-type="float" office:value="0.04182768">
                <text:p>0.04182768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81.750366210938">
                <text:p>581.750366210938</text:p>
              </table:table-cell>
              <table:table-cell office:value-type="float" office:value="0.03750562">
                <text:p>0.0375056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581.868835449219">
                <text:p>581.868835449219</text:p>
              </table:table-cell>
              <table:table-cell office:value-type="float" office:value="0.04190793">
                <text:p>0.0419079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81.987365722656">
                <text:p>581.987365722656</text:p>
              </table:table-cell>
              <table:table-cell office:value-type="float" office:value="0.04311868">
                <text:p>0.0431186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582.105895996094">
                <text:p>582.105895996094</text:p>
              </table:table-cell>
              <table:table-cell office:value-type="float" office:value="0.04616073">
                <text:p>0.04616073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582.224365234375">
                <text:p>582.224365234375</text:p>
              </table:table-cell>
              <table:table-cell office:value-type="float" office:value="0.04910393">
                <text:p>0.04910393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82.342895507813">
                <text:p>582.342895507813</text:p>
              </table:table-cell>
              <table:table-cell office:value-type="float" office:value="0.04375469">
                <text:p>0.0437546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582.46142578125">
                <text:p>582.46142578125</text:p>
              </table:table-cell>
              <table:table-cell office:value-type="float" office:value="0.04744834">
                <text:p>0.0474483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82.579956054688">
                <text:p>582.579956054688</text:p>
              </table:table-cell>
              <table:table-cell office:value-type="float" office:value="0.04240366">
                <text:p>0.04240366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82.698486328125">
                <text:p>582.698486328125</text:p>
              </table:table-cell>
              <table:table-cell office:value-type="float" office:value="0.04010118">
                <text:p>0.04010118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82.817016601563">
                <text:p>582.817016601563</text:p>
              </table:table-cell>
              <table:table-cell office:value-type="float" office:value="0.04870084">
                <text:p>0.0487008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582.935546875">
                <text:p>582.935546875</text:p>
              </table:table-cell>
              <table:table-cell office:value-type="float" office:value="0.03803461">
                <text:p>0.0380346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83.054077148438">
                <text:p>583.054077148438</text:p>
              </table:table-cell>
              <table:table-cell office:value-type="float" office:value="0.04244874">
                <text:p>0.04244874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83.172607421875">
                <text:p>583.172607421875</text:p>
              </table:table-cell>
              <table:table-cell office:value-type="float" office:value="0.07300084">
                <text:p>0.07300084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83.291137695313">
                <text:p>583.291137695313</text:p>
              </table:table-cell>
              <table:table-cell office:value-type="float" office:value="0.04566813">
                <text:p>0.04566813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83.40966796875">
                <text:p>583.40966796875</text:p>
              </table:table-cell>
              <table:table-cell office:value-type="float" office:value="0.04043759">
                <text:p>0.04043759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83.528198242188">
                <text:p>583.528198242188</text:p>
              </table:table-cell>
              <table:table-cell office:value-type="float" office:value="0.04613262">
                <text:p>0.0461326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83.646789550781">
                <text:p>583.646789550781</text:p>
              </table:table-cell>
              <table:table-cell office:value-type="float" office:value="0.04108874">
                <text:p>0.0410887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83.765319824219">
                <text:p>583.765319824219</text:p>
              </table:table-cell>
              <table:table-cell office:value-type="float" office:value="0.03961689">
                <text:p>0.0396168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83.883850097656">
                <text:p>583.883850097656</text:p>
              </table:table-cell>
              <table:table-cell office:value-type="float" office:value="0.05212591">
                <text:p>0.0521259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84.00244140625">
                <text:p>584.00244140625</text:p>
              </table:table-cell>
              <table:table-cell office:value-type="float" office:value="0.03667344">
                <text:p>0.0366734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84.120971679688">
                <text:p>584.120971679688</text:p>
              </table:table-cell>
              <table:table-cell office:value-type="float" office:value="0.052891">
                <text:p>0.05289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84.239501953125">
                <text:p>584.239501953125</text:p>
              </table:table-cell>
              <table:table-cell office:value-type="float" office:value="0.04900713">
                <text:p>0.04900713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84.358093261719">
                <text:p>584.358093261719</text:p>
              </table:table-cell>
              <table:table-cell office:value-type="float" office:value="0.04421486">
                <text:p>0.04421486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84.476623535156">
                <text:p>584.476623535156</text:p>
              </table:table-cell>
              <table:table-cell office:value-type="float" office:value="0.05159625">
                <text:p>0.0515962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84.59521484375">
                <text:p>584.59521484375</text:p>
              </table:table-cell>
              <table:table-cell office:value-type="float" office:value="0.05430703">
                <text:p>0.0543070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84.713806152344">
                <text:p>584.713806152344</text:p>
              </table:table-cell>
              <table:table-cell office:value-type="float" office:value="0.04735486">
                <text:p>0.04735486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84.832336425781">
                <text:p>584.832336425781</text:p>
              </table:table-cell>
              <table:table-cell office:value-type="float" office:value="0.04797153">
                <text:p>0.04797153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84.950927734375">
                <text:p>584.950927734375</text:p>
              </table:table-cell>
              <table:table-cell office:value-type="float" office:value="0.04450079">
                <text:p>0.04450079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85.069519042969">
                <text:p>585.069519042969</text:p>
              </table:table-cell>
              <table:table-cell office:value-type="float" office:value="0.03597213">
                <text:p>0.03597213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85.188110351563">
                <text:p>585.188110351563</text:p>
              </table:table-cell>
              <table:table-cell office:value-type="float" office:value="0.05033754">
                <text:p>0.0503375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85.306640625">
                <text:p>585.306640625</text:p>
              </table:table-cell>
              <table:table-cell office:value-type="float" office:value="0.05285322">
                <text:p>0.0528532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85.425231933594">
                <text:p>585.425231933594</text:p>
              </table:table-cell>
              <table:table-cell office:value-type="float" office:value="0.04365758">
                <text:p>0.04365758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5.543823242188">
                <text:p>585.543823242188</text:p>
              </table:table-cell>
              <table:table-cell office:value-type="float" office:value="0.06803139">
                <text:p>0.0680313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85.662414550781">
                <text:p>585.662414550781</text:p>
              </table:table-cell>
              <table:table-cell office:value-type="float" office:value="0.03764842">
                <text:p>0.03764842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85.781005859375">
                <text:p>585.781005859375</text:p>
              </table:table-cell>
              <table:table-cell office:value-type="float" office:value="0.04673442">
                <text:p>0.04673442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85.899597167969">
                <text:p>585.899597167969</text:p>
              </table:table-cell>
              <table:table-cell office:value-type="float" office:value="0.05162077">
                <text:p>0.05162077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86.018188476563">
                <text:p>586.018188476563</text:p>
              </table:table-cell>
              <table:table-cell office:value-type="float" office:value="0.03845003">
                <text:p>0.03845003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86.136779785156">
                <text:p>586.136779785156</text:p>
              </table:table-cell>
              <table:table-cell office:value-type="float" office:value="0.04045988">
                <text:p>0.0404598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86.255432128906">
                <text:p>586.255432128906</text:p>
              </table:table-cell>
              <table:table-cell office:value-type="float" office:value="0.04902415">
                <text:p>0.0490241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86.3740234375">
                <text:p>586.3740234375</text:p>
              </table:table-cell>
              <table:table-cell office:value-type="float" office:value="0.05016042">
                <text:p>0.0501604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86.492614746094">
                <text:p>586.492614746094</text:p>
              </table:table-cell>
              <table:table-cell office:value-type="float" office:value="0.04888985">
                <text:p>0.0488898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86.611206054688">
                <text:p>586.611206054688</text:p>
              </table:table-cell>
              <table:table-cell office:value-type="float" office:value="0.05741125">
                <text:p>0.0574112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86.729858398438">
                <text:p>586.729858398438</text:p>
              </table:table-cell>
              <table:table-cell office:value-type="float" office:value="0.05307242">
                <text:p>0.0530724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86.848449707031">
                <text:p>586.848449707031</text:p>
              </table:table-cell>
              <table:table-cell office:value-type="float" office:value="0.05600079">
                <text:p>0.05600079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86.967041015625">
                <text:p>586.967041015625</text:p>
              </table:table-cell>
              <table:table-cell office:value-type="float" office:value="0.0423112">
                <text:p>0.042311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87.085693359375">
                <text:p>587.085693359375</text:p>
              </table:table-cell>
              <table:table-cell office:value-type="float" office:value="0.04380921">
                <text:p>0.04380921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87.204284667969">
                <text:p>587.204284667969</text:p>
              </table:table-cell>
              <table:table-cell office:value-type="float" office:value="0.05588272">
                <text:p>0.0558827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87.322937011719">
                <text:p>587.322937011719</text:p>
              </table:table-cell>
              <table:table-cell office:value-type="float" office:value="0.04952605">
                <text:p>0.0495260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87.441589355469">
                <text:p>587.441589355469</text:p>
              </table:table-cell>
              <table:table-cell office:value-type="float" office:value="0.05540685">
                <text:p>0.0554068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87.560180664063">
                <text:p>587.560180664063</text:p>
              </table:table-cell>
              <table:table-cell office:value-type="float" office:value="0.03880394">
                <text:p>0.03880394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87.678833007813">
                <text:p>587.678833007813</text:p>
              </table:table-cell>
              <table:table-cell office:value-type="float" office:value="0.04970084">
                <text:p>0.04970084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87.797424316406">
                <text:p>587.797424316406</text:p>
              </table:table-cell>
              <table:table-cell office:value-type="float" office:value="0.05415235">
                <text:p>0.0541523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87.916076660156">
                <text:p>587.916076660156</text:p>
              </table:table-cell>
              <table:table-cell office:value-type="float" office:value="0.05742804">
                <text:p>0.05742804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88.034729003906">
                <text:p>588.034729003906</text:p>
              </table:table-cell>
              <table:table-cell office:value-type="float" office:value="0.04978712">
                <text:p>0.04978712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88.153381347656">
                <text:p>588.153381347656</text:p>
              </table:table-cell>
              <table:table-cell office:value-type="float" office:value="0.04907065">
                <text:p>0.0490706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88.272033691406">
                <text:p>588.272033691406</text:p>
              </table:table-cell>
              <table:table-cell office:value-type="float" office:value="0.05135238">
                <text:p>0.05135238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88.390686035156">
                <text:p>588.390686035156</text:p>
              </table:table-cell>
              <table:table-cell office:value-type="float" office:value="0.06025155">
                <text:p>0.0602515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88.509338378906">
                <text:p>588.509338378906</text:p>
              </table:table-cell>
              <table:table-cell office:value-type="float" office:value="0.04784577">
                <text:p>0.0478457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88.627990722656">
                <text:p>588.627990722656</text:p>
              </table:table-cell>
              <table:table-cell office:value-type="float" office:value="0.04274376">
                <text:p>0.04274376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88.746643066406">
                <text:p>588.746643066406</text:p>
              </table:table-cell>
              <table:table-cell office:value-type="float" office:value="0.04105941">
                <text:p>0.04105941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88.865295410156">
                <text:p>588.865295410156</text:p>
              </table:table-cell>
              <table:table-cell office:value-type="float" office:value="0.04619792">
                <text:p>0.0461979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88.983947753906">
                <text:p>588.983947753906</text:p>
              </table:table-cell>
              <table:table-cell office:value-type="float" office:value="0.04208411">
                <text:p>0.0420841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89.102600097656">
                <text:p>589.102600097656</text:p>
              </table:table-cell>
              <table:table-cell office:value-type="float" office:value="0.05273552">
                <text:p>0.0527355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89.221252441406">
                <text:p>589.221252441406</text:p>
              </table:table-cell>
              <table:table-cell office:value-type="float" office:value="0.03908562">
                <text:p>0.03908562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89.339904785156">
                <text:p>589.339904785156</text:p>
              </table:table-cell>
              <table:table-cell office:value-type="float" office:value="0.04387987">
                <text:p>0.04387987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89.458618164063">
                <text:p>589.458618164063</text:p>
              </table:table-cell>
              <table:table-cell office:value-type="float" office:value="0.04256644">
                <text:p>0.04256644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89.577270507813">
                <text:p>589.577270507813</text:p>
              </table:table-cell>
              <table:table-cell office:value-type="float" office:value="0.03807724">
                <text:p>0.0380772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89.695922851563">
                <text:p>589.695922851563</text:p>
              </table:table-cell>
              <table:table-cell office:value-type="float" office:value="0.05202462">
                <text:p>0.0520246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89.814636230469">
                <text:p>589.814636230469</text:p>
              </table:table-cell>
              <table:table-cell office:value-type="float" office:value="0.03912751">
                <text:p>0.03912751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89.933288574219">
                <text:p>589.933288574219</text:p>
              </table:table-cell>
              <table:table-cell office:value-type="float" office:value="0.04617858">
                <text:p>0.04617858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90.052001953125">
                <text:p>590.052001953125</text:p>
              </table:table-cell>
              <table:table-cell office:value-type="float" office:value="0.04042599">
                <text:p>0.04042599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90.170654296875">
                <text:p>590.170654296875</text:p>
              </table:table-cell>
              <table:table-cell office:value-type="float" office:value="0.0456641">
                <text:p>0.0456641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90.289367675781">
                <text:p>590.289367675781</text:p>
              </table:table-cell>
              <table:table-cell office:value-type="float" office:value="0.03709556">
                <text:p>0.03709556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90.408020019531">
                <text:p>590.408020019531</text:p>
              </table:table-cell>
              <table:table-cell office:value-type="float" office:value="0.08399249">
                <text:p>0.08399249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90.526733398438">
                <text:p>590.526733398438</text:p>
              </table:table-cell>
              <table:table-cell office:value-type="float" office:value="0.05169294">
                <text:p>0.0516929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90.645446777344">
                <text:p>590.645446777344</text:p>
              </table:table-cell>
              <table:table-cell office:value-type="float" office:value="0.03865507">
                <text:p>0.03865507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90.764099121094">
                <text:p>590.764099121094</text:p>
              </table:table-cell>
              <table:table-cell office:value-type="float" office:value="0.04017843">
                <text:p>0.04017843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90.8828125">
                <text:p>590.8828125</text:p>
              </table:table-cell>
              <table:table-cell office:value-type="float" office:value="0.05061047">
                <text:p>0.05061047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91.001525878906">
                <text:p>591.001525878906</text:p>
              </table:table-cell>
              <table:table-cell office:value-type="float" office:value="0.05303752">
                <text:p>0.0530375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91.120239257813">
                <text:p>591.120239257813</text:p>
              </table:table-cell>
              <table:table-cell office:value-type="float" office:value="0.03950573">
                <text:p>0.03950573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91.238891601563">
                <text:p>591.238891601563</text:p>
              </table:table-cell>
              <table:table-cell office:value-type="float" office:value="0.03898382">
                <text:p>0.03898382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91.357604980469">
                <text:p>591.357604980469</text:p>
              </table:table-cell>
              <table:table-cell office:value-type="float" office:value="0.049072">
                <text:p>0.049072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1.476318359375">
                <text:p>591.476318359375</text:p>
              </table:table-cell>
              <table:table-cell office:value-type="float" office:value="0.04086078">
                <text:p>0.04086078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91.595031738281">
                <text:p>591.595031738281</text:p>
              </table:table-cell>
              <table:table-cell office:value-type="float" office:value="0.05661986">
                <text:p>0.05661986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91.713745117188">
                <text:p>591.713745117188</text:p>
              </table:table-cell>
              <table:table-cell office:value-type="float" office:value="0.04308109">
                <text:p>0.0430810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91.832458496094">
                <text:p>591.832458496094</text:p>
              </table:table-cell>
              <table:table-cell office:value-type="float" office:value="0.05555413">
                <text:p>0.05555413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91.951232910156">
                <text:p>591.951232910156</text:p>
              </table:table-cell>
              <table:table-cell office:value-type="float" office:value="0.04297845">
                <text:p>0.0429784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92.069946289063">
                <text:p>592.069946289063</text:p>
              </table:table-cell>
              <table:table-cell office:value-type="float" office:value="0.04776141">
                <text:p>0.04776141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92.188659667969">
                <text:p>592.188659667969</text:p>
              </table:table-cell>
              <table:table-cell office:value-type="float" office:value="0.03661172">
                <text:p>0.03661172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92.307373046875">
                <text:p>592.307373046875</text:p>
              </table:table-cell>
              <table:table-cell office:value-type="float" office:value="0.03714456">
                <text:p>0.03714456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92.426086425781">
                <text:p>592.426086425781</text:p>
              </table:table-cell>
              <table:table-cell office:value-type="float" office:value="0.06017533">
                <text:p>0.06017533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92.544860839844">
                <text:p>592.544860839844</text:p>
              </table:table-cell>
              <table:table-cell office:value-type="float" office:value="0.03711977">
                <text:p>0.03711977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92.66357421875">
                <text:p>592.66357421875</text:p>
              </table:table-cell>
              <table:table-cell office:value-type="float" office:value="0.03606366">
                <text:p>0.0360636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92.782348632813">
                <text:p>592.782348632813</text:p>
              </table:table-cell>
              <table:table-cell office:value-type="float" office:value="0.03579972">
                <text:p>0.0357997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92.901062011719">
                <text:p>592.901062011719</text:p>
              </table:table-cell>
              <table:table-cell office:value-type="float" office:value="0.0406591">
                <text:p>0.040659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93.019775390625">
                <text:p>593.019775390625</text:p>
              </table:table-cell>
              <table:table-cell office:value-type="float" office:value="0.035426">
                <text:p>0.035426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93.138549804688">
                <text:p>593.138549804688</text:p>
              </table:table-cell>
              <table:table-cell office:value-type="float" office:value="0.03318584">
                <text:p>0.03318584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93.257263183594">
                <text:p>593.257263183594</text:p>
              </table:table-cell>
              <table:table-cell office:value-type="float" office:value="0.03181082">
                <text:p>0.0318108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93.376037597656">
                <text:p>593.376037597656</text:p>
              </table:table-cell>
              <table:table-cell office:value-type="float" office:value="0.0287078">
                <text:p>0.0287078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93.494812011719">
                <text:p>593.494812011719</text:p>
              </table:table-cell>
              <table:table-cell office:value-type="float" office:value="0.0459458">
                <text:p>0.045945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93.613525390625">
                <text:p>593.613525390625</text:p>
              </table:table-cell>
              <table:table-cell office:value-type="float" office:value="0.03450427">
                <text:p>0.03450427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93.732299804688">
                <text:p>593.732299804688</text:p>
              </table:table-cell>
              <table:table-cell office:value-type="float" office:value="0.03689798">
                <text:p>0.0368979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93.85107421875">
                <text:p>593.85107421875</text:p>
              </table:table-cell>
              <table:table-cell office:value-type="float" office:value="0.03797778">
                <text:p>0.0379777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93.969848632813">
                <text:p>593.969848632813</text:p>
              </table:table-cell>
              <table:table-cell office:value-type="float" office:value="0.03600129">
                <text:p>0.0360012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94.088562011719">
                <text:p>594.088562011719</text:p>
              </table:table-cell>
              <table:table-cell office:value-type="float" office:value="0.03494311">
                <text:p>0.03494311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94.207336425781">
                <text:p>594.207336425781</text:p>
              </table:table-cell>
              <table:table-cell office:value-type="float" office:value="0.03849901">
                <text:p>0.0384990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94.326110839844">
                <text:p>594.326110839844</text:p>
              </table:table-cell>
              <table:table-cell office:value-type="float" office:value="0.04293739">
                <text:p>0.04293739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94.444885253906">
                <text:p>594.444885253906</text:p>
              </table:table-cell>
              <table:table-cell office:value-type="float" office:value="0.0313203">
                <text:p>0.031320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94.563659667969">
                <text:p>594.563659667969</text:p>
              </table:table-cell>
              <table:table-cell office:value-type="float" office:value="0.03525754">
                <text:p>0.03525754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94.682434082031">
                <text:p>594.682434082031</text:p>
              </table:table-cell>
              <table:table-cell office:value-type="float" office:value="0.04043788">
                <text:p>0.04043788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94.801208496094">
                <text:p>594.801208496094</text:p>
              </table:table-cell>
              <table:table-cell office:value-type="float" office:value="0.0371217">
                <text:p>0.037121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94.919982910156">
                <text:p>594.919982910156</text:p>
              </table:table-cell>
              <table:table-cell office:value-type="float" office:value="0.03449475">
                <text:p>0.0344947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95.038818359375">
                <text:p>595.038818359375</text:p>
              </table:table-cell>
              <table:table-cell office:value-type="float" office:value="0.03932664">
                <text:p>0.03932664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95.157592773438">
                <text:p>595.157592773438</text:p>
              </table:table-cell>
              <table:table-cell office:value-type="float" office:value="0.04999144">
                <text:p>0.0499914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95.2763671875">
                <text:p>595.2763671875</text:p>
              </table:table-cell>
              <table:table-cell office:value-type="float" office:value="0.0631806">
                <text:p>0.063180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95.395141601563">
                <text:p>595.395141601563</text:p>
              </table:table-cell>
              <table:table-cell office:value-type="float" office:value="0.03960947">
                <text:p>0.03960947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95.513916015625">
                <text:p>595.513916015625</text:p>
              </table:table-cell>
              <table:table-cell office:value-type="float" office:value="0.0478858">
                <text:p>0.0478858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95.632751464844">
                <text:p>595.632751464844</text:p>
              </table:table-cell>
              <table:table-cell office:value-type="float" office:value="0.0308542">
                <text:p>0.030854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95.751525878906">
                <text:p>595.751525878906</text:p>
              </table:table-cell>
              <table:table-cell office:value-type="float" office:value="0.03613156">
                <text:p>0.03613156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95.870361328125">
                <text:p>595.870361328125</text:p>
              </table:table-cell>
              <table:table-cell office:value-type="float" office:value="0.03490805">
                <text:p>0.0349080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95.989135742188">
                <text:p>595.989135742188</text:p>
              </table:table-cell>
              <table:table-cell office:value-type="float" office:value="0.04483182">
                <text:p>0.04483182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96.107971191406">
                <text:p>596.107971191406</text:p>
              </table:table-cell>
              <table:table-cell office:value-type="float" office:value="0.03689303">
                <text:p>0.03689303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96.226745605469">
                <text:p>596.226745605469</text:p>
              </table:table-cell>
              <table:table-cell office:value-type="float" office:value="0.0415233">
                <text:p>0.0415233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96.345581054688">
                <text:p>596.345581054688</text:p>
              </table:table-cell>
              <table:table-cell office:value-type="float" office:value="0.03450643">
                <text:p>0.0345064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96.46435546875">
                <text:p>596.46435546875</text:p>
              </table:table-cell>
              <table:table-cell office:value-type="float" office:value="0.04990047">
                <text:p>0.04990047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96.583190917969">
                <text:p>596.583190917969</text:p>
              </table:table-cell>
              <table:table-cell office:value-type="float" office:value="0.03486912">
                <text:p>0.03486912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96.702026367188">
                <text:p>596.702026367188</text:p>
              </table:table-cell>
              <table:table-cell office:value-type="float" office:value="0.03919427">
                <text:p>0.03919427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96.82080078125">
                <text:p>596.82080078125</text:p>
              </table:table-cell>
              <table:table-cell office:value-type="float" office:value="0.03577431">
                <text:p>0.0357743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96.939636230469">
                <text:p>596.939636230469</text:p>
              </table:table-cell>
              <table:table-cell office:value-type="float" office:value="0.0324037">
                <text:p>0.0324037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97.058471679688">
                <text:p>597.058471679688</text:p>
              </table:table-cell>
              <table:table-cell office:value-type="float" office:value="0.03695567">
                <text:p>0.03695567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97.177307128906">
                <text:p>597.177307128906</text:p>
              </table:table-cell>
              <table:table-cell office:value-type="float" office:value="0.03421612">
                <text:p>0.0342161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97.296142578125">
                <text:p>597.296142578125</text:p>
              </table:table-cell>
              <table:table-cell office:value-type="float" office:value="0.04831388">
                <text:p>0.04831388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97.414978027344">
                <text:p>597.414978027344</text:p>
              </table:table-cell>
              <table:table-cell office:value-type="float" office:value="0.03504361">
                <text:p>0.0350436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97.533752441406">
                <text:p>597.533752441406</text:p>
              </table:table-cell>
              <table:table-cell office:value-type="float" office:value="0.02886068">
                <text:p>0.02886068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97.652587890625">
                <text:p>597.652587890625</text:p>
              </table:table-cell>
              <table:table-cell office:value-type="float" office:value="0.05711151">
                <text:p>0.0571115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97.771423339844">
                <text:p>597.771423339844</text:p>
              </table:table-cell>
              <table:table-cell office:value-type="float" office:value="0.03957182">
                <text:p>0.0395718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97.890319824219">
                <text:p>597.890319824219</text:p>
              </table:table-cell>
              <table:table-cell office:value-type="float" office:value="0.04169816">
                <text:p>0.0416981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98.009155273438">
                <text:p>598.009155273438</text:p>
              </table:table-cell>
              <table:table-cell office:value-type="float" office:value="0.03440027">
                <text:p>0.03440027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98.127990722656">
                <text:p>598.127990722656</text:p>
              </table:table-cell>
              <table:table-cell office:value-type="float" office:value="0.03040247">
                <text:p>0.03040247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98.246826171875">
                <text:p>598.246826171875</text:p>
              </table:table-cell>
              <table:table-cell office:value-type="float" office:value="0.04285029">
                <text:p>0.0428502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98.365661621094">
                <text:p>598.365661621094</text:p>
              </table:table-cell>
              <table:table-cell office:value-type="float" office:value="0.0372622">
                <text:p>0.0372622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98.484497070313">
                <text:p>598.484497070313</text:p>
              </table:table-cell>
              <table:table-cell office:value-type="float" office:value="0.0329406">
                <text:p>0.0329406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98.603393554688">
                <text:p>598.603393554688</text:p>
              </table:table-cell>
              <table:table-cell office:value-type="float" office:value="0.04155453">
                <text:p>0.04155453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98.722229003906">
                <text:p>598.722229003906</text:p>
              </table:table-cell>
              <table:table-cell office:value-type="float" office:value="0.02907451">
                <text:p>0.02907451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98.841064453125">
                <text:p>598.841064453125</text:p>
              </table:table-cell>
              <table:table-cell office:value-type="float" office:value="0.03230562">
                <text:p>0.0323056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98.9599609375">
                <text:p>598.9599609375</text:p>
              </table:table-cell>
              <table:table-cell office:value-type="float" office:value="0.04547882">
                <text:p>0.04547882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99.078796386719">
                <text:p>599.078796386719</text:p>
              </table:table-cell>
              <table:table-cell office:value-type="float" office:value="0.04568696">
                <text:p>0.04568696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99.197692871094">
                <text:p>599.197692871094</text:p>
              </table:table-cell>
              <table:table-cell office:value-type="float" office:value="0.0366137">
                <text:p>0.036613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99.316528320313">
                <text:p>599.316528320313</text:p>
              </table:table-cell>
              <table:table-cell office:value-type="float" office:value="0.02190009">
                <text:p>0.02190009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99.435424804688">
                <text:p>599.435424804688</text:p>
              </table:table-cell>
              <table:table-cell office:value-type="float" office:value="0.04064655">
                <text:p>0.0406465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99.554321289063">
                <text:p>599.554321289063</text:p>
              </table:table-cell>
              <table:table-cell office:value-type="float" office:value="0.02690322">
                <text:p>0.0269032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99.673156738281">
                <text:p>599.673156738281</text:p>
              </table:table-cell>
              <table:table-cell office:value-type="float" office:value="0.0299789">
                <text:p>0.029978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9.792053222656">
                <text:p>599.792053222656</text:p>
              </table:table-cell>
              <table:table-cell office:value-type="float" office:value="0.03677924">
                <text:p>0.03677924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9.910949707031">
                <text:p>599.910949707031</text:p>
              </table:table-cell>
              <table:table-cell office:value-type="float" office:value="0.03873828">
                <text:p>0.0387382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00.02978515625">
                <text:p>600.02978515625</text:p>
              </table:table-cell>
              <table:table-cell office:value-type="float" office:value="0.02983661">
                <text:p>0.0298366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00.148681640625">
                <text:p>600.148681640625</text:p>
              </table:table-cell>
              <table:table-cell office:value-type="float" office:value="0.03830654">
                <text:p>0.03830654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00.267578125">
                <text:p>600.267578125</text:p>
              </table:table-cell>
              <table:table-cell office:value-type="float" office:value="0.02867834">
                <text:p>0.0286783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00.386474609375">
                <text:p>600.386474609375</text:p>
              </table:table-cell>
              <table:table-cell office:value-type="float" office:value="0.0253226">
                <text:p>0.025322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.50537109375">
                <text:p>600.50537109375</text:p>
              </table:table-cell>
              <table:table-cell office:value-type="float" office:value="0.05496502">
                <text:p>0.05496502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0.624267578125">
                <text:p>600.624267578125</text:p>
              </table:table-cell>
              <table:table-cell office:value-type="float" office:value="0.02432779">
                <text:p>0.02432779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0.7431640625">
                <text:p>600.7431640625</text:p>
              </table:table-cell>
              <table:table-cell office:value-type="float" office:value="0.02936729">
                <text:p>0.02936729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0.862060546875">
                <text:p>600.862060546875</text:p>
              </table:table-cell>
              <table:table-cell office:value-type="float" office:value="0.02070575">
                <text:p>0.0207057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0.98095703125">
                <text:p>600.98095703125</text:p>
              </table:table-cell>
              <table:table-cell office:value-type="float" office:value="0.03238922">
                <text:p>0.0323892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1.099853515625">
                <text:p>601.099853515625</text:p>
              </table:table-cell>
              <table:table-cell office:value-type="float" office:value="0.02098872">
                <text:p>0.0209887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01.21875">
                <text:p>601.21875</text:p>
              </table:table-cell>
              <table:table-cell office:value-type="float" office:value="0.03234525">
                <text:p>0.0323452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01.337646484375">
                <text:p>601.337646484375</text:p>
              </table:table-cell>
              <table:table-cell office:value-type="float" office:value="0.03253861">
                <text:p>0.03253861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01.45654296875">
                <text:p>601.45654296875</text:p>
              </table:table-cell>
              <table:table-cell office:value-type="float" office:value="0.02952866">
                <text:p>0.02952866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01.575500488281">
                <text:p>601.575500488281</text:p>
              </table:table-cell>
              <table:table-cell office:value-type="float" office:value="0.0267152">
                <text:p>0.026715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01.694396972656">
                <text:p>601.694396972656</text:p>
              </table:table-cell>
              <table:table-cell office:value-type="float" office:value="0.03084935">
                <text:p>0.03084935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01.813293457031">
                <text:p>601.813293457031</text:p>
              </table:table-cell>
              <table:table-cell office:value-type="float" office:value="0.03096004">
                <text:p>0.03096004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01.932250976563">
                <text:p>601.932250976563</text:p>
              </table:table-cell>
              <table:table-cell office:value-type="float" office:value="0.02564978">
                <text:p>0.02564978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02.051147460938">
                <text:p>602.051147460938</text:p>
              </table:table-cell>
              <table:table-cell office:value-type="float" office:value="0.03400851">
                <text:p>0.03400851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02.170043945313">
                <text:p>602.170043945313</text:p>
              </table:table-cell>
              <table:table-cell office:value-type="float" office:value="0.03719096">
                <text:p>0.0371909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02.289001464844">
                <text:p>602.289001464844</text:p>
              </table:table-cell>
              <table:table-cell office:value-type="float" office:value="0.01959272">
                <text:p>0.0195927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02.407897949219">
                <text:p>602.407897949219</text:p>
              </table:table-cell>
              <table:table-cell office:value-type="float" office:value="0.03268209">
                <text:p>0.0326820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02.52685546875">
                <text:p>602.52685546875</text:p>
              </table:table-cell>
              <table:table-cell office:value-type="float" office:value="0.03422034">
                <text:p>0.03422034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02.645751953125">
                <text:p>602.645751953125</text:p>
              </table:table-cell>
              <table:table-cell office:value-type="float" office:value="0.01965682">
                <text:p>0.01965682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02.764709472656">
                <text:p>602.764709472656</text:p>
              </table:table-cell>
              <table:table-cell office:value-type="float" office:value="0.02260624">
                <text:p>0.0226062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2.883666992188">
                <text:p>602.883666992188</text:p>
              </table:table-cell>
              <table:table-cell office:value-type="float" office:value="0.01339398">
                <text:p>0.01339398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03.002563476563">
                <text:p>603.002563476563</text:p>
              </table:table-cell>
              <table:table-cell office:value-type="float" office:value="0.02624774">
                <text:p>0.02624774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03.121520996094">
                <text:p>603.121520996094</text:p>
              </table:table-cell>
              <table:table-cell office:value-type="float" office:value="0.0292872">
                <text:p>0.0292872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03.240478515625">
                <text:p>603.240478515625</text:p>
              </table:table-cell>
              <table:table-cell office:value-type="float" office:value="0.03516763">
                <text:p>0.03516763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03.359436035156">
                <text:p>603.359436035156</text:p>
              </table:table-cell>
              <table:table-cell office:value-type="float" office:value="0.03437725">
                <text:p>0.03437725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03.478393554688">
                <text:p>603.478393554688</text:p>
              </table:table-cell>
              <table:table-cell office:value-type="float" office:value="0.02759279">
                <text:p>0.02759279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03.597290039063">
                <text:p>603.597290039063</text:p>
              </table:table-cell>
              <table:table-cell office:value-type="float" office:value="0.02632273">
                <text:p>0.02632273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03.716247558594">
                <text:p>603.716247558594</text:p>
              </table:table-cell>
              <table:table-cell office:value-type="float" office:value="0.02466922">
                <text:p>0.02466922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03.835205078125">
                <text:p>603.835205078125</text:p>
              </table:table-cell>
              <table:table-cell office:value-type="float" office:value="0.01766544">
                <text:p>0.01766544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03.954162597656">
                <text:p>603.954162597656</text:p>
              </table:table-cell>
              <table:table-cell office:value-type="float" office:value="0.02046579">
                <text:p>0.0204657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04.073120117188">
                <text:p>604.073120117188</text:p>
              </table:table-cell>
              <table:table-cell office:value-type="float" office:value="0.02181679">
                <text:p>0.02181679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04.192077636719">
                <text:p>604.192077636719</text:p>
              </table:table-cell>
              <table:table-cell office:value-type="float" office:value="0.01845416">
                <text:p>0.01845416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04.31103515625">
                <text:p>604.31103515625</text:p>
              </table:table-cell>
              <table:table-cell office:value-type="float" office:value="0.04104508">
                <text:p>0.04104508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04.430053710938">
                <text:p>604.430053710938</text:p>
              </table:table-cell>
              <table:table-cell office:value-type="float" office:value="0.0251378">
                <text:p>0.0251378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04.549011230469">
                <text:p>604.549011230469</text:p>
              </table:table-cell>
              <table:table-cell office:value-type="float" office:value="0.02127745">
                <text:p>0.0212774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04.66796875">
                <text:p>604.66796875</text:p>
              </table:table-cell>
              <table:table-cell office:value-type="float" office:value="0.02472644">
                <text:p>0.02472644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04.786926269531">
                <text:p>604.786926269531</text:p>
              </table:table-cell>
              <table:table-cell office:value-type="float" office:value="0.03727662">
                <text:p>0.0372766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04.905883789063">
                <text:p>604.905883789063</text:p>
              </table:table-cell>
              <table:table-cell office:value-type="float" office:value="0.03446753">
                <text:p>0.03446753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05.02490234375">
                <text:p>605.02490234375</text:p>
              </table:table-cell>
              <table:table-cell office:value-type="float" office:value="0.02191509">
                <text:p>0.02191509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05.143859863281">
                <text:p>605.143859863281</text:p>
              </table:table-cell>
              <table:table-cell office:value-type="float" office:value="0.01836494">
                <text:p>0.01836494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05.262817382813">
                <text:p>605.262817382813</text:p>
              </table:table-cell>
              <table:table-cell office:value-type="float" office:value="0.01686609">
                <text:p>0.0168660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05.3818359375">
                <text:p>605.3818359375</text:p>
              </table:table-cell>
              <table:table-cell office:value-type="float" office:value="0.02660089">
                <text:p>0.02660089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05.500793457031">
                <text:p>605.500793457031</text:p>
              </table:table-cell>
              <table:table-cell office:value-type="float" office:value="0.02305748">
                <text:p>0.02305748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05.619812011719">
                <text:p>605.619812011719</text:p>
              </table:table-cell>
              <table:table-cell office:value-type="float" office:value="0.02500957">
                <text:p>0.02500957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05.73876953125">
                <text:p>605.73876953125</text:p>
              </table:table-cell>
              <table:table-cell office:value-type="float" office:value="0.01941831">
                <text:p>0.0194183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05.857788085938">
                <text:p>605.857788085938</text:p>
              </table:table-cell>
              <table:table-cell office:value-type="float" office:value="0.03425608">
                <text:p>0.03425608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05.976806640625">
                <text:p>605.976806640625</text:p>
              </table:table-cell>
              <table:table-cell office:value-type="float" office:value="0.03538922">
                <text:p>0.03538922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06.095764160156">
                <text:p>606.095764160156</text:p>
              </table:table-cell>
              <table:table-cell office:value-type="float" office:value="0.02771395">
                <text:p>0.0277139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06.214782714844">
                <text:p>606.214782714844</text:p>
              </table:table-cell>
              <table:table-cell office:value-type="float" office:value="0.03563158">
                <text:p>0.0356315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06.333801269531">
                <text:p>606.333801269531</text:p>
              </table:table-cell>
              <table:table-cell office:value-type="float" office:value="0.01822617">
                <text:p>0.0182261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06.452758789063">
                <text:p>606.452758789063</text:p>
              </table:table-cell>
              <table:table-cell office:value-type="float" office:value="0.032492">
                <text:p>0.032492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06.57177734375">
                <text:p>606.57177734375</text:p>
              </table:table-cell>
              <table:table-cell office:value-type="float" office:value="0.01853739">
                <text:p>0.0185373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06.690795898438">
                <text:p>606.690795898438</text:p>
              </table:table-cell>
              <table:table-cell office:value-type="float" office:value="0.02489636">
                <text:p>0.02489636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06.809814453125">
                <text:p>606.809814453125</text:p>
              </table:table-cell>
              <table:table-cell office:value-type="float" office:value="0.0174248">
                <text:p>0.0174248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06.928833007813">
                <text:p>606.928833007813</text:p>
              </table:table-cell>
              <table:table-cell office:value-type="float" office:value="0.01871268">
                <text:p>0.01871268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07.0478515625">
                <text:p>607.0478515625</text:p>
              </table:table-cell>
              <table:table-cell office:value-type="float" office:value="0.01628582">
                <text:p>0.01628582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07.166870117188">
                <text:p>607.166870117188</text:p>
              </table:table-cell>
              <table:table-cell office:value-type="float" office:value="0.04082143">
                <text:p>0.04082143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07.285888671875">
                <text:p>607.285888671875</text:p>
              </table:table-cell>
              <table:table-cell office:value-type="float" office:value="0.03252744">
                <text:p>0.0325274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07.404907226563">
                <text:p>607.404907226563</text:p>
              </table:table-cell>
              <table:table-cell office:value-type="float" office:value="0.02655748">
                <text:p>0.02655748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07.52392578125">
                <text:p>607.52392578125</text:p>
              </table:table-cell>
              <table:table-cell office:value-type="float" office:value="0.0242745">
                <text:p>0.024274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07.642944335938">
                <text:p>607.642944335938</text:p>
              </table:table-cell>
              <table:table-cell office:value-type="float" office:value="0.02945345">
                <text:p>0.02945345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07.761962890625">
                <text:p>607.761962890625</text:p>
              </table:table-cell>
              <table:table-cell office:value-type="float" office:value="0.04265222">
                <text:p>0.04265222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07.880981445313">
                <text:p>607.880981445313</text:p>
              </table:table-cell>
              <table:table-cell office:value-type="float" office:value="0.03180748">
                <text:p>0.03180748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08">
                <text:p>608</text:p>
              </table:table-cell>
              <table:table-cell office:value-type="float" office:value="0.01572086">
                <text:p>0.01572086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08.119079589844">
                <text:p>608.119079589844</text:p>
              </table:table-cell>
              <table:table-cell office:value-type="float" office:value="0.02177029">
                <text:p>0.02177029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08.238098144531">
                <text:p>608.238098144531</text:p>
              </table:table-cell>
              <table:table-cell office:value-type="float" office:value="0.02152762">
                <text:p>0.02152762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08.357116699219">
                <text:p>608.357116699219</text:p>
              </table:table-cell>
              <table:table-cell office:value-type="float" office:value="0.020155">
                <text:p>0.020155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8.476196289063">
                <text:p>608.476196289063</text:p>
              </table:table-cell>
              <table:table-cell office:value-type="float" office:value="0.02689891">
                <text:p>0.0268989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08.59521484375">
                <text:p>608.59521484375</text:p>
              </table:table-cell>
              <table:table-cell office:value-type="float" office:value="0.03734742">
                <text:p>0.0373474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08.714233398438">
                <text:p>608.714233398438</text:p>
              </table:table-cell>
              <table:table-cell office:value-type="float" office:value="0.02517927">
                <text:p>0.02517927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08.833312988281">
                <text:p>608.833312988281</text:p>
              </table:table-cell>
              <table:table-cell office:value-type="float" office:value="0.02498113">
                <text:p>0.0249811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08.952331542969">
                <text:p>608.952331542969</text:p>
              </table:table-cell>
              <table:table-cell office:value-type="float" office:value="0.01277811">
                <text:p>0.01277811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09.071411132813">
                <text:p>609.071411132813</text:p>
              </table:table-cell>
              <table:table-cell office:value-type="float" office:value="0.01657846">
                <text:p>0.01657846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09.1904296875">
                <text:p>609.1904296875</text:p>
              </table:table-cell>
              <table:table-cell office:value-type="float" office:value="0.01455125">
                <text:p>0.0145512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09.309509277344">
                <text:p>609.309509277344</text:p>
              </table:table-cell>
              <table:table-cell office:value-type="float" office:value="0.03509172">
                <text:p>0.0350917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09.428588867188">
                <text:p>609.428588867188</text:p>
              </table:table-cell>
              <table:table-cell office:value-type="float" office:value="0.02512291">
                <text:p>0.0251229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09.547607421875">
                <text:p>609.547607421875</text:p>
              </table:table-cell>
              <table:table-cell office:value-type="float" office:value="0.02388744">
                <text:p>0.02388744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09.666687011719">
                <text:p>609.666687011719</text:p>
              </table:table-cell>
              <table:table-cell office:value-type="float" office:value="0.02024621">
                <text:p>0.02024621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09.785766601563">
                <text:p>609.785766601563</text:p>
              </table:table-cell>
              <table:table-cell office:value-type="float" office:value="0.01986282">
                <text:p>0.01986282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09.904846191406">
                <text:p>609.904846191406</text:p>
              </table:table-cell>
              <table:table-cell office:value-type="float" office:value="0.02299276">
                <text:p>0.02299276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10.023864746094">
                <text:p>610.023864746094</text:p>
              </table:table-cell>
              <table:table-cell office:value-type="float" office:value="0.01870862">
                <text:p>0.01870862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10.142944335938">
                <text:p>610.142944335938</text:p>
              </table:table-cell>
              <table:table-cell office:value-type="float" office:value="0.0184357">
                <text:p>0.0184357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10.262023925781">
                <text:p>610.262023925781</text:p>
              </table:table-cell>
              <table:table-cell office:value-type="float" office:value="0.03762139">
                <text:p>0.03762139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10.381103515625">
                <text:p>610.381103515625</text:p>
              </table:table-cell>
              <table:table-cell office:value-type="float" office:value="0.02476114">
                <text:p>0.02476114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10.500183105469">
                <text:p>610.500183105469</text:p>
              </table:table-cell>
              <table:table-cell office:value-type="float" office:value="0.02048329">
                <text:p>0.02048329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10.619262695313">
                <text:p>610.619262695313</text:p>
              </table:table-cell>
              <table:table-cell office:value-type="float" office:value="0.01546334">
                <text:p>0.01546334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10.738342285156">
                <text:p>610.738342285156</text:p>
              </table:table-cell>
              <table:table-cell office:value-type="float" office:value="0.02378043">
                <text:p>0.02378043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10.857421875">
                <text:p>610.857421875</text:p>
              </table:table-cell>
              <table:table-cell office:value-type="float" office:value="0.01651883">
                <text:p>0.01651883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10.976501464844">
                <text:p>610.976501464844</text:p>
              </table:table-cell>
              <table:table-cell office:value-type="float" office:value="0.02757399">
                <text:p>0.02757399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11.095581054688">
                <text:p>611.095581054688</text:p>
              </table:table-cell>
              <table:table-cell office:value-type="float" office:value="0.02324194">
                <text:p>0.02324194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11.214660644531">
                <text:p>611.214660644531</text:p>
              </table:table-cell>
              <table:table-cell office:value-type="float" office:value="0.02010469">
                <text:p>0.0201046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11.333801269531">
                <text:p>611.333801269531</text:p>
              </table:table-cell>
              <table:table-cell office:value-type="float" office:value="0.01694147">
                <text:p>0.0169414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11.452880859375">
                <text:p>611.452880859375</text:p>
              </table:table-cell>
              <table:table-cell office:value-type="float" office:value="0.01038771">
                <text:p>0.01038771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11.571960449219">
                <text:p>611.571960449219</text:p>
              </table:table-cell>
              <table:table-cell office:value-type="float" office:value="0.02329312">
                <text:p>0.0232931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11.691040039063">
                <text:p>611.691040039063</text:p>
              </table:table-cell>
              <table:table-cell office:value-type="float" office:value="0.02331121">
                <text:p>0.02331121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11.810180664063">
                <text:p>611.810180664063</text:p>
              </table:table-cell>
              <table:table-cell office:value-type="float" office:value="0.02231883">
                <text:p>0.0223188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11.929260253906">
                <text:p>611.929260253906</text:p>
              </table:table-cell>
              <table:table-cell office:value-type="float" office:value="0.02091423">
                <text:p>0.02091423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12.048400878906">
                <text:p>612.048400878906</text:p>
              </table:table-cell>
              <table:table-cell office:value-type="float" office:value="0.0233556">
                <text:p>0.0233556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12.16748046875">
                <text:p>612.16748046875</text:p>
              </table:table-cell>
              <table:table-cell office:value-type="float" office:value="0.01521324">
                <text:p>0.01521324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2.286560058594">
                <text:p>612.286560058594</text:p>
              </table:table-cell>
              <table:table-cell office:value-type="float" office:value="0.02872101">
                <text:p>0.0287210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12.405700683594">
                <text:p>612.405700683594</text:p>
              </table:table-cell>
              <table:table-cell office:value-type="float" office:value="0.02907076">
                <text:p>0.02907076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12.524780273438">
                <text:p>612.524780273438</text:p>
              </table:table-cell>
              <table:table-cell office:value-type="float" office:value="0.01793735">
                <text:p>0.01793735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12.643920898438">
                <text:p>612.643920898438</text:p>
              </table:table-cell>
              <table:table-cell office:value-type="float" office:value="0.01223315">
                <text:p>0.0122331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12.763061523438">
                <text:p>612.763061523438</text:p>
              </table:table-cell>
              <table:table-cell office:value-type="float" office:value="0.03114057">
                <text:p>0.03114057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12.882141113281">
                <text:p>612.882141113281</text:p>
              </table:table-cell>
              <table:table-cell office:value-type="float" office:value="0.01487461">
                <text:p>0.0148746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13.001281738281">
                <text:p>613.001281738281</text:p>
              </table:table-cell>
              <table:table-cell office:value-type="float" office:value="0.02217426">
                <text:p>0.02217426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13.120422363281">
                <text:p>613.120422363281</text:p>
              </table:table-cell>
              <table:table-cell office:value-type="float" office:value="0.01646274">
                <text:p>0.01646274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13.239501953125">
                <text:p>613.239501953125</text:p>
              </table:table-cell>
              <table:table-cell office:value-type="float" office:value="0.02104142">
                <text:p>0.02104142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13.358642578125">
                <text:p>613.358642578125</text:p>
              </table:table-cell>
              <table:table-cell office:value-type="float" office:value="0.02415848">
                <text:p>0.02415848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13.477783203125">
                <text:p>613.477783203125</text:p>
              </table:table-cell>
              <table:table-cell office:value-type="float" office:value="0.01479598">
                <text:p>0.01479598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13.596923828125">
                <text:p>613.596923828125</text:p>
              </table:table-cell>
              <table:table-cell office:value-type="float" office:value="0.009387637">
                <text:p>0.009387637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13.716064453125">
                <text:p>613.716064453125</text:p>
              </table:table-cell>
              <table:table-cell office:value-type="float" office:value="0.01448438">
                <text:p>0.01448438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13.835205078125">
                <text:p>613.835205078125</text:p>
              </table:table-cell>
              <table:table-cell office:value-type="float" office:value="0.01242532">
                <text:p>0.0124253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13.954345703125">
                <text:p>613.954345703125</text:p>
              </table:table-cell>
              <table:table-cell office:value-type="float" office:value="0.007200511">
                <text:p>0.007200511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14.073486328125">
                <text:p>614.073486328125</text:p>
              </table:table-cell>
              <table:table-cell office:value-type="float" office:value="0.01517149">
                <text:p>0.01517149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14.192626953125">
                <text:p>614.192626953125</text:p>
              </table:table-cell>
              <table:table-cell office:value-type="float" office:value="0.03484605">
                <text:p>0.03484605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14.311767578125">
                <text:p>614.311767578125</text:p>
              </table:table-cell>
              <table:table-cell office:value-type="float" office:value="0.01273673">
                <text:p>0.0127367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14.430908203125">
                <text:p>614.430908203125</text:p>
              </table:table-cell>
              <table:table-cell office:value-type="float" office:value="0.01298216">
                <text:p>0.01298216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14.550048828125">
                <text:p>614.550048828125</text:p>
              </table:table-cell>
              <table:table-cell office:value-type="float" office:value="0.01214875">
                <text:p>0.01214875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14.669189453125">
                <text:p>614.669189453125</text:p>
              </table:table-cell>
              <table:table-cell office:value-type="float" office:value="0.02479331">
                <text:p>0.02479331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14.788330078125">
                <text:p>614.788330078125</text:p>
              </table:table-cell>
              <table:table-cell office:value-type="float" office:value="0.01444647">
                <text:p>0.01444647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14.907531738281">
                <text:p>614.907531738281</text:p>
              </table:table-cell>
              <table:table-cell office:value-type="float" office:value="0.02097438">
                <text:p>0.0209743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15.026672363281">
                <text:p>615.026672363281</text:p>
              </table:table-cell>
              <table:table-cell office:value-type="float" office:value="0.01938319">
                <text:p>0.01938319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5.145812988281">
                <text:p>615.145812988281</text:p>
              </table:table-cell>
              <table:table-cell office:value-type="float" office:value="0.04351994">
                <text:p>0.04351994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15.264953613281">
                <text:p>615.264953613281</text:p>
              </table:table-cell>
              <table:table-cell office:value-type="float" office:value="0.02182516">
                <text:p>0.02182516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15.384155273438">
                <text:p>615.384155273438</text:p>
              </table:table-cell>
              <table:table-cell office:value-type="float" office:value="0.02124138">
                <text:p>0.02124138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15.503295898438">
                <text:p>615.503295898438</text:p>
              </table:table-cell>
              <table:table-cell office:value-type="float" office:value="0.01425401">
                <text:p>0.01425401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15.622497558594">
                <text:p>615.622497558594</text:p>
              </table:table-cell>
              <table:table-cell office:value-type="float" office:value="0.0261264">
                <text:p>0.0261264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15.741638183594">
                <text:p>615.741638183594</text:p>
              </table:table-cell>
              <table:table-cell office:value-type="float" office:value="0.01488864">
                <text:p>0.0148886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15.86083984375">
                <text:p>615.86083984375</text:p>
              </table:table-cell>
              <table:table-cell office:value-type="float" office:value="0.01813095">
                <text:p>0.01813095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15.97998046875">
                <text:p>615.97998046875</text:p>
              </table:table-cell>
              <table:table-cell office:value-type="float" office:value="0.01407814">
                <text:p>0.01407814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16.099182128906">
                <text:p>616.099182128906</text:p>
              </table:table-cell>
              <table:table-cell office:value-type="float" office:value="0.01695316">
                <text:p>0.01695316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16.218322753906">
                <text:p>616.218322753906</text:p>
              </table:table-cell>
              <table:table-cell office:value-type="float" office:value="0.023523">
                <text:p>0.02352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16.337524414063">
                <text:p>616.337524414063</text:p>
              </table:table-cell>
              <table:table-cell office:value-type="float" office:value="0.0121127">
                <text:p>0.0121127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16.456726074219">
                <text:p>616.456726074219</text:p>
              </table:table-cell>
              <table:table-cell office:value-type="float" office:value="0.03146277">
                <text:p>0.03146277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16.575866699219">
                <text:p>616.575866699219</text:p>
              </table:table-cell>
              <table:table-cell office:value-type="float" office:value="0.01277218">
                <text:p>0.01277218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16.695068359375">
                <text:p>616.695068359375</text:p>
              </table:table-cell>
              <table:table-cell office:value-type="float" office:value="0.008253695">
                <text:p>0.008253695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16.814270019531">
                <text:p>616.814270019531</text:p>
              </table:table-cell>
              <table:table-cell office:value-type="float" office:value="0.01307753">
                <text:p>0.0130775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16.933471679688">
                <text:p>616.933471679688</text:p>
              </table:table-cell>
              <table:table-cell office:value-type="float" office:value="0.01922144">
                <text:p>0.01922144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17.052612304688">
                <text:p>617.052612304688</text:p>
              </table:table-cell>
              <table:table-cell office:value-type="float" office:value="0.01508144">
                <text:p>0.01508144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17.171813964844">
                <text:p>617.171813964844</text:p>
              </table:table-cell>
              <table:table-cell office:value-type="float" office:value="0.02646718">
                <text:p>0.02646718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17.291015625">
                <text:p>617.291015625</text:p>
              </table:table-cell>
              <table:table-cell office:value-type="float" office:value="0.01194646">
                <text:p>0.01194646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17.410217285156">
                <text:p>617.410217285156</text:p>
              </table:table-cell>
              <table:table-cell office:value-type="float" office:value="0.01757366">
                <text:p>0.01757366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17.529418945313">
                <text:p>617.529418945313</text:p>
              </table:table-cell>
              <table:table-cell office:value-type="float" office:value="0.02440175">
                <text:p>0.02440175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17.648620605469">
                <text:p>617.648620605469</text:p>
              </table:table-cell>
              <table:table-cell office:value-type="float" office:value="0.01591423">
                <text:p>0.0159142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17.767822265625">
                <text:p>617.767822265625</text:p>
              </table:table-cell>
              <table:table-cell office:value-type="float" office:value="0.03961438">
                <text:p>0.03961438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17.887023925781">
                <text:p>617.887023925781</text:p>
              </table:table-cell>
              <table:table-cell office:value-type="float" office:value="0.02319045">
                <text:p>0.02319045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18.006225585938">
                <text:p>618.006225585938</text:p>
              </table:table-cell>
              <table:table-cell office:value-type="float" office:value="0.01521398">
                <text:p>0.0152139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18.125427246094">
                <text:p>618.125427246094</text:p>
              </table:table-cell>
              <table:table-cell office:value-type="float" office:value="0.02200514">
                <text:p>0.02200514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18.24462890625">
                <text:p>618.24462890625</text:p>
              </table:table-cell>
              <table:table-cell office:value-type="float" office:value="0.02500005">
                <text:p>0.02500005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18.363891601563">
                <text:p>618.363891601563</text:p>
              </table:table-cell>
              <table:table-cell office:value-type="float" office:value="0.02447901">
                <text:p>0.02447901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18.483093261719">
                <text:p>618.483093261719</text:p>
              </table:table-cell>
              <table:table-cell office:value-type="float" office:value="0.01438054">
                <text:p>0.01438054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18.602294921875">
                <text:p>618.602294921875</text:p>
              </table:table-cell>
              <table:table-cell office:value-type="float" office:value="0.01909113">
                <text:p>0.01909113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18.721496582031">
                <text:p>618.721496582031</text:p>
              </table:table-cell>
              <table:table-cell office:value-type="float" office:value="0.03250472">
                <text:p>0.03250472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18.840759277344">
                <text:p>618.840759277344</text:p>
              </table:table-cell>
              <table:table-cell office:value-type="float" office:value="0.01187312">
                <text:p>0.01187312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18.9599609375">
                <text:p>618.9599609375</text:p>
              </table:table-cell>
              <table:table-cell office:value-type="float" office:value="0.02470299">
                <text:p>0.02470299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19.079162597656">
                <text:p>619.079162597656</text:p>
              </table:table-cell>
              <table:table-cell office:value-type="float" office:value="0.00754199">
                <text:p>0.00754199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19.198425292969">
                <text:p>619.198425292969</text:p>
              </table:table-cell>
              <table:table-cell office:value-type="float" office:value="0.030316">
                <text:p>0.030316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19.317626953125">
                <text:p>619.317626953125</text:p>
              </table:table-cell>
              <table:table-cell office:value-type="float" office:value="0.01291984">
                <text:p>0.01291984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19.436889648438">
                <text:p>619.436889648438</text:p>
              </table:table-cell>
              <table:table-cell office:value-type="float" office:value="0.02368474">
                <text:p>0.02368474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19.556091308594">
                <text:p>619.556091308594</text:p>
              </table:table-cell>
              <table:table-cell office:value-type="float" office:value="0.01815274">
                <text:p>0.01815274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19.675354003906">
                <text:p>619.675354003906</text:p>
              </table:table-cell>
              <table:table-cell office:value-type="float" office:value="0.0127569">
                <text:p>0.0127569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19.794616699219">
                <text:p>619.794616699219</text:p>
              </table:table-cell>
              <table:table-cell office:value-type="float" office:value="0.02012436">
                <text:p>0.02012436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19.913818359375">
                <text:p>619.913818359375</text:p>
              </table:table-cell>
              <table:table-cell office:value-type="float" office:value="0.007549491">
                <text:p>0.007549491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20.033081054688">
                <text:p>620.033081054688</text:p>
              </table:table-cell>
              <table:table-cell office:value-type="float" office:value="0.03540682">
                <text:p>0.03540682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20.152282714844">
                <text:p>620.152282714844</text:p>
              </table:table-cell>
              <table:table-cell office:value-type="float" office:value="0.02251519">
                <text:p>0.02251519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20.271545410156">
                <text:p>620.271545410156</text:p>
              </table:table-cell>
              <table:table-cell office:value-type="float" office:value="0.01955939">
                <text:p>0.0195593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20.390808105469">
                <text:p>620.390808105469</text:p>
              </table:table-cell>
              <table:table-cell office:value-type="float" office:value="0.009707405">
                <text:p>0.009707405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20.510070800781">
                <text:p>620.510070800781</text:p>
              </table:table-cell>
              <table:table-cell office:value-type="float" office:value="0.01359647">
                <text:p>0.01359647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20.629333496094">
                <text:p>620.629333496094</text:p>
              </table:table-cell>
              <table:table-cell office:value-type="float" office:value="0.01290221">
                <text:p>0.0129022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20.74853515625">
                <text:p>620.74853515625</text:p>
              </table:table-cell>
              <table:table-cell office:value-type="float" office:value="0.006579024">
                <text:p>0.006579024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20.867797851563">
                <text:p>620.867797851563</text:p>
              </table:table-cell>
              <table:table-cell office:value-type="float" office:value="0.0416293">
                <text:p>0.0416293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20.987060546875">
                <text:p>620.987060546875</text:p>
              </table:table-cell>
              <table:table-cell office:value-type="float" office:value="0.01164767">
                <text:p>0.01164767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21.106323242188">
                <text:p>621.106323242188</text:p>
              </table:table-cell>
              <table:table-cell office:value-type="float" office:value="0.01186243">
                <text:p>0.01186243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21.2255859375">
                <text:p>621.2255859375</text:p>
              </table:table-cell>
              <table:table-cell office:value-type="float" office:value="0.01690304">
                <text:p>0.01690304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21.344848632813">
                <text:p>621.344848632813</text:p>
              </table:table-cell>
              <table:table-cell office:value-type="float" office:value="0.008484157">
                <text:p>0.008484157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21.464111328125">
                <text:p>621.464111328125</text:p>
              </table:table-cell>
              <table:table-cell office:value-type="float" office:value="0.01121781">
                <text:p>0.01121781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21.583374023438">
                <text:p>621.583374023438</text:p>
              </table:table-cell>
              <table:table-cell office:value-type="float" office:value="0.03701556">
                <text:p>0.03701556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21.70263671875">
                <text:p>621.70263671875</text:p>
              </table:table-cell>
              <table:table-cell office:value-type="float" office:value="0.01687645">
                <text:p>0.01687645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21.821899414063">
                <text:p>621.821899414063</text:p>
              </table:table-cell>
              <table:table-cell office:value-type="float" office:value="0.04179711">
                <text:p>0.04179711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21.941223144531">
                <text:p>621.941223144531</text:p>
              </table:table-cell>
              <table:table-cell office:value-type="float" office:value="0.005875264">
                <text:p>0.005875264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22.060485839844">
                <text:p>622.060485839844</text:p>
              </table:table-cell>
              <table:table-cell office:value-type="float" office:value="0.02483417">
                <text:p>0.02483417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22.179748535156">
                <text:p>622.179748535156</text:p>
              </table:table-cell>
              <table:table-cell office:value-type="float" office:value="0.02878355">
                <text:p>0.02878355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22.299011230469">
                <text:p>622.299011230469</text:p>
              </table:table-cell>
              <table:table-cell office:value-type="float" office:value="0.01204191">
                <text:p>0.01204191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22.418334960938">
                <text:p>622.418334960938</text:p>
              </table:table-cell>
              <table:table-cell office:value-type="float" office:value="0.01443482">
                <text:p>0.01443482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22.53759765625">
                <text:p>622.53759765625</text:p>
              </table:table-cell>
              <table:table-cell office:value-type="float" office:value="0.01332869">
                <text:p>0.01332869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22.656860351563">
                <text:p>622.656860351563</text:p>
              </table:table-cell>
              <table:table-cell office:value-type="float" office:value="0.009587841">
                <text:p>0.009587841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22.776184082031">
                <text:p>622.776184082031</text:p>
              </table:table-cell>
              <table:table-cell office:value-type="float" office:value="0.01712756">
                <text:p>0.01712756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22.895446777344">
                <text:p>622.895446777344</text:p>
              </table:table-cell>
              <table:table-cell office:value-type="float" office:value="0.01807578">
                <text:p>0.01807578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23.014709472656">
                <text:p>623.014709472656</text:p>
              </table:table-cell>
              <table:table-cell office:value-type="float" office:value="0.01549426">
                <text:p>0.01549426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23.134033203125">
                <text:p>623.134033203125</text:p>
              </table:table-cell>
              <table:table-cell office:value-type="float" office:value="0.006325591">
                <text:p>0.006325591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23.253295898438">
                <text:p>623.253295898438</text:p>
              </table:table-cell>
              <table:table-cell office:value-type="float" office:value="0.009475817">
                <text:p>0.009475817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23.372619628906">
                <text:p>623.372619628906</text:p>
              </table:table-cell>
              <table:table-cell office:value-type="float" office:value="0.02101451">
                <text:p>0.02101451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3.491943359375">
                <text:p>623.491943359375</text:p>
              </table:table-cell>
              <table:table-cell office:value-type="float" office:value="0.01449657">
                <text:p>0.01449657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23.611206054688">
                <text:p>623.611206054688</text:p>
              </table:table-cell>
              <table:table-cell office:value-type="float" office:value="0.009316346">
                <text:p>0.009316346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23.730529785156">
                <text:p>623.730529785156</text:p>
              </table:table-cell>
              <table:table-cell office:value-type="float" office:value="0.01671401">
                <text:p>0.01671401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23.849853515625">
                <text:p>623.849853515625</text:p>
              </table:table-cell>
              <table:table-cell office:value-type="float" office:value="0.01485974">
                <text:p>0.01485974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23.969116210938">
                <text:p>623.969116210938</text:p>
              </table:table-cell>
              <table:table-cell office:value-type="float" office:value="0.01340577">
                <text:p>0.01340577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24.088439941406">
                <text:p>624.088439941406</text:p>
              </table:table-cell>
              <table:table-cell office:value-type="float" office:value="0.004447126">
                <text:p>0.004447126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24.207763671875">
                <text:p>624.207763671875</text:p>
              </table:table-cell>
              <table:table-cell office:value-type="float" office:value="0.00532894">
                <text:p>0.00532894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24.327087402344">
                <text:p>624.327087402344</text:p>
              </table:table-cell>
              <table:table-cell office:value-type="float" office:value="0.01377642">
                <text:p>0.01377642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24.446350097656">
                <text:p>624.446350097656</text:p>
              </table:table-cell>
              <table:table-cell office:value-type="float" office:value="0.02863384">
                <text:p>0.0286338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24.565673828125">
                <text:p>624.565673828125</text:p>
              </table:table-cell>
              <table:table-cell office:value-type="float" office:value="0.02027019">
                <text:p>0.02027019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24.684997558594">
                <text:p>624.684997558594</text:p>
              </table:table-cell>
              <table:table-cell office:value-type="float" office:value="0.0161458">
                <text:p>0.0161458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24.804321289063">
                <text:p>624.804321289063</text:p>
              </table:table-cell>
              <table:table-cell office:value-type="float" office:value="0.0135398">
                <text:p>0.0135398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24.923645019531">
                <text:p>624.923645019531</text:p>
              </table:table-cell>
              <table:table-cell office:value-type="float" office:value="0.01858709">
                <text:p>0.0185870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25.04296875">
                <text:p>625.04296875</text:p>
              </table:table-cell>
              <table:table-cell office:value-type="float" office:value="0.005074349">
                <text:p>0.005074349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25.162292480469">
                <text:p>625.162292480469</text:p>
              </table:table-cell>
              <table:table-cell office:value-type="float" office:value="0.011271">
                <text:p>0.011271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25.281616210938">
                <text:p>625.281616210938</text:p>
              </table:table-cell>
              <table:table-cell office:value-type="float" office:value="0.0179755">
                <text:p>0.0179755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25.400939941406">
                <text:p>625.400939941406</text:p>
              </table:table-cell>
              <table:table-cell office:value-type="float" office:value="0.01264641">
                <text:p>0.01264641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25.520263671875">
                <text:p>625.520263671875</text:p>
              </table:table-cell>
              <table:table-cell office:value-type="float" office:value="0.0110415">
                <text:p>0.011041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25.639587402344">
                <text:p>625.639587402344</text:p>
              </table:table-cell>
              <table:table-cell office:value-type="float" office:value="0.01663393">
                <text:p>0.0166339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25.758911132813">
                <text:p>625.758911132813</text:p>
              </table:table-cell>
              <table:table-cell office:value-type="float" office:value="0.0191243">
                <text:p>0.0191243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25.878295898438">
                <text:p>625.878295898438</text:p>
              </table:table-cell>
              <table:table-cell office:value-type="float" office:value="0.008490375">
                <text:p>0.008490375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25.997619628906">
                <text:p>625.997619628906</text:p>
              </table:table-cell>
              <table:table-cell office:value-type="float" office:value="0.006664411">
                <text:p>0.00666441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26.116943359375">
                <text:p>626.116943359375</text:p>
              </table:table-cell>
              <table:table-cell office:value-type="float" office:value="0.01654912">
                <text:p>0.01654912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26.236267089844">
                <text:p>626.236267089844</text:p>
              </table:table-cell>
              <table:table-cell office:value-type="float" office:value="0.01849065">
                <text:p>0.0184906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26.355651855469">
                <text:p>626.355651855469</text:p>
              </table:table-cell>
              <table:table-cell office:value-type="float" office:value="0.03154177">
                <text:p>0.0315417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26.474975585938">
                <text:p>626.474975585938</text:p>
              </table:table-cell>
              <table:table-cell office:value-type="float" office:value="0.005658295">
                <text:p>0.005658295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6.594360351563">
                <text:p>626.594360351563</text:p>
              </table:table-cell>
              <table:table-cell office:value-type="float" office:value="0.02787594">
                <text:p>0.02787594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26.713684082031">
                <text:p>626.713684082031</text:p>
              </table:table-cell>
              <table:table-cell office:value-type="float" office:value="0.01358014">
                <text:p>0.01358014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26.8330078125">
                <text:p>626.8330078125</text:p>
              </table:table-cell>
              <table:table-cell office:value-type="float" office:value="0.02901321">
                <text:p>0.02901321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26.952392578125">
                <text:p>626.952392578125</text:p>
              </table:table-cell>
              <table:table-cell office:value-type="float" office:value="0.02028399">
                <text:p>0.02028399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27.071716308594">
                <text:p>627.071716308594</text:p>
              </table:table-cell>
              <table:table-cell office:value-type="float" office:value="0.02206679">
                <text:p>0.02206679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27.191101074219">
                <text:p>627.191101074219</text:p>
              </table:table-cell>
              <table:table-cell office:value-type="float" office:value="0.02564096">
                <text:p>0.02564096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27.310424804688">
                <text:p>627.310424804688</text:p>
              </table:table-cell>
              <table:table-cell office:value-type="float" office:value="0.0151519">
                <text:p>0.0151519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27.429809570313">
                <text:p>627.429809570313</text:p>
              </table:table-cell>
              <table:table-cell office:value-type="float" office:value="0.005064589">
                <text:p>0.005064589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27.549194335938">
                <text:p>627.549194335938</text:p>
              </table:table-cell>
              <table:table-cell office:value-type="float" office:value="0.008290948">
                <text:p>0.008290948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27.668518066406">
                <text:p>627.668518066406</text:p>
              </table:table-cell>
              <table:table-cell office:value-type="float" office:value="0.02167958">
                <text:p>0.02167958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27.787902832031">
                <text:p>627.787902832031</text:p>
              </table:table-cell>
              <table:table-cell office:value-type="float" office:value="0.02017608">
                <text:p>0.02017608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27.907287597656">
                <text:p>627.907287597656</text:p>
              </table:table-cell>
              <table:table-cell office:value-type="float" office:value="0.01081954">
                <text:p>0.01081954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28.026672363281">
                <text:p>628.026672363281</text:p>
              </table:table-cell>
              <table:table-cell office:value-type="float" office:value="0.00837372">
                <text:p>0.00837372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28.14599609375">
                <text:p>628.14599609375</text:p>
              </table:table-cell>
              <table:table-cell office:value-type="float" office:value="0.006194247">
                <text:p>0.00619424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8.265380859375">
                <text:p>628.265380859375</text:p>
              </table:table-cell>
              <table:table-cell office:value-type="float" office:value="0.02119882">
                <text:p>0.0211988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28.384765625">
                <text:p>628.384765625</text:p>
              </table:table-cell>
              <table:table-cell office:value-type="float" office:value="0.02460198">
                <text:p>0.02460198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28.504150390625">
                <text:p>628.504150390625</text:p>
              </table:table-cell>
              <table:table-cell office:value-type="float" office:value="0.003254694">
                <text:p>0.003254694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28.62353515625">
                <text:p>628.62353515625</text:p>
              </table:table-cell>
              <table:table-cell office:value-type="float" office:value="0.01643016">
                <text:p>0.01643016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28.742919921875">
                <text:p>628.742919921875</text:p>
              </table:table-cell>
              <table:table-cell office:value-type="float" office:value="0.004159837">
                <text:p>0.004159837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28.8623046875">
                <text:p>628.8623046875</text:p>
              </table:table-cell>
              <table:table-cell office:value-type="float" office:value="0.009017609">
                <text:p>0.009017609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28.981689453125">
                <text:p>628.981689453125</text:p>
              </table:table-cell>
              <table:table-cell office:value-type="float" office:value="0.008495819">
                <text:p>0.008495819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29.10107421875">
                <text:p>629.10107421875</text:p>
              </table:table-cell>
              <table:table-cell office:value-type="float" office:value="0.006828475">
                <text:p>0.006828475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29.220458984375">
                <text:p>629.220458984375</text:p>
              </table:table-cell>
              <table:table-cell office:value-type="float" office:value="0.03347194">
                <text:p>0.03347194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29.33984375">
                <text:p>629.33984375</text:p>
              </table:table-cell>
              <table:table-cell office:value-type="float" office:value="0.02307933">
                <text:p>0.02307933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9.459228515625">
                <text:p>629.459228515625</text:p>
              </table:table-cell>
              <table:table-cell office:value-type="float" office:value="0.02319832">
                <text:p>0.0231983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29.57861328125">
                <text:p>629.57861328125</text:p>
              </table:table-cell>
              <table:table-cell office:value-type="float" office:value="0.005424736">
                <text:p>0.005424736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9.697998046875">
                <text:p>629.697998046875</text:p>
              </table:table-cell>
              <table:table-cell office:value-type="float" office:value="0.009969882">
                <text:p>0.00996988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29.8173828125">
                <text:p>629.8173828125</text:p>
              </table:table-cell>
              <table:table-cell office:value-type="float" office:value="0.01327699">
                <text:p>0.01327699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29.936828613281">
                <text:p>629.936828613281</text:p>
              </table:table-cell>
              <table:table-cell office:value-type="float" office:value="0.04093082">
                <text:p>0.04093082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30.056213378906">
                <text:p>630.056213378906</text:p>
              </table:table-cell>
              <table:table-cell office:value-type="float" office:value="0.0249151">
                <text:p>0.0249151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30.175598144531">
                <text:p>630.175598144531</text:p>
              </table:table-cell>
              <table:table-cell office:value-type="float" office:value="0.0229648">
                <text:p>0.0229648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30.295043945313">
                <text:p>630.295043945313</text:p>
              </table:table-cell>
              <table:table-cell office:value-type="float" office:value="0.006680559">
                <text:p>0.006680559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30.414428710938">
                <text:p>630.414428710938</text:p>
              </table:table-cell>
              <table:table-cell office:value-type="float" office:value="0.02004351">
                <text:p>0.0200435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30.533813476563">
                <text:p>630.533813476563</text:p>
              </table:table-cell>
              <table:table-cell office:value-type="float" office:value="0.01101603">
                <text:p>0.01101603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30.653259277344">
                <text:p>630.653259277344</text:p>
              </table:table-cell>
              <table:table-cell office:value-type="float" office:value="0.005629858">
                <text:p>0.00562985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0.772644042969">
                <text:p>630.772644042969</text:p>
              </table:table-cell>
              <table:table-cell office:value-type="float" office:value="0.01086932">
                <text:p>0.01086932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30.89208984375">
                <text:p>630.89208984375</text:p>
              </table:table-cell>
              <table:table-cell office:value-type="float" office:value="0.01607233">
                <text:p>0.0160723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31.011474609375">
                <text:p>631.011474609375</text:p>
              </table:table-cell>
              <table:table-cell office:value-type="float" office:value="0.02247822">
                <text:p>0.02247822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31.130920410156">
                <text:p>631.130920410156</text:p>
              </table:table-cell>
              <table:table-cell office:value-type="float" office:value="0.01330303">
                <text:p>0.01330303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31.250305175781">
                <text:p>631.250305175781</text:p>
              </table:table-cell>
              <table:table-cell office:value-type="float" office:value="0.01126269">
                <text:p>0.01126269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31.369750976563">
                <text:p>631.369750976563</text:p>
              </table:table-cell>
              <table:table-cell office:value-type="float" office:value="0.01901563">
                <text:p>0.01901563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31.489135742188">
                <text:p>631.489135742188</text:p>
              </table:table-cell>
              <table:table-cell office:value-type="float" office:value="0.02464367">
                <text:p>0.02464367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31.608581542969">
                <text:p>631.608581542969</text:p>
              </table:table-cell>
              <table:table-cell office:value-type="float" office:value="0.006589038">
                <text:p>0.006589038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31.72802734375">
                <text:p>631.72802734375</text:p>
              </table:table-cell>
              <table:table-cell office:value-type="float" office:value="0.02043292">
                <text:p>0.02043292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31.847412109375">
                <text:p>631.847412109375</text:p>
              </table:table-cell>
              <table:table-cell office:value-type="float" office:value="0.009751735">
                <text:p>0.009751735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31.966857910156">
                <text:p>631.966857910156</text:p>
              </table:table-cell>
              <table:table-cell office:value-type="float" office:value="0.027955">
                <text:p>0.027955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32.086303710938">
                <text:p>632.086303710938</text:p>
              </table:table-cell>
              <table:table-cell office:value-type="float" office:value="0.004463952">
                <text:p>0.00446395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32.205749511719">
                <text:p>632.205749511719</text:p>
              </table:table-cell>
              <table:table-cell office:value-type="float" office:value="0.01243585">
                <text:p>0.01243585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32.3251953125">
                <text:p>632.3251953125</text:p>
              </table:table-cell>
              <table:table-cell office:value-type="float" office:value="0.012414">
                <text:p>0.012414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32.444580078125">
                <text:p>632.444580078125</text:p>
              </table:table-cell>
              <table:table-cell office:value-type="float" office:value="0.02346756">
                <text:p>0.02346756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32.564025878906">
                <text:p>632.564025878906</text:p>
              </table:table-cell>
              <table:table-cell office:value-type="float" office:value="0.01166287">
                <text:p>0.01166287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2.683471679688">
                <text:p>632.683471679688</text:p>
              </table:table-cell>
              <table:table-cell office:value-type="float" office:value="0.01315494">
                <text:p>0.01315494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2.802917480469">
                <text:p>632.802917480469</text:p>
              </table:table-cell>
              <table:table-cell office:value-type="float" office:value="0.009608968">
                <text:p>0.009608968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32.92236328125">
                <text:p>632.92236328125</text:p>
              </table:table-cell>
              <table:table-cell office:value-type="float" office:value="0.004309487">
                <text:p>0.004309487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33.041809082031">
                <text:p>633.041809082031</text:p>
              </table:table-cell>
              <table:table-cell office:value-type="float" office:value="0.01902556">
                <text:p>0.01902556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33.161254882813">
                <text:p>633.161254882813</text:p>
              </table:table-cell>
              <table:table-cell office:value-type="float" office:value="0.04233594">
                <text:p>0.04233594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633.280700683594">
                <text:p>633.280700683594</text:p>
              </table:table-cell>
              <table:table-cell office:value-type="float" office:value="0.005277951">
                <text:p>0.005277951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33.400146484375">
                <text:p>633.400146484375</text:p>
              </table:table-cell>
              <table:table-cell office:value-type="float" office:value="0.009881572">
                <text:p>0.00988157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33.519592285156">
                <text:p>633.519592285156</text:p>
              </table:table-cell>
              <table:table-cell office:value-type="float" office:value="0.007597423">
                <text:p>0.007597423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33.639038085938">
                <text:p>633.639038085938</text:p>
              </table:table-cell>
              <table:table-cell office:value-type="float" office:value="0.02204548">
                <text:p>0.02204548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633.758544921875">
                <text:p>633.758544921875</text:p>
              </table:table-cell>
              <table:table-cell office:value-type="float" office:value="0.002850322">
                <text:p>0.002850322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633.877990722656">
                <text:p>633.877990722656</text:p>
              </table:table-cell>
              <table:table-cell office:value-type="float" office:value="0.01131022">
                <text:p>0.0113102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33.997436523438">
                <text:p>633.997436523438</text:p>
              </table:table-cell>
              <table:table-cell office:value-type="float" office:value="0.008977882">
                <text:p>0.008977882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634.116882324219">
                <text:p>634.116882324219</text:p>
              </table:table-cell>
              <table:table-cell office:value-type="float" office:value="0.005521359">
                <text:p>0.005521359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34.236389160156">
                <text:p>634.236389160156</text:p>
              </table:table-cell>
              <table:table-cell office:value-type="float" office:value="0.005408608">
                <text:p>0.005408608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34.355834960938">
                <text:p>634.355834960938</text:p>
              </table:table-cell>
              <table:table-cell office:value-type="float" office:value="0.01097831">
                <text:p>0.01097831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34.475280761719">
                <text:p>634.475280761719</text:p>
              </table:table-cell>
              <table:table-cell office:value-type="float" office:value="0.007176077">
                <text:p>0.00717607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634.594787597656">
                <text:p>634.594787597656</text:p>
              </table:table-cell>
              <table:table-cell office:value-type="float" office:value="0.03215375">
                <text:p>0.03215375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34.714233398438">
                <text:p>634.714233398438</text:p>
              </table:table-cell>
              <table:table-cell office:value-type="float" office:value="0.006298415">
                <text:p>0.00629841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34.833679199219">
                <text:p>634.833679199219</text:p>
              </table:table-cell>
              <table:table-cell office:value-type="float" office:value="0.003761163">
                <text:p>0.00376116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34.953186035156">
                <text:p>634.953186035156</text:p>
              </table:table-cell>
              <table:table-cell office:value-type="float" office:value="0.01730255">
                <text:p>0.01730255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635.072631835938">
                <text:p>635.072631835938</text:p>
              </table:table-cell>
              <table:table-cell office:value-type="float" office:value="0.01961221">
                <text:p>0.01961221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35.192138671875">
                <text:p>635.192138671875</text:p>
              </table:table-cell>
              <table:table-cell office:value-type="float" office:value="0.009571431">
                <text:p>0.00957143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635.311584472656">
                <text:p>635.311584472656</text:p>
              </table:table-cell>
              <table:table-cell office:value-type="float" office:value="-0.0004712152">
                <text:p>-0.0004712152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635.431091308594">
                <text:p>635.431091308594</text:p>
              </table:table-cell>
              <table:table-cell office:value-type="float" office:value="0.02818391">
                <text:p>0.0281839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635.550598144531">
                <text:p>635.550598144531</text:p>
              </table:table-cell>
              <table:table-cell office:value-type="float" office:value="0.01641083">
                <text:p>0.01641083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35.670043945313">
                <text:p>635.670043945313</text:p>
              </table:table-cell>
              <table:table-cell office:value-type="float" office:value="0.003285001">
                <text:p>0.003285001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5.78955078125">
                <text:p>635.78955078125</text:p>
              </table:table-cell>
              <table:table-cell office:value-type="float" office:value="0.01287501">
                <text:p>0.01287501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35.909057617188">
                <text:p>635.909057617188</text:p>
              </table:table-cell>
              <table:table-cell office:value-type="float" office:value="0.00977801">
                <text:p>0.00977801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36.028503417969">
                <text:p>636.028503417969</text:p>
              </table:table-cell>
              <table:table-cell office:value-type="float" office:value="0.004990987">
                <text:p>0.004990987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36.148010253906">
                <text:p>636.148010253906</text:p>
              </table:table-cell>
              <table:table-cell office:value-type="float" office:value="0.005533592">
                <text:p>0.005533592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36.267517089844">
                <text:p>636.267517089844</text:p>
              </table:table-cell>
              <table:table-cell office:value-type="float" office:value="0.01900166">
                <text:p>0.01900166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36.387023925781">
                <text:p>636.387023925781</text:p>
              </table:table-cell>
              <table:table-cell office:value-type="float" office:value="0.02091335">
                <text:p>0.02091335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636.506469726563">
                <text:p>636.506469726563</text:p>
              </table:table-cell>
              <table:table-cell office:value-type="float" office:value="0.01183871">
                <text:p>0.01183871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636.6259765625">
                <text:p>636.6259765625</text:p>
              </table:table-cell>
              <table:table-cell office:value-type="float" office:value="0.02016344">
                <text:p>0.02016344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36.745483398438">
                <text:p>636.745483398438</text:p>
              </table:table-cell>
              <table:table-cell office:value-type="float" office:value="0.002824666">
                <text:p>0.002824666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36.864990234375">
                <text:p>636.864990234375</text:p>
              </table:table-cell>
              <table:table-cell office:value-type="float" office:value="0.008214695">
                <text:p>0.008214695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636.984497070313">
                <text:p>636.984497070313</text:p>
              </table:table-cell>
              <table:table-cell office:value-type="float" office:value="0.002999514">
                <text:p>0.002999514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37.10400390625">
                <text:p>637.10400390625</text:p>
              </table:table-cell>
              <table:table-cell office:value-type="float" office:value="0.002247801">
                <text:p>0.002247801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637.223510742188">
                <text:p>637.223510742188</text:p>
              </table:table-cell>
              <table:table-cell office:value-type="float" office:value="0.01266256">
                <text:p>0.01266256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37.343017578125">
                <text:p>637.343017578125</text:p>
              </table:table-cell>
              <table:table-cell office:value-type="float" office:value="0.0218173">
                <text:p>0.0218173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37.462524414063">
                <text:p>637.462524414063</text:p>
              </table:table-cell>
              <table:table-cell office:value-type="float" office:value="0.002608763">
                <text:p>0.002608763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637.58203125">
                <text:p>637.58203125</text:p>
              </table:table-cell>
              <table:table-cell office:value-type="float" office:value="0.03108947">
                <text:p>0.03108947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37.701538085938">
                <text:p>637.701538085938</text:p>
              </table:table-cell>
              <table:table-cell office:value-type="float" office:value="0.01104518">
                <text:p>0.01104518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37.821044921875">
                <text:p>637.821044921875</text:p>
              </table:table-cell>
              <table:table-cell office:value-type="float" office:value="0.007396756">
                <text:p>0.007396756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37.940551757813">
                <text:p>637.940551757813</text:p>
              </table:table-cell>
              <table:table-cell office:value-type="float" office:value="0.001677358">
                <text:p>0.001677358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38.060119628906">
                <text:p>638.060119628906</text:p>
              </table:table-cell>
              <table:table-cell office:value-type="float" office:value="0.000204055">
                <text:p>0.000204055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38.179626464844">
                <text:p>638.179626464844</text:p>
              </table:table-cell>
              <table:table-cell office:value-type="float" office:value="0.003418911">
                <text:p>0.003418911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38.299133300781">
                <text:p>638.299133300781</text:p>
              </table:table-cell>
              <table:table-cell office:value-type="float" office:value="0.02066157">
                <text:p>0.02066157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38.418640136719">
                <text:p>638.418640136719</text:p>
              </table:table-cell>
              <table:table-cell office:value-type="float" office:value="0.02486693">
                <text:p>0.02486693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38.538208007813">
                <text:p>638.538208007813</text:p>
              </table:table-cell>
              <table:table-cell office:value-type="float" office:value="0.006300989">
                <text:p>0.006300989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8.65771484375">
                <text:p>638.65771484375</text:p>
              </table:table-cell>
              <table:table-cell office:value-type="float" office:value="0.006466154">
                <text:p>0.006466154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38.777221679688">
                <text:p>638.777221679688</text:p>
              </table:table-cell>
              <table:table-cell office:value-type="float" office:value="0.003078587">
                <text:p>0.003078587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38.896789550781">
                <text:p>638.896789550781</text:p>
              </table:table-cell>
              <table:table-cell office:value-type="float" office:value="0.02225739">
                <text:p>0.02225739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39.016296386719">
                <text:p>639.016296386719</text:p>
              </table:table-cell>
              <table:table-cell office:value-type="float" office:value="0.01183239">
                <text:p>0.01183239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39.135864257813">
                <text:p>639.135864257813</text:p>
              </table:table-cell>
              <table:table-cell office:value-type="float" office:value="-0.001488473">
                <text:p>-0.001488473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39.25537109375">
                <text:p>639.25537109375</text:p>
              </table:table-cell>
              <table:table-cell office:value-type="float" office:value="0.006203784">
                <text:p>0.006203784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39.374938964844">
                <text:p>639.374938964844</text:p>
              </table:table-cell>
              <table:table-cell office:value-type="float" office:value="0.01133875">
                <text:p>0.0113387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39.494445800781">
                <text:p>639.494445800781</text:p>
              </table:table-cell>
              <table:table-cell office:value-type="float" office:value="0.005938872">
                <text:p>0.005938872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39.614013671875">
                <text:p>639.614013671875</text:p>
              </table:table-cell>
              <table:table-cell office:value-type="float" office:value="0.006989551">
                <text:p>0.006989551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39.733520507813">
                <text:p>639.733520507813</text:p>
              </table:table-cell>
              <table:table-cell office:value-type="float" office:value="0.0234102">
                <text:p>0.023410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39.853088378906">
                <text:p>639.853088378906</text:p>
              </table:table-cell>
              <table:table-cell office:value-type="float" office:value="0.00275984">
                <text:p>0.0027598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39.972595214844">
                <text:p>639.972595214844</text:p>
              </table:table-cell>
              <table:table-cell office:value-type="float" office:value="0.0221271">
                <text:p>0.0221271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40.092163085938">
                <text:p>640.092163085938</text:p>
              </table:table-cell>
              <table:table-cell office:value-type="float" office:value="0.00379281">
                <text:p>0.00379281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0.211730957031">
                <text:p>640.211730957031</text:p>
              </table:table-cell>
              <table:table-cell office:value-type="float" office:value="0.019307">
                <text:p>0.01930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40.331237792969">
                <text:p>640.331237792969</text:p>
              </table:table-cell>
              <table:table-cell office:value-type="float" office:value="0.008681478">
                <text:p>0.008681478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0.450805664063">
                <text:p>640.450805664063</text:p>
              </table:table-cell>
              <table:table-cell office:value-type="float" office:value="0.002250684">
                <text:p>0.002250684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40.570373535156">
                <text:p>640.570373535156</text:p>
              </table:table-cell>
              <table:table-cell office:value-type="float" office:value="0.01605449">
                <text:p>0.01605449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0.68994140625">
                <text:p>640.68994140625</text:p>
              </table:table-cell>
              <table:table-cell office:value-type="float" office:value="0.01624732">
                <text:p>0.01624732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40.809509277344">
                <text:p>640.809509277344</text:p>
              </table:table-cell>
              <table:table-cell office:value-type="float" office:value="0.002671017">
                <text:p>0.002671017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40.929016113281">
                <text:p>640.929016113281</text:p>
              </table:table-cell>
              <table:table-cell office:value-type="float" office:value="-0.001944445">
                <text:p>-0.001944445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41.048583984375">
                <text:p>641.048583984375</text:p>
              </table:table-cell>
              <table:table-cell office:value-type="float" office:value="-0.002626755">
                <text:p>-0.002626755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41.168151855469">
                <text:p>641.168151855469</text:p>
              </table:table-cell>
              <table:table-cell office:value-type="float" office:value="0.003316071">
                <text:p>0.003316071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41.287719726563">
                <text:p>641.287719726563</text:p>
              </table:table-cell>
              <table:table-cell office:value-type="float" office:value="0.004373829">
                <text:p>0.004373829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41.407287597656">
                <text:p>641.407287597656</text:p>
              </table:table-cell>
              <table:table-cell office:value-type="float" office:value="0.0101852">
                <text:p>0.010185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41.52685546875">
                <text:p>641.52685546875</text:p>
              </table:table-cell>
              <table:table-cell office:value-type="float" office:value="0.01647597">
                <text:p>0.01647597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41.646423339844">
                <text:p>641.646423339844</text:p>
              </table:table-cell>
              <table:table-cell office:value-type="float" office:value="0.007325527">
                <text:p>0.007325527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641.765991210938">
                <text:p>641.765991210938</text:p>
              </table:table-cell>
              <table:table-cell office:value-type="float" office:value="0.001550952">
                <text:p>0.001550952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41.885559082031">
                <text:p>641.885559082031</text:p>
              </table:table-cell>
              <table:table-cell office:value-type="float" office:value="0.01262148">
                <text:p>0.0126214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642.005126953125">
                <text:p>642.005126953125</text:p>
              </table:table-cell>
              <table:table-cell office:value-type="float" office:value="0.005901838">
                <text:p>0.005901838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42.124694824219">
                <text:p>642.124694824219</text:p>
              </table:table-cell>
              <table:table-cell office:value-type="float" office:value="0.009049562">
                <text:p>0.009049562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642.244262695313">
                <text:p>642.244262695313</text:p>
              </table:table-cell>
              <table:table-cell office:value-type="float" office:value="0.003561176">
                <text:p>0.003561176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42.363891601563">
                <text:p>642.363891601563</text:p>
              </table:table-cell>
              <table:table-cell office:value-type="float" office:value="0.001307493">
                <text:p>0.001307493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642.483459472656">
                <text:p>642.483459472656</text:p>
              </table:table-cell>
              <table:table-cell office:value-type="float" office:value="0.004271926">
                <text:p>0.004271926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42.60302734375">
                <text:p>642.60302734375</text:p>
              </table:table-cell>
              <table:table-cell office:value-type="float" office:value="0.01573603">
                <text:p>0.0157360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42.722595214844">
                <text:p>642.722595214844</text:p>
              </table:table-cell>
              <table:table-cell office:value-type="float" office:value="-0.0005615887">
                <text:p>-0.0005615887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2.842163085938">
                <text:p>642.842163085938</text:p>
              </table:table-cell>
              <table:table-cell office:value-type="float" office:value="0.00353106">
                <text:p>0.00353106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42.961791992188">
                <text:p>642.961791992188</text:p>
              </table:table-cell>
              <table:table-cell office:value-type="float" office:value="0.005645241">
                <text:p>0.005645241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43.081359863281">
                <text:p>643.081359863281</text:p>
              </table:table-cell>
              <table:table-cell office:value-type="float" office:value="0.01471223">
                <text:p>0.01471223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43.200927734375">
                <text:p>643.200927734375</text:p>
              </table:table-cell>
              <table:table-cell office:value-type="float" office:value="0.009906106">
                <text:p>0.009906106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43.320556640625">
                <text:p>643.320556640625</text:p>
              </table:table-cell>
              <table:table-cell office:value-type="float" office:value="0.006937785">
                <text:p>0.006937785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43.440124511719">
                <text:p>643.440124511719</text:p>
              </table:table-cell>
              <table:table-cell office:value-type="float" office:value="0.01876408">
                <text:p>0.01876408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43.559753417969">
                <text:p>643.559753417969</text:p>
              </table:table-cell>
              <table:table-cell office:value-type="float" office:value="0.01646265">
                <text:p>0.01646265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43.679321289063">
                <text:p>643.679321289063</text:p>
              </table:table-cell>
              <table:table-cell office:value-type="float" office:value="0.012163">
                <text:p>0.012163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43.798950195313">
                <text:p>643.798950195313</text:p>
              </table:table-cell>
              <table:table-cell office:value-type="float" office:value="0.00836381">
                <text:p>0.0083638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43.918518066406">
                <text:p>643.918518066406</text:p>
              </table:table-cell>
              <table:table-cell office:value-type="float" office:value="0.005913958">
                <text:p>0.005913958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44.038146972656">
                <text:p>644.038146972656</text:p>
              </table:table-cell>
              <table:table-cell office:value-type="float" office:value="0.02505183">
                <text:p>0.02505183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44.15771484375">
                <text:p>644.15771484375</text:p>
              </table:table-cell>
              <table:table-cell office:value-type="float" office:value="0.000957602">
                <text:p>0.00095760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44.27734375">
                <text:p>644.27734375</text:p>
              </table:table-cell>
              <table:table-cell office:value-type="float" office:value="0.001353787">
                <text:p>0.001353787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644.396911621094">
                <text:p>644.396911621094</text:p>
              </table:table-cell>
              <table:table-cell office:value-type="float" office:value="0.004866382">
                <text:p>0.004866382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644.516540527344">
                <text:p>644.516540527344</text:p>
              </table:table-cell>
              <table:table-cell office:value-type="float" office:value="0.004719944">
                <text:p>0.004719944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644.636169433594">
                <text:p>644.636169433594</text:p>
              </table:table-cell>
              <table:table-cell office:value-type="float" office:value="0.002650985">
                <text:p>0.002650985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44.755737304688">
                <text:p>644.755737304688</text:p>
              </table:table-cell>
              <table:table-cell office:value-type="float" office:value="0.002918182">
                <text:p>0.00291818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44.875366210938">
                <text:p>644.875366210938</text:p>
              </table:table-cell>
              <table:table-cell office:value-type="float" office:value="0.01331366">
                <text:p>0.01331366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644.994995117188">
                <text:p>644.994995117188</text:p>
              </table:table-cell>
              <table:table-cell office:value-type="float" office:value="0.01317137">
                <text:p>0.01317137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45.114562988281">
                <text:p>645.114562988281</text:p>
              </table:table-cell>
              <table:table-cell office:value-type="float" office:value="0.01739217">
                <text:p>0.01739217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45.234191894531">
                <text:p>645.234191894531</text:p>
              </table:table-cell>
              <table:table-cell office:value-type="float" office:value="0.01529542">
                <text:p>0.01529542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45.353820800781">
                <text:p>645.353820800781</text:p>
              </table:table-cell>
              <table:table-cell office:value-type="float" office:value="0.007206395">
                <text:p>0.00720639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45.473449707031">
                <text:p>645.473449707031</text:p>
              </table:table-cell>
              <table:table-cell office:value-type="float" office:value="0.001942441">
                <text:p>0.001942441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45.593078613281">
                <text:p>645.593078613281</text:p>
              </table:table-cell>
              <table:table-cell office:value-type="float" office:value="0.007067492">
                <text:p>0.007067492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45.712707519531">
                <text:p>645.712707519531</text:p>
              </table:table-cell>
              <table:table-cell office:value-type="float" office:value="0.003809638">
                <text:p>0.003809638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45.832336425781">
                <text:p>645.832336425781</text:p>
              </table:table-cell>
              <table:table-cell office:value-type="float" office:value="0.002160764">
                <text:p>0.002160764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45.951965332031">
                <text:p>645.951965332031</text:p>
              </table:table-cell>
              <table:table-cell office:value-type="float" office:value="0.006093511">
                <text:p>0.00609351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46.071533203125">
                <text:p>646.071533203125</text:p>
              </table:table-cell>
              <table:table-cell office:value-type="float" office:value="0.004129027">
                <text:p>0.004129027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46.191162109375">
                <text:p>646.191162109375</text:p>
              </table:table-cell>
              <table:table-cell office:value-type="float" office:value="-0.0008079552">
                <text:p>-0.000807955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46.310852050781">
                <text:p>646.310852050781</text:p>
              </table:table-cell>
              <table:table-cell office:value-type="float" office:value="0.01412489">
                <text:p>0.0141248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46.430480957031">
                <text:p>646.430480957031</text:p>
              </table:table-cell>
              <table:table-cell office:value-type="float" office:value="0.008394333">
                <text:p>0.008394333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46.550109863281">
                <text:p>646.550109863281</text:p>
              </table:table-cell>
              <table:table-cell office:value-type="float" office:value="0.01797191">
                <text:p>0.01797191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46.669738769531">
                <text:p>646.669738769531</text:p>
              </table:table-cell>
              <table:table-cell office:value-type="float" office:value="0.003659821">
                <text:p>0.003659821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46.789367675781">
                <text:p>646.789367675781</text:p>
              </table:table-cell>
              <table:table-cell office:value-type="float" office:value="0.01155723">
                <text:p>0.01155723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46.908996582031">
                <text:p>646.908996582031</text:p>
              </table:table-cell>
              <table:table-cell office:value-type="float" office:value="0.02968155">
                <text:p>0.029681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47.028625488281">
                <text:p>647.028625488281</text:p>
              </table:table-cell>
              <table:table-cell office:value-type="float" office:value="0.01095341">
                <text:p>0.0109534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47.148254394531">
                <text:p>647.148254394531</text:p>
              </table:table-cell>
              <table:table-cell office:value-type="float" office:value="0.004867078">
                <text:p>0.004867078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47.267944335938">
                <text:p>647.267944335938</text:p>
              </table:table-cell>
              <table:table-cell office:value-type="float" office:value="0.003995966">
                <text:p>0.003995966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47.387573242188">
                <text:p>647.387573242188</text:p>
              </table:table-cell>
              <table:table-cell office:value-type="float" office:value="0.01108829">
                <text:p>0.01108829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647.507202148438">
                <text:p>647.507202148438</text:p>
              </table:table-cell>
              <table:table-cell office:value-type="float" office:value="0.003811517">
                <text:p>0.00381151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47.626831054688">
                <text:p>647.626831054688</text:p>
              </table:table-cell>
              <table:table-cell office:value-type="float" office:value="0.009035579">
                <text:p>0.009035579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47.746520996094">
                <text:p>647.746520996094</text:p>
              </table:table-cell>
              <table:table-cell office:value-type="float" office:value="0.03105379">
                <text:p>0.03105379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647.866149902344">
                <text:p>647.866149902344</text:p>
              </table:table-cell>
              <table:table-cell office:value-type="float" office:value="-0.0006318216">
                <text:p>-0.0006318216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47.985778808594">
                <text:p>647.985778808594</text:p>
              </table:table-cell>
              <table:table-cell office:value-type="float" office:value="0.02904487">
                <text:p>0.02904487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48.10546875">
                <text:p>648.10546875</text:p>
              </table:table-cell>
              <table:table-cell office:value-type="float" office:value="-0.0005950255">
                <text:p>-0.000595025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48.22509765625">
                <text:p>648.22509765625</text:p>
              </table:table-cell>
              <table:table-cell office:value-type="float" office:value="0.02491439">
                <text:p>0.02491439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48.344787597656">
                <text:p>648.344787597656</text:p>
              </table:table-cell>
              <table:table-cell office:value-type="float" office:value="0.01377189">
                <text:p>0.01377189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48.464416503906">
                <text:p>648.464416503906</text:p>
              </table:table-cell>
              <table:table-cell office:value-type="float" office:value="0.005883252">
                <text:p>0.005883252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48.584106445313">
                <text:p>648.584106445313</text:p>
              </table:table-cell>
              <table:table-cell office:value-type="float" office:value="0.009167187">
                <text:p>0.009167187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48.703735351563">
                <text:p>648.703735351563</text:p>
              </table:table-cell>
              <table:table-cell office:value-type="float" office:value="0.007213143">
                <text:p>0.007213143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48.823425292969">
                <text:p>648.823425292969</text:p>
              </table:table-cell>
              <table:table-cell office:value-type="float" office:value="-0.004273628">
                <text:p>-0.004273628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48.943054199219">
                <text:p>648.943054199219</text:p>
              </table:table-cell>
              <table:table-cell office:value-type="float" office:value="0.002514909">
                <text:p>0.002514909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49.062744140625">
                <text:p>649.062744140625</text:p>
              </table:table-cell>
              <table:table-cell office:value-type="float" office:value="0.005126569">
                <text:p>0.005126569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49.182434082031">
                <text:p>649.182434082031</text:p>
              </table:table-cell>
              <table:table-cell office:value-type="float" office:value="0.006753576">
                <text:p>0.006753576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49.302062988281">
                <text:p>649.302062988281</text:p>
              </table:table-cell>
              <table:table-cell office:value-type="float" office:value="0.01111651">
                <text:p>0.01111651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49.421752929688">
                <text:p>649.421752929688</text:p>
              </table:table-cell>
              <table:table-cell office:value-type="float" office:value="-0.002214789">
                <text:p>-0.00221478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49.541442871094">
                <text:p>649.541442871094</text:p>
              </table:table-cell>
              <table:table-cell office:value-type="float" office:value="0.00281476">
                <text:p>0.00281476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49.661071777344">
                <text:p>649.661071777344</text:p>
              </table:table-cell>
              <table:table-cell office:value-type="float" office:value="0.0227333">
                <text:p>0.0227333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49.78076171875">
                <text:p>649.78076171875</text:p>
              </table:table-cell>
              <table:table-cell office:value-type="float" office:value="0.008636995">
                <text:p>0.00863699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649.900451660156">
                <text:p>649.900451660156</text:p>
              </table:table-cell>
              <table:table-cell office:value-type="float" office:value="0.009550964">
                <text:p>0.00955096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50.020141601563">
                <text:p>650.020141601563</text:p>
              </table:table-cell>
              <table:table-cell office:value-type="float" office:value="0.0009320453">
                <text:p>0.0009320453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650.139770507813">
                <text:p>650.139770507813</text:p>
              </table:table-cell>
              <table:table-cell office:value-type="float" office:value="-0.002667592">
                <text:p>-0.00266759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650.259460449219">
                <text:p>650.259460449219</text:p>
              </table:table-cell>
              <table:table-cell office:value-type="float" office:value="-0.0002768541">
                <text:p>-0.0002768541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50.379150390625">
                <text:p>650.379150390625</text:p>
              </table:table-cell>
              <table:table-cell office:value-type="float" office:value="0.005607947">
                <text:p>0.005607947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50.498840332031">
                <text:p>650.498840332031</text:p>
              </table:table-cell>
              <table:table-cell office:value-type="float" office:value="0.001690442">
                <text:p>0.001690442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0.618530273438">
                <text:p>650.618530273438</text:p>
              </table:table-cell>
              <table:table-cell office:value-type="float" office:value="0.009633635">
                <text:p>0.00963363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50.738220214844">
                <text:p>650.738220214844</text:p>
              </table:table-cell>
              <table:table-cell office:value-type="float" office:value="0.00337201">
                <text:p>0.0033720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50.85791015625">
                <text:p>650.85791015625</text:p>
              </table:table-cell>
              <table:table-cell office:value-type="float" office:value="0.01158891">
                <text:p>0.01158891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50.977600097656">
                <text:p>650.977600097656</text:p>
              </table:table-cell>
              <table:table-cell office:value-type="float" office:value="0.01400452">
                <text:p>0.01400452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51.097290039063">
                <text:p>651.097290039063</text:p>
              </table:table-cell>
              <table:table-cell office:value-type="float" office:value="0.005884518">
                <text:p>0.005884518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51.216979980469">
                <text:p>651.216979980469</text:p>
              </table:table-cell>
              <table:table-cell office:value-type="float" office:value="0.01556944">
                <text:p>0.01556944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51.336669921875">
                <text:p>651.336669921875</text:p>
              </table:table-cell>
              <table:table-cell office:value-type="float" office:value="0.005355292">
                <text:p>0.005355292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51.456359863281">
                <text:p>651.456359863281</text:p>
              </table:table-cell>
              <table:table-cell office:value-type="float" office:value="0.005188093">
                <text:p>0.005188093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51.576049804688">
                <text:p>651.576049804688</text:p>
              </table:table-cell>
              <table:table-cell office:value-type="float" office:value="0.00228372">
                <text:p>0.00228372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51.695739746094">
                <text:p>651.695739746094</text:p>
              </table:table-cell>
              <table:table-cell office:value-type="float" office:value="0.01105528">
                <text:p>0.0110552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51.8154296875">
                <text:p>651.8154296875</text:p>
              </table:table-cell>
              <table:table-cell office:value-type="float" office:value="0.003188901">
                <text:p>0.003188901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51.935180664063">
                <text:p>651.935180664063</text:p>
              </table:table-cell>
              <table:table-cell office:value-type="float" office:value="-0.001308848">
                <text:p>-0.001308848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52.054870605469">
                <text:p>652.054870605469</text:p>
              </table:table-cell>
              <table:table-cell office:value-type="float" office:value="0.007674418">
                <text:p>0.007674418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52.174560546875">
                <text:p>652.174560546875</text:p>
              </table:table-cell>
              <table:table-cell office:value-type="float" office:value="0.001000252">
                <text:p>0.001000252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52.294250488281">
                <text:p>652.294250488281</text:p>
              </table:table-cell>
              <table:table-cell office:value-type="float" office:value="0.002493353">
                <text:p>0.002493353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52.414001464844">
                <text:p>652.414001464844</text:p>
              </table:table-cell>
              <table:table-cell office:value-type="float" office:value="0.008059117">
                <text:p>0.008059117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52.53369140625">
                <text:p>652.53369140625</text:p>
              </table:table-cell>
              <table:table-cell office:value-type="float" office:value="-0.001486656">
                <text:p>-0.001486656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52.653381347656">
                <text:p>652.653381347656</text:p>
              </table:table-cell>
              <table:table-cell office:value-type="float" office:value="0.004583277">
                <text:p>0.004583277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652.773071289063">
                <text:p>652.773071289063</text:p>
              </table:table-cell>
              <table:table-cell office:value-type="float" office:value="-0.002975522">
                <text:p>-0.00297552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652.892822265625">
                <text:p>652.892822265625</text:p>
              </table:table-cell>
              <table:table-cell office:value-type="float" office:value="0.01007385">
                <text:p>0.01007385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53.012512207031">
                <text:p>653.012512207031</text:p>
              </table:table-cell>
              <table:table-cell office:value-type="float" office:value="-0.0001504971">
                <text:p>-0.0001504971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53.132263183594">
                <text:p>653.132263183594</text:p>
              </table:table-cell>
              <table:table-cell office:value-type="float" office:value="0.007532927">
                <text:p>0.007532927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53.251953125">
                <text:p>653.251953125</text:p>
              </table:table-cell>
              <table:table-cell office:value-type="float" office:value="-0.0008107101">
                <text:p>-0.0008107101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53.371704101563">
                <text:p>653.371704101563</text:p>
              </table:table-cell>
              <table:table-cell office:value-type="float" office:value="0.008159909">
                <text:p>0.00815990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53.491394042969">
                <text:p>653.491394042969</text:p>
              </table:table-cell>
              <table:table-cell office:value-type="float" office:value="0.02254607">
                <text:p>0.02254607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653.611145019531">
                <text:p>653.611145019531</text:p>
              </table:table-cell>
              <table:table-cell office:value-type="float" office:value="0.008555336">
                <text:p>0.008555336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53.730834960938">
                <text:p>653.730834960938</text:p>
              </table:table-cell>
              <table:table-cell office:value-type="float" office:value="0.02628286">
                <text:p>0.02628286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653.8505859375">
                <text:p>653.8505859375</text:p>
              </table:table-cell>
              <table:table-cell office:value-type="float" office:value="0.007752305">
                <text:p>0.007752305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53.970275878906">
                <text:p>653.970275878906</text:p>
              </table:table-cell>
              <table:table-cell office:value-type="float" office:value="0.02080343">
                <text:p>0.02080343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54.090026855469">
                <text:p>654.090026855469</text:p>
              </table:table-cell>
              <table:table-cell office:value-type="float" office:value="-0.003163839">
                <text:p>-0.003163839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54.209716796875">
                <text:p>654.209716796875</text:p>
              </table:table-cell>
              <table:table-cell office:value-type="float" office:value="-0.0008725235">
                <text:p>-0.000872523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54.329467773438">
                <text:p>654.329467773438</text:p>
              </table:table-cell>
              <table:table-cell office:value-type="float" office:value="-0.006740981">
                <text:p>-0.00674098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54.44921875">
                <text:p>654.44921875</text:p>
              </table:table-cell>
              <table:table-cell office:value-type="float" office:value="0.01206589">
                <text:p>0.01206589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54.568969726563">
                <text:p>654.568969726563</text:p>
              </table:table-cell>
              <table:table-cell office:value-type="float" office:value="-0.0005955399">
                <text:p>-0.000595539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54.688659667969">
                <text:p>654.688659667969</text:p>
              </table:table-cell>
              <table:table-cell office:value-type="float" office:value="0.009731471">
                <text:p>0.009731471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54.808410644531">
                <text:p>654.808410644531</text:p>
              </table:table-cell>
              <table:table-cell office:value-type="float" office:value="0.003488672">
                <text:p>0.003488672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54.928161621094">
                <text:p>654.928161621094</text:p>
              </table:table-cell>
              <table:table-cell office:value-type="float" office:value="0.002552497">
                <text:p>0.002552497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55.047912597656">
                <text:p>655.047912597656</text:p>
              </table:table-cell>
              <table:table-cell office:value-type="float" office:value="0.01991218">
                <text:p>0.01991218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55.167602539063">
                <text:p>655.167602539063</text:p>
              </table:table-cell>
              <table:table-cell office:value-type="float" office:value="0.002354636">
                <text:p>0.002354636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55.287353515625">
                <text:p>655.287353515625</text:p>
              </table:table-cell>
              <table:table-cell office:value-type="float" office:value="0.0123858">
                <text:p>0.0123858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55.407104492188">
                <text:p>655.407104492188</text:p>
              </table:table-cell>
              <table:table-cell office:value-type="float" office:value="-0.004523132">
                <text:p>-0.004523132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55.52685546875">
                <text:p>655.52685546875</text:p>
              </table:table-cell>
              <table:table-cell office:value-type="float" office:value="0.004429173">
                <text:p>0.004429173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55.646606445313">
                <text:p>655.646606445313</text:p>
              </table:table-cell>
              <table:table-cell office:value-type="float" office:value="-0.005753993">
                <text:p>-0.005753993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55.766357421875">
                <text:p>655.766357421875</text:p>
              </table:table-cell>
              <table:table-cell office:value-type="float" office:value="0.004918303">
                <text:p>0.004918303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55.886108398438">
                <text:p>655.886108398438</text:p>
              </table:table-cell>
              <table:table-cell office:value-type="float" office:value="-0.003559741">
                <text:p>-0.003559741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56.005859375">
                <text:p>656.005859375</text:p>
              </table:table-cell>
              <table:table-cell office:value-type="float" office:value="-0.004702469">
                <text:p>-0.004702469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56.125610351563">
                <text:p>656.125610351563</text:p>
              </table:table-cell>
              <table:table-cell office:value-type="float" office:value="0.005579998">
                <text:p>0.005579998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56.245361328125">
                <text:p>656.245361328125</text:p>
              </table:table-cell>
              <table:table-cell office:value-type="float" office:value="0.001463267">
                <text:p>0.001463267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56.365112304688">
                <text:p>656.365112304688</text:p>
              </table:table-cell>
              <table:table-cell office:value-type="float" office:value="0.01989377">
                <text:p>0.01989377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56.48486328125">
                <text:p>656.48486328125</text:p>
              </table:table-cell>
              <table:table-cell office:value-type="float" office:value="0.001881928">
                <text:p>0.001881928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56.604614257813">
                <text:p>656.604614257813</text:p>
              </table:table-cell>
              <table:table-cell office:value-type="float" office:value="0.00545602">
                <text:p>0.00545602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56.724365234375">
                <text:p>656.724365234375</text:p>
              </table:table-cell>
              <table:table-cell office:value-type="float" office:value="0.02210936">
                <text:p>0.02210936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56.844116210938">
                <text:p>656.844116210938</text:p>
              </table:table-cell>
              <table:table-cell office:value-type="float" office:value="0.0045226">
                <text:p>0.0045226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56.9638671875">
                <text:p>656.9638671875</text:p>
              </table:table-cell>
              <table:table-cell office:value-type="float" office:value="0.001407375">
                <text:p>0.001407375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57.083679199219">
                <text:p>657.083679199219</text:p>
              </table:table-cell>
              <table:table-cell office:value-type="float" office:value="0.006186589">
                <text:p>0.006186589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57.203430175781">
                <text:p>657.203430175781</text:p>
              </table:table-cell>
              <table:table-cell office:value-type="float" office:value="-0.0003431604">
                <text:p>-0.0003431604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57.323181152344">
                <text:p>657.323181152344</text:p>
              </table:table-cell>
              <table:table-cell office:value-type="float" office:value="0.0178559">
                <text:p>0.0178559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57.442932128906">
                <text:p>657.442932128906</text:p>
              </table:table-cell>
              <table:table-cell office:value-type="float" office:value="0.0122828">
                <text:p>0.0122828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57.562744140625">
                <text:p>657.562744140625</text:p>
              </table:table-cell>
              <table:table-cell office:value-type="float" office:value="0.008457645">
                <text:p>0.008457645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7.682495117188">
                <text:p>657.682495117188</text:p>
              </table:table-cell>
              <table:table-cell office:value-type="float" office:value="0.01750004">
                <text:p>0.01750004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57.80224609375">
                <text:p>657.80224609375</text:p>
              </table:table-cell>
              <table:table-cell office:value-type="float" office:value="0.0121092">
                <text:p>0.0121092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57.921997070313">
                <text:p>657.921997070313</text:p>
              </table:table-cell>
              <table:table-cell office:value-type="float" office:value="-0.002510505">
                <text:p>-0.002510505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58.041809082031">
                <text:p>658.041809082031</text:p>
              </table:table-cell>
              <table:table-cell office:value-type="float" office:value="-0.0008714621">
                <text:p>-0.0008714621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58.161560058594">
                <text:p>658.161560058594</text:p>
              </table:table-cell>
              <table:table-cell office:value-type="float" office:value="-0.005022109">
                <text:p>-0.005022109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58.281372070313">
                <text:p>658.281372070313</text:p>
              </table:table-cell>
              <table:table-cell office:value-type="float" office:value="0.01629167">
                <text:p>0.01629167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58.401123046875">
                <text:p>658.401123046875</text:p>
              </table:table-cell>
              <table:table-cell office:value-type="float" office:value="0.0321609">
                <text:p>0.0321609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58.520935058594">
                <text:p>658.520935058594</text:p>
              </table:table-cell>
              <table:table-cell office:value-type="float" office:value="-0.0007510705">
                <text:p>-0.0007510705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58.640686035156">
                <text:p>658.640686035156</text:p>
              </table:table-cell>
              <table:table-cell office:value-type="float" office:value="-0.002232987">
                <text:p>-0.002232987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58.760437011719">
                <text:p>658.760437011719</text:p>
              </table:table-cell>
              <table:table-cell office:value-type="float" office:value="0.002206614">
                <text:p>0.002206614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58.880249023438">
                <text:p>658.880249023438</text:p>
              </table:table-cell>
              <table:table-cell office:value-type="float" office:value="-0.002534604">
                <text:p>-0.002534604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59.000061035156">
                <text:p>659.000061035156</text:p>
              </table:table-cell>
              <table:table-cell office:value-type="float" office:value="-0.0001207608">
                <text:p>-0.0001207608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59.119812011719">
                <text:p>659.119812011719</text:p>
              </table:table-cell>
              <table:table-cell office:value-type="float" office:value="-0.003855932">
                <text:p>-0.00385593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59.239624023438">
                <text:p>659.239624023438</text:p>
              </table:table-cell>
              <table:table-cell office:value-type="float" office:value="0.007729601">
                <text:p>0.00772960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59.359375">
                <text:p>659.359375</text:p>
              </table:table-cell>
              <table:table-cell office:value-type="float" office:value="0.007158517">
                <text:p>0.007158517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59.479187011719">
                <text:p>659.479187011719</text:p>
              </table:table-cell>
              <table:table-cell office:value-type="float" office:value="0.003907882">
                <text:p>0.003907882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59.598999023438">
                <text:p>659.598999023438</text:p>
              </table:table-cell>
              <table:table-cell office:value-type="float" office:value="0.004695891">
                <text:p>0.004695891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59.71875">
                <text:p>659.71875</text:p>
              </table:table-cell>
              <table:table-cell office:value-type="float" office:value="0.006501478">
                <text:p>0.006501478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59.838562011719">
                <text:p>659.838562011719</text:p>
              </table:table-cell>
              <table:table-cell office:value-type="float" office:value="-0.003336246">
                <text:p>-0.003336246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59.958374023438">
                <text:p>659.958374023438</text:p>
              </table:table-cell>
              <table:table-cell office:value-type="float" office:value="0.000118228">
                <text:p>0.000118228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60.078125">
                <text:p>660.078125</text:p>
              </table:table-cell>
              <table:table-cell office:value-type="float" office:value="-0.004636686">
                <text:p>-0.004636686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60.197937011719">
                <text:p>660.197937011719</text:p>
              </table:table-cell>
              <table:table-cell office:value-type="float" office:value="0.008464742">
                <text:p>0.00846474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60.317749023438">
                <text:p>660.317749023438</text:p>
              </table:table-cell>
              <table:table-cell office:value-type="float" office:value="0.006019138">
                <text:p>0.006019138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60.437561035156">
                <text:p>660.437561035156</text:p>
              </table:table-cell>
              <table:table-cell office:value-type="float" office:value="0.01646292">
                <text:p>0.01646292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60.557373046875">
                <text:p>660.557373046875</text:p>
              </table:table-cell>
              <table:table-cell office:value-type="float" office:value="-0.007760006">
                <text:p>-0.007760006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60.677124023438">
                <text:p>660.677124023438</text:p>
              </table:table-cell>
              <table:table-cell office:value-type="float" office:value="-0.003259403">
                <text:p>-0.003259403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60.796936035156">
                <text:p>660.796936035156</text:p>
              </table:table-cell>
              <table:table-cell office:value-type="float" office:value="0.001797545">
                <text:p>0.001797545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60.916748046875">
                <text:p>660.916748046875</text:p>
              </table:table-cell>
              <table:table-cell office:value-type="float" office:value="-0.005699678">
                <text:p>-0.005699678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61.036560058594">
                <text:p>661.036560058594</text:p>
              </table:table-cell>
              <table:table-cell office:value-type="float" office:value="0.006376002">
                <text:p>0.006376002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61.156372070313">
                <text:p>661.156372070313</text:p>
              </table:table-cell>
              <table:table-cell office:value-type="float" office:value="0.007714163">
                <text:p>0.007714163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661.276184082031">
                <text:p>661.276184082031</text:p>
              </table:table-cell>
              <table:table-cell office:value-type="float" office:value="0.001552517">
                <text:p>0.001552517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61.39599609375">
                <text:p>661.39599609375</text:p>
              </table:table-cell>
              <table:table-cell office:value-type="float" office:value="0.003419582">
                <text:p>0.00341958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61.515808105469">
                <text:p>661.515808105469</text:p>
              </table:table-cell>
              <table:table-cell office:value-type="float" office:value="0.0127575">
                <text:p>0.0127575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61.635620117188">
                <text:p>661.635620117188</text:p>
              </table:table-cell>
              <table:table-cell office:value-type="float" office:value="-0.001110441">
                <text:p>-0.001110441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61.755432128906">
                <text:p>661.755432128906</text:p>
              </table:table-cell>
              <table:table-cell office:value-type="float" office:value="0.006405078">
                <text:p>0.006405078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661.875244140625">
                <text:p>661.875244140625</text:p>
              </table:table-cell>
              <table:table-cell office:value-type="float" office:value="0.01226549">
                <text:p>0.01226549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661.995056152344">
                <text:p>661.995056152344</text:p>
              </table:table-cell>
              <table:table-cell office:value-type="float" office:value="0.004927655">
                <text:p>0.004927655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62.114868164063">
                <text:p>662.114868164063</text:p>
              </table:table-cell>
              <table:table-cell office:value-type="float" office:value="-0.0003096284">
                <text:p>-0.0003096284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62.234680175781">
                <text:p>662.234680175781</text:p>
              </table:table-cell>
              <table:table-cell office:value-type="float" office:value="-0.002812006">
                <text:p>-0.002812006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662.354553222656">
                <text:p>662.354553222656</text:p>
              </table:table-cell>
              <table:table-cell office:value-type="float" office:value="-0.00234899">
                <text:p>-0.00234899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62.474365234375">
                <text:p>662.474365234375</text:p>
              </table:table-cell>
              <table:table-cell office:value-type="float" office:value="0.002096466">
                <text:p>0.002096466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62.594177246094">
                <text:p>662.594177246094</text:p>
              </table:table-cell>
              <table:table-cell office:value-type="float" office:value="0.004721218">
                <text:p>0.004721218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662.713989257813">
                <text:p>662.713989257813</text:p>
              </table:table-cell>
              <table:table-cell office:value-type="float" office:value="0.008545459">
                <text:p>0.008545459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62.833801269531">
                <text:p>662.833801269531</text:p>
              </table:table-cell>
              <table:table-cell office:value-type="float" office:value="-0.006967167">
                <text:p>-0.006967167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662.953674316406">
                <text:p>662.953674316406</text:p>
              </table:table-cell>
              <table:table-cell office:value-type="float" office:value="-0.0004198176">
                <text:p>-0.0004198176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663.073486328125">
                <text:p>663.073486328125</text:p>
              </table:table-cell>
              <table:table-cell office:value-type="float" office:value="0.001720461">
                <text:p>0.001720461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663.193298339844">
                <text:p>663.193298339844</text:p>
              </table:table-cell>
              <table:table-cell office:value-type="float" office:value="0.00125602">
                <text:p>0.0012560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63.313110351563">
                <text:p>663.313110351563</text:p>
              </table:table-cell>
              <table:table-cell office:value-type="float" office:value="0.004392156">
                <text:p>0.004392156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663.432983398438">
                <text:p>663.432983398438</text:p>
              </table:table-cell>
              <table:table-cell office:value-type="float" office:value="0.001842939">
                <text:p>0.001842939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63.552795410156">
                <text:p>663.552795410156</text:p>
              </table:table-cell>
              <table:table-cell office:value-type="float" office:value="0.005213928">
                <text:p>0.005213928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63.672668457031">
                <text:p>663.672668457031</text:p>
              </table:table-cell>
              <table:table-cell office:value-type="float" office:value="0.001780251">
                <text:p>0.001780251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663.79248046875">
                <text:p>663.79248046875</text:p>
              </table:table-cell>
              <table:table-cell office:value-type="float" office:value="0.003830206">
                <text:p>0.003830206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63.912292480469">
                <text:p>663.912292480469</text:p>
              </table:table-cell>
              <table:table-cell office:value-type="float" office:value="0.001795538">
                <text:p>0.001795538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664.032165527344">
                <text:p>664.032165527344</text:p>
              </table:table-cell>
              <table:table-cell office:value-type="float" office:value="0.00678727">
                <text:p>0.00678727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664.151977539063">
                <text:p>664.151977539063</text:p>
              </table:table-cell>
              <table:table-cell office:value-type="float" office:value="0.001141103">
                <text:p>0.001141103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664.271850585938">
                <text:p>664.271850585938</text:p>
              </table:table-cell>
              <table:table-cell office:value-type="float" office:value="-0.004777161">
                <text:p>-0.004777161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64.391662597656">
                <text:p>664.391662597656</text:p>
              </table:table-cell>
              <table:table-cell office:value-type="float" office:value="0.0009204326">
                <text:p>0.0009204326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64.511535644531">
                <text:p>664.511535644531</text:p>
              </table:table-cell>
              <table:table-cell office:value-type="float" office:value="0.006413821">
                <text:p>0.006413821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64.63134765625">
                <text:p>664.63134765625</text:p>
              </table:table-cell>
              <table:table-cell office:value-type="float" office:value="0.0009306461">
                <text:p>0.0009306461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64.751220703125">
                <text:p>664.751220703125</text:p>
              </table:table-cell>
              <table:table-cell office:value-type="float" office:value="-0.004699139">
                <text:p>-0.004699139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64.87109375">
                <text:p>664.87109375</text:p>
              </table:table-cell>
              <table:table-cell office:value-type="float" office:value="0.007797064">
                <text:p>0.007797064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64.990905761719">
                <text:p>664.990905761719</text:p>
              </table:table-cell>
              <table:table-cell office:value-type="float" office:value="0.008114113">
                <text:p>0.008114113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65.110778808594">
                <text:p>665.110778808594</text:p>
              </table:table-cell>
              <table:table-cell office:value-type="float" office:value="0.001192099">
                <text:p>0.001192099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65.230590820313">
                <text:p>665.230590820313</text:p>
              </table:table-cell>
              <table:table-cell office:value-type="float" office:value="0.007823297">
                <text:p>0.007823297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65.350463867188">
                <text:p>665.350463867188</text:p>
              </table:table-cell>
              <table:table-cell office:value-type="float" office:value="-0.005319598">
                <text:p>-0.005319598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65.470336914063">
                <text:p>665.470336914063</text:p>
              </table:table-cell>
              <table:table-cell office:value-type="float" office:value="0.01435084">
                <text:p>0.01435084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65.590148925781">
                <text:p>665.590148925781</text:p>
              </table:table-cell>
              <table:table-cell office:value-type="float" office:value="0.01023165">
                <text:p>0.01023165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65.710021972656">
                <text:p>665.710021972656</text:p>
              </table:table-cell>
              <table:table-cell office:value-type="float" office:value="0.002084427">
                <text:p>0.002084427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65.829895019531">
                <text:p>665.829895019531</text:p>
              </table:table-cell>
              <table:table-cell office:value-type="float" office:value="-0.003247476">
                <text:p>-0.003247476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65.949768066406">
                <text:p>665.949768066406</text:p>
              </table:table-cell>
              <table:table-cell office:value-type="float" office:value="0.01677334">
                <text:p>0.01677334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66.069580078125">
                <text:p>666.069580078125</text:p>
              </table:table-cell>
              <table:table-cell office:value-type="float" office:value="-0.003155499">
                <text:p>-0.00315549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66.189453125">
                <text:p>666.189453125</text:p>
              </table:table-cell>
              <table:table-cell office:value-type="float" office:value="0.01842767">
                <text:p>0.01842767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6.309326171875">
                <text:p>666.309326171875</text:p>
              </table:table-cell>
              <table:table-cell office:value-type="float" office:value="-0.0008174257">
                <text:p>-0.0008174257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66.42919921875">
                <text:p>666.42919921875</text:p>
              </table:table-cell>
              <table:table-cell office:value-type="float" office:value="0.01028864">
                <text:p>0.01028864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66.549072265625">
                <text:p>666.549072265625</text:p>
              </table:table-cell>
              <table:table-cell office:value-type="float" office:value="0.008552853">
                <text:p>0.00855285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66.6689453125">
                <text:p>666.6689453125</text:p>
              </table:table-cell>
              <table:table-cell office:value-type="float" office:value="0.00308106">
                <text:p>0.00308106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66.788818359375">
                <text:p>666.788818359375</text:p>
              </table:table-cell>
              <table:table-cell office:value-type="float" office:value="0.00210086">
                <text:p>0.00210086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66.90869140625">
                <text:p>666.90869140625</text:p>
              </table:table-cell>
              <table:table-cell office:value-type="float" office:value="-0.001755217">
                <text:p>-0.001755217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67.028564453125">
                <text:p>667.028564453125</text:p>
              </table:table-cell>
              <table:table-cell office:value-type="float" office:value="0.003490845">
                <text:p>0.003490845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667.1484375">
                <text:p>667.1484375</text:p>
              </table:table-cell>
              <table:table-cell office:value-type="float" office:value="0.00397274">
                <text:p>0.00397274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67.268310546875">
                <text:p>667.268310546875</text:p>
              </table:table-cell>
              <table:table-cell office:value-type="float" office:value="0.003332606">
                <text:p>0.003332606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667.38818359375">
                <text:p>667.38818359375</text:p>
              </table:table-cell>
              <table:table-cell office:value-type="float" office:value="0.01082179">
                <text:p>0.01082179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67.508056640625">
                <text:p>667.508056640625</text:p>
              </table:table-cell>
              <table:table-cell office:value-type="float" office:value="-0.002092997">
                <text:p>-0.002092997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67.6279296875">
                <text:p>667.6279296875</text:p>
              </table:table-cell>
              <table:table-cell office:value-type="float" office:value="-0.004128703">
                <text:p>-0.00412870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67.747802734375">
                <text:p>667.747802734375</text:p>
              </table:table-cell>
              <table:table-cell office:value-type="float" office:value="-0.004190115">
                <text:p>-0.004190115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67.86767578125">
                <text:p>667.86767578125</text:p>
              </table:table-cell>
              <table:table-cell office:value-type="float" office:value="-0.01005352">
                <text:p>-0.01005352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67.987548828125">
                <text:p>667.987548828125</text:p>
              </table:table-cell>
              <table:table-cell office:value-type="float" office:value="0.007616926">
                <text:p>0.007616926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68.107421875">
                <text:p>668.107421875</text:p>
              </table:table-cell>
              <table:table-cell office:value-type="float" office:value="-0.009372662">
                <text:p>-0.009372662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68.227294921875">
                <text:p>668.227294921875</text:p>
              </table:table-cell>
              <table:table-cell office:value-type="float" office:value="0.002103389">
                <text:p>0.002103389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68.34716796875">
                <text:p>668.34716796875</text:p>
              </table:table-cell>
              <table:table-cell office:value-type="float" office:value="0.00639476">
                <text:p>0.00639476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68.467102050781">
                <text:p>668.467102050781</text:p>
              </table:table-cell>
              <table:table-cell office:value-type="float" office:value="0.00198749">
                <text:p>0.00198749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68.586975097656">
                <text:p>668.586975097656</text:p>
              </table:table-cell>
              <table:table-cell office:value-type="float" office:value="-0.0002535177">
                <text:p>-0.0002535177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68.706848144531">
                <text:p>668.706848144531</text:p>
              </table:table-cell>
              <table:table-cell office:value-type="float" office:value="-0.001003907">
                <text:p>-0.001003907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8.826721191406">
                <text:p>668.826721191406</text:p>
              </table:table-cell>
              <table:table-cell office:value-type="float" office:value="-0.0006070807">
                <text:p>-0.0006070807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68.946594238281">
                <text:p>668.946594238281</text:p>
              </table:table-cell>
              <table:table-cell office:value-type="float" office:value="0.008601065">
                <text:p>0.008601065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69.066528320313">
                <text:p>669.066528320313</text:p>
              </table:table-cell>
              <table:table-cell office:value-type="float" office:value="0.004515126">
                <text:p>0.004515126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69.186401367188">
                <text:p>669.186401367188</text:p>
              </table:table-cell>
              <table:table-cell office:value-type="float" office:value="-0.005212917">
                <text:p>-0.005212917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69.306274414063">
                <text:p>669.306274414063</text:p>
              </table:table-cell>
              <table:table-cell office:value-type="float" office:value="0.01401351">
                <text:p>0.01401351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69.426208496094">
                <text:p>669.426208496094</text:p>
              </table:table-cell>
              <table:table-cell office:value-type="float" office:value="0.004877238">
                <text:p>0.004877238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69.546081542969">
                <text:p>669.546081542969</text:p>
              </table:table-cell>
              <table:table-cell office:value-type="float" office:value="-0.003720578">
                <text:p>-0.003720578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69.665954589844">
                <text:p>669.665954589844</text:p>
              </table:table-cell>
              <table:table-cell office:value-type="float" office:value="-0.003462232">
                <text:p>-0.003462232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69.785888671875">
                <text:p>669.785888671875</text:p>
              </table:table-cell>
              <table:table-cell office:value-type="float" office:value="0.001936053">
                <text:p>0.001936053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69.90576171875">
                <text:p>669.90576171875</text:p>
              </table:table-cell>
              <table:table-cell office:value-type="float" office:value="0.0016025">
                <text:p>0.0016025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70.025695800781">
                <text:p>670.025695800781</text:p>
              </table:table-cell>
              <table:table-cell office:value-type="float" office:value="-0.005808658">
                <text:p>-0.005808658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70.145568847656">
                <text:p>670.145568847656</text:p>
              </table:table-cell>
              <table:table-cell office:value-type="float" office:value="0.01477336">
                <text:p>0.01477336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70.265502929688">
                <text:p>670.265502929688</text:p>
              </table:table-cell>
              <table:table-cell office:value-type="float" office:value="0.005343053">
                <text:p>0.005343053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70.385375976563">
                <text:p>670.385375976563</text:p>
              </table:table-cell>
              <table:table-cell office:value-type="float" office:value="0.01325987">
                <text:p>0.01325987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670.505310058594">
                <text:p>670.505310058594</text:p>
              </table:table-cell>
              <table:table-cell office:value-type="float" office:value="0.005154479">
                <text:p>0.005154479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70.625183105469">
                <text:p>670.625183105469</text:p>
              </table:table-cell>
              <table:table-cell office:value-type="float" office:value="0.008306161">
                <text:p>0.00830616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670.7451171875">
                <text:p>670.7451171875</text:p>
              </table:table-cell>
              <table:table-cell office:value-type="float" office:value="0.001573562">
                <text:p>0.001573562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70.864990234375">
                <text:p>670.864990234375</text:p>
              </table:table-cell>
              <table:table-cell office:value-type="float" office:value="0.01030648">
                <text:p>0.01030648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70.984924316406">
                <text:p>670.984924316406</text:p>
              </table:table-cell>
              <table:table-cell office:value-type="float" office:value="0.00960066">
                <text:p>0.00960066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671.104858398438">
                <text:p>671.104858398438</text:p>
              </table:table-cell>
              <table:table-cell office:value-type="float" office:value="-0.004890479">
                <text:p>-0.004890479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71.224731445313">
                <text:p>671.224731445313</text:p>
              </table:table-cell>
              <table:table-cell office:value-type="float" office:value="0.002571296">
                <text:p>0.002571296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71.344665527344">
                <text:p>671.344665527344</text:p>
              </table:table-cell>
              <table:table-cell office:value-type="float" office:value="0.009558608">
                <text:p>0.009558608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71.464599609375">
                <text:p>671.464599609375</text:p>
              </table:table-cell>
              <table:table-cell office:value-type="float" office:value="-0.006089505">
                <text:p>-0.006089505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71.58447265625">
                <text:p>671.58447265625</text:p>
              </table:table-cell>
              <table:table-cell office:value-type="float" office:value="-0.002424678">
                <text:p>-0.002424678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671.704406738281">
                <text:p>671.704406738281</text:p>
              </table:table-cell>
              <table:table-cell office:value-type="float" office:value="0.01037896">
                <text:p>0.01037896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671.824340820313">
                <text:p>671.824340820313</text:p>
              </table:table-cell>
              <table:table-cell office:value-type="float" office:value="0.0006763997">
                <text:p>0.0006763997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671.944213867188">
                <text:p>671.944213867188</text:p>
              </table:table-cell>
              <table:table-cell office:value-type="float" office:value="0.001035486">
                <text:p>0.001035486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72.064147949219">
                <text:p>672.064147949219</text:p>
              </table:table-cell>
              <table:table-cell office:value-type="float" office:value="-0.001738292">
                <text:p>-0.001738292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672.18408203125">
                <text:p>672.18408203125</text:p>
              </table:table-cell>
              <table:table-cell office:value-type="float" office:value="-0.0008464084">
                <text:p>-0.0008464084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72.304016113281">
                <text:p>672.304016113281</text:p>
              </table:table-cell>
              <table:table-cell office:value-type="float" office:value="-0.004300121">
                <text:p>-0.004300121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72.423950195313">
                <text:p>672.423950195313</text:p>
              </table:table-cell>
              <table:table-cell office:value-type="float" office:value="-0.008456277">
                <text:p>-0.008456277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72.543823242188">
                <text:p>672.543823242188</text:p>
              </table:table-cell>
              <table:table-cell office:value-type="float" office:value="-0.004315559">
                <text:p>-0.004315559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72.663757324219">
                <text:p>672.663757324219</text:p>
              </table:table-cell>
              <table:table-cell office:value-type="float" office:value="0.004700112">
                <text:p>0.004700112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72.78369140625">
                <text:p>672.78369140625</text:p>
              </table:table-cell>
              <table:table-cell office:value-type="float" office:value="0.002800863">
                <text:p>0.002800863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72.903625488281">
                <text:p>672.903625488281</text:p>
              </table:table-cell>
              <table:table-cell office:value-type="float" office:value="0.0150703">
                <text:p>0.0150703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73.023559570313">
                <text:p>673.023559570313</text:p>
              </table:table-cell>
              <table:table-cell office:value-type="float" office:value="0.01072262">
                <text:p>0.01072262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73.143493652344">
                <text:p>673.143493652344</text:p>
              </table:table-cell>
              <table:table-cell office:value-type="float" office:value="0.003490806">
                <text:p>0.003490806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673.263427734375">
                <text:p>673.263427734375</text:p>
              </table:table-cell>
              <table:table-cell office:value-type="float" office:value="-0.008628772">
                <text:p>-0.008628772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73.383361816406">
                <text:p>673.383361816406</text:p>
              </table:table-cell>
              <table:table-cell office:value-type="float" office:value="0.01958797">
                <text:p>0.01958797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673.503295898438">
                <text:p>673.503295898438</text:p>
              </table:table-cell>
              <table:table-cell office:value-type="float" office:value="-0.00864214">
                <text:p>-0.00864214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73.623229980469">
                <text:p>673.623229980469</text:p>
              </table:table-cell>
              <table:table-cell office:value-type="float" office:value="-0.001640794">
                <text:p>-0.001640794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673.7431640625">
                <text:p>673.7431640625</text:p>
              </table:table-cell>
              <table:table-cell office:value-type="float" office:value="-0.0008676392">
                <text:p>-0.0008676392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73.863098144531">
                <text:p>673.863098144531</text:p>
              </table:table-cell>
              <table:table-cell office:value-type="float" office:value="0.003948764">
                <text:p>0.00394876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73.983032226563">
                <text:p>673.983032226563</text:p>
              </table:table-cell>
              <table:table-cell office:value-type="float" office:value="-0.0006627591">
                <text:p>-0.0006627591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74.102966308594">
                <text:p>674.102966308594</text:p>
              </table:table-cell>
              <table:table-cell office:value-type="float" office:value="0.006964949">
                <text:p>0.006964949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74.222900390625">
                <text:p>674.222900390625</text:p>
              </table:table-cell>
              <table:table-cell office:value-type="float" office:value="-0.006352838">
                <text:p>-0.006352838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74.342834472656">
                <text:p>674.342834472656</text:p>
              </table:table-cell>
              <table:table-cell office:value-type="float" office:value="-0.008337539">
                <text:p>-0.008337539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674.462768554688">
                <text:p>674.462768554688</text:p>
              </table:table-cell>
              <table:table-cell office:value-type="float" office:value="0.002652444">
                <text:p>0.002652444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74.582702636719">
                <text:p>674.582702636719</text:p>
              </table:table-cell>
              <table:table-cell office:value-type="float" office:value="0.004503271">
                <text:p>0.004503271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674.702697753906">
                <text:p>674.702697753906</text:p>
              </table:table-cell>
              <table:table-cell office:value-type="float" office:value="0.007081007">
                <text:p>0.007081007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674.822631835938">
                <text:p>674.822631835938</text:p>
              </table:table-cell>
              <table:table-cell office:value-type="float" office:value="-0.003224801">
                <text:p>-0.003224801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674.942565917969">
                <text:p>674.942565917969</text:p>
              </table:table-cell>
              <table:table-cell office:value-type="float" office:value="0.01155277">
                <text:p>0.01155277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675.0625">
                <text:p>675.0625</text:p>
              </table:table-cell>
              <table:table-cell office:value-type="float" office:value="-0.004870077">
                <text:p>-0.004870077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675.182495117188">
                <text:p>675.182495117188</text:p>
              </table:table-cell>
              <table:table-cell office:value-type="float" office:value="-0.003729321">
                <text:p>-0.003729321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75.302429199219">
                <text:p>675.302429199219</text:p>
              </table:table-cell>
              <table:table-cell office:value-type="float" office:value="0.004971046">
                <text:p>0.004971046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75.42236328125">
                <text:p>675.42236328125</text:p>
              </table:table-cell>
              <table:table-cell office:value-type="float" office:value="0.01294659">
                <text:p>0.01294659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75.542297363281">
                <text:p>675.542297363281</text:p>
              </table:table-cell>
              <table:table-cell office:value-type="float" office:value="0.01054899">
                <text:p>0.01054899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75.662292480469">
                <text:p>675.662292480469</text:p>
              </table:table-cell>
              <table:table-cell office:value-type="float" office:value="0.006062847">
                <text:p>0.006062847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75.7822265625">
                <text:p>675.7822265625</text:p>
              </table:table-cell>
              <table:table-cell office:value-type="float" office:value="0.007961239">
                <text:p>0.007961239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675.902160644531">
                <text:p>675.902160644531</text:p>
              </table:table-cell>
              <table:table-cell office:value-type="float" office:value="-0.007266704">
                <text:p>-0.007266704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76.022155761719">
                <text:p>676.022155761719</text:p>
              </table:table-cell>
              <table:table-cell office:value-type="float" office:value="0.009089537">
                <text:p>0.009089537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676.14208984375">
                <text:p>676.14208984375</text:p>
              </table:table-cell>
              <table:table-cell office:value-type="float" office:value="0.0008132293">
                <text:p>0.0008132293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76.262023925781">
                <text:p>676.262023925781</text:p>
              </table:table-cell>
              <table:table-cell office:value-type="float" office:value="-0.005879443">
                <text:p>-0.005879443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676.382019042969">
                <text:p>676.382019042969</text:p>
              </table:table-cell>
              <table:table-cell office:value-type="float" office:value="0.009822294">
                <text:p>0.009822294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76.501953125">
                <text:p>676.501953125</text:p>
              </table:table-cell>
              <table:table-cell office:value-type="float" office:value="0.001519719">
                <text:p>0.001519719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76.621948242188">
                <text:p>676.621948242188</text:p>
              </table:table-cell>
              <table:table-cell office:value-type="float" office:value="-0.006368456">
                <text:p>-0.006368456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76.741882324219">
                <text:p>676.741882324219</text:p>
              </table:table-cell>
              <table:table-cell office:value-type="float" office:value="-0.01039039">
                <text:p>-0.01039039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76.861877441406">
                <text:p>676.861877441406</text:p>
              </table:table-cell>
              <table:table-cell office:value-type="float" office:value="-0.001143348">
                <text:p>-0.001143348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76.981811523438">
                <text:p>676.981811523438</text:p>
              </table:table-cell>
              <table:table-cell office:value-type="float" office:value="0.002586655">
                <text:p>0.002586655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677.101806640625">
                <text:p>677.101806640625</text:p>
              </table:table-cell>
              <table:table-cell office:value-type="float" office:value="0.001330841">
                <text:p>0.001330841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77.221740722656">
                <text:p>677.221740722656</text:p>
              </table:table-cell>
              <table:table-cell office:value-type="float" office:value="-0.004260314">
                <text:p>-0.004260314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77.341735839844">
                <text:p>677.341735839844</text:p>
              </table:table-cell>
              <table:table-cell office:value-type="float" office:value="0.009207695">
                <text:p>0.009207695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677.461669921875">
                <text:p>677.461669921875</text:p>
              </table:table-cell>
              <table:table-cell office:value-type="float" office:value="-0.002367706">
                <text:p>-0.002367706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77.581665039063">
                <text:p>677.581665039063</text:p>
              </table:table-cell>
              <table:table-cell office:value-type="float" office:value="0.004646197">
                <text:p>0.004646197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77.70166015625">
                <text:p>677.70166015625</text:p>
              </table:table-cell>
              <table:table-cell office:value-type="float" office:value="-0.002792138">
                <text:p>-0.002792138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677.821594238281">
                <text:p>677.821594238281</text:p>
              </table:table-cell>
              <table:table-cell office:value-type="float" office:value="0.004651535">
                <text:p>0.004651535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77.941589355469">
                <text:p>677.941589355469</text:p>
              </table:table-cell>
              <table:table-cell office:value-type="float" office:value="0.00148444">
                <text:p>0.00148444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78.061584472656">
                <text:p>678.061584472656</text:p>
              </table:table-cell>
              <table:table-cell office:value-type="float" office:value="-0.001822135">
                <text:p>-0.001822135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678.181518554688">
                <text:p>678.181518554688</text:p>
              </table:table-cell>
              <table:table-cell office:value-type="float" office:value="-0.001918669">
                <text:p>-0.00191866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78.301513671875">
                <text:p>678.301513671875</text:p>
              </table:table-cell>
              <table:table-cell office:value-type="float" office:value="0.002048109">
                <text:p>0.002048109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78.421508789063">
                <text:p>678.421508789063</text:p>
              </table:table-cell>
              <table:table-cell office:value-type="float" office:value="-0.004439652">
                <text:p>-0.004439652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678.541442871094">
                <text:p>678.541442871094</text:p>
              </table:table-cell>
              <table:table-cell office:value-type="float" office:value="0.01595753">
                <text:p>0.01595753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678.661437988281">
                <text:p>678.661437988281</text:p>
              </table:table-cell>
              <table:table-cell office:value-type="float" office:value="-0.001551723">
                <text:p>-0.001551723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78.781433105469">
                <text:p>678.781433105469</text:p>
              </table:table-cell>
              <table:table-cell office:value-type="float" office:value="0.003667921">
                <text:p>0.003667921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78.901428222656">
                <text:p>678.901428222656</text:p>
              </table:table-cell>
              <table:table-cell office:value-type="float" office:value="0.005977254">
                <text:p>0.005977254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79.021362304688">
                <text:p>679.021362304688</text:p>
              </table:table-cell>
              <table:table-cell office:value-type="float" office:value="0.003692686">
                <text:p>0.003692686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679.141357421875">
                <text:p>679.141357421875</text:p>
              </table:table-cell>
              <table:table-cell office:value-type="float" office:value="0.000412453">
                <text:p>0.000412453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79.261352539063">
                <text:p>679.261352539063</text:p>
              </table:table-cell>
              <table:table-cell office:value-type="float" office:value="0.007706628">
                <text:p>0.007706628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679.38134765625">
                <text:p>679.38134765625</text:p>
              </table:table-cell>
              <table:table-cell office:value-type="float" office:value="0.008957678">
                <text:p>0.008957678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79.501342773438">
                <text:p>679.501342773438</text:p>
              </table:table-cell>
              <table:table-cell office:value-type="float" office:value="-0.003567322">
                <text:p>-0.003567322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79.621337890625">
                <text:p>679.621337890625</text:p>
              </table:table-cell>
              <table:table-cell office:value-type="float" office:value="0.005599053">
                <text:p>0.005599053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79.741333007813">
                <text:p>679.741333007813</text:p>
              </table:table-cell>
              <table:table-cell office:value-type="float" office:value="0.0008028009">
                <text:p>0.0008028009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679.861267089844">
                <text:p>679.861267089844</text:p>
              </table:table-cell>
              <table:table-cell office:value-type="float" office:value="0.003702877">
                <text:p>0.003702877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79.981262207031">
                <text:p>679.981262207031</text:p>
              </table:table-cell>
              <table:table-cell office:value-type="float" office:value="-0.0006907429">
                <text:p>-0.0006907429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680.101257324219">
                <text:p>680.101257324219</text:p>
              </table:table-cell>
              <table:table-cell office:value-type="float" office:value="-0.005157254">
                <text:p>-0.005157254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680.221252441406">
                <text:p>680.221252441406</text:p>
              </table:table-cell>
              <table:table-cell office:value-type="float" office:value="0.009327483">
                <text:p>0.00932748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80.341247558594">
                <text:p>680.341247558594</text:p>
              </table:table-cell>
              <table:table-cell office:value-type="float" office:value="-0.003671382">
                <text:p>-0.003671382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80.461242675781">
                <text:p>680.461242675781</text:p>
              </table:table-cell>
              <table:table-cell office:value-type="float" office:value="-0.002603291">
                <text:p>-0.002603291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680.581237792969">
                <text:p>680.581237792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680.701232910156">
                <text:p>680.701232910156</text:p>
              </table:table-cell>
              <table:table-cell office:value-type="float" office:value="0.003820589">
                <text:p>0.003820589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80.821228027344">
                <text:p>680.821228027344</text:p>
              </table:table-cell>
              <table:table-cell office:value-type="float" office:value="0.003764704">
                <text:p>0.003764704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680.941223144531">
                <text:p>680.941223144531</text:p>
              </table:table-cell>
              <table:table-cell office:value-type="float" office:value="-0.0001518014">
                <text:p>-0.0001518014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81.061218261719">
                <text:p>681.061218261719</text:p>
              </table:table-cell>
              <table:table-cell office:value-type="float" office:value="-0.001608987">
                <text:p>-0.001608987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81.181274414063">
                <text:p>681.181274414063</text:p>
              </table:table-cell>
              <table:table-cell office:value-type="float" office:value="-0.00141672">
                <text:p>-0.00141672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81.30126953125">
                <text:p>681.30126953125</text:p>
              </table:table-cell>
              <table:table-cell office:value-type="float" office:value="0.003399071">
                <text:p>0.003399071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81.421264648438">
                <text:p>681.421264648438</text:p>
              </table:table-cell>
              <table:table-cell office:value-type="float" office:value="0.005524585">
                <text:p>0.005524585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81.541259765625">
                <text:p>681.541259765625</text:p>
              </table:table-cell>
              <table:table-cell office:value-type="float" office:value="-0.009260162">
                <text:p>-0.009260162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81.661254882813">
                <text:p>681.661254882813</text:p>
              </table:table-cell>
              <table:table-cell office:value-type="float" office:value="0.00208636">
                <text:p>0.00208636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81.78125">
                <text:p>681.78125</text:p>
              </table:table-cell>
              <table:table-cell office:value-type="float" office:value="-0.005484589">
                <text:p>-0.005484589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81.901245117188">
                <text:p>681.901245117188</text:p>
              </table:table-cell>
              <table:table-cell office:value-type="float" office:value="0.002894006">
                <text:p>0.002894006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82.021301269531">
                <text:p>682.021301269531</text:p>
              </table:table-cell>
              <table:table-cell office:value-type="float" office:value="-0.0026083">
                <text:p>-0.0026083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682.141296386719">
                <text:p>682.141296386719</text:p>
              </table:table-cell>
              <table:table-cell office:value-type="float" office:value="-0.004386345">
                <text:p>-0.00438634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682.261291503906">
                <text:p>682.261291503906</text:p>
              </table:table-cell>
              <table:table-cell office:value-type="float" office:value="-0.003816282">
                <text:p>-0.003816282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82.381286621094">
                <text:p>682.381286621094</text:p>
              </table:table-cell>
              <table:table-cell office:value-type="float" office:value="-0.0003379838">
                <text:p>-0.0003379838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682.501342773438">
                <text:p>682.501342773438</text:p>
              </table:table-cell>
              <table:table-cell office:value-type="float" office:value="0.003129747">
                <text:p>0.003129747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2.621337890625">
                <text:p>682.621337890625</text:p>
              </table:table-cell>
              <table:table-cell office:value-type="float" office:value="-0.001491627">
                <text:p>-0.001491627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82.741333007813">
                <text:p>682.741333007813</text:p>
              </table:table-cell>
              <table:table-cell office:value-type="float" office:value="-0.002906991">
                <text:p>-0.002906991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82.861389160156">
                <text:p>682.861389160156</text:p>
              </table:table-cell>
              <table:table-cell office:value-type="float" office:value="-0.0003753524">
                <text:p>-0.0003753524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82.981384277344">
                <text:p>682.981384277344</text:p>
              </table:table-cell>
              <table:table-cell office:value-type="float" office:value="0.001525814">
                <text:p>0.001525814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683.101379394531">
                <text:p>683.101379394531</text:p>
              </table:table-cell>
              <table:table-cell office:value-type="float" office:value="-0.006390247">
                <text:p>-0.006390247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683.221435546875">
                <text:p>683.221435546875</text:p>
              </table:table-cell>
              <table:table-cell office:value-type="float" office:value="-0.0004300101">
                <text:p>-0.0004300101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683.341430664063">
                <text:p>683.341430664063</text:p>
              </table:table-cell>
              <table:table-cell office:value-type="float" office:value="-0.009187753">
                <text:p>-0.009187753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83.46142578125">
                <text:p>683.46142578125</text:p>
              </table:table-cell>
              <table:table-cell office:value-type="float" office:value="-0.005983317">
                <text:p>-0.005983317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83.581481933594">
                <text:p>683.581481933594</text:p>
              </table:table-cell>
              <table:table-cell office:value-type="float" office:value="-0.004399826">
                <text:p>-0.004399826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683.701477050781">
                <text:p>683.701477050781</text:p>
              </table:table-cell>
              <table:table-cell office:value-type="float" office:value="-0.001585558">
                <text:p>-0.00158555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683.821533203125">
                <text:p>683.821533203125</text:p>
              </table:table-cell>
              <table:table-cell office:value-type="float" office:value="-0.004868876">
                <text:p>-0.004868876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683.941528320313">
                <text:p>683.941528320313</text:p>
              </table:table-cell>
              <table:table-cell office:value-type="float" office:value="-0.0055968">
                <text:p>-0.0055968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684.061584472656">
                <text:p>684.061584472656</text:p>
              </table:table-cell>
              <table:table-cell office:value-type="float" office:value="0.00441975">
                <text:p>0.00441975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84.181579589844">
                <text:p>684.181579589844</text:p>
              </table:table-cell>
              <table:table-cell office:value-type="float" office:value="-0.01105909">
                <text:p>-0.01105909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684.301635742188">
                <text:p>684.301635742188</text:p>
              </table:table-cell>
              <table:table-cell office:value-type="float" office:value="-0.004571408">
                <text:p>-0.004571408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684.421630859375">
                <text:p>684.421630859375</text:p>
              </table:table-cell>
              <table:table-cell office:value-type="float" office:value="-0.00807342">
                <text:p>-0.00807342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684.541687011719">
                <text:p>684.541687011719</text:p>
              </table:table-cell>
              <table:table-cell office:value-type="float" office:value="0.005378397">
                <text:p>0.005378397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684.661682128906">
                <text:p>684.661682128906</text:p>
              </table:table-cell>
              <table:table-cell office:value-type="float" office:value="-0.004681476">
                <text:p>-0.004681476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684.78173828125">
                <text:p>684.78173828125</text:p>
              </table:table-cell>
              <table:table-cell office:value-type="float" office:value="0.007591062">
                <text:p>0.007591062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84.901733398438">
                <text:p>684.901733398438</text:p>
              </table:table-cell>
              <table:table-cell office:value-type="float" office:value="0.008247105">
                <text:p>0.008247105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85.021789550781">
                <text:p>685.021789550781</text:p>
              </table:table-cell>
              <table:table-cell office:value-type="float" office:value="-0.003760337">
                <text:p>-0.003760337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685.141784667969">
                <text:p>685.141784667969</text:p>
              </table:table-cell>
              <table:table-cell office:value-type="float" office:value="0.001685087">
                <text:p>0.001685087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685.261840820313">
                <text:p>685.261840820313</text:p>
              </table:table-cell>
              <table:table-cell office:value-type="float" office:value="0.01025171">
                <text:p>0.01025171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685.381896972656">
                <text:p>685.381896972656</text:p>
              </table:table-cell>
              <table:table-cell office:value-type="float" office:value="0.002821385">
                <text:p>0.002821385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685.501892089844">
                <text:p>685.501892089844</text:p>
              </table:table-cell>
              <table:table-cell office:value-type="float" office:value="-0.003867108">
                <text:p>-0.003867108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685.621948242188">
                <text:p>685.621948242188</text:p>
              </table:table-cell>
              <table:table-cell office:value-type="float" office:value="0.01241804">
                <text:p>0.01241804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685.742004394531">
                <text:p>685.742004394531</text:p>
              </table:table-cell>
              <table:table-cell office:value-type="float" office:value="-0.0004840973">
                <text:p>-0.0004840973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685.861999511719">
                <text:p>685.861999511719</text:p>
              </table:table-cell>
              <table:table-cell office:value-type="float" office:value="0.0009527472">
                <text:p>0.0009527472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685.982055664063">
                <text:p>685.982055664063</text:p>
              </table:table-cell>
              <table:table-cell office:value-type="float" office:value="-0.002741864">
                <text:p>-0.002741864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686.102111816406">
                <text:p>686.102111816406</text:p>
              </table:table-cell>
              <table:table-cell office:value-type="float" office:value="0.002216232">
                <text:p>0.002216232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686.22216796875">
                <text:p>686.22216796875</text:p>
              </table:table-cell>
              <table:table-cell office:value-type="float" office:value="-0.007587574">
                <text:p>-0.007587574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86.342163085938">
                <text:p>686.342163085938</text:p>
              </table:table-cell>
              <table:table-cell office:value-type="float" office:value="-0.006193366">
                <text:p>-0.006193366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86.462219238281">
                <text:p>686.462219238281</text:p>
              </table:table-cell>
              <table:table-cell office:value-type="float" office:value="0.001539657">
                <text:p>0.001539657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86.582275390625">
                <text:p>686.582275390625</text:p>
              </table:table-cell>
              <table:table-cell office:value-type="float" office:value="-0.0006789641">
                <text:p>-0.0006789641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86.702331542969">
                <text:p>686.702331542969</text:p>
              </table:table-cell>
              <table:table-cell office:value-type="float" office:value="0.002939999">
                <text:p>0.002939999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86.822387695313">
                <text:p>686.822387695313</text:p>
              </table:table-cell>
              <table:table-cell office:value-type="float" office:value="-0.001635163">
                <text:p>-0.001635163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86.9423828125">
                <text:p>686.9423828125</text:p>
              </table:table-cell>
              <table:table-cell office:value-type="float" office:value="0.007590909">
                <text:p>0.007590909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687.062438964844">
                <text:p>687.062438964844</text:p>
              </table:table-cell>
              <table:table-cell office:value-type="float" office:value="0.002941216">
                <text:p>0.002941216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687.182495117188">
                <text:p>687.182495117188</text:p>
              </table:table-cell>
              <table:table-cell office:value-type="float" office:value="-0.009101212">
                <text:p>-0.009101212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87.302551269531">
                <text:p>687.302551269531</text:p>
              </table:table-cell>
              <table:table-cell office:value-type="float" office:value="0.001789447">
                <text:p>0.001789447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687.422607421875">
                <text:p>687.422607421875</text:p>
              </table:table-cell>
              <table:table-cell office:value-type="float" office:value="-0.006010068">
                <text:p>-0.006010068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687.542663574219">
                <text:p>687.542663574219</text:p>
              </table:table-cell>
              <table:table-cell office:value-type="float" office:value="-0.008307162">
                <text:p>-0.008307162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687.662719726563">
                <text:p>687.662719726563</text:p>
              </table:table-cell>
              <table:table-cell office:value-type="float" office:value="0.01094849">
                <text:p>0.01094849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687.782775878906">
                <text:p>687.782775878906</text:p>
              </table:table-cell>
              <table:table-cell office:value-type="float" office:value="-0.000192503">
                <text:p>-0.000192503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687.90283203125">
                <text:p>687.90283203125</text:p>
              </table:table-cell>
              <table:table-cell office:value-type="float" office:value="0.006754745">
                <text:p>0.006754745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8.022888183594">
                <text:p>688.022888183594</text:p>
              </table:table-cell>
              <table:table-cell office:value-type="float" office:value="0.008305038">
                <text:p>0.008305038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88.142944335938">
                <text:p>688.142944335938</text:p>
              </table:table-cell>
              <table:table-cell office:value-type="float" office:value="0.004044792">
                <text:p>0.004044792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88.263000488281">
                <text:p>688.263000488281</text:p>
              </table:table-cell>
              <table:table-cell office:value-type="float" office:value="-0.004474357">
                <text:p>-0.00447435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688.383056640625">
                <text:p>688.383056640625</text:p>
              </table:table-cell>
              <table:table-cell office:value-type="float" office:value="-0.002432642">
                <text:p>-0.002432642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688.503112792969">
                <text:p>688.503112792969</text:p>
              </table:table-cell>
              <table:table-cell office:value-type="float" office:value="-0.004424706">
                <text:p>-0.004424706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88.623168945313">
                <text:p>688.623168945313</text:p>
              </table:table-cell>
              <table:table-cell office:value-type="float" office:value="-0.005984248">
                <text:p>-0.005984248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688.743225097656">
                <text:p>688.743225097656</text:p>
              </table:table-cell>
              <table:table-cell office:value-type="float" office:value="-0.004634287">
                <text:p>-0.004634287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688.86328125">
                <text:p>688.86328125</text:p>
              </table:table-cell>
              <table:table-cell office:value-type="float" office:value="-0.003282591">
                <text:p>-0.003282591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688.983337402344">
                <text:p>688.983337402344</text:p>
              </table:table-cell>
              <table:table-cell office:value-type="float" office:value="-0.003904442">
                <text:p>-0.003904442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689.103393554688">
                <text:p>689.103393554688</text:p>
              </table:table-cell>
              <table:table-cell office:value-type="float" office:value="0.0003779672">
                <text:p>0.0003779672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89.223449707031">
                <text:p>689.223449707031</text:p>
              </table:table-cell>
              <table:table-cell office:value-type="float" office:value="-0.0003309055">
                <text:p>-0.0003309055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89.343505859375">
                <text:p>689.343505859375</text:p>
              </table:table-cell>
              <table:table-cell office:value-type="float" office:value="0.01599688">
                <text:p>0.01599688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689.463562011719">
                <text:p>689.463562011719</text:p>
              </table:table-cell>
              <table:table-cell office:value-type="float" office:value="0.003978289">
                <text:p>0.003978289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689.583679199219">
                <text:p>689.583679199219</text:p>
              </table:table-cell>
              <table:table-cell office:value-type="float" office:value="0.004587677">
                <text:p>0.004587677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689.703735351563">
                <text:p>689.703735351563</text:p>
              </table:table-cell>
              <table:table-cell office:value-type="float" office:value="0.004636545">
                <text:p>0.004636545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689.823791503906">
                <text:p>689.823791503906</text:p>
              </table:table-cell>
              <table:table-cell office:value-type="float" office:value="-0.00338157">
                <text:p>-0.0033815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689.94384765625">
                <text:p>689.94384765625</text:p>
              </table:table-cell>
              <table:table-cell office:value-type="float" office:value="-0.004298276">
                <text:p>-0.004298276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690.063903808594">
                <text:p>690.063903808594</text:p>
              </table:table-cell>
              <table:table-cell office:value-type="float" office:value="0.003960391">
                <text:p>0.003960391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690.184020996094">
                <text:p>690.184020996094</text:p>
              </table:table-cell>
              <table:table-cell office:value-type="float" office:value="0.001966664">
                <text:p>0.001966664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690.304077148438">
                <text:p>690.30407714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690.424133300781">
                <text:p>690.424133300781</text:p>
              </table:table-cell>
              <table:table-cell office:value-type="float" office:value="0.003401624">
                <text:p>0.003401624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690.544189453125">
                <text:p>690.544189453125</text:p>
              </table:table-cell>
              <table:table-cell office:value-type="float" office:value="0.02120343">
                <text:p>0.02120343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690.664306640625">
                <text:p>690.664306640625</text:p>
              </table:table-cell>
              <table:table-cell office:value-type="float" office:value="-0.007129406">
                <text:p>-0.007129406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0.784362792969">
                <text:p>690.784362792969</text:p>
              </table:table-cell>
              <table:table-cell office:value-type="float" office:value="-0.0002359099">
                <text:p>-0.0002359099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90.904418945313">
                <text:p>690.904418945313</text:p>
              </table:table-cell>
              <table:table-cell office:value-type="float" office:value="0.03832134">
                <text:p>0.03832134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91.024475097656">
                <text:p>691.024475097656</text:p>
              </table:table-cell>
              <table:table-cell office:value-type="float" office:value="0.002790495">
                <text:p>0.002790495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91.144592285156">
                <text:p>691.144592285156</text:p>
              </table:table-cell>
              <table:table-cell office:value-type="float" office:value="0.003387585">
                <text:p>0.00338758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691.2646484375">
                <text:p>691.2646484375</text:p>
              </table:table-cell>
              <table:table-cell office:value-type="float" office:value="-0.002122496">
                <text:p>-0.002122496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91.384765625">
                <text:p>691.384765625</text:p>
              </table:table-cell>
              <table:table-cell office:value-type="float" office:value="0.01186511">
                <text:p>0.01186511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691.504821777344">
                <text:p>691.504821777344</text:p>
              </table:table-cell>
              <table:table-cell office:value-type="float" office:value="0.002646782">
                <text:p>0.002646782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691.624877929688">
                <text:p>691.624877929688</text:p>
              </table:table-cell>
              <table:table-cell office:value-type="float" office:value="-0.009451076">
                <text:p>-0.009451076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691.744995117188">
                <text:p>691.744995117188</text:p>
              </table:table-cell>
              <table:table-cell office:value-type="float" office:value="0.009242243">
                <text:p>0.009242243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691.865051269531">
                <text:p>691.865051269531</text:p>
              </table:table-cell>
              <table:table-cell office:value-type="float" office:value="-0.006170606">
                <text:p>-0.006170606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691.985168457031">
                <text:p>691.985168457031</text:p>
              </table:table-cell>
              <table:table-cell office:value-type="float" office:value="-0.004450469">
                <text:p>-0.004450469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692.105224609375">
                <text:p>692.105224609375</text:p>
              </table:table-cell>
              <table:table-cell office:value-type="float" office:value="0.008573688">
                <text:p>0.008573688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92.225280761719">
                <text:p>692.225280761719</text:p>
              </table:table-cell>
              <table:table-cell office:value-type="float" office:value="0.003950301">
                <text:p>0.003950301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692.345397949219">
                <text:p>692.345397949219</text:p>
              </table:table-cell>
              <table:table-cell office:value-type="float" office:value="0.01285423">
                <text:p>0.01285423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692.465454101563">
                <text:p>692.465454101563</text:p>
              </table:table-cell>
              <table:table-cell office:value-type="float" office:value="0.004128915">
                <text:p>0.004128915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692.585571289063">
                <text:p>692.585571289063</text:p>
              </table:table-cell>
              <table:table-cell office:value-type="float" office:value="0.006086351">
                <text:p>0.006086351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692.705627441406">
                <text:p>692.705627441406</text:p>
              </table:table-cell>
              <table:table-cell office:value-type="float" office:value="-0.0005074386">
                <text:p>-0.0005074386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692.825744628906">
                <text:p>692.825744628906</text:p>
              </table:table-cell>
              <table:table-cell office:value-type="float" office:value="0.001646811">
                <text:p>0.001646811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92.94580078125">
                <text:p>692.94580078125</text:p>
              </table:table-cell>
              <table:table-cell office:value-type="float" office:value="-0.0001442697">
                <text:p>-0.0001442697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693.06591796875">
                <text:p>693.06591796875</text:p>
              </table:table-cell>
              <table:table-cell office:value-type="float" office:value="0.0002425881">
                <text:p>0.0002425881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93.18603515625">
                <text:p>693.18603515625</text:p>
              </table:table-cell>
              <table:table-cell office:value-type="float" office:value="-0.007640386">
                <text:p>-0.007640386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693.306091308594">
                <text:p>693.306091308594</text:p>
              </table:table-cell>
              <table:table-cell office:value-type="float" office:value="-0.005272881">
                <text:p>-0.005272881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693.426208496094">
                <text:p>693.426208496094</text:p>
              </table:table-cell>
              <table:table-cell office:value-type="float" office:value="-0.01064345">
                <text:p>-0.01064345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93.546264648438">
                <text:p>693.546264648438</text:p>
              </table:table-cell>
              <table:table-cell office:value-type="float" office:value="-0.001039259">
                <text:p>-0.001039259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693.666381835938">
                <text:p>693.666381835938</text:p>
              </table:table-cell>
              <table:table-cell office:value-type="float" office:value="-0.004441417">
                <text:p>-0.004441417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93.786499023438">
                <text:p>693.786499023438</text:p>
              </table:table-cell>
              <table:table-cell office:value-type="float" office:value="0.01173486">
                <text:p>0.01173486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693.906555175781">
                <text:p>693.906555175781</text:p>
              </table:table-cell>
              <table:table-cell office:value-type="float" office:value="-0.006098024">
                <text:p>-0.006098024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694.026672363281">
                <text:p>694.026672363281</text:p>
              </table:table-cell>
              <table:table-cell office:value-type="float" office:value="-0.0008723715">
                <text:p>-0.0008723715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694.146728515625">
                <text:p>694.1467285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94.266845703125">
                <text:p>694.266845703125</text:p>
              </table:table-cell>
              <table:table-cell office:value-type="float" office:value="-0.0003102079">
                <text:p>-0.0003102079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694.386962890625">
                <text:p>694.386962890625</text:p>
              </table:table-cell>
              <table:table-cell office:value-type="float" office:value="-0.001600016">
                <text:p>-0.001600016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694.507080078125">
                <text:p>694.507080078125</text:p>
              </table:table-cell>
              <table:table-cell office:value-type="float" office:value="0.008633047">
                <text:p>0.008633047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694.627136230469">
                <text:p>694.627136230469</text:p>
              </table:table-cell>
              <table:table-cell office:value-type="float" office:value="-0.0008686142">
                <text:p>-0.0008686142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694.747253417969">
                <text:p>694.747253417969</text:p>
              </table:table-cell>
              <table:table-cell office:value-type="float" office:value="-0.00355527">
                <text:p>-0.0035552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694.867370605469">
                <text:p>694.867370605469</text:p>
              </table:table-cell>
              <table:table-cell office:value-type="float" office:value="-0.009325877">
                <text:p>-0.009325877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694.987426757813">
                <text:p>694.987426757813</text:p>
              </table:table-cell>
              <table:table-cell office:value-type="float" office:value="-0.001120722">
                <text:p>-0.001120722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695.107543945313">
                <text:p>695.107543945313</text:p>
              </table:table-cell>
              <table:table-cell office:value-type="float" office:value="0.001228867">
                <text:p>0.001228867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695.227661132813">
                <text:p>695.227661132813</text:p>
              </table:table-cell>
              <table:table-cell office:value-type="float" office:value="0.002893866">
                <text:p>0.002893866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695.347778320313">
                <text:p>695.347778320313</text:p>
              </table:table-cell>
              <table:table-cell office:value-type="float" office:value="-0.006636728">
                <text:p>-0.006636728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695.467895507813">
                <text:p>695.467895507813</text:p>
              </table:table-cell>
              <table:table-cell office:value-type="float" office:value="-0.008394942">
                <text:p>-0.00839494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695.587951660156">
                <text:p>695.587951660156</text:p>
              </table:table-cell>
              <table:table-cell office:value-type="float" office:value="0.009192589">
                <text:p>0.009192589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695.708068847656">
                <text:p>695.708068847656</text:p>
              </table:table-cell>
              <table:table-cell office:value-type="float" office:value="0.001903899">
                <text:p>0.001903899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95.828186035156">
                <text:p>695.828186035156</text:p>
              </table:table-cell>
              <table:table-cell office:value-type="float" office:value="-0.003536246">
                <text:p>-0.003536246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695.948303222656">
                <text:p>695.948303222656</text:p>
              </table:table-cell>
              <table:table-cell office:value-type="float" office:value="-0.001335199">
                <text:p>-0.001335199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96.068420410156">
                <text:p>696.068420410156</text:p>
              </table:table-cell>
              <table:table-cell office:value-type="float" office:value="-0.006514739">
                <text:p>-0.006514739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696.188537597656">
                <text:p>696.188537597656</text:p>
              </table:table-cell>
              <table:table-cell office:value-type="float" office:value="0.02435203">
                <text:p>0.0243520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696.308654785156">
                <text:p>696.308654785156</text:p>
              </table:table-cell>
              <table:table-cell office:value-type="float" office:value="-0.007642453">
                <text:p>-0.007642453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96.428771972656">
                <text:p>696.428771972656</text:p>
              </table:table-cell>
              <table:table-cell office:value-type="float" office:value="0.01350789">
                <text:p>0.0135078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96.548828125">
                <text:p>696.548828125</text:p>
              </table:table-cell>
              <table:table-cell office:value-type="float" office:value="-0.006094016">
                <text:p>-0.006094016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96.6689453125">
                <text:p>696.6689453125</text:p>
              </table:table-cell>
              <table:table-cell office:value-type="float" office:value="-0.005694879">
                <text:p>-0.005694879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96.7890625">
                <text:p>696.7890625</text:p>
              </table:table-cell>
              <table:table-cell office:value-type="float" office:value="-0.008430011">
                <text:p>-0.008430011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96.9091796875">
                <text:p>696.9091796875</text:p>
              </table:table-cell>
              <table:table-cell office:value-type="float" office:value="-0.006773237">
                <text:p>-0.006773237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97.029296875">
                <text:p>697.029296875</text:p>
              </table:table-cell>
              <table:table-cell office:value-type="float" office:value="-0.01150499">
                <text:p>-0.01150499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97.1494140625">
                <text:p>697.1494140625</text:p>
              </table:table-cell>
              <table:table-cell office:value-type="float" office:value="0.008065136">
                <text:p>0.008065136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97.26953125">
                <text:p>697.26953125</text:p>
              </table:table-cell>
              <table:table-cell office:value-type="float" office:value="0.003638027">
                <text:p>0.003638027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97.3896484375">
                <text:p>697.3896484375</text:p>
              </table:table-cell>
              <table:table-cell office:value-type="float" office:value="-0.00742465">
                <text:p>-0.00742465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97.509765625">
                <text:p>697.509765625</text:p>
              </table:table-cell>
              <table:table-cell office:value-type="float" office:value="0.0004960756">
                <text:p>0.0004960756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97.6298828125">
                <text:p>697.6298828125</text:p>
              </table:table-cell>
              <table:table-cell office:value-type="float" office:value="-0.005979717">
                <text:p>-0.005979717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97.75">
                <text:p>697.75</text:p>
              </table:table-cell>
              <table:table-cell office:value-type="float" office:value="0.02530288">
                <text:p>0.02530288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97.8701171875">
                <text:p>697.8701171875</text:p>
              </table:table-cell>
              <table:table-cell office:value-type="float" office:value="0.006052123">
                <text:p>0.006052123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97.990234375">
                <text:p>697.990234375</text:p>
              </table:table-cell>
              <table:table-cell office:value-type="float" office:value="0.01320505">
                <text:p>0.01320505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8.1103515625">
                <text:p>698.1103515625</text:p>
              </table:table-cell>
              <table:table-cell office:value-type="float" office:value="0.002618684">
                <text:p>0.002618684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698.23046875">
                <text:p>698.23046875</text:p>
              </table:table-cell>
              <table:table-cell office:value-type="float" office:value="-0.008485815">
                <text:p>-0.008485815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698.350646972656">
                <text:p>698.350646972656</text:p>
              </table:table-cell>
              <table:table-cell office:value-type="float" office:value="-0.003704303">
                <text:p>-0.003704303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698.470764160156">
                <text:p>698.470764160156</text:p>
              </table:table-cell>
              <table:table-cell office:value-type="float" office:value="0.003623476">
                <text:p>0.003623476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698.590881347656">
                <text:p>698.590881347656</text:p>
              </table:table-cell>
              <table:table-cell office:value-type="float" office:value="0.002227238">
                <text:p>0.002227238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698.710998535156">
                <text:p>698.710998535156</text:p>
              </table:table-cell>
              <table:table-cell office:value-type="float" office:value="0.0245971">
                <text:p>0.0245971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98.831115722656">
                <text:p>698.831115722656</text:p>
              </table:table-cell>
              <table:table-cell office:value-type="float" office:value="-0.001832621">
                <text:p>-0.001832621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98.951232910156">
                <text:p>698.951232910156</text:p>
              </table:table-cell>
              <table:table-cell office:value-type="float" office:value="0.0002109457">
                <text:p>0.0002109457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699.071350097656">
                <text:p>699.071350097656</text:p>
              </table:table-cell>
              <table:table-cell office:value-type="float" office:value="0.00468119">
                <text:p>0.00468119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99.191528320313">
                <text:p>699.191528320313</text:p>
              </table:table-cell>
              <table:table-cell office:value-type="float" office:value="-0.0003340685">
                <text:p>-0.0003340685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699.311645507813">
                <text:p>699.311645507813</text:p>
              </table:table-cell>
              <table:table-cell office:value-type="float" office:value="0.002064393">
                <text:p>0.002064393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699.431762695313">
                <text:p>699.431762695313</text:p>
              </table:table-cell>
              <table:table-cell office:value-type="float" office:value="0.004810562">
                <text:p>0.004810562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699.551879882813">
                <text:p>699.551879882813</text:p>
              </table:table-cell>
              <table:table-cell office:value-type="float" office:value="0.0105506">
                <text:p>0.0105506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699.671997070313">
                <text:p>699.671997070313</text:p>
              </table:table-cell>
              <table:table-cell office:value-type="float" office:value="-0.0009837616">
                <text:p>-0.0009837616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699.792175292969">
                <text:p>699.792175292969</text:p>
              </table:table-cell>
              <table:table-cell office:value-type="float" office:value="-0.002171045">
                <text:p>-0.002171045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699.912292480469">
                <text:p>699.912292480469</text:p>
              </table:table-cell>
              <table:table-cell office:value-type="float" office:value="0.02508754">
                <text:p>0.02508754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00.032409667969">
                <text:p>700.032409667969</text:p>
              </table:table-cell>
              <table:table-cell office:value-type="float" office:value="0.01027471">
                <text:p>0.01027471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00.152526855469">
                <text:p>700.152526855469</text:p>
              </table:table-cell>
              <table:table-cell office:value-type="float" office:value="0.001142718">
                <text:p>0.001142718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700.272705078125">
                <text:p>700.272705078125</text:p>
              </table:table-cell>
              <table:table-cell office:value-type="float" office:value="-0.001345493">
                <text:p>-0.001345493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00.392822265625">
                <text:p>700.392822265625</text:p>
              </table:table-cell>
              <table:table-cell office:value-type="float" office:value="0.003191684">
                <text:p>0.003191684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700.512939453125">
                <text:p>700.512939453125</text:p>
              </table:table-cell>
              <table:table-cell office:value-type="float" office:value="0.01075919">
                <text:p>0.0107591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00.633117675781">
                <text:p>700.633117675781</text:p>
              </table:table-cell>
              <table:table-cell office:value-type="float" office:value="0.001779741">
                <text:p>0.001779741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700.753234863281">
                <text:p>700.753234863281</text:p>
              </table:table-cell>
              <table:table-cell office:value-type="float" office:value="0.001178927">
                <text:p>0.001178927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00.873352050781">
                <text:p>700.873352050781</text:p>
              </table:table-cell>
              <table:table-cell office:value-type="float" office:value="-0.006209283">
                <text:p>-0.006209283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00.993530273438">
                <text:p>700.993530273438</text:p>
              </table:table-cell>
              <table:table-cell office:value-type="float" office:value="-0.003093918">
                <text:p>-0.003093918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01.113647460938">
                <text:p>701.113647460938</text:p>
              </table:table-cell>
              <table:table-cell office:value-type="float" office:value="0.00317708">
                <text:p>0.00317708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701.233764648438">
                <text:p>701.233764648438</text:p>
              </table:table-cell>
              <table:table-cell office:value-type="float" office:value="-0.00383637">
                <text:p>-0.00383637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01.353942871094">
                <text:p>701.353942871094</text:p>
              </table:table-cell>
              <table:table-cell office:value-type="float" office:value="0.01470097">
                <text:p>0.01470097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01.474060058594">
                <text:p>701.474060058594</text:p>
              </table:table-cell>
              <table:table-cell office:value-type="float" office:value="0.006476635">
                <text:p>0.006476635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01.594177246094">
                <text:p>701.594177246094</text:p>
              </table:table-cell>
              <table:table-cell office:value-type="float" office:value="-0.004981491">
                <text:p>-0.004981491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01.71435546875">
                <text:p>701.71435546875</text:p>
              </table:table-cell>
              <table:table-cell office:value-type="float" office:value="0.005263224">
                <text:p>0.005263224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01.83447265625">
                <text:p>701.83447265625</text:p>
              </table:table-cell>
              <table:table-cell office:value-type="float" office:value="-0.009378245">
                <text:p>-0.009378245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01.954650878906">
                <text:p>701.954650878906</text:p>
              </table:table-cell>
              <table:table-cell office:value-type="float" office:value="-0.005101995">
                <text:p>-0.005101995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02.074768066406">
                <text:p>702.074768066406</text:p>
              </table:table-cell>
              <table:table-cell office:value-type="float" office:value="0.004761761">
                <text:p>0.004761761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02.194946289063">
                <text:p>702.194946289063</text:p>
              </table:table-cell>
              <table:table-cell office:value-type="float" office:value="0.01006454">
                <text:p>0.01006454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02.315063476563">
                <text:p>702.315063476563</text:p>
              </table:table-cell>
              <table:table-cell office:value-type="float" office:value="-0.005276235">
                <text:p>-0.005276235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702.435241699219">
                <text:p>702.435241699219</text:p>
              </table:table-cell>
              <table:table-cell office:value-type="float" office:value="-0.004545948">
                <text:p>-0.004545948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702.555358886719">
                <text:p>702.555358886719</text:p>
              </table:table-cell>
              <table:table-cell office:value-type="float" office:value="0.008320224">
                <text:p>0.008320224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02.675537109375">
                <text:p>702.675537109375</text:p>
              </table:table-cell>
              <table:table-cell office:value-type="float" office:value="0.01671683">
                <text:p>0.01671683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02.795654296875">
                <text:p>702.795654296875</text:p>
              </table:table-cell>
              <table:table-cell office:value-type="float" office:value="-0.000905728">
                <text:p>-0.000905728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702.915832519531">
                <text:p>702.915832519531</text:p>
              </table:table-cell>
              <table:table-cell office:value-type="float" office:value="0.001401236">
                <text:p>0.001401236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703.035949707031">
                <text:p>703.035949707031</text:p>
              </table:table-cell>
              <table:table-cell office:value-type="float" office:value="-0.003001224">
                <text:p>-0.003001224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703.156127929688">
                <text:p>703.156127929688</text:p>
              </table:table-cell>
              <table:table-cell office:value-type="float" office:value="-0.0009014957">
                <text:p>-0.0009014957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703.276245117188">
                <text:p>703.276245117188</text:p>
              </table:table-cell>
              <table:table-cell office:value-type="float" office:value="-0.002033382">
                <text:p>-0.002033382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703.396423339844">
                <text:p>703.396423339844</text:p>
              </table:table-cell>
              <table:table-cell office:value-type="float" office:value="-0.00562016">
                <text:p>-0.0056201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703.516540527344">
                <text:p>703.516540527344</text:p>
              </table:table-cell>
              <table:table-cell office:value-type="float" office:value="0.0001565838">
                <text:p>0.0001565838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703.63671875">
                <text:p>703.63671875</text:p>
              </table:table-cell>
              <table:table-cell office:value-type="float" office:value="0.01231857">
                <text:p>0.01231857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703.756896972656">
                <text:p>703.756896972656</text:p>
              </table:table-cell>
              <table:table-cell office:value-type="float" office:value="-0.009399026">
                <text:p>-0.009399026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703.877014160156">
                <text:p>703.877014160156</text:p>
              </table:table-cell>
              <table:table-cell office:value-type="float" office:value="0.007262225">
                <text:p>0.007262225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703.997192382813">
                <text:p>703.997192382813</text:p>
              </table:table-cell>
              <table:table-cell office:value-type="float" office:value="-0.005344467">
                <text:p>-0.005344467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04.117309570313">
                <text:p>704.117309570313</text:p>
              </table:table-cell>
              <table:table-cell office:value-type="float" office:value="-0.001836631">
                <text:p>-0.001836631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704.237487792969">
                <text:p>704.237487792969</text:p>
              </table:table-cell>
              <table:table-cell office:value-type="float" office:value="-0.005142494">
                <text:p>-0.005142494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704.357666015625">
                <text:p>704.357666015625</text:p>
              </table:table-cell>
              <table:table-cell office:value-type="float" office:value="-0.005224704">
                <text:p>-0.005224704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704.477783203125">
                <text:p>704.477783203125</text:p>
              </table:table-cell>
              <table:table-cell office:value-type="float" office:value="0.0102542">
                <text:p>0.0102542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704.597961425781">
                <text:p>704.597961425781</text:p>
              </table:table-cell>
              <table:table-cell office:value-type="float" office:value="-0.0041482">
                <text:p>-0.0041482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04.718139648438">
                <text:p>704.718139648438</text:p>
              </table:table-cell>
              <table:table-cell office:value-type="float" office:value="-0.006409157">
                <text:p>-0.00640915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04.838256835938">
                <text:p>704.838256835938</text:p>
              </table:table-cell>
              <table:table-cell office:value-type="float" office:value="-0.009056055">
                <text:p>-0.00905605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04.958435058594">
                <text:p>704.958435058594</text:p>
              </table:table-cell>
              <table:table-cell office:value-type="float" office:value="-0.008439599">
                <text:p>-0.008439599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05.07861328125">
                <text:p>705.07861328125</text:p>
              </table:table-cell>
              <table:table-cell office:value-type="float" office:value="0.002219016">
                <text:p>0.002219016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705.19873046875">
                <text:p>705.19873046875</text:p>
              </table:table-cell>
              <table:table-cell office:value-type="float" office:value="-0.0004039504">
                <text:p>-0.0004039504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05.318908691406">
                <text:p>705.318908691406</text:p>
              </table:table-cell>
              <table:table-cell office:value-type="float" office:value="-0.003237381">
                <text:p>-0.003237381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05.439086914063">
                <text:p>705.439086914063</text:p>
              </table:table-cell>
              <table:table-cell office:value-type="float" office:value="0.01049409">
                <text:p>0.01049409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05.559265136719">
                <text:p>705.559265136719</text:p>
              </table:table-cell>
              <table:table-cell office:value-type="float" office:value="-0.001953185">
                <text:p>-0.001953185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05.679382324219">
                <text:p>705.679382324219</text:p>
              </table:table-cell>
              <table:table-cell office:value-type="float" office:value="0.001757935">
                <text:p>0.001757935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705.799560546875">
                <text:p>705.799560546875</text:p>
              </table:table-cell>
              <table:table-cell office:value-type="float" office:value="0.01187904">
                <text:p>0.01187904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705.919738769531">
                <text:p>705.919738769531</text:p>
              </table:table-cell>
              <table:table-cell office:value-type="float" office:value="-0.002536169">
                <text:p>-0.002536169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706.039916992188">
                <text:p>706.039916992188</text:p>
              </table:table-cell>
              <table:table-cell office:value-type="float" office:value="-0.002270157">
                <text:p>-0.002270157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706.160034179688">
                <text:p>706.160034179688</text:p>
              </table:table-cell>
              <table:table-cell office:value-type="float" office:value="0.01949313">
                <text:p>0.01949313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706.280212402344">
                <text:p>706.280212402344</text:p>
              </table:table-cell>
              <table:table-cell office:value-type="float" office:value="-0.001787757">
                <text:p>-0.001787757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706.400390625">
                <text:p>706.400390625</text:p>
              </table:table-cell>
              <table:table-cell office:value-type="float" office:value="0.002995107">
                <text:p>0.002995107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706.520568847656">
                <text:p>706.520568847656</text:p>
              </table:table-cell>
              <table:table-cell office:value-type="float" office:value="0.004336087">
                <text:p>0.004336087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706.640747070313">
                <text:p>706.640747070313</text:p>
              </table:table-cell>
              <table:table-cell office:value-type="float" office:value="-0.003816297">
                <text:p>-0.003816297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706.760925292969">
                <text:p>706.760925292969</text:p>
              </table:table-cell>
              <table:table-cell office:value-type="float" office:value="0.008635296">
                <text:p>0.008635296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706.881042480469">
                <text:p>706.881042480469</text:p>
              </table:table-cell>
              <table:table-cell office:value-type="float" office:value="0.0009612857">
                <text:p>0.0009612857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707.001220703125">
                <text:p>707.001220703125</text:p>
              </table:table-cell>
              <table:table-cell office:value-type="float" office:value="-0.008369799">
                <text:p>-0.008369799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707.121398925781">
                <text:p>707.121398925781</text:p>
              </table:table-cell>
              <table:table-cell office:value-type="float" office:value="-0.009123865">
                <text:p>-0.009123865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707.241577148438">
                <text:p>707.241577148438</text:p>
              </table:table-cell>
              <table:table-cell office:value-type="float" office:value="0.002332091">
                <text:p>0.002332091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707.361755371094">
                <text:p>707.361755371094</text:p>
              </table:table-cell>
              <table:table-cell office:value-type="float" office:value="0.00430857">
                <text:p>0.0043085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707.48193359375">
                <text:p>707.48193359375</text:p>
              </table:table-cell>
              <table:table-cell office:value-type="float" office:value="0.004600003">
                <text:p>0.004600003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707.602111816406">
                <text:p>707.602111816406</text:p>
              </table:table-cell>
              <table:table-cell office:value-type="float" office:value="-0.006950659">
                <text:p>-0.006950659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07.722290039063">
                <text:p>707.722290039063</text:p>
              </table:table-cell>
              <table:table-cell office:value-type="float" office:value="0.002227523">
                <text:p>0.002227523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707.842468261719">
                <text:p>707.842468261719</text:p>
              </table:table-cell>
              <table:table-cell office:value-type="float" office:value="0.004232629">
                <text:p>0.004232629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707.962646484375">
                <text:p>707.962646484375</text:p>
              </table:table-cell>
              <table:table-cell office:value-type="float" office:value="0.008144701">
                <text:p>0.008144701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708.082763671875">
                <text:p>708.082763671875</text:p>
              </table:table-cell>
              <table:table-cell office:value-type="float" office:value="-0.002071719">
                <text:p>-0.00207171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708.202941894531">
                <text:p>708.202941894531</text:p>
              </table:table-cell>
              <table:table-cell office:value-type="float" office:value="0.001453822">
                <text:p>0.001453822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708.323120117188">
                <text:p>708.323120117188</text:p>
              </table:table-cell>
              <table:table-cell office:value-type="float" office:value="0.003822271">
                <text:p>0.003822271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708.443298339844">
                <text:p>708.443298339844</text:p>
              </table:table-cell>
              <table:table-cell office:value-type="float" office:value="-0.004697387">
                <text:p>-0.004697387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08.5634765625">
                <text:p>708.5634765625</text:p>
              </table:table-cell>
              <table:table-cell office:value-type="float" office:value="-0.00230291">
                <text:p>-0.00230291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08.683654785156">
                <text:p>708.683654785156</text:p>
              </table:table-cell>
              <table:table-cell office:value-type="float" office:value="-0.003889836">
                <text:p>-0.003889836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08.803833007813">
                <text:p>708.803833007813</text:p>
              </table:table-cell>
              <table:table-cell office:value-type="float" office:value="0.01226103">
                <text:p>0.01226103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708.924011230469">
                <text:p>708.924011230469</text:p>
              </table:table-cell>
              <table:table-cell office:value-type="float" office:value="-0.009174937">
                <text:p>-0.009174937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709.044189453125">
                <text:p>709.044189453125</text:p>
              </table:table-cell>
              <table:table-cell office:value-type="float" office:value="-0.001609618">
                <text:p>-0.001609618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709.164367675781">
                <text:p>709.164367675781</text:p>
              </table:table-cell>
              <table:table-cell office:value-type="float" office:value="0.002138029">
                <text:p>0.002138029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09.284545898438">
                <text:p>709.284545898438</text:p>
              </table:table-cell>
              <table:table-cell office:value-type="float" office:value="0.002519537">
                <text:p>0.002519537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709.404724121094">
                <text:p>709.404724121094</text:p>
              </table:table-cell>
              <table:table-cell office:value-type="float" office:value="0.001238779">
                <text:p>0.001238779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09.52490234375">
                <text:p>709.52490234375</text:p>
              </table:table-cell>
              <table:table-cell office:value-type="float" office:value="-0.00542176">
                <text:p>-0.00542176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9.645141601563">
                <text:p>709.645141601563</text:p>
              </table:table-cell>
              <table:table-cell office:value-type="float" office:value="-0.006330262">
                <text:p>-0.006330262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709.765319824219">
                <text:p>709.765319824219</text:p>
              </table:table-cell>
              <table:table-cell office:value-type="float" office:value="0.002690328">
                <text:p>0.002690328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709.885498046875">
                <text:p>709.885498046875</text:p>
              </table:table-cell>
              <table:table-cell office:value-type="float" office:value="-0.001424475">
                <text:p>-0.001424475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710.005676269531">
                <text:p>710.005676269531</text:p>
              </table:table-cell>
              <table:table-cell office:value-type="float" office:value="-0.002944539">
                <text:p>-0.002944539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710.125854492188">
                <text:p>710.125854492188</text:p>
              </table:table-cell>
              <table:table-cell office:value-type="float" office:value="0.006179226">
                <text:p>0.006179226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710.246032714844">
                <text:p>710.246032714844</text:p>
              </table:table-cell>
              <table:table-cell office:value-type="float" office:value="0.001648555">
                <text:p>0.00164855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710.3662109375">
                <text:p>710.3662109375</text:p>
              </table:table-cell>
              <table:table-cell office:value-type="float" office:value="-0.00815606">
                <text:p>-0.00815606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710.486389160156">
                <text:p>710.486389160156</text:p>
              </table:table-cell>
              <table:table-cell office:value-type="float" office:value="0.00917578">
                <text:p>0.00917578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710.606567382813">
                <text:p>710.606567382813</text:p>
              </table:table-cell>
              <table:table-cell office:value-type="float" office:value="-0.001424894">
                <text:p>-0.001424894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710.726745605469">
                <text:p>710.726745605469</text:p>
              </table:table-cell>
              <table:table-cell office:value-type="float" office:value="-0.006976043">
                <text:p>-0.006976043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710.846984863281">
                <text:p>710.846984863281</text:p>
              </table:table-cell>
              <table:table-cell office:value-type="float" office:value="0.001779472">
                <text:p>0.001779472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710.967163085938">
                <text:p>710.967163085938</text:p>
              </table:table-cell>
              <table:table-cell office:value-type="float" office:value="0.0003206024">
                <text:p>0.0003206024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711.087341308594">
                <text:p>711.087341308594</text:p>
              </table:table-cell>
              <table:table-cell office:value-type="float" office:value="0.000103468">
                <text:p>0.000103468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711.20751953125">
                <text:p>711.20751953125</text:p>
              </table:table-cell>
              <table:table-cell office:value-type="float" office:value="-0.009344232">
                <text:p>-0.009344232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711.327697753906">
                <text:p>711.327697753906</text:p>
              </table:table-cell>
              <table:table-cell office:value-type="float" office:value="-0.007595935">
                <text:p>-0.007595935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711.447875976563">
                <text:p>711.447875976563</text:p>
              </table:table-cell>
              <table:table-cell office:value-type="float" office:value="0.002983775">
                <text:p>0.002983775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711.568115234375">
                <text:p>711.568115234375</text:p>
              </table:table-cell>
              <table:table-cell office:value-type="float" office:value="-0.003520612">
                <text:p>-0.003520612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711.688293457031">
                <text:p>711.688293457031</text:p>
              </table:table-cell>
              <table:table-cell office:value-type="float" office:value="0.01238224">
                <text:p>0.01238224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711.808471679688">
                <text:p>711.808471679688</text:p>
              </table:table-cell>
              <table:table-cell office:value-type="float" office:value="-0.008260281">
                <text:p>-0.008260281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711.928649902344">
                <text:p>711.928649902344</text:p>
              </table:table-cell>
              <table:table-cell office:value-type="float" office:value="-0.003930212">
                <text:p>-0.003930212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712.048889160156">
                <text:p>712.048889160156</text:p>
              </table:table-cell>
              <table:table-cell office:value-type="float" office:value="-0.001065471">
                <text:p>-0.001065471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12.169067382813">
                <text:p>712.169067382813</text:p>
              </table:table-cell>
              <table:table-cell office:value-type="float" office:value="0.00741733">
                <text:p>0.00741733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12.289245605469">
                <text:p>712.289245605469</text:p>
              </table:table-cell>
              <table:table-cell office:value-type="float" office:value="0.004088067">
                <text:p>0.004088067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712.409423828125">
                <text:p>712.409423828125</text:p>
              </table:table-cell>
              <table:table-cell office:value-type="float" office:value="-0.006253154">
                <text:p>-0.006253154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712.529663085938">
                <text:p>712.529663085938</text:p>
              </table:table-cell>
              <table:table-cell office:value-type="float" office:value="0.006523957">
                <text:p>0.00652395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712.649841308594">
                <text:p>712.649841308594</text:p>
              </table:table-cell>
              <table:table-cell office:value-type="float" office:value="-0.004750619">
                <text:p>-0.004750619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712.77001953125">
                <text:p>712.77001953125</text:p>
              </table:table-cell>
              <table:table-cell office:value-type="float" office:value="-0.01008968">
                <text:p>-0.01008968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712.890197753906">
                <text:p>712.890197753906</text:p>
              </table:table-cell>
              <table:table-cell office:value-type="float" office:value="-0.004130197">
                <text:p>-0.004130197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713.010437011719">
                <text:p>713.010437011719</text:p>
              </table:table-cell>
              <table:table-cell office:value-type="float" office:value="0.01697574">
                <text:p>0.01697574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713.130615234375">
                <text:p>713.130615234375</text:p>
              </table:table-cell>
              <table:table-cell office:value-type="float" office:value="0.01668858">
                <text:p>0.01668858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713.250793457031">
                <text:p>713.250793457031</text:p>
              </table:table-cell>
              <table:table-cell office:value-type="float" office:value="0.01668402">
                <text:p>0.01668402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713.371032714844">
                <text:p>713.371032714844</text:p>
              </table:table-cell>
              <table:table-cell office:value-type="float" office:value="-0.009523815">
                <text:p>-0.009523815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713.4912109375">
                <text:p>713.4912109375</text:p>
              </table:table-cell>
              <table:table-cell office:value-type="float" office:value="-0.0004265501">
                <text:p>-0.0004265501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713.611389160156">
                <text:p>713.611389160156</text:p>
              </table:table-cell>
              <table:table-cell office:value-type="float" office:value="0.004926555">
                <text:p>0.004926555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13.731628417969">
                <text:p>713.731628417969</text:p>
              </table:table-cell>
              <table:table-cell office:value-type="float" office:value="0.004315399">
                <text:p>0.004315399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713.851806640625">
                <text:p>713.851806640625</text:p>
              </table:table-cell>
              <table:table-cell office:value-type="float" office:value="-0.007318683">
                <text:p>-0.007318683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713.971984863281">
                <text:p>713.971984863281</text:p>
              </table:table-cell>
              <table:table-cell office:value-type="float" office:value="-0.002621681">
                <text:p>-0.002621681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14.092224121094">
                <text:p>714.092224121094</text:p>
              </table:table-cell>
              <table:table-cell office:value-type="float" office:value="-0.01029403">
                <text:p>-0.01029403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714.21240234375">
                <text:p>714.21240234375</text:p>
              </table:table-cell>
              <table:table-cell office:value-type="float" office:value="0.009420456">
                <text:p>0.009420456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714.332580566406">
                <text:p>714.332580566406</text:p>
              </table:table-cell>
              <table:table-cell office:value-type="float" office:value="0.00475195">
                <text:p>0.00475195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714.452819824219">
                <text:p>714.452819824219</text:p>
              </table:table-cell>
              <table:table-cell office:value-type="float" office:value="-0.0002759297">
                <text:p>-0.0002759297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714.572998046875">
                <text:p>714.572998046875</text:p>
              </table:table-cell>
              <table:table-cell office:value-type="float" office:value="0.004568111">
                <text:p>0.004568111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714.693237304688">
                <text:p>714.693237304688</text:p>
              </table:table-cell>
              <table:table-cell office:value-type="float" office:value="0.01356432">
                <text:p>0.01356432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714.813415527344">
                <text:p>714.813415527344</text:p>
              </table:table-cell>
              <table:table-cell office:value-type="float" office:value="-0.003703824">
                <text:p>-0.003703824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714.93359375">
                <text:p>714.93359375</text:p>
              </table:table-cell>
              <table:table-cell office:value-type="float" office:value="0.004141712">
                <text:p>0.004141712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715.053833007813">
                <text:p>715.053833007813</text:p>
              </table:table-cell>
              <table:table-cell office:value-type="float" office:value="0.002798731">
                <text:p>0.002798731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715.174011230469">
                <text:p>715.174011230469</text:p>
              </table:table-cell>
              <table:table-cell office:value-type="float" office:value="0.004381148">
                <text:p>0.004381148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15.294250488281">
                <text:p>715.294250488281</text:p>
              </table:table-cell>
              <table:table-cell office:value-type="float" office:value="-0.009174644">
                <text:p>-0.009174644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15.414428710938">
                <text:p>715.414428710938</text:p>
              </table:table-cell>
              <table:table-cell office:value-type="float" office:value="-0.003517021">
                <text:p>-0.003517021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715.53466796875">
                <text:p>715.53466796875</text:p>
              </table:table-cell>
              <table:table-cell office:value-type="float" office:value="0.001437271">
                <text:p>0.001437271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715.654846191406">
                <text:p>715.654846191406</text:p>
              </table:table-cell>
              <table:table-cell office:value-type="float" office:value="-0.006806087">
                <text:p>-0.006806087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715.775024414063">
                <text:p>715.775024414063</text:p>
              </table:table-cell>
              <table:table-cell office:value-type="float" office:value="0.001804836">
                <text:p>0.001804836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715.895263671875">
                <text:p>715.895263671875</text:p>
              </table:table-cell>
              <table:table-cell office:value-type="float" office:value="-0.001987935">
                <text:p>-0.001987935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16.015441894531">
                <text:p>716.015441894531</text:p>
              </table:table-cell>
              <table:table-cell office:value-type="float" office:value="-0.005236696">
                <text:p>-0.005236696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716.135681152344">
                <text:p>716.135681152344</text:p>
              </table:table-cell>
              <table:table-cell office:value-type="float" office:value="-0.0003441191">
                <text:p>-0.0003441191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716.255859375">
                <text:p>716.255859375</text:p>
              </table:table-cell>
              <table:table-cell office:value-type="float" office:value="-0.008386726">
                <text:p>-0.008386726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16.376098632813">
                <text:p>716.376098632813</text:p>
              </table:table-cell>
              <table:table-cell office:value-type="float" office:value="-0.01029844">
                <text:p>-0.01029844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16.496276855469">
                <text:p>716.496276855469</text:p>
              </table:table-cell>
              <table:table-cell office:value-type="float" office:value="0.006081596">
                <text:p>0.006081596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16.616516113281">
                <text:p>716.616516113281</text:p>
              </table:table-cell>
              <table:table-cell office:value-type="float" office:value="0.001610054">
                <text:p>0.001610054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716.736694335938">
                <text:p>716.736694335938</text:p>
              </table:table-cell>
              <table:table-cell office:value-type="float" office:value="0.0006574577">
                <text:p>0.0006574577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716.85693359375">
                <text:p>716.85693359375</text:p>
              </table:table-cell>
              <table:table-cell office:value-type="float" office:value="0.000247722">
                <text:p>0.000247722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716.977172851563">
                <text:p>716.977172851563</text:p>
              </table:table-cell>
              <table:table-cell office:value-type="float" office:value="0.00123596">
                <text:p>0.00123596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717.097351074219">
                <text:p>717.097351074219</text:p>
              </table:table-cell>
              <table:table-cell office:value-type="float" office:value="0.006063021">
                <text:p>0.006063021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717.217590332031">
                <text:p>717.217590332031</text:p>
              </table:table-cell>
              <table:table-cell office:value-type="float" office:value="-0.005650129">
                <text:p>-0.005650129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717.337768554688">
                <text:p>717.337768554688</text:p>
              </table:table-cell>
              <table:table-cell office:value-type="float" office:value="-0.009462844">
                <text:p>-0.009462844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717.4580078125">
                <text:p>717.4580078125</text:p>
              </table:table-cell>
              <table:table-cell office:value-type="float" office:value="0.00191108">
                <text:p>0.00191108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717.578186035156">
                <text:p>717.578186035156</text:p>
              </table:table-cell>
              <table:table-cell office:value-type="float" office:value="-0.001893781">
                <text:p>-0.001893781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17.698425292969">
                <text:p>717.698425292969</text:p>
              </table:table-cell>
              <table:table-cell office:value-type="float" office:value="0.0006860704">
                <text:p>0.0006860704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17.818603515625">
                <text:p>717.818603515625</text:p>
              </table:table-cell>
              <table:table-cell office:value-type="float" office:value="0.0002855133">
                <text:p>0.0002855133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17.938842773438">
                <text:p>717.938842773438</text:p>
              </table:table-cell>
              <table:table-cell office:value-type="float" office:value="-0.002316252">
                <text:p>-0.002316252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718.05908203125">
                <text:p>718.05908203125</text:p>
              </table:table-cell>
              <table:table-cell office:value-type="float" office:value="0.001034351">
                <text:p>0.001034351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718.179260253906">
                <text:p>718.179260253906</text:p>
              </table:table-cell>
              <table:table-cell office:value-type="float" office:value="-0.006173067">
                <text:p>-0.006173067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18.299499511719">
                <text:p>718.299499511719</text:p>
              </table:table-cell>
              <table:table-cell office:value-type="float" office:value="0.004846761">
                <text:p>0.004846761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718.419677734375">
                <text:p>718.419677734375</text:p>
              </table:table-cell>
              <table:table-cell office:value-type="float" office:value="-0.001839811">
                <text:p>-0.001839811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718.539916992188">
                <text:p>718.539916992188</text:p>
              </table:table-cell>
              <table:table-cell office:value-type="float" office:value="-0.003126285">
                <text:p>-0.003126285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718.66015625">
                <text:p>718.66015625</text:p>
              </table:table-cell>
              <table:table-cell office:value-type="float" office:value="0.0008590133">
                <text:p>0.0008590133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718.780334472656">
                <text:p>718.780334472656</text:p>
              </table:table-cell>
              <table:table-cell office:value-type="float" office:value="-0.002644471">
                <text:p>-0.002644471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18.900573730469">
                <text:p>718.900573730469</text:p>
              </table:table-cell>
              <table:table-cell office:value-type="float" office:value="0.001725062">
                <text:p>0.001725062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19.020812988281">
                <text:p>719.020812988281</text:p>
              </table:table-cell>
              <table:table-cell office:value-type="float" office:value="0.004309331">
                <text:p>0.004309331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19.140991210938">
                <text:p>719.140991210938</text:p>
              </table:table-cell>
              <table:table-cell office:value-type="float" office:value="0.007713735">
                <text:p>0.007713735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19.26123046875">
                <text:p>719.26123046875</text:p>
              </table:table-cell>
              <table:table-cell office:value-type="float" office:value="-0.0004098316">
                <text:p>-0.0004098316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719.381469726563">
                <text:p>719.381469726563</text:p>
              </table:table-cell>
              <table:table-cell office:value-type="float" office:value="-0.004559164">
                <text:p>-0.004559164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719.501647949219">
                <text:p>719.501647949219</text:p>
              </table:table-cell>
              <table:table-cell office:value-type="float" office:value="0.008907229">
                <text:p>0.008907229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719.621887207031">
                <text:p>719.621887207031</text:p>
              </table:table-cell>
              <table:table-cell office:value-type="float" office:value="-0.003083307">
                <text:p>-0.003083307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719.742126464844">
                <text:p>719.742126464844</text:p>
              </table:table-cell>
              <table:table-cell office:value-type="float" office:value="-0.008728409">
                <text:p>-0.008728409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719.8623046875">
                <text:p>719.8623046875</text:p>
              </table:table-cell>
              <table:table-cell office:value-type="float" office:value="-0.009064701">
                <text:p>-0.009064701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719.982543945313">
                <text:p>719.982543945313</text:p>
              </table:table-cell>
              <table:table-cell office:value-type="float" office:value="0.004222888">
                <text:p>0.004222888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720.102783203125">
                <text:p>720.102783203125</text:p>
              </table:table-cell>
              <table:table-cell office:value-type="float" office:value="-0.006073539">
                <text:p>-0.00607353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720.222961425781">
                <text:p>720.222961425781</text:p>
              </table:table-cell>
              <table:table-cell office:value-type="float" office:value="0.008599556">
                <text:p>0.008599556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720.343200683594">
                <text:p>720.343200683594</text:p>
              </table:table-cell>
              <table:table-cell office:value-type="float" office:value="-0.009360357">
                <text:p>-0.009360357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720.463439941406">
                <text:p>720.463439941406</text:p>
              </table:table-cell>
              <table:table-cell office:value-type="float" office:value="0.0007853663">
                <text:p>0.0007853663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720.583679199219">
                <text:p>720.583679199219</text:p>
              </table:table-cell>
              <table:table-cell office:value-type="float" office:value="0.02246147">
                <text:p>0.02246147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720.703857421875">
                <text:p>720.703857421875</text:p>
              </table:table-cell>
              <table:table-cell office:value-type="float" office:value="0.001166432">
                <text:p>0.001166432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720.824096679688">
                <text:p>720.824096679688</text:p>
              </table:table-cell>
              <table:table-cell office:value-type="float" office:value="0.0009469601">
                <text:p>0.0009469601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720.9443359375">
                <text:p>720.9443359375</text:p>
              </table:table-cell>
              <table:table-cell office:value-type="float" office:value="0.005644531">
                <text:p>0.005644531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721.064575195313">
                <text:p>721.064575195313</text:p>
              </table:table-cell>
              <table:table-cell office:value-type="float" office:value="0.005221842">
                <text:p>0.005221842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721.184753417969">
                <text:p>721.184753417969</text:p>
              </table:table-cell>
              <table:table-cell office:value-type="float" office:value="-0.003578748">
                <text:p>-0.003578748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721.304992675781">
                <text:p>721.304992675781</text:p>
              </table:table-cell>
              <table:table-cell office:value-type="float" office:value="0.0003725752">
                <text:p>0.0003725752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721.425231933594">
                <text:p>721.425231933594</text:p>
              </table:table-cell>
              <table:table-cell office:value-type="float" office:value="0.001116363">
                <text:p>0.001116363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721.545471191406">
                <text:p>721.545471191406</text:p>
              </table:table-cell>
              <table:table-cell office:value-type="float" office:value="0.01835034">
                <text:p>0.01835034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721.665649414063">
                <text:p>721.665649414063</text:p>
              </table:table-cell>
              <table:table-cell office:value-type="float" office:value="-0.009173918">
                <text:p>-0.009173918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721.785888671875">
                <text:p>721.785888671875</text:p>
              </table:table-cell>
              <table:table-cell office:value-type="float" office:value="0.01625698">
                <text:p>0.01625698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721.906127929688">
                <text:p>721.906127929688</text:p>
              </table:table-cell>
              <table:table-cell office:value-type="float" office:value="-0.001839685">
                <text:p>-0.001839685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722.0263671875">
                <text:p>722.0263671875</text:p>
              </table:table-cell>
              <table:table-cell office:value-type="float" office:value="-0.007435061">
                <text:p>-0.007435061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722.146606445313">
                <text:p>722.146606445313</text:p>
              </table:table-cell>
              <table:table-cell office:value-type="float" office:value="0.01415561">
                <text:p>0.0141556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722.266784667969">
                <text:p>722.266784667969</text:p>
              </table:table-cell>
              <table:table-cell office:value-type="float" office:value="-0.003024356">
                <text:p>-0.003024356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22.387023925781">
                <text:p>722.387023925781</text:p>
              </table:table-cell>
              <table:table-cell office:value-type="float" office:value="-0.007712159">
                <text:p>-0.007712159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2.507263183594">
                <text:p>722.507263183594</text:p>
              </table:table-cell>
              <table:table-cell office:value-type="float" office:value="-0.009556985">
                <text:p>-0.009556985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722.627502441406">
                <text:p>722.627502441406</text:p>
              </table:table-cell>
              <table:table-cell office:value-type="float" office:value="-0.00639349">
                <text:p>-0.00639349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722.747741699219">
                <text:p>722.747741699219</text:p>
              </table:table-cell>
              <table:table-cell office:value-type="float" office:value="0.002128063">
                <text:p>0.002128063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722.867980957031">
                <text:p>722.867980957031</text:p>
              </table:table-cell>
              <table:table-cell office:value-type="float" office:value="-0.007665283">
                <text:p>-0.007665283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722.988159179688">
                <text:p>722.988159179688</text:p>
              </table:table-cell>
              <table:table-cell office:value-type="float" office:value="0.0008888471">
                <text:p>0.0008888471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723.1083984375">
                <text:p>723.1083984375</text:p>
              </table:table-cell>
              <table:table-cell office:value-type="float" office:value="0.003916375">
                <text:p>0.003916375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723.228637695313">
                <text:p>723.228637695313</text:p>
              </table:table-cell>
              <table:table-cell office:value-type="float" office:value="0.01651949">
                <text:p>0.0165194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723.348876953125">
                <text:p>723.348876953125</text:p>
              </table:table-cell>
              <table:table-cell office:value-type="float" office:value="0.001057914">
                <text:p>0.001057914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723.469116210938">
                <text:p>723.469116210938</text:p>
              </table:table-cell>
              <table:table-cell office:value-type="float" office:value="-0.005281717">
                <text:p>-0.005281717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723.58935546875">
                <text:p>723.58935546875</text:p>
              </table:table-cell>
              <table:table-cell office:value-type="float" office:value="0.001273402">
                <text:p>0.001273402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723.709594726563">
                <text:p>723.709594726563</text:p>
              </table:table-cell>
              <table:table-cell office:value-type="float" office:value="-0.005115237">
                <text:p>-0.005115237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23.829772949219">
                <text:p>723.829772949219</text:p>
              </table:table-cell>
              <table:table-cell office:value-type="float" office:value="-0.005876656">
                <text:p>-0.005876656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23.950012207031">
                <text:p>723.950012207031</text:p>
              </table:table-cell>
              <table:table-cell office:value-type="float" office:value="0.002755931">
                <text:p>0.002755931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24.070251464844">
                <text:p>724.070251464844</text:p>
              </table:table-cell>
              <table:table-cell office:value-type="float" office:value="-0.0004284369">
                <text:p>-0.0004284369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724.190490722656">
                <text:p>724.190490722656</text:p>
              </table:table-cell>
              <table:table-cell office:value-type="float" office:value="-0.01230936">
                <text:p>-0.01230936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724.310729980469">
                <text:p>724.310729980469</text:p>
              </table:table-cell>
              <table:table-cell office:value-type="float" office:value="-0.007708619">
                <text:p>-0.007708619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24.430969238281">
                <text:p>724.430969238281</text:p>
              </table:table-cell>
              <table:table-cell office:value-type="float" office:value="-0.008241115">
                <text:p>-0.008241115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724.551208496094">
                <text:p>724.551208496094</text:p>
              </table:table-cell>
              <table:table-cell office:value-type="float" office:value="-0.01039299">
                <text:p>-0.0103929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724.671447753906">
                <text:p>724.671447753906</text:p>
              </table:table-cell>
              <table:table-cell office:value-type="float" office:value="0.006025808">
                <text:p>0.006025808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24.791687011719">
                <text:p>724.791687011719</text:p>
              </table:table-cell>
              <table:table-cell office:value-type="float" office:value="-0.009689196">
                <text:p>-0.009689196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724.911865234375">
                <text:p>724.911865234375</text:p>
              </table:table-cell>
              <table:table-cell office:value-type="float" office:value="-0.009029334">
                <text:p>-0.009029334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725.032104492188">
                <text:p>725.032104492188</text:p>
              </table:table-cell>
              <table:table-cell office:value-type="float" office:value="0.002219507">
                <text:p>0.002219507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725.15234375">
                <text:p>725.15234375</text:p>
              </table:table-cell>
              <table:table-cell office:value-type="float" office:value="-0.006816852">
                <text:p>-0.006816852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725.272583007813">
                <text:p>725.272583007813</text:p>
              </table:table-cell>
              <table:table-cell office:value-type="float" office:value="-0.007932546">
                <text:p>-0.007932546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725.392822265625">
                <text:p>725.392822265625</text:p>
              </table:table-cell>
              <table:table-cell office:value-type="float" office:value="0.02601653">
                <text:p>0.02601653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725.513061523438">
                <text:p>725.513061523438</text:p>
              </table:table-cell>
              <table:table-cell office:value-type="float" office:value="-0.002128992">
                <text:p>-0.002128992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725.63330078125">
                <text:p>725.63330078125</text:p>
              </table:table-cell>
              <table:table-cell office:value-type="float" office:value="-0.001355301">
                <text:p>-0.001355301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725.753540039063">
                <text:p>725.753540039063</text:p>
              </table:table-cell>
              <table:table-cell office:value-type="float" office:value="-0.006391385">
                <text:p>-0.006391385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725.873779296875">
                <text:p>725.873779296875</text:p>
              </table:table-cell>
              <table:table-cell office:value-type="float" office:value="0.002621428">
                <text:p>0.002621428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725.994018554688">
                <text:p>725.994018554688</text:p>
              </table:table-cell>
              <table:table-cell office:value-type="float" office:value="-0.0016047">
                <text:p>-0.0016047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726.1142578125">
                <text:p>726.1142578125</text:p>
              </table:table-cell>
              <table:table-cell office:value-type="float" office:value="0.0004009297">
                <text:p>0.0004009297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726.234497070313">
                <text:p>726.234497070313</text:p>
              </table:table-cell>
              <table:table-cell office:value-type="float" office:value="-0.002929673">
                <text:p>-0.002929673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726.354736328125">
                <text:p>726.354736328125</text:p>
              </table:table-cell>
              <table:table-cell office:value-type="float" office:value="0.008115436">
                <text:p>0.008115436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26.474975585938">
                <text:p>726.474975585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726.59521484375">
                <text:p>726.59521484375</text:p>
              </table:table-cell>
              <table:table-cell office:value-type="float" office:value="0.0008953186">
                <text:p>0.0008953186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26.715454101563">
                <text:p>726.715454101563</text:p>
              </table:table-cell>
              <table:table-cell office:value-type="float" office:value="-0.004028455">
                <text:p>-0.004028455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26.835693359375">
                <text:p>726.835693359375</text:p>
              </table:table-cell>
              <table:table-cell office:value-type="float" office:value="-0.005243289">
                <text:p>-0.005243289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26.955932617188">
                <text:p>726.955932617188</text:p>
              </table:table-cell>
              <table:table-cell office:value-type="float" office:value="-0.01073127">
                <text:p>-0.01073127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727.076171875">
                <text:p>727.076171875</text:p>
              </table:table-cell>
              <table:table-cell office:value-type="float" office:value="0.00584153">
                <text:p>0.00584153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727.196411132813">
                <text:p>727.196411132813</text:p>
              </table:table-cell>
              <table:table-cell office:value-type="float" office:value="-0.001768958">
                <text:p>-0.001768958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727.316650390625">
                <text:p>727.316650390625</text:p>
              </table:table-cell>
              <table:table-cell office:value-type="float" office:value="0.0117264">
                <text:p>0.0117264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727.436889648438">
                <text:p>727.436889648438</text:p>
              </table:table-cell>
              <table:table-cell office:value-type="float" office:value="-0.001574963">
                <text:p>-0.001574963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727.55712890625">
                <text:p>727.55712890625</text:p>
              </table:table-cell>
              <table:table-cell office:value-type="float" office:value="-0.0001152566">
                <text:p>-0.0001152566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727.677368164063">
                <text:p>727.677368164063</text:p>
              </table:table-cell>
              <table:table-cell office:value-type="float" office:value="-0.001724017">
                <text:p>-0.001724017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727.797607421875">
                <text:p>727.797607421875</text:p>
              </table:table-cell>
              <table:table-cell office:value-type="float" office:value="-0.00816922">
                <text:p>-0.00816922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727.917846679688">
                <text:p>727.917846679688</text:p>
              </table:table-cell>
              <table:table-cell office:value-type="float" office:value="-0.01159066">
                <text:p>-0.01159066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728.0380859375">
                <text:p>728.0380859375</text:p>
              </table:table-cell>
              <table:table-cell office:value-type="float" office:value="0.002335357">
                <text:p>0.002335357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728.158325195313">
                <text:p>728.158325195313</text:p>
              </table:table-cell>
              <table:table-cell office:value-type="float" office:value="-0.01067552">
                <text:p>-0.01067552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728.278564453125">
                <text:p>728.278564453125</text:p>
              </table:table-cell>
              <table:table-cell office:value-type="float" office:value="-0.005299168">
                <text:p>-0.005299168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728.398803710938">
                <text:p>728.398803710938</text:p>
              </table:table-cell>
              <table:table-cell office:value-type="float" office:value="-0.008943696">
                <text:p>-0.008943696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728.51904296875">
                <text:p>728.51904296875</text:p>
              </table:table-cell>
              <table:table-cell office:value-type="float" office:value="0.005307393">
                <text:p>0.005307393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728.639282226563">
                <text:p>728.639282226563</text:p>
              </table:table-cell>
              <table:table-cell office:value-type="float" office:value="-0.009849091">
                <text:p>-0.009849091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728.759521484375">
                <text:p>728.759521484375</text:p>
              </table:table-cell>
              <table:table-cell office:value-type="float" office:value="0.0001593284">
                <text:p>0.0001593284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728.879760742188">
                <text:p>728.879760742188</text:p>
              </table:table-cell>
              <table:table-cell office:value-type="float" office:value="0.00322313">
                <text:p>0.00322313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729">
                <text:p>729</text:p>
              </table:table-cell>
              <table:table-cell office:value-type="float" office:value="-0.007242193">
                <text:p>-0.007242193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729.120239257813">
                <text:p>729.120239257813</text:p>
              </table:table-cell>
              <table:table-cell office:value-type="float" office:value="0.000100017">
                <text:p>0.000100017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729.240478515625">
                <text:p>729.240478515625</text:p>
              </table:table-cell>
              <table:table-cell office:value-type="float" office:value="0.007854071">
                <text:p>0.007854071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729.360778808594">
                <text:p>729.360778808594</text:p>
              </table:table-cell>
              <table:table-cell office:value-type="float" office:value="0.002911447">
                <text:p>0.002911447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29.481018066406">
                <text:p>729.481018066406</text:p>
              </table:table-cell>
              <table:table-cell office:value-type="float" office:value="-0.0008384844">
                <text:p>-0.0008384844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29.601257324219">
                <text:p>729.601257324219</text:p>
              </table:table-cell>
              <table:table-cell office:value-type="float" office:value="0.005846353">
                <text:p>0.005846353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29.721496582031">
                <text:p>729.721496582031</text:p>
              </table:table-cell>
              <table:table-cell office:value-type="float" office:value="0.02233941">
                <text:p>0.02233941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29.841735839844">
                <text:p>729.841735839844</text:p>
              </table:table-cell>
              <table:table-cell office:value-type="float" office:value="-0.0070231">
                <text:p>-0.0070231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29.961975097656">
                <text:p>729.961975097656</text:p>
              </table:table-cell>
              <table:table-cell office:value-type="float" office:value="-0.007847368">
                <text:p>-0.007847368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30.082214355469">
                <text:p>730.082214355469</text:p>
              </table:table-cell>
              <table:table-cell office:value-type="float" office:value="0.0116056">
                <text:p>0.0116056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730.202453613281">
                <text:p>730.202453613281</text:p>
              </table:table-cell>
              <table:table-cell office:value-type="float" office:value="0.004546143">
                <text:p>0.004546143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730.322692871094">
                <text:p>730.322692871094</text:p>
              </table:table-cell>
              <table:table-cell office:value-type="float" office:value="-0.001937753">
                <text:p>-0.001937753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730.442932128906">
                <text:p>730.442932128906</text:p>
              </table:table-cell>
              <table:table-cell office:value-type="float" office:value="0.00241304">
                <text:p>0.00241304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730.563171386719">
                <text:p>730.563171386719</text:p>
              </table:table-cell>
              <table:table-cell office:value-type="float" office:value="0.005864298">
                <text:p>0.005864298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30.683471679688">
                <text:p>730.683471679688</text:p>
              </table:table-cell>
              <table:table-cell office:value-type="float" office:value="-0.001612005">
                <text:p>-0.001612005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730.8037109375">
                <text:p>730.8037109375</text:p>
              </table:table-cell>
              <table:table-cell office:value-type="float" office:value="0.01145038">
                <text:p>0.01145038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730.923950195313">
                <text:p>730.923950195313</text:p>
              </table:table-cell>
              <table:table-cell office:value-type="float" office:value="0.005979804">
                <text:p>0.005979804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731.044189453125">
                <text:p>731.044189453125</text:p>
              </table:table-cell>
              <table:table-cell office:value-type="float" office:value="0.01376751">
                <text:p>0.01376751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31.164428710938">
                <text:p>731.164428710938</text:p>
              </table:table-cell>
              <table:table-cell office:value-type="float" office:value="-0.004946354">
                <text:p>-0.004946354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31.28466796875">
                <text:p>731.28466796875</text:p>
              </table:table-cell>
              <table:table-cell office:value-type="float" office:value="0.0009835184">
                <text:p>0.0009835184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31.404907226563">
                <text:p>731.404907226563</text:p>
              </table:table-cell>
              <table:table-cell office:value-type="float" office:value="-0.007353842">
                <text:p>-0.007353842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31.525146484375">
                <text:p>731.525146484375</text:p>
              </table:table-cell>
              <table:table-cell office:value-type="float" office:value="-0.003177403">
                <text:p>-0.003177403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1.645446777344">
                <text:p>731.645446777344</text:p>
              </table:table-cell>
              <table:table-cell office:value-type="float" office:value="0.007462989">
                <text:p>0.007462989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31.765686035156">
                <text:p>731.765686035156</text:p>
              </table:table-cell>
              <table:table-cell office:value-type="float" office:value="0.008131559">
                <text:p>0.008131559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31.885925292969">
                <text:p>731.885925292969</text:p>
              </table:table-cell>
              <table:table-cell office:value-type="float" office:value="0.005173843">
                <text:p>0.005173843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32.006164550781">
                <text:p>732.006164550781</text:p>
              </table:table-cell>
              <table:table-cell office:value-type="float" office:value="-0.002971679">
                <text:p>-0.002971679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32.126403808594">
                <text:p>732.126403808594</text:p>
              </table:table-cell>
              <table:table-cell office:value-type="float" office:value="0.01753643">
                <text:p>0.01753643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32.246643066406">
                <text:p>732.246643066406</text:p>
              </table:table-cell>
              <table:table-cell office:value-type="float" office:value="-0.004375815">
                <text:p>-0.004375815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32.366882324219">
                <text:p>732.366882324219</text:p>
              </table:table-cell>
              <table:table-cell office:value-type="float" office:value="-0.005550454">
                <text:p>-0.005550454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32.487182617188">
                <text:p>732.487182617188</text:p>
              </table:table-cell>
              <table:table-cell office:value-type="float" office:value="-0.006204735">
                <text:p>-0.006204735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32.607421875">
                <text:p>732.607421875</text:p>
              </table:table-cell>
              <table:table-cell office:value-type="float" office:value="-0.002437521">
                <text:p>-0.002437521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732.727661132813">
                <text:p>732.727661132813</text:p>
              </table:table-cell>
              <table:table-cell office:value-type="float" office:value="0.003280248">
                <text:p>0.003280248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732.847900390625">
                <text:p>732.847900390625</text:p>
              </table:table-cell>
              <table:table-cell office:value-type="float" office:value="-0.003806187">
                <text:p>-0.00380618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732.968139648438">
                <text:p>732.968139648438</text:p>
              </table:table-cell>
              <table:table-cell office:value-type="float" office:value="-0.002143952">
                <text:p>-0.002143952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733.08837890625">
                <text:p>733.08837890625</text:p>
              </table:table-cell>
              <table:table-cell office:value-type="float" office:value="-0.005484563">
                <text:p>-0.005484563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733.208679199219">
                <text:p>733.208679199219</text:p>
              </table:table-cell>
              <table:table-cell office:value-type="float" office:value="-0.008521277">
                <text:p>-0.008521277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733.328918457031">
                <text:p>733.328918457031</text:p>
              </table:table-cell>
              <table:table-cell office:value-type="float" office:value="-0.003877764">
                <text:p>-0.003877764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733.449157714844">
                <text:p>733.449157714844</text:p>
              </table:table-cell>
              <table:table-cell office:value-type="float" office:value="-0.001250978">
                <text:p>-0.001250978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3.569396972656">
                <text:p>733.569396972656</text:p>
              </table:table-cell>
              <table:table-cell office:value-type="float" office:value="0.002062992">
                <text:p>0.002062992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733.689636230469">
                <text:p>733.689636230469</text:p>
              </table:table-cell>
              <table:table-cell office:value-type="float" office:value="-0.002751318">
                <text:p>-0.002751318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733.809936523438">
                <text:p>733.809936523438</text:p>
              </table:table-cell>
              <table:table-cell office:value-type="float" office:value="-0.001081789">
                <text:p>-0.001081789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733.93017578125">
                <text:p>733.93017578125</text:p>
              </table:table-cell>
              <table:table-cell office:value-type="float" office:value="0.006866451">
                <text:p>0.006866451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734.050415039063">
                <text:p>734.050415039063</text:p>
              </table:table-cell>
              <table:table-cell office:value-type="float" office:value="0.0008312922">
                <text:p>0.0008312922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734.170654296875">
                <text:p>734.170654296875</text:p>
              </table:table-cell>
              <table:table-cell office:value-type="float" office:value="0.006049385">
                <text:p>0.006049385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734.290893554688">
                <text:p>734.290893554688</text:p>
              </table:table-cell>
              <table:table-cell office:value-type="float" office:value="-0.007365116">
                <text:p>-0.007365116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734.4111328125">
                <text:p>734.4111328125</text:p>
              </table:table-cell>
              <table:table-cell office:value-type="float" office:value="-0.009549687">
                <text:p>-0.009549687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734.531433105469">
                <text:p>734.531433105469</text:p>
              </table:table-cell>
              <table:table-cell office:value-type="float" office:value="-0.002232895">
                <text:p>-0.002232895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734.651672363281">
                <text:p>734.651672363281</text:p>
              </table:table-cell>
              <table:table-cell office:value-type="float" office:value="0.005428861">
                <text:p>0.005428861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734.771911621094">
                <text:p>734.771911621094</text:p>
              </table:table-cell>
              <table:table-cell office:value-type="float" office:value="-0.0008457323">
                <text:p>-0.0008457323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734.892150878906">
                <text:p>734.892150878906</text:p>
              </table:table-cell>
              <table:table-cell office:value-type="float" office:value="-0.007605467">
                <text:p>-0.007605467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735.012451171875">
                <text:p>735.012451171875</text:p>
              </table:table-cell>
              <table:table-cell office:value-type="float" office:value="-0.006582703">
                <text:p>-0.006582703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735.132690429688">
                <text:p>735.132690429688</text:p>
              </table:table-cell>
              <table:table-cell office:value-type="float" office:value="-0.001171972">
                <text:p>-0.001171972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735.2529296875">
                <text:p>735.2529296875</text:p>
              </table:table-cell>
              <table:table-cell office:value-type="float" office:value="0.01770977">
                <text:p>0.01770977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735.373168945313">
                <text:p>735.373168945313</text:p>
              </table:table-cell>
              <table:table-cell office:value-type="float" office:value="0.003937132">
                <text:p>0.00393713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35.493408203125">
                <text:p>735.493408203125</text:p>
              </table:table-cell>
              <table:table-cell office:value-type="float" office:value="-0.001507866">
                <text:p>-0.001507866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5.613708496094">
                <text:p>735.613708496094</text:p>
              </table:table-cell>
              <table:table-cell office:value-type="float" office:value="0.00317519">
                <text:p>0.00317519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735.733947753906">
                <text:p>735.733947753906</text:p>
              </table:table-cell>
              <table:table-cell office:value-type="float" office:value="0.005349671">
                <text:p>0.005349671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735.854187011719">
                <text:p>735.854187011719</text:p>
              </table:table-cell>
              <table:table-cell office:value-type="float" office:value="0.008636107">
                <text:p>0.008636107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735.974426269531">
                <text:p>735.974426269531</text:p>
              </table:table-cell>
              <table:table-cell office:value-type="float" office:value="0.002625522">
                <text:p>0.002625522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36.094665527344">
                <text:p>736.094665527344</text:p>
              </table:table-cell>
              <table:table-cell office:value-type="float" office:value="0.003019633">
                <text:p>0.003019633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736.214965820313">
                <text:p>736.214965820313</text:p>
              </table:table-cell>
              <table:table-cell office:value-type="float" office:value="-0.006210044">
                <text:p>-0.006210044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736.335205078125">
                <text:p>736.335205078125</text:p>
              </table:table-cell>
              <table:table-cell office:value-type="float" office:value="0.000719509">
                <text:p>0.000719509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36.455444335938">
                <text:p>736.455444335938</text:p>
              </table:table-cell>
              <table:table-cell office:value-type="float" office:value="0.005191003">
                <text:p>0.005191003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36.57568359375">
                <text:p>736.57568359375</text:p>
              </table:table-cell>
              <table:table-cell office:value-type="float" office:value="0.003410092">
                <text:p>0.003410092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36.695983886719">
                <text:p>736.695983886719</text:p>
              </table:table-cell>
              <table:table-cell office:value-type="float" office:value="0.01198655">
                <text:p>0.01198655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736.816223144531">
                <text:p>736.816223144531</text:p>
              </table:table-cell>
              <table:table-cell office:value-type="float" office:value="0.007613282">
                <text:p>0.007613282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736.936462402344">
                <text:p>736.936462402344</text:p>
              </table:table-cell>
              <table:table-cell office:value-type="float" office:value="0.01080122">
                <text:p>0.01080122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737.056701660156">
                <text:p>737.056701660156</text:p>
              </table:table-cell>
              <table:table-cell office:value-type="float" office:value="-0.0006534734">
                <text:p>-0.0006534734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737.177001953125">
                <text:p>737.177001953125</text:p>
              </table:table-cell>
              <table:table-cell office:value-type="float" office:value="0.004599835">
                <text:p>0.00459983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37.297241210938">
                <text:p>737.297241210938</text:p>
              </table:table-cell>
              <table:table-cell office:value-type="float" office:value="0.005585133">
                <text:p>0.005585133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737.41748046875">
                <text:p>737.41748046875</text:p>
              </table:table-cell>
              <table:table-cell office:value-type="float" office:value="0.003750761">
                <text:p>0.003750761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737.537719726563">
                <text:p>737.537719726563</text:p>
              </table:table-cell>
              <table:table-cell office:value-type="float" office:value="0.003644883">
                <text:p>0.003644883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737.658020019531">
                <text:p>737.658020019531</text:p>
              </table:table-cell>
              <table:table-cell office:value-type="float" office:value="-0.0083458">
                <text:p>-0.0083458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737.778259277344">
                <text:p>737.778259277344</text:p>
              </table:table-cell>
              <table:table-cell office:value-type="float" office:value="0.004929548">
                <text:p>0.004929548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737.898498535156">
                <text:p>737.898498535156</text:p>
              </table:table-cell>
              <table:table-cell office:value-type="float" office:value="0.002106727">
                <text:p>0.002106727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738.018737792969">
                <text:p>738.018737792969</text:p>
              </table:table-cell>
              <table:table-cell office:value-type="float" office:value="0.004652026">
                <text:p>0.004652026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738.139038085938">
                <text:p>738.139038085938</text:p>
              </table:table-cell>
              <table:table-cell office:value-type="float" office:value="0.00454322">
                <text:p>0.00454322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738.25927734375">
                <text:p>738.25927734375</text:p>
              </table:table-cell>
              <table:table-cell office:value-type="float" office:value="-0.002288834">
                <text:p>-0.002288834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738.379516601563">
                <text:p>738.379516601563</text:p>
              </table:table-cell>
              <table:table-cell office:value-type="float" office:value="0.01465216">
                <text:p>0.01465216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738.499755859375">
                <text:p>738.499755859375</text:p>
              </table:table-cell>
              <table:table-cell office:value-type="float" office:value="0.004959431">
                <text:p>0.004959431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738.620056152344">
                <text:p>738.620056152344</text:p>
              </table:table-cell>
              <table:table-cell office:value-type="float" office:value="-0.004759015">
                <text:p>-0.004759015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738.740295410156">
                <text:p>738.740295410156</text:p>
              </table:table-cell>
              <table:table-cell office:value-type="float" office:value="-0.001804231">
                <text:p>-0.001804231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738.860534667969">
                <text:p>738.860534667969</text:p>
              </table:table-cell>
              <table:table-cell office:value-type="float" office:value="-0.0054452">
                <text:p>-0.0054452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738.980773925781">
                <text:p>738.980773925781</text:p>
              </table:table-cell>
              <table:table-cell office:value-type="float" office:value="0.01204968">
                <text:p>0.01204968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739.10107421875">
                <text:p>739.10107421875</text:p>
              </table:table-cell>
              <table:table-cell office:value-type="float" office:value="-0.002934093">
                <text:p>-0.002934093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739.221313476563">
                <text:p>739.221313476563</text:p>
              </table:table-cell>
              <table:table-cell office:value-type="float" office:value="0.007838189">
                <text:p>0.007838189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739.341552734375">
                <text:p>739.341552734375</text:p>
              </table:table-cell>
              <table:table-cell office:value-type="float" office:value="0.0001392403">
                <text:p>0.0001392403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739.461791992188">
                <text:p>739.461791992188</text:p>
              </table:table-cell>
              <table:table-cell office:value-type="float" office:value="0.0001869727">
                <text:p>0.0001869727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739.582092285156">
                <text:p>739.582092285156</text:p>
              </table:table-cell>
              <table:table-cell office:value-type="float" office:value="-0.004446852">
                <text:p>-0.004446852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739.702331542969">
                <text:p>739.702331542969</text:p>
              </table:table-cell>
              <table:table-cell office:value-type="float" office:value="-0.010832">
                <text:p>-0.010832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739.822570800781">
                <text:p>739.822570800781</text:p>
              </table:table-cell>
              <table:table-cell office:value-type="float" office:value="-0.003171968">
                <text:p>-0.003171968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739.942810058594">
                <text:p>739.942810058594</text:p>
              </table:table-cell>
              <table:table-cell office:value-type="float" office:value="-0.01062759">
                <text:p>-0.01062759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740.063110351563">
                <text:p>740.063110351563</text:p>
              </table:table-cell>
              <table:table-cell office:value-type="float" office:value="-0.004471465">
                <text:p>-0.004471465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740.183349609375">
                <text:p>740.183349609375</text:p>
              </table:table-cell>
              <table:table-cell office:value-type="float" office:value="-0.003319074">
                <text:p>-0.003319074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740.303588867188">
                <text:p>740.303588867188</text:p>
              </table:table-cell>
              <table:table-cell office:value-type="float" office:value="-0.001759241">
                <text:p>-0.001759241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40.423889160156">
                <text:p>740.423889160156</text:p>
              </table:table-cell>
              <table:table-cell office:value-type="float" office:value="0.009361626">
                <text:p>0.009361626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40.544128417969">
                <text:p>740.544128417969</text:p>
              </table:table-cell>
              <table:table-cell office:value-type="float" office:value="0.01330029">
                <text:p>0.01330029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40.664367675781">
                <text:p>740.664367675781</text:p>
              </table:table-cell>
              <table:table-cell office:value-type="float" office:value="-0.007786127">
                <text:p>-0.007786127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40.784606933594">
                <text:p>740.784606933594</text:p>
              </table:table-cell>
              <table:table-cell office:value-type="float" office:value="0.008815344">
                <text:p>0.008815344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40.904907226563">
                <text:p>740.904907226563</text:p>
              </table:table-cell>
              <table:table-cell office:value-type="float" office:value="0.0006252871">
                <text:p>0.0006252871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741.025146484375">
                <text:p>741.025146484375</text:p>
              </table:table-cell>
              <table:table-cell office:value-type="float" office:value="-0.006956109">
                <text:p>-0.00695610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741.145385742188">
                <text:p>741.145385742188</text:p>
              </table:table-cell>
              <table:table-cell office:value-type="float" office:value="-0.005377127">
                <text:p>-0.005377127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741.265625">
                <text:p>741.265625</text:p>
              </table:table-cell>
              <table:table-cell office:value-type="float" office:value="0.02303711">
                <text:p>0.02303711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41.385925292969">
                <text:p>741.385925292969</text:p>
              </table:table-cell>
              <table:table-cell office:value-type="float" office:value="-0.006359055">
                <text:p>-0.006359055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41.506164550781">
                <text:p>741.506164550781</text:p>
              </table:table-cell>
              <table:table-cell office:value-type="float" office:value="-0.0004662034">
                <text:p>-0.0004662034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741.626403808594">
                <text:p>741.626403808594</text:p>
              </table:table-cell>
              <table:table-cell office:value-type="float" office:value="0.008114714">
                <text:p>0.008114714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41.746704101563">
                <text:p>741.746704101563</text:p>
              </table:table-cell>
              <table:table-cell office:value-type="float" office:value="-0.0007460083">
                <text:p>-0.0007460083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741.866943359375">
                <text:p>741.866943359375</text:p>
              </table:table-cell>
              <table:table-cell office:value-type="float" office:value="0.01807014">
                <text:p>0.01807014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741.987182617188">
                <text:p>741.987182617188</text:p>
              </table:table-cell>
              <table:table-cell office:value-type="float" office:value="-0.002856797">
                <text:p>-0.002856797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742.107421875">
                <text:p>742.107421875</text:p>
              </table:table-cell>
              <table:table-cell office:value-type="float" office:value="0.005488954">
                <text:p>0.005488954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742.227722167969">
                <text:p>742.227722167969</text:p>
              </table:table-cell>
              <table:table-cell office:value-type="float" office:value="0.007592935">
                <text:p>0.007592935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742.347961425781">
                <text:p>742.347961425781</text:p>
              </table:table-cell>
              <table:table-cell office:value-type="float" office:value="0.0016598">
                <text:p>0.0016598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742.468200683594">
                <text:p>742.468200683594</text:p>
              </table:table-cell>
              <table:table-cell office:value-type="float" office:value="-0.005604157">
                <text:p>-0.005604157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742.588439941406">
                <text:p>742.588439941406</text:p>
              </table:table-cell>
              <table:table-cell office:value-type="float" office:value="-0.000822446">
                <text:p>-0.000822446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742.708740234375">
                <text:p>742.708740234375</text:p>
              </table:table-cell>
              <table:table-cell office:value-type="float" office:value="-0.002800248">
                <text:p>-0.002800248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742.828979492188">
                <text:p>742.828979492188</text:p>
              </table:table-cell>
              <table:table-cell office:value-type="float" office:value="-0.003666008">
                <text:p>-0.003666008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742.94921875">
                <text:p>742.94921875</text:p>
              </table:table-cell>
              <table:table-cell office:value-type="float" office:value="0.004711824">
                <text:p>0.004711824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743.069519042969">
                <text:p>743.069519042969</text:p>
              </table:table-cell>
              <table:table-cell office:value-type="float" office:value="0.01225116">
                <text:p>0.01225116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743.189758300781">
                <text:p>743.189758300781</text:p>
              </table:table-cell>
              <table:table-cell office:value-type="float" office:value="0.001644346">
                <text:p>0.001644346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743.309997558594">
                <text:p>743.309997558594</text:p>
              </table:table-cell>
              <table:table-cell office:value-type="float" office:value="-0.01006322">
                <text:p>-0.01006322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743.430236816406">
                <text:p>743.430236816406</text:p>
              </table:table-cell>
              <table:table-cell office:value-type="float" office:value="0.003095068">
                <text:p>0.003095068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743.550537109375">
                <text:p>743.550537109375</text:p>
              </table:table-cell>
              <table:table-cell office:value-type="float" office:value="-0.009058437">
                <text:p>-0.009058437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743.670776367188">
                <text:p>743.670776367188</text:p>
              </table:table-cell>
              <table:table-cell office:value-type="float" office:value="-0.006312653">
                <text:p>-0.006312653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43.791015625">
                <text:p>743.791015625</text:p>
              </table:table-cell>
              <table:table-cell office:value-type="float" office:value="-0.007240695">
                <text:p>-0.007240695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743.911254882813">
                <text:p>743.911254882813</text:p>
              </table:table-cell>
              <table:table-cell office:value-type="float" office:value="0.03127024">
                <text:p>0.03127024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744.031555175781">
                <text:p>744.031555175781</text:p>
              </table:table-cell>
              <table:table-cell office:value-type="float" office:value="-0.007922564">
                <text:p>-0.007922564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744.151794433594">
                <text:p>744.151794433594</text:p>
              </table:table-cell>
              <table:table-cell office:value-type="float" office:value="-0.05800999">
                <text:p>-0.0580099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744.272033691406">
                <text:p>744.272033691406</text:p>
              </table:table-cell>
              <table:table-cell office:value-type="float" office:value="-0.0596058">
                <text:p>-0.0596058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744.392333984375">
                <text:p>744.392333984375</text:p>
              </table:table-cell>
              <table:table-cell office:value-type="float" office:value="-0.06142367">
                <text:p>-0.06142367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744.512573242188">
                <text:p>744.512573242188</text:p>
              </table:table-cell>
              <table:table-cell office:value-type="float" office:value="-0.06115067">
                <text:p>-0.06115067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744.6328125">
                <text:p>744.6328125</text:p>
              </table:table-cell>
              <table:table-cell office:value-type="float" office:value="-0.0623581">
                <text:p>-0.0623581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744.753051757813">
                <text:p>744.753051757813</text:p>
              </table:table-cell>
              <table:table-cell office:value-type="float" office:value="-0.06214746">
                <text:p>-0.06214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