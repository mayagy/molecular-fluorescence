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619305">
            <text:p>0.00619305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586513">
            <text:p>0.001586513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3650311">
            <text:p>0.003650311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225415">
            <text:p>0.01225415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6991808">
            <text:p>0.006991808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5086241">
            <text:p>0.005086241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676012">
            <text:p>0.01676012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794933">
            <text:p>-0.001794933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0.0002476695">
            <text:p>0.0002476695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7081536">
            <text:p>0.007081536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09556032">
            <text:p>0.009556032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131513">
            <text:p>0.01131513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2763164">
            <text:p>-0.002763164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2456328">
            <text:p>0.002456328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14695">
            <text:p>0.0014695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6247856">
            <text:p>0.006247856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2187356">
            <text:p>-0.002187356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2712295">
            <text:p>0.002712295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3731993">
            <text:p>0.03731993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611022">
            <text:p>-0.00611022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4696338">
            <text:p>-0.004696338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167684">
            <text:p>0.01167684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778068">
            <text:p>0.01778068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925948">
            <text:p>-0.001925948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5064481">
            <text:p>-0.005064481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5145777">
            <text:p>0.005145777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2317782">
            <text:p>-0.002317782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879685">
            <text:p>0.002879685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7715104">
            <text:p>0.007715104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4058096">
            <text:p>0.004058096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2288299">
            <text:p>0.002288299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634384">
            <text:p>0.01634384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7756706">
            <text:p>-0.007756706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1684599">
            <text:p>0.001684599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6198953">
            <text:p>0.0006198953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3746503">
            <text:p>-0.003746503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2621539">
            <text:p>0.002621539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4659038">
            <text:p>0.004659038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3695095">
            <text:p>0.003695095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4518314">
            <text:p>0.004518314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2696387">
            <text:p>0.002696387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1188763">
            <text:p>0.001188763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7673406">
            <text:p>0.007673406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547641">
            <text:p>0.01547641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3360612">
            <text:p>-0.003360612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09392378">
            <text:p>0.009392378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333084">
            <text:p>0.02333084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704333">
            <text:p>0.01704333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450364">
            <text:p>0.005450364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09439483">
            <text:p>0.009439483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4035412">
            <text:p>0.004035412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6794921">
            <text:p>0.006794921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353353">
            <text:p>-0.001353353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489661">
            <text:p>0.00489661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184606">
            <text:p>0.0184606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3182506">
            <text:p>-0.003182506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08857272">
            <text:p>0.008857272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2853318">
            <text:p>-0.002853318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7179506">
            <text:p>-0.007179506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03741715">
            <text:p>-0.0003741715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604933">
            <text:p>0.003604933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6368136">
            <text:p>0.006368136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2271974">
            <text:p>-0.002271974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1827482">
            <text:p>-0.001827482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7942909">
            <text:p>-0.007942909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717308">
            <text:p>0.002717308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235366">
            <text:p>0.02235366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84776">
            <text:p>0.00184776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8144555">
            <text:p>0.008144555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8716838">
            <text:p>0.008716838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641478">
            <text:p>0.01641478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669357">
            <text:p>-0.002669357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3583204">
            <text:p>-0.003583204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2392513">
            <text:p>0.002392513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3214741">
            <text:p>0.003214741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2972832">
            <text:p>-0.002972832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7463506">
            <text:p>0.007463506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3891021">
            <text:p>0.03891021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2002037">
            <text:p>0.002002037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130991">
            <text:p>0.001130991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6572091">
            <text:p>-0.006572091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583809">
            <text:p>0.01583809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792023">
            <text:p>0.009792023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0883711">
            <text:p>0.00883711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3634375">
            <text:p>-0.003634375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732325">
            <text:p>0.005732325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626701">
            <text:p>0.01626701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117939">
            <text:p>0.01117939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2770125">
            <text:p>0.02770125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074915">
            <text:p>0.01074915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1900497">
            <text:p>0.01900497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4037328">
            <text:p>-0.004037328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4235288">
            <text:p>-0.004235288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3146211">
            <text:p>0.003146211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8737176">
            <text:p>0.008737176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09744029">
            <text:p>-0.0009744029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3400892">
            <text:p>-0.003400892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6490928">
            <text:p>0.006490928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-0.000933079">
            <text:p>-0.000933079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0878449">
            <text:p>-0.00878449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333405">
            <text:p>-0.00333405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1965195">
            <text:p>0.01965195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219268">
            <text:p>0.01219268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4163045">
            <text:p>0.004163045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795602">
            <text:p>-0.00795602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0.00083237">
            <text:p>0.00083237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0.0005339542">
            <text:p>0.0005339542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6073953">
            <text:p>0.006073953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4617398">
            <text:p>0.04617398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133437">
            <text:p>-0.00133437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2590502">
            <text:p>0.002590502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2628326">
            <text:p>0.002628326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6489514">
            <text:p>-0.006489514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7343291">
            <text:p>0.007343291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3557409">
            <text:p>0.003557409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068734">
            <text:p>-0.01068734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string">
            <text:p>-3.057185E-05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4795314">
            <text:p>0.004795314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-0.000187844">
            <text:p>-0.000187844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6588438">
            <text:p>0.0006588438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5787514">
            <text:p>-0.005787514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682152">
            <text:p>0.01682152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02797999">
            <text:p>-0.0002797999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8456162">
            <text:p>0.008456162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7433369">
            <text:p>0.007433369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616228">
            <text:p>0.009616228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1431921">
            <text:p>0.001431921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1600589">
            <text:p>0.01600589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6600018">
            <text:p>0.006600018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2943078">
            <text:p>0.02943078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646454">
            <text:p>0.009646454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6420847">
            <text:p>0.006420847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1010574">
            <text:p>-0.001010574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09750154">
            <text:p>0.009750154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1948696">
            <text:p>0.01948696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5560717">
            <text:p>-0.005560717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1916022">
            <text:p>0.001916022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738267">
            <text:p>0.01738267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4486718">
            <text:p>0.004486718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4598159">
            <text:p>-0.004598159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98135">
            <text:p>-0.00298135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string">
            <text:p>2.950282E-05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2409765">
            <text:p>0.002409765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5404561">
            <text:p>-0.005404561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8411929">
            <text:p>-0.008411929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384436">
            <text:p>0.02384436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1812712">
            <text:p>0.001812712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99919">
            <text:p>0.00399919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2577335">
            <text:p>-0.002577335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07885839">
            <text:p>-0.0007885839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3194891">
            <text:p>-0.003194891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670783">
            <text:p>-0.003670783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735746">
            <text:p>-0.002735746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224382">
            <text:p>0.01224382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039688">
            <text:p>0.01039688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2609122">
            <text:p>-0.002609122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397006">
            <text:p>0.02397006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6184248">
            <text:p>0.006184248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237634">
            <text:p>0.01237634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4044345">
            <text:p>-0.004044345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2755603">
            <text:p>-0.002755603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4289001">
            <text:p>0.004289001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1004274">
            <text:p>0.01004274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499548">
            <text:p>-0.00499548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09974997">
            <text:p>0.009974997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2908637">
            <text:p>0.002908637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047373">
            <text:p>0.01047373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010785">
            <text:p>0.003010785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4030872">
            <text:p>0.004030872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1168544">
            <text:p>0.001168544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586688">
            <text:p>0.01586688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2161944">
            <text:p>0.002161944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70267">
            <text:p>0.0170267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5551729">
            <text:p>0.005551729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8616034">
            <text:p>0.008616034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8016896">
            <text:p>-0.008016896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554869">
            <text:p>0.01554869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626841">
            <text:p>0.01626841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456671">
            <text:p>0.01456671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12976">
            <text:p>-0.00412976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06457851">
            <text:p>-0.0006457851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1545374">
            <text:p>-0.001545374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2115913">
            <text:p>-0.002115913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518156">
            <text:p>0.01518156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4314236">
            <text:p>0.004314236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326269">
            <text:p>0.02326269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1951911">
            <text:p>0.01951911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426414">
            <text:p>0.01426414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155441">
            <text:p>-0.00155441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240977">
            <text:p>-0.00240977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0.001453525">
            <text:p>0.001453525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09505923">
            <text:p>0.009505923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3719556">
            <text:p>0.003719556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03041891">
            <text:p>-0.0003041891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179088">
            <text:p>0.01179088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3675077">
            <text:p>-0.003675077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7053028">
            <text:p>0.007053028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513735">
            <text:p>0.01513735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23161">
            <text:p>0.0123161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25192">
            <text:p>-0.0025192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6794963">
            <text:p>-0.006794963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288932">
            <text:p>0.009288932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155549">
            <text:p>0.00155549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2657754">
            <text:p>-0.002657754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3113284">
            <text:p>-0.003113284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1467011">
            <text:p>0.001467011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043271">
            <text:p>0.004043271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821167">
            <text:p>-0.00821167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09563334">
            <text:p>0.009563334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2385556">
            <text:p>-0.002385556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7092029">
            <text:p>0.007092029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3798343">
            <text:p>-0.003798343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-0.0001379498">
            <text:p>-0.0001379498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-0.0007521407">
            <text:p>-0.0007521407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05880158">
            <text:p>0.0005880158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6421318">
            <text:p>0.006421318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034575">
            <text:p>0.01034575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1388846">
            <text:p>-0.001388846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2315732">
            <text:p>0.002315732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272934">
            <text:p>0.02272934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6078489">
            <text:p>-0.006078489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4581931">
            <text:p>-0.004581931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154415">
            <text:p>0.003154415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504526">
            <text:p>-0.001504526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050738">
            <text:p>0.01050738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191044">
            <text:p>0.01191044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1583553">
            <text:p>-0.001583553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3295263">
            <text:p>-0.003295263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3408652">
            <text:p>-0.003408652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3223794">
            <text:p>0.003223794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257048">
            <text:p>-0.00257048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4262071">
            <text:p>-0.004262071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101708">
            <text:p>0.001101708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17764">
            <text:p>0.0117764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2859505">
            <text:p>0.02859505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08778818">
            <text:p>-0.008778818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770316">
            <text:p>-0.00770316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3657127">
            <text:p>0.003657127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1657641">
            <text:p>-0.001657641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5784952">
            <text:p>0.005784952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139888">
            <text:p>-0.01139888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4770161">
            <text:p>0.004770161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1221666">
            <text:p>-0.001221666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795703">
            <text:p>0.002795703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6569752">
            <text:p>0.006569752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2303857">
            <text:p>0.002303857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235884">
            <text:p>0.01235884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8943866">
            <text:p>-0.008943866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-0.000697907">
            <text:p>-0.000697907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2124859">
            <text:p>-0.002124859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038603">
            <text:p>0.02038603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6380086">
            <text:p>-0.0006380086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4974745">
            <text:p>0.004974745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1608653">
            <text:p>0.001608653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077296">
            <text:p>0.01077296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7761078">
            <text:p>-0.007761078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08431019">
            <text:p>-0.008431019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8492264">
            <text:p>0.008492264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4062601">
            <text:p>0.004062601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6529893">
            <text:p>-0.006529893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3935219">
            <text:p>-0.003935219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461575">
            <text:p>0.01461575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030546">
            <text:p>0.01030546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09683873">
            <text:p>0.009683873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7138516">
            <text:p>-0.007138516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07109677">
            <text:p>-0.0007109677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112342">
            <text:p>0.005112342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218122">
            <text:p>0.003218122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04121">
            <text:p>0.00504121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4487397">
            <text:p>0.004487397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329775">
            <text:p>0.01329775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09999018">
            <text:p>-0.009999018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302126">
            <text:p>0.00302126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522073">
            <text:p>0.002522073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186696">
            <text:p>0.01186696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08950853">
            <text:p>0.008950853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8234571">
            <text:p>-0.008234571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077378">
            <text:p>0.01077378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1961352">
            <text:p>0.001961352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7830418">
            <text:p>-0.007830418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626914">
            <text:p>0.001626914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string">
            <text:p>9.867597E-05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3084237">
            <text:p>0.003084237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4947231">
            <text:p>0.004947231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3135268">
            <text:p>-0.003135268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1823879">
            <text:p>0.001823879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688487">
            <text:p>0.01688487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5005188">
            <text:p>-0.005005188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6638335">
            <text:p>-0.006638335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521943">
            <text:p>0.01521943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148049">
            <text:p>0.01148049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05261198">
            <text:p>-0.0005261198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203385">
            <text:p>-0.00203385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563177">
            <text:p>0.00563177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4970429">
            <text:p>0.004970429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8849725">
            <text:p>0.008849725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1077539">
            <text:p>-0.001077539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4038974">
            <text:p>-0.004038974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578373">
            <text:p>0.01578373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4085902">
            <text:p>-0.004085902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4694414">
            <text:p>0.004694414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2519814">
            <text:p>0.002519814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207077">
            <text:p>0.005207077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3433254">
            <text:p>0.003433254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4495672">
            <text:p>0.004495672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1774345">
            <text:p>0.001774345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119119">
            <text:p>0.01119119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0813883">
            <text:p>0.000813883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718982">
            <text:p>0.00718982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1930045">
            <text:p>-0.001930045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4176375">
            <text:p>0.004176375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515479">
            <text:p>0.003515479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1615394">
            <text:p>0.001615394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9203086">
            <text:p>0.009203086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310912">
            <text:p>0.01310912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450923">
            <text:p>0.01450923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6270246">
            <text:p>-0.006270246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42616">
            <text:p>0.01042616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2478795">
            <text:p>-0.002478795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5082427">
            <text:p>-0.005082427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803506">
            <text:p>0.003803506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3139604">
            <text:p>0.003139604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string">
            <text:p>3.521011E-06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5962171">
            <text:p>-0.005962171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5842632">
            <text:p>-0.005842632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6445706">
            <text:p>-0.006445706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7932222">
            <text:p>-0.007932222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string">
            <text:p>2.410975E-05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5025018">
            <text:p>0.005025018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4032976">
            <text:p>0.004032976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834833">
            <text:p>0.00834833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3243178">
            <text:p>-0.003243178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03220322">
            <text:p>-0.0003220322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505671">
            <text:p>0.01505671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197705">
            <text:p>0.001197705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08777528">
            <text:p>-0.0008777528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0996019">
            <text:p>0.00996019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02629">
            <text:p>0.0102629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3139879">
            <text:p>0.003139879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7081823">
            <text:p>0.007081823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5370974">
            <text:p>-0.005370974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1145161">
            <text:p>0.001145161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09199888">
            <text:p>0.009199888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5929363">
            <text:p>-0.005929363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2735685">
            <text:p>0.002735685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407635">
            <text:p>0.01407635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18427">
            <text:p>0.00518427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240869">
            <text:p>0.001240869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08378684">
            <text:p>-0.008378684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173613">
            <text:p>0.01173613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0.0003845406">
            <text:p>0.0003845406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1192501">
            <text:p>-0.001192501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0.001077567">
            <text:p>0.001077567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7530136">
            <text:p>0.007530136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4925103">
            <text:p>-0.004925103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297188">
            <text:p>0.01297188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136803">
            <text:p>0.01136803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09232561">
            <text:p>0.009232561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3446877">
            <text:p>0.003446877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259105">
            <text:p>0.00259105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658547">
            <text:p>-0.003658547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6268763">
            <text:p>0.006268763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7608458">
            <text:p>-0.007608458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string">
            <text:p>-2.197255E-05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0.0003280788">
            <text:p>0.0003280788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1679463">
            <text:p>0.001679463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3652522">
            <text:p>0.003652522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6650866">
            <text:p>-0.006650866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5092281">
            <text:p>-0.005092281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8094133">
            <text:p>0.008094133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2979539">
            <text:p>0.002979539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0.0004016018">
            <text:p>0.0004016018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04425216">
            <text:p>-0.0004425216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989676">
            <text:p>0.003989676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763541">
            <text:p>0.01763541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09799593">
            <text:p>0.009799593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1356121">
            <text:p>-0.001356121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1627828">
            <text:p>-0.001627828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7663873">
            <text:p>0.007663873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178876">
            <text:p>0.01178876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09144014">
            <text:p>0.0009144014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-0.0005931524">
            <text:p>-0.0005931524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0678789">
            <text:p>-0.000678789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5963513">
            <text:p>0.005963513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175157">
            <text:p>0.006175157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5728947">
            <text:p>-0.005728947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30114">
            <text:p>0.0130114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791389">
            <text:p>0.008791389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6006226">
            <text:p>0.006006226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5176086">
            <text:p>-0.005176086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6355775">
            <text:p>-0.006355775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4598509">
            <text:p>-0.004598509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1779072">
            <text:p>-0.001779072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5058272">
            <text:p>-0.005058272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470042">
            <text:p>0.007470042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08453363">
            <text:p>0.008453363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208309">
            <text:p>0.003208309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1356489">
            <text:p>0.01356489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3344122">
            <text:p>-0.003344122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6407467">
            <text:p>-0.006407467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8405066">
            <text:p>-0.008405066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09689863">
            <text:p>0.009689863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2682817">
            <text:p>0.02682817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4048718">
            <text:p>0.004048718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17192">
            <text:p>0.00717192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9890121">
            <text:p>0.009890121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string">
            <text:p>-2.396844E-05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09250297">
            <text:p>0.009250297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344135">
            <text:p>0.00344135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5259356">
            <text:p>0.005259356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1814404">
            <text:p>-0.001814404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0.00014051">
            <text:p>0.00014051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string">
            <text:p>5.212971E-05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2712038">
            <text:p>0.002712038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08467504">
            <text:p>-0.0008467504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09087509">
            <text:p>0.009087509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2487812">
            <text:p>-0.002487812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0617139">
            <text:p>0.000617139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185792">
            <text:p>0.01185792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568863">
            <text:p>0.01568863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1843007">
            <text:p>0.01843007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09796859">
            <text:p>0.009796859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5125977">
            <text:p>-0.005125977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1908462">
            <text:p>-0.001908462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6857732">
            <text:p>-0.006857732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7932073">
            <text:p>-0.007932073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0.0006198037">
            <text:p>0.0006198037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2892255">
            <text:p>-0.002892255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4018899">
            <text:p>0.0004018899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06719177">
            <text:p>-0.0006719177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451919">
            <text:p>0.003451919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7510843">
            <text:p>0.007510843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6375267">
            <text:p>-0.006375267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2563338">
            <text:p>-0.002563338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09633633">
            <text:p>-0.009633633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0.0001718062">
            <text:p>0.0001718062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8277677">
            <text:p>-0.008277677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8023007">
            <text:p>-0.008023007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7283919">
            <text:p>-0.007283919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938649">
            <text:p>-0.000938649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601003">
            <text:p>0.003601003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6026038">
            <text:p>0.006026038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3716634">
            <text:p>-0.003716634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3003421">
            <text:p>0.003003421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5415631">
            <text:p>-0.005415631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09739626">
            <text:p>0.009739626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8249718">
            <text:p>0.008249718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1933078">
            <text:p>0.01933078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12095">
            <text:p>0.0112095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3006683">
            <text:p>0.003006683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4117195">
            <text:p>-0.004117195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08446435">
            <text:p>-0.008446435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6159073">
            <text:p>0.006159073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6394663">
            <text:p>-0.006394663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427993">
            <text:p>0.004427993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5531334">
            <text:p>-0.005531334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4187495">
            <text:p>-0.004187495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277697">
            <text:p>0.001277697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220167">
            <text:p>0.01220167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7471919">
            <text:p>-0.007471919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4312293">
            <text:p>-0.004312293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729496">
            <text:p>-0.00729496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724243">
            <text:p>0.003724243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5227122">
            <text:p>-0.005227122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554716">
            <text:p>-0.00554716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4676117">
            <text:p>-0.004676117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1389584">
            <text:p>-0.001389584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2826476">
            <text:p>0.002826476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09503191">
            <text:p>-0.009503191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string">
            <text:p>3.699668E-05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5950626">
            <text:p>0.005950626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09066537">
            <text:p>-0.009066537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035989">
            <text:p>-0.001035989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2895707">
            <text:p>0.02895707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07262659">
            <text:p>-0.0007262659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06568325">
            <text:p>0.0006568325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6343937">
            <text:p>-0.006343937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100408">
            <text:p>0.01100408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689342">
            <text:p>0.00689342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532532">
            <text:p>-0.00532532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string">
            <text:p>3.194267E-05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5414872">
            <text:p>-0.005414872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7799234">
            <text:p>-0.007799234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2417174">
            <text:p>-0.002417174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5164992">
            <text:p>-0.005164992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382292">
            <text:p>0.006382292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9367108">
            <text:p>0.009367108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4382788">
            <text:p>-0.004382788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1487985">
            <text:p>-0.001487985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0.0009138455">
            <text:p>0.0009138455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string">
            <text:p>-9.724775E-05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3264755">
            <text:p>-0.003264755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8024679">
            <text:p>-0.008024679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511589">
            <text:p>0.003511589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08651026">
            <text:p>-0.0008651026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71791">
            <text:p>0.0071791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1192511">
            <text:p>-0.001192511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3019389">
            <text:p>-0.003019389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1799632">
            <text:p>-0.001799632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5944671">
            <text:p>-0.005944671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1322741">
            <text:p>0.001322741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2019839">
            <text:p>-0.002019839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030684">
            <text:p>-0.01030684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string">
            <text:p>-7.560115E-05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1187554">
            <text:p>-0.001187554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1819795">
            <text:p>0.001819795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271424">
            <text:p>0.01271424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494871">
            <text:p>0.01494871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4202804">
            <text:p>-0.004202804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4218971">
            <text:p>0.004218971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680521">
            <text:p>-0.00680521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68315">
            <text:p>0.0068315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4654768">
            <text:p>-0.004654768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1908666">
            <text:p>0.001908666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437028">
            <text:p>-0.00437028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6354919">
            <text:p>-0.006354919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3259933">
            <text:p>-0.003259933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113191">
            <text:p>0.01113191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09785857">
            <text:p>0.009785857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7162412">
            <text:p>-0.007162412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01849387">
            <text:p>-0.0001849387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5251042">
            <text:p>0.005251042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1038068">
            <text:p>0.001038068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586175">
            <text:p>0.001586175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305413">
            <text:p>0.00305413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406003">
            <text:p>0.004406003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09756426">
            <text:p>0.009756426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6207963">
            <text:p>-0.006207963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6477788">
            <text:p>0.006477788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08868319">
            <text:p>-0.008868319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5752386">
            <text:p>-0.005752386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2324391">
            <text:p>-0.002324391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104452">
            <text:p>0.01104452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5165081">
            <text:p>-0.005165081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2011242">
            <text:p>-0.002011242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5613317">
            <text:p>-0.005613317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061795">
            <text:p>0.01061795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6287393">
            <text:p>0.006287393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083011">
            <text:p>-0.01083011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8005391">
            <text:p>-0.008005391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1531848">
            <text:p>-0.001531848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08944798">
            <text:p>-0.008944798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436067">
            <text:p>0.01436067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1103366">
            <text:p>-0.001103366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4725145">
            <text:p>-0.004725145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0.002408836">
            <text:p>0.002408836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4131455">
            <text:p>-0.004131455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151637">
            <text:p>0.01151637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09998889">
            <text:p>0.009998889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171094">
            <text:p>0.01171094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08339128">
            <text:p>0.008339128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5349949">
            <text:p>-0.005349949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8540842">
            <text:p>0.008540842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1442657">
            <text:p>0.001442657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877854">
            <text:p>0.004877854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4632221">
            <text:p>-0.004632221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3915171">
            <text:p>0.003915171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488792">
            <text:p>0.01488792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2300735">
            <text:p>-0.002300735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6982995">
            <text:p>0.006982995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3020224">
            <text:p>0.003020224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8596792">
            <text:p>0.008596792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292464">
            <text:p>0.003292464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291861">
            <text:p>0.01291861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294233">
            <text:p>0.003294233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1524296">
            <text:p>-0.001524296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0832231">
            <text:p>-0.000832231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105026">
            <text:p>0.01105026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254898">
            <text:p>0.01254898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0.0005687873">
            <text:p>0.0005687873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05155526">
            <text:p>-0.0005155526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77019">
            <text:p>-0.0077019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002792">
            <text:p>0.01002792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6740264">
            <text:p>-0.006740264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054721">
            <text:p>0.01054721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10317">
            <text:p>0.0110317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09184636">
            <text:p>-0.009184636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3846088">
            <text:p>-0.003846088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593311">
            <text:p>0.01593311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8766">
            <text:p>0.0138766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5095238">
            <text:p>-0.005095238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325135">
            <text:p>0.01325135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8362965">
            <text:p>0.008362965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248601">
            <text:p>-0.00248601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4260352">
            <text:p>0.004260352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3487076">
            <text:p>-0.003487076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7039934">
            <text:p>-0.007039934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249301">
            <text:p>0.01249301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3105943">
            <text:p>-0.003105943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197066">
            <text:p>0.01197066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09053905">
            <text:p>0.0009053905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7046796">
            <text:p>0.007046796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1972689">
            <text:p>0.001972689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3213153">
            <text:p>0.003213153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3890162">
            <text:p>0.003890162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06459605">
            <text:p>0.0006459605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2838542">
            <text:p>-0.002838542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4335886">
            <text:p>-0.004335886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8051965">
            <text:p>0.008051965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4488234">
            <text:p>-0.004488234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328049">
            <text:p>0.01328049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850788">
            <text:p>0.004850788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-0.0002985439">
            <text:p>-0.0002985439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1303618">
            <text:p>0.001303618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309097">
            <text:p>0.01309097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253152">
            <text:p>0.002253152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092277">
            <text:p>0.004092277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1920308">
            <text:p>0.001920308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1255609">
            <text:p>0.001255609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4632133">
            <text:p>-0.004632133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7174674">
            <text:p>-0.007174674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5917423">
            <text:p>0.005917423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483837">
            <text:p>0.004483837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float" office:value="-0.0005288281">
            <text:p>-0.0005288281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7621487">
            <text:p>-0.007621487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933864">
            <text:p>0.002933864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1249901">
            <text:p>-0.001249901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1695963">
            <text:p>0.001695963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06823136">
            <text:p>-0.0006823136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4311012">
            <text:p>0.004311012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1984925">
            <text:p>-0.001984925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295121">
            <text:p>0.01295121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2432523">
            <text:p>-0.002432523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2550404">
            <text:p>-0.002550404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1209623">
            <text:p>-0.001209623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2597453">
            <text:p>-0.002597453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296555">
            <text:p>0.01296555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-0.0003372545">
            <text:p>-0.0003372545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0.0007776722">
            <text:p>0.0007776722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268011">
            <text:p>0.001268011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3523657">
            <text:p>-0.003523657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41087">
            <text:p>0.0141087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01527981">
            <text:p>0.0001527981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07537344">
            <text:p>0.0007537344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6215404">
            <text:p>-0.006215404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478268">
            <text:p>0.01478268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08385833">
            <text:p>-0.0008385833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132064">
            <text:p>0.01132064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8340295">
            <text:p>-0.008340295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4487786">
            <text:p>0.004487786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08692029">
            <text:p>-0.008692029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13495">
            <text:p>0.0113495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364366">
            <text:p>0.002364366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7089683">
            <text:p>-0.007089683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string">
            <text:p>3.526073E-05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547631">
            <text:p>0.01547631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055622">
            <text:p>0.01055622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3649019">
            <text:p>-0.003649019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7730398">
            <text:p>-0.007730398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0159242">
            <text:p>-0.000159242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0.0004108982">
            <text:p>0.0004108982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4251057">
            <text:p>0.004251057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293074">
            <text:p>0.01293074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2233218">
            <text:p>-0.002233218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1972747">
            <text:p>-0.001972747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4561226">
            <text:p>-0.004561226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08923608">
            <text:p>-0.008923608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09346129">
            <text:p>0.0009346129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5488295">
            <text:p>-0.005488295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161482">
            <text:p>0.01161482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005759">
            <text:p>0.02005759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5351164">
            <text:p>-0.005351164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06990434">
            <text:p>0.0006990434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5990214">
            <text:p>0.005990214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992249">
            <text:p>-0.001992249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7860004">
            <text:p>-0.007860004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508265">
            <text:p>0.003508265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3105084">
            <text:p>-0.003105084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798972">
            <text:p>0.00798972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2244402">
            <text:p>-0.002244402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08814954">
            <text:p>0.008814954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2311948">
            <text:p>-0.002311948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7491683">
            <text:p>-0.007491683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1752993">
            <text:p>-0.001752993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4861453">
            <text:p>-0.004861453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114683">
            <text:p>0.04114683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2301057">
            <text:p>-0.002301057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39083">
            <text:p>0.00339083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857114">
            <text:p>0.002857114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4425031">
            <text:p>0.04425031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-0.0006302753">
            <text:p>-0.0006302753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202227">
            <text:p>-0.001202227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3668877">
            <text:p>-0.003668877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6565506">
            <text:p>-0.006565506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2801865">
            <text:p>-0.002801865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072678">
            <text:p>0.01072678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398076">
            <text:p>-0.00398076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1485665">
            <text:p>0.001485665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3942146">
            <text:p>-0.003942146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5797318">
            <text:p>0.005797318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336497">
            <text:p>0.00336497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1202197">
            <text:p>-0.001202197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5071131">
            <text:p>0.005071131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2317831">
            <text:p>-0.002317831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2717838">
            <text:p>0.002717838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1240018">
            <text:p>0.001240018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6361684">
            <text:p>0.006361684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2866526">
            <text:p>-0.002866526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string">
            <text:p>-1.557886E-05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20748">
            <text:p>-0.0020748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124591">
            <text:p>-0.001124591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1388497">
            <text:p>-0.001388497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5922521">
            <text:p>-0.005922521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5644267">
            <text:p>-0.005644267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616242">
            <text:p>-0.003616242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1959309">
            <text:p>0.01959309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2123087">
            <text:p>-0.002123087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502445">
            <text:p>0.01502445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2205682">
            <text:p>-0.002205682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8783311">
            <text:p>0.008783311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0.0001116381">
            <text:p>0.0001116381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1571678">
            <text:p>-0.001571678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6173068">
            <text:p>-0.006173068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1888018">
            <text:p>-0.001888018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5553933">
            <text:p>-0.005553933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-0.0001774358">
            <text:p>-0.0001774358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2204481">
            <text:p>-0.002204481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3353598">
            <text:p>0.003353598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1655321">
            <text:p>-0.001655321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6103015">
            <text:p>0.006103015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3065855">
            <text:p>-0.003065855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5957698">
            <text:p>0.005957698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6153906">
            <text:p>0.006153906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09354438">
            <text:p>-0.0009354438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424074">
            <text:p>0.005424074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405282">
            <text:p>0.004405282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1262536">
            <text:p>0.001262536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09918215">
            <text:p>-0.0009918215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-0.0004016881">
            <text:p>-0.0004016881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2927088">
            <text:p>-0.002927088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343618">
            <text:p>0.001343618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2494863">
            <text:p>0.002494863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4555031">
            <text:p>-0.004555031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0948039">
            <text:p>0.00948039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1956731">
            <text:p>-0.001956731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07885809">
            <text:p>-0.0007885809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1266157">
            <text:p>0.001266157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5218014">
            <text:p>0.005218014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187177">
            <text:p>0.005187177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387022">
            <text:p>0.003387022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244609">
            <text:p>0.01244609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287944">
            <text:p>0.002287944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158532">
            <text:p>0.01158532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08826127">
            <text:p>-0.0008826127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509894">
            <text:p>-0.00509894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1543262">
            <text:p>0.001543262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6630571">
            <text:p>-0.006630571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2585375">
            <text:p>0.002585375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2054462">
            <text:p>-0.002054462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08664016">
            <text:p>-0.0008664016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05301595">
            <text:p>-0.0005301595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8471339">
            <text:p>-0.008471339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1018584">
            <text:p>0.01018584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8067555">
            <text:p>-0.008067555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4915976">
            <text:p>0.004915976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192982">
            <text:p>0.005192982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5898772">
            <text:p>0.005898772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8593123">
            <text:p>-0.008593123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2810559">
            <text:p>0.002810559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307883">
            <text:p>0.01307883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4494559">
            <text:p>-0.004494559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0.0007581676">
            <text:p>0.0007581676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-0.0002030369">
            <text:p>-0.0002030369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1009936">
            <text:p>0.01009936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2142423">
            <text:p>-0.002142423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204298">
            <text:p>-0.00204298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2207578">
            <text:p>-0.002207578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608913">
            <text:p>0.01608913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6435007">
            <text:p>-0.006435007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6807129">
            <text:p>0.006807129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0.0003831897">
            <text:p>0.0003831897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6056024">
            <text:p>-0.006056024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06174137">
            <text:p>0.0006174137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5747699">
            <text:p>-0.005747699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7267279">
            <text:p>-0.007267279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3927605">
            <text:p>-0.003927605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1851711">
            <text:p>0.001851711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5061883">
            <text:p>-0.005061883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567914">
            <text:p>0.01567914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5122247">
            <text:p>0.005122247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1055088">
            <text:p>-0.001055088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8491409">
            <text:p>0.008491409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2510359">
            <text:p>-0.002510359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245609">
            <text:p>0.01245609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5766089">
            <text:p>0.005766089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736558">
            <text:p>0.00736558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564247">
            <text:p>0.003564247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1927878">
            <text:p>0.01927878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000325">
            <text:p>-0.01000325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279619">
            <text:p>-0.002279619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5232869">
            <text:p>-0.005232869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1517824">
            <text:p>-0.001517824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3226754">
            <text:p>-0.003226754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1641161">
            <text:p>-0.001641161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6087715">
            <text:p>-0.006087715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1784443">
            <text:p>0.001784443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2127222">
            <text:p>0.002127222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8225491">
            <text:p>-0.008225491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210906">
            <text:p>-0.00210906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5595603">
            <text:p>-0.005595603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2024298">
            <text:p>0.002024298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0672101">
            <text:p>-0.000672101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1909106">
            <text:p>0.001909106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0449193">
            <text:p>-0.000449193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759141">
            <text:p>0.003759141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2072934">
            <text:p>0.002072934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1995468">
            <text:p>-0.001995468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856526">
            <text:p>0.01856526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7589794">
            <text:p>0.007589794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3555778">
            <text:p>-0.003555778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2359771">
            <text:p>0.002359771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546524">
            <text:p>0.02546524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508613">
            <text:p>0.006508613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319276">
            <text:p>0.01319276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6164071">
            <text:p>0.006164071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3442742">
            <text:p>0.003442742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29686">
            <text:p>0.0229686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3542221">
            <text:p>0.003542221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2185">
            <text:p>0.022185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18221">
            <text:p>0.0018221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2358681">
            <text:p>0.002358681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1142108">
            <text:p>0.001142108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7080752">
            <text:p>-0.007080752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8817388">
            <text:p>0.008817388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2718888">
            <text:p>0.002718888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7372666">
            <text:p>-0.007372666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2232938">
            <text:p>-0.002232938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0.0003769614">
            <text:p>0.0003769614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1055287">
            <text:p>-0.001055287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08238004">
            <text:p>-0.008238004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5555121">
            <text:p>-0.005555121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-0.0001872951">
            <text:p>-0.0001872951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0.0004937793">
            <text:p>0.0004937793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249258">
            <text:p>-0.00249258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1465183">
            <text:p>-0.001465183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6525035">
            <text:p>-0.006525035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2672211">
            <text:p>0.002672211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2630789">
            <text:p>0.002630789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1835324">
            <text:p>-0.001835324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03853">
            <text:p>0.01203853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2088735">
            <text:p>0.002088735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8206266">
            <text:p>0.008206266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0851369">
            <text:p>-0.00851369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7232418">
            <text:p>0.007232418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3479874">
            <text:p>-0.003479874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378429">
            <text:p>-0.00378429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463612">
            <text:p>0.004463612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2774545">
            <text:p>0.002774545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0.0002527032">
            <text:p>0.0002527032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371465">
            <text:p>-0.00371465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2877907">
            <text:p>-0.002877907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3719148">
            <text:p>-0.003719148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04487501">
            <text:p>0.0004487501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6034397">
            <text:p>-0.006034397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5530003">
            <text:p>0.005530003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4267868">
            <text:p>-0.004267868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08214528">
            <text:p>-0.008214528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7912829">
            <text:p>-0.007912829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03325805">
            <text:p>-0.0003325805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2018619">
            <text:p>-0.002018619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1342448">
            <text:p>0.001342448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3949861">
            <text:p>-0.003949861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3974817">
            <text:p>-0.003974817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02689362">
            <text:p>0.0002689362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2820062">
            <text:p>-0.002820062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2367084">
            <text:p>-0.002367084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121104">
            <text:p>0.01121104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3793234">
            <text:p>0.003793234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2031633">
            <text:p>0.02031633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09212269">
            <text:p>-0.009212269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5302982">
            <text:p>-0.005302982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07565628">
            <text:p>0.0007565628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3598504">
            <text:p>0.003598504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432448">
            <text:p>-0.01432448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6930453">
            <text:p>-0.006930453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2918043">
            <text:p>0.02918043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557697">
            <text:p>0.01557697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711363">
            <text:p>0.005711363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4106417">
            <text:p>0.004106417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006673909">
            <text:p>0.0006673909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0815712">
            <text:p>0.000815712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470655">
            <text:p>0.001470655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390786">
            <text:p>0.00390786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3795566">
            <text:p>-0.003795566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7799601">
            <text:p>-0.007799601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5444048">
            <text:p>-0.005444048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0.0003023973">
            <text:p>0.0003023973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09996623">
            <text:p>0.009996623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5974215">
            <text:p>0.005974215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8461817">
            <text:p>0.008461817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1317838">
            <text:p>0.001317838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209782">
            <text:p>0.01209782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1384538">
            <text:p>-0.001384538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0.0002961569">
            <text:p>0.0002961569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6644409">
            <text:p>-0.006644409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5238201">
            <text:p>-0.005238201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2950029">
            <text:p>-0.002950029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393038">
            <text:p>0.002393038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394278">
            <text:p>0.00394278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4995305">
            <text:p>0.004995305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359637">
            <text:p>0.01359637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2739987">
            <text:p>-0.002739987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5169452">
            <text:p>-0.005169452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18732">
            <text:p>0.0018732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029817">
            <text:p>0.01029817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8009136">
            <text:p>-0.008009136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3197294">
            <text:p>0.003197294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1497055">
            <text:p>-0.001497055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7499126">
            <text:p>0.007499126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5612068">
            <text:p>0.005612068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08476067">
            <text:p>-0.0008476067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167893">
            <text:p>0.02167893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2372819">
            <text:p>-0.002372819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7151094">
            <text:p>-0.007151094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7680446">
            <text:p>-0.007680446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9041466">
            <text:p>0.009041466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4923871">
            <text:p>-0.004923871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079227">
            <text:p>0.01079227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6155021">
            <text:p>0.006155021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2074158">
            <text:p>-0.002074158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3534505">
            <text:p>-0.003534505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07564">
            <text:p>0.00207564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0836957">
            <text:p>-0.00836957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61558">
            <text:p>0.01061558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-0.0002637603">
            <text:p>-0.0002637603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3213543">
            <text:p>-0.003213543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09978651">
            <text:p>-0.009978651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009578">
            <text:p>0.004009578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005921">
            <text:p>0.01005921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5649507">
            <text:p>0.005649507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4271007">
            <text:p>-0.004271007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3150472">
            <text:p>0.003150472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string">
            <text:p>9.389614E-05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6380917">
            <text:p>-0.006380917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1879961">
            <text:p>-0.001879961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428107">
            <text:p>0.01428107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3986616">
            <text:p>-0.003986616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2779155">
            <text:p>-0.002779155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293326">
            <text:p>-0.01293326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1133531">
            <text:p>-0.001133531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651664">
            <text:p>0.005651664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079343">
            <text:p>0.005079343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4939699">
            <text:p>-0.004939699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6623965">
            <text:p>-0.006623965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297783">
            <text:p>0.003297783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077643">
            <text:p>0.01077643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5020093">
            <text:p>-0.005020093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09746008">
            <text:p>0.009746008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0.000549781">
            <text:p>0.000549781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2077065">
            <text:p>-0.002077065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356952">
            <text:p>0.00356952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915005">
            <text:p>0.00915005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8864149">
            <text:p>0.008864149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3080409">
            <text:p>-0.003080409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3714285">
            <text:p>-0.003714285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920733">
            <text:p>0.003920733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3267249">
            <text:p>0.003267249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08578259">
            <text:p>0.0008578259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09086429">
            <text:p>-0.009086429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3013482">
            <text:p>0.003013482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525041">
            <text:p>0.00525041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6647497">
            <text:p>-0.006647497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09861009">
            <text:p>-0.009861009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09209329">
            <text:p>-0.0009209329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7988545">
            <text:p>0.007988545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2632981">
            <text:p>-0.002632981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6016824">
            <text:p>-0.006016824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3441144">
            <text:p>-0.003441144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928215">
            <text:p>0.003928215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-0.0001853182">
            <text:p>-0.0001853182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7272394">
            <text:p>0.007272394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5774847">
            <text:p>-0.005774847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3850752">
            <text:p>-0.003850752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5194032">
            <text:p>-0.005194032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62034">
            <text:p>0.0162034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338592">
            <text:p>0.02338592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-0.0003363718">
            <text:p>-0.0003363718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4812863">
            <text:p>-0.004812863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703873">
            <text:p>0.00703873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0.0004340145">
            <text:p>0.0004340145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7704865">
            <text:p>0.007704865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7936428">
            <text:p>0.007936428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3367111">
            <text:p>-0.003367111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088629">
            <text:p>0.01088629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1929763">
            <text:p>-0.001929763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1386681">
            <text:p>0.0001386681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2075745">
            <text:p>-0.002075745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5757661">
            <text:p>0.005757661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08800059">
            <text:p>-0.0008800059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3152531">
            <text:p>-0.003152531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5429246">
            <text:p>-0.005429246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4167354">
            <text:p>0.004167354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493801">
            <text:p>-0.00493801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1098272">
            <text:p>-0.001098272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3056562">
            <text:p>-0.003056562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8562739">
            <text:p>0.008562739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0944418">
            <text:p>0.00944418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6383284">
            <text:p>0.006383284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183021">
            <text:p>0.0183021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5563284">
            <text:p>-0.005563284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1643517">
            <text:p>-0.001643517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03058764">
            <text:p>0.0003058764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4287664">
            <text:p>0.004287664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3243488">
            <text:p>-0.003243488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192259">
            <text:p>0.01192259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623137">
            <text:p>0.01623137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735352">
            <text:p>0.008735352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3445005">
            <text:p>0.003445005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232067">
            <text:p>0.003232067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06698523">
            <text:p>-0.0006698523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4926995">
            <text:p>0.004926995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2188792">
            <text:p>-0.002188792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4063531">
            <text:p>-0.004063531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4840547">
            <text:p>-0.004840547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414828">
            <text:p>0.01414828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1263911">
            <text:p>-0.001263911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2194609">
            <text:p>0.002194609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8095955">
            <text:p>-0.008095955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4860062">
            <text:p>-0.004860062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195055">
            <text:p>0.0195055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3814625">
            <text:p>-0.003814625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2287747">
            <text:p>-0.002287747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3398782">
            <text:p>-0.003398782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77467">
            <text:p>0.00277467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2156883">
            <text:p>-0.002156883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020606">
            <text:p>-0.001020606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063096">
            <text:p>0.006063096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7701518">
            <text:p>-0.007701518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7113891">
            <text:p>-0.007113891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4587936">
            <text:p>-0.004587936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149259">
            <text:p>0.01149259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3123929">
            <text:p>0.003123929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09306509">
            <text:p>-0.009306509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2962333">
            <text:p>0.002962333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2221288">
            <text:p>-0.002221288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497363">
            <text:p>0.02497363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07902257">
            <text:p>-0.0007902257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2511373">
            <text:p>-0.002511373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4109688">
            <text:p>0.004109688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2171847">
            <text:p>0.002171847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8742374">
            <text:p>-0.008742374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4602642">
            <text:p>0.004602642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2915257">
            <text:p>0.002915257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05548586">
            <text:p>-0.0005548586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2090907">
            <text:p>0.002090907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2977992">
            <text:p>0.002977992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0.0002491515">
            <text:p>0.0002491515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01881191">
            <text:p>-0.0001881191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3441104">
            <text:p>0.003441104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3833145">
            <text:p>-0.003833145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46454">
            <text:p>0.0146454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4460466">
            <text:p>0.004460466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6259397">
            <text:p>-0.006259397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09548131">
            <text:p>-0.009548131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04356818">
            <text:p>-0.0004356818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687009">
            <text:p>0.00687009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8525449">
            <text:p>-0.008525449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214985">
            <text:p>-0.01214985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3261213">
            <text:p>-0.003261213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2129126">
            <text:p>0.002129126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8558947">
            <text:p>-0.008558947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7000864">
            <text:p>-0.007000864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3609002">
            <text:p>0.003609002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1943859">
            <text:p>0.01943859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4768338">
            <text:p>-0.004768338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8190067">
            <text:p>-0.008190067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556039">
            <text:p>-0.00556039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5477218">
            <text:p>0.05477218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06150029">
            <text:p>-0.0006150029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3060319">
            <text:p>-0.003060319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6482083">
            <text:p>0.006482083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294022">
            <text:p>0.0294022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07519491">
            <text:p>-0.0007519491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59795">
            <text:p>-0.0159795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1906041">
            <text:p>0.01906041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000492">
            <text:p>0.01000492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243575">
            <text:p>-0.00243575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2847722">
            <text:p>-0.002847722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5796667">
            <text:p>0.005796667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string">
            <text:p>7.108668E-05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string">
            <text:p>-6.201787E-05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406482">
            <text:p>0.01406482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1995821">
            <text:p>0.001995821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6033613">
            <text:p>0.006033613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09974469">
            <text:p>-0.009974469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08883515">
            <text:p>0.0008883515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8334104">
            <text:p>0.008334104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5255759">
            <text:p>-0.005255759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-0.0006375482">
            <text:p>-0.0006375482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1826714">
            <text:p>0.01826714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1796625">
            <text:p>0.001796625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206128">
            <text:p>-0.00206128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-0.0003718081">
            <text:p>-0.0003718081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2818436">
            <text:p>-0.002818436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787376">
            <text:p>0.00787376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3491486">
            <text:p>0.003491486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5037748">
            <text:p>-0.005037748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06321566">
            <text:p>-0.0006321566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3048099">
            <text:p>0.003048099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4973053">
            <text:p>-0.004973053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9632558">
            <text:p>-0.009632558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2193278">
            <text:p>0.002193278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315936">
            <text:p>-0.00315936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4385884">
            <text:p>0.004385884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359025">
            <text:p>0.02359025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385986">
            <text:p>-0.00385986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-0.0001558185">
            <text:p>-0.0001558185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1580923">
            <text:p>0.001580923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4490038">
            <text:p>-0.004490038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2794778">
            <text:p>-0.002794778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4189176">
            <text:p>0.004189176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6645618">
            <text:p>0.006645618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3443029">
            <text:p>-0.003443029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100317">
            <text:p>-0.0100317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5655257">
            <text:p>0.005655257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06398691">
            <text:p>-0.0006398691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5827148">
            <text:p>-0.005827148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01007287">
            <text:p>0.0001007287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09628378">
            <text:p>0.0009628378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4152098">
            <text:p>0.004152098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5670096">
            <text:p>-0.005670096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09259249">
            <text:p>-0.0009259249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4560469">
            <text:p>0.004560469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3501163">
            <text:p>0.003501163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4664688">
            <text:p>-0.004664688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01939846">
            <text:p>0.0001939846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178736">
            <text:p>0.01178736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3620993">
            <text:p>-0.003620993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2442096">
            <text:p>-0.002442096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3620473">
            <text:p>-0.003620473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327781">
            <text:p>0.01327781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09708533">
            <text:p>0.0009708533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3019237">
            <text:p>0.003019237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7597468">
            <text:p>0.007597468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09104988">
            <text:p>0.0009104988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3689853">
            <text:p>0.003689853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6474141">
            <text:p>-0.006474141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8914489">
            <text:p>-0.008914489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6440571">
            <text:p>-0.006440571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083199">
            <text:p>0.01083199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7967695">
            <text:p>-0.007967695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2850974">
            <text:p>-0.002850974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6291632">
            <text:p>0.006291632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08574533">
            <text:p>0.008574533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08962075">
            <text:p>0.008962075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908435">
            <text:p>-0.00908435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1459135">
            <text:p>-0.001459135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2407979">
            <text:p>-0.002407979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124277">
            <text:p>-0.01124277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-0.0002248579">
            <text:p>-0.0002248579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277067">
            <text:p>0.01277067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0477431">
            <text:p>0.000477431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08004322">
            <text:p>0.008004322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04681">
            <text:p>-0.0104681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5838762">
            <text:p>0.005838762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4282001">
            <text:p>-0.004282001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2616171">
            <text:p>-0.002616171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325024">
            <text:p>-0.01325024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5949234">
            <text:p>0.005949234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1729828">
            <text:p>0.001729828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string">
            <text:p>-5.087574E-05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295995">
            <text:p>-0.01295995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6968733">
            <text:p>0.006968733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6410222">
            <text:p>-0.006410222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2076937">
            <text:p>-0.002076937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431148">
            <text:p>-0.01431148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-0.0001465481">
            <text:p>-0.0001465481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149803">
            <text:p>0.01149803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400037">
            <text:p>0.001400037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254284">
            <text:p>-0.01254284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6133557">
            <text:p>0.006133557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08885792">
            <text:p>0.008885792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7849603">
            <text:p>-0.007849603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4230984">
            <text:p>-0.004230984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2204121">
            <text:p>0.002204121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6968858">
            <text:p>0.006968858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1057002">
            <text:p>-0.01057002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2424665">
            <text:p>0.002424665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08989367">
            <text:p>0.008989367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4697925">
            <text:p>0.004697925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07256247">
            <text:p>0.007256247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7780178">
            <text:p>-0.007780178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2719521">
            <text:p>-0.002719521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5352058">
            <text:p>0.005352058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049817">
            <text:p>-0.01049817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3844695">
            <text:p>-0.003844695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461036">
            <text:p>0.01461036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6633533">
            <text:p>-0.006633533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4185376">
            <text:p>-0.004185376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3866649">
            <text:p>-0.003866649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1336674">
            <text:p>0.001336674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2302202">
            <text:p>-0.002302202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11075">
            <text:p>-0.0111075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566666">
            <text:p>-0.01566666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5207743">
            <text:p>0.005207743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8401511">
            <text:p>0.008401511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7069718">
            <text:p>-0.007069718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3796952">
            <text:p>-0.003796952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09556065">
            <text:p>0.009556065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045749">
            <text:p>0.01045749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7334677">
            <text:p>-0.007334677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5395018">
            <text:p>-0.005395018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6924129">
            <text:p>0.006924129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7584682">
            <text:p>0.007584682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1034024">
            <text:p>-0.01034024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063007">
            <text:p>-0.01063007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09923062">
            <text:p>0.009923062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9069089">
            <text:p>-0.0009069089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7506431">
            <text:p>-0.007506431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4689206">
            <text:p>-0.004689206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472679">
            <text:p>-0.00472679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172745">
            <text:p>0.008172745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7007431">
            <text:p>-0.007007431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500011">
            <text:p>-0.01500011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385373">
            <text:p>0.01385373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-0.0003476038">
            <text:p>-0.0003476038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128114">
            <text:p>-0.01128114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6863253">
            <text:p>0.006863253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2873257">
            <text:p>0.002873257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1563124">
            <text:p>0.001563124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418944">
            <text:p>-0.01418944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53115">
            <text:p>0.0153115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8212883">
            <text:p>0.008212883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041999">
            <text:p>0.01041999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1538568">
            <text:p>-0.001538568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2275409">
            <text:p>-0.002275409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2461683">
            <text:p>-0.002461683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5520803">
            <text:p>0.005520803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037475">
            <text:p>0.01037475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-0.0006555245">
            <text:p>-0.0006555245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6939461">
            <text:p>0.006939461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485254">
            <text:p>0.01485254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6887542">
            <text:p>-0.006887542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2439068">
            <text:p>-0.002439068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09806994">
            <text:p>0.009806994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074332">
            <text:p>0.03074332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09107019">
            <text:p>0.009107019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7450558">
            <text:p>-0.007450558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3259617">
            <text:p>0.003259617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05089483">
            <text:p>-0.0005089483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5263953">
            <text:p>0.005263953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5912818">
            <text:p>-0.005912818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6798061">
            <text:p>0.006798061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355496">
            <text:p>0.03355496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256852">
            <text:p>0.01256852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77498">
            <text:p>-0.01077498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3164962">
            <text:p>-0.003164962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25358">
            <text:p>0.01025358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2870538">
            <text:p>-0.002870538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7463906">
            <text:p>0.007463906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203656">
            <text:p>0.01203656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-0.001653188">
            <text:p>-0.001653188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042831">
            <text:p>-0.01042831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08172693">
            <text:p>-0.0008172693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5217522">
            <text:p>0.005217522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2470584">
            <text:p>-0.002470584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09413836">
            <text:p>-0.009413836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7166516">
            <text:p>0.007166516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2528286">
            <text:p>0.002528286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5008757">
            <text:p>0.005008757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2980615">
            <text:p>-0.002980615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595156">
            <text:p>0.005595156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1080393">
            <text:p>0.001080393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08944818">
            <text:p>0.008944818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1310711">
            <text:p>-0.001310711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2637677">
            <text:p>0.002637677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104784">
            <text:p>0.01104784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8927992">
            <text:p>-0.008927992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5954656">
            <text:p>-0.005954656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5661426">
            <text:p>0.005661426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5159572">
            <text:p>0.005159572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8768287">
            <text:p>-0.008768287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158592">
            <text:p>0.01158592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6061537">
            <text:p>0.006061537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555495">
            <text:p>0.00555495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1971643">
            <text:p>-0.001971643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083097">
            <text:p>-0.01083097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1729246">
            <text:p>0.001729246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5038219">
            <text:p>-0.005038219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5903408">
            <text:p>-0.005903408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9315433">
            <text:p>-0.009315433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6117006">
            <text:p>0.006117006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4379927">
            <text:p>-0.004379927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3179757">
            <text:p>-0.003179757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807362">
            <text:p>-0.00807362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3474958">
            <text:p>0.003474958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297002">
            <text:p>0.01297002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7117324">
            <text:p>-0.007117324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27167">
            <text:p>-0.0127167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8190651">
            <text:p>-0.008190651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1350265">
            <text:p>0.001350265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484265">
            <text:p>-0.00484265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7719947">
            <text:p>-0.007719947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3253004">
            <text:p>0.003253004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4485093">
            <text:p>0.004485093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3067991">
            <text:p>-0.003067991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1095795">
            <text:p>-0.01095795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543372">
            <text:p>0.01543372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2379344">
            <text:p>-0.002379344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245166">
            <text:p>-0.01245166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4036395">
            <text:p>0.004036395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299041">
            <text:p>0.02299041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1624763">
            <text:p>-0.001624763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6200161">
            <text:p>-0.006200161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7609808">
            <text:p>0.007609808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4166141">
            <text:p>-0.004166141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1500794">
            <text:p>0.001500794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7254087">
            <text:p>-0.007254087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8940388">
            <text:p>-0.008940388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1591771">
            <text:p>0.001591771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0963749">
            <text:p>-0.00963749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6422102">
            <text:p>-0.006422102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7948237">
            <text:p>-0.007948237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1111453">
            <text:p>-0.001111453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8916958">
            <text:p>0.008916958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2945191">
            <text:p>-0.002945191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3271623">
            <text:p>-0.003271623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-0.0003532279">
            <text:p>-0.0003532279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6371905">
            <text:p>-0.006371905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7427973">
            <text:p>-0.007427973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5415176">
            <text:p>-0.005415176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39952">
            <text:p>0.0239952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03899798">
            <text:p>-0.0003899798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2624972">
            <text:p>0.002624972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08142611">
            <text:p>0.008142611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829424">
            <text:p>0.00829424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08561506">
            <text:p>0.008561506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04269537">
            <text:p>0.0004269537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6066074">
            <text:p>-0.006066074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3210114">
            <text:p>-0.003210114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5175525">
            <text:p>0.005175525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1091755">
            <text:p>-0.01091755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3958168">
            <text:p>0.003958168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4433689">
            <text:p>0.004433689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-0.0008539493">
            <text:p>-0.0008539493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0879613">
            <text:p>-0.00879613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09199637">
            <text:p>0.009199637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209562">
            <text:p>0.04209562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1685997">
            <text:p>0.001685997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588621">
            <text:p>0.01588621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122328">
            <text:p>-0.01122328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6610136">
            <text:p>0.006610136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3708433">
            <text:p>0.003708433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451227">
            <text:p>0.01451227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1551757">
            <text:p>-0.001551757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1904897">
            <text:p>0.01904897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357272">
            <text:p>0.01357272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436187">
            <text:p>0.00436187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8999637">
            <text:p>-0.008999637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2889083">
            <text:p>0.002889083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1145755">
            <text:p>0.001145755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237146">
            <text:p>-0.01237146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0930659">
            <text:p>-0.00930659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8255307">
            <text:p>0.008255307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-0.001101532">
            <text:p>-0.001101532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7595032">
            <text:p>-0.007595032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085745">
            <text:p>-0.01085745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142748">
            <text:p>0.01142748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6790303">
            <text:p>0.006790303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54126">
            <text:p>-0.0054126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2211212">
            <text:p>-0.002211212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458802">
            <text:p>0.01458802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447811">
            <text:p>0.02447811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4536821">
            <text:p>-0.004536821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2047533">
            <text:p>0.002047533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2799768">
            <text:p>0.002799768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1685077">
            <text:p>0.01685077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1928965">
            <text:p>0.01928965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243648">
            <text:p>-0.01243648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5244493">
            <text:p>0.005244493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4646696">
            <text:p>-0.004646696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774044">
            <text:p>-0.00774044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7497957">
            <text:p>-0.007497957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4202524">
            <text:p>0.004202524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6107821">
            <text:p>-0.006107821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5647522">
            <text:p>-0.005647522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1943315">
            <text:p>0.001943315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8218062">
            <text:p>0.008218062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2511305">
            <text:p>0.002511305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1093552">
            <text:p>-0.01093552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183421">
            <text:p>-0.01183421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1720406">
            <text:p>0.001720406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700912">
            <text:p>0.00700912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5669442">
            <text:p>0.005669442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275934">
            <text:p>-0.01275934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364083">
            <text:p>0.01364083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0.0004771603">
            <text:p>0.0004771603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8290331">
            <text:p>-0.008290331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6613965">
            <text:p>-0.006613965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458235">
            <text:p>0.01458235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1762356">
            <text:p>0.001762356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315562">
            <text:p>-0.01315562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7498551">
            <text:p>-0.007498551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433342">
            <text:p>0.01433342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7564496">
            <text:p>-0.007564496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4671485">
            <text:p>-0.004671485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250032">
            <text:p>-0.01250032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590405">
            <text:p>-0.00590405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011199">
            <text:p>0.01011199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319431">
            <text:p>-0.01319431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5652173">
            <text:p>-0.005652173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2735334">
            <text:p>0.002735334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-0.0002182768">
            <text:p>-0.0002182768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215966">
            <text:p>-0.01215966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615414">
            <text:p>-0.00615414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043762">
            <text:p>0.01043762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1981988">
            <text:p>-0.001981988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3916062">
            <text:p>-0.003916062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239268">
            <text:p>-0.01239268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2187113">
            <text:p>-0.002187113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1836959">
            <text:p>0.01836959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8969138">
            <text:p>-0.008969138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6475269">
            <text:p>-0.006475269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2287123">
            <text:p>0.002287123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08578618">
            <text:p>0.0008578618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5970382">
            <text:p>-0.005970382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4794113">
            <text:p>-0.004794113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3226134">
            <text:p>0.003226134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245901">
            <text:p>0.01245901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5936822">
            <text:p>-0.005936822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5130684">
            <text:p>-0.005130684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6073673">
            <text:p>0.006073673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4267153">
            <text:p>-0.004267153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09152976">
            <text:p>-0.009152976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6165569">
            <text:p>-0.006165569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1308314">
            <text:p>0.001308314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3354516">
            <text:p>0.003354516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2793984">
            <text:p>0.002793984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10629">
            <text:p>-0.010629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4550502">
            <text:p>-0.004550502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3937676">
            <text:p>0.003937676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1045117">
            <text:p>-0.01045117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5339854">
            <text:p>-0.005339854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2654627">
            <text:p>-0.002654627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409854">
            <text:p>0.01409854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7864762">
            <text:p>-0.007864762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3322426">
            <text:p>-0.003322426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158009">
            <text:p>0.01158009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578589">
            <text:p>0.01578589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7502994">
            <text:p>-0.007502994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1421678">
            <text:p>0.001421678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5696897">
            <text:p>-0.005696897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6518911">
            <text:p>0.006518911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47025">
            <text:p>-0.0147025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-0.0003157403">
            <text:p>-0.0003157403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4343324">
            <text:p>0.004343324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1061598">
            <text:p>0.01061598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2172151">
            <text:p>-0.002172151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08679151">
            <text:p>-0.008679151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1614848">
            <text:p>0.001614848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553806">
            <text:p>0.01553806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1185656">
            <text:p>-0.01185656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512489">
            <text:p>-0.01512489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07124997">
            <text:p>0.007124997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-0.0006186446">
            <text:p>-0.0006186446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3639443">
            <text:p>-0.003639443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1075902">
            <text:p>-0.01075902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-0.002192234">
            <text:p>-0.002192234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355703">
            <text:p>0.00355703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1281214">
            <text:p>-0.01281214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5640479">
            <text:p>-0.005640479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224399">
            <text:p>0.01224399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01491674">
            <text:p>0.001491674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6168743">
            <text:p>0.006168743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8468813">
            <text:p>-0.008468813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-0.001086478">
            <text:p>-0.001086478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117284">
            <text:p>0.02117284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1130199">
            <text:p>-0.01130199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08111781">
            <text:p>-0.008111781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198644">
            <text:p>0.0198644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009684727">
            <text:p>0.0009684727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-0.003139519">
            <text:p>-0.003139519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-0.002320537">
            <text:p>-0.002320537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4398114">
            <text:p>0.004398114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01991567">
            <text:p>0.001991567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04745772">
            <text:p>0.0004745772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5532244">
            <text:p>-0.005532244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08479221">
            <text:p>0.008479221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4298856">
            <text:p>-0.004298856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09715374">
            <text:p>0.009715374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06482793">
            <text:p>0.0006482793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06993709">
            <text:p>0.006993709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6629712">
            <text:p>0.006629712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5905034">
            <text:p>0.005905034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09357284">
            <text:p>-0.009357284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4480013">
            <text:p>0.004480013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1668349">
            <text:p>0.01668349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5031798">
            <text:p>-0.005031798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1197873">
            <text:p>-0.01197873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05568297">
            <text:p>0.005568297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-0.00181337">
            <text:p>-0.00181337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129034">
            <text:p>-0.0129034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1220954">
            <text:p>-0.01220954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0637483">
            <text:p>0.00637483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-0.002718054">
            <text:p>-0.002718054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-0.002452853">
            <text:p>-0.002452853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08240865">
            <text:p>-0.008240865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422973">
            <text:p>0.00422973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3151768">
            <text:p>0.003151768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1397718">
            <text:p>-0.01397718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625976">
            <text:p>-0.00625976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07116077">
            <text:p>0.007116077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0.0008295501">
            <text:p>0.0008295501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1141005">
            <text:p>-0.01141005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212235">
            <text:p>0.01212235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04616776">
            <text:p>0.004616776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1227273">
            <text:p>-0.01227273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-0.002264494">
            <text:p>-0.002264494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-0.004527512">
            <text:p>-0.004527512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08844974">
            <text:p>0.008844974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0.0003641024">
            <text:p>0.0003641024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-0.003943848">
            <text:p>-0.003943848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01034671">
            <text:p>0.001034671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09451443">
            <text:p>0.009451443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-0.003992058">
            <text:p>-0.003992058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1009643">
            <text:p>-0.01009643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09124068">
            <text:p>0.009124068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0.0001925642">
            <text:p>0.0001925642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-0.004830546">
            <text:p>-0.004830546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1181096">
            <text:p>-0.01181096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04593387">
            <text:p>0.004593387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03851755">
            <text:p>0.003851755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1190245">
            <text:p>-0.01190245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128776">
            <text:p>0.00128776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007145623">
            <text:p>0.0007145623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02392279">
            <text:p>0.002392279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-0.005211917">
            <text:p>-0.005211917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08437361">
            <text:p>-0.008437361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09922933">
            <text:p>0.009922933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-0.004304554">
            <text:p>-0.004304554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-0.007742314">
            <text:p>-0.007742314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-0.001172598">
            <text:p>-0.001172598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068539">
            <text:p>0.01068539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0328669">
            <text:p>0.00328669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005960029">
            <text:p>0.0005960029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1129646">
            <text:p>-0.01129646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-0.004635292">
            <text:p>-0.004635292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05233949">
            <text:p>0.005233949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00496314">
            <text:p>0.000496314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-0.001709363">
            <text:p>-0.001709363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-0.003182942">
            <text:p>-0.003182942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-0.001888785">
            <text:p>-0.001888785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-0.006369916">
            <text:p>-0.006369916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-0.006265719">
            <text:p>-0.006265719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-0.002455017">
            <text:p>-0.002455017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06089465">
            <text:p>0.006089465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-0.01225056">
            <text:p>-0.01225056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-0.01066042">
            <text:p>-0.01066042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04053703">
            <text:p>0.004053703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07503512">
            <text:p>0.007503512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-0.01200418">
            <text:p>-0.01200418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0436695">
            <text:p>0.00436695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-0.003338036">
            <text:p>-0.003338036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2455886">
            <text:p>0.02455886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-0.001635826">
            <text:p>-0.001635826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08477927">
            <text:p>0.008477927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-0.004151139">
            <text:p>-0.004151139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-0.006209363">
            <text:p>-0.006209363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1061604">
            <text:p>0.01061604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-0.009498433">
            <text:p>-0.009498433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07972069">
            <text:p>0.007972069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04474754">
            <text:p>0.004474754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-0.004426357">
            <text:p>-0.004426357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01564026">
            <text:p>0.001564026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2058287">
            <text:p>0.02058287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03423013">
            <text:p>0.003423013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-0.002590589">
            <text:p>-0.002590589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-0.008799906">
            <text:p>-0.008799906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05228803">
            <text:p>0.005228803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06069921">
            <text:p>0.006069921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-0.0003199365">
            <text:p>-0.0003199365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-0.01063104">
            <text:p>-0.01063104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05356373">
            <text:p>0.005356373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1551795">
            <text:p>0.01551795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-0.004223769">
            <text:p>-0.004223769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-0.001806782">
            <text:p>-0.001806782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1332112">
            <text:p>0.01332112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-0.0002176235">
            <text:p>-0.0002176235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0223174">
            <text:p>0.00223174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-0.01314322">
            <text:p>-0.01314322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03487337">
            <text:p>0.003487337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257066">
            <text:p>0.0257066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-0.007087313">
            <text:p>-0.007087313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-0.006108874">
            <text:p>-0.006108874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07838807">
            <text:p>0.007838807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-0.001674087">
            <text:p>-0.001674087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-0.007379">
            <text:p>-0.007379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-0.0134697">
            <text:p>-0.0134697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string">
            <text:p>-1.965393E-06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2433188">
            <text:p>0.02433188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-0.003749755">
            <text:p>-0.003749755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01468064">
            <text:p>0.001468064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02143866">
            <text:p>0.002143866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001242051">
            <text:p>0.001242051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-0.009140111">
            <text:p>-0.009140111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-0.01054141">
            <text:p>-0.01054141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0.0004047629">
            <text:p>0.0004047629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02068528">
            <text:p>0.002068528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-0.01263808">
            <text:p>-0.01263808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-0.00392053">
            <text:p>-0.00392053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0662525">
            <text:p>0.00662525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01144836">
            <text:p>0.001144836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-0.002930961">
            <text:p>-0.002930961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0607644">
            <text:p>0.0607644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0.0001334444">
            <text:p>0.0001334444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-0.001690338">
            <text:p>-0.001690338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02660823">
            <text:p>0.002660823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-0.01116118">
            <text:p>-0.01116118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001832349">
            <text:p>0.001832349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-0.003825729">
            <text:p>-0.003825729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-0.00882045">
            <text:p>-0.00882045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0003601343">
            <text:p>0.0003601343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04192376">
            <text:p>0.004192376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-0.001102897">
            <text:p>-0.001102897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-0.005474664">
            <text:p>-0.005474664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-0.009161822">
            <text:p>-0.009161822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-0.002773985">
            <text:p>-0.002773985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05747785">
            <text:p>0.005747785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-0.009676355">
            <text:p>-0.009676355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-0.0066382">
            <text:p>-0.0066382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-0.0006230149">
            <text:p>-0.0006230149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-0.003000969">
            <text:p>-0.003000969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-0.001129623">
            <text:p>-0.001129623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-0.01097938">
            <text:p>-0.01097938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-0.0002767322">
            <text:p>-0.0002767322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04316763">
            <text:p>0.004316763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04390521">
            <text:p>0.004390521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-0.007601283">
            <text:p>-0.007601283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-0.002327949">
            <text:p>-0.002327949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0.0004874016">
            <text:p>0.0004874016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-0.002194523">
            <text:p>-0.002194523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-0.002489474">
            <text:p>-0.002489474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007541758">
            <text:p>0.007541758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02270641">
            <text:p>0.02270641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-0.001105142">
            <text:p>-0.001105142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-0.005616001">
            <text:p>-0.005616001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002696486">
            <text:p>0.002696486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01018841">
            <text:p>0.01018841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-0.007936842">
            <text:p>-0.007936842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-0.00632799">
            <text:p>-0.00632799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001293291">
            <text:p>0.001293291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001370082">
            <text:p>0.001370082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0009740898">
            <text:p>0.0009740898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-0.004514643">
            <text:p>-0.004514643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007526041">
            <text:p>0.007526041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001238126">
            <text:p>0.001238126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00112762">
            <text:p>0.00112762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00407345">
            <text:p>0.00407345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009199132">
            <text:p>0.009199132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-0.001176933">
            <text:p>-0.001176933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-0.005547424">
            <text:p>-0.005547424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-0.01254025">
            <text:p>-0.01254025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-0.005087015">
            <text:p>-0.005087015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-0.001003886">
            <text:p>-0.001003886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-0.01263271">
            <text:p>-0.01263271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-0.008991237">
            <text:p>-0.008991237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-0.002163233">
            <text:p>-0.002163233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-0.001397662">
            <text:p>-0.001397662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-0.005169063">
            <text:p>-0.005169063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-0.0004521577">
            <text:p>-0.0004521577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001662118">
            <text:p>0.001662118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-0.005042712">
            <text:p>-0.005042712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-0.007283851">
            <text:p>-0.007283851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-0.008817167">
            <text:p>-0.008817167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0174028">
            <text:p>0.0174028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004059794">
            <text:p>0.004059794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-0.00582167">
            <text:p>-0.00582167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-0.002246939">
            <text:p>-0.002246939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0131027">
            <text:p>0.0131027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-0.002554303">
            <text:p>-0.002554303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-0.003618801">
            <text:p>-0.003618801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-0.005193795">
            <text:p>-0.005193795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006785879">
            <text:p>0.006785879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002962417">
            <text:p>0.002962417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-0.001518266">
            <text:p>-0.001518266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-0.009260119">
            <text:p>-0.009260119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-0.003257812">
            <text:p>-0.003257812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003918915">
            <text:p>0.003918915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-0.003918528">
            <text:p>-0.003918528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-0.01145225">
            <text:p>-0.01145225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005150169">
            <text:p>0.005150169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002137193">
            <text:p>0.002137193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-0.01223128">
            <text:p>-0.01223128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008293467">
            <text:p>0.008293467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-0.002712408">
            <text:p>-0.002712408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-0.005194078">
            <text:p>-0.005194078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-0.0109806">
            <text:p>-0.0109806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-0.01241634">
            <text:p>-0.01241634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-0.003588843">
            <text:p>-0.003588843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-0.005511242">
            <text:p>-0.005511242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-0.002087729">
            <text:p>-0.002087729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-0.00392181">
            <text:p>-0.00392181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-0.003862613">
            <text:p>-0.003862613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005296116">
            <text:p>0.005296116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04627543">
            <text:p>0.04627543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-0.00145091">
            <text:p>-0.00145091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00947939">
            <text:p>0.00947939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-0.001174182">
            <text:p>-0.001174182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01802106">
            <text:p>0.01802106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-0.01026867">
            <text:p>-0.01026867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005744349">
            <text:p>0.005744349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004242734">
            <text:p>0.004242734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-0.009655482">
            <text:p>-0.009655482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-0.01024617">
            <text:p>-0.01024617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008509453">
            <text:p>0.008509453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004976306">
            <text:p>0.004976306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-0.005308761">
            <text:p>-0.005308761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005429629">
            <text:p>0.005429629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005224462">
            <text:p>0.005224462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006670759">
            <text:p>0.006670759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0082673">
            <text:p>0.0082673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-0.004222486">
            <text:p>-0.004222486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001037844">
            <text:p>0.001037844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006460098">
            <text:p>0.006460098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-0.006960872">
            <text:p>-0.006960872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001852278">
            <text:p>0.001852278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0005813097">
            <text:p>0.0005813097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003871031">
            <text:p>0.003871031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-0.003903159">
            <text:p>-0.003903159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-0.01178898">
            <text:p>-0.01178898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-0.0013528">
            <text:p>-0.0013528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004888027">
            <text:p>0.004888027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-0.001074865">
            <text:p>-0.001074865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001661736">
            <text:p>0.001661736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-0.001851106">
            <text:p>-0.001851106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01282343">
            <text:p>0.01282343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-0.0002900221">
            <text:p>-0.0002900221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001589608">
            <text:p>0.001589608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-0.001549348">
            <text:p>-0.001549348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-0.004066539">
            <text:p>-0.004066539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-0.00653503">
            <text:p>-0.00653503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-0.00214769">
            <text:p>-0.00214769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-0.001240598">
            <text:p>-0.001240598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01230756">
            <text:p>0.01230756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02798315">
            <text:p>0.02798315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-0.006138414">
            <text:p>-0.006138414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0004371598">
            <text:p>0.0004371598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006042646">
            <text:p>0.006042646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-0.005869349">
            <text:p>-0.005869349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0007310716">
            <text:p>0.0007310716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01208355">
            <text:p>0.01208355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0011333">
            <text:p>0.0011333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00404613">
            <text:p>0.00404613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-0.0001218716">
            <text:p>-0.0001218716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-0.003470365">
            <text:p>-0.003470365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005761669">
            <text:p>0.005761669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01196403">
            <text:p>0.01196403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005015624">
            <text:p>0.005015624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01862193">
            <text:p>0.01862193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007407189">
            <text:p>0.007407189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-0.008396984">
            <text:p>-0.008396984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-0.009030523">
            <text:p>-0.009030523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002705695">
            <text:p>0.002705695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-0.0003145831">
            <text:p>-0.0003145831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004369468">
            <text:p>0.004369468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-0.002544329">
            <text:p>-0.002544329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003100433">
            <text:p>0.003100433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002264539">
            <text:p>0.002264539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-0.003288633">
            <text:p>-0.003288633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-0.006030976">
            <text:p>-0.006030976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01475557">
            <text:p>0.01475557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-0.003840133">
            <text:p>-0.003840133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-0.0001131879">
            <text:p>-0.0001131879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-0.004958685">
            <text:p>-0.004958685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-0.00185305">
            <text:p>-0.00185305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-0.005119713">
            <text:p>-0.005119713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-0.007361154">
            <text:p>-0.007361154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-0.001688691">
            <text:p>-0.001688691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02138366">
            <text:p>0.02138366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002435309">
            <text:p>0.002435309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-0.007837514">
            <text:p>-0.007837514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001995293">
            <text:p>0.001995293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007552606">
            <text:p>0.007552606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-0.006024871">
            <text:p>-0.006024871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-0.004717612">
            <text:p>-0.004717612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-0.001533241">
            <text:p>-0.001533241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-0.005106553">
            <text:p>-0.005106553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01096093">
            <text:p>0.01096093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002096449">
            <text:p>0.002096449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0370065">
            <text:p>0.0370065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0101632">
            <text:p>0.0101632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001909475">
            <text:p>0.001909475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-0.00442084">
            <text:p>-0.00442084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003890256">
            <text:p>0.003890256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001315749">
            <text:p>0.001315749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01516144">
            <text:p>0.01516144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-0.00870139">
            <text:p>-0.00870139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01633217">
            <text:p>0.01633217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006251852">
            <text:p>0.006251852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002192474">
            <text:p>0.002192474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001617343">
            <text:p>0.001617343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002488189">
            <text:p>0.002488189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-0.001785367">
            <text:p>-0.001785367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-0.006001584">
            <text:p>-0.006001584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-0.009562645">
            <text:p>-0.009562645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008530992">
            <text:p>0.008530992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003635986">
            <text:p>0.003635986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004691268">
            <text:p>0.004691268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-0.009484435">
            <text:p>-0.009484435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01897487">
            <text:p>0.01897487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007162536">
            <text:p>0.007162536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-0.007460907">
            <text:p>-0.007460907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-0.006237732">
            <text:p>-0.006237732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002203288">
            <text:p>0.002203288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01979801">
            <text:p>0.01979801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-0.003203593">
            <text:p>-0.003203593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-0.002376697">
            <text:p>-0.002376697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007152327">
            <text:p>0.007152327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006994688">
            <text:p>0.006994688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-0.003635508">
            <text:p>-0.003635508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-0.01193113">
            <text:p>-0.01193113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-0.001402764">
            <text:p>-0.001402764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-0.004621134">
            <text:p>-0.004621134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-0.003797667">
            <text:p>-0.003797667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011683">
            <text:p>0.011683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-0.004966202">
            <text:p>-0.004966202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01256986">
            <text:p>0.01256986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-0.004917577">
            <text:p>-0.004917577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007010137">
            <text:p>0.007010137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01244747">
            <text:p>0.01244747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002348303">
            <text:p>0.002348303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0176544">
            <text:p>0.0176544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-0.006079286">
            <text:p>-0.006079286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004664968">
            <text:p>0.004664968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-0.000222942">
            <text:p>-0.000222942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-0.007017632">
            <text:p>-0.007017632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-0.01009773">
            <text:p>-0.01009773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008026392">
            <text:p>0.008026392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005228405">
            <text:p>0.005228405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-0.006324034">
            <text:p>-0.006324034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-0.0003350507">
            <text:p>-0.0003350507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01059326">
            <text:p>0.01059326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-0.005072627">
            <text:p>-0.005072627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0176481">
            <text:p>0.0176481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01226823">
            <text:p>0.01226823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003978378">
            <text:p>0.003978378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001567773">
            <text:p>0.001567773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-0.002263828">
            <text:p>-0.002263828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-0.010484">
            <text:p>-0.010484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005067546">
            <text:p>0.005067546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01354873">
            <text:p>0.01354873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-0.001391127">
            <text:p>-0.001391127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004587953">
            <text:p>0.004587953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002862568">
            <text:p>0.002862568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003128483">
            <text:p>0.003128483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0.001571158">
            <text:p>0.001571158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002337605">
            <text:p>0.002337605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003616843">
            <text:p>0.003616843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0.001406562">
            <text:p>0.001406562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-0.005144075">
            <text:p>-0.005144075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-0.007648236">
            <text:p>-0.007648236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005486266">
            <text:p>0.005486266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04935159">
            <text:p>0.04935159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009085837">
            <text:p>0.009085837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003759074">
            <text:p>0.003759074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005336609">
            <text:p>0.005336609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0.001907347">
            <text:p>0.001907347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004034293">
            <text:p>0.004034293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005976861">
            <text:p>0.005976861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-0.0002263345">
            <text:p>-0.0002263345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0.001699661">
            <text:p>0.001699661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0.002980226">
            <text:p>0.002980226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-0.0004023925">
            <text:p>-0.0004023925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007094153">
            <text:p>0.007094153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02719738">
            <text:p>0.02719738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006698263">
            <text:p>0.006698263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02090868">
            <text:p>0.02090868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-0.001862039">
            <text:p>-0.001862039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0.001542967">
            <text:p>0.001542967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00417554">
            <text:p>0.00417554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-0.004544949">
            <text:p>-0.004544949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01141878">
            <text:p>0.01141878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string">
            <text:p>-9.189473E-05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-0.0008072266">
            <text:p>-0.0008072266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02599045">
            <text:p>0.02599045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0.003226311">
            <text:p>0.003226311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01199955">
            <text:p>0.01199955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009805204">
            <text:p>0.009805204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-0.00326339">
            <text:p>-0.00326339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01737065">
            <text:p>0.01737065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01291366">
            <text:p>0.01291366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0.005140118">
            <text:p>0.005140118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01119542">
            <text:p>0.01119542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0.001814703">
            <text:p>0.001814703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0.002943388">
            <text:p>0.002943388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01288361">
            <text:p>0.01288361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-0.002736803">
            <text:p>-0.002736803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0.005495481">
            <text:p>0.005495481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0.001074012">
            <text:p>0.001074012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-0.0007044162">
            <text:p>-0.0007044162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0106363">
            <text:p>0.0106363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007571319">
            <text:p>0.007571319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008270024">
            <text:p>0.008270024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-0.001801197">
            <text:p>-0.001801197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0.003137463">
            <text:p>0.003137463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0.004424245">
            <text:p>0.004424245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01266949">
            <text:p>0.01266949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01726457">
            <text:p>0.01726457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01595144">
            <text:p>0.01595144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0.008772766">
            <text:p>0.008772766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0.005818366">
            <text:p>0.005818366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-0.00258475">
            <text:p>-0.00258475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0.0009175839">
            <text:p>0.0009175839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0.00653428">
            <text:p>0.00653428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00988765">
            <text:p>0.00988765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02854497">
            <text:p>0.02854497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0.008058485">
            <text:p>0.008058485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01270454">
            <text:p>0.01270454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0.01031337">
            <text:p>0.01031337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01371092">
            <text:p>0.01371092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0.007154157">
            <text:p>0.007154157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01437663">
            <text:p>0.01437663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0.01013431">
            <text:p>0.01013431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01413546">
            <text:p>0.01413546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0.0001156258">
            <text:p>0.0001156258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04402173">
            <text:p>0.04402173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01552716">
            <text:p>0.01552716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03991458">
            <text:p>0.03991458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01565871">
            <text:p>0.01565871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04439518">
            <text:p>0.04439518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0.01407504">
            <text:p>0.01407504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01941579">
            <text:p>0.01941579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0.006455341">
            <text:p>0.006455341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02304749">
            <text:p>0.02304749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01747258">
            <text:p>0.01747258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0.008399786">
            <text:p>0.008399786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01754619">
            <text:p>0.01754619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0.01563504">
            <text:p>0.01563504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0.01649318">
            <text:p>0.01649318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0.0148913">
            <text:p>0.0148913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0.008605152">
            <text:p>0.008605152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02505157">
            <text:p>0.02505157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0.01169503">
            <text:p>0.01169503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0.01185935">
            <text:p>0.01185935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0.01900797">
            <text:p>0.01900797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0.01857219">
            <text:p>0.01857219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03416783">
            <text:p>0.03416783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0.01974399">
            <text:p>0.01974399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0.01919198">
            <text:p>0.01919198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0.01517401">
            <text:p>0.01517401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0.02307399">
            <text:p>0.02307399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02643739">
            <text:p>0.02643739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0.02174889">
            <text:p>0.02174889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03517675">
            <text:p>0.03517675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0.02465147">
            <text:p>0.02465147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02896552">
            <text:p>0.02896552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04196038">
            <text:p>0.04196038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0.02776984">
            <text:p>0.02776984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0.02000783">
            <text:p>0.02000783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03386182">
            <text:p>0.03386182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0334123">
            <text:p>0.0334123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0.02645433">
            <text:p>0.02645433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04206321">
            <text:p>0.04206321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0.03281325">
            <text:p>0.03281325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0.02800223">
            <text:p>0.02800223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04522373">
            <text:p>0.04522373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0.03463542">
            <text:p>0.03463542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04335597">
            <text:p>0.04335597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0.027916">
            <text:p>0.027916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04226459">
            <text:p>0.04226459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04707709">
            <text:p>0.04707709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0.03364233">
            <text:p>0.03364233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04475698">
            <text:p>0.04475698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0.03875374">
            <text:p>0.03875374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0.04136175">
            <text:p>0.04136175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04781353">
            <text:p>0.04781353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0.04489365">
            <text:p>0.04489365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05045712">
            <text:p>0.05045712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05684203">
            <text:p>0.05684203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0.04376139">
            <text:p>0.04376139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05614462">
            <text:p>0.05614462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05799142">
            <text:p>0.05799142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05962203">
            <text:p>0.05962203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0.04739725">
            <text:p>0.04739725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05821492">
            <text:p>0.05821492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06270012">
            <text:p>0.06270012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06413707">
            <text:p>0.06413707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0.05079625">
            <text:p>0.05079625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0.06482839">
            <text:p>0.06482839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07193109">
            <text:p>0.07193109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07274116">
            <text:p>0.07274116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0702317">
            <text:p>0.0702317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08047371">
            <text:p>0.08047371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084904">
            <text:p>0.084904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08571342">
            <text:p>0.08571342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0.07182612">
            <text:p>0.07182612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0820934">
            <text:p>0.0820934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08421566">
            <text:p>0.08421566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08249139">
            <text:p>0.08249139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08583949">
            <text:p>0.08583949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09193022">
            <text:p>0.09193022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0.08534538">
            <text:p>0.08534538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09426793">
            <text:p>0.09426793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09674965">
            <text:p>0.09674965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09975846">
            <text:p>0.09975846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0.0895424">
            <text:p>0.0895424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1001438">
            <text:p>0.1001438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1036747">
            <text:p>0.1036747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0.1001521">
            <text:p>0.1001521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0.09361541">
            <text:p>0.09361541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0.1006314">
            <text:p>0.1006314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115944">
            <text:p>0.115944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0.1034832">
            <text:p>0.1034832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1191605">
            <text:p>0.1191605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0.11435">
            <text:p>0.11435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1256929">
            <text:p>0.1256929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0.1169422">
            <text:p>0.1169422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0.1160856">
            <text:p>0.1160856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0.1242806">
            <text:p>0.1242806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0.1239732">
            <text:p>0.1239732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1365429">
            <text:p>0.1365429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0.131917">
            <text:p>0.131917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1391087">
            <text:p>0.1391087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1518769">
            <text:p>0.1518769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1486253">
            <text:p>0.1486253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1454805">
            <text:p>0.1454805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156991">
            <text:p>0.156991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0.142363">
            <text:p>0.142363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1563032">
            <text:p>0.1563032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0.1536644">
            <text:p>0.1536644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0.1602128">
            <text:p>0.1602128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1724899">
            <text:p>0.1724899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1714397">
            <text:p>0.1714397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1706263">
            <text:p>0.1706263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1736496">
            <text:p>0.1736496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0.1709916">
            <text:p>0.1709916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181481">
            <text:p>0.181481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0.1715703">
            <text:p>0.1715703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1879676">
            <text:p>0.1879676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0.177688">
            <text:p>0.177688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2037444">
            <text:p>0.2037444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0.1917897">
            <text:p>0.1917897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0.1890876">
            <text:p>0.1890876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2033134">
            <text:p>0.2033134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0.1967694">
            <text:p>0.1967694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216396">
            <text:p>0.216396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0.2058186">
            <text:p>0.2058186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211673">
            <text:p>0.211673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2265665">
            <text:p>0.2265665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0.2137943">
            <text:p>0.2137943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0.2169421">
            <text:p>0.2169421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0.2189476">
            <text:p>0.2189476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0.2220496">
            <text:p>0.2220496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2312364">
            <text:p>0.2312364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2493949">
            <text:p>0.2493949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0.2272118">
            <text:p>0.2272118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2486709">
            <text:p>0.2486709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2430867">
            <text:p>0.2430867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0.2393535">
            <text:p>0.2393535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0.2368588">
            <text:p>0.2368588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2499856">
            <text:p>0.2499856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0.2494152">
            <text:p>0.2494152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2743638">
            <text:p>0.2743638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2616633">
            <text:p>0.2616633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260236">
            <text:p>0.260236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264364">
            <text:p>0.264364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0.2618919">
            <text:p>0.2618919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0.2640485">
            <text:p>0.2640485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0.2657384">
            <text:p>0.2657384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0.2750029">
            <text:p>0.2750029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0.2766133">
            <text:p>0.2766133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2823806">
            <text:p>0.2823806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2854621">
            <text:p>0.2854621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2893157">
            <text:p>0.2893157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2967169">
            <text:p>0.2967169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2985865">
            <text:p>0.2985865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0.2879525">
            <text:p>0.2879525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2974136">
            <text:p>0.2974136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0.2957279">
            <text:p>0.2957279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3137188">
            <text:p>0.3137188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3163632">
            <text:p>0.3163632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3125889">
            <text:p>0.3125889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313739">
            <text:p>0.313739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3116327">
            <text:p>0.3116327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3147214">
            <text:p>0.3147214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3258622">
            <text:p>0.3258622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3206147">
            <text:p>0.3206147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0.3185377">
            <text:p>0.3185377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3417706">
            <text:p>0.3417706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3294097">
            <text:p>0.3294097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0.3207827">
            <text:p>0.3207827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334248">
            <text:p>0.334248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0.3337807">
            <text:p>0.3337807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3374232">
            <text:p>0.3374232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0.3274717">
            <text:p>0.3274717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0.3338985">
            <text:p>0.3338985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0.3408272">
            <text:p>0.3408272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3552457">
            <text:p>0.3552457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0.3449866">
            <text:p>0.3449866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3506561">
            <text:p>0.3506561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3551475">
            <text:p>0.3551475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3599698">
            <text:p>0.3599698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0.3514114">
            <text:p>0.3514114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3600246">
            <text:p>0.3600246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3604762">
            <text:p>0.3604762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361166">
            <text:p>0.361166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369179">
            <text:p>0.369179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0.3539806">
            <text:p>0.3539806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3677993">
            <text:p>0.3677993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3756543">
            <text:p>0.3756543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3673566">
            <text:p>0.3673566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3738748">
            <text:p>0.3738748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3763093">
            <text:p>0.3763093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3710108">
            <text:p>0.3710108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0.3672953">
            <text:p>0.3672953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3833333">
            <text:p>0.3833333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4017674">
            <text:p>0.4017674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0.3741488">
            <text:p>0.3741488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0.3756714">
            <text:p>0.3756714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387728">
            <text:p>0.387728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3827572">
            <text:p>0.3827572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0.3831246">
            <text:p>0.3831246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3897234">
            <text:p>0.3897234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3856193">
            <text:p>0.3856193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3992077">
            <text:p>0.3992077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0.3870823">
            <text:p>0.3870823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0.381386">
            <text:p>0.381386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4016238">
            <text:p>0.4016238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4076722">
            <text:p>0.4076722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0.3879687">
            <text:p>0.3879687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4030852">
            <text:p>0.4030852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398205">
            <text:p>0.398205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3994998">
            <text:p>0.3994998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3989339">
            <text:p>0.3989339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0.3889586">
            <text:p>0.3889586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0.3927008">
            <text:p>0.3927008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0.3924839">
            <text:p>0.3924839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4030748">
            <text:p>0.4030748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4139543">
            <text:p>0.4139543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0.393364">
            <text:p>0.393364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4058034">
            <text:p>0.4058034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4170478">
            <text:p>0.4170478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0.3961791">
            <text:p>0.3961791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0.3973491">
            <text:p>0.3973491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4051691">
            <text:p>0.4051691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3989762">
            <text:p>0.3989762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0.393843">
            <text:p>0.393843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4142701">
            <text:p>0.4142701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4146532">
            <text:p>0.4146532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4070958">
            <text:p>0.4070958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4143749">
            <text:p>0.4143749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4368316">
            <text:p>0.4368316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4082694">
            <text:p>0.4082694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4091514">
            <text:p>0.4091514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4155027">
            <text:p>0.4155027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4116101">
            <text:p>0.4116101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0.3987467">
            <text:p>0.3987467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4063465">
            <text:p>0.4063465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402371">
            <text:p>0.402371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4128979">
            <text:p>0.4128979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4097198">
            <text:p>0.4097198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4202005">
            <text:p>0.4202005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4109066">
            <text:p>0.4109066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4048588">
            <text:p>0.4048588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4103028">
            <text:p>0.4103028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412877">
            <text:p>0.412877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4007283">
            <text:p>0.4007283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4271871">
            <text:p>0.4271871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4118702">
            <text:p>0.4118702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404893">
            <text:p>0.404893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4091876">
            <text:p>0.4091876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4274091">
            <text:p>0.4274091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4155464">
            <text:p>0.4155464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4105333">
            <text:p>0.4105333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4037943">
            <text:p>0.4037943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4196541">
            <text:p>0.4196541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4079192">
            <text:p>0.4079192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4110462">
            <text:p>0.4110462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4039583">
            <text:p>0.4039583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4254949">
            <text:p>0.4254949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4291418">
            <text:p>0.4291418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396972">
            <text:p>0.396972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3991941">
            <text:p>0.3991941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410341">
            <text:p>0.410341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4121795">
            <text:p>0.4121795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3875793">
            <text:p>0.3875793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4042732">
            <text:p>0.4042732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4071022">
            <text:p>0.4071022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4185165">
            <text:p>0.4185165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385598">
            <text:p>0.385598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3998706">
            <text:p>0.3998706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4002933">
            <text:p>0.4002933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4051573">
            <text:p>0.4051573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3971348">
            <text:p>0.3971348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384993">
            <text:p>0.384993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3829558">
            <text:p>0.3829558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3900681">
            <text:p>0.3900681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3909777">
            <text:p>0.3909777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3759879">
            <text:p>0.3759879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3885324">
            <text:p>0.3885324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4004799">
            <text:p>0.4004799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3993462">
            <text:p>0.3993462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383883">
            <text:p>0.383883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3806691">
            <text:p>0.3806691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3844548">
            <text:p>0.3844548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3753119">
            <text:p>0.3753119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3824611">
            <text:p>0.3824611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3816893">
            <text:p>0.3816893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3807032">
            <text:p>0.3807032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3682277">
            <text:p>0.3682277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3825062">
            <text:p>0.3825062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3709811">
            <text:p>0.3709811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3935523">
            <text:p>0.3935523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371289">
            <text:p>0.371289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3811886">
            <text:p>0.3811886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3671431">
            <text:p>0.3671431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3638568">
            <text:p>0.3638568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361578">
            <text:p>0.361578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3667542">
            <text:p>0.3667542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3731411">
            <text:p>0.3731411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3581274">
            <text:p>0.3581274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3570656">
            <text:p>0.3570656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3678664">
            <text:p>0.3678664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359372">
            <text:p>0.359372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3610312">
            <text:p>0.3610312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3691955">
            <text:p>0.3691955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3546112">
            <text:p>0.3546112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3591182">
            <text:p>0.3591182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35216">
            <text:p>0.35216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3539198">
            <text:p>0.3539198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3497303">
            <text:p>0.3497303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3496875">
            <text:p>0.3496875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3449623">
            <text:p>0.3449623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3527105">
            <text:p>0.3527105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35024">
            <text:p>0.35024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3487247">
            <text:p>0.3487247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3480985">
            <text:p>0.3480985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350638">
            <text:p>0.350638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3395626">
            <text:p>0.3395626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3619484">
            <text:p>0.3619484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3371887">
            <text:p>0.3371887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3504565">
            <text:p>0.3504565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3344348">
            <text:p>0.3344348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3315181">
            <text:p>0.3315181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3328213">
            <text:p>0.3328213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3306034">
            <text:p>0.3306034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3396293">
            <text:p>0.3396293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3348772">
            <text:p>0.3348772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3251781">
            <text:p>0.3251781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3374452">
            <text:p>0.3374452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3390244">
            <text:p>0.3390244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3263924">
            <text:p>0.3263924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3416588">
            <text:p>0.3416588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3189529">
            <text:p>0.3189529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321392">
            <text:p>0.321392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3335592">
            <text:p>0.3335592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3236663">
            <text:p>0.3236663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3281396">
            <text:p>0.3281396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3130473">
            <text:p>0.3130473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3258741">
            <text:p>0.3258741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3106456">
            <text:p>0.3106456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3144206">
            <text:p>0.3144206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3172331">
            <text:p>0.3172331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3097371">
            <text:p>0.3097371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3283599">
            <text:p>0.3283599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3086515">
            <text:p>0.3086515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3074739">
            <text:p>0.3074739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3087736">
            <text:p>0.3087736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3082943">
            <text:p>0.3082943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3186294">
            <text:p>0.3186294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3350124">
            <text:p>0.3350124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2992907">
            <text:p>0.2992907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3049484">
            <text:p>0.3049484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30884">
            <text:p>0.30884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3008581">
            <text:p>0.3008581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304611">
            <text:p>0.304611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2974111">
            <text:p>0.2974111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294372">
            <text:p>0.294372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297959">
            <text:p>0.297959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2922435">
            <text:p>0.2922435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2919417">
            <text:p>0.2919417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3010861">
            <text:p>0.3010861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307303">
            <text:p>0.307303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2971968">
            <text:p>0.2971968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2912795">
            <text:p>0.2912795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2908268">
            <text:p>0.2908268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3003441">
            <text:p>0.3003441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2935185">
            <text:p>0.2935185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2871931">
            <text:p>0.2871931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2873916">
            <text:p>0.2873916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2965699">
            <text:p>0.2965699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297143">
            <text:p>0.297143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2886498">
            <text:p>0.2886498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2944094">
            <text:p>0.2944094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2805774">
            <text:p>0.2805774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2759484">
            <text:p>0.2759484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2799675">
            <text:p>0.2799675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2799081">
            <text:p>0.2799081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281594">
            <text:p>0.281594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2833856">
            <text:p>0.2833856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2770327">
            <text:p>0.2770327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2784954">
            <text:p>0.2784954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2740702">
            <text:p>0.2740702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2707602">
            <text:p>0.2707602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2774548">
            <text:p>0.2774548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2660806">
            <text:p>0.2660806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2701777">
            <text:p>0.2701777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2980057">
            <text:p>0.2980057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2725328">
            <text:p>0.2725328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2643688">
            <text:p>0.2643688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2692851">
            <text:p>0.2692851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2634894">
            <text:p>0.2634894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2606939">
            <text:p>0.2606939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2729201">
            <text:p>0.2729201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2573075">
            <text:p>0.2573075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2725115">
            <text:p>0.2725115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2670552">
            <text:p>0.2670552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2617055">
            <text:p>0.2617055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2682502">
            <text:p>0.2682502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2705879">
            <text:p>0.2705879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261175">
            <text:p>0.261175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2609647">
            <text:p>0.2609647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258871">
            <text:p>0.258871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2479519">
            <text:p>0.2479519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2625298">
            <text:p>0.2625298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2608106">
            <text:p>0.2608106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2519235">
            <text:p>0.2519235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2752733">
            <text:p>0.2752733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2479257">
            <text:p>0.2479257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2536222">
            <text:p>0.2536222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2589723">
            <text:p>0.2589723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2442719">
            <text:p>0.2442719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2461018">
            <text:p>0.2461018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2501486">
            <text:p>0.2501486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2525902">
            <text:p>0.2525902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2521221">
            <text:p>0.2521221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2603105">
            <text:p>0.2603105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2539986">
            <text:p>0.2539986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252325">
            <text:p>0.252325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2422252">
            <text:p>0.2422252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2445145">
            <text:p>0.2445145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2547894">
            <text:p>0.2547894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246707">
            <text:p>0.246707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2513098">
            <text:p>0.2513098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2371546">
            <text:p>0.2371546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2458714">
            <text:p>0.2458714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2487758">
            <text:p>0.2487758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2521392">
            <text:p>0.2521392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2415699">
            <text:p>0.2415699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241154">
            <text:p>0.241154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2431589">
            <text:p>0.2431589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2494978">
            <text:p>0.2494978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2403969">
            <text:p>0.2403969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234623">
            <text:p>0.234623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2320046">
            <text:p>0.2320046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2362055">
            <text:p>0.2362055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2318701">
            <text:p>0.2318701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2413854">
            <text:p>0.2413854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2268543">
            <text:p>0.2268543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2317524">
            <text:p>0.2317524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2275697">
            <text:p>0.2275697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2250804">
            <text:p>0.2250804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2358052">
            <text:p>0.2358052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2234673">
            <text:p>0.2234673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2300578">
            <text:p>0.2300578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2258234">
            <text:p>0.2258234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2295416">
            <text:p>0.2295416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2196892">
            <text:p>0.2196892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2630432">
            <text:p>0.2630432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233008">
            <text:p>0.233008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2209357">
            <text:p>0.2209357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2220227">
            <text:p>0.2220227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2310982">
            <text:p>0.2310982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2300435">
            <text:p>0.2300435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2173336">
            <text:p>0.2173336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2168757">
            <text:p>0.2168757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2276614">
            <text:p>0.2276614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2191379">
            <text:p>0.2191379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2329483">
            <text:p>0.2329483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2172031">
            <text:p>0.2172031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2308598">
            <text:p>0.2308598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21981">
            <text:p>0.21981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2212882">
            <text:p>0.2212882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2102418">
            <text:p>0.2102418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2123211">
            <text:p>0.2123211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2335868">
            <text:p>0.2335868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2127105">
            <text:p>0.2127105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2076513">
            <text:p>0.2076513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2073914">
            <text:p>0.2073914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2119105">
            <text:p>0.2119105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2074262">
            <text:p>0.2074262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2050756">
            <text:p>0.2050756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2032886">
            <text:p>0.2032886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1996286">
            <text:p>0.1996286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2163835">
            <text:p>0.2163835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2040512">
            <text:p>0.2040512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2069879">
            <text:p>0.2069879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2080306">
            <text:p>0.2080306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2054038">
            <text:p>0.2054038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2039802">
            <text:p>0.2039802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2056981">
            <text:p>0.2056981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2102136">
            <text:p>0.2102136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1985123">
            <text:p>0.1985123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2023986">
            <text:p>0.2023986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2072286">
            <text:p>0.2072286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2020998">
            <text:p>0.2020998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1990586">
            <text:p>0.1990586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2036041">
            <text:p>0.2036041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2149353">
            <text:p>0.2149353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2232437">
            <text:p>0.2232437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2013479">
            <text:p>0.2013479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2093155">
            <text:p>0.2093155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1922992">
            <text:p>0.1922992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1970426">
            <text:p>0.1970426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1963544">
            <text:p>0.1963544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2056802">
            <text:p>0.2056802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1984958">
            <text:p>0.1984958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2009464">
            <text:p>0.2009464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1950652">
            <text:p>0.1950652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2087314">
            <text:p>0.2087314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1946158">
            <text:p>0.1946158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1970622">
            <text:p>0.1970622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1944513">
            <text:p>0.1944513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1910044">
            <text:p>0.1910044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193917">
            <text:p>0.193917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1915893">
            <text:p>0.1915893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2042632">
            <text:p>0.2042632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1921834">
            <text:p>0.1921834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1849653">
            <text:p>0.1849653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2098528">
            <text:p>0.2098528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195899">
            <text:p>0.195899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1965898">
            <text:p>0.1965898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189617">
            <text:p>0.189617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1846928">
            <text:p>0.1846928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1974447">
            <text:p>0.1974447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1913029">
            <text:p>0.1913029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1861537">
            <text:p>0.1861537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192694">
            <text:p>0.192694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1814678">
            <text:p>0.1814678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1854507">
            <text:p>0.1854507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1963379">
            <text:p>0.1963379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1963228">
            <text:p>0.1963228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1883151">
            <text:p>0.1883151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1727371">
            <text:p>0.1727371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1897624">
            <text:p>0.1897624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176302">
            <text:p>0.176302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1797711">
            <text:p>0.1797711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1856257">
            <text:p>0.1856257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1869744">
            <text:p>0.1869744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1791859">
            <text:p>0.1791859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186274">
            <text:p>0.186274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1760099">
            <text:p>0.1760099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1728518">
            <text:p>0.1728518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1989004">
            <text:p>0.1989004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1711055">
            <text:p>0.1711055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1740475">
            <text:p>0.1740475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1667988">
            <text:p>0.1667988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1761318">
            <text:p>0.1761318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1661116">
            <text:p>0.1661116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1762769">
            <text:p>0.1762769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1751594">
            <text:p>0.1751594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1714234">
            <text:p>0.1714234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1705102">
            <text:p>0.1705102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172665">
            <text:p>0.172665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1720067">
            <text:p>0.1720067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1675479">
            <text:p>0.1675479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1743433">
            <text:p>0.1743433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1756941">
            <text:p>0.1756941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1601816">
            <text:p>0.1601816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1723066">
            <text:p>0.1723066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1732342">
            <text:p>0.1732342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1593463">
            <text:p>0.1593463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1624189">
            <text:p>0.1624189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1525456">
            <text:p>0.1525456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1642023">
            <text:p>0.1642023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1671235">
            <text:p>0.1671235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1703921">
            <text:p>0.1703921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1704691">
            <text:p>0.1704691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1623819">
            <text:p>0.1623819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1621184">
            <text:p>0.1621184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159104">
            <text:p>0.159104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1529946">
            <text:p>0.1529946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1547981">
            <text:p>0.1547981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1544545">
            <text:p>0.1544545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1510239">
            <text:p>0.1510239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1717276">
            <text:p>0.1717276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1576487">
            <text:p>0.1576487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1520635">
            <text:p>0.1520635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1562901">
            <text:p>0.1562901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1679484">
            <text:p>0.1679484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164711">
            <text:p>0.164711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1515971">
            <text:p>0.1515971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1495388">
            <text:p>0.1495388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147567">
            <text:p>0.147567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154817">
            <text:p>0.154817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1502514">
            <text:p>0.1502514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1528387">
            <text:p>0.1528387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1464496">
            <text:p>0.1464496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1596428">
            <text:p>0.1596428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1604919">
            <text:p>0.1604919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1529799">
            <text:p>0.1529799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1601157">
            <text:p>0.1601157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142831">
            <text:p>0.142831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1563038">
            <text:p>0.1563038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1438778">
            <text:p>0.1438778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1495132">
            <text:p>0.1495132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1413434">
            <text:p>0.1413434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1414121">
            <text:p>0.1414121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1401218">
            <text:p>0.1401218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162921">
            <text:p>0.162921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1537077">
            <text:p>0.1537077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1453607">
            <text:p>0.1453607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1450188">
            <text:p>0.1450188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1480217">
            <text:p>0.1480217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1606641">
            <text:p>0.1606641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1505237">
            <text:p>0.1505237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1335128">
            <text:p>0.1335128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1390906">
            <text:p>0.1390906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1388603">
            <text:p>0.1388603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1359328">
            <text:p>0.1359328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1421208">
            <text:p>0.1421208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1519289">
            <text:p>0.1519289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1407471">
            <text:p>0.1407471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1400655">
            <text:p>0.1400655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1271542">
            <text:p>0.1271542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1313519">
            <text:p>0.1313519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1276422">
            <text:p>0.1276422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1478007">
            <text:p>0.1478007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1388548">
            <text:p>0.1388548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1368687">
            <text:p>0.1368687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1322051">
            <text:p>0.1322051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1316991">
            <text:p>0.1316991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1336549">
            <text:p>0.1336549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1286814">
            <text:p>0.1286814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1291169">
            <text:p>0.1291169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1443007">
            <text:p>0.1443007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1329538">
            <text:p>0.1329538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128414">
            <text:p>0.128414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1224155">
            <text:p>0.1224155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1292299">
            <text:p>0.1292299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1225928">
            <text:p>0.1225928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1326366">
            <text:p>0.1326366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1283127">
            <text:p>0.1283127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124961">
            <text:p>0.124961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1207752">
            <text:p>0.1207752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1147868">
            <text:p>0.1147868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1250626">
            <text:p>0.1250626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1270647">
            <text:p>0.1270647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1229145">
            <text:p>0.1229145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1225451">
            <text:p>0.1225451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1254981">
            <text:p>0.1254981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116977">
            <text:p>0.116977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1286714">
            <text:p>0.1286714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1292371">
            <text:p>0.1292371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1160355">
            <text:p>0.1160355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1113832">
            <text:p>0.1113832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1283022">
            <text:p>0.1283022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111861">
            <text:p>0.111861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1176545">
            <text:p>0.1176545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1132208">
            <text:p>0.1132208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1176106">
            <text:p>0.1176106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1200051">
            <text:p>0.1200051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1105688">
            <text:p>0.1105688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1047286">
            <text:p>0.1047286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108633">
            <text:p>0.108633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1066757">
            <text:p>0.1066757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1014923">
            <text:p>0.1014923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1094448">
            <text:p>0.1094448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1264544">
            <text:p>0.1264544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1055267">
            <text:p>0.1055267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103787">
            <text:p>0.103787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1038772">
            <text:p>0.1038772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1149557">
            <text:p>0.1149557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1048488">
            <text:p>0.1048488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1093681">
            <text:p>0.1093681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1084242">
            <text:p>0.1084242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1312309">
            <text:p>0.1312309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1086073">
            <text:p>0.1086073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1094948">
            <text:p>0.1094948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1026716">
            <text:p>0.1026716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1129992">
            <text:p>0.1129992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1015751">
            <text:p>0.1015751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1036185">
            <text:p>0.1036185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1003448">
            <text:p>0.1003448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1020236">
            <text:p>0.1020236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1077785">
            <text:p>0.1077785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9697206">
            <text:p>0.09697206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113876">
            <text:p>0.113876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9646291">
            <text:p>0.09646291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9179684">
            <text:p>0.09179684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944814">
            <text:p>0.0944814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1001355">
            <text:p>0.1001355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9674572">
            <text:p>0.09674572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1057847">
            <text:p>0.1057847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9240239">
            <text:p>0.09240239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960919">
            <text:p>0.0960919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1030067">
            <text:p>0.1030067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9508949">
            <text:p>0.09508949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1165513">
            <text:p>0.1165513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1014513">
            <text:p>0.1014513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926744">
            <text:p>0.0926744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1000916">
            <text:p>0.1000916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1013467">
            <text:p>0.1013467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1005523">
            <text:p>0.1005523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9025977">
            <text:p>0.09025977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9509313">
            <text:p>0.09509313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1078679">
            <text:p>0.1078679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874864">
            <text:p>0.0874864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9831344">
            <text:p>0.09831344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8258625">
            <text:p>0.08258625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103152">
            <text:p>0.103152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869627">
            <text:p>0.0869627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9527273">
            <text:p>0.09527273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8988084">
            <text:p>0.08988084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8381549">
            <text:p>0.08381549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9100893">
            <text:p>0.09100893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7937914">
            <text:p>0.07937914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1045067">
            <text:p>0.1045067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919414">
            <text:p>0.0919414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8925884">
            <text:p>0.08925884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7889175">
            <text:p>0.07889175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8276065">
            <text:p>0.08276065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8175671">
            <text:p>0.08175671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7518104">
            <text:p>0.07518104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108104">
            <text:p>0.108104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7968342">
            <text:p>0.07968342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7841244">
            <text:p>0.07841244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8359998">
            <text:p>0.08359998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7469421">
            <text:p>0.07469421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7624366">
            <text:p>0.07624366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101989">
            <text:p>0.101989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8171332">
            <text:p>0.08171332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1054122">
            <text:p>0.1054122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7041053">
            <text:p>0.07041053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877689">
            <text:p>0.0877689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914415">
            <text:p>0.0914415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7523224">
            <text:p>0.07523224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7652392">
            <text:p>0.07652392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7738384">
            <text:p>0.07738384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728806">
            <text:p>0.0728806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7762274">
            <text:p>0.07762274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7942612">
            <text:p>0.07942612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7634675">
            <text:p>0.07634675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6799731">
            <text:p>0.06799731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714064">
            <text:p>0.0714064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79521">
            <text:p>0.079521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7401552">
            <text:p>0.07401552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6945964">
            <text:p>0.06945964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7477928">
            <text:p>0.07477928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7329777">
            <text:p>0.07329777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7136767">
            <text:p>0.07136767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6268405">
            <text:p>0.06268405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6237421">
            <text:p>0.06237421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705083">
            <text:p>0.0705083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8454807">
            <text:p>0.08454807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7643413">
            <text:p>0.07643413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7202046">
            <text:p>0.07202046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6952434">
            <text:p>0.06952434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7374687">
            <text:p>0.07374687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6125879">
            <text:p>0.06125879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660015">
            <text:p>0.0660015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7332554">
            <text:p>0.07332554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6716908">
            <text:p>0.06716908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6479114">
            <text:p>0.06479114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7068019">
            <text:p>0.07068019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7237255">
            <text:p>0.07237255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6110291">
            <text:p>0.06110291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5918518">
            <text:p>0.05918518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6900983">
            <text:p>0.06900983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7001195">
            <text:p>0.07001195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8202177">
            <text:p>0.08202177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5672295">
            <text:p>0.05672295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7811459">
            <text:p>0.07811459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6298748">
            <text:p>0.06298748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7855699">
            <text:p>0.07855699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6946149">
            <text:p>0.06946149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7195577">
            <text:p>0.07195577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7467244">
            <text:p>0.07467244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6304072">
            <text:p>0.06304072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5558908">
            <text:p>0.05558908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5691298">
            <text:p>0.05691298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7056902">
            <text:p>0.07056902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6776191">
            <text:p>0.06776191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5913369">
            <text:p>0.05913369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5576236">
            <text:p>0.05576236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5346353">
            <text:p>0.05346353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6642198">
            <text:p>0.06642198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7044598">
            <text:p>0.07044598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4997019">
            <text:p>0.04997019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6119321">
            <text:p>0.06119321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5013494">
            <text:p>0.05013494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5485412">
            <text:p>0.05485412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5413629">
            <text:p>0.05413629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5207922">
            <text:p>0.05207922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7653357">
            <text:p>0.07653357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6702226">
            <text:p>0.06702226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6621742">
            <text:p>0.06621742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5018064">
            <text:p>0.05018064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5395621">
            <text:p>0.05395621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5727282">
            <text:p>0.05727282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8148659">
            <text:p>0.08148659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6589722">
            <text:p>0.06589722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6605593">
            <text:p>0.06605593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4961419">
            <text:p>0.04961419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607965">
            <text:p>0.0607965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5355361">
            <text:p>0.05355361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478345">
            <text:p>0.0478345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5267996">
            <text:p>0.05267996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5620953">
            <text:p>0.05620953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6352434">
            <text:p>0.06352434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5328288">
            <text:p>0.05328288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5191827">
            <text:p>0.05191827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5891534">
            <text:p>0.05891534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6321958">
            <text:p>0.06321958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4674219">
            <text:p>0.04674219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5928248">
            <text:p>0.05928248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4960245">
            <text:p>0.04960245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6635936">
            <text:p>0.06635936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4343745">
            <text:p>0.04343745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5094881">
            <text:p>0.05094881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4991518">
            <text:p>0.04991518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6027199">
            <text:p>0.06027199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4909871">
            <text:p>0.04909871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5053585">
            <text:p>0.05053585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4714298">
            <text:p>0.04714298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4174186">
            <text:p>0.04174186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5564234">
            <text:p>0.05564234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7742577">
            <text:p>0.07742577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4209995">
            <text:p>0.04209995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4634817">
            <text:p>0.04634817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441173">
            <text:p>0.0441173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5647722">
            <text:p>0.05647722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3930316">
            <text:p>0.03930316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4630012">
            <text:p>0.04630012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447261">
            <text:p>0.0447261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4114057">
            <text:p>0.04114057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4050804">
            <text:p>0.04050804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4680827">
            <text:p>0.04680827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4235798">
            <text:p>0.04235798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6460207">
            <text:p>0.06460207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404655">
            <text:p>0.0404655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3742587">
            <text:p>0.03742587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5030203">
            <text:p>0.05030203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5310011">
            <text:p>0.05310011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4358012">
            <text:p>0.04358012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0.03352031">
            <text:p>0.03352031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6069118">
            <text:p>0.06069118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4999305">
            <text:p>0.04999305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3715136">
            <text:p>0.03715136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4529897">
            <text:p>0.04529897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4283923">
            <text:p>0.04283923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3742367">
            <text:p>0.03742367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3793715">
            <text:p>0.03793715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5149171">
            <text:p>0.05149171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516922">
            <text:p>0.0516922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4319878">
            <text:p>0.04319878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5073588">
            <text:p>0.05073588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3376491">
            <text:p>0.03376491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393987">
            <text:p>0.0393987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3363686">
            <text:p>0.03363686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3395891">
            <text:p>0.03395891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4361046">
            <text:p>0.04361046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5129028">
            <text:p>0.05129028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3385755">
            <text:p>0.03385755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598425">
            <text:p>0.0598425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4084689">
            <text:p>0.04084689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3660329">
            <text:p>0.03660329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3067713">
            <text:p>0.03067713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0.03034373">
            <text:p>0.03034373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3260234">
            <text:p>0.03260234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4952941">
            <text:p>0.04952941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5388106">
            <text:p>0.05388106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3431294">
            <text:p>0.03431294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3471915">
            <text:p>0.03471915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3172497">
            <text:p>0.03172497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5089291">
            <text:p>0.05089291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3929817">
            <text:p>0.03929817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0.0266069">
            <text:p>0.0266069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3347976">
            <text:p>0.03347976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3844964">
            <text:p>0.03844964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3312978">
            <text:p>0.03312978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3384173">
            <text:p>0.03384173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4967361">
            <text:p>0.04967361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3039384">
            <text:p>0.03039384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4857917">
            <text:p>0.04857917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3062234">
            <text:p>0.03062234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4551919">
            <text:p>0.04551919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3580871">
            <text:p>0.03580871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2968191">
            <text:p>0.02968191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428015">
            <text:p>0.0428015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4216675">
            <text:p>0.04216675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293742">
            <text:p>0.0293742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0.02520243">
            <text:p>0.02520243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0.02413947">
            <text:p>0.02413947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2888086">
            <text:p>0.02888086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2879106">
            <text:p>0.02879106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3601619">
            <text:p>0.03601619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4093048">
            <text:p>0.04093048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3279956">
            <text:p>0.03279956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2659933">
            <text:p>0.02659933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3623921">
            <text:p>0.03623921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3102381">
            <text:p>0.03102381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3382238">
            <text:p>0.03382238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2749799">
            <text:p>0.02749799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2598718">
            <text:p>0.02598718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2875803">
            <text:p>0.02875803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4051487">
            <text:p>0.04051487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0.02414937">
            <text:p>0.02414937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2757513">
            <text:p>0.02757513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3061516">
            <text:p>0.03061516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3801304">
            <text:p>0.03801304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330556">
            <text:p>0.0330556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3048045">
            <text:p>0.03048045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4167425">
            <text:p>0.04167425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3889265">
            <text:p>0.03889265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3565274">
            <text:p>0.03565274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3108707">
            <text:p>0.03108707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2872352">
            <text:p>0.02872352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4665152">
            <text:p>0.04665152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2316133">
            <text:p>0.02316133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2441255">
            <text:p>0.02441255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2730225">
            <text:p>0.02730225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269446">
            <text:p>0.0269446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2527134">
            <text:p>0.02527134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2610797">
            <text:p>0.02610797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349501">
            <text:p>0.0349501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3594224">
            <text:p>0.03594224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390902">
            <text:p>0.0390902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3666011">
            <text:p>0.03666011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28749">
            <text:p>0.028749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2377219">
            <text:p>0.02377219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280238">
            <text:p>0.0280238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2546764">
            <text:p>0.02546764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2311671">
            <text:p>0.02311671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2731115">
            <text:p>0.02731115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2570697">
            <text:p>0.02570697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0.02018332">
            <text:p>0.02018332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3466241">
            <text:p>0.03466241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2916117">
            <text:p>0.02916117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3780611">
            <text:p>0.03780611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2494304">
            <text:p>0.02494304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3137707">
            <text:p>0.03137707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5158279">
            <text:p>0.05158279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3144663">
            <text:p>0.03144663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2514682">
            <text:p>0.02514682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241824">
            <text:p>0.0241824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3134308">
            <text:p>0.03134308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2345387">
            <text:p>0.02345387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2857612">
            <text:p>0.02857612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4935456">
            <text:p>0.04935456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0.01994782">
            <text:p>0.01994782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4676549">
            <text:p>0.04676549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0.0184294">
            <text:p>0.0184294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4338936">
            <text:p>0.04338936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3381763">
            <text:p>0.03381763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2474957">
            <text:p>0.02474957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2751073">
            <text:p>0.02751073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2519661">
            <text:p>0.02519661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0.01571655">
            <text:p>0.01571655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2090656">
            <text:p>0.02090656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244809">
            <text:p>0.0244809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2599474">
            <text:p>0.02599474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2939236">
            <text:p>0.02939236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0.01699364">
            <text:p>0.01699364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2191254">
            <text:p>0.02191254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3986499">
            <text:p>0.03986499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278781">
            <text:p>0.0278781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2802432">
            <text:p>0.02802432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1934361">
            <text:p>0.01934361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0.01641255">
            <text:p>0.01641255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0.0179212">
            <text:p>0.0179212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2264849">
            <text:p>0.02264849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1890494">
            <text:p>0.01890494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2696721">
            <text:p>0.02696721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2151406">
            <text:p>0.02151406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2887268">
            <text:p>0.02887268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3052581">
            <text:p>0.03052581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233005">
            <text:p>0.0233005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3228555">
            <text:p>0.03228555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2182726">
            <text:p>0.02182726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2215469">
            <text:p>0.02215469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1980091">
            <text:p>0.01980091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2790359">
            <text:p>0.02790359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205069">
            <text:p>0.0205069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0.0158209">
            <text:p>0.0158209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2421938">
            <text:p>0.02421938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1809257">
            <text:p>0.01809257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1911375">
            <text:p>0.01911375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2456797">
            <text:p>0.02456797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0.01457078">
            <text:p>0.01457078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2040579">
            <text:p>0.02040579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0.01361808">
            <text:p>0.01361808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2512715">
            <text:p>0.02512715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0.01710404">
            <text:p>0.01710404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2303725">
            <text:p>0.02303725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0.01591279">
            <text:p>0.01591279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2300678">
            <text:p>0.02300678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3800074">
            <text:p>0.03800074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2455551">
            <text:p>0.02455551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4049246">
            <text:p>0.04049246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2314518">
            <text:p>0.02314518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3448638">
            <text:p>0.03448638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0.01315355">
            <text:p>0.01315355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0.01518385">
            <text:p>0.01518385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0.008443139">
            <text:p>0.008443139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2612546">
            <text:p>0.02612546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0.0150296">
            <text:p>0.0150296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2426417">
            <text:p>0.02426417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1839323">
            <text:p>0.01839323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1764452">
            <text:p>0.01764452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3387118">
            <text:p>0.03387118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181364">
            <text:p>0.0181364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2693371">
            <text:p>0.02693371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0.01048452">
            <text:p>0.01048452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1849184">
            <text:p>0.01849184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0.009525619">
            <text:p>0.009525619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1912979">
            <text:p>0.01912979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0.011612">
            <text:p>0.011612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0.008872561">
            <text:p>0.008872561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198242">
            <text:p>0.0198242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1615313">
            <text:p>0.01615313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3317306">
            <text:p>0.03317306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1672764">
            <text:p>0.01672764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1955781">
            <text:p>0.01955781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34552">
            <text:p>0.034552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1892814">
            <text:p>0.01892814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15889">
            <text:p>0.015889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2014014">
            <text:p>0.02014014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0.01363705">
            <text:p>0.01363705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3035508">
            <text:p>0.03035508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2473575">
            <text:p>0.02473575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2079179">
            <text:p>0.02079179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3097085">
            <text:p>0.03097085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2417528">
            <text:p>0.02417528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0.01156752">
            <text:p>0.01156752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0.01314205">
            <text:p>0.01314205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0.008470713">
            <text:p>0.008470713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2933387">
            <text:p>0.02933387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4352493">
            <text:p>0.04352493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0.01266812">
            <text:p>0.01266812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0.01047407">
            <text:p>0.01047407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154796">
            <text:p>0.0154796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0.01061899">
            <text:p>0.01061899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0.0124895">
            <text:p>0.0124895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0.008685862">
            <text:p>0.008685862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2065213">
            <text:p>0.02065213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1924459">
            <text:p>0.01924459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1524641">
            <text:p>0.01524641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167399">
            <text:p>0.0167399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1906884">
            <text:p>0.01906884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0.009259404">
            <text:p>0.009259404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1230067">
            <text:p>0.01230067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0.007779028">
            <text:p>0.007779028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2067549">
            <text:p>0.02067549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1720773">
            <text:p>0.01720773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2808334">
            <text:p>0.02808334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0.005055213">
            <text:p>0.005055213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0.009029004">
            <text:p>0.009029004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1454341">
            <text:p>0.01454341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0.006545992">
            <text:p>0.006545992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1779177">
            <text:p>0.01779177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1914687">
            <text:p>0.01914687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124992">
            <text:p>0.0124992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1499667">
            <text:p>0.01499667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2439799">
            <text:p>0.02439799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0.01093638">
            <text:p>0.01093638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1828787">
            <text:p>0.01828787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2279945">
            <text:p>0.02279945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1564591">
            <text:p>0.01564591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0.01056511">
            <text:p>0.01056511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0.008856278">
            <text:p>0.008856278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0.008130448">
            <text:p>0.008130448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1341665">
            <text:p>0.01341665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15236">
            <text:p>0.015236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2002499">
            <text:p>0.02002499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0.005445812">
            <text:p>0.005445812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0.009992828">
            <text:p>0.009992828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1274991">
            <text:p>0.01274991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1274413">
            <text:p>0.01274413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1501955">
            <text:p>0.01501955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123334">
            <text:p>0.0123334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155547">
            <text:p>0.0155547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1223908">
            <text:p>0.01223908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1378545">
            <text:p>0.01378545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1188018">
            <text:p>0.01188018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1742791">
            <text:p>0.01742791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1204921">
            <text:p>0.01204921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0.005651306">
            <text:p>0.005651306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1162686">
            <text:p>0.01162686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1591307">
            <text:p>0.01591307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1163693">
            <text:p>0.01163693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0.005408292">
            <text:p>0.005408292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1693362">
            <text:p>0.01693362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1815767">
            <text:p>0.01815767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1120129">
            <text:p>0.01120129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1716613">
            <text:p>0.01716613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0.00530174">
            <text:p>0.00530174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2376801">
            <text:p>0.02376801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962396">
            <text:p>0.01962396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1186245">
            <text:p>0.01186245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0.007093105">
            <text:p>0.007093105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260006">
            <text:p>0.0260006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0.006600996">
            <text:p>0.006600996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680288">
            <text:p>0.02680288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0.008363424">
            <text:p>0.008363424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961726">
            <text:p>0.01961726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1780966">
            <text:p>0.01780966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1267737">
            <text:p>0.01267737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1085692">
            <text:p>0.01085692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0.007484437">
            <text:p>0.007484437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1366256">
            <text:p>0.01366256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1282995">
            <text:p>0.01282995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1274807">
            <text:p>0.01274807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2001977">
            <text:p>0.02001977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0.008131911">
            <text:p>0.008131911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0.005752719">
            <text:p>0.005752719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0.005441417">
            <text:p>0.005441417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003409413">
            <text:p>-0.0003409413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1598588">
            <text:p>0.01598588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01615114">
            <text:p>-0.0001615114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10651">
            <text:p>0.010651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1469832">
            <text:p>0.01469832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1001581">
            <text:p>0.01001581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0.00820263">
            <text:p>0.00820263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0.00815924">
            <text:p>0.00815924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0.008637129">
            <text:p>0.008637129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1643341">
            <text:p>0.01643341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1272332">
            <text:p>0.01272332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0.004113059">
            <text:p>0.004113059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2199308">
            <text:p>0.02199308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1423078">
            <text:p>0.01423078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0.005660192">
            <text:p>0.005660192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0.005309958">
            <text:p>0.005309958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1097507">
            <text:p>0.01097507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1020743">
            <text:p>0.01020743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0.002935765">
            <text:p>0.002935765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2177268">
            <text:p>0.02177268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1287189">
            <text:p>0.01287189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2006725">
            <text:p>0.02006725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1303592">
            <text:p>0.01303592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152169">
            <text:p>0.0152169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9257967">
            <text:p>0.009257967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800841">
            <text:p>0.01800841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1656684">
            <text:p>0.01656684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0.003999179">
            <text:p>0.003999179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1039639">
            <text:p>0.01039639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1646901">
            <text:p>0.01646901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0.001559003">
            <text:p>0.001559003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0.006109414">
            <text:p>0.006109414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725289">
            <text:p>0.01725289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9613135">
            <text:p>0.009613135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8637979">
            <text:p>0.008637979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0.006231043">
            <text:p>0.006231043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0.006946502">
            <text:p>0.006946502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0.003654651">
            <text:p>0.003654651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string">
            <text:p>4.62639E-05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0.003239456">
            <text:p>0.003239456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1238674">
            <text:p>0.01238674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9578438">
            <text:p>0.009578438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2053348">
            <text:p>0.02053348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806994">
            <text:p>0.01806994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1000662">
            <text:p>0.01000662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1664097">
            <text:p>-0.001664097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504349">
            <text:p>0.02504349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07902502">
            <text:p>-0.0007902502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0.00583253">
            <text:p>0.00583253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0.006243175">
            <text:p>0.006243175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1075296">
            <text:p>0.01075296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0.007059382">
            <text:p>0.007059382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1473562">
            <text:p>0.01473562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0.001238297">
            <text:p>0.001238297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06346397">
            <text:p>-0.0006346397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9880575">
            <text:p>0.009880575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1086174">
            <text:p>0.01086174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1425849">
            <text:p>0.01425849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0.004734399">
            <text:p>0.004734399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811133">
            <text:p>0.01811133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0.002647307">
            <text:p>0.002647307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0.003492377">
            <text:p>0.003492377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1130355">
            <text:p>0.01130355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876041">
            <text:p>0.01876041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679786">
            <text:p>0.01679786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1257272">
            <text:p>0.01257272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1366164">
            <text:p>0.01366164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0.0002553758">
            <text:p>0.0002553758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1555761">
            <text:p>0.01555761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7443683">
            <text:p>0.007443683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0.0008401465">
            <text:p>0.0008401465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1515439">
            <text:p>0.01515439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7959425">
            <text:p>0.007959425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0.0002647672">
            <text:p>0.0002647672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03354418">
            <text:p>-0.003354418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0.00523858">
            <text:p>0.00523858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8548004">
            <text:p>0.008548004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7386187">
            <text:p>0.007386187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0.00267066">
            <text:p>0.00267066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1449899">
            <text:p>0.01449899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0.004068424">
            <text:p>0.004068424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9684155">
            <text:p>0.009684155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0.003250035">
            <text:p>0.003250035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1072754">
            <text:p>0.01072754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6760176">
            <text:p>0.006760176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0.004461676">
            <text:p>0.004461676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0.00404793">
            <text:p>0.00404793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815485">
            <text:p>0.00815485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0.001576903">
            <text:p>0.001576903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2067765">
            <text:p>0.02067765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0.004499321">
            <text:p>0.004499321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907684">
            <text:p>0.00907684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1129901">
            <text:p>0.01129901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9051292">
            <text:p>0.009051292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5620867">
            <text:p>0.005620867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130865">
            <text:p>0.0130865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1308972">
            <text:p>0.01308972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0.001861483">
            <text:p>0.001861483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1001466">
            <text:p>0.01001466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6305613">
            <text:p>0.006305613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8128448">
            <text:p>0.008128448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0.004197745">
            <text:p>0.004197745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0.000894304">
            <text:p>0.000894304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411836">
            <text:p>0.01411836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0.002454568">
            <text:p>0.002454568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0.002475698">
            <text:p>0.002475698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0.005383871">
            <text:p>0.005383871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8742048">
            <text:p>0.008742048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9101557">
            <text:p>0.009101557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0.005779641">
            <text:p>0.005779641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0.004022333">
            <text:p>0.004022333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0.003862529">
            <text:p>0.003862529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8548201">
            <text:p>0.008548201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9751581">
            <text:p>0.009751581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04133973">
            <text:p>-0.004133973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6691469">
            <text:p>0.006691469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0.000352559">
            <text:p>0.000352559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7996521">
            <text:p>0.007996521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0.002313153">
            <text:p>0.002313153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0.0008442958">
            <text:p>0.0008442958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0.0009630852">
            <text:p>0.0009630852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0.004369122">
            <text:p>0.004369122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8144486">
            <text:p>0.008144486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0.003946827">
            <text:p>0.003946827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0.002687137">
            <text:p>0.002687137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0.005399595">
            <text:p>0.005399595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6188408">
            <text:p>0.006188408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05049043">
            <text:p>-0.0005049043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0.00475635">
            <text:p>0.00475635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3197764">
            <text:p>-0.003197764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1716013">
            <text:p>-0.001716013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0.001065801">
            <text:p>0.001065801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0.002658812">
            <text:p>0.002658812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string">
            <text:p>-4.300489E-05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09943674">
            <text:p>-0.0009943674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9045562">
            <text:p>0.009045562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04596992">
            <text:p>-0.004596992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string">
            <text:p>-8.914837E-05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3496893">
            <text:p>-0.003496893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929299">
            <text:p>0.00929299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0201556">
            <text:p>-0.000201556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1085716">
            <text:p>0.01085716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1255641">
            <text:p>0.01255641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0.001016969">
            <text:p>0.001016969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5757989">
            <text:p>0.005757989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402452">
            <text:p>0.01402452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676589">
            <text:p>0.00676589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0.001311441">
            <text:p>0.001311441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577286">
            <text:p>0.01577286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0.004139838">
            <text:p>0.004139838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4800705">
            <text:p>0.004800705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0.0009393278">
            <text:p>0.0009393278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6391648">
            <text:p>0.006391648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2876766">
            <text:p>-0.002876766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2205274">
            <text:p>-0.002205274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56855">
            <text:p>0.0056855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0.003237404">
            <text:p>0.003237404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6452845">
            <text:p>0.006452845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0.002102974">
            <text:p>0.002102974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118655">
            <text:p>0.0118655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6712064">
            <text:p>0.006712064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4457041">
            <text:p>-0.004457041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5838288">
            <text:p>0.005838288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07292156">
            <text:p>-0.0007292156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3531178">
            <text:p>-0.003531178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410706">
            <text:p>0.01410706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0.003299055">
            <text:p>0.003299055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108546">
            <text:p>0.0108546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1232603">
            <text:p>0.01232603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7445493">
            <text:p>0.007445493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04107817">
            <text:p>-0.0004107817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0.001605971">
            <text:p>0.001605971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06604536">
            <text:p>-0.0006604536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1756363">
            <text:p>-0.001756363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0.0002947058">
            <text:p>0.0002947058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0.001003437">
            <text:p>0.001003437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0.0001411499">
            <text:p>0.0001411499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4325329">
            <text:p>0.004325329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0.003036072">
            <text:p>0.003036072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835023">
            <text:p>0.01835023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6798928">
            <text:p>0.006798928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8281256">
            <text:p>0.008281256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8027534">
            <text:p>0.008027534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0.0002617579">
            <text:p>0.0002617579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0.0001597024">
            <text:p>0.0001597024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756845">
            <text:p>0.00756845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5474813">
            <text:p>0.005474813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0.003314486">
            <text:p>0.003314486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6763811">
            <text:p>0.006763811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218688">
            <text:p>0.02218688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2746741">
            <text:p>-0.002746741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0.003206671">
            <text:p>0.003206671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3834243">
            <text:p>0.03834243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6302926">
            <text:p>0.006302926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6861139">
            <text:p>0.006861139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0.0007385085">
            <text:p>0.0007385085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446145">
            <text:p>0.01446145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5640087">
            <text:p>0.005640087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5488041">
            <text:p>-0.005488041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228223">
            <text:p>0.01228223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2744765">
            <text:p>-0.002744765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0995695">
            <text:p>-0.000995695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1142086">
            <text:p>0.01142086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6904736">
            <text:p>0.006904736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517785">
            <text:p>0.01517785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7396133">
            <text:p>0.007396133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922626">
            <text:p>0.00922626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0.003148266">
            <text:p>0.003148266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413197">
            <text:p>0.00413197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0.002743729">
            <text:p>0.002743729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2812662">
            <text:p>0.002812662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4682546">
            <text:p>-0.004682546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1357227">
            <text:p>-0.001357227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07341372">
            <text:p>-0.007341372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0.002015726">
            <text:p>0.002015726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1379545">
            <text:p>-0.001379545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387662">
            <text:p>0.01387662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305401">
            <text:p>-0.00305401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0.001286287">
            <text:p>0.001286287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0.002826091">
            <text:p>0.002826091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0.002325727">
            <text:p>0.002325727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0.002667214">
            <text:p>0.002667214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1110819">
            <text:p>0.01110819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0.002209037">
            <text:p>0.002209037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01235007">
            <text:p>-0.0001235007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06125612">
            <text:p>-0.006125612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0.001750701">
            <text:p>0.001750701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3716312">
            <text:p>0.003716312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5350473">
            <text:p>0.005350473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2934793">
            <text:p>-0.002934793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5328367">
            <text:p>-0.005328367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1150795">
            <text:p>0.01150795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4885872">
            <text:p>0.004885872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string">
            <text:p>6.723531E-05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0.0009680886">
            <text:p>0.0009680886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3169615">
            <text:p>-0.003169615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565529">
            <text:p>0.02565529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4863546">
            <text:p>-0.004863546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509466">
            <text:p>0.01509466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2907403">
            <text:p>-0.002907403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2372851">
            <text:p>-0.002372851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5570501">
            <text:p>-0.005570501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4181203">
            <text:p>-0.004181203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07766038">
            <text:p>-0.007766038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9921401">
            <text:p>0.009921401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635036">
            <text:p>0.00635036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4598612">
            <text:p>-0.004598612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319019">
            <text:p>0.00319019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327129">
            <text:p>-0.00327129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552094">
            <text:p>0.02552094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8544286">
            <text:p>0.008544286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469644">
            <text:p>0.01469644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4803704">
            <text:p>0.004803704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5603394">
            <text:p>-0.005603394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1417574">
            <text:p>-0.001417574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5770606">
            <text:p>0.005770606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5012671">
            <text:p>0.005012671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512069">
            <text:p>0.02512069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0.001279897">
            <text:p>0.001279897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0.003180371">
            <text:p>0.003180371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615123">
            <text:p>0.00615123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0.002277295">
            <text:p>0.002277295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3929558">
            <text:p>0.003929558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6586426">
            <text:p>0.006586426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138235">
            <text:p>0.01138235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0.001679614">
            <text:p>0.001679614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05461864">
            <text:p>-0.0005461864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518046">
            <text:p>0.02518046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119805">
            <text:p>0.01119805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2271622">
            <text:p>0.002271622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0.000801722">
            <text:p>0.000801722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4316996">
            <text:p>0.004316996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156972">
            <text:p>0.01156972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371302">
            <text:p>0.00371302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3859427">
            <text:p>0.003859427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323054">
            <text:p>-0.00323054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04500601">
            <text:p>-0.0004500601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5184123">
            <text:p>0.005184123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1101508">
            <text:p>-0.001101508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568237">
            <text:p>0.01568237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8009609">
            <text:p>0.008009609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239101">
            <text:p>-0.00239101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8213333">
            <text:p>0.008213333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6931967">
            <text:p>-0.006931967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2959115">
            <text:p>-0.002959115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6320817">
            <text:p>0.006320817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099626">
            <text:p>0.01099626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2796605">
            <text:p>-0.002796605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271124">
            <text:p>-0.00271124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531668">
            <text:p>0.009531668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718215">
            <text:p>0.01718215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0.0009587152">
            <text:p>0.0009587152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375019">
            <text:p>0.00375019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1089344">
            <text:p>-0.001089344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0.0005976129">
            <text:p>0.0005976129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0.0008418143">
            <text:p>0.0008418143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2353088">
            <text:p>-0.002353088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1750665">
            <text:p>0.001750665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296931">
            <text:p>0.01296931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06984212">
            <text:p>-0.006984212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7440437">
            <text:p>0.007440437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3580728">
            <text:p>-0.003580728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03855468">
            <text:p>-0.0003855468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3424767">
            <text:p>-0.003424767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3114151">
            <text:p>-0.003114151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146876">
            <text:p>0.01146876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2075634">
            <text:p>-0.002075634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4031513">
            <text:p>-0.004031513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6095202">
            <text:p>-0.006095202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6252158">
            <text:p>-0.006252158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4267504">
            <text:p>0.004267504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3109321">
            <text:p>0.003109321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07255228">
            <text:p>-0.0007255228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144516">
            <text:p>0.01144516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0.0002921042">
            <text:p>0.0002921042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3577573">
            <text:p>0.003577573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365952">
            <text:p>0.01365952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05281912">
            <text:p>-0.0005281912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0460734">
            <text:p>-0.000460734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1877937">
            <text:p>0.01877937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string">
            <text:p>6.438163E-06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4049175">
            <text:p>0.004049175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680469">
            <text:p>0.005680469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2074039">
            <text:p>-0.002074039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9759484">
            <text:p>0.009759484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1993209">
            <text:p>0.001993209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6121115">
            <text:p>-0.006121115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662063">
            <text:p>-0.00662063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4004787">
            <text:p>0.004004787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56622">
            <text:p>0.0056622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6183072">
            <text:p>0.006183072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4771783">
            <text:p>-0.004771783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3803198">
            <text:p>0.003803198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6061814">
            <text:p>0.006061814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9444621">
            <text:p>0.009444621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07962752">
            <text:p>-0.0007962752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3514822">
            <text:p>0.003514822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5200201">
            <text:p>0.005200201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2314313">
            <text:p>-0.002314313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1349984">
            <text:p>-0.001349984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3090019">
            <text:p>-0.003090019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27377">
            <text:p>0.0127377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07765288">
            <text:p>-0.007765288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01184535">
            <text:p>-0.0001184535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3230534">
            <text:p>0.003230534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3339351">
            <text:p>0.003339351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2709758">
            <text:p>0.002709758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2802188">
            <text:p>-0.002802188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426058">
            <text:p>-0.00426058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4317215">
            <text:p>0.004317215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0.0004899812">
            <text:p>0.0004899812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09270124">
            <text:p>-0.0009270124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6918201">
            <text:p>0.006918201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3465973">
            <text:p>0.003465973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5953589">
            <text:p>-0.005953589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1022239">
            <text:p>0.01022239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04950442">
            <text:p>-0.0004950442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4959017">
            <text:p>-0.004959017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2536257">
            <text:p>0.002536257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0.001399651">
            <text:p>0.001399651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148773">
            <text:p>0.00148773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07756703">
            <text:p>-0.007756703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5710373">
            <text:p>-0.005710373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4002595">
            <text:p>0.004002595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1967513">
            <text:p>-0.001967513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329633">
            <text:p>0.01329633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6211396">
            <text:p>-0.006211396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2226677">
            <text:p>-0.002226677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0.001319406">
            <text:p>0.001319406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9027675">
            <text:p>0.009027675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5229205">
            <text:p>0.005229205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4012982">
            <text:p>-0.004012982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891392">
            <text:p>0.007891392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3346317">
            <text:p>-0.003346317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08092113">
            <text:p>-0.008092113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2813357">
            <text:p>-0.002813357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720842">
            <text:p>0.01720842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617195">
            <text:p>0.01617195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588939">
            <text:p>0.01588939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07855847">
            <text:p>-0.007855847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0.0002714693">
            <text:p>0.0002714693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4815261">
            <text:p>0.004815261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601588">
            <text:p>0.005601588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5154567">
            <text:p>-0.005154567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1194357">
            <text:p>-0.001194357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08426552">
            <text:p>-0.008426552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1026111">
            <text:p>0.01026111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5381969">
            <text:p>0.005381969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0.001678537">
            <text:p>0.001678537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5858074">
            <text:p>0.005858074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418111">
            <text:p>0.01418111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1523142">
            <text:p>-0.001523142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620134">
            <text:p>0.004620134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3657005">
            <text:p>0.003657005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5006402">
            <text:p>0.005006402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7416427">
            <text:p>-0.007416427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2527042">
            <text:p>-0.002527042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201386">
            <text:p>0.00201386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6062818">
            <text:p>-0.006062818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2922967">
            <text:p>0.002922967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06338778">
            <text:p>-0.0006338778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4587722">
            <text:p>-0.004587722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0.000860088">
            <text:p>0.000860088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6334334">
            <text:p>-0.006334334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07980573">
            <text:p>-0.007980573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6430563">
            <text:p>0.006430563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1904971">
            <text:p>0.001904971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2187579">
            <text:p>0.002187579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0.001576499">
            <text:p>0.001576499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3072668">
            <text:p>0.003072668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68062">
            <text:p>0.0068062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4969809">
            <text:p>-0.004969809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07851007">
            <text:p>-0.007851007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2151572">
            <text:p>0.002151572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04258938">
            <text:p>-0.0004258938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1486948">
            <text:p>0.001486948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1436143">
            <text:p>0.001436143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1391068">
            <text:p>-0.001391068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1944996">
            <text:p>0.001944996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4253551">
            <text:p>-0.004253551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533495">
            <text:p>0.005533495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03056472">
            <text:p>-0.0003056472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2297507">
            <text:p>-0.002297507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1557729">
            <text:p>0.001557729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140539">
            <text:p>-0.00140539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3238822">
            <text:p>0.003238822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5236649">
            <text:p>0.005236649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8539665">
            <text:p>0.008539665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0.0009785346">
            <text:p>0.0009785346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221024">
            <text:p>-0.00221024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9002603">
            <text:p>0.009002603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2007224">
            <text:p>-0.002007224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6672135">
            <text:p>-0.006672135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7752792">
            <text:p>-0.007752792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4765579">
            <text:p>0.004765579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4880309">
            <text:p>-0.004880309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09294811">
            <text:p>0.009294811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8109121">
            <text:p>-0.008109121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1139248">
            <text:p>0.001139248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143447">
            <text:p>0.02143447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2226982">
            <text:p>0.002226982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2318857">
            <text:p>0.002318857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6469611">
            <text:p>0.006469611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479426">
            <text:p>0.005479426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2305227">
            <text:p>-0.002305227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2039236">
            <text:p>0.002039236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2561416">
            <text:p>0.002561416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824551">
            <text:p>0.01824551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7168841">
            <text:p>-0.007168841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591679">
            <text:p>0.01591679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1743234">
            <text:p>-0.001743234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5915487">
            <text:p>-0.005915487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355783">
            <text:p>0.01355783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1610348">
            <text:p>-0.001610348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7030575">
            <text:p>-0.007030575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8194762">
            <text:p>-0.008194762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4995487">
            <text:p>-0.004995487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3443604">
            <text:p>0.003443604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6054464">
            <text:p>-0.006054464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1974594">
            <text:p>0.001974594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4947479">
            <text:p>0.004947479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562984">
            <text:p>0.01562984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164309">
            <text:p>0.00164309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3690582">
            <text:p>-0.003690582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2625812">
            <text:p>0.002625812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3582039">
            <text:p>-0.003582039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4909307">
            <text:p>-0.004909307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3997639">
            <text:p>0.003997639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0.0005448121">
            <text:p>0.0005448121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112836">
            <text:p>-0.01112836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6947116">
            <text:p>-0.006947116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6575409">
            <text:p>-0.006575409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09330385">
            <text:p>-0.009330385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602593">
            <text:p>0.00602593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7635873">
            <text:p>-0.007635873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8001235">
            <text:p>-0.008001235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3377746">
            <text:p>0.003377746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5789898">
            <text:p>-0.005789898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6770725">
            <text:p>-0.006770725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47852">
            <text:p>0.0247852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02418115">
            <text:p>-0.0002418115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0.0004587063">
            <text:p>0.0004587063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5539511">
            <text:p>-0.005539511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2626711">
            <text:p>0.002626711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string">
            <text:p>7.019236E-05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0.00171388">
            <text:p>0.00171388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2708387">
            <text:p>-0.002708387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8997287">
            <text:p>0.008997287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0.0004638946">
            <text:p>0.0004638946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1535846">
            <text:p>0.001535846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3366758">
            <text:p>-0.003366758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4236631">
            <text:p>-0.004236631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0968736">
            <text:p>-0.00968736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6325153">
            <text:p>0.006325153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08695869">
            <text:p>-0.0008695869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174619">
            <text:p>0.01174619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string">
            <text:p>-3.014109E-06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0.0005972783">
            <text:p>0.0005972783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07342973">
            <text:p>-0.0007342973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6749793">
            <text:p>-0.006749793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09743087">
            <text:p>-0.009743087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3702096">
            <text:p>0.003702096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08866962">
            <text:p>-0.008866962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3467177">
            <text:p>-0.003467177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7346796">
            <text:p>-0.007346796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5175782">
            <text:p>0.005175782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08674078">
            <text:p>-0.008674078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08558033">
            <text:p>0.0008558033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3188662">
            <text:p>0.003188662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6339643">
            <text:p>-0.006339643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07888131">
            <text:p>0.0007888131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8798862">
            <text:p>0.008798862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3531892">
            <text:p>0.003531892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string">
            <text:p>-8.347299E-05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6676391">
            <text:p>0.006676391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170903">
            <text:p>0.02170903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5413569">
            <text:p>-0.005413569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680292">
            <text:p>-0.00680292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068974">
            <text:p>0.01068974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568886">
            <text:p>0.004568886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1315202">
            <text:p>-0.001315202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3319977">
            <text:p>0.003319977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607959">
            <text:p>0.00607959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09696634">
            <text:p>-0.0009696634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172393">
            <text:p>0.01172393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6484503">
            <text:p>0.006484503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279476">
            <text:p>0.01279476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4234207">
            <text:p>-0.004234207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1667501">
            <text:p>0.001667501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6182877">
            <text:p>-0.006182877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2703486">
            <text:p>-0.002703486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6834812">
            <text:p>0.006834812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088904">
            <text:p>0.008088904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540232">
            <text:p>0.00540232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2643998">
            <text:p>-0.002643998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718499">
            <text:p>0.01718499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3538302">
            <text:p>-0.003538302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3978462">
            <text:p>-0.003978462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5241901">
            <text:p>-0.005241901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1006645">
            <text:p>-0.001006645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4368385">
            <text:p>0.004368385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205341">
            <text:p>-0.00205341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1743934">
            <text:p>-0.001743934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463939">
            <text:p>-0.00463939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7185017">
            <text:p>-0.007185017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3680075">
            <text:p>-0.003680075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04393338">
            <text:p>-0.0004393338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244446">
            <text:p>0.00244446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2021812">
            <text:p>-0.002021812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-0.000256529">
            <text:p>-0.000256529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6652371">
            <text:p>0.006652371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09175407">
            <text:p>0.0009175407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052212">
            <text:p>0.006052212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6638769">
            <text:p>-0.006638769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0822452">
            <text:p>-0.00822452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1450112">
            <text:p>-0.001450112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6358234">
            <text:p>0.006358234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string">
            <text:p>8.479672E-05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5808462">
            <text:p>-0.005808462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5620561">
            <text:p>-0.005620561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01445979">
            <text:p>-0.0001445979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658389">
            <text:p>0.01658389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789761">
            <text:p>0.003789761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08029892">
            <text:p>-0.0008029892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366921">
            <text:p>0.003366921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5736976">
            <text:p>0.005736976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7841744">
            <text:p>0.007841744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2141785">
            <text:p>0.002141785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3135833">
            <text:p>0.003135833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4768893">
            <text:p>-0.004768893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07781186">
            <text:p>0.0007781186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5344701">
            <text:p>0.005344701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237191">
            <text:p>0.003237191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13034">
            <text:p>0.0113034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8013837">
            <text:p>0.008013837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115714">
            <text:p>0.01115714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-0.0001009307">
            <text:p>-0.0001009307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5552145">
            <text:p>0.005552145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5859987">
            <text:p>0.005859987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3654933">
            <text:p>0.003654933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3239116">
            <text:p>0.003239116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7629097">
            <text:p>-0.007629097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5488451">
            <text:p>0.005488451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485989">
            <text:p>0.002485989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4296954">
            <text:p>0.004296954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442645">
            <text:p>0.004442645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1394999">
            <text:p>-0.001394999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43738">
            <text:p>0.0143738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4761509">
            <text:p>0.004761509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3802687">
            <text:p>-0.003802687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06254694">
            <text:p>-0.0006254694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4554583">
            <text:p>-0.004554583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172952">
            <text:p>0.01172952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261723">
            <text:p>-0.00261723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7723331">
            <text:p>0.007723331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0.001595885">
            <text:p>0.001595885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0.0001418018">
            <text:p>0.0001418018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3864004">
            <text:p>-0.003864004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09175464">
            <text:p>-0.009175464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256956">
            <text:p>-0.00256956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0919624">
            <text:p>-0.00919624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4401316">
            <text:p>-0.004401316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2634913">
            <text:p>-0.002634913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07744678">
            <text:p>-0.0007744678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8370106">
            <text:p>0.008370106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276507">
            <text:p>0.01276507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6833633">
            <text:p>-0.006833633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633953">
            <text:p>0.008633953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1674452">
            <text:p>0.001674452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6183125">
            <text:p>-0.006183125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47553">
            <text:p>-0.0047553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14405">
            <text:p>0.0214405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4291271">
            <text:p>-0.004291271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0.0005252121">
            <text:p>0.0005252121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8426839">
            <text:p>0.008426839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string">
            <text:p>7.986235E-05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775402">
            <text:p>0.01775402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2299008">
            <text:p>-0.002299008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5517891">
            <text:p>0.005517891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7255706">
            <text:p>0.007255706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1887515">
            <text:p>0.001887515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4729534">
            <text:p>-0.004729534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string">
            <text:p>-4.708188E-05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3389032">
            <text:p>-0.003389032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253202">
            <text:p>-0.00253202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4448085">
            <text:p>0.004448085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073607">
            <text:p>0.01073607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09829625">
            <text:p>0.0009829625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08966286">
            <text:p>-0.008966286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3865969">
            <text:p>0.003865969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7683937">
            <text:p>-0.007683937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521053">
            <text:p>-0.00521053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615617">
            <text:p>-0.00615617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2965509">
            <text:p>0.02965509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6532325">
            <text:p>-0.006532325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555756">
            <text:p>-0.05555756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5764171">
            <text:p>-0.05764171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5910992">
            <text:p>-0.05910992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5997262">
            <text:p>-0.05997262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03101">
            <text:p>-0.0603101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6039065">
            <text:p>-0.0603906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40:12.20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604cm" svg:y="1.068cm" svg:width="10.869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619305">
                <text:p>0.00619305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586513">
                <text:p>0.001586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3650311">
                <text:p>0.003650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225415">
                <text:p>0.01225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6991808">
                <text:p>0.006991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5086241">
                <text:p>0.005086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676012">
                <text:p>0.0167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794933">
                <text:p>-0.001794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0.0002476695">
                <text:p>0.0002476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7081536">
                <text:p>0.007081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09556032">
                <text:p>0.009556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131513">
                <text:p>0.01131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2763164">
                <text:p>-0.002763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2456328">
                <text:p>0.002456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14695">
                <text:p>0.0014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6247856">
                <text:p>0.006247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2187356">
                <text:p>-0.002187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2712295">
                <text:p>0.002712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3731993">
                <text:p>0.03731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611022">
                <text:p>-0.00611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4696338">
                <text:p>-0.004696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167684">
                <text:p>0.01167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778068">
                <text:p>0.01778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925948">
                <text:p>-0.001925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5064481">
                <text:p>-0.0050644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5145777">
                <text:p>0.005145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2317782">
                <text:p>-0.0023177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879685">
                <text:p>0.002879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7715104">
                <text:p>0.007715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4058096">
                <text:p>0.004058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2288299">
                <text:p>0.002288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634384">
                <text:p>0.01634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7756706">
                <text:p>-0.007756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1684599">
                <text:p>0.001684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6198953">
                <text:p>0.0006198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3746503">
                <text:p>-0.003746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2621539">
                <text:p>0.002621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4659038">
                <text:p>0.004659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3695095">
                <text:p>0.003695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4518314">
                <text:p>0.004518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2696387">
                <text:p>0.002696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1188763">
                <text:p>0.001188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7673406">
                <text:p>0.007673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547641">
                <text:p>0.01547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3360612">
                <text:p>-0.0033606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09392378">
                <text:p>0.0093923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333084">
                <text:p>0.02333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704333">
                <text:p>0.0170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450364">
                <text:p>0.0054503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09439483">
                <text:p>0.009439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4035412">
                <text:p>0.004035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6794921">
                <text:p>0.006794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353353">
                <text:p>-0.001353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489661">
                <text:p>0.004896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184606">
                <text:p>0.01846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3182506">
                <text:p>-0.0031825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08857272">
                <text:p>0.008857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2853318">
                <text:p>-0.002853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7179506">
                <text:p>-0.007179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03741715">
                <text:p>-0.0003741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604933">
                <text:p>0.003604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6368136">
                <text:p>0.006368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2271974">
                <text:p>-0.0022719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1827482">
                <text:p>-0.0018274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7942909">
                <text:p>-0.0079429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717308">
                <text:p>0.002717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235366">
                <text:p>0.022353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84776">
                <text:p>0.001847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8144555">
                <text:p>0.008144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8716838">
                <text:p>0.008716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641478">
                <text:p>0.01641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669357">
                <text:p>-0.0026693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3583204">
                <text:p>-0.003583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2392513">
                <text:p>0.002392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3214741">
                <text:p>0.003214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2972832">
                <text:p>-0.0029728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7463506">
                <text:p>0.007463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3891021">
                <text:p>0.03891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2002037">
                <text:p>0.002002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130991">
                <text:p>0.001130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6572091">
                <text:p>-0.0065720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583809">
                <text:p>0.01583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792023">
                <text:p>0.009792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0883711">
                <text:p>0.008837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3634375">
                <text:p>-0.00363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732325">
                <text:p>0.0057323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626701">
                <text:p>0.016267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117939">
                <text:p>0.011179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2770125">
                <text:p>0.02770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074915">
                <text:p>0.01074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1900497">
                <text:p>0.019004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4037328">
                <text:p>-0.004037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4235288">
                <text:p>-0.0042352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3146211">
                <text:p>0.003146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8737176">
                <text:p>0.008737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09744029">
                <text:p>-0.0009744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3400892">
                <text:p>-0.003400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6490928">
                <text:p>0.006490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-0.000933079">
                <text:p>-0.0009330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0878449">
                <text:p>-0.008784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333405">
                <text:p>-0.003334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1965195">
                <text:p>0.019651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219268">
                <text:p>0.012192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4163045">
                <text:p>0.0041630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795602">
                <text:p>-0.00795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0.00083237">
                <text:p>0.000832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0.0005339542">
                <text:p>0.00053395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6073953">
                <text:p>0.0060739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4617398">
                <text:p>0.046173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133437">
                <text:p>-0.001334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2590502">
                <text:p>0.0025905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2628326">
                <text:p>0.002628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6489514">
                <text:p>-0.0064895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7343291">
                <text:p>0.007343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3557409">
                <text:p>0.0035574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068734">
                <text:p>-0.010687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4795314">
                <text:p>0.0047953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-0.000187844">
                <text:p>-0.0001878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6588438">
                <text:p>0.0006588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5787514">
                <text:p>-0.0057875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682152">
                <text:p>0.016821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02797999">
                <text:p>-0.0002797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8456162">
                <text:p>0.008456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7433369">
                <text:p>0.0074333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616228">
                <text:p>0.0096162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1431921">
                <text:p>0.001431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1600589">
                <text:p>0.016005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6600018">
                <text:p>0.0066000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2943078">
                <text:p>0.029430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646454">
                <text:p>0.0096464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6420847">
                <text:p>0.0064208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1010574">
                <text:p>-0.0010105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09750154">
                <text:p>0.0097501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1948696">
                <text:p>0.019486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5560717">
                <text:p>-0.0055607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1916022">
                <text:p>0.001916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738267">
                <text:p>0.017382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4486718">
                <text:p>0.004486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4598159">
                <text:p>-0.0045981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98135">
                <text:p>-0.002981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2409765">
                <text:p>0.0024097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5404561">
                <text:p>-0.0054045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8411929">
                <text:p>-0.0084119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384436">
                <text:p>0.023844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1812712">
                <text:p>0.0018127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99919">
                <text:p>0.003999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2577335">
                <text:p>-0.0025773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07885839">
                <text:p>-0.00078858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3194891">
                <text:p>-0.0031948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670783">
                <text:p>-0.003670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735746">
                <text:p>-0.0027357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224382">
                <text:p>0.012243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039688">
                <text:p>0.010396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2609122">
                <text:p>-0.0026091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397006">
                <text:p>0.023970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6184248">
                <text:p>0.0061842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237634">
                <text:p>0.012376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4044345">
                <text:p>-0.0040443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2755603">
                <text:p>-0.0027556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4289001">
                <text:p>0.004289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1004274">
                <text:p>0.010042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499548">
                <text:p>-0.004995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09974997">
                <text:p>0.009974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2908637">
                <text:p>0.0029086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047373">
                <text:p>0.010473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010785">
                <text:p>0.0030107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4030872">
                <text:p>0.0040308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1168544">
                <text:p>0.0011685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586688">
                <text:p>0.015866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2161944">
                <text:p>0.0021619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70267">
                <text:p>0.01702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5551729">
                <text:p>0.0055517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8616034">
                <text:p>0.0086160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8016896">
                <text:p>-0.008016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554869">
                <text:p>0.015548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626841">
                <text:p>0.016268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456671">
                <text:p>0.014566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12976">
                <text:p>-0.004129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06457851">
                <text:p>-0.00064578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1545374">
                <text:p>-0.001545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2115913">
                <text:p>-0.0021159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518156">
                <text:p>0.015181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4314236">
                <text:p>0.0043142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326269">
                <text:p>0.02326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1951911">
                <text:p>0.019519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426414">
                <text:p>0.014264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155441">
                <text:p>-0.00155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240977">
                <text:p>-0.002409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0.001453525">
                <text:p>0.0014535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09505923">
                <text:p>0.0095059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3719556">
                <text:p>0.0037195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03041891">
                <text:p>-0.00030418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179088">
                <text:p>0.011790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3675077">
                <text:p>-0.0036750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7053028">
                <text:p>0.0070530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513735">
                <text:p>0.015137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23161">
                <text:p>0.01231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25192">
                <text:p>-0.00251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6794963">
                <text:p>-0.006794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288932">
                <text:p>0.0092889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155549">
                <text:p>0.001555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2657754">
                <text:p>-0.0026577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3113284">
                <text:p>-0.0031132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1467011">
                <text:p>0.001467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043271">
                <text:p>0.0040432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821167">
                <text:p>-0.008211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09563334">
                <text:p>0.0095633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2385556">
                <text:p>-0.0023855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7092029">
                <text:p>0.0070920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3798343">
                <text:p>-0.0037983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-0.0001379498">
                <text:p>-0.00013794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-0.0007521407">
                <text:p>-0.00075214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05880158">
                <text:p>0.0005880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6421318">
                <text:p>0.0064213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034575">
                <text:p>0.010345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1388846">
                <text:p>-0.0013888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2315732">
                <text:p>0.0023157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272934">
                <text:p>0.022729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6078489">
                <text:p>-0.0060784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4581931">
                <text:p>-0.0045819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154415">
                <text:p>0.0031544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504526">
                <text:p>-0.0015045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050738">
                <text:p>0.010507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191044">
                <text:p>0.011910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1583553">
                <text:p>-0.0015835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3295263">
                <text:p>-0.0032952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3408652">
                <text:p>-0.0034086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3223794">
                <text:p>0.0032237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257048">
                <text:p>-0.002570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4262071">
                <text:p>-0.0042620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101708">
                <text:p>0.0011017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17764">
                <text:p>0.01177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2859505">
                <text:p>0.028595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08778818">
                <text:p>-0.0087788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770316">
                <text:p>-0.007703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3657127">
                <text:p>0.0036571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1657641">
                <text:p>-0.0016576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5784952">
                <text:p>0.0057849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139888">
                <text:p>-0.011398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4770161">
                <text:p>0.0047701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1221666">
                <text:p>-0.0012216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795703">
                <text:p>0.002795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6569752">
                <text:p>0.0065697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2303857">
                <text:p>0.0023038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235884">
                <text:p>0.012358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8943866">
                <text:p>-0.0089438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-0.000697907">
                <text:p>-0.0006979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2124859">
                <text:p>-0.0021248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038603">
                <text:p>0.020386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6380086">
                <text:p>-0.0006380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4974745">
                <text:p>0.0049747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1608653">
                <text:p>0.0016086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077296">
                <text:p>0.010772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7761078">
                <text:p>-0.0077610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08431019">
                <text:p>-0.0084310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8492264">
                <text:p>0.008492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4062601">
                <text:p>0.0040626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6529893">
                <text:p>-0.0065298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3935219">
                <text:p>-0.0039352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461575">
                <text:p>0.014615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030546">
                <text:p>0.010305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09683873">
                <text:p>0.0096838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7138516">
                <text:p>-0.0071385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07109677">
                <text:p>-0.00071096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112342">
                <text:p>0.0051123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218122">
                <text:p>0.0032181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04121">
                <text:p>0.005041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4487397">
                <text:p>0.0044873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329775">
                <text:p>0.013297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09999018">
                <text:p>-0.0099990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302126">
                <text:p>0.003021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522073">
                <text:p>0.0025220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186696">
                <text:p>0.011866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08950853">
                <text:p>0.0089508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8234571">
                <text:p>-0.0082345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077378">
                <text:p>0.010773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1961352">
                <text:p>0.0019613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7830418">
                <text:p>-0.0078304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626914">
                <text:p>0.0016269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3084237">
                <text:p>0.003084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4947231">
                <text:p>0.0049472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3135268">
                <text:p>-0.0031352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1823879">
                <text:p>0.0018238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688487">
                <text:p>0.016884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5005188">
                <text:p>-0.0050051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6638335">
                <text:p>-0.0066383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521943">
                <text:p>0.015219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148049">
                <text:p>0.011480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05261198">
                <text:p>-0.00052611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203385">
                <text:p>-0.002033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563177">
                <text:p>0.005631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4970429">
                <text:p>0.0049704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8849725">
                <text:p>0.0088497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1077539">
                <text:p>-0.0010775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4038974">
                <text:p>-0.0040389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578373">
                <text:p>0.015783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4085902">
                <text:p>-0.0040859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4694414">
                <text:p>0.0046944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2519814">
                <text:p>0.0025198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207077">
                <text:p>0.0052070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3433254">
                <text:p>0.0034332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4495672">
                <text:p>0.0044956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1774345">
                <text:p>0.0017743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119119">
                <text:p>0.011191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0813883">
                <text:p>0.0008138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718982">
                <text:p>0.007189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1930045">
                <text:p>-0.0019300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4176375">
                <text:p>0.004176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515479">
                <text:p>0.0035154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1615394">
                <text:p>0.0016153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9203086">
                <text:p>0.0092030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310912">
                <text:p>0.013109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450923">
                <text:p>0.014509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6270246">
                <text:p>-0.0062702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42616">
                <text:p>0.010426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2478795">
                <text:p>-0.0024787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5082427">
                <text:p>-0.0050824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803506">
                <text:p>0.0038035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3139604">
                <text:p>0.0031396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5962171">
                <text:p>-0.0059621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5842632">
                <text:p>-0.0058426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6445706">
                <text:p>-0.0064457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7932222">
                <text:p>-0.0079322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5025018">
                <text:p>0.0050250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4032976">
                <text:p>0.0040329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834833">
                <text:p>0.008348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3243178">
                <text:p>-0.0032431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03220322">
                <text:p>-0.00032203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505671">
                <text:p>0.015056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197705">
                <text:p>0.0011977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08777528">
                <text:p>-0.00087775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0996019">
                <text:p>0.009960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02629">
                <text:p>0.01026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3139879">
                <text:p>0.0031398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7081823">
                <text:p>0.0070818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5370974">
                <text:p>-0.0053709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1145161">
                <text:p>0.0011451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09199888">
                <text:p>0.0091998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5929363">
                <text:p>-0.0059293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2735685">
                <text:p>0.0027356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407635">
                <text:p>0.014076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18427">
                <text:p>0.005184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240869">
                <text:p>0.0012408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08378684">
                <text:p>-0.0083786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173613">
                <text:p>0.011736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0.0003845406">
                <text:p>0.00038454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1192501">
                <text:p>-0.0011925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0.001077567">
                <text:p>0.0010775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7530136">
                <text:p>0.0075301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4925103">
                <text:p>-0.0049251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297188">
                <text:p>0.012971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136803">
                <text:p>0.011368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09232561">
                <text:p>0.0092325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3446877">
                <text:p>0.0034468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259105">
                <text:p>0.002591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658547">
                <text:p>-0.0036585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6268763">
                <text:p>0.0062687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7608458">
                <text:p>-0.0076084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0.0003280788">
                <text:p>0.00032807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1679463">
                <text:p>0.0016794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3652522">
                <text:p>0.003652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6650866">
                <text:p>-0.0066508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5092281">
                <text:p>-0.0050922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8094133">
                <text:p>0.0080941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2979539">
                <text:p>0.0029795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0.0004016018">
                <text:p>0.00040160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04425216">
                <text:p>-0.00044252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989676">
                <text:p>0.0039896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763541">
                <text:p>0.017635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09799593">
                <text:p>0.0097995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1356121">
                <text:p>-0.0013561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1627828">
                <text:p>-0.0016278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7663873">
                <text:p>0.0076638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178876">
                <text:p>0.011788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09144014">
                <text:p>0.00091440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-0.0005931524">
                <text:p>-0.00059315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0678789">
                <text:p>-0.0006787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5963513">
                <text:p>0.0059635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175157">
                <text:p>0.0061751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5728947">
                <text:p>-0.0057289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30114">
                <text:p>0.01301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791389">
                <text:p>0.0087913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6006226">
                <text:p>0.0060062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5176086">
                <text:p>-0.0051760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6355775">
                <text:p>-0.0063557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4598509">
                <text:p>-0.0045985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1779072">
                <text:p>-0.0017790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5058272">
                <text:p>-0.0050582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470042">
                <text:p>0.0074700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08453363">
                <text:p>0.0084533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208309">
                <text:p>0.003208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1356489">
                <text:p>0.013564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3344122">
                <text:p>-0.0033441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6407467">
                <text:p>-0.0064074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8405066">
                <text:p>-0.0084050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09689863">
                <text:p>0.0096898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2682817">
                <text:p>0.026828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4048718">
                <text:p>0.0040487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17192">
                <text:p>0.007171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9890121">
                <text:p>0.0098901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09250297">
                <text:p>0.0092502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344135">
                <text:p>0.003441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5259356">
                <text:p>0.0052593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1814404">
                <text:p>-0.0018144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0.00014051">
                <text:p>0.000140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2712038">
                <text:p>0.0027120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08467504">
                <text:p>-0.00084675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09087509">
                <text:p>0.0090875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2487812">
                <text:p>-0.0024878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0617139">
                <text:p>0.0006171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185792">
                <text:p>0.011857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568863">
                <text:p>0.015688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1843007">
                <text:p>0.018430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09796859">
                <text:p>0.0097968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5125977">
                <text:p>-0.0051259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1908462">
                <text:p>-0.0019084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6857732">
                <text:p>-0.0068577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7932073">
                <text:p>-0.0079320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0.0006198037">
                <text:p>0.00061980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2892255">
                <text:p>-0.0028922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4018899">
                <text:p>0.00040188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06719177">
                <text:p>-0.00067191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451919">
                <text:p>0.0034519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7510843">
                <text:p>0.0075108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6375267">
                <text:p>-0.0063752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2563338">
                <text:p>-0.0025633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09633633">
                <text:p>-0.0096336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0.0001718062">
                <text:p>0.00017180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8277677">
                <text:p>-0.0082776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8023007">
                <text:p>-0.0080230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7283919">
                <text:p>-0.0072839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938649">
                <text:p>-0.0009386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601003">
                <text:p>0.0036010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6026038">
                <text:p>0.0060260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3716634">
                <text:p>-0.0037166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3003421">
                <text:p>0.0030034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5415631">
                <text:p>-0.0054156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09739626">
                <text:p>0.0097396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8249718">
                <text:p>0.0082497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1933078">
                <text:p>0.019330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12095">
                <text:p>0.01120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3006683">
                <text:p>0.0030066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4117195">
                <text:p>-0.0041171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08446435">
                <text:p>-0.0084464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6159073">
                <text:p>0.0061590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6394663">
                <text:p>-0.0063946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427993">
                <text:p>0.0044279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5531334">
                <text:p>-0.0055313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4187495">
                <text:p>-0.0041874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277697">
                <text:p>0.0012776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220167">
                <text:p>0.012201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7471919">
                <text:p>-0.0074719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4312293">
                <text:p>-0.0043122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729496">
                <text:p>-0.007294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724243">
                <text:p>0.0037242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5227122">
                <text:p>-0.0052271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554716">
                <text:p>-0.005547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4676117">
                <text:p>-0.0046761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1389584">
                <text:p>-0.0013895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2826476">
                <text:p>0.0028264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09503191">
                <text:p>-0.0095031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5950626">
                <text:p>0.0059506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09066537">
                <text:p>-0.0090665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035989">
                <text:p>-0.0010359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2895707">
                <text:p>0.028957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07262659">
                <text:p>-0.00072626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06568325">
                <text:p>0.00065683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6343937">
                <text:p>-0.0063439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100408">
                <text:p>0.011004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689342">
                <text:p>0.006893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532532">
                <text:p>-0.005325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5414872">
                <text:p>-0.0054148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7799234">
                <text:p>-0.0077992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2417174">
                <text:p>-0.0024171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5164992">
                <text:p>-0.0051649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382292">
                <text:p>0.0063822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9367108">
                <text:p>0.0093671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4382788">
                <text:p>-0.0043827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1487985">
                <text:p>-0.0014879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0.0009138455">
                <text:p>0.00091384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3264755">
                <text:p>-0.0032647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8024679">
                <text:p>-0.0080246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511589">
                <text:p>0.0035115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08651026">
                <text:p>-0.00086510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71791">
                <text:p>0.00717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1192511">
                <text:p>-0.0011925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3019389">
                <text:p>-0.0030193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1799632">
                <text:p>-0.0017996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5944671">
                <text:p>-0.0059446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1322741">
                <text:p>0.0013227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2019839">
                <text:p>-0.0020198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030684">
                <text:p>-0.010306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1187554">
                <text:p>-0.0011875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1819795">
                <text:p>0.0018197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271424">
                <text:p>0.012714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494871">
                <text:p>0.014948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4202804">
                <text:p>-0.0042028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4218971">
                <text:p>0.0042189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680521">
                <text:p>-0.006805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68315">
                <text:p>0.00683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4654768">
                <text:p>-0.0046547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1908666">
                <text:p>0.001908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437028">
                <text:p>-0.004370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6354919">
                <text:p>-0.0063549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3259933">
                <text:p>-0.0032599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113191">
                <text:p>0.011131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09785857">
                <text:p>0.0097858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7162412">
                <text:p>-0.0071624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01849387">
                <text:p>-0.00018493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5251042">
                <text:p>0.0052510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1038068">
                <text:p>0.0010380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586175">
                <text:p>0.0015861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305413">
                <text:p>0.003054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406003">
                <text:p>0.0044060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09756426">
                <text:p>0.0097564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6207963">
                <text:p>-0.006207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6477788">
                <text:p>0.0064777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08868319">
                <text:p>-0.0088683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5752386">
                <text:p>-0.0057523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2324391">
                <text:p>-0.0023243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104452">
                <text:p>0.011044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5165081">
                <text:p>-0.0051650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2011242">
                <text:p>-0.0020112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5613317">
                <text:p>-0.0056133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061795">
                <text:p>0.010617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6287393">
                <text:p>0.0062873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083011">
                <text:p>-0.010830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8005391">
                <text:p>-0.0080053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1531848">
                <text:p>-0.0015318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08944798">
                <text:p>-0.0089447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436067">
                <text:p>0.014360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1103366">
                <text:p>-0.0011033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4725145">
                <text:p>-0.0047251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0.002408836">
                <text:p>0.0024088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4131455">
                <text:p>-0.0041314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151637">
                <text:p>0.011516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09998889">
                <text:p>0.0099988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171094">
                <text:p>0.011710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08339128">
                <text:p>0.0083391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5349949">
                <text:p>-0.0053499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8540842">
                <text:p>0.0085408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1442657">
                <text:p>0.0014426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877854">
                <text:p>0.0048778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4632221">
                <text:p>-0.00463222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3915171">
                <text:p>0.0039151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488792">
                <text:p>0.014887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2300735">
                <text:p>-0.0023007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6982995">
                <text:p>0.0069829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3020224">
                <text:p>0.0030202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8596792">
                <text:p>0.0085967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292464">
                <text:p>0.0032924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291861">
                <text:p>0.012918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294233">
                <text:p>0.0032942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1524296">
                <text:p>-0.0015242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0832231">
                <text:p>-0.0008322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105026">
                <text:p>0.011050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254898">
                <text:p>0.012548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0.0005687873">
                <text:p>0.00056878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05155526">
                <text:p>-0.00051555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77019">
                <text:p>-0.0077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002792">
                <text:p>0.010027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6740264">
                <text:p>-0.0067402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054721">
                <text:p>0.010547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10317">
                <text:p>0.01103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09184636">
                <text:p>-0.0091846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3846088">
                <text:p>-0.0038460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593311">
                <text:p>0.015933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8766">
                <text:p>0.01387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5095238">
                <text:p>-0.0050952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325135">
                <text:p>0.013251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8362965">
                <text:p>0.00836296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248601">
                <text:p>-0.002486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4260352">
                <text:p>0.0042603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3487076">
                <text:p>-0.0034870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7039934">
                <text:p>-0.00703993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249301">
                <text:p>0.012493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3105943">
                <text:p>-0.0031059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197066">
                <text:p>0.011970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09053905">
                <text:p>0.00090539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7046796">
                <text:p>0.0070467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1972689">
                <text:p>0.0019726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3213153">
                <text:p>0.0032131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3890162">
                <text:p>0.0038901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06459605">
                <text:p>0.00064596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2838542">
                <text:p>-0.0028385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4335886">
                <text:p>-0.0043358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8051965">
                <text:p>0.0080519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4488234">
                <text:p>-0.0044882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328049">
                <text:p>0.013280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850788">
                <text:p>0.0048507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-0.0002985439">
                <text:p>-0.00029854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1303618">
                <text:p>0.0013036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309097">
                <text:p>0.013090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253152">
                <text:p>0.0022531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092277">
                <text:p>0.0040922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1920308">
                <text:p>0.0019203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1255609">
                <text:p>0.0012556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4632133">
                <text:p>-0.0046321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7174674">
                <text:p>-0.0071746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5917423">
                <text:p>0.0059174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483837">
                <text:p>0.0044838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-0.0005288281">
                <text:p>-0.00052882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7621487">
                <text:p>-0.0076214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933864">
                <text:p>0.0029338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1249901">
                <text:p>-0.0012499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1695963">
                <text:p>0.001695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06823136">
                <text:p>-0.00068231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4311012">
                <text:p>0.0043110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1984925">
                <text:p>-0.0019849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295121">
                <text:p>0.012951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2432523">
                <text:p>-0.0024325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2550404">
                <text:p>-0.0025504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1209623">
                <text:p>-0.0012096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2597453">
                <text:p>-0.0025974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296555">
                <text:p>0.012965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-0.0003372545">
                <text:p>-0.00033725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0.0007776722">
                <text:p>0.00077767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268011">
                <text:p>0.0012680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3523657">
                <text:p>-0.0035236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41087">
                <text:p>0.01410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01527981">
                <text:p>0.00015279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07537344">
                <text:p>0.00075373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6215404">
                <text:p>-0.0062154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478268">
                <text:p>0.014782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08385833">
                <text:p>-0.00083858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132064">
                <text:p>0.011320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8340295">
                <text:p>-0.0083402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4487786">
                <text:p>0.0044877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08692029">
                <text:p>-0.0086920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13495">
                <text:p>0.01134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364366">
                <text:p>0.0023643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7089683">
                <text:p>-0.0070896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547631">
                <text:p>0.015476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055622">
                <text:p>0.010556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3649019">
                <text:p>-0.0036490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7730398">
                <text:p>-0.0077303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0159242">
                <text:p>-0.0001592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0.0004108982">
                <text:p>0.00041089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4251057">
                <text:p>0.0042510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293074">
                <text:p>0.012930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2233218">
                <text:p>-0.0022332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1972747">
                <text:p>-0.00197274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4561226">
                <text:p>-0.0045612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08923608">
                <text:p>-0.0089236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09346129">
                <text:p>0.00093461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5488295">
                <text:p>-0.0054882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161482">
                <text:p>0.011614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005759">
                <text:p>0.020057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5351164">
                <text:p>-0.0053511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06990434">
                <text:p>0.00069904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5990214">
                <text:p>0.0059902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992249">
                <text:p>-0.00199224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7860004">
                <text:p>-0.0078600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508265">
                <text:p>0.0035082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3105084">
                <text:p>-0.0031050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798972">
                <text:p>0.007989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2244402">
                <text:p>-0.0022444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08814954">
                <text:p>0.0088149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2311948">
                <text:p>-0.0023119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7491683">
                <text:p>-0.0074916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1752993">
                <text:p>-0.0017529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4861453">
                <text:p>-0.0048614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114683">
                <text:p>0.041146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2301057">
                <text:p>-0.0023010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39083">
                <text:p>0.0033908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857114">
                <text:p>0.0028571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4425031">
                <text:p>0.044250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-0.0006302753">
                <text:p>-0.00063027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202227">
                <text:p>-0.0012022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3668877">
                <text:p>-0.0036688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6565506">
                <text:p>-0.0065655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2801865">
                <text:p>-0.0028018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072678">
                <text:p>0.010726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398076">
                <text:p>-0.003980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1485665">
                <text:p>0.0014856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3942146">
                <text:p>-0.0039421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5797318">
                <text:p>0.0057973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336497">
                <text:p>0.003364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1202197">
                <text:p>-0.00120219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5071131">
                <text:p>0.0050711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2317831">
                <text:p>-0.0023178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2717838">
                <text:p>0.0027178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1240018">
                <text:p>0.0012400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6361684">
                <text:p>0.0063616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2866526">
                <text:p>-0.0028665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20748">
                <text:p>-0.00207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124591">
                <text:p>-0.0011245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1388497">
                <text:p>-0.0013884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5922521">
                <text:p>-0.0059225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5644267">
                <text:p>-0.0056442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616242">
                <text:p>-0.0036162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1959309">
                <text:p>0.019593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2123087">
                <text:p>-0.0021230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502445">
                <text:p>0.0150244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2205682">
                <text:p>-0.0022056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8783311">
                <text:p>0.0087833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0.0001116381">
                <text:p>0.00011163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1571678">
                <text:p>-0.0015716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6173068">
                <text:p>-0.0061730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1888018">
                <text:p>-0.0018880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5553933">
                <text:p>-0.0055539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-0.0001774358">
                <text:p>-0.00017743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2204481">
                <text:p>-0.0022044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3353598">
                <text:p>0.0033535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1655321">
                <text:p>-0.00165532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6103015">
                <text:p>0.0061030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3065855">
                <text:p>-0.0030658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5957698">
                <text:p>0.0059576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6153906">
                <text:p>0.0061539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09354438">
                <text:p>-0.00093544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424074">
                <text:p>0.0054240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405282">
                <text:p>0.0044052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1262536">
                <text:p>0.0012625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09918215">
                <text:p>-0.00099182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-0.0004016881">
                <text:p>-0.00040168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2927088">
                <text:p>-0.0029270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343618">
                <text:p>0.0013436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2494863">
                <text:p>0.0024948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4555031">
                <text:p>-0.0045550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0948039">
                <text:p>0.0094803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1956731">
                <text:p>-0.0019567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07885809">
                <text:p>-0.00078858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1266157">
                <text:p>0.0012661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5218014">
                <text:p>0.0052180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187177">
                <text:p>0.0051871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387022">
                <text:p>0.00338702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244609">
                <text:p>0.012446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287944">
                <text:p>0.00228794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158532">
                <text:p>0.011585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08826127">
                <text:p>-0.000882612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509894">
                <text:p>-0.005098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1543262">
                <text:p>0.0015432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6630571">
                <text:p>-0.00663057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2585375">
                <text:p>0.0025853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2054462">
                <text:p>-0.0020544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08664016">
                <text:p>-0.00086640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05301595">
                <text:p>-0.00053015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8471339">
                <text:p>-0.0084713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1018584">
                <text:p>0.010185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8067555">
                <text:p>-0.0080675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4915976">
                <text:p>0.0049159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192982">
                <text:p>0.0051929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5898772">
                <text:p>0.0058987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8593123">
                <text:p>-0.0085931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2810559">
                <text:p>0.0028105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307883">
                <text:p>0.013078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4494559">
                <text:p>-0.0044945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0.0007581676">
                <text:p>0.000758167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-0.0002030369">
                <text:p>-0.00020303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1009936">
                <text:p>0.010099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2142423">
                <text:p>-0.0021424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204298">
                <text:p>-0.002042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2207578">
                <text:p>-0.0022075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608913">
                <text:p>0.016089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6435007">
                <text:p>-0.00643500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6807129">
                <text:p>0.0068071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0.0003831897">
                <text:p>0.00038318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6056024">
                <text:p>-0.0060560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06174137">
                <text:p>0.00061741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5747699">
                <text:p>-0.0057476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7267279">
                <text:p>-0.0072672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3927605">
                <text:p>-0.0039276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1851711">
                <text:p>0.0018517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5061883">
                <text:p>-0.0050618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567914">
                <text:p>0.015679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5122247">
                <text:p>0.0051222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1055088">
                <text:p>-0.00105508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8491409">
                <text:p>0.00849140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2510359">
                <text:p>-0.0025103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245609">
                <text:p>0.0124560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5766089">
                <text:p>0.00576608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736558">
                <text:p>0.007365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564247">
                <text:p>0.0035642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1927878">
                <text:p>0.019278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000325">
                <text:p>-0.010003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279619">
                <text:p>-0.0022796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5232869">
                <text:p>-0.0052328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1517824">
                <text:p>-0.0015178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3226754">
                <text:p>-0.0032267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1641161">
                <text:p>-0.00164116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6087715">
                <text:p>-0.0060877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1784443">
                <text:p>0.0017844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2127222">
                <text:p>0.00212722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8225491">
                <text:p>-0.0082254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210906">
                <text:p>-0.002109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5595603">
                <text:p>-0.00559560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2024298">
                <text:p>0.00202429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0672101">
                <text:p>-0.0006721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1909106">
                <text:p>0.0019091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0449193">
                <text:p>-0.00044919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759141">
                <text:p>0.0037591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2072934">
                <text:p>0.0020729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1995468">
                <text:p>-0.0019954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856526">
                <text:p>0.018565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7589794">
                <text:p>0.00758979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3555778">
                <text:p>-0.0035557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2359771">
                <text:p>0.0023597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546524">
                <text:p>0.025465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508613">
                <text:p>0.0065086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319276">
                <text:p>0.013192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6164071">
                <text:p>0.0061640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3442742">
                <text:p>0.0034427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29686">
                <text:p>0.02296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3542221">
                <text:p>0.0035422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2185">
                <text:p>0.02218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18221">
                <text:p>0.00182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2358681">
                <text:p>0.0023586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1142108">
                <text:p>0.0011421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7080752">
                <text:p>-0.00708075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8817388">
                <text:p>0.00881738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2718888">
                <text:p>0.00271888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7372666">
                <text:p>-0.00737266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2232938">
                <text:p>-0.0022329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0.0003769614">
                <text:p>0.00037696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1055287">
                <text:p>-0.0010552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08238004">
                <text:p>-0.0082380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5555121">
                <text:p>-0.0055551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-0.0001872951">
                <text:p>-0.00018729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0.0004937793">
                <text:p>0.000493779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249258">
                <text:p>-0.002492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1465183">
                <text:p>-0.0014651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6525035">
                <text:p>-0.00652503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2672211">
                <text:p>0.0026722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2630789">
                <text:p>0.0026307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1835324">
                <text:p>-0.0018353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03853">
                <text:p>0.0120385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2088735">
                <text:p>0.00208873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8206266">
                <text:p>0.0082062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0851369">
                <text:p>-0.008513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7232418">
                <text:p>0.0072324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3479874">
                <text:p>-0.00347987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378429">
                <text:p>-0.003784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463612">
                <text:p>0.0044636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2774545">
                <text:p>0.0027745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0.0002527032">
                <text:p>0.00025270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371465">
                <text:p>-0.0037146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2877907">
                <text:p>-0.0028779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3719148">
                <text:p>-0.0037191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04487501">
                <text:p>0.00044875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6034397">
                <text:p>-0.00603439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5530003">
                <text:p>0.0055300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4267868">
                <text:p>-0.0042678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08214528">
                <text:p>-0.0082145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7912829">
                <text:p>-0.0079128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03325805">
                <text:p>-0.00033258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2018619">
                <text:p>-0.0020186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1342448">
                <text:p>0.00134244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3949861">
                <text:p>-0.0039498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3974817">
                <text:p>-0.0039748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02689362">
                <text:p>0.000268936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2820062">
                <text:p>-0.0028200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2367084">
                <text:p>-0.0023670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121104">
                <text:p>0.0112110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3793234">
                <text:p>0.00379323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2031633">
                <text:p>0.020316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09212269">
                <text:p>-0.00921226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5302982">
                <text:p>-0.00530298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07565628">
                <text:p>0.00075656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3598504">
                <text:p>0.0035985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432448">
                <text:p>-0.014324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6930453">
                <text:p>-0.0069304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2918043">
                <text:p>0.029180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557697">
                <text:p>0.0155769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711363">
                <text:p>0.0057113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4106417">
                <text:p>0.0041064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006673909">
                <text:p>0.00066739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0815712">
                <text:p>0.0008157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470655">
                <text:p>0.0014706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390786">
                <text:p>0.0039078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3795566">
                <text:p>-0.0037955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7799601">
                <text:p>-0.0077996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5444048">
                <text:p>-0.0054440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0.0003023973">
                <text:p>0.000302397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09996623">
                <text:p>0.0099966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5974215">
                <text:p>0.0059742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8461817">
                <text:p>0.0084618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1317838">
                <text:p>0.0013178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209782">
                <text:p>0.0120978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1384538">
                <text:p>-0.0013845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0.0002961569">
                <text:p>0.000296156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6644409">
                <text:p>-0.0066444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5238201">
                <text:p>-0.0052382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2950029">
                <text:p>-0.0029500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393038">
                <text:p>0.00239303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394278">
                <text:p>0.003942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4995305">
                <text:p>0.0049953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359637">
                <text:p>0.013596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2739987">
                <text:p>-0.00273998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5169452">
                <text:p>-0.0051694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18732">
                <text:p>0.00187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029817">
                <text:p>0.010298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8009136">
                <text:p>-0.0080091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3197294">
                <text:p>0.00319729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1497055">
                <text:p>-0.0014970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7499126">
                <text:p>0.0074991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5612068">
                <text:p>0.00561206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08476067">
                <text:p>-0.00084760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167893">
                <text:p>0.021678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2372819">
                <text:p>-0.0023728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7151094">
                <text:p>-0.0071510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7680446">
                <text:p>-0.0076804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9041466">
                <text:p>0.0090414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4923871">
                <text:p>-0.0049238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079227">
                <text:p>0.010792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6155021">
                <text:p>0.0061550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2074158">
                <text:p>-0.0020741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3534505">
                <text:p>-0.0035345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07564">
                <text:p>0.0020756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0836957">
                <text:p>-0.008369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61558">
                <text:p>0.010615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-0.0002637603">
                <text:p>-0.000263760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3213543">
                <text:p>-0.00321354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09978651">
                <text:p>-0.0099786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009578">
                <text:p>0.00400957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005921">
                <text:p>0.010059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5649507">
                <text:p>0.0056495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4271007">
                <text:p>-0.0042710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3150472">
                <text:p>0.0031504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6380917">
                <text:p>-0.0063809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1879961">
                <text:p>-0.00187996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428107">
                <text:p>0.014281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3986616">
                <text:p>-0.0039866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2779155">
                <text:p>-0.0027791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293326">
                <text:p>-0.012933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1133531">
                <text:p>-0.0011335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651664">
                <text:p>0.00565166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079343">
                <text:p>0.0050793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4939699">
                <text:p>-0.00493969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6623965">
                <text:p>-0.00662396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297783">
                <text:p>0.0032977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077643">
                <text:p>0.0107764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5020093">
                <text:p>-0.0050200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09746008">
                <text:p>0.0097460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0.000549781">
                <text:p>0.00054978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2077065">
                <text:p>-0.00207706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356952">
                <text:p>0.003569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915005">
                <text:p>0.009150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8864149">
                <text:p>0.00886414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3080409">
                <text:p>-0.0030804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3714285">
                <text:p>-0.0037142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920733">
                <text:p>0.0039207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3267249">
                <text:p>0.00326724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08578259">
                <text:p>0.00085782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09086429">
                <text:p>-0.0090864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3013482">
                <text:p>0.0030134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525041">
                <text:p>0.005250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6647497">
                <text:p>-0.00664749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09861009">
                <text:p>-0.0098610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09209329">
                <text:p>-0.00092093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7988545">
                <text:p>0.00798854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2632981">
                <text:p>-0.0026329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6016824">
                <text:p>-0.0060168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3441144">
                <text:p>-0.0034411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928215">
                <text:p>0.0039282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-0.0001853182">
                <text:p>-0.000185318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7272394">
                <text:p>0.0072723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5774847">
                <text:p>-0.00577484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3850752">
                <text:p>-0.00385075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5194032">
                <text:p>-0.0051940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62034">
                <text:p>0.01620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338592">
                <text:p>0.023385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-0.0003363718">
                <text:p>-0.00033637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4812863">
                <text:p>-0.00481286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703873">
                <text:p>0.0070387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0.0004340145">
                <text:p>0.00043401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7704865">
                <text:p>0.00770486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7936428">
                <text:p>0.0079364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3367111">
                <text:p>-0.0033671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088629">
                <text:p>0.010886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1929763">
                <text:p>-0.0019297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1386681">
                <text:p>0.000138668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2075745">
                <text:p>-0.00207574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5757661">
                <text:p>0.00575766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08800059">
                <text:p>-0.000880005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3152531">
                <text:p>-0.00315253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5429246">
                <text:p>-0.00542924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4167354">
                <text:p>0.00416735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493801">
                <text:p>-0.004938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1098272">
                <text:p>-0.0010982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3056562">
                <text:p>-0.00305656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8562739">
                <text:p>0.00856273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0944418">
                <text:p>0.009444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6383284">
                <text:p>0.0063832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183021">
                <text:p>0.01830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5563284">
                <text:p>-0.00556328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1643517">
                <text:p>-0.00164351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03058764">
                <text:p>0.000305876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4287664">
                <text:p>0.0042876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3243488">
                <text:p>-0.00324348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192259">
                <text:p>0.0119225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623137">
                <text:p>0.0162313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735352">
                <text:p>0.00873535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3445005">
                <text:p>0.00344500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232067">
                <text:p>0.00323206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06698523">
                <text:p>-0.000669852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4926995">
                <text:p>0.0049269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2188792">
                <text:p>-0.00218879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4063531">
                <text:p>-0.00406353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4840547">
                <text:p>-0.00484054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414828">
                <text:p>0.0141482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1263911">
                <text:p>-0.00126391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2194609">
                <text:p>0.00219460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8095955">
                <text:p>-0.00809595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4860062">
                <text:p>-0.00486006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195055">
                <text:p>0.019505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3814625">
                <text:p>-0.0038146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2287747">
                <text:p>-0.00228774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3398782">
                <text:p>-0.00339878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77467">
                <text:p>0.0027746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2156883">
                <text:p>-0.00215688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020606">
                <text:p>-0.00102060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063096">
                <text:p>0.00606309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7701518">
                <text:p>-0.00770151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7113891">
                <text:p>-0.0071138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4587936">
                <text:p>-0.00458793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149259">
                <text:p>0.0114925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3123929">
                <text:p>0.00312392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09306509">
                <text:p>-0.00930650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2962333">
                <text:p>0.0029623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2221288">
                <text:p>-0.00222128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497363">
                <text:p>0.0249736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07902257">
                <text:p>-0.000790225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2511373">
                <text:p>-0.00251137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4109688">
                <text:p>0.00410968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2171847">
                <text:p>0.00217184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8742374">
                <text:p>-0.00874237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4602642">
                <text:p>0.00460264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2915257">
                <text:p>0.0029152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05548586">
                <text:p>-0.000554858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2090907">
                <text:p>0.00209090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2977992">
                <text:p>0.0029779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0.0002491515">
                <text:p>0.00024915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01881191">
                <text:p>-0.000188119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3441104">
                <text:p>0.00344110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3833145">
                <text:p>-0.00383314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46454">
                <text:p>0.014645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4460466">
                <text:p>0.00446046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6259397">
                <text:p>-0.00625939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09548131">
                <text:p>-0.00954813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04356818">
                <text:p>-0.000435681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687009">
                <text:p>0.0068700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8525449">
                <text:p>-0.00852544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214985">
                <text:p>-0.0121498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3261213">
                <text:p>-0.0032612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2129126">
                <text:p>0.00212912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8558947">
                <text:p>-0.00855894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7000864">
                <text:p>-0.00700086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3609002">
                <text:p>0.00360900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1943859">
                <text:p>0.0194385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4768338">
                <text:p>-0.00476833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8190067">
                <text:p>-0.00819006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556039">
                <text:p>-0.0055603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5477218">
                <text:p>0.054772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06150029">
                <text:p>-0.000615002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3060319">
                <text:p>-0.00306031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6482083">
                <text:p>0.00648208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294022">
                <text:p>0.029402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07519491">
                <text:p>-0.000751949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59795">
                <text:p>-0.015979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1906041">
                <text:p>0.0190604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000492">
                <text:p>0.0100049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243575">
                <text:p>-0.0024357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2847722">
                <text:p>-0.00284772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5796667">
                <text:p>0.00579666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406482">
                <text:p>0.0140648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1995821">
                <text:p>0.00199582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6033613">
                <text:p>0.00603361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09974469">
                <text:p>-0.00997446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08883515">
                <text:p>0.000888351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8334104">
                <text:p>0.00833410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5255759">
                <text:p>-0.00525575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-0.0006375482">
                <text:p>-0.000637548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1826714">
                <text:p>0.0182671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1796625">
                <text:p>0.0017966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206128">
                <text:p>-0.0020612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-0.0003718081">
                <text:p>-0.00037180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2818436">
                <text:p>-0.00281843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787376">
                <text:p>0.0078737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3491486">
                <text:p>0.00349148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5037748">
                <text:p>-0.00503774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06321566">
                <text:p>-0.000632156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3048099">
                <text:p>0.00304809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4973053">
                <text:p>-0.00497305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9632558">
                <text:p>-0.00963255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2193278">
                <text:p>0.00219327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315936">
                <text:p>-0.0031593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4385884">
                <text:p>0.00438588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359025">
                <text:p>0.0235902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385986">
                <text:p>-0.003859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-0.0001558185">
                <text:p>-0.000155818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1580923">
                <text:p>0.00158092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4490038">
                <text:p>-0.00449003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2794778">
                <text:p>-0.0027947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4189176">
                <text:p>0.00418917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6645618">
                <text:p>0.00664561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3443029">
                <text:p>-0.00344302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100317">
                <text:p>-0.010031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5655257">
                <text:p>0.00565525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06398691">
                <text:p>-0.000639869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5827148">
                <text:p>-0.00582714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01007287">
                <text:p>0.000100728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09628378">
                <text:p>0.000962837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4152098">
                <text:p>0.00415209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5670096">
                <text:p>-0.00567009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09259249">
                <text:p>-0.000925924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4560469">
                <text:p>0.00456046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3501163">
                <text:p>0.00350116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4664688">
                <text:p>-0.00466468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01939846">
                <text:p>0.000193984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178736">
                <text:p>0.0117873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3620993">
                <text:p>-0.00362099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2442096">
                <text:p>-0.00244209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3620473">
                <text:p>-0.00362047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327781">
                <text:p>0.0132778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09708533">
                <text:p>0.00097085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3019237">
                <text:p>0.00301923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7597468">
                <text:p>0.00759746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09104988">
                <text:p>0.000910498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3689853">
                <text:p>0.00368985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6474141">
                <text:p>-0.00647414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8914489">
                <text:p>-0.00891448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6440571">
                <text:p>-0.00644057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083199">
                <text:p>0.0108319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7967695">
                <text:p>-0.00796769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2850974">
                <text:p>-0.00285097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6291632">
                <text:p>0.00629163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08574533">
                <text:p>0.00857453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08962075">
                <text:p>0.00896207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908435">
                <text:p>-0.0090843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1459135">
                <text:p>-0.00145913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2407979">
                <text:p>-0.00240797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124277">
                <text:p>-0.0112427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-0.0002248579">
                <text:p>-0.000224857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277067">
                <text:p>0.0127706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0477431">
                <text:p>0.00047743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08004322">
                <text:p>0.00800432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04681">
                <text:p>-0.010468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5838762">
                <text:p>0.00583876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4282001">
                <text:p>-0.00428200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2616171">
                <text:p>-0.00261617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325024">
                <text:p>-0.013250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5949234">
                <text:p>0.00594923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1729828">
                <text:p>0.00172982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295995">
                <text:p>-0.012959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6968733">
                <text:p>0.00696873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6410222">
                <text:p>-0.00641022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2076937">
                <text:p>-0.00207693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431148">
                <text:p>-0.0143114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-0.0001465481">
                <text:p>-0.000146548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149803">
                <text:p>0.0114980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400037">
                <text:p>0.00140003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254284">
                <text:p>-0.0125428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6133557">
                <text:p>0.00613355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08885792">
                <text:p>0.00888579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7849603">
                <text:p>-0.00784960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4230984">
                <text:p>-0.00423098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2204121">
                <text:p>0.00220412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6968858">
                <text:p>0.00696885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1057002">
                <text:p>-0.0105700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2424665">
                <text:p>0.00242466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08989367">
                <text:p>0.00898936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4697925">
                <text:p>0.00469792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07256247">
                <text:p>0.00725624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7780178">
                <text:p>-0.00778017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2719521">
                <text:p>-0.00271952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5352058">
                <text:p>0.00535205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049817">
                <text:p>-0.0104981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3844695">
                <text:p>-0.00384469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461036">
                <text:p>0.0146103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6633533">
                <text:p>-0.00663353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4185376">
                <text:p>-0.00418537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3866649">
                <text:p>-0.00386664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1336674">
                <text:p>0.00133667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2302202">
                <text:p>-0.00230220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11075">
                <text:p>-0.011107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566666">
                <text:p>-0.0156666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5207743">
                <text:p>0.00520774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8401511">
                <text:p>0.00840151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7069718">
                <text:p>-0.0070697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3796952">
                <text:p>-0.00379695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09556065">
                <text:p>0.00955606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045749">
                <text:p>0.0104574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7334677">
                <text:p>-0.00733467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5395018">
                <text:p>-0.00539501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6924129">
                <text:p>0.00692412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7584682">
                <text:p>0.00758468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1034024">
                <text:p>-0.0103402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063007">
                <text:p>-0.0106300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09923062">
                <text:p>0.00992306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9069089">
                <text:p>-0.000906908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7506431">
                <text:p>-0.00750643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4689206">
                <text:p>-0.00468920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472679">
                <text:p>-0.0047267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172745">
                <text:p>0.00817274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7007431">
                <text:p>-0.0070074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500011">
                <text:p>-0.0150001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385373">
                <text:p>0.0138537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-0.0003476038">
                <text:p>-0.000347603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128114">
                <text:p>-0.0112811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6863253">
                <text:p>0.00686325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2873257">
                <text:p>0.00287325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1563124">
                <text:p>0.00156312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418944">
                <text:p>-0.0141894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53115">
                <text:p>0.015311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8212883">
                <text:p>0.00821288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041999">
                <text:p>0.0104199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1538568">
                <text:p>-0.00153856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2275409">
                <text:p>-0.00227540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2461683">
                <text:p>-0.00246168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5520803">
                <text:p>0.0055208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037475">
                <text:p>0.0103747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-0.0006555245">
                <text:p>-0.000655524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6939461">
                <text:p>0.00693946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485254">
                <text:p>0.0148525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6887542">
                <text:p>-0.00688754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2439068">
                <text:p>-0.00243906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09806994">
                <text:p>0.00980699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074332">
                <text:p>0.0307433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09107019">
                <text:p>0.00910701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7450558">
                <text:p>-0.00745055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3259617">
                <text:p>0.00325961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05089483">
                <text:p>-0.000508948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5263953">
                <text:p>0.00526395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5912818">
                <text:p>-0.00591281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6798061">
                <text:p>0.00679806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355496">
                <text:p>0.0335549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256852">
                <text:p>0.0125685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77498">
                <text:p>-0.0107749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3164962">
                <text:p>-0.00316496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25358">
                <text:p>0.0102535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2870538">
                <text:p>-0.00287053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7463906">
                <text:p>0.00746390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203656">
                <text:p>0.0120365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-0.001653188">
                <text:p>-0.00165318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042831">
                <text:p>-0.0104283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08172693">
                <text:p>-0.000817269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5217522">
                <text:p>0.00521752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2470584">
                <text:p>-0.00247058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09413836">
                <text:p>-0.00941383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7166516">
                <text:p>0.00716651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2528286">
                <text:p>0.0025282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5008757">
                <text:p>0.00500875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2980615">
                <text:p>-0.00298061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595156">
                <text:p>0.00559515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1080393">
                <text:p>0.00108039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08944818">
                <text:p>0.00894481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1310711">
                <text:p>-0.00131071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2637677">
                <text:p>0.00263767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104784">
                <text:p>0.0110478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8927992">
                <text:p>-0.00892799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5954656">
                <text:p>-0.00595465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5661426">
                <text:p>0.0056614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5159572">
                <text:p>0.00515957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8768287">
                <text:p>-0.00876828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158592">
                <text:p>0.0115859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6061537">
                <text:p>0.00606153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555495">
                <text:p>0.0055549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1971643">
                <text:p>-0.0019716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083097">
                <text:p>-0.0108309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1729246">
                <text:p>0.00172924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5038219">
                <text:p>-0.00503821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5903408">
                <text:p>-0.0059034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9315433">
                <text:p>-0.00931543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6117006">
                <text:p>0.00611700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4379927">
                <text:p>-0.00437992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3179757">
                <text:p>-0.00317975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807362">
                <text:p>-0.0080736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3474958">
                <text:p>0.00347495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297002">
                <text:p>0.0129700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7117324">
                <text:p>-0.00711732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27167">
                <text:p>-0.012716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8190651">
                <text:p>-0.00819065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1350265">
                <text:p>0.00135026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484265">
                <text:p>-0.0048426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7719947">
                <text:p>-0.00771994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3253004">
                <text:p>0.00325300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4485093">
                <text:p>0.00448509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3067991">
                <text:p>-0.00306799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1095795">
                <text:p>-0.0109579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543372">
                <text:p>0.0154337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2379344">
                <text:p>-0.00237934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245166">
                <text:p>-0.0124516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4036395">
                <text:p>0.00403639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299041">
                <text:p>0.0229904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1624763">
                <text:p>-0.00162476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6200161">
                <text:p>-0.00620016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7609808">
                <text:p>0.00760980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4166141">
                <text:p>-0.00416614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1500794">
                <text:p>0.00150079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7254087">
                <text:p>-0.00725408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8940388">
                <text:p>-0.00894038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1591771">
                <text:p>0.00159177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0963749">
                <text:p>-0.0096374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6422102">
                <text:p>-0.00642210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7948237">
                <text:p>-0.00794823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1111453">
                <text:p>-0.00111145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8916958">
                <text:p>0.00891695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2945191">
                <text:p>-0.00294519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3271623">
                <text:p>-0.00327162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-0.0003532279">
                <text:p>-0.000353227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6371905">
                <text:p>-0.00637190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7427973">
                <text:p>-0.00742797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5415176">
                <text:p>-0.00541517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39952">
                <text:p>0.023995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03899798">
                <text:p>-0.000389979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2624972">
                <text:p>0.00262497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08142611">
                <text:p>0.00814261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829424">
                <text:p>0.0082942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08561506">
                <text:p>0.00856150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04269537">
                <text:p>0.000426953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6066074">
                <text:p>-0.00606607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3210114">
                <text:p>-0.00321011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5175525">
                <text:p>0.00517552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1091755">
                <text:p>-0.0109175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3958168">
                <text:p>0.00395816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4433689">
                <text:p>0.00443368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-0.0008539493">
                <text:p>-0.000853949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0879613">
                <text:p>-0.0087961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09199637">
                <text:p>0.00919963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209562">
                <text:p>0.0420956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1685997">
                <text:p>0.00168599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588621">
                <text:p>0.0158862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122328">
                <text:p>-0.0112232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6610136">
                <text:p>0.00661013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3708433">
                <text:p>0.00370843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451227">
                <text:p>0.0145122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1551757">
                <text:p>-0.00155175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1904897">
                <text:p>0.0190489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357272">
                <text:p>0.0135727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436187">
                <text:p>0.0043618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8999637">
                <text:p>-0.00899963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2889083">
                <text:p>0.00288908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1145755">
                <text:p>0.00114575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237146">
                <text:p>-0.0123714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0930659">
                <text:p>-0.0093065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8255307">
                <text:p>0.00825530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-0.001101532">
                <text:p>-0.00110153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7595032">
                <text:p>-0.00759503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085745">
                <text:p>-0.0108574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142748">
                <text:p>0.0114274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6790303">
                <text:p>0.00679030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54126">
                <text:p>-0.005412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2211212">
                <text:p>-0.00221121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458802">
                <text:p>0.0145880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447811">
                <text:p>0.0244781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4536821">
                <text:p>-0.00453682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2047533">
                <text:p>0.00204753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2799768">
                <text:p>0.00279976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1685077">
                <text:p>0.0168507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1928965">
                <text:p>0.0192896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243648">
                <text:p>-0.0124364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5244493">
                <text:p>0.00524449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4646696">
                <text:p>-0.00464669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774044">
                <text:p>-0.0077404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7497957">
                <text:p>-0.00749795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4202524">
                <text:p>0.00420252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6107821">
                <text:p>-0.00610782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5647522">
                <text:p>-0.00564752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1943315">
                <text:p>0.00194331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8218062">
                <text:p>0.00821806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2511305">
                <text:p>0.00251130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1093552">
                <text:p>-0.0109355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183421">
                <text:p>-0.0118342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1720406">
                <text:p>0.00172040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700912">
                <text:p>0.0070091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5669442">
                <text:p>0.00566944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275934">
                <text:p>-0.0127593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364083">
                <text:p>0.0136408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0.0004771603">
                <text:p>0.000477160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8290331">
                <text:p>-0.00829033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6613965">
                <text:p>-0.00661396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458235">
                <text:p>0.0145823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1762356">
                <text:p>0.00176235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315562">
                <text:p>-0.0131556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7498551">
                <text:p>-0.00749855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433342">
                <text:p>0.0143334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7564496">
                <text:p>-0.00756449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4671485">
                <text:p>-0.00467148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250032">
                <text:p>-0.0125003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590405">
                <text:p>-0.0059040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011199">
                <text:p>0.0101119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319431">
                <text:p>-0.0131943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5652173">
                <text:p>-0.00565217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2735334">
                <text:p>0.00273533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-0.0002182768">
                <text:p>-0.000218276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215966">
                <text:p>-0.0121596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615414">
                <text:p>-0.0061541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043762">
                <text:p>0.0104376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1981988">
                <text:p>-0.00198198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3916062">
                <text:p>-0.00391606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239268">
                <text:p>-0.0123926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2187113">
                <text:p>-0.00218711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1836959">
                <text:p>0.0183695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8969138">
                <text:p>-0.00896913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6475269">
                <text:p>-0.00647526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2287123">
                <text:p>0.00228712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08578618">
                <text:p>0.000857861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5970382">
                <text:p>-0.00597038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4794113">
                <text:p>-0.00479411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3226134">
                <text:p>0.00322613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245901">
                <text:p>0.0124590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5936822">
                <text:p>-0.0059368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5130684">
                <text:p>-0.00513068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6073673">
                <text:p>0.00607367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4267153">
                <text:p>-0.00426715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09152976">
                <text:p>-0.00915297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6165569">
                <text:p>-0.00616556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1308314">
                <text:p>0.0013083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3354516">
                <text:p>0.00335451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2793984">
                <text:p>0.00279398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10629">
                <text:p>-0.01062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4550502">
                <text:p>-0.00455050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3937676">
                <text:p>0.00393767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1045117">
                <text:p>-0.0104511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5339854">
                <text:p>-0.00533985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2654627">
                <text:p>-0.00265462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409854">
                <text:p>0.0140985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7864762">
                <text:p>-0.00786476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3322426">
                <text:p>-0.00332242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158009">
                <text:p>0.0115800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578589">
                <text:p>0.0157858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7502994">
                <text:p>-0.00750299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1421678">
                <text:p>0.00142167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5696897">
                <text:p>-0.00569689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6518911">
                <text:p>0.00651891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47025">
                <text:p>-0.014702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-0.0003157403">
                <text:p>-0.000315740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4343324">
                <text:p>0.00434332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1061598">
                <text:p>0.0106159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2172151">
                <text:p>-0.00217215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08679151">
                <text:p>-0.00867915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1614848">
                <text:p>0.00161484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553806">
                <text:p>0.0155380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1185656">
                <text:p>-0.0118565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512489">
                <text:p>-0.0151248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07124997">
                <text:p>0.00712499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-0.0006186446">
                <text:p>-0.000618644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3639443">
                <text:p>-0.00363944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1075902">
                <text:p>-0.0107590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-0.002192234">
                <text:p>-0.00219223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355703">
                <text:p>0.0035570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1281214">
                <text:p>-0.0128121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5640479">
                <text:p>-0.00564047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224399">
                <text:p>0.0122439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01491674">
                <text:p>0.00149167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6168743">
                <text:p>0.00616874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8468813">
                <text:p>-0.00846881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-0.001086478">
                <text:p>-0.00108647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117284">
                <text:p>0.0211728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1130199">
                <text:p>-0.0113019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08111781">
                <text:p>-0.00811178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198644">
                <text:p>0.019864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009684727">
                <text:p>0.000968472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-0.003139519">
                <text:p>-0.00313951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-0.002320537">
                <text:p>-0.00232053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4398114">
                <text:p>0.00439811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01991567">
                <text:p>0.00199156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04745772">
                <text:p>0.000474577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5532244">
                <text:p>-0.00553224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08479221">
                <text:p>0.00847922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4298856">
                <text:p>-0.00429885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09715374">
                <text:p>0.00971537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06482793">
                <text:p>0.000648279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06993709">
                <text:p>0.00699370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6629712">
                <text:p>0.00662971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5905034">
                <text:p>0.00590503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09357284">
                <text:p>-0.00935728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4480013">
                <text:p>0.0044800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1668349">
                <text:p>0.0166834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5031798">
                <text:p>-0.00503179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1197873">
                <text:p>-0.0119787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05568297">
                <text:p>0.00556829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-0.00181337">
                <text:p>-0.0018133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129034">
                <text:p>-0.012903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1220954">
                <text:p>-0.0122095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0637483">
                <text:p>0.0063748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-0.002718054">
                <text:p>-0.00271805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-0.002452853">
                <text:p>-0.00245285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08240865">
                <text:p>-0.00824086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422973">
                <text:p>0.0042297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3151768">
                <text:p>0.00315176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1397718">
                <text:p>-0.0139771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625976">
                <text:p>-0.0062597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07116077">
                <text:p>0.00711607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0.0008295501">
                <text:p>0.000829550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1141005">
                <text:p>-0.0114100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212235">
                <text:p>0.0121223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04616776">
                <text:p>0.00461677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1227273">
                <text:p>-0.0122727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-0.002264494">
                <text:p>-0.00226449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-0.004527512">
                <text:p>-0.00452751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08844974">
                <text:p>0.00884497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0.0003641024">
                <text:p>0.000364102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-0.003943848">
                <text:p>-0.00394384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01034671">
                <text:p>0.00103467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09451443">
                <text:p>0.00945144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-0.003992058">
                <text:p>-0.00399205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1009643">
                <text:p>-0.0100964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09124068">
                <text:p>0.00912406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0.0001925642">
                <text:p>0.000192564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-0.004830546">
                <text:p>-0.00483054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1181096">
                <text:p>-0.0118109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04593387">
                <text:p>0.00459338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03851755">
                <text:p>0.00385175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1190245">
                <text:p>-0.0119024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128776">
                <text:p>0.0012877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007145623">
                <text:p>0.000714562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02392279">
                <text:p>0.00239227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-0.005211917">
                <text:p>-0.00521191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08437361">
                <text:p>-0.00843736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09922933">
                <text:p>0.00992293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-0.004304554">
                <text:p>-0.00430455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-0.007742314">
                <text:p>-0.00774231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-0.001172598">
                <text:p>-0.00117259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068539">
                <text:p>0.0106853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0328669">
                <text:p>0.0032866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005960029">
                <text:p>0.000596002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1129646">
                <text:p>-0.0112964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-0.004635292">
                <text:p>-0.00463529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05233949">
                <text:p>0.00523394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00496314">
                <text:p>0.00049631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-0.001709363">
                <text:p>-0.00170936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-0.003182942">
                <text:p>-0.00318294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-0.001888785">
                <text:p>-0.00188878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-0.006369916">
                <text:p>-0.00636991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-0.006265719">
                <text:p>-0.00626571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-0.002455017">
                <text:p>-0.0024550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06089465">
                <text:p>0.00608946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-0.01225056">
                <text:p>-0.0122505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-0.01066042">
                <text:p>-0.0106604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04053703">
                <text:p>0.00405370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07503512">
                <text:p>0.0075035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-0.01200418">
                <text:p>-0.0120041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0436695">
                <text:p>0.0043669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-0.003338036">
                <text:p>-0.00333803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2455886">
                <text:p>0.0245588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-0.001635826">
                <text:p>-0.00163582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08477927">
                <text:p>0.00847792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-0.004151139">
                <text:p>-0.00415113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-0.006209363">
                <text:p>-0.00620936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1061604">
                <text:p>0.0106160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-0.009498433">
                <text:p>-0.0094984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07972069">
                <text:p>0.00797206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04474754">
                <text:p>0.00447475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-0.004426357">
                <text:p>-0.00442635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01564026">
                <text:p>0.00156402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2058287">
                <text:p>0.0205828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03423013">
                <text:p>0.00342301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-0.002590589">
                <text:p>-0.00259058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-0.008799906">
                <text:p>-0.00879990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05228803">
                <text:p>0.00522880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06069921">
                <text:p>0.00606992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-0.0003199365">
                <text:p>-0.000319936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-0.01063104">
                <text:p>-0.0106310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05356373">
                <text:p>0.00535637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1551795">
                <text:p>0.0155179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-0.004223769">
                <text:p>-0.00422376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-0.001806782">
                <text:p>-0.00180678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1332112">
                <text:p>0.0133211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-0.0002176235">
                <text:p>-0.000217623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0223174">
                <text:p>0.0022317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-0.01314322">
                <text:p>-0.0131432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03487337">
                <text:p>0.00348733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257066">
                <text:p>0.025706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-0.007087313">
                <text:p>-0.00708731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-0.006108874">
                <text:p>-0.00610887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07838807">
                <text:p>0.00783880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-0.001674087">
                <text:p>-0.00167408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-0.007379">
                <text:p>-0.00737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-0.0134697">
                <text:p>-0.013469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2433188">
                <text:p>0.0243318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-0.003749755">
                <text:p>-0.00374975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01468064">
                <text:p>0.00146806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02143866">
                <text:p>0.00214386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001242051">
                <text:p>0.00124205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-0.009140111">
                <text:p>-0.00914011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-0.01054141">
                <text:p>-0.0105414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0.0004047629">
                <text:p>0.000404762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02068528">
                <text:p>0.00206852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-0.01263808">
                <text:p>-0.0126380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-0.00392053">
                <text:p>-0.0039205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0662525">
                <text:p>0.0066252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01144836">
                <text:p>0.00114483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-0.002930961">
                <text:p>-0.00293096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0607644">
                <text:p>0.060764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0.0001334444">
                <text:p>0.000133444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-0.001690338">
                <text:p>-0.00169033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02660823">
                <text:p>0.00266082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-0.01116118">
                <text:p>-0.0111611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001832349">
                <text:p>0.00183234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-0.003825729">
                <text:p>-0.0038257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-0.00882045">
                <text:p>-0.0088204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0003601343">
                <text:p>0.000360134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04192376">
                <text:p>0.00419237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-0.001102897">
                <text:p>-0.00110289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-0.005474664">
                <text:p>-0.00547466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-0.009161822">
                <text:p>-0.00916182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-0.002773985">
                <text:p>-0.00277398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05747785">
                <text:p>0.00574778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-0.009676355">
                <text:p>-0.00967635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-0.0066382">
                <text:p>-0.006638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-0.0006230149">
                <text:p>-0.000623014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-0.003000969">
                <text:p>-0.00300096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-0.001129623">
                <text:p>-0.00112962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-0.01097938">
                <text:p>-0.0109793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-0.0002767322">
                <text:p>-0.000276732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04316763">
                <text:p>0.00431676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04390521">
                <text:p>0.00439052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-0.007601283">
                <text:p>-0.00760128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-0.002327949">
                <text:p>-0.00232794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0.0004874016">
                <text:p>0.000487401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-0.002194523">
                <text:p>-0.00219452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-0.002489474">
                <text:p>-0.00248947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007541758">
                <text:p>0.00754175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02270641">
                <text:p>0.022706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-0.001105142">
                <text:p>-0.00110514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-0.005616001">
                <text:p>-0.00561600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002696486">
                <text:p>0.00269648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01018841">
                <text:p>0.0101884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-0.007936842">
                <text:p>-0.00793684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-0.00632799">
                <text:p>-0.0063279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001293291">
                <text:p>0.00129329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001370082">
                <text:p>0.00137008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0009740898">
                <text:p>0.000974089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-0.004514643">
                <text:p>-0.00451464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007526041">
                <text:p>0.00752604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001238126">
                <text:p>0.00123812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00112762">
                <text:p>0.0011276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00407345">
                <text:p>0.0040734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009199132">
                <text:p>0.00919913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-0.001176933">
                <text:p>-0.00117693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-0.005547424">
                <text:p>-0.00554742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-0.01254025">
                <text:p>-0.0125402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-0.005087015">
                <text:p>-0.00508701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-0.001003886">
                <text:p>-0.00100388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-0.01263271">
                <text:p>-0.0126327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-0.008991237">
                <text:p>-0.00899123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-0.002163233">
                <text:p>-0.00216323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-0.001397662">
                <text:p>-0.00139766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-0.005169063">
                <text:p>-0.00516906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-0.0004521577">
                <text:p>-0.000452157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001662118">
                <text:p>0.00166211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-0.005042712">
                <text:p>-0.00504271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-0.007283851">
                <text:p>-0.00728385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-0.008817167">
                <text:p>-0.00881716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0174028">
                <text:p>0.017402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004059794">
                <text:p>0.00405979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-0.00582167">
                <text:p>-0.0058216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-0.002246939">
                <text:p>-0.00224693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0131027">
                <text:p>0.013102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-0.002554303">
                <text:p>-0.00255430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-0.003618801">
                <text:p>-0.00361880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-0.005193795">
                <text:p>-0.00519379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006785879">
                <text:p>0.00678587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002962417">
                <text:p>0.00296241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-0.001518266">
                <text:p>-0.00151826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-0.009260119">
                <text:p>-0.00926011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-0.003257812">
                <text:p>-0.00325781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003918915">
                <text:p>0.00391891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-0.003918528">
                <text:p>-0.00391852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-0.01145225">
                <text:p>-0.0114522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005150169">
                <text:p>0.00515016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002137193">
                <text:p>0.00213719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-0.01223128">
                <text:p>-0.0122312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008293467">
                <text:p>0.00829346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-0.002712408">
                <text:p>-0.00271240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-0.005194078">
                <text:p>-0.00519407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-0.0109806">
                <text:p>-0.010980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-0.01241634">
                <text:p>-0.0124163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-0.003588843">
                <text:p>-0.00358884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-0.005511242">
                <text:p>-0.00551124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-0.002087729">
                <text:p>-0.00208772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-0.00392181">
                <text:p>-0.0039218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-0.003862613">
                <text:p>-0.00386261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005296116">
                <text:p>0.00529611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04627543">
                <text:p>0.0462754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-0.00145091">
                <text:p>-0.0014509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00947939">
                <text:p>0.0094793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-0.001174182">
                <text:p>-0.00117418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01802106">
                <text:p>0.0180210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-0.01026867">
                <text:p>-0.0102686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005744349">
                <text:p>0.00574434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004242734">
                <text:p>0.00424273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-0.009655482">
                <text:p>-0.00965548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-0.01024617">
                <text:p>-0.0102461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008509453">
                <text:p>0.00850945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004976306">
                <text:p>0.00497630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-0.005308761">
                <text:p>-0.00530876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005429629">
                <text:p>0.00542962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005224462">
                <text:p>0.00522446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006670759">
                <text:p>0.00667075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0082673">
                <text:p>0.008267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-0.004222486">
                <text:p>-0.00422248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001037844">
                <text:p>0.00103784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006460098">
                <text:p>0.00646009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-0.006960872">
                <text:p>-0.00696087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001852278">
                <text:p>0.00185227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0005813097">
                <text:p>0.000581309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003871031">
                <text:p>0.00387103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-0.003903159">
                <text:p>-0.00390315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-0.01178898">
                <text:p>-0.0117889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-0.0013528">
                <text:p>-0.001352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004888027">
                <text:p>0.00488802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-0.001074865">
                <text:p>-0.00107486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001661736">
                <text:p>0.00166173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-0.001851106">
                <text:p>-0.00185110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01282343">
                <text:p>0.0128234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-0.0002900221">
                <text:p>-0.000290022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001589608">
                <text:p>0.00158960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-0.001549348">
                <text:p>-0.00154934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-0.004066539">
                <text:p>-0.00406653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-0.00653503">
                <text:p>-0.0065350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-0.00214769">
                <text:p>-0.0021476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-0.001240598">
                <text:p>-0.00124059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01230756">
                <text:p>0.0123075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02798315">
                <text:p>0.0279831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-0.006138414">
                <text:p>-0.00613841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0004371598">
                <text:p>0.000437159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006042646">
                <text:p>0.00604264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-0.005869349">
                <text:p>-0.00586934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0007310716">
                <text:p>0.000731071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01208355">
                <text:p>0.0120835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0011333">
                <text:p>0.001133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00404613">
                <text:p>0.0040461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-0.0001218716">
                <text:p>-0.000121871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-0.003470365">
                <text:p>-0.00347036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005761669">
                <text:p>0.00576166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01196403">
                <text:p>0.0119640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005015624">
                <text:p>0.00501562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01862193">
                <text:p>0.0186219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007407189">
                <text:p>0.00740718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-0.008396984">
                <text:p>-0.00839698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-0.009030523">
                <text:p>-0.00903052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002705695">
                <text:p>0.00270569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-0.0003145831">
                <text:p>-0.000314583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004369468">
                <text:p>0.00436946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-0.002544329">
                <text:p>-0.00254432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003100433">
                <text:p>0.00310043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002264539">
                <text:p>0.00226453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-0.003288633">
                <text:p>-0.00328863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-0.006030976">
                <text:p>-0.00603097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01475557">
                <text:p>0.0147555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-0.003840133">
                <text:p>-0.00384013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-0.0001131879">
                <text:p>-0.000113187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-0.004958685">
                <text:p>-0.00495868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-0.00185305">
                <text:p>-0.0018530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-0.005119713">
                <text:p>-0.00511971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-0.007361154">
                <text:p>-0.00736115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-0.001688691">
                <text:p>-0.00168869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02138366">
                <text:p>0.0213836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002435309">
                <text:p>0.00243530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-0.007837514">
                <text:p>-0.00783751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001995293">
                <text:p>0.00199529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007552606">
                <text:p>0.00755260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-0.006024871">
                <text:p>-0.00602487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-0.004717612">
                <text:p>-0.00471761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-0.001533241">
                <text:p>-0.00153324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-0.005106553">
                <text:p>-0.00510655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01096093">
                <text:p>0.0109609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002096449">
                <text:p>0.00209644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0370065">
                <text:p>0.037006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0101632">
                <text:p>0.010163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001909475">
                <text:p>0.00190947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-0.00442084">
                <text:p>-0.0044208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003890256">
                <text:p>0.00389025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001315749">
                <text:p>0.00131574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01516144">
                <text:p>0.0151614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-0.00870139">
                <text:p>-0.0087013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01633217">
                <text:p>0.0163321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006251852">
                <text:p>0.00625185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002192474">
                <text:p>0.00219247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001617343">
                <text:p>0.00161734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002488189">
                <text:p>0.00248818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-0.001785367">
                <text:p>-0.00178536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-0.006001584">
                <text:p>-0.00600158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-0.009562645">
                <text:p>-0.00956264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008530992">
                <text:p>0.00853099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003635986">
                <text:p>0.00363598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004691268">
                <text:p>0.00469126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-0.009484435">
                <text:p>-0.00948443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01897487">
                <text:p>0.0189748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007162536">
                <text:p>0.00716253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-0.007460907">
                <text:p>-0.00746090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-0.006237732">
                <text:p>-0.00623773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002203288">
                <text:p>0.00220328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01979801">
                <text:p>0.0197980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-0.003203593">
                <text:p>-0.00320359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-0.002376697">
                <text:p>-0.00237669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007152327">
                <text:p>0.00715232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006994688">
                <text:p>0.00699468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-0.003635508">
                <text:p>-0.00363550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-0.01193113">
                <text:p>-0.0119311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-0.001402764">
                <text:p>-0.00140276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-0.004621134">
                <text:p>-0.00462113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-0.003797667">
                <text:p>-0.00379766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011683">
                <text:p>0.01168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-0.004966202">
                <text:p>-0.00496620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01256986">
                <text:p>0.0125698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-0.004917577">
                <text:p>-0.00491757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007010137">
                <text:p>0.00701013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01244747">
                <text:p>0.0124474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002348303">
                <text:p>0.00234830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0176544">
                <text:p>0.017654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-0.006079286">
                <text:p>-0.00607928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004664968">
                <text:p>0.00466496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-0.000222942">
                <text:p>-0.00022294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-0.007017632">
                <text:p>-0.00701763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-0.01009773">
                <text:p>-0.0100977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008026392">
                <text:p>0.00802639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005228405">
                <text:p>0.00522840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-0.006324034">
                <text:p>-0.00632403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-0.0003350507">
                <text:p>-0.000335050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01059326">
                <text:p>0.0105932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-0.005072627">
                <text:p>-0.00507262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0176481">
                <text:p>0.017648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01226823">
                <text:p>0.0122682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003978378">
                <text:p>0.00397837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001567773">
                <text:p>0.00156777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-0.002263828">
                <text:p>-0.00226382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-0.010484">
                <text:p>-0.01048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005067546">
                <text:p>0.00506754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01354873">
                <text:p>0.0135487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-0.001391127">
                <text:p>-0.00139112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004587953">
                <text:p>0.00458795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002862568">
                <text:p>0.00286256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003128483">
                <text:p>0.00312848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0.001571158">
                <text:p>0.00157115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002337605">
                <text:p>0.00233760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003616843">
                <text:p>0.00361684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0.001406562">
                <text:p>0.00140656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-0.005144075">
                <text:p>-0.00514407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-0.007648236">
                <text:p>-0.00764823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005486266">
                <text:p>0.00548626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04935159">
                <text:p>0.0493515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009085837">
                <text:p>0.00908583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003759074">
                <text:p>0.00375907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005336609">
                <text:p>0.00533660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0.001907347">
                <text:p>0.00190734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004034293">
                <text:p>0.00403429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005976861">
                <text:p>0.00597686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-0.0002263345">
                <text:p>-0.000226334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0.001699661">
                <text:p>0.00169966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0.002980226">
                <text:p>0.00298022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-0.0004023925">
                <text:p>-0.000402392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007094153">
                <text:p>0.00709415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02719738">
                <text:p>0.0271973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006698263">
                <text:p>0.00669826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02090868">
                <text:p>0.0209086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-0.001862039">
                <text:p>-0.00186203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0.001542967">
                <text:p>0.00154296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00417554">
                <text:p>0.0041755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-0.004544949">
                <text:p>-0.00454494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01141878">
                <text:p>0.0114187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-0.0008072266">
                <text:p>-0.000807226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02599045">
                <text:p>0.0259904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0.003226311">
                <text:p>0.00322631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01199955">
                <text:p>0.0119995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009805204">
                <text:p>0.00980520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-0.00326339">
                <text:p>-0.0032633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01737065">
                <text:p>0.0173706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01291366">
                <text:p>0.0129136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0.005140118">
                <text:p>0.00514011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01119542">
                <text:p>0.0111954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0.001814703">
                <text:p>0.00181470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0.002943388">
                <text:p>0.00294338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01288361">
                <text:p>0.0128836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-0.002736803">
                <text:p>-0.00273680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0.005495481">
                <text:p>0.00549548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0.001074012">
                <text:p>0.00107401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-0.0007044162">
                <text:p>-0.000704416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0106363">
                <text:p>0.010636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007571319">
                <text:p>0.00757131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008270024">
                <text:p>0.00827002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-0.001801197">
                <text:p>-0.00180119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0.003137463">
                <text:p>0.00313746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0.004424245">
                <text:p>0.00442424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01266949">
                <text:p>0.0126694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01726457">
                <text:p>0.0172645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01595144">
                <text:p>0.0159514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0.008772766">
                <text:p>0.00877276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0.005818366">
                <text:p>0.00581836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-0.00258475">
                <text:p>-0.0025847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0.0009175839">
                <text:p>0.0009175839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0.00653428">
                <text:p>0.0065342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00988765">
                <text:p>0.0098876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02854497">
                <text:p>0.0285449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0.008058485">
                <text:p>0.00805848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01270454">
                <text:p>0.0127045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0.01031337">
                <text:p>0.0103133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01371092">
                <text:p>0.0137109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0.007154157">
                <text:p>0.00715415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01437663">
                <text:p>0.0143766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0.01013431">
                <text:p>0.0101343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01413546">
                <text:p>0.0141354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0.0001156258">
                <text:p>0.000115625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04402173">
                <text:p>0.0440217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01552716">
                <text:p>0.0155271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03991458">
                <text:p>0.0399145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01565871">
                <text:p>0.0156587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04439518">
                <text:p>0.0443951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0.01407504">
                <text:p>0.0140750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01941579">
                <text:p>0.0194157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0.006455341">
                <text:p>0.00645534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02304749">
                <text:p>0.0230474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01747258">
                <text:p>0.0174725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0.008399786">
                <text:p>0.00839978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01754619">
                <text:p>0.0175461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0.01563504">
                <text:p>0.0156350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0.01649318">
                <text:p>0.0164931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0.0148913">
                <text:p>0.014891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0.008605152">
                <text:p>0.00860515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02505157">
                <text:p>0.0250515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0.01169503">
                <text:p>0.0116950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0.01185935">
                <text:p>0.0118593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0.01900797">
                <text:p>0.0190079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0.01857219">
                <text:p>0.0185721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03416783">
                <text:p>0.0341678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0.01974399">
                <text:p>0.0197439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0.01919198">
                <text:p>0.0191919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0.01517401">
                <text:p>0.0151740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0.02307399">
                <text:p>0.0230739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02643739">
                <text:p>0.0264373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0.02174889">
                <text:p>0.0217488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03517675">
                <text:p>0.0351767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0.02465147">
                <text:p>0.0246514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02896552">
                <text:p>0.0289655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04196038">
                <text:p>0.0419603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0.02776984">
                <text:p>0.0277698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0.02000783">
                <text:p>0.0200078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03386182">
                <text:p>0.0338618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0334123">
                <text:p>0.033412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0.02645433">
                <text:p>0.0264543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04206321">
                <text:p>0.0420632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0.03281325">
                <text:p>0.0328132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0.02800223">
                <text:p>0.0280022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04522373">
                <text:p>0.0452237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0.03463542">
                <text:p>0.0346354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04335597">
                <text:p>0.0433559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0.027916">
                <text:p>0.02791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04226459">
                <text:p>0.0422645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04707709">
                <text:p>0.0470770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0.03364233">
                <text:p>0.0336423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04475698">
                <text:p>0.0447569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0.03875374">
                <text:p>0.0387537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0.04136175">
                <text:p>0.0413617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04781353">
                <text:p>0.0478135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0.04489365">
                <text:p>0.0448936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05045712">
                <text:p>0.0504571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05684203">
                <text:p>0.0568420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0.04376139">
                <text:p>0.0437613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05614462">
                <text:p>0.0561446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05799142">
                <text:p>0.0579914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05962203">
                <text:p>0.0596220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0.04739725">
                <text:p>0.0473972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05821492">
                <text:p>0.0582149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06270012">
                <text:p>0.0627001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06413707">
                <text:p>0.0641370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0.05079625">
                <text:p>0.0507962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0.06482839">
                <text:p>0.0648283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07193109">
                <text:p>0.0719310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07274116">
                <text:p>0.0727411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0702317">
                <text:p>0.070231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08047371">
                <text:p>0.0804737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084904">
                <text:p>0.08490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08571342">
                <text:p>0.0857134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0.07182612">
                <text:p>0.0718261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0820934">
                <text:p>0.082093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08421566">
                <text:p>0.0842156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08249139">
                <text:p>0.0824913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08583949">
                <text:p>0.0858394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09193022">
                <text:p>0.0919302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0.08534538">
                <text:p>0.0853453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09426793">
                <text:p>0.0942679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09674965">
                <text:p>0.0967496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09975846">
                <text:p>0.0997584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0.0895424">
                <text:p>0.089542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1001438">
                <text:p>0.100143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1036747">
                <text:p>0.103674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0.1001521">
                <text:p>0.100152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0.09361541">
                <text:p>0.0936154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0.1006314">
                <text:p>0.100631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115944">
                <text:p>0.11594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0.1034832">
                <text:p>0.103483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1191605">
                <text:p>0.119160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0.11435">
                <text:p>0.1143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1256929">
                <text:p>0.125692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0.1169422">
                <text:p>0.116942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0.1160856">
                <text:p>0.116085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0.1242806">
                <text:p>0.124280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0.1239732">
                <text:p>0.12397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1365429">
                <text:p>0.136542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0.131917">
                <text:p>0.13191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1391087">
                <text:p>0.139108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1518769">
                <text:p>0.151876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1486253">
                <text:p>0.148625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1454805">
                <text:p>0.145480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156991">
                <text:p>0.15699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0.142363">
                <text:p>0.14236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1563032">
                <text:p>0.156303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0.1536644">
                <text:p>0.153664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0.1602128">
                <text:p>0.160212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1724899">
                <text:p>0.172489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1714397">
                <text:p>0.171439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1706263">
                <text:p>0.170626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1736496">
                <text:p>0.173649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0.1709916">
                <text:p>0.170991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181481">
                <text:p>0.18148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0.1715703">
                <text:p>0.171570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1879676">
                <text:p>0.187967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0.177688">
                <text:p>0.17768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2037444">
                <text:p>0.203744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0.1917897">
                <text:p>0.191789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0.1890876">
                <text:p>0.189087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2033134">
                <text:p>0.203313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0.1967694">
                <text:p>0.196769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216396">
                <text:p>0.21639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0.2058186">
                <text:p>0.205818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211673">
                <text:p>0.21167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2265665">
                <text:p>0.226566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0.2137943">
                <text:p>0.213794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0.2169421">
                <text:p>0.21694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0.2189476">
                <text:p>0.218947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0.2220496">
                <text:p>0.222049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2312364">
                <text:p>0.231236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2493949">
                <text:p>0.249394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0.2272118">
                <text:p>0.227211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2486709">
                <text:p>0.248670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2430867">
                <text:p>0.243086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0.2393535">
                <text:p>0.239353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0.2368588">
                <text:p>0.236858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2499856">
                <text:p>0.249985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0.2494152">
                <text:p>0.249415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2743638">
                <text:p>0.274363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2616633">
                <text:p>0.261663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260236">
                <text:p>0.26023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264364">
                <text:p>0.26436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0.2618919">
                <text:p>0.2618919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0.2640485">
                <text:p>0.264048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0.2657384">
                <text:p>0.265738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0.2750029">
                <text:p>0.275002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0.2766133">
                <text:p>0.276613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2823806">
                <text:p>0.282380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2854621">
                <text:p>0.285462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2893157">
                <text:p>0.289315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2967169">
                <text:p>0.296716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2985865">
                <text:p>0.298586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0.2879525">
                <text:p>0.287952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2974136">
                <text:p>0.297413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0.2957279">
                <text:p>0.295727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3137188">
                <text:p>0.313718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3163632">
                <text:p>0.316363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3125889">
                <text:p>0.312588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313739">
                <text:p>0.31373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3116327">
                <text:p>0.311632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3147214">
                <text:p>0.314721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3258622">
                <text:p>0.325862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3206147">
                <text:p>0.320614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0.3185377">
                <text:p>0.318537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3417706">
                <text:p>0.341770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3294097">
                <text:p>0.329409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0.3207827">
                <text:p>0.320782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334248">
                <text:p>0.33424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0.3337807">
                <text:p>0.333780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3374232">
                <text:p>0.337423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0.3274717">
                <text:p>0.327471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0.3338985">
                <text:p>0.333898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0.3408272">
                <text:p>0.340827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3552457">
                <text:p>0.35524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0.3449866">
                <text:p>0.3449866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3506561">
                <text:p>0.3506561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3551475">
                <text:p>0.355147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3599698">
                <text:p>0.359969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0.3514114">
                <text:p>0.351411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3600246">
                <text:p>0.360024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3604762">
                <text:p>0.360476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361166">
                <text:p>0.36116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369179">
                <text:p>0.36917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0.3539806">
                <text:p>0.353980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3677993">
                <text:p>0.367799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3756543">
                <text:p>0.375654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3673566">
                <text:p>0.367356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3738748">
                <text:p>0.373874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3763093">
                <text:p>0.376309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3710108">
                <text:p>0.371010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0.3672953">
                <text:p>0.367295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3833333">
                <text:p>0.383333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4017674">
                <text:p>0.401767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0.3741488">
                <text:p>0.374148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0.3756714">
                <text:p>0.37567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387728">
                <text:p>0.38772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3827572">
                <text:p>0.382757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0.3831246">
                <text:p>0.383124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3897234">
                <text:p>0.389723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3856193">
                <text:p>0.385619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3992077">
                <text:p>0.399207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0.3870823">
                <text:p>0.387082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0.381386">
                <text:p>0.38138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4016238">
                <text:p>0.401623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4076722">
                <text:p>0.407672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0.3879687">
                <text:p>0.387968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4030852">
                <text:p>0.403085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398205">
                <text:p>0.39820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3994998">
                <text:p>0.399499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3989339">
                <text:p>0.398933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0.3889586">
                <text:p>0.388958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0.3927008">
                <text:p>0.392700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0.3924839">
                <text:p>0.392483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4030748">
                <text:p>0.403074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4139543">
                <text:p>0.413954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0.393364">
                <text:p>0.393364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4058034">
                <text:p>0.405803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4170478">
                <text:p>0.4170478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0.3961791">
                <text:p>0.396179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0.3973491">
                <text:p>0.397349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4051691">
                <text:p>0.405169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3989762">
                <text:p>0.398976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0.393843">
                <text:p>0.39384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4142701">
                <text:p>0.414270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4146532">
                <text:p>0.414653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4070958">
                <text:p>0.407095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4143749">
                <text:p>0.414374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4368316">
                <text:p>0.436831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4082694">
                <text:p>0.408269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4091514">
                <text:p>0.409151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4155027">
                <text:p>0.415502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4116101">
                <text:p>0.411610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0.3987467">
                <text:p>0.3987467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4063465">
                <text:p>0.406346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402371">
                <text:p>0.40237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4128979">
                <text:p>0.412897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4097198">
                <text:p>0.409719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4202005">
                <text:p>0.420200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4109066">
                <text:p>0.410906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4048588">
                <text:p>0.404858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4103028">
                <text:p>0.410302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412877">
                <text:p>0.41287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4007283">
                <text:p>0.400728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4271871">
                <text:p>0.427187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4118702">
                <text:p>0.411870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404893">
                <text:p>0.40489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4091876">
                <text:p>0.409187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4274091">
                <text:p>0.427409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4155464">
                <text:p>0.415546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4105333">
                <text:p>0.410533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4037943">
                <text:p>0.403794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4196541">
                <text:p>0.41965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4079192">
                <text:p>0.407919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4110462">
                <text:p>0.411046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4039583">
                <text:p>0.4039583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4254949">
                <text:p>0.425494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4291418">
                <text:p>0.4291418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396972">
                <text:p>0.39697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3991941">
                <text:p>0.399194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410341">
                <text:p>0.41034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4121795">
                <text:p>0.412179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3875793">
                <text:p>0.387579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4042732">
                <text:p>0.404273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4071022">
                <text:p>0.407102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4185165">
                <text:p>0.418516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385598">
                <text:p>0.38559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3998706">
                <text:p>0.399870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4002933">
                <text:p>0.400293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4051573">
                <text:p>0.405157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3971348">
                <text:p>0.397134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384993">
                <text:p>0.38499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3829558">
                <text:p>0.382955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3900681">
                <text:p>0.390068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3909777">
                <text:p>0.390977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3759879">
                <text:p>0.375987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3885324">
                <text:p>0.388532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4004799">
                <text:p>0.400479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3993462">
                <text:p>0.399346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383883">
                <text:p>0.38388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3806691">
                <text:p>0.380669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3844548">
                <text:p>0.384454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3753119">
                <text:p>0.3753119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3824611">
                <text:p>0.382461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3816893">
                <text:p>0.381689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3807032">
                <text:p>0.380703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3682277">
                <text:p>0.368227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3825062">
                <text:p>0.382506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3709811">
                <text:p>0.370981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3935523">
                <text:p>0.393552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371289">
                <text:p>0.37128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3811886">
                <text:p>0.381188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3671431">
                <text:p>0.367143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3638568">
                <text:p>0.363856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361578">
                <text:p>0.36157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3667542">
                <text:p>0.366754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3731411">
                <text:p>0.373141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3581274">
                <text:p>0.358127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3570656">
                <text:p>0.357065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3678664">
                <text:p>0.367866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359372">
                <text:p>0.35937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3610312">
                <text:p>0.36103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3691955">
                <text:p>0.369195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3546112">
                <text:p>0.354611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3591182">
                <text:p>0.359118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35216">
                <text:p>0.3521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3539198">
                <text:p>0.353919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3497303">
                <text:p>0.349730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3496875">
                <text:p>0.349687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3449623">
                <text:p>0.344962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3527105">
                <text:p>0.352710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35024">
                <text:p>0.3502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3487247">
                <text:p>0.348724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3480985">
                <text:p>0.348098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350638">
                <text:p>0.35063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3395626">
                <text:p>0.339562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3619484">
                <text:p>0.361948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3371887">
                <text:p>0.337188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3504565">
                <text:p>0.350456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3344348">
                <text:p>0.334434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3315181">
                <text:p>0.331518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3328213">
                <text:p>0.332821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3306034">
                <text:p>0.330603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3396293">
                <text:p>0.339629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3348772">
                <text:p>0.334877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3251781">
                <text:p>0.325178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3374452">
                <text:p>0.337445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3390244">
                <text:p>0.339024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3263924">
                <text:p>0.326392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3416588">
                <text:p>0.341658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3189529">
                <text:p>0.3189529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321392">
                <text:p>0.32139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3335592">
                <text:p>0.333559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3236663">
                <text:p>0.323666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3281396">
                <text:p>0.3281396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3130473">
                <text:p>0.313047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3258741">
                <text:p>0.325874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3106456">
                <text:p>0.3106456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3144206">
                <text:p>0.314420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3172331">
                <text:p>0.317233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3097371">
                <text:p>0.309737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3283599">
                <text:p>0.328359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3086515">
                <text:p>0.308651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3074739">
                <text:p>0.307473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3087736">
                <text:p>0.308773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3082943">
                <text:p>0.308294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3186294">
                <text:p>0.318629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3350124">
                <text:p>0.335012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2992907">
                <text:p>0.299290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3049484">
                <text:p>0.304948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30884">
                <text:p>0.3088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3008581">
                <text:p>0.300858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304611">
                <text:p>0.30461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2974111">
                <text:p>0.2974111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294372">
                <text:p>0.29437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297959">
                <text:p>0.29795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2922435">
                <text:p>0.292243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2919417">
                <text:p>0.2919417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3010861">
                <text:p>0.301086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307303">
                <text:p>0.30730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2971968">
                <text:p>0.297196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2912795">
                <text:p>0.291279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2908268">
                <text:p>0.290826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3003441">
                <text:p>0.300344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2935185">
                <text:p>0.293518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2871931">
                <text:p>0.287193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2873916">
                <text:p>0.2873916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2965699">
                <text:p>0.296569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297143">
                <text:p>0.29714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2886498">
                <text:p>0.288649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2944094">
                <text:p>0.294409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2805774">
                <text:p>0.280577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2759484">
                <text:p>0.275948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2799675">
                <text:p>0.279967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2799081">
                <text:p>0.279908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281594">
                <text:p>0.28159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2833856">
                <text:p>0.2833856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2770327">
                <text:p>0.277032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2784954">
                <text:p>0.278495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2740702">
                <text:p>0.274070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2707602">
                <text:p>0.270760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2774548">
                <text:p>0.277454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2660806">
                <text:p>0.2660806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2701777">
                <text:p>0.270177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2980057">
                <text:p>0.2980057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2725328">
                <text:p>0.272532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2643688">
                <text:p>0.264368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2692851">
                <text:p>0.269285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2634894">
                <text:p>0.263489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2606939">
                <text:p>0.260693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2729201">
                <text:p>0.272920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2573075">
                <text:p>0.257307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2725115">
                <text:p>0.272511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2670552">
                <text:p>0.267055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2617055">
                <text:p>0.261705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2682502">
                <text:p>0.268250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2705879">
                <text:p>0.270587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261175">
                <text:p>0.26117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2609647">
                <text:p>0.260964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258871">
                <text:p>0.25887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2479519">
                <text:p>0.247951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2625298">
                <text:p>0.262529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2608106">
                <text:p>0.260810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2519235">
                <text:p>0.251923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2752733">
                <text:p>0.275273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2479257">
                <text:p>0.2479257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2536222">
                <text:p>0.253622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2589723">
                <text:p>0.258972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2442719">
                <text:p>0.244271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2461018">
                <text:p>0.246101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2501486">
                <text:p>0.250148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2525902">
                <text:p>0.252590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2521221">
                <text:p>0.252122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2603105">
                <text:p>0.260310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2539986">
                <text:p>0.253998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252325">
                <text:p>0.25232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2422252">
                <text:p>0.242225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2445145">
                <text:p>0.244514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2547894">
                <text:p>0.254789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246707">
                <text:p>0.24670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2513098">
                <text:p>0.251309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2371546">
                <text:p>0.237154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2458714">
                <text:p>0.245871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2487758">
                <text:p>0.248775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2521392">
                <text:p>0.252139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2415699">
                <text:p>0.241569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241154">
                <text:p>0.24115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2431589">
                <text:p>0.243158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2494978">
                <text:p>0.249497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2403969">
                <text:p>0.240396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234623">
                <text:p>0.2346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2320046">
                <text:p>0.232004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2362055">
                <text:p>0.236205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2318701">
                <text:p>0.231870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2413854">
                <text:p>0.241385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2268543">
                <text:p>0.2268543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2317524">
                <text:p>0.231752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2275697">
                <text:p>0.227569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2250804">
                <text:p>0.225080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2358052">
                <text:p>0.235805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2234673">
                <text:p>0.2234673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2300578">
                <text:p>0.230057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2258234">
                <text:p>0.225823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2295416">
                <text:p>0.2295416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2196892">
                <text:p>0.219689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2630432">
                <text:p>0.263043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233008">
                <text:p>0.23300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2209357">
                <text:p>0.220935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2220227">
                <text:p>0.222022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2310982">
                <text:p>0.231098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2300435">
                <text:p>0.230043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2173336">
                <text:p>0.217333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2168757">
                <text:p>0.216875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2276614">
                <text:p>0.227661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2191379">
                <text:p>0.219137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2329483">
                <text:p>0.232948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2172031">
                <text:p>0.217203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2308598">
                <text:p>0.2308598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21981">
                <text:p>0.2198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2212882">
                <text:p>0.221288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2102418">
                <text:p>0.210241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2123211">
                <text:p>0.2123211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2335868">
                <text:p>0.233586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2127105">
                <text:p>0.212710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2076513">
                <text:p>0.207651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2073914">
                <text:p>0.207391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2119105">
                <text:p>0.211910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2074262">
                <text:p>0.207426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2050756">
                <text:p>0.2050756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2032886">
                <text:p>0.2032886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1996286">
                <text:p>0.1996286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2163835">
                <text:p>0.216383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2040512">
                <text:p>0.204051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2069879">
                <text:p>0.206987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2080306">
                <text:p>0.2080306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2054038">
                <text:p>0.205403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2039802">
                <text:p>0.203980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2056981">
                <text:p>0.205698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2102136">
                <text:p>0.210213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1985123">
                <text:p>0.198512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2023986">
                <text:p>0.202398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2072286">
                <text:p>0.207228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2020998">
                <text:p>0.202099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1990586">
                <text:p>0.1990586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2036041">
                <text:p>0.203604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2149353">
                <text:p>0.2149353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2232437">
                <text:p>0.2232437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2013479">
                <text:p>0.201347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2093155">
                <text:p>0.209315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1922992">
                <text:p>0.192299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1970426">
                <text:p>0.197042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1963544">
                <text:p>0.1963544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2056802">
                <text:p>0.205680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1984958">
                <text:p>0.1984958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2009464">
                <text:p>0.200946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1950652">
                <text:p>0.1950652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2087314">
                <text:p>0.2087314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1946158">
                <text:p>0.194615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1970622">
                <text:p>0.197062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1944513">
                <text:p>0.194451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1910044">
                <text:p>0.191004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193917">
                <text:p>0.193917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1915893">
                <text:p>0.191589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2042632">
                <text:p>0.204263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1921834">
                <text:p>0.192183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1849653">
                <text:p>0.184965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2098528">
                <text:p>0.209852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195899">
                <text:p>0.195899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1965898">
                <text:p>0.1965898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189617">
                <text:p>0.18961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1846928">
                <text:p>0.184692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1974447">
                <text:p>0.197444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1913029">
                <text:p>0.191302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1861537">
                <text:p>0.186153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192694">
                <text:p>0.19269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1814678">
                <text:p>0.181467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1854507">
                <text:p>0.1854507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1963379">
                <text:p>0.196337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1963228">
                <text:p>0.1963228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1883151">
                <text:p>0.1883151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1727371">
                <text:p>0.172737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1897624">
                <text:p>0.189762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176302">
                <text:p>0.17630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1797711">
                <text:p>0.179771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1856257">
                <text:p>0.1856257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1869744">
                <text:p>0.1869744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1791859">
                <text:p>0.179185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186274">
                <text:p>0.18627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1760099">
                <text:p>0.176009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1728518">
                <text:p>0.172851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1989004">
                <text:p>0.198900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1711055">
                <text:p>0.171105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1740475">
                <text:p>0.174047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1667988">
                <text:p>0.166798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1761318">
                <text:p>0.176131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1661116">
                <text:p>0.1661116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1762769">
                <text:p>0.176276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1751594">
                <text:p>0.1751594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1714234">
                <text:p>0.171423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1705102">
                <text:p>0.170510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172665">
                <text:p>0.17266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1720067">
                <text:p>0.1720067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1675479">
                <text:p>0.1675479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1743433">
                <text:p>0.1743433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1756941">
                <text:p>0.175694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1601816">
                <text:p>0.1601816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1723066">
                <text:p>0.172306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1732342">
                <text:p>0.173234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1593463">
                <text:p>0.159346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1624189">
                <text:p>0.162418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1525456">
                <text:p>0.152545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1642023">
                <text:p>0.1642023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1671235">
                <text:p>0.167123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1703921">
                <text:p>0.170392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1704691">
                <text:p>0.1704691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1623819">
                <text:p>0.162381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1621184">
                <text:p>0.162118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159104">
                <text:p>0.159104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1529946">
                <text:p>0.152994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1547981">
                <text:p>0.154798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1544545">
                <text:p>0.154454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1510239">
                <text:p>0.1510239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1717276">
                <text:p>0.171727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1576487">
                <text:p>0.157648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1520635">
                <text:p>0.152063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1562901">
                <text:p>0.156290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1679484">
                <text:p>0.167948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164711">
                <text:p>0.16471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1515971">
                <text:p>0.151597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1495388">
                <text:p>0.149538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147567">
                <text:p>0.14756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154817">
                <text:p>0.15481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1502514">
                <text:p>0.150251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1528387">
                <text:p>0.152838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1464496">
                <text:p>0.146449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1596428">
                <text:p>0.159642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1604919">
                <text:p>0.160491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1529799">
                <text:p>0.1529799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1601157">
                <text:p>0.1601157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142831">
                <text:p>0.14283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1563038">
                <text:p>0.156303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1438778">
                <text:p>0.1438778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1495132">
                <text:p>0.149513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1413434">
                <text:p>0.1413434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1414121">
                <text:p>0.141412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1401218">
                <text:p>0.140121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162921">
                <text:p>0.16292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1537077">
                <text:p>0.153707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1453607">
                <text:p>0.1453607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1450188">
                <text:p>0.1450188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1480217">
                <text:p>0.1480217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1606641">
                <text:p>0.1606641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1505237">
                <text:p>0.1505237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1335128">
                <text:p>0.1335128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1390906">
                <text:p>0.139090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1388603">
                <text:p>0.1388603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1359328">
                <text:p>0.135932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1421208">
                <text:p>0.1421208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1519289">
                <text:p>0.1519289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1407471">
                <text:p>0.140747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1400655">
                <text:p>0.1400655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1271542">
                <text:p>0.1271542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1313519">
                <text:p>0.1313519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1276422">
                <text:p>0.127642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1478007">
                <text:p>0.1478007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1388548">
                <text:p>0.1388548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1368687">
                <text:p>0.136868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1322051">
                <text:p>0.132205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1316991">
                <text:p>0.131699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1336549">
                <text:p>0.1336549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1286814">
                <text:p>0.1286814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1291169">
                <text:p>0.1291169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1443007">
                <text:p>0.144300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1329538">
                <text:p>0.1329538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128414">
                <text:p>0.128414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1224155">
                <text:p>0.122415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1292299">
                <text:p>0.129229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1225928">
                <text:p>0.122592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1326366">
                <text:p>0.1326366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1283127">
                <text:p>0.1283127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124961">
                <text:p>0.12496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1207752">
                <text:p>0.120775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1147868">
                <text:p>0.114786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1250626">
                <text:p>0.1250626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1270647">
                <text:p>0.1270647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1229145">
                <text:p>0.122914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1225451">
                <text:p>0.122545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1254981">
                <text:p>0.125498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116977">
                <text:p>0.116977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1286714">
                <text:p>0.128671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1292371">
                <text:p>0.1292371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1160355">
                <text:p>0.1160355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1113832">
                <text:p>0.111383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1283022">
                <text:p>0.128302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111861">
                <text:p>0.11186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1176545">
                <text:p>0.117654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1132208">
                <text:p>0.1132208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1176106">
                <text:p>0.117610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1200051">
                <text:p>0.120005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1105688">
                <text:p>0.1105688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1047286">
                <text:p>0.1047286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108633">
                <text:p>0.10863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1066757">
                <text:p>0.1066757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1014923">
                <text:p>0.101492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1094448">
                <text:p>0.1094448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1264544">
                <text:p>0.126454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1055267">
                <text:p>0.105526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103787">
                <text:p>0.103787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1038772">
                <text:p>0.1038772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1149557">
                <text:p>0.1149557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1048488">
                <text:p>0.104848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1093681">
                <text:p>0.1093681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1084242">
                <text:p>0.108424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1312309">
                <text:p>0.1312309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1086073">
                <text:p>0.1086073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1094948">
                <text:p>0.109494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1026716">
                <text:p>0.1026716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1129992">
                <text:p>0.112999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1015751">
                <text:p>0.101575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1036185">
                <text:p>0.1036185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1003448">
                <text:p>0.100344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1020236">
                <text:p>0.102023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1077785">
                <text:p>0.107778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9697206">
                <text:p>0.0969720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113876">
                <text:p>0.113876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9646291">
                <text:p>0.09646291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9179684">
                <text:p>0.09179684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944814">
                <text:p>0.0944814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1001355">
                <text:p>0.1001355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9674572">
                <text:p>0.09674572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1057847">
                <text:p>0.105784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9240239">
                <text:p>0.09240239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960919">
                <text:p>0.096091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1030067">
                <text:p>0.103006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9508949">
                <text:p>0.0950894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1165513">
                <text:p>0.116551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1014513">
                <text:p>0.101451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926744">
                <text:p>0.0926744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1000916">
                <text:p>0.1000916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1013467">
                <text:p>0.101346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1005523">
                <text:p>0.100552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9025977">
                <text:p>0.0902597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9509313">
                <text:p>0.0950931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1078679">
                <text:p>0.107867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874864">
                <text:p>0.0874864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9831344">
                <text:p>0.0983134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8258625">
                <text:p>0.0825862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103152">
                <text:p>0.103152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869627">
                <text:p>0.0869627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9527273">
                <text:p>0.0952727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8988084">
                <text:p>0.08988084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8381549">
                <text:p>0.08381549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9100893">
                <text:p>0.0910089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7937914">
                <text:p>0.07937914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1045067">
                <text:p>0.104506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919414">
                <text:p>0.091941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8925884">
                <text:p>0.0892588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7889175">
                <text:p>0.07889175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8276065">
                <text:p>0.0827606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8175671">
                <text:p>0.0817567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7518104">
                <text:p>0.07518104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108104">
                <text:p>0.108104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7968342">
                <text:p>0.0796834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7841244">
                <text:p>0.07841244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8359998">
                <text:p>0.0835999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7469421">
                <text:p>0.07469421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7624366">
                <text:p>0.0762436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101989">
                <text:p>0.101989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8171332">
                <text:p>0.0817133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1054122">
                <text:p>0.105412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7041053">
                <text:p>0.0704105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877689">
                <text:p>0.0877689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914415">
                <text:p>0.091441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7523224">
                <text:p>0.0752322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7652392">
                <text:p>0.0765239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7738384">
                <text:p>0.07738384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728806">
                <text:p>0.0728806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7762274">
                <text:p>0.07762274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7942612">
                <text:p>0.0794261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7634675">
                <text:p>0.07634675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6799731">
                <text:p>0.06799731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714064">
                <text:p>0.071406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79521">
                <text:p>0.079521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7401552">
                <text:p>0.0740155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6945964">
                <text:p>0.06945964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7477928">
                <text:p>0.07477928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7329777">
                <text:p>0.07329777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7136767">
                <text:p>0.07136767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6268405">
                <text:p>0.06268405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6237421">
                <text:p>0.06237421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705083">
                <text:p>0.0705083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8454807">
                <text:p>0.08454807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7643413">
                <text:p>0.0764341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7202046">
                <text:p>0.07202046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6952434">
                <text:p>0.0695243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7374687">
                <text:p>0.07374687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6125879">
                <text:p>0.0612587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660015">
                <text:p>0.0660015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7332554">
                <text:p>0.07332554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6716908">
                <text:p>0.06716908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6479114">
                <text:p>0.0647911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7068019">
                <text:p>0.0706801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7237255">
                <text:p>0.0723725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6110291">
                <text:p>0.0611029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5918518">
                <text:p>0.0591851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6900983">
                <text:p>0.0690098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7001195">
                <text:p>0.0700119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8202177">
                <text:p>0.0820217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5672295">
                <text:p>0.0567229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7811459">
                <text:p>0.07811459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6298748">
                <text:p>0.06298748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7855699">
                <text:p>0.07855699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6946149">
                <text:p>0.06946149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7195577">
                <text:p>0.07195577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7467244">
                <text:p>0.0746724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6304072">
                <text:p>0.06304072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5558908">
                <text:p>0.05558908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5691298">
                <text:p>0.05691298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7056902">
                <text:p>0.0705690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6776191">
                <text:p>0.0677619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5913369">
                <text:p>0.0591336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5576236">
                <text:p>0.05576236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5346353">
                <text:p>0.0534635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6642198">
                <text:p>0.06642198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7044598">
                <text:p>0.07044598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4997019">
                <text:p>0.0499701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6119321">
                <text:p>0.0611932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5013494">
                <text:p>0.0501349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5485412">
                <text:p>0.05485412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5413629">
                <text:p>0.05413629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5207922">
                <text:p>0.0520792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7653357">
                <text:p>0.0765335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6702226">
                <text:p>0.06702226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6621742">
                <text:p>0.0662174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5018064">
                <text:p>0.0501806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5395621">
                <text:p>0.05395621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5727282">
                <text:p>0.0572728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8148659">
                <text:p>0.08148659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6589722">
                <text:p>0.0658972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6605593">
                <text:p>0.0660559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4961419">
                <text:p>0.04961419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607965">
                <text:p>0.060796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5355361">
                <text:p>0.05355361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478345">
                <text:p>0.0478345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5267996">
                <text:p>0.05267996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5620953">
                <text:p>0.0562095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6352434">
                <text:p>0.06352434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5328288">
                <text:p>0.0532828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5191827">
                <text:p>0.0519182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5891534">
                <text:p>0.0589153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6321958">
                <text:p>0.06321958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4674219">
                <text:p>0.04674219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5928248">
                <text:p>0.0592824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4960245">
                <text:p>0.04960245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6635936">
                <text:p>0.0663593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4343745">
                <text:p>0.0434374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5094881">
                <text:p>0.05094881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4991518">
                <text:p>0.0499151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6027199">
                <text:p>0.06027199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4909871">
                <text:p>0.0490987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5053585">
                <text:p>0.05053585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4714298">
                <text:p>0.0471429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4174186">
                <text:p>0.04174186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5564234">
                <text:p>0.0556423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7742577">
                <text:p>0.0774257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4209995">
                <text:p>0.0420999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4634817">
                <text:p>0.04634817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441173">
                <text:p>0.044117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5647722">
                <text:p>0.0564772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3930316">
                <text:p>0.03930316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4630012">
                <text:p>0.0463001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447261">
                <text:p>0.044726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4114057">
                <text:p>0.0411405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4050804">
                <text:p>0.0405080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4680827">
                <text:p>0.0468082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4235798">
                <text:p>0.0423579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6460207">
                <text:p>0.06460207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404655">
                <text:p>0.040465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3742587">
                <text:p>0.03742587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5030203">
                <text:p>0.0503020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5310011">
                <text:p>0.05310011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4358012">
                <text:p>0.04358012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0.03352031">
                <text:p>0.0335203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6069118">
                <text:p>0.06069118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4999305">
                <text:p>0.04999305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3715136">
                <text:p>0.0371513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4529897">
                <text:p>0.04529897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4283923">
                <text:p>0.04283923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3742367">
                <text:p>0.0374236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3793715">
                <text:p>0.03793715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5149171">
                <text:p>0.05149171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516922">
                <text:p>0.051692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4319878">
                <text:p>0.04319878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5073588">
                <text:p>0.0507358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3376491">
                <text:p>0.03376491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393987">
                <text:p>0.0393987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3363686">
                <text:p>0.03363686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3395891">
                <text:p>0.03395891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4361046">
                <text:p>0.0436104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5129028">
                <text:p>0.05129028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3385755">
                <text:p>0.0338575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598425">
                <text:p>0.059842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4084689">
                <text:p>0.0408468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3660329">
                <text:p>0.03660329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3067713">
                <text:p>0.03067713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0.03034373">
                <text:p>0.03034373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3260234">
                <text:p>0.0326023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4952941">
                <text:p>0.0495294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5388106">
                <text:p>0.05388106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3431294">
                <text:p>0.03431294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3471915">
                <text:p>0.0347191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3172497">
                <text:p>0.0317249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5089291">
                <text:p>0.05089291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3929817">
                <text:p>0.03929817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0.0266069">
                <text:p>0.0266069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3347976">
                <text:p>0.03347976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3844964">
                <text:p>0.0384496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3312978">
                <text:p>0.0331297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3384173">
                <text:p>0.03384173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4967361">
                <text:p>0.04967361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3039384">
                <text:p>0.0303938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4857917">
                <text:p>0.04857917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3062234">
                <text:p>0.03062234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4551919">
                <text:p>0.0455191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3580871">
                <text:p>0.0358087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2968191">
                <text:p>0.02968191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428015">
                <text:p>0.0428015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4216675">
                <text:p>0.0421667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293742">
                <text:p>0.029374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0.02520243">
                <text:p>0.02520243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0.02413947">
                <text:p>0.02413947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2888086">
                <text:p>0.02888086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2879106">
                <text:p>0.02879106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3601619">
                <text:p>0.03601619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4093048">
                <text:p>0.04093048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3279956">
                <text:p>0.03279956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2659933">
                <text:p>0.0265993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3623921">
                <text:p>0.0362392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3102381">
                <text:p>0.0310238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3382238">
                <text:p>0.0338223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2749799">
                <text:p>0.0274979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2598718">
                <text:p>0.0259871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2875803">
                <text:p>0.0287580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4051487">
                <text:p>0.04051487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0.02414937">
                <text:p>0.02414937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2757513">
                <text:p>0.02757513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3061516">
                <text:p>0.03061516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3801304">
                <text:p>0.0380130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330556">
                <text:p>0.0330556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3048045">
                <text:p>0.0304804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4167425">
                <text:p>0.0416742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3889265">
                <text:p>0.0388926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3565274">
                <text:p>0.03565274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3108707">
                <text:p>0.03108707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2872352">
                <text:p>0.02872352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4665152">
                <text:p>0.0466515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2316133">
                <text:p>0.0231613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2441255">
                <text:p>0.0244125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2730225">
                <text:p>0.0273022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269446">
                <text:p>0.0269446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2527134">
                <text:p>0.0252713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2610797">
                <text:p>0.02610797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349501">
                <text:p>0.034950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3594224">
                <text:p>0.03594224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390902">
                <text:p>0.039090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3666011">
                <text:p>0.0366601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28749">
                <text:p>0.028749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2377219">
                <text:p>0.02377219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280238">
                <text:p>0.0280238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2546764">
                <text:p>0.0254676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2311671">
                <text:p>0.0231167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2731115">
                <text:p>0.0273111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2570697">
                <text:p>0.02570697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0.02018332">
                <text:p>0.0201833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3466241">
                <text:p>0.0346624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2916117">
                <text:p>0.02916117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3780611">
                <text:p>0.03780611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2494304">
                <text:p>0.02494304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3137707">
                <text:p>0.03137707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5158279">
                <text:p>0.05158279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3144663">
                <text:p>0.03144663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2514682">
                <text:p>0.02514682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241824">
                <text:p>0.0241824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3134308">
                <text:p>0.03134308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2345387">
                <text:p>0.0234538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2857612">
                <text:p>0.02857612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4935456">
                <text:p>0.04935456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0.01994782">
                <text:p>0.0199478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4676549">
                <text:p>0.0467654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0.0184294">
                <text:p>0.018429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4338936">
                <text:p>0.04338936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3381763">
                <text:p>0.03381763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2474957">
                <text:p>0.0247495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2751073">
                <text:p>0.02751073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2519661">
                <text:p>0.02519661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0.01571655">
                <text:p>0.0157165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2090656">
                <text:p>0.0209065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244809">
                <text:p>0.024480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2599474">
                <text:p>0.0259947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2939236">
                <text:p>0.02939236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0.01699364">
                <text:p>0.0169936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2191254">
                <text:p>0.02191254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3986499">
                <text:p>0.03986499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278781">
                <text:p>0.027878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2802432">
                <text:p>0.0280243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1934361">
                <text:p>0.0193436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0.01641255">
                <text:p>0.0164125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0.0179212">
                <text:p>0.017921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2264849">
                <text:p>0.0226484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1890494">
                <text:p>0.0189049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2696721">
                <text:p>0.0269672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2151406">
                <text:p>0.02151406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2887268">
                <text:p>0.0288726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3052581">
                <text:p>0.03052581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233005">
                <text:p>0.023300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3228555">
                <text:p>0.0322855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2182726">
                <text:p>0.0218272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2215469">
                <text:p>0.0221546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1980091">
                <text:p>0.01980091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2790359">
                <text:p>0.02790359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205069">
                <text:p>0.0205069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0.0158209">
                <text:p>0.0158209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2421938">
                <text:p>0.0242193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1809257">
                <text:p>0.0180925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1911375">
                <text:p>0.01911375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2456797">
                <text:p>0.0245679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0.01457078">
                <text:p>0.0145707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2040579">
                <text:p>0.02040579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0.01361808">
                <text:p>0.01361808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2512715">
                <text:p>0.0251271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0.01710404">
                <text:p>0.01710404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2303725">
                <text:p>0.0230372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0.01591279">
                <text:p>0.01591279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2300678">
                <text:p>0.02300678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3800074">
                <text:p>0.03800074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2455551">
                <text:p>0.0245555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4049246">
                <text:p>0.0404924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2314518">
                <text:p>0.02314518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3448638">
                <text:p>0.0344863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0.01315355">
                <text:p>0.0131535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0.01518385">
                <text:p>0.0151838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0.008443139">
                <text:p>0.008443139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2612546">
                <text:p>0.02612546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0.0150296">
                <text:p>0.015029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2426417">
                <text:p>0.02426417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1839323">
                <text:p>0.0183932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1764452">
                <text:p>0.01764452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3387118">
                <text:p>0.0338711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181364">
                <text:p>0.0181364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2693371">
                <text:p>0.0269337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0.01048452">
                <text:p>0.0104845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1849184">
                <text:p>0.01849184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0.009525619">
                <text:p>0.00952561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1912979">
                <text:p>0.01912979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0.011612">
                <text:p>0.01161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0.008872561">
                <text:p>0.008872561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198242">
                <text:p>0.0198242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1615313">
                <text:p>0.0161531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3317306">
                <text:p>0.0331730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1672764">
                <text:p>0.0167276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1955781">
                <text:p>0.0195578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34552">
                <text:p>0.034552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1892814">
                <text:p>0.01892814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15889">
                <text:p>0.015889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2014014">
                <text:p>0.02014014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0.01363705">
                <text:p>0.01363705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3035508">
                <text:p>0.03035508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2473575">
                <text:p>0.02473575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2079179">
                <text:p>0.0207917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3097085">
                <text:p>0.0309708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2417528">
                <text:p>0.02417528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0.01156752">
                <text:p>0.01156752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0.01314205">
                <text:p>0.0131420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0.008470713">
                <text:p>0.008470713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2933387">
                <text:p>0.02933387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4352493">
                <text:p>0.04352493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0.01266812">
                <text:p>0.0126681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0.01047407">
                <text:p>0.01047407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154796">
                <text:p>0.0154796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0.01061899">
                <text:p>0.0106189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0.0124895">
                <text:p>0.012489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0.008685862">
                <text:p>0.00868586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2065213">
                <text:p>0.0206521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1924459">
                <text:p>0.01924459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1524641">
                <text:p>0.01524641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167399">
                <text:p>0.0167399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1906884">
                <text:p>0.0190688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0.009259404">
                <text:p>0.009259404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1230067">
                <text:p>0.0123006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0.007779028">
                <text:p>0.00777902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2067549">
                <text:p>0.0206754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1720773">
                <text:p>0.01720773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2808334">
                <text:p>0.0280833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0.005055213">
                <text:p>0.00505521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0.009029004">
                <text:p>0.00902900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1454341">
                <text:p>0.0145434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0.006545992">
                <text:p>0.006545992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1779177">
                <text:p>0.01779177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1914687">
                <text:p>0.0191468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124992">
                <text:p>0.012499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1499667">
                <text:p>0.01499667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2439799">
                <text:p>0.02439799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0.01093638">
                <text:p>0.01093638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1828787">
                <text:p>0.01828787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2279945">
                <text:p>0.0227994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1564591">
                <text:p>0.0156459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0.01056511">
                <text:p>0.0105651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0.008856278">
                <text:p>0.008856278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0.008130448">
                <text:p>0.008130448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1341665">
                <text:p>0.0134166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15236">
                <text:p>0.015236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2002499">
                <text:p>0.0200249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0.005445812">
                <text:p>0.00544581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0.009992828">
                <text:p>0.009992828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1274991">
                <text:p>0.0127499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1274413">
                <text:p>0.0127441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1501955">
                <text:p>0.0150195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123334">
                <text:p>0.0123334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155547">
                <text:p>0.015554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1223908">
                <text:p>0.0122390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1378545">
                <text:p>0.0137854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1188018">
                <text:p>0.0118801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1742791">
                <text:p>0.01742791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1204921">
                <text:p>0.0120492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0.005651306">
                <text:p>0.00565130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1162686">
                <text:p>0.0116268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1591307">
                <text:p>0.01591307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1163693">
                <text:p>0.0116369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0.005408292">
                <text:p>0.00540829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1693362">
                <text:p>0.0169336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1815767">
                <text:p>0.01815767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1120129">
                <text:p>0.01120129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1716613">
                <text:p>0.0171661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0.00530174">
                <text:p>0.00530174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2376801">
                <text:p>0.0237680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962396">
                <text:p>0.0196239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1186245">
                <text:p>0.0118624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0.007093105">
                <text:p>0.007093105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260006">
                <text:p>0.0260006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0.006600996">
                <text:p>0.00660099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680288">
                <text:p>0.0268028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0.008363424">
                <text:p>0.00836342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961726">
                <text:p>0.01961726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1780966">
                <text:p>0.0178096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1267737">
                <text:p>0.01267737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1085692">
                <text:p>0.0108569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0.007484437">
                <text:p>0.007484437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1366256">
                <text:p>0.01366256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1282995">
                <text:p>0.01282995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1274807">
                <text:p>0.0127480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2001977">
                <text:p>0.02001977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0.008131911">
                <text:p>0.008131911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0.005752719">
                <text:p>0.005752719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0.005441417">
                <text:p>0.005441417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003409413">
                <text:p>-0.0003409413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1598588">
                <text:p>0.0159858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01615114">
                <text:p>-0.0001615114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10651">
                <text:p>0.010651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1469832">
                <text:p>0.01469832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1001581">
                <text:p>0.01001581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0.00820263">
                <text:p>0.00820263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0.00815924">
                <text:p>0.00815924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0.008637129">
                <text:p>0.008637129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1643341">
                <text:p>0.016433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1272332">
                <text:p>0.01272332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0.004113059">
                <text:p>0.00411305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2199308">
                <text:p>0.0219930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1423078">
                <text:p>0.0142307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0.005660192">
                <text:p>0.005660192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0.005309958">
                <text:p>0.005309958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1097507">
                <text:p>0.0109750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1020743">
                <text:p>0.0102074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0.002935765">
                <text:p>0.00293576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2177268">
                <text:p>0.02177268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1287189">
                <text:p>0.01287189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2006725">
                <text:p>0.02006725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1303592">
                <text:p>0.01303592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152169">
                <text:p>0.015216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9257967">
                <text:p>0.009257967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800841">
                <text:p>0.01800841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1656684">
                <text:p>0.01656684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0.003999179">
                <text:p>0.003999179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1039639">
                <text:p>0.0103963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1646901">
                <text:p>0.01646901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0.001559003">
                <text:p>0.001559003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0.006109414">
                <text:p>0.006109414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725289">
                <text:p>0.01725289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9613135">
                <text:p>0.009613135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8637979">
                <text:p>0.00863797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0.006231043">
                <text:p>0.006231043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0.006946502">
                <text:p>0.006946502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0.003654651">
                <text:p>0.003654651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0.003239456">
                <text:p>0.003239456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1238674">
                <text:p>0.0123867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9578438">
                <text:p>0.009578438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2053348">
                <text:p>0.02053348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806994">
                <text:p>0.0180699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1000662">
                <text:p>0.0100066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1664097">
                <text:p>-0.001664097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504349">
                <text:p>0.02504349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07902502">
                <text:p>-0.000790250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0.00583253">
                <text:p>0.00583253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0.006243175">
                <text:p>0.006243175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1075296">
                <text:p>0.01075296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0.007059382">
                <text:p>0.00705938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1473562">
                <text:p>0.0147356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0.001238297">
                <text:p>0.001238297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06346397">
                <text:p>-0.000634639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9880575">
                <text:p>0.009880575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1086174">
                <text:p>0.01086174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1425849">
                <text:p>0.014258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0.004734399">
                <text:p>0.004734399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811133">
                <text:p>0.0181113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0.002647307">
                <text:p>0.002647307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0.003492377">
                <text:p>0.003492377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1130355">
                <text:p>0.01130355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876041">
                <text:p>0.0187604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679786">
                <text:p>0.0167978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1257272">
                <text:p>0.0125727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1366164">
                <text:p>0.01366164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0.0002553758">
                <text:p>0.0002553758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1555761">
                <text:p>0.0155576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7443683">
                <text:p>0.007443683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0.0008401465">
                <text:p>0.0008401465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1515439">
                <text:p>0.01515439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7959425">
                <text:p>0.007959425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0.0002647672">
                <text:p>0.0002647672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03354418">
                <text:p>-0.003354418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0.00523858">
                <text:p>0.00523858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8548004">
                <text:p>0.00854800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7386187">
                <text:p>0.007386187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0.00267066">
                <text:p>0.0026706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1449899">
                <text:p>0.01449899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0.004068424">
                <text:p>0.004068424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9684155">
                <text:p>0.00968415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0.003250035">
                <text:p>0.00325003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1072754">
                <text:p>0.01072754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6760176">
                <text:p>0.006760176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0.004461676">
                <text:p>0.004461676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0.00404793">
                <text:p>0.00404793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815485">
                <text:p>0.00815485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0.001576903">
                <text:p>0.00157690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2067765">
                <text:p>0.0206776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0.004499321">
                <text:p>0.004499321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907684">
                <text:p>0.00907684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1129901">
                <text:p>0.01129901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9051292">
                <text:p>0.00905129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5620867">
                <text:p>0.005620867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130865">
                <text:p>0.0130865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1308972">
                <text:p>0.0130897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0.001861483">
                <text:p>0.00186148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1001466">
                <text:p>0.0100146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6305613">
                <text:p>0.00630561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8128448">
                <text:p>0.00812844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0.004197745">
                <text:p>0.004197745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0.000894304">
                <text:p>0.000894304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411836">
                <text:p>0.01411836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0.002454568">
                <text:p>0.002454568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0.002475698">
                <text:p>0.002475698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0.005383871">
                <text:p>0.00538387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8742048">
                <text:p>0.00874204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9101557">
                <text:p>0.00910155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0.005779641">
                <text:p>0.005779641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0.004022333">
                <text:p>0.004022333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0.003862529">
                <text:p>0.003862529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8548201">
                <text:p>0.00854820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9751581">
                <text:p>0.00975158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04133973">
                <text:p>-0.004133973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6691469">
                <text:p>0.00669146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0.000352559">
                <text:p>0.000352559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7996521">
                <text:p>0.00799652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0.002313153">
                <text:p>0.002313153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0.0008442958">
                <text:p>0.0008442958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0.0009630852">
                <text:p>0.000963085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0.004369122">
                <text:p>0.00436912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8144486">
                <text:p>0.00814448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0.003946827">
                <text:p>0.00394682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0.002687137">
                <text:p>0.002687137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0.005399595">
                <text:p>0.005399595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6188408">
                <text:p>0.006188408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05049043">
                <text:p>-0.000504904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0.00475635">
                <text:p>0.00475635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3197764">
                <text:p>-0.003197764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1716013">
                <text:p>-0.00171601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0.001065801">
                <text:p>0.001065801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0.002658812">
                <text:p>0.002658812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09943674">
                <text:p>-0.0009943674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9045562">
                <text:p>0.009045562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04596992">
                <text:p>-0.004596992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3496893">
                <text:p>-0.003496893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929299">
                <text:p>0.00929299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0201556">
                <text:p>-0.000201556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1085716">
                <text:p>0.0108571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1255641">
                <text:p>0.01255641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0.001016969">
                <text:p>0.00101696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5757989">
                <text:p>0.005757989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402452">
                <text:p>0.0140245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676589">
                <text:p>0.0067658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0.001311441">
                <text:p>0.00131144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577286">
                <text:p>0.01577286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0.004139838">
                <text:p>0.004139838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4800705">
                <text:p>0.004800705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0.0009393278">
                <text:p>0.0009393278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6391648">
                <text:p>0.006391648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2876766">
                <text:p>-0.002876766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2205274">
                <text:p>-0.00220527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56855">
                <text:p>0.0056855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0.003237404">
                <text:p>0.003237404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6452845">
                <text:p>0.006452845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0.002102974">
                <text:p>0.002102974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118655">
                <text:p>0.0118655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6712064">
                <text:p>0.006712064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4457041">
                <text:p>-0.004457041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5838288">
                <text:p>0.005838288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07292156">
                <text:p>-0.0007292156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3531178">
                <text:p>-0.003531178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410706">
                <text:p>0.01410706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0.003299055">
                <text:p>0.003299055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108546">
                <text:p>0.0108546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1232603">
                <text:p>0.01232603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7445493">
                <text:p>0.007445493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04107817">
                <text:p>-0.000410781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0.001605971">
                <text:p>0.001605971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06604536">
                <text:p>-0.0006604536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1756363">
                <text:p>-0.001756363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0.0002947058">
                <text:p>0.000294705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0.001003437">
                <text:p>0.001003437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0.0001411499">
                <text:p>0.0001411499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4325329">
                <text:p>0.00432532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0.003036072">
                <text:p>0.003036072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835023">
                <text:p>0.01835023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6798928">
                <text:p>0.006798928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8281256">
                <text:p>0.00828125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8027534">
                <text:p>0.008027534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0.0002617579">
                <text:p>0.000261757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0.0001597024">
                <text:p>0.0001597024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756845">
                <text:p>0.00756845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5474813">
                <text:p>0.00547481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0.003314486">
                <text:p>0.003314486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6763811">
                <text:p>0.00676381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218688">
                <text:p>0.02218688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2746741">
                <text:p>-0.002746741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0.003206671">
                <text:p>0.003206671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3834243">
                <text:p>0.03834243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6302926">
                <text:p>0.00630292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6861139">
                <text:p>0.006861139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0.0007385085">
                <text:p>0.0007385085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446145">
                <text:p>0.01446145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5640087">
                <text:p>0.005640087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5488041">
                <text:p>-0.00548804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228223">
                <text:p>0.01228223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2744765">
                <text:p>-0.002744765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0995695">
                <text:p>-0.000995695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1142086">
                <text:p>0.01142086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6904736">
                <text:p>0.006904736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517785">
                <text:p>0.01517785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7396133">
                <text:p>0.007396133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922626">
                <text:p>0.00922626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0.003148266">
                <text:p>0.003148266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413197">
                <text:p>0.00413197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0.002743729">
                <text:p>0.002743729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2812662">
                <text:p>0.00281266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4682546">
                <text:p>-0.00468254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1357227">
                <text:p>-0.001357227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07341372">
                <text:p>-0.00734137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0.002015726">
                <text:p>0.002015726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1379545">
                <text:p>-0.001379545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387662">
                <text:p>0.01387662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305401">
                <text:p>-0.00305401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0.001286287">
                <text:p>0.00128628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0.002826091">
                <text:p>0.002826091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0.002325727">
                <text:p>0.002325727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0.002667214">
                <text:p>0.002667214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1110819">
                <text:p>0.01110819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0.002209037">
                <text:p>0.00220903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01235007">
                <text:p>-0.000123500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06125612">
                <text:p>-0.0061256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0.001750701">
                <text:p>0.001750701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3716312">
                <text:p>0.003716312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5350473">
                <text:p>0.005350473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2934793">
                <text:p>-0.00293479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5328367">
                <text:p>-0.005328367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1150795">
                <text:p>0.01150795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4885872">
                <text:p>0.004885872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0.0009680886">
                <text:p>0.0009680886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3169615">
                <text:p>-0.003169615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565529">
                <text:p>0.02565529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4863546">
                <text:p>-0.004863546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509466">
                <text:p>0.01509466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2907403">
                <text:p>-0.002907403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2372851">
                <text:p>-0.00237285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5570501">
                <text:p>-0.005570501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4181203">
                <text:p>-0.004181203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07766038">
                <text:p>-0.007766038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9921401">
                <text:p>0.009921401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635036">
                <text:p>0.00635036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4598612">
                <text:p>-0.00459861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319019">
                <text:p>0.00319019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327129">
                <text:p>-0.00327129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552094">
                <text:p>0.02552094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8544286">
                <text:p>0.008544286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469644">
                <text:p>0.01469644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4803704">
                <text:p>0.004803704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5603394">
                <text:p>-0.005603394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1417574">
                <text:p>-0.001417574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5770606">
                <text:p>0.00577060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5012671">
                <text:p>0.005012671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512069">
                <text:p>0.02512069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0.001279897">
                <text:p>0.001279897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0.003180371">
                <text:p>0.003180371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615123">
                <text:p>0.00615123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0.002277295">
                <text:p>0.00227729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3929558">
                <text:p>0.003929558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6586426">
                <text:p>0.006586426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138235">
                <text:p>0.01138235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0.001679614">
                <text:p>0.001679614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05461864">
                <text:p>-0.0005461864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518046">
                <text:p>0.02518046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119805">
                <text:p>0.01119805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2271622">
                <text:p>0.00227162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0.000801722">
                <text:p>0.00080172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4316996">
                <text:p>0.004316996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156972">
                <text:p>0.01156972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371302">
                <text:p>0.0037130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3859427">
                <text:p>0.003859427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323054">
                <text:p>-0.0032305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04500601">
                <text:p>-0.0004500601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5184123">
                <text:p>0.005184123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1101508">
                <text:p>-0.001101508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568237">
                <text:p>0.01568237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8009609">
                <text:p>0.008009609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239101">
                <text:p>-0.00239101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8213333">
                <text:p>0.008213333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6931967">
                <text:p>-0.006931967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2959115">
                <text:p>-0.002959115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6320817">
                <text:p>0.006320817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099626">
                <text:p>0.01099626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2796605">
                <text:p>-0.002796605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271124">
                <text:p>-0.00271124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531668">
                <text:p>0.009531668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718215">
                <text:p>0.0171821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0.0009587152">
                <text:p>0.0009587152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375019">
                <text:p>0.00375019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1089344">
                <text:p>-0.001089344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0.0005976129">
                <text:p>0.000597612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0.0008418143">
                <text:p>0.0008418143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2353088">
                <text:p>-0.002353088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1750665">
                <text:p>0.001750665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296931">
                <text:p>0.01296931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06984212">
                <text:p>-0.00698421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7440437">
                <text:p>0.00744043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3580728">
                <text:p>-0.003580728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03855468">
                <text:p>-0.0003855468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3424767">
                <text:p>-0.003424767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3114151">
                <text:p>-0.003114151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146876">
                <text:p>0.01146876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2075634">
                <text:p>-0.002075634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4031513">
                <text:p>-0.004031513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6095202">
                <text:p>-0.006095202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6252158">
                <text:p>-0.006252158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4267504">
                <text:p>0.004267504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3109321">
                <text:p>0.003109321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07255228">
                <text:p>-0.000725522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144516">
                <text:p>0.01144516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0.0002921042">
                <text:p>0.0002921042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3577573">
                <text:p>0.00357757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365952">
                <text:p>0.01365952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05281912">
                <text:p>-0.000528191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0460734">
                <text:p>-0.00046073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1877937">
                <text:p>0.01877937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4049175">
                <text:p>0.00404917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680469">
                <text:p>0.00568046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2074039">
                <text:p>-0.00207403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9759484">
                <text:p>0.009759484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1993209">
                <text:p>0.00199320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6121115">
                <text:p>-0.006121115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662063">
                <text:p>-0.00662063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4004787">
                <text:p>0.004004787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56622">
                <text:p>0.0056622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6183072">
                <text:p>0.006183072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4771783">
                <text:p>-0.00477178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3803198">
                <text:p>0.003803198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6061814">
                <text:p>0.006061814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9444621">
                <text:p>0.00944462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07962752">
                <text:p>-0.0007962752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3514822">
                <text:p>0.003514822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5200201">
                <text:p>0.00520020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2314313">
                <text:p>-0.00231431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1349984">
                <text:p>-0.001349984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3090019">
                <text:p>-0.003090019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27377">
                <text:p>0.0127377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07765288">
                <text:p>-0.00776528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01184535">
                <text:p>-0.0001184535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3230534">
                <text:p>0.003230534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3339351">
                <text:p>0.003339351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2709758">
                <text:p>0.002709758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2802188">
                <text:p>-0.002802188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426058">
                <text:p>-0.00426058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4317215">
                <text:p>0.004317215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0.0004899812">
                <text:p>0.000489981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09270124">
                <text:p>-0.0009270124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6918201">
                <text:p>0.006918201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3465973">
                <text:p>0.003465973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5953589">
                <text:p>-0.005953589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1022239">
                <text:p>0.01022239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04950442">
                <text:p>-0.000495044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4959017">
                <text:p>-0.004959017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2536257">
                <text:p>0.002536257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0.001399651">
                <text:p>0.001399651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148773">
                <text:p>0.00148773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07756703">
                <text:p>-0.007756703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5710373">
                <text:p>-0.005710373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4002595">
                <text:p>0.00400259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1967513">
                <text:p>-0.001967513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329633">
                <text:p>0.0132963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6211396">
                <text:p>-0.006211396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2226677">
                <text:p>-0.002226677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0.001319406">
                <text:p>0.001319406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9027675">
                <text:p>0.009027675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5229205">
                <text:p>0.005229205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4012982">
                <text:p>-0.004012982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891392">
                <text:p>0.007891392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3346317">
                <text:p>-0.003346317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08092113">
                <text:p>-0.008092113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2813357">
                <text:p>-0.002813357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720842">
                <text:p>0.0172084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617195">
                <text:p>0.01617195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588939">
                <text:p>0.01588939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07855847">
                <text:p>-0.007855847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0.0002714693">
                <text:p>0.0002714693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4815261">
                <text:p>0.004815261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601588">
                <text:p>0.005601588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5154567">
                <text:p>-0.005154567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1194357">
                <text:p>-0.001194357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08426552">
                <text:p>-0.008426552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1026111">
                <text:p>0.01026111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5381969">
                <text:p>0.005381969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0.001678537">
                <text:p>0.001678537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5858074">
                <text:p>0.00585807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418111">
                <text:p>0.01418111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1523142">
                <text:p>-0.00152314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620134">
                <text:p>0.004620134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3657005">
                <text:p>0.003657005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5006402">
                <text:p>0.005006402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7416427">
                <text:p>-0.007416427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2527042">
                <text:p>-0.002527042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201386">
                <text:p>0.00201386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6062818">
                <text:p>-0.006062818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2922967">
                <text:p>0.002922967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06338778">
                <text:p>-0.000633877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4587722">
                <text:p>-0.004587722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0.000860088">
                <text:p>0.000860088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6334334">
                <text:p>-0.006334334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07980573">
                <text:p>-0.007980573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6430563">
                <text:p>0.006430563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1904971">
                <text:p>0.001904971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2187579">
                <text:p>0.00218757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0.001576499">
                <text:p>0.00157649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3072668">
                <text:p>0.003072668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68062">
                <text:p>0.0068062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4969809">
                <text:p>-0.00496980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07851007">
                <text:p>-0.007851007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2151572">
                <text:p>0.00215157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04258938">
                <text:p>-0.0004258938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1486948">
                <text:p>0.00148694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1436143">
                <text:p>0.001436143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1391068">
                <text:p>-0.001391068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1944996">
                <text:p>0.001944996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4253551">
                <text:p>-0.004253551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533495">
                <text:p>0.005533495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03056472">
                <text:p>-0.0003056472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2297507">
                <text:p>-0.00229750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1557729">
                <text:p>0.001557729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140539">
                <text:p>-0.00140539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3238822">
                <text:p>0.003238822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5236649">
                <text:p>0.005236649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8539665">
                <text:p>0.008539665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0.0009785346">
                <text:p>0.0009785346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221024">
                <text:p>-0.00221024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9002603">
                <text:p>0.009002603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2007224">
                <text:p>-0.00200722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6672135">
                <text:p>-0.00667213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7752792">
                <text:p>-0.007752792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4765579">
                <text:p>0.00476557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4880309">
                <text:p>-0.00488030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09294811">
                <text:p>0.009294811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8109121">
                <text:p>-0.008109121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1139248">
                <text:p>0.001139248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143447">
                <text:p>0.02143447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2226982">
                <text:p>0.002226982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2318857">
                <text:p>0.002318857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6469611">
                <text:p>0.00646961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479426">
                <text:p>0.005479426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2305227">
                <text:p>-0.002305227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2039236">
                <text:p>0.002039236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2561416">
                <text:p>0.002561416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824551">
                <text:p>0.01824551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7168841">
                <text:p>-0.007168841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591679">
                <text:p>0.01591679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1743234">
                <text:p>-0.00174323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5915487">
                <text:p>-0.005915487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355783">
                <text:p>0.01355783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1610348">
                <text:p>-0.001610348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7030575">
                <text:p>-0.007030575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8194762">
                <text:p>-0.00819476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4995487">
                <text:p>-0.00499548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3443604">
                <text:p>0.00344360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6054464">
                <text:p>-0.006054464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1974594">
                <text:p>0.001974594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4947479">
                <text:p>0.00494747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562984">
                <text:p>0.01562984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164309">
                <text:p>0.00164309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3690582">
                <text:p>-0.003690582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2625812">
                <text:p>0.002625812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3582039">
                <text:p>-0.003582039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4909307">
                <text:p>-0.00490930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3997639">
                <text:p>0.003997639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0.0005448121">
                <text:p>0.000544812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112836">
                <text:p>-0.01112836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6947116">
                <text:p>-0.006947116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6575409">
                <text:p>-0.006575409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09330385">
                <text:p>-0.009330385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602593">
                <text:p>0.00602593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7635873">
                <text:p>-0.007635873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8001235">
                <text:p>-0.008001235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3377746">
                <text:p>0.003377746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5789898">
                <text:p>-0.005789898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6770725">
                <text:p>-0.006770725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47852">
                <text:p>0.0247852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02418115">
                <text:p>-0.000241811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0.0004587063">
                <text:p>0.0004587063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5539511">
                <text:p>-0.00553951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2626711">
                <text:p>0.002626711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0.00171388">
                <text:p>0.00171388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2708387">
                <text:p>-0.002708387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8997287">
                <text:p>0.008997287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0.0004638946">
                <text:p>0.0004638946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1535846">
                <text:p>0.00153584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3366758">
                <text:p>-0.003366758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4236631">
                <text:p>-0.004236631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0968736">
                <text:p>-0.00968736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6325153">
                <text:p>0.006325153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08695869">
                <text:p>-0.0008695869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174619">
                <text:p>0.0117461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0.0005972783">
                <text:p>0.0005972783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07342973">
                <text:p>-0.0007342973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6749793">
                <text:p>-0.006749793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09743087">
                <text:p>-0.009743087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3702096">
                <text:p>0.003702096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08866962">
                <text:p>-0.008866962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3467177">
                <text:p>-0.00346717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7346796">
                <text:p>-0.007346796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5175782">
                <text:p>0.005175782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08674078">
                <text:p>-0.008674078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08558033">
                <text:p>0.0008558033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3188662">
                <text:p>0.003188662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6339643">
                <text:p>-0.006339643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07888131">
                <text:p>0.000788813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8798862">
                <text:p>0.00879886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3531892">
                <text:p>0.003531892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6676391">
                <text:p>0.006676391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170903">
                <text:p>0.02170903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5413569">
                <text:p>-0.005413569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680292">
                <text:p>-0.00680292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068974">
                <text:p>0.01068974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568886">
                <text:p>0.004568886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1315202">
                <text:p>-0.001315202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3319977">
                <text:p>0.003319977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607959">
                <text:p>0.00607959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09696634">
                <text:p>-0.0009696634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172393">
                <text:p>0.01172393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6484503">
                <text:p>0.006484503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279476">
                <text:p>0.01279476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4234207">
                <text:p>-0.004234207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1667501">
                <text:p>0.001667501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6182877">
                <text:p>-0.006182877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2703486">
                <text:p>-0.002703486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6834812">
                <text:p>0.006834812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088904">
                <text:p>0.008088904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540232">
                <text:p>0.00540232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2643998">
                <text:p>-0.002643998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718499">
                <text:p>0.0171849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3538302">
                <text:p>-0.003538302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3978462">
                <text:p>-0.00397846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5241901">
                <text:p>-0.005241901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1006645">
                <text:p>-0.00100664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4368385">
                <text:p>0.004368385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205341">
                <text:p>-0.00205341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1743934">
                <text:p>-0.00174393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463939">
                <text:p>-0.00463939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7185017">
                <text:p>-0.007185017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3680075">
                <text:p>-0.003680075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04393338">
                <text:p>-0.000439333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244446">
                <text:p>0.00244446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2021812">
                <text:p>-0.002021812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-0.000256529">
                <text:p>-0.00025652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6652371">
                <text:p>0.006652371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09175407">
                <text:p>0.0009175407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052212">
                <text:p>0.00605221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6638769">
                <text:p>-0.006638769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0822452">
                <text:p>-0.00822452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1450112">
                <text:p>-0.00145011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6358234">
                <text:p>0.006358234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5808462">
                <text:p>-0.005808462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5620561">
                <text:p>-0.00562056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01445979">
                <text:p>-0.000144597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658389">
                <text:p>0.01658389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789761">
                <text:p>0.003789761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08029892">
                <text:p>-0.000802989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366921">
                <text:p>0.00336692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5736976">
                <text:p>0.005736976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7841744">
                <text:p>0.007841744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2141785">
                <text:p>0.002141785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3135833">
                <text:p>0.003135833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4768893">
                <text:p>-0.004768893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07781186">
                <text:p>0.0007781186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5344701">
                <text:p>0.005344701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237191">
                <text:p>0.003237191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13034">
                <text:p>0.0113034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8013837">
                <text:p>0.008013837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115714">
                <text:p>0.01115714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-0.0001009307">
                <text:p>-0.000100930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5552145">
                <text:p>0.00555214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5859987">
                <text:p>0.005859987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3654933">
                <text:p>0.003654933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3239116">
                <text:p>0.003239116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7629097">
                <text:p>-0.007629097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5488451">
                <text:p>0.00548845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485989">
                <text:p>0.002485989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4296954">
                <text:p>0.004296954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442645">
                <text:p>0.004442645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1394999">
                <text:p>-0.001394999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43738">
                <text:p>0.0143738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4761509">
                <text:p>0.004761509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3802687">
                <text:p>-0.003802687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06254694">
                <text:p>-0.000625469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4554583">
                <text:p>-0.00455458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172952">
                <text:p>0.0117295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261723">
                <text:p>-0.00261723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7723331">
                <text:p>0.007723331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0.001595885">
                <text:p>0.001595885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0.0001418018">
                <text:p>0.0001418018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3864004">
                <text:p>-0.003864004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09175464">
                <text:p>-0.009175464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256956">
                <text:p>-0.00256956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0919624">
                <text:p>-0.00919624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4401316">
                <text:p>-0.00440131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2634913">
                <text:p>-0.00263491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07744678">
                <text:p>-0.0007744678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8370106">
                <text:p>0.008370106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276507">
                <text:p>0.0127650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6833633">
                <text:p>-0.006833633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633953">
                <text:p>0.00863395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1674452">
                <text:p>0.001674452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6183125">
                <text:p>-0.006183125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47553">
                <text:p>-0.0047553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14405">
                <text:p>0.021440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4291271">
                <text:p>-0.004291271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0.0005252121">
                <text:p>0.0005252121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8426839">
                <text:p>0.00842683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775402">
                <text:p>0.01775402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2299008">
                <text:p>-0.00229900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5517891">
                <text:p>0.005517891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7255706">
                <text:p>0.007255706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1887515">
                <text:p>0.001887515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4729534">
                <text:p>-0.004729534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3389032">
                <text:p>-0.00338903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253202">
                <text:p>-0.00253202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4448085">
                <text:p>0.004448085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073607">
                <text:p>0.01073607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09829625">
                <text:p>0.0009829625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08966286">
                <text:p>-0.00896628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3865969">
                <text:p>0.003865969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7683937">
                <text:p>-0.007683937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521053">
                <text:p>-0.0052105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615617">
                <text:p>-0.0061561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2965509">
                <text:p>0.02965509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6532325">
                <text:p>-0.006532325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555756">
                <text:p>-0.05555756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5764171">
                <text:p>-0.05764171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5910992">
                <text:p>-0.05910992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5997262">
                <text:p>-0.05997262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03101">
                <text:p>-0.0603101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6039065">
                <text:p>-0.06039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