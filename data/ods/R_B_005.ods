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number-columns-repeated="6" table:default-cell-style-name="Default"/>
        <table:table-row table:style-name="ro1">
          <table:table-cell office:value-type="string">
            <text:p>X [nm (air)]</text:p>
          </table:table-cell>
          <table:table-cell office:value-type="string">
            <text:p>Y [Intensity]</text:p>
          </table:table-cell>
          <table:table-cell table:number-columns-repeated="4"/>
        </table:table-row>
        <table:table-row table:style-name="ro1">
          <table:table-cell office:value-type="float" office:value="321.5908203125">
            <text:p>321.5908203125</text:p>
          </table:table-cell>
          <table:table-cell office:value-type="float" office:value="0.006218733">
            <text:p>0.006218733</text:p>
          </table:table-cell>
          <table:table-cell table:number-columns-repeated="4"/>
        </table:table-row>
        <table:table-row table:style-name="ro1">
          <table:table-cell office:value-type="float" office:value="321.698333740234">
            <text:p>321.6983337402</text:p>
          </table:table-cell>
          <table:table-cell office:value-type="float" office:value="0.001599127">
            <text:p>0.001599127</text:p>
          </table:table-cell>
          <table:table-cell table:number-columns-repeated="3"/>
          <table:table-cell>
            <draw:frame table:end-cell-address="Sheet1.M23" table:end-x="0.7083in" table:end-y="0.1417in" draw:z-index="0" draw:style-name="gr1" draw:text-style-name="P1" svg:width="6.2988in" svg:height="3.5429in" svg:x="0.6327in" svg:y="0.1547in">
              <draw:object draw:notify-on-update-of-ranges="Sheet1.A1:Sheet1.A1 Sheet1.A2:Sheet1.A3649 Sheet1.B1:Sheet1.B1 Sheet1.B2:Sheet1.B3649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321.805877685547">
            <text:p>321.8058776855</text:p>
          </table:table-cell>
          <table:table-cell office:value-type="float" office:value="0.002960364">
            <text:p>0.002960364</text:p>
          </table:table-cell>
          <table:table-cell table:number-columns-repeated="4"/>
        </table:table-row>
        <table:table-row table:style-name="ro1">
          <table:table-cell office:value-type="float" office:value="321.913421630859">
            <text:p>321.9134216309</text:p>
          </table:table-cell>
          <table:table-cell office:value-type="float" office:value="0.0117084">
            <text:p>0.0117084</text:p>
          </table:table-cell>
          <table:table-cell table:number-columns-repeated="4"/>
        </table:table-row>
        <table:table-row table:style-name="ro1">
          <table:table-cell office:value-type="float" office:value="322.020965576172">
            <text:p>322.0209655762</text:p>
          </table:table-cell>
          <table:table-cell office:value-type="float" office:value="0.007223422">
            <text:p>0.007223422</text:p>
          </table:table-cell>
          <table:table-cell table:number-columns-repeated="4"/>
        </table:table-row>
        <table:table-row table:style-name="ro1">
          <table:table-cell office:value-type="float" office:value="322.128540039063">
            <text:p>322.1285400391</text:p>
          </table:table-cell>
          <table:table-cell office:value-type="float" office:value="0.003958338">
            <text:p>0.003958338</text:p>
          </table:table-cell>
          <table:table-cell table:number-columns-repeated="4"/>
        </table:table-row>
        <table:table-row table:style-name="ro1">
          <table:table-cell office:value-type="float" office:value="322.236083984375">
            <text:p>322.2360839844</text:p>
          </table:table-cell>
          <table:table-cell office:value-type="float" office:value="0.01609373">
            <text:p>0.01609373</text:p>
          </table:table-cell>
          <table:table-cell table:number-columns-repeated="4"/>
        </table:table-row>
        <table:table-row table:style-name="ro1">
          <table:table-cell office:value-type="float" office:value="322.343658447266">
            <text:p>322.3436584473</text:p>
          </table:table-cell>
          <table:table-cell office:value-type="float" office:value="-0.00168408">
            <text:p>-0.00168408</text:p>
          </table:table-cell>
          <table:table-cell table:number-columns-repeated="4"/>
        </table:table-row>
        <table:table-row table:style-name="ro1">
          <table:table-cell office:value-type="float" office:value="322.451232910156">
            <text:p>322.4512329102</text:p>
          </table:table-cell>
          <table:table-cell office:value-type="float" office:value="-0.0003126213">
            <text:p>-0.0003126213</text:p>
          </table:table-cell>
          <table:table-cell table:number-columns-repeated="4"/>
        </table:table-row>
        <table:table-row table:style-name="ro1">
          <table:table-cell office:value-type="float" office:value="322.558837890625">
            <text:p>322.5588378906</text:p>
          </table:table-cell>
          <table:table-cell office:value-type="float" office:value="0.006792164">
            <text:p>0.006792164</text:p>
          </table:table-cell>
          <table:table-cell table:number-columns-repeated="4"/>
        </table:table-row>
        <table:table-row table:style-name="ro1">
          <table:table-cell office:value-type="float" office:value="322.666412353516">
            <text:p>322.6664123535</text:p>
          </table:table-cell>
          <table:table-cell office:value-type="float" office:value="0.009125953">
            <text:p>0.009125953</text:p>
          </table:table-cell>
          <table:table-cell table:number-columns-repeated="4"/>
        </table:table-row>
        <table:table-row table:style-name="ro1">
          <table:table-cell office:value-type="float" office:value="322.774017333984">
            <text:p>322.774017334</text:p>
          </table:table-cell>
          <table:table-cell office:value-type="float" office:value="0.01134551">
            <text:p>0.01134551</text:p>
          </table:table-cell>
          <table:table-cell table:number-columns-repeated="4"/>
        </table:table-row>
        <table:table-row table:style-name="ro1">
          <table:table-cell office:value-type="float" office:value="322.881622314453">
            <text:p>322.8816223145</text:p>
          </table:table-cell>
          <table:table-cell office:value-type="float" office:value="-0.002442798">
            <text:p>-0.002442798</text:p>
          </table:table-cell>
          <table:table-cell table:number-columns-repeated="4"/>
        </table:table-row>
        <table:table-row table:style-name="ro1">
          <table:table-cell office:value-type="float" office:value="322.989227294922">
            <text:p>322.9892272949</text:p>
          </table:table-cell>
          <table:table-cell office:value-type="float" office:value="0.002626309">
            <text:p>0.002626309</text:p>
          </table:table-cell>
          <table:table-cell table:number-columns-repeated="4"/>
        </table:table-row>
        <table:table-row table:style-name="ro1">
          <table:table-cell office:value-type="float" office:value="323.096862792969">
            <text:p>323.096862793</text:p>
          </table:table-cell>
          <table:table-cell office:value-type="float" office:value="0.001522871">
            <text:p>0.001522871</text:p>
          </table:table-cell>
          <table:table-cell table:number-columns-repeated="4"/>
        </table:table-row>
        <table:table-row table:style-name="ro1">
          <table:table-cell office:value-type="float" office:value="323.204498291016">
            <text:p>323.204498291</text:p>
          </table:table-cell>
          <table:table-cell office:value-type="float" office:value="0.007261261">
            <text:p>0.007261261</text:p>
          </table:table-cell>
          <table:table-cell table:number-columns-repeated="4"/>
        </table:table-row>
        <table:table-row table:style-name="ro1">
          <table:table-cell office:value-type="float" office:value="323.312133789063">
            <text:p>323.3121337891</text:p>
          </table:table-cell>
          <table:table-cell office:value-type="float" office:value="-0.001251786">
            <text:p>-0.001251786</text:p>
          </table:table-cell>
          <table:table-cell table:number-columns-repeated="4"/>
        </table:table-row>
        <table:table-row table:style-name="ro1">
          <table:table-cell office:value-type="float" office:value="323.419769287109">
            <text:p>323.4197692871</text:p>
          </table:table-cell>
          <table:table-cell office:value-type="float" office:value="0.003696201">
            <text:p>0.003696201</text:p>
          </table:table-cell>
          <table:table-cell table:number-columns-repeated="4"/>
        </table:table-row>
        <table:table-row table:style-name="ro1">
          <table:table-cell office:value-type="float" office:value="323.527404785156">
            <text:p>323.5274047852</text:p>
          </table:table-cell>
          <table:table-cell office:value-type="float" office:value="0.03821716">
            <text:p>0.03821716</text:p>
          </table:table-cell>
          <table:table-cell table:number-columns-repeated="4"/>
        </table:table-row>
        <table:table-row table:style-name="ro1">
          <table:table-cell office:value-type="float" office:value="323.635070800781">
            <text:p>323.6350708008</text:p>
          </table:table-cell>
          <table:table-cell office:value-type="float" office:value="-0.006628186">
            <text:p>-0.006628186</text:p>
          </table:table-cell>
          <table:table-cell table:number-columns-repeated="4"/>
        </table:table-row>
        <table:table-row table:style-name="ro1">
          <table:table-cell office:value-type="float" office:value="323.742736816406">
            <text:p>323.7427368164</text:p>
          </table:table-cell>
          <table:table-cell office:value-type="float" office:value="-0.00358998">
            <text:p>-0.00358998</text:p>
          </table:table-cell>
          <table:table-cell table:number-columns-repeated="4"/>
        </table:table-row>
        <table:table-row table:style-name="ro1">
          <table:table-cell office:value-type="float" office:value="323.850402832031">
            <text:p>323.850402832</text:p>
          </table:table-cell>
          <table:table-cell office:value-type="float" office:value="0.01034994">
            <text:p>0.01034994</text:p>
          </table:table-cell>
          <table:table-cell table:number-columns-repeated="4"/>
        </table:table-row>
        <table:table-row table:style-name="ro1">
          <table:table-cell office:value-type="float" office:value="323.958068847656">
            <text:p>323.9580688477</text:p>
          </table:table-cell>
          <table:table-cell office:value-type="float" office:value="0.01684279">
            <text:p>0.01684279</text:p>
          </table:table-cell>
          <table:table-cell table:number-columns-repeated="4"/>
        </table:table-row>
        <table:table-row table:style-name="ro1">
          <table:table-cell office:value-type="float" office:value="324.065765380859">
            <text:p>324.0657653809</text:p>
          </table:table-cell>
          <table:table-cell office:value-type="float" office:value="-0.001376737">
            <text:p>-0.001376737</text:p>
          </table:table-cell>
          <table:table-cell table:number-columns-repeated="4"/>
        </table:table-row>
        <table:table-row table:style-name="ro1">
          <table:table-cell office:value-type="float" office:value="324.173461914063">
            <text:p>324.1734619141</text:p>
          </table:table-cell>
          <table:table-cell office:value-type="float" office:value="-0.005598779">
            <text:p>-0.005598779</text:p>
          </table:table-cell>
          <table:table-cell table:number-columns-repeated="4"/>
        </table:table-row>
        <table:table-row table:style-name="ro1">
          <table:table-cell office:value-type="float" office:value="324.281158447266">
            <text:p>324.2811584473</text:p>
          </table:table-cell>
          <table:table-cell office:value-type="float" office:value="0.003475914">
            <text:p>0.003475914</text:p>
          </table:table-cell>
          <table:table-cell table:number-columns-repeated="4"/>
        </table:table-row>
        <table:table-row table:style-name="ro1">
          <table:table-cell office:value-type="float" office:value="324.388854980469">
            <text:p>324.3888549805</text:p>
          </table:table-cell>
          <table:table-cell office:value-type="float" office:value="-0.002992577">
            <text:p>-0.002992577</text:p>
          </table:table-cell>
          <table:table-cell table:number-columns-repeated="4"/>
        </table:table-row>
        <table:table-row table:style-name="ro1">
          <table:table-cell office:value-type="float" office:value="324.496551513672">
            <text:p>324.4965515137</text:p>
          </table:table-cell>
          <table:table-cell office:value-type="float" office:value="0.002371167">
            <text:p>0.002371167</text:p>
          </table:table-cell>
          <table:table-cell table:number-columns-repeated="4"/>
        </table:table-row>
        <table:table-row table:style-name="ro1">
          <table:table-cell office:value-type="float" office:value="324.604278564453">
            <text:p>324.6042785645</text:p>
          </table:table-cell>
          <table:table-cell office:value-type="float" office:value="0.007189238">
            <text:p>0.007189238</text:p>
          </table:table-cell>
          <table:table-cell table:number-columns-repeated="4"/>
        </table:table-row>
        <table:table-row table:style-name="ro1">
          <table:table-cell office:value-type="float" office:value="324.712005615234">
            <text:p>324.7120056152</text:p>
          </table:table-cell>
          <table:table-cell office:value-type="float" office:value="0.003238156">
            <text:p>0.003238156</text:p>
          </table:table-cell>
          <table:table-cell table:number-columns-repeated="4"/>
        </table:table-row>
        <table:table-row table:style-name="ro1">
          <table:table-cell office:value-type="float" office:value="324.819732666016">
            <text:p>324.819732666</text:p>
          </table:table-cell>
          <table:table-cell office:value-type="float" office:value="0.002350102">
            <text:p>0.002350102</text:p>
          </table:table-cell>
          <table:table-cell table:number-columns-repeated="4"/>
        </table:table-row>
        <table:table-row table:style-name="ro1">
          <table:table-cell office:value-type="float" office:value="324.927490234375">
            <text:p>324.9274902344</text:p>
          </table:table-cell>
          <table:table-cell office:value-type="float" office:value="0.01631283">
            <text:p>0.01631283</text:p>
          </table:table-cell>
          <table:table-cell table:number-columns-repeated="4"/>
        </table:table-row>
        <table:table-row table:style-name="ro1">
          <table:table-cell office:value-type="float" office:value="325.035217285156">
            <text:p>325.0352172852</text:p>
          </table:table-cell>
          <table:table-cell office:value-type="float" office:value="-0.007664563">
            <text:p>-0.007664563</text:p>
          </table:table-cell>
          <table:table-cell table:number-columns-repeated="4"/>
        </table:table-row>
        <table:table-row table:style-name="ro1">
          <table:table-cell office:value-type="float" office:value="325.142974853516">
            <text:p>325.1429748535</text:p>
          </table:table-cell>
          <table:table-cell office:value-type="float" office:value="0.002007358">
            <text:p>0.002007358</text:p>
          </table:table-cell>
          <table:table-cell table:number-columns-repeated="4"/>
        </table:table-row>
        <table:table-row table:style-name="ro1">
          <table:table-cell office:value-type="float" office:value="325.250732421875">
            <text:p>325.2507324219</text:p>
          </table:table-cell>
          <table:table-cell office:value-type="float" office:value="0.0006600439">
            <text:p>0.0006600439</text:p>
          </table:table-cell>
          <table:table-cell table:number-columns-repeated="4"/>
        </table:table-row>
        <table:table-row table:style-name="ro1">
          <table:table-cell office:value-type="float" office:value="325.358489990234">
            <text:p>325.3584899902</text:p>
          </table:table-cell>
          <table:table-cell office:value-type="float" office:value="-0.003535759">
            <text:p>-0.003535759</text:p>
          </table:table-cell>
          <table:table-cell table:number-columns-repeated="4"/>
        </table:table-row>
        <table:table-row table:style-name="ro1">
          <table:table-cell office:value-type="float" office:value="325.466278076172">
            <text:p>325.4662780762</text:p>
          </table:table-cell>
          <table:table-cell office:value-type="float" office:value="0.003005787">
            <text:p>0.003005787</text:p>
          </table:table-cell>
          <table:table-cell table:number-columns-repeated="4"/>
        </table:table-row>
        <table:table-row table:style-name="ro1">
          <table:table-cell office:value-type="float" office:value="325.574066162109">
            <text:p>325.5740661621</text:p>
          </table:table-cell>
          <table:table-cell office:value-type="float" office:value="0.005312101">
            <text:p>0.005312101</text:p>
          </table:table-cell>
          <table:table-cell table:number-columns-repeated="4"/>
        </table:table-row>
        <table:table-row table:style-name="ro1">
          <table:table-cell office:value-type="float" office:value="325.681854248047">
            <text:p>325.681854248</text:p>
          </table:table-cell>
          <table:table-cell office:value-type="float" office:value="0.004306723">
            <text:p>0.004306723</text:p>
          </table:table-cell>
          <table:table-cell table:number-columns-repeated="4"/>
        </table:table-row>
        <table:table-row table:style-name="ro1">
          <table:table-cell office:value-type="float" office:value="325.789642333984">
            <text:p>325.789642334</text:p>
          </table:table-cell>
          <table:table-cell office:value-type="float" office:value="0.005500186">
            <text:p>0.005500186</text:p>
          </table:table-cell>
          <table:table-cell table:number-columns-repeated="4"/>
        </table:table-row>
        <table:table-row table:style-name="ro1">
          <table:table-cell office:value-type="float" office:value="325.897430419922">
            <text:p>325.8974304199</text:p>
          </table:table-cell>
          <table:table-cell office:value-type="float" office:value="0.002477835">
            <text:p>0.002477835</text:p>
          </table:table-cell>
          <table:table-cell table:number-columns-repeated="4"/>
        </table:table-row>
        <table:table-row table:style-name="ro1">
          <table:table-cell office:value-type="float" office:value="326.005249023438">
            <text:p>326.0052490234</text:p>
          </table:table-cell>
          <table:table-cell office:value-type="float" office:value="0.001173407">
            <text:p>0.001173407</text:p>
          </table:table-cell>
          <table:table-cell table:number-columns-repeated="4"/>
        </table:table-row>
        <table:table-row table:style-name="ro1">
          <table:table-cell office:value-type="float" office:value="326.113067626953">
            <text:p>326.113067627</text:p>
          </table:table-cell>
          <table:table-cell office:value-type="float" office:value="0.007369981">
            <text:p>0.007369981</text:p>
          </table:table-cell>
          <table:table-cell table:number-columns-repeated="4"/>
        </table:table-row>
        <table:table-row table:style-name="ro1">
          <table:table-cell office:value-type="float" office:value="326.220886230469">
            <text:p>326.2208862305</text:p>
          </table:table-cell>
          <table:table-cell office:value-type="float" office:value="0.01568188">
            <text:p>0.01568188</text:p>
          </table:table-cell>
          <table:table-cell table:number-columns-repeated="4"/>
        </table:table-row>
        <table:table-row table:style-name="ro1">
          <table:table-cell office:value-type="float" office:value="326.328704833984">
            <text:p>326.328704834</text:p>
          </table:table-cell>
          <table:table-cell office:value-type="float" office:value="-0.0041801">
            <text:p>-0.0041801</text:p>
          </table:table-cell>
          <table:table-cell table:number-columns-repeated="4"/>
        </table:table-row>
        <table:table-row table:style-name="ro1">
          <table:table-cell office:value-type="float" office:value="326.436553955078">
            <text:p>326.4365539551</text:p>
          </table:table-cell>
          <table:table-cell office:value-type="float" office:value="0.008567971">
            <text:p>0.008567971</text:p>
          </table:table-cell>
          <table:table-cell table:number-columns-repeated="4"/>
        </table:table-row>
        <table:table-row table:style-name="ro1">
          <table:table-cell office:value-type="float" office:value="326.544403076172">
            <text:p>326.5444030762</text:p>
          </table:table-cell>
          <table:table-cell office:value-type="float" office:value="0.02277227">
            <text:p>0.02277227</text:p>
          </table:table-cell>
          <table:table-cell table:number-columns-repeated="4"/>
        </table:table-row>
        <table:table-row table:style-name="ro1">
          <table:table-cell office:value-type="float" office:value="326.652252197266">
            <text:p>326.6522521973</text:p>
          </table:table-cell>
          <table:table-cell office:value-type="float" office:value="0.01691746">
            <text:p>0.01691746</text:p>
          </table:table-cell>
          <table:table-cell table:number-columns-repeated="4"/>
        </table:table-row>
        <table:table-row table:style-name="ro1">
          <table:table-cell office:value-type="float" office:value="326.760101318359">
            <text:p>326.7601013184</text:p>
          </table:table-cell>
          <table:table-cell office:value-type="float" office:value="0.00542776">
            <text:p>0.00542776</text:p>
          </table:table-cell>
          <table:table-cell table:number-columns-repeated="4"/>
        </table:table-row>
        <table:table-row table:style-name="ro1">
          <table:table-cell office:value-type="float" office:value="326.867950439453">
            <text:p>326.8679504395</text:p>
          </table:table-cell>
          <table:table-cell office:value-type="float" office:value="0.00958849">
            <text:p>0.00958849</text:p>
          </table:table-cell>
          <table:table-cell table:number-columns-repeated="4"/>
        </table:table-row>
        <table:table-row table:style-name="ro1">
          <table:table-cell office:value-type="float" office:value="326.975830078125">
            <text:p>326.9758300781</text:p>
          </table:table-cell>
          <table:table-cell office:value-type="float" office:value="0.004009557">
            <text:p>0.004009557</text:p>
          </table:table-cell>
          <table:table-cell table:number-columns-repeated="4"/>
        </table:table-row>
        <table:table-row table:style-name="ro1">
          <table:table-cell office:value-type="float" office:value="327.083709716797">
            <text:p>327.0837097168</text:p>
          </table:table-cell>
          <table:table-cell office:value-type="float" office:value="0.007268567">
            <text:p>0.007268567</text:p>
          </table:table-cell>
          <table:table-cell table:number-columns-repeated="4"/>
        </table:table-row>
        <table:table-row table:style-name="ro1">
          <table:table-cell office:value-type="float" office:value="327.191589355469">
            <text:p>327.1915893555</text:p>
          </table:table-cell>
          <table:table-cell office:value-type="float" office:value="-0.001349773">
            <text:p>-0.001349773</text:p>
          </table:table-cell>
          <table:table-cell table:number-columns-repeated="4"/>
        </table:table-row>
        <table:table-row table:style-name="ro1">
          <table:table-cell office:value-type="float" office:value="327.299499511719">
            <text:p>327.2994995117</text:p>
          </table:table-cell>
          <table:table-cell office:value-type="float" office:value="0.006117597">
            <text:p>0.006117597</text:p>
          </table:table-cell>
          <table:table-cell table:number-columns-repeated="4"/>
        </table:table-row>
        <table:table-row table:style-name="ro1">
          <table:table-cell office:value-type="float" office:value="327.407379150391">
            <text:p>327.4073791504</text:p>
          </table:table-cell>
          <table:table-cell office:value-type="float" office:value="0.0184645">
            <text:p>0.0184645</text:p>
          </table:table-cell>
          <table:table-cell table:number-columns-repeated="4"/>
        </table:table-row>
        <table:table-row table:style-name="ro1">
          <table:table-cell office:value-type="float" office:value="327.515289306641">
            <text:p>327.5152893066</text:p>
          </table:table-cell>
          <table:table-cell office:value-type="float" office:value="-0.002181496">
            <text:p>-0.002181496</text:p>
          </table:table-cell>
          <table:table-cell table:number-columns-repeated="4"/>
        </table:table-row>
        <table:table-row table:style-name="ro1">
          <table:table-cell office:value-type="float" office:value="327.623199462891">
            <text:p>327.6231994629</text:p>
          </table:table-cell>
          <table:table-cell office:value-type="float" office:value="0.008856415">
            <text:p>0.008856415</text:p>
          </table:table-cell>
          <table:table-cell table:number-columns-repeated="4"/>
        </table:table-row>
        <table:table-row table:style-name="ro1">
          <table:table-cell office:value-type="float" office:value="327.731109619141">
            <text:p>327.7311096191</text:p>
          </table:table-cell>
          <table:table-cell office:value-type="float" office:value="-0.002685407">
            <text:p>-0.002685407</text:p>
          </table:table-cell>
          <table:table-cell table:number-columns-repeated="4"/>
        </table:table-row>
        <table:table-row table:style-name="ro1">
          <table:table-cell office:value-type="float" office:value="327.839050292969">
            <text:p>327.839050293</text:p>
          </table:table-cell>
          <table:table-cell office:value-type="float" office:value="-0.006016334">
            <text:p>-0.006016334</text:p>
          </table:table-cell>
          <table:table-cell table:number-columns-repeated="4"/>
        </table:table-row>
        <table:table-row table:style-name="ro1">
          <table:table-cell office:value-type="float" office:value="327.946990966797">
            <text:p>327.9469909668</text:p>
          </table:table-cell>
          <table:table-cell office:value-type="float" office:value="-0.001164905">
            <text:p>-0.001164905</text:p>
          </table:table-cell>
          <table:table-cell table:number-columns-repeated="4"/>
        </table:table-row>
        <table:table-row table:style-name="ro1">
          <table:table-cell office:value-type="float" office:value="328.054931640625">
            <text:p>328.0549316406</text:p>
          </table:table-cell>
          <table:table-cell office:value-type="float" office:value="0.003647109">
            <text:p>0.003647109</text:p>
          </table:table-cell>
          <table:table-cell table:number-columns-repeated="4"/>
        </table:table-row>
        <table:table-row table:style-name="ro1">
          <table:table-cell office:value-type="float" office:value="328.162872314453">
            <text:p>328.1628723145</text:p>
          </table:table-cell>
          <table:table-cell office:value-type="float" office:value="0.006102612">
            <text:p>0.006102612</text:p>
          </table:table-cell>
          <table:table-cell table:number-columns-repeated="4"/>
        </table:table-row>
        <table:table-row table:style-name="ro1">
          <table:table-cell office:value-type="float" office:value="328.270812988281">
            <text:p>328.2708129883</text:p>
          </table:table-cell>
          <table:table-cell office:value-type="float" office:value="-0.002060826">
            <text:p>-0.002060826</text:p>
          </table:table-cell>
          <table:table-cell table:number-columns-repeated="4"/>
        </table:table-row>
        <table:table-row table:style-name="ro1">
          <table:table-cell office:value-type="float" office:value="328.378784179688">
            <text:p>328.3787841797</text:p>
          </table:table-cell>
          <table:table-cell office:value-type="float" office:value="-0.001305884">
            <text:p>-0.001305884</text:p>
          </table:table-cell>
          <table:table-cell table:number-columns-repeated="4"/>
        </table:table-row>
        <table:table-row table:style-name="ro1">
          <table:table-cell office:value-type="float" office:value="328.486755371094">
            <text:p>328.4867553711</text:p>
          </table:table-cell>
          <table:table-cell office:value-type="float" office:value="-0.009398081">
            <text:p>-0.009398081</text:p>
          </table:table-cell>
          <table:table-cell table:number-columns-repeated="4"/>
        </table:table-row>
        <table:table-row table:style-name="ro1">
          <table:table-cell office:value-type="float" office:value="328.5947265625">
            <text:p>328.5947265625</text:p>
          </table:table-cell>
          <table:table-cell office:value-type="float" office:value="0.002300603">
            <text:p>0.002300603</text:p>
          </table:table-cell>
          <table:table-cell table:number-columns-repeated="4"/>
        </table:table-row>
        <table:table-row table:style-name="ro1">
          <table:table-cell office:value-type="float" office:value="328.702697753906">
            <text:p>328.7026977539</text:p>
          </table:table-cell>
          <table:table-cell office:value-type="float" office:value="0.02151375">
            <text:p>0.02151375</text:p>
          </table:table-cell>
          <table:table-cell table:number-columns-repeated="4"/>
        </table:table-row>
        <table:table-row table:style-name="ro1">
          <table:table-cell office:value-type="float" office:value="328.810699462891">
            <text:p>328.8106994629</text:p>
          </table:table-cell>
          <table:table-cell office:value-type="float" office:value="0.001436442">
            <text:p>0.001436442</text:p>
          </table:table-cell>
          <table:table-cell table:number-columns-repeated="4"/>
        </table:table-row>
        <table:table-row table:style-name="ro1">
          <table:table-cell office:value-type="float" office:value="328.918670654297">
            <text:p>328.9186706543</text:p>
          </table:table-cell>
          <table:table-cell office:value-type="float" office:value="0.007540838">
            <text:p>0.007540838</text:p>
          </table:table-cell>
          <table:table-cell table:number-columns-repeated="4"/>
        </table:table-row>
        <table:table-row table:style-name="ro1">
          <table:table-cell office:value-type="float" office:value="329.026672363281">
            <text:p>329.0266723633</text:p>
          </table:table-cell>
          <table:table-cell office:value-type="float" office:value="0.00919826">
            <text:p>0.00919826</text:p>
          </table:table-cell>
          <table:table-cell table:number-columns-repeated="4"/>
        </table:table-row>
        <table:table-row table:style-name="ro1">
          <table:table-cell office:value-type="float" office:value="329.134704589844">
            <text:p>329.1347045898</text:p>
          </table:table-cell>
          <table:table-cell office:value-type="float" office:value="0.0166553">
            <text:p>0.0166553</text:p>
          </table:table-cell>
          <table:table-cell table:number-columns-repeated="4"/>
        </table:table-row>
        <table:table-row table:style-name="ro1">
          <table:table-cell office:value-type="float" office:value="329.242706298828">
            <text:p>329.2427062988</text:p>
          </table:table-cell>
          <table:table-cell office:value-type="float" office:value="-0.001937518">
            <text:p>-0.001937518</text:p>
          </table:table-cell>
          <table:table-cell table:number-columns-repeated="4"/>
        </table:table-row>
        <table:table-row table:style-name="ro1">
          <table:table-cell office:value-type="float" office:value="329.350738525391">
            <text:p>329.3507385254</text:p>
          </table:table-cell>
          <table:table-cell office:value-type="float" office:value="-0.002399474">
            <text:p>-0.002399474</text:p>
          </table:table-cell>
          <table:table-cell table:number-columns-repeated="4"/>
        </table:table-row>
        <table:table-row table:style-name="ro1">
          <table:table-cell office:value-type="float" office:value="329.458770751953">
            <text:p>329.458770752</text:p>
          </table:table-cell>
          <table:table-cell office:value-type="float" office:value="0.002017929">
            <text:p>0.002017929</text:p>
          </table:table-cell>
          <table:table-cell table:number-columns-repeated="4"/>
        </table:table-row>
        <table:table-row table:style-name="ro1">
          <table:table-cell office:value-type="float" office:value="329.566802978516">
            <text:p>329.5668029785</text:p>
          </table:table-cell>
          <table:table-cell office:value-type="float" office:value="0.003432544">
            <text:p>0.003432544</text:p>
          </table:table-cell>
          <table:table-cell table:number-columns-repeated="4"/>
        </table:table-row>
        <table:table-row table:style-name="ro1">
          <table:table-cell office:value-type="float" office:value="329.674835205078">
            <text:p>329.6748352051</text:p>
          </table:table-cell>
          <table:table-cell office:value-type="float" office:value="-0.002248784">
            <text:p>-0.002248784</text:p>
          </table:table-cell>
          <table:table-cell table:number-columns-repeated="4"/>
        </table:table-row>
        <table:table-row table:style-name="ro1">
          <table:table-cell office:value-type="float" office:value="329.782897949219">
            <text:p>329.7828979492</text:p>
          </table:table-cell>
          <table:table-cell office:value-type="float" office:value="0.00783221">
            <text:p>0.00783221</text:p>
          </table:table-cell>
          <table:table-cell table:number-columns-repeated="4"/>
        </table:table-row>
        <table:table-row table:style-name="ro1">
          <table:table-cell office:value-type="float" office:value="329.890960693359">
            <text:p>329.8909606934</text:p>
          </table:table-cell>
          <table:table-cell office:value-type="float" office:value="0.03876593">
            <text:p>0.03876593</text:p>
          </table:table-cell>
          <table:table-cell table:number-columns-repeated="4"/>
        </table:table-row>
        <table:table-row table:style-name="ro1">
          <table:table-cell office:value-type="float" office:value="329.9990234375">
            <text:p>329.9990234375</text:p>
          </table:table-cell>
          <table:table-cell office:value-type="float" office:value="0.002656442">
            <text:p>0.002656442</text:p>
          </table:table-cell>
          <table:table-cell table:number-columns-repeated="4"/>
        </table:table-row>
        <table:table-row table:style-name="ro1">
          <table:table-cell office:value-type="float" office:value="330.107086181641">
            <text:p>330.1070861816</text:p>
          </table:table-cell>
          <table:table-cell office:value-type="float" office:value="0.001294865">
            <text:p>0.001294865</text:p>
          </table:table-cell>
          <table:table-cell table:number-columns-repeated="4"/>
        </table:table-row>
        <table:table-row table:style-name="ro1">
          <table:table-cell office:value-type="float" office:value="330.215148925781">
            <text:p>330.2151489258</text:p>
          </table:table-cell>
          <table:table-cell office:value-type="float" office:value="-0.00693481">
            <text:p>-0.00693481</text:p>
          </table:table-cell>
          <table:table-cell table:number-columns-repeated="4"/>
        </table:table-row>
        <table:table-row table:style-name="ro1">
          <table:table-cell office:value-type="float" office:value="330.3232421875">
            <text:p>330.3232421875</text:p>
          </table:table-cell>
          <table:table-cell office:value-type="float" office:value="0.01561821">
            <text:p>0.01561821</text:p>
          </table:table-cell>
          <table:table-cell table:number-columns-repeated="4"/>
        </table:table-row>
        <table:table-row table:style-name="ro1">
          <table:table-cell office:value-type="float" office:value="330.431335449219">
            <text:p>330.4313354492</text:p>
          </table:table-cell>
          <table:table-cell office:value-type="float" office:value="0.009394303">
            <text:p>0.009394303</text:p>
          </table:table-cell>
          <table:table-cell table:number-columns-repeated="4"/>
        </table:table-row>
        <table:table-row table:style-name="ro1">
          <table:table-cell office:value-type="float" office:value="330.539428710938">
            <text:p>330.5394287109</text:p>
          </table:table-cell>
          <table:table-cell office:value-type="float" office:value="0.008358868">
            <text:p>0.008358868</text:p>
          </table:table-cell>
          <table:table-cell table:number-columns-repeated="4"/>
        </table:table-row>
        <table:table-row table:style-name="ro1">
          <table:table-cell office:value-type="float" office:value="330.647521972656">
            <text:p>330.6475219727</text:p>
          </table:table-cell>
          <table:table-cell office:value-type="float" office:value="-0.00327752">
            <text:p>-0.00327752</text:p>
          </table:table-cell>
          <table:table-cell table:number-columns-repeated="4"/>
        </table:table-row>
        <table:table-row table:style-name="ro1">
          <table:table-cell office:value-type="float" office:value="330.755645751953">
            <text:p>330.755645752</text:p>
          </table:table-cell>
          <table:table-cell office:value-type="float" office:value="0.005475027">
            <text:p>0.005475027</text:p>
          </table:table-cell>
          <table:table-cell table:number-columns-repeated="4"/>
        </table:table-row>
        <table:table-row table:style-name="ro1">
          <table:table-cell office:value-type="float" office:value="330.86376953125">
            <text:p>330.8637695313</text:p>
          </table:table-cell>
          <table:table-cell office:value-type="float" office:value="0.0162225">
            <text:p>0.0162225</text:p>
          </table:table-cell>
          <table:table-cell table:number-columns-repeated="4"/>
        </table:table-row>
        <table:table-row table:style-name="ro1">
          <table:table-cell office:value-type="float" office:value="330.971893310547">
            <text:p>330.9718933105</text:p>
          </table:table-cell>
          <table:table-cell office:value-type="float" office:value="0.01082199">
            <text:p>0.01082199</text:p>
          </table:table-cell>
          <table:table-cell table:number-columns-repeated="4"/>
        </table:table-row>
        <table:table-row table:style-name="ro1">
          <table:table-cell office:value-type="float" office:value="331.080017089844">
            <text:p>331.0800170898</text:p>
          </table:table-cell>
          <table:table-cell office:value-type="float" office:value="0.02783186">
            <text:p>0.02783186</text:p>
          </table:table-cell>
          <table:table-cell table:number-columns-repeated="4"/>
        </table:table-row>
        <table:table-row table:style-name="ro1">
          <table:table-cell office:value-type="float" office:value="331.188171386719">
            <text:p>331.1881713867</text:p>
          </table:table-cell>
          <table:table-cell office:value-type="float" office:value="0.01069262">
            <text:p>0.01069262</text:p>
          </table:table-cell>
          <table:table-cell table:number-columns-repeated="4"/>
        </table:table-row>
        <table:table-row table:style-name="ro1">
          <table:table-cell office:value-type="float" office:value="331.296295166016">
            <text:p>331.296295166</text:p>
          </table:table-cell>
          <table:table-cell office:value-type="float" office:value="0.01944631">
            <text:p>0.01944631</text:p>
          </table:table-cell>
          <table:table-cell table:number-columns-repeated="4"/>
        </table:table-row>
        <table:table-row table:style-name="ro1">
          <table:table-cell office:value-type="float" office:value="331.404449462891">
            <text:p>331.4044494629</text:p>
          </table:table-cell>
          <table:table-cell office:value-type="float" office:value="-0.00356965">
            <text:p>-0.00356965</text:p>
          </table:table-cell>
          <table:table-cell table:number-columns-repeated="4"/>
        </table:table-row>
        <table:table-row table:style-name="ro1">
          <table:table-cell office:value-type="float" office:value="331.512603759766">
            <text:p>331.5126037598</text:p>
          </table:table-cell>
          <table:table-cell office:value-type="float" office:value="-0.003688099">
            <text:p>-0.003688099</text:p>
          </table:table-cell>
          <table:table-cell table:number-columns-repeated="4"/>
        </table:table-row>
        <table:table-row table:style-name="ro1">
          <table:table-cell office:value-type="float" office:value="331.620788574219">
            <text:p>331.6207885742</text:p>
          </table:table-cell>
          <table:table-cell office:value-type="float" office:value="0.003351351">
            <text:p>0.003351351</text:p>
          </table:table-cell>
          <table:table-cell table:number-columns-repeated="4"/>
        </table:table-row>
        <table:table-row table:style-name="ro1">
          <table:table-cell office:value-type="float" office:value="331.728942871094">
            <text:p>331.7289428711</text:p>
          </table:table-cell>
          <table:table-cell office:value-type="float" office:value="0.009048153">
            <text:p>0.009048153</text:p>
          </table:table-cell>
          <table:table-cell table:number-columns-repeated="4"/>
        </table:table-row>
        <table:table-row table:style-name="ro1">
          <table:table-cell office:value-type="float" office:value="331.837127685547">
            <text:p>331.8371276855</text:p>
          </table:table-cell>
          <table:table-cell office:value-type="float" office:value="-0.0009116158">
            <text:p>-0.0009116158</text:p>
          </table:table-cell>
          <table:table-cell table:number-columns-repeated="4"/>
        </table:table-row>
        <table:table-row table:style-name="ro1">
          <table:table-cell office:value-type="float" office:value="331.9453125">
            <text:p>331.9453125</text:p>
          </table:table-cell>
          <table:table-cell office:value-type="float" office:value="-0.002742466">
            <text:p>-0.002742466</text:p>
          </table:table-cell>
          <table:table-cell table:number-columns-repeated="4"/>
        </table:table-row>
        <table:table-row table:style-name="ro1">
          <table:table-cell office:value-type="float" office:value="332.053527832031">
            <text:p>332.053527832</text:p>
          </table:table-cell>
          <table:table-cell office:value-type="float" office:value="0.007150551">
            <text:p>0.007150551</text:p>
          </table:table-cell>
          <table:table-cell table:number-columns-repeated="4"/>
        </table:table-row>
        <table:table-row table:style-name="ro1">
          <table:table-cell office:value-type="float" office:value="332.161712646484">
            <text:p>332.1617126465</text:p>
          </table:table-cell>
          <table:table-cell office:value-type="string">
            <text:p>5.81686E-06</text:p>
          </table:table-cell>
          <table:table-cell table:number-columns-repeated="4"/>
        </table:table-row>
        <table:table-row table:style-name="ro1">
          <table:table-cell office:value-type="float" office:value="332.269927978516">
            <text:p>332.2699279785</text:p>
          </table:table-cell>
          <table:table-cell office:value-type="float" office:value="-0.008865872">
            <text:p>-0.008865872</text:p>
          </table:table-cell>
          <table:table-cell table:number-columns-repeated="4"/>
        </table:table-row>
        <table:table-row table:style-name="ro1">
          <table:table-cell office:value-type="float" office:value="332.378143310547">
            <text:p>332.3781433105</text:p>
          </table:table-cell>
          <table:table-cell office:value-type="float" office:value="-0.003283694">
            <text:p>-0.003283694</text:p>
          </table:table-cell>
          <table:table-cell table:number-columns-repeated="4"/>
        </table:table-row>
        <table:table-row table:style-name="ro1">
          <table:table-cell office:value-type="float" office:value="332.486358642578">
            <text:p>332.4863586426</text:p>
          </table:table-cell>
          <table:table-cell office:value-type="float" office:value="0.01917746">
            <text:p>0.01917746</text:p>
          </table:table-cell>
          <table:table-cell table:number-columns-repeated="4"/>
        </table:table-row>
        <table:table-row table:style-name="ro1">
          <table:table-cell office:value-type="float" office:value="332.594573974609">
            <text:p>332.5945739746</text:p>
          </table:table-cell>
          <table:table-cell office:value-type="float" office:value="0.01121046">
            <text:p>0.01121046</text:p>
          </table:table-cell>
          <table:table-cell table:number-columns-repeated="4"/>
        </table:table-row>
        <table:table-row table:style-name="ro1">
          <table:table-cell office:value-type="float" office:value="332.702819824219">
            <text:p>332.7028198242</text:p>
          </table:table-cell>
          <table:table-cell office:value-type="float" office:value="0.003380249">
            <text:p>0.003380249</text:p>
          </table:table-cell>
          <table:table-cell table:number-columns-repeated="4"/>
        </table:table-row>
        <table:table-row table:style-name="ro1">
          <table:table-cell office:value-type="float" office:value="332.811065673828">
            <text:p>332.8110656738</text:p>
          </table:table-cell>
          <table:table-cell office:value-type="float" office:value="-0.008360771">
            <text:p>-0.008360771</text:p>
          </table:table-cell>
          <table:table-cell table:number-columns-repeated="4"/>
        </table:table-row>
        <table:table-row table:style-name="ro1">
          <table:table-cell office:value-type="float" office:value="332.919311523438">
            <text:p>332.9193115234</text:p>
          </table:table-cell>
          <table:table-cell office:value-type="float" office:value="0.0007755967">
            <text:p>0.0007755967</text:p>
          </table:table-cell>
          <table:table-cell table:number-columns-repeated="4"/>
        </table:table-row>
        <table:table-row table:style-name="ro1">
          <table:table-cell office:value-type="float" office:value="333.027557373047">
            <text:p>333.027557373</text:p>
          </table:table-cell>
          <table:table-cell office:value-type="float" office:value="0.0005296157">
            <text:p>0.0005296157</text:p>
          </table:table-cell>
          <table:table-cell table:number-columns-repeated="4"/>
        </table:table-row>
        <table:table-row table:style-name="ro1">
          <table:table-cell office:value-type="float" office:value="333.135833740234">
            <text:p>333.1358337402</text:p>
          </table:table-cell>
          <table:table-cell office:value-type="float" office:value="0.005652049">
            <text:p>0.005652049</text:p>
          </table:table-cell>
          <table:table-cell table:number-columns-repeated="4"/>
        </table:table-row>
        <table:table-row table:style-name="ro1">
          <table:table-cell office:value-type="float" office:value="333.244079589844">
            <text:p>333.2440795898</text:p>
          </table:table-cell>
          <table:table-cell office:value-type="float" office:value="0.0462161">
            <text:p>0.0462161</text:p>
          </table:table-cell>
          <table:table-cell table:number-columns-repeated="4"/>
        </table:table-row>
        <table:table-row table:style-name="ro1">
          <table:table-cell office:value-type="float" office:value="333.352355957031">
            <text:p>333.352355957</text:p>
          </table:table-cell>
          <table:table-cell office:value-type="float" office:value="-0.001892966">
            <text:p>-0.001892966</text:p>
          </table:table-cell>
          <table:table-cell table:number-columns-repeated="4"/>
        </table:table-row>
        <table:table-row table:style-name="ro1">
          <table:table-cell office:value-type="float" office:value="333.460662841797">
            <text:p>333.4606628418</text:p>
          </table:table-cell>
          <table:table-cell office:value-type="float" office:value="0.003482694">
            <text:p>0.003482694</text:p>
          </table:table-cell>
          <table:table-cell table:number-columns-repeated="4"/>
        </table:table-row>
        <table:table-row table:style-name="ro1">
          <table:table-cell office:value-type="float" office:value="333.568939208984">
            <text:p>333.568939209</text:p>
          </table:table-cell>
          <table:table-cell office:value-type="float" office:value="0.001883788">
            <text:p>0.001883788</text:p>
          </table:table-cell>
          <table:table-cell table:number-columns-repeated="4"/>
        </table:table-row>
        <table:table-row table:style-name="ro1">
          <table:table-cell office:value-type="float" office:value="333.67724609375">
            <text:p>333.6772460938</text:p>
          </table:table-cell>
          <table:table-cell office:value-type="float" office:value="-0.005750307">
            <text:p>-0.005750307</text:p>
          </table:table-cell>
          <table:table-cell table:number-columns-repeated="4"/>
        </table:table-row>
        <table:table-row table:style-name="ro1">
          <table:table-cell office:value-type="float" office:value="333.785552978516">
            <text:p>333.7855529785</text:p>
          </table:table-cell>
          <table:table-cell office:value-type="float" office:value="0.007908233">
            <text:p>0.007908233</text:p>
          </table:table-cell>
          <table:table-cell table:number-columns-repeated="4"/>
        </table:table-row>
        <table:table-row table:style-name="ro1">
          <table:table-cell office:value-type="float" office:value="333.893859863281">
            <text:p>333.8938598633</text:p>
          </table:table-cell>
          <table:table-cell office:value-type="float" office:value="0.004098916">
            <text:p>0.004098916</text:p>
          </table:table-cell>
          <table:table-cell table:number-columns-repeated="4"/>
        </table:table-row>
        <table:table-row table:style-name="ro1">
          <table:table-cell office:value-type="float" office:value="334.002166748047">
            <text:p>334.002166748</text:p>
          </table:table-cell>
          <table:table-cell office:value-type="float" office:value="-0.01021996">
            <text:p>-0.01021996</text:p>
          </table:table-cell>
          <table:table-cell table:number-columns-repeated="4"/>
        </table:table-row>
        <table:table-row table:style-name="ro1">
          <table:table-cell office:value-type="float" office:value="334.110473632813">
            <text:p>334.1104736328</text:p>
          </table:table-cell>
          <table:table-cell office:value-type="float" office:value="0.001075465">
            <text:p>0.001075465</text:p>
          </table:table-cell>
          <table:table-cell table:number-columns-repeated="4"/>
        </table:table-row>
        <table:table-row table:style-name="ro1">
          <table:table-cell office:value-type="float" office:value="334.218811035156">
            <text:p>334.2188110352</text:p>
          </table:table-cell>
          <table:table-cell office:value-type="float" office:value="0.004422773">
            <text:p>0.004422773</text:p>
          </table:table-cell>
          <table:table-cell table:number-columns-repeated="4"/>
        </table:table-row>
        <table:table-row table:style-name="ro1">
          <table:table-cell office:value-type="float" office:value="334.3271484375">
            <text:p>334.3271484375</text:p>
          </table:table-cell>
          <table:table-cell office:value-type="float" office:value="-0.0003532021">
            <text:p>-0.0003532021</text:p>
          </table:table-cell>
          <table:table-cell table:number-columns-repeated="4"/>
        </table:table-row>
        <table:table-row table:style-name="ro1">
          <table:table-cell office:value-type="float" office:value="334.435485839844">
            <text:p>334.4354858398</text:p>
          </table:table-cell>
          <table:table-cell office:value-type="float" office:value="0.0005803109">
            <text:p>0.0005803109</text:p>
          </table:table-cell>
          <table:table-cell table:number-columns-repeated="4"/>
        </table:table-row>
        <table:table-row table:style-name="ro1">
          <table:table-cell office:value-type="float" office:value="334.543853759766">
            <text:p>334.5438537598</text:p>
          </table:table-cell>
          <table:table-cell office:value-type="float" office:value="-0.005902335">
            <text:p>-0.005902335</text:p>
          </table:table-cell>
          <table:table-cell table:number-columns-repeated="4"/>
        </table:table-row>
        <table:table-row table:style-name="ro1">
          <table:table-cell office:value-type="float" office:value="334.652191162109">
            <text:p>334.6521911621</text:p>
          </table:table-cell>
          <table:table-cell office:value-type="float" office:value="0.01652069">
            <text:p>0.01652069</text:p>
          </table:table-cell>
          <table:table-cell table:number-columns-repeated="4"/>
        </table:table-row>
        <table:table-row table:style-name="ro1">
          <table:table-cell office:value-type="float" office:value="334.760559082031">
            <text:p>334.760559082</text:p>
          </table:table-cell>
          <table:table-cell office:value-type="float" office:value="-0.0007274459">
            <text:p>-0.0007274459</text:p>
          </table:table-cell>
          <table:table-cell table:number-columns-repeated="4"/>
        </table:table-row>
        <table:table-row table:style-name="ro1">
          <table:table-cell office:value-type="float" office:value="334.868927001953">
            <text:p>334.868927002</text:p>
          </table:table-cell>
          <table:table-cell office:value-type="float" office:value="0.008622251">
            <text:p>0.008622251</text:p>
          </table:table-cell>
          <table:table-cell table:number-columns-repeated="4"/>
        </table:table-row>
        <table:table-row table:style-name="ro1">
          <table:table-cell office:value-type="float" office:value="334.977325439453">
            <text:p>334.9773254395</text:p>
          </table:table-cell>
          <table:table-cell office:value-type="float" office:value="0.006635866">
            <text:p>0.006635866</text:p>
          </table:table-cell>
          <table:table-cell table:number-columns-repeated="4"/>
        </table:table-row>
        <table:table-row table:style-name="ro1">
          <table:table-cell office:value-type="float" office:value="335.085693359375">
            <text:p>335.0856933594</text:p>
          </table:table-cell>
          <table:table-cell office:value-type="float" office:value="0.009521038">
            <text:p>0.009521038</text:p>
          </table:table-cell>
          <table:table-cell table:number-columns-repeated="4"/>
        </table:table-row>
        <table:table-row table:style-name="ro1">
          <table:table-cell office:value-type="float" office:value="335.194091796875">
            <text:p>335.1940917969</text:p>
          </table:table-cell>
          <table:table-cell office:value-type="float" office:value="0.0005959093">
            <text:p>0.0005959093</text:p>
          </table:table-cell>
          <table:table-cell table:number-columns-repeated="4"/>
        </table:table-row>
        <table:table-row table:style-name="ro1">
          <table:table-cell office:value-type="float" office:value="335.302490234375">
            <text:p>335.3024902344</text:p>
          </table:table-cell>
          <table:table-cell office:value-type="float" office:value="0.006804112">
            <text:p>0.006804112</text:p>
          </table:table-cell>
          <table:table-cell table:number-columns-repeated="4"/>
        </table:table-row>
        <table:table-row table:style-name="ro1">
          <table:table-cell office:value-type="float" office:value="335.410888671875">
            <text:p>335.4108886719</text:p>
          </table:table-cell>
          <table:table-cell office:value-type="float" office:value="0.006296795">
            <text:p>0.006296795</text:p>
          </table:table-cell>
          <table:table-cell table:number-columns-repeated="4"/>
        </table:table-row>
        <table:table-row table:style-name="ro1">
          <table:table-cell office:value-type="float" office:value="335.519287109375">
            <text:p>335.5192871094</text:p>
          </table:table-cell>
          <table:table-cell office:value-type="float" office:value="0.02995386">
            <text:p>0.02995386</text:p>
          </table:table-cell>
          <table:table-cell table:number-columns-repeated="4"/>
        </table:table-row>
        <table:table-row table:style-name="ro1">
          <table:table-cell office:value-type="float" office:value="335.627716064453">
            <text:p>335.6277160645</text:p>
          </table:table-cell>
          <table:table-cell office:value-type="float" office:value="0.009235655">
            <text:p>0.009235655</text:p>
          </table:table-cell>
          <table:table-cell table:number-columns-repeated="4"/>
        </table:table-row>
        <table:table-row table:style-name="ro1">
          <table:table-cell office:value-type="float" office:value="335.736145019531">
            <text:p>335.7361450195</text:p>
          </table:table-cell>
          <table:table-cell office:value-type="float" office:value="0.006857804">
            <text:p>0.006857804</text:p>
          </table:table-cell>
          <table:table-cell table:number-columns-repeated="4"/>
        </table:table-row>
        <table:table-row table:style-name="ro1">
          <table:table-cell office:value-type="float" office:value="335.844573974609">
            <text:p>335.8445739746</text:p>
          </table:table-cell>
          <table:table-cell office:value-type="float" office:value="-0.0007319871">
            <text:p>-0.0007319871</text:p>
          </table:table-cell>
          <table:table-cell table:number-columns-repeated="4"/>
        </table:table-row>
        <table:table-row table:style-name="ro1">
          <table:table-cell office:value-type="float" office:value="335.953002929688">
            <text:p>335.9530029297</text:p>
          </table:table-cell>
          <table:table-cell office:value-type="float" office:value="0.01065848">
            <text:p>0.01065848</text:p>
          </table:table-cell>
          <table:table-cell table:number-columns-repeated="4"/>
        </table:table-row>
        <table:table-row table:style-name="ro1">
          <table:table-cell office:value-type="float" office:value="336.061462402344">
            <text:p>336.0614624023</text:p>
          </table:table-cell>
          <table:table-cell office:value-type="float" office:value="0.02015739">
            <text:p>0.02015739</text:p>
          </table:table-cell>
          <table:table-cell table:number-columns-repeated="4"/>
        </table:table-row>
        <table:table-row table:style-name="ro1">
          <table:table-cell office:value-type="float" office:value="336.169891357422">
            <text:p>336.1698913574</text:p>
          </table:table-cell>
          <table:table-cell office:value-type="float" office:value="-0.005254204">
            <text:p>-0.005254204</text:p>
          </table:table-cell>
          <table:table-cell table:number-columns-repeated="4"/>
        </table:table-row>
        <table:table-row table:style-name="ro1">
          <table:table-cell office:value-type="float" office:value="336.278350830078">
            <text:p>336.2783508301</text:p>
          </table:table-cell>
          <table:table-cell office:value-type="float" office:value="0.001879733">
            <text:p>0.001879733</text:p>
          </table:table-cell>
          <table:table-cell table:number-columns-repeated="4"/>
        </table:table-row>
        <table:table-row table:style-name="ro1">
          <table:table-cell office:value-type="float" office:value="336.386840820313">
            <text:p>336.3868408203</text:p>
          </table:table-cell>
          <table:table-cell office:value-type="float" office:value="0.01722241">
            <text:p>0.01722241</text:p>
          </table:table-cell>
          <table:table-cell table:number-columns-repeated="4"/>
        </table:table-row>
        <table:table-row table:style-name="ro1">
          <table:table-cell office:value-type="float" office:value="336.495300292969">
            <text:p>336.495300293</text:p>
          </table:table-cell>
          <table:table-cell office:value-type="float" office:value="0.004620183">
            <text:p>0.004620183</text:p>
          </table:table-cell>
          <table:table-cell table:number-columns-repeated="4"/>
        </table:table-row>
        <table:table-row table:style-name="ro1">
          <table:table-cell office:value-type="float" office:value="336.603790283203">
            <text:p>336.6037902832</text:p>
          </table:table-cell>
          <table:table-cell office:value-type="float" office:value="-0.004552136">
            <text:p>-0.004552136</text:p>
          </table:table-cell>
          <table:table-cell table:number-columns-repeated="4"/>
        </table:table-row>
        <table:table-row table:style-name="ro1">
          <table:table-cell office:value-type="float" office:value="336.712249755859">
            <text:p>336.7122497559</text:p>
          </table:table-cell>
          <table:table-cell office:value-type="float" office:value="-0.003075159">
            <text:p>-0.003075159</text:p>
          </table:table-cell>
          <table:table-cell table:number-columns-repeated="4"/>
        </table:table-row>
        <table:table-row table:style-name="ro1">
          <table:table-cell office:value-type="float" office:value="336.820770263672">
            <text:p>336.8207702637</text:p>
          </table:table-cell>
          <table:table-cell office:value-type="float" office:value="-0.0001460452">
            <text:p>-0.0001460452</text:p>
          </table:table-cell>
          <table:table-cell table:number-columns-repeated="4"/>
        </table:table-row>
        <table:table-row table:style-name="ro1">
          <table:table-cell office:value-type="float" office:value="336.929260253906">
            <text:p>336.9292602539</text:p>
          </table:table-cell>
          <table:table-cell office:value-type="float" office:value="0.002407169">
            <text:p>0.002407169</text:p>
          </table:table-cell>
          <table:table-cell table:number-columns-repeated="4"/>
        </table:table-row>
        <table:table-row table:style-name="ro1">
          <table:table-cell office:value-type="float" office:value="337.037750244141">
            <text:p>337.0377502441</text:p>
          </table:table-cell>
          <table:table-cell office:value-type="float" office:value="-0.005810536">
            <text:p>-0.005810536</text:p>
          </table:table-cell>
          <table:table-cell table:number-columns-repeated="4"/>
        </table:table-row>
        <table:table-row table:style-name="ro1">
          <table:table-cell office:value-type="float" office:value="337.146270751953">
            <text:p>337.146270752</text:p>
          </table:table-cell>
          <table:table-cell office:value-type="float" office:value="-0.008828025">
            <text:p>-0.008828025</text:p>
          </table:table-cell>
          <table:table-cell table:number-columns-repeated="4"/>
        </table:table-row>
        <table:table-row table:style-name="ro1">
          <table:table-cell office:value-type="float" office:value="337.254791259766">
            <text:p>337.2547912598</text:p>
          </table:table-cell>
          <table:table-cell office:value-type="float" office:value="0.02401995">
            <text:p>0.02401995</text:p>
          </table:table-cell>
          <table:table-cell table:number-columns-repeated="4"/>
        </table:table-row>
        <table:table-row table:style-name="ro1">
          <table:table-cell office:value-type="float" office:value="337.363311767578">
            <text:p>337.3633117676</text:p>
          </table:table-cell>
          <table:table-cell office:value-type="float" office:value="0.002049132">
            <text:p>0.002049132</text:p>
          </table:table-cell>
          <table:table-cell table:number-columns-repeated="4"/>
        </table:table-row>
        <table:table-row table:style-name="ro1">
          <table:table-cell office:value-type="float" office:value="337.471862792969">
            <text:p>337.471862793</text:p>
          </table:table-cell>
          <table:table-cell office:value-type="float" office:value="0.004007961">
            <text:p>0.004007961</text:p>
          </table:table-cell>
          <table:table-cell table:number-columns-repeated="4"/>
        </table:table-row>
        <table:table-row table:style-name="ro1">
          <table:table-cell office:value-type="float" office:value="337.580383300781">
            <text:p>337.5803833008</text:p>
          </table:table-cell>
          <table:table-cell office:value-type="float" office:value="-0.002775744">
            <text:p>-0.002775744</text:p>
          </table:table-cell>
          <table:table-cell table:number-columns-repeated="4"/>
        </table:table-row>
        <table:table-row table:style-name="ro1">
          <table:table-cell office:value-type="float" office:value="337.688934326172">
            <text:p>337.6889343262</text:p>
          </table:table-cell>
          <table:table-cell office:value-type="float" office:value="-0.0008238127">
            <text:p>-0.0008238127</text:p>
          </table:table-cell>
          <table:table-cell table:number-columns-repeated="4"/>
        </table:table-row>
        <table:table-row table:style-name="ro1">
          <table:table-cell office:value-type="float" office:value="337.797485351563">
            <text:p>337.7974853516</text:p>
          </table:table-cell>
          <table:table-cell office:value-type="float" office:value="-0.002561667">
            <text:p>-0.002561667</text:p>
          </table:table-cell>
          <table:table-cell table:number-columns-repeated="4"/>
        </table:table-row>
        <table:table-row table:style-name="ro1">
          <table:table-cell office:value-type="float" office:value="337.906036376953">
            <text:p>337.906036377</text:p>
          </table:table-cell>
          <table:table-cell office:value-type="float" office:value="-0.003514041">
            <text:p>-0.003514041</text:p>
          </table:table-cell>
          <table:table-cell table:number-columns-repeated="4"/>
        </table:table-row>
        <table:table-row table:style-name="ro1">
          <table:table-cell office:value-type="float" office:value="338.014617919922">
            <text:p>338.0146179199</text:p>
          </table:table-cell>
          <table:table-cell office:value-type="float" office:value="-0.002400032">
            <text:p>-0.002400032</text:p>
          </table:table-cell>
          <table:table-cell table:number-columns-repeated="4"/>
        </table:table-row>
        <table:table-row table:style-name="ro1">
          <table:table-cell office:value-type="float" office:value="338.123168945313">
            <text:p>338.1231689453</text:p>
          </table:table-cell>
          <table:table-cell office:value-type="float" office:value="0.01214103">
            <text:p>0.01214103</text:p>
          </table:table-cell>
          <table:table-cell table:number-columns-repeated="4"/>
        </table:table-row>
        <table:table-row table:style-name="ro1">
          <table:table-cell office:value-type="float" office:value="338.231750488281">
            <text:p>338.2317504883</text:p>
          </table:table-cell>
          <table:table-cell office:value-type="float" office:value="0.01067724">
            <text:p>0.01067724</text:p>
          </table:table-cell>
          <table:table-cell table:number-columns-repeated="4"/>
        </table:table-row>
        <table:table-row table:style-name="ro1">
          <table:table-cell office:value-type="float" office:value="338.340362548828">
            <text:p>338.3403625488</text:p>
          </table:table-cell>
          <table:table-cell office:value-type="float" office:value="-0.002861963">
            <text:p>-0.002861963</text:p>
          </table:table-cell>
          <table:table-cell table:number-columns-repeated="4"/>
        </table:table-row>
        <table:table-row table:style-name="ro1">
          <table:table-cell office:value-type="float" office:value="338.448944091797">
            <text:p>338.4489440918</text:p>
          </table:table-cell>
          <table:table-cell office:value-type="float" office:value="0.02335574">
            <text:p>0.02335574</text:p>
          </table:table-cell>
          <table:table-cell table:number-columns-repeated="4"/>
        </table:table-row>
        <table:table-row table:style-name="ro1">
          <table:table-cell office:value-type="float" office:value="338.557525634766">
            <text:p>338.5575256348</text:p>
          </table:table-cell>
          <table:table-cell office:value-type="float" office:value="0.006017238">
            <text:p>0.006017238</text:p>
          </table:table-cell>
          <table:table-cell table:number-columns-repeated="4"/>
        </table:table-row>
        <table:table-row table:style-name="ro1">
          <table:table-cell office:value-type="float" office:value="338.666137695313">
            <text:p>338.6661376953</text:p>
          </table:table-cell>
          <table:table-cell office:value-type="float" office:value="0.01244948">
            <text:p>0.01244948</text:p>
          </table:table-cell>
          <table:table-cell table:number-columns-repeated="4"/>
        </table:table-row>
        <table:table-row table:style-name="ro1">
          <table:table-cell office:value-type="float" office:value="338.774749755859">
            <text:p>338.7747497559</text:p>
          </table:table-cell>
          <table:table-cell office:value-type="float" office:value="-0.004140259">
            <text:p>-0.004140259</text:p>
          </table:table-cell>
          <table:table-cell table:number-columns-repeated="4"/>
        </table:table-row>
        <table:table-row table:style-name="ro1">
          <table:table-cell office:value-type="float" office:value="338.883392333984">
            <text:p>338.883392334</text:p>
          </table:table-cell>
          <table:table-cell office:value-type="float" office:value="-0.003281065">
            <text:p>-0.003281065</text:p>
          </table:table-cell>
          <table:table-cell table:number-columns-repeated="4"/>
        </table:table-row>
        <table:table-row table:style-name="ro1">
          <table:table-cell office:value-type="float" office:value="338.992004394531">
            <text:p>338.9920043945</text:p>
          </table:table-cell>
          <table:table-cell office:value-type="float" office:value="0.003717221">
            <text:p>0.003717221</text:p>
          </table:table-cell>
          <table:table-cell table:number-columns-repeated="4"/>
        </table:table-row>
        <table:table-row table:style-name="ro1">
          <table:table-cell office:value-type="float" office:value="339.100646972656">
            <text:p>339.1006469727</text:p>
          </table:table-cell>
          <table:table-cell office:value-type="float" office:value="0.009512516">
            <text:p>0.009512516</text:p>
          </table:table-cell>
          <table:table-cell table:number-columns-repeated="4"/>
        </table:table-row>
        <table:table-row table:style-name="ro1">
          <table:table-cell office:value-type="float" office:value="339.209289550781">
            <text:p>339.2092895508</text:p>
          </table:table-cell>
          <table:table-cell office:value-type="float" office:value="-0.00453648">
            <text:p>-0.00453648</text:p>
          </table:table-cell>
          <table:table-cell table:number-columns-repeated="4"/>
        </table:table-row>
        <table:table-row table:style-name="ro1">
          <table:table-cell office:value-type="float" office:value="339.317932128906">
            <text:p>339.3179321289</text:p>
          </table:table-cell>
          <table:table-cell office:value-type="float" office:value="0.00956223">
            <text:p>0.00956223</text:p>
          </table:table-cell>
          <table:table-cell table:number-columns-repeated="4"/>
        </table:table-row>
        <table:table-row table:style-name="ro1">
          <table:table-cell office:value-type="float" office:value="339.426574707031">
            <text:p>339.426574707</text:p>
          </table:table-cell>
          <table:table-cell office:value-type="float" office:value="0.003208381">
            <text:p>0.003208381</text:p>
          </table:table-cell>
          <table:table-cell table:number-columns-repeated="4"/>
        </table:table-row>
        <table:table-row table:style-name="ro1">
          <table:table-cell office:value-type="float" office:value="339.535247802734">
            <text:p>339.5352478027</text:p>
          </table:table-cell>
          <table:table-cell office:value-type="float" office:value="0.01093836">
            <text:p>0.01093836</text:p>
          </table:table-cell>
          <table:table-cell table:number-columns-repeated="4"/>
        </table:table-row>
        <table:table-row table:style-name="ro1">
          <table:table-cell office:value-type="float" office:value="339.643890380859">
            <text:p>339.6438903809</text:p>
          </table:table-cell>
          <table:table-cell office:value-type="float" office:value="0.002856623">
            <text:p>0.002856623</text:p>
          </table:table-cell>
          <table:table-cell table:number-columns-repeated="4"/>
        </table:table-row>
        <table:table-row table:style-name="ro1">
          <table:table-cell office:value-type="float" office:value="339.752563476563">
            <text:p>339.7525634766</text:p>
          </table:table-cell>
          <table:table-cell office:value-type="float" office:value="0.004852612">
            <text:p>0.004852612</text:p>
          </table:table-cell>
          <table:table-cell table:number-columns-repeated="4"/>
        </table:table-row>
        <table:table-row table:style-name="ro1">
          <table:table-cell office:value-type="float" office:value="339.861267089844">
            <text:p>339.8612670898</text:p>
          </table:table-cell>
          <table:table-cell office:value-type="float" office:value="0.001050118">
            <text:p>0.001050118</text:p>
          </table:table-cell>
          <table:table-cell table:number-columns-repeated="4"/>
        </table:table-row>
        <table:table-row table:style-name="ro1">
          <table:table-cell office:value-type="float" office:value="339.969940185547">
            <text:p>339.9699401855</text:p>
          </table:table-cell>
          <table:table-cell office:value-type="float" office:value="0.01700081">
            <text:p>0.01700081</text:p>
          </table:table-cell>
          <table:table-cell table:number-columns-repeated="4"/>
        </table:table-row>
        <table:table-row table:style-name="ro1">
          <table:table-cell office:value-type="float" office:value="340.078643798828">
            <text:p>340.0786437988</text:p>
          </table:table-cell>
          <table:table-cell office:value-type="float" office:value="0.00269694">
            <text:p>0.00269694</text:p>
          </table:table-cell>
          <table:table-cell table:number-columns-repeated="4"/>
        </table:table-row>
        <table:table-row table:style-name="ro1">
          <table:table-cell office:value-type="float" office:value="340.187347412109">
            <text:p>340.1873474121</text:p>
          </table:table-cell>
          <table:table-cell office:value-type="float" office:value="0.01748537">
            <text:p>0.01748537</text:p>
          </table:table-cell>
          <table:table-cell table:number-columns-repeated="4"/>
        </table:table-row>
        <table:table-row table:style-name="ro1">
          <table:table-cell office:value-type="float" office:value="340.296051025391">
            <text:p>340.2960510254</text:p>
          </table:table-cell>
          <table:table-cell office:value-type="float" office:value="0.005937403">
            <text:p>0.005937403</text:p>
          </table:table-cell>
          <table:table-cell table:number-columns-repeated="4"/>
        </table:table-row>
        <table:table-row table:style-name="ro1">
          <table:table-cell office:value-type="float" office:value="340.404754638672">
            <text:p>340.4047546387</text:p>
          </table:table-cell>
          <table:table-cell office:value-type="float" office:value="0.008058106">
            <text:p>0.008058106</text:p>
          </table:table-cell>
          <table:table-cell table:number-columns-repeated="4"/>
        </table:table-row>
        <table:table-row table:style-name="ro1">
          <table:table-cell office:value-type="float" office:value="340.513488769531">
            <text:p>340.5134887695</text:p>
          </table:table-cell>
          <table:table-cell office:value-type="float" office:value="-0.007693402">
            <text:p>-0.007693402</text:p>
          </table:table-cell>
          <table:table-cell table:number-columns-repeated="4"/>
        </table:table-row>
        <table:table-row table:style-name="ro1">
          <table:table-cell office:value-type="float" office:value="340.622192382813">
            <text:p>340.6221923828</text:p>
          </table:table-cell>
          <table:table-cell office:value-type="float" office:value="0.01624333">
            <text:p>0.01624333</text:p>
          </table:table-cell>
          <table:table-cell table:number-columns-repeated="4"/>
        </table:table-row>
        <table:table-row table:style-name="ro1">
          <table:table-cell office:value-type="float" office:value="340.730926513672">
            <text:p>340.7309265137</text:p>
          </table:table-cell>
          <table:table-cell office:value-type="float" office:value="0.01562953">
            <text:p>0.01562953</text:p>
          </table:table-cell>
          <table:table-cell table:number-columns-repeated="4"/>
        </table:table-row>
        <table:table-row table:style-name="ro1">
          <table:table-cell office:value-type="float" office:value="340.839660644531">
            <text:p>340.8396606445</text:p>
          </table:table-cell>
          <table:table-cell office:value-type="float" office:value="0.01380964">
            <text:p>0.01380964</text:p>
          </table:table-cell>
          <table:table-cell table:number-columns-repeated="4"/>
        </table:table-row>
        <table:table-row table:style-name="ro1">
          <table:table-cell office:value-type="float" office:value="340.948425292969">
            <text:p>340.948425293</text:p>
          </table:table-cell>
          <table:table-cell office:value-type="float" office:value="-0.004802159">
            <text:p>-0.004802159</text:p>
          </table:table-cell>
          <table:table-cell table:number-columns-repeated="4"/>
        </table:table-row>
        <table:table-row table:style-name="ro1">
          <table:table-cell office:value-type="float" office:value="341.057159423828">
            <text:p>341.0571594238</text:p>
          </table:table-cell>
          <table:table-cell office:value-type="float" office:value="-0.0004409676">
            <text:p>-0.0004409676</text:p>
          </table:table-cell>
          <table:table-cell table:number-columns-repeated="4"/>
        </table:table-row>
        <table:table-row table:style-name="ro1">
          <table:table-cell office:value-type="float" office:value="341.165924072266">
            <text:p>341.1659240723</text:p>
          </table:table-cell>
          <table:table-cell office:value-type="float" office:value="-0.001888667">
            <text:p>-0.001888667</text:p>
          </table:table-cell>
          <table:table-cell table:number-columns-repeated="4"/>
        </table:table-row>
        <table:table-row table:style-name="ro1">
          <table:table-cell office:value-type="float" office:value="341.274688720703">
            <text:p>341.2746887207</text:p>
          </table:table-cell>
          <table:table-cell office:value-type="float" office:value="-0.002632621">
            <text:p>-0.002632621</text:p>
          </table:table-cell>
          <table:table-cell table:number-columns-repeated="4"/>
        </table:table-row>
        <table:table-row table:style-name="ro1">
          <table:table-cell office:value-type="float" office:value="341.383483886719">
            <text:p>341.3834838867</text:p>
          </table:table-cell>
          <table:table-cell office:value-type="float" office:value="0.01538179">
            <text:p>0.01538179</text:p>
          </table:table-cell>
          <table:table-cell table:number-columns-repeated="4"/>
        </table:table-row>
        <table:table-row table:style-name="ro1">
          <table:table-cell office:value-type="float" office:value="341.492248535156">
            <text:p>341.4922485352</text:p>
          </table:table-cell>
          <table:table-cell office:value-type="float" office:value="0.004694498">
            <text:p>0.004694498</text:p>
          </table:table-cell>
          <table:table-cell table:number-columns-repeated="4"/>
        </table:table-row>
        <table:table-row table:style-name="ro1">
          <table:table-cell office:value-type="float" office:value="341.601043701172">
            <text:p>341.6010437012</text:p>
          </table:table-cell>
          <table:table-cell office:value-type="float" office:value="0.02312859">
            <text:p>0.02312859</text:p>
          </table:table-cell>
          <table:table-cell table:number-columns-repeated="4"/>
        </table:table-row>
        <table:table-row table:style-name="ro1">
          <table:table-cell office:value-type="float" office:value="341.709838867188">
            <text:p>341.7098388672</text:p>
          </table:table-cell>
          <table:table-cell office:value-type="float" office:value="0.01962086">
            <text:p>0.01962086</text:p>
          </table:table-cell>
          <table:table-cell table:number-columns-repeated="4"/>
        </table:table-row>
        <table:table-row table:style-name="ro1">
          <table:table-cell office:value-type="float" office:value="341.818634033203">
            <text:p>341.8186340332</text:p>
          </table:table-cell>
          <table:table-cell office:value-type="float" office:value="0.01392837">
            <text:p>0.01392837</text:p>
          </table:table-cell>
          <table:table-cell table:number-columns-repeated="4"/>
        </table:table-row>
        <table:table-row table:style-name="ro1">
          <table:table-cell office:value-type="float" office:value="341.927429199219">
            <text:p>341.9274291992</text:p>
          </table:table-cell>
          <table:table-cell office:value-type="float" office:value="-0.001728931">
            <text:p>-0.001728931</text:p>
          </table:table-cell>
          <table:table-cell table:number-columns-repeated="4"/>
        </table:table-row>
        <table:table-row table:style-name="ro1">
          <table:table-cell office:value-type="float" office:value="342.036254882813">
            <text:p>342.0362548828</text:p>
          </table:table-cell>
          <table:table-cell office:value-type="float" office:value="-0.001946321">
            <text:p>-0.001946321</text:p>
          </table:table-cell>
          <table:table-cell table:number-columns-repeated="4"/>
        </table:table-row>
        <table:table-row table:style-name="ro1">
          <table:table-cell office:value-type="float" office:value="342.145080566406">
            <text:p>342.1450805664</text:p>
          </table:table-cell>
          <table:table-cell office:value-type="float" office:value="0.001215377">
            <text:p>0.001215377</text:p>
          </table:table-cell>
          <table:table-cell table:number-columns-repeated="4"/>
        </table:table-row>
        <table:table-row table:style-name="ro1">
          <table:table-cell office:value-type="float" office:value="342.25390625">
            <text:p>342.25390625</text:p>
          </table:table-cell>
          <table:table-cell office:value-type="float" office:value="0.00987272">
            <text:p>0.00987272</text:p>
          </table:table-cell>
          <table:table-cell table:number-columns-repeated="4"/>
        </table:table-row>
        <table:table-row table:style-name="ro1">
          <table:table-cell office:value-type="float" office:value="342.362731933594">
            <text:p>342.3627319336</text:p>
          </table:table-cell>
          <table:table-cell office:value-type="float" office:value="0.004473263">
            <text:p>0.004473263</text:p>
          </table:table-cell>
          <table:table-cell table:number-columns-repeated="4"/>
        </table:table-row>
        <table:table-row table:style-name="ro1">
          <table:table-cell office:value-type="float" office:value="342.471557617188">
            <text:p>342.4715576172</text:p>
          </table:table-cell>
          <table:table-cell office:value-type="float" office:value="-0.000528093">
            <text:p>-0.000528093</text:p>
          </table:table-cell>
          <table:table-cell table:number-columns-repeated="4"/>
        </table:table-row>
        <table:table-row table:style-name="ro1">
          <table:table-cell office:value-type="float" office:value="342.580413818359">
            <text:p>342.5804138184</text:p>
          </table:table-cell>
          <table:table-cell office:value-type="float" office:value="0.01087721">
            <text:p>0.01087721</text:p>
          </table:table-cell>
          <table:table-cell table:number-columns-repeated="4"/>
        </table:table-row>
        <table:table-row table:style-name="ro1">
          <table:table-cell office:value-type="float" office:value="342.689270019531">
            <text:p>342.6892700195</text:p>
          </table:table-cell>
          <table:table-cell office:value-type="float" office:value="-0.00452268">
            <text:p>-0.00452268</text:p>
          </table:table-cell>
          <table:table-cell table:number-columns-repeated="4"/>
        </table:table-row>
        <table:table-row table:style-name="ro1">
          <table:table-cell office:value-type="float" office:value="342.798126220703">
            <text:p>342.7981262207</text:p>
          </table:table-cell>
          <table:table-cell office:value-type="float" office:value="0.007195025">
            <text:p>0.007195025</text:p>
          </table:table-cell>
          <table:table-cell table:number-columns-repeated="4"/>
        </table:table-row>
        <table:table-row table:style-name="ro1">
          <table:table-cell office:value-type="float" office:value="342.906982421875">
            <text:p>342.9069824219</text:p>
          </table:table-cell>
          <table:table-cell office:value-type="float" office:value="0.01509177">
            <text:p>0.01509177</text:p>
          </table:table-cell>
          <table:table-cell table:number-columns-repeated="4"/>
        </table:table-row>
        <table:table-row table:style-name="ro1">
          <table:table-cell office:value-type="float" office:value="343.015869140625">
            <text:p>343.0158691406</text:p>
          </table:table-cell>
          <table:table-cell office:value-type="float" office:value="0.01278942">
            <text:p>0.01278942</text:p>
          </table:table-cell>
          <table:table-cell table:number-columns-repeated="4"/>
        </table:table-row>
        <table:table-row table:style-name="ro1">
          <table:table-cell office:value-type="float" office:value="343.124755859375">
            <text:p>343.1247558594</text:p>
          </table:table-cell>
          <table:table-cell office:value-type="float" office:value="-0.002042797">
            <text:p>-0.002042797</text:p>
          </table:table-cell>
          <table:table-cell table:number-columns-repeated="4"/>
        </table:table-row>
        <table:table-row table:style-name="ro1">
          <table:table-cell office:value-type="float" office:value="343.233642578125">
            <text:p>343.2336425781</text:p>
          </table:table-cell>
          <table:table-cell office:value-type="float" office:value="-0.007437596">
            <text:p>-0.007437596</text:p>
          </table:table-cell>
          <table:table-cell table:number-columns-repeated="4"/>
        </table:table-row>
        <table:table-row table:style-name="ro1">
          <table:table-cell office:value-type="float" office:value="343.342529296875">
            <text:p>343.3425292969</text:p>
          </table:table-cell>
          <table:table-cell office:value-type="float" office:value="0.01001283">
            <text:p>0.01001283</text:p>
          </table:table-cell>
          <table:table-cell table:number-columns-repeated="4"/>
        </table:table-row>
        <table:table-row table:style-name="ro1">
          <table:table-cell office:value-type="float" office:value="343.451416015625">
            <text:p>343.4514160156</text:p>
          </table:table-cell>
          <table:table-cell office:value-type="float" office:value="0.001478224">
            <text:p>0.001478224</text:p>
          </table:table-cell>
          <table:table-cell table:number-columns-repeated="4"/>
        </table:table-row>
        <table:table-row table:style-name="ro1">
          <table:table-cell office:value-type="float" office:value="343.560333251953">
            <text:p>343.560333252</text:p>
          </table:table-cell>
          <table:table-cell office:value-type="float" office:value="-0.002281962">
            <text:p>-0.002281962</text:p>
          </table:table-cell>
          <table:table-cell table:number-columns-repeated="4"/>
        </table:table-row>
        <table:table-row table:style-name="ro1">
          <table:table-cell office:value-type="float" office:value="343.669250488281">
            <text:p>343.6692504883</text:p>
          </table:table-cell>
          <table:table-cell office:value-type="float" office:value="-0.003004008">
            <text:p>-0.003004008</text:p>
          </table:table-cell>
          <table:table-cell table:number-columns-repeated="4"/>
        </table:table-row>
        <table:table-row table:style-name="ro1">
          <table:table-cell office:value-type="float" office:value="343.778167724609">
            <text:p>343.7781677246</text:p>
          </table:table-cell>
          <table:table-cell office:value-type="float" office:value="0.00190221">
            <text:p>0.00190221</text:p>
          </table:table-cell>
          <table:table-cell table:number-columns-repeated="4"/>
        </table:table-row>
        <table:table-row table:style-name="ro1">
          <table:table-cell office:value-type="float" office:value="343.887084960938">
            <text:p>343.8870849609</text:p>
          </table:table-cell>
          <table:table-cell office:value-type="float" office:value="0.005123079">
            <text:p>0.005123079</text:p>
          </table:table-cell>
          <table:table-cell table:number-columns-repeated="4"/>
        </table:table-row>
        <table:table-row table:style-name="ro1">
          <table:table-cell office:value-type="float" office:value="343.996032714844">
            <text:p>343.9960327148</text:p>
          </table:table-cell>
          <table:table-cell office:value-type="float" office:value="-0.007347775">
            <text:p>-0.007347775</text:p>
          </table:table-cell>
          <table:table-cell table:number-columns-repeated="4"/>
        </table:table-row>
        <table:table-row table:style-name="ro1">
          <table:table-cell office:value-type="float" office:value="344.104949951172">
            <text:p>344.1049499512</text:p>
          </table:table-cell>
          <table:table-cell office:value-type="float" office:value="0.009167842">
            <text:p>0.009167842</text:p>
          </table:table-cell>
          <table:table-cell table:number-columns-repeated="4"/>
        </table:table-row>
        <table:table-row table:style-name="ro1">
          <table:table-cell office:value-type="float" office:value="344.213897705078">
            <text:p>344.2138977051</text:p>
          </table:table-cell>
          <table:table-cell office:value-type="float" office:value="-0.002273619">
            <text:p>-0.002273619</text:p>
          </table:table-cell>
          <table:table-cell table:number-columns-repeated="4"/>
        </table:table-row>
        <table:table-row table:style-name="ro1">
          <table:table-cell office:value-type="float" office:value="344.322845458984">
            <text:p>344.322845459</text:p>
          </table:table-cell>
          <table:table-cell office:value-type="float" office:value="0.007143619">
            <text:p>0.007143619</text:p>
          </table:table-cell>
          <table:table-cell table:number-columns-repeated="4"/>
        </table:table-row>
        <table:table-row table:style-name="ro1">
          <table:table-cell office:value-type="float" office:value="344.431823730469">
            <text:p>344.4318237305</text:p>
          </table:table-cell>
          <table:table-cell office:value-type="float" office:value="-0.00397339">
            <text:p>-0.00397339</text:p>
          </table:table-cell>
          <table:table-cell table:number-columns-repeated="4"/>
        </table:table-row>
        <table:table-row table:style-name="ro1">
          <table:table-cell office:value-type="float" office:value="344.540771484375">
            <text:p>344.5407714844</text:p>
          </table:table-cell>
          <table:table-cell office:value-type="float" office:value="-0.0002317824">
            <text:p>-0.0002317824</text:p>
          </table:table-cell>
          <table:table-cell table:number-columns-repeated="4"/>
        </table:table-row>
        <table:table-row table:style-name="ro1">
          <table:table-cell office:value-type="float" office:value="344.649749755859">
            <text:p>344.6497497559</text:p>
          </table:table-cell>
          <table:table-cell office:value-type="float" office:value="-0.0005669877">
            <text:p>-0.0005669877</text:p>
          </table:table-cell>
          <table:table-cell table:number-columns-repeated="4"/>
        </table:table-row>
        <table:table-row table:style-name="ro1">
          <table:table-cell office:value-type="float" office:value="344.758728027344">
            <text:p>344.7587280273</text:p>
          </table:table-cell>
          <table:table-cell office:value-type="float" office:value="0.0003654267">
            <text:p>0.0003654267</text:p>
          </table:table-cell>
          <table:table-cell table:number-columns-repeated="4"/>
        </table:table-row>
        <table:table-row table:style-name="ro1">
          <table:table-cell office:value-type="float" office:value="344.867706298828">
            <text:p>344.8677062988</text:p>
          </table:table-cell>
          <table:table-cell office:value-type="float" office:value="0.006453316">
            <text:p>0.006453316</text:p>
          </table:table-cell>
          <table:table-cell table:number-columns-repeated="4"/>
        </table:table-row>
        <table:table-row table:style-name="ro1">
          <table:table-cell office:value-type="float" office:value="344.976715087891">
            <text:p>344.9767150879</text:p>
          </table:table-cell>
          <table:table-cell office:value-type="float" office:value="0.01027341">
            <text:p>0.01027341</text:p>
          </table:table-cell>
          <table:table-cell table:number-columns-repeated="4"/>
        </table:table-row>
        <table:table-row table:style-name="ro1">
          <table:table-cell office:value-type="float" office:value="345.085723876953">
            <text:p>345.085723877</text:p>
          </table:table-cell>
          <table:table-cell office:value-type="float" office:value="-0.001061965">
            <text:p>-0.001061965</text:p>
          </table:table-cell>
          <table:table-cell table:number-columns-repeated="4"/>
        </table:table-row>
        <table:table-row table:style-name="ro1">
          <table:table-cell office:value-type="float" office:value="345.194702148438">
            <text:p>345.1947021484</text:p>
          </table:table-cell>
          <table:table-cell office:value-type="float" office:value="0.002092758">
            <text:p>0.002092758</text:p>
          </table:table-cell>
          <table:table-cell table:number-columns-repeated="4"/>
        </table:table-row>
        <table:table-row table:style-name="ro1">
          <table:table-cell office:value-type="float" office:value="345.303741455078">
            <text:p>345.3037414551</text:p>
          </table:table-cell>
          <table:table-cell office:value-type="float" office:value="0.02281353">
            <text:p>0.02281353</text:p>
          </table:table-cell>
          <table:table-cell table:number-columns-repeated="4"/>
        </table:table-row>
        <table:table-row table:style-name="ro1">
          <table:table-cell office:value-type="float" office:value="345.412750244141">
            <text:p>345.4127502441</text:p>
          </table:table-cell>
          <table:table-cell office:value-type="float" office:value="-0.006383666">
            <text:p>-0.006383666</text:p>
          </table:table-cell>
          <table:table-cell table:number-columns-repeated="4"/>
        </table:table-row>
        <table:table-row table:style-name="ro1">
          <table:table-cell office:value-type="float" office:value="345.521759033203">
            <text:p>345.5217590332</text:p>
          </table:table-cell>
          <table:table-cell office:value-type="float" office:value="-0.00398756">
            <text:p>-0.00398756</text:p>
          </table:table-cell>
          <table:table-cell table:number-columns-repeated="4"/>
        </table:table-row>
        <table:table-row table:style-name="ro1">
          <table:table-cell office:value-type="float" office:value="345.630798339844">
            <text:p>345.6307983398</text:p>
          </table:table-cell>
          <table:table-cell office:value-type="float" office:value="0.003327788">
            <text:p>0.003327788</text:p>
          </table:table-cell>
          <table:table-cell table:number-columns-repeated="4"/>
        </table:table-row>
        <table:table-row table:style-name="ro1">
          <table:table-cell office:value-type="float" office:value="345.739837646484">
            <text:p>345.7398376465</text:p>
          </table:table-cell>
          <table:table-cell office:value-type="float" office:value="-0.0013943">
            <text:p>-0.0013943</text:p>
          </table:table-cell>
          <table:table-cell table:number-columns-repeated="4"/>
        </table:table-row>
        <table:table-row table:style-name="ro1">
          <table:table-cell office:value-type="float" office:value="345.848876953125">
            <text:p>345.8488769531</text:p>
          </table:table-cell>
          <table:table-cell office:value-type="float" office:value="0.01065182">
            <text:p>0.01065182</text:p>
          </table:table-cell>
          <table:table-cell table:number-columns-repeated="4"/>
        </table:table-row>
        <table:table-row table:style-name="ro1">
          <table:table-cell office:value-type="float" office:value="345.957946777344">
            <text:p>345.9579467773</text:p>
          </table:table-cell>
          <table:table-cell office:value-type="float" office:value="0.01182742">
            <text:p>0.01182742</text:p>
          </table:table-cell>
          <table:table-cell table:number-columns-repeated="4"/>
        </table:table-row>
        <table:table-row table:style-name="ro1">
          <table:table-cell office:value-type="float" office:value="346.066986083984">
            <text:p>346.066986084</text:p>
          </table:table-cell>
          <table:table-cell office:value-type="float" office:value="-0.001249664">
            <text:p>-0.001249664</text:p>
          </table:table-cell>
          <table:table-cell table:number-columns-repeated="4"/>
        </table:table-row>
        <table:table-row table:style-name="ro1">
          <table:table-cell office:value-type="float" office:value="346.176055908203">
            <text:p>346.1760559082</text:p>
          </table:table-cell>
          <table:table-cell office:value-type="float" office:value="-0.002938719">
            <text:p>-0.002938719</text:p>
          </table:table-cell>
          <table:table-cell table:number-columns-repeated="4"/>
        </table:table-row>
        <table:table-row table:style-name="ro1">
          <table:table-cell office:value-type="float" office:value="346.285125732422">
            <text:p>346.2851257324</text:p>
          </table:table-cell>
          <table:table-cell office:value-type="float" office:value="-0.003655192">
            <text:p>-0.003655192</text:p>
          </table:table-cell>
          <table:table-cell table:number-columns-repeated="4"/>
        </table:table-row>
        <table:table-row table:style-name="ro1">
          <table:table-cell office:value-type="float" office:value="346.394195556641">
            <text:p>346.3941955566</text:p>
          </table:table-cell>
          <table:table-cell office:value-type="float" office:value="0.003389608">
            <text:p>0.003389608</text:p>
          </table:table-cell>
          <table:table-cell table:number-columns-repeated="4"/>
        </table:table-row>
        <table:table-row table:style-name="ro1">
          <table:table-cell office:value-type="float" office:value="346.503295898438">
            <text:p>346.5032958984</text:p>
          </table:table-cell>
          <table:table-cell office:value-type="float" office:value="-0.002411122">
            <text:p>-0.002411122</text:p>
          </table:table-cell>
          <table:table-cell table:number-columns-repeated="4"/>
        </table:table-row>
        <table:table-row table:style-name="ro1">
          <table:table-cell office:value-type="float" office:value="346.612365722656">
            <text:p>346.6123657227</text:p>
          </table:table-cell>
          <table:table-cell office:value-type="float" office:value="-0.004003591">
            <text:p>-0.004003591</text:p>
          </table:table-cell>
          <table:table-cell table:number-columns-repeated="4"/>
        </table:table-row>
        <table:table-row table:style-name="ro1">
          <table:table-cell office:value-type="float" office:value="346.721466064453">
            <text:p>346.7214660645</text:p>
          </table:table-cell>
          <table:table-cell office:value-type="float" office:value="0.0003392881">
            <text:p>0.0003392881</text:p>
          </table:table-cell>
          <table:table-cell table:number-columns-repeated="4"/>
        </table:table-row>
        <table:table-row table:style-name="ro1">
          <table:table-cell office:value-type="float" office:value="346.83056640625">
            <text:p>346.8305664063</text:p>
          </table:table-cell>
          <table:table-cell office:value-type="float" office:value="0.01146071">
            <text:p>0.01146071</text:p>
          </table:table-cell>
          <table:table-cell table:number-columns-repeated="4"/>
        </table:table-row>
        <table:table-row table:style-name="ro1">
          <table:table-cell office:value-type="float" office:value="346.939697265625">
            <text:p>346.9396972656</text:p>
          </table:table-cell>
          <table:table-cell office:value-type="float" office:value="0.02884848">
            <text:p>0.02884848</text:p>
          </table:table-cell>
          <table:table-cell table:number-columns-repeated="4"/>
        </table:table-row>
        <table:table-row table:style-name="ro1">
          <table:table-cell office:value-type="float" office:value="347.048797607422">
            <text:p>347.0487976074</text:p>
          </table:table-cell>
          <table:table-cell office:value-type="float" office:value="-0.008834707">
            <text:p>-0.008834707</text:p>
          </table:table-cell>
          <table:table-cell table:number-columns-repeated="4"/>
        </table:table-row>
        <table:table-row table:style-name="ro1">
          <table:table-cell office:value-type="float" office:value="347.157928466797">
            <text:p>347.1579284668</text:p>
          </table:table-cell>
          <table:table-cell office:value-type="float" office:value="-0.008115877">
            <text:p>-0.008115877</text:p>
          </table:table-cell>
          <table:table-cell table:number-columns-repeated="4"/>
        </table:table-row>
        <table:table-row table:style-name="ro1">
          <table:table-cell office:value-type="float" office:value="347.267059326172">
            <text:p>347.2670593262</text:p>
          </table:table-cell>
          <table:table-cell office:value-type="float" office:value="0.00359454">
            <text:p>0.00359454</text:p>
          </table:table-cell>
          <table:table-cell table:number-columns-repeated="4"/>
        </table:table-row>
        <table:table-row table:style-name="ro1">
          <table:table-cell office:value-type="float" office:value="347.376190185547">
            <text:p>347.3761901855</text:p>
          </table:table-cell>
          <table:table-cell office:value-type="float" office:value="-0.001781359">
            <text:p>-0.001781359</text:p>
          </table:table-cell>
          <table:table-cell table:number-columns-repeated="4"/>
        </table:table-row>
        <table:table-row table:style-name="ro1">
          <table:table-cell office:value-type="float" office:value="347.4853515625">
            <text:p>347.4853515625</text:p>
          </table:table-cell>
          <table:table-cell office:value-type="float" office:value="0.005728514">
            <text:p>0.005728514</text:p>
          </table:table-cell>
          <table:table-cell table:number-columns-repeated="4"/>
        </table:table-row>
        <table:table-row table:style-name="ro1">
          <table:table-cell office:value-type="float" office:value="347.594482421875">
            <text:p>347.5944824219</text:p>
          </table:table-cell>
          <table:table-cell office:value-type="float" office:value="-0.01140095">
            <text:p>-0.01140095</text:p>
          </table:table-cell>
          <table:table-cell table:number-columns-repeated="4"/>
        </table:table-row>
        <table:table-row table:style-name="ro1">
          <table:table-cell office:value-type="float" office:value="347.703643798828">
            <text:p>347.7036437988</text:p>
          </table:table-cell>
          <table:table-cell office:value-type="float" office:value="0.004815455">
            <text:p>0.004815455</text:p>
          </table:table-cell>
          <table:table-cell table:number-columns-repeated="4"/>
        </table:table-row>
        <table:table-row table:style-name="ro1">
          <table:table-cell office:value-type="float" office:value="347.812805175781">
            <text:p>347.8128051758</text:p>
          </table:table-cell>
          <table:table-cell office:value-type="float" office:value="-0.0008226375">
            <text:p>-0.0008226375</text:p>
          </table:table-cell>
          <table:table-cell table:number-columns-repeated="4"/>
        </table:table-row>
        <table:table-row table:style-name="ro1">
          <table:table-cell office:value-type="float" office:value="347.921966552734">
            <text:p>347.9219665527</text:p>
          </table:table-cell>
          <table:table-cell office:value-type="float" office:value="0.002206141">
            <text:p>0.002206141</text:p>
          </table:table-cell>
          <table:table-cell table:number-columns-repeated="4"/>
        </table:table-row>
        <table:table-row table:style-name="ro1">
          <table:table-cell office:value-type="float" office:value="348.031158447266">
            <text:p>348.0311584473</text:p>
          </table:table-cell>
          <table:table-cell office:value-type="float" office:value="0.006533248">
            <text:p>0.006533248</text:p>
          </table:table-cell>
          <table:table-cell table:number-columns-repeated="4"/>
        </table:table-row>
        <table:table-row table:style-name="ro1">
          <table:table-cell office:value-type="float" office:value="348.140319824219">
            <text:p>348.1403198242</text:p>
          </table:table-cell>
          <table:table-cell office:value-type="float" office:value="0.001932776">
            <text:p>0.001932776</text:p>
          </table:table-cell>
          <table:table-cell table:number-columns-repeated="4"/>
        </table:table-row>
        <table:table-row table:style-name="ro1">
          <table:table-cell office:value-type="float" office:value="348.24951171875">
            <text:p>348.2495117188</text:p>
          </table:table-cell>
          <table:table-cell office:value-type="float" office:value="0.01275481">
            <text:p>0.01275481</text:p>
          </table:table-cell>
          <table:table-cell table:number-columns-repeated="4"/>
        </table:table-row>
        <table:table-row table:style-name="ro1">
          <table:table-cell office:value-type="float" office:value="348.358703613281">
            <text:p>348.3587036133</text:p>
          </table:table-cell>
          <table:table-cell office:value-type="float" office:value="-0.008010908">
            <text:p>-0.008010908</text:p>
          </table:table-cell>
          <table:table-cell table:number-columns-repeated="4"/>
        </table:table-row>
        <table:table-row table:style-name="ro1">
          <table:table-cell office:value-type="float" office:value="348.467926025391">
            <text:p>348.4679260254</text:p>
          </table:table-cell>
          <table:table-cell office:value-type="float" office:value="-0.0004561633">
            <text:p>-0.0004561633</text:p>
          </table:table-cell>
          <table:table-cell table:number-columns-repeated="4"/>
        </table:table-row>
        <table:table-row table:style-name="ro1">
          <table:table-cell office:value-type="float" office:value="348.577117919922">
            <text:p>348.5771179199</text:p>
          </table:table-cell>
          <table:table-cell office:value-type="float" office:value="-0.001507252">
            <text:p>-0.001507252</text:p>
          </table:table-cell>
          <table:table-cell table:number-columns-repeated="4"/>
        </table:table-row>
        <table:table-row table:style-name="ro1">
          <table:table-cell office:value-type="float" office:value="348.686340332031">
            <text:p>348.686340332</text:p>
          </table:table-cell>
          <table:table-cell office:value-type="float" office:value="0.0199255">
            <text:p>0.0199255</text:p>
          </table:table-cell>
          <table:table-cell table:number-columns-repeated="4"/>
        </table:table-row>
        <table:table-row table:style-name="ro1">
          <table:table-cell office:value-type="float" office:value="348.795562744141">
            <text:p>348.7955627441</text:p>
          </table:table-cell>
          <table:table-cell office:value-type="float" office:value="0.0001396089">
            <text:p>0.0001396089</text:p>
          </table:table-cell>
          <table:table-cell table:number-columns-repeated="4"/>
        </table:table-row>
        <table:table-row table:style-name="ro1">
          <table:table-cell office:value-type="float" office:value="348.90478515625">
            <text:p>348.9047851563</text:p>
          </table:table-cell>
          <table:table-cell office:value-type="float" office:value="0.005034908">
            <text:p>0.005034908</text:p>
          </table:table-cell>
          <table:table-cell table:number-columns-repeated="4"/>
        </table:table-row>
        <table:table-row table:style-name="ro1">
          <table:table-cell office:value-type="float" office:value="349.014038085938">
            <text:p>349.0140380859</text:p>
          </table:table-cell>
          <table:table-cell office:value-type="float" office:value="0.00157937">
            <text:p>0.00157937</text:p>
          </table:table-cell>
          <table:table-cell table:number-columns-repeated="4"/>
        </table:table-row>
        <table:table-row table:style-name="ro1">
          <table:table-cell office:value-type="float" office:value="349.123260498047">
            <text:p>349.123260498</text:p>
          </table:table-cell>
          <table:table-cell office:value-type="float" office:value="0.01073753">
            <text:p>0.01073753</text:p>
          </table:table-cell>
          <table:table-cell table:number-columns-repeated="4"/>
        </table:table-row>
        <table:table-row table:style-name="ro1">
          <table:table-cell office:value-type="float" office:value="349.232513427734">
            <text:p>349.2325134277</text:p>
          </table:table-cell>
          <table:table-cell office:value-type="float" office:value="-0.008293407">
            <text:p>-0.008293407</text:p>
          </table:table-cell>
          <table:table-cell table:number-columns-repeated="4"/>
        </table:table-row>
        <table:table-row table:style-name="ro1">
          <table:table-cell office:value-type="float" office:value="349.341766357422">
            <text:p>349.3417663574</text:p>
          </table:table-cell>
          <table:table-cell office:value-type="float" office:value="-0.00947667">
            <text:p>-0.00947667</text:p>
          </table:table-cell>
          <table:table-cell table:number-columns-repeated="4"/>
        </table:table-row>
        <table:table-row table:style-name="ro1">
          <table:table-cell office:value-type="float" office:value="349.451019287109">
            <text:p>349.4510192871</text:p>
          </table:table-cell>
          <table:table-cell office:value-type="float" office:value="0.009164323">
            <text:p>0.009164323</text:p>
          </table:table-cell>
          <table:table-cell table:number-columns-repeated="4"/>
        </table:table-row>
        <table:table-row table:style-name="ro1">
          <table:table-cell office:value-type="float" office:value="349.560302734375">
            <text:p>349.5603027344</text:p>
          </table:table-cell>
          <table:table-cell office:value-type="float" office:value="0.003872725">
            <text:p>0.003872725</text:p>
          </table:table-cell>
          <table:table-cell table:number-columns-repeated="4"/>
        </table:table-row>
        <table:table-row table:style-name="ro1">
          <table:table-cell office:value-type="float" office:value="349.669586181641">
            <text:p>349.6695861816</text:p>
          </table:table-cell>
          <table:table-cell office:value-type="float" office:value="-0.00684892">
            <text:p>-0.00684892</text:p>
          </table:table-cell>
          <table:table-cell table:number-columns-repeated="4"/>
        </table:table-row>
        <table:table-row table:style-name="ro1">
          <table:table-cell office:value-type="float" office:value="349.778839111328">
            <text:p>349.7788391113</text:p>
          </table:table-cell>
          <table:table-cell office:value-type="float" office:value="-0.004017809">
            <text:p>-0.004017809</text:p>
          </table:table-cell>
          <table:table-cell table:number-columns-repeated="4"/>
        </table:table-row>
        <table:table-row table:style-name="ro1">
          <table:table-cell office:value-type="float" office:value="349.888153076172">
            <text:p>349.8881530762</text:p>
          </table:table-cell>
          <table:table-cell office:value-type="float" office:value="0.01421935">
            <text:p>0.01421935</text:p>
          </table:table-cell>
          <table:table-cell table:number-columns-repeated="4"/>
        </table:table-row>
        <table:table-row table:style-name="ro1">
          <table:table-cell office:value-type="float" office:value="349.997436523438">
            <text:p>349.9974365234</text:p>
          </table:table-cell>
          <table:table-cell office:value-type="float" office:value="0.01055092">
            <text:p>0.01055092</text:p>
          </table:table-cell>
          <table:table-cell table:number-columns-repeated="4"/>
        </table:table-row>
        <table:table-row table:style-name="ro1">
          <table:table-cell office:value-type="float" office:value="350.106719970703">
            <text:p>350.1067199707</text:p>
          </table:table-cell>
          <table:table-cell office:value-type="float" office:value="0.00944795">
            <text:p>0.00944795</text:p>
          </table:table-cell>
          <table:table-cell table:number-columns-repeated="4"/>
        </table:table-row>
        <table:table-row table:style-name="ro1">
          <table:table-cell office:value-type="float" office:value="350.216033935547">
            <text:p>350.2160339355</text:p>
          </table:table-cell>
          <table:table-cell office:value-type="float" office:value="-0.007081197">
            <text:p>-0.007081197</text:p>
          </table:table-cell>
          <table:table-cell table:number-columns-repeated="4"/>
        </table:table-row>
        <table:table-row table:style-name="ro1">
          <table:table-cell office:value-type="float" office:value="350.325347900391">
            <text:p>350.3253479004</text:p>
          </table:table-cell>
          <table:table-cell office:value-type="float" office:value="-0.0009661023">
            <text:p>-0.0009661023</text:p>
          </table:table-cell>
          <table:table-cell table:number-columns-repeated="4"/>
        </table:table-row>
        <table:table-row table:style-name="ro1">
          <table:table-cell office:value-type="float" office:value="350.434661865234">
            <text:p>350.4346618652</text:p>
          </table:table-cell>
          <table:table-cell office:value-type="float" office:value="0.005747964">
            <text:p>0.005747964</text:p>
          </table:table-cell>
          <table:table-cell table:number-columns-repeated="4"/>
        </table:table-row>
        <table:table-row table:style-name="ro1">
          <table:table-cell office:value-type="float" office:value="350.544006347656">
            <text:p>350.5440063477</text:p>
          </table:table-cell>
          <table:table-cell office:value-type="float" office:value="0.003055668">
            <text:p>0.003055668</text:p>
          </table:table-cell>
          <table:table-cell table:number-columns-repeated="4"/>
        </table:table-row>
        <table:table-row table:style-name="ro1">
          <table:table-cell office:value-type="float" office:value="350.6533203125">
            <text:p>350.6533203125</text:p>
          </table:table-cell>
          <table:table-cell office:value-type="float" office:value="0.005094968">
            <text:p>0.005094968</text:p>
          </table:table-cell>
          <table:table-cell table:number-columns-repeated="4"/>
        </table:table-row>
        <table:table-row table:style-name="ro1">
          <table:table-cell office:value-type="float" office:value="350.762664794922">
            <text:p>350.7626647949</text:p>
          </table:table-cell>
          <table:table-cell office:value-type="float" office:value="0.004542768">
            <text:p>0.004542768</text:p>
          </table:table-cell>
          <table:table-cell table:number-columns-repeated="4"/>
        </table:table-row>
        <table:table-row table:style-name="ro1">
          <table:table-cell office:value-type="float" office:value="350.872009277344">
            <text:p>350.8720092773</text:p>
          </table:table-cell>
          <table:table-cell office:value-type="float" office:value="0.01328672">
            <text:p>0.01328672</text:p>
          </table:table-cell>
          <table:table-cell table:number-columns-repeated="4"/>
        </table:table-row>
        <table:table-row table:style-name="ro1">
          <table:table-cell office:value-type="float" office:value="350.981353759766">
            <text:p>350.9813537598</text:p>
          </table:table-cell>
          <table:table-cell office:value-type="float" office:value="-0.01018512">
            <text:p>-0.01018512</text:p>
          </table:table-cell>
          <table:table-cell table:number-columns-repeated="4"/>
        </table:table-row>
        <table:table-row table:style-name="ro1">
          <table:table-cell office:value-type="float" office:value="351.090728759766">
            <text:p>351.0907287598</text:p>
          </table:table-cell>
          <table:table-cell office:value-type="float" office:value="0.003682714">
            <text:p>0.003682714</text:p>
          </table:table-cell>
          <table:table-cell table:number-columns-repeated="4"/>
        </table:table-row>
        <table:table-row table:style-name="ro1">
          <table:table-cell office:value-type="float" office:value="351.200073242188">
            <text:p>351.2000732422</text:p>
          </table:table-cell>
          <table:table-cell office:value-type="float" office:value="0.002374007">
            <text:p>0.002374007</text:p>
          </table:table-cell>
          <table:table-cell table:number-columns-repeated="4"/>
        </table:table-row>
        <table:table-row table:style-name="ro1">
          <table:table-cell office:value-type="float" office:value="351.309448242188">
            <text:p>351.3094482422</text:p>
          </table:table-cell>
          <table:table-cell office:value-type="float" office:value="0.01130918">
            <text:p>0.01130918</text:p>
          </table:table-cell>
          <table:table-cell table:number-columns-repeated="4"/>
        </table:table-row>
        <table:table-row table:style-name="ro1">
          <table:table-cell office:value-type="float" office:value="351.418823242188">
            <text:p>351.4188232422</text:p>
          </table:table-cell>
          <table:table-cell office:value-type="float" office:value="0.008975402">
            <text:p>0.008975402</text:p>
          </table:table-cell>
          <table:table-cell table:number-columns-repeated="4"/>
        </table:table-row>
        <table:table-row table:style-name="ro1">
          <table:table-cell office:value-type="float" office:value="351.528228759766">
            <text:p>351.5282287598</text:p>
          </table:table-cell>
          <table:table-cell office:value-type="float" office:value="-0.008373418">
            <text:p>-0.008373418</text:p>
          </table:table-cell>
          <table:table-cell table:number-columns-repeated="4"/>
        </table:table-row>
        <table:table-row table:style-name="ro1">
          <table:table-cell office:value-type="float" office:value="351.637603759766">
            <text:p>351.6376037598</text:p>
          </table:table-cell>
          <table:table-cell office:value-type="float" office:value="0.01028907">
            <text:p>0.01028907</text:p>
          </table:table-cell>
          <table:table-cell table:number-columns-repeated="4"/>
        </table:table-row>
        <table:table-row table:style-name="ro1">
          <table:table-cell office:value-type="float" office:value="351.747009277344">
            <text:p>351.7470092773</text:p>
          </table:table-cell>
          <table:table-cell office:value-type="float" office:value="0.002110752">
            <text:p>0.002110752</text:p>
          </table:table-cell>
          <table:table-cell table:number-columns-repeated="4"/>
        </table:table-row>
        <table:table-row table:style-name="ro1">
          <table:table-cell office:value-type="float" office:value="351.856414794922">
            <text:p>351.8564147949</text:p>
          </table:table-cell>
          <table:table-cell office:value-type="float" office:value="-0.007761524">
            <text:p>-0.007761524</text:p>
          </table:table-cell>
          <table:table-cell table:number-columns-repeated="4"/>
        </table:table-row>
        <table:table-row table:style-name="ro1">
          <table:table-cell office:value-type="float" office:value="351.9658203125">
            <text:p>351.9658203125</text:p>
          </table:table-cell>
          <table:table-cell office:value-type="float" office:value="0.001946572">
            <text:p>0.001946572</text:p>
          </table:table-cell>
          <table:table-cell table:number-columns-repeated="4"/>
        </table:table-row>
        <table:table-row table:style-name="ro1">
          <table:table-cell office:value-type="float" office:value="352.075225830078">
            <text:p>352.0752258301</text:p>
          </table:table-cell>
          <table:table-cell office:value-type="float" office:value="0.0002459385">
            <text:p>0.0002459385</text:p>
          </table:table-cell>
          <table:table-cell table:number-columns-repeated="4"/>
        </table:table-row>
        <table:table-row table:style-name="ro1">
          <table:table-cell office:value-type="float" office:value="352.184661865234">
            <text:p>352.1846618652</text:p>
          </table:table-cell>
          <table:table-cell office:value-type="float" office:value="0.003526335">
            <text:p>0.003526335</text:p>
          </table:table-cell>
          <table:table-cell table:number-columns-repeated="4"/>
        </table:table-row>
        <table:table-row table:style-name="ro1">
          <table:table-cell office:value-type="float" office:value="352.294097900391">
            <text:p>352.2940979004</text:p>
          </table:table-cell>
          <table:table-cell office:value-type="float" office:value="0.005660586">
            <text:p>0.005660586</text:p>
          </table:table-cell>
          <table:table-cell table:number-columns-repeated="4"/>
        </table:table-row>
        <table:table-row table:style-name="ro1">
          <table:table-cell office:value-type="float" office:value="352.403533935547">
            <text:p>352.4035339355</text:p>
          </table:table-cell>
          <table:table-cell office:value-type="float" office:value="-0.002515419">
            <text:p>-0.002515419</text:p>
          </table:table-cell>
          <table:table-cell table:number-columns-repeated="4"/>
        </table:table-row>
        <table:table-row table:style-name="ro1">
          <table:table-cell office:value-type="float" office:value="352.512969970703">
            <text:p>352.5129699707</text:p>
          </table:table-cell>
          <table:table-cell office:value-type="float" office:value="0.002752216">
            <text:p>0.002752216</text:p>
          </table:table-cell>
          <table:table-cell table:number-columns-repeated="4"/>
        </table:table-row>
        <table:table-row table:style-name="ro1">
          <table:table-cell office:value-type="float" office:value="352.622406005859">
            <text:p>352.6224060059</text:p>
          </table:table-cell>
          <table:table-cell office:value-type="float" office:value="0.0166616">
            <text:p>0.0166616</text:p>
          </table:table-cell>
          <table:table-cell table:number-columns-repeated="4"/>
        </table:table-row>
        <table:table-row table:style-name="ro1">
          <table:table-cell office:value-type="float" office:value="352.731872558594">
            <text:p>352.7318725586</text:p>
          </table:table-cell>
          <table:table-cell office:value-type="float" office:value="-0.005082215">
            <text:p>-0.005082215</text:p>
          </table:table-cell>
          <table:table-cell table:number-columns-repeated="4"/>
        </table:table-row>
        <table:table-row table:style-name="ro1">
          <table:table-cell office:value-type="float" office:value="352.841339111328">
            <text:p>352.8413391113</text:p>
          </table:table-cell>
          <table:table-cell office:value-type="float" office:value="-0.006531085">
            <text:p>-0.006531085</text:p>
          </table:table-cell>
          <table:table-cell table:number-columns-repeated="4"/>
        </table:table-row>
        <table:table-row table:style-name="ro1">
          <table:table-cell office:value-type="float" office:value="352.950805664063">
            <text:p>352.9508056641</text:p>
          </table:table-cell>
          <table:table-cell office:value-type="float" office:value="0.01492016">
            <text:p>0.01492016</text:p>
          </table:table-cell>
          <table:table-cell table:number-columns-repeated="4"/>
        </table:table-row>
        <table:table-row table:style-name="ro1">
          <table:table-cell office:value-type="float" office:value="353.060272216797">
            <text:p>353.0602722168</text:p>
          </table:table-cell>
          <table:table-cell office:value-type="float" office:value="0.01127692">
            <text:p>0.01127692</text:p>
          </table:table-cell>
          <table:table-cell table:number-columns-repeated="4"/>
        </table:table-row>
        <table:table-row table:style-name="ro1">
          <table:table-cell office:value-type="float" office:value="353.169738769531">
            <text:p>353.1697387695</text:p>
          </table:table-cell>
          <table:table-cell office:value-type="float" office:value="-0.0006091557">
            <text:p>-0.0006091557</text:p>
          </table:table-cell>
          <table:table-cell table:number-columns-repeated="4"/>
        </table:table-row>
        <table:table-row table:style-name="ro1">
          <table:table-cell office:value-type="float" office:value="353.279235839844">
            <text:p>353.2792358398</text:p>
          </table:table-cell>
          <table:table-cell office:value-type="float" office:value="-0.002362323">
            <text:p>-0.002362323</text:p>
          </table:table-cell>
          <table:table-cell table:number-columns-repeated="4"/>
        </table:table-row>
        <table:table-row table:style-name="ro1">
          <table:table-cell office:value-type="float" office:value="353.388732910156">
            <text:p>353.3887329102</text:p>
          </table:table-cell>
          <table:table-cell office:value-type="float" office:value="0.005905028">
            <text:p>0.005905028</text:p>
          </table:table-cell>
          <table:table-cell table:number-columns-repeated="4"/>
        </table:table-row>
        <table:table-row table:style-name="ro1">
          <table:table-cell office:value-type="float" office:value="353.498229980469">
            <text:p>353.4982299805</text:p>
          </table:table-cell>
          <table:table-cell office:value-type="float" office:value="0.004757206">
            <text:p>0.004757206</text:p>
          </table:table-cell>
          <table:table-cell table:number-columns-repeated="4"/>
        </table:table-row>
        <table:table-row table:style-name="ro1">
          <table:table-cell office:value-type="float" office:value="353.607727050781">
            <text:p>353.6077270508</text:p>
          </table:table-cell>
          <table:table-cell office:value-type="float" office:value="0.008387554">
            <text:p>0.008387554</text:p>
          </table:table-cell>
          <table:table-cell table:number-columns-repeated="4"/>
        </table:table-row>
        <table:table-row table:style-name="ro1">
          <table:table-cell office:value-type="float" office:value="353.717254638672">
            <text:p>353.7172546387</text:p>
          </table:table-cell>
          <table:table-cell office:value-type="float" office:value="-0.001461426">
            <text:p>-0.001461426</text:p>
          </table:table-cell>
          <table:table-cell table:number-columns-repeated="4"/>
        </table:table-row>
        <table:table-row table:style-name="ro1">
          <table:table-cell office:value-type="float" office:value="353.826782226563">
            <text:p>353.8267822266</text:p>
          </table:table-cell>
          <table:table-cell office:value-type="float" office:value="-0.003676355">
            <text:p>-0.003676355</text:p>
          </table:table-cell>
          <table:table-cell table:number-columns-repeated="4"/>
        </table:table-row>
        <table:table-row table:style-name="ro1">
          <table:table-cell office:value-type="float" office:value="353.936309814453">
            <text:p>353.9363098145</text:p>
          </table:table-cell>
          <table:table-cell office:value-type="float" office:value="0.0149446">
            <text:p>0.0149446</text:p>
          </table:table-cell>
          <table:table-cell table:number-columns-repeated="4"/>
        </table:table-row>
        <table:table-row table:style-name="ro1">
          <table:table-cell office:value-type="float" office:value="354.045837402344">
            <text:p>354.0458374023</text:p>
          </table:table-cell>
          <table:table-cell office:value-type="float" office:value="-0.003848333">
            <text:p>-0.003848333</text:p>
          </table:table-cell>
          <table:table-cell table:number-columns-repeated="4"/>
        </table:table-row>
        <table:table-row table:style-name="ro1">
          <table:table-cell office:value-type="float" office:value="354.155364990234">
            <text:p>354.1553649902</text:p>
          </table:table-cell>
          <table:table-cell office:value-type="float" office:value="0.004716874">
            <text:p>0.004716874</text:p>
          </table:table-cell>
          <table:table-cell table:number-columns-repeated="4"/>
        </table:table-row>
        <table:table-row table:style-name="ro1">
          <table:table-cell office:value-type="float" office:value="354.264923095703">
            <text:p>354.2649230957</text:p>
          </table:table-cell>
          <table:table-cell office:value-type="float" office:value="0.002574306">
            <text:p>0.002574306</text:p>
          </table:table-cell>
          <table:table-cell table:number-columns-repeated="4"/>
        </table:table-row>
        <table:table-row table:style-name="ro1">
          <table:table-cell office:value-type="float" office:value="354.374481201172">
            <text:p>354.3744812012</text:p>
          </table:table-cell>
          <table:table-cell office:value-type="float" office:value="0.005975682">
            <text:p>0.005975682</text:p>
          </table:table-cell>
          <table:table-cell table:number-columns-repeated="4"/>
        </table:table-row>
        <table:table-row table:style-name="ro1">
          <table:table-cell office:value-type="float" office:value="354.484039306641">
            <text:p>354.4840393066</text:p>
          </table:table-cell>
          <table:table-cell office:value-type="float" office:value="0.003748706">
            <text:p>0.003748706</text:p>
          </table:table-cell>
          <table:table-cell table:number-columns-repeated="4"/>
        </table:table-row>
        <table:table-row table:style-name="ro1">
          <table:table-cell office:value-type="float" office:value="354.593597412109">
            <text:p>354.5935974121</text:p>
          </table:table-cell>
          <table:table-cell office:value-type="float" office:value="0.003727892">
            <text:p>0.003727892</text:p>
          </table:table-cell>
          <table:table-cell table:number-columns-repeated="4"/>
        </table:table-row>
        <table:table-row table:style-name="ro1">
          <table:table-cell office:value-type="float" office:value="354.703155517578">
            <text:p>354.7031555176</text:p>
          </table:table-cell>
          <table:table-cell office:value-type="float" office:value="0.001693255">
            <text:p>0.001693255</text:p>
          </table:table-cell>
          <table:table-cell table:number-columns-repeated="4"/>
        </table:table-row>
        <table:table-row table:style-name="ro1">
          <table:table-cell office:value-type="float" office:value="354.812744140625">
            <text:p>354.8127441406</text:p>
          </table:table-cell>
          <table:table-cell office:value-type="float" office:value="0.01075017">
            <text:p>0.01075017</text:p>
          </table:table-cell>
          <table:table-cell table:number-columns-repeated="4"/>
        </table:table-row>
        <table:table-row table:style-name="ro1">
          <table:table-cell office:value-type="float" office:value="354.922332763672">
            <text:p>354.9223327637</text:p>
          </table:table-cell>
          <table:table-cell office:value-type="float" office:value="0.001132658">
            <text:p>0.001132658</text:p>
          </table:table-cell>
          <table:table-cell table:number-columns-repeated="4"/>
        </table:table-row>
        <table:table-row table:style-name="ro1">
          <table:table-cell office:value-type="float" office:value="355.031921386719">
            <text:p>355.0319213867</text:p>
          </table:table-cell>
          <table:table-cell office:value-type="float" office:value="0.007258897">
            <text:p>0.007258897</text:p>
          </table:table-cell>
          <table:table-cell table:number-columns-repeated="4"/>
        </table:table-row>
        <table:table-row table:style-name="ro1">
          <table:table-cell office:value-type="float" office:value="355.141510009766">
            <text:p>355.1415100098</text:p>
          </table:table-cell>
          <table:table-cell office:value-type="float" office:value="-0.001670081">
            <text:p>-0.001670081</text:p>
          </table:table-cell>
          <table:table-cell table:number-columns-repeated="4"/>
        </table:table-row>
        <table:table-row table:style-name="ro1">
          <table:table-cell office:value-type="float" office:value="355.251129150391">
            <text:p>355.2511291504</text:p>
          </table:table-cell>
          <table:table-cell office:value-type="float" office:value="0.003886174">
            <text:p>0.003886174</text:p>
          </table:table-cell>
          <table:table-cell table:number-columns-repeated="4"/>
        </table:table-row>
        <table:table-row table:style-name="ro1">
          <table:table-cell office:value-type="float" office:value="355.360717773438">
            <text:p>355.3607177734</text:p>
          </table:table-cell>
          <table:table-cell office:value-type="float" office:value="0.003531013">
            <text:p>0.003531013</text:p>
          </table:table-cell>
          <table:table-cell table:number-columns-repeated="4"/>
        </table:table-row>
        <table:table-row table:style-name="ro1">
          <table:table-cell office:value-type="float" office:value="355.470336914063">
            <text:p>355.4703369141</text:p>
          </table:table-cell>
          <table:table-cell office:value-type="float" office:value="0.001468979">
            <text:p>0.001468979</text:p>
          </table:table-cell>
          <table:table-cell table:number-columns-repeated="4"/>
        </table:table-row>
        <table:table-row table:style-name="ro1">
          <table:table-cell office:value-type="float" office:value="355.579956054688">
            <text:p>355.5799560547</text:p>
          </table:table-cell>
          <table:table-cell office:value-type="float" office:value="0.008217505">
            <text:p>0.008217505</text:p>
          </table:table-cell>
          <table:table-cell table:number-columns-repeated="4"/>
        </table:table-row>
        <table:table-row table:style-name="ro1">
          <table:table-cell office:value-type="float" office:value="355.689605712891">
            <text:p>355.6896057129</text:p>
          </table:table-cell>
          <table:table-cell office:value-type="float" office:value="0.0131818">
            <text:p>0.0131818</text:p>
          </table:table-cell>
          <table:table-cell table:number-columns-repeated="4"/>
        </table:table-row>
        <table:table-row table:style-name="ro1">
          <table:table-cell office:value-type="float" office:value="355.799224853516">
            <text:p>355.7992248535</text:p>
          </table:table-cell>
          <table:table-cell office:value-type="float" office:value="0.01436488">
            <text:p>0.01436488</text:p>
          </table:table-cell>
          <table:table-cell table:number-columns-repeated="4"/>
        </table:table-row>
        <table:table-row table:style-name="ro1">
          <table:table-cell office:value-type="float" office:value="355.908874511719">
            <text:p>355.9088745117</text:p>
          </table:table-cell>
          <table:table-cell office:value-type="float" office:value="-0.006429988">
            <text:p>-0.006429988</text:p>
          </table:table-cell>
          <table:table-cell table:number-columns-repeated="4"/>
        </table:table-row>
        <table:table-row table:style-name="ro1">
          <table:table-cell office:value-type="float" office:value="356.018524169922">
            <text:p>356.0185241699</text:p>
          </table:table-cell>
          <table:table-cell office:value-type="float" office:value="0.01067379">
            <text:p>0.01067379</text:p>
          </table:table-cell>
          <table:table-cell table:number-columns-repeated="4"/>
        </table:table-row>
        <table:table-row table:style-name="ro1">
          <table:table-cell office:value-type="float" office:value="356.128173828125">
            <text:p>356.1281738281</text:p>
          </table:table-cell>
          <table:table-cell office:value-type="float" office:value="-0.001914587">
            <text:p>-0.001914587</text:p>
          </table:table-cell>
          <table:table-cell table:number-columns-repeated="4"/>
        </table:table-row>
        <table:table-row table:style-name="ro1">
          <table:table-cell office:value-type="float" office:value="356.237823486328">
            <text:p>356.2378234863</text:p>
          </table:table-cell>
          <table:table-cell office:value-type="float" office:value="-0.005379538">
            <text:p>-0.005379538</text:p>
          </table:table-cell>
          <table:table-cell table:number-columns-repeated="4"/>
        </table:table-row>
        <table:table-row table:style-name="ro1">
          <table:table-cell office:value-type="float" office:value="356.347503662109">
            <text:p>356.3475036621</text:p>
          </table:table-cell>
          <table:table-cell office:value-type="float" office:value="0.00441166">
            <text:p>0.00441166</text:p>
          </table:table-cell>
          <table:table-cell table:number-columns-repeated="4"/>
        </table:table-row>
        <table:table-row table:style-name="ro1">
          <table:table-cell office:value-type="float" office:value="356.457183837891">
            <text:p>356.4571838379</text:p>
          </table:table-cell>
          <table:table-cell office:value-type="float" office:value="0.003359868">
            <text:p>0.003359868</text:p>
          </table:table-cell>
          <table:table-cell table:number-columns-repeated="4"/>
        </table:table-row>
        <table:table-row table:style-name="ro1">
          <table:table-cell office:value-type="float" office:value="356.566864013672">
            <text:p>356.5668640137</text:p>
          </table:table-cell>
          <table:table-cell office:value-type="float" office:value="0.0007775459">
            <text:p>0.0007775459</text:p>
          </table:table-cell>
          <table:table-cell table:number-columns-repeated="4"/>
        </table:table-row>
        <table:table-row table:style-name="ro1">
          <table:table-cell office:value-type="float" office:value="356.676544189453">
            <text:p>356.6765441895</text:p>
          </table:table-cell>
          <table:table-cell office:value-type="float" office:value="-0.005815506">
            <text:p>-0.005815506</text:p>
          </table:table-cell>
          <table:table-cell table:number-columns-repeated="4"/>
        </table:table-row>
        <table:table-row table:style-name="ro1">
          <table:table-cell office:value-type="float" office:value="356.786224365234">
            <text:p>356.7862243652</text:p>
          </table:table-cell>
          <table:table-cell office:value-type="float" office:value="-0.00595167">
            <text:p>-0.00595167</text:p>
          </table:table-cell>
          <table:table-cell table:number-columns-repeated="4"/>
        </table:table-row>
        <table:table-row table:style-name="ro1">
          <table:table-cell office:value-type="float" office:value="356.895935058594">
            <text:p>356.8959350586</text:p>
          </table:table-cell>
          <table:table-cell office:value-type="float" office:value="-0.006057066">
            <text:p>-0.006057066</text:p>
          </table:table-cell>
          <table:table-cell table:number-columns-repeated="4"/>
        </table:table-row>
        <table:table-row table:style-name="ro1">
          <table:table-cell office:value-type="float" office:value="357.005645751953">
            <text:p>357.005645752</text:p>
          </table:table-cell>
          <table:table-cell office:value-type="float" office:value="-0.00824776">
            <text:p>-0.00824776</text:p>
          </table:table-cell>
          <table:table-cell table:number-columns-repeated="4"/>
        </table:table-row>
        <table:table-row table:style-name="ro1">
          <table:table-cell office:value-type="float" office:value="357.115356445313">
            <text:p>357.1153564453</text:p>
          </table:table-cell>
          <table:table-cell office:value-type="string">
            <text:p>-7.397598E-05</text:p>
          </table:table-cell>
          <table:table-cell table:number-columns-repeated="4"/>
        </table:table-row>
        <table:table-row table:style-name="ro1">
          <table:table-cell office:value-type="float" office:value="357.225067138672">
            <text:p>357.2250671387</text:p>
          </table:table-cell>
          <table:table-cell office:value-type="float" office:value="0.005028727">
            <text:p>0.005028727</text:p>
          </table:table-cell>
          <table:table-cell table:number-columns-repeated="4"/>
        </table:table-row>
        <table:table-row table:style-name="ro1">
          <table:table-cell office:value-type="float" office:value="357.334777832031">
            <text:p>357.334777832</text:p>
          </table:table-cell>
          <table:table-cell office:value-type="float" office:value="0.003626795">
            <text:p>0.003626795</text:p>
          </table:table-cell>
          <table:table-cell table:number-columns-repeated="4"/>
        </table:table-row>
        <table:table-row table:style-name="ro1">
          <table:table-cell office:value-type="float" office:value="357.444519042969">
            <text:p>357.444519043</text:p>
          </table:table-cell>
          <table:table-cell office:value-type="float" office:value="0.008610913">
            <text:p>0.008610913</text:p>
          </table:table-cell>
          <table:table-cell table:number-columns-repeated="4"/>
        </table:table-row>
        <table:table-row table:style-name="ro1">
          <table:table-cell office:value-type="float" office:value="357.554260253906">
            <text:p>357.5542602539</text:p>
          </table:table-cell>
          <table:table-cell office:value-type="float" office:value="-0.003377572">
            <text:p>-0.003377572</text:p>
          </table:table-cell>
          <table:table-cell table:number-columns-repeated="4"/>
        </table:table-row>
        <table:table-row table:style-name="ro1">
          <table:table-cell office:value-type="float" office:value="357.664001464844">
            <text:p>357.6640014648</text:p>
          </table:table-cell>
          <table:table-cell office:value-type="float" office:value="0.0001006705">
            <text:p>0.0001006705</text:p>
          </table:table-cell>
          <table:table-cell table:number-columns-repeated="4"/>
        </table:table-row>
        <table:table-row table:style-name="ro1">
          <table:table-cell office:value-type="float" office:value="357.773742675781">
            <text:p>357.7737426758</text:p>
          </table:table-cell>
          <table:table-cell office:value-type="float" office:value="0.01547694">
            <text:p>0.01547694</text:p>
          </table:table-cell>
          <table:table-cell table:number-columns-repeated="4"/>
        </table:table-row>
        <table:table-row table:style-name="ro1">
          <table:table-cell office:value-type="float" office:value="357.883514404297">
            <text:p>357.8835144043</text:p>
          </table:table-cell>
          <table:table-cell office:value-type="float" office:value="0.00191394">
            <text:p>0.00191394</text:p>
          </table:table-cell>
          <table:table-cell table:number-columns-repeated="4"/>
        </table:table-row>
        <table:table-row table:style-name="ro1">
          <table:table-cell office:value-type="float" office:value="357.993286132813">
            <text:p>357.9932861328</text:p>
          </table:table-cell>
          <table:table-cell office:value-type="float" office:value="-0.0004092612">
            <text:p>-0.0004092612</text:p>
          </table:table-cell>
          <table:table-cell table:number-columns-repeated="4"/>
        </table:table-row>
        <table:table-row table:style-name="ro1">
          <table:table-cell office:value-type="float" office:value="358.10302734375">
            <text:p>358.1030273438</text:p>
          </table:table-cell>
          <table:table-cell office:value-type="float" office:value="0.01045102">
            <text:p>0.01045102</text:p>
          </table:table-cell>
          <table:table-cell table:number-columns-repeated="4"/>
        </table:table-row>
        <table:table-row table:style-name="ro1">
          <table:table-cell office:value-type="float" office:value="358.212829589844">
            <text:p>358.2128295898</text:p>
          </table:table-cell>
          <table:table-cell office:value-type="float" office:value="0.010793">
            <text:p>0.010793</text:p>
          </table:table-cell>
          <table:table-cell table:number-columns-repeated="4"/>
        </table:table-row>
        <table:table-row table:style-name="ro1">
          <table:table-cell office:value-type="float" office:value="358.322601318359">
            <text:p>358.3226013184</text:p>
          </table:table-cell>
          <table:table-cell office:value-type="float" office:value="0.00195138">
            <text:p>0.00195138</text:p>
          </table:table-cell>
          <table:table-cell table:number-columns-repeated="4"/>
        </table:table-row>
        <table:table-row table:style-name="ro1">
          <table:table-cell office:value-type="float" office:value="358.432373046875">
            <text:p>358.4323730469</text:p>
          </table:table-cell>
          <table:table-cell office:value-type="float" office:value="0.007413924">
            <text:p>0.007413924</text:p>
          </table:table-cell>
          <table:table-cell table:number-columns-repeated="4"/>
        </table:table-row>
        <table:table-row table:style-name="ro1">
          <table:table-cell office:value-type="float" office:value="358.542175292969">
            <text:p>358.542175293</text:p>
          </table:table-cell>
          <table:table-cell office:value-type="float" office:value="-0.00524208">
            <text:p>-0.00524208</text:p>
          </table:table-cell>
          <table:table-cell table:number-columns-repeated="4"/>
        </table:table-row>
        <table:table-row table:style-name="ro1">
          <table:table-cell office:value-type="float" office:value="358.651977539063">
            <text:p>358.6519775391</text:p>
          </table:table-cell>
          <table:table-cell office:value-type="float" office:value="0.001692767">
            <text:p>0.001692767</text:p>
          </table:table-cell>
          <table:table-cell table:number-columns-repeated="4"/>
        </table:table-row>
        <table:table-row table:style-name="ro1">
          <table:table-cell office:value-type="float" office:value="358.761779785156">
            <text:p>358.7617797852</text:p>
          </table:table-cell>
          <table:table-cell office:value-type="float" office:value="0.01008613">
            <text:p>0.01008613</text:p>
          </table:table-cell>
          <table:table-cell table:number-columns-repeated="4"/>
        </table:table-row>
        <table:table-row table:style-name="ro1">
          <table:table-cell office:value-type="float" office:value="358.871612548828">
            <text:p>358.8716125488</text:p>
          </table:table-cell>
          <table:table-cell office:value-type="float" office:value="-0.005646914">
            <text:p>-0.005646914</text:p>
          </table:table-cell>
          <table:table-cell table:number-columns-repeated="4"/>
        </table:table-row>
        <table:table-row table:style-name="ro1">
          <table:table-cell office:value-type="float" office:value="358.981414794922">
            <text:p>358.9814147949</text:p>
          </table:table-cell>
          <table:table-cell office:value-type="float" office:value="0.00225921">
            <text:p>0.00225921</text:p>
          </table:table-cell>
          <table:table-cell table:number-columns-repeated="4"/>
        </table:table-row>
        <table:table-row table:style-name="ro1">
          <table:table-cell office:value-type="float" office:value="359.091247558594">
            <text:p>359.0912475586</text:p>
          </table:table-cell>
          <table:table-cell office:value-type="float" office:value="0.0141791">
            <text:p>0.0141791</text:p>
          </table:table-cell>
          <table:table-cell table:number-columns-repeated="4"/>
        </table:table-row>
        <table:table-row table:style-name="ro1">
          <table:table-cell office:value-type="float" office:value="359.201080322266">
            <text:p>359.2010803223</text:p>
          </table:table-cell>
          <table:table-cell office:value-type="float" office:value="0.004862783">
            <text:p>0.004862783</text:p>
          </table:table-cell>
          <table:table-cell table:number-columns-repeated="4"/>
        </table:table-row>
        <table:table-row table:style-name="ro1">
          <table:table-cell office:value-type="float" office:value="359.310913085938">
            <text:p>359.3109130859</text:p>
          </table:table-cell>
          <table:table-cell office:value-type="float" office:value="0.001739042">
            <text:p>0.001739042</text:p>
          </table:table-cell>
          <table:table-cell table:number-columns-repeated="4"/>
        </table:table-row>
        <table:table-row table:style-name="ro1">
          <table:table-cell office:value-type="float" office:value="359.420776367188">
            <text:p>359.4207763672</text:p>
          </table:table-cell>
          <table:table-cell office:value-type="float" office:value="-0.008885347">
            <text:p>-0.008885347</text:p>
          </table:table-cell>
          <table:table-cell table:number-columns-repeated="4"/>
        </table:table-row>
        <table:table-row table:style-name="ro1">
          <table:table-cell office:value-type="float" office:value="359.530609130859">
            <text:p>359.5306091309</text:p>
          </table:table-cell>
          <table:table-cell office:value-type="float" office:value="0.01137665">
            <text:p>0.01137665</text:p>
          </table:table-cell>
          <table:table-cell table:number-columns-repeated="4"/>
        </table:table-row>
        <table:table-row table:style-name="ro1">
          <table:table-cell office:value-type="float" office:value="359.640472412109">
            <text:p>359.6404724121</text:p>
          </table:table-cell>
          <table:table-cell office:value-type="float" office:value="-0.0001335075">
            <text:p>-0.0001335075</text:p>
          </table:table-cell>
          <table:table-cell table:number-columns-repeated="4"/>
        </table:table-row>
        <table:table-row table:style-name="ro1">
          <table:table-cell office:value-type="float" office:value="359.750335693359">
            <text:p>359.7503356934</text:p>
          </table:table-cell>
          <table:table-cell office:value-type="float" office:value="-0.002278226">
            <text:p>-0.002278226</text:p>
          </table:table-cell>
          <table:table-cell table:number-columns-repeated="4"/>
        </table:table-row>
        <table:table-row table:style-name="ro1">
          <table:table-cell office:value-type="float" office:value="359.860198974609">
            <text:p>359.8601989746</text:p>
          </table:table-cell>
          <table:table-cell office:value-type="float" office:value="0.001133477">
            <text:p>0.001133477</text:p>
          </table:table-cell>
          <table:table-cell table:number-columns-repeated="4"/>
        </table:table-row>
        <table:table-row table:style-name="ro1">
          <table:table-cell office:value-type="float" office:value="359.970092773438">
            <text:p>359.9700927734</text:p>
          </table:table-cell>
          <table:table-cell office:value-type="float" office:value="0.007249283">
            <text:p>0.007249283</text:p>
          </table:table-cell>
          <table:table-cell table:number-columns-repeated="4"/>
        </table:table-row>
        <table:table-row table:style-name="ro1">
          <table:table-cell office:value-type="float" office:value="360.079986572266">
            <text:p>360.0799865723</text:p>
          </table:table-cell>
          <table:table-cell office:value-type="float" office:value="-0.005007308">
            <text:p>-0.005007308</text:p>
          </table:table-cell>
          <table:table-cell table:number-columns-repeated="4"/>
        </table:table-row>
        <table:table-row table:style-name="ro1">
          <table:table-cell office:value-type="float" office:value="360.189849853516">
            <text:p>360.1898498535</text:p>
          </table:table-cell>
          <table:table-cell office:value-type="float" office:value="0.01262464">
            <text:p>0.01262464</text:p>
          </table:table-cell>
          <table:table-cell table:number-columns-repeated="4"/>
        </table:table-row>
        <table:table-row table:style-name="ro1">
          <table:table-cell office:value-type="float" office:value="360.299743652344">
            <text:p>360.2997436523</text:p>
          </table:table-cell>
          <table:table-cell office:value-type="float" office:value="0.0107405">
            <text:p>0.0107405</text:p>
          </table:table-cell>
          <table:table-cell table:number-columns-repeated="4"/>
        </table:table-row>
        <table:table-row table:style-name="ro1">
          <table:table-cell office:value-type="float" office:value="360.40966796875">
            <text:p>360.4096679688</text:p>
          </table:table-cell>
          <table:table-cell office:value-type="float" office:value="0.009785679">
            <text:p>0.009785679</text:p>
          </table:table-cell>
          <table:table-cell table:number-columns-repeated="4"/>
        </table:table-row>
        <table:table-row table:style-name="ro1">
          <table:table-cell office:value-type="float" office:value="360.519561767578">
            <text:p>360.5195617676</text:p>
          </table:table-cell>
          <table:table-cell office:value-type="float" office:value="0.003415834">
            <text:p>0.003415834</text:p>
          </table:table-cell>
          <table:table-cell table:number-columns-repeated="4"/>
        </table:table-row>
        <table:table-row table:style-name="ro1">
          <table:table-cell office:value-type="float" office:value="360.629486083984">
            <text:p>360.629486084</text:p>
          </table:table-cell>
          <table:table-cell office:value-type="float" office:value="0.003111318">
            <text:p>0.003111318</text:p>
          </table:table-cell>
          <table:table-cell table:number-columns-repeated="4"/>
        </table:table-row>
        <table:table-row table:style-name="ro1">
          <table:table-cell office:value-type="float" office:value="360.739410400391">
            <text:p>360.7394104004</text:p>
          </table:table-cell>
          <table:table-cell office:value-type="float" office:value="-0.003701995">
            <text:p>-0.003701995</text:p>
          </table:table-cell>
          <table:table-cell table:number-columns-repeated="4"/>
        </table:table-row>
        <table:table-row table:style-name="ro1">
          <table:table-cell office:value-type="float" office:value="360.849334716797">
            <text:p>360.8493347168</text:p>
          </table:table-cell>
          <table:table-cell office:value-type="float" office:value="0.005854544">
            <text:p>0.005854544</text:p>
          </table:table-cell>
          <table:table-cell table:number-columns-repeated="4"/>
        </table:table-row>
        <table:table-row table:style-name="ro1">
          <table:table-cell office:value-type="float" office:value="360.959259033203">
            <text:p>360.9592590332</text:p>
          </table:table-cell>
          <table:table-cell office:value-type="float" office:value="-0.007717555">
            <text:p>-0.007717555</text:p>
          </table:table-cell>
          <table:table-cell table:number-columns-repeated="4"/>
        </table:table-row>
        <table:table-row table:style-name="ro1">
          <table:table-cell office:value-type="float" office:value="361.069213867188">
            <text:p>361.0692138672</text:p>
          </table:table-cell>
          <table:table-cell office:value-type="float" office:value="-0.0007150375">
            <text:p>-0.0007150375</text:p>
          </table:table-cell>
          <table:table-cell table:number-columns-repeated="4"/>
        </table:table-row>
        <table:table-row table:style-name="ro1">
          <table:table-cell office:value-type="float" office:value="361.179168701172">
            <text:p>361.1791687012</text:p>
          </table:table-cell>
          <table:table-cell office:value-type="float" office:value="-0.0001336818">
            <text:p>-0.0001336818</text:p>
          </table:table-cell>
          <table:table-cell table:number-columns-repeated="4"/>
        </table:table-row>
        <table:table-row table:style-name="ro1">
          <table:table-cell office:value-type="float" office:value="361.289093017578">
            <text:p>361.2890930176</text:p>
          </table:table-cell>
          <table:table-cell office:value-type="float" office:value="0.001448922">
            <text:p>0.001448922</text:p>
          </table:table-cell>
          <table:table-cell table:number-columns-repeated="4"/>
        </table:table-row>
        <table:table-row table:style-name="ro1">
          <table:table-cell office:value-type="float" office:value="361.399078369141">
            <text:p>361.3990783691</text:p>
          </table:table-cell>
          <table:table-cell office:value-type="float" office:value="0.003138722">
            <text:p>0.003138722</text:p>
          </table:table-cell>
          <table:table-cell table:number-columns-repeated="4"/>
        </table:table-row>
        <table:table-row table:style-name="ro1">
          <table:table-cell office:value-type="float" office:value="361.509033203125">
            <text:p>361.5090332031</text:p>
          </table:table-cell>
          <table:table-cell office:value-type="float" office:value="-0.006327847">
            <text:p>-0.006327847</text:p>
          </table:table-cell>
          <table:table-cell table:number-columns-repeated="4"/>
        </table:table-row>
        <table:table-row table:style-name="ro1">
          <table:table-cell office:value-type="float" office:value="361.619018554688">
            <text:p>361.6190185547</text:p>
          </table:table-cell>
          <table:table-cell office:value-type="float" office:value="-0.004577815">
            <text:p>-0.004577815</text:p>
          </table:table-cell>
          <table:table-cell table:number-columns-repeated="4"/>
        </table:table-row>
        <table:table-row table:style-name="ro1">
          <table:table-cell office:value-type="float" office:value="361.728973388672">
            <text:p>361.7289733887</text:p>
          </table:table-cell>
          <table:table-cell office:value-type="float" office:value="0.00832888">
            <text:p>0.00832888</text:p>
          </table:table-cell>
          <table:table-cell table:number-columns-repeated="4"/>
        </table:table-row>
        <table:table-row table:style-name="ro1">
          <table:table-cell office:value-type="float" office:value="361.838958740234">
            <text:p>361.8389587402</text:p>
          </table:table-cell>
          <table:table-cell office:value-type="float" office:value="0.003203273">
            <text:p>0.003203273</text:p>
          </table:table-cell>
          <table:table-cell table:number-columns-repeated="4"/>
        </table:table-row>
        <table:table-row table:style-name="ro1">
          <table:table-cell office:value-type="float" office:value="361.948944091797">
            <text:p>361.9489440918</text:p>
          </table:table-cell>
          <table:table-cell office:value-type="float" office:value="0.0006169681">
            <text:p>0.0006169681</text:p>
          </table:table-cell>
          <table:table-cell table:number-columns-repeated="4"/>
        </table:table-row>
        <table:table-row table:style-name="ro1">
          <table:table-cell office:value-type="float" office:value="362.058959960938">
            <text:p>362.0589599609</text:p>
          </table:table-cell>
          <table:table-cell office:value-type="float" office:value="-0.0002669657">
            <text:p>-0.0002669657</text:p>
          </table:table-cell>
          <table:table-cell table:number-columns-repeated="4"/>
        </table:table-row>
        <table:table-row table:style-name="ro1">
          <table:table-cell office:value-type="float" office:value="362.1689453125">
            <text:p>362.1689453125</text:p>
          </table:table-cell>
          <table:table-cell office:value-type="float" office:value="0.004627885">
            <text:p>0.004627885</text:p>
          </table:table-cell>
          <table:table-cell table:number-columns-repeated="4"/>
        </table:table-row>
        <table:table-row table:style-name="ro1">
          <table:table-cell office:value-type="float" office:value="362.278961181641">
            <text:p>362.2789611816</text:p>
          </table:table-cell>
          <table:table-cell office:value-type="float" office:value="0.01684645">
            <text:p>0.01684645</text:p>
          </table:table-cell>
          <table:table-cell table:number-columns-repeated="4"/>
        </table:table-row>
        <table:table-row table:style-name="ro1">
          <table:table-cell office:value-type="float" office:value="362.388977050781">
            <text:p>362.3889770508</text:p>
          </table:table-cell>
          <table:table-cell office:value-type="float" office:value="0.01035036">
            <text:p>0.01035036</text:p>
          </table:table-cell>
          <table:table-cell table:number-columns-repeated="4"/>
        </table:table-row>
        <table:table-row table:style-name="ro1">
          <table:table-cell office:value-type="float" office:value="362.498992919922">
            <text:p>362.4989929199</text:p>
          </table:table-cell>
          <table:table-cell office:value-type="float" office:value="-0.0008122845">
            <text:p>-0.0008122845</text:p>
          </table:table-cell>
          <table:table-cell table:number-columns-repeated="4"/>
        </table:table-row>
        <table:table-row table:style-name="ro1">
          <table:table-cell office:value-type="float" office:value="362.609039306641">
            <text:p>362.6090393066</text:p>
          </table:table-cell>
          <table:table-cell office:value-type="float" office:value="-0.001335138">
            <text:p>-0.001335138</text:p>
          </table:table-cell>
          <table:table-cell table:number-columns-repeated="4"/>
        </table:table-row>
        <table:table-row table:style-name="ro1">
          <table:table-cell office:value-type="float" office:value="362.719055175781">
            <text:p>362.7190551758</text:p>
          </table:table-cell>
          <table:table-cell office:value-type="float" office:value="0.007873639">
            <text:p>0.007873639</text:p>
          </table:table-cell>
          <table:table-cell table:number-columns-repeated="4"/>
        </table:table-row>
        <table:table-row table:style-name="ro1">
          <table:table-cell office:value-type="float" office:value="362.8291015625">
            <text:p>362.8291015625</text:p>
          </table:table-cell>
          <table:table-cell office:value-type="float" office:value="0.01216897">
            <text:p>0.01216897</text:p>
          </table:table-cell>
          <table:table-cell table:number-columns-repeated="4"/>
        </table:table-row>
        <table:table-row table:style-name="ro1">
          <table:table-cell office:value-type="float" office:value="362.939147949219">
            <text:p>362.9391479492</text:p>
          </table:table-cell>
          <table:table-cell office:value-type="float" office:value="0.001134294">
            <text:p>0.001134294</text:p>
          </table:table-cell>
          <table:table-cell table:number-columns-repeated="4"/>
        </table:table-row>
        <table:table-row table:style-name="ro1">
          <table:table-cell office:value-type="float" office:value="363.049224853516">
            <text:p>363.0492248535</text:p>
          </table:table-cell>
          <table:table-cell office:value-type="float" office:value="-0.0007055345">
            <text:p>-0.0007055345</text:p>
          </table:table-cell>
          <table:table-cell table:number-columns-repeated="4"/>
        </table:table-row>
        <table:table-row table:style-name="ro1">
          <table:table-cell office:value-type="float" office:value="363.159271240234">
            <text:p>363.1592712402</text:p>
          </table:table-cell>
          <table:table-cell office:value-type="float" office:value="-0.001417372">
            <text:p>-0.001417372</text:p>
          </table:table-cell>
          <table:table-cell table:number-columns-repeated="4"/>
        </table:table-row>
        <table:table-row table:style-name="ro1">
          <table:table-cell office:value-type="float" office:value="363.269348144531">
            <text:p>363.2693481445</text:p>
          </table:table-cell>
          <table:table-cell office:value-type="float" office:value="0.006148978">
            <text:p>0.006148978</text:p>
          </table:table-cell>
          <table:table-cell table:number-columns-repeated="4"/>
        </table:table-row>
        <table:table-row table:style-name="ro1">
          <table:table-cell office:value-type="float" office:value="363.37939453125">
            <text:p>363.3793945313</text:p>
          </table:table-cell>
          <table:table-cell office:value-type="float" office:value="0.006079016">
            <text:p>0.006079016</text:p>
          </table:table-cell>
          <table:table-cell table:number-columns-repeated="4"/>
        </table:table-row>
        <table:table-row table:style-name="ro1">
          <table:table-cell office:value-type="float" office:value="363.489501953125">
            <text:p>363.4895019531</text:p>
          </table:table-cell>
          <table:table-cell office:value-type="float" office:value="-0.006290577">
            <text:p>-0.006290577</text:p>
          </table:table-cell>
          <table:table-cell table:number-columns-repeated="4"/>
        </table:table-row>
        <table:table-row table:style-name="ro1">
          <table:table-cell office:value-type="float" office:value="363.599578857422">
            <text:p>363.5995788574</text:p>
          </table:table-cell>
          <table:table-cell office:value-type="float" office:value="0.01214847">
            <text:p>0.01214847</text:p>
          </table:table-cell>
          <table:table-cell table:number-columns-repeated="4"/>
        </table:table-row>
        <table:table-row table:style-name="ro1">
          <table:table-cell office:value-type="float" office:value="363.709655761719">
            <text:p>363.7096557617</text:p>
          </table:table-cell>
          <table:table-cell office:value-type="float" office:value="0.007901618">
            <text:p>0.007901618</text:p>
          </table:table-cell>
          <table:table-cell table:number-columns-repeated="4"/>
        </table:table-row>
        <table:table-row table:style-name="ro1">
          <table:table-cell office:value-type="float" office:value="363.819763183594">
            <text:p>363.8197631836</text:p>
          </table:table-cell>
          <table:table-cell office:value-type="float" office:value="0.00529257">
            <text:p>0.00529257</text:p>
          </table:table-cell>
          <table:table-cell table:number-columns-repeated="4"/>
        </table:table-row>
        <table:table-row table:style-name="ro1">
          <table:table-cell office:value-type="float" office:value="363.929870605469">
            <text:p>363.9298706055</text:p>
          </table:table-cell>
          <table:table-cell office:value-type="float" office:value="-0.004888298">
            <text:p>-0.004888298</text:p>
          </table:table-cell>
          <table:table-cell table:number-columns-repeated="4"/>
        </table:table-row>
        <table:table-row table:style-name="ro1">
          <table:table-cell office:value-type="float" office:value="364.039978027344">
            <text:p>364.0399780273</text:p>
          </table:table-cell>
          <table:table-cell office:value-type="float" office:value="-0.006179174">
            <text:p>-0.006179174</text:p>
          </table:table-cell>
          <table:table-cell table:number-columns-repeated="4"/>
        </table:table-row>
        <table:table-row table:style-name="ro1">
          <table:table-cell office:value-type="float" office:value="364.150085449219">
            <text:p>364.1500854492</text:p>
          </table:table-cell>
          <table:table-cell office:value-type="float" office:value="-0.003563055">
            <text:p>-0.003563055</text:p>
          </table:table-cell>
          <table:table-cell table:number-columns-repeated="4"/>
        </table:table-row>
        <table:table-row table:style-name="ro1">
          <table:table-cell office:value-type="float" office:value="364.260223388672">
            <text:p>364.2602233887</text:p>
          </table:table-cell>
          <table:table-cell office:value-type="float" office:value="-0.002093201">
            <text:p>-0.002093201</text:p>
          </table:table-cell>
          <table:table-cell table:number-columns-repeated="4"/>
        </table:table-row>
        <table:table-row table:style-name="ro1">
          <table:table-cell office:value-type="float" office:value="364.370330810547">
            <text:p>364.3703308105</text:p>
          </table:table-cell>
          <table:table-cell office:value-type="float" office:value="-0.004535302">
            <text:p>-0.004535302</text:p>
          </table:table-cell>
          <table:table-cell table:number-columns-repeated="4"/>
        </table:table-row>
        <table:table-row table:style-name="ro1">
          <table:table-cell office:value-type="float" office:value="364.48046875">
            <text:p>364.48046875</text:p>
          </table:table-cell>
          <table:table-cell office:value-type="float" office:value="0.006594639">
            <text:p>0.006594639</text:p>
          </table:table-cell>
          <table:table-cell table:number-columns-repeated="4"/>
        </table:table-row>
        <table:table-row table:style-name="ro1">
          <table:table-cell office:value-type="float" office:value="364.590606689453">
            <text:p>364.5906066895</text:p>
          </table:table-cell>
          <table:table-cell office:value-type="float" office:value="0.008715565">
            <text:p>0.008715565</text:p>
          </table:table-cell>
          <table:table-cell table:number-columns-repeated="4"/>
        </table:table-row>
        <table:table-row table:style-name="ro1">
          <table:table-cell office:value-type="float" office:value="364.700775146484">
            <text:p>364.7007751465</text:p>
          </table:table-cell>
          <table:table-cell office:value-type="float" office:value="0.003268448">
            <text:p>0.003268448</text:p>
          </table:table-cell>
          <table:table-cell table:number-columns-repeated="4"/>
        </table:table-row>
        <table:table-row table:style-name="ro1">
          <table:table-cell office:value-type="float" office:value="364.810913085938">
            <text:p>364.8109130859</text:p>
          </table:table-cell>
          <table:table-cell office:value-type="float" office:value="0.005446161">
            <text:p>0.005446161</text:p>
          </table:table-cell>
          <table:table-cell table:number-columns-repeated="4"/>
        </table:table-row>
        <table:table-row table:style-name="ro1">
          <table:table-cell office:value-type="float" office:value="364.921081542969">
            <text:p>364.921081543</text:p>
          </table:table-cell>
          <table:table-cell office:value-type="float" office:value="-0.003238857">
            <text:p>-0.003238857</text:p>
          </table:table-cell>
          <table:table-cell table:number-columns-repeated="4"/>
        </table:table-row>
        <table:table-row table:style-name="ro1">
          <table:table-cell office:value-type="float" office:value="365.03125">
            <text:p>365.03125</text:p>
          </table:table-cell>
          <table:table-cell office:value-type="float" office:value="-0.005911515">
            <text:p>-0.005911515</text:p>
          </table:table-cell>
          <table:table-cell table:number-columns-repeated="4"/>
        </table:table-row>
        <table:table-row table:style-name="ro1">
          <table:table-cell office:value-type="float" office:value="365.141418457031">
            <text:p>365.141418457</text:p>
          </table:table-cell>
          <table:table-cell office:value-type="float" office:value="-0.009151408">
            <text:p>-0.009151408</text:p>
          </table:table-cell>
          <table:table-cell table:number-columns-repeated="4"/>
        </table:table-row>
        <table:table-row table:style-name="ro1">
          <table:table-cell office:value-type="float" office:value="365.251586914063">
            <text:p>365.2515869141</text:p>
          </table:table-cell>
          <table:table-cell office:value-type="float" office:value="0.009656004">
            <text:p>0.009656004</text:p>
          </table:table-cell>
          <table:table-cell table:number-columns-repeated="4"/>
        </table:table-row>
        <table:table-row table:style-name="ro1">
          <table:table-cell office:value-type="float" office:value="365.361785888672">
            <text:p>365.3617858887</text:p>
          </table:table-cell>
          <table:table-cell office:value-type="float" office:value="0.02651109">
            <text:p>0.02651109</text:p>
          </table:table-cell>
          <table:table-cell table:number-columns-repeated="4"/>
        </table:table-row>
        <table:table-row table:style-name="ro1">
          <table:table-cell office:value-type="float" office:value="365.471984863281">
            <text:p>365.4719848633</text:p>
          </table:table-cell>
          <table:table-cell office:value-type="float" office:value="0.003478841">
            <text:p>0.003478841</text:p>
          </table:table-cell>
          <table:table-cell table:number-columns-repeated="4"/>
        </table:table-row>
        <table:table-row table:style-name="ro1">
          <table:table-cell office:value-type="float" office:value="365.582183837891">
            <text:p>365.5821838379</text:p>
          </table:table-cell>
          <table:table-cell office:value-type="float" office:value="0.00765947">
            <text:p>0.00765947</text:p>
          </table:table-cell>
          <table:table-cell table:number-columns-repeated="4"/>
        </table:table-row>
        <table:table-row table:style-name="ro1">
          <table:table-cell office:value-type="float" office:value="365.6923828125">
            <text:p>365.6923828125</text:p>
          </table:table-cell>
          <table:table-cell office:value-type="float" office:value="0.00895765">
            <text:p>0.00895765</text:p>
          </table:table-cell>
          <table:table-cell table:number-columns-repeated="4"/>
        </table:table-row>
        <table:table-row table:style-name="ro1">
          <table:table-cell office:value-type="float" office:value="365.802581787109">
            <text:p>365.8025817871</text:p>
          </table:table-cell>
          <table:table-cell office:value-type="string">
            <text:p>-9.147808E-05</text:p>
          </table:table-cell>
          <table:table-cell table:number-columns-repeated="4"/>
        </table:table-row>
        <table:table-row table:style-name="ro1">
          <table:table-cell office:value-type="float" office:value="365.912811279297">
            <text:p>365.9128112793</text:p>
          </table:table-cell>
          <table:table-cell office:value-type="float" office:value="0.00946229">
            <text:p>0.00946229</text:p>
          </table:table-cell>
          <table:table-cell table:number-columns-repeated="4"/>
        </table:table-row>
        <table:table-row table:style-name="ro1">
          <table:table-cell office:value-type="float" office:value="366.023010253906">
            <text:p>366.0230102539</text:p>
          </table:table-cell>
          <table:table-cell office:value-type="float" office:value="0.004100331">
            <text:p>0.004100331</text:p>
          </table:table-cell>
          <table:table-cell table:number-columns-repeated="4"/>
        </table:table-row>
        <table:table-row table:style-name="ro1">
          <table:table-cell office:value-type="float" office:value="366.133239746094">
            <text:p>366.1332397461</text:p>
          </table:table-cell>
          <table:table-cell office:value-type="float" office:value="0.005448647">
            <text:p>0.005448647</text:p>
          </table:table-cell>
          <table:table-cell table:number-columns-repeated="4"/>
        </table:table-row>
        <table:table-row table:style-name="ro1">
          <table:table-cell office:value-type="float" office:value="366.243499755859">
            <text:p>366.2434997559</text:p>
          </table:table-cell>
          <table:table-cell office:value-type="float" office:value="-0.001743189">
            <text:p>-0.001743189</text:p>
          </table:table-cell>
          <table:table-cell table:number-columns-repeated="4"/>
        </table:table-row>
        <table:table-row table:style-name="ro1">
          <table:table-cell office:value-type="float" office:value="366.353729248047">
            <text:p>366.353729248</text:p>
          </table:table-cell>
          <table:table-cell office:value-type="float" office:value="-0.0001713471">
            <text:p>-0.0001713471</text:p>
          </table:table-cell>
          <table:table-cell table:number-columns-repeated="4"/>
        </table:table-row>
        <table:table-row table:style-name="ro1">
          <table:table-cell office:value-type="float" office:value="366.463989257813">
            <text:p>366.4639892578</text:p>
          </table:table-cell>
          <table:table-cell office:value-type="float" office:value="-0.000219509">
            <text:p>-0.000219509</text:p>
          </table:table-cell>
          <table:table-cell table:number-columns-repeated="4"/>
        </table:table-row>
        <table:table-row table:style-name="ro1">
          <table:table-cell office:value-type="float" office:value="366.57421875">
            <text:p>366.57421875</text:p>
          </table:table-cell>
          <table:table-cell office:value-type="float" office:value="0.002527403">
            <text:p>0.002527403</text:p>
          </table:table-cell>
          <table:table-cell table:number-columns-repeated="4"/>
        </table:table-row>
        <table:table-row table:style-name="ro1">
          <table:table-cell office:value-type="float" office:value="366.684478759766">
            <text:p>366.6844787598</text:p>
          </table:table-cell>
          <table:table-cell office:value-type="float" office:value="-0.0002925211">
            <text:p>-0.0002925211</text:p>
          </table:table-cell>
          <table:table-cell table:number-columns-repeated="4"/>
        </table:table-row>
        <table:table-row table:style-name="ro1">
          <table:table-cell office:value-type="float" office:value="366.794738769531">
            <text:p>366.7947387695</text:p>
          </table:table-cell>
          <table:table-cell office:value-type="float" office:value="0.00929031">
            <text:p>0.00929031</text:p>
          </table:table-cell>
          <table:table-cell table:number-columns-repeated="4"/>
        </table:table-row>
        <table:table-row table:style-name="ro1">
          <table:table-cell office:value-type="float" office:value="366.905029296875">
            <text:p>366.9050292969</text:p>
          </table:table-cell>
          <table:table-cell office:value-type="float" office:value="-0.003228152">
            <text:p>-0.003228152</text:p>
          </table:table-cell>
          <table:table-cell table:number-columns-repeated="4"/>
        </table:table-row>
        <table:table-row table:style-name="ro1">
          <table:table-cell office:value-type="float" office:value="367.015289306641">
            <text:p>367.0152893066</text:p>
          </table:table-cell>
          <table:table-cell office:value-type="float" office:value="0.0006543446">
            <text:p>0.0006543446</text:p>
          </table:table-cell>
          <table:table-cell table:number-columns-repeated="4"/>
        </table:table-row>
        <table:table-row table:style-name="ro1">
          <table:table-cell office:value-type="float" office:value="367.125579833984">
            <text:p>367.125579834</text:p>
          </table:table-cell>
          <table:table-cell office:value-type="float" office:value="0.01162082">
            <text:p>0.01162082</text:p>
          </table:table-cell>
          <table:table-cell table:number-columns-repeated="4"/>
        </table:table-row>
        <table:table-row table:style-name="ro1">
          <table:table-cell office:value-type="float" office:value="367.235870361328">
            <text:p>367.2358703613</text:p>
          </table:table-cell>
          <table:table-cell office:value-type="float" office:value="0.01457024">
            <text:p>0.01457024</text:p>
          </table:table-cell>
          <table:table-cell table:number-columns-repeated="4"/>
        </table:table-row>
        <table:table-row table:style-name="ro1">
          <table:table-cell office:value-type="float" office:value="367.346160888672">
            <text:p>367.3461608887</text:p>
          </table:table-cell>
          <table:table-cell office:value-type="float" office:value="0.01846875">
            <text:p>0.01846875</text:p>
          </table:table-cell>
          <table:table-cell table:number-columns-repeated="4"/>
        </table:table-row>
        <table:table-row table:style-name="ro1">
          <table:table-cell office:value-type="float" office:value="367.456481933594">
            <text:p>367.4564819336</text:p>
          </table:table-cell>
          <table:table-cell office:value-type="float" office:value="0.009678283">
            <text:p>0.009678283</text:p>
          </table:table-cell>
          <table:table-cell table:number-columns-repeated="4"/>
        </table:table-row>
        <table:table-row table:style-name="ro1">
          <table:table-cell office:value-type="float" office:value="367.566772460938">
            <text:p>367.5667724609</text:p>
          </table:table-cell>
          <table:table-cell office:value-type="float" office:value="-0.00577548">
            <text:p>-0.00577548</text:p>
          </table:table-cell>
          <table:table-cell table:number-columns-repeated="4"/>
        </table:table-row>
        <table:table-row table:style-name="ro1">
          <table:table-cell office:value-type="float" office:value="367.677093505859">
            <text:p>367.6770935059</text:p>
          </table:table-cell>
          <table:table-cell office:value-type="float" office:value="-0.002305053">
            <text:p>-0.002305053</text:p>
          </table:table-cell>
          <table:table-cell table:number-columns-repeated="4"/>
        </table:table-row>
        <table:table-row table:style-name="ro1">
          <table:table-cell office:value-type="float" office:value="367.787414550781">
            <text:p>367.7874145508</text:p>
          </table:table-cell>
          <table:table-cell office:value-type="float" office:value="-0.0074646">
            <text:p>-0.0074646</text:p>
          </table:table-cell>
          <table:table-cell table:number-columns-repeated="4"/>
        </table:table-row>
        <table:table-row table:style-name="ro1">
          <table:table-cell office:value-type="float" office:value="367.897766113281">
            <text:p>367.8977661133</text:p>
          </table:table-cell>
          <table:table-cell office:value-type="float" office:value="-0.007825905">
            <text:p>-0.007825905</text:p>
          </table:table-cell>
          <table:table-cell table:number-columns-repeated="4"/>
        </table:table-row>
        <table:table-row table:style-name="ro1">
          <table:table-cell office:value-type="float" office:value="368.008087158203">
            <text:p>368.0080871582</text:p>
          </table:table-cell>
          <table:table-cell office:value-type="float" office:value="0.000313405">
            <text:p>0.000313405</text:p>
          </table:table-cell>
          <table:table-cell table:number-columns-repeated="4"/>
        </table:table-row>
        <table:table-row table:style-name="ro1">
          <table:table-cell office:value-type="float" office:value="368.118438720703">
            <text:p>368.1184387207</text:p>
          </table:table-cell>
          <table:table-cell office:value-type="float" office:value="-0.001848331">
            <text:p>-0.001848331</text:p>
          </table:table-cell>
          <table:table-cell table:number-columns-repeated="4"/>
        </table:table-row>
        <table:table-row table:style-name="ro1">
          <table:table-cell office:value-type="float" office:value="368.228759765625">
            <text:p>368.2287597656</text:p>
          </table:table-cell>
          <table:table-cell office:value-type="float" office:value="0.0009870304">
            <text:p>0.0009870304</text:p>
          </table:table-cell>
          <table:table-cell table:number-columns-repeated="4"/>
        </table:table-row>
        <table:table-row table:style-name="ro1">
          <table:table-cell office:value-type="float" office:value="368.339111328125">
            <text:p>368.3391113281</text:p>
          </table:table-cell>
          <table:table-cell office:value-type="float" office:value="-0.0008167243">
            <text:p>-0.0008167243</text:p>
          </table:table-cell>
          <table:table-cell table:number-columns-repeated="4"/>
        </table:table-row>
        <table:table-row table:style-name="ro1">
          <table:table-cell office:value-type="float" office:value="368.449493408203">
            <text:p>368.4494934082</text:p>
          </table:table-cell>
          <table:table-cell office:value-type="float" office:value="0.003153848">
            <text:p>0.003153848</text:p>
          </table:table-cell>
          <table:table-cell table:number-columns-repeated="4"/>
        </table:table-row>
        <table:table-row table:style-name="ro1">
          <table:table-cell office:value-type="float" office:value="368.559844970703">
            <text:p>368.5598449707</text:p>
          </table:table-cell>
          <table:table-cell office:value-type="float" office:value="0.007937831">
            <text:p>0.007937831</text:p>
          </table:table-cell>
          <table:table-cell table:number-columns-repeated="4"/>
        </table:table-row>
        <table:table-row table:style-name="ro1">
          <table:table-cell office:value-type="float" office:value="368.670227050781">
            <text:p>368.6702270508</text:p>
          </table:table-cell>
          <table:table-cell office:value-type="float" office:value="-0.005994183">
            <text:p>-0.005994183</text:p>
          </table:table-cell>
          <table:table-cell table:number-columns-repeated="4"/>
        </table:table-row>
        <table:table-row table:style-name="ro1">
          <table:table-cell office:value-type="float" office:value="368.780609130859">
            <text:p>368.7806091309</text:p>
          </table:table-cell>
          <table:table-cell office:value-type="float" office:value="-0.002271183">
            <text:p>-0.002271183</text:p>
          </table:table-cell>
          <table:table-cell table:number-columns-repeated="4"/>
        </table:table-row>
        <table:table-row table:style-name="ro1">
          <table:table-cell office:value-type="float" office:value="368.890991210938">
            <text:p>368.8909912109</text:p>
          </table:table-cell>
          <table:table-cell office:value-type="float" office:value="-0.009343528">
            <text:p>-0.009343528</text:p>
          </table:table-cell>
          <table:table-cell table:number-columns-repeated="4"/>
        </table:table-row>
        <table:table-row table:style-name="ro1">
          <table:table-cell office:value-type="float" office:value="369.001373291016">
            <text:p>369.001373291</text:p>
          </table:table-cell>
          <table:table-cell office:value-type="float" office:value="0.0002384742">
            <text:p>0.0002384742</text:p>
          </table:table-cell>
          <table:table-cell table:number-columns-repeated="4"/>
        </table:table-row>
        <table:table-row table:style-name="ro1">
          <table:table-cell office:value-type="float" office:value="369.111755371094">
            <text:p>369.1117553711</text:p>
          </table:table-cell>
          <table:table-cell office:value-type="float" office:value="-0.008436749">
            <text:p>-0.008436749</text:p>
          </table:table-cell>
          <table:table-cell table:number-columns-repeated="4"/>
        </table:table-row>
        <table:table-row table:style-name="ro1">
          <table:table-cell office:value-type="float" office:value="369.22216796875">
            <text:p>369.2221679688</text:p>
          </table:table-cell>
          <table:table-cell office:value-type="float" office:value="-0.007842171">
            <text:p>-0.007842171</text:p>
          </table:table-cell>
          <table:table-cell table:number-columns-repeated="4"/>
        </table:table-row>
        <table:table-row table:style-name="ro1">
          <table:table-cell office:value-type="float" office:value="369.332580566406">
            <text:p>369.3325805664</text:p>
          </table:table-cell>
          <table:table-cell office:value-type="float" office:value="-0.007967264">
            <text:p>-0.007967264</text:p>
          </table:table-cell>
          <table:table-cell table:number-columns-repeated="4"/>
        </table:table-row>
        <table:table-row table:style-name="ro1">
          <table:table-cell office:value-type="float" office:value="369.442993164063">
            <text:p>369.4429931641</text:p>
          </table:table-cell>
          <table:table-cell office:value-type="float" office:value="-0.0003733889">
            <text:p>-0.0003733889</text:p>
          </table:table-cell>
          <table:table-cell table:number-columns-repeated="4"/>
        </table:table-row>
        <table:table-row table:style-name="ro1">
          <table:table-cell office:value-type="float" office:value="369.553405761719">
            <text:p>369.5534057617</text:p>
          </table:table-cell>
          <table:table-cell office:value-type="float" office:value="0.003704077">
            <text:p>0.003704077</text:p>
          </table:table-cell>
          <table:table-cell table:number-columns-repeated="4"/>
        </table:table-row>
        <table:table-row table:style-name="ro1">
          <table:table-cell office:value-type="float" office:value="369.663848876953">
            <text:p>369.663848877</text:p>
          </table:table-cell>
          <table:table-cell office:value-type="float" office:value="0.006044782">
            <text:p>0.006044782</text:p>
          </table:table-cell>
          <table:table-cell table:number-columns-repeated="4"/>
        </table:table-row>
        <table:table-row table:style-name="ro1">
          <table:table-cell office:value-type="float" office:value="369.774261474609">
            <text:p>369.7742614746</text:p>
          </table:table-cell>
          <table:table-cell office:value-type="float" office:value="-0.00358943">
            <text:p>-0.00358943</text:p>
          </table:table-cell>
          <table:table-cell table:number-columns-repeated="4"/>
        </table:table-row>
        <table:table-row table:style-name="ro1">
          <table:table-cell office:value-type="float" office:value="369.884704589844">
            <text:p>369.8847045898</text:p>
          </table:table-cell>
          <table:table-cell office:value-type="float" office:value="0.002663332">
            <text:p>0.002663332</text:p>
          </table:table-cell>
          <table:table-cell table:number-columns-repeated="4"/>
        </table:table-row>
        <table:table-row table:style-name="ro1">
          <table:table-cell office:value-type="float" office:value="369.995147705078">
            <text:p>369.9951477051</text:p>
          </table:table-cell>
          <table:table-cell office:value-type="float" office:value="-0.005299336">
            <text:p>-0.005299336</text:p>
          </table:table-cell>
          <table:table-cell table:number-columns-repeated="4"/>
        </table:table-row>
        <table:table-row table:style-name="ro1">
          <table:table-cell office:value-type="float" office:value="370.105621337891">
            <text:p>370.1056213379</text:p>
          </table:table-cell>
          <table:table-cell office:value-type="float" office:value="0.009963589">
            <text:p>0.009963589</text:p>
          </table:table-cell>
          <table:table-cell table:number-columns-repeated="4"/>
        </table:table-row>
        <table:table-row table:style-name="ro1">
          <table:table-cell office:value-type="float" office:value="370.216064453125">
            <text:p>370.2160644531</text:p>
          </table:table-cell>
          <table:table-cell office:value-type="float" office:value="0.008831318">
            <text:p>0.008831318</text:p>
          </table:table-cell>
          <table:table-cell table:number-columns-repeated="4"/>
        </table:table-row>
        <table:table-row table:style-name="ro1">
          <table:table-cell office:value-type="float" office:value="370.326538085938">
            <text:p>370.3265380859</text:p>
          </table:table-cell>
          <table:table-cell office:value-type="float" office:value="0.01916484">
            <text:p>0.01916484</text:p>
          </table:table-cell>
          <table:table-cell table:number-columns-repeated="4"/>
        </table:table-row>
        <table:table-row table:style-name="ro1">
          <table:table-cell office:value-type="float" office:value="370.43701171875">
            <text:p>370.4370117188</text:p>
          </table:table-cell>
          <table:table-cell office:value-type="float" office:value="0.01125161">
            <text:p>0.01125161</text:p>
          </table:table-cell>
          <table:table-cell table:number-columns-repeated="4"/>
        </table:table-row>
        <table:table-row table:style-name="ro1">
          <table:table-cell office:value-type="float" office:value="370.547485351563">
            <text:p>370.5474853516</text:p>
          </table:table-cell>
          <table:table-cell office:value-type="float" office:value="0.002721426">
            <text:p>0.002721426</text:p>
          </table:table-cell>
          <table:table-cell table:number-columns-repeated="4"/>
        </table:table-row>
        <table:table-row table:style-name="ro1">
          <table:table-cell office:value-type="float" office:value="370.657958984375">
            <text:p>370.6579589844</text:p>
          </table:table-cell>
          <table:table-cell office:value-type="float" office:value="-0.003657638">
            <text:p>-0.003657638</text:p>
          </table:table-cell>
          <table:table-cell table:number-columns-repeated="4"/>
        </table:table-row>
        <table:table-row table:style-name="ro1">
          <table:table-cell office:value-type="float" office:value="370.768432617188">
            <text:p>370.7684326172</text:p>
          </table:table-cell>
          <table:table-cell office:value-type="float" office:value="-0.00858808">
            <text:p>-0.00858808</text:p>
          </table:table-cell>
          <table:table-cell table:number-columns-repeated="4"/>
        </table:table-row>
        <table:table-row table:style-name="ro1">
          <table:table-cell office:value-type="float" office:value="370.878936767578">
            <text:p>370.8789367676</text:p>
          </table:table-cell>
          <table:table-cell office:value-type="float" office:value="0.006680244">
            <text:p>0.006680244</text:p>
          </table:table-cell>
          <table:table-cell table:number-columns-repeated="4"/>
        </table:table-row>
        <table:table-row table:style-name="ro1">
          <table:table-cell office:value-type="float" office:value="370.989440917969">
            <text:p>370.989440918</text:p>
          </table:table-cell>
          <table:table-cell office:value-type="float" office:value="-0.006269492">
            <text:p>-0.006269492</text:p>
          </table:table-cell>
          <table:table-cell table:number-columns-repeated="4"/>
        </table:table-row>
        <table:table-row table:style-name="ro1">
          <table:table-cell office:value-type="float" office:value="371.099945068359">
            <text:p>371.0999450684</text:p>
          </table:table-cell>
          <table:table-cell office:value-type="float" office:value="0.004006838">
            <text:p>0.004006838</text:p>
          </table:table-cell>
          <table:table-cell table:number-columns-repeated="4"/>
        </table:table-row>
        <table:table-row table:style-name="ro1">
          <table:table-cell office:value-type="float" office:value="371.21044921875">
            <text:p>371.2104492188</text:p>
          </table:table-cell>
          <table:table-cell office:value-type="float" office:value="-0.005484415">
            <text:p>-0.005484415</text:p>
          </table:table-cell>
          <table:table-cell table:number-columns-repeated="4"/>
        </table:table-row>
        <table:table-row table:style-name="ro1">
          <table:table-cell office:value-type="float" office:value="371.320983886719">
            <text:p>371.3209838867</text:p>
          </table:table-cell>
          <table:table-cell office:value-type="float" office:value="-0.00480634">
            <text:p>-0.00480634</text:p>
          </table:table-cell>
          <table:table-cell table:number-columns-repeated="4"/>
        </table:table-row>
        <table:table-row table:style-name="ro1">
          <table:table-cell office:value-type="float" office:value="371.431488037109">
            <text:p>371.4314880371</text:p>
          </table:table-cell>
          <table:table-cell office:value-type="float" office:value="0.001086923">
            <text:p>0.001086923</text:p>
          </table:table-cell>
          <table:table-cell table:number-columns-repeated="4"/>
        </table:table-row>
        <table:table-row table:style-name="ro1">
          <table:table-cell office:value-type="float" office:value="371.542022705078">
            <text:p>371.5420227051</text:p>
          </table:table-cell>
          <table:table-cell office:value-type="float" office:value="0.01225183">
            <text:p>0.01225183</text:p>
          </table:table-cell>
          <table:table-cell table:number-columns-repeated="4"/>
        </table:table-row>
        <table:table-row table:style-name="ro1">
          <table:table-cell office:value-type="float" office:value="371.652557373047">
            <text:p>371.652557373</text:p>
          </table:table-cell>
          <table:table-cell office:value-type="float" office:value="-0.00740518">
            <text:p>-0.00740518</text:p>
          </table:table-cell>
          <table:table-cell table:number-columns-repeated="4"/>
        </table:table-row>
        <table:table-row table:style-name="ro1">
          <table:table-cell office:value-type="float" office:value="371.763122558594">
            <text:p>371.7631225586</text:p>
          </table:table-cell>
          <table:table-cell office:value-type="float" office:value="-0.004731469">
            <text:p>-0.004731469</text:p>
          </table:table-cell>
          <table:table-cell table:number-columns-repeated="4"/>
        </table:table-row>
        <table:table-row table:style-name="ro1">
          <table:table-cell office:value-type="float" office:value="371.873657226563">
            <text:p>371.8736572266</text:p>
          </table:table-cell>
          <table:table-cell office:value-type="float" office:value="-0.007232938">
            <text:p>-0.007232938</text:p>
          </table:table-cell>
          <table:table-cell table:number-columns-repeated="4"/>
        </table:table-row>
        <table:table-row table:style-name="ro1">
          <table:table-cell office:value-type="float" office:value="371.984222412109">
            <text:p>371.9842224121</text:p>
          </table:table-cell>
          <table:table-cell office:value-type="float" office:value="0.003443719">
            <text:p>0.003443719</text:p>
          </table:table-cell>
          <table:table-cell table:number-columns-repeated="4"/>
        </table:table-row>
        <table:table-row table:style-name="ro1">
          <table:table-cell office:value-type="float" office:value="372.094787597656">
            <text:p>372.0947875977</text:p>
          </table:table-cell>
          <table:table-cell office:value-type="float" office:value="-0.005231549">
            <text:p>-0.005231549</text:p>
          </table:table-cell>
          <table:table-cell table:number-columns-repeated="4"/>
        </table:table-row>
        <table:table-row table:style-name="ro1">
          <table:table-cell office:value-type="float" office:value="372.205352783203">
            <text:p>372.2053527832</text:p>
          </table:table-cell>
          <table:table-cell office:value-type="float" office:value="-0.005307059">
            <text:p>-0.005307059</text:p>
          </table:table-cell>
          <table:table-cell table:number-columns-repeated="4"/>
        </table:table-row>
        <table:table-row table:style-name="ro1">
          <table:table-cell office:value-type="float" office:value="372.31591796875">
            <text:p>372.3159179688</text:p>
          </table:table-cell>
          <table:table-cell office:value-type="float" office:value="-0.005095069">
            <text:p>-0.005095069</text:p>
          </table:table-cell>
          <table:table-cell table:number-columns-repeated="4"/>
        </table:table-row>
        <table:table-row table:style-name="ro1">
          <table:table-cell office:value-type="float" office:value="372.426513671875">
            <text:p>372.4265136719</text:p>
          </table:table-cell>
          <table:table-cell office:value-type="float" office:value="-0.0004686886">
            <text:p>-0.0004686886</text:p>
          </table:table-cell>
          <table:table-cell table:number-columns-repeated="4"/>
        </table:table-row>
        <table:table-row table:style-name="ro1">
          <table:table-cell office:value-type="float" office:value="372.537078857422">
            <text:p>372.5370788574</text:p>
          </table:table-cell>
          <table:table-cell office:value-type="float" office:value="0.002450607">
            <text:p>0.002450607</text:p>
          </table:table-cell>
          <table:table-cell table:number-columns-repeated="4"/>
        </table:table-row>
        <table:table-row table:style-name="ro1">
          <table:table-cell office:value-type="float" office:value="372.647674560547">
            <text:p>372.6476745605</text:p>
          </table:table-cell>
          <table:table-cell office:value-type="float" office:value="-0.009104523">
            <text:p>-0.009104523</text:p>
          </table:table-cell>
          <table:table-cell table:number-columns-repeated="4"/>
        </table:table-row>
        <table:table-row table:style-name="ro1">
          <table:table-cell office:value-type="float" office:value="372.758270263672">
            <text:p>372.7582702637</text:p>
          </table:table-cell>
          <table:table-cell office:value-type="float" office:value="0.00060732">
            <text:p>0.00060732</text:p>
          </table:table-cell>
          <table:table-cell table:number-columns-repeated="4"/>
        </table:table-row>
        <table:table-row table:style-name="ro1">
          <table:table-cell office:value-type="float" office:value="372.868896484375">
            <text:p>372.8688964844</text:p>
          </table:table-cell>
          <table:table-cell office:value-type="float" office:value="0.005987398">
            <text:p>0.005987398</text:p>
          </table:table-cell>
          <table:table-cell table:number-columns-repeated="4"/>
        </table:table-row>
        <table:table-row table:style-name="ro1">
          <table:table-cell office:value-type="float" office:value="372.9794921875">
            <text:p>372.9794921875</text:p>
          </table:table-cell>
          <table:table-cell office:value-type="float" office:value="-0.008823807">
            <text:p>-0.008823807</text:p>
          </table:table-cell>
          <table:table-cell table:number-columns-repeated="4"/>
        </table:table-row>
        <table:table-row table:style-name="ro1">
          <table:table-cell office:value-type="float" office:value="373.090118408203">
            <text:p>373.0901184082</text:p>
          </table:table-cell>
          <table:table-cell office:value-type="float" office:value="-0.001015915">
            <text:p>-0.001015915</text:p>
          </table:table-cell>
          <table:table-cell table:number-columns-repeated="4"/>
        </table:table-row>
        <table:table-row table:style-name="ro1">
          <table:table-cell office:value-type="float" office:value="373.200744628906">
            <text:p>373.2007446289</text:p>
          </table:table-cell>
          <table:table-cell office:value-type="float" office:value="0.02803411">
            <text:p>0.02803411</text:p>
          </table:table-cell>
          <table:table-cell table:number-columns-repeated="4"/>
        </table:table-row>
        <table:table-row table:style-name="ro1">
          <table:table-cell office:value-type="float" office:value="373.311370849609">
            <text:p>373.3113708496</text:p>
          </table:table-cell>
          <table:table-cell office:value-type="float" office:value="-0.001481927">
            <text:p>-0.001481927</text:p>
          </table:table-cell>
          <table:table-cell table:number-columns-repeated="4"/>
        </table:table-row>
        <table:table-row table:style-name="ro1">
          <table:table-cell office:value-type="float" office:value="373.421997070313">
            <text:p>373.4219970703</text:p>
          </table:table-cell>
          <table:table-cell office:value-type="float" office:value="0.0005231059">
            <text:p>0.0005231059</text:p>
          </table:table-cell>
          <table:table-cell table:number-columns-repeated="4"/>
        </table:table-row>
        <table:table-row table:style-name="ro1">
          <table:table-cell office:value-type="float" office:value="373.532623291016">
            <text:p>373.532623291</text:p>
          </table:table-cell>
          <table:table-cell office:value-type="float" office:value="-0.00641981">
            <text:p>-0.00641981</text:p>
          </table:table-cell>
          <table:table-cell table:number-columns-repeated="4"/>
        </table:table-row>
        <table:table-row table:style-name="ro1">
          <table:table-cell office:value-type="float" office:value="373.643280029297">
            <text:p>373.6432800293</text:p>
          </table:table-cell>
          <table:table-cell office:value-type="float" office:value="0.01059369">
            <text:p>0.01059369</text:p>
          </table:table-cell>
          <table:table-cell table:number-columns-repeated="4"/>
        </table:table-row>
        <table:table-row table:style-name="ro1">
          <table:table-cell office:value-type="float" office:value="373.753936767578">
            <text:p>373.7539367676</text:p>
          </table:table-cell>
          <table:table-cell office:value-type="float" office:value="0.007335454">
            <text:p>0.007335454</text:p>
          </table:table-cell>
          <table:table-cell table:number-columns-repeated="4"/>
        </table:table-row>
        <table:table-row table:style-name="ro1">
          <table:table-cell office:value-type="float" office:value="373.864593505859">
            <text:p>373.8645935059</text:p>
          </table:table-cell>
          <table:table-cell office:value-type="float" office:value="-0.004780602">
            <text:p>-0.004780602</text:p>
          </table:table-cell>
          <table:table-cell table:number-columns-repeated="4"/>
        </table:table-row>
        <table:table-row table:style-name="ro1">
          <table:table-cell office:value-type="float" office:value="373.975250244141">
            <text:p>373.9752502441</text:p>
          </table:table-cell>
          <table:table-cell office:value-type="float" office:value="-0.0001730608">
            <text:p>-0.0001730608</text:p>
          </table:table-cell>
          <table:table-cell table:number-columns-repeated="4"/>
        </table:table-row>
        <table:table-row table:style-name="ro1">
          <table:table-cell office:value-type="float" office:value="374.0859375">
            <text:p>374.0859375</text:p>
          </table:table-cell>
          <table:table-cell office:value-type="float" office:value="-0.004482026">
            <text:p>-0.004482026</text:p>
          </table:table-cell>
          <table:table-cell table:number-columns-repeated="4"/>
        </table:table-row>
        <table:table-row table:style-name="ro1">
          <table:table-cell office:value-type="float" office:value="374.196624755859">
            <text:p>374.1966247559</text:p>
          </table:table-cell>
          <table:table-cell office:value-type="float" office:value="-0.008002925">
            <text:p>-0.008002925</text:p>
          </table:table-cell>
          <table:table-cell table:number-columns-repeated="4"/>
        </table:table-row>
        <table:table-row table:style-name="ro1">
          <table:table-cell office:value-type="float" office:value="374.307281494141">
            <text:p>374.3072814941</text:p>
          </table:table-cell>
          <table:table-cell office:value-type="float" office:value="-0.002701156">
            <text:p>-0.002701156</text:p>
          </table:table-cell>
          <table:table-cell table:number-columns-repeated="4"/>
        </table:table-row>
        <table:table-row table:style-name="ro1">
          <table:table-cell office:value-type="float" office:value="374.417999267578">
            <text:p>374.4179992676</text:p>
          </table:table-cell>
          <table:table-cell office:value-type="float" office:value="-0.004870604">
            <text:p>-0.004870604</text:p>
          </table:table-cell>
          <table:table-cell table:number-columns-repeated="4"/>
        </table:table-row>
        <table:table-row table:style-name="ro1">
          <table:table-cell office:value-type="float" office:value="374.528686523438">
            <text:p>374.5286865234</text:p>
          </table:table-cell>
          <table:table-cell office:value-type="float" office:value="0.006893461">
            <text:p>0.006893461</text:p>
          </table:table-cell>
          <table:table-cell table:number-columns-repeated="4"/>
        </table:table-row>
        <table:table-row table:style-name="ro1">
          <table:table-cell office:value-type="float" office:value="374.639373779297">
            <text:p>374.6393737793</text:p>
          </table:table-cell>
          <table:table-cell office:value-type="float" office:value="0.008848209">
            <text:p>0.008848209</text:p>
          </table:table-cell>
          <table:table-cell table:number-columns-repeated="4"/>
        </table:table-row>
        <table:table-row table:style-name="ro1">
          <table:table-cell office:value-type="float" office:value="374.750091552734">
            <text:p>374.7500915527</text:p>
          </table:table-cell>
          <table:table-cell office:value-type="float" office:value="-0.004389537">
            <text:p>-0.004389537</text:p>
          </table:table-cell>
          <table:table-cell table:number-columns-repeated="4"/>
        </table:table-row>
        <table:table-row table:style-name="ro1">
          <table:table-cell office:value-type="float" office:value="374.860809326172">
            <text:p>374.8608093262</text:p>
          </table:table-cell>
          <table:table-cell office:value-type="float" office:value="-0.001135797">
            <text:p>-0.001135797</text:p>
          </table:table-cell>
          <table:table-cell table:number-columns-repeated="4"/>
        </table:table-row>
        <table:table-row table:style-name="ro1">
          <table:table-cell office:value-type="float" office:value="374.971527099609">
            <text:p>374.9715270996</text:p>
          </table:table-cell>
          <table:table-cell office:value-type="float" office:value="0.0004838388">
            <text:p>0.0004838388</text:p>
          </table:table-cell>
          <table:table-cell table:number-columns-repeated="4"/>
        </table:table-row>
        <table:table-row table:style-name="ro1">
          <table:table-cell office:value-type="float" office:value="375.082244873047">
            <text:p>375.082244873</text:p>
          </table:table-cell>
          <table:table-cell office:value-type="string">
            <text:p>-9.591739E-05</text:p>
          </table:table-cell>
          <table:table-cell table:number-columns-repeated="4"/>
        </table:table-row>
        <table:table-row table:style-name="ro1">
          <table:table-cell office:value-type="float" office:value="375.192993164063">
            <text:p>375.1929931641</text:p>
          </table:table-cell>
          <table:table-cell office:value-type="float" office:value="-0.003150775">
            <text:p>-0.003150775</text:p>
          </table:table-cell>
          <table:table-cell table:number-columns-repeated="4"/>
        </table:table-row>
        <table:table-row table:style-name="ro1">
          <table:table-cell office:value-type="float" office:value="375.3037109375">
            <text:p>375.3037109375</text:p>
          </table:table-cell>
          <table:table-cell office:value-type="float" office:value="-0.008218387">
            <text:p>-0.008218387</text:p>
          </table:table-cell>
          <table:table-cell table:number-columns-repeated="4"/>
        </table:table-row>
        <table:table-row table:style-name="ro1">
          <table:table-cell office:value-type="float" office:value="375.414459228516">
            <text:p>375.4144592285</text:p>
          </table:table-cell>
          <table:table-cell office:value-type="float" office:value="0.004188553">
            <text:p>0.004188553</text:p>
          </table:table-cell>
          <table:table-cell table:number-columns-repeated="4"/>
        </table:table-row>
        <table:table-row table:style-name="ro1">
          <table:table-cell office:value-type="float" office:value="375.525207519531">
            <text:p>375.5252075195</text:p>
          </table:table-cell>
          <table:table-cell office:value-type="float" office:value="-0.0008093031">
            <text:p>-0.0008093031</text:p>
          </table:table-cell>
          <table:table-cell table:number-columns-repeated="4"/>
        </table:table-row>
        <table:table-row table:style-name="ro1">
          <table:table-cell office:value-type="float" office:value="375.635986328125">
            <text:p>375.6359863281</text:p>
          </table:table-cell>
          <table:table-cell office:value-type="float" office:value="0.006933371">
            <text:p>0.006933371</text:p>
          </table:table-cell>
          <table:table-cell table:number-columns-repeated="4"/>
        </table:table-row>
        <table:table-row table:style-name="ro1">
          <table:table-cell office:value-type="float" office:value="375.746734619141">
            <text:p>375.7467346191</text:p>
          </table:table-cell>
          <table:table-cell office:value-type="float" office:value="-0.0009124616">
            <text:p>-0.0009124616</text:p>
          </table:table-cell>
          <table:table-cell table:number-columns-repeated="4"/>
        </table:table-row>
        <table:table-row table:style-name="ro1">
          <table:table-cell office:value-type="float" office:value="375.857513427734">
            <text:p>375.8575134277</text:p>
          </table:table-cell>
          <table:table-cell office:value-type="float" office:value="-0.003560593">
            <text:p>-0.003560593</text:p>
          </table:table-cell>
          <table:table-cell table:number-columns-repeated="4"/>
        </table:table-row>
        <table:table-row table:style-name="ro1">
          <table:table-cell office:value-type="float" office:value="375.968292236328">
            <text:p>375.9682922363</text:p>
          </table:table-cell>
          <table:table-cell office:value-type="float" office:value="-0.002556443">
            <text:p>-0.002556443</text:p>
          </table:table-cell>
          <table:table-cell table:number-columns-repeated="4"/>
        </table:table-row>
        <table:table-row table:style-name="ro1">
          <table:table-cell office:value-type="float" office:value="376.079071044922">
            <text:p>376.0790710449</text:p>
          </table:table-cell>
          <table:table-cell office:value-type="float" office:value="-0.006093824">
            <text:p>-0.006093824</text:p>
          </table:table-cell>
          <table:table-cell table:number-columns-repeated="4"/>
        </table:table-row>
        <table:table-row table:style-name="ro1">
          <table:table-cell office:value-type="float" office:value="376.189849853516">
            <text:p>376.1898498535</text:p>
          </table:table-cell>
          <table:table-cell office:value-type="float" office:value="0.001834723">
            <text:p>0.001834723</text:p>
          </table:table-cell>
          <table:table-cell table:number-columns-repeated="4"/>
        </table:table-row>
        <table:table-row table:style-name="ro1">
          <table:table-cell office:value-type="float" office:value="376.300628662109">
            <text:p>376.3006286621</text:p>
          </table:table-cell>
          <table:table-cell office:value-type="float" office:value="-0.001880754">
            <text:p>-0.001880754</text:p>
          </table:table-cell>
          <table:table-cell table:number-columns-repeated="4"/>
        </table:table-row>
        <table:table-row table:style-name="ro1">
          <table:table-cell office:value-type="float" office:value="376.411437988281">
            <text:p>376.4114379883</text:p>
          </table:table-cell>
          <table:table-cell office:value-type="float" office:value="-0.009704887">
            <text:p>-0.009704887</text:p>
          </table:table-cell>
          <table:table-cell table:number-columns-repeated="4"/>
        </table:table-row>
        <table:table-row table:style-name="ro1">
          <table:table-cell office:value-type="float" office:value="376.522247314453">
            <text:p>376.5222473145</text:p>
          </table:table-cell>
          <table:table-cell office:value-type="float" office:value="0.0002331619">
            <text:p>0.0002331619</text:p>
          </table:table-cell>
          <table:table-cell table:number-columns-repeated="4"/>
        </table:table-row>
        <table:table-row table:style-name="ro1">
          <table:table-cell office:value-type="float" office:value="376.633056640625">
            <text:p>376.6330566406</text:p>
          </table:table-cell>
          <table:table-cell office:value-type="float" office:value="-0.0007740876">
            <text:p>-0.0007740876</text:p>
          </table:table-cell>
          <table:table-cell table:number-columns-repeated="4"/>
        </table:table-row>
        <table:table-row table:style-name="ro1">
          <table:table-cell office:value-type="float" office:value="376.743865966797">
            <text:p>376.7438659668</text:p>
          </table:table-cell>
          <table:table-cell office:value-type="float" office:value="0.00173211">
            <text:p>0.00173211</text:p>
          </table:table-cell>
          <table:table-cell table:number-columns-repeated="4"/>
        </table:table-row>
        <table:table-row table:style-name="ro1">
          <table:table-cell office:value-type="float" office:value="376.854705810547">
            <text:p>376.8547058105</text:p>
          </table:table-cell>
          <table:table-cell office:value-type="float" office:value="0.01230021">
            <text:p>0.01230021</text:p>
          </table:table-cell>
          <table:table-cell table:number-columns-repeated="4"/>
        </table:table-row>
        <table:table-row table:style-name="ro1">
          <table:table-cell office:value-type="float" office:value="376.965515136719">
            <text:p>376.9655151367</text:p>
          </table:table-cell>
          <table:table-cell office:value-type="float" office:value="0.01515999">
            <text:p>0.01515999</text:p>
          </table:table-cell>
          <table:table-cell table:number-columns-repeated="4"/>
        </table:table-row>
        <table:table-row table:style-name="ro1">
          <table:table-cell office:value-type="float" office:value="377.076354980469">
            <text:p>377.0763549805</text:p>
          </table:table-cell>
          <table:table-cell office:value-type="float" office:value="-0.004822276">
            <text:p>-0.004822276</text:p>
          </table:table-cell>
          <table:table-cell table:number-columns-repeated="4"/>
        </table:table-row>
        <table:table-row table:style-name="ro1">
          <table:table-cell office:value-type="float" office:value="377.187194824219">
            <text:p>377.1871948242</text:p>
          </table:table-cell>
          <table:table-cell office:value-type="float" office:value="0.003753003">
            <text:p>0.003753003</text:p>
          </table:table-cell>
          <table:table-cell table:number-columns-repeated="4"/>
        </table:table-row>
        <table:table-row table:style-name="ro1">
          <table:table-cell office:value-type="float" office:value="377.298034667969">
            <text:p>377.298034668</text:p>
          </table:table-cell>
          <table:table-cell office:value-type="float" office:value="-0.006526306">
            <text:p>-0.006526306</text:p>
          </table:table-cell>
          <table:table-cell table:number-columns-repeated="4"/>
        </table:table-row>
        <table:table-row table:style-name="ro1">
          <table:table-cell office:value-type="float" office:value="377.408905029297">
            <text:p>377.4089050293</text:p>
          </table:table-cell>
          <table:table-cell office:value-type="float" office:value="0.006164149">
            <text:p>0.006164149</text:p>
          </table:table-cell>
          <table:table-cell table:number-columns-repeated="4"/>
        </table:table-row>
        <table:table-row table:style-name="ro1">
          <table:table-cell office:value-type="float" office:value="377.519744873047">
            <text:p>377.519744873</text:p>
          </table:table-cell>
          <table:table-cell office:value-type="float" office:value="-0.004422721">
            <text:p>-0.004422721</text:p>
          </table:table-cell>
          <table:table-cell table:number-columns-repeated="4"/>
        </table:table-row>
        <table:table-row table:style-name="ro1">
          <table:table-cell office:value-type="float" office:value="377.630615234375">
            <text:p>377.6306152344</text:p>
          </table:table-cell>
          <table:table-cell office:value-type="float" office:value="0.001622891">
            <text:p>0.001622891</text:p>
          </table:table-cell>
          <table:table-cell table:number-columns-repeated="4"/>
        </table:table-row>
        <table:table-row table:style-name="ro1">
          <table:table-cell office:value-type="float" office:value="377.741485595703">
            <text:p>377.7414855957</text:p>
          </table:table-cell>
          <table:table-cell office:value-type="float" office:value="-0.005119889">
            <text:p>-0.005119889</text:p>
          </table:table-cell>
          <table:table-cell table:number-columns-repeated="4"/>
        </table:table-row>
        <table:table-row table:style-name="ro1">
          <table:table-cell office:value-type="float" office:value="377.852355957031">
            <text:p>377.852355957</text:p>
          </table:table-cell>
          <table:table-cell office:value-type="float" office:value="-0.006591336">
            <text:p>-0.006591336</text:p>
          </table:table-cell>
          <table:table-cell table:number-columns-repeated="4"/>
        </table:table-row>
        <table:table-row table:style-name="ro1">
          <table:table-cell office:value-type="float" office:value="377.963256835938">
            <text:p>377.9632568359</text:p>
          </table:table-cell>
          <table:table-cell office:value-type="float" office:value="-0.00320563">
            <text:p>-0.00320563</text:p>
          </table:table-cell>
          <table:table-cell table:number-columns-repeated="4"/>
        </table:table-row>
        <table:table-row table:style-name="ro1">
          <table:table-cell office:value-type="float" office:value="378.074157714844">
            <text:p>378.0741577148</text:p>
          </table:table-cell>
          <table:table-cell office:value-type="float" office:value="0.01123181">
            <text:p>0.01123181</text:p>
          </table:table-cell>
          <table:table-cell table:number-columns-repeated="4"/>
        </table:table-row>
        <table:table-row table:style-name="ro1">
          <table:table-cell office:value-type="float" office:value="378.185028076172">
            <text:p>378.1850280762</text:p>
          </table:table-cell>
          <table:table-cell office:value-type="float" office:value="0.009523823">
            <text:p>0.009523823</text:p>
          </table:table-cell>
          <table:table-cell table:number-columns-repeated="4"/>
        </table:table-row>
        <table:table-row table:style-name="ro1">
          <table:table-cell office:value-type="float" office:value="378.295928955078">
            <text:p>378.2959289551</text:p>
          </table:table-cell>
          <table:table-cell office:value-type="float" office:value="-0.006915656">
            <text:p>-0.006915656</text:p>
          </table:table-cell>
          <table:table-cell table:number-columns-repeated="4"/>
        </table:table-row>
        <table:table-row table:style-name="ro1">
          <table:table-cell office:value-type="float" office:value="378.406860351563">
            <text:p>378.4068603516</text:p>
          </table:table-cell>
          <table:table-cell office:value-type="float" office:value="-0.0001761334">
            <text:p>-0.0001761334</text:p>
          </table:table-cell>
          <table:table-cell table:number-columns-repeated="4"/>
        </table:table-row>
        <table:table-row table:style-name="ro1">
          <table:table-cell office:value-type="float" office:value="378.517761230469">
            <text:p>378.5177612305</text:p>
          </table:table-cell>
          <table:table-cell office:value-type="float" office:value="0.004510526">
            <text:p>0.004510526</text:p>
          </table:table-cell>
          <table:table-cell table:number-columns-repeated="4"/>
        </table:table-row>
        <table:table-row table:style-name="ro1">
          <table:table-cell office:value-type="float" office:value="378.628692626953">
            <text:p>378.628692627</text:p>
          </table:table-cell>
          <table:table-cell office:value-type="float" office:value="0.001466432">
            <text:p>0.001466432</text:p>
          </table:table-cell>
          <table:table-cell table:number-columns-repeated="4"/>
        </table:table-row>
        <table:table-row table:style-name="ro1">
          <table:table-cell office:value-type="float" office:value="378.739593505859">
            <text:p>378.7395935059</text:p>
          </table:table-cell>
          <table:table-cell office:value-type="float" office:value="0.001770503">
            <text:p>0.001770503</text:p>
          </table:table-cell>
          <table:table-cell table:number-columns-repeated="4"/>
        </table:table-row>
        <table:table-row table:style-name="ro1">
          <table:table-cell office:value-type="float" office:value="378.850524902344">
            <text:p>378.8505249023</text:p>
          </table:table-cell>
          <table:table-cell office:value-type="float" office:value="0.002708828">
            <text:p>0.002708828</text:p>
          </table:table-cell>
          <table:table-cell table:number-columns-repeated="4"/>
        </table:table-row>
        <table:table-row table:style-name="ro1">
          <table:table-cell office:value-type="float" office:value="378.961486816406">
            <text:p>378.9614868164</text:p>
          </table:table-cell>
          <table:table-cell office:value-type="float" office:value="0.004775828">
            <text:p>0.004775828</text:p>
          </table:table-cell>
          <table:table-cell table:number-columns-repeated="4"/>
        </table:table-row>
        <table:table-row table:style-name="ro1">
          <table:table-cell office:value-type="float" office:value="379.072418212891">
            <text:p>379.0724182129</text:p>
          </table:table-cell>
          <table:table-cell office:value-type="float" office:value="0.009980114">
            <text:p>0.009980114</text:p>
          </table:table-cell>
          <table:table-cell table:number-columns-repeated="4"/>
        </table:table-row>
        <table:table-row table:style-name="ro1">
          <table:table-cell office:value-type="float" office:value="379.183380126953">
            <text:p>379.183380127</text:p>
          </table:table-cell>
          <table:table-cell office:value-type="float" office:value="-0.006718231">
            <text:p>-0.006718231</text:p>
          </table:table-cell>
          <table:table-cell table:number-columns-repeated="4"/>
        </table:table-row>
        <table:table-row table:style-name="ro1">
          <table:table-cell office:value-type="float" office:value="379.294311523438">
            <text:p>379.2943115234</text:p>
          </table:table-cell>
          <table:table-cell office:value-type="float" office:value="0.005408967">
            <text:p>0.005408967</text:p>
          </table:table-cell>
          <table:table-cell table:number-columns-repeated="4"/>
        </table:table-row>
        <table:table-row table:style-name="ro1">
          <table:table-cell office:value-type="float" office:value="379.4052734375">
            <text:p>379.4052734375</text:p>
          </table:table-cell>
          <table:table-cell office:value-type="float" office:value="-0.00891036">
            <text:p>-0.00891036</text:p>
          </table:table-cell>
          <table:table-cell table:number-columns-repeated="4"/>
        </table:table-row>
        <table:table-row table:style-name="ro1">
          <table:table-cell office:value-type="float" office:value="379.516235351563">
            <text:p>379.5162353516</text:p>
          </table:table-cell>
          <table:table-cell office:value-type="float" office:value="-0.00674939">
            <text:p>-0.00674939</text:p>
          </table:table-cell>
          <table:table-cell table:number-columns-repeated="4"/>
        </table:table-row>
        <table:table-row table:style-name="ro1">
          <table:table-cell office:value-type="float" office:value="379.627227783203">
            <text:p>379.6272277832</text:p>
          </table:table-cell>
          <table:table-cell office:value-type="float" office:value="-0.002599912">
            <text:p>-0.002599912</text:p>
          </table:table-cell>
          <table:table-cell table:number-columns-repeated="4"/>
        </table:table-row>
        <table:table-row table:style-name="ro1">
          <table:table-cell office:value-type="float" office:value="379.738189697266">
            <text:p>379.7381896973</text:p>
          </table:table-cell>
          <table:table-cell office:value-type="float" office:value="0.01056387">
            <text:p>0.01056387</text:p>
          </table:table-cell>
          <table:table-cell table:number-columns-repeated="4"/>
        </table:table-row>
        <table:table-row table:style-name="ro1">
          <table:table-cell office:value-type="float" office:value="379.849182128906">
            <text:p>379.8491821289</text:p>
          </table:table-cell>
          <table:table-cell office:value-type="float" office:value="-0.004801949">
            <text:p>-0.004801949</text:p>
          </table:table-cell>
          <table:table-cell table:number-columns-repeated="4"/>
        </table:table-row>
        <table:table-row table:style-name="ro1">
          <table:table-cell office:value-type="float" office:value="379.960174560547">
            <text:p>379.9601745605</text:p>
          </table:table-cell>
          <table:table-cell office:value-type="float" office:value="-0.001334504">
            <text:p>-0.001334504</text:p>
          </table:table-cell>
          <table:table-cell table:number-columns-repeated="4"/>
        </table:table-row>
        <table:table-row table:style-name="ro1">
          <table:table-cell office:value-type="float" office:value="380.071166992188">
            <text:p>380.0711669922</text:p>
          </table:table-cell>
          <table:table-cell office:value-type="float" office:value="-0.004677659">
            <text:p>-0.004677659</text:p>
          </table:table-cell>
          <table:table-cell table:number-columns-repeated="4"/>
        </table:table-row>
        <table:table-row table:style-name="ro1">
          <table:table-cell office:value-type="float" office:value="380.182189941406">
            <text:p>380.1821899414</text:p>
          </table:table-cell>
          <table:table-cell office:value-type="float" office:value="0.009946878">
            <text:p>0.009946878</text:p>
          </table:table-cell>
          <table:table-cell table:number-columns-repeated="4"/>
        </table:table-row>
        <table:table-row table:style-name="ro1">
          <table:table-cell office:value-type="float" office:value="380.293182373047">
            <text:p>380.293182373</text:p>
          </table:table-cell>
          <table:table-cell office:value-type="float" office:value="0.005906184">
            <text:p>0.005906184</text:p>
          </table:table-cell>
          <table:table-cell table:number-columns-repeated="4"/>
        </table:table-row>
        <table:table-row table:style-name="ro1">
          <table:table-cell office:value-type="float" office:value="380.404205322266">
            <text:p>380.4042053223</text:p>
          </table:table-cell>
          <table:table-cell office:value-type="float" office:value="-0.01157378">
            <text:p>-0.01157378</text:p>
          </table:table-cell>
          <table:table-cell table:number-columns-repeated="4"/>
        </table:table-row>
        <table:table-row table:style-name="ro1">
          <table:table-cell office:value-type="float" office:value="380.515228271484">
            <text:p>380.5152282715</text:p>
          </table:table-cell>
          <table:table-cell office:value-type="float" office:value="-0.007032962">
            <text:p>-0.007032962</text:p>
          </table:table-cell>
          <table:table-cell table:number-columns-repeated="4"/>
        </table:table-row>
        <table:table-row table:style-name="ro1">
          <table:table-cell office:value-type="float" office:value="380.626251220703">
            <text:p>380.6262512207</text:p>
          </table:table-cell>
          <table:table-cell office:value-type="float" office:value="-0.0004532201">
            <text:p>-0.0004532201</text:p>
          </table:table-cell>
          <table:table-cell table:number-columns-repeated="4"/>
        </table:table-row>
        <table:table-row table:style-name="ro1">
          <table:table-cell office:value-type="float" office:value="380.737274169922">
            <text:p>380.7372741699</text:p>
          </table:table-cell>
          <table:table-cell office:value-type="float" office:value="-0.009341548">
            <text:p>-0.009341548</text:p>
          </table:table-cell>
          <table:table-cell table:number-columns-repeated="4"/>
        </table:table-row>
        <table:table-row table:style-name="ro1">
          <table:table-cell office:value-type="float" office:value="380.848327636719">
            <text:p>380.8483276367</text:p>
          </table:table-cell>
          <table:table-cell office:value-type="float" office:value="0.01422705">
            <text:p>0.01422705</text:p>
          </table:table-cell>
          <table:table-cell table:number-columns-repeated="4"/>
        </table:table-row>
        <table:table-row table:style-name="ro1">
          <table:table-cell office:value-type="float" office:value="380.959381103516">
            <text:p>380.9593811035</text:p>
          </table:table-cell>
          <table:table-cell office:value-type="float" office:value="-0.001066544">
            <text:p>-0.001066544</text:p>
          </table:table-cell>
          <table:table-cell table:number-columns-repeated="4"/>
        </table:table-row>
        <table:table-row table:style-name="ro1">
          <table:table-cell office:value-type="float" office:value="381.070404052734">
            <text:p>381.0704040527</text:p>
          </table:table-cell>
          <table:table-cell office:value-type="float" office:value="-0.00446419">
            <text:p>-0.00446419</text:p>
          </table:table-cell>
          <table:table-cell table:number-columns-repeated="4"/>
        </table:table-row>
        <table:table-row table:style-name="ro1">
          <table:table-cell office:value-type="float" office:value="381.181488037109">
            <text:p>381.1814880371</text:p>
          </table:table-cell>
          <table:table-cell office:value-type="float" office:value="-0.005529759">
            <text:p>-0.005529759</text:p>
          </table:table-cell>
          <table:table-cell table:number-columns-repeated="4"/>
        </table:table-row>
        <table:table-row table:style-name="ro1">
          <table:table-cell office:value-type="float" office:value="381.292541503906">
            <text:p>381.2925415039</text:p>
          </table:table-cell>
          <table:table-cell office:value-type="float" office:value="-0.004145672">
            <text:p>-0.004145672</text:p>
          </table:table-cell>
          <table:table-cell table:number-columns-repeated="4"/>
        </table:table-row>
        <table:table-row table:style-name="ro1">
          <table:table-cell office:value-type="float" office:value="381.403594970703">
            <text:p>381.4035949707</text:p>
          </table:table-cell>
          <table:table-cell office:value-type="float" office:value="0.01129669">
            <text:p>0.01129669</text:p>
          </table:table-cell>
          <table:table-cell table:number-columns-repeated="4"/>
        </table:table-row>
        <table:table-row table:style-name="ro1">
          <table:table-cell office:value-type="float" office:value="381.514678955078">
            <text:p>381.5146789551</text:p>
          </table:table-cell>
          <table:table-cell office:value-type="float" office:value="0.009740371">
            <text:p>0.009740371</text:p>
          </table:table-cell>
          <table:table-cell table:number-columns-repeated="4"/>
        </table:table-row>
        <table:table-row table:style-name="ro1">
          <table:table-cell office:value-type="float" office:value="381.625762939453">
            <text:p>381.6257629395</text:p>
          </table:table-cell>
          <table:table-cell office:value-type="float" office:value="0.01148488">
            <text:p>0.01148488</text:p>
          </table:table-cell>
          <table:table-cell table:number-columns-repeated="4"/>
        </table:table-row>
        <table:table-row table:style-name="ro1">
          <table:table-cell office:value-type="float" office:value="381.736846923828">
            <text:p>381.7368469238</text:p>
          </table:table-cell>
          <table:table-cell office:value-type="float" office:value="0.008342922">
            <text:p>0.008342922</text:p>
          </table:table-cell>
          <table:table-cell table:number-columns-repeated="4"/>
        </table:table-row>
        <table:table-row table:style-name="ro1">
          <table:table-cell office:value-type="float" office:value="381.847930908203">
            <text:p>381.8479309082</text:p>
          </table:table-cell>
          <table:table-cell office:value-type="float" office:value="-0.005960368">
            <text:p>-0.005960368</text:p>
          </table:table-cell>
          <table:table-cell table:number-columns-repeated="4"/>
        </table:table-row>
        <table:table-row table:style-name="ro1">
          <table:table-cell office:value-type="float" office:value="381.959045410156">
            <text:p>381.9590454102</text:p>
          </table:table-cell>
          <table:table-cell office:value-type="float" office:value="0.008234232">
            <text:p>0.008234232</text:p>
          </table:table-cell>
          <table:table-cell table:number-columns-repeated="4"/>
        </table:table-row>
        <table:table-row table:style-name="ro1">
          <table:table-cell office:value-type="float" office:value="382.070129394531">
            <text:p>382.0701293945</text:p>
          </table:table-cell>
          <table:table-cell office:value-type="float" office:value="0.001198114">
            <text:p>0.001198114</text:p>
          </table:table-cell>
          <table:table-cell table:number-columns-repeated="4"/>
        </table:table-row>
        <table:table-row table:style-name="ro1">
          <table:table-cell office:value-type="float" office:value="382.181243896484">
            <text:p>382.1812438965</text:p>
          </table:table-cell>
          <table:table-cell office:value-type="float" office:value="0.004793785">
            <text:p>0.004793785</text:p>
          </table:table-cell>
          <table:table-cell table:number-columns-repeated="4"/>
        </table:table-row>
        <table:table-row table:style-name="ro1">
          <table:table-cell office:value-type="float" office:value="382.292358398438">
            <text:p>382.2923583984</text:p>
          </table:table-cell>
          <table:table-cell office:value-type="float" office:value="-0.003781458">
            <text:p>-0.003781458</text:p>
          </table:table-cell>
          <table:table-cell table:number-columns-repeated="4"/>
        </table:table-row>
        <table:table-row table:style-name="ro1">
          <table:table-cell office:value-type="float" office:value="382.403503417969">
            <text:p>382.403503418</text:p>
          </table:table-cell>
          <table:table-cell office:value-type="float" office:value="0.004407111">
            <text:p>0.004407111</text:p>
          </table:table-cell>
          <table:table-cell table:number-columns-repeated="4"/>
        </table:table-row>
        <table:table-row table:style-name="ro1">
          <table:table-cell office:value-type="float" office:value="382.514617919922">
            <text:p>382.5146179199</text:p>
          </table:table-cell>
          <table:table-cell office:value-type="float" office:value="0.01562442">
            <text:p>0.01562442</text:p>
          </table:table-cell>
          <table:table-cell table:number-columns-repeated="4"/>
        </table:table-row>
        <table:table-row table:style-name="ro1">
          <table:table-cell office:value-type="float" office:value="382.625762939453">
            <text:p>382.6257629395</text:p>
          </table:table-cell>
          <table:table-cell office:value-type="float" office:value="-0.001663968">
            <text:p>-0.001663968</text:p>
          </table:table-cell>
          <table:table-cell table:number-columns-repeated="4"/>
        </table:table-row>
        <table:table-row table:style-name="ro1">
          <table:table-cell office:value-type="float" office:value="382.736907958984">
            <text:p>382.736907959</text:p>
          </table:table-cell>
          <table:table-cell office:value-type="float" office:value="0.007453039">
            <text:p>0.007453039</text:p>
          </table:table-cell>
          <table:table-cell table:number-columns-repeated="4"/>
        </table:table-row>
        <table:table-row table:style-name="ro1">
          <table:table-cell office:value-type="float" office:value="382.848052978516">
            <text:p>382.8480529785</text:p>
          </table:table-cell>
          <table:table-cell office:value-type="float" office:value="0.004028356">
            <text:p>0.004028356</text:p>
          </table:table-cell>
          <table:table-cell table:number-columns-repeated="4"/>
        </table:table-row>
        <table:table-row table:style-name="ro1">
          <table:table-cell office:value-type="float" office:value="382.959197998047">
            <text:p>382.959197998</text:p>
          </table:table-cell>
          <table:table-cell office:value-type="float" office:value="0.008648969">
            <text:p>0.008648969</text:p>
          </table:table-cell>
          <table:table-cell table:number-columns-repeated="4"/>
        </table:table-row>
        <table:table-row table:style-name="ro1">
          <table:table-cell office:value-type="float" office:value="383.070343017578">
            <text:p>383.0703430176</text:p>
          </table:table-cell>
          <table:table-cell office:value-type="float" office:value="0.003836031">
            <text:p>0.003836031</text:p>
          </table:table-cell>
          <table:table-cell table:number-columns-repeated="4"/>
        </table:table-row>
        <table:table-row table:style-name="ro1">
          <table:table-cell office:value-type="float" office:value="383.181518554688">
            <text:p>383.1815185547</text:p>
          </table:table-cell>
          <table:table-cell office:value-type="float" office:value="0.01328681">
            <text:p>0.01328681</text:p>
          </table:table-cell>
          <table:table-cell table:number-columns-repeated="4"/>
        </table:table-row>
        <table:table-row table:style-name="ro1">
          <table:table-cell office:value-type="float" office:value="383.292694091797">
            <text:p>383.2926940918</text:p>
          </table:table-cell>
          <table:table-cell office:value-type="float" office:value="0.002967611">
            <text:p>0.002967611</text:p>
          </table:table-cell>
          <table:table-cell table:number-columns-repeated="4"/>
        </table:table-row>
        <table:table-row table:style-name="ro1">
          <table:table-cell office:value-type="float" office:value="383.403869628906">
            <text:p>383.4038696289</text:p>
          </table:table-cell>
          <table:table-cell office:value-type="float" office:value="-0.00202377">
            <text:p>-0.00202377</text:p>
          </table:table-cell>
          <table:table-cell table:number-columns-repeated="4"/>
        </table:table-row>
        <table:table-row table:style-name="ro1">
          <table:table-cell office:value-type="float" office:value="383.515045166016">
            <text:p>383.515045166</text:p>
          </table:table-cell>
          <table:table-cell office:value-type="float" office:value="-0.0009261724">
            <text:p>-0.0009261724</text:p>
          </table:table-cell>
          <table:table-cell table:number-columns-repeated="4"/>
        </table:table-row>
        <table:table-row table:style-name="ro1">
          <table:table-cell office:value-type="float" office:value="383.626220703125">
            <text:p>383.6262207031</text:p>
          </table:table-cell>
          <table:table-cell office:value-type="float" office:value="0.01115507">
            <text:p>0.01115507</text:p>
          </table:table-cell>
          <table:table-cell table:number-columns-repeated="4"/>
        </table:table-row>
        <table:table-row table:style-name="ro1">
          <table:table-cell office:value-type="float" office:value="383.737426757813">
            <text:p>383.7374267578</text:p>
          </table:table-cell>
          <table:table-cell office:value-type="float" office:value="0.01270508">
            <text:p>0.01270508</text:p>
          </table:table-cell>
          <table:table-cell table:number-columns-repeated="4"/>
        </table:table-row>
        <table:table-row table:style-name="ro1">
          <table:table-cell office:value-type="float" office:value="383.8486328125">
            <text:p>383.8486328125</text:p>
          </table:table-cell>
          <table:table-cell office:value-type="float" office:value="0.0004727395">
            <text:p>0.0004727395</text:p>
          </table:table-cell>
          <table:table-cell table:number-columns-repeated="4"/>
        </table:table-row>
        <table:table-row table:style-name="ro1">
          <table:table-cell office:value-type="float" office:value="383.959838867188">
            <text:p>383.9598388672</text:p>
          </table:table-cell>
          <table:table-cell office:value-type="float" office:value="-0.0008086697">
            <text:p>-0.0008086697</text:p>
          </table:table-cell>
          <table:table-cell table:number-columns-repeated="4"/>
        </table:table-row>
        <table:table-row table:style-name="ro1">
          <table:table-cell office:value-type="float" office:value="384.071044921875">
            <text:p>384.0710449219</text:p>
          </table:table-cell>
          <table:table-cell office:value-type="float" office:value="-0.008059311">
            <text:p>-0.008059311</text:p>
          </table:table-cell>
          <table:table-cell table:number-columns-repeated="4"/>
        </table:table-row>
        <table:table-row table:style-name="ro1">
          <table:table-cell office:value-type="float" office:value="384.182250976563">
            <text:p>384.1822509766</text:p>
          </table:table-cell>
          <table:table-cell office:value-type="float" office:value="0.01012702">
            <text:p>0.01012702</text:p>
          </table:table-cell>
          <table:table-cell table:number-columns-repeated="4"/>
        </table:table-row>
        <table:table-row table:style-name="ro1">
          <table:table-cell office:value-type="float" office:value="384.293487548828">
            <text:p>384.2934875488</text:p>
          </table:table-cell>
          <table:table-cell office:value-type="float" office:value="-0.007039455">
            <text:p>-0.007039455</text:p>
          </table:table-cell>
          <table:table-cell table:number-columns-repeated="4"/>
        </table:table-row>
        <table:table-row table:style-name="ro1">
          <table:table-cell office:value-type="float" office:value="384.404693603516">
            <text:p>384.4046936035</text:p>
          </table:table-cell>
          <table:table-cell office:value-type="float" office:value="0.01124955">
            <text:p>0.01124955</text:p>
          </table:table-cell>
          <table:table-cell table:number-columns-repeated="4"/>
        </table:table-row>
        <table:table-row table:style-name="ro1">
          <table:table-cell office:value-type="float" office:value="384.515930175781">
            <text:p>384.5159301758</text:p>
          </table:table-cell>
          <table:table-cell office:value-type="float" office:value="0.01148207">
            <text:p>0.01148207</text:p>
          </table:table-cell>
          <table:table-cell table:number-columns-repeated="4"/>
        </table:table-row>
        <table:table-row table:style-name="ro1">
          <table:table-cell office:value-type="float" office:value="384.627197265625">
            <text:p>384.6271972656</text:p>
          </table:table-cell>
          <table:table-cell office:value-type="float" office:value="-0.008677459">
            <text:p>-0.008677459</text:p>
          </table:table-cell>
          <table:table-cell table:number-columns-repeated="4"/>
        </table:table-row>
        <table:table-row table:style-name="ro1">
          <table:table-cell office:value-type="float" office:value="384.738433837891">
            <text:p>384.7384338379</text:p>
          </table:table-cell>
          <table:table-cell office:value-type="float" office:value="-0.002883961">
            <text:p>-0.002883961</text:p>
          </table:table-cell>
          <table:table-cell table:number-columns-repeated="4"/>
        </table:table-row>
        <table:table-row table:style-name="ro1">
          <table:table-cell office:value-type="float" office:value="384.849670410156">
            <text:p>384.8496704102</text:p>
          </table:table-cell>
          <table:table-cell office:value-type="float" office:value="0.01613582">
            <text:p>0.01613582</text:p>
          </table:table-cell>
          <table:table-cell table:number-columns-repeated="4"/>
        </table:table-row>
        <table:table-row table:style-name="ro1">
          <table:table-cell office:value-type="float" office:value="384.9609375">
            <text:p>384.9609375</text:p>
          </table:table-cell>
          <table:table-cell office:value-type="float" office:value="0.0132735">
            <text:p>0.0132735</text:p>
          </table:table-cell>
          <table:table-cell table:number-columns-repeated="4"/>
        </table:table-row>
        <table:table-row table:style-name="ro1">
          <table:table-cell office:value-type="float" office:value="385.072204589844">
            <text:p>385.0722045898</text:p>
          </table:table-cell>
          <table:table-cell office:value-type="float" office:value="-0.004195221">
            <text:p>-0.004195221</text:p>
          </table:table-cell>
          <table:table-cell table:number-columns-repeated="4"/>
        </table:table-row>
        <table:table-row table:style-name="ro1">
          <table:table-cell office:value-type="float" office:value="385.183471679688">
            <text:p>385.1834716797</text:p>
          </table:table-cell>
          <table:table-cell office:value-type="float" office:value="0.01318866">
            <text:p>0.01318866</text:p>
          </table:table-cell>
          <table:table-cell table:number-columns-repeated="4"/>
        </table:table-row>
        <table:table-row table:style-name="ro1">
          <table:table-cell office:value-type="float" office:value="385.294738769531">
            <text:p>385.2947387695</text:p>
          </table:table-cell>
          <table:table-cell office:value-type="float" office:value="0.008056658">
            <text:p>0.008056658</text:p>
          </table:table-cell>
          <table:table-cell table:number-columns-repeated="4"/>
        </table:table-row>
        <table:table-row table:style-name="ro1">
          <table:table-cell office:value-type="float" office:value="385.406036376953">
            <text:p>385.406036377</text:p>
          </table:table-cell>
          <table:table-cell office:value-type="float" office:value="-0.002659528">
            <text:p>-0.002659528</text:p>
          </table:table-cell>
          <table:table-cell table:number-columns-repeated="4"/>
        </table:table-row>
        <table:table-row table:style-name="ro1">
          <table:table-cell office:value-type="float" office:value="385.517333984375">
            <text:p>385.5173339844</text:p>
          </table:table-cell>
          <table:table-cell office:value-type="float" office:value="0.004581318">
            <text:p>0.004581318</text:p>
          </table:table-cell>
          <table:table-cell table:number-columns-repeated="4"/>
        </table:table-row>
        <table:table-row table:style-name="ro1">
          <table:table-cell office:value-type="float" office:value="385.628601074219">
            <text:p>385.6286010742</text:p>
          </table:table-cell>
          <table:table-cell office:value-type="float" office:value="-0.003876351">
            <text:p>-0.003876351</text:p>
          </table:table-cell>
          <table:table-cell table:number-columns-repeated="4"/>
        </table:table-row>
        <table:table-row table:style-name="ro1">
          <table:table-cell office:value-type="float" office:value="385.739898681641">
            <text:p>385.7398986816</text:p>
          </table:table-cell>
          <table:table-cell office:value-type="float" office:value="-0.007487557">
            <text:p>-0.007487557</text:p>
          </table:table-cell>
          <table:table-cell table:number-columns-repeated="4"/>
        </table:table-row>
        <table:table-row table:style-name="ro1">
          <table:table-cell office:value-type="float" office:value="385.851226806641">
            <text:p>385.8512268066</text:p>
          </table:table-cell>
          <table:table-cell office:value-type="float" office:value="0.01177296">
            <text:p>0.01177296</text:p>
          </table:table-cell>
          <table:table-cell table:number-columns-repeated="4"/>
        </table:table-row>
        <table:table-row table:style-name="ro1">
          <table:table-cell office:value-type="float" office:value="385.962524414063">
            <text:p>385.9625244141</text:p>
          </table:table-cell>
          <table:table-cell office:value-type="float" office:value="-0.003691101">
            <text:p>-0.003691101</text:p>
          </table:table-cell>
          <table:table-cell table:number-columns-repeated="4"/>
        </table:table-row>
        <table:table-row table:style-name="ro1">
          <table:table-cell office:value-type="float" office:value="386.073852539063">
            <text:p>386.0738525391</text:p>
          </table:table-cell>
          <table:table-cell office:value-type="float" office:value="0.01243559">
            <text:p>0.01243559</text:p>
          </table:table-cell>
          <table:table-cell table:number-columns-repeated="4"/>
        </table:table-row>
        <table:table-row table:style-name="ro1">
          <table:table-cell office:value-type="float" office:value="386.185180664063">
            <text:p>386.1851806641</text:p>
          </table:table-cell>
          <table:table-cell office:value-type="float" office:value="0.0006096518">
            <text:p>0.0006096518</text:p>
          </table:table-cell>
          <table:table-cell table:number-columns-repeated="4"/>
        </table:table-row>
        <table:table-row table:style-name="ro1">
          <table:table-cell office:value-type="float" office:value="386.296508789063">
            <text:p>386.2965087891</text:p>
          </table:table-cell>
          <table:table-cell office:value-type="float" office:value="0.00660978">
            <text:p>0.00660978</text:p>
          </table:table-cell>
          <table:table-cell table:number-columns-repeated="4"/>
        </table:table-row>
        <table:table-row table:style-name="ro1">
          <table:table-cell office:value-type="float" office:value="386.407836914063">
            <text:p>386.4078369141</text:p>
          </table:table-cell>
          <table:table-cell office:value-type="float" office:value="0.002236468">
            <text:p>0.002236468</text:p>
          </table:table-cell>
          <table:table-cell table:number-columns-repeated="4"/>
        </table:table-row>
        <table:table-row table:style-name="ro1">
          <table:table-cell office:value-type="float" office:value="386.519165039063">
            <text:p>386.5191650391</text:p>
          </table:table-cell>
          <table:table-cell office:value-type="float" office:value="0.002783222">
            <text:p>0.002783222</text:p>
          </table:table-cell>
          <table:table-cell table:number-columns-repeated="4"/>
        </table:table-row>
        <table:table-row table:style-name="ro1">
          <table:table-cell office:value-type="float" office:value="386.630523681641">
            <text:p>386.6305236816</text:p>
          </table:table-cell>
          <table:table-cell office:value-type="float" office:value="0.003575768">
            <text:p>0.003575768</text:p>
          </table:table-cell>
          <table:table-cell table:number-columns-repeated="4"/>
        </table:table-row>
        <table:table-row table:style-name="ro1">
          <table:table-cell office:value-type="float" office:value="386.741882324219">
            <text:p>386.7418823242</text:p>
          </table:table-cell>
          <table:table-cell office:value-type="float" office:value="0.001350982">
            <text:p>0.001350982</text:p>
          </table:table-cell>
          <table:table-cell table:number-columns-repeated="4"/>
        </table:table-row>
        <table:table-row table:style-name="ro1">
          <table:table-cell office:value-type="float" office:value="386.853240966797">
            <text:p>386.8532409668</text:p>
          </table:table-cell>
          <table:table-cell office:value-type="float" office:value="-0.002247466">
            <text:p>-0.002247466</text:p>
          </table:table-cell>
          <table:table-cell table:number-columns-repeated="4"/>
        </table:table-row>
        <table:table-row table:style-name="ro1">
          <table:table-cell office:value-type="float" office:value="386.964599609375">
            <text:p>386.9645996094</text:p>
          </table:table-cell>
          <table:table-cell office:value-type="float" office:value="-0.004321664">
            <text:p>-0.004321664</text:p>
          </table:table-cell>
          <table:table-cell table:number-columns-repeated="4"/>
        </table:table-row>
        <table:table-row table:style-name="ro1">
          <table:table-cell office:value-type="float" office:value="387.075958251953">
            <text:p>387.075958252</text:p>
          </table:table-cell>
          <table:table-cell office:value-type="float" office:value="0.00831529">
            <text:p>0.00831529</text:p>
          </table:table-cell>
          <table:table-cell table:number-columns-repeated="4"/>
        </table:table-row>
        <table:table-row table:style-name="ro1">
          <table:table-cell office:value-type="float" office:value="387.187347412109">
            <text:p>387.1873474121</text:p>
          </table:table-cell>
          <table:table-cell office:value-type="float" office:value="-0.004760192">
            <text:p>-0.004760192</text:p>
          </table:table-cell>
          <table:table-cell table:number-columns-repeated="4"/>
        </table:table-row>
        <table:table-row table:style-name="ro1">
          <table:table-cell office:value-type="float" office:value="387.298736572266">
            <text:p>387.2987365723</text:p>
          </table:table-cell>
          <table:table-cell office:value-type="float" office:value="0.01415788">
            <text:p>0.01415788</text:p>
          </table:table-cell>
          <table:table-cell table:number-columns-repeated="4"/>
        </table:table-row>
        <table:table-row table:style-name="ro1">
          <table:table-cell office:value-type="float" office:value="387.410095214844">
            <text:p>387.4100952148</text:p>
          </table:table-cell>
          <table:table-cell office:value-type="float" office:value="0.004054716">
            <text:p>0.004054716</text:p>
          </table:table-cell>
          <table:table-cell table:number-columns-repeated="4"/>
        </table:table-row>
        <table:table-row table:style-name="ro1">
          <table:table-cell office:value-type="float" office:value="387.521514892578">
            <text:p>387.5215148926</text:p>
          </table:table-cell>
          <table:table-cell office:value-type="float" office:value="-0.0004664132">
            <text:p>-0.0004664132</text:p>
          </table:table-cell>
          <table:table-cell table:number-columns-repeated="4"/>
        </table:table-row>
        <table:table-row table:style-name="ro1">
          <table:table-cell office:value-type="float" office:value="387.632904052734">
            <text:p>387.6329040527</text:p>
          </table:table-cell>
          <table:table-cell office:value-type="float" office:value="0.0003000647">
            <text:p>0.0003000647</text:p>
          </table:table-cell>
          <table:table-cell table:number-columns-repeated="4"/>
        </table:table-row>
        <table:table-row table:style-name="ro1">
          <table:table-cell office:value-type="float" office:value="387.744293212891">
            <text:p>387.7442932129</text:p>
          </table:table-cell>
          <table:table-cell office:value-type="float" office:value="0.01179017">
            <text:p>0.01179017</text:p>
          </table:table-cell>
          <table:table-cell table:number-columns-repeated="4"/>
        </table:table-row>
        <table:table-row table:style-name="ro1">
          <table:table-cell office:value-type="float" office:value="387.855712890625">
            <text:p>387.8557128906</text:p>
          </table:table-cell>
          <table:table-cell office:value-type="float" office:value="0.001182516">
            <text:p>0.001182516</text:p>
          </table:table-cell>
          <table:table-cell table:number-columns-repeated="4"/>
        </table:table-row>
        <table:table-row table:style-name="ro1">
          <table:table-cell office:value-type="float" office:value="387.967132568359">
            <text:p>387.9671325684</text:p>
          </table:table-cell>
          <table:table-cell office:value-type="float" office:value="0.00422885">
            <text:p>0.00422885</text:p>
          </table:table-cell>
          <table:table-cell table:number-columns-repeated="4"/>
        </table:table-row>
        <table:table-row table:style-name="ro1">
          <table:table-cell office:value-type="float" office:value="388.078552246094">
            <text:p>388.0785522461</text:p>
          </table:table-cell>
          <table:table-cell office:value-type="float" office:value="0.001815396">
            <text:p>0.001815396</text:p>
          </table:table-cell>
          <table:table-cell table:number-columns-repeated="4"/>
        </table:table-row>
        <table:table-row table:style-name="ro1">
          <table:table-cell office:value-type="float" office:value="388.189971923828">
            <text:p>388.1899719238</text:p>
          </table:table-cell>
          <table:table-cell office:value-type="float" office:value="0.0008025427">
            <text:p>0.0008025427</text:p>
          </table:table-cell>
          <table:table-cell table:number-columns-repeated="4"/>
        </table:table-row>
        <table:table-row table:style-name="ro1">
          <table:table-cell office:value-type="float" office:value="388.301422119141">
            <text:p>388.3014221191</text:p>
          </table:table-cell>
          <table:table-cell office:value-type="float" office:value="-0.004596362">
            <text:p>-0.004596362</text:p>
          </table:table-cell>
          <table:table-cell table:number-columns-repeated="4"/>
        </table:table-row>
        <table:table-row table:style-name="ro1">
          <table:table-cell office:value-type="float" office:value="388.412872314453">
            <text:p>388.4128723145</text:p>
          </table:table-cell>
          <table:table-cell office:value-type="float" office:value="-0.007911222">
            <text:p>-0.007911222</text:p>
          </table:table-cell>
          <table:table-cell table:number-columns-repeated="4"/>
        </table:table-row>
        <table:table-row table:style-name="ro1">
          <table:table-cell office:value-type="float" office:value="388.524291992188">
            <text:p>388.5242919922</text:p>
          </table:table-cell>
          <table:table-cell office:value-type="float" office:value="0.005966521">
            <text:p>0.005966521</text:p>
          </table:table-cell>
          <table:table-cell table:number-columns-repeated="4"/>
        </table:table-row>
        <table:table-row table:style-name="ro1">
          <table:table-cell office:value-type="float" office:value="388.635772705078">
            <text:p>388.6357727051</text:p>
          </table:table-cell>
          <table:table-cell office:value-type="float" office:value="0.005032437">
            <text:p>0.005032437</text:p>
          </table:table-cell>
          <table:table-cell table:number-columns-repeated="4"/>
        </table:table-row>
        <table:table-row table:style-name="ro1">
          <table:table-cell office:value-type="float" office:value="388.747222900391">
            <text:p>388.7472229004</text:p>
          </table:table-cell>
          <table:table-cell office:value-type="string">
            <text:p>-1.988577E-05</text:p>
          </table:table-cell>
          <table:table-cell table:number-columns-repeated="4"/>
        </table:table-row>
        <table:table-row table:style-name="ro1">
          <table:table-cell office:value-type="float" office:value="388.858673095703">
            <text:p>388.8586730957</text:p>
          </table:table-cell>
          <table:table-cell office:value-type="float" office:value="-0.007570819">
            <text:p>-0.007570819</text:p>
          </table:table-cell>
          <table:table-cell table:number-columns-repeated="4"/>
        </table:table-row>
        <table:table-row table:style-name="ro1">
          <table:table-cell office:value-type="float" office:value="388.970153808594">
            <text:p>388.9701538086</text:p>
          </table:table-cell>
          <table:table-cell office:value-type="float" office:value="0.003313559">
            <text:p>0.003313559</text:p>
          </table:table-cell>
          <table:table-cell table:number-columns-repeated="4"/>
        </table:table-row>
        <table:table-row table:style-name="ro1">
          <table:table-cell office:value-type="float" office:value="389.081634521484">
            <text:p>389.0816345215</text:p>
          </table:table-cell>
          <table:table-cell office:value-type="float" office:value="-0.0003711076">
            <text:p>-0.0003711076</text:p>
          </table:table-cell>
          <table:table-cell table:number-columns-repeated="4"/>
        </table:table-row>
        <table:table-row table:style-name="ro1">
          <table:table-cell office:value-type="float" office:value="389.193115234375">
            <text:p>389.1931152344</text:p>
          </table:table-cell>
          <table:table-cell office:value-type="float" office:value="0.002330969">
            <text:p>0.002330969</text:p>
          </table:table-cell>
          <table:table-cell table:number-columns-repeated="4"/>
        </table:table-row>
        <table:table-row table:style-name="ro1">
          <table:table-cell office:value-type="float" office:value="389.304595947266">
            <text:p>389.3045959473</text:p>
          </table:table-cell>
          <table:table-cell office:value-type="float" office:value="-0.0007356796">
            <text:p>-0.0007356796</text:p>
          </table:table-cell>
          <table:table-cell table:number-columns-repeated="4"/>
        </table:table-row>
        <table:table-row table:style-name="ro1">
          <table:table-cell office:value-type="float" office:value="389.416076660156">
            <text:p>389.4160766602</text:p>
          </table:table-cell>
          <table:table-cell office:value-type="float" office:value="0.004041775">
            <text:p>0.004041775</text:p>
          </table:table-cell>
          <table:table-cell table:number-columns-repeated="4"/>
        </table:table-row>
        <table:table-row table:style-name="ro1">
          <table:table-cell office:value-type="float" office:value="389.527587890625">
            <text:p>389.5275878906</text:p>
          </table:table-cell>
          <table:table-cell office:value-type="float" office:value="-0.00275337">
            <text:p>-0.00275337</text:p>
          </table:table-cell>
          <table:table-cell table:number-columns-repeated="4"/>
        </table:table-row>
        <table:table-row table:style-name="ro1">
          <table:table-cell office:value-type="float" office:value="389.639099121094">
            <text:p>389.6390991211</text:p>
          </table:table-cell>
          <table:table-cell office:value-type="float" office:value="0.01276773">
            <text:p>0.01276773</text:p>
          </table:table-cell>
          <table:table-cell table:number-columns-repeated="4"/>
        </table:table-row>
        <table:table-row table:style-name="ro1">
          <table:table-cell office:value-type="float" office:value="389.750610351563">
            <text:p>389.7506103516</text:p>
          </table:table-cell>
          <table:table-cell office:value-type="float" office:value="-0.002926678">
            <text:p>-0.002926678</text:p>
          </table:table-cell>
          <table:table-cell table:number-columns-repeated="4"/>
        </table:table-row>
        <table:table-row table:style-name="ro1">
          <table:table-cell office:value-type="float" office:value="389.862121582031">
            <text:p>389.862121582</text:p>
          </table:table-cell>
          <table:table-cell office:value-type="float" office:value="-0.003698326">
            <text:p>-0.003698326</text:p>
          </table:table-cell>
          <table:table-cell table:number-columns-repeated="4"/>
        </table:table-row>
        <table:table-row table:style-name="ro1">
          <table:table-cell office:value-type="float" office:value="389.9736328125">
            <text:p>389.9736328125</text:p>
          </table:table-cell>
          <table:table-cell office:value-type="float" office:value="-0.001449366">
            <text:p>-0.001449366</text:p>
          </table:table-cell>
          <table:table-cell table:number-columns-repeated="4"/>
        </table:table-row>
        <table:table-row table:style-name="ro1">
          <table:table-cell office:value-type="float" office:value="390.085174560547">
            <text:p>390.0851745605</text:p>
          </table:table-cell>
          <table:table-cell office:value-type="float" office:value="-0.002801628">
            <text:p>-0.002801628</text:p>
          </table:table-cell>
          <table:table-cell table:number-columns-repeated="4"/>
        </table:table-row>
        <table:table-row table:style-name="ro1">
          <table:table-cell office:value-type="float" office:value="390.196685791016">
            <text:p>390.196685791</text:p>
          </table:table-cell>
          <table:table-cell office:value-type="float" office:value="0.01284008">
            <text:p>0.01284008</text:p>
          </table:table-cell>
          <table:table-cell table:number-columns-repeated="4"/>
        </table:table-row>
        <table:table-row table:style-name="ro1">
          <table:table-cell office:value-type="float" office:value="390.308227539063">
            <text:p>390.3082275391</text:p>
          </table:table-cell>
          <table:table-cell office:value-type="float" office:value="-0.0004065255">
            <text:p>-0.0004065255</text:p>
          </table:table-cell>
          <table:table-cell table:number-columns-repeated="4"/>
        </table:table-row>
        <table:table-row table:style-name="ro1">
          <table:table-cell office:value-type="float" office:value="390.419769287109">
            <text:p>390.4197692871</text:p>
          </table:table-cell>
          <table:table-cell office:value-type="float" office:value="0.00119354">
            <text:p>0.00119354</text:p>
          </table:table-cell>
          <table:table-cell table:number-columns-repeated="4"/>
        </table:table-row>
        <table:table-row table:style-name="ro1">
          <table:table-cell office:value-type="float" office:value="390.531341552734">
            <text:p>390.5313415527</text:p>
          </table:table-cell>
          <table:table-cell office:value-type="float" office:value="0.00151803">
            <text:p>0.00151803</text:p>
          </table:table-cell>
          <table:table-cell table:number-columns-repeated="4"/>
        </table:table-row>
        <table:table-row table:style-name="ro1">
          <table:table-cell office:value-type="float" office:value="390.642883300781">
            <text:p>390.6428833008</text:p>
          </table:table-cell>
          <table:table-cell office:value-type="float" office:value="-0.003226363">
            <text:p>-0.003226363</text:p>
          </table:table-cell>
          <table:table-cell table:number-columns-repeated="4"/>
        </table:table-row>
        <table:table-row table:style-name="ro1">
          <table:table-cell office:value-type="float" office:value="390.754455566406">
            <text:p>390.7544555664</text:p>
          </table:table-cell>
          <table:table-cell office:value-type="float" office:value="0.01475021">
            <text:p>0.01475021</text:p>
          </table:table-cell>
          <table:table-cell table:number-columns-repeated="4"/>
        </table:table-row>
        <table:table-row table:style-name="ro1">
          <table:table-cell office:value-type="float" office:value="390.866027832031">
            <text:p>390.866027832</text:p>
          </table:table-cell>
          <table:table-cell office:value-type="float" office:value="0.0003682736">
            <text:p>0.0003682736</text:p>
          </table:table-cell>
          <table:table-cell table:number-columns-repeated="4"/>
        </table:table-row>
        <table:table-row table:style-name="ro1">
          <table:table-cell office:value-type="float" office:value="390.977600097656">
            <text:p>390.9776000977</text:p>
          </table:table-cell>
          <table:table-cell office:value-type="float" office:value="0.000464812">
            <text:p>0.000464812</text:p>
          </table:table-cell>
          <table:table-cell table:number-columns-repeated="4"/>
        </table:table-row>
        <table:table-row table:style-name="ro1">
          <table:table-cell office:value-type="float" office:value="391.089172363281">
            <text:p>391.0891723633</text:p>
          </table:table-cell>
          <table:table-cell office:value-type="float" office:value="-0.005487393">
            <text:p>-0.005487393</text:p>
          </table:table-cell>
          <table:table-cell table:number-columns-repeated="4"/>
        </table:table-row>
        <table:table-row table:style-name="ro1">
          <table:table-cell office:value-type="float" office:value="391.200744628906">
            <text:p>391.2007446289</text:p>
          </table:table-cell>
          <table:table-cell office:value-type="float" office:value="0.0153013">
            <text:p>0.0153013</text:p>
          </table:table-cell>
          <table:table-cell table:number-columns-repeated="4"/>
        </table:table-row>
        <table:table-row table:style-name="ro1">
          <table:table-cell office:value-type="float" office:value="391.312347412109">
            <text:p>391.3123474121</text:p>
          </table:table-cell>
          <table:table-cell office:value-type="float" office:value="-0.001190712">
            <text:p>-0.001190712</text:p>
          </table:table-cell>
          <table:table-cell table:number-columns-repeated="4"/>
        </table:table-row>
        <table:table-row table:style-name="ro1">
          <table:table-cell office:value-type="float" office:value="391.423950195313">
            <text:p>391.4239501953</text:p>
          </table:table-cell>
          <table:table-cell office:value-type="float" office:value="0.01111891">
            <text:p>0.01111891</text:p>
          </table:table-cell>
          <table:table-cell table:number-columns-repeated="4"/>
        </table:table-row>
        <table:table-row table:style-name="ro1">
          <table:table-cell office:value-type="float" office:value="391.535552978516">
            <text:p>391.5355529785</text:p>
          </table:table-cell>
          <table:table-cell office:value-type="float" office:value="-0.008379362">
            <text:p>-0.008379362</text:p>
          </table:table-cell>
          <table:table-cell table:number-columns-repeated="4"/>
        </table:table-row>
        <table:table-row table:style-name="ro1">
          <table:table-cell office:value-type="float" office:value="391.647155761719">
            <text:p>391.6471557617</text:p>
          </table:table-cell>
          <table:table-cell office:value-type="float" office:value="0.004441823">
            <text:p>0.004441823</text:p>
          </table:table-cell>
          <table:table-cell table:number-columns-repeated="4"/>
        </table:table-row>
        <table:table-row table:style-name="ro1">
          <table:table-cell office:value-type="float" office:value="391.758758544922">
            <text:p>391.7587585449</text:p>
          </table:table-cell>
          <table:table-cell office:value-type="float" office:value="-0.009395885">
            <text:p>-0.009395885</text:p>
          </table:table-cell>
          <table:table-cell table:number-columns-repeated="4"/>
        </table:table-row>
        <table:table-row table:style-name="ro1">
          <table:table-cell office:value-type="float" office:value="391.870391845703">
            <text:p>391.8703918457</text:p>
          </table:table-cell>
          <table:table-cell office:value-type="float" office:value="0.01125628">
            <text:p>0.01125628</text:p>
          </table:table-cell>
          <table:table-cell table:number-columns-repeated="4"/>
        </table:table-row>
        <table:table-row table:style-name="ro1">
          <table:table-cell office:value-type="float" office:value="391.982025146484">
            <text:p>391.9820251465</text:p>
          </table:table-cell>
          <table:table-cell office:value-type="float" office:value="0.00214792">
            <text:p>0.00214792</text:p>
          </table:table-cell>
          <table:table-cell table:number-columns-repeated="4"/>
        </table:table-row>
        <table:table-row table:style-name="ro1">
          <table:table-cell office:value-type="float" office:value="392.093658447266">
            <text:p>392.0936584473</text:p>
          </table:table-cell>
          <table:table-cell office:value-type="float" office:value="-0.007591855">
            <text:p>-0.007591855</text:p>
          </table:table-cell>
          <table:table-cell table:number-columns-repeated="4"/>
        </table:table-row>
        <table:table-row table:style-name="ro1">
          <table:table-cell office:value-type="float" office:value="392.205291748047">
            <text:p>392.205291748</text:p>
          </table:table-cell>
          <table:table-cell office:value-type="float" office:value="0.000631284">
            <text:p>0.000631284</text:p>
          </table:table-cell>
          <table:table-cell table:number-columns-repeated="4"/>
        </table:table-row>
        <table:table-row table:style-name="ro1">
          <table:table-cell office:value-type="float" office:value="392.316925048828">
            <text:p>392.3169250488</text:p>
          </table:table-cell>
          <table:table-cell office:value-type="float" office:value="0.01457062">
            <text:p>0.01457062</text:p>
          </table:table-cell>
          <table:table-cell table:number-columns-repeated="4"/>
        </table:table-row>
        <table:table-row table:style-name="ro1">
          <table:table-cell office:value-type="float" office:value="392.428558349609">
            <text:p>392.4285583496</text:p>
          </table:table-cell>
          <table:table-cell office:value-type="float" office:value="0.01042542">
            <text:p>0.01042542</text:p>
          </table:table-cell>
          <table:table-cell table:number-columns-repeated="4"/>
        </table:table-row>
        <table:table-row table:style-name="ro1">
          <table:table-cell office:value-type="float" office:value="392.540222167969">
            <text:p>392.540222168</text:p>
          </table:table-cell>
          <table:table-cell office:value-type="float" office:value="-0.003984471">
            <text:p>-0.003984471</text:p>
          </table:table-cell>
          <table:table-cell table:number-columns-repeated="4"/>
        </table:table-row>
        <table:table-row table:style-name="ro1">
          <table:table-cell office:value-type="float" office:value="392.651885986328">
            <text:p>392.6518859863</text:p>
          </table:table-cell>
          <table:table-cell office:value-type="float" office:value="-0.006706753">
            <text:p>-0.006706753</text:p>
          </table:table-cell>
          <table:table-cell table:number-columns-repeated="4"/>
        </table:table-row>
        <table:table-row table:style-name="ro1">
          <table:table-cell office:value-type="float" office:value="392.763549804688">
            <text:p>392.7635498047</text:p>
          </table:table-cell>
          <table:table-cell office:value-type="float" office:value="-0.0002310461">
            <text:p>-0.0002310461</text:p>
          </table:table-cell>
          <table:table-cell table:number-columns-repeated="4"/>
        </table:table-row>
        <table:table-row table:style-name="ro1">
          <table:table-cell office:value-type="float" office:value="392.875213623047">
            <text:p>392.875213623</text:p>
          </table:table-cell>
          <table:table-cell office:value-type="float" office:value="0.0007736936">
            <text:p>0.0007736936</text:p>
          </table:table-cell>
          <table:table-cell table:number-columns-repeated="4"/>
        </table:table-row>
        <table:table-row table:style-name="ro1">
          <table:table-cell office:value-type="float" office:value="392.986907958984">
            <text:p>392.986907959</text:p>
          </table:table-cell>
          <table:table-cell office:value-type="float" office:value="0.004847923">
            <text:p>0.004847923</text:p>
          </table:table-cell>
          <table:table-cell table:number-columns-repeated="4"/>
        </table:table-row>
        <table:table-row table:style-name="ro1">
          <table:table-cell office:value-type="float" office:value="393.098602294922">
            <text:p>393.0986022949</text:p>
          </table:table-cell>
          <table:table-cell office:value-type="float" office:value="0.0132448">
            <text:p>0.0132448</text:p>
          </table:table-cell>
          <table:table-cell table:number-columns-repeated="4"/>
        </table:table-row>
        <table:table-row table:style-name="ro1">
          <table:table-cell office:value-type="float" office:value="393.210266113281">
            <text:p>393.2102661133</text:p>
          </table:table-cell>
          <table:table-cell office:value-type="float" office:value="-0.001761166">
            <text:p>-0.001761166</text:p>
          </table:table-cell>
          <table:table-cell table:number-columns-repeated="4"/>
        </table:table-row>
        <table:table-row table:style-name="ro1">
          <table:table-cell office:value-type="float" office:value="393.321960449219">
            <text:p>393.3219604492</text:p>
          </table:table-cell>
          <table:table-cell office:value-type="float" office:value="-0.001310684">
            <text:p>-0.001310684</text:p>
          </table:table-cell>
          <table:table-cell table:number-columns-repeated="4"/>
        </table:table-row>
        <table:table-row table:style-name="ro1">
          <table:table-cell office:value-type="float" office:value="393.433685302734">
            <text:p>393.4336853027</text:p>
          </table:table-cell>
          <table:table-cell office:value-type="float" office:value="-0.004515582">
            <text:p>-0.004515582</text:p>
          </table:table-cell>
          <table:table-cell table:number-columns-repeated="4"/>
        </table:table-row>
        <table:table-row table:style-name="ro1">
          <table:table-cell office:value-type="float" office:value="393.545379638672">
            <text:p>393.5453796387</text:p>
          </table:table-cell>
          <table:table-cell office:value-type="float" office:value="-0.008833586">
            <text:p>-0.008833586</text:p>
          </table:table-cell>
          <table:table-cell table:number-columns-repeated="4"/>
        </table:table-row>
        <table:table-row table:style-name="ro1">
          <table:table-cell office:value-type="float" office:value="393.657104492188">
            <text:p>393.6571044922</text:p>
          </table:table-cell>
          <table:table-cell office:value-type="float" office:value="0.001012618">
            <text:p>0.001012618</text:p>
          </table:table-cell>
          <table:table-cell table:number-columns-repeated="4"/>
        </table:table-row>
        <table:table-row table:style-name="ro1">
          <table:table-cell office:value-type="float" office:value="393.768798828125">
            <text:p>393.7687988281</text:p>
          </table:table-cell>
          <table:table-cell office:value-type="float" office:value="-0.0052054">
            <text:p>-0.0052054</text:p>
          </table:table-cell>
          <table:table-cell table:number-columns-repeated="4"/>
        </table:table-row>
        <table:table-row table:style-name="ro1">
          <table:table-cell office:value-type="float" office:value="393.880523681641">
            <text:p>393.8805236816</text:p>
          </table:table-cell>
          <table:table-cell office:value-type="float" office:value="0.01120887">
            <text:p>0.01120887</text:p>
          </table:table-cell>
          <table:table-cell table:number-columns-repeated="4"/>
        </table:table-row>
        <table:table-row table:style-name="ro1">
          <table:table-cell office:value-type="float" office:value="393.992248535156">
            <text:p>393.9922485352</text:p>
          </table:table-cell>
          <table:table-cell office:value-type="float" office:value="0.02014236">
            <text:p>0.02014236</text:p>
          </table:table-cell>
          <table:table-cell table:number-columns-repeated="4"/>
        </table:table-row>
        <table:table-row table:style-name="ro1">
          <table:table-cell office:value-type="float" office:value="394.10400390625">
            <text:p>394.1040039063</text:p>
          </table:table-cell>
          <table:table-cell office:value-type="float" office:value="-0.005747321">
            <text:p>-0.005747321</text:p>
          </table:table-cell>
          <table:table-cell table:number-columns-repeated="4"/>
        </table:table-row>
        <table:table-row table:style-name="ro1">
          <table:table-cell office:value-type="float" office:value="394.215728759766">
            <text:p>394.2157287598</text:p>
          </table:table-cell>
          <table:table-cell office:value-type="float" office:value="0.001270522">
            <text:p>0.001270522</text:p>
          </table:table-cell>
          <table:table-cell table:number-columns-repeated="4"/>
        </table:table-row>
        <table:table-row table:style-name="ro1">
          <table:table-cell office:value-type="float" office:value="394.327484130859">
            <text:p>394.3274841309</text:p>
          </table:table-cell>
          <table:table-cell office:value-type="float" office:value="0.005771514">
            <text:p>0.005771514</text:p>
          </table:table-cell>
          <table:table-cell table:number-columns-repeated="4"/>
        </table:table-row>
        <table:table-row table:style-name="ro1">
          <table:table-cell office:value-type="float" office:value="394.439239501953">
            <text:p>394.439239502</text:p>
          </table:table-cell>
          <table:table-cell office:value-type="float" office:value="-0.002180484">
            <text:p>-0.002180484</text:p>
          </table:table-cell>
          <table:table-cell table:number-columns-repeated="4"/>
        </table:table-row>
        <table:table-row table:style-name="ro1">
          <table:table-cell office:value-type="float" office:value="394.550994873047">
            <text:p>394.550994873</text:p>
          </table:table-cell>
          <table:table-cell office:value-type="float" office:value="-0.007352633">
            <text:p>-0.007352633</text:p>
          </table:table-cell>
          <table:table-cell table:number-columns-repeated="4"/>
        </table:table-row>
        <table:table-row table:style-name="ro1">
          <table:table-cell office:value-type="float" office:value="394.662750244141">
            <text:p>394.6627502441</text:p>
          </table:table-cell>
          <table:table-cell office:value-type="float" office:value="0.003281886">
            <text:p>0.003281886</text:p>
          </table:table-cell>
          <table:table-cell table:number-columns-repeated="4"/>
        </table:table-row>
        <table:table-row table:style-name="ro1">
          <table:table-cell office:value-type="float" office:value="394.774536132813">
            <text:p>394.7745361328</text:p>
          </table:table-cell>
          <table:table-cell office:value-type="float" office:value="-0.002740707">
            <text:p>-0.002740707</text:p>
          </table:table-cell>
          <table:table-cell table:number-columns-repeated="4"/>
        </table:table-row>
        <table:table-row table:style-name="ro1">
          <table:table-cell office:value-type="float" office:value="394.886291503906">
            <text:p>394.8862915039</text:p>
          </table:table-cell>
          <table:table-cell office:value-type="float" office:value="0.00759888">
            <text:p>0.00759888</text:p>
          </table:table-cell>
          <table:table-cell table:number-columns-repeated="4"/>
        </table:table-row>
        <table:table-row table:style-name="ro1">
          <table:table-cell office:value-type="float" office:value="394.998077392578">
            <text:p>394.9980773926</text:p>
          </table:table-cell>
          <table:table-cell office:value-type="float" office:value="-0.002141156">
            <text:p>-0.002141156</text:p>
          </table:table-cell>
          <table:table-cell table:number-columns-repeated="4"/>
        </table:table-row>
        <table:table-row table:style-name="ro1">
          <table:table-cell office:value-type="float" office:value="395.10986328125">
            <text:p>395.1098632813</text:p>
          </table:table-cell>
          <table:table-cell office:value-type="float" office:value="0.009061393">
            <text:p>0.009061393</text:p>
          </table:table-cell>
          <table:table-cell table:number-columns-repeated="4"/>
        </table:table-row>
        <table:table-row table:style-name="ro1">
          <table:table-cell office:value-type="float" office:value="395.221649169922">
            <text:p>395.2216491699</text:p>
          </table:table-cell>
          <table:table-cell office:value-type="float" office:value="-0.001201032">
            <text:p>-0.001201032</text:p>
          </table:table-cell>
          <table:table-cell table:number-columns-repeated="4"/>
        </table:table-row>
        <table:table-row table:style-name="ro1">
          <table:table-cell office:value-type="float" office:value="395.333465576172">
            <text:p>395.3334655762</text:p>
          </table:table-cell>
          <table:table-cell office:value-type="float" office:value="-0.007520015">
            <text:p>-0.007520015</text:p>
          </table:table-cell>
          <table:table-cell table:number-columns-repeated="4"/>
        </table:table-row>
        <table:table-row table:style-name="ro1">
          <table:table-cell office:value-type="float" office:value="395.445251464844">
            <text:p>395.4452514648</text:p>
          </table:table-cell>
          <table:table-cell office:value-type="float" office:value="-0.001963187">
            <text:p>-0.001963187</text:p>
          </table:table-cell>
          <table:table-cell table:number-columns-repeated="4"/>
        </table:table-row>
        <table:table-row table:style-name="ro1">
          <table:table-cell office:value-type="float" office:value="395.557067871094">
            <text:p>395.5570678711</text:p>
          </table:table-cell>
          <table:table-cell office:value-type="float" office:value="-0.005131487">
            <text:p>-0.005131487</text:p>
          </table:table-cell>
          <table:table-cell table:number-columns-repeated="4"/>
        </table:table-row>
        <table:table-row table:style-name="ro1">
          <table:table-cell office:value-type="float" office:value="395.668884277344">
            <text:p>395.6688842773</text:p>
          </table:table-cell>
          <table:table-cell office:value-type="float" office:value="0.04090488">
            <text:p>0.04090488</text:p>
          </table:table-cell>
          <table:table-cell table:number-columns-repeated="4"/>
        </table:table-row>
        <table:table-row table:style-name="ro1">
          <table:table-cell office:value-type="float" office:value="395.780700683594">
            <text:p>395.7807006836</text:p>
          </table:table-cell>
          <table:table-cell office:value-type="float" office:value="-0.003430501">
            <text:p>-0.003430501</text:p>
          </table:table-cell>
          <table:table-cell table:number-columns-repeated="4"/>
        </table:table-row>
        <table:table-row table:style-name="ro1">
          <table:table-cell office:value-type="float" office:value="395.892547607422">
            <text:p>395.8925476074</text:p>
          </table:table-cell>
          <table:table-cell office:value-type="float" office:value="0.003224533">
            <text:p>0.003224533</text:p>
          </table:table-cell>
          <table:table-cell table:number-columns-repeated="4"/>
        </table:table-row>
        <table:table-row table:style-name="ro1">
          <table:table-cell office:value-type="float" office:value="396.004364013672">
            <text:p>396.0043640137</text:p>
          </table:table-cell>
          <table:table-cell office:value-type="float" office:value="0.002267021">
            <text:p>0.002267021</text:p>
          </table:table-cell>
          <table:table-cell table:number-columns-repeated="4"/>
        </table:table-row>
        <table:table-row table:style-name="ro1">
          <table:table-cell office:value-type="float" office:value="396.1162109375">
            <text:p>396.1162109375</text:p>
          </table:table-cell>
          <table:table-cell office:value-type="float" office:value="0.04419417">
            <text:p>0.04419417</text:p>
          </table:table-cell>
          <table:table-cell table:number-columns-repeated="4"/>
        </table:table-row>
        <table:table-row table:style-name="ro1">
          <table:table-cell office:value-type="float" office:value="396.228057861328">
            <text:p>396.2280578613</text:p>
          </table:table-cell>
          <table:table-cell office:value-type="float" office:value="-0.0005701693">
            <text:p>-0.0005701693</text:p>
          </table:table-cell>
          <table:table-cell table:number-columns-repeated="4"/>
        </table:table-row>
        <table:table-row table:style-name="ro1">
          <table:table-cell office:value-type="float" office:value="396.339904785156">
            <text:p>396.3399047852</text:p>
          </table:table-cell>
          <table:table-cell office:value-type="float" office:value="-0.001598075">
            <text:p>-0.001598075</text:p>
          </table:table-cell>
          <table:table-cell table:number-columns-repeated="4"/>
        </table:table-row>
        <table:table-row table:style-name="ro1">
          <table:table-cell office:value-type="float" office:value="396.451751708984">
            <text:p>396.451751709</text:p>
          </table:table-cell>
          <table:table-cell office:value-type="float" office:value="-0.004317311">
            <text:p>-0.004317311</text:p>
          </table:table-cell>
          <table:table-cell table:number-columns-repeated="4"/>
        </table:table-row>
        <table:table-row table:style-name="ro1">
          <table:table-cell office:value-type="float" office:value="396.563629150391">
            <text:p>396.5636291504</text:p>
          </table:table-cell>
          <table:table-cell office:value-type="float" office:value="-0.006614219">
            <text:p>-0.006614219</text:p>
          </table:table-cell>
          <table:table-cell table:number-columns-repeated="4"/>
        </table:table-row>
        <table:table-row table:style-name="ro1">
          <table:table-cell office:value-type="float" office:value="396.675476074219">
            <text:p>396.6754760742</text:p>
          </table:table-cell>
          <table:table-cell office:value-type="float" office:value="-0.003279729">
            <text:p>-0.003279729</text:p>
          </table:table-cell>
          <table:table-cell table:number-columns-repeated="4"/>
        </table:table-row>
        <table:table-row table:style-name="ro1">
          <table:table-cell office:value-type="float" office:value="396.787353515625">
            <text:p>396.7873535156</text:p>
          </table:table-cell>
          <table:table-cell office:value-type="float" office:value="0.01077397">
            <text:p>0.01077397</text:p>
          </table:table-cell>
          <table:table-cell table:number-columns-repeated="4"/>
        </table:table-row>
        <table:table-row table:style-name="ro1">
          <table:table-cell office:value-type="float" office:value="396.899230957031">
            <text:p>396.899230957</text:p>
          </table:table-cell>
          <table:table-cell office:value-type="float" office:value="-0.003777896">
            <text:p>-0.003777896</text:p>
          </table:table-cell>
          <table:table-cell table:number-columns-repeated="4"/>
        </table:table-row>
        <table:table-row table:style-name="ro1">
          <table:table-cell office:value-type="float" office:value="397.011108398438">
            <text:p>397.0111083984</text:p>
          </table:table-cell>
          <table:table-cell office:value-type="float" office:value="0.001418787">
            <text:p>0.001418787</text:p>
          </table:table-cell>
          <table:table-cell table:number-columns-repeated="4"/>
        </table:table-row>
        <table:table-row table:style-name="ro1">
          <table:table-cell office:value-type="float" office:value="397.123016357422">
            <text:p>397.1230163574</text:p>
          </table:table-cell>
          <table:table-cell office:value-type="float" office:value="-0.003186792">
            <text:p>-0.003186792</text:p>
          </table:table-cell>
          <table:table-cell table:number-columns-repeated="4"/>
        </table:table-row>
        <table:table-row table:style-name="ro1">
          <table:table-cell office:value-type="float" office:value="397.234893798828">
            <text:p>397.2348937988</text:p>
          </table:table-cell>
          <table:table-cell office:value-type="float" office:value="0.005968565">
            <text:p>0.005968565</text:p>
          </table:table-cell>
          <table:table-cell table:number-columns-repeated="4"/>
        </table:table-row>
        <table:table-row table:style-name="ro1">
          <table:table-cell office:value-type="float" office:value="397.346801757813">
            <text:p>397.3468017578</text:p>
          </table:table-cell>
          <table:table-cell office:value-type="float" office:value="0.003654947">
            <text:p>0.003654947</text:p>
          </table:table-cell>
          <table:table-cell table:number-columns-repeated="4"/>
        </table:table-row>
        <table:table-row table:style-name="ro1">
          <table:table-cell office:value-type="float" office:value="397.458709716797">
            <text:p>397.4587097168</text:p>
          </table:table-cell>
          <table:table-cell office:value-type="float" office:value="-0.001617992">
            <text:p>-0.001617992</text:p>
          </table:table-cell>
          <table:table-cell table:number-columns-repeated="4"/>
        </table:table-row>
        <table:table-row table:style-name="ro1">
          <table:table-cell office:value-type="float" office:value="397.570617675781">
            <text:p>397.5706176758</text:p>
          </table:table-cell>
          <table:table-cell office:value-type="float" office:value="0.005781503">
            <text:p>0.005781503</text:p>
          </table:table-cell>
          <table:table-cell table:number-columns-repeated="4"/>
        </table:table-row>
        <table:table-row table:style-name="ro1">
          <table:table-cell office:value-type="float" office:value="397.682525634766">
            <text:p>397.6825256348</text:p>
          </table:table-cell>
          <table:table-cell office:value-type="float" office:value="-0.002446963">
            <text:p>-0.002446963</text:p>
          </table:table-cell>
          <table:table-cell table:number-columns-repeated="4"/>
        </table:table-row>
        <table:table-row table:style-name="ro1">
          <table:table-cell office:value-type="float" office:value="397.794464111328">
            <text:p>397.7944641113</text:p>
          </table:table-cell>
          <table:table-cell office:value-type="float" office:value="0.00258593">
            <text:p>0.00258593</text:p>
          </table:table-cell>
          <table:table-cell table:number-columns-repeated="4"/>
        </table:table-row>
        <table:table-row table:style-name="ro1">
          <table:table-cell office:value-type="float" office:value="397.906402587891">
            <text:p>397.9064025879</text:p>
          </table:table-cell>
          <table:table-cell office:value-type="float" office:value="0.001666301">
            <text:p>0.001666301</text:p>
          </table:table-cell>
          <table:table-cell table:number-columns-repeated="4"/>
        </table:table-row>
        <table:table-row table:style-name="ro1">
          <table:table-cell office:value-type="float" office:value="398.018310546875">
            <text:p>398.0183105469</text:p>
          </table:table-cell>
          <table:table-cell office:value-type="float" office:value="0.00576617">
            <text:p>0.00576617</text:p>
          </table:table-cell>
          <table:table-cell table:number-columns-repeated="4"/>
        </table:table-row>
        <table:table-row table:style-name="ro1">
          <table:table-cell office:value-type="float" office:value="398.130249023438">
            <text:p>398.1302490234</text:p>
          </table:table-cell>
          <table:table-cell office:value-type="float" office:value="-0.003174592">
            <text:p>-0.003174592</text:p>
          </table:table-cell>
          <table:table-cell table:number-columns-repeated="4"/>
        </table:table-row>
        <table:table-row table:style-name="ro1">
          <table:table-cell office:value-type="float" office:value="398.242218017578">
            <text:p>398.2422180176</text:p>
          </table:table-cell>
          <table:table-cell office:value-type="float" office:value="-0.0002645222">
            <text:p>-0.0002645222</text:p>
          </table:table-cell>
          <table:table-cell table:number-columns-repeated="4"/>
        </table:table-row>
        <table:table-row table:style-name="ro1">
          <table:table-cell office:value-type="float" office:value="398.354156494141">
            <text:p>398.3541564941</text:p>
          </table:table-cell>
          <table:table-cell office:value-type="float" office:value="-0.002876712">
            <text:p>-0.002876712</text:p>
          </table:table-cell>
          <table:table-cell table:number-columns-repeated="4"/>
        </table:table-row>
        <table:table-row table:style-name="ro1">
          <table:table-cell office:value-type="float" office:value="398.466125488281">
            <text:p>398.4661254883</text:p>
          </table:table-cell>
          <table:table-cell office:value-type="float" office:value="-0.002045406">
            <text:p>-0.002045406</text:p>
          </table:table-cell>
          <table:table-cell table:number-columns-repeated="4"/>
        </table:table-row>
        <table:table-row table:style-name="ro1">
          <table:table-cell office:value-type="float" office:value="398.578094482422">
            <text:p>398.5780944824</text:p>
          </table:table-cell>
          <table:table-cell office:value-type="float" office:value="-0.001442131">
            <text:p>-0.001442131</text:p>
          </table:table-cell>
          <table:table-cell table:number-columns-repeated="4"/>
        </table:table-row>
        <table:table-row table:style-name="ro1">
          <table:table-cell office:value-type="float" office:value="398.690063476563">
            <text:p>398.6900634766</text:p>
          </table:table-cell>
          <table:table-cell office:value-type="float" office:value="-0.006018423">
            <text:p>-0.006018423</text:p>
          </table:table-cell>
          <table:table-cell table:number-columns-repeated="4"/>
        </table:table-row>
        <table:table-row table:style-name="ro1">
          <table:table-cell office:value-type="float" office:value="398.802032470703">
            <text:p>398.8020324707</text:p>
          </table:table-cell>
          <table:table-cell office:value-type="float" office:value="-0.005098545">
            <text:p>-0.005098545</text:p>
          </table:table-cell>
          <table:table-cell table:number-columns-repeated="4"/>
        </table:table-row>
        <table:table-row table:style-name="ro1">
          <table:table-cell office:value-type="float" office:value="398.914001464844">
            <text:p>398.9140014648</text:p>
          </table:table-cell>
          <table:table-cell office:value-type="float" office:value="-0.003082282">
            <text:p>-0.003082282</text:p>
          </table:table-cell>
          <table:table-cell table:number-columns-repeated="4"/>
        </table:table-row>
        <table:table-row table:style-name="ro1">
          <table:table-cell office:value-type="float" office:value="399.026000976563">
            <text:p>399.0260009766</text:p>
          </table:table-cell>
          <table:table-cell office:value-type="float" office:value="0.01979387">
            <text:p>0.01979387</text:p>
          </table:table-cell>
          <table:table-cell table:number-columns-repeated="4"/>
        </table:table-row>
        <table:table-row table:style-name="ro1">
          <table:table-cell office:value-type="float" office:value="399.137969970703">
            <text:p>399.1379699707</text:p>
          </table:table-cell>
          <table:table-cell office:value-type="float" office:value="-0.001588056">
            <text:p>-0.001588056</text:p>
          </table:table-cell>
          <table:table-cell table:number-columns-repeated="4"/>
        </table:table-row>
        <table:table-row table:style-name="ro1">
          <table:table-cell office:value-type="float" office:value="399.249969482422">
            <text:p>399.2499694824</text:p>
          </table:table-cell>
          <table:table-cell office:value-type="float" office:value="0.01605304">
            <text:p>0.01605304</text:p>
          </table:table-cell>
          <table:table-cell table:number-columns-repeated="4"/>
        </table:table-row>
        <table:table-row table:style-name="ro1">
          <table:table-cell office:value-type="float" office:value="399.361968994141">
            <text:p>399.3619689941</text:p>
          </table:table-cell>
          <table:table-cell office:value-type="float" office:value="-0.001958644">
            <text:p>-0.001958644</text:p>
          </table:table-cell>
          <table:table-cell table:number-columns-repeated="4"/>
        </table:table-row>
        <table:table-row table:style-name="ro1">
          <table:table-cell office:value-type="float" office:value="399.473999023438">
            <text:p>399.4739990234</text:p>
          </table:table-cell>
          <table:table-cell office:value-type="float" office:value="0.008756663">
            <text:p>0.008756663</text:p>
          </table:table-cell>
          <table:table-cell table:number-columns-repeated="4"/>
        </table:table-row>
        <table:table-row table:style-name="ro1">
          <table:table-cell office:value-type="float" office:value="399.585998535156">
            <text:p>399.5859985352</text:p>
          </table:table-cell>
          <table:table-cell office:value-type="string">
            <text:p>-3.57258E-05</text:p>
          </table:table-cell>
          <table:table-cell table:number-columns-repeated="4"/>
        </table:table-row>
        <table:table-row table:style-name="ro1">
          <table:table-cell office:value-type="float" office:value="399.698028564453">
            <text:p>399.6980285645</text:p>
          </table:table-cell>
          <table:table-cell office:value-type="float" office:value="-0.001313306">
            <text:p>-0.001313306</text:p>
          </table:table-cell>
          <table:table-cell table:number-columns-repeated="4"/>
        </table:table-row>
        <table:table-row table:style-name="ro1">
          <table:table-cell office:value-type="float" office:value="399.81005859375">
            <text:p>399.8100585938</text:p>
          </table:table-cell>
          <table:table-cell office:value-type="float" office:value="-0.00612706">
            <text:p>-0.00612706</text:p>
          </table:table-cell>
          <table:table-cell table:number-columns-repeated="4"/>
        </table:table-row>
        <table:table-row table:style-name="ro1">
          <table:table-cell office:value-type="float" office:value="399.922088623047">
            <text:p>399.922088623</text:p>
          </table:table-cell>
          <table:table-cell office:value-type="float" office:value="-0.002088777">
            <text:p>-0.002088777</text:p>
          </table:table-cell>
          <table:table-cell table:number-columns-repeated="4"/>
        </table:table-row>
        <table:table-row table:style-name="ro1">
          <table:table-cell office:value-type="float" office:value="400.034118652344">
            <text:p>400.0341186523</text:p>
          </table:table-cell>
          <table:table-cell office:value-type="float" office:value="-0.005699728">
            <text:p>-0.005699728</text:p>
          </table:table-cell>
          <table:table-cell table:number-columns-repeated="4"/>
        </table:table-row>
        <table:table-row table:style-name="ro1">
          <table:table-cell office:value-type="float" office:value="400.146148681641">
            <text:p>400.1461486816</text:p>
          </table:table-cell>
          <table:table-cell office:value-type="string">
            <text:p>-5.568416E-05</text:p>
          </table:table-cell>
          <table:table-cell table:number-columns-repeated="4"/>
        </table:table-row>
        <table:table-row table:style-name="ro1">
          <table:table-cell office:value-type="float" office:value="400.258209228516">
            <text:p>400.2582092285</text:p>
          </table:table-cell>
          <table:table-cell office:value-type="float" office:value="-0.002858762">
            <text:p>-0.002858762</text:p>
          </table:table-cell>
          <table:table-cell table:number-columns-repeated="4"/>
        </table:table-row>
        <table:table-row table:style-name="ro1">
          <table:table-cell office:value-type="float" office:value="400.370269775391">
            <text:p>400.3702697754</text:p>
          </table:table-cell>
          <table:table-cell office:value-type="float" office:value="0.00290687">
            <text:p>0.00290687</text:p>
          </table:table-cell>
          <table:table-cell table:number-columns-repeated="4"/>
        </table:table-row>
        <table:table-row table:style-name="ro1">
          <table:table-cell office:value-type="float" office:value="400.482330322266">
            <text:p>400.4823303223</text:p>
          </table:table-cell>
          <table:table-cell office:value-type="float" office:value="-0.001640559">
            <text:p>-0.001640559</text:p>
          </table:table-cell>
          <table:table-cell table:number-columns-repeated="4"/>
        </table:table-row>
        <table:table-row table:style-name="ro1">
          <table:table-cell office:value-type="float" office:value="400.594390869141">
            <text:p>400.5943908691</text:p>
          </table:table-cell>
          <table:table-cell office:value-type="float" office:value="0.006048443">
            <text:p>0.006048443</text:p>
          </table:table-cell>
          <table:table-cell table:number-columns-repeated="4"/>
        </table:table-row>
        <table:table-row table:style-name="ro1">
          <table:table-cell office:value-type="float" office:value="400.706451416016">
            <text:p>400.706451416</text:p>
          </table:table-cell>
          <table:table-cell office:value-type="float" office:value="-0.003831885">
            <text:p>-0.003831885</text:p>
          </table:table-cell>
          <table:table-cell table:number-columns-repeated="4"/>
        </table:table-row>
        <table:table-row table:style-name="ro1">
          <table:table-cell office:value-type="float" office:value="400.818511962891">
            <text:p>400.8185119629</text:p>
          </table:table-cell>
          <table:table-cell office:value-type="float" office:value="0.00562185">
            <text:p>0.00562185</text:p>
          </table:table-cell>
          <table:table-cell table:number-columns-repeated="4"/>
        </table:table-row>
        <table:table-row table:style-name="ro1">
          <table:table-cell office:value-type="float" office:value="400.930603027344">
            <text:p>400.9306030273</text:p>
          </table:table-cell>
          <table:table-cell office:value-type="float" office:value="0.005975419">
            <text:p>0.005975419</text:p>
          </table:table-cell>
          <table:table-cell table:number-columns-repeated="4"/>
        </table:table-row>
        <table:table-row table:style-name="ro1">
          <table:table-cell office:value-type="float" office:value="401.042694091797">
            <text:p>401.0426940918</text:p>
          </table:table-cell>
          <table:table-cell office:value-type="float" office:value="-0.001100668">
            <text:p>-0.001100668</text:p>
          </table:table-cell>
          <table:table-cell table:number-columns-repeated="4"/>
        </table:table-row>
        <table:table-row table:style-name="ro1">
          <table:table-cell office:value-type="float" office:value="401.15478515625">
            <text:p>401.1547851563</text:p>
          </table:table-cell>
          <table:table-cell office:value-type="float" office:value="0.005314692">
            <text:p>0.005314692</text:p>
          </table:table-cell>
          <table:table-cell table:number-columns-repeated="4"/>
        </table:table-row>
        <table:table-row table:style-name="ro1">
          <table:table-cell office:value-type="float" office:value="401.266876220703">
            <text:p>401.2668762207</text:p>
          </table:table-cell>
          <table:table-cell office:value-type="float" office:value="0.004145966">
            <text:p>0.004145966</text:p>
          </table:table-cell>
          <table:table-cell table:number-columns-repeated="4"/>
        </table:table-row>
        <table:table-row table:style-name="ro1">
          <table:table-cell office:value-type="float" office:value="401.378997802734">
            <text:p>401.3789978027</text:p>
          </table:table-cell>
          <table:table-cell office:value-type="float" office:value="0.001240911">
            <text:p>0.001240911</text:p>
          </table:table-cell>
          <table:table-cell table:number-columns-repeated="4"/>
        </table:table-row>
        <table:table-row table:style-name="ro1">
          <table:table-cell office:value-type="float" office:value="401.491088867188">
            <text:p>401.4910888672</text:p>
          </table:table-cell>
          <table:table-cell office:value-type="float" office:value="-0.0009505711">
            <text:p>-0.0009505711</text:p>
          </table:table-cell>
          <table:table-cell table:number-columns-repeated="4"/>
        </table:table-row>
        <table:table-row table:style-name="ro1">
          <table:table-cell office:value-type="float" office:value="401.603210449219">
            <text:p>401.6032104492</text:p>
          </table:table-cell>
          <table:table-cell office:value-type="float" office:value="0.000273756">
            <text:p>0.000273756</text:p>
          </table:table-cell>
          <table:table-cell table:number-columns-repeated="4"/>
        </table:table-row>
        <table:table-row table:style-name="ro1">
          <table:table-cell office:value-type="float" office:value="401.71533203125">
            <text:p>401.7153320313</text:p>
          </table:table-cell>
          <table:table-cell office:value-type="float" office:value="-0.00239604">
            <text:p>-0.00239604</text:p>
          </table:table-cell>
          <table:table-cell table:number-columns-repeated="4"/>
        </table:table-row>
        <table:table-row table:style-name="ro1">
          <table:table-cell office:value-type="float" office:value="401.827453613281">
            <text:p>401.8274536133</text:p>
          </table:table-cell>
          <table:table-cell office:value-type="float" office:value="0.001021624">
            <text:p>0.001021624</text:p>
          </table:table-cell>
          <table:table-cell table:number-columns-repeated="4"/>
        </table:table-row>
        <table:table-row table:style-name="ro1">
          <table:table-cell office:value-type="float" office:value="401.939605712891">
            <text:p>401.9396057129</text:p>
          </table:table-cell>
          <table:table-cell office:value-type="float" office:value="0.002747826">
            <text:p>0.002747826</text:p>
          </table:table-cell>
          <table:table-cell table:number-columns-repeated="4"/>
        </table:table-row>
        <table:table-row table:style-name="ro1">
          <table:table-cell office:value-type="float" office:value="402.051727294922">
            <text:p>402.0517272949</text:p>
          </table:table-cell>
          <table:table-cell office:value-type="float" office:value="-0.005010919">
            <text:p>-0.005010919</text:p>
          </table:table-cell>
          <table:table-cell table:number-columns-repeated="4"/>
        </table:table-row>
        <table:table-row table:style-name="ro1">
          <table:table-cell office:value-type="float" office:value="402.163879394531">
            <text:p>402.1638793945</text:p>
          </table:table-cell>
          <table:table-cell office:value-type="float" office:value="0.00987155">
            <text:p>0.00987155</text:p>
          </table:table-cell>
          <table:table-cell table:number-columns-repeated="4"/>
        </table:table-row>
        <table:table-row table:style-name="ro1">
          <table:table-cell office:value-type="float" office:value="402.276031494141">
            <text:p>402.2760314941</text:p>
          </table:table-cell>
          <table:table-cell office:value-type="float" office:value="-0.002467701">
            <text:p>-0.002467701</text:p>
          </table:table-cell>
          <table:table-cell table:number-columns-repeated="4"/>
        </table:table-row>
        <table:table-row table:style-name="ro1">
          <table:table-cell office:value-type="float" office:value="402.38818359375">
            <text:p>402.3881835938</text:p>
          </table:table-cell>
          <table:table-cell office:value-type="float" office:value="-0.001086711">
            <text:p>-0.001086711</text:p>
          </table:table-cell>
          <table:table-cell table:number-columns-repeated="4"/>
        </table:table-row>
        <table:table-row table:style-name="ro1">
          <table:table-cell office:value-type="float" office:value="402.500335693359">
            <text:p>402.5003356934</text:p>
          </table:table-cell>
          <table:table-cell office:value-type="float" office:value="0.000328202">
            <text:p>0.000328202</text:p>
          </table:table-cell>
          <table:table-cell table:number-columns-repeated="4"/>
        </table:table-row>
        <table:table-row table:style-name="ro1">
          <table:table-cell office:value-type="float" office:value="402.612487792969">
            <text:p>402.612487793</text:p>
          </table:table-cell>
          <table:table-cell office:value-type="float" office:value="0.005265553">
            <text:p>0.005265553</text:p>
          </table:table-cell>
          <table:table-cell table:number-columns-repeated="4"/>
        </table:table-row>
        <table:table-row table:style-name="ro1">
          <table:table-cell office:value-type="float" office:value="402.724670410156">
            <text:p>402.7246704102</text:p>
          </table:table-cell>
          <table:table-cell office:value-type="float" office:value="0.005393303">
            <text:p>0.005393303</text:p>
          </table:table-cell>
          <table:table-cell table:number-columns-repeated="4"/>
        </table:table-row>
        <table:table-row table:style-name="ro1">
          <table:table-cell office:value-type="float" office:value="402.836853027344">
            <text:p>402.8368530273</text:p>
          </table:table-cell>
          <table:table-cell office:value-type="float" office:value="0.00368353">
            <text:p>0.00368353</text:p>
          </table:table-cell>
          <table:table-cell table:number-columns-repeated="4"/>
        </table:table-row>
        <table:table-row table:style-name="ro1">
          <table:table-cell office:value-type="float" office:value="402.949035644531">
            <text:p>402.9490356445</text:p>
          </table:table-cell>
          <table:table-cell office:value-type="float" office:value="0.01200878">
            <text:p>0.01200878</text:p>
          </table:table-cell>
          <table:table-cell table:number-columns-repeated="4"/>
        </table:table-row>
        <table:table-row table:style-name="ro1">
          <table:table-cell office:value-type="float" office:value="403.061218261719">
            <text:p>403.0612182617</text:p>
          </table:table-cell>
          <table:table-cell office:value-type="float" office:value="0.002208778">
            <text:p>0.002208778</text:p>
          </table:table-cell>
          <table:table-cell table:number-columns-repeated="4"/>
        </table:table-row>
        <table:table-row table:style-name="ro1">
          <table:table-cell office:value-type="float" office:value="403.173400878906">
            <text:p>403.1734008789</text:p>
          </table:table-cell>
          <table:table-cell office:value-type="float" office:value="0.01106674">
            <text:p>0.01106674</text:p>
          </table:table-cell>
          <table:table-cell table:number-columns-repeated="4"/>
        </table:table-row>
        <table:table-row table:style-name="ro1">
          <table:table-cell office:value-type="float" office:value="403.285614013672">
            <text:p>403.2856140137</text:p>
          </table:table-cell>
          <table:table-cell office:value-type="float" office:value="-0.0006595896">
            <text:p>-0.0006595896</text:p>
          </table:table-cell>
          <table:table-cell table:number-columns-repeated="4"/>
        </table:table-row>
        <table:table-row table:style-name="ro1">
          <table:table-cell office:value-type="float" office:value="403.397827148438">
            <text:p>403.3978271484</text:p>
          </table:table-cell>
          <table:table-cell office:value-type="float" office:value="-0.004920744">
            <text:p>-0.004920744</text:p>
          </table:table-cell>
          <table:table-cell table:number-columns-repeated="4"/>
        </table:table-row>
        <table:table-row table:style-name="ro1">
          <table:table-cell office:value-type="float" office:value="403.510040283203">
            <text:p>403.5100402832</text:p>
          </table:table-cell>
          <table:table-cell office:value-type="float" office:value="0.002256899">
            <text:p>0.002256899</text:p>
          </table:table-cell>
          <table:table-cell table:number-columns-repeated="4"/>
        </table:table-row>
        <table:table-row table:style-name="ro1">
          <table:table-cell office:value-type="float" office:value="403.622253417969">
            <text:p>403.622253418</text:p>
          </table:table-cell>
          <table:table-cell office:value-type="float" office:value="-0.00654726">
            <text:p>-0.00654726</text:p>
          </table:table-cell>
          <table:table-cell table:number-columns-repeated="4"/>
        </table:table-row>
        <table:table-row table:style-name="ro1">
          <table:table-cell office:value-type="float" office:value="403.734466552734">
            <text:p>403.7344665527</text:p>
          </table:table-cell>
          <table:table-cell office:value-type="float" office:value="0.003329775">
            <text:p>0.003329775</text:p>
          </table:table-cell>
          <table:table-cell table:number-columns-repeated="4"/>
        </table:table-row>
        <table:table-row table:style-name="ro1">
          <table:table-cell office:value-type="float" office:value="403.8466796875">
            <text:p>403.8466796875</text:p>
          </table:table-cell>
          <table:table-cell office:value-type="float" office:value="-0.001774471">
            <text:p>-0.001774471</text:p>
          </table:table-cell>
          <table:table-cell table:number-columns-repeated="4"/>
        </table:table-row>
        <table:table-row table:style-name="ro1">
          <table:table-cell office:value-type="float" office:value="403.958923339844">
            <text:p>403.9589233398</text:p>
          </table:table-cell>
          <table:table-cell office:value-type="float" office:value="-0.0004570163">
            <text:p>-0.0004570163</text:p>
          </table:table-cell>
          <table:table-cell table:number-columns-repeated="4"/>
        </table:table-row>
        <table:table-row table:style-name="ro1">
          <table:table-cell office:value-type="float" office:value="404.071166992188">
            <text:p>404.0711669922</text:p>
          </table:table-cell>
          <table:table-cell office:value-type="string">
            <text:p>-6.107822E-05</text:p>
          </table:table-cell>
          <table:table-cell table:number-columns-repeated="4"/>
        </table:table-row>
        <table:table-row table:style-name="ro1">
          <table:table-cell office:value-type="float" office:value="404.183410644531">
            <text:p>404.1834106445</text:p>
          </table:table-cell>
          <table:table-cell office:value-type="float" office:value="-0.007940236">
            <text:p>-0.007940236</text:p>
          </table:table-cell>
          <table:table-cell table:number-columns-repeated="4"/>
        </table:table-row>
        <table:table-row table:style-name="ro1">
          <table:table-cell office:value-type="float" office:value="404.295654296875">
            <text:p>404.2956542969</text:p>
          </table:table-cell>
          <table:table-cell office:value-type="float" office:value="0.009211433">
            <text:p>0.009211433</text:p>
          </table:table-cell>
          <table:table-cell table:number-columns-repeated="4"/>
        </table:table-row>
        <table:table-row table:style-name="ro1">
          <table:table-cell office:value-type="float" office:value="404.407897949219">
            <text:p>404.4078979492</text:p>
          </table:table-cell>
          <table:table-cell office:value-type="float" office:value="-0.008041281">
            <text:p>-0.008041281</text:p>
          </table:table-cell>
          <table:table-cell table:number-columns-repeated="4"/>
        </table:table-row>
        <table:table-row table:style-name="ro1">
          <table:table-cell office:value-type="float" office:value="404.520172119141">
            <text:p>404.5201721191</text:p>
          </table:table-cell>
          <table:table-cell office:value-type="float" office:value="0.00506149">
            <text:p>0.00506149</text:p>
          </table:table-cell>
          <table:table-cell table:number-columns-repeated="4"/>
        </table:table-row>
        <table:table-row table:style-name="ro1">
          <table:table-cell office:value-type="float" office:value="404.632446289063">
            <text:p>404.6324462891</text:p>
          </table:table-cell>
          <table:table-cell office:value-type="float" office:value="0.004574956">
            <text:p>0.004574956</text:p>
          </table:table-cell>
          <table:table-cell table:number-columns-repeated="4"/>
        </table:table-row>
        <table:table-row table:style-name="ro1">
          <table:table-cell office:value-type="float" office:value="404.744689941406">
            <text:p>404.7446899414</text:p>
          </table:table-cell>
          <table:table-cell office:value-type="float" office:value="0.005686322">
            <text:p>0.005686322</text:p>
          </table:table-cell>
          <table:table-cell table:number-columns-repeated="4"/>
        </table:table-row>
        <table:table-row table:style-name="ro1">
          <table:table-cell office:value-type="float" office:value="404.856994628906">
            <text:p>404.8569946289</text:p>
          </table:table-cell>
          <table:table-cell office:value-type="float" office:value="-0.00874085">
            <text:p>-0.00874085</text:p>
          </table:table-cell>
          <table:table-cell table:number-columns-repeated="4"/>
        </table:table-row>
        <table:table-row table:style-name="ro1">
          <table:table-cell office:value-type="float" office:value="404.969268798828">
            <text:p>404.9692687988</text:p>
          </table:table-cell>
          <table:table-cell office:value-type="float" office:value="0.002298879">
            <text:p>0.002298879</text:p>
          </table:table-cell>
          <table:table-cell table:number-columns-repeated="4"/>
        </table:table-row>
        <table:table-row table:style-name="ro1">
          <table:table-cell office:value-type="float" office:value="405.08154296875">
            <text:p>405.0815429688</text:p>
          </table:table-cell>
          <table:table-cell office:value-type="float" office:value="0.01311435">
            <text:p>0.01311435</text:p>
          </table:table-cell>
          <table:table-cell table:number-columns-repeated="4"/>
        </table:table-row>
        <table:table-row table:style-name="ro1">
          <table:table-cell office:value-type="float" office:value="405.19384765625">
            <text:p>405.1938476563</text:p>
          </table:table-cell>
          <table:table-cell office:value-type="float" office:value="-0.004140037">
            <text:p>-0.004140037</text:p>
          </table:table-cell>
          <table:table-cell table:number-columns-repeated="4"/>
        </table:table-row>
        <table:table-row table:style-name="ro1">
          <table:table-cell office:value-type="float" office:value="405.30615234375">
            <text:p>405.3061523438</text:p>
          </table:table-cell>
          <table:table-cell office:value-type="float" office:value="0.0002259846">
            <text:p>0.0002259846</text:p>
          </table:table-cell>
          <table:table-cell table:number-columns-repeated="4"/>
        </table:table-row>
        <table:table-row table:style-name="ro1">
          <table:table-cell office:value-type="float" office:value="405.41845703125">
            <text:p>405.4184570313</text:p>
          </table:table-cell>
          <table:table-cell office:value-type="float" office:value="0.0005360107">
            <text:p>0.0005360107</text:p>
          </table:table-cell>
          <table:table-cell table:number-columns-repeated="4"/>
        </table:table-row>
        <table:table-row table:style-name="ro1">
          <table:table-cell office:value-type="float" office:value="405.53076171875">
            <text:p>405.5307617188</text:p>
          </table:table-cell>
          <table:table-cell office:value-type="float" office:value="0.01030836">
            <text:p>0.01030836</text:p>
          </table:table-cell>
          <table:table-cell table:number-columns-repeated="4"/>
        </table:table-row>
        <table:table-row table:style-name="ro1">
          <table:table-cell office:value-type="float" office:value="405.64306640625">
            <text:p>405.6430664063</text:p>
          </table:table-cell>
          <table:table-cell office:value-type="float" office:value="-0.001373001">
            <text:p>-0.001373001</text:p>
          </table:table-cell>
          <table:table-cell table:number-columns-repeated="4"/>
        </table:table-row>
        <table:table-row table:style-name="ro1">
          <table:table-cell office:value-type="float" office:value="405.755401611328">
            <text:p>405.7554016113</text:p>
          </table:table-cell>
          <table:table-cell office:value-type="float" office:value="-0.00184067">
            <text:p>-0.00184067</text:p>
          </table:table-cell>
          <table:table-cell table:number-columns-repeated="4"/>
        </table:table-row>
        <table:table-row table:style-name="ro1">
          <table:table-cell office:value-type="float" office:value="405.867706298828">
            <text:p>405.8677062988</text:p>
          </table:table-cell>
          <table:table-cell office:value-type="float" office:value="-0.002533681">
            <text:p>-0.002533681</text:p>
          </table:table-cell>
          <table:table-cell table:number-columns-repeated="4"/>
        </table:table-row>
        <table:table-row table:style-name="ro1">
          <table:table-cell office:value-type="float" office:value="405.980041503906">
            <text:p>405.9800415039</text:p>
          </table:table-cell>
          <table:table-cell office:value-type="float" office:value="0.0158213">
            <text:p>0.0158213</text:p>
          </table:table-cell>
          <table:table-cell table:number-columns-repeated="4"/>
        </table:table-row>
        <table:table-row table:style-name="ro1">
          <table:table-cell office:value-type="float" office:value="406.092376708984">
            <text:p>406.092376709</text:p>
          </table:table-cell>
          <table:table-cell office:value-type="float" office:value="-0.006934342">
            <text:p>-0.006934342</text:p>
          </table:table-cell>
          <table:table-cell table:number-columns-repeated="4"/>
        </table:table-row>
        <table:table-row table:style-name="ro1">
          <table:table-cell office:value-type="float" office:value="406.204742431641">
            <text:p>406.2047424316</text:p>
          </table:table-cell>
          <table:table-cell office:value-type="float" office:value="0.00677868">
            <text:p>0.00677868</text:p>
          </table:table-cell>
          <table:table-cell table:number-columns-repeated="4"/>
        </table:table-row>
        <table:table-row table:style-name="ro1">
          <table:table-cell office:value-type="float" office:value="406.317077636719">
            <text:p>406.3170776367</text:p>
          </table:table-cell>
          <table:table-cell office:value-type="float" office:value="-0.0004604452">
            <text:p>-0.0004604452</text:p>
          </table:table-cell>
          <table:table-cell table:number-columns-repeated="4"/>
        </table:table-row>
        <table:table-row table:style-name="ro1">
          <table:table-cell office:value-type="float" office:value="406.429443359375">
            <text:p>406.4294433594</text:p>
          </table:table-cell>
          <table:table-cell office:value-type="float" office:value="-0.006683283">
            <text:p>-0.006683283</text:p>
          </table:table-cell>
          <table:table-cell table:number-columns-repeated="4"/>
        </table:table-row>
        <table:table-row table:style-name="ro1">
          <table:table-cell office:value-type="float" office:value="406.541809082031">
            <text:p>406.541809082</text:p>
          </table:table-cell>
          <table:table-cell office:value-type="float" office:value="0.001121659">
            <text:p>0.001121659</text:p>
          </table:table-cell>
          <table:table-cell table:number-columns-repeated="4"/>
        </table:table-row>
        <table:table-row table:style-name="ro1">
          <table:table-cell office:value-type="float" office:value="406.654174804688">
            <text:p>406.6541748047</text:p>
          </table:table-cell>
          <table:table-cell office:value-type="float" office:value="-0.00664537">
            <text:p>-0.00664537</text:p>
          </table:table-cell>
          <table:table-cell table:number-columns-repeated="4"/>
        </table:table-row>
        <table:table-row table:style-name="ro1">
          <table:table-cell office:value-type="float" office:value="406.766540527344">
            <text:p>406.7665405273</text:p>
          </table:table-cell>
          <table:table-cell office:value-type="float" office:value="-0.007349579">
            <text:p>-0.007349579</text:p>
          </table:table-cell>
          <table:table-cell table:number-columns-repeated="4"/>
        </table:table-row>
        <table:table-row table:style-name="ro1">
          <table:table-cell office:value-type="float" office:value="406.87890625">
            <text:p>406.87890625</text:p>
          </table:table-cell>
          <table:table-cell office:value-type="float" office:value="-0.004225899">
            <text:p>-0.004225899</text:p>
          </table:table-cell>
          <table:table-cell table:number-columns-repeated="4"/>
        </table:table-row>
        <table:table-row table:style-name="ro1">
          <table:table-cell office:value-type="float" office:value="406.991302490234">
            <text:p>406.9913024902</text:p>
          </table:table-cell>
          <table:table-cell office:value-type="float" office:value="0.001225925">
            <text:p>0.001225925</text:p>
          </table:table-cell>
          <table:table-cell table:number-columns-repeated="4"/>
        </table:table-row>
        <table:table-row table:style-name="ro1">
          <table:table-cell office:value-type="float" office:value="407.103668212891">
            <text:p>407.1036682129</text:p>
          </table:table-cell>
          <table:table-cell office:value-type="float" office:value="-0.004488784">
            <text:p>-0.004488784</text:p>
          </table:table-cell>
          <table:table-cell table:number-columns-repeated="4"/>
        </table:table-row>
        <table:table-row table:style-name="ro1">
          <table:table-cell office:value-type="float" office:value="407.216064453125">
            <text:p>407.2160644531</text:p>
          </table:table-cell>
          <table:table-cell office:value-type="float" office:value="0.01520679">
            <text:p>0.01520679</text:p>
          </table:table-cell>
          <table:table-cell table:number-columns-repeated="4"/>
        </table:table-row>
        <table:table-row table:style-name="ro1">
          <table:table-cell office:value-type="float" office:value="407.328460693359">
            <text:p>407.3284606934</text:p>
          </table:table-cell>
          <table:table-cell office:value-type="float" office:value="0.004272343">
            <text:p>0.004272343</text:p>
          </table:table-cell>
          <table:table-cell table:number-columns-repeated="4"/>
        </table:table-row>
        <table:table-row table:style-name="ro1">
          <table:table-cell office:value-type="float" office:value="407.440887451172">
            <text:p>407.4408874512</text:p>
          </table:table-cell>
          <table:table-cell office:value-type="float" office:value="-0.001248572">
            <text:p>-0.001248572</text:p>
          </table:table-cell>
          <table:table-cell table:number-columns-repeated="4"/>
        </table:table-row>
        <table:table-row table:style-name="ro1">
          <table:table-cell office:value-type="float" office:value="407.553283691406">
            <text:p>407.5532836914</text:p>
          </table:table-cell>
          <table:table-cell office:value-type="float" office:value="0.008531196">
            <text:p>0.008531196</text:p>
          </table:table-cell>
          <table:table-cell table:number-columns-repeated="4"/>
        </table:table-row>
        <table:table-row table:style-name="ro1">
          <table:table-cell office:value-type="float" office:value="407.665710449219">
            <text:p>407.6657104492</text:p>
          </table:table-cell>
          <table:table-cell office:value-type="float" office:value="-0.002358258">
            <text:p>-0.002358258</text:p>
          </table:table-cell>
          <table:table-cell table:number-columns-repeated="4"/>
        </table:table-row>
        <table:table-row table:style-name="ro1">
          <table:table-cell office:value-type="float" office:value="407.778106689453">
            <text:p>407.7781066895</text:p>
          </table:table-cell>
          <table:table-cell office:value-type="float" office:value="0.01241722">
            <text:p>0.01241722</text:p>
          </table:table-cell>
          <table:table-cell table:number-columns-repeated="4"/>
        </table:table-row>
        <table:table-row table:style-name="ro1">
          <table:table-cell office:value-type="float" office:value="407.890533447266">
            <text:p>407.8905334473</text:p>
          </table:table-cell>
          <table:table-cell office:value-type="float" office:value="0.006174815">
            <text:p>0.006174815</text:p>
          </table:table-cell>
          <table:table-cell table:number-columns-repeated="4"/>
        </table:table-row>
        <table:table-row table:style-name="ro1">
          <table:table-cell office:value-type="float" office:value="408.002990722656">
            <text:p>408.0029907227</text:p>
          </table:table-cell>
          <table:table-cell office:value-type="float" office:value="0.007971249">
            <text:p>0.007971249</text:p>
          </table:table-cell>
          <table:table-cell table:number-columns-repeated="4"/>
        </table:table-row>
        <table:table-row table:style-name="ro1">
          <table:table-cell office:value-type="float" office:value="408.115417480469">
            <text:p>408.1154174805</text:p>
          </table:table-cell>
          <table:table-cell office:value-type="float" office:value="0.003045191">
            <text:p>0.003045191</text:p>
          </table:table-cell>
          <table:table-cell table:number-columns-repeated="4"/>
        </table:table-row>
        <table:table-row table:style-name="ro1">
          <table:table-cell office:value-type="float" office:value="408.227844238281">
            <text:p>408.2278442383</text:p>
          </table:table-cell>
          <table:table-cell office:value-type="float" office:value="0.01952296">
            <text:p>0.01952296</text:p>
          </table:table-cell>
          <table:table-cell table:number-columns-repeated="4"/>
        </table:table-row>
        <table:table-row table:style-name="ro1">
          <table:table-cell office:value-type="float" office:value="408.340301513672">
            <text:p>408.3403015137</text:p>
          </table:table-cell>
          <table:table-cell office:value-type="float" office:value="-0.009697677">
            <text:p>-0.009697677</text:p>
          </table:table-cell>
          <table:table-cell table:number-columns-repeated="4"/>
        </table:table-row>
        <table:table-row table:style-name="ro1">
          <table:table-cell office:value-type="float" office:value="408.452758789063">
            <text:p>408.4527587891</text:p>
          </table:table-cell>
          <table:table-cell office:value-type="float" office:value="-0.002427259">
            <text:p>-0.002427259</text:p>
          </table:table-cell>
          <table:table-cell table:number-columns-repeated="4"/>
        </table:table-row>
        <table:table-row table:style-name="ro1">
          <table:table-cell office:value-type="float" office:value="408.565216064453">
            <text:p>408.5652160645</text:p>
          </table:table-cell>
          <table:table-cell office:value-type="float" office:value="-0.005452243">
            <text:p>-0.005452243</text:p>
          </table:table-cell>
          <table:table-cell table:number-columns-repeated="4"/>
        </table:table-row>
        <table:table-row table:style-name="ro1">
          <table:table-cell office:value-type="float" office:value="408.677673339844">
            <text:p>408.6776733398</text:p>
          </table:table-cell>
          <table:table-cell office:value-type="float" office:value="-0.001129663">
            <text:p>-0.001129663</text:p>
          </table:table-cell>
          <table:table-cell table:number-columns-repeated="4"/>
        </table:table-row>
        <table:table-row table:style-name="ro1">
          <table:table-cell office:value-type="float" office:value="408.790161132813">
            <text:p>408.7901611328</text:p>
          </table:table-cell>
          <table:table-cell office:value-type="float" office:value="-0.003472723">
            <text:p>-0.003472723</text:p>
          </table:table-cell>
          <table:table-cell table:number-columns-repeated="4"/>
        </table:table-row>
        <table:table-row table:style-name="ro1">
          <table:table-cell office:value-type="float" office:value="408.902618408203">
            <text:p>408.9026184082</text:p>
          </table:table-cell>
          <table:table-cell office:value-type="float" office:value="-0.002917008">
            <text:p>-0.002917008</text:p>
          </table:table-cell>
          <table:table-cell table:number-columns-repeated="4"/>
        </table:table-row>
        <table:table-row table:style-name="ro1">
          <table:table-cell office:value-type="float" office:value="409.015106201172">
            <text:p>409.0151062012</text:p>
          </table:table-cell>
          <table:table-cell office:value-type="float" office:value="-0.006086962">
            <text:p>-0.006086962</text:p>
          </table:table-cell>
          <table:table-cell table:number-columns-repeated="4"/>
        </table:table-row>
        <table:table-row table:style-name="ro1">
          <table:table-cell office:value-type="float" office:value="409.127593994141">
            <text:p>409.1275939941</text:p>
          </table:table-cell>
          <table:table-cell office:value-type="float" office:value="0.001733716">
            <text:p>0.001733716</text:p>
          </table:table-cell>
          <table:table-cell table:number-columns-repeated="4"/>
        </table:table-row>
        <table:table-row table:style-name="ro1">
          <table:table-cell office:value-type="float" office:value="409.240081787109">
            <text:p>409.2400817871</text:p>
          </table:table-cell>
          <table:table-cell office:value-type="float" office:value="0.001229001">
            <text:p>0.001229001</text:p>
          </table:table-cell>
          <table:table-cell table:number-columns-repeated="4"/>
        </table:table-row>
        <table:table-row table:style-name="ro1">
          <table:table-cell office:value-type="float" office:value="409.352569580078">
            <text:p>409.3525695801</text:p>
          </table:table-cell>
          <table:table-cell office:value-type="float" office:value="-0.008028002">
            <text:p>-0.008028002</text:p>
          </table:table-cell>
          <table:table-cell table:number-columns-repeated="4"/>
        </table:table-row>
        <table:table-row table:style-name="ro1">
          <table:table-cell office:value-type="float" office:value="409.465087890625">
            <text:p>409.4650878906</text:p>
          </table:table-cell>
          <table:table-cell office:value-type="float" office:value="-0.002522548">
            <text:p>-0.002522548</text:p>
          </table:table-cell>
          <table:table-cell table:number-columns-repeated="4"/>
        </table:table-row>
        <table:table-row table:style-name="ro1">
          <table:table-cell office:value-type="float" office:value="409.577606201172">
            <text:p>409.5776062012</text:p>
          </table:table-cell>
          <table:table-cell office:value-type="float" office:value="-0.005853468">
            <text:p>-0.005853468</text:p>
          </table:table-cell>
          <table:table-cell table:number-columns-repeated="4"/>
        </table:table-row>
        <table:table-row table:style-name="ro1">
          <table:table-cell office:value-type="float" office:value="409.690093994141">
            <text:p>409.6900939941</text:p>
          </table:table-cell>
          <table:table-cell office:value-type="float" office:value="0.001879517">
            <text:p>0.001879517</text:p>
          </table:table-cell>
          <table:table-cell table:number-columns-repeated="4"/>
        </table:table-row>
        <table:table-row table:style-name="ro1">
          <table:table-cell office:value-type="float" office:value="409.802612304688">
            <text:p>409.8026123047</text:p>
          </table:table-cell>
          <table:table-cell office:value-type="float" office:value="-0.0006809168">
            <text:p>-0.0006809168</text:p>
          </table:table-cell>
          <table:table-cell table:number-columns-repeated="4"/>
        </table:table-row>
        <table:table-row table:style-name="ro1">
          <table:table-cell office:value-type="float" office:value="409.915161132813">
            <text:p>409.9151611328</text:p>
          </table:table-cell>
          <table:table-cell office:value-type="float" office:value="0.001777696">
            <text:p>0.001777696</text:p>
          </table:table-cell>
          <table:table-cell table:number-columns-repeated="4"/>
        </table:table-row>
        <table:table-row table:style-name="ro1">
          <table:table-cell office:value-type="float" office:value="410.027679443359">
            <text:p>410.0276794434</text:p>
          </table:table-cell>
          <table:table-cell office:value-type="float" office:value="-0.0007832352">
            <text:p>-0.0007832352</text:p>
          </table:table-cell>
          <table:table-cell table:number-columns-repeated="4"/>
        </table:table-row>
        <table:table-row table:style-name="ro1">
          <table:table-cell office:value-type="float" office:value="410.140228271484">
            <text:p>410.1402282715</text:p>
          </table:table-cell>
          <table:table-cell office:value-type="float" office:value="0.003595357">
            <text:p>0.003595357</text:p>
          </table:table-cell>
          <table:table-cell table:number-columns-repeated="4"/>
        </table:table-row>
        <table:table-row table:style-name="ro1">
          <table:table-cell office:value-type="float" office:value="410.252746582031">
            <text:p>410.252746582</text:p>
          </table:table-cell>
          <table:table-cell office:value-type="float" office:value="0.001996275">
            <text:p>0.001996275</text:p>
          </table:table-cell>
          <table:table-cell table:number-columns-repeated="4"/>
        </table:table-row>
        <table:table-row table:style-name="ro1">
          <table:table-cell office:value-type="float" office:value="410.365295410156">
            <text:p>410.3652954102</text:p>
          </table:table-cell>
          <table:table-cell office:value-type="float" office:value="-0.001194">
            <text:p>-0.001194</text:p>
          </table:table-cell>
          <table:table-cell table:number-columns-repeated="4"/>
        </table:table-row>
        <table:table-row table:style-name="ro1">
          <table:table-cell office:value-type="float" office:value="410.477844238281">
            <text:p>410.4778442383</text:p>
          </table:table-cell>
          <table:table-cell office:value-type="float" office:value="0.01844108">
            <text:p>0.01844108</text:p>
          </table:table-cell>
          <table:table-cell table:number-columns-repeated="4"/>
        </table:table-row>
        <table:table-row table:style-name="ro1">
          <table:table-cell office:value-type="float" office:value="410.590423583984">
            <text:p>410.590423584</text:p>
          </table:table-cell>
          <table:table-cell office:value-type="float" office:value="0.007813272">
            <text:p>0.007813272</text:p>
          </table:table-cell>
          <table:table-cell table:number-columns-repeated="4"/>
        </table:table-row>
        <table:table-row table:style-name="ro1">
          <table:table-cell office:value-type="float" office:value="410.702972412109">
            <text:p>410.7029724121</text:p>
          </table:table-cell>
          <table:table-cell office:value-type="float" office:value="-0.003568987">
            <text:p>-0.003568987</text:p>
          </table:table-cell>
          <table:table-cell table:number-columns-repeated="4"/>
        </table:table-row>
        <table:table-row table:style-name="ro1">
          <table:table-cell office:value-type="float" office:value="410.815551757813">
            <text:p>410.8155517578</text:p>
          </table:table-cell>
          <table:table-cell office:value-type="float" office:value="0.002014653">
            <text:p>0.002014653</text:p>
          </table:table-cell>
          <table:table-cell table:number-columns-repeated="4"/>
        </table:table-row>
        <table:table-row table:style-name="ro1">
          <table:table-cell office:value-type="float" office:value="410.928131103516">
            <text:p>410.9281311035</text:p>
          </table:table-cell>
          <table:table-cell office:value-type="float" office:value="0.02540089">
            <text:p>0.02540089</text:p>
          </table:table-cell>
          <table:table-cell table:number-columns-repeated="4"/>
        </table:table-row>
        <table:table-row table:style-name="ro1">
          <table:table-cell office:value-type="float" office:value="411.040679931641">
            <text:p>411.0406799316</text:p>
          </table:table-cell>
          <table:table-cell office:value-type="float" office:value="0.005974116">
            <text:p>0.005974116</text:p>
          </table:table-cell>
          <table:table-cell table:number-columns-repeated="4"/>
        </table:table-row>
        <table:table-row table:style-name="ro1">
          <table:table-cell office:value-type="float" office:value="411.153289794922">
            <text:p>411.1532897949</text:p>
          </table:table-cell>
          <table:table-cell office:value-type="float" office:value="0.01205425">
            <text:p>0.01205425</text:p>
          </table:table-cell>
          <table:table-cell table:number-columns-repeated="4"/>
        </table:table-row>
        <table:table-row table:style-name="ro1">
          <table:table-cell office:value-type="float" office:value="411.265869140625">
            <text:p>411.2658691406</text:p>
          </table:table-cell>
          <table:table-cell office:value-type="float" office:value="0.006121538">
            <text:p>0.006121538</text:p>
          </table:table-cell>
          <table:table-cell table:number-columns-repeated="4"/>
        </table:table-row>
        <table:table-row table:style-name="ro1">
          <table:table-cell office:value-type="float" office:value="411.378479003906">
            <text:p>411.3784790039</text:p>
          </table:table-cell>
          <table:table-cell office:value-type="float" office:value="0.002582499">
            <text:p>0.002582499</text:p>
          </table:table-cell>
          <table:table-cell table:number-columns-repeated="4"/>
        </table:table-row>
        <table:table-row table:style-name="ro1">
          <table:table-cell office:value-type="float" office:value="411.491058349609">
            <text:p>411.4910583496</text:p>
          </table:table-cell>
          <table:table-cell office:value-type="float" office:value="0.0235571">
            <text:p>0.0235571</text:p>
          </table:table-cell>
          <table:table-cell table:number-columns-repeated="4"/>
        </table:table-row>
        <table:table-row table:style-name="ro1">
          <table:table-cell office:value-type="float" office:value="411.603668212891">
            <text:p>411.6036682129</text:p>
          </table:table-cell>
          <table:table-cell office:value-type="float" office:value="0.002941641">
            <text:p>0.002941641</text:p>
          </table:table-cell>
          <table:table-cell table:number-columns-repeated="4"/>
        </table:table-row>
        <table:table-row table:style-name="ro1">
          <table:table-cell office:value-type="float" office:value="411.716278076172">
            <text:p>411.7162780762</text:p>
          </table:table-cell>
          <table:table-cell office:value-type="float" office:value="0.0219634">
            <text:p>0.0219634</text:p>
          </table:table-cell>
          <table:table-cell table:number-columns-repeated="4"/>
        </table:table-row>
        <table:table-row table:style-name="ro1">
          <table:table-cell office:value-type="float" office:value="411.828887939453">
            <text:p>411.8288879395</text:p>
          </table:table-cell>
          <table:table-cell office:value-type="float" office:value="0.001527636">
            <text:p>0.001527636</text:p>
          </table:table-cell>
          <table:table-cell table:number-columns-repeated="4"/>
        </table:table-row>
        <table:table-row table:style-name="ro1">
          <table:table-cell office:value-type="float" office:value="411.941528320313">
            <text:p>411.9415283203</text:p>
          </table:table-cell>
          <table:table-cell office:value-type="float" office:value="0.002612635">
            <text:p>0.002612635</text:p>
          </table:table-cell>
          <table:table-cell table:number-columns-repeated="4"/>
        </table:table-row>
        <table:table-row table:style-name="ro1">
          <table:table-cell office:value-type="float" office:value="412.054138183594">
            <text:p>412.0541381836</text:p>
          </table:table-cell>
          <table:table-cell office:value-type="float" office:value="0.001157479">
            <text:p>0.001157479</text:p>
          </table:table-cell>
          <table:table-cell table:number-columns-repeated="4"/>
        </table:table-row>
        <table:table-row table:style-name="ro1">
          <table:table-cell office:value-type="float" office:value="412.166778564453">
            <text:p>412.1667785645</text:p>
          </table:table-cell>
          <table:table-cell office:value-type="float" office:value="-0.007199971">
            <text:p>-0.007199971</text:p>
          </table:table-cell>
          <table:table-cell table:number-columns-repeated="4"/>
        </table:table-row>
        <table:table-row table:style-name="ro1">
          <table:table-cell office:value-type="float" office:value="412.279418945313">
            <text:p>412.2794189453</text:p>
          </table:table-cell>
          <table:table-cell office:value-type="float" office:value="0.008583926">
            <text:p>0.008583926</text:p>
          </table:table-cell>
          <table:table-cell table:number-columns-repeated="4"/>
        </table:table-row>
        <table:table-row table:style-name="ro1">
          <table:table-cell office:value-type="float" office:value="412.392059326172">
            <text:p>412.3920593262</text:p>
          </table:table-cell>
          <table:table-cell office:value-type="float" office:value="0.002391253">
            <text:p>0.002391253</text:p>
          </table:table-cell>
          <table:table-cell table:number-columns-repeated="4"/>
        </table:table-row>
        <table:table-row table:style-name="ro1">
          <table:table-cell office:value-type="float" office:value="412.504730224609">
            <text:p>412.5047302246</text:p>
          </table:table-cell>
          <table:table-cell office:value-type="float" office:value="-0.007468534">
            <text:p>-0.007468534</text:p>
          </table:table-cell>
          <table:table-cell table:number-columns-repeated="4"/>
        </table:table-row>
        <table:table-row table:style-name="ro1">
          <table:table-cell office:value-type="float" office:value="412.617370605469">
            <text:p>412.6173706055</text:p>
          </table:table-cell>
          <table:table-cell office:value-type="float" office:value="-0.001903547">
            <text:p>-0.001903547</text:p>
          </table:table-cell>
          <table:table-cell table:number-columns-repeated="4"/>
        </table:table-row>
        <table:table-row table:style-name="ro1">
          <table:table-cell office:value-type="float" office:value="412.730041503906">
            <text:p>412.7300415039</text:p>
          </table:table-cell>
          <table:table-cell office:value-type="float" office:value="0.0006104452">
            <text:p>0.0006104452</text:p>
          </table:table-cell>
          <table:table-cell table:number-columns-repeated="4"/>
        </table:table-row>
        <table:table-row table:style-name="ro1">
          <table:table-cell office:value-type="float" office:value="412.842712402344">
            <text:p>412.8427124023</text:p>
          </table:table-cell>
          <table:table-cell office:value-type="float" office:value="-0.0006554447">
            <text:p>-0.0006554447</text:p>
          </table:table-cell>
          <table:table-cell table:number-columns-repeated="4"/>
        </table:table-row>
        <table:table-row table:style-name="ro1">
          <table:table-cell office:value-type="float" office:value="412.955383300781">
            <text:p>412.9553833008</text:p>
          </table:table-cell>
          <table:table-cell office:value-type="float" office:value="-0.008914857">
            <text:p>-0.008914857</text:p>
          </table:table-cell>
          <table:table-cell table:number-columns-repeated="4"/>
        </table:table-row>
        <table:table-row table:style-name="ro1">
          <table:table-cell office:value-type="float" office:value="413.068054199219">
            <text:p>413.0680541992</text:p>
          </table:table-cell>
          <table:table-cell office:value-type="float" office:value="-0.005549447">
            <text:p>-0.005549447</text:p>
          </table:table-cell>
          <table:table-cell table:number-columns-repeated="4"/>
        </table:table-row>
        <table:table-row table:style-name="ro1">
          <table:table-cell office:value-type="float" office:value="413.180725097656">
            <text:p>413.1807250977</text:p>
          </table:table-cell>
          <table:table-cell office:value-type="string">
            <text:p>-2.210229E-05</text:p>
          </table:table-cell>
          <table:table-cell table:number-columns-repeated="4"/>
        </table:table-row>
        <table:table-row table:style-name="ro1">
          <table:table-cell office:value-type="float" office:value="413.293426513672">
            <text:p>413.2934265137</text:p>
          </table:table-cell>
          <table:table-cell office:value-type="float" office:value="-0.0002712096">
            <text:p>-0.0002712096</text:p>
          </table:table-cell>
          <table:table-cell table:number-columns-repeated="4"/>
        </table:table-row>
        <table:table-row table:style-name="ro1">
          <table:table-cell office:value-type="float" office:value="413.406097412109">
            <text:p>413.4060974121</text:p>
          </table:table-cell>
          <table:table-cell office:value-type="float" office:value="-0.003175538">
            <text:p>-0.003175538</text:p>
          </table:table-cell>
          <table:table-cell table:number-columns-repeated="4"/>
        </table:table-row>
        <table:table-row table:style-name="ro1">
          <table:table-cell office:value-type="float" office:value="413.518798828125">
            <text:p>413.5187988281</text:p>
          </table:table-cell>
          <table:table-cell office:value-type="float" office:value="-0.001850737">
            <text:p>-0.001850737</text:p>
          </table:table-cell>
          <table:table-cell table:number-columns-repeated="4"/>
        </table:table-row>
        <table:table-row table:style-name="ro1">
          <table:table-cell office:value-type="float" office:value="413.631500244141">
            <text:p>413.6315002441</text:p>
          </table:table-cell>
          <table:table-cell office:value-type="float" office:value="-0.006817286">
            <text:p>-0.006817286</text:p>
          </table:table-cell>
          <table:table-cell table:number-columns-repeated="4"/>
        </table:table-row>
        <table:table-row table:style-name="ro1">
          <table:table-cell office:value-type="float" office:value="413.744232177734">
            <text:p>413.7442321777</text:p>
          </table:table-cell>
          <table:table-cell office:value-type="float" office:value="0.002153651">
            <text:p>0.002153651</text:p>
          </table:table-cell>
          <table:table-cell table:number-columns-repeated="4"/>
        </table:table-row>
        <table:table-row table:style-name="ro1">
          <table:table-cell office:value-type="float" office:value="413.85693359375">
            <text:p>413.8569335938</text:p>
          </table:table-cell>
          <table:table-cell office:value-type="float" office:value="0.002095897">
            <text:p>0.002095897</text:p>
          </table:table-cell>
          <table:table-cell table:number-columns-repeated="4"/>
        </table:table-row>
        <table:table-row table:style-name="ro1">
          <table:table-cell office:value-type="float" office:value="413.969665527344">
            <text:p>413.9696655273</text:p>
          </table:table-cell>
          <table:table-cell office:value-type="float" office:value="-0.001765201">
            <text:p>-0.001765201</text:p>
          </table:table-cell>
          <table:table-cell table:number-columns-repeated="4"/>
        </table:table-row>
        <table:table-row table:style-name="ro1">
          <table:table-cell office:value-type="float" office:value="414.082366943359">
            <text:p>414.0823669434</text:p>
          </table:table-cell>
          <table:table-cell office:value-type="float" office:value="0.01182778">
            <text:p>0.01182778</text:p>
          </table:table-cell>
          <table:table-cell table:number-columns-repeated="4"/>
        </table:table-row>
        <table:table-row table:style-name="ro1">
          <table:table-cell office:value-type="float" office:value="414.195098876953">
            <text:p>414.195098877</text:p>
          </table:table-cell>
          <table:table-cell office:value-type="float" office:value="0.002242427">
            <text:p>0.002242427</text:p>
          </table:table-cell>
          <table:table-cell table:number-columns-repeated="4"/>
        </table:table-row>
        <table:table-row table:style-name="ro1">
          <table:table-cell office:value-type="float" office:value="414.307861328125">
            <text:p>414.3078613281</text:p>
          </table:table-cell>
          <table:table-cell office:value-type="float" office:value="0.008467028">
            <text:p>0.008467028</text:p>
          </table:table-cell>
          <table:table-cell table:number-columns-repeated="4"/>
        </table:table-row>
        <table:table-row table:style-name="ro1">
          <table:table-cell office:value-type="float" office:value="414.420593261719">
            <text:p>414.4205932617</text:p>
          </table:table-cell>
          <table:table-cell office:value-type="float" office:value="-0.008514777">
            <text:p>-0.008514777</text:p>
          </table:table-cell>
          <table:table-cell table:number-columns-repeated="4"/>
        </table:table-row>
        <table:table-row table:style-name="ro1">
          <table:table-cell office:value-type="float" office:value="414.533325195313">
            <text:p>414.5333251953</text:p>
          </table:table-cell>
          <table:table-cell office:value-type="float" office:value="0.006731597">
            <text:p>0.006731597</text:p>
          </table:table-cell>
          <table:table-cell table:number-columns-repeated="4"/>
        </table:table-row>
        <table:table-row table:style-name="ro1">
          <table:table-cell office:value-type="float" office:value="414.646087646484">
            <text:p>414.6460876465</text:p>
          </table:table-cell>
          <table:table-cell office:value-type="float" office:value="-0.003476334">
            <text:p>-0.003476334</text:p>
          </table:table-cell>
          <table:table-cell table:number-columns-repeated="4"/>
        </table:table-row>
        <table:table-row table:style-name="ro1">
          <table:table-cell office:value-type="float" office:value="414.758850097656">
            <text:p>414.7588500977</text:p>
          </table:table-cell>
          <table:table-cell office:value-type="float" office:value="-0.003064088">
            <text:p>-0.003064088</text:p>
          </table:table-cell>
          <table:table-cell table:number-columns-repeated="4"/>
        </table:table-row>
        <table:table-row table:style-name="ro1">
          <table:table-cell office:value-type="float" office:value="414.871612548828">
            <text:p>414.8716125488</text:p>
          </table:table-cell>
          <table:table-cell office:value-type="float" office:value="0.004403215">
            <text:p>0.004403215</text:p>
          </table:table-cell>
          <table:table-cell table:number-columns-repeated="4"/>
        </table:table-row>
        <table:table-row table:style-name="ro1">
          <table:table-cell office:value-type="float" office:value="414.984375">
            <text:p>414.984375</text:p>
          </table:table-cell>
          <table:table-cell office:value-type="float" office:value="0.00352238">
            <text:p>0.00352238</text:p>
          </table:table-cell>
          <table:table-cell table:number-columns-repeated="4"/>
        </table:table-row>
        <table:table-row table:style-name="ro1">
          <table:table-cell office:value-type="float" office:value="415.09716796875">
            <text:p>415.0971679688</text:p>
          </table:table-cell>
          <table:table-cell office:value-type="float" office:value="0.0002263986">
            <text:p>0.0002263986</text:p>
          </table:table-cell>
          <table:table-cell table:number-columns-repeated="4"/>
        </table:table-row>
        <table:table-row table:style-name="ro1">
          <table:table-cell office:value-type="float" office:value="415.209930419922">
            <text:p>415.2099304199</text:p>
          </table:table-cell>
          <table:table-cell office:value-type="float" office:value="-0.003690352">
            <text:p>-0.003690352</text:p>
          </table:table-cell>
          <table:table-cell table:number-columns-repeated="4"/>
        </table:table-row>
        <table:table-row table:style-name="ro1">
          <table:table-cell office:value-type="float" office:value="415.322723388672">
            <text:p>415.3227233887</text:p>
          </table:table-cell>
          <table:table-cell office:value-type="float" office:value="-0.002867825">
            <text:p>-0.002867825</text:p>
          </table:table-cell>
          <table:table-cell table:number-columns-repeated="4"/>
        </table:table-row>
        <table:table-row table:style-name="ro1">
          <table:table-cell office:value-type="float" office:value="415.435516357422">
            <text:p>415.4355163574</text:p>
          </table:table-cell>
          <table:table-cell office:value-type="float" office:value="-0.004003081">
            <text:p>-0.004003081</text:p>
          </table:table-cell>
          <table:table-cell table:number-columns-repeated="4"/>
        </table:table-row>
        <table:table-row table:style-name="ro1">
          <table:table-cell office:value-type="float" office:value="415.548309326172">
            <text:p>415.5483093262</text:p>
          </table:table-cell>
          <table:table-cell office:value-type="float" office:value="0.0009154966">
            <text:p>0.0009154966</text:p>
          </table:table-cell>
          <table:table-cell table:number-columns-repeated="4"/>
        </table:table-row>
        <table:table-row table:style-name="ro1">
          <table:table-cell office:value-type="float" office:value="415.661102294922">
            <text:p>415.6611022949</text:p>
          </table:table-cell>
          <table:table-cell office:value-type="float" office:value="-0.006041618">
            <text:p>-0.006041618</text:p>
          </table:table-cell>
          <table:table-cell table:number-columns-repeated="4"/>
        </table:table-row>
        <table:table-row table:style-name="ro1">
          <table:table-cell office:value-type="float" office:value="415.773895263672">
            <text:p>415.7738952637</text:p>
          </table:table-cell>
          <table:table-cell office:value-type="float" office:value="0.005391041">
            <text:p>0.005391041</text:p>
          </table:table-cell>
          <table:table-cell table:number-columns-repeated="4"/>
        </table:table-row>
        <table:table-row table:style-name="ro1">
          <table:table-cell office:value-type="float" office:value="415.88671875">
            <text:p>415.88671875</text:p>
          </table:table-cell>
          <table:table-cell office:value-type="float" office:value="-0.004788213">
            <text:p>-0.004788213</text:p>
          </table:table-cell>
          <table:table-cell table:number-columns-repeated="4"/>
        </table:table-row>
        <table:table-row table:style-name="ro1">
          <table:table-cell office:value-type="float" office:value="415.999542236328">
            <text:p>415.9995422363</text:p>
          </table:table-cell>
          <table:table-cell office:value-type="float" office:value="-0.008666575">
            <text:p>-0.008666575</text:p>
          </table:table-cell>
          <table:table-cell table:number-columns-repeated="4"/>
        </table:table-row>
        <table:table-row table:style-name="ro1">
          <table:table-cell office:value-type="float" office:value="416.112365722656">
            <text:p>416.1123657227</text:p>
          </table:table-cell>
          <table:table-cell office:value-type="float" office:value="-0.00824669">
            <text:p>-0.00824669</text:p>
          </table:table-cell>
          <table:table-cell table:number-columns-repeated="4"/>
        </table:table-row>
        <table:table-row table:style-name="ro1">
          <table:table-cell office:value-type="float" office:value="416.225189208984">
            <text:p>416.225189209</text:p>
          </table:table-cell>
          <table:table-cell office:value-type="float" office:value="-0.0001736371">
            <text:p>-0.0001736371</text:p>
          </table:table-cell>
          <table:table-cell table:number-columns-repeated="4"/>
        </table:table-row>
        <table:table-row table:style-name="ro1">
          <table:table-cell office:value-type="float" office:value="416.338012695313">
            <text:p>416.3380126953</text:p>
          </table:table-cell>
          <table:table-cell office:value-type="float" office:value="-0.002070487">
            <text:p>-0.002070487</text:p>
          </table:table-cell>
          <table:table-cell table:number-columns-repeated="4"/>
        </table:table-row>
        <table:table-row table:style-name="ro1">
          <table:table-cell office:value-type="float" office:value="416.450866699219">
            <text:p>416.4508666992</text:p>
          </table:table-cell>
          <table:table-cell office:value-type="float" office:value="0.0006246497">
            <text:p>0.0006246497</text:p>
          </table:table-cell>
          <table:table-cell table:number-columns-repeated="4"/>
        </table:table-row>
        <table:table-row table:style-name="ro1">
          <table:table-cell office:value-type="float" office:value="416.563690185547">
            <text:p>416.5636901855</text:p>
          </table:table-cell>
          <table:table-cell office:value-type="float" office:value="-0.003182289">
            <text:p>-0.003182289</text:p>
          </table:table-cell>
          <table:table-cell table:number-columns-repeated="4"/>
        </table:table-row>
        <table:table-row table:style-name="ro1">
          <table:table-cell office:value-type="float" office:value="416.676544189453">
            <text:p>416.6765441895</text:p>
          </table:table-cell>
          <table:table-cell office:value-type="float" office:value="-0.003903253">
            <text:p>-0.003903253</text:p>
          </table:table-cell>
          <table:table-cell table:number-columns-repeated="4"/>
        </table:table-row>
        <table:table-row table:style-name="ro1">
          <table:table-cell office:value-type="float" office:value="416.789398193359">
            <text:p>416.7893981934</text:p>
          </table:table-cell>
          <table:table-cell office:value-type="float" office:value="0.001482465">
            <text:p>0.001482465</text:p>
          </table:table-cell>
          <table:table-cell table:number-columns-repeated="4"/>
        </table:table-row>
        <table:table-row table:style-name="ro1">
          <table:table-cell office:value-type="float" office:value="416.902252197266">
            <text:p>416.9022521973</text:p>
          </table:table-cell>
          <table:table-cell office:value-type="float" office:value="-0.00266364">
            <text:p>-0.00266364</text:p>
          </table:table-cell>
          <table:table-cell table:number-columns-repeated="4"/>
        </table:table-row>
        <table:table-row table:style-name="ro1">
          <table:table-cell office:value-type="float" office:value="417.01513671875">
            <text:p>417.0151367188</text:p>
          </table:table-cell>
          <table:table-cell office:value-type="float" office:value="-0.0025574">
            <text:p>-0.0025574</text:p>
          </table:table-cell>
          <table:table-cell table:number-columns-repeated="4"/>
        </table:table-row>
        <table:table-row table:style-name="ro1">
          <table:table-cell office:value-type="float" office:value="417.127990722656">
            <text:p>417.1279907227</text:p>
          </table:table-cell>
          <table:table-cell office:value-type="float" office:value="0.01212146">
            <text:p>0.01212146</text:p>
          </table:table-cell>
          <table:table-cell table:number-columns-repeated="4"/>
        </table:table-row>
        <table:table-row table:style-name="ro1">
          <table:table-cell office:value-type="float" office:value="417.240875244141">
            <text:p>417.2408752441</text:p>
          </table:table-cell>
          <table:table-cell office:value-type="float" office:value="0.003753794">
            <text:p>0.003753794</text:p>
          </table:table-cell>
          <table:table-cell table:number-columns-repeated="4"/>
        </table:table-row>
        <table:table-row table:style-name="ro1">
          <table:table-cell office:value-type="float" office:value="417.353759765625">
            <text:p>417.3537597656</text:p>
          </table:table-cell>
          <table:table-cell office:value-type="float" office:value="0.01950768">
            <text:p>0.01950768</text:p>
          </table:table-cell>
          <table:table-cell table:number-columns-repeated="4"/>
        </table:table-row>
        <table:table-row table:style-name="ro1">
          <table:table-cell office:value-type="float" office:value="417.466644287109">
            <text:p>417.4666442871</text:p>
          </table:table-cell>
          <table:table-cell office:value-type="float" office:value="-0.009404738">
            <text:p>-0.009404738</text:p>
          </table:table-cell>
          <table:table-cell table:number-columns-repeated="4"/>
        </table:table-row>
        <table:table-row table:style-name="ro1">
          <table:table-cell office:value-type="float" office:value="417.579528808594">
            <text:p>417.5795288086</text:p>
          </table:table-cell>
          <table:table-cell office:value-type="float" office:value="-0.006151777">
            <text:p>-0.006151777</text:p>
          </table:table-cell>
          <table:table-cell table:number-columns-repeated="4"/>
        </table:table-row>
        <table:table-row table:style-name="ro1">
          <table:table-cell office:value-type="float" office:value="417.692443847656">
            <text:p>417.6924438477</text:p>
          </table:table-cell>
          <table:table-cell office:value-type="float" office:value="0.001221781">
            <text:p>0.001221781</text:p>
          </table:table-cell>
          <table:table-cell table:number-columns-repeated="4"/>
        </table:table-row>
        <table:table-row table:style-name="ro1">
          <table:table-cell office:value-type="float" office:value="417.805328369141">
            <text:p>417.8053283691</text:p>
          </table:table-cell>
          <table:table-cell office:value-type="float" office:value="0.002888185">
            <text:p>0.002888185</text:p>
          </table:table-cell>
          <table:table-cell table:number-columns-repeated="4"/>
        </table:table-row>
        <table:table-row table:style-name="ro1">
          <table:table-cell office:value-type="float" office:value="417.918243408203">
            <text:p>417.9182434082</text:p>
          </table:table-cell>
          <table:table-cell office:value-type="float" office:value="-0.01463507">
            <text:p>-0.01463507</text:p>
          </table:table-cell>
          <table:table-cell table:number-columns-repeated="4"/>
        </table:table-row>
        <table:table-row table:style-name="ro1">
          <table:table-cell office:value-type="float" office:value="418.031158447266">
            <text:p>418.0311584473</text:p>
          </table:table-cell>
          <table:table-cell office:value-type="float" office:value="-0.007993084">
            <text:p>-0.007993084</text:p>
          </table:table-cell>
          <table:table-cell table:number-columns-repeated="4"/>
        </table:table-row>
        <table:table-row table:style-name="ro1">
          <table:table-cell office:value-type="float" office:value="418.144073486328">
            <text:p>418.1440734863</text:p>
          </table:table-cell>
          <table:table-cell office:value-type="float" office:value="0.02920197">
            <text:p>0.02920197</text:p>
          </table:table-cell>
          <table:table-cell table:number-columns-repeated="4"/>
        </table:table-row>
        <table:table-row table:style-name="ro1">
          <table:table-cell office:value-type="float" office:value="418.256988525391">
            <text:p>418.2569885254</text:p>
          </table:table-cell>
          <table:table-cell office:value-type="float" office:value="0.01452223">
            <text:p>0.01452223</text:p>
          </table:table-cell>
          <table:table-cell table:number-columns-repeated="4"/>
        </table:table-row>
        <table:table-row table:style-name="ro1">
          <table:table-cell office:value-type="float" office:value="418.369934082031">
            <text:p>418.369934082</text:p>
          </table:table-cell>
          <table:table-cell office:value-type="float" office:value="0.005588329">
            <text:p>0.005588329</text:p>
          </table:table-cell>
          <table:table-cell table:number-columns-repeated="4"/>
        </table:table-row>
        <table:table-row table:style-name="ro1">
          <table:table-cell office:value-type="float" office:value="418.482849121094">
            <text:p>418.4828491211</text:p>
          </table:table-cell>
          <table:table-cell office:value-type="float" office:value="0.004728617">
            <text:p>0.004728617</text:p>
          </table:table-cell>
          <table:table-cell table:number-columns-repeated="4"/>
        </table:table-row>
        <table:table-row table:style-name="ro1">
          <table:table-cell office:value-type="float" office:value="418.595794677734">
            <text:p>418.5957946777</text:p>
          </table:table-cell>
          <table:table-cell office:value-type="float" office:value="0.0004590876">
            <text:p>0.0004590876</text:p>
          </table:table-cell>
          <table:table-cell table:number-columns-repeated="4"/>
        </table:table-row>
        <table:table-row table:style-name="ro1">
          <table:table-cell office:value-type="float" office:value="418.708740234375">
            <text:p>418.7087402344</text:p>
          </table:table-cell>
          <table:table-cell office:value-type="float" office:value="0.001242443">
            <text:p>0.001242443</text:p>
          </table:table-cell>
          <table:table-cell table:number-columns-repeated="4"/>
        </table:table-row>
        <table:table-row table:style-name="ro1">
          <table:table-cell office:value-type="float" office:value="418.821685791016">
            <text:p>418.821685791</text:p>
          </table:table-cell>
          <table:table-cell office:value-type="float" office:value="0.001676148">
            <text:p>0.001676148</text:p>
          </table:table-cell>
          <table:table-cell table:number-columns-repeated="4"/>
        </table:table-row>
        <table:table-row table:style-name="ro1">
          <table:table-cell office:value-type="float" office:value="418.934661865234">
            <text:p>418.9346618652</text:p>
          </table:table-cell>
          <table:table-cell office:value-type="float" office:value="0.003753381">
            <text:p>0.003753381</text:p>
          </table:table-cell>
          <table:table-cell table:number-columns-repeated="4"/>
        </table:table-row>
        <table:table-row table:style-name="ro1">
          <table:table-cell office:value-type="float" office:value="419.047607421875">
            <text:p>419.0476074219</text:p>
          </table:table-cell>
          <table:table-cell office:value-type="float" office:value="-0.003373288">
            <text:p>-0.003373288</text:p>
          </table:table-cell>
          <table:table-cell table:number-columns-repeated="4"/>
        </table:table-row>
        <table:table-row table:style-name="ro1">
          <table:table-cell office:value-type="float" office:value="419.160583496094">
            <text:p>419.1605834961</text:p>
          </table:table-cell>
          <table:table-cell office:value-type="float" office:value="-0.007680501">
            <text:p>-0.007680501</text:p>
          </table:table-cell>
          <table:table-cell table:number-columns-repeated="4"/>
        </table:table-row>
        <table:table-row table:style-name="ro1">
          <table:table-cell office:value-type="float" office:value="419.273559570313">
            <text:p>419.2735595703</text:p>
          </table:table-cell>
          <table:table-cell office:value-type="float" office:value="-0.005803587">
            <text:p>-0.005803587</text:p>
          </table:table-cell>
          <table:table-cell table:number-columns-repeated="4"/>
        </table:table-row>
        <table:table-row table:style-name="ro1">
          <table:table-cell office:value-type="float" office:value="419.386535644531">
            <text:p>419.3865356445</text:p>
          </table:table-cell>
          <table:table-cell office:value-type="float" office:value="-0.0003978944">
            <text:p>-0.0003978944</text:p>
          </table:table-cell>
          <table:table-cell table:number-columns-repeated="4"/>
        </table:table-row>
        <table:table-row table:style-name="ro1">
          <table:table-cell office:value-type="float" office:value="419.49951171875">
            <text:p>419.4995117188</text:p>
          </table:table-cell>
          <table:table-cell office:value-type="float" office:value="0.009863282">
            <text:p>0.009863282</text:p>
          </table:table-cell>
          <table:table-cell table:number-columns-repeated="4"/>
        </table:table-row>
        <table:table-row table:style-name="ro1">
          <table:table-cell office:value-type="float" office:value="419.612487792969">
            <text:p>419.612487793</text:p>
          </table:table-cell>
          <table:table-cell office:value-type="float" office:value="0.006056131">
            <text:p>0.006056131</text:p>
          </table:table-cell>
          <table:table-cell table:number-columns-repeated="4"/>
        </table:table-row>
        <table:table-row table:style-name="ro1">
          <table:table-cell office:value-type="float" office:value="419.725494384766">
            <text:p>419.7254943848</text:p>
          </table:table-cell>
          <table:table-cell office:value-type="float" office:value="0.008217057">
            <text:p>0.008217057</text:p>
          </table:table-cell>
          <table:table-cell table:number-columns-repeated="4"/>
        </table:table-row>
        <table:table-row table:style-name="ro1">
          <table:table-cell office:value-type="float" office:value="419.838470458984">
            <text:p>419.838470459</text:p>
          </table:table-cell>
          <table:table-cell office:value-type="float" office:value="0.0007590328">
            <text:p>0.0007590328</text:p>
          </table:table-cell>
          <table:table-cell table:number-columns-repeated="4"/>
        </table:table-row>
        <table:table-row table:style-name="ro1">
          <table:table-cell office:value-type="float" office:value="419.951477050781">
            <text:p>419.9514770508</text:p>
          </table:table-cell>
          <table:table-cell office:value-type="float" office:value="0.01171621">
            <text:p>0.01171621</text:p>
          </table:table-cell>
          <table:table-cell table:number-columns-repeated="4"/>
        </table:table-row>
        <table:table-row table:style-name="ro1">
          <table:table-cell office:value-type="float" office:value="420.064483642578">
            <text:p>420.0644836426</text:p>
          </table:table-cell>
          <table:table-cell office:value-type="float" office:value="-0.002311971">
            <text:p>-0.002311971</text:p>
          </table:table-cell>
          <table:table-cell table:number-columns-repeated="4"/>
        </table:table-row>
        <table:table-row table:style-name="ro1">
          <table:table-cell office:value-type="float" office:value="420.177520751953">
            <text:p>420.177520752</text:p>
          </table:table-cell>
          <table:table-cell office:value-type="string">
            <text:p>2.350925E-05</text:p>
          </table:table-cell>
          <table:table-cell table:number-columns-repeated="4"/>
        </table:table-row>
        <table:table-row table:style-name="ro1">
          <table:table-cell office:value-type="float" office:value="420.29052734375">
            <text:p>420.2905273438</text:p>
          </table:table-cell>
          <table:table-cell office:value-type="float" office:value="-0.007017438">
            <text:p>-0.007017438</text:p>
          </table:table-cell>
          <table:table-cell table:number-columns-repeated="4"/>
        </table:table-row>
        <table:table-row table:style-name="ro1">
          <table:table-cell office:value-type="float" office:value="420.403564453125">
            <text:p>420.4035644531</text:p>
          </table:table-cell>
          <table:table-cell office:value-type="float" office:value="-0.004750987">
            <text:p>-0.004750987</text:p>
          </table:table-cell>
          <table:table-cell table:number-columns-repeated="4"/>
        </table:table-row>
        <table:table-row table:style-name="ro1">
          <table:table-cell office:value-type="float" office:value="420.516571044922">
            <text:p>420.5165710449</text:p>
          </table:table-cell>
          <table:table-cell office:value-type="float" office:value="-0.003221323">
            <text:p>-0.003221323</text:p>
          </table:table-cell>
          <table:table-cell table:number-columns-repeated="4"/>
        </table:table-row>
        <table:table-row table:style-name="ro1">
          <table:table-cell office:value-type="float" office:value="420.629608154297">
            <text:p>420.6296081543</text:p>
          </table:table-cell>
          <table:table-cell office:value-type="float" office:value="0.001993384">
            <text:p>0.001993384</text:p>
          </table:table-cell>
          <table:table-cell table:number-columns-repeated="4"/>
        </table:table-row>
        <table:table-row table:style-name="ro1">
          <table:table-cell office:value-type="float" office:value="420.742645263672">
            <text:p>420.7426452637</text:p>
          </table:table-cell>
          <table:table-cell office:value-type="float" office:value="0.004134569">
            <text:p>0.004134569</text:p>
          </table:table-cell>
          <table:table-cell table:number-columns-repeated="4"/>
        </table:table-row>
        <table:table-row table:style-name="ro1">
          <table:table-cell office:value-type="float" office:value="420.855712890625">
            <text:p>420.8557128906</text:p>
          </table:table-cell>
          <table:table-cell office:value-type="float" office:value="0.005755753">
            <text:p>0.005755753</text:p>
          </table:table-cell>
          <table:table-cell table:number-columns-repeated="4"/>
        </table:table-row>
        <table:table-row table:style-name="ro1">
          <table:table-cell office:value-type="float" office:value="420.96875">
            <text:p>420.96875</text:p>
          </table:table-cell>
          <table:table-cell office:value-type="float" office:value="0.0133656">
            <text:p>0.0133656</text:p>
          </table:table-cell>
          <table:table-cell table:number-columns-repeated="4"/>
        </table:table-row>
        <table:table-row table:style-name="ro1">
          <table:table-cell office:value-type="float" office:value="421.081817626953">
            <text:p>421.081817627</text:p>
          </table:table-cell>
          <table:table-cell office:value-type="float" office:value="-0.002023526">
            <text:p>-0.002023526</text:p>
          </table:table-cell>
          <table:table-cell table:number-columns-repeated="4"/>
        </table:table-row>
        <table:table-row table:style-name="ro1">
          <table:table-cell office:value-type="float" office:value="421.194854736328">
            <text:p>421.1948547363</text:p>
          </table:table-cell>
          <table:table-cell office:value-type="float" office:value="-0.004779955">
            <text:p>-0.004779955</text:p>
          </table:table-cell>
          <table:table-cell table:number-columns-repeated="4"/>
        </table:table-row>
        <table:table-row table:style-name="ro1">
          <table:table-cell office:value-type="float" office:value="421.307922363281">
            <text:p>421.3079223633</text:p>
          </table:table-cell>
          <table:table-cell office:value-type="float" office:value="0.002383973">
            <text:p>0.002383973</text:p>
          </table:table-cell>
          <table:table-cell table:number-columns-repeated="4"/>
        </table:table-row>
        <table:table-row table:style-name="ro1">
          <table:table-cell office:value-type="float" office:value="421.421020507813">
            <text:p>421.4210205078</text:p>
          </table:table-cell>
          <table:table-cell office:value-type="float" office:value="0.01053416">
            <text:p>0.01053416</text:p>
          </table:table-cell>
          <table:table-cell table:number-columns-repeated="4"/>
        </table:table-row>
        <table:table-row table:style-name="ro1">
          <table:table-cell office:value-type="float" office:value="421.534088134766">
            <text:p>421.5340881348</text:p>
          </table:table-cell>
          <table:table-cell office:value-type="float" office:value="-0.008253216">
            <text:p>-0.008253216</text:p>
          </table:table-cell>
          <table:table-cell table:number-columns-repeated="4"/>
        </table:table-row>
        <table:table-row table:style-name="ro1">
          <table:table-cell office:value-type="float" office:value="421.647155761719">
            <text:p>421.6471557617</text:p>
          </table:table-cell>
          <table:table-cell office:value-type="float" office:value="0.003638663">
            <text:p>0.003638663</text:p>
          </table:table-cell>
          <table:table-cell table:number-columns-repeated="4"/>
        </table:table-row>
        <table:table-row table:style-name="ro1">
          <table:table-cell office:value-type="float" office:value="421.76025390625">
            <text:p>421.7602539063</text:p>
          </table:table-cell>
          <table:table-cell office:value-type="float" office:value="-0.001779708">
            <text:p>-0.001779708</text:p>
          </table:table-cell>
          <table:table-cell table:number-columns-repeated="4"/>
        </table:table-row>
        <table:table-row table:style-name="ro1">
          <table:table-cell office:value-type="float" office:value="421.873352050781">
            <text:p>421.8733520508</text:p>
          </table:table-cell>
          <table:table-cell office:value-type="float" office:value="0.006868467">
            <text:p>0.006868467</text:p>
          </table:table-cell>
          <table:table-cell table:number-columns-repeated="4"/>
        </table:table-row>
        <table:table-row table:style-name="ro1">
          <table:table-cell office:value-type="float" office:value="421.986450195313">
            <text:p>421.9864501953</text:p>
          </table:table-cell>
          <table:table-cell office:value-type="float" office:value="0.005133217">
            <text:p>0.005133217</text:p>
          </table:table-cell>
          <table:table-cell table:number-columns-repeated="4"/>
        </table:table-row>
        <table:table-row table:style-name="ro1">
          <table:table-cell office:value-type="float" office:value="422.099548339844">
            <text:p>422.0995483398</text:p>
          </table:table-cell>
          <table:table-cell office:value-type="float" office:value="-0.001684428">
            <text:p>-0.001684428</text:p>
          </table:table-cell>
          <table:table-cell table:number-columns-repeated="4"/>
        </table:table-row>
        <table:table-row table:style-name="ro1">
          <table:table-cell office:value-type="float" office:value="422.212646484375">
            <text:p>422.2126464844</text:p>
          </table:table-cell>
          <table:table-cell office:value-type="float" office:value="0.02081948">
            <text:p>0.02081948</text:p>
          </table:table-cell>
          <table:table-cell table:number-columns-repeated="4"/>
        </table:table-row>
        <table:table-row table:style-name="ro1">
          <table:table-cell office:value-type="float" office:value="422.325775146484">
            <text:p>422.3257751465</text:p>
          </table:table-cell>
          <table:table-cell office:value-type="float" office:value="-0.00301849">
            <text:p>-0.00301849</text:p>
          </table:table-cell>
          <table:table-cell table:number-columns-repeated="4"/>
        </table:table-row>
        <table:table-row table:style-name="ro1">
          <table:table-cell office:value-type="float" office:value="422.438903808594">
            <text:p>422.4389038086</text:p>
          </table:table-cell>
          <table:table-cell office:value-type="float" office:value="-0.007347972">
            <text:p>-0.007347972</text:p>
          </table:table-cell>
          <table:table-cell table:number-columns-repeated="4"/>
        </table:table-row>
        <table:table-row table:style-name="ro1">
          <table:table-cell office:value-type="float" office:value="422.552001953125">
            <text:p>422.5520019531</text:p>
          </table:table-cell>
          <table:table-cell office:value-type="float" office:value="-0.007732293">
            <text:p>-0.007732293</text:p>
          </table:table-cell>
          <table:table-cell table:number-columns-repeated="4"/>
        </table:table-row>
        <table:table-row table:style-name="ro1">
          <table:table-cell office:value-type="float" office:value="422.665130615234">
            <text:p>422.6651306152</text:p>
          </table:table-cell>
          <table:table-cell office:value-type="float" office:value="0.008555517">
            <text:p>0.008555517</text:p>
          </table:table-cell>
          <table:table-cell table:number-columns-repeated="4"/>
        </table:table-row>
        <table:table-row table:style-name="ro1">
          <table:table-cell office:value-type="float" office:value="422.778289794922">
            <text:p>422.7782897949</text:p>
          </table:table-cell>
          <table:table-cell office:value-type="float" office:value="-0.005014373">
            <text:p>-0.005014373</text:p>
          </table:table-cell>
          <table:table-cell table:number-columns-repeated="4"/>
        </table:table-row>
        <table:table-row table:style-name="ro1">
          <table:table-cell office:value-type="float" office:value="422.891418457031">
            <text:p>422.891418457</text:p>
          </table:table-cell>
          <table:table-cell office:value-type="float" office:value="0.01082126">
            <text:p>0.01082126</text:p>
          </table:table-cell>
          <table:table-cell table:number-columns-repeated="4"/>
        </table:table-row>
        <table:table-row table:style-name="ro1">
          <table:table-cell office:value-type="float" office:value="423.004577636719">
            <text:p>423.0045776367</text:p>
          </table:table-cell>
          <table:table-cell office:value-type="float" office:value="0.006218763">
            <text:p>0.006218763</text:p>
          </table:table-cell>
          <table:table-cell table:number-columns-repeated="4"/>
        </table:table-row>
        <table:table-row table:style-name="ro1">
          <table:table-cell office:value-type="float" office:value="423.117706298828">
            <text:p>423.1177062988</text:p>
          </table:table-cell>
          <table:table-cell office:value-type="float" office:value="-0.00184953">
            <text:p>-0.00184953</text:p>
          </table:table-cell>
          <table:table-cell table:number-columns-repeated="4"/>
        </table:table-row>
        <table:table-row table:style-name="ro1">
          <table:table-cell office:value-type="float" office:value="423.230865478516">
            <text:p>423.2308654785</text:p>
          </table:table-cell>
          <table:table-cell office:value-type="float" office:value="-0.003619681">
            <text:p>-0.003619681</text:p>
          </table:table-cell>
          <table:table-cell table:number-columns-repeated="4"/>
        </table:table-row>
        <table:table-row table:style-name="ro1">
          <table:table-cell office:value-type="float" office:value="423.344024658203">
            <text:p>423.3440246582</text:p>
          </table:table-cell>
          <table:table-cell office:value-type="float" office:value="0.002985301">
            <text:p>0.002985301</text:p>
          </table:table-cell>
          <table:table-cell table:number-columns-repeated="4"/>
        </table:table-row>
        <table:table-row table:style-name="ro1">
          <table:table-cell office:value-type="float" office:value="423.457183837891">
            <text:p>423.4571838379</text:p>
          </table:table-cell>
          <table:table-cell office:value-type="float" office:value="-0.008319216">
            <text:p>-0.008319216</text:p>
          </table:table-cell>
          <table:table-cell table:number-columns-repeated="4"/>
        </table:table-row>
        <table:table-row table:style-name="ro1">
          <table:table-cell office:value-type="float" office:value="423.570373535156">
            <text:p>423.5703735352</text:p>
          </table:table-cell>
          <table:table-cell office:value-type="float" office:value="0.01059797">
            <text:p>0.01059797</text:p>
          </table:table-cell>
          <table:table-cell table:number-columns-repeated="4"/>
        </table:table-row>
        <table:table-row table:style-name="ro1">
          <table:table-cell office:value-type="float" office:value="423.683532714844">
            <text:p>423.6835327148</text:p>
          </table:table-cell>
          <table:table-cell office:value-type="float" office:value="-0.0002423461">
            <text:p>-0.0002423461</text:p>
          </table:table-cell>
          <table:table-cell table:number-columns-repeated="4"/>
        </table:table-row>
        <table:table-row table:style-name="ro1">
          <table:table-cell office:value-type="float" office:value="423.796722412109">
            <text:p>423.7967224121</text:p>
          </table:table-cell>
          <table:table-cell office:value-type="float" office:value="-0.004140993">
            <text:p>-0.004140993</text:p>
          </table:table-cell>
          <table:table-cell table:number-columns-repeated="4"/>
        </table:table-row>
        <table:table-row table:style-name="ro1">
          <table:table-cell office:value-type="float" office:value="423.909912109375">
            <text:p>423.9099121094</text:p>
          </table:table-cell>
          <table:table-cell office:value-type="float" office:value="-0.01012414">
            <text:p>-0.01012414</text:p>
          </table:table-cell>
          <table:table-cell table:number-columns-repeated="4"/>
        </table:table-row>
        <table:table-row table:style-name="ro1">
          <table:table-cell office:value-type="float" office:value="424.023101806641">
            <text:p>424.0231018066</text:p>
          </table:table-cell>
          <table:table-cell office:value-type="float" office:value="0.004126194">
            <text:p>0.004126194</text:p>
          </table:table-cell>
          <table:table-cell table:number-columns-repeated="4"/>
        </table:table-row>
        <table:table-row table:style-name="ro1">
          <table:table-cell office:value-type="float" office:value="424.136291503906">
            <text:p>424.1362915039</text:p>
          </table:table-cell>
          <table:table-cell office:value-type="float" office:value="0.009972911">
            <text:p>0.009972911</text:p>
          </table:table-cell>
          <table:table-cell table:number-columns-repeated="4"/>
        </table:table-row>
        <table:table-row table:style-name="ro1">
          <table:table-cell office:value-type="float" office:value="424.24951171875">
            <text:p>424.2495117188</text:p>
          </table:table-cell>
          <table:table-cell office:value-type="float" office:value="0.004995078">
            <text:p>0.004995078</text:p>
          </table:table-cell>
          <table:table-cell table:number-columns-repeated="4"/>
        </table:table-row>
        <table:table-row table:style-name="ro1">
          <table:table-cell office:value-type="float" office:value="424.362701416016">
            <text:p>424.362701416</text:p>
          </table:table-cell>
          <table:table-cell office:value-type="float" office:value="-0.004108304">
            <text:p>-0.004108304</text:p>
          </table:table-cell>
          <table:table-cell table:number-columns-repeated="4"/>
        </table:table-row>
        <table:table-row table:style-name="ro1">
          <table:table-cell office:value-type="float" office:value="424.475921630859">
            <text:p>424.4759216309</text:p>
          </table:table-cell>
          <table:table-cell office:value-type="float" office:value="0.002302469">
            <text:p>0.002302469</text:p>
          </table:table-cell>
          <table:table-cell table:number-columns-repeated="4"/>
        </table:table-row>
        <table:table-row table:style-name="ro1">
          <table:table-cell office:value-type="float" office:value="424.589141845703">
            <text:p>424.5891418457</text:p>
          </table:table-cell>
          <table:table-cell office:value-type="float" office:value="-0.0001900741">
            <text:p>-0.0001900741</text:p>
          </table:table-cell>
          <table:table-cell table:number-columns-repeated="4"/>
        </table:table-row>
        <table:table-row table:style-name="ro1">
          <table:table-cell office:value-type="float" office:value="424.702362060547">
            <text:p>424.7023620605</text:p>
          </table:table-cell>
          <table:table-cell office:value-type="float" office:value="-0.005805772">
            <text:p>-0.005805772</text:p>
          </table:table-cell>
          <table:table-cell table:number-columns-repeated="4"/>
        </table:table-row>
        <table:table-row table:style-name="ro1">
          <table:table-cell office:value-type="float" office:value="424.815612792969">
            <text:p>424.815612793</text:p>
          </table:table-cell>
          <table:table-cell office:value-type="float" office:value="-0.002490383">
            <text:p>-0.002490383</text:p>
          </table:table-cell>
          <table:table-cell table:number-columns-repeated="4"/>
        </table:table-row>
        <table:table-row table:style-name="ro1">
          <table:table-cell office:value-type="float" office:value="424.928833007813">
            <text:p>424.9288330078</text:p>
          </table:table-cell>
          <table:table-cell office:value-type="float" office:value="0.01467029">
            <text:p>0.01467029</text:p>
          </table:table-cell>
          <table:table-cell table:number-columns-repeated="4"/>
        </table:table-row>
        <table:table-row table:style-name="ro1">
          <table:table-cell office:value-type="float" office:value="425.042083740234">
            <text:p>425.0420837402</text:p>
          </table:table-cell>
          <table:table-cell office:value-type="float" office:value="-0.004126628">
            <text:p>-0.004126628</text:p>
          </table:table-cell>
          <table:table-cell table:number-columns-repeated="4"/>
        </table:table-row>
        <table:table-row table:style-name="ro1">
          <table:table-cell office:value-type="float" office:value="425.155303955078">
            <text:p>425.1553039551</text:p>
          </table:table-cell>
          <table:table-cell office:value-type="float" office:value="-0.002320399">
            <text:p>-0.002320399</text:p>
          </table:table-cell>
          <table:table-cell table:number-columns-repeated="4"/>
        </table:table-row>
        <table:table-row table:style-name="ro1">
          <table:table-cell office:value-type="float" office:value="425.2685546875">
            <text:p>425.2685546875</text:p>
          </table:table-cell>
          <table:table-cell office:value-type="float" office:value="-0.01268254">
            <text:p>-0.01268254</text:p>
          </table:table-cell>
          <table:table-cell table:number-columns-repeated="4"/>
        </table:table-row>
        <table:table-row table:style-name="ro1">
          <table:table-cell office:value-type="float" office:value="425.3818359375">
            <text:p>425.3818359375</text:p>
          </table:table-cell>
          <table:table-cell office:value-type="float" office:value="-0.0009609694">
            <text:p>-0.0009609694</text:p>
          </table:table-cell>
          <table:table-cell table:number-columns-repeated="4"/>
        </table:table-row>
        <table:table-row table:style-name="ro1">
          <table:table-cell office:value-type="float" office:value="425.495086669922">
            <text:p>425.4950866699</text:p>
          </table:table-cell>
          <table:table-cell office:value-type="float" office:value="0.006208846">
            <text:p>0.006208846</text:p>
          </table:table-cell>
          <table:table-cell table:number-columns-repeated="4"/>
        </table:table-row>
        <table:table-row table:style-name="ro1">
          <table:table-cell office:value-type="float" office:value="425.608337402344">
            <text:p>425.6083374023</text:p>
          </table:table-cell>
          <table:table-cell office:value-type="float" office:value="0.005139114">
            <text:p>0.005139114</text:p>
          </table:table-cell>
          <table:table-cell table:number-columns-repeated="4"/>
        </table:table-row>
        <table:table-row table:style-name="ro1">
          <table:table-cell office:value-type="float" office:value="425.721618652344">
            <text:p>425.7216186523</text:p>
          </table:table-cell>
          <table:table-cell office:value-type="float" office:value="-0.005830664">
            <text:p>-0.005830664</text:p>
          </table:table-cell>
          <table:table-cell table:number-columns-repeated="4"/>
        </table:table-row>
        <table:table-row table:style-name="ro1">
          <table:table-cell office:value-type="float" office:value="425.834899902344">
            <text:p>425.8348999023</text:p>
          </table:table-cell>
          <table:table-cell office:value-type="float" office:value="-0.006406088">
            <text:p>-0.006406088</text:p>
          </table:table-cell>
          <table:table-cell table:number-columns-repeated="4"/>
        </table:table-row>
        <table:table-row table:style-name="ro1">
          <table:table-cell office:value-type="float" office:value="425.948181152344">
            <text:p>425.9481811523</text:p>
          </table:table-cell>
          <table:table-cell office:value-type="float" office:value="0.003455328">
            <text:p>0.003455328</text:p>
          </table:table-cell>
          <table:table-cell table:number-columns-repeated="4"/>
        </table:table-row>
        <table:table-row table:style-name="ro1">
          <table:table-cell office:value-type="float" office:value="426.061462402344">
            <text:p>426.0614624023</text:p>
          </table:table-cell>
          <table:table-cell office:value-type="float" office:value="0.01084411">
            <text:p>0.01084411</text:p>
          </table:table-cell>
          <table:table-cell table:number-columns-repeated="4"/>
        </table:table-row>
        <table:table-row table:style-name="ro1">
          <table:table-cell office:value-type="float" office:value="426.174743652344">
            <text:p>426.1747436523</text:p>
          </table:table-cell>
          <table:table-cell office:value-type="float" office:value="-0.00512562">
            <text:p>-0.00512562</text:p>
          </table:table-cell>
          <table:table-cell table:number-columns-repeated="4"/>
        </table:table-row>
        <table:table-row table:style-name="ro1">
          <table:table-cell office:value-type="float" office:value="426.288055419922">
            <text:p>426.2880554199</text:p>
          </table:table-cell>
          <table:table-cell office:value-type="float" office:value="0.009180652">
            <text:p>0.009180652</text:p>
          </table:table-cell>
          <table:table-cell table:number-columns-repeated="4"/>
        </table:table-row>
        <table:table-row table:style-name="ro1">
          <table:table-cell office:value-type="float" office:value="426.401336669922">
            <text:p>426.4013366699</text:p>
          </table:table-cell>
          <table:table-cell office:value-type="float" office:value="-0.0003855143">
            <text:p>-0.0003855143</text:p>
          </table:table-cell>
          <table:table-cell table:number-columns-repeated="4"/>
        </table:table-row>
        <table:table-row table:style-name="ro1">
          <table:table-cell office:value-type="float" office:value="426.5146484375">
            <text:p>426.5146484375</text:p>
          </table:table-cell>
          <table:table-cell office:value-type="float" office:value="-0.002949013">
            <text:p>-0.002949013</text:p>
          </table:table-cell>
          <table:table-cell table:number-columns-repeated="4"/>
        </table:table-row>
        <table:table-row table:style-name="ro1">
          <table:table-cell office:value-type="float" office:value="426.627960205078">
            <text:p>426.6279602051</text:p>
          </table:table-cell>
          <table:table-cell office:value-type="float" office:value="0.002878217">
            <text:p>0.002878217</text:p>
          </table:table-cell>
          <table:table-cell table:number-columns-repeated="4"/>
        </table:table-row>
        <table:table-row table:style-name="ro1">
          <table:table-cell office:value-type="float" office:value="426.741271972656">
            <text:p>426.7412719727</text:p>
          </table:table-cell>
          <table:table-cell office:value-type="float" office:value="0.008626665">
            <text:p>0.008626665</text:p>
          </table:table-cell>
          <table:table-cell table:number-columns-repeated="4"/>
        </table:table-row>
        <table:table-row table:style-name="ro1">
          <table:table-cell office:value-type="float" office:value="426.854614257813">
            <text:p>426.8546142578</text:p>
          </table:table-cell>
          <table:table-cell office:value-type="float" office:value="0.008850499">
            <text:p>0.008850499</text:p>
          </table:table-cell>
          <table:table-cell table:number-columns-repeated="4"/>
        </table:table-row>
        <table:table-row table:style-name="ro1">
          <table:table-cell office:value-type="float" office:value="426.967926025391">
            <text:p>426.9679260254</text:p>
          </table:table-cell>
          <table:table-cell office:value-type="float" office:value="-0.003591889">
            <text:p>-0.003591889</text:p>
          </table:table-cell>
          <table:table-cell table:number-columns-repeated="4"/>
        </table:table-row>
        <table:table-row table:style-name="ro1">
          <table:table-cell office:value-type="float" office:value="427.081268310547">
            <text:p>427.0812683105</text:p>
          </table:table-cell>
          <table:table-cell office:value-type="float" office:value="-0.00407816">
            <text:p>-0.00407816</text:p>
          </table:table-cell>
          <table:table-cell table:number-columns-repeated="4"/>
        </table:table-row>
        <table:table-row table:style-name="ro1">
          <table:table-cell office:value-type="float" office:value="427.194610595703">
            <text:p>427.1946105957</text:p>
          </table:table-cell>
          <table:table-cell office:value-type="float" office:value="0.003573681">
            <text:p>0.003573681</text:p>
          </table:table-cell>
          <table:table-cell table:number-columns-repeated="4"/>
        </table:table-row>
        <table:table-row table:style-name="ro1">
          <table:table-cell office:value-type="float" office:value="427.307952880859">
            <text:p>427.3079528809</text:p>
          </table:table-cell>
          <table:table-cell office:value-type="float" office:value="0.003159936">
            <text:p>0.003159936</text:p>
          </table:table-cell>
          <table:table-cell table:number-columns-repeated="4"/>
        </table:table-row>
        <table:table-row table:style-name="ro1">
          <table:table-cell office:value-type="float" office:value="427.421295166016">
            <text:p>427.421295166</text:p>
          </table:table-cell>
          <table:table-cell office:value-type="float" office:value="0.000982658">
            <text:p>0.000982658</text:p>
          </table:table-cell>
          <table:table-cell table:number-columns-repeated="4"/>
        </table:table-row>
        <table:table-row table:style-name="ro1">
          <table:table-cell office:value-type="float" office:value="427.534637451172">
            <text:p>427.5346374512</text:p>
          </table:table-cell>
          <table:table-cell office:value-type="float" office:value="-0.009146406">
            <text:p>-0.009146406</text:p>
          </table:table-cell>
          <table:table-cell table:number-columns-repeated="4"/>
        </table:table-row>
        <table:table-row table:style-name="ro1">
          <table:table-cell office:value-type="float" office:value="427.648010253906">
            <text:p>427.6480102539</text:p>
          </table:table-cell>
          <table:table-cell office:value-type="float" office:value="0.003497795">
            <text:p>0.003497795</text:p>
          </table:table-cell>
          <table:table-cell table:number-columns-repeated="4"/>
        </table:table-row>
        <table:table-row table:style-name="ro1">
          <table:table-cell office:value-type="float" office:value="427.761383056641">
            <text:p>427.7613830566</text:p>
          </table:table-cell>
          <table:table-cell office:value-type="float" office:value="0.004986029">
            <text:p>0.004986029</text:p>
          </table:table-cell>
          <table:table-cell table:number-columns-repeated="4"/>
        </table:table-row>
        <table:table-row table:style-name="ro1">
          <table:table-cell office:value-type="float" office:value="427.874755859375">
            <text:p>427.8747558594</text:p>
          </table:table-cell>
          <table:table-cell office:value-type="float" office:value="-0.006978349">
            <text:p>-0.006978349</text:p>
          </table:table-cell>
          <table:table-cell table:number-columns-repeated="4"/>
        </table:table-row>
        <table:table-row table:style-name="ro1">
          <table:table-cell office:value-type="float" office:value="427.988128662109">
            <text:p>427.9881286621</text:p>
          </table:table-cell>
          <table:table-cell office:value-type="float" office:value="-0.009602075">
            <text:p>-0.009602075</text:p>
          </table:table-cell>
          <table:table-cell table:number-columns-repeated="4"/>
        </table:table-row>
        <table:table-row table:style-name="ro1">
          <table:table-cell office:value-type="float" office:value="428.101501464844">
            <text:p>428.1015014648</text:p>
          </table:table-cell>
          <table:table-cell office:value-type="float" office:value="-0.001652948">
            <text:p>-0.001652948</text:p>
          </table:table-cell>
          <table:table-cell table:number-columns-repeated="4"/>
        </table:table-row>
        <table:table-row table:style-name="ro1">
          <table:table-cell office:value-type="float" office:value="428.214874267578">
            <text:p>428.2148742676</text:p>
          </table:table-cell>
          <table:table-cell office:value-type="float" office:value="0.007690751">
            <text:p>0.007690751</text:p>
          </table:table-cell>
          <table:table-cell table:number-columns-repeated="4"/>
        </table:table-row>
        <table:table-row table:style-name="ro1">
          <table:table-cell office:value-type="float" office:value="428.328277587891">
            <text:p>428.3282775879</text:p>
          </table:table-cell>
          <table:table-cell office:value-type="float" office:value="-0.003020382">
            <text:p>-0.003020382</text:p>
          </table:table-cell>
          <table:table-cell table:number-columns-repeated="4"/>
        </table:table-row>
        <table:table-row table:style-name="ro1">
          <table:table-cell office:value-type="float" office:value="428.441650390625">
            <text:p>428.4416503906</text:p>
          </table:table-cell>
          <table:table-cell office:value-type="float" office:value="-0.007187179">
            <text:p>-0.007187179</text:p>
          </table:table-cell>
          <table:table-cell table:number-columns-repeated="4"/>
        </table:table-row>
        <table:table-row table:style-name="ro1">
          <table:table-cell office:value-type="float" office:value="428.555053710938">
            <text:p>428.5550537109</text:p>
          </table:table-cell>
          <table:table-cell office:value-type="float" office:value="-0.003794784">
            <text:p>-0.003794784</text:p>
          </table:table-cell>
          <table:table-cell table:number-columns-repeated="4"/>
        </table:table-row>
        <table:table-row table:style-name="ro1">
          <table:table-cell office:value-type="float" office:value="428.66845703125">
            <text:p>428.6684570313</text:p>
          </table:table-cell>
          <table:table-cell office:value-type="float" office:value="0.00259564">
            <text:p>0.00259564</text:p>
          </table:table-cell>
          <table:table-cell table:number-columns-repeated="4"/>
        </table:table-row>
        <table:table-row table:style-name="ro1">
          <table:table-cell office:value-type="float" office:value="428.781890869141">
            <text:p>428.7818908691</text:p>
          </table:table-cell>
          <table:table-cell office:value-type="float" office:value="-0.0005744736">
            <text:p>-0.0005744736</text:p>
          </table:table-cell>
          <table:table-cell table:number-columns-repeated="4"/>
        </table:table-row>
        <table:table-row table:style-name="ro1">
          <table:table-cell office:value-type="float" office:value="428.895294189453">
            <text:p>428.8952941895</text:p>
          </table:table-cell>
          <table:table-cell office:value-type="float" office:value="0.006487902">
            <text:p>0.006487902</text:p>
          </table:table-cell>
          <table:table-cell table:number-columns-repeated="4"/>
        </table:table-row>
        <table:table-row table:style-name="ro1">
          <table:table-cell office:value-type="float" office:value="429.008728027344">
            <text:p>429.0087280273</text:p>
          </table:table-cell>
          <table:table-cell office:value-type="float" office:value="-0.00672072">
            <text:p>-0.00672072</text:p>
          </table:table-cell>
          <table:table-cell table:number-columns-repeated="4"/>
        </table:table-row>
        <table:table-row table:style-name="ro1">
          <table:table-cell office:value-type="float" office:value="429.122131347656">
            <text:p>429.1221313477</text:p>
          </table:table-cell>
          <table:table-cell office:value-type="float" office:value="-0.003984527">
            <text:p>-0.003984527</text:p>
          </table:table-cell>
          <table:table-cell table:number-columns-repeated="4"/>
        </table:table-row>
        <table:table-row table:style-name="ro1">
          <table:table-cell office:value-type="float" office:value="429.235565185547">
            <text:p>429.2355651855</text:p>
          </table:table-cell>
          <table:table-cell office:value-type="float" office:value="-0.005027947">
            <text:p>-0.005027947</text:p>
          </table:table-cell>
          <table:table-cell table:number-columns-repeated="4"/>
        </table:table-row>
        <table:table-row table:style-name="ro1">
          <table:table-cell office:value-type="float" office:value="429.348999023438">
            <text:p>429.3489990234</text:p>
          </table:table-cell>
          <table:table-cell office:value-type="float" office:value="0.01622462">
            <text:p>0.01622462</text:p>
          </table:table-cell>
          <table:table-cell table:number-columns-repeated="4"/>
        </table:table-row>
        <table:table-row table:style-name="ro1">
          <table:table-cell office:value-type="float" office:value="429.462432861328">
            <text:p>429.4624328613</text:p>
          </table:table-cell>
          <table:table-cell office:value-type="float" office:value="0.02441058">
            <text:p>0.02441058</text:p>
          </table:table-cell>
          <table:table-cell table:number-columns-repeated="4"/>
        </table:table-row>
        <table:table-row table:style-name="ro1">
          <table:table-cell office:value-type="float" office:value="429.575897216797">
            <text:p>429.5758972168</text:p>
          </table:table-cell>
          <table:table-cell office:value-type="float" office:value="0.0004567842">
            <text:p>0.0004567842</text:p>
          </table:table-cell>
          <table:table-cell table:number-columns-repeated="4"/>
        </table:table-row>
        <table:table-row table:style-name="ro1">
          <table:table-cell office:value-type="float" office:value="429.689331054688">
            <text:p>429.6893310547</text:p>
          </table:table-cell>
          <table:table-cell office:value-type="float" office:value="-0.004876096">
            <text:p>-0.004876096</text:p>
          </table:table-cell>
          <table:table-cell table:number-columns-repeated="4"/>
        </table:table-row>
        <table:table-row table:style-name="ro1">
          <table:table-cell office:value-type="float" office:value="429.802795410156">
            <text:p>429.8027954102</text:p>
          </table:table-cell>
          <table:table-cell office:value-type="float" office:value="0.007282503">
            <text:p>0.007282503</text:p>
          </table:table-cell>
          <table:table-cell table:number-columns-repeated="4"/>
        </table:table-row>
        <table:table-row table:style-name="ro1">
          <table:table-cell office:value-type="float" office:value="429.916259765625">
            <text:p>429.9162597656</text:p>
          </table:table-cell>
          <table:table-cell office:value-type="float" office:value="0.0004892436">
            <text:p>0.0004892436</text:p>
          </table:table-cell>
          <table:table-cell table:number-columns-repeated="4"/>
        </table:table-row>
        <table:table-row table:style-name="ro1">
          <table:table-cell office:value-type="float" office:value="430.029724121094">
            <text:p>430.0297241211</text:p>
          </table:table-cell>
          <table:table-cell office:value-type="float" office:value="0.007624339">
            <text:p>0.007624339</text:p>
          </table:table-cell>
          <table:table-cell table:number-columns-repeated="4"/>
        </table:table-row>
        <table:table-row table:style-name="ro1">
          <table:table-cell office:value-type="float" office:value="430.143188476563">
            <text:p>430.1431884766</text:p>
          </table:table-cell>
          <table:table-cell office:value-type="float" office:value="0.007276546">
            <text:p>0.007276546</text:p>
          </table:table-cell>
          <table:table-cell table:number-columns-repeated="4"/>
        </table:table-row>
        <table:table-row table:style-name="ro1">
          <table:table-cell office:value-type="float" office:value="430.256683349609">
            <text:p>430.2566833496</text:p>
          </table:table-cell>
          <table:table-cell office:value-type="float" office:value="-0.003611089">
            <text:p>-0.003611089</text:p>
          </table:table-cell>
          <table:table-cell table:number-columns-repeated="4"/>
        </table:table-row>
        <table:table-row table:style-name="ro1">
          <table:table-cell office:value-type="float" office:value="430.370147705078">
            <text:p>430.3701477051</text:p>
          </table:table-cell>
          <table:table-cell office:value-type="float" office:value="0.01063873">
            <text:p>0.01063873</text:p>
          </table:table-cell>
          <table:table-cell table:number-columns-repeated="4"/>
        </table:table-row>
        <table:table-row table:style-name="ro1">
          <table:table-cell office:value-type="float" office:value="430.483642578125">
            <text:p>430.4836425781</text:p>
          </table:table-cell>
          <table:table-cell office:value-type="float" office:value="-0.002377968">
            <text:p>-0.002377968</text:p>
          </table:table-cell>
          <table:table-cell table:number-columns-repeated="4"/>
        </table:table-row>
        <table:table-row table:style-name="ro1">
          <table:table-cell office:value-type="float" office:value="430.597137451172">
            <text:p>430.5971374512</text:p>
          </table:table-cell>
          <table:table-cell office:value-type="float" office:value="-0.0001403402">
            <text:p>-0.0001403402</text:p>
          </table:table-cell>
          <table:table-cell table:number-columns-repeated="4"/>
        </table:table-row>
        <table:table-row table:style-name="ro1">
          <table:table-cell office:value-type="float" office:value="430.710632324219">
            <text:p>430.7106323242</text:p>
          </table:table-cell>
          <table:table-cell office:value-type="float" office:value="-0.002766193">
            <text:p>-0.002766193</text:p>
          </table:table-cell>
          <table:table-cell table:number-columns-repeated="4"/>
        </table:table-row>
        <table:table-row table:style-name="ro1">
          <table:table-cell office:value-type="float" office:value="430.824127197266">
            <text:p>430.8241271973</text:p>
          </table:table-cell>
          <table:table-cell office:value-type="float" office:value="0.006115543">
            <text:p>0.006115543</text:p>
          </table:table-cell>
          <table:table-cell table:number-columns-repeated="4"/>
        </table:table-row>
        <table:table-row table:style-name="ro1">
          <table:table-cell office:value-type="float" office:value="430.937652587891">
            <text:p>430.9376525879</text:p>
          </table:table-cell>
          <table:table-cell office:value-type="float" office:value="-0.00113827">
            <text:p>-0.00113827</text:p>
          </table:table-cell>
          <table:table-cell table:number-columns-repeated="4"/>
        </table:table-row>
        <table:table-row table:style-name="ro1">
          <table:table-cell office:value-type="float" office:value="431.051147460938">
            <text:p>431.0511474609</text:p>
          </table:table-cell>
          <table:table-cell office:value-type="float" office:value="-0.003598407">
            <text:p>-0.003598407</text:p>
          </table:table-cell>
          <table:table-cell table:number-columns-repeated="4"/>
        </table:table-row>
        <table:table-row table:style-name="ro1">
          <table:table-cell office:value-type="float" office:value="431.164672851563">
            <text:p>431.1646728516</text:p>
          </table:table-cell>
          <table:table-cell office:value-type="float" office:value="-0.00539037">
            <text:p>-0.00539037</text:p>
          </table:table-cell>
          <table:table-cell table:number-columns-repeated="4"/>
        </table:table-row>
        <table:table-row table:style-name="ro1">
          <table:table-cell office:value-type="float" office:value="431.278198242188">
            <text:p>431.2781982422</text:p>
          </table:table-cell>
          <table:table-cell office:value-type="float" office:value="0.003523763">
            <text:p>0.003523763</text:p>
          </table:table-cell>
          <table:table-cell table:number-columns-repeated="4"/>
        </table:table-row>
        <table:table-row table:style-name="ro1">
          <table:table-cell office:value-type="float" office:value="431.391723632813">
            <text:p>431.3917236328</text:p>
          </table:table-cell>
          <table:table-cell office:value-type="float" office:value="-0.004506574">
            <text:p>-0.004506574</text:p>
          </table:table-cell>
          <table:table-cell table:number-columns-repeated="4"/>
        </table:table-row>
        <table:table-row table:style-name="ro1">
          <table:table-cell office:value-type="float" office:value="431.505249023438">
            <text:p>431.5052490234</text:p>
          </table:table-cell>
          <table:table-cell office:value-type="float" office:value="-0.001349679">
            <text:p>-0.001349679</text:p>
          </table:table-cell>
          <table:table-cell table:number-columns-repeated="4"/>
        </table:table-row>
        <table:table-row table:style-name="ro1">
          <table:table-cell office:value-type="float" office:value="431.618804931641">
            <text:p>431.6188049316</text:p>
          </table:table-cell>
          <table:table-cell office:value-type="float" office:value="-0.002606906">
            <text:p>-0.002606906</text:p>
          </table:table-cell>
          <table:table-cell table:number-columns-repeated="4"/>
        </table:table-row>
        <table:table-row table:style-name="ro1">
          <table:table-cell office:value-type="float" office:value="431.732330322266">
            <text:p>431.7323303223</text:p>
          </table:table-cell>
          <table:table-cell office:value-type="float" office:value="0.008572627">
            <text:p>0.008572627</text:p>
          </table:table-cell>
          <table:table-cell table:number-columns-repeated="4"/>
        </table:table-row>
        <table:table-row table:style-name="ro1">
          <table:table-cell office:value-type="float" office:value="431.845886230469">
            <text:p>431.8458862305</text:p>
          </table:table-cell>
          <table:table-cell office:value-type="float" office:value="0.009654361">
            <text:p>0.009654361</text:p>
          </table:table-cell>
          <table:table-cell table:number-columns-repeated="4"/>
        </table:table-row>
        <table:table-row table:style-name="ro1">
          <table:table-cell office:value-type="float" office:value="431.959442138672">
            <text:p>431.9594421387</text:p>
          </table:table-cell>
          <table:table-cell office:value-type="float" office:value="0.006672879">
            <text:p>0.006672879</text:p>
          </table:table-cell>
          <table:table-cell table:number-columns-repeated="4"/>
        </table:table-row>
        <table:table-row table:style-name="ro1">
          <table:table-cell office:value-type="float" office:value="432.072998046875">
            <text:p>432.0729980469</text:p>
          </table:table-cell>
          <table:table-cell office:value-type="float" office:value="0.01802168">
            <text:p>0.01802168</text:p>
          </table:table-cell>
          <table:table-cell table:number-columns-repeated="4"/>
        </table:table-row>
        <table:table-row table:style-name="ro1">
          <table:table-cell office:value-type="float" office:value="432.186553955078">
            <text:p>432.1865539551</text:p>
          </table:table-cell>
          <table:table-cell office:value-type="float" office:value="-0.005822503">
            <text:p>-0.005822503</text:p>
          </table:table-cell>
          <table:table-cell table:number-columns-repeated="4"/>
        </table:table-row>
        <table:table-row table:style-name="ro1">
          <table:table-cell office:value-type="float" office:value="432.300140380859">
            <text:p>432.3001403809</text:p>
          </table:table-cell>
          <table:table-cell office:value-type="float" office:value="-0.002250184">
            <text:p>-0.002250184</text:p>
          </table:table-cell>
          <table:table-cell table:number-columns-repeated="4"/>
        </table:table-row>
        <table:table-row table:style-name="ro1">
          <table:table-cell office:value-type="float" office:value="432.413696289063">
            <text:p>432.4136962891</text:p>
          </table:table-cell>
          <table:table-cell office:value-type="float" office:value="0.0003599591">
            <text:p>0.0003599591</text:p>
          </table:table-cell>
          <table:table-cell table:number-columns-repeated="4"/>
        </table:table-row>
        <table:table-row table:style-name="ro1">
          <table:table-cell office:value-type="float" office:value="432.527282714844">
            <text:p>432.5272827148</text:p>
          </table:table-cell>
          <table:table-cell office:value-type="float" office:value="0.00425845">
            <text:p>0.00425845</text:p>
          </table:table-cell>
          <table:table-cell table:number-columns-repeated="4"/>
        </table:table-row>
        <table:table-row table:style-name="ro1">
          <table:table-cell office:value-type="float" office:value="432.640869140625">
            <text:p>432.6408691406</text:p>
          </table:table-cell>
          <table:table-cell office:value-type="float" office:value="-0.003403175">
            <text:p>-0.003403175</text:p>
          </table:table-cell>
          <table:table-cell table:number-columns-repeated="4"/>
        </table:table-row>
        <table:table-row table:style-name="ro1">
          <table:table-cell office:value-type="float" office:value="432.754455566406">
            <text:p>432.7544555664</text:p>
          </table:table-cell>
          <table:table-cell office:value-type="float" office:value="0.01101162">
            <text:p>0.01101162</text:p>
          </table:table-cell>
          <table:table-cell table:number-columns-repeated="4"/>
        </table:table-row>
        <table:table-row table:style-name="ro1">
          <table:table-cell office:value-type="float" office:value="432.868041992188">
            <text:p>432.8680419922</text:p>
          </table:table-cell>
          <table:table-cell office:value-type="float" office:value="0.01587727">
            <text:p>0.01587727</text:p>
          </table:table-cell>
          <table:table-cell table:number-columns-repeated="4"/>
        </table:table-row>
        <table:table-row table:style-name="ro1">
          <table:table-cell office:value-type="float" office:value="432.981658935547">
            <text:p>432.9816589355</text:p>
          </table:table-cell>
          <table:table-cell office:value-type="float" office:value="0.008416751">
            <text:p>0.008416751</text:p>
          </table:table-cell>
          <table:table-cell table:number-columns-repeated="4"/>
        </table:table-row>
        <table:table-row table:style-name="ro1">
          <table:table-cell office:value-type="float" office:value="433.095245361328">
            <text:p>433.0952453613</text:p>
          </table:table-cell>
          <table:table-cell office:value-type="float" office:value="0.00293742">
            <text:p>0.00293742</text:p>
          </table:table-cell>
          <table:table-cell table:number-columns-repeated="4"/>
        </table:table-row>
        <table:table-row table:style-name="ro1">
          <table:table-cell office:value-type="float" office:value="433.208862304688">
            <text:p>433.2088623047</text:p>
          </table:table-cell>
          <table:table-cell office:value-type="float" office:value="0.003469985">
            <text:p>0.003469985</text:p>
          </table:table-cell>
          <table:table-cell table:number-columns-repeated="4"/>
        </table:table-row>
        <table:table-row table:style-name="ro1">
          <table:table-cell office:value-type="float" office:value="433.322479248047">
            <text:p>433.322479248</text:p>
          </table:table-cell>
          <table:table-cell office:value-type="float" office:value="-0.001514921">
            <text:p>-0.001514921</text:p>
          </table:table-cell>
          <table:table-cell table:number-columns-repeated="4"/>
        </table:table-row>
        <table:table-row table:style-name="ro1">
          <table:table-cell office:value-type="float" office:value="433.436096191406">
            <text:p>433.4360961914</text:p>
          </table:table-cell>
          <table:table-cell office:value-type="float" office:value="0.005013661">
            <text:p>0.005013661</text:p>
          </table:table-cell>
          <table:table-cell table:number-columns-repeated="4"/>
        </table:table-row>
        <table:table-row table:style-name="ro1">
          <table:table-cell office:value-type="float" office:value="433.549713134766">
            <text:p>433.5497131348</text:p>
          </table:table-cell>
          <table:table-cell office:value-type="float" office:value="-0.001688834">
            <text:p>-0.001688834</text:p>
          </table:table-cell>
          <table:table-cell table:number-columns-repeated="4"/>
        </table:table-row>
        <table:table-row table:style-name="ro1">
          <table:table-cell office:value-type="float" office:value="433.663330078125">
            <text:p>433.6633300781</text:p>
          </table:table-cell>
          <table:table-cell office:value-type="float" office:value="-0.00370837">
            <text:p>-0.00370837</text:p>
          </table:table-cell>
          <table:table-cell table:number-columns-repeated="4"/>
        </table:table-row>
        <table:table-row table:style-name="ro1">
          <table:table-cell office:value-type="float" office:value="433.776977539063">
            <text:p>433.7769775391</text:p>
          </table:table-cell>
          <table:table-cell office:value-type="float" office:value="-0.004647433">
            <text:p>-0.004647433</text:p>
          </table:table-cell>
          <table:table-cell table:number-columns-repeated="4"/>
        </table:table-row>
        <table:table-row table:style-name="ro1">
          <table:table-cell office:value-type="float" office:value="433.890625">
            <text:p>433.890625</text:p>
          </table:table-cell>
          <table:table-cell office:value-type="float" office:value="0.01382707">
            <text:p>0.01382707</text:p>
          </table:table-cell>
          <table:table-cell table:number-columns-repeated="4"/>
        </table:table-row>
        <table:table-row table:style-name="ro1">
          <table:table-cell office:value-type="float" office:value="434.004272460938">
            <text:p>434.0042724609</text:p>
          </table:table-cell>
          <table:table-cell office:value-type="float" office:value="-0.001268749">
            <text:p>-0.001268749</text:p>
          </table:table-cell>
          <table:table-cell table:number-columns-repeated="4"/>
        </table:table-row>
        <table:table-row table:style-name="ro1">
          <table:table-cell office:value-type="float" office:value="434.117919921875">
            <text:p>434.1179199219</text:p>
          </table:table-cell>
          <table:table-cell office:value-type="float" office:value="0.003032392">
            <text:p>0.003032392</text:p>
          </table:table-cell>
          <table:table-cell table:number-columns-repeated="4"/>
        </table:table-row>
        <table:table-row table:style-name="ro1">
          <table:table-cell office:value-type="float" office:value="434.231567382813">
            <text:p>434.2315673828</text:p>
          </table:table-cell>
          <table:table-cell office:value-type="float" office:value="-0.008022274">
            <text:p>-0.008022274</text:p>
          </table:table-cell>
          <table:table-cell table:number-columns-repeated="4"/>
        </table:table-row>
        <table:table-row table:style-name="ro1">
          <table:table-cell office:value-type="float" office:value="434.34521484375">
            <text:p>434.3452148438</text:p>
          </table:table-cell>
          <table:table-cell office:value-type="float" office:value="-0.005817882">
            <text:p>-0.005817882</text:p>
          </table:table-cell>
          <table:table-cell table:number-columns-repeated="4"/>
        </table:table-row>
        <table:table-row table:style-name="ro1">
          <table:table-cell office:value-type="float" office:value="434.458892822266">
            <text:p>434.4588928223</text:p>
          </table:table-cell>
          <table:table-cell office:value-type="float" office:value="0.01919799">
            <text:p>0.01919799</text:p>
          </table:table-cell>
          <table:table-cell table:number-columns-repeated="4"/>
        </table:table-row>
        <table:table-row table:style-name="ro1">
          <table:table-cell office:value-type="float" office:value="434.572570800781">
            <text:p>434.5725708008</text:p>
          </table:table-cell>
          <table:table-cell office:value-type="float" office:value="-0.004652433">
            <text:p>-0.004652433</text:p>
          </table:table-cell>
          <table:table-cell table:number-columns-repeated="4"/>
        </table:table-row>
        <table:table-row table:style-name="ro1">
          <table:table-cell office:value-type="float" office:value="434.686248779297">
            <text:p>434.6862487793</text:p>
          </table:table-cell>
          <table:table-cell office:value-type="float" office:value="-0.002846102">
            <text:p>-0.002846102</text:p>
          </table:table-cell>
          <table:table-cell table:number-columns-repeated="4"/>
        </table:table-row>
        <table:table-row table:style-name="ro1">
          <table:table-cell office:value-type="float" office:value="434.799926757813">
            <text:p>434.7999267578</text:p>
          </table:table-cell>
          <table:table-cell office:value-type="float" office:value="-0.003845216">
            <text:p>-0.003845216</text:p>
          </table:table-cell>
          <table:table-cell table:number-columns-repeated="4"/>
        </table:table-row>
        <table:table-row table:style-name="ro1">
          <table:table-cell office:value-type="float" office:value="434.913604736328">
            <text:p>434.9136047363</text:p>
          </table:table-cell>
          <table:table-cell office:value-type="float" office:value="0.001970784">
            <text:p>0.001970784</text:p>
          </table:table-cell>
          <table:table-cell table:number-columns-repeated="4"/>
        </table:table-row>
        <table:table-row table:style-name="ro1">
          <table:table-cell office:value-type="float" office:value="435.027282714844">
            <text:p>435.0272827148</text:p>
          </table:table-cell>
          <table:table-cell office:value-type="float" office:value="-0.002799915">
            <text:p>-0.002799915</text:p>
          </table:table-cell>
          <table:table-cell table:number-columns-repeated="4"/>
        </table:table-row>
        <table:table-row table:style-name="ro1">
          <table:table-cell office:value-type="float" office:value="435.140991210938">
            <text:p>435.1409912109</text:p>
          </table:table-cell>
          <table:table-cell office:value-type="float" office:value="-0.001643972">
            <text:p>-0.001643972</text:p>
          </table:table-cell>
          <table:table-cell table:number-columns-repeated="4"/>
        </table:table-row>
        <table:table-row table:style-name="ro1">
          <table:table-cell office:value-type="float" office:value="435.254669189453">
            <text:p>435.2546691895</text:p>
          </table:table-cell>
          <table:table-cell office:value-type="float" office:value="0.00673777">
            <text:p>0.00673777</text:p>
          </table:table-cell>
          <table:table-cell table:number-columns-repeated="4"/>
        </table:table-row>
        <table:table-row table:style-name="ro1">
          <table:table-cell office:value-type="float" office:value="435.368377685547">
            <text:p>435.3683776855</text:p>
          </table:table-cell>
          <table:table-cell office:value-type="float" office:value="-0.008144984">
            <text:p>-0.008144984</text:p>
          </table:table-cell>
          <table:table-cell table:number-columns-repeated="4"/>
        </table:table-row>
        <table:table-row table:style-name="ro1">
          <table:table-cell office:value-type="float" office:value="435.482086181641">
            <text:p>435.4820861816</text:p>
          </table:table-cell>
          <table:table-cell office:value-type="float" office:value="-0.007830827">
            <text:p>-0.007830827</text:p>
          </table:table-cell>
          <table:table-cell table:number-columns-repeated="4"/>
        </table:table-row>
        <table:table-row table:style-name="ro1">
          <table:table-cell office:value-type="float" office:value="435.595825195313">
            <text:p>435.5958251953</text:p>
          </table:table-cell>
          <table:table-cell office:value-type="float" office:value="-0.003961495">
            <text:p>-0.003961495</text:p>
          </table:table-cell>
          <table:table-cell table:number-columns-repeated="4"/>
        </table:table-row>
        <table:table-row table:style-name="ro1">
          <table:table-cell office:value-type="float" office:value="435.709533691406">
            <text:p>435.7095336914</text:p>
          </table:table-cell>
          <table:table-cell office:value-type="float" office:value="0.01172793">
            <text:p>0.01172793</text:p>
          </table:table-cell>
          <table:table-cell table:number-columns-repeated="4"/>
        </table:table-row>
        <table:table-row table:style-name="ro1">
          <table:table-cell office:value-type="float" office:value="435.823272705078">
            <text:p>435.8232727051</text:p>
          </table:table-cell>
          <table:table-cell office:value-type="float" office:value="0.003544166">
            <text:p>0.003544166</text:p>
          </table:table-cell>
          <table:table-cell table:number-columns-repeated="4"/>
        </table:table-row>
        <table:table-row table:style-name="ro1">
          <table:table-cell office:value-type="float" office:value="435.936981201172">
            <text:p>435.9369812012</text:p>
          </table:table-cell>
          <table:table-cell office:value-type="float" office:value="-0.008833027">
            <text:p>-0.008833027</text:p>
          </table:table-cell>
          <table:table-cell table:number-columns-repeated="4"/>
        </table:table-row>
        <table:table-row table:style-name="ro1">
          <table:table-cell office:value-type="float" office:value="436.050720214844">
            <text:p>436.0507202148</text:p>
          </table:table-cell>
          <table:table-cell office:value-type="float" office:value="0.003247371">
            <text:p>0.003247371</text:p>
          </table:table-cell>
          <table:table-cell table:number-columns-repeated="4"/>
        </table:table-row>
        <table:table-row table:style-name="ro1">
          <table:table-cell office:value-type="float" office:value="436.164459228516">
            <text:p>436.1644592285</text:p>
          </table:table-cell>
          <table:table-cell office:value-type="float" office:value="-0.001783987">
            <text:p>-0.001783987</text:p>
          </table:table-cell>
          <table:table-cell table:number-columns-repeated="4"/>
        </table:table-row>
        <table:table-row table:style-name="ro1">
          <table:table-cell office:value-type="float" office:value="436.278198242188">
            <text:p>436.2781982422</text:p>
          </table:table-cell>
          <table:table-cell office:value-type="float" office:value="0.02456505">
            <text:p>0.02456505</text:p>
          </table:table-cell>
          <table:table-cell table:number-columns-repeated="4"/>
        </table:table-row>
        <table:table-row table:style-name="ro1">
          <table:table-cell office:value-type="float" office:value="436.391967773438">
            <text:p>436.3919677734</text:p>
          </table:table-cell>
          <table:table-cell office:value-type="float" office:value="-0.0006054072">
            <text:p>-0.0006054072</text:p>
          </table:table-cell>
          <table:table-cell table:number-columns-repeated="4"/>
        </table:table-row>
        <table:table-row table:style-name="ro1">
          <table:table-cell office:value-type="float" office:value="436.505706787109">
            <text:p>436.5057067871</text:p>
          </table:table-cell>
          <table:table-cell office:value-type="float" office:value="-0.002269463">
            <text:p>-0.002269463</text:p>
          </table:table-cell>
          <table:table-cell table:number-columns-repeated="4"/>
        </table:table-row>
        <table:table-row table:style-name="ro1">
          <table:table-cell office:value-type="float" office:value="436.619476318359">
            <text:p>436.6194763184</text:p>
          </table:table-cell>
          <table:table-cell office:value-type="float" office:value="0.0045281">
            <text:p>0.0045281</text:p>
          </table:table-cell>
          <table:table-cell table:number-columns-repeated="4"/>
        </table:table-row>
        <table:table-row table:style-name="ro1">
          <table:table-cell office:value-type="float" office:value="436.733245849609">
            <text:p>436.7332458496</text:p>
          </table:table-cell>
          <table:table-cell office:value-type="float" office:value="0.00263323">
            <text:p>0.00263323</text:p>
          </table:table-cell>
          <table:table-cell table:number-columns-repeated="4"/>
        </table:table-row>
        <table:table-row table:style-name="ro1">
          <table:table-cell office:value-type="float" office:value="436.847015380859">
            <text:p>436.8470153809</text:p>
          </table:table-cell>
          <table:table-cell office:value-type="float" office:value="-0.009195467">
            <text:p>-0.009195467</text:p>
          </table:table-cell>
          <table:table-cell table:number-columns-repeated="4"/>
        </table:table-row>
        <table:table-row table:style-name="ro1">
          <table:table-cell office:value-type="float" office:value="436.960784912109">
            <text:p>436.9607849121</text:p>
          </table:table-cell>
          <table:table-cell office:value-type="float" office:value="0.004693047">
            <text:p>0.004693047</text:p>
          </table:table-cell>
          <table:table-cell table:number-columns-repeated="4"/>
        </table:table-row>
        <table:table-row table:style-name="ro1">
          <table:table-cell office:value-type="float" office:value="437.074554443359">
            <text:p>437.0745544434</text:p>
          </table:table-cell>
          <table:table-cell office:value-type="float" office:value="0.002429946">
            <text:p>0.002429946</text:p>
          </table:table-cell>
          <table:table-cell table:number-columns-repeated="4"/>
        </table:table-row>
        <table:table-row table:style-name="ro1">
          <table:table-cell office:value-type="float" office:value="437.188354492188">
            <text:p>437.1883544922</text:p>
          </table:table-cell>
          <table:table-cell office:value-type="float" office:value="-0.0006091322">
            <text:p>-0.0006091322</text:p>
          </table:table-cell>
          <table:table-cell table:number-columns-repeated="4"/>
        </table:table-row>
        <table:table-row table:style-name="ro1">
          <table:table-cell office:value-type="float" office:value="437.302154541016">
            <text:p>437.302154541</text:p>
          </table:table-cell>
          <table:table-cell office:value-type="float" office:value="0.002823791">
            <text:p>0.002823791</text:p>
          </table:table-cell>
          <table:table-cell table:number-columns-repeated="4"/>
        </table:table-row>
        <table:table-row table:style-name="ro1">
          <table:table-cell office:value-type="float" office:value="437.415924072266">
            <text:p>437.4159240723</text:p>
          </table:table-cell>
          <table:table-cell office:value-type="float" office:value="0.002898669">
            <text:p>0.002898669</text:p>
          </table:table-cell>
          <table:table-cell table:number-columns-repeated="4"/>
        </table:table-row>
        <table:table-row table:style-name="ro1">
          <table:table-cell office:value-type="float" office:value="437.529724121094">
            <text:p>437.5297241211</text:p>
          </table:table-cell>
          <table:table-cell office:value-type="float" office:value="0.0003683329">
            <text:p>0.0003683329</text:p>
          </table:table-cell>
          <table:table-cell table:number-columns-repeated="4"/>
        </table:table-row>
        <table:table-row table:style-name="ro1">
          <table:table-cell office:value-type="float" office:value="437.6435546875">
            <text:p>437.6435546875</text:p>
          </table:table-cell>
          <table:table-cell office:value-type="float" office:value="-0.0002539828">
            <text:p>-0.0002539828</text:p>
          </table:table-cell>
          <table:table-cell table:number-columns-repeated="4"/>
        </table:table-row>
        <table:table-row table:style-name="ro1">
          <table:table-cell office:value-type="float" office:value="437.757354736328">
            <text:p>437.7573547363</text:p>
          </table:table-cell>
          <table:table-cell office:value-type="float" office:value="0.004753695">
            <text:p>0.004753695</text:p>
          </table:table-cell>
          <table:table-cell table:number-columns-repeated="4"/>
        </table:table-row>
        <table:table-row table:style-name="ro1">
          <table:table-cell office:value-type="float" office:value="437.871154785156">
            <text:p>437.8711547852</text:p>
          </table:table-cell>
          <table:table-cell office:value-type="float" office:value="-0.003066138">
            <text:p>-0.003066138</text:p>
          </table:table-cell>
          <table:table-cell table:number-columns-repeated="4"/>
        </table:table-row>
        <table:table-row table:style-name="ro1">
          <table:table-cell office:value-type="float" office:value="437.984985351563">
            <text:p>437.9849853516</text:p>
          </table:table-cell>
          <table:table-cell office:value-type="float" office:value="0.0150827">
            <text:p>0.0150827</text:p>
          </table:table-cell>
          <table:table-cell table:number-columns-repeated="4"/>
        </table:table-row>
        <table:table-row table:style-name="ro1">
          <table:table-cell office:value-type="float" office:value="438.098815917969">
            <text:p>438.098815918</text:p>
          </table:table-cell>
          <table:table-cell office:value-type="float" office:value="0.004520911">
            <text:p>0.004520911</text:p>
          </table:table-cell>
          <table:table-cell table:number-columns-repeated="4"/>
        </table:table-row>
        <table:table-row table:style-name="ro1">
          <table:table-cell office:value-type="float" office:value="438.212646484375">
            <text:p>438.2126464844</text:p>
          </table:table-cell>
          <table:table-cell office:value-type="float" office:value="-0.006127033">
            <text:p>-0.006127033</text:p>
          </table:table-cell>
          <table:table-cell table:number-columns-repeated="4"/>
        </table:table-row>
        <table:table-row table:style-name="ro1">
          <table:table-cell office:value-type="float" office:value="438.326477050781">
            <text:p>438.3264770508</text:p>
          </table:table-cell>
          <table:table-cell office:value-type="float" office:value="-0.01001878">
            <text:p>-0.01001878</text:p>
          </table:table-cell>
          <table:table-cell table:number-columns-repeated="4"/>
        </table:table-row>
        <table:table-row table:style-name="ro1">
          <table:table-cell office:value-type="float" office:value="438.440307617188">
            <text:p>438.4403076172</text:p>
          </table:table-cell>
          <table:table-cell office:value-type="float" office:value="-0.0002910751">
            <text:p>-0.0002910751</text:p>
          </table:table-cell>
          <table:table-cell table:number-columns-repeated="4"/>
        </table:table-row>
        <table:table-row table:style-name="ro1">
          <table:table-cell office:value-type="float" office:value="438.554168701172">
            <text:p>438.5541687012</text:p>
          </table:table-cell>
          <table:table-cell office:value-type="float" office:value="0.007388079">
            <text:p>0.007388079</text:p>
          </table:table-cell>
          <table:table-cell table:number-columns-repeated="4"/>
        </table:table-row>
        <table:table-row table:style-name="ro1">
          <table:table-cell office:value-type="float" office:value="438.667999267578">
            <text:p>438.6679992676</text:p>
          </table:table-cell>
          <table:table-cell office:value-type="float" office:value="-0.008366279">
            <text:p>-0.008366279</text:p>
          </table:table-cell>
          <table:table-cell table:number-columns-repeated="4"/>
        </table:table-row>
        <table:table-row table:style-name="ro1">
          <table:table-cell office:value-type="float" office:value="438.781860351563">
            <text:p>438.7818603516</text:p>
          </table:table-cell>
          <table:table-cell office:value-type="float" office:value="-0.01222518">
            <text:p>-0.01222518</text:p>
          </table:table-cell>
          <table:table-cell table:number-columns-repeated="4"/>
        </table:table-row>
        <table:table-row table:style-name="ro1">
          <table:table-cell office:value-type="float" office:value="438.895721435547">
            <text:p>438.8957214355</text:p>
          </table:table-cell>
          <table:table-cell office:value-type="float" office:value="-0.002691053">
            <text:p>-0.002691053</text:p>
          </table:table-cell>
          <table:table-cell table:number-columns-repeated="4"/>
        </table:table-row>
        <table:table-row table:style-name="ro1">
          <table:table-cell office:value-type="float" office:value="439.009582519531">
            <text:p>439.0095825195</text:p>
          </table:table-cell>
          <table:table-cell office:value-type="float" office:value="0.002475586">
            <text:p>0.002475586</text:p>
          </table:table-cell>
          <table:table-cell table:number-columns-repeated="4"/>
        </table:table-row>
        <table:table-row table:style-name="ro1">
          <table:table-cell office:value-type="float" office:value="439.123474121094">
            <text:p>439.1234741211</text:p>
          </table:table-cell>
          <table:table-cell office:value-type="float" office:value="-0.008669664">
            <text:p>-0.008669664</text:p>
          </table:table-cell>
          <table:table-cell table:number-columns-repeated="4"/>
        </table:table-row>
        <table:table-row table:style-name="ro1">
          <table:table-cell office:value-type="float" office:value="439.237335205078">
            <text:p>439.2373352051</text:p>
          </table:table-cell>
          <table:table-cell office:value-type="float" office:value="-0.007136977">
            <text:p>-0.007136977</text:p>
          </table:table-cell>
          <table:table-cell table:number-columns-repeated="4"/>
        </table:table-row>
        <table:table-row table:style-name="ro1">
          <table:table-cell office:value-type="float" office:value="439.351226806641">
            <text:p>439.3512268066</text:p>
          </table:table-cell>
          <table:table-cell office:value-type="float" office:value="0.00372469">
            <text:p>0.00372469</text:p>
          </table:table-cell>
          <table:table-cell table:number-columns-repeated="4"/>
        </table:table-row>
        <table:table-row table:style-name="ro1">
          <table:table-cell office:value-type="float" office:value="439.465087890625">
            <text:p>439.4650878906</text:p>
          </table:table-cell>
          <table:table-cell office:value-type="float" office:value="0.01952327">
            <text:p>0.01952327</text:p>
          </table:table-cell>
          <table:table-cell table:number-columns-repeated="4"/>
        </table:table-row>
        <table:table-row table:style-name="ro1">
          <table:table-cell office:value-type="float" office:value="439.578979492188">
            <text:p>439.5789794922</text:p>
          </table:table-cell>
          <table:table-cell office:value-type="float" office:value="-0.004754614">
            <text:p>-0.004754614</text:p>
          </table:table-cell>
          <table:table-cell table:number-columns-repeated="4"/>
        </table:table-row>
        <table:table-row table:style-name="ro1">
          <table:table-cell office:value-type="float" office:value="439.69287109375">
            <text:p>439.6928710938</text:p>
          </table:table-cell>
          <table:table-cell office:value-type="float" office:value="-0.007883477">
            <text:p>-0.007883477</text:p>
          </table:table-cell>
          <table:table-cell table:number-columns-repeated="4"/>
        </table:table-row>
        <table:table-row table:style-name="ro1">
          <table:table-cell office:value-type="float" office:value="439.806793212891">
            <text:p>439.8067932129</text:p>
          </table:table-cell>
          <table:table-cell office:value-type="float" office:value="-0.005904732">
            <text:p>-0.005904732</text:p>
          </table:table-cell>
          <table:table-cell table:number-columns-repeated="4"/>
        </table:table-row>
        <table:table-row table:style-name="ro1">
          <table:table-cell office:value-type="float" office:value="439.920684814453">
            <text:p>439.9206848145</text:p>
          </table:table-cell>
          <table:table-cell office:value-type="float" office:value="0.05499396">
            <text:p>0.05499396</text:p>
          </table:table-cell>
          <table:table-cell table:number-columns-repeated="4"/>
        </table:table-row>
        <table:table-row table:style-name="ro1">
          <table:table-cell office:value-type="float" office:value="440.034606933594">
            <text:p>440.0346069336</text:p>
          </table:table-cell>
          <table:table-cell office:value-type="float" office:value="-0.0002084111">
            <text:p>-0.0002084111</text:p>
          </table:table-cell>
          <table:table-cell table:number-columns-repeated="4"/>
        </table:table-row>
        <table:table-row table:style-name="ro1">
          <table:table-cell office:value-type="float" office:value="440.148498535156">
            <text:p>440.1484985352</text:p>
          </table:table-cell>
          <table:table-cell office:value-type="float" office:value="-0.002356118">
            <text:p>-0.002356118</text:p>
          </table:table-cell>
          <table:table-cell table:number-columns-repeated="4"/>
        </table:table-row>
        <table:table-row table:style-name="ro1">
          <table:table-cell office:value-type="float" office:value="440.262420654297">
            <text:p>440.2624206543</text:p>
          </table:table-cell>
          <table:table-cell office:value-type="float" office:value="0.00673952">
            <text:p>0.00673952</text:p>
          </table:table-cell>
          <table:table-cell table:number-columns-repeated="4"/>
        </table:table-row>
        <table:table-row table:style-name="ro1">
          <table:table-cell office:value-type="float" office:value="440.376342773438">
            <text:p>440.3763427734</text:p>
          </table:table-cell>
          <table:table-cell office:value-type="float" office:value="0.03017448">
            <text:p>0.03017448</text:p>
          </table:table-cell>
          <table:table-cell table:number-columns-repeated="4"/>
        </table:table-row>
        <table:table-row table:style-name="ro1">
          <table:table-cell office:value-type="float" office:value="440.490295410156">
            <text:p>440.4902954102</text:p>
          </table:table-cell>
          <table:table-cell office:value-type="float" office:value="-0.001294442">
            <text:p>-0.001294442</text:p>
          </table:table-cell>
          <table:table-cell table:number-columns-repeated="4"/>
        </table:table-row>
        <table:table-row table:style-name="ro1">
          <table:table-cell office:value-type="float" office:value="440.604217529297">
            <text:p>440.6042175293</text:p>
          </table:table-cell>
          <table:table-cell office:value-type="float" office:value="-0.01597958">
            <text:p>-0.01597958</text:p>
          </table:table-cell>
          <table:table-cell table:number-columns-repeated="4"/>
        </table:table-row>
        <table:table-row table:style-name="ro1">
          <table:table-cell office:value-type="float" office:value="440.718170166016">
            <text:p>440.718170166</text:p>
          </table:table-cell>
          <table:table-cell office:value-type="float" office:value="0.01843569">
            <text:p>0.01843569</text:p>
          </table:table-cell>
          <table:table-cell table:number-columns-repeated="4"/>
        </table:table-row>
        <table:table-row table:style-name="ro1">
          <table:table-cell office:value-type="float" office:value="440.832092285156">
            <text:p>440.8320922852</text:p>
          </table:table-cell>
          <table:table-cell office:value-type="float" office:value="0.009420058">
            <text:p>0.009420058</text:p>
          </table:table-cell>
          <table:table-cell table:number-columns-repeated="4"/>
        </table:table-row>
        <table:table-row table:style-name="ro1">
          <table:table-cell office:value-type="float" office:value="440.946044921875">
            <text:p>440.9460449219</text:p>
          </table:table-cell>
          <table:table-cell office:value-type="float" office:value="-0.002648288">
            <text:p>-0.002648288</text:p>
          </table:table-cell>
          <table:table-cell table:number-columns-repeated="4"/>
        </table:table-row>
        <table:table-row table:style-name="ro1">
          <table:table-cell office:value-type="float" office:value="441.059997558594">
            <text:p>441.0599975586</text:p>
          </table:table-cell>
          <table:table-cell office:value-type="float" office:value="-0.002703514">
            <text:p>-0.002703514</text:p>
          </table:table-cell>
          <table:table-cell table:number-columns-repeated="4"/>
        </table:table-row>
        <table:table-row table:style-name="ro1">
          <table:table-cell office:value-type="float" office:value="441.173950195313">
            <text:p>441.1739501953</text:p>
          </table:table-cell>
          <table:table-cell office:value-type="float" office:value="0.005391055">
            <text:p>0.005391055</text:p>
          </table:table-cell>
          <table:table-cell table:number-columns-repeated="4"/>
        </table:table-row>
        <table:table-row table:style-name="ro1">
          <table:table-cell office:value-type="float" office:value="441.287933349609">
            <text:p>441.2879333496</text:p>
          </table:table-cell>
          <table:table-cell office:value-type="float" office:value="-0.0004883867">
            <text:p>-0.0004883867</text:p>
          </table:table-cell>
          <table:table-cell table:number-columns-repeated="4"/>
        </table:table-row>
        <table:table-row table:style-name="ro1">
          <table:table-cell office:value-type="float" office:value="441.401885986328">
            <text:p>441.4018859863</text:p>
          </table:table-cell>
          <table:table-cell office:value-type="string">
            <text:p>-6.311367E-05</text:p>
          </table:table-cell>
          <table:table-cell table:number-columns-repeated="4"/>
        </table:table-row>
        <table:table-row table:style-name="ro1">
          <table:table-cell office:value-type="float" office:value="441.515869140625">
            <text:p>441.5158691406</text:p>
          </table:table-cell>
          <table:table-cell office:value-type="float" office:value="0.01418502">
            <text:p>0.01418502</text:p>
          </table:table-cell>
          <table:table-cell table:number-columns-repeated="4"/>
        </table:table-row>
        <table:table-row table:style-name="ro1">
          <table:table-cell office:value-type="float" office:value="441.629852294922">
            <text:p>441.6298522949</text:p>
          </table:table-cell>
          <table:table-cell office:value-type="float" office:value="0.001773631">
            <text:p>0.001773631</text:p>
          </table:table-cell>
          <table:table-cell table:number-columns-repeated="4"/>
        </table:table-row>
        <table:table-row table:style-name="ro1">
          <table:table-cell office:value-type="float" office:value="441.743835449219">
            <text:p>441.7438354492</text:p>
          </table:table-cell>
          <table:table-cell office:value-type="float" office:value="0.006015456">
            <text:p>0.006015456</text:p>
          </table:table-cell>
          <table:table-cell table:number-columns-repeated="4"/>
        </table:table-row>
        <table:table-row table:style-name="ro1">
          <table:table-cell office:value-type="float" office:value="441.857818603516">
            <text:p>441.8578186035</text:p>
          </table:table-cell>
          <table:table-cell office:value-type="float" office:value="-0.00961569">
            <text:p>-0.00961569</text:p>
          </table:table-cell>
          <table:table-cell table:number-columns-repeated="4"/>
        </table:table-row>
        <table:table-row table:style-name="ro1">
          <table:table-cell office:value-type="float" office:value="441.971801757813">
            <text:p>441.9718017578</text:p>
          </table:table-cell>
          <table:table-cell office:value-type="float" office:value="0.0009023961">
            <text:p>0.0009023961</text:p>
          </table:table-cell>
          <table:table-cell table:number-columns-repeated="4"/>
        </table:table-row>
        <table:table-row table:style-name="ro1">
          <table:table-cell office:value-type="float" office:value="442.085815429688">
            <text:p>442.0858154297</text:p>
          </table:table-cell>
          <table:table-cell office:value-type="float" office:value="0.008761689">
            <text:p>0.008761689</text:p>
          </table:table-cell>
          <table:table-cell table:number-columns-repeated="4"/>
        </table:table-row>
        <table:table-row table:style-name="ro1">
          <table:table-cell office:value-type="float" office:value="442.199829101563">
            <text:p>442.1998291016</text:p>
          </table:table-cell>
          <table:table-cell office:value-type="float" office:value="-0.004325564">
            <text:p>-0.004325564</text:p>
          </table:table-cell>
          <table:table-cell table:number-columns-repeated="4"/>
        </table:table-row>
        <table:table-row table:style-name="ro1">
          <table:table-cell office:value-type="float" office:value="442.313812255859">
            <text:p>442.3138122559</text:p>
          </table:table-cell>
          <table:table-cell office:value-type="float" office:value="0.0002452072">
            <text:p>0.0002452072</text:p>
          </table:table-cell>
          <table:table-cell table:number-columns-repeated="4"/>
        </table:table-row>
        <table:table-row table:style-name="ro1">
          <table:table-cell office:value-type="float" office:value="442.427825927734">
            <text:p>442.4278259277</text:p>
          </table:table-cell>
          <table:table-cell office:value-type="float" office:value="0.01835181">
            <text:p>0.01835181</text:p>
          </table:table-cell>
          <table:table-cell table:number-columns-repeated="4"/>
        </table:table-row>
        <table:table-row table:style-name="ro1">
          <table:table-cell office:value-type="float" office:value="442.541839599609">
            <text:p>442.5418395996</text:p>
          </table:table-cell>
          <table:table-cell office:value-type="float" office:value="0.002413699">
            <text:p>0.002413699</text:p>
          </table:table-cell>
          <table:table-cell table:number-columns-repeated="4"/>
        </table:table-row>
        <table:table-row table:style-name="ro1">
          <table:table-cell office:value-type="float" office:value="442.655883789063">
            <text:p>442.6558837891</text:p>
          </table:table-cell>
          <table:table-cell office:value-type="float" office:value="-0.001689179">
            <text:p>-0.001689179</text:p>
          </table:table-cell>
          <table:table-cell table:number-columns-repeated="4"/>
        </table:table-row>
        <table:table-row table:style-name="ro1">
          <table:table-cell office:value-type="float" office:value="442.769897460938">
            <text:p>442.7698974609</text:p>
          </table:table-cell>
          <table:table-cell office:value-type="float" office:value="-0.0007784946">
            <text:p>-0.0007784946</text:p>
          </table:table-cell>
          <table:table-cell table:number-columns-repeated="4"/>
        </table:table-row>
        <table:table-row table:style-name="ro1">
          <table:table-cell office:value-type="float" office:value="442.883941650391">
            <text:p>442.8839416504</text:p>
          </table:table-cell>
          <table:table-cell office:value-type="float" office:value="-0.003311593">
            <text:p>-0.003311593</text:p>
          </table:table-cell>
          <table:table-cell table:number-columns-repeated="4"/>
        </table:table-row>
        <table:table-row table:style-name="ro1">
          <table:table-cell office:value-type="float" office:value="442.997985839844">
            <text:p>442.9979858398</text:p>
          </table:table-cell>
          <table:table-cell office:value-type="float" office:value="0.00731426">
            <text:p>0.00731426</text:p>
          </table:table-cell>
          <table:table-cell table:number-columns-repeated="4"/>
        </table:table-row>
        <table:table-row table:style-name="ro1">
          <table:table-cell office:value-type="float" office:value="443.112030029297">
            <text:p>443.1120300293</text:p>
          </table:table-cell>
          <table:table-cell office:value-type="float" office:value="0.003192305">
            <text:p>0.003192305</text:p>
          </table:table-cell>
          <table:table-cell table:number-columns-repeated="4"/>
        </table:table-row>
        <table:table-row table:style-name="ro1">
          <table:table-cell office:value-type="float" office:value="443.22607421875">
            <text:p>443.2260742188</text:p>
          </table:table-cell>
          <table:table-cell office:value-type="float" office:value="-0.005473884">
            <text:p>-0.005473884</text:p>
          </table:table-cell>
          <table:table-cell table:number-columns-repeated="4"/>
        </table:table-row>
        <table:table-row table:style-name="ro1">
          <table:table-cell office:value-type="float" office:value="443.340118408203">
            <text:p>443.3401184082</text:p>
          </table:table-cell>
          <table:table-cell office:value-type="float" office:value="-0.0004354766">
            <text:p>-0.0004354766</text:p>
          </table:table-cell>
          <table:table-cell table:number-columns-repeated="4"/>
        </table:table-row>
        <table:table-row table:style-name="ro1">
          <table:table-cell office:value-type="float" office:value="443.454162597656">
            <text:p>443.4541625977</text:p>
          </table:table-cell>
          <table:table-cell office:value-type="float" office:value="0.003573655">
            <text:p>0.003573655</text:p>
          </table:table-cell>
          <table:table-cell table:number-columns-repeated="4"/>
        </table:table-row>
        <table:table-row table:style-name="ro1">
          <table:table-cell office:value-type="float" office:value="443.568237304688">
            <text:p>443.5682373047</text:p>
          </table:table-cell>
          <table:table-cell office:value-type="float" office:value="-0.004867427">
            <text:p>-0.004867427</text:p>
          </table:table-cell>
          <table:table-cell table:number-columns-repeated="4"/>
        </table:table-row>
        <table:table-row table:style-name="ro1">
          <table:table-cell office:value-type="float" office:value="443.682312011719">
            <text:p>443.6823120117</text:p>
          </table:table-cell>
          <table:table-cell office:value-type="float" office:value="-0.008990115">
            <text:p>-0.008990115</text:p>
          </table:table-cell>
          <table:table-cell table:number-columns-repeated="4"/>
        </table:table-row>
        <table:table-row table:style-name="ro1">
          <table:table-cell office:value-type="float" office:value="443.79638671875">
            <text:p>443.7963867188</text:p>
          </table:table-cell>
          <table:table-cell office:value-type="float" office:value="0.002054312">
            <text:p>0.002054312</text:p>
          </table:table-cell>
          <table:table-cell table:number-columns-repeated="4"/>
        </table:table-row>
        <table:table-row table:style-name="ro1">
          <table:table-cell office:value-type="float" office:value="443.910461425781">
            <text:p>443.9104614258</text:p>
          </table:table-cell>
          <table:table-cell office:value-type="float" office:value="-0.003455867">
            <text:p>-0.003455867</text:p>
          </table:table-cell>
          <table:table-cell table:number-columns-repeated="4"/>
        </table:table-row>
        <table:table-row table:style-name="ro1">
          <table:table-cell office:value-type="float" office:value="444.024536132813">
            <text:p>444.0245361328</text:p>
          </table:table-cell>
          <table:table-cell office:value-type="float" office:value="0.005398909">
            <text:p>0.005398909</text:p>
          </table:table-cell>
          <table:table-cell table:number-columns-repeated="4"/>
        </table:table-row>
        <table:table-row table:style-name="ro1">
          <table:table-cell office:value-type="float" office:value="444.138610839844">
            <text:p>444.1386108398</text:p>
          </table:table-cell>
          <table:table-cell office:value-type="float" office:value="0.02350338">
            <text:p>0.02350338</text:p>
          </table:table-cell>
          <table:table-cell table:number-columns-repeated="4"/>
        </table:table-row>
        <table:table-row table:style-name="ro1">
          <table:table-cell office:value-type="float" office:value="444.252716064453">
            <text:p>444.2527160645</text:p>
          </table:table-cell>
          <table:table-cell office:value-type="float" office:value="-0.003735405">
            <text:p>-0.003735405</text:p>
          </table:table-cell>
          <table:table-cell table:number-columns-repeated="4"/>
        </table:table-row>
        <table:table-row table:style-name="ro1">
          <table:table-cell office:value-type="float" office:value="444.366821289063">
            <text:p>444.3668212891</text:p>
          </table:table-cell>
          <table:table-cell office:value-type="float" office:value="0.0004687199">
            <text:p>0.0004687199</text:p>
          </table:table-cell>
          <table:table-cell table:number-columns-repeated="4"/>
        </table:table-row>
        <table:table-row table:style-name="ro1">
          <table:table-cell office:value-type="float" office:value="444.480895996094">
            <text:p>444.4808959961</text:p>
          </table:table-cell>
          <table:table-cell office:value-type="float" office:value="0.002117947">
            <text:p>0.002117947</text:p>
          </table:table-cell>
          <table:table-cell table:number-columns-repeated="4"/>
        </table:table-row>
        <table:table-row table:style-name="ro1">
          <table:table-cell office:value-type="float" office:value="444.595001220703">
            <text:p>444.5950012207</text:p>
          </table:table-cell>
          <table:table-cell office:value-type="float" office:value="-0.003357878">
            <text:p>-0.003357878</text:p>
          </table:table-cell>
          <table:table-cell table:number-columns-repeated="4"/>
        </table:table-row>
        <table:table-row table:style-name="ro1">
          <table:table-cell office:value-type="float" office:value="444.709136962891">
            <text:p>444.7091369629</text:p>
          </table:table-cell>
          <table:table-cell office:value-type="float" office:value="-0.001987277">
            <text:p>-0.001987277</text:p>
          </table:table-cell>
          <table:table-cell table:number-columns-repeated="4"/>
        </table:table-row>
        <table:table-row table:style-name="ro1">
          <table:table-cell office:value-type="float" office:value="444.8232421875">
            <text:p>444.8232421875</text:p>
          </table:table-cell>
          <table:table-cell office:value-type="float" office:value="0.004893109">
            <text:p>0.004893109</text:p>
          </table:table-cell>
          <table:table-cell table:number-columns-repeated="4"/>
        </table:table-row>
        <table:table-row table:style-name="ro1">
          <table:table-cell office:value-type="float" office:value="444.937347412109">
            <text:p>444.9373474121</text:p>
          </table:table-cell>
          <table:table-cell office:value-type="float" office:value="0.006281064">
            <text:p>0.006281064</text:p>
          </table:table-cell>
          <table:table-cell table:number-columns-repeated="4"/>
        </table:table-row>
        <table:table-row table:style-name="ro1">
          <table:table-cell office:value-type="float" office:value="445.051483154297">
            <text:p>445.0514831543</text:p>
          </table:table-cell>
          <table:table-cell office:value-type="float" office:value="-0.003538803">
            <text:p>-0.003538803</text:p>
          </table:table-cell>
          <table:table-cell table:number-columns-repeated="4"/>
        </table:table-row>
        <table:table-row table:style-name="ro1">
          <table:table-cell office:value-type="float" office:value="445.165618896484">
            <text:p>445.1656188965</text:p>
          </table:table-cell>
          <table:table-cell office:value-type="float" office:value="-0.00964825">
            <text:p>-0.00964825</text:p>
          </table:table-cell>
          <table:table-cell table:number-columns-repeated="4"/>
        </table:table-row>
        <table:table-row table:style-name="ro1">
          <table:table-cell office:value-type="float" office:value="445.279754638672">
            <text:p>445.2797546387</text:p>
          </table:table-cell>
          <table:table-cell office:value-type="float" office:value="0.005440158">
            <text:p>0.005440158</text:p>
          </table:table-cell>
          <table:table-cell table:number-columns-repeated="4"/>
        </table:table-row>
        <table:table-row table:style-name="ro1">
          <table:table-cell office:value-type="float" office:value="445.393890380859">
            <text:p>445.3938903809</text:p>
          </table:table-cell>
          <table:table-cell office:value-type="float" office:value="-0.0008290447">
            <text:p>-0.0008290447</text:p>
          </table:table-cell>
          <table:table-cell table:number-columns-repeated="4"/>
        </table:table-row>
        <table:table-row table:style-name="ro1">
          <table:table-cell office:value-type="float" office:value="445.508026123047">
            <text:p>445.508026123</text:p>
          </table:table-cell>
          <table:table-cell office:value-type="float" office:value="-0.006506532">
            <text:p>-0.006506532</text:p>
          </table:table-cell>
          <table:table-cell table:number-columns-repeated="4"/>
        </table:table-row>
        <table:table-row table:style-name="ro1">
          <table:table-cell office:value-type="float" office:value="445.622192382813">
            <text:p>445.6221923828</text:p>
          </table:table-cell>
          <table:table-cell office:value-type="float" office:value="0.0006686468">
            <text:p>0.0006686468</text:p>
          </table:table-cell>
          <table:table-cell table:number-columns-repeated="4"/>
        </table:table-row>
        <table:table-row table:style-name="ro1">
          <table:table-cell office:value-type="float" office:value="445.736328125">
            <text:p>445.736328125</text:p>
          </table:table-cell>
          <table:table-cell office:value-type="float" office:value="0.001526226">
            <text:p>0.001526226</text:p>
          </table:table-cell>
          <table:table-cell table:number-columns-repeated="4"/>
        </table:table-row>
        <table:table-row table:style-name="ro1">
          <table:table-cell office:value-type="float" office:value="445.850494384766">
            <text:p>445.8504943848</text:p>
          </table:table-cell>
          <table:table-cell office:value-type="float" office:value="0.004812592">
            <text:p>0.004812592</text:p>
          </table:table-cell>
          <table:table-cell table:number-columns-repeated="4"/>
        </table:table-row>
        <table:table-row table:style-name="ro1">
          <table:table-cell office:value-type="float" office:value="445.964660644531">
            <text:p>445.9646606445</text:p>
          </table:table-cell>
          <table:table-cell office:value-type="float" office:value="-0.004545171">
            <text:p>-0.004545171</text:p>
          </table:table-cell>
          <table:table-cell table:number-columns-repeated="4"/>
        </table:table-row>
        <table:table-row table:style-name="ro1">
          <table:table-cell office:value-type="float" office:value="446.078826904297">
            <text:p>446.0788269043</text:p>
          </table:table-cell>
          <table:table-cell office:value-type="float" office:value="-0.000731369">
            <text:p>-0.000731369</text:p>
          </table:table-cell>
          <table:table-cell table:number-columns-repeated="4"/>
        </table:table-row>
        <table:table-row table:style-name="ro1">
          <table:table-cell office:value-type="float" office:value="446.192993164063">
            <text:p>446.1929931641</text:p>
          </table:table-cell>
          <table:table-cell office:value-type="float" office:value="0.005316391">
            <text:p>0.005316391</text:p>
          </table:table-cell>
          <table:table-cell table:number-columns-repeated="4"/>
        </table:table-row>
        <table:table-row table:style-name="ro1">
          <table:table-cell office:value-type="float" office:value="446.307189941406">
            <text:p>446.3071899414</text:p>
          </table:table-cell>
          <table:table-cell office:value-type="float" office:value="0.004490589">
            <text:p>0.004490589</text:p>
          </table:table-cell>
          <table:table-cell table:number-columns-repeated="4"/>
        </table:table-row>
        <table:table-row table:style-name="ro1">
          <table:table-cell office:value-type="float" office:value="446.421356201172">
            <text:p>446.4213562012</text:p>
          </table:table-cell>
          <table:table-cell office:value-type="float" office:value="-0.004078029">
            <text:p>-0.004078029</text:p>
          </table:table-cell>
          <table:table-cell table:number-columns-repeated="4"/>
        </table:table-row>
        <table:table-row table:style-name="ro1">
          <table:table-cell office:value-type="float" office:value="446.535552978516">
            <text:p>446.5355529785</text:p>
          </table:table-cell>
          <table:table-cell office:value-type="float" office:value="0.001606959">
            <text:p>0.001606959</text:p>
          </table:table-cell>
          <table:table-cell table:number-columns-repeated="4"/>
        </table:table-row>
        <table:table-row table:style-name="ro1">
          <table:table-cell office:value-type="float" office:value="446.649749755859">
            <text:p>446.6497497559</text:p>
          </table:table-cell>
          <table:table-cell office:value-type="float" office:value="0.01275077">
            <text:p>0.01275077</text:p>
          </table:table-cell>
          <table:table-cell table:number-columns-repeated="4"/>
        </table:table-row>
        <table:table-row table:style-name="ro1">
          <table:table-cell office:value-type="float" office:value="446.763946533203">
            <text:p>446.7639465332</text:p>
          </table:table-cell>
          <table:table-cell office:value-type="float" office:value="-0.002103605">
            <text:p>-0.002103605</text:p>
          </table:table-cell>
          <table:table-cell table:number-columns-repeated="4"/>
        </table:table-row>
        <table:table-row table:style-name="ro1">
          <table:table-cell office:value-type="float" office:value="446.878143310547">
            <text:p>446.8781433105</text:p>
          </table:table-cell>
          <table:table-cell office:value-type="float" office:value="-0.001598909">
            <text:p>-0.001598909</text:p>
          </table:table-cell>
          <table:table-cell table:number-columns-repeated="4"/>
        </table:table-row>
        <table:table-row table:style-name="ro1">
          <table:table-cell office:value-type="float" office:value="446.992370605469">
            <text:p>446.9923706055</text:p>
          </table:table-cell>
          <table:table-cell office:value-type="float" office:value="-0.002946174">
            <text:p>-0.002946174</text:p>
          </table:table-cell>
          <table:table-cell table:number-columns-repeated="4"/>
        </table:table-row>
        <table:table-row table:style-name="ro1">
          <table:table-cell office:value-type="float" office:value="447.106567382813">
            <text:p>447.1065673828</text:p>
          </table:table-cell>
          <table:table-cell office:value-type="float" office:value="0.01347492">
            <text:p>0.01347492</text:p>
          </table:table-cell>
          <table:table-cell table:number-columns-repeated="4"/>
        </table:table-row>
        <table:table-row table:style-name="ro1">
          <table:table-cell office:value-type="float" office:value="447.220794677734">
            <text:p>447.2207946777</text:p>
          </table:table-cell>
          <table:table-cell office:value-type="float" office:value="0.001781226">
            <text:p>0.001781226</text:p>
          </table:table-cell>
          <table:table-cell table:number-columns-repeated="4"/>
        </table:table-row>
        <table:table-row table:style-name="ro1">
          <table:table-cell office:value-type="float" office:value="447.335021972656">
            <text:p>447.3350219727</text:p>
          </table:table-cell>
          <table:table-cell office:value-type="float" office:value="0.003300244">
            <text:p>0.003300244</text:p>
          </table:table-cell>
          <table:table-cell table:number-columns-repeated="4"/>
        </table:table-row>
        <table:table-row table:style-name="ro1">
          <table:table-cell office:value-type="float" office:value="447.449249267578">
            <text:p>447.4492492676</text:p>
          </table:table-cell>
          <table:table-cell office:value-type="float" office:value="0.007786409">
            <text:p>0.007786409</text:p>
          </table:table-cell>
          <table:table-cell table:number-columns-repeated="4"/>
        </table:table-row>
        <table:table-row table:style-name="ro1">
          <table:table-cell office:value-type="float" office:value="447.5634765625">
            <text:p>447.5634765625</text:p>
          </table:table-cell>
          <table:table-cell office:value-type="float" office:value="0.001226972">
            <text:p>0.001226972</text:p>
          </table:table-cell>
          <table:table-cell table:number-columns-repeated="4"/>
        </table:table-row>
        <table:table-row table:style-name="ro1">
          <table:table-cell office:value-type="float" office:value="447.677703857422">
            <text:p>447.6777038574</text:p>
          </table:table-cell>
          <table:table-cell office:value-type="float" office:value="0.003318536">
            <text:p>0.003318536</text:p>
          </table:table-cell>
          <table:table-cell table:number-columns-repeated="4"/>
        </table:table-row>
        <table:table-row table:style-name="ro1">
          <table:table-cell office:value-type="float" office:value="447.791961669922">
            <text:p>447.7919616699</text:p>
          </table:table-cell>
          <table:table-cell office:value-type="float" office:value="-0.006618979">
            <text:p>-0.006618979</text:p>
          </table:table-cell>
          <table:table-cell table:number-columns-repeated="4"/>
        </table:table-row>
        <table:table-row table:style-name="ro1">
          <table:table-cell office:value-type="float" office:value="447.906188964844">
            <text:p>447.9061889648</text:p>
          </table:table-cell>
          <table:table-cell office:value-type="float" office:value="-0.007578065">
            <text:p>-0.007578065</text:p>
          </table:table-cell>
          <table:table-cell table:number-columns-repeated="4"/>
        </table:table-row>
        <table:table-row table:style-name="ro1">
          <table:table-cell office:value-type="float" office:value="448.020446777344">
            <text:p>448.0204467773</text:p>
          </table:table-cell>
          <table:table-cell office:value-type="float" office:value="-0.005608231">
            <text:p>-0.005608231</text:p>
          </table:table-cell>
          <table:table-cell table:number-columns-repeated="4"/>
        </table:table-row>
        <table:table-row table:style-name="ro1">
          <table:table-cell office:value-type="float" office:value="448.134704589844">
            <text:p>448.1347045898</text:p>
          </table:table-cell>
          <table:table-cell office:value-type="float" office:value="0.01187086">
            <text:p>0.01187086</text:p>
          </table:table-cell>
          <table:table-cell table:number-columns-repeated="4"/>
        </table:table-row>
        <table:table-row table:style-name="ro1">
          <table:table-cell office:value-type="float" office:value="448.248962402344">
            <text:p>448.2489624023</text:p>
          </table:table-cell>
          <table:table-cell office:value-type="float" office:value="-0.007454613">
            <text:p>-0.007454613</text:p>
          </table:table-cell>
          <table:table-cell table:number-columns-repeated="4"/>
        </table:table-row>
        <table:table-row table:style-name="ro1">
          <table:table-cell office:value-type="float" office:value="448.363220214844">
            <text:p>448.3632202148</text:p>
          </table:table-cell>
          <table:table-cell office:value-type="float" office:value="-0.002079828">
            <text:p>-0.002079828</text:p>
          </table:table-cell>
          <table:table-cell table:number-columns-repeated="4"/>
        </table:table-row>
        <table:table-row table:style-name="ro1">
          <table:table-cell office:value-type="float" office:value="448.477508544922">
            <text:p>448.4775085449</text:p>
          </table:table-cell>
          <table:table-cell office:value-type="float" office:value="0.007708652">
            <text:p>0.007708652</text:p>
          </table:table-cell>
          <table:table-cell table:number-columns-repeated="4"/>
        </table:table-row>
        <table:table-row table:style-name="ro1">
          <table:table-cell office:value-type="float" office:value="448.591766357422">
            <text:p>448.5917663574</text:p>
          </table:table-cell>
          <table:table-cell office:value-type="float" office:value="0.01011891">
            <text:p>0.01011891</text:p>
          </table:table-cell>
          <table:table-cell table:number-columns-repeated="4"/>
        </table:table-row>
        <table:table-row table:style-name="ro1">
          <table:table-cell office:value-type="float" office:value="448.7060546875">
            <text:p>448.7060546875</text:p>
          </table:table-cell>
          <table:table-cell office:value-type="float" office:value="0.01009853">
            <text:p>0.01009853</text:p>
          </table:table-cell>
          <table:table-cell table:number-columns-repeated="4"/>
        </table:table-row>
        <table:table-row table:style-name="ro1">
          <table:table-cell office:value-type="float" office:value="448.820343017578">
            <text:p>448.8203430176</text:p>
          </table:table-cell>
          <table:table-cell office:value-type="float" office:value="-0.007952846">
            <text:p>-0.007952846</text:p>
          </table:table-cell>
          <table:table-cell table:number-columns-repeated="4"/>
        </table:table-row>
        <table:table-row table:style-name="ro1">
          <table:table-cell office:value-type="float" office:value="448.934631347656">
            <text:p>448.9346313477</text:p>
          </table:table-cell>
          <table:table-cell office:value-type="float" office:value="-0.0008618123">
            <text:p>-0.0008618123</text:p>
          </table:table-cell>
          <table:table-cell table:number-columns-repeated="4"/>
        </table:table-row>
        <table:table-row table:style-name="ro1">
          <table:table-cell office:value-type="float" office:value="449.048919677734">
            <text:p>449.0489196777</text:p>
          </table:table-cell>
          <table:table-cell office:value-type="float" office:value="-0.002153406">
            <text:p>-0.002153406</text:p>
          </table:table-cell>
          <table:table-cell table:number-columns-repeated="4"/>
        </table:table-row>
        <table:table-row table:style-name="ro1">
          <table:table-cell office:value-type="float" office:value="449.163238525391">
            <text:p>449.1632385254</text:p>
          </table:table-cell>
          <table:table-cell office:value-type="float" office:value="-0.01040481">
            <text:p>-0.01040481</text:p>
          </table:table-cell>
          <table:table-cell table:number-columns-repeated="4"/>
        </table:table-row>
        <table:table-row table:style-name="ro1">
          <table:table-cell office:value-type="float" office:value="449.277526855469">
            <text:p>449.2775268555</text:p>
          </table:table-cell>
          <table:table-cell office:value-type="float" office:value="0.0003271958">
            <text:p>0.0003271958</text:p>
          </table:table-cell>
          <table:table-cell table:number-columns-repeated="4"/>
        </table:table-row>
        <table:table-row table:style-name="ro1">
          <table:table-cell office:value-type="float" office:value="449.391845703125">
            <text:p>449.3918457031</text:p>
          </table:table-cell>
          <table:table-cell office:value-type="float" office:value="0.01363706">
            <text:p>0.01363706</text:p>
          </table:table-cell>
          <table:table-cell table:number-columns-repeated="4"/>
        </table:table-row>
        <table:table-row table:style-name="ro1">
          <table:table-cell office:value-type="float" office:value="449.506164550781">
            <text:p>449.5061645508</text:p>
          </table:table-cell>
          <table:table-cell office:value-type="float" office:value="0.0007790584">
            <text:p>0.0007790584</text:p>
          </table:table-cell>
          <table:table-cell table:number-columns-repeated="4"/>
        </table:table-row>
        <table:table-row table:style-name="ro1">
          <table:table-cell office:value-type="float" office:value="449.620483398438">
            <text:p>449.6204833984</text:p>
          </table:table-cell>
          <table:table-cell office:value-type="float" office:value="0.007993995">
            <text:p>0.007993995</text:p>
          </table:table-cell>
          <table:table-cell table:number-columns-repeated="4"/>
        </table:table-row>
        <table:table-row table:style-name="ro1">
          <table:table-cell office:value-type="float" office:value="449.734802246094">
            <text:p>449.7348022461</text:p>
          </table:table-cell>
          <table:table-cell office:value-type="float" office:value="-0.01003489">
            <text:p>-0.01003489</text:p>
          </table:table-cell>
          <table:table-cell table:number-columns-repeated="4"/>
        </table:table-row>
        <table:table-row table:style-name="ro1">
          <table:table-cell office:value-type="float" office:value="449.84912109375">
            <text:p>449.8491210938</text:p>
          </table:table-cell>
          <table:table-cell office:value-type="float" office:value="0.006717833">
            <text:p>0.006717833</text:p>
          </table:table-cell>
          <table:table-cell table:number-columns-repeated="4"/>
        </table:table-row>
        <table:table-row table:style-name="ro1">
          <table:table-cell office:value-type="float" office:value="449.963439941406">
            <text:p>449.9634399414</text:p>
          </table:table-cell>
          <table:table-cell office:value-type="float" office:value="-0.003859197">
            <text:p>-0.003859197</text:p>
          </table:table-cell>
          <table:table-cell table:number-columns-repeated="4"/>
        </table:table-row>
        <table:table-row table:style-name="ro1">
          <table:table-cell office:value-type="float" office:value="450.077789306641">
            <text:p>450.0777893066</text:p>
          </table:table-cell>
          <table:table-cell office:value-type="float" office:value="-0.002276119">
            <text:p>-0.002276119</text:p>
          </table:table-cell>
          <table:table-cell table:number-columns-repeated="4"/>
        </table:table-row>
        <table:table-row table:style-name="ro1">
          <table:table-cell office:value-type="float" office:value="450.192138671875">
            <text:p>450.1921386719</text:p>
          </table:table-cell>
          <table:table-cell office:value-type="float" office:value="-0.01278835">
            <text:p>-0.01278835</text:p>
          </table:table-cell>
          <table:table-cell table:number-columns-repeated="4"/>
        </table:table-row>
        <table:table-row table:style-name="ro1">
          <table:table-cell office:value-type="float" office:value="450.306488037109">
            <text:p>450.3064880371</text:p>
          </table:table-cell>
          <table:table-cell office:value-type="float" office:value="0.006823399">
            <text:p>0.006823399</text:p>
          </table:table-cell>
          <table:table-cell table:number-columns-repeated="4"/>
        </table:table-row>
        <table:table-row table:style-name="ro1">
          <table:table-cell office:value-type="float" office:value="450.420837402344">
            <text:p>450.4208374023</text:p>
          </table:table-cell>
          <table:table-cell office:value-type="float" office:value="0.002755719">
            <text:p>0.002755719</text:p>
          </table:table-cell>
          <table:table-cell table:number-columns-repeated="4"/>
        </table:table-row>
        <table:table-row table:style-name="ro1">
          <table:table-cell office:value-type="float" office:value="450.535186767578">
            <text:p>450.5351867676</text:p>
          </table:table-cell>
          <table:table-cell office:value-type="float" office:value="0.0006537001">
            <text:p>0.0006537001</text:p>
          </table:table-cell>
          <table:table-cell table:number-columns-repeated="4"/>
        </table:table-row>
        <table:table-row table:style-name="ro1">
          <table:table-cell office:value-type="float" office:value="450.649536132813">
            <text:p>450.6495361328</text:p>
          </table:table-cell>
          <table:table-cell office:value-type="float" office:value="-0.0118872">
            <text:p>-0.0118872</text:p>
          </table:table-cell>
          <table:table-cell table:number-columns-repeated="4"/>
        </table:table-row>
        <table:table-row table:style-name="ro1">
          <table:table-cell office:value-type="float" office:value="450.763916015625">
            <text:p>450.7639160156</text:p>
          </table:table-cell>
          <table:table-cell office:value-type="float" office:value="0.008646712">
            <text:p>0.008646712</text:p>
          </table:table-cell>
          <table:table-cell table:number-columns-repeated="4"/>
        </table:table-row>
        <table:table-row table:style-name="ro1">
          <table:table-cell office:value-type="float" office:value="450.878295898438">
            <text:p>450.8782958984</text:p>
          </table:table-cell>
          <table:table-cell office:value-type="float" office:value="-0.004270425">
            <text:p>-0.004270425</text:p>
          </table:table-cell>
          <table:table-cell table:number-columns-repeated="4"/>
        </table:table-row>
        <table:table-row table:style-name="ro1">
          <table:table-cell office:value-type="float" office:value="450.99267578125">
            <text:p>450.9926757813</text:p>
          </table:table-cell>
          <table:table-cell office:value-type="string">
            <text:p>-7.454991E-05</text:p>
          </table:table-cell>
          <table:table-cell table:number-columns-repeated="4"/>
        </table:table-row>
        <table:table-row table:style-name="ro1">
          <table:table-cell office:value-type="float" office:value="451.107055664063">
            <text:p>451.1070556641</text:p>
          </table:table-cell>
          <table:table-cell office:value-type="float" office:value="-0.01332995">
            <text:p>-0.01332995</text:p>
          </table:table-cell>
          <table:table-cell table:number-columns-repeated="4"/>
        </table:table-row>
        <table:table-row table:style-name="ro1">
          <table:table-cell office:value-type="float" office:value="451.221435546875">
            <text:p>451.2214355469</text:p>
          </table:table-cell>
          <table:table-cell office:value-type="float" office:value="0.0003553693">
            <text:p>0.0003553693</text:p>
          </table:table-cell>
          <table:table-cell table:number-columns-repeated="4"/>
        </table:table-row>
        <table:table-row table:style-name="ro1">
          <table:table-cell office:value-type="float" office:value="451.335815429688">
            <text:p>451.3358154297</text:p>
          </table:table-cell>
          <table:table-cell office:value-type="float" office:value="0.0120033">
            <text:p>0.0120033</text:p>
          </table:table-cell>
          <table:table-cell table:number-columns-repeated="4"/>
        </table:table-row>
        <table:table-row table:style-name="ro1">
          <table:table-cell office:value-type="float" office:value="451.450225830078">
            <text:p>451.4502258301</text:p>
          </table:table-cell>
          <table:table-cell office:value-type="float" office:value="0.001438251">
            <text:p>0.001438251</text:p>
          </table:table-cell>
          <table:table-cell table:number-columns-repeated="4"/>
        </table:table-row>
        <table:table-row table:style-name="ro1">
          <table:table-cell office:value-type="float" office:value="451.564605712891">
            <text:p>451.5646057129</text:p>
          </table:table-cell>
          <table:table-cell office:value-type="float" office:value="-0.0128956">
            <text:p>-0.0128956</text:p>
          </table:table-cell>
          <table:table-cell table:number-columns-repeated="4"/>
        </table:table-row>
        <table:table-row table:style-name="ro1">
          <table:table-cell office:value-type="float" office:value="451.679016113281">
            <text:p>451.6790161133</text:p>
          </table:table-cell>
          <table:table-cell office:value-type="float" office:value="0.007225335">
            <text:p>0.007225335</text:p>
          </table:table-cell>
          <table:table-cell table:number-columns-repeated="4"/>
        </table:table-row>
        <table:table-row table:style-name="ro1">
          <table:table-cell office:value-type="float" office:value="451.793426513672">
            <text:p>451.7934265137</text:p>
          </table:table-cell>
          <table:table-cell office:value-type="float" office:value="0.009445696">
            <text:p>0.009445696</text:p>
          </table:table-cell>
          <table:table-cell table:number-columns-repeated="4"/>
        </table:table-row>
        <table:table-row table:style-name="ro1">
          <table:table-cell office:value-type="float" office:value="451.907836914063">
            <text:p>451.9078369141</text:p>
          </table:table-cell>
          <table:table-cell office:value-type="float" office:value="-0.006431235">
            <text:p>-0.006431235</text:p>
          </table:table-cell>
          <table:table-cell table:number-columns-repeated="4"/>
        </table:table-row>
        <table:table-row table:style-name="ro1">
          <table:table-cell office:value-type="float" office:value="452.022247314453">
            <text:p>452.0222473145</text:p>
          </table:table-cell>
          <table:table-cell office:value-type="float" office:value="-0.003669839">
            <text:p>-0.003669839</text:p>
          </table:table-cell>
          <table:table-cell table:number-columns-repeated="4"/>
        </table:table-row>
        <table:table-row table:style-name="ro1">
          <table:table-cell office:value-type="float" office:value="452.136688232422">
            <text:p>452.1366882324</text:p>
          </table:table-cell>
          <table:table-cell office:value-type="float" office:value="0.003200527">
            <text:p>0.003200527</text:p>
          </table:table-cell>
          <table:table-cell table:number-columns-repeated="4"/>
        </table:table-row>
        <table:table-row table:style-name="ro1">
          <table:table-cell office:value-type="float" office:value="452.251098632813">
            <text:p>452.2510986328</text:p>
          </table:table-cell>
          <table:table-cell office:value-type="float" office:value="0.007500846">
            <text:p>0.007500846</text:p>
          </table:table-cell>
          <table:table-cell table:number-columns-repeated="4"/>
        </table:table-row>
        <table:table-row table:style-name="ro1">
          <table:table-cell office:value-type="float" office:value="452.365539550781">
            <text:p>452.3655395508</text:p>
          </table:table-cell>
          <table:table-cell office:value-type="float" office:value="-0.009560239">
            <text:p>-0.009560239</text:p>
          </table:table-cell>
          <table:table-cell table:number-columns-repeated="4"/>
        </table:table-row>
        <table:table-row table:style-name="ro1">
          <table:table-cell office:value-type="float" office:value="452.47998046875">
            <text:p>452.4799804688</text:p>
          </table:table-cell>
          <table:table-cell office:value-type="float" office:value="0.002793174">
            <text:p>0.002793174</text:p>
          </table:table-cell>
          <table:table-cell table:number-columns-repeated="4"/>
        </table:table-row>
        <table:table-row table:style-name="ro1">
          <table:table-cell office:value-type="float" office:value="452.594421386719">
            <text:p>452.5944213867</text:p>
          </table:table-cell>
          <table:table-cell office:value-type="float" office:value="0.009651322">
            <text:p>0.009651322</text:p>
          </table:table-cell>
          <table:table-cell table:number-columns-repeated="4"/>
        </table:table-row>
        <table:table-row table:style-name="ro1">
          <table:table-cell office:value-type="float" office:value="452.708862304688">
            <text:p>452.7088623047</text:p>
          </table:table-cell>
          <table:table-cell office:value-type="float" office:value="0.00574888">
            <text:p>0.00574888</text:p>
          </table:table-cell>
          <table:table-cell table:number-columns-repeated="4"/>
        </table:table-row>
        <table:table-row table:style-name="ro1">
          <table:table-cell office:value-type="float" office:value="452.823333740234">
            <text:p>452.8233337402</text:p>
          </table:table-cell>
          <table:table-cell office:value-type="float" office:value="0.008409975">
            <text:p>0.008409975</text:p>
          </table:table-cell>
          <table:table-cell table:number-columns-repeated="4"/>
        </table:table-row>
        <table:table-row table:style-name="ro1">
          <table:table-cell office:value-type="float" office:value="452.937774658203">
            <text:p>452.9377746582</text:p>
          </table:table-cell>
          <table:table-cell office:value-type="float" office:value="-0.006466214">
            <text:p>-0.006466214</text:p>
          </table:table-cell>
          <table:table-cell table:number-columns-repeated="4"/>
        </table:table-row>
        <table:table-row table:style-name="ro1">
          <table:table-cell office:value-type="float" office:value="453.05224609375">
            <text:p>453.0522460938</text:p>
          </table:table-cell>
          <table:table-cell office:value-type="float" office:value="-0.001639853">
            <text:p>-0.001639853</text:p>
          </table:table-cell>
          <table:table-cell table:number-columns-repeated="4"/>
        </table:table-row>
        <table:table-row table:style-name="ro1">
          <table:table-cell office:value-type="float" office:value="453.166717529297">
            <text:p>453.1667175293</text:p>
          </table:table-cell>
          <table:table-cell office:value-type="float" office:value="0.007070418">
            <text:p>0.007070418</text:p>
          </table:table-cell>
          <table:table-cell table:number-columns-repeated="4"/>
        </table:table-row>
        <table:table-row table:style-name="ro1">
          <table:table-cell office:value-type="float" office:value="453.281188964844">
            <text:p>453.2811889648</text:p>
          </table:table-cell>
          <table:table-cell office:value-type="float" office:value="-0.009934698">
            <text:p>-0.009934698</text:p>
          </table:table-cell>
          <table:table-cell table:number-columns-repeated="4"/>
        </table:table-row>
        <table:table-row table:style-name="ro1">
          <table:table-cell office:value-type="float" office:value="453.395660400391">
            <text:p>453.3956604004</text:p>
          </table:table-cell>
          <table:table-cell office:value-type="float" office:value="-0.002936454">
            <text:p>-0.002936454</text:p>
          </table:table-cell>
          <table:table-cell table:number-columns-repeated="4"/>
        </table:table-row>
        <table:table-row table:style-name="ro1">
          <table:table-cell office:value-type="float" office:value="453.510131835938">
            <text:p>453.5101318359</text:p>
          </table:table-cell>
          <table:table-cell office:value-type="float" office:value="0.01538199">
            <text:p>0.01538199</text:p>
          </table:table-cell>
          <table:table-cell table:number-columns-repeated="4"/>
        </table:table-row>
        <table:table-row table:style-name="ro1">
          <table:table-cell office:value-type="float" office:value="453.624603271484">
            <text:p>453.6246032715</text:p>
          </table:table-cell>
          <table:table-cell office:value-type="float" office:value="-0.005759727">
            <text:p>-0.005759727</text:p>
          </table:table-cell>
          <table:table-cell table:number-columns-repeated="4"/>
        </table:table-row>
        <table:table-row table:style-name="ro1">
          <table:table-cell office:value-type="float" office:value="453.739105224609">
            <text:p>453.7391052246</text:p>
          </table:table-cell>
          <table:table-cell office:value-type="float" office:value="-0.004322282">
            <text:p>-0.004322282</text:p>
          </table:table-cell>
          <table:table-cell table:number-columns-repeated="4"/>
        </table:table-row>
        <table:table-row table:style-name="ro1">
          <table:table-cell office:value-type="float" office:value="453.853607177734">
            <text:p>453.8536071777</text:p>
          </table:table-cell>
          <table:table-cell office:value-type="float" office:value="-0.003578571">
            <text:p>-0.003578571</text:p>
          </table:table-cell>
          <table:table-cell table:number-columns-repeated="4"/>
        </table:table-row>
        <table:table-row table:style-name="ro1">
          <table:table-cell office:value-type="float" office:value="453.968109130859">
            <text:p>453.9681091309</text:p>
          </table:table-cell>
          <table:table-cell office:value-type="float" office:value="0.002230419">
            <text:p>0.002230419</text:p>
          </table:table-cell>
          <table:table-cell table:number-columns-repeated="4"/>
        </table:table-row>
        <table:table-row table:style-name="ro1">
          <table:table-cell office:value-type="float" office:value="454.082611083984">
            <text:p>454.082611084</text:p>
          </table:table-cell>
          <table:table-cell office:value-type="float" office:value="-0.001305144">
            <text:p>-0.001305144</text:p>
          </table:table-cell>
          <table:table-cell table:number-columns-repeated="4"/>
        </table:table-row>
        <table:table-row table:style-name="ro1">
          <table:table-cell office:value-type="float" office:value="454.197113037109">
            <text:p>454.1971130371</text:p>
          </table:table-cell>
          <table:table-cell office:value-type="float" office:value="-0.01020626">
            <text:p>-0.01020626</text:p>
          </table:table-cell>
          <table:table-cell table:number-columns-repeated="4"/>
        </table:table-row>
        <table:table-row table:style-name="ro1">
          <table:table-cell office:value-type="float" office:value="454.311614990234">
            <text:p>454.3116149902</text:p>
          </table:table-cell>
          <table:table-cell office:value-type="float" office:value="-0.01493955">
            <text:p>-0.01493955</text:p>
          </table:table-cell>
          <table:table-cell table:number-columns-repeated="4"/>
        </table:table-row>
        <table:table-row table:style-name="ro1">
          <table:table-cell office:value-type="float" office:value="454.426147460938">
            <text:p>454.4261474609</text:p>
          </table:table-cell>
          <table:table-cell office:value-type="float" office:value="0.006181602">
            <text:p>0.006181602</text:p>
          </table:table-cell>
          <table:table-cell table:number-columns-repeated="4"/>
        </table:table-row>
        <table:table-row table:style-name="ro1">
          <table:table-cell office:value-type="float" office:value="454.540649414063">
            <text:p>454.5406494141</text:p>
          </table:table-cell>
          <table:table-cell office:value-type="float" office:value="0.008752788">
            <text:p>0.008752788</text:p>
          </table:table-cell>
          <table:table-cell table:number-columns-repeated="4"/>
        </table:table-row>
        <table:table-row table:style-name="ro1">
          <table:table-cell office:value-type="float" office:value="454.655181884766">
            <text:p>454.6551818848</text:p>
          </table:table-cell>
          <table:table-cell office:value-type="float" office:value="-0.005646859">
            <text:p>-0.005646859</text:p>
          </table:table-cell>
          <table:table-cell table:number-columns-repeated="4"/>
        </table:table-row>
        <table:table-row table:style-name="ro1">
          <table:table-cell office:value-type="float" office:value="454.769714355469">
            <text:p>454.7697143555</text:p>
          </table:table-cell>
          <table:table-cell office:value-type="float" office:value="-0.002414186">
            <text:p>-0.002414186</text:p>
          </table:table-cell>
          <table:table-cell table:number-columns-repeated="4"/>
        </table:table-row>
        <table:table-row table:style-name="ro1">
          <table:table-cell office:value-type="float" office:value="454.884246826172">
            <text:p>454.8842468262</text:p>
          </table:table-cell>
          <table:table-cell office:value-type="float" office:value="0.0100296">
            <text:p>0.0100296</text:p>
          </table:table-cell>
          <table:table-cell table:number-columns-repeated="4"/>
        </table:table-row>
        <table:table-row table:style-name="ro1">
          <table:table-cell office:value-type="float" office:value="454.998809814453">
            <text:p>454.9988098145</text:p>
          </table:table-cell>
          <table:table-cell office:value-type="float" office:value="0.01179276">
            <text:p>0.01179276</text:p>
          </table:table-cell>
          <table:table-cell table:number-columns-repeated="4"/>
        </table:table-row>
        <table:table-row table:style-name="ro1">
          <table:table-cell office:value-type="float" office:value="455.113342285156">
            <text:p>455.1133422852</text:p>
          </table:table-cell>
          <table:table-cell office:value-type="float" office:value="-0.005764169">
            <text:p>-0.005764169</text:p>
          </table:table-cell>
          <table:table-cell table:number-columns-repeated="4"/>
        </table:table-row>
        <table:table-row table:style-name="ro1">
          <table:table-cell office:value-type="float" office:value="455.227905273438">
            <text:p>455.2279052734</text:p>
          </table:table-cell>
          <table:table-cell office:value-type="float" office:value="-0.004034984">
            <text:p>-0.004034984</text:p>
          </table:table-cell>
          <table:table-cell table:number-columns-repeated="4"/>
        </table:table-row>
        <table:table-row table:style-name="ro1">
          <table:table-cell office:value-type="float" office:value="455.342468261719">
            <text:p>455.3424682617</text:p>
          </table:table-cell>
          <table:table-cell office:value-type="float" office:value="0.007748742">
            <text:p>0.007748742</text:p>
          </table:table-cell>
          <table:table-cell table:number-columns-repeated="4"/>
        </table:table-row>
        <table:table-row table:style-name="ro1">
          <table:table-cell office:value-type="float" office:value="455.457000732422">
            <text:p>455.4570007324</text:p>
          </table:table-cell>
          <table:table-cell office:value-type="float" office:value="0.008531372">
            <text:p>0.008531372</text:p>
          </table:table-cell>
          <table:table-cell table:number-columns-repeated="4"/>
        </table:table-row>
        <table:table-row table:style-name="ro1">
          <table:table-cell office:value-type="float" office:value="455.571563720703">
            <text:p>455.5715637207</text:p>
          </table:table-cell>
          <table:table-cell office:value-type="float" office:value="-0.00885684">
            <text:p>-0.00885684</text:p>
          </table:table-cell>
          <table:table-cell table:number-columns-repeated="4"/>
        </table:table-row>
        <table:table-row table:style-name="ro1">
          <table:table-cell office:value-type="float" office:value="455.686157226563">
            <text:p>455.6861572266</text:p>
          </table:table-cell>
          <table:table-cell office:value-type="float" office:value="-0.01002599">
            <text:p>-0.01002599</text:p>
          </table:table-cell>
          <table:table-cell table:number-columns-repeated="4"/>
        </table:table-row>
        <table:table-row table:style-name="ro1">
          <table:table-cell office:value-type="float" office:value="455.800720214844">
            <text:p>455.8007202148</text:p>
          </table:table-cell>
          <table:table-cell office:value-type="float" office:value="0.01084867">
            <text:p>0.01084867</text:p>
          </table:table-cell>
          <table:table-cell table:number-columns-repeated="4"/>
        </table:table-row>
        <table:table-row table:style-name="ro1">
          <table:table-cell office:value-type="float" office:value="455.915313720703">
            <text:p>455.9153137207</text:p>
          </table:table-cell>
          <table:table-cell office:value-type="float" office:value="-0.0003913153">
            <text:p>-0.0003913153</text:p>
          </table:table-cell>
          <table:table-cell table:number-columns-repeated="4"/>
        </table:table-row>
        <table:table-row table:style-name="ro1">
          <table:table-cell office:value-type="float" office:value="456.029876708984">
            <text:p>456.029876709</text:p>
          </table:table-cell>
          <table:table-cell office:value-type="float" office:value="-0.007040241">
            <text:p>-0.007040241</text:p>
          </table:table-cell>
          <table:table-cell table:number-columns-repeated="4"/>
        </table:table-row>
        <table:table-row table:style-name="ro1">
          <table:table-cell office:value-type="float" office:value="456.144470214844">
            <text:p>456.1444702148</text:p>
          </table:table-cell>
          <table:table-cell office:value-type="float" office:value="-0.004118278">
            <text:p>-0.004118278</text:p>
          </table:table-cell>
          <table:table-cell table:number-columns-repeated="4"/>
        </table:table-row>
        <table:table-row table:style-name="ro1">
          <table:table-cell office:value-type="float" office:value="456.259063720703">
            <text:p>456.2590637207</text:p>
          </table:table-cell>
          <table:table-cell office:value-type="float" office:value="-0.004097493">
            <text:p>-0.004097493</text:p>
          </table:table-cell>
          <table:table-cell table:number-columns-repeated="4"/>
        </table:table-row>
        <table:table-row table:style-name="ro1">
          <table:table-cell office:value-type="float" office:value="456.373657226563">
            <text:p>456.3736572266</text:p>
          </table:table-cell>
          <table:table-cell office:value-type="float" office:value="0.00865913">
            <text:p>0.00865913</text:p>
          </table:table-cell>
          <table:table-cell table:number-columns-repeated="4"/>
        </table:table-row>
        <table:table-row table:style-name="ro1">
          <table:table-cell office:value-type="float" office:value="456.488250732422">
            <text:p>456.4882507324</text:p>
          </table:table-cell>
          <table:table-cell office:value-type="float" office:value="-0.01003328">
            <text:p>-0.01003328</text:p>
          </table:table-cell>
          <table:table-cell table:number-columns-repeated="4"/>
        </table:table-row>
        <table:table-row table:style-name="ro1">
          <table:table-cell office:value-type="float" office:value="456.602874755859">
            <text:p>456.6028747559</text:p>
          </table:table-cell>
          <table:table-cell office:value-type="float" office:value="-0.01359212">
            <text:p>-0.01359212</text:p>
          </table:table-cell>
          <table:table-cell table:number-columns-repeated="4"/>
        </table:table-row>
        <table:table-row table:style-name="ro1">
          <table:table-cell office:value-type="float" office:value="456.717468261719">
            <text:p>456.7174682617</text:p>
          </table:table-cell>
          <table:table-cell office:value-type="float" office:value="0.01414785">
            <text:p>0.01414785</text:p>
          </table:table-cell>
          <table:table-cell table:number-columns-repeated="4"/>
        </table:table-row>
        <table:table-row table:style-name="ro1">
          <table:table-cell office:value-type="float" office:value="456.832092285156">
            <text:p>456.8320922852</text:p>
          </table:table-cell>
          <table:table-cell office:value-type="float" office:value="0.0007202075">
            <text:p>0.0007202075</text:p>
          </table:table-cell>
          <table:table-cell table:number-columns-repeated="4"/>
        </table:table-row>
        <table:table-row table:style-name="ro1">
          <table:table-cell office:value-type="float" office:value="456.946716308594">
            <text:p>456.9467163086</text:p>
          </table:table-cell>
          <table:table-cell office:value-type="float" office:value="-0.009483664">
            <text:p>-0.009483664</text:p>
          </table:table-cell>
          <table:table-cell table:number-columns-repeated="4"/>
        </table:table-row>
        <table:table-row table:style-name="ro1">
          <table:table-cell office:value-type="float" office:value="457.061340332031">
            <text:p>457.061340332</text:p>
          </table:table-cell>
          <table:table-cell office:value-type="float" office:value="0.008170106">
            <text:p>0.008170106</text:p>
          </table:table-cell>
          <table:table-cell table:number-columns-repeated="4"/>
        </table:table-row>
        <table:table-row table:style-name="ro1">
          <table:table-cell office:value-type="float" office:value="457.175964355469">
            <text:p>457.1759643555</text:p>
          </table:table-cell>
          <table:table-cell office:value-type="float" office:value="0.004090678">
            <text:p>0.004090678</text:p>
          </table:table-cell>
          <table:table-cell table:number-columns-repeated="4"/>
        </table:table-row>
        <table:table-row table:style-name="ro1">
          <table:table-cell office:value-type="float" office:value="457.290618896484">
            <text:p>457.2906188965</text:p>
          </table:table-cell>
          <table:table-cell office:value-type="float" office:value="0.002947817">
            <text:p>0.002947817</text:p>
          </table:table-cell>
          <table:table-cell table:number-columns-repeated="4"/>
        </table:table-row>
        <table:table-row table:style-name="ro1">
          <table:table-cell office:value-type="float" office:value="457.405242919922">
            <text:p>457.4052429199</text:p>
          </table:table-cell>
          <table:table-cell office:value-type="float" office:value="-0.01280815">
            <text:p>-0.01280815</text:p>
          </table:table-cell>
          <table:table-cell table:number-columns-repeated="4"/>
        </table:table-row>
        <table:table-row table:style-name="ro1">
          <table:table-cell office:value-type="float" office:value="457.519897460938">
            <text:p>457.5198974609</text:p>
          </table:table-cell>
          <table:table-cell office:value-type="float" office:value="0.01599739">
            <text:p>0.01599739</text:p>
          </table:table-cell>
          <table:table-cell table:number-columns-repeated="4"/>
        </table:table-row>
        <table:table-row table:style-name="ro1">
          <table:table-cell office:value-type="float" office:value="457.634552001953">
            <text:p>457.634552002</text:p>
          </table:table-cell>
          <table:table-cell office:value-type="float" office:value="0.008740897">
            <text:p>0.008740897</text:p>
          </table:table-cell>
          <table:table-cell table:number-columns-repeated="4"/>
        </table:table-row>
        <table:table-row table:style-name="ro1">
          <table:table-cell office:value-type="float" office:value="457.749206542969">
            <text:p>457.749206543</text:p>
          </table:table-cell>
          <table:table-cell office:value-type="float" office:value="0.01096754">
            <text:p>0.01096754</text:p>
          </table:table-cell>
          <table:table-cell table:number-columns-repeated="4"/>
        </table:table-row>
        <table:table-row table:style-name="ro1">
          <table:table-cell office:value-type="float" office:value="457.863861083984">
            <text:p>457.863861084</text:p>
          </table:table-cell>
          <table:table-cell office:value-type="float" office:value="-0.001412155">
            <text:p>-0.001412155</text:p>
          </table:table-cell>
          <table:table-cell table:number-columns-repeated="4"/>
        </table:table-row>
        <table:table-row table:style-name="ro1">
          <table:table-cell office:value-type="float" office:value="457.978515625">
            <text:p>457.978515625</text:p>
          </table:table-cell>
          <table:table-cell office:value-type="float" office:value="-0.001344411">
            <text:p>-0.001344411</text:p>
          </table:table-cell>
          <table:table-cell table:number-columns-repeated="4"/>
        </table:table-row>
        <table:table-row table:style-name="ro1">
          <table:table-cell office:value-type="float" office:value="458.093200683594">
            <text:p>458.0932006836</text:p>
          </table:table-cell>
          <table:table-cell office:value-type="float" office:value="-0.002023675">
            <text:p>-0.002023675</text:p>
          </table:table-cell>
          <table:table-cell table:number-columns-repeated="4"/>
        </table:table-row>
        <table:table-row table:style-name="ro1">
          <table:table-cell office:value-type="float" office:value="458.207855224609">
            <text:p>458.2078552246</text:p>
          </table:table-cell>
          <table:table-cell office:value-type="float" office:value="0.007047583">
            <text:p>0.007047583</text:p>
          </table:table-cell>
          <table:table-cell table:number-columns-repeated="4"/>
        </table:table-row>
        <table:table-row table:style-name="ro1">
          <table:table-cell office:value-type="float" office:value="458.322540283203">
            <text:p>458.3225402832</text:p>
          </table:table-cell>
          <table:table-cell office:value-type="float" office:value="0.01029635">
            <text:p>0.01029635</text:p>
          </table:table-cell>
          <table:table-cell table:number-columns-repeated="4"/>
        </table:table-row>
        <table:table-row table:style-name="ro1">
          <table:table-cell office:value-type="float" office:value="458.437225341797">
            <text:p>458.4372253418</text:p>
          </table:table-cell>
          <table:table-cell office:value-type="float" office:value="0.000216672">
            <text:p>0.000216672</text:p>
          </table:table-cell>
          <table:table-cell table:number-columns-repeated="4"/>
        </table:table-row>
        <table:table-row table:style-name="ro1">
          <table:table-cell office:value-type="float" office:value="458.551910400391">
            <text:p>458.5519104004</text:p>
          </table:table-cell>
          <table:table-cell office:value-type="float" office:value="0.007563733">
            <text:p>0.007563733</text:p>
          </table:table-cell>
          <table:table-cell table:number-columns-repeated="4"/>
        </table:table-row>
        <table:table-row table:style-name="ro1">
          <table:table-cell office:value-type="float" office:value="458.666595458984">
            <text:p>458.666595459</text:p>
          </table:table-cell>
          <table:table-cell office:value-type="float" office:value="0.01511192">
            <text:p>0.01511192</text:p>
          </table:table-cell>
          <table:table-cell table:number-columns-repeated="4"/>
        </table:table-row>
        <table:table-row table:style-name="ro1">
          <table:table-cell office:value-type="float" office:value="458.781280517578">
            <text:p>458.7812805176</text:p>
          </table:table-cell>
          <table:table-cell office:value-type="float" office:value="-0.005795273">
            <text:p>-0.005795273</text:p>
          </table:table-cell>
          <table:table-cell table:number-columns-repeated="4"/>
        </table:table-row>
        <table:table-row table:style-name="ro1">
          <table:table-cell office:value-type="float" office:value="458.89599609375">
            <text:p>458.8959960938</text:p>
          </table:table-cell>
          <table:table-cell office:value-type="float" office:value="-0.001695699">
            <text:p>-0.001695699</text:p>
          </table:table-cell>
          <table:table-cell table:number-columns-repeated="4"/>
        </table:table-row>
        <table:table-row table:style-name="ro1">
          <table:table-cell office:value-type="float" office:value="459.010681152344">
            <text:p>459.0106811523</text:p>
          </table:table-cell>
          <table:table-cell office:value-type="float" office:value="0.01091462">
            <text:p>0.01091462</text:p>
          </table:table-cell>
          <table:table-cell table:number-columns-repeated="4"/>
        </table:table-row>
        <table:table-row table:style-name="ro1">
          <table:table-cell office:value-type="float" office:value="459.125396728516">
            <text:p>459.1253967285</text:p>
          </table:table-cell>
          <table:table-cell office:value-type="float" office:value="0.03199485">
            <text:p>0.03199485</text:p>
          </table:table-cell>
          <table:table-cell table:number-columns-repeated="4"/>
        </table:table-row>
        <table:table-row table:style-name="ro1">
          <table:table-cell office:value-type="float" office:value="459.240112304688">
            <text:p>459.2401123047</text:p>
          </table:table-cell>
          <table:table-cell office:value-type="float" office:value="0.009757375">
            <text:p>0.009757375</text:p>
          </table:table-cell>
          <table:table-cell table:number-columns-repeated="4"/>
        </table:table-row>
        <table:table-row table:style-name="ro1">
          <table:table-cell office:value-type="float" office:value="459.354827880859">
            <text:p>459.3548278809</text:p>
          </table:table-cell>
          <table:table-cell office:value-type="float" office:value="-0.006731304">
            <text:p>-0.006731304</text:p>
          </table:table-cell>
          <table:table-cell table:number-columns-repeated="4"/>
        </table:table-row>
        <table:table-row table:style-name="ro1">
          <table:table-cell office:value-type="float" office:value="459.469543457031">
            <text:p>459.469543457</text:p>
          </table:table-cell>
          <table:table-cell office:value-type="float" office:value="0.004703616">
            <text:p>0.004703616</text:p>
          </table:table-cell>
          <table:table-cell table:number-columns-repeated="4"/>
        </table:table-row>
        <table:table-row table:style-name="ro1">
          <table:table-cell office:value-type="float" office:value="459.584289550781">
            <text:p>459.5842895508</text:p>
          </table:table-cell>
          <table:table-cell office:value-type="float" office:value="0.0004437476">
            <text:p>0.0004437476</text:p>
          </table:table-cell>
          <table:table-cell table:number-columns-repeated="4"/>
        </table:table-row>
        <table:table-row table:style-name="ro1">
          <table:table-cell office:value-type="float" office:value="459.699005126953">
            <text:p>459.699005127</text:p>
          </table:table-cell>
          <table:table-cell office:value-type="float" office:value="0.005758418">
            <text:p>0.005758418</text:p>
          </table:table-cell>
          <table:table-cell table:number-columns-repeated="4"/>
        </table:table-row>
        <table:table-row table:style-name="ro1">
          <table:table-cell office:value-type="float" office:value="459.813751220703">
            <text:p>459.8137512207</text:p>
          </table:table-cell>
          <table:table-cell office:value-type="float" office:value="-0.005025982">
            <text:p>-0.005025982</text:p>
          </table:table-cell>
          <table:table-cell table:number-columns-repeated="4"/>
        </table:table-row>
        <table:table-row table:style-name="ro1">
          <table:table-cell office:value-type="float" office:value="459.928497314453">
            <text:p>459.9284973145</text:p>
          </table:table-cell>
          <table:table-cell office:value-type="float" office:value="0.007602708">
            <text:p>0.007602708</text:p>
          </table:table-cell>
          <table:table-cell table:number-columns-repeated="4"/>
        </table:table-row>
        <table:table-row table:style-name="ro1">
          <table:table-cell office:value-type="float" office:value="460.043243408203">
            <text:p>460.0432434082</text:p>
          </table:table-cell>
          <table:table-cell office:value-type="float" office:value="0.03479741">
            <text:p>0.03479741</text:p>
          </table:table-cell>
          <table:table-cell table:number-columns-repeated="4"/>
        </table:table-row>
        <table:table-row table:style-name="ro1">
          <table:table-cell office:value-type="float" office:value="460.157989501953">
            <text:p>460.157989502</text:p>
          </table:table-cell>
          <table:table-cell office:value-type="float" office:value="0.01298271">
            <text:p>0.01298271</text:p>
          </table:table-cell>
          <table:table-cell table:number-columns-repeated="4"/>
        </table:table-row>
        <table:table-row table:style-name="ro1">
          <table:table-cell office:value-type="float" office:value="460.272735595703">
            <text:p>460.2727355957</text:p>
          </table:table-cell>
          <table:table-cell office:value-type="float" office:value="-0.01045016">
            <text:p>-0.01045016</text:p>
          </table:table-cell>
          <table:table-cell table:number-columns-repeated="4"/>
        </table:table-row>
        <table:table-row table:style-name="ro1">
          <table:table-cell office:value-type="float" office:value="460.387512207031">
            <text:p>460.387512207</text:p>
          </table:table-cell>
          <table:table-cell office:value-type="float" office:value="-0.00280323">
            <text:p>-0.00280323</text:p>
          </table:table-cell>
          <table:table-cell table:number-columns-repeated="4"/>
        </table:table-row>
        <table:table-row table:style-name="ro1">
          <table:table-cell office:value-type="float" office:value="460.502258300781">
            <text:p>460.5022583008</text:p>
          </table:table-cell>
          <table:table-cell office:value-type="float" office:value="0.01008694">
            <text:p>0.01008694</text:p>
          </table:table-cell>
          <table:table-cell table:number-columns-repeated="4"/>
        </table:table-row>
        <table:table-row table:style-name="ro1">
          <table:table-cell office:value-type="float" office:value="460.617034912109">
            <text:p>460.6170349121</text:p>
          </table:table-cell>
          <table:table-cell office:value-type="float" office:value="-0.002404027">
            <text:p>-0.002404027</text:p>
          </table:table-cell>
          <table:table-cell table:number-columns-repeated="4"/>
        </table:table-row>
        <table:table-row table:style-name="ro1">
          <table:table-cell office:value-type="float" office:value="460.731811523438">
            <text:p>460.7318115234</text:p>
          </table:table-cell>
          <table:table-cell office:value-type="float" office:value="0.007890158">
            <text:p>0.007890158</text:p>
          </table:table-cell>
          <table:table-cell table:number-columns-repeated="4"/>
        </table:table-row>
        <table:table-row table:style-name="ro1">
          <table:table-cell office:value-type="float" office:value="460.846588134766">
            <text:p>460.8465881348</text:p>
          </table:table-cell>
          <table:table-cell office:value-type="float" office:value="0.01279604">
            <text:p>0.01279604</text:p>
          </table:table-cell>
          <table:table-cell table:number-columns-repeated="4"/>
        </table:table-row>
        <table:table-row table:style-name="ro1">
          <table:table-cell office:value-type="float" office:value="460.961364746094">
            <text:p>460.9613647461</text:p>
          </table:table-cell>
          <table:table-cell office:value-type="float" office:value="-0.001245443">
            <text:p>-0.001245443</text:p>
          </table:table-cell>
          <table:table-cell table:number-columns-repeated="4"/>
        </table:table-row>
        <table:table-row table:style-name="ro1">
          <table:table-cell office:value-type="float" office:value="461.076171875">
            <text:p>461.076171875</text:p>
          </table:table-cell>
          <table:table-cell office:value-type="float" office:value="-0.01011755">
            <text:p>-0.01011755</text:p>
          </table:table-cell>
          <table:table-cell table:number-columns-repeated="4"/>
        </table:table-row>
        <table:table-row table:style-name="ro1">
          <table:table-cell office:value-type="float" office:value="461.190948486328">
            <text:p>461.1909484863</text:p>
          </table:table-cell>
          <table:table-cell office:value-type="float" office:value="-0.0002007391">
            <text:p>-0.0002007391</text:p>
          </table:table-cell>
          <table:table-cell table:number-columns-repeated="4"/>
        </table:table-row>
        <table:table-row table:style-name="ro1">
          <table:table-cell office:value-type="float" office:value="461.305755615234">
            <text:p>461.3057556152</text:p>
          </table:table-cell>
          <table:table-cell office:value-type="float" office:value="0.005474839">
            <text:p>0.005474839</text:p>
          </table:table-cell>
          <table:table-cell table:number-columns-repeated="4"/>
        </table:table-row>
        <table:table-row table:style-name="ro1">
          <table:table-cell office:value-type="float" office:value="461.420562744141">
            <text:p>461.4205627441</text:p>
          </table:table-cell>
          <table:table-cell office:value-type="float" office:value="-0.001282535">
            <text:p>-0.001282535</text:p>
          </table:table-cell>
          <table:table-cell table:number-columns-repeated="4"/>
        </table:table-row>
        <table:table-row table:style-name="ro1">
          <table:table-cell office:value-type="float" office:value="461.535369873047">
            <text:p>461.535369873</text:p>
          </table:table-cell>
          <table:table-cell office:value-type="float" office:value="-0.009004084">
            <text:p>-0.009004084</text:p>
          </table:table-cell>
          <table:table-cell table:number-columns-repeated="4"/>
        </table:table-row>
        <table:table-row table:style-name="ro1">
          <table:table-cell office:value-type="float" office:value="461.650177001953">
            <text:p>461.650177002</text:p>
          </table:table-cell>
          <table:table-cell office:value-type="float" office:value="0.007748539">
            <text:p>0.007748539</text:p>
          </table:table-cell>
          <table:table-cell table:number-columns-repeated="4"/>
        </table:table-row>
        <table:table-row table:style-name="ro1">
          <table:table-cell office:value-type="float" office:value="461.764984130859">
            <text:p>461.7649841309</text:p>
          </table:table-cell>
          <table:table-cell office:value-type="float" office:value="0.003045518">
            <text:p>0.003045518</text:p>
          </table:table-cell>
          <table:table-cell table:number-columns-repeated="4"/>
        </table:table-row>
        <table:table-row table:style-name="ro1">
          <table:table-cell office:value-type="float" office:value="461.879791259766">
            <text:p>461.8797912598</text:p>
          </table:table-cell>
          <table:table-cell office:value-type="float" office:value="0.005748794">
            <text:p>0.005748794</text:p>
          </table:table-cell>
          <table:table-cell table:number-columns-repeated="4"/>
        </table:table-row>
        <table:table-row table:style-name="ro1">
          <table:table-cell office:value-type="float" office:value="461.99462890625">
            <text:p>461.9946289063</text:p>
          </table:table-cell>
          <table:table-cell office:value-type="float" office:value="-0.003392869">
            <text:p>-0.003392869</text:p>
          </table:table-cell>
          <table:table-cell table:number-columns-repeated="4"/>
        </table:table-row>
        <table:table-row table:style-name="ro1">
          <table:table-cell office:value-type="float" office:value="462.109466552734">
            <text:p>462.1094665527</text:p>
          </table:table-cell>
          <table:table-cell office:value-type="float" office:value="0.005376709">
            <text:p>0.005376709</text:p>
          </table:table-cell>
          <table:table-cell table:number-columns-repeated="4"/>
        </table:table-row>
        <table:table-row table:style-name="ro1">
          <table:table-cell office:value-type="float" office:value="462.224304199219">
            <text:p>462.2243041992</text:p>
          </table:table-cell>
          <table:table-cell office:value-type="float" office:value="0.001190242">
            <text:p>0.001190242</text:p>
          </table:table-cell>
          <table:table-cell table:number-columns-repeated="4"/>
        </table:table-row>
        <table:table-row table:style-name="ro1">
          <table:table-cell office:value-type="float" office:value="462.339141845703">
            <text:p>462.3391418457</text:p>
          </table:table-cell>
          <table:table-cell office:value-type="float" office:value="0.008572418">
            <text:p>0.008572418</text:p>
          </table:table-cell>
          <table:table-cell table:number-columns-repeated="4"/>
        </table:table-row>
        <table:table-row table:style-name="ro1">
          <table:table-cell office:value-type="float" office:value="462.453979492188">
            <text:p>462.4539794922</text:p>
          </table:table-cell>
          <table:table-cell office:value-type="float" office:value="-0.0009307576">
            <text:p>-0.0009307576</text:p>
          </table:table-cell>
          <table:table-cell table:number-columns-repeated="4"/>
        </table:table-row>
        <table:table-row table:style-name="ro1">
          <table:table-cell office:value-type="float" office:value="462.568817138672">
            <text:p>462.5688171387</text:p>
          </table:table-cell>
          <table:table-cell office:value-type="float" office:value="0.003130932">
            <text:p>0.003130932</text:p>
          </table:table-cell>
          <table:table-cell table:number-columns-repeated="4"/>
        </table:table-row>
        <table:table-row table:style-name="ro1">
          <table:table-cell office:value-type="float" office:value="462.683654785156">
            <text:p>462.6836547852</text:p>
          </table:table-cell>
          <table:table-cell office:value-type="float" office:value="0.01172821">
            <text:p>0.01172821</text:p>
          </table:table-cell>
          <table:table-cell table:number-columns-repeated="4"/>
        </table:table-row>
        <table:table-row table:style-name="ro1">
          <table:table-cell office:value-type="float" office:value="462.798522949219">
            <text:p>462.7985229492</text:p>
          </table:table-cell>
          <table:table-cell office:value-type="float" office:value="-0.008271471">
            <text:p>-0.008271471</text:p>
          </table:table-cell>
          <table:table-cell table:number-columns-repeated="4"/>
        </table:table-row>
        <table:table-row table:style-name="ro1">
          <table:table-cell office:value-type="float" office:value="462.913391113281">
            <text:p>462.9133911133</text:p>
          </table:table-cell>
          <table:table-cell office:value-type="float" office:value="-0.005325734">
            <text:p>-0.005325734</text:p>
          </table:table-cell>
          <table:table-cell table:number-columns-repeated="4"/>
        </table:table-row>
        <table:table-row table:style-name="ro1">
          <table:table-cell office:value-type="float" office:value="463.028259277344">
            <text:p>463.0282592773</text:p>
          </table:table-cell>
          <table:table-cell office:value-type="float" office:value="0.006385648">
            <text:p>0.006385648</text:p>
          </table:table-cell>
          <table:table-cell table:number-columns-repeated="4"/>
        </table:table-row>
        <table:table-row table:style-name="ro1">
          <table:table-cell office:value-type="float" office:value="463.143127441406">
            <text:p>463.1431274414</text:p>
          </table:table-cell>
          <table:table-cell office:value-type="float" office:value="0.005972693">
            <text:p>0.005972693</text:p>
          </table:table-cell>
          <table:table-cell table:number-columns-repeated="4"/>
        </table:table-row>
        <table:table-row table:style-name="ro1">
          <table:table-cell office:value-type="float" office:value="463.257995605469">
            <text:p>463.2579956055</text:p>
          </table:table-cell>
          <table:table-cell office:value-type="float" office:value="-0.007643347">
            <text:p>-0.007643347</text:p>
          </table:table-cell>
          <table:table-cell table:number-columns-repeated="4"/>
        </table:table-row>
        <table:table-row table:style-name="ro1">
          <table:table-cell office:value-type="float" office:value="463.372863769531">
            <text:p>463.3728637695</text:p>
          </table:table-cell>
          <table:table-cell office:value-type="float" office:value="0.01253285">
            <text:p>0.01253285</text:p>
          </table:table-cell>
          <table:table-cell table:number-columns-repeated="4"/>
        </table:table-row>
        <table:table-row table:style-name="ro1">
          <table:table-cell office:value-type="float" office:value="463.487762451172">
            <text:p>463.4877624512</text:p>
          </table:table-cell>
          <table:table-cell office:value-type="float" office:value="0.006767015">
            <text:p>0.006767015</text:p>
          </table:table-cell>
          <table:table-cell table:number-columns-repeated="4"/>
        </table:table-row>
        <table:table-row table:style-name="ro1">
          <table:table-cell office:value-type="float" office:value="463.602661132813">
            <text:p>463.6026611328</text:p>
          </table:table-cell>
          <table:table-cell office:value-type="float" office:value="0.006903361">
            <text:p>0.006903361</text:p>
          </table:table-cell>
          <table:table-cell table:number-columns-repeated="4"/>
        </table:table-row>
        <table:table-row table:style-name="ro1">
          <table:table-cell office:value-type="float" office:value="463.717529296875">
            <text:p>463.7175292969</text:p>
          </table:table-cell>
          <table:table-cell office:value-type="float" office:value="-0.001867501">
            <text:p>-0.001867501</text:p>
          </table:table-cell>
          <table:table-cell table:number-columns-repeated="4"/>
        </table:table-row>
        <table:table-row table:style-name="ro1">
          <table:table-cell office:value-type="float" office:value="463.832427978516">
            <text:p>463.8324279785</text:p>
          </table:table-cell>
          <table:table-cell office:value-type="float" office:value="-0.01015917">
            <text:p>-0.01015917</text:p>
          </table:table-cell>
          <table:table-cell table:number-columns-repeated="4"/>
        </table:table-row>
        <table:table-row table:style-name="ro1">
          <table:table-cell office:value-type="float" office:value="463.947326660156">
            <text:p>463.9473266602</text:p>
          </table:table-cell>
          <table:table-cell office:value-type="float" office:value="0.002355546">
            <text:p>0.002355546</text:p>
          </table:table-cell>
          <table:table-cell table:number-columns-repeated="4"/>
        </table:table-row>
        <table:table-row table:style-name="ro1">
          <table:table-cell office:value-type="float" office:value="464.062255859375">
            <text:p>464.0622558594</text:p>
          </table:table-cell>
          <table:table-cell office:value-type="float" office:value="-0.004269926">
            <text:p>-0.004269926</text:p>
          </table:table-cell>
          <table:table-cell table:number-columns-repeated="4"/>
        </table:table-row>
        <table:table-row table:style-name="ro1">
          <table:table-cell office:value-type="float" office:value="464.177154541016">
            <text:p>464.177154541</text:p>
          </table:table-cell>
          <table:table-cell office:value-type="float" office:value="-0.005666158">
            <text:p>-0.005666158</text:p>
          </table:table-cell>
          <table:table-cell table:number-columns-repeated="4"/>
        </table:table-row>
        <table:table-row table:style-name="ro1">
          <table:table-cell office:value-type="float" office:value="464.292083740234">
            <text:p>464.2920837402</text:p>
          </table:table-cell>
          <table:table-cell office:value-type="float" office:value="-0.008966136">
            <text:p>-0.008966136</text:p>
          </table:table-cell>
          <table:table-cell table:number-columns-repeated="4"/>
        </table:table-row>
        <table:table-row table:style-name="ro1">
          <table:table-cell office:value-type="float" office:value="464.406982421875">
            <text:p>464.4069824219</text:p>
          </table:table-cell>
          <table:table-cell office:value-type="float" office:value="0.006248052">
            <text:p>0.006248052</text:p>
          </table:table-cell>
          <table:table-cell table:number-columns-repeated="4"/>
        </table:table-row>
        <table:table-row table:style-name="ro1">
          <table:table-cell office:value-type="float" office:value="464.521911621094">
            <text:p>464.5219116211</text:p>
          </table:table-cell>
          <table:table-cell office:value-type="float" office:value="-0.004114914">
            <text:p>-0.004114914</text:p>
          </table:table-cell>
          <table:table-cell table:number-columns-repeated="4"/>
        </table:table-row>
        <table:table-row table:style-name="ro1">
          <table:table-cell office:value-type="float" office:value="464.636840820313">
            <text:p>464.6368408203</text:p>
          </table:table-cell>
          <table:table-cell office:value-type="float" office:value="-0.003526712">
            <text:p>-0.003526712</text:p>
          </table:table-cell>
          <table:table-cell table:number-columns-repeated="4"/>
        </table:table-row>
        <table:table-row table:style-name="ro1">
          <table:table-cell office:value-type="float" office:value="464.751770019531">
            <text:p>464.7517700195</text:p>
          </table:table-cell>
          <table:table-cell office:value-type="float" office:value="-0.007684425">
            <text:p>-0.007684425</text:p>
          </table:table-cell>
          <table:table-cell table:number-columns-repeated="4"/>
        </table:table-row>
        <table:table-row table:style-name="ro1">
          <table:table-cell office:value-type="float" office:value="464.866729736328">
            <text:p>464.8667297363</text:p>
          </table:table-cell>
          <table:table-cell office:value-type="float" office:value="0.003812834">
            <text:p>0.003812834</text:p>
          </table:table-cell>
          <table:table-cell table:number-columns-repeated="4"/>
        </table:table-row>
        <table:table-row table:style-name="ro1">
          <table:table-cell office:value-type="float" office:value="464.981658935547">
            <text:p>464.9816589355</text:p>
          </table:table-cell>
          <table:table-cell office:value-type="float" office:value="0.01325939">
            <text:p>0.01325939</text:p>
          </table:table-cell>
          <table:table-cell table:number-columns-repeated="4"/>
        </table:table-row>
        <table:table-row table:style-name="ro1">
          <table:table-cell office:value-type="float" office:value="465.096618652344">
            <text:p>465.0966186523</text:p>
          </table:table-cell>
          <table:table-cell office:value-type="float" office:value="-0.006460841">
            <text:p>-0.006460841</text:p>
          </table:table-cell>
          <table:table-cell table:number-columns-repeated="4"/>
        </table:table-row>
        <table:table-row table:style-name="ro1">
          <table:table-cell office:value-type="float" office:value="465.211547851563">
            <text:p>465.2115478516</text:p>
          </table:table-cell>
          <table:table-cell office:value-type="float" office:value="-0.01253736">
            <text:p>-0.01253736</text:p>
          </table:table-cell>
          <table:table-cell table:number-columns-repeated="4"/>
        </table:table-row>
        <table:table-row table:style-name="ro1">
          <table:table-cell office:value-type="float" office:value="465.326507568359">
            <text:p>465.3265075684</text:p>
          </table:table-cell>
          <table:table-cell office:value-type="float" office:value="-0.007548583">
            <text:p>-0.007548583</text:p>
          </table:table-cell>
          <table:table-cell table:number-columns-repeated="4"/>
        </table:table-row>
        <table:table-row table:style-name="ro1">
          <table:table-cell office:value-type="float" office:value="465.441467285156">
            <text:p>465.4414672852</text:p>
          </table:table-cell>
          <table:table-cell office:value-type="float" office:value="0.002299049">
            <text:p>0.002299049</text:p>
          </table:table-cell>
          <table:table-cell table:number-columns-repeated="4"/>
        </table:table-row>
        <table:table-row table:style-name="ro1">
          <table:table-cell office:value-type="float" office:value="465.556427001953">
            <text:p>465.556427002</text:p>
          </table:table-cell>
          <table:table-cell office:value-type="float" office:value="-0.00393872">
            <text:p>-0.00393872</text:p>
          </table:table-cell>
          <table:table-cell table:number-columns-repeated="4"/>
        </table:table-row>
        <table:table-row table:style-name="ro1">
          <table:table-cell office:value-type="float" office:value="465.671417236328">
            <text:p>465.6714172363</text:p>
          </table:table-cell>
          <table:table-cell office:value-type="float" office:value="-0.007006244">
            <text:p>-0.007006244</text:p>
          </table:table-cell>
          <table:table-cell table:number-columns-repeated="4"/>
        </table:table-row>
        <table:table-row table:style-name="ro1">
          <table:table-cell office:value-type="float" office:value="465.786376953125">
            <text:p>465.7863769531</text:p>
          </table:table-cell>
          <table:table-cell office:value-type="float" office:value="0.004975195">
            <text:p>0.004975195</text:p>
          </table:table-cell>
          <table:table-cell table:number-columns-repeated="4"/>
        </table:table-row>
        <table:table-row table:style-name="ro1">
          <table:table-cell office:value-type="float" office:value="465.9013671875">
            <text:p>465.9013671875</text:p>
          </table:table-cell>
          <table:table-cell office:value-type="float" office:value="0.004990758">
            <text:p>0.004990758</text:p>
          </table:table-cell>
          <table:table-cell table:number-columns-repeated="4"/>
        </table:table-row>
        <table:table-row table:style-name="ro1">
          <table:table-cell office:value-type="float" office:value="466.016357421875">
            <text:p>466.0163574219</text:p>
          </table:table-cell>
          <table:table-cell office:value-type="float" office:value="-0.002011069">
            <text:p>-0.002011069</text:p>
          </table:table-cell>
          <table:table-cell table:number-columns-repeated="4"/>
        </table:table-row>
        <table:table-row table:style-name="ro1">
          <table:table-cell office:value-type="float" office:value="466.13134765625">
            <text:p>466.1313476563</text:p>
          </table:table-cell>
          <table:table-cell office:value-type="float" office:value="-0.008581454">
            <text:p>-0.008581454</text:p>
          </table:table-cell>
          <table:table-cell table:number-columns-repeated="4"/>
        </table:table-row>
        <table:table-row table:style-name="ro1">
          <table:table-cell office:value-type="float" office:value="466.246337890625">
            <text:p>466.2463378906</text:p>
          </table:table-cell>
          <table:table-cell office:value-type="float" office:value="0.01671099">
            <text:p>0.01671099</text:p>
          </table:table-cell>
          <table:table-cell table:number-columns-repeated="4"/>
        </table:table-row>
        <table:table-row table:style-name="ro1">
          <table:table-cell office:value-type="float" office:value="466.361328125">
            <text:p>466.361328125</text:p>
          </table:table-cell>
          <table:table-cell office:value-type="float" office:value="-0.002396022">
            <text:p>-0.002396022</text:p>
          </table:table-cell>
          <table:table-cell table:number-columns-repeated="4"/>
        </table:table-row>
        <table:table-row table:style-name="ro1">
          <table:table-cell office:value-type="float" office:value="466.476318359375">
            <text:p>466.4763183594</text:p>
          </table:table-cell>
          <table:table-cell office:value-type="float" office:value="-0.01226316">
            <text:p>-0.01226316</text:p>
          </table:table-cell>
          <table:table-cell table:number-columns-repeated="4"/>
        </table:table-row>
        <table:table-row table:style-name="ro1">
          <table:table-cell office:value-type="float" office:value="466.591339111328">
            <text:p>466.5913391113</text:p>
          </table:table-cell>
          <table:table-cell office:value-type="float" office:value="0.002997729">
            <text:p>0.002997729</text:p>
          </table:table-cell>
          <table:table-cell table:number-columns-repeated="4"/>
        </table:table-row>
        <table:table-row table:style-name="ro1">
          <table:table-cell office:value-type="float" office:value="466.706329345703">
            <text:p>466.7063293457</text:p>
          </table:table-cell>
          <table:table-cell office:value-type="float" office:value="0.02265209">
            <text:p>0.02265209</text:p>
          </table:table-cell>
          <table:table-cell table:number-columns-repeated="4"/>
        </table:table-row>
        <table:table-row table:style-name="ro1">
          <table:table-cell office:value-type="float" office:value="466.821350097656">
            <text:p>466.8213500977</text:p>
          </table:table-cell>
          <table:table-cell office:value-type="float" office:value="-0.001873595">
            <text:p>-0.001873595</text:p>
          </table:table-cell>
          <table:table-cell table:number-columns-repeated="4"/>
        </table:table-row>
        <table:table-row table:style-name="ro1">
          <table:table-cell office:value-type="float" office:value="466.936370849609">
            <text:p>466.9363708496</text:p>
          </table:table-cell>
          <table:table-cell office:value-type="float" office:value="-0.006089105">
            <text:p>-0.006089105</text:p>
          </table:table-cell>
          <table:table-cell table:number-columns-repeated="4"/>
        </table:table-row>
        <table:table-row table:style-name="ro1">
          <table:table-cell office:value-type="float" office:value="467.051391601563">
            <text:p>467.0513916016</text:p>
          </table:table-cell>
          <table:table-cell office:value-type="float" office:value="0.007267542">
            <text:p>0.007267542</text:p>
          </table:table-cell>
          <table:table-cell table:number-columns-repeated="4"/>
        </table:table-row>
        <table:table-row table:style-name="ro1">
          <table:table-cell office:value-type="float" office:value="467.166442871094">
            <text:p>467.1664428711</text:p>
          </table:table-cell>
          <table:table-cell office:value-type="float" office:value="-0.004449003">
            <text:p>-0.004449003</text:p>
          </table:table-cell>
          <table:table-cell table:number-columns-repeated="4"/>
        </table:table-row>
        <table:table-row table:style-name="ro1">
          <table:table-cell office:value-type="float" office:value="467.281463623047">
            <text:p>467.281463623</text:p>
          </table:table-cell>
          <table:table-cell office:value-type="float" office:value="0.002113441">
            <text:p>0.002113441</text:p>
          </table:table-cell>
          <table:table-cell table:number-columns-repeated="4"/>
        </table:table-row>
        <table:table-row table:style-name="ro1">
          <table:table-cell office:value-type="float" office:value="467.396484375">
            <text:p>467.396484375</text:p>
          </table:table-cell>
          <table:table-cell office:value-type="float" office:value="-0.006481314">
            <text:p>-0.006481314</text:p>
          </table:table-cell>
          <table:table-cell table:number-columns-repeated="4"/>
        </table:table-row>
        <table:table-row table:style-name="ro1">
          <table:table-cell office:value-type="float" office:value="467.511535644531">
            <text:p>467.5115356445</text:p>
          </table:table-cell>
          <table:table-cell office:value-type="float" office:value="-0.008398138">
            <text:p>-0.008398138</text:p>
          </table:table-cell>
          <table:table-cell table:number-columns-repeated="4"/>
        </table:table-row>
        <table:table-row table:style-name="ro1">
          <table:table-cell office:value-type="float" office:value="467.626586914063">
            <text:p>467.6265869141</text:p>
          </table:table-cell>
          <table:table-cell office:value-type="float" office:value="0.002445267">
            <text:p>0.002445267</text:p>
          </table:table-cell>
          <table:table-cell table:number-columns-repeated="4"/>
        </table:table-row>
        <table:table-row table:style-name="ro1">
          <table:table-cell office:value-type="float" office:value="467.741638183594">
            <text:p>467.7416381836</text:p>
          </table:table-cell>
          <table:table-cell office:value-type="float" office:value="-0.009469284">
            <text:p>-0.009469284</text:p>
          </table:table-cell>
          <table:table-cell table:number-columns-repeated="4"/>
        </table:table-row>
        <table:table-row table:style-name="ro1">
          <table:table-cell office:value-type="float" office:value="467.856689453125">
            <text:p>467.8566894531</text:p>
          </table:table-cell>
          <table:table-cell office:value-type="float" office:value="-0.005587166">
            <text:p>-0.005587166</text:p>
          </table:table-cell>
          <table:table-cell table:number-columns-repeated="4"/>
        </table:table-row>
        <table:table-row table:style-name="ro1">
          <table:table-cell office:value-type="float" office:value="467.971740722656">
            <text:p>467.9717407227</text:p>
          </table:table-cell>
          <table:table-cell office:value-type="float" office:value="-0.007573757">
            <text:p>-0.007573757</text:p>
          </table:table-cell>
          <table:table-cell table:number-columns-repeated="4"/>
        </table:table-row>
        <table:table-row table:style-name="ro1">
          <table:table-cell office:value-type="float" office:value="468.086822509766">
            <text:p>468.0868225098</text:p>
          </table:table-cell>
          <table:table-cell office:value-type="float" office:value="-0.0002939502">
            <text:p>-0.0002939502</text:p>
          </table:table-cell>
          <table:table-cell table:number-columns-repeated="4"/>
        </table:table-row>
        <table:table-row table:style-name="ro1">
          <table:table-cell office:value-type="float" office:value="468.201873779297">
            <text:p>468.2018737793</text:p>
          </table:table-cell>
          <table:table-cell office:value-type="float" office:value="0.009317288">
            <text:p>0.009317288</text:p>
          </table:table-cell>
          <table:table-cell table:number-columns-repeated="4"/>
        </table:table-row>
        <table:table-row table:style-name="ro1">
          <table:table-cell office:value-type="float" office:value="468.316955566406">
            <text:p>468.3169555664</text:p>
          </table:table-cell>
          <table:table-cell office:value-type="float" office:value="-0.001477346">
            <text:p>-0.001477346</text:p>
          </table:table-cell>
          <table:table-cell table:number-columns-repeated="4"/>
        </table:table-row>
        <table:table-row table:style-name="ro1">
          <table:table-cell office:value-type="float" office:value="468.432037353516">
            <text:p>468.4320373535</text:p>
          </table:table-cell>
          <table:table-cell office:value-type="float" office:value="-0.002429493">
            <text:p>-0.002429493</text:p>
          </table:table-cell>
          <table:table-cell table:number-columns-repeated="4"/>
        </table:table-row>
        <table:table-row table:style-name="ro1">
          <table:table-cell office:value-type="float" office:value="468.547119140625">
            <text:p>468.5471191406</text:p>
          </table:table-cell>
          <table:table-cell office:value-type="float" office:value="-0.0003304803">
            <text:p>-0.0003304803</text:p>
          </table:table-cell>
          <table:table-cell table:number-columns-repeated="4"/>
        </table:table-row>
        <table:table-row table:style-name="ro1">
          <table:table-cell office:value-type="float" office:value="468.662200927734">
            <text:p>468.6622009277</text:p>
          </table:table-cell>
          <table:table-cell office:value-type="float" office:value="-0.006041169">
            <text:p>-0.006041169</text:p>
          </table:table-cell>
          <table:table-cell table:number-columns-repeated="4"/>
        </table:table-row>
        <table:table-row table:style-name="ro1">
          <table:table-cell office:value-type="float" office:value="468.777282714844">
            <text:p>468.7772827148</text:p>
          </table:table-cell>
          <table:table-cell office:value-type="float" office:value="-0.006917566">
            <text:p>-0.006917566</text:p>
          </table:table-cell>
          <table:table-cell table:number-columns-repeated="4"/>
        </table:table-row>
        <table:table-row table:style-name="ro1">
          <table:table-cell office:value-type="float" office:value="468.892395019531">
            <text:p>468.8923950195</text:p>
          </table:table-cell>
          <table:table-cell office:value-type="float" office:value="-0.005523594">
            <text:p>-0.005523594</text:p>
          </table:table-cell>
          <table:table-cell table:number-columns-repeated="4"/>
        </table:table-row>
        <table:table-row table:style-name="ro1">
          <table:table-cell office:value-type="float" office:value="469.007476806641">
            <text:p>469.0074768066</text:p>
          </table:table-cell>
          <table:table-cell office:value-type="float" office:value="0.02374534">
            <text:p>0.02374534</text:p>
          </table:table-cell>
          <table:table-cell table:number-columns-repeated="4"/>
        </table:table-row>
        <table:table-row table:style-name="ro1">
          <table:table-cell office:value-type="float" office:value="469.122589111328">
            <text:p>469.1225891113</text:p>
          </table:table-cell>
          <table:table-cell office:value-type="float" office:value="-0.0005143024">
            <text:p>-0.0005143024</text:p>
          </table:table-cell>
          <table:table-cell table:number-columns-repeated="4"/>
        </table:table-row>
        <table:table-row table:style-name="ro1">
          <table:table-cell office:value-type="float" office:value="469.237701416016">
            <text:p>469.237701416</text:p>
          </table:table-cell>
          <table:table-cell office:value-type="float" office:value="0.003012771">
            <text:p>0.003012771</text:p>
          </table:table-cell>
          <table:table-cell table:number-columns-repeated="4"/>
        </table:table-row>
        <table:table-row table:style-name="ro1">
          <table:table-cell office:value-type="float" office:value="469.352813720703">
            <text:p>469.3528137207</text:p>
          </table:table-cell>
          <table:table-cell office:value-type="float" office:value="0.008939056">
            <text:p>0.008939056</text:p>
          </table:table-cell>
          <table:table-cell table:number-columns-repeated="4"/>
        </table:table-row>
        <table:table-row table:style-name="ro1">
          <table:table-cell office:value-type="float" office:value="469.467926025391">
            <text:p>469.4679260254</text:p>
          </table:table-cell>
          <table:table-cell office:value-type="float" office:value="0.008499378">
            <text:p>0.008499378</text:p>
          </table:table-cell>
          <table:table-cell table:number-columns-repeated="4"/>
        </table:table-row>
        <table:table-row table:style-name="ro1">
          <table:table-cell office:value-type="float" office:value="469.583068847656">
            <text:p>469.5830688477</text:p>
          </table:table-cell>
          <table:table-cell office:value-type="float" office:value="0.009154316">
            <text:p>0.009154316</text:p>
          </table:table-cell>
          <table:table-cell table:number-columns-repeated="4"/>
        </table:table-row>
        <table:table-row table:style-name="ro1">
          <table:table-cell office:value-type="float" office:value="469.698181152344">
            <text:p>469.6981811523</text:p>
          </table:table-cell>
          <table:table-cell office:value-type="float" office:value="0.0006466428">
            <text:p>0.0006466428</text:p>
          </table:table-cell>
          <table:table-cell table:number-columns-repeated="4"/>
        </table:table-row>
        <table:table-row table:style-name="ro1">
          <table:table-cell office:value-type="float" office:value="469.813323974609">
            <text:p>469.8133239746</text:p>
          </table:table-cell>
          <table:table-cell office:value-type="float" office:value="-0.005558756">
            <text:p>-0.005558756</text:p>
          </table:table-cell>
          <table:table-cell table:number-columns-repeated="4"/>
        </table:table-row>
        <table:table-row table:style-name="ro1">
          <table:table-cell office:value-type="float" office:value="469.928436279297">
            <text:p>469.9284362793</text:p>
          </table:table-cell>
          <table:table-cell office:value-type="float" office:value="-0.002583553">
            <text:p>-0.002583553</text:p>
          </table:table-cell>
          <table:table-cell table:number-columns-repeated="4"/>
        </table:table-row>
        <table:table-row table:style-name="ro1">
          <table:table-cell office:value-type="float" office:value="470.043579101563">
            <text:p>470.0435791016</text:p>
          </table:table-cell>
          <table:table-cell office:value-type="float" office:value="0.006083051">
            <text:p>0.006083051</text:p>
          </table:table-cell>
          <table:table-cell table:number-columns-repeated="4"/>
        </table:table-row>
        <table:table-row table:style-name="ro1">
          <table:table-cell office:value-type="float" office:value="470.158721923828">
            <text:p>470.1587219238</text:p>
          </table:table-cell>
          <table:table-cell office:value-type="float" office:value="-0.00985943">
            <text:p>-0.00985943</text:p>
          </table:table-cell>
          <table:table-cell table:number-columns-repeated="4"/>
        </table:table-row>
        <table:table-row table:style-name="ro1">
          <table:table-cell office:value-type="float" office:value="470.273895263672">
            <text:p>470.2738952637</text:p>
          </table:table-cell>
          <table:table-cell office:value-type="float" office:value="0.003892924">
            <text:p>0.003892924</text:p>
          </table:table-cell>
          <table:table-cell table:number-columns-repeated="4"/>
        </table:table-row>
        <table:table-row table:style-name="ro1">
          <table:table-cell office:value-type="float" office:value="470.389038085938">
            <text:p>470.3890380859</text:p>
          </table:table-cell>
          <table:table-cell office:value-type="float" office:value="0.005148243">
            <text:p>0.005148243</text:p>
          </table:table-cell>
          <table:table-cell table:number-columns-repeated="4"/>
        </table:table-row>
        <table:table-row table:style-name="ro1">
          <table:table-cell office:value-type="float" office:value="470.504180908203">
            <text:p>470.5041809082</text:p>
          </table:table-cell>
          <table:table-cell office:value-type="string">
            <text:p>-8.688301E-05</text:p>
          </table:table-cell>
          <table:table-cell table:number-columns-repeated="4"/>
        </table:table-row>
        <table:table-row table:style-name="ro1">
          <table:table-cell office:value-type="float" office:value="470.619354248047">
            <text:p>470.619354248</text:p>
          </table:table-cell>
          <table:table-cell office:value-type="float" office:value="-0.008235204">
            <text:p>-0.008235204</text:p>
          </table:table-cell>
          <table:table-cell table:number-columns-repeated="4"/>
        </table:table-row>
        <table:table-row table:style-name="ro1">
          <table:table-cell office:value-type="float" office:value="470.734527587891">
            <text:p>470.7345275879</text:p>
          </table:table-cell>
          <table:table-cell office:value-type="float" office:value="0.009673507">
            <text:p>0.009673507</text:p>
          </table:table-cell>
          <table:table-cell table:number-columns-repeated="4"/>
        </table:table-row>
        <table:table-row table:style-name="ro1">
          <table:table-cell office:value-type="float" office:value="470.849700927734">
            <text:p>470.8497009277</text:p>
          </table:table-cell>
          <table:table-cell office:value-type="float" office:value="0.04094125">
            <text:p>0.04094125</text:p>
          </table:table-cell>
          <table:table-cell table:number-columns-repeated="4"/>
        </table:table-row>
        <table:table-row table:style-name="ro1">
          <table:table-cell office:value-type="float" office:value="470.964874267578">
            <text:p>470.9648742676</text:p>
          </table:table-cell>
          <table:table-cell office:value-type="float" office:value="0.001738107">
            <text:p>0.001738107</text:p>
          </table:table-cell>
          <table:table-cell table:number-columns-repeated="4"/>
        </table:table-row>
        <table:table-row table:style-name="ro1">
          <table:table-cell office:value-type="float" office:value="471.080047607422">
            <text:p>471.0800476074</text:p>
          </table:table-cell>
          <table:table-cell office:value-type="float" office:value="0.01532754">
            <text:p>0.01532754</text:p>
          </table:table-cell>
          <table:table-cell table:number-columns-repeated="4"/>
        </table:table-row>
        <table:table-row table:style-name="ro1">
          <table:table-cell office:value-type="float" office:value="471.195220947266">
            <text:p>471.1952209473</text:p>
          </table:table-cell>
          <table:table-cell office:value-type="float" office:value="-0.01150373">
            <text:p>-0.01150373</text:p>
          </table:table-cell>
          <table:table-cell table:number-columns-repeated="4"/>
        </table:table-row>
        <table:table-row table:style-name="ro1">
          <table:table-cell office:value-type="float" office:value="471.310424804688">
            <text:p>471.3104248047</text:p>
          </table:table-cell>
          <table:table-cell office:value-type="float" office:value="0.006961082">
            <text:p>0.006961082</text:p>
          </table:table-cell>
          <table:table-cell table:number-columns-repeated="4"/>
        </table:table-row>
        <table:table-row table:style-name="ro1">
          <table:table-cell office:value-type="float" office:value="471.425628662109">
            <text:p>471.4256286621</text:p>
          </table:table-cell>
          <table:table-cell office:value-type="float" office:value="0.003658751">
            <text:p>0.003658751</text:p>
          </table:table-cell>
          <table:table-cell table:number-columns-repeated="4"/>
        </table:table-row>
        <table:table-row table:style-name="ro1">
          <table:table-cell office:value-type="float" office:value="471.540802001953">
            <text:p>471.540802002</text:p>
          </table:table-cell>
          <table:table-cell office:value-type="float" office:value="0.01432924">
            <text:p>0.01432924</text:p>
          </table:table-cell>
          <table:table-cell table:number-columns-repeated="4"/>
        </table:table-row>
        <table:table-row table:style-name="ro1">
          <table:table-cell office:value-type="float" office:value="471.656005859375">
            <text:p>471.6560058594</text:p>
          </table:table-cell>
          <table:table-cell office:value-type="float" office:value="-0.001712943">
            <text:p>-0.001712943</text:p>
          </table:table-cell>
          <table:table-cell table:number-columns-repeated="4"/>
        </table:table-row>
        <table:table-row table:style-name="ro1">
          <table:table-cell office:value-type="float" office:value="471.771209716797">
            <text:p>471.7712097168</text:p>
          </table:table-cell>
          <table:table-cell office:value-type="float" office:value="0.01922302">
            <text:p>0.01922302</text:p>
          </table:table-cell>
          <table:table-cell table:number-columns-repeated="4"/>
        </table:table-row>
        <table:table-row table:style-name="ro1">
          <table:table-cell office:value-type="float" office:value="471.886444091797">
            <text:p>471.8864440918</text:p>
          </table:table-cell>
          <table:table-cell office:value-type="float" office:value="0.01378861">
            <text:p>0.01378861</text:p>
          </table:table-cell>
          <table:table-cell table:number-columns-repeated="4"/>
        </table:table-row>
        <table:table-row table:style-name="ro1">
          <table:table-cell office:value-type="float" office:value="472.001647949219">
            <text:p>472.0016479492</text:p>
          </table:table-cell>
          <table:table-cell office:value-type="float" office:value="0.004957229">
            <text:p>0.004957229</text:p>
          </table:table-cell>
          <table:table-cell table:number-columns-repeated="4"/>
        </table:table-row>
        <table:table-row table:style-name="ro1">
          <table:table-cell office:value-type="float" office:value="472.116882324219">
            <text:p>472.1168823242</text:p>
          </table:table-cell>
          <table:table-cell office:value-type="float" office:value="-0.008223492">
            <text:p>-0.008223492</text:p>
          </table:table-cell>
          <table:table-cell table:number-columns-repeated="4"/>
        </table:table-row>
        <table:table-row table:style-name="ro1">
          <table:table-cell office:value-type="float" office:value="472.232086181641">
            <text:p>472.2320861816</text:p>
          </table:table-cell>
          <table:table-cell office:value-type="float" office:value="0.003861867">
            <text:p>0.003861867</text:p>
          </table:table-cell>
          <table:table-cell table:number-columns-repeated="4"/>
        </table:table-row>
        <table:table-row table:style-name="ro1">
          <table:table-cell office:value-type="float" office:value="472.347320556641">
            <text:p>472.3473205566</text:p>
          </table:table-cell>
          <table:table-cell office:value-type="float" office:value="0.001610812">
            <text:p>0.001610812</text:p>
          </table:table-cell>
          <table:table-cell table:number-columns-repeated="4"/>
        </table:table-row>
        <table:table-row table:style-name="ro1">
          <table:table-cell office:value-type="float" office:value="472.462554931641">
            <text:p>472.4625549316</text:p>
          </table:table-cell>
          <table:table-cell office:value-type="float" office:value="-0.01287526">
            <text:p>-0.01287526</text:p>
          </table:table-cell>
          <table:table-cell table:number-columns-repeated="4"/>
        </table:table-row>
        <table:table-row table:style-name="ro1">
          <table:table-cell office:value-type="float" office:value="472.577789306641">
            <text:p>472.5777893066</text:p>
          </table:table-cell>
          <table:table-cell office:value-type="float" office:value="-0.008520054">
            <text:p>-0.008520054</text:p>
          </table:table-cell>
          <table:table-cell table:number-columns-repeated="4"/>
        </table:table-row>
        <table:table-row table:style-name="ro1">
          <table:table-cell office:value-type="float" office:value="472.693023681641">
            <text:p>472.6930236816</text:p>
          </table:table-cell>
          <table:table-cell office:value-type="float" office:value="0.00821598">
            <text:p>0.00821598</text:p>
          </table:table-cell>
          <table:table-cell table:number-columns-repeated="4"/>
        </table:table-row>
        <table:table-row table:style-name="ro1">
          <table:table-cell office:value-type="float" office:value="472.808288574219">
            <text:p>472.8082885742</text:p>
          </table:table-cell>
          <table:table-cell office:value-type="float" office:value="-0.0008697776">
            <text:p>-0.0008697776</text:p>
          </table:table-cell>
          <table:table-cell table:number-columns-repeated="4"/>
        </table:table-row>
        <table:table-row table:style-name="ro1">
          <table:table-cell office:value-type="float" office:value="472.923522949219">
            <text:p>472.9235229492</text:p>
          </table:table-cell>
          <table:table-cell office:value-type="float" office:value="-0.007262242">
            <text:p>-0.007262242</text:p>
          </table:table-cell>
          <table:table-cell table:number-columns-repeated="4"/>
        </table:table-row>
        <table:table-row table:style-name="ro1">
          <table:table-cell office:value-type="float" office:value="473.038787841797">
            <text:p>473.0387878418</text:p>
          </table:table-cell>
          <table:table-cell office:value-type="float" office:value="-0.01060054">
            <text:p>-0.01060054</text:p>
          </table:table-cell>
          <table:table-cell table:number-columns-repeated="4"/>
        </table:table-row>
        <table:table-row table:style-name="ro1">
          <table:table-cell office:value-type="float" office:value="473.154052734375">
            <text:p>473.1540527344</text:p>
          </table:table-cell>
          <table:table-cell office:value-type="float" office:value="0.01233748">
            <text:p>0.01233748</text:p>
          </table:table-cell>
          <table:table-cell table:number-columns-repeated="4"/>
        </table:table-row>
        <table:table-row table:style-name="ro1">
          <table:table-cell office:value-type="float" office:value="473.269317626953">
            <text:p>473.269317627</text:p>
          </table:table-cell>
          <table:table-cell office:value-type="float" office:value="0.006775979">
            <text:p>0.006775979</text:p>
          </table:table-cell>
          <table:table-cell table:number-columns-repeated="4"/>
        </table:table-row>
        <table:table-row table:style-name="ro1">
          <table:table-cell office:value-type="float" office:value="473.384582519531">
            <text:p>473.3845825195</text:p>
          </table:table-cell>
          <table:table-cell office:value-type="float" office:value="-0.00557491">
            <text:p>-0.00557491</text:p>
          </table:table-cell>
          <table:table-cell table:number-columns-repeated="4"/>
        </table:table-row>
        <table:table-row table:style-name="ro1">
          <table:table-cell office:value-type="float" office:value="473.499847412109">
            <text:p>473.4998474121</text:p>
          </table:table-cell>
          <table:table-cell office:value-type="float" office:value="-0.002756668">
            <text:p>-0.002756668</text:p>
          </table:table-cell>
          <table:table-cell table:number-columns-repeated="4"/>
        </table:table-row>
        <table:table-row table:style-name="ro1">
          <table:table-cell office:value-type="float" office:value="473.615112304688">
            <text:p>473.6151123047</text:p>
          </table:table-cell>
          <table:table-cell office:value-type="float" office:value="0.01476376">
            <text:p>0.01476376</text:p>
          </table:table-cell>
          <table:table-cell table:number-columns-repeated="4"/>
        </table:table-row>
        <table:table-row table:style-name="ro1">
          <table:table-cell office:value-type="float" office:value="473.730407714844">
            <text:p>473.7304077148</text:p>
          </table:table-cell>
          <table:table-cell office:value-type="float" office:value="0.02406246">
            <text:p>0.02406246</text:p>
          </table:table-cell>
          <table:table-cell table:number-columns-repeated="4"/>
        </table:table-row>
        <table:table-row table:style-name="ro1">
          <table:table-cell office:value-type="float" office:value="473.845703125">
            <text:p>473.845703125</text:p>
          </table:table-cell>
          <table:table-cell office:value-type="float" office:value="-0.004073996">
            <text:p>-0.004073996</text:p>
          </table:table-cell>
          <table:table-cell table:number-columns-repeated="4"/>
        </table:table-row>
        <table:table-row table:style-name="ro1">
          <table:table-cell office:value-type="float" office:value="473.960998535156">
            <text:p>473.9609985352</text:p>
          </table:table-cell>
          <table:table-cell office:value-type="float" office:value="0.002655835">
            <text:p>0.002655835</text:p>
          </table:table-cell>
          <table:table-cell table:number-columns-repeated="4"/>
        </table:table-row>
        <table:table-row table:style-name="ro1">
          <table:table-cell office:value-type="float" office:value="474.076263427734">
            <text:p>474.0762634277</text:p>
          </table:table-cell>
          <table:table-cell office:value-type="float" office:value="0.003344414">
            <text:p>0.003344414</text:p>
          </table:table-cell>
          <table:table-cell table:number-columns-repeated="4"/>
        </table:table-row>
        <table:table-row table:style-name="ro1">
          <table:table-cell office:value-type="float" office:value="474.191589355469">
            <text:p>474.1915893555</text:p>
          </table:table-cell>
          <table:table-cell office:value-type="float" office:value="0.01849372">
            <text:p>0.01849372</text:p>
          </table:table-cell>
          <table:table-cell table:number-columns-repeated="4"/>
        </table:table-row>
        <table:table-row table:style-name="ro1">
          <table:table-cell office:value-type="float" office:value="474.306884765625">
            <text:p>474.3068847656</text:p>
          </table:table-cell>
          <table:table-cell office:value-type="float" office:value="0.02004414">
            <text:p>0.02004414</text:p>
          </table:table-cell>
          <table:table-cell table:number-columns-repeated="4"/>
        </table:table-row>
        <table:table-row table:style-name="ro1">
          <table:table-cell office:value-type="float" office:value="474.422180175781">
            <text:p>474.4221801758</text:p>
          </table:table-cell>
          <table:table-cell office:value-type="float" office:value="-0.01195785">
            <text:p>-0.01195785</text:p>
          </table:table-cell>
          <table:table-cell table:number-columns-repeated="4"/>
        </table:table-row>
        <table:table-row table:style-name="ro1">
          <table:table-cell office:value-type="float" office:value="474.537506103516">
            <text:p>474.5375061035</text:p>
          </table:table-cell>
          <table:table-cell office:value-type="float" office:value="0.005309262">
            <text:p>0.005309262</text:p>
          </table:table-cell>
          <table:table-cell table:number-columns-repeated="4"/>
        </table:table-row>
        <table:table-row table:style-name="ro1">
          <table:table-cell office:value-type="float" office:value="474.652801513672">
            <text:p>474.6528015137</text:p>
          </table:table-cell>
          <table:table-cell office:value-type="float" office:value="-0.003913488">
            <text:p>-0.003913488</text:p>
          </table:table-cell>
          <table:table-cell table:number-columns-repeated="4"/>
        </table:table-row>
        <table:table-row table:style-name="ro1">
          <table:table-cell office:value-type="float" office:value="474.768127441406">
            <text:p>474.7681274414</text:p>
          </table:table-cell>
          <table:table-cell office:value-type="float" office:value="-0.008400773">
            <text:p>-0.008400773</text:p>
          </table:table-cell>
          <table:table-cell table:number-columns-repeated="4"/>
        </table:table-row>
        <table:table-row table:style-name="ro1">
          <table:table-cell office:value-type="float" office:value="474.883453369141">
            <text:p>474.8834533691</text:p>
          </table:table-cell>
          <table:table-cell office:value-type="float" office:value="-0.007338619">
            <text:p>-0.007338619</text:p>
          </table:table-cell>
          <table:table-cell table:number-columns-repeated="4"/>
        </table:table-row>
        <table:table-row table:style-name="ro1">
          <table:table-cell office:value-type="float" office:value="474.998779296875">
            <text:p>474.9987792969</text:p>
          </table:table-cell>
          <table:table-cell office:value-type="float" office:value="0.004868316">
            <text:p>0.004868316</text:p>
          </table:table-cell>
          <table:table-cell table:number-columns-repeated="4"/>
        </table:table-row>
        <table:table-row table:style-name="ro1">
          <table:table-cell office:value-type="float" office:value="475.114135742188">
            <text:p>475.1141357422</text:p>
          </table:table-cell>
          <table:table-cell office:value-type="float" office:value="-0.00599299">
            <text:p>-0.00599299</text:p>
          </table:table-cell>
          <table:table-cell table:number-columns-repeated="4"/>
        </table:table-row>
        <table:table-row table:style-name="ro1">
          <table:table-cell office:value-type="float" office:value="475.229461669922">
            <text:p>475.2294616699</text:p>
          </table:table-cell>
          <table:table-cell office:value-type="float" office:value="-0.006122907">
            <text:p>-0.006122907</text:p>
          </table:table-cell>
          <table:table-cell table:number-columns-repeated="4"/>
        </table:table-row>
        <table:table-row table:style-name="ro1">
          <table:table-cell office:value-type="float" office:value="475.344818115234">
            <text:p>475.3448181152</text:p>
          </table:table-cell>
          <table:table-cell office:value-type="float" office:value="0.0013595">
            <text:p>0.0013595</text:p>
          </table:table-cell>
          <table:table-cell table:number-columns-repeated="4"/>
        </table:table-row>
        <table:table-row table:style-name="ro1">
          <table:table-cell office:value-type="float" office:value="475.460144042969">
            <text:p>475.460144043</text:p>
          </table:table-cell>
          <table:table-cell office:value-type="float" office:value="0.00774104">
            <text:p>0.00774104</text:p>
          </table:table-cell>
          <table:table-cell table:number-columns-repeated="4"/>
        </table:table-row>
        <table:table-row table:style-name="ro1">
          <table:table-cell office:value-type="float" office:value="475.575500488281">
            <text:p>475.5755004883</text:p>
          </table:table-cell>
          <table:table-cell office:value-type="float" office:value="0.001836566">
            <text:p>0.001836566</text:p>
          </table:table-cell>
          <table:table-cell table:number-columns-repeated="4"/>
        </table:table-row>
        <table:table-row table:style-name="ro1">
          <table:table-cell office:value-type="float" office:value="475.690856933594">
            <text:p>475.6908569336</text:p>
          </table:table-cell>
          <table:table-cell office:value-type="float" office:value="-0.0109275">
            <text:p>-0.0109275</text:p>
          </table:table-cell>
          <table:table-cell table:number-columns-repeated="4"/>
        </table:table-row>
        <table:table-row table:style-name="ro1">
          <table:table-cell office:value-type="float" office:value="475.806213378906">
            <text:p>475.8062133789</text:p>
          </table:table-cell>
          <table:table-cell office:value-type="float" office:value="-0.01138047">
            <text:p>-0.01138047</text:p>
          </table:table-cell>
          <table:table-cell table:number-columns-repeated="4"/>
        </table:table-row>
        <table:table-row table:style-name="ro1">
          <table:table-cell office:value-type="float" office:value="475.921569824219">
            <text:p>475.9215698242</text:p>
          </table:table-cell>
          <table:table-cell office:value-type="float" office:value="0.002115052">
            <text:p>0.002115052</text:p>
          </table:table-cell>
          <table:table-cell table:number-columns-repeated="4"/>
        </table:table-row>
        <table:table-row table:style-name="ro1">
          <table:table-cell office:value-type="float" office:value="476.036956787109">
            <text:p>476.0369567871</text:p>
          </table:table-cell>
          <table:table-cell office:value-type="float" office:value="0.006220316">
            <text:p>0.006220316</text:p>
          </table:table-cell>
          <table:table-cell table:number-columns-repeated="4"/>
        </table:table-row>
        <table:table-row table:style-name="ro1">
          <table:table-cell office:value-type="float" office:value="476.152313232422">
            <text:p>476.1523132324</text:p>
          </table:table-cell>
          <table:table-cell office:value-type="float" office:value="0.006109493">
            <text:p>0.006109493</text:p>
          </table:table-cell>
          <table:table-cell table:number-columns-repeated="4"/>
        </table:table-row>
        <table:table-row table:style-name="ro1">
          <table:table-cell office:value-type="float" office:value="476.267700195313">
            <text:p>476.2677001953</text:p>
          </table:table-cell>
          <table:table-cell office:value-type="float" office:value="-0.01219647">
            <text:p>-0.01219647</text:p>
          </table:table-cell>
          <table:table-cell table:number-columns-repeated="4"/>
        </table:table-row>
        <table:table-row table:style-name="ro1">
          <table:table-cell office:value-type="float" office:value="476.383087158203">
            <text:p>476.3830871582</text:p>
          </table:table-cell>
          <table:table-cell office:value-type="float" office:value="0.013596">
            <text:p>0.013596</text:p>
          </table:table-cell>
          <table:table-cell table:number-columns-repeated="4"/>
        </table:table-row>
        <table:table-row table:style-name="ro1">
          <table:table-cell office:value-type="float" office:value="476.498474121094">
            <text:p>476.4984741211</text:p>
          </table:table-cell>
          <table:table-cell office:value-type="float" office:value="0.000867445">
            <text:p>0.000867445</text:p>
          </table:table-cell>
          <table:table-cell table:number-columns-repeated="4"/>
        </table:table-row>
        <table:table-row table:style-name="ro1">
          <table:table-cell office:value-type="float" office:value="476.613861083984">
            <text:p>476.613861084</text:p>
          </table:table-cell>
          <table:table-cell office:value-type="float" office:value="-0.007780048">
            <text:p>-0.007780048</text:p>
          </table:table-cell>
          <table:table-cell table:number-columns-repeated="4"/>
        </table:table-row>
        <table:table-row table:style-name="ro1">
          <table:table-cell office:value-type="float" office:value="476.729248046875">
            <text:p>476.7292480469</text:p>
          </table:table-cell>
          <table:table-cell office:value-type="float" office:value="-0.005762835">
            <text:p>-0.005762835</text:p>
          </table:table-cell>
          <table:table-cell table:number-columns-repeated="4"/>
        </table:table-row>
        <table:table-row table:style-name="ro1">
          <table:table-cell office:value-type="float" office:value="476.844665527344">
            <text:p>476.8446655273</text:p>
          </table:table-cell>
          <table:table-cell office:value-type="float" office:value="0.01515569">
            <text:p>0.01515569</text:p>
          </table:table-cell>
          <table:table-cell table:number-columns-repeated="4"/>
        </table:table-row>
        <table:table-row table:style-name="ro1">
          <table:table-cell office:value-type="float" office:value="476.960052490234">
            <text:p>476.9600524902</text:p>
          </table:table-cell>
          <table:table-cell office:value-type="float" office:value="0.001889517">
            <text:p>0.001889517</text:p>
          </table:table-cell>
          <table:table-cell table:number-columns-repeated="4"/>
        </table:table-row>
        <table:table-row table:style-name="ro1">
          <table:table-cell office:value-type="float" office:value="477.075469970703">
            <text:p>477.0754699707</text:p>
          </table:table-cell>
          <table:table-cell office:value-type="float" office:value="-0.01321137">
            <text:p>-0.01321137</text:p>
          </table:table-cell>
          <table:table-cell table:number-columns-repeated="4"/>
        </table:table-row>
        <table:table-row table:style-name="ro1">
          <table:table-cell office:value-type="float" office:value="477.190887451172">
            <text:p>477.1908874512</text:p>
          </table:table-cell>
          <table:table-cell office:value-type="float" office:value="-0.0076866">
            <text:p>-0.0076866</text:p>
          </table:table-cell>
          <table:table-cell table:number-columns-repeated="4"/>
        </table:table-row>
        <table:table-row table:style-name="ro1">
          <table:table-cell office:value-type="float" office:value="477.306304931641">
            <text:p>477.3063049316</text:p>
          </table:table-cell>
          <table:table-cell office:value-type="float" office:value="0.01433498">
            <text:p>0.01433498</text:p>
          </table:table-cell>
          <table:table-cell table:number-columns-repeated="4"/>
        </table:table-row>
        <table:table-row table:style-name="ro1">
          <table:table-cell office:value-type="float" office:value="477.421722412109">
            <text:p>477.4217224121</text:p>
          </table:table-cell>
          <table:table-cell office:value-type="float" office:value="-0.007647169">
            <text:p>-0.007647169</text:p>
          </table:table-cell>
          <table:table-cell table:number-columns-repeated="4"/>
        </table:table-row>
        <table:table-row table:style-name="ro1">
          <table:table-cell office:value-type="float" office:value="477.537139892578">
            <text:p>477.5371398926</text:p>
          </table:table-cell>
          <table:table-cell office:value-type="float" office:value="-0.005632555">
            <text:p>-0.005632555</text:p>
          </table:table-cell>
          <table:table-cell table:number-columns-repeated="4"/>
        </table:table-row>
        <table:table-row table:style-name="ro1">
          <table:table-cell office:value-type="float" office:value="477.652557373047">
            <text:p>477.652557373</text:p>
          </table:table-cell>
          <table:table-cell office:value-type="float" office:value="-0.01245874">
            <text:p>-0.01245874</text:p>
          </table:table-cell>
          <table:table-cell table:number-columns-repeated="4"/>
        </table:table-row>
        <table:table-row table:style-name="ro1">
          <table:table-cell office:value-type="float" office:value="477.768005371094">
            <text:p>477.7680053711</text:p>
          </table:table-cell>
          <table:table-cell office:value-type="float" office:value="-0.005213653">
            <text:p>-0.005213653</text:p>
          </table:table-cell>
          <table:table-cell table:number-columns-repeated="4"/>
        </table:table-row>
        <table:table-row table:style-name="ro1">
          <table:table-cell office:value-type="float" office:value="477.883422851563">
            <text:p>477.8834228516</text:p>
          </table:table-cell>
          <table:table-cell office:value-type="float" office:value="0.0103522">
            <text:p>0.0103522</text:p>
          </table:table-cell>
          <table:table-cell table:number-columns-repeated="4"/>
        </table:table-row>
        <table:table-row table:style-name="ro1">
          <table:table-cell office:value-type="float" office:value="477.998870849609">
            <text:p>477.9988708496</text:p>
          </table:table-cell>
          <table:table-cell office:value-type="float" office:value="-0.01346915">
            <text:p>-0.01346915</text:p>
          </table:table-cell>
          <table:table-cell table:number-columns-repeated="4"/>
        </table:table-row>
        <table:table-row table:style-name="ro1">
          <table:table-cell office:value-type="float" office:value="478.114318847656">
            <text:p>478.1143188477</text:p>
          </table:table-cell>
          <table:table-cell office:value-type="float" office:value="-0.005310055">
            <text:p>-0.005310055</text:p>
          </table:table-cell>
          <table:table-cell table:number-columns-repeated="4"/>
        </table:table-row>
        <table:table-row table:style-name="ro1">
          <table:table-cell office:value-type="float" office:value="478.229766845703">
            <text:p>478.2297668457</text:p>
          </table:table-cell>
          <table:table-cell office:value-type="float" office:value="0.002985078">
            <text:p>0.002985078</text:p>
          </table:table-cell>
          <table:table-cell table:number-columns-repeated="4"/>
        </table:table-row>
        <table:table-row table:style-name="ro1">
          <table:table-cell office:value-type="float" office:value="478.345245361328">
            <text:p>478.3452453613</text:p>
          </table:table-cell>
          <table:table-cell office:value-type="float" office:value="0.000658094">
            <text:p>0.000658094</text:p>
          </table:table-cell>
          <table:table-cell table:number-columns-repeated="4"/>
        </table:table-row>
        <table:table-row table:style-name="ro1">
          <table:table-cell office:value-type="float" office:value="478.460693359375">
            <text:p>478.4606933594</text:p>
          </table:table-cell>
          <table:table-cell office:value-type="float" office:value="-0.01107436">
            <text:p>-0.01107436</text:p>
          </table:table-cell>
          <table:table-cell table:number-columns-repeated="4"/>
        </table:table-row>
        <table:table-row table:style-name="ro1">
          <table:table-cell office:value-type="float" office:value="478.576141357422">
            <text:p>478.5761413574</text:p>
          </table:table-cell>
          <table:table-cell office:value-type="float" office:value="-0.005830835">
            <text:p>-0.005830835</text:p>
          </table:table-cell>
          <table:table-cell table:number-columns-repeated="4"/>
        </table:table-row>
        <table:table-row table:style-name="ro1">
          <table:table-cell office:value-type="float" office:value="478.691619873047">
            <text:p>478.691619873</text:p>
          </table:table-cell>
          <table:table-cell office:value-type="float" office:value="0.01177152">
            <text:p>0.01177152</text:p>
          </table:table-cell>
          <table:table-cell table:number-columns-repeated="4"/>
        </table:table-row>
        <table:table-row table:style-name="ro1">
          <table:table-cell office:value-type="float" office:value="478.807098388672">
            <text:p>478.8070983887</text:p>
          </table:table-cell>
          <table:table-cell office:value-type="float" office:value="-0.001904674">
            <text:p>-0.001904674</text:p>
          </table:table-cell>
          <table:table-cell table:number-columns-repeated="4"/>
        </table:table-row>
        <table:table-row table:style-name="ro1">
          <table:table-cell office:value-type="float" office:value="478.922576904297">
            <text:p>478.9225769043</text:p>
          </table:table-cell>
          <table:table-cell office:value-type="float" office:value="-0.00332491">
            <text:p>-0.00332491</text:p>
          </table:table-cell>
          <table:table-cell table:number-columns-repeated="4"/>
        </table:table-row>
        <table:table-row table:style-name="ro1">
          <table:table-cell office:value-type="float" office:value="479.038055419922">
            <text:p>479.0380554199</text:p>
          </table:table-cell>
          <table:table-cell office:value-type="float" office:value="-0.01148949">
            <text:p>-0.01148949</text:p>
          </table:table-cell>
          <table:table-cell table:number-columns-repeated="4"/>
        </table:table-row>
        <table:table-row table:style-name="ro1">
          <table:table-cell office:value-type="float" office:value="479.153533935547">
            <text:p>479.1535339355</text:p>
          </table:table-cell>
          <table:table-cell office:value-type="float" office:value="-0.001651747">
            <text:p>-0.001651747</text:p>
          </table:table-cell>
          <table:table-cell table:number-columns-repeated="4"/>
        </table:table-row>
        <table:table-row table:style-name="ro1">
          <table:table-cell office:value-type="float" office:value="479.269012451172">
            <text:p>479.2690124512</text:p>
          </table:table-cell>
          <table:table-cell office:value-type="float" office:value="0.01840026">
            <text:p>0.01840026</text:p>
          </table:table-cell>
          <table:table-cell table:number-columns-repeated="4"/>
        </table:table-row>
        <table:table-row table:style-name="ro1">
          <table:table-cell office:value-type="float" office:value="479.384521484375">
            <text:p>479.3845214844</text:p>
          </table:table-cell>
          <table:table-cell office:value-type="float" office:value="-0.008887157">
            <text:p>-0.008887157</text:p>
          </table:table-cell>
          <table:table-cell table:number-columns-repeated="4"/>
        </table:table-row>
        <table:table-row table:style-name="ro1">
          <table:table-cell office:value-type="float" office:value="479.500030517578">
            <text:p>479.5000305176</text:p>
          </table:table-cell>
          <table:table-cell office:value-type="float" office:value="-0.006676401">
            <text:p>-0.006676401</text:p>
          </table:table-cell>
          <table:table-cell table:number-columns-repeated="4"/>
        </table:table-row>
        <table:table-row table:style-name="ro1">
          <table:table-cell office:value-type="float" office:value="479.615509033203">
            <text:p>479.6155090332</text:p>
          </table:table-cell>
          <table:table-cell office:value-type="float" office:value="0.002588008">
            <text:p>0.002588008</text:p>
          </table:table-cell>
          <table:table-cell table:number-columns-repeated="4"/>
        </table:table-row>
        <table:table-row table:style-name="ro1">
          <table:table-cell office:value-type="float" office:value="479.731018066406">
            <text:p>479.7310180664</text:p>
          </table:table-cell>
          <table:table-cell office:value-type="float" office:value="0.001521646">
            <text:p>0.001521646</text:p>
          </table:table-cell>
          <table:table-cell table:number-columns-repeated="4"/>
        </table:table-row>
        <table:table-row table:style-name="ro1">
          <table:table-cell office:value-type="float" office:value="479.846527099609">
            <text:p>479.8465270996</text:p>
          </table:table-cell>
          <table:table-cell office:value-type="float" office:value="-0.005405684">
            <text:p>-0.005405684</text:p>
          </table:table-cell>
          <table:table-cell table:number-columns-repeated="4"/>
        </table:table-row>
        <table:table-row table:style-name="ro1">
          <table:table-cell office:value-type="float" office:value="479.962066650391">
            <text:p>479.9620666504</text:p>
          </table:table-cell>
          <table:table-cell office:value-type="float" office:value="-0.004226811">
            <text:p>-0.004226811</text:p>
          </table:table-cell>
          <table:table-cell table:number-columns-repeated="4"/>
        </table:table-row>
        <table:table-row table:style-name="ro1">
          <table:table-cell office:value-type="float" office:value="480.077575683594">
            <text:p>480.0775756836</text:p>
          </table:table-cell>
          <table:table-cell office:value-type="float" office:value="0.002989752">
            <text:p>0.002989752</text:p>
          </table:table-cell>
          <table:table-cell table:number-columns-repeated="4"/>
        </table:table-row>
        <table:table-row table:style-name="ro1">
          <table:table-cell office:value-type="float" office:value="480.193084716797">
            <text:p>480.1930847168</text:p>
          </table:table-cell>
          <table:table-cell office:value-type="float" office:value="0.01273088">
            <text:p>0.01273088</text:p>
          </table:table-cell>
          <table:table-cell table:number-columns-repeated="4"/>
        </table:table-row>
        <table:table-row table:style-name="ro1">
          <table:table-cell office:value-type="float" office:value="480.308624267578">
            <text:p>480.3086242676</text:p>
          </table:table-cell>
          <table:table-cell office:value-type="float" office:value="-0.005606724">
            <text:p>-0.005606724</text:p>
          </table:table-cell>
          <table:table-cell table:number-columns-repeated="4"/>
        </table:table-row>
        <table:table-row table:style-name="ro1">
          <table:table-cell office:value-type="float" office:value="480.424163818359">
            <text:p>480.4241638184</text:p>
          </table:table-cell>
          <table:table-cell office:value-type="float" office:value="-0.005175236">
            <text:p>-0.005175236</text:p>
          </table:table-cell>
          <table:table-cell table:number-columns-repeated="4"/>
        </table:table-row>
        <table:table-row table:style-name="ro1">
          <table:table-cell office:value-type="float" office:value="480.539703369141">
            <text:p>480.5397033691</text:p>
          </table:table-cell>
          <table:table-cell office:value-type="float" office:value="0.006955054">
            <text:p>0.006955054</text:p>
          </table:table-cell>
          <table:table-cell table:number-columns-repeated="4"/>
        </table:table-row>
        <table:table-row table:style-name="ro1">
          <table:table-cell office:value-type="float" office:value="480.655242919922">
            <text:p>480.6552429199</text:p>
          </table:table-cell>
          <table:table-cell office:value-type="float" office:value="-0.00281553">
            <text:p>-0.00281553</text:p>
          </table:table-cell>
          <table:table-cell table:number-columns-repeated="4"/>
        </table:table-row>
        <table:table-row table:style-name="ro1">
          <table:table-cell office:value-type="float" office:value="480.770782470703">
            <text:p>480.7707824707</text:p>
          </table:table-cell>
          <table:table-cell office:value-type="float" office:value="-0.009505508">
            <text:p>-0.009505508</text:p>
          </table:table-cell>
          <table:table-cell table:number-columns-repeated="4"/>
        </table:table-row>
        <table:table-row table:style-name="ro1">
          <table:table-cell office:value-type="float" office:value="480.886322021484">
            <text:p>480.8863220215</text:p>
          </table:table-cell>
          <table:table-cell office:value-type="float" office:value="-0.005556089">
            <text:p>-0.005556089</text:p>
          </table:table-cell>
          <table:table-cell table:number-columns-repeated="4"/>
        </table:table-row>
        <table:table-row table:style-name="ro1">
          <table:table-cell office:value-type="float" office:value="481.001892089844">
            <text:p>481.0018920898</text:p>
          </table:table-cell>
          <table:table-cell office:value-type="float" office:value="0.002163868">
            <text:p>0.002163868</text:p>
          </table:table-cell>
          <table:table-cell table:number-columns-repeated="4"/>
        </table:table-row>
        <table:table-row table:style-name="ro1">
          <table:table-cell office:value-type="float" office:value="481.117431640625">
            <text:p>481.1174316406</text:p>
          </table:table-cell>
          <table:table-cell office:value-type="float" office:value="0.004171134">
            <text:p>0.004171134</text:p>
          </table:table-cell>
          <table:table-cell table:number-columns-repeated="4"/>
        </table:table-row>
        <table:table-row table:style-name="ro1">
          <table:table-cell office:value-type="float" office:value="481.233001708984">
            <text:p>481.233001709</text:p>
          </table:table-cell>
          <table:table-cell office:value-type="float" office:value="0.003146388">
            <text:p>0.003146388</text:p>
          </table:table-cell>
          <table:table-cell table:number-columns-repeated="4"/>
        </table:table-row>
        <table:table-row table:style-name="ro1">
          <table:table-cell office:value-type="float" office:value="481.348571777344">
            <text:p>481.3485717773</text:p>
          </table:table-cell>
          <table:table-cell office:value-type="float" office:value="-0.01055811">
            <text:p>-0.01055811</text:p>
          </table:table-cell>
          <table:table-cell table:number-columns-repeated="4"/>
        </table:table-row>
        <table:table-row table:style-name="ro1">
          <table:table-cell office:value-type="float" office:value="481.464141845703">
            <text:p>481.4641418457</text:p>
          </table:table-cell>
          <table:table-cell office:value-type="float" office:value="-0.004830192">
            <text:p>-0.004830192</text:p>
          </table:table-cell>
          <table:table-cell table:number-columns-repeated="4"/>
        </table:table-row>
        <table:table-row table:style-name="ro1">
          <table:table-cell office:value-type="float" office:value="481.579711914063">
            <text:p>481.5797119141</text:p>
          </table:table-cell>
          <table:table-cell office:value-type="float" office:value="0.003676412">
            <text:p>0.003676412</text:p>
          </table:table-cell>
          <table:table-cell table:number-columns-repeated="4"/>
        </table:table-row>
        <table:table-row table:style-name="ro1">
          <table:table-cell office:value-type="float" office:value="481.695281982422">
            <text:p>481.6952819824</text:p>
          </table:table-cell>
          <table:table-cell office:value-type="float" office:value="-0.01005893">
            <text:p>-0.01005893</text:p>
          </table:table-cell>
          <table:table-cell table:number-columns-repeated="4"/>
        </table:table-row>
        <table:table-row table:style-name="ro1">
          <table:table-cell office:value-type="float" office:value="481.810882568359">
            <text:p>481.8108825684</text:p>
          </table:table-cell>
          <table:table-cell office:value-type="float" office:value="-0.005021922">
            <text:p>-0.005021922</text:p>
          </table:table-cell>
          <table:table-cell table:number-columns-repeated="4"/>
        </table:table-row>
        <table:table-row table:style-name="ro1">
          <table:table-cell office:value-type="float" office:value="481.926452636719">
            <text:p>481.9264526367</text:p>
          </table:table-cell>
          <table:table-cell office:value-type="float" office:value="-0.002864691">
            <text:p>-0.002864691</text:p>
          </table:table-cell>
          <table:table-cell table:number-columns-repeated="4"/>
        </table:table-row>
        <table:table-row table:style-name="ro1">
          <table:table-cell office:value-type="float" office:value="482.042053222656">
            <text:p>482.0420532227</text:p>
          </table:table-cell>
          <table:table-cell office:value-type="float" office:value="0.0141093">
            <text:p>0.0141093</text:p>
          </table:table-cell>
          <table:table-cell table:number-columns-repeated="4"/>
        </table:table-row>
        <table:table-row table:style-name="ro1">
          <table:table-cell office:value-type="float" office:value="482.157653808594">
            <text:p>482.1576538086</text:p>
          </table:table-cell>
          <table:table-cell office:value-type="float" office:value="-0.008373532">
            <text:p>-0.008373532</text:p>
          </table:table-cell>
          <table:table-cell table:number-columns-repeated="4"/>
        </table:table-row>
        <table:table-row table:style-name="ro1">
          <table:table-cell office:value-type="float" office:value="482.273254394531">
            <text:p>482.2732543945</text:p>
          </table:table-cell>
          <table:table-cell office:value-type="float" office:value="-0.00259692">
            <text:p>-0.00259692</text:p>
          </table:table-cell>
          <table:table-cell table:number-columns-repeated="4"/>
        </table:table-row>
        <table:table-row table:style-name="ro1">
          <table:table-cell office:value-type="float" office:value="482.388854980469">
            <text:p>482.3888549805</text:p>
          </table:table-cell>
          <table:table-cell office:value-type="float" office:value="0.0114522">
            <text:p>0.0114522</text:p>
          </table:table-cell>
          <table:table-cell table:number-columns-repeated="4"/>
        </table:table-row>
        <table:table-row table:style-name="ro1">
          <table:table-cell office:value-type="float" office:value="482.504455566406">
            <text:p>482.5044555664</text:p>
          </table:table-cell>
          <table:table-cell office:value-type="float" office:value="0.01588655">
            <text:p>0.01588655</text:p>
          </table:table-cell>
          <table:table-cell table:number-columns-repeated="4"/>
        </table:table-row>
        <table:table-row table:style-name="ro1">
          <table:table-cell office:value-type="float" office:value="482.620086669922">
            <text:p>482.6200866699</text:p>
          </table:table-cell>
          <table:table-cell office:value-type="float" office:value="-0.007685413">
            <text:p>-0.007685413</text:p>
          </table:table-cell>
          <table:table-cell table:number-columns-repeated="4"/>
        </table:table-row>
        <table:table-row table:style-name="ro1">
          <table:table-cell office:value-type="float" office:value="482.735687255859">
            <text:p>482.7356872559</text:p>
          </table:table-cell>
          <table:table-cell office:value-type="float" office:value="0.001953851">
            <text:p>0.001953851</text:p>
          </table:table-cell>
          <table:table-cell table:number-columns-repeated="4"/>
        </table:table-row>
        <table:table-row table:style-name="ro1">
          <table:table-cell office:value-type="float" office:value="482.851318359375">
            <text:p>482.8513183594</text:p>
          </table:table-cell>
          <table:table-cell office:value-type="float" office:value="-0.005053786">
            <text:p>-0.005053786</text:p>
          </table:table-cell>
          <table:table-cell table:number-columns-repeated="4"/>
        </table:table-row>
        <table:table-row table:style-name="ro1">
          <table:table-cell office:value-type="float" office:value="482.966949462891">
            <text:p>482.9669494629</text:p>
          </table:table-cell>
          <table:table-cell office:value-type="float" office:value="0.00737689">
            <text:p>0.00737689</text:p>
          </table:table-cell>
          <table:table-cell table:number-columns-repeated="4"/>
        </table:table-row>
        <table:table-row table:style-name="ro1">
          <table:table-cell office:value-type="float" office:value="483.082580566406">
            <text:p>483.0825805664</text:p>
          </table:table-cell>
          <table:table-cell office:value-type="float" office:value="-0.01442056">
            <text:p>-0.01442056</text:p>
          </table:table-cell>
          <table:table-cell table:number-columns-repeated="4"/>
        </table:table-row>
        <table:table-row table:style-name="ro1">
          <table:table-cell office:value-type="float" office:value="483.198211669922">
            <text:p>483.1982116699</text:p>
          </table:table-cell>
          <table:table-cell office:value-type="float" office:value="0.0002854902">
            <text:p>0.0002854902</text:p>
          </table:table-cell>
          <table:table-cell table:number-columns-repeated="4"/>
        </table:table-row>
        <table:table-row table:style-name="ro1">
          <table:table-cell office:value-type="float" office:value="483.313842773438">
            <text:p>483.3138427734</text:p>
          </table:table-cell>
          <table:table-cell office:value-type="float" office:value="0.004712459">
            <text:p>0.004712459</text:p>
          </table:table-cell>
          <table:table-cell table:number-columns-repeated="4"/>
        </table:table-row>
        <table:table-row table:style-name="ro1">
          <table:table-cell office:value-type="float" office:value="483.429473876953">
            <text:p>483.429473877</text:p>
          </table:table-cell>
          <table:table-cell office:value-type="float" office:value="0.01015335">
            <text:p>0.01015335</text:p>
          </table:table-cell>
          <table:table-cell table:number-columns-repeated="4"/>
        </table:table-row>
        <table:table-row table:style-name="ro1">
          <table:table-cell office:value-type="float" office:value="483.545135498047">
            <text:p>483.545135498</text:p>
          </table:table-cell>
          <table:table-cell office:value-type="float" office:value="-0.002713885">
            <text:p>-0.002713885</text:p>
          </table:table-cell>
          <table:table-cell table:number-columns-repeated="4"/>
        </table:table-row>
        <table:table-row table:style-name="ro1">
          <table:table-cell office:value-type="float" office:value="483.660797119141">
            <text:p>483.6607971191</text:p>
          </table:table-cell>
          <table:table-cell office:value-type="float" office:value="-0.008773318">
            <text:p>-0.008773318</text:p>
          </table:table-cell>
          <table:table-cell table:number-columns-repeated="4"/>
        </table:table-row>
        <table:table-row table:style-name="ro1">
          <table:table-cell office:value-type="float" office:value="483.776428222656">
            <text:p>483.7764282227</text:p>
          </table:table-cell>
          <table:table-cell office:value-type="float" office:value="0.002603983">
            <text:p>0.002603983</text:p>
          </table:table-cell>
          <table:table-cell table:number-columns-repeated="4"/>
        </table:table-row>
        <table:table-row table:style-name="ro1">
          <table:table-cell office:value-type="float" office:value="483.89208984375">
            <text:p>483.8920898438</text:p>
          </table:table-cell>
          <table:table-cell office:value-type="float" office:value="0.01535252">
            <text:p>0.01535252</text:p>
          </table:table-cell>
          <table:table-cell table:number-columns-repeated="4"/>
        </table:table-row>
        <table:table-row table:style-name="ro1">
          <table:table-cell office:value-type="float" office:value="484.007751464844">
            <text:p>484.0077514648</text:p>
          </table:table-cell>
          <table:table-cell office:value-type="float" office:value="-0.01174382">
            <text:p>-0.01174382</text:p>
          </table:table-cell>
          <table:table-cell table:number-columns-repeated="4"/>
        </table:table-row>
        <table:table-row table:style-name="ro1">
          <table:table-cell office:value-type="float" office:value="484.123413085938">
            <text:p>484.1234130859</text:p>
          </table:table-cell>
          <table:table-cell office:value-type="float" office:value="-0.01473968">
            <text:p>-0.01473968</text:p>
          </table:table-cell>
          <table:table-cell table:number-columns-repeated="4"/>
        </table:table-row>
        <table:table-row table:style-name="ro1">
          <table:table-cell office:value-type="float" office:value="484.239105224609">
            <text:p>484.2391052246</text:p>
          </table:table-cell>
          <table:table-cell office:value-type="float" office:value="0.007465701">
            <text:p>0.007465701</text:p>
          </table:table-cell>
          <table:table-cell table:number-columns-repeated="4"/>
        </table:table-row>
        <table:table-row table:style-name="ro1">
          <table:table-cell office:value-type="float" office:value="484.354766845703">
            <text:p>484.3547668457</text:p>
          </table:table-cell>
          <table:table-cell office:value-type="float" office:value="-0.0005730155">
            <text:p>-0.0005730155</text:p>
          </table:table-cell>
          <table:table-cell table:number-columns-repeated="4"/>
        </table:table-row>
        <table:table-row table:style-name="ro1">
          <table:table-cell office:value-type="float" office:value="484.470458984375">
            <text:p>484.4704589844</text:p>
          </table:table-cell>
          <table:table-cell office:value-type="float" office:value="-0.002869045">
            <text:p>-0.002869045</text:p>
          </table:table-cell>
          <table:table-cell table:number-columns-repeated="4"/>
        </table:table-row>
        <table:table-row table:style-name="ro1">
          <table:table-cell office:value-type="float" office:value="484.586151123047">
            <text:p>484.586151123</text:p>
          </table:table-cell>
          <table:table-cell office:value-type="float" office:value="-0.01003371">
            <text:p>-0.01003371</text:p>
          </table:table-cell>
          <table:table-cell table:number-columns-repeated="4"/>
        </table:table-row>
        <table:table-row table:style-name="ro1">
          <table:table-cell office:value-type="float" office:value="484.701843261719">
            <text:p>484.7018432617</text:p>
          </table:table-cell>
          <table:table-cell office:value-type="float" office:value="-0.00188562">
            <text:p>-0.00188562</text:p>
          </table:table-cell>
          <table:table-cell table:number-columns-repeated="4"/>
        </table:table-row>
        <table:table-row table:style-name="ro1">
          <table:table-cell office:value-type="float" office:value="484.817535400391">
            <text:p>484.8175354004</text:p>
          </table:table-cell>
          <table:table-cell office:value-type="float" office:value="0.00394034">
            <text:p>0.00394034</text:p>
          </table:table-cell>
          <table:table-cell table:number-columns-repeated="4"/>
        </table:table-row>
        <table:table-row table:style-name="ro1">
          <table:table-cell office:value-type="float" office:value="484.933227539063">
            <text:p>484.9332275391</text:p>
          </table:table-cell>
          <table:table-cell office:value-type="float" office:value="-0.01201624">
            <text:p>-0.01201624</text:p>
          </table:table-cell>
          <table:table-cell table:number-columns-repeated="4"/>
        </table:table-row>
        <table:table-row table:style-name="ro1">
          <table:table-cell office:value-type="float" office:value="485.048919677734">
            <text:p>485.0489196777</text:p>
          </table:table-cell>
          <table:table-cell office:value-type="float" office:value="-0.005275983">
            <text:p>-0.005275983</text:p>
          </table:table-cell>
          <table:table-cell table:number-columns-repeated="4"/>
        </table:table-row>
        <table:table-row table:style-name="ro1">
          <table:table-cell office:value-type="float" office:value="485.164642333984">
            <text:p>485.164642334</text:p>
          </table:table-cell>
          <table:table-cell office:value-type="float" office:value="0.01313214">
            <text:p>0.01313214</text:p>
          </table:table-cell>
          <table:table-cell table:number-columns-repeated="4"/>
        </table:table-row>
        <table:table-row table:style-name="ro1">
          <table:table-cell office:value-type="float" office:value="485.280334472656">
            <text:p>485.2803344727</text:p>
          </table:table-cell>
          <table:table-cell office:value-type="float" office:value="0.001881214">
            <text:p>0.001881214</text:p>
          </table:table-cell>
          <table:table-cell table:number-columns-repeated="4"/>
        </table:table-row>
        <table:table-row table:style-name="ro1">
          <table:table-cell office:value-type="float" office:value="485.396057128906">
            <text:p>485.3960571289</text:p>
          </table:table-cell>
          <table:table-cell office:value-type="float" office:value="0.006115751">
            <text:p>0.006115751</text:p>
          </table:table-cell>
          <table:table-cell table:number-columns-repeated="4"/>
        </table:table-row>
        <table:table-row table:style-name="ro1">
          <table:table-cell office:value-type="float" office:value="485.511779785156">
            <text:p>485.5117797852</text:p>
          </table:table-cell>
          <table:table-cell office:value-type="float" office:value="-0.007984725">
            <text:p>-0.007984725</text:p>
          </table:table-cell>
          <table:table-cell table:number-columns-repeated="4"/>
        </table:table-row>
        <table:table-row table:style-name="ro1">
          <table:table-cell office:value-type="float" office:value="485.627502441406">
            <text:p>485.6275024414</text:p>
          </table:table-cell>
          <table:table-cell office:value-type="float" office:value="-0.001633322">
            <text:p>-0.001633322</text:p>
          </table:table-cell>
          <table:table-cell table:number-columns-repeated="4"/>
        </table:table-row>
        <table:table-row table:style-name="ro1">
          <table:table-cell office:value-type="float" office:value="485.743225097656">
            <text:p>485.7432250977</text:p>
          </table:table-cell>
          <table:table-cell office:value-type="float" office:value="0.0208698">
            <text:p>0.0208698</text:p>
          </table:table-cell>
          <table:table-cell table:number-columns-repeated="4"/>
        </table:table-row>
        <table:table-row table:style-name="ro1">
          <table:table-cell office:value-type="float" office:value="485.858947753906">
            <text:p>485.8589477539</text:p>
          </table:table-cell>
          <table:table-cell office:value-type="float" office:value="-0.01125749">
            <text:p>-0.01125749</text:p>
          </table:table-cell>
          <table:table-cell table:number-columns-repeated="4"/>
        </table:table-row>
        <table:table-row table:style-name="ro1">
          <table:table-cell office:value-type="float" office:value="485.974670410156">
            <text:p>485.9746704102</text:p>
          </table:table-cell>
          <table:table-cell office:value-type="float" office:value="-0.008454743">
            <text:p>-0.008454743</text:p>
          </table:table-cell>
          <table:table-cell table:number-columns-repeated="4"/>
        </table:table-row>
        <table:table-row table:style-name="ro1">
          <table:table-cell office:value-type="float" office:value="486.090423583984">
            <text:p>486.090423584</text:p>
          </table:table-cell>
          <table:table-cell office:value-type="float" office:value="0.01945709">
            <text:p>0.01945709</text:p>
          </table:table-cell>
          <table:table-cell table:number-columns-repeated="4"/>
        </table:table-row>
        <table:table-row table:style-name="ro1">
          <table:table-cell office:value-type="float" office:value="486.206176757813">
            <text:p>486.2061767578</text:p>
          </table:table-cell>
          <table:table-cell office:value-type="float" office:value="0.0008279003">
            <text:p>0.0008279003</text:p>
          </table:table-cell>
          <table:table-cell table:number-columns-repeated="4"/>
        </table:table-row>
        <table:table-row table:style-name="ro1">
          <table:table-cell office:value-type="float" office:value="486.321899414063">
            <text:p>486.3218994141</text:p>
          </table:table-cell>
          <table:table-cell office:value-type="float" office:value="-0.003299104">
            <text:p>-0.003299104</text:p>
          </table:table-cell>
          <table:table-cell table:number-columns-repeated="4"/>
        </table:table-row>
        <table:table-row table:style-name="ro1">
          <table:table-cell office:value-type="float" office:value="486.437652587891">
            <text:p>486.4376525879</text:p>
          </table:table-cell>
          <table:table-cell office:value-type="float" office:value="-0.002976158">
            <text:p>-0.002976158</text:p>
          </table:table-cell>
          <table:table-cell table:number-columns-repeated="4"/>
        </table:table-row>
        <table:table-row table:style-name="ro1">
          <table:table-cell office:value-type="float" office:value="486.553436279297">
            <text:p>486.5534362793</text:p>
          </table:table-cell>
          <table:table-cell office:value-type="float" office:value="0.005366139">
            <text:p>0.005366139</text:p>
          </table:table-cell>
          <table:table-cell table:number-columns-repeated="4"/>
        </table:table-row>
        <table:table-row table:style-name="ro1">
          <table:table-cell office:value-type="float" office:value="486.669189453125">
            <text:p>486.6691894531</text:p>
          </table:table-cell>
          <table:table-cell office:value-type="float" office:value="0.00160918">
            <text:p>0.00160918</text:p>
          </table:table-cell>
          <table:table-cell table:number-columns-repeated="4"/>
        </table:table-row>
        <table:table-row table:style-name="ro1">
          <table:table-cell office:value-type="float" office:value="486.784942626953">
            <text:p>486.784942627</text:p>
          </table:table-cell>
          <table:table-cell office:value-type="float" office:value="0.0004764845">
            <text:p>0.0004764845</text:p>
          </table:table-cell>
          <table:table-cell table:number-columns-repeated="4"/>
        </table:table-row>
        <table:table-row table:style-name="ro1">
          <table:table-cell office:value-type="float" office:value="486.900726318359">
            <text:p>486.9007263184</text:p>
          </table:table-cell>
          <table:table-cell office:value-type="float" office:value="-0.004634081">
            <text:p>-0.004634081</text:p>
          </table:table-cell>
          <table:table-cell table:number-columns-repeated="4"/>
        </table:table-row>
        <table:table-row table:style-name="ro1">
          <table:table-cell office:value-type="float" office:value="487.016479492188">
            <text:p>487.0164794922</text:p>
          </table:table-cell>
          <table:table-cell office:value-type="float" office:value="0.008790337">
            <text:p>0.008790337</text:p>
          </table:table-cell>
          <table:table-cell table:number-columns-repeated="4"/>
        </table:table-row>
        <table:table-row table:style-name="ro1">
          <table:table-cell office:value-type="float" office:value="487.132263183594">
            <text:p>487.1322631836</text:p>
          </table:table-cell>
          <table:table-cell office:value-type="float" office:value="-0.003265635">
            <text:p>-0.003265635</text:p>
          </table:table-cell>
          <table:table-cell table:number-columns-repeated="4"/>
        </table:table-row>
        <table:table-row table:style-name="ro1">
          <table:table-cell office:value-type="float" office:value="487.248046875">
            <text:p>487.248046875</text:p>
          </table:table-cell>
          <table:table-cell office:value-type="float" office:value="0.009937464">
            <text:p>0.009937464</text:p>
          </table:table-cell>
          <table:table-cell table:number-columns-repeated="4"/>
        </table:table-row>
        <table:table-row table:style-name="ro1">
          <table:table-cell office:value-type="float" office:value="487.363830566406">
            <text:p>487.3638305664</text:p>
          </table:table-cell>
          <table:table-cell office:value-type="float" office:value="0.001073063">
            <text:p>0.001073063</text:p>
          </table:table-cell>
          <table:table-cell table:number-columns-repeated="4"/>
        </table:table-row>
        <table:table-row table:style-name="ro1">
          <table:table-cell office:value-type="float" office:value="487.479614257813">
            <text:p>487.4796142578</text:p>
          </table:table-cell>
          <table:table-cell office:value-type="float" office:value="0.006665479">
            <text:p>0.006665479</text:p>
          </table:table-cell>
          <table:table-cell table:number-columns-repeated="4"/>
        </table:table-row>
        <table:table-row table:style-name="ro1">
          <table:table-cell office:value-type="float" office:value="487.595397949219">
            <text:p>487.5953979492</text:p>
          </table:table-cell>
          <table:table-cell office:value-type="float" office:value="0.007054868">
            <text:p>0.007054868</text:p>
          </table:table-cell>
          <table:table-cell table:number-columns-repeated="4"/>
        </table:table-row>
        <table:table-row table:style-name="ro1">
          <table:table-cell office:value-type="float" office:value="487.711212158203">
            <text:p>487.7112121582</text:p>
          </table:table-cell>
          <table:table-cell office:value-type="float" office:value="0.005752117">
            <text:p>0.005752117</text:p>
          </table:table-cell>
          <table:table-cell table:number-columns-repeated="4"/>
        </table:table-row>
        <table:table-row table:style-name="ro1">
          <table:table-cell office:value-type="float" office:value="487.826995849609">
            <text:p>487.8269958496</text:p>
          </table:table-cell>
          <table:table-cell office:value-type="float" office:value="-0.009299902">
            <text:p>-0.009299902</text:p>
          </table:table-cell>
          <table:table-cell table:number-columns-repeated="4"/>
        </table:table-row>
        <table:table-row table:style-name="ro1">
          <table:table-cell office:value-type="float" office:value="487.942810058594">
            <text:p>487.9428100586</text:p>
          </table:table-cell>
          <table:table-cell office:value-type="float" office:value="0.004256518">
            <text:p>0.004256518</text:p>
          </table:table-cell>
          <table:table-cell table:number-columns-repeated="4"/>
        </table:table-row>
        <table:table-row table:style-name="ro1">
          <table:table-cell office:value-type="float" office:value="488.058624267578">
            <text:p>488.0586242676</text:p>
          </table:table-cell>
          <table:table-cell office:value-type="float" office:value="0.01637192">
            <text:p>0.01637192</text:p>
          </table:table-cell>
          <table:table-cell table:number-columns-repeated="4"/>
        </table:table-row>
        <table:table-row table:style-name="ro1">
          <table:table-cell office:value-type="float" office:value="488.174438476563">
            <text:p>488.1744384766</text:p>
          </table:table-cell>
          <table:table-cell office:value-type="float" office:value="-0.0053939">
            <text:p>-0.0053939</text:p>
          </table:table-cell>
          <table:table-cell table:number-columns-repeated="4"/>
        </table:table-row>
        <table:table-row table:style-name="ro1">
          <table:table-cell office:value-type="float" office:value="488.290252685547">
            <text:p>488.2902526855</text:p>
          </table:table-cell>
          <table:table-cell office:value-type="float" office:value="-0.01154384">
            <text:p>-0.01154384</text:p>
          </table:table-cell>
          <table:table-cell table:number-columns-repeated="4"/>
        </table:table-row>
        <table:table-row table:style-name="ro1">
          <table:table-cell office:value-type="float" office:value="488.406066894531">
            <text:p>488.4060668945</text:p>
          </table:table-cell>
          <table:table-cell office:value-type="float" office:value="0.005580831">
            <text:p>0.005580831</text:p>
          </table:table-cell>
          <table:table-cell table:number-columns-repeated="4"/>
        </table:table-row>
        <table:table-row table:style-name="ro1">
          <table:table-cell office:value-type="float" office:value="488.521911621094">
            <text:p>488.5219116211</text:p>
          </table:table-cell>
          <table:table-cell office:value-type="float" office:value="-0.002123624">
            <text:p>-0.002123624</text:p>
          </table:table-cell>
          <table:table-cell table:number-columns-repeated="4"/>
        </table:table-row>
        <table:table-row table:style-name="ro1">
          <table:table-cell office:value-type="float" office:value="488.637725830078">
            <text:p>488.6377258301</text:p>
          </table:table-cell>
          <table:table-cell office:value-type="float" office:value="-0.01290294">
            <text:p>-0.01290294</text:p>
          </table:table-cell>
          <table:table-cell table:number-columns-repeated="4"/>
        </table:table-row>
        <table:table-row table:style-name="ro1">
          <table:table-cell office:value-type="float" office:value="488.753570556641">
            <text:p>488.7535705566</text:p>
          </table:table-cell>
          <table:table-cell office:value-type="float" office:value="-0.01294771">
            <text:p>-0.01294771</text:p>
          </table:table-cell>
          <table:table-cell table:number-columns-repeated="4"/>
        </table:table-row>
        <table:table-row table:style-name="ro1">
          <table:table-cell office:value-type="float" office:value="488.869415283203">
            <text:p>488.8694152832</text:p>
          </table:table-cell>
          <table:table-cell office:value-type="float" office:value="0.007058056">
            <text:p>0.007058056</text:p>
          </table:table-cell>
          <table:table-cell table:number-columns-repeated="4"/>
        </table:table-row>
        <table:table-row table:style-name="ro1">
          <table:table-cell office:value-type="float" office:value="488.985260009766">
            <text:p>488.9852600098</text:p>
          </table:table-cell>
          <table:table-cell office:value-type="float" office:value="-0.001491124">
            <text:p>-0.001491124</text:p>
          </table:table-cell>
          <table:table-cell table:number-columns-repeated="4"/>
        </table:table-row>
        <table:table-row table:style-name="ro1">
          <table:table-cell office:value-type="float" office:value="489.101104736328">
            <text:p>489.1011047363</text:p>
          </table:table-cell>
          <table:table-cell office:value-type="float" office:value="-0.002315711">
            <text:p>-0.002315711</text:p>
          </table:table-cell>
          <table:table-cell table:number-columns-repeated="4"/>
        </table:table-row>
        <table:table-row table:style-name="ro1">
          <table:table-cell office:value-type="float" office:value="489.216949462891">
            <text:p>489.2169494629</text:p>
          </table:table-cell>
          <table:table-cell office:value-type="float" office:value="-0.007432114">
            <text:p>-0.007432114</text:p>
          </table:table-cell>
          <table:table-cell table:number-columns-repeated="4"/>
        </table:table-row>
        <table:table-row table:style-name="ro1">
          <table:table-cell office:value-type="float" office:value="489.332794189453">
            <text:p>489.3327941895</text:p>
          </table:table-cell>
          <table:table-cell office:value-type="float" office:value="0.004604662">
            <text:p>0.004604662</text:p>
          </table:table-cell>
          <table:table-cell table:number-columns-repeated="4"/>
        </table:table-row>
        <table:table-row table:style-name="ro1">
          <table:table-cell office:value-type="float" office:value="489.448669433594">
            <text:p>489.4486694336</text:p>
          </table:table-cell>
          <table:table-cell office:value-type="float" office:value="0.004206823">
            <text:p>0.004206823</text:p>
          </table:table-cell>
          <table:table-cell table:number-columns-repeated="4"/>
        </table:table-row>
        <table:table-row table:style-name="ro1">
          <table:table-cell office:value-type="float" office:value="489.564544677734">
            <text:p>489.5645446777</text:p>
          </table:table-cell>
          <table:table-cell office:value-type="float" office:value="-0.01399839">
            <text:p>-0.01399839</text:p>
          </table:table-cell>
          <table:table-cell table:number-columns-repeated="4"/>
        </table:table-row>
        <table:table-row table:style-name="ro1">
          <table:table-cell office:value-type="float" office:value="489.680389404297">
            <text:p>489.6803894043</text:p>
          </table:table-cell>
          <table:table-cell office:value-type="float" office:value="-0.006343198">
            <text:p>-0.006343198</text:p>
          </table:table-cell>
          <table:table-cell table:number-columns-repeated="4"/>
        </table:table-row>
        <table:table-row table:style-name="ro1">
          <table:table-cell office:value-type="float" office:value="489.796264648438">
            <text:p>489.7962646484</text:p>
          </table:table-cell>
          <table:table-cell office:value-type="float" office:value="0.006971222">
            <text:p>0.006971222</text:p>
          </table:table-cell>
          <table:table-cell table:number-columns-repeated="4"/>
        </table:table-row>
        <table:table-row table:style-name="ro1">
          <table:table-cell office:value-type="float" office:value="489.912139892578">
            <text:p>489.9121398926</text:p>
          </table:table-cell>
          <table:table-cell office:value-type="float" office:value="0.001351826">
            <text:p>0.001351826</text:p>
          </table:table-cell>
          <table:table-cell table:number-columns-repeated="4"/>
        </table:table-row>
        <table:table-row table:style-name="ro1">
          <table:table-cell office:value-type="float" office:value="490.028015136719">
            <text:p>490.0280151367</text:p>
          </table:table-cell>
          <table:table-cell office:value-type="float" office:value="-0.0112979">
            <text:p>-0.0112979</text:p>
          </table:table-cell>
          <table:table-cell table:number-columns-repeated="4"/>
        </table:table-row>
        <table:table-row table:style-name="ro1">
          <table:table-cell office:value-type="float" office:value="490.143920898438">
            <text:p>490.1439208984</text:p>
          </table:table-cell>
          <table:table-cell office:value-type="float" office:value="0.01161907">
            <text:p>0.01161907</text:p>
          </table:table-cell>
          <table:table-cell table:number-columns-repeated="4"/>
        </table:table-row>
        <table:table-row table:style-name="ro1">
          <table:table-cell office:value-type="float" office:value="490.259796142578">
            <text:p>490.2597961426</text:p>
          </table:table-cell>
          <table:table-cell office:value-type="float" office:value="0.004774013">
            <text:p>0.004774013</text:p>
          </table:table-cell>
          <table:table-cell table:number-columns-repeated="4"/>
        </table:table-row>
        <table:table-row table:style-name="ro1">
          <table:table-cell office:value-type="float" office:value="490.375701904297">
            <text:p>490.3757019043</text:p>
          </table:table-cell>
          <table:table-cell office:value-type="float" office:value="-0.0124148">
            <text:p>-0.0124148</text:p>
          </table:table-cell>
          <table:table-cell table:number-columns-repeated="4"/>
        </table:table-row>
        <table:table-row table:style-name="ro1">
          <table:table-cell office:value-type="float" office:value="490.491577148438">
            <text:p>490.4915771484</text:p>
          </table:table-cell>
          <table:table-cell office:value-type="float" office:value="-0.002180003">
            <text:p>-0.002180003</text:p>
          </table:table-cell>
          <table:table-cell table:number-columns-repeated="4"/>
        </table:table-row>
        <table:table-row table:style-name="ro1">
          <table:table-cell office:value-type="float" office:value="490.607482910156">
            <text:p>490.6074829102</text:p>
          </table:table-cell>
          <table:table-cell office:value-type="float" office:value="-0.004052337">
            <text:p>-0.004052337</text:p>
          </table:table-cell>
          <table:table-cell table:number-columns-repeated="4"/>
        </table:table-row>
        <table:table-row table:style-name="ro1">
          <table:table-cell office:value-type="float" office:value="490.723388671875">
            <text:p>490.7233886719</text:p>
          </table:table-cell>
          <table:table-cell office:value-type="float" office:value="0.008931533">
            <text:p>0.008931533</text:p>
          </table:table-cell>
          <table:table-cell table:number-columns-repeated="4"/>
        </table:table-row>
        <table:table-row table:style-name="ro1">
          <table:table-cell office:value-type="float" office:value="490.839294433594">
            <text:p>490.8392944336</text:p>
          </table:table-cell>
          <table:table-cell office:value-type="float" office:value="-0.0001621154">
            <text:p>-0.0001621154</text:p>
          </table:table-cell>
          <table:table-cell table:number-columns-repeated="4"/>
        </table:table-row>
        <table:table-row table:style-name="ro1">
          <table:table-cell office:value-type="float" office:value="490.955200195313">
            <text:p>490.9552001953</text:p>
          </table:table-cell>
          <table:table-cell office:value-type="float" office:value="-0.00399268">
            <text:p>-0.00399268</text:p>
          </table:table-cell>
          <table:table-cell table:number-columns-repeated="4"/>
        </table:table-row>
        <table:table-row table:style-name="ro1">
          <table:table-cell office:value-type="float" office:value="491.071136474609">
            <text:p>491.0711364746</text:p>
          </table:table-cell>
          <table:table-cell office:value-type="float" office:value="0.001571145">
            <text:p>0.001571145</text:p>
          </table:table-cell>
          <table:table-cell table:number-columns-repeated="4"/>
        </table:table-row>
        <table:table-row table:style-name="ro1">
          <table:table-cell office:value-type="float" office:value="491.187042236328">
            <text:p>491.1870422363</text:p>
          </table:table-cell>
          <table:table-cell office:value-type="float" office:value="0.01032363">
            <text:p>0.01032363</text:p>
          </table:table-cell>
          <table:table-cell table:number-columns-repeated="4"/>
        </table:table-row>
        <table:table-row table:style-name="ro1">
          <table:table-cell office:value-type="float" office:value="491.302978515625">
            <text:p>491.3029785156</text:p>
          </table:table-cell>
          <table:table-cell office:value-type="float" office:value="-0.003268585">
            <text:p>-0.003268585</text:p>
          </table:table-cell>
          <table:table-cell table:number-columns-repeated="4"/>
        </table:table-row>
        <table:table-row table:style-name="ro1">
          <table:table-cell office:value-type="float" office:value="491.418914794922">
            <text:p>491.4189147949</text:p>
          </table:table-cell>
          <table:table-cell office:value-type="float" office:value="-0.01001999">
            <text:p>-0.01001999</text:p>
          </table:table-cell>
          <table:table-cell table:number-columns-repeated="4"/>
        </table:table-row>
        <table:table-row table:style-name="ro1">
          <table:table-cell office:value-type="float" office:value="491.534851074219">
            <text:p>491.5348510742</text:p>
          </table:table-cell>
          <table:table-cell office:value-type="float" office:value="0.009227526">
            <text:p>0.009227526</text:p>
          </table:table-cell>
          <table:table-cell table:number-columns-repeated="4"/>
        </table:table-row>
        <table:table-row table:style-name="ro1">
          <table:table-cell office:value-type="float" office:value="491.650787353516">
            <text:p>491.6507873535</text:p>
          </table:table-cell>
          <table:table-cell office:value-type="float" office:value="0.000824909">
            <text:p>0.000824909</text:p>
          </table:table-cell>
          <table:table-cell table:number-columns-repeated="4"/>
        </table:table-row>
        <table:table-row table:style-name="ro1">
          <table:table-cell office:value-type="float" office:value="491.766723632813">
            <text:p>491.7667236328</text:p>
          </table:table-cell>
          <table:table-cell office:value-type="float" office:value="-0.004623311">
            <text:p>-0.004623311</text:p>
          </table:table-cell>
          <table:table-cell table:number-columns-repeated="4"/>
        </table:table-row>
        <table:table-row table:style-name="ro1">
          <table:table-cell office:value-type="float" office:value="491.882659912109">
            <text:p>491.8826599121</text:p>
          </table:table-cell>
          <table:table-cell office:value-type="float" office:value="-0.01164072">
            <text:p>-0.01164072</text:p>
          </table:table-cell>
          <table:table-cell table:number-columns-repeated="4"/>
        </table:table-row>
        <table:table-row table:style-name="ro1">
          <table:table-cell office:value-type="float" office:value="491.998596191406">
            <text:p>491.9985961914</text:p>
          </table:table-cell>
          <table:table-cell office:value-type="float" office:value="0.004264628">
            <text:p>0.004264628</text:p>
          </table:table-cell>
          <table:table-cell table:number-columns-repeated="4"/>
        </table:table-row>
        <table:table-row table:style-name="ro1">
          <table:table-cell office:value-type="float" office:value="492.114562988281">
            <text:p>492.1145629883</text:p>
          </table:table-cell>
          <table:table-cell office:value-type="float" office:value="0.003683736">
            <text:p>0.003683736</text:p>
          </table:table-cell>
          <table:table-cell table:number-columns-repeated="4"/>
        </table:table-row>
        <table:table-row table:style-name="ro1">
          <table:table-cell office:value-type="float" office:value="492.230529785156">
            <text:p>492.2305297852</text:p>
          </table:table-cell>
          <table:table-cell office:value-type="float" office:value="-0.01176367">
            <text:p>-0.01176367</text:p>
          </table:table-cell>
          <table:table-cell table:number-columns-repeated="4"/>
        </table:table-row>
        <table:table-row table:style-name="ro1">
          <table:table-cell office:value-type="float" office:value="492.346496582031">
            <text:p>492.346496582</text:p>
          </table:table-cell>
          <table:table-cell office:value-type="float" office:value="0.0006881253">
            <text:p>0.0006881253</text:p>
          </table:table-cell>
          <table:table-cell table:number-columns-repeated="4"/>
        </table:table-row>
        <table:table-row table:style-name="ro1">
          <table:table-cell office:value-type="float" office:value="492.462463378906">
            <text:p>492.4624633789</text:p>
          </table:table-cell>
          <table:table-cell office:value-type="float" office:value="0.00119582">
            <text:p>0.00119582</text:p>
          </table:table-cell>
          <table:table-cell table:number-columns-repeated="4"/>
        </table:table-row>
        <table:table-row table:style-name="ro1">
          <table:table-cell office:value-type="float" office:value="492.578430175781">
            <text:p>492.5784301758</text:p>
          </table:table-cell>
          <table:table-cell office:value-type="float" office:value="0.002540395">
            <text:p>0.002540395</text:p>
          </table:table-cell>
          <table:table-cell table:number-columns-repeated="4"/>
        </table:table-row>
        <table:table-row table:style-name="ro1">
          <table:table-cell office:value-type="float" office:value="492.694396972656">
            <text:p>492.6943969727</text:p>
          </table:table-cell>
          <table:table-cell office:value-type="float" office:value="-0.005971536">
            <text:p>-0.005971536</text:p>
          </table:table-cell>
          <table:table-cell table:number-columns-repeated="4"/>
        </table:table-row>
        <table:table-row table:style-name="ro1">
          <table:table-cell office:value-type="float" office:value="492.810363769531">
            <text:p>492.8103637695</text:p>
          </table:table-cell>
          <table:table-cell office:value-type="float" office:value="-0.008541859">
            <text:p>-0.008541859</text:p>
          </table:table-cell>
          <table:table-cell table:number-columns-repeated="4"/>
        </table:table-row>
        <table:table-row table:style-name="ro1">
          <table:table-cell office:value-type="float" office:value="492.926361083984">
            <text:p>492.926361084</text:p>
          </table:table-cell>
          <table:table-cell office:value-type="float" office:value="0.009767124">
            <text:p>0.009767124</text:p>
          </table:table-cell>
          <table:table-cell table:number-columns-repeated="4"/>
        </table:table-row>
        <table:table-row table:style-name="ro1">
          <table:table-cell office:value-type="float" office:value="493.042327880859">
            <text:p>493.0423278809</text:p>
          </table:table-cell>
          <table:table-cell office:value-type="float" office:value="-0.003994735">
            <text:p>-0.003994735</text:p>
          </table:table-cell>
          <table:table-cell table:number-columns-repeated="4"/>
        </table:table-row>
        <table:table-row table:style-name="ro1">
          <table:table-cell office:value-type="float" office:value="493.158325195313">
            <text:p>493.1583251953</text:p>
          </table:table-cell>
          <table:table-cell office:value-type="float" office:value="-0.007600968">
            <text:p>-0.007600968</text:p>
          </table:table-cell>
          <table:table-cell table:number-columns-repeated="4"/>
        </table:table-row>
        <table:table-row table:style-name="ro1">
          <table:table-cell office:value-type="float" office:value="493.274322509766">
            <text:p>493.2743225098</text:p>
          </table:table-cell>
          <table:table-cell office:value-type="float" office:value="-0.001081893">
            <text:p>-0.001081893</text:p>
          </table:table-cell>
          <table:table-cell table:number-columns-repeated="4"/>
        </table:table-row>
        <table:table-row table:style-name="ro1">
          <table:table-cell office:value-type="float" office:value="493.390319824219">
            <text:p>493.3903198242</text:p>
          </table:table-cell>
          <table:table-cell office:value-type="float" office:value="0.01095348">
            <text:p>0.01095348</text:p>
          </table:table-cell>
          <table:table-cell table:number-columns-repeated="4"/>
        </table:table-row>
        <table:table-row table:style-name="ro1">
          <table:table-cell office:value-type="float" office:value="493.506317138672">
            <text:p>493.5063171387</text:p>
          </table:table-cell>
          <table:table-cell office:value-type="float" office:value="0.004007446">
            <text:p>0.004007446</text:p>
          </table:table-cell>
          <table:table-cell table:number-columns-repeated="4"/>
        </table:table-row>
        <table:table-row table:style-name="ro1">
          <table:table-cell office:value-type="float" office:value="493.622344970703">
            <text:p>493.6223449707</text:p>
          </table:table-cell>
          <table:table-cell office:value-type="float" office:value="0.0001050611">
            <text:p>0.0001050611</text:p>
          </table:table-cell>
          <table:table-cell table:number-columns-repeated="4"/>
        </table:table-row>
        <table:table-row table:style-name="ro1">
          <table:table-cell office:value-type="float" office:value="493.738342285156">
            <text:p>493.7383422852</text:p>
          </table:table-cell>
          <table:table-cell office:value-type="float" office:value="-0.01093438">
            <text:p>-0.01093438</text:p>
          </table:table-cell>
          <table:table-cell table:number-columns-repeated="4"/>
        </table:table-row>
        <table:table-row table:style-name="ro1">
          <table:table-cell office:value-type="float" office:value="493.854370117188">
            <text:p>493.8543701172</text:p>
          </table:table-cell>
          <table:table-cell office:value-type="float" office:value="-0.00388062">
            <text:p>-0.00388062</text:p>
          </table:table-cell>
          <table:table-cell table:number-columns-repeated="4"/>
        </table:table-row>
        <table:table-row table:style-name="ro1">
          <table:table-cell office:value-type="float" office:value="493.970367431641">
            <text:p>493.9703674316</text:p>
          </table:table-cell>
          <table:table-cell office:value-type="float" office:value="0.005745733">
            <text:p>0.005745733</text:p>
          </table:table-cell>
          <table:table-cell table:number-columns-repeated="4"/>
        </table:table-row>
        <table:table-row table:style-name="ro1">
          <table:table-cell office:value-type="float" office:value="494.086395263672">
            <text:p>494.0863952637</text:p>
          </table:table-cell>
          <table:table-cell office:value-type="float" office:value="0.001454064">
            <text:p>0.001454064</text:p>
          </table:table-cell>
          <table:table-cell table:number-columns-repeated="4"/>
        </table:table-row>
        <table:table-row table:style-name="ro1">
          <table:table-cell office:value-type="float" office:value="494.202423095703">
            <text:p>494.2024230957</text:p>
          </table:table-cell>
          <table:table-cell office:value-type="float" office:value="-0.001370649">
            <text:p>-0.001370649</text:p>
          </table:table-cell>
          <table:table-cell table:number-columns-repeated="4"/>
        </table:table-row>
        <table:table-row table:style-name="ro1">
          <table:table-cell office:value-type="float" office:value="494.318450927734">
            <text:p>494.3184509277</text:p>
          </table:table-cell>
          <table:table-cell office:value-type="float" office:value="-0.003491227">
            <text:p>-0.003491227</text:p>
          </table:table-cell>
          <table:table-cell table:number-columns-repeated="4"/>
        </table:table-row>
        <table:table-row table:style-name="ro1">
          <table:table-cell office:value-type="float" office:value="494.434478759766">
            <text:p>494.4344787598</text:p>
          </table:table-cell>
          <table:table-cell office:value-type="float" office:value="-0.001349194">
            <text:p>-0.001349194</text:p>
          </table:table-cell>
          <table:table-cell table:number-columns-repeated="4"/>
        </table:table-row>
        <table:table-row table:style-name="ro1">
          <table:table-cell office:value-type="float" office:value="494.550537109375">
            <text:p>494.5505371094</text:p>
          </table:table-cell>
          <table:table-cell office:value-type="float" office:value="-0.006255955">
            <text:p>-0.006255955</text:p>
          </table:table-cell>
          <table:table-cell table:number-columns-repeated="4"/>
        </table:table-row>
        <table:table-row table:style-name="ro1">
          <table:table-cell office:value-type="float" office:value="494.666564941406">
            <text:p>494.6665649414</text:p>
          </table:table-cell>
          <table:table-cell office:value-type="float" office:value="-0.006073845">
            <text:p>-0.006073845</text:p>
          </table:table-cell>
          <table:table-cell table:number-columns-repeated="4"/>
        </table:table-row>
        <table:table-row table:style-name="ro1">
          <table:table-cell office:value-type="float" office:value="494.782623291016">
            <text:p>494.782623291</text:p>
          </table:table-cell>
          <table:table-cell office:value-type="float" office:value="-0.002196514">
            <text:p>-0.002196514</text:p>
          </table:table-cell>
          <table:table-cell table:number-columns-repeated="4"/>
        </table:table-row>
        <table:table-row table:style-name="ro1">
          <table:table-cell office:value-type="float" office:value="494.898681640625">
            <text:p>494.8986816406</text:p>
          </table:table-cell>
          <table:table-cell office:value-type="float" office:value="0.0058486">
            <text:p>0.0058486</text:p>
          </table:table-cell>
          <table:table-cell table:number-columns-repeated="4"/>
        </table:table-row>
        <table:table-row table:style-name="ro1">
          <table:table-cell office:value-type="float" office:value="495.014739990234">
            <text:p>495.0147399902</text:p>
          </table:table-cell>
          <table:table-cell office:value-type="float" office:value="-0.01152522">
            <text:p>-0.01152522</text:p>
          </table:table-cell>
          <table:table-cell table:number-columns-repeated="4"/>
        </table:table-row>
        <table:table-row table:style-name="ro1">
          <table:table-cell office:value-type="float" office:value="495.130798339844">
            <text:p>495.1307983398</text:p>
          </table:table-cell>
          <table:table-cell office:value-type="float" office:value="-0.01085865">
            <text:p>-0.01085865</text:p>
          </table:table-cell>
          <table:table-cell table:number-columns-repeated="4"/>
        </table:table-row>
        <table:table-row table:style-name="ro1">
          <table:table-cell office:value-type="float" office:value="495.246856689453">
            <text:p>495.2468566895</text:p>
          </table:table-cell>
          <table:table-cell office:value-type="float" office:value="0.004071865">
            <text:p>0.004071865</text:p>
          </table:table-cell>
          <table:table-cell table:number-columns-repeated="4"/>
        </table:table-row>
        <table:table-row table:style-name="ro1">
          <table:table-cell office:value-type="float" office:value="495.362915039063">
            <text:p>495.3629150391</text:p>
          </table:table-cell>
          <table:table-cell office:value-type="float" office:value="0.007429295">
            <text:p>0.007429295</text:p>
          </table:table-cell>
          <table:table-cell table:number-columns-repeated="4"/>
        </table:table-row>
        <table:table-row table:style-name="ro1">
          <table:table-cell office:value-type="float" office:value="495.478973388672">
            <text:p>495.4789733887</text:p>
          </table:table-cell>
          <table:table-cell office:value-type="float" office:value="-0.01168476">
            <text:p>-0.01168476</text:p>
          </table:table-cell>
          <table:table-cell table:number-columns-repeated="4"/>
        </table:table-row>
        <table:table-row table:style-name="ro1">
          <table:table-cell office:value-type="float" office:value="495.595062255859">
            <text:p>495.5950622559</text:p>
          </table:table-cell>
          <table:table-cell office:value-type="float" office:value="0.00425601">
            <text:p>0.00425601</text:p>
          </table:table-cell>
          <table:table-cell table:number-columns-repeated="4"/>
        </table:table-row>
        <table:table-row table:style-name="ro1">
          <table:table-cell office:value-type="float" office:value="495.711151123047">
            <text:p>495.711151123</text:p>
          </table:table-cell>
          <table:table-cell office:value-type="float" office:value="-0.003240332">
            <text:p>-0.003240332</text:p>
          </table:table-cell>
          <table:table-cell table:number-columns-repeated="4"/>
        </table:table-row>
        <table:table-row table:style-name="ro1">
          <table:table-cell office:value-type="float" office:value="495.827209472656">
            <text:p>495.8272094727</text:p>
          </table:table-cell>
          <table:table-cell office:value-type="float" office:value="0.02526594">
            <text:p>0.02526594</text:p>
          </table:table-cell>
          <table:table-cell table:number-columns-repeated="4"/>
        </table:table-row>
        <table:table-row table:style-name="ro1">
          <table:table-cell office:value-type="float" office:value="495.943298339844">
            <text:p>495.9432983398</text:p>
          </table:table-cell>
          <table:table-cell office:value-type="float" office:value="-0.001462687">
            <text:p>-0.001462687</text:p>
          </table:table-cell>
          <table:table-cell table:number-columns-repeated="4"/>
        </table:table-row>
        <table:table-row table:style-name="ro1">
          <table:table-cell office:value-type="float" office:value="496.059387207031">
            <text:p>496.059387207</text:p>
          </table:table-cell>
          <table:table-cell office:value-type="float" office:value="0.008707207">
            <text:p>0.008707207</text:p>
          </table:table-cell>
          <table:table-cell table:number-columns-repeated="4"/>
        </table:table-row>
        <table:table-row table:style-name="ro1">
          <table:table-cell office:value-type="float" office:value="496.175506591797">
            <text:p>496.1755065918</text:p>
          </table:table-cell>
          <table:table-cell office:value-type="float" office:value="-0.00361604">
            <text:p>-0.00361604</text:p>
          </table:table-cell>
          <table:table-cell table:number-columns-repeated="4"/>
        </table:table-row>
        <table:table-row table:style-name="ro1">
          <table:table-cell office:value-type="float" office:value="496.291595458984">
            <text:p>496.291595459</text:p>
          </table:table-cell>
          <table:table-cell office:value-type="float" office:value="-0.005535142">
            <text:p>-0.005535142</text:p>
          </table:table-cell>
          <table:table-cell table:number-columns-repeated="4"/>
        </table:table-row>
        <table:table-row table:style-name="ro1">
          <table:table-cell office:value-type="float" office:value="496.407684326172">
            <text:p>496.4076843262</text:p>
          </table:table-cell>
          <table:table-cell office:value-type="float" office:value="0.01002386">
            <text:p>0.01002386</text:p>
          </table:table-cell>
          <table:table-cell table:number-columns-repeated="4"/>
        </table:table-row>
        <table:table-row table:style-name="ro1">
          <table:table-cell office:value-type="float" office:value="496.523803710938">
            <text:p>496.5238037109</text:p>
          </table:table-cell>
          <table:table-cell office:value-type="float" office:value="-0.01017453">
            <text:p>-0.01017453</text:p>
          </table:table-cell>
          <table:table-cell table:number-columns-repeated="4"/>
        </table:table-row>
        <table:table-row table:style-name="ro1">
          <table:table-cell office:value-type="float" office:value="496.639923095703">
            <text:p>496.6399230957</text:p>
          </table:table-cell>
          <table:table-cell office:value-type="float" office:value="0.007981933">
            <text:p>0.007981933</text:p>
          </table:table-cell>
          <table:table-cell table:number-columns-repeated="4"/>
        </table:table-row>
        <table:table-row table:style-name="ro1">
          <table:table-cell office:value-type="float" office:value="496.756042480469">
            <text:p>496.7560424805</text:p>
          </table:table-cell>
          <table:table-cell office:value-type="float" office:value="0.004825311">
            <text:p>0.004825311</text:p>
          </table:table-cell>
          <table:table-cell table:number-columns-repeated="4"/>
        </table:table-row>
        <table:table-row table:style-name="ro1">
          <table:table-cell office:value-type="float" office:value="496.872161865234">
            <text:p>496.8721618652</text:p>
          </table:table-cell>
          <table:table-cell office:value-type="float" office:value="-0.004850983">
            <text:p>-0.004850983</text:p>
          </table:table-cell>
          <table:table-cell table:number-columns-repeated="4"/>
        </table:table-row>
        <table:table-row table:style-name="ro1">
          <table:table-cell office:value-type="float" office:value="496.98828125">
            <text:p>496.98828125</text:p>
          </table:table-cell>
          <table:table-cell office:value-type="float" office:value="0.001523794">
            <text:p>0.001523794</text:p>
          </table:table-cell>
          <table:table-cell table:number-columns-repeated="4"/>
        </table:table-row>
        <table:table-row table:style-name="ro1">
          <table:table-cell office:value-type="float" office:value="497.104400634766">
            <text:p>497.1044006348</text:p>
          </table:table-cell>
          <table:table-cell office:value-type="float" office:value="0.01980464">
            <text:p>0.01980464</text:p>
          </table:table-cell>
          <table:table-cell table:number-columns-repeated="4"/>
        </table:table-row>
        <table:table-row table:style-name="ro1">
          <table:table-cell office:value-type="float" office:value="497.220520019531">
            <text:p>497.2205200195</text:p>
          </table:table-cell>
          <table:table-cell office:value-type="float" office:value="0.002918393">
            <text:p>0.002918393</text:p>
          </table:table-cell>
          <table:table-cell table:number-columns-repeated="4"/>
        </table:table-row>
        <table:table-row table:style-name="ro1">
          <table:table-cell office:value-type="float" office:value="497.336669921875">
            <text:p>497.3366699219</text:p>
          </table:table-cell>
          <table:table-cell office:value-type="float" office:value="-0.002922388">
            <text:p>-0.002922388</text:p>
          </table:table-cell>
          <table:table-cell table:number-columns-repeated="4"/>
        </table:table-row>
        <table:table-row table:style-name="ro1">
          <table:table-cell office:value-type="float" office:value="497.452819824219">
            <text:p>497.4528198242</text:p>
          </table:table-cell>
          <table:table-cell office:value-type="float" office:value="-0.00877501">
            <text:p>-0.00877501</text:p>
          </table:table-cell>
          <table:table-cell table:number-columns-repeated="4"/>
        </table:table-row>
        <table:table-row table:style-name="ro1">
          <table:table-cell office:value-type="float" office:value="497.568939208984">
            <text:p>497.568939209</text:p>
          </table:table-cell>
          <table:table-cell office:value-type="float" office:value="0.005307929">
            <text:p>0.005307929</text:p>
          </table:table-cell>
          <table:table-cell table:number-columns-repeated="4"/>
        </table:table-row>
        <table:table-row table:style-name="ro1">
          <table:table-cell office:value-type="float" office:value="497.685089111328">
            <text:p>497.6850891113</text:p>
          </table:table-cell>
          <table:table-cell office:value-type="float" office:value="0.005941094">
            <text:p>0.005941094</text:p>
          </table:table-cell>
          <table:table-cell table:number-columns-repeated="4"/>
        </table:table-row>
        <table:table-row table:style-name="ro1">
          <table:table-cell office:value-type="float" office:value="497.801239013672">
            <text:p>497.8012390137</text:p>
          </table:table-cell>
          <table:table-cell office:value-type="float" office:value="-0.0001650181">
            <text:p>-0.0001650181</text:p>
          </table:table-cell>
          <table:table-cell table:number-columns-repeated="4"/>
        </table:table-row>
        <table:table-row table:style-name="ro1">
          <table:table-cell office:value-type="float" office:value="497.917388916016">
            <text:p>497.917388916</text:p>
          </table:table-cell>
          <table:table-cell office:value-type="float" office:value="-0.01012371">
            <text:p>-0.01012371</text:p>
          </table:table-cell>
          <table:table-cell table:number-columns-repeated="4"/>
        </table:table-row>
        <table:table-row table:style-name="ro1">
          <table:table-cell office:value-type="float" office:value="498.033569335938">
            <text:p>498.0335693359</text:p>
          </table:table-cell>
          <table:table-cell office:value-type="float" office:value="0.006081481">
            <text:p>0.006081481</text:p>
          </table:table-cell>
          <table:table-cell table:number-columns-repeated="4"/>
        </table:table-row>
        <table:table-row table:style-name="ro1">
          <table:table-cell office:value-type="float" office:value="498.149719238281">
            <text:p>498.1497192383</text:p>
          </table:table-cell>
          <table:table-cell office:value-type="float" office:value="0.01678798">
            <text:p>0.01678798</text:p>
          </table:table-cell>
          <table:table-cell table:number-columns-repeated="4"/>
        </table:table-row>
        <table:table-row table:style-name="ro1">
          <table:table-cell office:value-type="float" office:value="498.265899658203">
            <text:p>498.2658996582</text:p>
          </table:table-cell>
          <table:table-cell office:value-type="float" office:value="-0.004106972">
            <text:p>-0.004106972</text:p>
          </table:table-cell>
          <table:table-cell table:number-columns-repeated="4"/>
        </table:table-row>
        <table:table-row table:style-name="ro1">
          <table:table-cell office:value-type="float" office:value="498.382049560547">
            <text:p>498.3820495605</text:p>
          </table:table-cell>
          <table:table-cell office:value-type="float" office:value="-0.001203434">
            <text:p>-0.001203434</text:p>
          </table:table-cell>
          <table:table-cell table:number-columns-repeated="4"/>
        </table:table-row>
        <table:table-row table:style-name="ro1">
          <table:table-cell office:value-type="float" office:value="498.498229980469">
            <text:p>498.4982299805</text:p>
          </table:table-cell>
          <table:table-cell office:value-type="float" office:value="0.01400301">
            <text:p>0.01400301</text:p>
          </table:table-cell>
          <table:table-cell table:number-columns-repeated="4"/>
        </table:table-row>
        <table:table-row table:style-name="ro1">
          <table:table-cell office:value-type="float" office:value="498.614410400391">
            <text:p>498.6144104004</text:p>
          </table:table-cell>
          <table:table-cell office:value-type="float" office:value="-0.0003465297">
            <text:p>-0.0003465297</text:p>
          </table:table-cell>
          <table:table-cell table:number-columns-repeated="4"/>
        </table:table-row>
        <table:table-row table:style-name="ro1">
          <table:table-cell office:value-type="float" office:value="498.730590820313">
            <text:p>498.7305908203</text:p>
          </table:table-cell>
          <table:table-cell office:value-type="float" office:value="0.001281599">
            <text:p>0.001281599</text:p>
          </table:table-cell>
          <table:table-cell table:number-columns-repeated="4"/>
        </table:table-row>
        <table:table-row table:style-name="ro1">
          <table:table-cell office:value-type="float" office:value="498.846771240234">
            <text:p>498.8467712402</text:p>
          </table:table-cell>
          <table:table-cell office:value-type="float" office:value="-0.01323937">
            <text:p>-0.01323937</text:p>
          </table:table-cell>
          <table:table-cell table:number-columns-repeated="4"/>
        </table:table-row>
        <table:table-row table:style-name="ro1">
          <table:table-cell office:value-type="float" office:value="498.962982177734">
            <text:p>498.9629821777</text:p>
          </table:table-cell>
          <table:table-cell office:value-type="float" office:value="0.002937769">
            <text:p>0.002937769</text:p>
          </table:table-cell>
          <table:table-cell table:number-columns-repeated="4"/>
        </table:table-row>
        <table:table-row table:style-name="ro1">
          <table:table-cell office:value-type="float" office:value="499.079162597656">
            <text:p>499.0791625977</text:p>
          </table:table-cell>
          <table:table-cell office:value-type="float" office:value="0.025212">
            <text:p>0.025212</text:p>
          </table:table-cell>
          <table:table-cell table:number-columns-repeated="4"/>
        </table:table-row>
        <table:table-row table:style-name="ro1">
          <table:table-cell office:value-type="float" office:value="499.195373535156">
            <text:p>499.1953735352</text:p>
          </table:table-cell>
          <table:table-cell office:value-type="float" office:value="-0.007178034">
            <text:p>-0.007178034</text:p>
          </table:table-cell>
          <table:table-cell table:number-columns-repeated="4"/>
        </table:table-row>
        <table:table-row table:style-name="ro1">
          <table:table-cell office:value-type="float" office:value="499.311584472656">
            <text:p>499.3115844727</text:p>
          </table:table-cell>
          <table:table-cell office:value-type="float" office:value="-0.005664381">
            <text:p>-0.005664381</text:p>
          </table:table-cell>
          <table:table-cell table:number-columns-repeated="4"/>
        </table:table-row>
        <table:table-row table:style-name="ro1">
          <table:table-cell office:value-type="float" office:value="499.427764892578">
            <text:p>499.4277648926</text:p>
          </table:table-cell>
          <table:table-cell office:value-type="float" office:value="0.008020683">
            <text:p>0.008020683</text:p>
          </table:table-cell>
          <table:table-cell table:number-columns-repeated="4"/>
        </table:table-row>
        <table:table-row table:style-name="ro1">
          <table:table-cell office:value-type="float" office:value="499.543975830078">
            <text:p>499.5439758301</text:p>
          </table:table-cell>
          <table:table-cell office:value-type="float" office:value="-0.001296649">
            <text:p>-0.001296649</text:p>
          </table:table-cell>
          <table:table-cell table:number-columns-repeated="4"/>
        </table:table-row>
        <table:table-row table:style-name="ro1">
          <table:table-cell office:value-type="float" office:value="499.660217285156">
            <text:p>499.6602172852</text:p>
          </table:table-cell>
          <table:table-cell office:value-type="float" office:value="-0.006899703">
            <text:p>-0.006899703</text:p>
          </table:table-cell>
          <table:table-cell table:number-columns-repeated="4"/>
        </table:table-row>
        <table:table-row table:style-name="ro1">
          <table:table-cell office:value-type="float" office:value="499.776428222656">
            <text:p>499.7764282227</text:p>
          </table:table-cell>
          <table:table-cell office:value-type="float" office:value="-0.01344801">
            <text:p>-0.01344801</text:p>
          </table:table-cell>
          <table:table-cell table:number-columns-repeated="4"/>
        </table:table-row>
        <table:table-row table:style-name="ro1">
          <table:table-cell office:value-type="float" office:value="499.892639160156">
            <text:p>499.8926391602</text:p>
          </table:table-cell>
          <table:table-cell office:value-type="float" office:value="0.0004476679">
            <text:p>0.0004476679</text:p>
          </table:table-cell>
          <table:table-cell table:number-columns-repeated="4"/>
        </table:table-row>
        <table:table-row table:style-name="ro1">
          <table:table-cell office:value-type="float" office:value="500.008880615234">
            <text:p>500.0088806152</text:p>
          </table:table-cell>
          <table:table-cell office:value-type="float" office:value="0.02513922">
            <text:p>0.02513922</text:p>
          </table:table-cell>
          <table:table-cell table:number-columns-repeated="4"/>
        </table:table-row>
        <table:table-row table:style-name="ro1">
          <table:table-cell office:value-type="float" office:value="500.125091552734">
            <text:p>500.1250915527</text:p>
          </table:table-cell>
          <table:table-cell office:value-type="float" office:value="-0.003083435">
            <text:p>-0.003083435</text:p>
          </table:table-cell>
          <table:table-cell table:number-columns-repeated="4"/>
        </table:table-row>
        <table:table-row table:style-name="ro1">
          <table:table-cell office:value-type="float" office:value="500.241333007813">
            <text:p>500.2413330078</text:p>
          </table:table-cell>
          <table:table-cell office:value-type="float" office:value="0.00159155">
            <text:p>0.00159155</text:p>
          </table:table-cell>
          <table:table-cell table:number-columns-repeated="4"/>
        </table:table-row>
        <table:table-row table:style-name="ro1">
          <table:table-cell office:value-type="float" office:value="500.357574462891">
            <text:p>500.3575744629</text:p>
          </table:table-cell>
          <table:table-cell office:value-type="float" office:value="0.002338897">
            <text:p>0.002338897</text:p>
          </table:table-cell>
          <table:table-cell table:number-columns-repeated="4"/>
        </table:table-row>
        <table:table-row table:style-name="ro1">
          <table:table-cell office:value-type="float" office:value="500.473815917969">
            <text:p>500.473815918</text:p>
          </table:table-cell>
          <table:table-cell office:value-type="float" office:value="0.002187543">
            <text:p>0.002187543</text:p>
          </table:table-cell>
          <table:table-cell table:number-columns-repeated="4"/>
        </table:table-row>
        <table:table-row table:style-name="ro1">
          <table:table-cell office:value-type="float" office:value="500.590057373047">
            <text:p>500.590057373</text:p>
          </table:table-cell>
          <table:table-cell office:value-type="float" office:value="-0.008742812">
            <text:p>-0.008742812</text:p>
          </table:table-cell>
          <table:table-cell table:number-columns-repeated="4"/>
        </table:table-row>
        <table:table-row table:style-name="ro1">
          <table:table-cell office:value-type="float" office:value="500.706298828125">
            <text:p>500.7062988281</text:p>
          </table:table-cell>
          <table:table-cell office:value-type="float" office:value="-0.01013513">
            <text:p>-0.01013513</text:p>
          </table:table-cell>
          <table:table-cell table:number-columns-repeated="4"/>
        </table:table-row>
        <table:table-row table:style-name="ro1">
          <table:table-cell office:value-type="float" office:value="500.822570800781">
            <text:p>500.8225708008</text:p>
          </table:table-cell>
          <table:table-cell office:value-type="float" office:value="0.0007559019">
            <text:p>0.0007559019</text:p>
          </table:table-cell>
          <table:table-cell table:number-columns-repeated="4"/>
        </table:table-row>
        <table:table-row table:style-name="ro1">
          <table:table-cell office:value-type="float" office:value="500.938812255859">
            <text:p>500.9388122559</text:p>
          </table:table-cell>
          <table:table-cell office:value-type="float" office:value="0.001974243">
            <text:p>0.001974243</text:p>
          </table:table-cell>
          <table:table-cell table:number-columns-repeated="4"/>
        </table:table-row>
        <table:table-row table:style-name="ro1">
          <table:table-cell office:value-type="float" office:value="501.055084228516">
            <text:p>501.0550842285</text:p>
          </table:table-cell>
          <table:table-cell office:value-type="float" office:value="-0.0118928">
            <text:p>-0.0118928</text:p>
          </table:table-cell>
          <table:table-cell table:number-columns-repeated="4"/>
        </table:table-row>
        <table:table-row table:style-name="ro1">
          <table:table-cell office:value-type="float" office:value="501.171356201172">
            <text:p>501.1713562012</text:p>
          </table:table-cell>
          <table:table-cell office:value-type="float" office:value="-0.004119006">
            <text:p>-0.004119006</text:p>
          </table:table-cell>
          <table:table-cell table:number-columns-repeated="4"/>
        </table:table-row>
        <table:table-row table:style-name="ro1">
          <table:table-cell office:value-type="float" office:value="501.287628173828">
            <text:p>501.2876281738</text:p>
          </table:table-cell>
          <table:table-cell office:value-type="float" office:value="0.006074985">
            <text:p>0.006074985</text:p>
          </table:table-cell>
          <table:table-cell table:number-columns-repeated="4"/>
        </table:table-row>
        <table:table-row table:style-name="ro1">
          <table:table-cell office:value-type="float" office:value="501.403900146484">
            <text:p>501.4039001465</text:p>
          </table:table-cell>
          <table:table-cell office:value-type="float" office:value="0.001134912">
            <text:p>0.001134912</text:p>
          </table:table-cell>
          <table:table-cell table:number-columns-repeated="4"/>
        </table:table-row>
        <table:table-row table:style-name="ro1">
          <table:table-cell office:value-type="float" office:value="501.520172119141">
            <text:p>501.5201721191</text:p>
          </table:table-cell>
          <table:table-cell office:value-type="float" office:value="-0.003581522">
            <text:p>-0.003581522</text:p>
          </table:table-cell>
          <table:table-cell table:number-columns-repeated="4"/>
        </table:table-row>
        <table:table-row table:style-name="ro1">
          <table:table-cell office:value-type="float" office:value="501.636444091797">
            <text:p>501.6364440918</text:p>
          </table:table-cell>
          <table:table-cell office:value-type="float" office:value="0.0599647">
            <text:p>0.0599647</text:p>
          </table:table-cell>
          <table:table-cell table:number-columns-repeated="4"/>
        </table:table-row>
        <table:table-row table:style-name="ro1">
          <table:table-cell office:value-type="float" office:value="501.752746582031">
            <text:p>501.752746582</text:p>
          </table:table-cell>
          <table:table-cell office:value-type="float" office:value="0.000115062">
            <text:p>0.000115062</text:p>
          </table:table-cell>
          <table:table-cell table:number-columns-repeated="4"/>
        </table:table-row>
        <table:table-row table:style-name="ro1">
          <table:table-cell office:value-type="float" office:value="501.869018554688">
            <text:p>501.8690185547</text:p>
          </table:table-cell>
          <table:table-cell office:value-type="float" office:value="-0.001520244">
            <text:p>-0.001520244</text:p>
          </table:table-cell>
          <table:table-cell table:number-columns-repeated="4"/>
        </table:table-row>
        <table:table-row table:style-name="ro1">
          <table:table-cell office:value-type="float" office:value="501.985321044922">
            <text:p>501.9853210449</text:p>
          </table:table-cell>
          <table:table-cell office:value-type="float" office:value="0.002392809">
            <text:p>0.002392809</text:p>
          </table:table-cell>
          <table:table-cell table:number-columns-repeated="4"/>
        </table:table-row>
        <table:table-row table:style-name="ro1">
          <table:table-cell office:value-type="float" office:value="502.101623535156">
            <text:p>502.1016235352</text:p>
          </table:table-cell>
          <table:table-cell office:value-type="float" office:value="-0.01069377">
            <text:p>-0.01069377</text:p>
          </table:table-cell>
          <table:table-cell table:number-columns-repeated="4"/>
        </table:table-row>
        <table:table-row table:style-name="ro1">
          <table:table-cell office:value-type="float" office:value="502.217926025391">
            <text:p>502.2179260254</text:p>
          </table:table-cell>
          <table:table-cell office:value-type="float" office:value="0.002271967">
            <text:p>0.002271967</text:p>
          </table:table-cell>
          <table:table-cell table:number-columns-repeated="4"/>
        </table:table-row>
        <table:table-row table:style-name="ro1">
          <table:table-cell office:value-type="float" office:value="502.334228515625">
            <text:p>502.3342285156</text:p>
          </table:table-cell>
          <table:table-cell office:value-type="float" office:value="-0.003291933">
            <text:p>-0.003291933</text:p>
          </table:table-cell>
          <table:table-cell table:number-columns-repeated="4"/>
        </table:table-row>
        <table:table-row table:style-name="ro1">
          <table:table-cell office:value-type="float" office:value="502.450531005859">
            <text:p>502.4505310059</text:p>
          </table:table-cell>
          <table:table-cell office:value-type="float" office:value="-0.008391961">
            <text:p>-0.008391961</text:p>
          </table:table-cell>
          <table:table-cell table:number-columns-repeated="4"/>
        </table:table-row>
        <table:table-row table:style-name="ro1">
          <table:table-cell office:value-type="float" office:value="502.566833496094">
            <text:p>502.5668334961</text:p>
          </table:table-cell>
          <table:table-cell office:value-type="float" office:value="-0.0002985714">
            <text:p>-0.0002985714</text:p>
          </table:table-cell>
          <table:table-cell table:number-columns-repeated="4"/>
        </table:table-row>
        <table:table-row table:style-name="ro1">
          <table:table-cell office:value-type="float" office:value="502.683166503906">
            <text:p>502.6831665039</text:p>
          </table:table-cell>
          <table:table-cell office:value-type="float" office:value="0.004073979">
            <text:p>0.004073979</text:p>
          </table:table-cell>
          <table:table-cell table:number-columns-repeated="4"/>
        </table:table-row>
        <table:table-row table:style-name="ro1">
          <table:table-cell office:value-type="float" office:value="502.799468994141">
            <text:p>502.7994689941</text:p>
          </table:table-cell>
          <table:table-cell office:value-type="float" office:value="-0.0004728034">
            <text:p>-0.0004728034</text:p>
          </table:table-cell>
          <table:table-cell table:number-columns-repeated="4"/>
        </table:table-row>
        <table:table-row table:style-name="ro1">
          <table:table-cell office:value-type="float" office:value="502.915802001953">
            <text:p>502.915802002</text:p>
          </table:table-cell>
          <table:table-cell office:value-type="float" office:value="-0.00627456">
            <text:p>-0.00627456</text:p>
          </table:table-cell>
          <table:table-cell table:number-columns-repeated="4"/>
        </table:table-row>
        <table:table-row table:style-name="ro1">
          <table:table-cell office:value-type="float" office:value="503.032135009766">
            <text:p>503.0321350098</text:p>
          </table:table-cell>
          <table:table-cell office:value-type="float" office:value="-0.008874428">
            <text:p>-0.008874428</text:p>
          </table:table-cell>
          <table:table-cell table:number-columns-repeated="4"/>
        </table:table-row>
        <table:table-row table:style-name="ro1">
          <table:table-cell office:value-type="float" office:value="503.148468017578">
            <text:p>503.1484680176</text:p>
          </table:table-cell>
          <table:table-cell office:value-type="float" office:value="-0.002077671">
            <text:p>-0.002077671</text:p>
          </table:table-cell>
          <table:table-cell table:number-columns-repeated="4"/>
        </table:table-row>
        <table:table-row table:style-name="ro1">
          <table:table-cell office:value-type="float" office:value="503.264801025391">
            <text:p>503.2648010254</text:p>
          </table:table-cell>
          <table:table-cell office:value-type="float" office:value="0.005360707">
            <text:p>0.005360707</text:p>
          </table:table-cell>
          <table:table-cell table:number-columns-repeated="4"/>
        </table:table-row>
        <table:table-row table:style-name="ro1">
          <table:table-cell office:value-type="float" office:value="503.381134033203">
            <text:p>503.3811340332</text:p>
          </table:table-cell>
          <table:table-cell office:value-type="float" office:value="-0.00967215">
            <text:p>-0.00967215</text:p>
          </table:table-cell>
          <table:table-cell table:number-columns-repeated="4"/>
        </table:table-row>
        <table:table-row table:style-name="ro1">
          <table:table-cell office:value-type="float" office:value="503.497497558594">
            <text:p>503.4974975586</text:p>
          </table:table-cell>
          <table:table-cell office:value-type="float" office:value="-0.006309487">
            <text:p>-0.006309487</text:p>
          </table:table-cell>
          <table:table-cell table:number-columns-repeated="4"/>
        </table:table-row>
        <table:table-row table:style-name="ro1">
          <table:table-cell office:value-type="float" office:value="503.613830566406">
            <text:p>503.6138305664</text:p>
          </table:table-cell>
          <table:table-cell office:value-type="float" office:value="-0.0002002222">
            <text:p>-0.0002002222</text:p>
          </table:table-cell>
          <table:table-cell table:number-columns-repeated="4"/>
        </table:table-row>
        <table:table-row table:style-name="ro1">
          <table:table-cell office:value-type="float" office:value="503.730194091797">
            <text:p>503.7301940918</text:p>
          </table:table-cell>
          <table:table-cell office:value-type="float" office:value="-0.002589292">
            <text:p>-0.002589292</text:p>
          </table:table-cell>
          <table:table-cell table:number-columns-repeated="4"/>
        </table:table-row>
        <table:table-row table:style-name="ro1">
          <table:table-cell office:value-type="float" office:value="503.846527099609">
            <text:p>503.8465270996</text:p>
          </table:table-cell>
          <table:table-cell office:value-type="float" office:value="-0.0009901524">
            <text:p>-0.0009901524</text:p>
          </table:table-cell>
          <table:table-cell table:number-columns-repeated="4"/>
        </table:table-row>
        <table:table-row table:style-name="ro1">
          <table:table-cell office:value-type="float" office:value="503.962890625">
            <text:p>503.962890625</text:p>
          </table:table-cell>
          <table:table-cell office:value-type="float" office:value="-0.01093326">
            <text:p>-0.01093326</text:p>
          </table:table-cell>
          <table:table-cell table:number-columns-repeated="4"/>
        </table:table-row>
        <table:table-row table:style-name="ro1">
          <table:table-cell office:value-type="float" office:value="504.079254150391">
            <text:p>504.0792541504</text:p>
          </table:table-cell>
          <table:table-cell office:value-type="float" office:value="-0.0004459469">
            <text:p>-0.0004459469</text:p>
          </table:table-cell>
          <table:table-cell table:number-columns-repeated="4"/>
        </table:table-row>
        <table:table-row table:style-name="ro1">
          <table:table-cell office:value-type="float" office:value="504.195617675781">
            <text:p>504.1956176758</text:p>
          </table:table-cell>
          <table:table-cell office:value-type="float" office:value="0.00527734">
            <text:p>0.00527734</text:p>
          </table:table-cell>
          <table:table-cell table:number-columns-repeated="4"/>
        </table:table-row>
        <table:table-row table:style-name="ro1">
          <table:table-cell office:value-type="float" office:value="504.31201171875">
            <text:p>504.3120117188</text:p>
          </table:table-cell>
          <table:table-cell office:value-type="float" office:value="0.004689271">
            <text:p>0.004689271</text:p>
          </table:table-cell>
          <table:table-cell table:number-columns-repeated="4"/>
        </table:table-row>
        <table:table-row table:style-name="ro1">
          <table:table-cell office:value-type="float" office:value="504.428375244141">
            <text:p>504.4283752441</text:p>
          </table:table-cell>
          <table:table-cell office:value-type="float" office:value="-0.007935079">
            <text:p>-0.007935079</text:p>
          </table:table-cell>
          <table:table-cell table:number-columns-repeated="4"/>
        </table:table-row>
        <table:table-row table:style-name="ro1">
          <table:table-cell office:value-type="float" office:value="504.544738769531">
            <text:p>504.5447387695</text:p>
          </table:table-cell>
          <table:table-cell office:value-type="float" office:value="-0.001815738">
            <text:p>-0.001815738</text:p>
          </table:table-cell>
          <table:table-cell table:number-columns-repeated="4"/>
        </table:table-row>
        <table:table-row table:style-name="ro1">
          <table:table-cell office:value-type="float" office:value="504.6611328125">
            <text:p>504.6611328125</text:p>
          </table:table-cell>
          <table:table-cell office:value-type="float" office:value="0.0005434715">
            <text:p>0.0005434715</text:p>
          </table:table-cell>
          <table:table-cell table:number-columns-repeated="4"/>
        </table:table-row>
        <table:table-row table:style-name="ro1">
          <table:table-cell office:value-type="float" office:value="504.777526855469">
            <text:p>504.7775268555</text:p>
          </table:table-cell>
          <table:table-cell office:value-type="float" office:value="-0.002477728">
            <text:p>-0.002477728</text:p>
          </table:table-cell>
          <table:table-cell table:number-columns-repeated="4"/>
        </table:table-row>
        <table:table-row table:style-name="ro1">
          <table:table-cell office:value-type="float" office:value="504.893920898438">
            <text:p>504.8939208984</text:p>
          </table:table-cell>
          <table:table-cell office:value-type="float" office:value="-0.002460059">
            <text:p>-0.002460059</text:p>
          </table:table-cell>
          <table:table-cell table:number-columns-repeated="4"/>
        </table:table-row>
        <table:table-row table:style-name="ro1">
          <table:table-cell office:value-type="float" office:value="505.010314941406">
            <text:p>505.0103149414</text:p>
          </table:table-cell>
          <table:table-cell office:value-type="float" office:value="0.007418207">
            <text:p>0.007418207</text:p>
          </table:table-cell>
          <table:table-cell table:number-columns-repeated="4"/>
        </table:table-row>
        <table:table-row table:style-name="ro1">
          <table:table-cell office:value-type="float" office:value="505.126708984375">
            <text:p>505.1267089844</text:p>
          </table:table-cell>
          <table:table-cell office:value-type="float" office:value="0.02236496">
            <text:p>0.02236496</text:p>
          </table:table-cell>
          <table:table-cell table:number-columns-repeated="4"/>
        </table:table-row>
        <table:table-row table:style-name="ro1">
          <table:table-cell office:value-type="float" office:value="505.243103027344">
            <text:p>505.2431030273</text:p>
          </table:table-cell>
          <table:table-cell office:value-type="float" office:value="-0.001272713">
            <text:p>-0.001272713</text:p>
          </table:table-cell>
          <table:table-cell table:number-columns-repeated="4"/>
        </table:table-row>
        <table:table-row table:style-name="ro1">
          <table:table-cell office:value-type="float" office:value="505.359497070313">
            <text:p>505.3594970703</text:p>
          </table:table-cell>
          <table:table-cell office:value-type="float" office:value="-0.00542597">
            <text:p>-0.00542597</text:p>
          </table:table-cell>
          <table:table-cell table:number-columns-repeated="4"/>
        </table:table-row>
        <table:table-row table:style-name="ro1">
          <table:table-cell office:value-type="float" office:value="505.475921630859">
            <text:p>505.4759216309</text:p>
          </table:table-cell>
          <table:table-cell office:value-type="float" office:value="0.002462597">
            <text:p>0.002462597</text:p>
          </table:table-cell>
          <table:table-cell table:number-columns-repeated="4"/>
        </table:table-row>
        <table:table-row table:style-name="ro1">
          <table:table-cell office:value-type="float" office:value="505.592346191406">
            <text:p>505.5923461914</text:p>
          </table:table-cell>
          <table:table-cell office:value-type="float" office:value="0.01040615">
            <text:p>0.01040615</text:p>
          </table:table-cell>
          <table:table-cell table:number-columns-repeated="4"/>
        </table:table-row>
        <table:table-row table:style-name="ro1">
          <table:table-cell office:value-type="float" office:value="505.708740234375">
            <text:p>505.7087402344</text:p>
          </table:table-cell>
          <table:table-cell office:value-type="float" office:value="-0.007693753">
            <text:p>-0.007693753</text:p>
          </table:table-cell>
          <table:table-cell table:number-columns-repeated="4"/>
        </table:table-row>
        <table:table-row table:style-name="ro1">
          <table:table-cell office:value-type="float" office:value="505.825164794922">
            <text:p>505.8251647949</text:p>
          </table:table-cell>
          <table:table-cell office:value-type="float" office:value="-0.005694194">
            <text:p>-0.005694194</text:p>
          </table:table-cell>
          <table:table-cell table:number-columns-repeated="4"/>
        </table:table-row>
        <table:table-row table:style-name="ro1">
          <table:table-cell office:value-type="float" office:value="505.941589355469">
            <text:p>505.9415893555</text:p>
          </table:table-cell>
          <table:table-cell office:value-type="float" office:value="0.001258002">
            <text:p>0.001258002</text:p>
          </table:table-cell>
          <table:table-cell table:number-columns-repeated="4"/>
        </table:table-row>
        <table:table-row table:style-name="ro1">
          <table:table-cell office:value-type="float" office:value="506.058013916016">
            <text:p>506.058013916</text:p>
          </table:table-cell>
          <table:table-cell office:value-type="float" office:value="0.001342339">
            <text:p>0.001342339</text:p>
          </table:table-cell>
          <table:table-cell table:number-columns-repeated="4"/>
        </table:table-row>
        <table:table-row table:style-name="ro1">
          <table:table-cell office:value-type="float" office:value="506.174468994141">
            <text:p>506.1744689941</text:p>
          </table:table-cell>
          <table:table-cell office:value-type="float" office:value="0.001575542">
            <text:p>0.001575542</text:p>
          </table:table-cell>
          <table:table-cell table:number-columns-repeated="4"/>
        </table:table-row>
        <table:table-row table:style-name="ro1">
          <table:table-cell office:value-type="float" office:value="506.290893554688">
            <text:p>506.2908935547</text:p>
          </table:table-cell>
          <table:table-cell office:value-type="float" office:value="-0.004417768">
            <text:p>-0.004417768</text:p>
          </table:table-cell>
          <table:table-cell table:number-columns-repeated="4"/>
        </table:table-row>
        <table:table-row table:style-name="ro1">
          <table:table-cell office:value-type="float" office:value="506.407348632813">
            <text:p>506.4073486328</text:p>
          </table:table-cell>
          <table:table-cell office:value-type="float" office:value="0.00732464">
            <text:p>0.00732464</text:p>
          </table:table-cell>
          <table:table-cell table:number-columns-repeated="4"/>
        </table:table-row>
        <table:table-row table:style-name="ro1">
          <table:table-cell office:value-type="float" office:value="506.523773193359">
            <text:p>506.5237731934</text:p>
          </table:table-cell>
          <table:table-cell office:value-type="string">
            <text:p>-7.144213E-05</text:p>
          </table:table-cell>
          <table:table-cell table:number-columns-repeated="4"/>
        </table:table-row>
        <table:table-row table:style-name="ro1">
          <table:table-cell office:value-type="float" office:value="506.640228271484">
            <text:p>506.6402282715</text:p>
          </table:table-cell>
          <table:table-cell office:value-type="float" office:value="0.0005475098">
            <text:p>0.0005475098</text:p>
          </table:table-cell>
          <table:table-cell table:number-columns-repeated="4"/>
        </table:table-row>
        <table:table-row table:style-name="ro1">
          <table:table-cell office:value-type="float" office:value="506.756683349609">
            <text:p>506.7566833496</text:p>
          </table:table-cell>
          <table:table-cell office:value-type="float" office:value="0.0036773">
            <text:p>0.0036773</text:p>
          </table:table-cell>
          <table:table-cell table:number-columns-repeated="4"/>
        </table:table-row>
        <table:table-row table:style-name="ro1">
          <table:table-cell office:value-type="float" office:value="506.873138427734">
            <text:p>506.8731384277</text:p>
          </table:table-cell>
          <table:table-cell office:value-type="float" office:value="0.0089436">
            <text:p>0.0089436</text:p>
          </table:table-cell>
          <table:table-cell table:number-columns-repeated="4"/>
        </table:table-row>
        <table:table-row table:style-name="ro1">
          <table:table-cell office:value-type="float" office:value="506.989593505859">
            <text:p>506.9895935059</text:p>
          </table:table-cell>
          <table:table-cell office:value-type="float" office:value="-0.0009477767">
            <text:p>-0.0009477767</text:p>
          </table:table-cell>
          <table:table-cell table:number-columns-repeated="4"/>
        </table:table-row>
        <table:table-row table:style-name="ro1">
          <table:table-cell office:value-type="float" office:value="507.106048583984">
            <text:p>507.106048584</text:p>
          </table:table-cell>
          <table:table-cell office:value-type="float" office:value="-0.005478796">
            <text:p>-0.005478796</text:p>
          </table:table-cell>
          <table:table-cell table:number-columns-repeated="4"/>
        </table:table-row>
        <table:table-row table:style-name="ro1">
          <table:table-cell office:value-type="float" office:value="507.222534179688">
            <text:p>507.2225341797</text:p>
          </table:table-cell>
          <table:table-cell office:value-type="float" office:value="-0.0126552">
            <text:p>-0.0126552</text:p>
          </table:table-cell>
          <table:table-cell table:number-columns-repeated="4"/>
        </table:table-row>
        <table:table-row table:style-name="ro1">
          <table:table-cell office:value-type="float" office:value="507.338989257813">
            <text:p>507.3389892578</text:p>
          </table:table-cell>
          <table:table-cell office:value-type="float" office:value="-0.00522864">
            <text:p>-0.00522864</text:p>
          </table:table-cell>
          <table:table-cell table:number-columns-repeated="4"/>
        </table:table-row>
        <table:table-row table:style-name="ro1">
          <table:table-cell office:value-type="float" office:value="507.455474853516">
            <text:p>507.4554748535</text:p>
          </table:table-cell>
          <table:table-cell office:value-type="float" office:value="-0.0007870281">
            <text:p>-0.0007870281</text:p>
          </table:table-cell>
          <table:table-cell table:number-columns-repeated="4"/>
        </table:table-row>
        <table:table-row table:style-name="ro1">
          <table:table-cell office:value-type="float" office:value="507.571960449219">
            <text:p>507.5719604492</text:p>
          </table:table-cell>
          <table:table-cell office:value-type="float" office:value="-0.01221433">
            <text:p>-0.01221433</text:p>
          </table:table-cell>
          <table:table-cell table:number-columns-repeated="4"/>
        </table:table-row>
        <table:table-row table:style-name="ro1">
          <table:table-cell office:value-type="float" office:value="507.688446044922">
            <text:p>507.6884460449</text:p>
          </table:table-cell>
          <table:table-cell office:value-type="float" office:value="-0.00837951">
            <text:p>-0.00837951</text:p>
          </table:table-cell>
          <table:table-cell table:number-columns-repeated="4"/>
        </table:table-row>
        <table:table-row table:style-name="ro1">
          <table:table-cell office:value-type="float" office:value="507.804931640625">
            <text:p>507.8049316406</text:p>
          </table:table-cell>
          <table:table-cell office:value-type="float" office:value="-0.002383277">
            <text:p>-0.002383277</text:p>
          </table:table-cell>
          <table:table-cell table:number-columns-repeated="4"/>
        </table:table-row>
        <table:table-row table:style-name="ro1">
          <table:table-cell office:value-type="float" office:value="507.921417236328">
            <text:p>507.9214172363</text:p>
          </table:table-cell>
          <table:table-cell office:value-type="float" office:value="-0.0006707013">
            <text:p>-0.0006707013</text:p>
          </table:table-cell>
          <table:table-cell table:number-columns-repeated="4"/>
        </table:table-row>
        <table:table-row table:style-name="ro1">
          <table:table-cell office:value-type="float" office:value="508.037902832031">
            <text:p>508.037902832</text:p>
          </table:table-cell>
          <table:table-cell office:value-type="float" office:value="-0.005076052">
            <text:p>-0.005076052</text:p>
          </table:table-cell>
          <table:table-cell table:number-columns-repeated="4"/>
        </table:table-row>
        <table:table-row table:style-name="ro1">
          <table:table-cell office:value-type="float" office:value="508.154388427734">
            <text:p>508.1543884277</text:p>
          </table:table-cell>
          <table:table-cell office:value-type="float" office:value="-0.000763318">
            <text:p>-0.000763318</text:p>
          </table:table-cell>
          <table:table-cell table:number-columns-repeated="4"/>
        </table:table-row>
        <table:table-row table:style-name="ro1">
          <table:table-cell office:value-type="float" office:value="508.270904541016">
            <text:p>508.270904541</text:p>
          </table:table-cell>
          <table:table-cell office:value-type="float" office:value="0.001093041">
            <text:p>0.001093041</text:p>
          </table:table-cell>
          <table:table-cell table:number-columns-repeated="4"/>
        </table:table-row>
        <table:table-row table:style-name="ro1">
          <table:table-cell office:value-type="float" office:value="508.387420654297">
            <text:p>508.3874206543</text:p>
          </table:table-cell>
          <table:table-cell office:value-type="float" office:value="-0.005205887">
            <text:p>-0.005205887</text:p>
          </table:table-cell>
          <table:table-cell table:number-columns-repeated="4"/>
        </table:table-row>
        <table:table-row table:style-name="ro1">
          <table:table-cell office:value-type="float" office:value="508.50390625">
            <text:p>508.50390625</text:p>
          </table:table-cell>
          <table:table-cell office:value-type="float" office:value="-0.006367331">
            <text:p>-0.006367331</text:p>
          </table:table-cell>
          <table:table-cell table:number-columns-repeated="4"/>
        </table:table-row>
        <table:table-row table:style-name="ro1">
          <table:table-cell office:value-type="float" office:value="508.620422363281">
            <text:p>508.6204223633</text:p>
          </table:table-cell>
          <table:table-cell office:value-type="float" office:value="-0.008288643">
            <text:p>-0.008288643</text:p>
          </table:table-cell>
          <table:table-cell table:number-columns-repeated="4"/>
        </table:table-row>
        <table:table-row table:style-name="ro1">
          <table:table-cell office:value-type="float" office:value="508.736938476563">
            <text:p>508.7369384766</text:p>
          </table:table-cell>
          <table:table-cell office:value-type="float" office:value="0.0177598">
            <text:p>0.0177598</text:p>
          </table:table-cell>
          <table:table-cell table:number-columns-repeated="4"/>
        </table:table-row>
        <table:table-row table:style-name="ro1">
          <table:table-cell office:value-type="float" office:value="508.853454589844">
            <text:p>508.8534545898</text:p>
          </table:table-cell>
          <table:table-cell office:value-type="float" office:value="0.005000292">
            <text:p>0.005000292</text:p>
          </table:table-cell>
          <table:table-cell table:number-columns-repeated="4"/>
        </table:table-row>
        <table:table-row table:style-name="ro1">
          <table:table-cell office:value-type="float" office:value="508.970001220703">
            <text:p>508.9700012207</text:p>
          </table:table-cell>
          <table:table-cell office:value-type="float" office:value="-0.004797883">
            <text:p>-0.004797883</text:p>
          </table:table-cell>
          <table:table-cell table:number-columns-repeated="4"/>
        </table:table-row>
        <table:table-row table:style-name="ro1">
          <table:table-cell office:value-type="float" office:value="509.086517333984">
            <text:p>509.086517334</text:p>
          </table:table-cell>
          <table:table-cell office:value-type="float" office:value="-0.001841093">
            <text:p>-0.001841093</text:p>
          </table:table-cell>
          <table:table-cell table:number-columns-repeated="4"/>
        </table:table-row>
        <table:table-row table:style-name="ro1">
          <table:table-cell office:value-type="float" office:value="509.203063964844">
            <text:p>509.2030639648</text:p>
          </table:table-cell>
          <table:table-cell office:value-type="float" office:value="0.01269561">
            <text:p>0.01269561</text:p>
          </table:table-cell>
          <table:table-cell table:number-columns-repeated="4"/>
        </table:table-row>
        <table:table-row table:style-name="ro1">
          <table:table-cell office:value-type="float" office:value="509.319580078125">
            <text:p>509.3195800781</text:p>
          </table:table-cell>
          <table:table-cell office:value-type="float" office:value="-0.002073216">
            <text:p>-0.002073216</text:p>
          </table:table-cell>
          <table:table-cell table:number-columns-repeated="4"/>
        </table:table-row>
        <table:table-row table:style-name="ro1">
          <table:table-cell office:value-type="float" office:value="509.436126708984">
            <text:p>509.436126709</text:p>
          </table:table-cell>
          <table:table-cell office:value-type="float" office:value="-0.003030538">
            <text:p>-0.003030538</text:p>
          </table:table-cell>
          <table:table-cell table:number-columns-repeated="4"/>
        </table:table-row>
        <table:table-row table:style-name="ro1">
          <table:table-cell office:value-type="float" office:value="509.552673339844">
            <text:p>509.5526733398</text:p>
          </table:table-cell>
          <table:table-cell office:value-type="float" office:value="-0.005387852">
            <text:p>-0.005387852</text:p>
          </table:table-cell>
          <table:table-cell table:number-columns-repeated="4"/>
        </table:table-row>
        <table:table-row table:style-name="ro1">
          <table:table-cell office:value-type="float" office:value="509.669219970703">
            <text:p>509.6692199707</text:p>
          </table:table-cell>
          <table:table-cell office:value-type="float" office:value="0.006845759">
            <text:p>0.006845759</text:p>
          </table:table-cell>
          <table:table-cell table:number-columns-repeated="4"/>
        </table:table-row>
        <table:table-row table:style-name="ro1">
          <table:table-cell office:value-type="float" office:value="509.785766601563">
            <text:p>509.7857666016</text:p>
          </table:table-cell>
          <table:table-cell office:value-type="float" office:value="0.002628666">
            <text:p>0.002628666</text:p>
          </table:table-cell>
          <table:table-cell table:number-columns-repeated="4"/>
        </table:table-row>
        <table:table-row table:style-name="ro1">
          <table:table-cell office:value-type="float" office:value="509.902313232422">
            <text:p>509.9023132324</text:p>
          </table:table-cell>
          <table:table-cell office:value-type="float" office:value="-0.001931533">
            <text:p>-0.001931533</text:p>
          </table:table-cell>
          <table:table-cell table:number-columns-repeated="4"/>
        </table:table-row>
        <table:table-row table:style-name="ro1">
          <table:table-cell office:value-type="float" office:value="510.018890380859">
            <text:p>510.0188903809</text:p>
          </table:table-cell>
          <table:table-cell office:value-type="float" office:value="-0.008938275">
            <text:p>-0.008938275</text:p>
          </table:table-cell>
          <table:table-cell table:number-columns-repeated="4"/>
        </table:table-row>
        <table:table-row table:style-name="ro1">
          <table:table-cell office:value-type="float" office:value="510.135437011719">
            <text:p>510.1354370117</text:p>
          </table:table-cell>
          <table:table-cell office:value-type="float" office:value="-0.002843422">
            <text:p>-0.002843422</text:p>
          </table:table-cell>
          <table:table-cell table:number-columns-repeated="4"/>
        </table:table-row>
        <table:table-row table:style-name="ro1">
          <table:table-cell office:value-type="float" office:value="510.252014160156">
            <text:p>510.2520141602</text:p>
          </table:table-cell>
          <table:table-cell office:value-type="float" office:value="0.00316698">
            <text:p>0.00316698</text:p>
          </table:table-cell>
          <table:table-cell table:number-columns-repeated="4"/>
        </table:table-row>
        <table:table-row table:style-name="ro1">
          <table:table-cell office:value-type="float" office:value="510.368560791016">
            <text:p>510.368560791</text:p>
          </table:table-cell>
          <table:table-cell office:value-type="float" office:value="-0.003850039">
            <text:p>-0.003850039</text:p>
          </table:table-cell>
          <table:table-cell table:number-columns-repeated="4"/>
        </table:table-row>
        <table:table-row table:style-name="ro1">
          <table:table-cell office:value-type="float" office:value="510.485137939453">
            <text:p>510.4851379395</text:p>
          </table:table-cell>
          <table:table-cell office:value-type="float" office:value="-0.01092095">
            <text:p>-0.01092095</text:p>
          </table:table-cell>
          <table:table-cell table:number-columns-repeated="4"/>
        </table:table-row>
        <table:table-row table:style-name="ro1">
          <table:table-cell office:value-type="float" office:value="510.601715087891">
            <text:p>510.6017150879</text:p>
          </table:table-cell>
          <table:table-cell office:value-type="float" office:value="0.004780001">
            <text:p>0.004780001</text:p>
          </table:table-cell>
          <table:table-cell table:number-columns-repeated="4"/>
        </table:table-row>
        <table:table-row table:style-name="ro1">
          <table:table-cell office:value-type="float" office:value="510.718322753906">
            <text:p>510.7183227539</text:p>
          </table:table-cell>
          <table:table-cell office:value-type="float" office:value="0.001972387">
            <text:p>0.001972387</text:p>
          </table:table-cell>
          <table:table-cell table:number-columns-repeated="4"/>
        </table:table-row>
        <table:table-row table:style-name="ro1">
          <table:table-cell office:value-type="float" office:value="510.834899902344">
            <text:p>510.8348999023</text:p>
          </table:table-cell>
          <table:table-cell office:value-type="float" office:value="-0.01097349">
            <text:p>-0.01097349</text:p>
          </table:table-cell>
          <table:table-cell table:number-columns-repeated="4"/>
        </table:table-row>
        <table:table-row table:style-name="ro1">
          <table:table-cell office:value-type="float" office:value="510.951477050781">
            <text:p>510.9514770508</text:p>
          </table:table-cell>
          <table:table-cell office:value-type="float" office:value="0.008663321">
            <text:p>0.008663321</text:p>
          </table:table-cell>
          <table:table-cell table:number-columns-repeated="4"/>
        </table:table-row>
        <table:table-row table:style-name="ro1">
          <table:table-cell office:value-type="float" office:value="511.068084716797">
            <text:p>511.0680847168</text:p>
          </table:table-cell>
          <table:table-cell office:value-type="float" office:value="-0.002215628">
            <text:p>-0.002215628</text:p>
          </table:table-cell>
          <table:table-cell table:number-columns-repeated="4"/>
        </table:table-row>
        <table:table-row table:style-name="ro1">
          <table:table-cell office:value-type="float" office:value="511.184661865234">
            <text:p>511.1846618652</text:p>
          </table:table-cell>
          <table:table-cell office:value-type="float" office:value="-0.004423099">
            <text:p>-0.004423099</text:p>
          </table:table-cell>
          <table:table-cell table:number-columns-repeated="4"/>
        </table:table-row>
        <table:table-row table:style-name="ro1">
          <table:table-cell office:value-type="float" office:value="511.30126953125">
            <text:p>511.3012695313</text:p>
          </table:table-cell>
          <table:table-cell office:value-type="float" office:value="-0.01024582">
            <text:p>-0.01024582</text:p>
          </table:table-cell>
          <table:table-cell table:number-columns-repeated="4"/>
        </table:table-row>
        <table:table-row table:style-name="ro1">
          <table:table-cell office:value-type="float" office:value="511.417877197266">
            <text:p>511.4178771973</text:p>
          </table:table-cell>
          <table:table-cell office:value-type="float" office:value="-0.01185762">
            <text:p>-0.01185762</text:p>
          </table:table-cell>
          <table:table-cell table:number-columns-repeated="4"/>
        </table:table-row>
        <table:table-row table:style-name="ro1">
          <table:table-cell office:value-type="float" office:value="511.534484863281">
            <text:p>511.5344848633</text:p>
          </table:table-cell>
          <table:table-cell office:value-type="float" office:value="-0.003872104">
            <text:p>-0.003872104</text:p>
          </table:table-cell>
          <table:table-cell table:number-columns-repeated="4"/>
        </table:table-row>
        <table:table-row table:style-name="ro1">
          <table:table-cell office:value-type="float" office:value="511.651092529297">
            <text:p>511.6510925293</text:p>
          </table:table-cell>
          <table:table-cell office:value-type="float" office:value="-0.005036884">
            <text:p>-0.005036884</text:p>
          </table:table-cell>
          <table:table-cell table:number-columns-repeated="4"/>
        </table:table-row>
        <table:table-row table:style-name="ro1">
          <table:table-cell office:value-type="float" office:value="511.767700195313">
            <text:p>511.7677001953</text:p>
          </table:table-cell>
          <table:table-cell office:value-type="float" office:value="-0.002493268">
            <text:p>-0.002493268</text:p>
          </table:table-cell>
          <table:table-cell table:number-columns-repeated="4"/>
        </table:table-row>
        <table:table-row table:style-name="ro1">
          <table:table-cell office:value-type="float" office:value="511.884338378906">
            <text:p>511.8843383789</text:p>
          </table:table-cell>
          <table:table-cell office:value-type="float" office:value="-0.004014847">
            <text:p>-0.004014847</text:p>
          </table:table-cell>
          <table:table-cell table:number-columns-repeated="4"/>
        </table:table-row>
        <table:table-row table:style-name="ro1">
          <table:table-cell office:value-type="float" office:value="512.0009765625">
            <text:p>512.0009765625</text:p>
          </table:table-cell>
          <table:table-cell office:value-type="float" office:value="-0.004081539">
            <text:p>-0.004081539</text:p>
          </table:table-cell>
          <table:table-cell table:number-columns-repeated="4"/>
        </table:table-row>
        <table:table-row table:style-name="ro1">
          <table:table-cell office:value-type="float" office:value="512.117553710938">
            <text:p>512.1175537109</text:p>
          </table:table-cell>
          <table:table-cell office:value-type="float" office:value="0.00451191">
            <text:p>0.00451191</text:p>
          </table:table-cell>
          <table:table-cell table:number-columns-repeated="4"/>
        </table:table-row>
        <table:table-row table:style-name="ro1">
          <table:table-cell office:value-type="float" office:value="512.234191894531">
            <text:p>512.2341918945</text:p>
          </table:table-cell>
          <table:table-cell office:value-type="float" office:value="0.0464294">
            <text:p>0.0464294</text:p>
          </table:table-cell>
          <table:table-cell table:number-columns-repeated="4"/>
        </table:table-row>
        <table:table-row table:style-name="ro1">
          <table:table-cell office:value-type="float" office:value="512.350830078125">
            <text:p>512.3508300781</text:p>
          </table:table-cell>
          <table:table-cell office:value-type="float" office:value="-0.001749419">
            <text:p>-0.001749419</text:p>
          </table:table-cell>
          <table:table-cell table:number-columns-repeated="4"/>
        </table:table-row>
        <table:table-row table:style-name="ro1">
          <table:table-cell office:value-type="float" office:value="512.467468261719">
            <text:p>512.4674682617</text:p>
          </table:table-cell>
          <table:table-cell office:value-type="float" office:value="0.009470003">
            <text:p>0.009470003</text:p>
          </table:table-cell>
          <table:table-cell table:number-columns-repeated="4"/>
        </table:table-row>
        <table:table-row table:style-name="ro1">
          <table:table-cell office:value-type="float" office:value="512.584106445313">
            <text:p>512.5841064453</text:p>
          </table:table-cell>
          <table:table-cell office:value-type="float" office:value="-0.002251327">
            <text:p>-0.002251327</text:p>
          </table:table-cell>
          <table:table-cell table:number-columns-repeated="4"/>
        </table:table-row>
        <table:table-row table:style-name="ro1">
          <table:table-cell office:value-type="float" office:value="512.700744628906">
            <text:p>512.7007446289</text:p>
          </table:table-cell>
          <table:table-cell office:value-type="float" office:value="0.01827677">
            <text:p>0.01827677</text:p>
          </table:table-cell>
          <table:table-cell table:number-columns-repeated="4"/>
        </table:table-row>
        <table:table-row table:style-name="ro1">
          <table:table-cell office:value-type="float" office:value="512.8173828125">
            <text:p>512.8173828125</text:p>
          </table:table-cell>
          <table:table-cell office:value-type="float" office:value="-0.01029209">
            <text:p>-0.01029209</text:p>
          </table:table-cell>
          <table:table-cell table:number-columns-repeated="4"/>
        </table:table-row>
        <table:table-row table:style-name="ro1">
          <table:table-cell office:value-type="float" office:value="512.93408203125">
            <text:p>512.9340820313</text:p>
          </table:table-cell>
          <table:table-cell office:value-type="float" office:value="0.00514459">
            <text:p>0.00514459</text:p>
          </table:table-cell>
          <table:table-cell table:number-columns-repeated="4"/>
        </table:table-row>
        <table:table-row table:style-name="ro1">
          <table:table-cell office:value-type="float" office:value="513.050720214844">
            <text:p>513.0507202148</text:p>
          </table:table-cell>
          <table:table-cell office:value-type="float" office:value="0.004415323">
            <text:p>0.004415323</text:p>
          </table:table-cell>
          <table:table-cell table:number-columns-repeated="4"/>
        </table:table-row>
        <table:table-row table:style-name="ro1">
          <table:table-cell office:value-type="float" office:value="513.167358398438">
            <text:p>513.1673583984</text:p>
          </table:table-cell>
          <table:table-cell office:value-type="float" office:value="-0.008909199">
            <text:p>-0.008909199</text:p>
          </table:table-cell>
          <table:table-cell table:number-columns-repeated="4"/>
        </table:table-row>
        <table:table-row table:style-name="ro1">
          <table:table-cell office:value-type="float" office:value="513.284057617188">
            <text:p>513.2840576172</text:p>
          </table:table-cell>
          <table:table-cell office:value-type="float" office:value="-0.009909864">
            <text:p>-0.009909864</text:p>
          </table:table-cell>
          <table:table-cell table:number-columns-repeated="4"/>
        </table:table-row>
        <table:table-row table:style-name="ro1">
          <table:table-cell office:value-type="float" office:value="513.400695800781">
            <text:p>513.4006958008</text:p>
          </table:table-cell>
          <table:table-cell office:value-type="float" office:value="0.00875008">
            <text:p>0.00875008</text:p>
          </table:table-cell>
          <table:table-cell table:number-columns-repeated="4"/>
        </table:table-row>
        <table:table-row table:style-name="ro1">
          <table:table-cell office:value-type="float" office:value="513.517395019531">
            <text:p>513.5173950195</text:p>
          </table:table-cell>
          <table:table-cell office:value-type="float" office:value="0.004923943">
            <text:p>0.004923943</text:p>
          </table:table-cell>
          <table:table-cell table:number-columns-repeated="4"/>
        </table:table-row>
        <table:table-row table:style-name="ro1">
          <table:table-cell office:value-type="float" office:value="513.634033203125">
            <text:p>513.6340332031</text:p>
          </table:table-cell>
          <table:table-cell office:value-type="float" office:value="-0.005272465">
            <text:p>-0.005272465</text:p>
          </table:table-cell>
          <table:table-cell table:number-columns-repeated="4"/>
        </table:table-row>
        <table:table-row table:style-name="ro1">
          <table:table-cell office:value-type="float" office:value="513.750732421875">
            <text:p>513.7507324219</text:p>
          </table:table-cell>
          <table:table-cell office:value-type="float" office:value="0.005224629">
            <text:p>0.005224629</text:p>
          </table:table-cell>
          <table:table-cell table:number-columns-repeated="4"/>
        </table:table-row>
        <table:table-row table:style-name="ro1">
          <table:table-cell office:value-type="float" office:value="513.867431640625">
            <text:p>513.8674316406</text:p>
          </table:table-cell>
          <table:table-cell office:value-type="float" office:value="0.005207377">
            <text:p>0.005207377</text:p>
          </table:table-cell>
          <table:table-cell table:number-columns-repeated="4"/>
        </table:table-row>
        <table:table-row table:style-name="ro1">
          <table:table-cell office:value-type="float" office:value="513.984069824219">
            <text:p>513.9840698242</text:p>
          </table:table-cell>
          <table:table-cell office:value-type="float" office:value="0.005958734">
            <text:p>0.005958734</text:p>
          </table:table-cell>
          <table:table-cell table:number-columns-repeated="4"/>
        </table:table-row>
        <table:table-row table:style-name="ro1">
          <table:table-cell office:value-type="float" office:value="514.100769042969">
            <text:p>514.100769043</text:p>
          </table:table-cell>
          <table:table-cell office:value-type="float" office:value="0.007592415">
            <text:p>0.007592415</text:p>
          </table:table-cell>
          <table:table-cell table:number-columns-repeated="4"/>
        </table:table-row>
        <table:table-row table:style-name="ro1">
          <table:table-cell office:value-type="float" office:value="514.217468261719">
            <text:p>514.2174682617</text:p>
          </table:table-cell>
          <table:table-cell office:value-type="float" office:value="-0.003425659">
            <text:p>-0.003425659</text:p>
          </table:table-cell>
          <table:table-cell table:number-columns-repeated="4"/>
        </table:table-row>
        <table:table-row table:style-name="ro1">
          <table:table-cell office:value-type="float" office:value="514.334167480469">
            <text:p>514.3341674805</text:p>
          </table:table-cell>
          <table:table-cell office:value-type="float" office:value="0.00078978">
            <text:p>0.00078978</text:p>
          </table:table-cell>
          <table:table-cell table:number-columns-repeated="4"/>
        </table:table-row>
        <table:table-row table:style-name="ro1">
          <table:table-cell office:value-type="float" office:value="514.450866699219">
            <text:p>514.4508666992</text:p>
          </table:table-cell>
          <table:table-cell office:value-type="float" office:value="0.005865072">
            <text:p>0.005865072</text:p>
          </table:table-cell>
          <table:table-cell table:number-columns-repeated="4"/>
        </table:table-row>
        <table:table-row table:style-name="ro1">
          <table:table-cell office:value-type="float" office:value="514.567565917969">
            <text:p>514.567565918</text:p>
          </table:table-cell>
          <table:table-cell office:value-type="float" office:value="-0.006472215">
            <text:p>-0.006472215</text:p>
          </table:table-cell>
          <table:table-cell table:number-columns-repeated="4"/>
        </table:table-row>
        <table:table-row table:style-name="ro1">
          <table:table-cell office:value-type="float" office:value="514.684265136719">
            <text:p>514.6842651367</text:p>
          </table:table-cell>
          <table:table-cell office:value-type="float" office:value="0.001085046">
            <text:p>0.001085046</text:p>
          </table:table-cell>
          <table:table-cell table:number-columns-repeated="4"/>
        </table:table-row>
        <table:table-row table:style-name="ro1">
          <table:table-cell office:value-type="float" office:value="514.801025390625">
            <text:p>514.8010253906</text:p>
          </table:table-cell>
          <table:table-cell office:value-type="float" office:value="-0.0001939719">
            <text:p>-0.0001939719</text:p>
          </table:table-cell>
          <table:table-cell table:number-columns-repeated="4"/>
        </table:table-row>
        <table:table-row table:style-name="ro1">
          <table:table-cell office:value-type="float" office:value="514.917724609375">
            <text:p>514.9177246094</text:p>
          </table:table-cell>
          <table:table-cell office:value-type="float" office:value="0.004440976">
            <text:p>0.004440976</text:p>
          </table:table-cell>
          <table:table-cell table:number-columns-repeated="4"/>
        </table:table-row>
        <table:table-row table:style-name="ro1">
          <table:table-cell office:value-type="float" office:value="515.034423828125">
            <text:p>515.0344238281</text:p>
          </table:table-cell>
          <table:table-cell office:value-type="float" office:value="-0.004262262">
            <text:p>-0.004262262</text:p>
          </table:table-cell>
          <table:table-cell table:number-columns-repeated="4"/>
        </table:table-row>
        <table:table-row table:style-name="ro1">
          <table:table-cell office:value-type="float" office:value="515.151184082031">
            <text:p>515.151184082</text:p>
          </table:table-cell>
          <table:table-cell office:value-type="float" office:value="-0.01176643">
            <text:p>-0.01176643</text:p>
          </table:table-cell>
          <table:table-cell table:number-columns-repeated="4"/>
        </table:table-row>
        <table:table-row table:style-name="ro1">
          <table:table-cell office:value-type="float" office:value="515.267883300781">
            <text:p>515.2678833008</text:p>
          </table:table-cell>
          <table:table-cell office:value-type="float" office:value="-0.001614727">
            <text:p>-0.001614727</text:p>
          </table:table-cell>
          <table:table-cell table:number-columns-repeated="4"/>
        </table:table-row>
        <table:table-row table:style-name="ro1">
          <table:table-cell office:value-type="float" office:value="515.384643554688">
            <text:p>515.3846435547</text:p>
          </table:table-cell>
          <table:table-cell office:value-type="float" office:value="0.005003976">
            <text:p>0.005003976</text:p>
          </table:table-cell>
          <table:table-cell table:number-columns-repeated="4"/>
        </table:table-row>
        <table:table-row table:style-name="ro1">
          <table:table-cell office:value-type="float" office:value="515.501342773438">
            <text:p>515.5013427734</text:p>
          </table:table-cell>
          <table:table-cell office:value-type="float" office:value="-0.001106455">
            <text:p>-0.001106455</text:p>
          </table:table-cell>
          <table:table-cell table:number-columns-repeated="4"/>
        </table:table-row>
        <table:table-row table:style-name="ro1">
          <table:table-cell office:value-type="float" office:value="515.618103027344">
            <text:p>515.6181030273</text:p>
          </table:table-cell>
          <table:table-cell office:value-type="float" office:value="0.00167073">
            <text:p>0.00167073</text:p>
          </table:table-cell>
          <table:table-cell table:number-columns-repeated="4"/>
        </table:table-row>
        <table:table-row table:style-name="ro1">
          <table:table-cell office:value-type="float" office:value="515.734802246094">
            <text:p>515.7348022461</text:p>
          </table:table-cell>
          <table:table-cell office:value-type="float" office:value="-0.001859322">
            <text:p>-0.001859322</text:p>
          </table:table-cell>
          <table:table-cell table:number-columns-repeated="4"/>
        </table:table-row>
        <table:table-row table:style-name="ro1">
          <table:table-cell office:value-type="float" office:value="515.8515625">
            <text:p>515.8515625</text:p>
          </table:table-cell>
          <table:table-cell office:value-type="float" office:value="0.01298772">
            <text:p>0.01298772</text:p>
          </table:table-cell>
          <table:table-cell table:number-columns-repeated="4"/>
        </table:table-row>
        <table:table-row table:style-name="ro1">
          <table:table-cell office:value-type="float" office:value="515.968322753906">
            <text:p>515.9683227539</text:p>
          </table:table-cell>
          <table:table-cell office:value-type="float" office:value="-0.00044942">
            <text:p>-0.00044942</text:p>
          </table:table-cell>
          <table:table-cell table:number-columns-repeated="4"/>
        </table:table-row>
        <table:table-row table:style-name="ro1">
          <table:table-cell office:value-type="float" office:value="516.085083007813">
            <text:p>516.0850830078</text:p>
          </table:table-cell>
          <table:table-cell office:value-type="float" office:value="0.001031951">
            <text:p>0.001031951</text:p>
          </table:table-cell>
          <table:table-cell table:number-columns-repeated="4"/>
        </table:table-row>
        <table:table-row table:style-name="ro1">
          <table:table-cell office:value-type="float" office:value="516.201843261719">
            <text:p>516.2018432617</text:p>
          </table:table-cell>
          <table:table-cell office:value-type="float" office:value="-0.001823038">
            <text:p>-0.001823038</text:p>
          </table:table-cell>
          <table:table-cell table:number-columns-repeated="4"/>
        </table:table-row>
        <table:table-row table:style-name="ro1">
          <table:table-cell office:value-type="float" office:value="516.318603515625">
            <text:p>516.3186035156</text:p>
          </table:table-cell>
          <table:table-cell office:value-type="float" office:value="-0.003760601">
            <text:p>-0.003760601</text:p>
          </table:table-cell>
          <table:table-cell table:number-columns-repeated="4"/>
        </table:table-row>
        <table:table-row table:style-name="ro1">
          <table:table-cell office:value-type="float" office:value="516.435363769531">
            <text:p>516.4353637695</text:p>
          </table:table-cell>
          <table:table-cell office:value-type="float" office:value="-0.006606572">
            <text:p>-0.006606572</text:p>
          </table:table-cell>
          <table:table-cell table:number-columns-repeated="4"/>
        </table:table-row>
        <table:table-row table:style-name="ro1">
          <table:table-cell office:value-type="float" office:value="516.552124023438">
            <text:p>516.5521240234</text:p>
          </table:table-cell>
          <table:table-cell office:value-type="float" office:value="-0.002569052">
            <text:p>-0.002569052</text:p>
          </table:table-cell>
          <table:table-cell table:number-columns-repeated="4"/>
        </table:table-row>
        <table:table-row table:style-name="ro1">
          <table:table-cell office:value-type="float" office:value="516.668884277344">
            <text:p>516.6688842773</text:p>
          </table:table-cell>
          <table:table-cell office:value-type="float" office:value="-0.002068059">
            <text:p>-0.002068059</text:p>
          </table:table-cell>
          <table:table-cell table:number-columns-repeated="4"/>
        </table:table-row>
        <table:table-row table:style-name="ro1">
          <table:table-cell office:value-type="float" office:value="516.78564453125">
            <text:p>516.7856445313</text:p>
          </table:table-cell>
          <table:table-cell office:value-type="float" office:value="0.01183421">
            <text:p>0.01183421</text:p>
          </table:table-cell>
          <table:table-cell table:number-columns-repeated="4"/>
        </table:table-row>
        <table:table-row table:style-name="ro1">
          <table:table-cell office:value-type="float" office:value="516.902465820313">
            <text:p>516.9024658203</text:p>
          </table:table-cell>
          <table:table-cell office:value-type="float" office:value="0.02751169">
            <text:p>0.02751169</text:p>
          </table:table-cell>
          <table:table-cell table:number-columns-repeated="4"/>
        </table:table-row>
        <table:table-row table:style-name="ro1">
          <table:table-cell office:value-type="float" office:value="517.019226074219">
            <text:p>517.0192260742</text:p>
          </table:table-cell>
          <table:table-cell office:value-type="float" office:value="-0.006115084">
            <text:p>-0.006115084</text:p>
          </table:table-cell>
          <table:table-cell table:number-columns-repeated="4"/>
        </table:table-row>
        <table:table-row table:style-name="ro1">
          <table:table-cell office:value-type="float" office:value="517.135986328125">
            <text:p>517.1359863281</text:p>
          </table:table-cell>
          <table:table-cell office:value-type="float" office:value="0.0003077183">
            <text:p>0.0003077183</text:p>
          </table:table-cell>
          <table:table-cell table:number-columns-repeated="4"/>
        </table:table-row>
        <table:table-row table:style-name="ro1">
          <table:table-cell office:value-type="float" office:value="517.252807617188">
            <text:p>517.2528076172</text:p>
          </table:table-cell>
          <table:table-cell office:value-type="float" office:value="0.005789003">
            <text:p>0.005789003</text:p>
          </table:table-cell>
          <table:table-cell table:number-columns-repeated="4"/>
        </table:table-row>
        <table:table-row table:style-name="ro1">
          <table:table-cell office:value-type="float" office:value="517.369567871094">
            <text:p>517.3695678711</text:p>
          </table:table-cell>
          <table:table-cell office:value-type="float" office:value="-0.006555823">
            <text:p>-0.006555823</text:p>
          </table:table-cell>
          <table:table-cell table:number-columns-repeated="4"/>
        </table:table-row>
        <table:table-row table:style-name="ro1">
          <table:table-cell office:value-type="float" office:value="517.486389160156">
            <text:p>517.4863891602</text:p>
          </table:table-cell>
          <table:table-cell office:value-type="string">
            <text:p>-3.485711E-05</text:p>
          </table:table-cell>
          <table:table-cell table:number-columns-repeated="4"/>
        </table:table-row>
        <table:table-row table:style-name="ro1">
          <table:table-cell office:value-type="float" office:value="517.603210449219">
            <text:p>517.6032104492</text:p>
          </table:table-cell>
          <table:table-cell office:value-type="float" office:value="0.01167934">
            <text:p>0.01167934</text:p>
          </table:table-cell>
          <table:table-cell table:number-columns-repeated="4"/>
        </table:table-row>
        <table:table-row table:style-name="ro1">
          <table:table-cell office:value-type="float" office:value="517.719970703125">
            <text:p>517.7199707031</text:p>
          </table:table-cell>
          <table:table-cell office:value-type="float" office:value="0.001247008">
            <text:p>0.001247008</text:p>
          </table:table-cell>
          <table:table-cell table:number-columns-repeated="4"/>
        </table:table-row>
        <table:table-row table:style-name="ro1">
          <table:table-cell office:value-type="float" office:value="517.836791992188">
            <text:p>517.8367919922</text:p>
          </table:table-cell>
          <table:table-cell office:value-type="float" office:value="0.003115467">
            <text:p>0.003115467</text:p>
          </table:table-cell>
          <table:table-cell table:number-columns-repeated="4"/>
        </table:table-row>
        <table:table-row table:style-name="ro1">
          <table:table-cell office:value-type="float" office:value="517.95361328125">
            <text:p>517.9536132813</text:p>
          </table:table-cell>
          <table:table-cell office:value-type="string">
            <text:p>-8.60915E-06</text:p>
          </table:table-cell>
          <table:table-cell table:number-columns-repeated="4"/>
        </table:table-row>
        <table:table-row table:style-name="ro1">
          <table:table-cell office:value-type="float" office:value="518.070434570313">
            <text:p>518.0704345703</text:p>
          </table:table-cell>
          <table:table-cell office:value-type="float" office:value="-0.002994521">
            <text:p>-0.002994521</text:p>
          </table:table-cell>
          <table:table-cell table:number-columns-repeated="4"/>
        </table:table-row>
        <table:table-row table:style-name="ro1">
          <table:table-cell office:value-type="float" office:value="518.187255859375">
            <text:p>518.1872558594</text:p>
          </table:table-cell>
          <table:table-cell office:value-type="float" office:value="0.005229549">
            <text:p>0.005229549</text:p>
          </table:table-cell>
          <table:table-cell table:number-columns-repeated="4"/>
        </table:table-row>
        <table:table-row table:style-name="ro1">
          <table:table-cell office:value-type="float" office:value="518.304077148438">
            <text:p>518.3040771484</text:p>
          </table:table-cell>
          <table:table-cell office:value-type="float" office:value="0.01150906">
            <text:p>0.01150906</text:p>
          </table:table-cell>
          <table:table-cell table:number-columns-repeated="4"/>
        </table:table-row>
        <table:table-row table:style-name="ro1">
          <table:table-cell office:value-type="float" office:value="518.4208984375">
            <text:p>518.4208984375</text:p>
          </table:table-cell>
          <table:table-cell office:value-type="float" office:value="0.004078928">
            <text:p>0.004078928</text:p>
          </table:table-cell>
          <table:table-cell table:number-columns-repeated="4"/>
        </table:table-row>
        <table:table-row table:style-name="ro1">
          <table:table-cell office:value-type="float" office:value="518.537719726563">
            <text:p>518.5377197266</text:p>
          </table:table-cell>
          <table:table-cell office:value-type="float" office:value="0.0177419">
            <text:p>0.0177419</text:p>
          </table:table-cell>
          <table:table-cell table:number-columns-repeated="4"/>
        </table:table-row>
        <table:table-row table:style-name="ro1">
          <table:table-cell office:value-type="float" office:value="518.654541015625">
            <text:p>518.6545410156</text:p>
          </table:table-cell>
          <table:table-cell office:value-type="float" office:value="0.006995969">
            <text:p>0.006995969</text:p>
          </table:table-cell>
          <table:table-cell table:number-columns-repeated="4"/>
        </table:table-row>
        <table:table-row table:style-name="ro1">
          <table:table-cell office:value-type="float" office:value="518.771362304688">
            <text:p>518.7713623047</text:p>
          </table:table-cell>
          <table:table-cell office:value-type="float" office:value="-0.008352427">
            <text:p>-0.008352427</text:p>
          </table:table-cell>
          <table:table-cell table:number-columns-repeated="4"/>
        </table:table-row>
        <table:table-row table:style-name="ro1">
          <table:table-cell office:value-type="float" office:value="518.888244628906">
            <text:p>518.8882446289</text:p>
          </table:table-cell>
          <table:table-cell office:value-type="float" office:value="-0.00866734">
            <text:p>-0.00866734</text:p>
          </table:table-cell>
          <table:table-cell table:number-columns-repeated="4"/>
        </table:table-row>
        <table:table-row table:style-name="ro1">
          <table:table-cell office:value-type="float" office:value="519.005065917969">
            <text:p>519.005065918</text:p>
          </table:table-cell>
          <table:table-cell office:value-type="float" office:value="0.00221999">
            <text:p>0.00221999</text:p>
          </table:table-cell>
          <table:table-cell table:number-columns-repeated="4"/>
        </table:table-row>
        <table:table-row table:style-name="ro1">
          <table:table-cell office:value-type="float" office:value="519.121887207031">
            <text:p>519.121887207</text:p>
          </table:table-cell>
          <table:table-cell office:value-type="float" office:value="-0.001030606">
            <text:p>-0.001030606</text:p>
          </table:table-cell>
          <table:table-cell table:number-columns-repeated="4"/>
        </table:table-row>
        <table:table-row table:style-name="ro1">
          <table:table-cell office:value-type="float" office:value="519.23876953125">
            <text:p>519.2387695313</text:p>
          </table:table-cell>
          <table:table-cell office:value-type="float" office:value="0.003748715">
            <text:p>0.003748715</text:p>
          </table:table-cell>
          <table:table-cell table:number-columns-repeated="4"/>
        </table:table-row>
        <table:table-row table:style-name="ro1">
          <table:table-cell office:value-type="float" office:value="519.355590820313">
            <text:p>519.3555908203</text:p>
          </table:table-cell>
          <table:table-cell office:value-type="float" office:value="-0.003309974">
            <text:p>-0.003309974</text:p>
          </table:table-cell>
          <table:table-cell table:number-columns-repeated="4"/>
        </table:table-row>
        <table:table-row table:style-name="ro1">
          <table:table-cell office:value-type="float" office:value="519.472473144531">
            <text:p>519.4724731445</text:p>
          </table:table-cell>
          <table:table-cell office:value-type="float" office:value="0.003067646">
            <text:p>0.003067646</text:p>
          </table:table-cell>
          <table:table-cell table:number-columns-repeated="4"/>
        </table:table-row>
        <table:table-row table:style-name="ro1">
          <table:table-cell office:value-type="float" office:value="519.58935546875">
            <text:p>519.5893554688</text:p>
          </table:table-cell>
          <table:table-cell office:value-type="float" office:value="0.001302447">
            <text:p>0.001302447</text:p>
          </table:table-cell>
          <table:table-cell table:number-columns-repeated="4"/>
        </table:table-row>
        <table:table-row table:style-name="ro1">
          <table:table-cell office:value-type="float" office:value="519.706176757813">
            <text:p>519.7061767578</text:p>
          </table:table-cell>
          <table:table-cell office:value-type="float" office:value="-0.003514391">
            <text:p>-0.003514391</text:p>
          </table:table-cell>
          <table:table-cell table:number-columns-repeated="4"/>
        </table:table-row>
        <table:table-row table:style-name="ro1">
          <table:table-cell office:value-type="float" office:value="519.823059082031">
            <text:p>519.823059082</text:p>
          </table:table-cell>
          <table:table-cell office:value-type="float" office:value="-0.006861347">
            <text:p>-0.006861347</text:p>
          </table:table-cell>
          <table:table-cell table:number-columns-repeated="4"/>
        </table:table-row>
        <table:table-row table:style-name="ro1">
          <table:table-cell office:value-type="float" office:value="519.93994140625">
            <text:p>519.9399414063</text:p>
          </table:table-cell>
          <table:table-cell office:value-type="float" office:value="0.01426388">
            <text:p>0.01426388</text:p>
          </table:table-cell>
          <table:table-cell table:number-columns-repeated="4"/>
        </table:table-row>
        <table:table-row table:style-name="ro1">
          <table:table-cell office:value-type="float" office:value="520.056823730469">
            <text:p>520.0568237305</text:p>
          </table:table-cell>
          <table:table-cell office:value-type="float" office:value="-0.004168718">
            <text:p>-0.004168718</text:p>
          </table:table-cell>
          <table:table-cell table:number-columns-repeated="4"/>
        </table:table-row>
        <table:table-row table:style-name="ro1">
          <table:table-cell office:value-type="float" office:value="520.173706054688">
            <text:p>520.1737060547</text:p>
          </table:table-cell>
          <table:table-cell office:value-type="string">
            <text:p>2.114155E-05</text:p>
          </table:table-cell>
          <table:table-cell table:number-columns-repeated="4"/>
        </table:table-row>
        <table:table-row table:style-name="ro1">
          <table:table-cell office:value-type="float" office:value="520.290588378906">
            <text:p>520.2905883789</text:p>
          </table:table-cell>
          <table:table-cell office:value-type="float" office:value="-0.005683539">
            <text:p>-0.005683539</text:p>
          </table:table-cell>
          <table:table-cell table:number-columns-repeated="4"/>
        </table:table-row>
        <table:table-row table:style-name="ro1">
          <table:table-cell office:value-type="float" office:value="520.407470703125">
            <text:p>520.4074707031</text:p>
          </table:table-cell>
          <table:table-cell office:value-type="float" office:value="-0.001610329">
            <text:p>-0.001610329</text:p>
          </table:table-cell>
          <table:table-cell table:number-columns-repeated="4"/>
        </table:table-row>
        <table:table-row table:style-name="ro1">
          <table:table-cell office:value-type="float" office:value="520.524353027344">
            <text:p>520.5243530273</text:p>
          </table:table-cell>
          <table:table-cell office:value-type="float" office:value="-0.004848645">
            <text:p>-0.004848645</text:p>
          </table:table-cell>
          <table:table-cell table:number-columns-repeated="4"/>
        </table:table-row>
        <table:table-row table:style-name="ro1">
          <table:table-cell office:value-type="float" office:value="520.641235351563">
            <text:p>520.6412353516</text:p>
          </table:table-cell>
          <table:table-cell office:value-type="float" office:value="-0.007346387">
            <text:p>-0.007346387</text:p>
          </table:table-cell>
          <table:table-cell table:number-columns-repeated="4"/>
        </table:table-row>
        <table:table-row table:style-name="ro1">
          <table:table-cell office:value-type="float" office:value="520.758178710938">
            <text:p>520.7581787109</text:p>
          </table:table-cell>
          <table:table-cell office:value-type="float" office:value="-0.002121676">
            <text:p>-0.002121676</text:p>
          </table:table-cell>
          <table:table-cell table:number-columns-repeated="4"/>
        </table:table-row>
        <table:table-row table:style-name="ro1">
          <table:table-cell office:value-type="float" office:value="520.875061035156">
            <text:p>520.8750610352</text:p>
          </table:table-cell>
          <table:table-cell office:value-type="float" office:value="0.02067209">
            <text:p>0.02067209</text:p>
          </table:table-cell>
          <table:table-cell table:number-columns-repeated="4"/>
        </table:table-row>
        <table:table-row table:style-name="ro1">
          <table:table-cell office:value-type="float" office:value="520.991943359375">
            <text:p>520.9919433594</text:p>
          </table:table-cell>
          <table:table-cell office:value-type="float" office:value="0.001910565">
            <text:p>0.001910565</text:p>
          </table:table-cell>
          <table:table-cell table:number-columns-repeated="4"/>
        </table:table-row>
        <table:table-row table:style-name="ro1">
          <table:table-cell office:value-type="float" office:value="521.10888671875">
            <text:p>521.1088867188</text:p>
          </table:table-cell>
          <table:table-cell office:value-type="float" office:value="-0.007952635">
            <text:p>-0.007952635</text:p>
          </table:table-cell>
          <table:table-cell table:number-columns-repeated="4"/>
        </table:table-row>
        <table:table-row table:style-name="ro1">
          <table:table-cell office:value-type="float" office:value="521.225769042969">
            <text:p>521.225769043</text:p>
          </table:table-cell>
          <table:table-cell office:value-type="float" office:value="0.001358741">
            <text:p>0.001358741</text:p>
          </table:table-cell>
          <table:table-cell table:number-columns-repeated="4"/>
        </table:table-row>
        <table:table-row table:style-name="ro1">
          <table:table-cell office:value-type="float" office:value="521.342712402344">
            <text:p>521.3427124023</text:p>
          </table:table-cell>
          <table:table-cell office:value-type="float" office:value="0.007041009">
            <text:p>0.007041009</text:p>
          </table:table-cell>
          <table:table-cell table:number-columns-repeated="4"/>
        </table:table-row>
        <table:table-row table:style-name="ro1">
          <table:table-cell office:value-type="float" office:value="521.459594726563">
            <text:p>521.4595947266</text:p>
          </table:table-cell>
          <table:table-cell office:value-type="float" office:value="-0.006149629">
            <text:p>-0.006149629</text:p>
          </table:table-cell>
          <table:table-cell table:number-columns-repeated="4"/>
        </table:table-row>
        <table:table-row table:style-name="ro1">
          <table:table-cell office:value-type="float" office:value="521.576538085938">
            <text:p>521.5765380859</text:p>
          </table:table-cell>
          <table:table-cell office:value-type="float" office:value="-0.004892885">
            <text:p>-0.004892885</text:p>
          </table:table-cell>
          <table:table-cell table:number-columns-repeated="4"/>
        </table:table-row>
        <table:table-row table:style-name="ro1">
          <table:table-cell office:value-type="float" office:value="521.693481445313">
            <text:p>521.6934814453</text:p>
          </table:table-cell>
          <table:table-cell office:value-type="float" office:value="-0.001413394">
            <text:p>-0.001413394</text:p>
          </table:table-cell>
          <table:table-cell table:number-columns-repeated="4"/>
        </table:table-row>
        <table:table-row table:style-name="ro1">
          <table:table-cell office:value-type="float" office:value="521.810424804688">
            <text:p>521.8104248047</text:p>
          </table:table-cell>
          <table:table-cell office:value-type="float" office:value="-0.005281766">
            <text:p>-0.005281766</text:p>
          </table:table-cell>
          <table:table-cell table:number-columns-repeated="4"/>
        </table:table-row>
        <table:table-row table:style-name="ro1">
          <table:table-cell office:value-type="float" office:value="521.927307128906">
            <text:p>521.9273071289</text:p>
          </table:table-cell>
          <table:table-cell office:value-type="float" office:value="0.0108478">
            <text:p>0.0108478</text:p>
          </table:table-cell>
          <table:table-cell table:number-columns-repeated="4"/>
        </table:table-row>
        <table:table-row table:style-name="ro1">
          <table:table-cell office:value-type="float" office:value="522.044250488281">
            <text:p>522.0442504883</text:p>
          </table:table-cell>
          <table:table-cell office:value-type="float" office:value="0.001524671">
            <text:p>0.001524671</text:p>
          </table:table-cell>
          <table:table-cell table:number-columns-repeated="4"/>
        </table:table-row>
        <table:table-row table:style-name="ro1">
          <table:table-cell office:value-type="float" office:value="522.161193847656">
            <text:p>522.1611938477</text:p>
          </table:table-cell>
          <table:table-cell office:value-type="float" office:value="0.03690556">
            <text:p>0.03690556</text:p>
          </table:table-cell>
          <table:table-cell table:number-columns-repeated="4"/>
        </table:table-row>
        <table:table-row table:style-name="ro1">
          <table:table-cell office:value-type="float" office:value="522.278137207031">
            <text:p>522.278137207</text:p>
          </table:table-cell>
          <table:table-cell office:value-type="float" office:value="0.008808685">
            <text:p>0.008808685</text:p>
          </table:table-cell>
          <table:table-cell table:number-columns-repeated="4"/>
        </table:table-row>
        <table:table-row table:style-name="ro1">
          <table:table-cell office:value-type="float" office:value="522.395080566406">
            <text:p>522.3950805664</text:p>
          </table:table-cell>
          <table:table-cell office:value-type="float" office:value="0.001069703">
            <text:p>0.001069703</text:p>
          </table:table-cell>
          <table:table-cell table:number-columns-repeated="4"/>
        </table:table-row>
        <table:table-row table:style-name="ro1">
          <table:table-cell office:value-type="float" office:value="522.512023925781">
            <text:p>522.5120239258</text:p>
          </table:table-cell>
          <table:table-cell office:value-type="float" office:value="-0.005290363">
            <text:p>-0.005290363</text:p>
          </table:table-cell>
          <table:table-cell table:number-columns-repeated="4"/>
        </table:table-row>
        <table:table-row table:style-name="ro1">
          <table:table-cell office:value-type="float" office:value="522.629028320313">
            <text:p>522.6290283203</text:p>
          </table:table-cell>
          <table:table-cell office:value-type="float" office:value="0.002215858">
            <text:p>0.002215858</text:p>
          </table:table-cell>
          <table:table-cell table:number-columns-repeated="4"/>
        </table:table-row>
        <table:table-row table:style-name="ro1">
          <table:table-cell office:value-type="float" office:value="522.745971679688">
            <text:p>522.7459716797</text:p>
          </table:table-cell>
          <table:table-cell office:value-type="float" office:value="0.0003517264">
            <text:p>0.0003517264</text:p>
          </table:table-cell>
          <table:table-cell table:number-columns-repeated="4"/>
        </table:table-row>
        <table:table-row table:style-name="ro1">
          <table:table-cell office:value-type="float" office:value="522.862915039063">
            <text:p>522.8629150391</text:p>
          </table:table-cell>
          <table:table-cell office:value-type="float" office:value="0.01444339">
            <text:p>0.01444339</text:p>
          </table:table-cell>
          <table:table-cell table:number-columns-repeated="4"/>
        </table:table-row>
        <table:table-row table:style-name="ro1">
          <table:table-cell office:value-type="float" office:value="522.979919433594">
            <text:p>522.9799194336</text:p>
          </table:table-cell>
          <table:table-cell office:value-type="float" office:value="-0.009791109">
            <text:p>-0.009791109</text:p>
          </table:table-cell>
          <table:table-cell table:number-columns-repeated="4"/>
        </table:table-row>
        <table:table-row table:style-name="ro1">
          <table:table-cell office:value-type="float" office:value="523.096862792969">
            <text:p>523.096862793</text:p>
          </table:table-cell>
          <table:table-cell office:value-type="float" office:value="0.01517284">
            <text:p>0.01517284</text:p>
          </table:table-cell>
          <table:table-cell table:number-columns-repeated="4"/>
        </table:table-row>
        <table:table-row table:style-name="ro1">
          <table:table-cell office:value-type="float" office:value="523.2138671875">
            <text:p>523.2138671875</text:p>
          </table:table-cell>
          <table:table-cell office:value-type="float" office:value="0.004988997">
            <text:p>0.004988997</text:p>
          </table:table-cell>
          <table:table-cell table:number-columns-repeated="4"/>
        </table:table-row>
        <table:table-row table:style-name="ro1">
          <table:table-cell office:value-type="float" office:value="523.330810546875">
            <text:p>523.3308105469</text:p>
          </table:table-cell>
          <table:table-cell office:value-type="float" office:value="0.0011436">
            <text:p>0.0011436</text:p>
          </table:table-cell>
          <table:table-cell table:number-columns-repeated="4"/>
        </table:table-row>
        <table:table-row table:style-name="ro1">
          <table:table-cell office:value-type="float" office:value="523.447814941406">
            <text:p>523.4478149414</text:p>
          </table:table-cell>
          <table:table-cell office:value-type="float" office:value="0.0005998926">
            <text:p>0.0005998926</text:p>
          </table:table-cell>
          <table:table-cell table:number-columns-repeated="4"/>
        </table:table-row>
        <table:table-row table:style-name="ro1">
          <table:table-cell office:value-type="float" office:value="523.564758300781">
            <text:p>523.5647583008</text:p>
          </table:table-cell>
          <table:table-cell office:value-type="float" office:value="0.002450176">
            <text:p>0.002450176</text:p>
          </table:table-cell>
          <table:table-cell table:number-columns-repeated="4"/>
        </table:table-row>
        <table:table-row table:style-name="ro1">
          <table:table-cell office:value-type="float" office:value="523.681762695313">
            <text:p>523.6817626953</text:p>
          </table:table-cell>
          <table:table-cell office:value-type="float" office:value="-0.002654854">
            <text:p>-0.002654854</text:p>
          </table:table-cell>
          <table:table-cell table:number-columns-repeated="4"/>
        </table:table-row>
        <table:table-row table:style-name="ro1">
          <table:table-cell office:value-type="float" office:value="523.798767089844">
            <text:p>523.7987670898</text:p>
          </table:table-cell>
          <table:table-cell office:value-type="float" office:value="-0.006718704">
            <text:p>-0.006718704</text:p>
          </table:table-cell>
          <table:table-cell table:number-columns-repeated="4"/>
        </table:table-row>
        <table:table-row table:style-name="ro1">
          <table:table-cell office:value-type="float" office:value="523.915771484375">
            <text:p>523.9157714844</text:p>
          </table:table-cell>
          <table:table-cell office:value-type="float" office:value="-0.01047529">
            <text:p>-0.01047529</text:p>
          </table:table-cell>
          <table:table-cell table:number-columns-repeated="4"/>
        </table:table-row>
        <table:table-row table:style-name="ro1">
          <table:table-cell office:value-type="float" office:value="524.032775878906">
            <text:p>524.0327758789</text:p>
          </table:table-cell>
          <table:table-cell office:value-type="float" office:value="0.008011894">
            <text:p>0.008011894</text:p>
          </table:table-cell>
          <table:table-cell table:number-columns-repeated="4"/>
        </table:table-row>
        <table:table-row table:style-name="ro1">
          <table:table-cell office:value-type="float" office:value="524.149719238281">
            <text:p>524.1497192383</text:p>
          </table:table-cell>
          <table:table-cell office:value-type="float" office:value="0.003771387">
            <text:p>0.003771387</text:p>
          </table:table-cell>
          <table:table-cell table:number-columns-repeated="4"/>
        </table:table-row>
        <table:table-row table:style-name="ro1">
          <table:table-cell office:value-type="float" office:value="524.266723632813">
            <text:p>524.2667236328</text:p>
          </table:table-cell>
          <table:table-cell office:value-type="float" office:value="0.00392483">
            <text:p>0.00392483</text:p>
          </table:table-cell>
          <table:table-cell table:number-columns-repeated="4"/>
        </table:table-row>
        <table:table-row table:style-name="ro1">
          <table:table-cell office:value-type="float" office:value="524.3837890625">
            <text:p>524.3837890625</text:p>
          </table:table-cell>
          <table:table-cell office:value-type="float" office:value="-0.01076427">
            <text:p>-0.01076427</text:p>
          </table:table-cell>
          <table:table-cell table:number-columns-repeated="4"/>
        </table:table-row>
        <table:table-row table:style-name="ro1">
          <table:table-cell office:value-type="float" office:value="524.500793457031">
            <text:p>524.500793457</text:p>
          </table:table-cell>
          <table:table-cell office:value-type="float" office:value="0.01868411">
            <text:p>0.01868411</text:p>
          </table:table-cell>
          <table:table-cell table:number-columns-repeated="4"/>
        </table:table-row>
        <table:table-row table:style-name="ro1">
          <table:table-cell office:value-type="float" office:value="524.617797851563">
            <text:p>524.6177978516</text:p>
          </table:table-cell>
          <table:table-cell office:value-type="float" office:value="0.0062186">
            <text:p>0.0062186</text:p>
          </table:table-cell>
          <table:table-cell table:number-columns-repeated="4"/>
        </table:table-row>
        <table:table-row table:style-name="ro1">
          <table:table-cell office:value-type="float" office:value="524.734802246094">
            <text:p>524.7348022461</text:p>
          </table:table-cell>
          <table:table-cell office:value-type="float" office:value="-0.008258958">
            <text:p>-0.008258958</text:p>
          </table:table-cell>
          <table:table-cell table:number-columns-repeated="4"/>
        </table:table-row>
        <table:table-row table:style-name="ro1">
          <table:table-cell office:value-type="float" office:value="524.851806640625">
            <text:p>524.8518066406</text:p>
          </table:table-cell>
          <table:table-cell office:value-type="float" office:value="-0.00784347">
            <text:p>-0.00784347</text:p>
          </table:table-cell>
          <table:table-cell table:number-columns-repeated="4"/>
        </table:table-row>
        <table:table-row table:style-name="ro1">
          <table:table-cell office:value-type="float" office:value="524.968872070313">
            <text:p>524.9688720703</text:p>
          </table:table-cell>
          <table:table-cell office:value-type="float" office:value="0.001337547">
            <text:p>0.001337547</text:p>
          </table:table-cell>
          <table:table-cell table:number-columns-repeated="4"/>
        </table:table-row>
        <table:table-row table:style-name="ro1">
          <table:table-cell office:value-type="float" office:value="525.085876464844">
            <text:p>525.0858764648</text:p>
          </table:table-cell>
          <table:table-cell office:value-type="float" office:value="0.01858683">
            <text:p>0.01858683</text:p>
          </table:table-cell>
          <table:table-cell table:number-columns-repeated="4"/>
        </table:table-row>
        <table:table-row table:style-name="ro1">
          <table:table-cell office:value-type="float" office:value="525.202941894531">
            <text:p>525.2029418945</text:p>
          </table:table-cell>
          <table:table-cell office:value-type="float" office:value="-0.00456954">
            <text:p>-0.00456954</text:p>
          </table:table-cell>
          <table:table-cell table:number-columns-repeated="4"/>
        </table:table-row>
        <table:table-row table:style-name="ro1">
          <table:table-cell office:value-type="float" office:value="525.319946289063">
            <text:p>525.3199462891</text:p>
          </table:table-cell>
          <table:table-cell office:value-type="float" office:value="-0.004351737">
            <text:p>-0.004351737</text:p>
          </table:table-cell>
          <table:table-cell table:number-columns-repeated="4"/>
        </table:table-row>
        <table:table-row table:style-name="ro1">
          <table:table-cell office:value-type="float" office:value="525.43701171875">
            <text:p>525.4370117188</text:p>
          </table:table-cell>
          <table:table-cell office:value-type="float" office:value="0.006409964">
            <text:p>0.006409964</text:p>
          </table:table-cell>
          <table:table-cell table:number-columns-repeated="4"/>
        </table:table-row>
        <table:table-row table:style-name="ro1">
          <table:table-cell office:value-type="float" office:value="525.554016113281">
            <text:p>525.5540161133</text:p>
          </table:table-cell>
          <table:table-cell office:value-type="float" office:value="0.005309313">
            <text:p>0.005309313</text:p>
          </table:table-cell>
          <table:table-cell table:number-columns-repeated="4"/>
        </table:table-row>
        <table:table-row table:style-name="ro1">
          <table:table-cell office:value-type="float" office:value="525.671081542969">
            <text:p>525.671081543</text:p>
          </table:table-cell>
          <table:table-cell office:value-type="float" office:value="-0.00457406">
            <text:p>-0.00457406</text:p>
          </table:table-cell>
          <table:table-cell table:number-columns-repeated="4"/>
        </table:table-row>
        <table:table-row table:style-name="ro1">
          <table:table-cell office:value-type="float" office:value="525.788146972656">
            <text:p>525.7881469727</text:p>
          </table:table-cell>
          <table:table-cell office:value-type="float" office:value="-0.01295808">
            <text:p>-0.01295808</text:p>
          </table:table-cell>
          <table:table-cell table:number-columns-repeated="4"/>
        </table:table-row>
        <table:table-row table:style-name="ro1">
          <table:table-cell office:value-type="float" office:value="525.905212402344">
            <text:p>525.9052124023</text:p>
          </table:table-cell>
          <table:table-cell office:value-type="float" office:value="-0.00239911">
            <text:p>-0.00239911</text:p>
          </table:table-cell>
          <table:table-cell table:number-columns-repeated="4"/>
        </table:table-row>
        <table:table-row table:style-name="ro1">
          <table:table-cell office:value-type="float" office:value="526.022277832031">
            <text:p>526.022277832</text:p>
          </table:table-cell>
          <table:table-cell office:value-type="float" office:value="-0.005058528">
            <text:p>-0.005058528</text:p>
          </table:table-cell>
          <table:table-cell table:number-columns-repeated="4"/>
        </table:table-row>
        <table:table-row table:style-name="ro1">
          <table:table-cell office:value-type="float" office:value="526.139282226563">
            <text:p>526.1392822266</text:p>
          </table:table-cell>
          <table:table-cell office:value-type="float" office:value="-0.004377417">
            <text:p>-0.004377417</text:p>
          </table:table-cell>
          <table:table-cell table:number-columns-repeated="4"/>
        </table:table-row>
        <table:table-row table:style-name="ro1">
          <table:table-cell office:value-type="float" office:value="526.25634765625">
            <text:p>526.2563476563</text:p>
          </table:table-cell>
          <table:table-cell office:value-type="float" office:value="0.00999106">
            <text:p>0.00999106</text:p>
          </table:table-cell>
          <table:table-cell table:number-columns-repeated="4"/>
        </table:table-row>
        <table:table-row table:style-name="ro1">
          <table:table-cell office:value-type="float" office:value="526.373474121094">
            <text:p>526.3734741211</text:p>
          </table:table-cell>
          <table:table-cell office:value-type="float" office:value="-0.005117532">
            <text:p>-0.005117532</text:p>
          </table:table-cell>
          <table:table-cell table:number-columns-repeated="4"/>
        </table:table-row>
        <table:table-row table:style-name="ro1">
          <table:table-cell office:value-type="float" office:value="526.490539550781">
            <text:p>526.4905395508</text:p>
          </table:table-cell>
          <table:table-cell office:value-type="float" office:value="0.01180183">
            <text:p>0.01180183</text:p>
          </table:table-cell>
          <table:table-cell table:number-columns-repeated="4"/>
        </table:table-row>
        <table:table-row table:style-name="ro1">
          <table:table-cell office:value-type="float" office:value="526.607604980469">
            <text:p>526.6076049805</text:p>
          </table:table-cell>
          <table:table-cell office:value-type="float" office:value="-0.005841537">
            <text:p>-0.005841537</text:p>
          </table:table-cell>
          <table:table-cell table:number-columns-repeated="4"/>
        </table:table-row>
        <table:table-row table:style-name="ro1">
          <table:table-cell office:value-type="float" office:value="526.724670410156">
            <text:p>526.7246704102</text:p>
          </table:table-cell>
          <table:table-cell office:value-type="float" office:value="0.006268666">
            <text:p>0.006268666</text:p>
          </table:table-cell>
          <table:table-cell table:number-columns-repeated="4"/>
        </table:table-row>
        <table:table-row table:style-name="ro1">
          <table:table-cell office:value-type="float" office:value="526.841735839844">
            <text:p>526.8417358398</text:p>
          </table:table-cell>
          <table:table-cell office:value-type="float" office:value="0.01045189">
            <text:p>0.01045189</text:p>
          </table:table-cell>
          <table:table-cell table:number-columns-repeated="4"/>
        </table:table-row>
        <table:table-row table:style-name="ro1">
          <table:table-cell office:value-type="float" office:value="526.958862304688">
            <text:p>526.9588623047</text:p>
          </table:table-cell>
          <table:table-cell office:value-type="float" office:value="0.001783844">
            <text:p>0.001783844</text:p>
          </table:table-cell>
          <table:table-cell table:number-columns-repeated="4"/>
        </table:table-row>
        <table:table-row table:style-name="ro1">
          <table:table-cell office:value-type="float" office:value="527.075927734375">
            <text:p>527.0759277344</text:p>
          </table:table-cell>
          <table:table-cell office:value-type="float" office:value="0.0156644">
            <text:p>0.0156644</text:p>
          </table:table-cell>
          <table:table-cell table:number-columns-repeated="4"/>
        </table:table-row>
        <table:table-row table:style-name="ro1">
          <table:table-cell office:value-type="float" office:value="527.192993164063">
            <text:p>527.1929931641</text:p>
          </table:table-cell>
          <table:table-cell office:value-type="float" office:value="-0.008377002">
            <text:p>-0.008377002</text:p>
          </table:table-cell>
          <table:table-cell table:number-columns-repeated="4"/>
        </table:table-row>
        <table:table-row table:style-name="ro1">
          <table:table-cell office:value-type="float" office:value="527.310119628906">
            <text:p>527.3101196289</text:p>
          </table:table-cell>
          <table:table-cell office:value-type="float" office:value="0.002458217">
            <text:p>0.002458217</text:p>
          </table:table-cell>
          <table:table-cell table:number-columns-repeated="4"/>
        </table:table-row>
        <table:table-row table:style-name="ro1">
          <table:table-cell office:value-type="float" office:value="527.42724609375">
            <text:p>527.4272460938</text:p>
          </table:table-cell>
          <table:table-cell office:value-type="float" office:value="-0.002041494">
            <text:p>-0.002041494</text:p>
          </table:table-cell>
          <table:table-cell table:number-columns-repeated="4"/>
        </table:table-row>
        <table:table-row table:style-name="ro1">
          <table:table-cell office:value-type="float" office:value="527.544311523438">
            <text:p>527.5443115234</text:p>
          </table:table-cell>
          <table:table-cell office:value-type="float" office:value="-0.008025332">
            <text:p>-0.008025332</text:p>
          </table:table-cell>
          <table:table-cell table:number-columns-repeated="4"/>
        </table:table-row>
        <table:table-row table:style-name="ro1">
          <table:table-cell office:value-type="float" office:value="527.661437988281">
            <text:p>527.6614379883</text:p>
          </table:table-cell>
          <table:table-cell office:value-type="float" office:value="-0.01201082">
            <text:p>-0.01201082</text:p>
          </table:table-cell>
          <table:table-cell table:number-columns-repeated="4"/>
        </table:table-row>
        <table:table-row table:style-name="ro1">
          <table:table-cell office:value-type="float" office:value="527.778564453125">
            <text:p>527.7785644531</text:p>
          </table:table-cell>
          <table:table-cell office:value-type="float" office:value="0.006036963">
            <text:p>0.006036963</text:p>
          </table:table-cell>
          <table:table-cell table:number-columns-repeated="4"/>
        </table:table-row>
        <table:table-row table:style-name="ro1">
          <table:table-cell office:value-type="float" office:value="527.895629882813">
            <text:p>527.8956298828</text:p>
          </table:table-cell>
          <table:table-cell office:value-type="float" office:value="0.003226754">
            <text:p>0.003226754</text:p>
          </table:table-cell>
          <table:table-cell table:number-columns-repeated="4"/>
        </table:table-row>
        <table:table-row table:style-name="ro1">
          <table:table-cell office:value-type="float" office:value="528.012756347656">
            <text:p>528.0127563477</text:p>
          </table:table-cell>
          <table:table-cell office:value-type="float" office:value="-0.008019785">
            <text:p>-0.008019785</text:p>
          </table:table-cell>
          <table:table-cell table:number-columns-repeated="4"/>
        </table:table-row>
        <table:table-row table:style-name="ro1">
          <table:table-cell office:value-type="float" office:value="528.1298828125">
            <text:p>528.1298828125</text:p>
          </table:table-cell>
          <table:table-cell office:value-type="float" office:value="-0.003195124">
            <text:p>-0.003195124</text:p>
          </table:table-cell>
          <table:table-cell table:number-columns-repeated="4"/>
        </table:table-row>
        <table:table-row table:style-name="ro1">
          <table:table-cell office:value-type="float" office:value="528.247009277344">
            <text:p>528.2470092773</text:p>
          </table:table-cell>
          <table:table-cell office:value-type="float" office:value="0.0101537">
            <text:p>0.0101537</text:p>
          </table:table-cell>
          <table:table-cell table:number-columns-repeated="4"/>
        </table:table-row>
        <table:table-row table:style-name="ro1">
          <table:table-cell office:value-type="float" office:value="528.364135742188">
            <text:p>528.3641357422</text:p>
          </table:table-cell>
          <table:table-cell office:value-type="float" office:value="-0.00610525">
            <text:p>-0.00610525</text:p>
          </table:table-cell>
          <table:table-cell table:number-columns-repeated="4"/>
        </table:table-row>
        <table:table-row table:style-name="ro1">
          <table:table-cell office:value-type="float" office:value="528.481262207031">
            <text:p>528.481262207</text:p>
          </table:table-cell>
          <table:table-cell office:value-type="float" office:value="0.01653418">
            <text:p>0.01653418</text:p>
          </table:table-cell>
          <table:table-cell table:number-columns-repeated="4"/>
        </table:table-row>
        <table:table-row table:style-name="ro1">
          <table:table-cell office:value-type="float" office:value="528.598388671875">
            <text:p>528.5983886719</text:p>
          </table:table-cell>
          <table:table-cell office:value-type="float" office:value="0.01054654">
            <text:p>0.01054654</text:p>
          </table:table-cell>
          <table:table-cell table:number-columns-repeated="4"/>
        </table:table-row>
        <table:table-row table:style-name="ro1">
          <table:table-cell office:value-type="float" office:value="528.715576171875">
            <text:p>528.7155761719</text:p>
          </table:table-cell>
          <table:table-cell office:value-type="float" office:value="0.002029901">
            <text:p>0.002029901</text:p>
          </table:table-cell>
          <table:table-cell table:number-columns-repeated="4"/>
        </table:table-row>
        <table:table-row table:style-name="ro1">
          <table:table-cell office:value-type="float" office:value="528.832702636719">
            <text:p>528.8327026367</text:p>
          </table:table-cell>
          <table:table-cell office:value-type="float" office:value="0.001072922">
            <text:p>0.001072922</text:p>
          </table:table-cell>
          <table:table-cell table:number-columns-repeated="4"/>
        </table:table-row>
        <table:table-row table:style-name="ro1">
          <table:table-cell office:value-type="float" office:value="528.949829101563">
            <text:p>528.9498291016</text:p>
          </table:table-cell>
          <table:table-cell office:value-type="float" office:value="-0.004445925">
            <text:p>-0.004445925</text:p>
          </table:table-cell>
          <table:table-cell table:number-columns-repeated="4"/>
        </table:table-row>
        <table:table-row table:style-name="ro1">
          <table:table-cell office:value-type="float" office:value="529.066955566406">
            <text:p>529.0669555664</text:p>
          </table:table-cell>
          <table:table-cell office:value-type="float" office:value="-0.01217845">
            <text:p>-0.01217845</text:p>
          </table:table-cell>
          <table:table-cell table:number-columns-repeated="4"/>
        </table:table-row>
        <table:table-row table:style-name="ro1">
          <table:table-cell office:value-type="float" office:value="529.184143066406">
            <text:p>529.1841430664</text:p>
          </table:table-cell>
          <table:table-cell office:value-type="float" office:value="0.003780667">
            <text:p>0.003780667</text:p>
          </table:table-cell>
          <table:table-cell table:number-columns-repeated="4"/>
        </table:table-row>
        <table:table-row table:style-name="ro1">
          <table:table-cell office:value-type="float" office:value="529.30126953125">
            <text:p>529.3012695313</text:p>
          </table:table-cell>
          <table:table-cell office:value-type="float" office:value="0.01028922">
            <text:p>0.01028922</text:p>
          </table:table-cell>
          <table:table-cell table:number-columns-repeated="4"/>
        </table:table-row>
        <table:table-row table:style-name="ro1">
          <table:table-cell office:value-type="float" office:value="529.41845703125">
            <text:p>529.4184570313</text:p>
          </table:table-cell>
          <table:table-cell office:value-type="float" office:value="-0.003134813">
            <text:p>-0.003134813</text:p>
          </table:table-cell>
          <table:table-cell table:number-columns-repeated="4"/>
        </table:table-row>
        <table:table-row table:style-name="ro1">
          <table:table-cell office:value-type="float" office:value="529.535583496094">
            <text:p>529.5355834961</text:p>
          </table:table-cell>
          <table:table-cell office:value-type="float" office:value="0.002284158">
            <text:p>0.002284158</text:p>
          </table:table-cell>
          <table:table-cell table:number-columns-repeated="4"/>
        </table:table-row>
        <table:table-row table:style-name="ro1">
          <table:table-cell office:value-type="float" office:value="529.652770996094">
            <text:p>529.6527709961</text:p>
          </table:table-cell>
          <table:table-cell office:value-type="float" office:value="0.0002482768">
            <text:p>0.0002482768</text:p>
          </table:table-cell>
          <table:table-cell table:number-columns-repeated="4"/>
        </table:table-row>
        <table:table-row table:style-name="ro1">
          <table:table-cell office:value-type="float" office:value="529.769958496094">
            <text:p>529.7699584961</text:p>
          </table:table-cell>
          <table:table-cell office:value-type="float" office:value="0.0005162369">
            <text:p>0.0005162369</text:p>
          </table:table-cell>
          <table:table-cell table:number-columns-repeated="4"/>
        </table:table-row>
        <table:table-row table:style-name="ro1">
          <table:table-cell office:value-type="float" office:value="529.887145996094">
            <text:p>529.8871459961</text:p>
          </table:table-cell>
          <table:table-cell office:value-type="float" office:value="-0.001300373">
            <text:p>-0.001300373</text:p>
          </table:table-cell>
          <table:table-cell table:number-columns-repeated="4"/>
        </table:table-row>
        <table:table-row table:style-name="ro1">
          <table:table-cell office:value-type="float" office:value="530.004272460938">
            <text:p>530.0042724609</text:p>
          </table:table-cell>
          <table:table-cell office:value-type="float" office:value="0.0005861066">
            <text:p>0.0005861066</text:p>
          </table:table-cell>
          <table:table-cell table:number-columns-repeated="4"/>
        </table:table-row>
        <table:table-row table:style-name="ro1">
          <table:table-cell office:value-type="float" office:value="530.121459960938">
            <text:p>530.1214599609</text:p>
          </table:table-cell>
          <table:table-cell office:value-type="float" office:value="0.001276695">
            <text:p>0.001276695</text:p>
          </table:table-cell>
          <table:table-cell table:number-columns-repeated="4"/>
        </table:table-row>
        <table:table-row table:style-name="ro1">
          <table:table-cell office:value-type="float" office:value="530.238647460938">
            <text:p>530.2386474609</text:p>
          </table:table-cell>
          <table:table-cell office:value-type="float" office:value="-0.0008668745">
            <text:p>-0.0008668745</text:p>
          </table:table-cell>
          <table:table-cell table:number-columns-repeated="4"/>
        </table:table-row>
        <table:table-row table:style-name="ro1">
          <table:table-cell office:value-type="float" office:value="530.355834960938">
            <text:p>530.3558349609</text:p>
          </table:table-cell>
          <table:table-cell office:value-type="float" office:value="-0.007398854">
            <text:p>-0.007398854</text:p>
          </table:table-cell>
          <table:table-cell table:number-columns-repeated="4"/>
        </table:table-row>
        <table:table-row table:style-name="ro1">
          <table:table-cell office:value-type="float" office:value="530.473022460938">
            <text:p>530.4730224609</text:p>
          </table:table-cell>
          <table:table-cell office:value-type="float" office:value="-0.009990164">
            <text:p>-0.009990164</text:p>
          </table:table-cell>
          <table:table-cell table:number-columns-repeated="4"/>
        </table:table-row>
        <table:table-row table:style-name="ro1">
          <table:table-cell office:value-type="float" office:value="530.590209960938">
            <text:p>530.5902099609</text:p>
          </table:table-cell>
          <table:table-cell office:value-type="float" office:value="0.003573988">
            <text:p>0.003573988</text:p>
          </table:table-cell>
          <table:table-cell table:number-columns-repeated="4"/>
        </table:table-row>
        <table:table-row table:style-name="ro1">
          <table:table-cell office:value-type="float" office:value="530.707397460938">
            <text:p>530.7073974609</text:p>
          </table:table-cell>
          <table:table-cell office:value-type="float" office:value="0.04665372">
            <text:p>0.04665372</text:p>
          </table:table-cell>
          <table:table-cell table:number-columns-repeated="4"/>
        </table:table-row>
        <table:table-row table:style-name="ro1">
          <table:table-cell office:value-type="float" office:value="530.824645996094">
            <text:p>530.8246459961</text:p>
          </table:table-cell>
          <table:table-cell office:value-type="float" office:value="0.006570238">
            <text:p>0.006570238</text:p>
          </table:table-cell>
          <table:table-cell table:number-columns-repeated="4"/>
        </table:table-row>
        <table:table-row table:style-name="ro1">
          <table:table-cell office:value-type="float" office:value="530.941833496094">
            <text:p>530.9418334961</text:p>
          </table:table-cell>
          <table:table-cell office:value-type="float" office:value="0.001367266">
            <text:p>0.001367266</text:p>
          </table:table-cell>
          <table:table-cell table:number-columns-repeated="4"/>
        </table:table-row>
        <table:table-row table:style-name="ro1">
          <table:table-cell office:value-type="float" office:value="531.059020996094">
            <text:p>531.0590209961</text:p>
          </table:table-cell>
          <table:table-cell office:value-type="float" office:value="0.002639656">
            <text:p>0.002639656</text:p>
          </table:table-cell>
          <table:table-cell table:number-columns-repeated="4"/>
        </table:table-row>
        <table:table-row table:style-name="ro1">
          <table:table-cell office:value-type="float" office:value="531.17626953125">
            <text:p>531.1762695313</text:p>
          </table:table-cell>
          <table:table-cell office:value-type="float" office:value="-0.001283721">
            <text:p>-0.001283721</text:p>
          </table:table-cell>
          <table:table-cell table:number-columns-repeated="4"/>
        </table:table-row>
        <table:table-row table:style-name="ro1">
          <table:table-cell office:value-type="float" office:value="531.29345703125">
            <text:p>531.2934570313</text:p>
          </table:table-cell>
          <table:table-cell office:value-type="float" office:value="0.001154994">
            <text:p>0.001154994</text:p>
          </table:table-cell>
          <table:table-cell table:number-columns-repeated="4"/>
        </table:table-row>
        <table:table-row table:style-name="ro1">
          <table:table-cell office:value-type="float" office:value="531.410705566406">
            <text:p>531.4107055664</text:p>
          </table:table-cell>
          <table:table-cell office:value-type="float" office:value="0.002255753">
            <text:p>0.002255753</text:p>
          </table:table-cell>
          <table:table-cell table:number-columns-repeated="4"/>
        </table:table-row>
        <table:table-row table:style-name="ro1">
          <table:table-cell office:value-type="float" office:value="531.527893066406">
            <text:p>531.5278930664</text:p>
          </table:table-cell>
          <table:table-cell office:value-type="float" office:value="-0.003488387">
            <text:p>-0.003488387</text:p>
          </table:table-cell>
          <table:table-cell table:number-columns-repeated="4"/>
        </table:table-row>
        <table:table-row table:style-name="ro1">
          <table:table-cell office:value-type="float" office:value="531.645141601563">
            <text:p>531.6451416016</text:p>
          </table:table-cell>
          <table:table-cell office:value-type="float" office:value="-0.002067964">
            <text:p>-0.002067964</text:p>
          </table:table-cell>
          <table:table-cell table:number-columns-repeated="4"/>
        </table:table-row>
        <table:table-row table:style-name="ro1">
          <table:table-cell office:value-type="float" office:value="531.762329101563">
            <text:p>531.7623291016</text:p>
          </table:table-cell>
          <table:table-cell office:value-type="float" office:value="-0.0007837025">
            <text:p>-0.0007837025</text:p>
          </table:table-cell>
          <table:table-cell table:number-columns-repeated="4"/>
        </table:table-row>
        <table:table-row table:style-name="ro1">
          <table:table-cell office:value-type="float" office:value="531.879577636719">
            <text:p>531.8795776367</text:p>
          </table:table-cell>
          <table:table-cell office:value-type="float" office:value="-0.004240847">
            <text:p>-0.004240847</text:p>
          </table:table-cell>
          <table:table-cell table:number-columns-repeated="4"/>
        </table:table-row>
        <table:table-row table:style-name="ro1">
          <table:table-cell office:value-type="float" office:value="531.996826171875">
            <text:p>531.9968261719</text:p>
          </table:table-cell>
          <table:table-cell office:value-type="float" office:value="0.003570211">
            <text:p>0.003570211</text:p>
          </table:table-cell>
          <table:table-cell table:number-columns-repeated="4"/>
        </table:table-row>
        <table:table-row table:style-name="ro1">
          <table:table-cell office:value-type="float" office:value="532.114074707031">
            <text:p>532.114074707</text:p>
          </table:table-cell>
          <table:table-cell office:value-type="float" office:value="0.02403075">
            <text:p>0.02403075</text:p>
          </table:table-cell>
          <table:table-cell table:number-columns-repeated="4"/>
        </table:table-row>
        <table:table-row table:style-name="ro1">
          <table:table-cell office:value-type="float" office:value="532.231323242188">
            <text:p>532.2313232422</text:p>
          </table:table-cell>
          <table:table-cell office:value-type="float" office:value="0.003488377">
            <text:p>0.003488377</text:p>
          </table:table-cell>
          <table:table-cell table:number-columns-repeated="4"/>
        </table:table-row>
        <table:table-row table:style-name="ro1">
          <table:table-cell office:value-type="float" office:value="532.348510742188">
            <text:p>532.3485107422</text:p>
          </table:table-cell>
          <table:table-cell office:value-type="float" office:value="0.01619132">
            <text:p>0.01619132</text:p>
          </table:table-cell>
          <table:table-cell table:number-columns-repeated="4"/>
        </table:table-row>
        <table:table-row table:style-name="ro1">
          <table:table-cell office:value-type="float" office:value="532.465759277344">
            <text:p>532.4657592773</text:p>
          </table:table-cell>
          <table:table-cell office:value-type="float" office:value="-0.005788868">
            <text:p>-0.005788868</text:p>
          </table:table-cell>
          <table:table-cell table:number-columns-repeated="4"/>
        </table:table-row>
        <table:table-row table:style-name="ro1">
          <table:table-cell office:value-type="float" office:value="532.583068847656">
            <text:p>532.5830688477</text:p>
          </table:table-cell>
          <table:table-cell office:value-type="float" office:value="-0.001924373">
            <text:p>-0.001924373</text:p>
          </table:table-cell>
          <table:table-cell table:number-columns-repeated="4"/>
        </table:table-row>
        <table:table-row table:style-name="ro1">
          <table:table-cell office:value-type="float" office:value="532.700317382813">
            <text:p>532.7003173828</text:p>
          </table:table-cell>
          <table:table-cell office:value-type="float" office:value="0.0004363689">
            <text:p>0.0004363689</text:p>
          </table:table-cell>
          <table:table-cell table:number-columns-repeated="4"/>
        </table:table-row>
        <table:table-row table:style-name="ro1">
          <table:table-cell office:value-type="float" office:value="532.817565917969">
            <text:p>532.817565918</text:p>
          </table:table-cell>
          <table:table-cell office:value-type="float" office:value="-0.008970653">
            <text:p>-0.008970653</text:p>
          </table:table-cell>
          <table:table-cell table:number-columns-repeated="4"/>
        </table:table-row>
        <table:table-row table:style-name="ro1">
          <table:table-cell office:value-type="float" office:value="532.934814453125">
            <text:p>532.9348144531</text:p>
          </table:table-cell>
          <table:table-cell office:value-type="float" office:value="0.007106606">
            <text:p>0.007106606</text:p>
          </table:table-cell>
          <table:table-cell table:number-columns-repeated="4"/>
        </table:table-row>
        <table:table-row table:style-name="ro1">
          <table:table-cell office:value-type="float" office:value="533.052062988281">
            <text:p>533.0520629883</text:p>
          </table:table-cell>
          <table:table-cell office:value-type="float" office:value="-0.003898226">
            <text:p>-0.003898226</text:p>
          </table:table-cell>
          <table:table-cell table:number-columns-repeated="4"/>
        </table:table-row>
        <table:table-row table:style-name="ro1">
          <table:table-cell office:value-type="float" office:value="533.169372558594">
            <text:p>533.1693725586</text:p>
          </table:table-cell>
          <table:table-cell office:value-type="float" office:value="-0.005085732">
            <text:p>-0.005085732</text:p>
          </table:table-cell>
          <table:table-cell table:number-columns-repeated="4"/>
        </table:table-row>
        <table:table-row table:style-name="ro1">
          <table:table-cell office:value-type="float" office:value="533.28662109375">
            <text:p>533.2866210938</text:p>
          </table:table-cell>
          <table:table-cell office:value-type="float" office:value="0.02157227">
            <text:p>0.02157227</text:p>
          </table:table-cell>
          <table:table-cell table:number-columns-repeated="4"/>
        </table:table-row>
        <table:table-row table:style-name="ro1">
          <table:table-cell office:value-type="float" office:value="533.403869628906">
            <text:p>533.4038696289</text:p>
          </table:table-cell>
          <table:table-cell office:value-type="float" office:value="-0.0002339197">
            <text:p>-0.0002339197</text:p>
          </table:table-cell>
          <table:table-cell table:number-columns-repeated="4"/>
        </table:table-row>
        <table:table-row table:style-name="ro1">
          <table:table-cell office:value-type="float" office:value="533.521179199219">
            <text:p>533.5211791992</text:p>
          </table:table-cell>
          <table:table-cell office:value-type="float" office:value="0.007066214">
            <text:p>0.007066214</text:p>
          </table:table-cell>
          <table:table-cell table:number-columns-repeated="4"/>
        </table:table-row>
        <table:table-row table:style-name="ro1">
          <table:table-cell office:value-type="float" office:value="533.638427734375">
            <text:p>533.6384277344</text:p>
          </table:table-cell>
          <table:table-cell office:value-type="float" office:value="0.004239799">
            <text:p>0.004239799</text:p>
          </table:table-cell>
          <table:table-cell table:number-columns-repeated="4"/>
        </table:table-row>
        <table:table-row table:style-name="ro1">
          <table:table-cell office:value-type="float" office:value="533.755737304688">
            <text:p>533.7557373047</text:p>
          </table:table-cell>
          <table:table-cell office:value-type="float" office:value="-0.008001451">
            <text:p>-0.008001451</text:p>
          </table:table-cell>
          <table:table-cell table:number-columns-repeated="4"/>
        </table:table-row>
        <table:table-row table:style-name="ro1">
          <table:table-cell office:value-type="float" office:value="533.873046875">
            <text:p>533.873046875</text:p>
          </table:table-cell>
          <table:table-cell office:value-type="float" office:value="0.01160717">
            <text:p>0.01160717</text:p>
          </table:table-cell>
          <table:table-cell table:number-columns-repeated="4"/>
        </table:table-row>
        <table:table-row table:style-name="ro1">
          <table:table-cell office:value-type="float" office:value="533.990295410156">
            <text:p>533.9902954102</text:p>
          </table:table-cell>
          <table:table-cell office:value-type="float" office:value="0.007779868">
            <text:p>0.007779868</text:p>
          </table:table-cell>
          <table:table-cell table:number-columns-repeated="4"/>
        </table:table-row>
        <table:table-row table:style-name="ro1">
          <table:table-cell office:value-type="float" office:value="534.107604980469">
            <text:p>534.1076049805</text:p>
          </table:table-cell>
          <table:table-cell office:value-type="float" office:value="-0.0004195271">
            <text:p>-0.0004195271</text:p>
          </table:table-cell>
          <table:table-cell table:number-columns-repeated="4"/>
        </table:table-row>
        <table:table-row table:style-name="ro1">
          <table:table-cell office:value-type="float" office:value="534.224914550781">
            <text:p>534.2249145508</text:p>
          </table:table-cell>
          <table:table-cell office:value-type="float" office:value="0.005273935">
            <text:p>0.005273935</text:p>
          </table:table-cell>
          <table:table-cell table:number-columns-repeated="4"/>
        </table:table-row>
        <table:table-row table:style-name="ro1">
          <table:table-cell office:value-type="float" office:value="534.342224121094">
            <text:p>534.3422241211</text:p>
          </table:table-cell>
          <table:table-cell office:value-type="float" office:value="-0.004165124">
            <text:p>-0.004165124</text:p>
          </table:table-cell>
          <table:table-cell table:number-columns-repeated="4"/>
        </table:table-row>
        <table:table-row table:style-name="ro1">
          <table:table-cell office:value-type="float" office:value="534.459533691406">
            <text:p>534.4595336914</text:p>
          </table:table-cell>
          <table:table-cell office:value-type="float" office:value="-0.003391111">
            <text:p>-0.003391111</text:p>
          </table:table-cell>
          <table:table-cell table:number-columns-repeated="4"/>
        </table:table-row>
        <table:table-row table:style-name="ro1">
          <table:table-cell office:value-type="float" office:value="534.576843261719">
            <text:p>534.5768432617</text:p>
          </table:table-cell>
          <table:table-cell office:value-type="float" office:value="0.006659043">
            <text:p>0.006659043</text:p>
          </table:table-cell>
          <table:table-cell table:number-columns-repeated="4"/>
        </table:table-row>
        <table:table-row table:style-name="ro1">
          <table:table-cell office:value-type="float" office:value="534.694152832031">
            <text:p>534.694152832</text:p>
          </table:table-cell>
          <table:table-cell office:value-type="float" office:value="-0.008057748">
            <text:p>-0.008057748</text:p>
          </table:table-cell>
          <table:table-cell table:number-columns-repeated="4"/>
        </table:table-row>
        <table:table-row table:style-name="ro1">
          <table:table-cell office:value-type="float" office:value="534.811462402344">
            <text:p>534.8114624023</text:p>
          </table:table-cell>
          <table:table-cell office:value-type="float" office:value="-0.000620102">
            <text:p>-0.000620102</text:p>
          </table:table-cell>
          <table:table-cell table:number-columns-repeated="4"/>
        </table:table-row>
        <table:table-row table:style-name="ro1">
          <table:table-cell office:value-type="float" office:value="534.928771972656">
            <text:p>534.9287719727</text:p>
          </table:table-cell>
          <table:table-cell office:value-type="float" office:value="-0.004785897">
            <text:p>-0.004785897</text:p>
          </table:table-cell>
          <table:table-cell table:number-columns-repeated="4"/>
        </table:table-row>
        <table:table-row table:style-name="ro1">
          <table:table-cell office:value-type="float" office:value="535.046081542969">
            <text:p>535.046081543</text:p>
          </table:table-cell>
          <table:table-cell office:value-type="float" office:value="-0.007339288">
            <text:p>-0.007339288</text:p>
          </table:table-cell>
          <table:table-cell table:number-columns-repeated="4"/>
        </table:table-row>
        <table:table-row table:style-name="ro1">
          <table:table-cell office:value-type="float" office:value="535.163452148438">
            <text:p>535.1634521484</text:p>
          </table:table-cell>
          <table:table-cell office:value-type="float" office:value="0.004342816">
            <text:p>0.004342816</text:p>
          </table:table-cell>
          <table:table-cell table:number-columns-repeated="4"/>
        </table:table-row>
        <table:table-row table:style-name="ro1">
          <table:table-cell office:value-type="float" office:value="535.28076171875">
            <text:p>535.2807617188</text:p>
          </table:table-cell>
          <table:table-cell office:value-type="float" office:value="0.0006046427">
            <text:p>0.0006046427</text:p>
          </table:table-cell>
          <table:table-cell table:number-columns-repeated="4"/>
        </table:table-row>
        <table:table-row table:style-name="ro1">
          <table:table-cell office:value-type="float" office:value="535.398071289063">
            <text:p>535.3980712891</text:p>
          </table:table-cell>
          <table:table-cell office:value-type="float" office:value="0.001091011">
            <text:p>0.001091011</text:p>
          </table:table-cell>
          <table:table-cell table:number-columns-repeated="4"/>
        </table:table-row>
        <table:table-row table:style-name="ro1">
          <table:table-cell office:value-type="float" office:value="535.515441894531">
            <text:p>535.5154418945</text:p>
          </table:table-cell>
          <table:table-cell office:value-type="float" office:value="-0.00898036">
            <text:p>-0.00898036</text:p>
          </table:table-cell>
          <table:table-cell table:number-columns-repeated="4"/>
        </table:table-row>
        <table:table-row table:style-name="ro1">
          <table:table-cell office:value-type="float" office:value="535.632751464844">
            <text:p>535.6327514648</text:p>
          </table:table-cell>
          <table:table-cell office:value-type="float" office:value="-0.004589859">
            <text:p>-0.004589859</text:p>
          </table:table-cell>
          <table:table-cell table:number-columns-repeated="4"/>
        </table:table-row>
        <table:table-row table:style-name="ro1">
          <table:table-cell office:value-type="float" office:value="535.750122070313">
            <text:p>535.7501220703</text:p>
          </table:table-cell>
          <table:table-cell office:value-type="float" office:value="-0.002644232">
            <text:p>-0.002644232</text:p>
          </table:table-cell>
          <table:table-cell table:number-columns-repeated="4"/>
        </table:table-row>
        <table:table-row table:style-name="ro1">
          <table:table-cell office:value-type="float" office:value="535.867431640625">
            <text:p>535.8674316406</text:p>
          </table:table-cell>
          <table:table-cell office:value-type="float" office:value="0.004369848">
            <text:p>0.004369848</text:p>
          </table:table-cell>
          <table:table-cell table:number-columns-repeated="4"/>
        </table:table-row>
        <table:table-row table:style-name="ro1">
          <table:table-cell office:value-type="float" office:value="535.984802246094">
            <text:p>535.9848022461</text:p>
          </table:table-cell>
          <table:table-cell office:value-type="float" office:value="0.008386752">
            <text:p>0.008386752</text:p>
          </table:table-cell>
          <table:table-cell table:number-columns-repeated="4"/>
        </table:table-row>
        <table:table-row table:style-name="ro1">
          <table:table-cell office:value-type="float" office:value="536.102172851563">
            <text:p>536.1021728516</text:p>
          </table:table-cell>
          <table:table-cell office:value-type="float" office:value="0.006741751">
            <text:p>0.006741751</text:p>
          </table:table-cell>
          <table:table-cell table:number-columns-repeated="4"/>
        </table:table-row>
        <table:table-row table:style-name="ro1">
          <table:table-cell office:value-type="float" office:value="536.219543457031">
            <text:p>536.219543457</text:p>
          </table:table-cell>
          <table:table-cell office:value-type="float" office:value="-0.001039685">
            <text:p>-0.001039685</text:p>
          </table:table-cell>
          <table:table-cell table:number-columns-repeated="4"/>
        </table:table-row>
        <table:table-row table:style-name="ro1">
          <table:table-cell office:value-type="float" office:value="536.336853027344">
            <text:p>536.3368530273</text:p>
          </table:table-cell>
          <table:table-cell office:value-type="float" office:value="-0.003140954">
            <text:p>-0.003140954</text:p>
          </table:table-cell>
          <table:table-cell table:number-columns-repeated="4"/>
        </table:table-row>
        <table:table-row table:style-name="ro1">
          <table:table-cell office:value-type="float" office:value="536.454223632813">
            <text:p>536.4542236328</text:p>
          </table:table-cell>
          <table:table-cell office:value-type="float" office:value="-0.01179466">
            <text:p>-0.01179466</text:p>
          </table:table-cell>
          <table:table-cell table:number-columns-repeated="4"/>
        </table:table-row>
        <table:table-row table:style-name="ro1">
          <table:table-cell office:value-type="float" office:value="536.571594238281">
            <text:p>536.5715942383</text:p>
          </table:table-cell>
          <table:table-cell office:value-type="float" office:value="-0.008449628">
            <text:p>-0.008449628</text:p>
          </table:table-cell>
          <table:table-cell table:number-columns-repeated="4"/>
        </table:table-row>
        <table:table-row table:style-name="ro1">
          <table:table-cell office:value-type="float" office:value="536.68896484375">
            <text:p>536.6889648438</text:p>
          </table:table-cell>
          <table:table-cell office:value-type="float" office:value="-0.002884774">
            <text:p>-0.002884774</text:p>
          </table:table-cell>
          <table:table-cell table:number-columns-repeated="4"/>
        </table:table-row>
        <table:table-row table:style-name="ro1">
          <table:table-cell office:value-type="float" office:value="536.806335449219">
            <text:p>536.8063354492</text:p>
          </table:table-cell>
          <table:table-cell office:value-type="float" office:value="0.0005086394">
            <text:p>0.0005086394</text:p>
          </table:table-cell>
          <table:table-cell table:number-columns-repeated="4"/>
        </table:table-row>
        <table:table-row table:style-name="ro1">
          <table:table-cell office:value-type="float" office:value="536.923706054688">
            <text:p>536.9237060547</text:p>
          </table:table-cell>
          <table:table-cell office:value-type="float" office:value="0.01881808">
            <text:p>0.01881808</text:p>
          </table:table-cell>
          <table:table-cell table:number-columns-repeated="4"/>
        </table:table-row>
        <table:table-row table:style-name="ro1">
          <table:table-cell office:value-type="float" office:value="537.041076660156">
            <text:p>537.0410766602</text:p>
          </table:table-cell>
          <table:table-cell office:value-type="float" office:value="-0.001686499">
            <text:p>-0.001686499</text:p>
          </table:table-cell>
          <table:table-cell table:number-columns-repeated="4"/>
        </table:table-row>
        <table:table-row table:style-name="ro1">
          <table:table-cell office:value-type="float" office:value="537.158508300781">
            <text:p>537.1585083008</text:p>
          </table:table-cell>
          <table:table-cell office:value-type="float" office:value="0.001754625">
            <text:p>0.001754625</text:p>
          </table:table-cell>
          <table:table-cell table:number-columns-repeated="4"/>
        </table:table-row>
        <table:table-row table:style-name="ro1">
          <table:table-cell office:value-type="float" office:value="537.27587890625">
            <text:p>537.2758789063</text:p>
          </table:table-cell>
          <table:table-cell office:value-type="string">
            <text:p>1.662741E-05</text:p>
          </table:table-cell>
          <table:table-cell table:number-columns-repeated="4"/>
        </table:table-row>
        <table:table-row table:style-name="ro1">
          <table:table-cell office:value-type="float" office:value="537.393249511719">
            <text:p>537.3932495117</text:p>
          </table:table-cell>
          <table:table-cell office:value-type="float" office:value="0.001956253">
            <text:p>0.001956253</text:p>
          </table:table-cell>
          <table:table-cell table:number-columns-repeated="4"/>
        </table:table-row>
        <table:table-row table:style-name="ro1">
          <table:table-cell office:value-type="float" office:value="537.510681152344">
            <text:p>537.5106811523</text:p>
          </table:table-cell>
          <table:table-cell office:value-type="float" office:value="-0.004124296">
            <text:p>-0.004124296</text:p>
          </table:table-cell>
          <table:table-cell table:number-columns-repeated="4"/>
        </table:table-row>
        <table:table-row table:style-name="ro1">
          <table:table-cell office:value-type="float" office:value="537.628051757813">
            <text:p>537.6280517578</text:p>
          </table:table-cell>
          <table:table-cell office:value-type="float" office:value="0.002217921">
            <text:p>0.002217921</text:p>
          </table:table-cell>
          <table:table-cell table:number-columns-repeated="4"/>
        </table:table-row>
        <table:table-row table:style-name="ro1">
          <table:table-cell office:value-type="float" office:value="537.745483398438">
            <text:p>537.7454833984</text:p>
          </table:table-cell>
          <table:table-cell office:value-type="float" office:value="-0.002081987">
            <text:p>-0.002081987</text:p>
          </table:table-cell>
          <table:table-cell table:number-columns-repeated="4"/>
        </table:table-row>
        <table:table-row table:style-name="ro1">
          <table:table-cell office:value-type="float" office:value="537.862854003906">
            <text:p>537.8628540039</text:p>
          </table:table-cell>
          <table:table-cell office:value-type="float" office:value="0.0004608184">
            <text:p>0.0004608184</text:p>
          </table:table-cell>
          <table:table-cell table:number-columns-repeated="4"/>
        </table:table-row>
        <table:table-row table:style-name="ro1">
          <table:table-cell office:value-type="float" office:value="537.980285644531">
            <text:p>537.9802856445</text:p>
          </table:table-cell>
          <table:table-cell office:value-type="float" office:value="-0.01257832">
            <text:p>-0.01257832</text:p>
          </table:table-cell>
          <table:table-cell table:number-columns-repeated="4"/>
        </table:table-row>
        <table:table-row table:style-name="ro1">
          <table:table-cell office:value-type="float" office:value="538.09765625">
            <text:p>538.09765625</text:p>
          </table:table-cell>
          <table:table-cell office:value-type="float" office:value="0.03035254">
            <text:p>0.03035254</text:p>
          </table:table-cell>
          <table:table-cell table:number-columns-repeated="4"/>
        </table:table-row>
        <table:table-row table:style-name="ro1">
          <table:table-cell office:value-type="float" office:value="538.215087890625">
            <text:p>538.2150878906</text:p>
          </table:table-cell>
          <table:table-cell office:value-type="float" office:value="0.001491152">
            <text:p>0.001491152</text:p>
          </table:table-cell>
          <table:table-cell table:number-columns-repeated="4"/>
        </table:table-row>
        <table:table-row table:style-name="ro1">
          <table:table-cell office:value-type="float" office:value="538.33251953125">
            <text:p>538.3325195313</text:p>
          </table:table-cell>
          <table:table-cell office:value-type="float" office:value="0.02512585">
            <text:p>0.02512585</text:p>
          </table:table-cell>
          <table:table-cell table:number-columns-repeated="4"/>
        </table:table-row>
        <table:table-row table:style-name="ro1">
          <table:table-cell office:value-type="float" office:value="538.449890136719">
            <text:p>538.4498901367</text:p>
          </table:table-cell>
          <table:table-cell office:value-type="float" office:value="0.0003119717">
            <text:p>0.0003119717</text:p>
          </table:table-cell>
          <table:table-cell table:number-columns-repeated="4"/>
        </table:table-row>
        <table:table-row table:style-name="ro1">
          <table:table-cell office:value-type="float" office:value="538.567321777344">
            <text:p>538.5673217773</text:p>
          </table:table-cell>
          <table:table-cell office:value-type="float" office:value="0.02919534">
            <text:p>0.02919534</text:p>
          </table:table-cell>
          <table:table-cell table:number-columns-repeated="4"/>
        </table:table-row>
        <table:table-row table:style-name="ro1">
          <table:table-cell office:value-type="float" office:value="538.684753417969">
            <text:p>538.684753418</text:p>
          </table:table-cell>
          <table:table-cell office:value-type="float" office:value="-0.0007160752">
            <text:p>-0.0007160752</text:p>
          </table:table-cell>
          <table:table-cell table:number-columns-repeated="4"/>
        </table:table-row>
        <table:table-row table:style-name="ro1">
          <table:table-cell office:value-type="float" office:value="538.802185058594">
            <text:p>538.8021850586</text:p>
          </table:table-cell>
          <table:table-cell office:value-type="float" office:value="0.004087088">
            <text:p>0.004087088</text:p>
          </table:table-cell>
          <table:table-cell table:number-columns-repeated="4"/>
        </table:table-row>
        <table:table-row table:style-name="ro1">
          <table:table-cell office:value-type="float" office:value="538.919616699219">
            <text:p>538.9196166992</text:p>
          </table:table-cell>
          <table:table-cell office:value-type="float" office:value="-0.009170066">
            <text:p>-0.009170066</text:p>
          </table:table-cell>
          <table:table-cell table:number-columns-repeated="4"/>
        </table:table-row>
        <table:table-row table:style-name="ro1">
          <table:table-cell office:value-type="float" office:value="539.037048339844">
            <text:p>539.0370483398</text:p>
          </table:table-cell>
          <table:table-cell office:value-type="float" office:value="0.00777232">
            <text:p>0.00777232</text:p>
          </table:table-cell>
          <table:table-cell table:number-columns-repeated="4"/>
        </table:table-row>
        <table:table-row table:style-name="ro1">
          <table:table-cell office:value-type="float" office:value="539.154479980469">
            <text:p>539.1544799805</text:p>
          </table:table-cell>
          <table:table-cell office:value-type="float" office:value="0.001313031">
            <text:p>0.001313031</text:p>
          </table:table-cell>
          <table:table-cell table:number-columns-repeated="4"/>
        </table:table-row>
        <table:table-row table:style-name="ro1">
          <table:table-cell office:value-type="float" office:value="539.27197265625">
            <text:p>539.2719726563</text:p>
          </table:table-cell>
          <table:table-cell office:value-type="float" office:value="-0.008039316">
            <text:p>-0.008039316</text:p>
          </table:table-cell>
          <table:table-cell table:number-columns-repeated="4"/>
        </table:table-row>
        <table:table-row table:style-name="ro1">
          <table:table-cell office:value-type="float" office:value="539.389404296875">
            <text:p>539.3894042969</text:p>
          </table:table-cell>
          <table:table-cell office:value-type="float" office:value="0.0004678315">
            <text:p>0.0004678315</text:p>
          </table:table-cell>
          <table:table-cell table:number-columns-repeated="4"/>
        </table:table-row>
        <table:table-row table:style-name="ro1">
          <table:table-cell office:value-type="float" office:value="539.5068359375">
            <text:p>539.5068359375</text:p>
          </table:table-cell>
          <table:table-cell office:value-type="float" office:value="-0.001687358">
            <text:p>-0.001687358</text:p>
          </table:table-cell>
          <table:table-cell table:number-columns-repeated="4"/>
        </table:table-row>
        <table:table-row table:style-name="ro1">
          <table:table-cell office:value-type="float" office:value="539.624267578125">
            <text:p>539.6242675781</text:p>
          </table:table-cell>
          <table:table-cell office:value-type="float" office:value="-0.001839656">
            <text:p>-0.001839656</text:p>
          </table:table-cell>
          <table:table-cell table:number-columns-repeated="4"/>
        </table:table-row>
        <table:table-row table:style-name="ro1">
          <table:table-cell office:value-type="float" office:value="539.741760253906">
            <text:p>539.7417602539</text:p>
          </table:table-cell>
          <table:table-cell office:value-type="float" office:value="-0.003330146">
            <text:p>-0.003330146</text:p>
          </table:table-cell>
          <table:table-cell table:number-columns-repeated="4"/>
        </table:table-row>
        <table:table-row table:style-name="ro1">
          <table:table-cell office:value-type="float" office:value="539.859191894531">
            <text:p>539.8591918945</text:p>
          </table:table-cell>
          <table:table-cell office:value-type="float" office:value="-0.01100614">
            <text:p>-0.01100614</text:p>
          </table:table-cell>
          <table:table-cell table:number-columns-repeated="4"/>
        </table:table-row>
        <table:table-row table:style-name="ro1">
          <table:table-cell office:value-type="float" office:value="539.976684570313">
            <text:p>539.9766845703</text:p>
          </table:table-cell>
          <table:table-cell office:value-type="float" office:value="0.005256596">
            <text:p>0.005256596</text:p>
          </table:table-cell>
          <table:table-cell table:number-columns-repeated="4"/>
        </table:table-row>
        <table:table-row table:style-name="ro1">
          <table:table-cell office:value-type="float" office:value="540.094116210938">
            <text:p>540.0941162109</text:p>
          </table:table-cell>
          <table:table-cell office:value-type="float" office:value="-0.008464409">
            <text:p>-0.008464409</text:p>
          </table:table-cell>
          <table:table-cell table:number-columns-repeated="4"/>
        </table:table-row>
        <table:table-row table:style-name="ro1">
          <table:table-cell office:value-type="float" office:value="540.211608886719">
            <text:p>540.2116088867</text:p>
          </table:table-cell>
          <table:table-cell office:value-type="float" office:value="-0.008210744">
            <text:p>-0.008210744</text:p>
          </table:table-cell>
          <table:table-cell table:number-columns-repeated="4"/>
        </table:table-row>
        <table:table-row table:style-name="ro1">
          <table:table-cell office:value-type="float" office:value="540.3291015625">
            <text:p>540.3291015625</text:p>
          </table:table-cell>
          <table:table-cell office:value-type="float" office:value="-0.002908206">
            <text:p>-0.002908206</text:p>
          </table:table-cell>
          <table:table-cell table:number-columns-repeated="4"/>
        </table:table-row>
        <table:table-row table:style-name="ro1">
          <table:table-cell office:value-type="float" office:value="540.446533203125">
            <text:p>540.4465332031</text:p>
          </table:table-cell>
          <table:table-cell office:value-type="float" office:value="-0.004194406">
            <text:p>-0.004194406</text:p>
          </table:table-cell>
          <table:table-cell table:number-columns-repeated="4"/>
        </table:table-row>
        <table:table-row table:style-name="ro1">
          <table:table-cell office:value-type="float" office:value="540.564025878906">
            <text:p>540.5640258789</text:p>
          </table:table-cell>
          <table:table-cell office:value-type="float" office:value="0.01133051">
            <text:p>0.01133051</text:p>
          </table:table-cell>
          <table:table-cell table:number-columns-repeated="4"/>
        </table:table-row>
        <table:table-row table:style-name="ro1">
          <table:table-cell office:value-type="float" office:value="540.681518554688">
            <text:p>540.6815185547</text:p>
          </table:table-cell>
          <table:table-cell office:value-type="float" office:value="-0.003542278">
            <text:p>-0.003542278</text:p>
          </table:table-cell>
          <table:table-cell table:number-columns-repeated="4"/>
        </table:table-row>
        <table:table-row table:style-name="ro1">
          <table:table-cell office:value-type="float" office:value="540.799011230469">
            <text:p>540.7990112305</text:p>
          </table:table-cell>
          <table:table-cell office:value-type="float" office:value="-0.004952319">
            <text:p>-0.004952319</text:p>
          </table:table-cell>
          <table:table-cell table:number-columns-repeated="4"/>
        </table:table-row>
        <table:table-row table:style-name="ro1">
          <table:table-cell office:value-type="float" office:value="540.91650390625">
            <text:p>540.9165039063</text:p>
          </table:table-cell>
          <table:table-cell office:value-type="float" office:value="-0.008248225">
            <text:p>-0.008248225</text:p>
          </table:table-cell>
          <table:table-cell table:number-columns-repeated="4"/>
        </table:table-row>
        <table:table-row table:style-name="ro1">
          <table:table-cell office:value-type="float" office:value="541.033996582031">
            <text:p>541.033996582</text:p>
          </table:table-cell>
          <table:table-cell office:value-type="float" office:value="-0.001979192">
            <text:p>-0.001979192</text:p>
          </table:table-cell>
          <table:table-cell table:number-columns-repeated="4"/>
        </table:table-row>
        <table:table-row table:style-name="ro1">
          <table:table-cell office:value-type="float" office:value="541.151489257813">
            <text:p>541.1514892578</text:p>
          </table:table-cell>
          <table:table-cell office:value-type="float" office:value="0.001039853">
            <text:p>0.001039853</text:p>
          </table:table-cell>
          <table:table-cell table:number-columns-repeated="4"/>
        </table:table-row>
        <table:table-row table:style-name="ro1">
          <table:table-cell office:value-type="float" office:value="541.268981933594">
            <text:p>541.2689819336</text:p>
          </table:table-cell>
          <table:table-cell office:value-type="float" office:value="-0.004445449">
            <text:p>-0.004445449</text:p>
          </table:table-cell>
          <table:table-cell table:number-columns-repeated="4"/>
        </table:table-row>
        <table:table-row table:style-name="ro1">
          <table:table-cell office:value-type="float" office:value="541.386474609375">
            <text:p>541.3864746094</text:p>
          </table:table-cell>
          <table:table-cell office:value-type="float" office:value="0.007823025">
            <text:p>0.007823025</text:p>
          </table:table-cell>
          <table:table-cell table:number-columns-repeated="4"/>
        </table:table-row>
        <table:table-row table:style-name="ro1">
          <table:table-cell office:value-type="float" office:value="541.503967285156">
            <text:p>541.5039672852</text:p>
          </table:table-cell>
          <table:table-cell office:value-type="float" office:value="-0.002908199">
            <text:p>-0.002908199</text:p>
          </table:table-cell>
          <table:table-cell table:number-columns-repeated="4"/>
        </table:table-row>
        <table:table-row table:style-name="ro1">
          <table:table-cell office:value-type="float" office:value="541.621459960938">
            <text:p>541.6214599609</text:p>
          </table:table-cell>
          <table:table-cell office:value-type="float" office:value="0.0008043637">
            <text:p>0.0008043637</text:p>
          </table:table-cell>
          <table:table-cell table:number-columns-repeated="4"/>
        </table:table-row>
        <table:table-row table:style-name="ro1">
          <table:table-cell office:value-type="float" office:value="541.739013671875">
            <text:p>541.7390136719</text:p>
          </table:table-cell>
          <table:table-cell office:value-type="float" office:value="0.01260142">
            <text:p>0.01260142</text:p>
          </table:table-cell>
          <table:table-cell table:number-columns-repeated="4"/>
        </table:table-row>
        <table:table-row table:style-name="ro1">
          <table:table-cell office:value-type="float" office:value="541.856506347656">
            <text:p>541.8565063477</text:p>
          </table:table-cell>
          <table:table-cell office:value-type="float" office:value="-0.002150688">
            <text:p>-0.002150688</text:p>
          </table:table-cell>
          <table:table-cell table:number-columns-repeated="4"/>
        </table:table-row>
        <table:table-row table:style-name="ro1">
          <table:table-cell office:value-type="float" office:value="541.974060058594">
            <text:p>541.9740600586</text:p>
          </table:table-cell>
          <table:table-cell office:value-type="float" office:value="-0.01066645">
            <text:p>-0.01066645</text:p>
          </table:table-cell>
          <table:table-cell table:number-columns-repeated="4"/>
        </table:table-row>
        <table:table-row table:style-name="ro1">
          <table:table-cell office:value-type="float" office:value="542.091552734375">
            <text:p>542.0915527344</text:p>
          </table:table-cell>
          <table:table-cell office:value-type="float" office:value="0.002258209">
            <text:p>0.002258209</text:p>
          </table:table-cell>
          <table:table-cell table:number-columns-repeated="4"/>
        </table:table-row>
        <table:table-row table:style-name="ro1">
          <table:table-cell office:value-type="float" office:value="542.209106445313">
            <text:p>542.2091064453</text:p>
          </table:table-cell>
          <table:table-cell office:value-type="float" office:value="0.0009534104">
            <text:p>0.0009534104</text:p>
          </table:table-cell>
          <table:table-cell table:number-columns-repeated="4"/>
        </table:table-row>
        <table:table-row table:style-name="ro1">
          <table:table-cell office:value-type="float" office:value="542.326599121094">
            <text:p>542.3265991211</text:p>
          </table:table-cell>
          <table:table-cell office:value-type="float" office:value="-0.00654868">
            <text:p>-0.00654868</text:p>
          </table:table-cell>
          <table:table-cell table:number-columns-repeated="4"/>
        </table:table-row>
        <table:table-row table:style-name="ro1">
          <table:table-cell office:value-type="float" office:value="542.444152832031">
            <text:p>542.444152832</text:p>
          </table:table-cell>
          <table:table-cell office:value-type="float" office:value="0.007426661">
            <text:p>0.007426661</text:p>
          </table:table-cell>
          <table:table-cell table:number-columns-repeated="4"/>
        </table:table-row>
        <table:table-row table:style-name="ro1">
          <table:table-cell office:value-type="float" office:value="542.561645507813">
            <text:p>542.5616455078</text:p>
          </table:table-cell>
          <table:table-cell office:value-type="float" office:value="-0.002888826">
            <text:p>-0.002888826</text:p>
          </table:table-cell>
          <table:table-cell table:number-columns-repeated="4"/>
        </table:table-row>
        <table:table-row table:style-name="ro1">
          <table:table-cell office:value-type="float" office:value="542.67919921875">
            <text:p>542.6791992188</text:p>
          </table:table-cell>
          <table:table-cell office:value-type="float" office:value="-0.007578868">
            <text:p>-0.007578868</text:p>
          </table:table-cell>
          <table:table-cell table:number-columns-repeated="4"/>
        </table:table-row>
        <table:table-row table:style-name="ro1">
          <table:table-cell office:value-type="float" office:value="542.796752929688">
            <text:p>542.7967529297</text:p>
          </table:table-cell>
          <table:table-cell office:value-type="float" office:value="0.006539811">
            <text:p>0.006539811</text:p>
          </table:table-cell>
          <table:table-cell table:number-columns-repeated="4"/>
        </table:table-row>
        <table:table-row table:style-name="ro1">
          <table:table-cell office:value-type="float" office:value="542.914306640625">
            <text:p>542.9143066406</text:p>
          </table:table-cell>
          <table:table-cell office:value-type="float" office:value="-0.003887531">
            <text:p>-0.003887531</text:p>
          </table:table-cell>
          <table:table-cell table:number-columns-repeated="4"/>
        </table:table-row>
        <table:table-row table:style-name="ro1">
          <table:table-cell office:value-type="float" office:value="543.031860351563">
            <text:p>543.0318603516</text:p>
          </table:table-cell>
          <table:table-cell office:value-type="float" office:value="0.004713628">
            <text:p>0.004713628</text:p>
          </table:table-cell>
          <table:table-cell table:number-columns-repeated="4"/>
        </table:table-row>
        <table:table-row table:style-name="ro1">
          <table:table-cell office:value-type="float" office:value="543.1494140625">
            <text:p>543.1494140625</text:p>
          </table:table-cell>
          <table:table-cell office:value-type="float" office:value="-0.01104689">
            <text:p>-0.01104689</text:p>
          </table:table-cell>
          <table:table-cell table:number-columns-repeated="4"/>
        </table:table-row>
        <table:table-row table:style-name="ro1">
          <table:table-cell office:value-type="float" office:value="543.266967773438">
            <text:p>543.2669677734</text:p>
          </table:table-cell>
          <table:table-cell office:value-type="float" office:value="0.001615093">
            <text:p>0.001615093</text:p>
          </table:table-cell>
          <table:table-cell table:number-columns-repeated="4"/>
        </table:table-row>
        <table:table-row table:style-name="ro1">
          <table:table-cell office:value-type="float" office:value="543.384521484375">
            <text:p>543.3845214844</text:p>
          </table:table-cell>
          <table:table-cell office:value-type="float" office:value="0.004412105">
            <text:p>0.004412105</text:p>
          </table:table-cell>
          <table:table-cell table:number-columns-repeated="4"/>
        </table:table-row>
        <table:table-row table:style-name="ro1">
          <table:table-cell office:value-type="float" office:value="543.502075195313">
            <text:p>543.5020751953</text:p>
          </table:table-cell>
          <table:table-cell office:value-type="float" office:value="-0.008517262">
            <text:p>-0.008517262</text:p>
          </table:table-cell>
          <table:table-cell table:number-columns-repeated="4"/>
        </table:table-row>
        <table:table-row table:style-name="ro1">
          <table:table-cell office:value-type="float" office:value="543.61962890625">
            <text:p>543.6196289063</text:p>
          </table:table-cell>
          <table:table-cell office:value-type="float" office:value="0.001053742">
            <text:p>0.001053742</text:p>
          </table:table-cell>
          <table:table-cell table:number-columns-repeated="4"/>
        </table:table-row>
        <table:table-row table:style-name="ro1">
          <table:table-cell office:value-type="float" office:value="543.737182617188">
            <text:p>543.7371826172</text:p>
          </table:table-cell>
          <table:table-cell office:value-type="float" office:value="-0.005214158">
            <text:p>-0.005214158</text:p>
          </table:table-cell>
          <table:table-cell table:number-columns-repeated="4"/>
        </table:table-row>
        <table:table-row table:style-name="ro1">
          <table:table-cell office:value-type="float" office:value="543.854736328125">
            <text:p>543.8547363281</text:p>
          </table:table-cell>
          <table:table-cell office:value-type="float" office:value="-0.004426581">
            <text:p>-0.004426581</text:p>
          </table:table-cell>
          <table:table-cell table:number-columns-repeated="4"/>
        </table:table-row>
        <table:table-row table:style-name="ro1">
          <table:table-cell office:value-type="float" office:value="543.972351074219">
            <text:p>543.9723510742</text:p>
          </table:table-cell>
          <table:table-cell office:value-type="float" office:value="0.0005934566">
            <text:p>0.0005934566</text:p>
          </table:table-cell>
          <table:table-cell table:number-columns-repeated="4"/>
        </table:table-row>
        <table:table-row table:style-name="ro1">
          <table:table-cell office:value-type="float" office:value="544.089904785156">
            <text:p>544.0899047852</text:p>
          </table:table-cell>
          <table:table-cell office:value-type="float" office:value="-0.003138325">
            <text:p>-0.003138325</text:p>
          </table:table-cell>
          <table:table-cell table:number-columns-repeated="4"/>
        </table:table-row>
        <table:table-row table:style-name="ro1">
          <table:table-cell office:value-type="float" office:value="544.207458496094">
            <text:p>544.2074584961</text:p>
          </table:table-cell>
          <table:table-cell office:value-type="string">
            <text:p>-8.149055E-05</text:p>
          </table:table-cell>
          <table:table-cell table:number-columns-repeated="4"/>
        </table:table-row>
        <table:table-row table:style-name="ro1">
          <table:table-cell office:value-type="float" office:value="544.325073242188">
            <text:p>544.3250732422</text:p>
          </table:table-cell>
          <table:table-cell office:value-type="float" office:value="0.005073783">
            <text:p>0.005073783</text:p>
          </table:table-cell>
          <table:table-cell table:number-columns-repeated="4"/>
        </table:table-row>
        <table:table-row table:style-name="ro1">
          <table:table-cell office:value-type="float" office:value="544.442626953125">
            <text:p>544.4426269531</text:p>
          </table:table-cell>
          <table:table-cell office:value-type="float" office:value="-0.007362306">
            <text:p>-0.007362306</text:p>
          </table:table-cell>
          <table:table-cell table:number-columns-repeated="4"/>
        </table:table-row>
        <table:table-row table:style-name="ro1">
          <table:table-cell office:value-type="float" office:value="544.560241699219">
            <text:p>544.5602416992</text:p>
          </table:table-cell>
          <table:table-cell office:value-type="float" office:value="0.001057547">
            <text:p>0.001057547</text:p>
          </table:table-cell>
          <table:table-cell table:number-columns-repeated="4"/>
        </table:table-row>
        <table:table-row table:style-name="ro1">
          <table:table-cell office:value-type="float" office:value="544.677856445313">
            <text:p>544.6778564453</text:p>
          </table:table-cell>
          <table:table-cell office:value-type="float" office:value="0.001796931">
            <text:p>0.001796931</text:p>
          </table:table-cell>
          <table:table-cell table:number-columns-repeated="4"/>
        </table:table-row>
        <table:table-row table:style-name="ro1">
          <table:table-cell office:value-type="float" office:value="544.79541015625">
            <text:p>544.7954101563</text:p>
          </table:table-cell>
          <table:table-cell office:value-type="float" office:value="0.002382005">
            <text:p>0.002382005</text:p>
          </table:table-cell>
          <table:table-cell table:number-columns-repeated="4"/>
        </table:table-row>
        <table:table-row table:style-name="ro1">
          <table:table-cell office:value-type="float" office:value="544.913024902344">
            <text:p>544.9130249023</text:p>
          </table:table-cell>
          <table:table-cell office:value-type="float" office:value="-0.009762536">
            <text:p>-0.009762536</text:p>
          </table:table-cell>
          <table:table-cell table:number-columns-repeated="4"/>
        </table:table-row>
        <table:table-row table:style-name="ro1">
          <table:table-cell office:value-type="float" office:value="545.030639648438">
            <text:p>545.0306396484</text:p>
          </table:table-cell>
          <table:table-cell office:value-type="float" office:value="-0.00156365">
            <text:p>-0.00156365</text:p>
          </table:table-cell>
          <table:table-cell table:number-columns-repeated="4"/>
        </table:table-row>
        <table:table-row table:style-name="ro1">
          <table:table-cell office:value-type="float" office:value="545.148254394531">
            <text:p>545.1482543945</text:p>
          </table:table-cell>
          <table:table-cell office:value-type="float" office:value="0.002198757">
            <text:p>0.002198757</text:p>
          </table:table-cell>
          <table:table-cell table:number-columns-repeated="4"/>
        </table:table-row>
        <table:table-row table:style-name="ro1">
          <table:table-cell office:value-type="float" office:value="545.265869140625">
            <text:p>545.2658691406</text:p>
          </table:table-cell>
          <table:table-cell office:value-type="float" office:value="0.0019053">
            <text:p>0.0019053</text:p>
          </table:table-cell>
          <table:table-cell table:number-columns-repeated="4"/>
        </table:table-row>
        <table:table-row table:style-name="ro1">
          <table:table-cell office:value-type="float" office:value="545.383483886719">
            <text:p>545.3834838867</text:p>
          </table:table-cell>
          <table:table-cell office:value-type="float" office:value="-0.01158407">
            <text:p>-0.01158407</text:p>
          </table:table-cell>
          <table:table-cell table:number-columns-repeated="4"/>
        </table:table-row>
        <table:table-row table:style-name="ro1">
          <table:table-cell office:value-type="float" office:value="545.501098632813">
            <text:p>545.5010986328</text:p>
          </table:table-cell>
          <table:table-cell office:value-type="float" office:value="-0.0003691343">
            <text:p>-0.0003691343</text:p>
          </table:table-cell>
          <table:table-cell table:number-columns-repeated="4"/>
        </table:table-row>
        <table:table-row table:style-name="ro1">
          <table:table-cell office:value-type="float" office:value="545.618713378906">
            <text:p>545.6187133789</text:p>
          </table:table-cell>
          <table:table-cell office:value-type="float" office:value="0.005172255">
            <text:p>0.005172255</text:p>
          </table:table-cell>
          <table:table-cell table:number-columns-repeated="4"/>
        </table:table-row>
        <table:table-row table:style-name="ro1">
          <table:table-cell office:value-type="float" office:value="545.736328125">
            <text:p>545.736328125</text:p>
          </table:table-cell>
          <table:table-cell office:value-type="float" office:value="0.00464814">
            <text:p>0.00464814</text:p>
          </table:table-cell>
          <table:table-cell table:number-columns-repeated="4"/>
        </table:table-row>
        <table:table-row table:style-name="ro1">
          <table:table-cell office:value-type="float" office:value="545.853942871094">
            <text:p>545.8539428711</text:p>
          </table:table-cell>
          <table:table-cell office:value-type="float" office:value="0.0006922116">
            <text:p>0.0006922116</text:p>
          </table:table-cell>
          <table:table-cell table:number-columns-repeated="4"/>
        </table:table-row>
        <table:table-row table:style-name="ro1">
          <table:table-cell office:value-type="float" office:value="545.971557617188">
            <text:p>545.9715576172</text:p>
          </table:table-cell>
          <table:table-cell office:value-type="float" office:value="0.009004407">
            <text:p>0.009004407</text:p>
          </table:table-cell>
          <table:table-cell table:number-columns-repeated="4"/>
        </table:table-row>
        <table:table-row table:style-name="ro1">
          <table:table-cell office:value-type="float" office:value="546.089172363281">
            <text:p>546.0891723633</text:p>
          </table:table-cell>
          <table:table-cell office:value-type="float" office:value="0.01096169">
            <text:p>0.01096169</text:p>
          </table:table-cell>
          <table:table-cell table:number-columns-repeated="4"/>
        </table:table-row>
        <table:table-row table:style-name="ro1">
          <table:table-cell office:value-type="float" office:value="546.206848144531">
            <text:p>546.2068481445</text:p>
          </table:table-cell>
          <table:table-cell office:value-type="float" office:value="0.0101845">
            <text:p>0.0101845</text:p>
          </table:table-cell>
          <table:table-cell table:number-columns-repeated="4"/>
        </table:table-row>
        <table:table-row table:style-name="ro1">
          <table:table-cell office:value-type="float" office:value="546.324462890625">
            <text:p>546.3244628906</text:p>
          </table:table-cell>
          <table:table-cell office:value-type="float" office:value="-0.005450864">
            <text:p>-0.005450864</text:p>
          </table:table-cell>
          <table:table-cell table:number-columns-repeated="4"/>
        </table:table-row>
        <table:table-row table:style-name="ro1">
          <table:table-cell office:value-type="float" office:value="546.442077636719">
            <text:p>546.4420776367</text:p>
          </table:table-cell>
          <table:table-cell office:value-type="float" office:value="0.003038811">
            <text:p>0.003038811</text:p>
          </table:table-cell>
          <table:table-cell table:number-columns-repeated="4"/>
        </table:table-row>
        <table:table-row table:style-name="ro1">
          <table:table-cell office:value-type="float" office:value="546.559753417969">
            <text:p>546.559753418</text:p>
          </table:table-cell>
          <table:table-cell office:value-type="float" office:value="0.003258564">
            <text:p>0.003258564</text:p>
          </table:table-cell>
          <table:table-cell table:number-columns-repeated="4"/>
        </table:table-row>
        <table:table-row table:style-name="ro1">
          <table:table-cell office:value-type="float" office:value="546.677368164063">
            <text:p>546.6773681641</text:p>
          </table:table-cell>
          <table:table-cell office:value-type="string">
            <text:p>-3.414692E-05</text:p>
          </table:table-cell>
          <table:table-cell table:number-columns-repeated="4"/>
        </table:table-row>
        <table:table-row table:style-name="ro1">
          <table:table-cell office:value-type="float" office:value="546.795043945313">
            <text:p>546.7950439453</text:p>
          </table:table-cell>
          <table:table-cell office:value-type="float" office:value="0.001511021">
            <text:p>0.001511021</text:p>
          </table:table-cell>
          <table:table-cell table:number-columns-repeated="4"/>
        </table:table-row>
        <table:table-row table:style-name="ro1">
          <table:table-cell office:value-type="float" office:value="546.912719726563">
            <text:p>546.9127197266</text:p>
          </table:table-cell>
          <table:table-cell office:value-type="float" office:value="0.004240058">
            <text:p>0.004240058</text:p>
          </table:table-cell>
          <table:table-cell table:number-columns-repeated="4"/>
        </table:table-row>
        <table:table-row table:style-name="ro1">
          <table:table-cell office:value-type="float" office:value="547.030334472656">
            <text:p>547.0303344727</text:p>
          </table:table-cell>
          <table:table-cell office:value-type="float" office:value="-0.002624619">
            <text:p>-0.002624619</text:p>
          </table:table-cell>
          <table:table-cell table:number-columns-repeated="4"/>
        </table:table-row>
        <table:table-row table:style-name="ro1">
          <table:table-cell office:value-type="float" office:value="547.148010253906">
            <text:p>547.1480102539</text:p>
          </table:table-cell>
          <table:table-cell office:value-type="float" office:value="0.003463542">
            <text:p>0.003463542</text:p>
          </table:table-cell>
          <table:table-cell table:number-columns-repeated="4"/>
        </table:table-row>
        <table:table-row table:style-name="ro1">
          <table:table-cell office:value-type="float" office:value="547.265686035156">
            <text:p>547.2656860352</text:p>
          </table:table-cell>
          <table:table-cell office:value-type="float" office:value="0.003672205">
            <text:p>0.003672205</text:p>
          </table:table-cell>
          <table:table-cell table:number-columns-repeated="4"/>
        </table:table-row>
        <table:table-row table:style-name="ro1">
          <table:table-cell office:value-type="float" office:value="547.383361816406">
            <text:p>547.3833618164</text:p>
          </table:table-cell>
          <table:table-cell office:value-type="float" office:value="0.005404846">
            <text:p>0.005404846</text:p>
          </table:table-cell>
          <table:table-cell table:number-columns-repeated="4"/>
        </table:table-row>
        <table:table-row table:style-name="ro1">
          <table:table-cell office:value-type="float" office:value="547.5009765625">
            <text:p>547.5009765625</text:p>
          </table:table-cell>
          <table:table-cell office:value-type="float" office:value="-0.006101203">
            <text:p>-0.006101203</text:p>
          </table:table-cell>
          <table:table-cell table:number-columns-repeated="4"/>
        </table:table-row>
        <table:table-row table:style-name="ro1">
          <table:table-cell office:value-type="float" office:value="547.61865234375">
            <text:p>547.6186523438</text:p>
          </table:table-cell>
          <table:table-cell office:value-type="float" office:value="0.001985235">
            <text:p>0.001985235</text:p>
          </table:table-cell>
          <table:table-cell table:number-columns-repeated="4"/>
        </table:table-row>
        <table:table-row table:style-name="ro1">
          <table:table-cell office:value-type="float" office:value="547.736328125">
            <text:p>547.736328125</text:p>
          </table:table-cell>
          <table:table-cell office:value-type="float" office:value="0.002435324">
            <text:p>0.002435324</text:p>
          </table:table-cell>
          <table:table-cell table:number-columns-repeated="4"/>
        </table:table-row>
        <table:table-row table:style-name="ro1">
          <table:table-cell office:value-type="float" office:value="547.85400390625">
            <text:p>547.8540039063</text:p>
          </table:table-cell>
          <table:table-cell office:value-type="float" office:value="-0.002266881">
            <text:p>-0.002266881</text:p>
          </table:table-cell>
          <table:table-cell table:number-columns-repeated="4"/>
        </table:table-row>
        <table:table-row table:style-name="ro1">
          <table:table-cell office:value-type="float" office:value="547.971740722656">
            <text:p>547.9717407227</text:p>
          </table:table-cell>
          <table:table-cell office:value-type="float" office:value="-0.01002513">
            <text:p>-0.01002513</text:p>
          </table:table-cell>
          <table:table-cell table:number-columns-repeated="4"/>
        </table:table-row>
        <table:table-row table:style-name="ro1">
          <table:table-cell office:value-type="float" office:value="548.089416503906">
            <text:p>548.0894165039</text:p>
          </table:table-cell>
          <table:table-cell office:value-type="float" office:value="-0.005737427">
            <text:p>-0.005737427</text:p>
          </table:table-cell>
          <table:table-cell table:number-columns-repeated="4"/>
        </table:table-row>
        <table:table-row table:style-name="ro1">
          <table:table-cell office:value-type="float" office:value="548.207092285156">
            <text:p>548.2070922852</text:p>
          </table:table-cell>
          <table:table-cell office:value-type="float" office:value="0.007068121">
            <text:p>0.007068121</text:p>
          </table:table-cell>
          <table:table-cell table:number-columns-repeated="4"/>
        </table:table-row>
        <table:table-row table:style-name="ro1">
          <table:table-cell office:value-type="float" office:value="548.324768066406">
            <text:p>548.3247680664</text:p>
          </table:table-cell>
          <table:table-cell office:value-type="float" office:value="-0.00760781">
            <text:p>-0.00760781</text:p>
          </table:table-cell>
          <table:table-cell table:number-columns-repeated="4"/>
        </table:table-row>
        <table:table-row table:style-name="ro1">
          <table:table-cell office:value-type="float" office:value="548.442443847656">
            <text:p>548.4424438477</text:p>
          </table:table-cell>
          <table:table-cell office:value-type="float" office:value="0.01193401">
            <text:p>0.01193401</text:p>
          </table:table-cell>
          <table:table-cell table:number-columns-repeated="4"/>
        </table:table-row>
        <table:table-row table:style-name="ro1">
          <table:table-cell office:value-type="float" office:value="548.560180664063">
            <text:p>548.5601806641</text:p>
          </table:table-cell>
          <table:table-cell office:value-type="float" office:value="-0.002895503">
            <text:p>-0.002895503</text:p>
          </table:table-cell>
          <table:table-cell table:number-columns-repeated="4"/>
        </table:table-row>
        <table:table-row table:style-name="ro1">
          <table:table-cell office:value-type="float" office:value="548.677856445313">
            <text:p>548.6778564453</text:p>
          </table:table-cell>
          <table:table-cell office:value-type="float" office:value="0.006817395">
            <text:p>0.006817395</text:p>
          </table:table-cell>
          <table:table-cell table:number-columns-repeated="4"/>
        </table:table-row>
        <table:table-row table:style-name="ro1">
          <table:table-cell office:value-type="float" office:value="548.795593261719">
            <text:p>548.7955932617</text:p>
          </table:table-cell>
          <table:table-cell office:value-type="float" office:value="-0.004610896">
            <text:p>-0.004610896</text:p>
          </table:table-cell>
          <table:table-cell table:number-columns-repeated="4"/>
        </table:table-row>
        <table:table-row table:style-name="ro1">
          <table:table-cell office:value-type="float" office:value="548.913269042969">
            <text:p>548.913269043</text:p>
          </table:table-cell>
          <table:table-cell office:value-type="float" office:value="-0.005084909">
            <text:p>-0.005084909</text:p>
          </table:table-cell>
          <table:table-cell table:number-columns-repeated="4"/>
        </table:table-row>
        <table:table-row table:style-name="ro1">
          <table:table-cell office:value-type="float" office:value="549.031005859375">
            <text:p>549.0310058594</text:p>
          </table:table-cell>
          <table:table-cell office:value-type="float" office:value="-0.001870495">
            <text:p>-0.001870495</text:p>
          </table:table-cell>
          <table:table-cell table:number-columns-repeated="4"/>
        </table:table-row>
        <table:table-row table:style-name="ro1">
          <table:table-cell office:value-type="float" office:value="549.148681640625">
            <text:p>549.1486816406</text:p>
          </table:table-cell>
          <table:table-cell office:value-type="float" office:value="-0.004883188">
            <text:p>-0.004883188</text:p>
          </table:table-cell>
          <table:table-cell table:number-columns-repeated="4"/>
        </table:table-row>
        <table:table-row table:style-name="ro1">
          <table:table-cell office:value-type="float" office:value="549.266418457031">
            <text:p>549.266418457</text:p>
          </table:table-cell>
          <table:table-cell office:value-type="float" office:value="0.004470018">
            <text:p>0.004470018</text:p>
          </table:table-cell>
          <table:table-cell table:number-columns-repeated="4"/>
        </table:table-row>
        <table:table-row table:style-name="ro1">
          <table:table-cell office:value-type="float" office:value="549.384155273438">
            <text:p>549.3841552734</text:p>
          </table:table-cell>
          <table:table-cell office:value-type="float" office:value="-0.0001414967">
            <text:p>-0.0001414967</text:p>
          </table:table-cell>
          <table:table-cell table:number-columns-repeated="4"/>
        </table:table-row>
        <table:table-row table:style-name="ro1">
          <table:table-cell office:value-type="float" office:value="549.501831054688">
            <text:p>549.5018310547</text:p>
          </table:table-cell>
          <table:table-cell office:value-type="float" office:value="0.002566601">
            <text:p>0.002566601</text:p>
          </table:table-cell>
          <table:table-cell table:number-columns-repeated="4"/>
        </table:table-row>
        <table:table-row table:style-name="ro1">
          <table:table-cell office:value-type="float" office:value="549.619567871094">
            <text:p>549.6195678711</text:p>
          </table:table-cell>
          <table:table-cell office:value-type="float" office:value="0.01273571">
            <text:p>0.01273571</text:p>
          </table:table-cell>
          <table:table-cell table:number-columns-repeated="4"/>
        </table:table-row>
        <table:table-row table:style-name="ro1">
          <table:table-cell office:value-type="float" office:value="549.7373046875">
            <text:p>549.7373046875</text:p>
          </table:table-cell>
          <table:table-cell office:value-type="float" office:value="0.006353207">
            <text:p>0.006353207</text:p>
          </table:table-cell>
          <table:table-cell table:number-columns-repeated="4"/>
        </table:table-row>
        <table:table-row table:style-name="ro1">
          <table:table-cell office:value-type="float" office:value="549.855041503906">
            <text:p>549.8550415039</text:p>
          </table:table-cell>
          <table:table-cell office:value-type="float" office:value="0.001946629">
            <text:p>0.001946629</text:p>
          </table:table-cell>
          <table:table-cell table:number-columns-repeated="4"/>
        </table:table-row>
        <table:table-row table:style-name="ro1">
          <table:table-cell office:value-type="float" office:value="549.972778320313">
            <text:p>549.9727783203</text:p>
          </table:table-cell>
          <table:table-cell office:value-type="float" office:value="0.007576847">
            <text:p>0.007576847</text:p>
          </table:table-cell>
          <table:table-cell table:number-columns-repeated="4"/>
        </table:table-row>
        <table:table-row table:style-name="ro1">
          <table:table-cell office:value-type="float" office:value="550.090515136719">
            <text:p>550.0905151367</text:p>
          </table:table-cell>
          <table:table-cell office:value-type="float" office:value="-0.009560183">
            <text:p>-0.009560183</text:p>
          </table:table-cell>
          <table:table-cell table:number-columns-repeated="4"/>
        </table:table-row>
        <table:table-row table:style-name="ro1">
          <table:table-cell office:value-type="float" office:value="550.208251953125">
            <text:p>550.2082519531</text:p>
          </table:table-cell>
          <table:table-cell office:value-type="float" office:value="0.002569754">
            <text:p>0.002569754</text:p>
          </table:table-cell>
          <table:table-cell table:number-columns-repeated="4"/>
        </table:table-row>
        <table:table-row table:style-name="ro1">
          <table:table-cell office:value-type="float" office:value="550.325988769531">
            <text:p>550.3259887695</text:p>
          </table:table-cell>
          <table:table-cell office:value-type="float" office:value="-0.004821185">
            <text:p>-0.004821185</text:p>
          </table:table-cell>
          <table:table-cell table:number-columns-repeated="4"/>
        </table:table-row>
        <table:table-row table:style-name="ro1">
          <table:table-cell office:value-type="float" office:value="550.443725585938">
            <text:p>550.4437255859</text:p>
          </table:table-cell>
          <table:table-cell office:value-type="float" office:value="-0.0002789313">
            <text:p>-0.0002789313</text:p>
          </table:table-cell>
          <table:table-cell table:number-columns-repeated="4"/>
        </table:table-row>
        <table:table-row table:style-name="ro1">
          <table:table-cell office:value-type="float" office:value="550.561462402344">
            <text:p>550.5614624023</text:p>
          </table:table-cell>
          <table:table-cell office:value-type="float" office:value="0.009004871">
            <text:p>0.009004871</text:p>
          </table:table-cell>
          <table:table-cell table:number-columns-repeated="4"/>
        </table:table-row>
        <table:table-row table:style-name="ro1">
          <table:table-cell office:value-type="float" office:value="550.679260253906">
            <text:p>550.6792602539</text:p>
          </table:table-cell>
          <table:table-cell office:value-type="float" office:value="0.003951249">
            <text:p>0.003951249</text:p>
          </table:table-cell>
          <table:table-cell table:number-columns-repeated="4"/>
        </table:table-row>
        <table:table-row table:style-name="ro1">
          <table:table-cell office:value-type="float" office:value="550.796997070313">
            <text:p>550.7969970703</text:p>
          </table:table-cell>
          <table:table-cell office:value-type="float" office:value="-0.0001393945">
            <text:p>-0.0001393945</text:p>
          </table:table-cell>
          <table:table-cell table:number-columns-repeated="4"/>
        </table:table-row>
        <table:table-row table:style-name="ro1">
          <table:table-cell office:value-type="float" office:value="550.914733886719">
            <text:p>550.9147338867</text:p>
          </table:table-cell>
          <table:table-cell office:value-type="float" office:value="0.003044639">
            <text:p>0.003044639</text:p>
          </table:table-cell>
          <table:table-cell table:number-columns-repeated="4"/>
        </table:table-row>
        <table:table-row table:style-name="ro1">
          <table:table-cell office:value-type="float" office:value="551.032531738281">
            <text:p>551.0325317383</text:p>
          </table:table-cell>
          <table:table-cell office:value-type="float" office:value="-0.00388699">
            <text:p>-0.00388699</text:p>
          </table:table-cell>
          <table:table-cell table:number-columns-repeated="4"/>
        </table:table-row>
        <table:table-row table:style-name="ro1">
          <table:table-cell office:value-type="float" office:value="551.150268554688">
            <text:p>551.1502685547</text:p>
          </table:table-cell>
          <table:table-cell office:value-type="float" office:value="0.004892637">
            <text:p>0.004892637</text:p>
          </table:table-cell>
          <table:table-cell table:number-columns-repeated="4"/>
        </table:table-row>
        <table:table-row table:style-name="ro1">
          <table:table-cell office:value-type="float" office:value="551.26806640625">
            <text:p>551.2680664063</text:p>
          </table:table-cell>
          <table:table-cell office:value-type="float" office:value="-0.008483278">
            <text:p>-0.008483278</text:p>
          </table:table-cell>
          <table:table-cell table:number-columns-repeated="4"/>
        </table:table-row>
        <table:table-row table:style-name="ro1">
          <table:table-cell office:value-type="float" office:value="551.385803222656">
            <text:p>551.3858032227</text:p>
          </table:table-cell>
          <table:table-cell office:value-type="float" office:value="0.003654446">
            <text:p>0.003654446</text:p>
          </table:table-cell>
          <table:table-cell table:number-columns-repeated="4"/>
        </table:table-row>
        <table:table-row table:style-name="ro1">
          <table:table-cell office:value-type="float" office:value="551.503601074219">
            <text:p>551.5036010742</text:p>
          </table:table-cell>
          <table:table-cell office:value-type="float" office:value="-0.007918596">
            <text:p>-0.007918596</text:p>
          </table:table-cell>
          <table:table-cell table:number-columns-repeated="4"/>
        </table:table-row>
        <table:table-row table:style-name="ro1">
          <table:table-cell office:value-type="float" office:value="551.621398925781">
            <text:p>551.6213989258</text:p>
          </table:table-cell>
          <table:table-cell office:value-type="float" office:value="0.013723">
            <text:p>0.013723</text:p>
          </table:table-cell>
          <table:table-cell table:number-columns-repeated="4"/>
        </table:table-row>
        <table:table-row table:style-name="ro1">
          <table:table-cell office:value-type="float" office:value="551.739135742188">
            <text:p>551.7391357422</text:p>
          </table:table-cell>
          <table:table-cell office:value-type="float" office:value="-0.001566997">
            <text:p>-0.001566997</text:p>
          </table:table-cell>
          <table:table-cell table:number-columns-repeated="4"/>
        </table:table-row>
        <table:table-row table:style-name="ro1">
          <table:table-cell office:value-type="float" office:value="551.85693359375">
            <text:p>551.8569335938</text:p>
          </table:table-cell>
          <table:table-cell office:value-type="float" office:value="-0.005526309">
            <text:p>-0.005526309</text:p>
          </table:table-cell>
          <table:table-cell table:number-columns-repeated="4"/>
        </table:table-row>
        <table:table-row table:style-name="ro1">
          <table:table-cell office:value-type="float" office:value="551.974731445313">
            <text:p>551.9747314453</text:p>
          </table:table-cell>
          <table:table-cell office:value-type="float" office:value="0.003840834">
            <text:p>0.003840834</text:p>
          </table:table-cell>
          <table:table-cell table:number-columns-repeated="4"/>
        </table:table-row>
        <table:table-row table:style-name="ro1">
          <table:table-cell office:value-type="float" office:value="552.092529296875">
            <text:p>552.0925292969</text:p>
          </table:table-cell>
          <table:table-cell office:value-type="float" office:value="-0.004416391">
            <text:p>-0.004416391</text:p>
          </table:table-cell>
          <table:table-cell table:number-columns-repeated="4"/>
        </table:table-row>
        <table:table-row table:style-name="ro1">
          <table:table-cell office:value-type="float" office:value="552.210327148438">
            <text:p>552.2103271484</text:p>
          </table:table-cell>
          <table:table-cell office:value-type="float" office:value="0.01003021">
            <text:p>0.01003021</text:p>
          </table:table-cell>
          <table:table-cell table:number-columns-repeated="4"/>
        </table:table-row>
        <table:table-row table:style-name="ro1">
          <table:table-cell office:value-type="float" office:value="552.328125">
            <text:p>552.328125</text:p>
          </table:table-cell>
          <table:table-cell office:value-type="float" office:value="-0.001237316">
            <text:p>-0.001237316</text:p>
          </table:table-cell>
          <table:table-cell table:number-columns-repeated="4"/>
        </table:table-row>
        <table:table-row table:style-name="ro1">
          <table:table-cell office:value-type="float" office:value="552.445922851563">
            <text:p>552.4459228516</text:p>
          </table:table-cell>
          <table:table-cell office:value-type="float" office:value="0.0003896933">
            <text:p>0.0003896933</text:p>
          </table:table-cell>
          <table:table-cell table:number-columns-repeated="4"/>
        </table:table-row>
        <table:table-row table:style-name="ro1">
          <table:table-cell office:value-type="float" office:value="552.563720703125">
            <text:p>552.5637207031</text:p>
          </table:table-cell>
          <table:table-cell office:value-type="float" office:value="0.01293872">
            <text:p>0.01293872</text:p>
          </table:table-cell>
          <table:table-cell table:number-columns-repeated="4"/>
        </table:table-row>
        <table:table-row table:style-name="ro1">
          <table:table-cell office:value-type="float" office:value="552.681518554688">
            <text:p>552.6815185547</text:p>
          </table:table-cell>
          <table:table-cell office:value-type="float" office:value="-0.001777756">
            <text:p>-0.001777756</text:p>
          </table:table-cell>
          <table:table-cell table:number-columns-repeated="4"/>
        </table:table-row>
        <table:table-row table:style-name="ro1">
          <table:table-cell office:value-type="float" office:value="552.79931640625">
            <text:p>552.7993164063</text:p>
          </table:table-cell>
          <table:table-cell office:value-type="float" office:value="-0.001835999">
            <text:p>-0.001835999</text:p>
          </table:table-cell>
          <table:table-cell table:number-columns-repeated="4"/>
        </table:table-row>
        <table:table-row table:style-name="ro1">
          <table:table-cell office:value-type="float" office:value="552.917114257813">
            <text:p>552.9171142578</text:p>
          </table:table-cell>
          <table:table-cell office:value-type="float" office:value="-0.003310523">
            <text:p>-0.003310523</text:p>
          </table:table-cell>
          <table:table-cell table:number-columns-repeated="4"/>
        </table:table-row>
        <table:table-row table:style-name="ro1">
          <table:table-cell office:value-type="float" office:value="553.034973144531">
            <text:p>553.0349731445</text:p>
          </table:table-cell>
          <table:table-cell office:value-type="float" office:value="-0.002127031">
            <text:p>-0.002127031</text:p>
          </table:table-cell>
          <table:table-cell table:number-columns-repeated="4"/>
        </table:table-row>
        <table:table-row table:style-name="ro1">
          <table:table-cell office:value-type="float" office:value="553.152770996094">
            <text:p>553.1527709961</text:p>
          </table:table-cell>
          <table:table-cell office:value-type="float" office:value="0.002626139">
            <text:p>0.002626139</text:p>
          </table:table-cell>
          <table:table-cell table:number-columns-repeated="4"/>
        </table:table-row>
        <table:table-row table:style-name="ro1">
          <table:table-cell office:value-type="float" office:value="553.270568847656">
            <text:p>553.2705688477</text:p>
          </table:table-cell>
          <table:table-cell office:value-type="float" office:value="0.01747547">
            <text:p>0.01747547</text:p>
          </table:table-cell>
          <table:table-cell table:number-columns-repeated="4"/>
        </table:table-row>
        <table:table-row table:style-name="ro1">
          <table:table-cell office:value-type="float" office:value="553.388427734375">
            <text:p>553.3884277344</text:p>
          </table:table-cell>
          <table:table-cell office:value-type="float" office:value="-0.006492659">
            <text:p>-0.006492659</text:p>
          </table:table-cell>
          <table:table-cell table:number-columns-repeated="4"/>
        </table:table-row>
        <table:table-row table:style-name="ro1">
          <table:table-cell office:value-type="float" office:value="553.506225585938">
            <text:p>553.5062255859</text:p>
          </table:table-cell>
          <table:table-cell office:value-type="float" office:value="0.01034015">
            <text:p>0.01034015</text:p>
          </table:table-cell>
          <table:table-cell table:number-columns-repeated="4"/>
        </table:table-row>
        <table:table-row table:style-name="ro1">
          <table:table-cell office:value-type="float" office:value="553.624084472656">
            <text:p>553.6240844727</text:p>
          </table:table-cell>
          <table:table-cell office:value-type="float" office:value="0.002057844">
            <text:p>0.002057844</text:p>
          </table:table-cell>
          <table:table-cell table:number-columns-repeated="4"/>
        </table:table-row>
        <table:table-row table:style-name="ro1">
          <table:table-cell office:value-type="float" office:value="553.741882324219">
            <text:p>553.7418823242</text:p>
          </table:table-cell>
          <table:table-cell office:value-type="float" office:value="-0.002392648">
            <text:p>-0.002392648</text:p>
          </table:table-cell>
          <table:table-cell table:number-columns-repeated="4"/>
        </table:table-row>
        <table:table-row table:style-name="ro1">
          <table:table-cell office:value-type="float" office:value="553.859741210938">
            <text:p>553.8597412109</text:p>
          </table:table-cell>
          <table:table-cell office:value-type="float" office:value="-0.009525708">
            <text:p>-0.009525708</text:p>
          </table:table-cell>
          <table:table-cell table:number-columns-repeated="4"/>
        </table:table-row>
        <table:table-row table:style-name="ro1">
          <table:table-cell office:value-type="float" office:value="553.977600097656">
            <text:p>553.9776000977</text:p>
          </table:table-cell>
          <table:table-cell office:value-type="float" office:value="0.0009831043">
            <text:p>0.0009831043</text:p>
          </table:table-cell>
          <table:table-cell table:number-columns-repeated="4"/>
        </table:table-row>
        <table:table-row table:style-name="ro1">
          <table:table-cell office:value-type="float" office:value="554.095458984375">
            <text:p>554.0954589844</text:p>
          </table:table-cell>
          <table:table-cell office:value-type="float" office:value="-0.002526525">
            <text:p>-0.002526525</text:p>
          </table:table-cell>
          <table:table-cell table:number-columns-repeated="4"/>
        </table:table-row>
        <table:table-row table:style-name="ro1">
          <table:table-cell office:value-type="float" office:value="554.213256835938">
            <text:p>554.2132568359</text:p>
          </table:table-cell>
          <table:table-cell office:value-type="float" office:value="0.01636608">
            <text:p>0.01636608</text:p>
          </table:table-cell>
          <table:table-cell table:number-columns-repeated="4"/>
        </table:table-row>
        <table:table-row table:style-name="ro1">
          <table:table-cell office:value-type="float" office:value="554.331115722656">
            <text:p>554.3311157227</text:p>
          </table:table-cell>
          <table:table-cell office:value-type="float" office:value="0.001877394">
            <text:p>0.001877394</text:p>
          </table:table-cell>
          <table:table-cell table:number-columns-repeated="4"/>
        </table:table-row>
        <table:table-row table:style-name="ro1">
          <table:table-cell office:value-type="float" office:value="554.448974609375">
            <text:p>554.4489746094</text:p>
          </table:table-cell>
          <table:table-cell office:value-type="float" office:value="0.001109839">
            <text:p>0.001109839</text:p>
          </table:table-cell>
          <table:table-cell table:number-columns-repeated="4"/>
        </table:table-row>
        <table:table-row table:style-name="ro1">
          <table:table-cell office:value-type="float" office:value="554.566833496094">
            <text:p>554.5668334961</text:p>
          </table:table-cell>
          <table:table-cell office:value-type="float" office:value="0.0007966246">
            <text:p>0.0007966246</text:p>
          </table:table-cell>
          <table:table-cell table:number-columns-repeated="4"/>
        </table:table-row>
        <table:table-row table:style-name="ro1">
          <table:table-cell office:value-type="float" office:value="554.684692382813">
            <text:p>554.6846923828</text:p>
          </table:table-cell>
          <table:table-cell office:value-type="float" office:value="-0.004696608">
            <text:p>-0.004696608</text:p>
          </table:table-cell>
          <table:table-cell table:number-columns-repeated="4"/>
        </table:table-row>
        <table:table-row table:style-name="ro1">
          <table:table-cell office:value-type="float" office:value="554.802551269531">
            <text:p>554.8025512695</text:p>
          </table:table-cell>
          <table:table-cell office:value-type="float" office:value="-0.003645296">
            <text:p>-0.003645296</text:p>
          </table:table-cell>
          <table:table-cell table:number-columns-repeated="4"/>
        </table:table-row>
        <table:table-row table:style-name="ro1">
          <table:table-cell office:value-type="float" office:value="554.92041015625">
            <text:p>554.9204101563</text:p>
          </table:table-cell>
          <table:table-cell office:value-type="float" office:value="-0.006061414">
            <text:p>-0.006061414</text:p>
          </table:table-cell>
          <table:table-cell table:number-columns-repeated="4"/>
        </table:table-row>
        <table:table-row table:style-name="ro1">
          <table:table-cell office:value-type="float" office:value="555.038269042969">
            <text:p>555.038269043</text:p>
          </table:table-cell>
          <table:table-cell office:value-type="float" office:value="-0.0006299883">
            <text:p>-0.0006299883</text:p>
          </table:table-cell>
          <table:table-cell table:number-columns-repeated="4"/>
        </table:table-row>
        <table:table-row table:style-name="ro1">
          <table:table-cell office:value-type="float" office:value="555.156127929688">
            <text:p>555.1561279297</text:p>
          </table:table-cell>
          <table:table-cell office:value-type="float" office:value="-0.001315318">
            <text:p>-0.001315318</text:p>
          </table:table-cell>
          <table:table-cell table:number-columns-repeated="4"/>
        </table:table-row>
        <table:table-row table:style-name="ro1">
          <table:table-cell office:value-type="float" office:value="555.274047851563">
            <text:p>555.2740478516</text:p>
          </table:table-cell>
          <table:table-cell office:value-type="float" office:value="-0.0006065072">
            <text:p>-0.0006065072</text:p>
          </table:table-cell>
          <table:table-cell table:number-columns-repeated="4"/>
        </table:table-row>
        <table:table-row table:style-name="ro1">
          <table:table-cell office:value-type="float" office:value="555.391906738281">
            <text:p>555.3919067383</text:p>
          </table:table-cell>
          <table:table-cell office:value-type="float" office:value="0.001936668">
            <text:p>0.001936668</text:p>
          </table:table-cell>
          <table:table-cell table:number-columns-repeated="4"/>
        </table:table-row>
        <table:table-row table:style-name="ro1">
          <table:table-cell office:value-type="float" office:value="555.509765625">
            <text:p>555.509765625</text:p>
          </table:table-cell>
          <table:table-cell office:value-type="float" office:value="0.001116255">
            <text:p>0.001116255</text:p>
          </table:table-cell>
          <table:table-cell table:number-columns-repeated="4"/>
        </table:table-row>
        <table:table-row table:style-name="ro1">
          <table:table-cell office:value-type="float" office:value="555.627685546875">
            <text:p>555.6276855469</text:p>
          </table:table-cell>
          <table:table-cell office:value-type="float" office:value="0.007474428">
            <text:p>0.007474428</text:p>
          </table:table-cell>
          <table:table-cell table:number-columns-repeated="4"/>
        </table:table-row>
        <table:table-row table:style-name="ro1">
          <table:table-cell office:value-type="float" office:value="555.745544433594">
            <text:p>555.7455444336</text:p>
          </table:table-cell>
          <table:table-cell office:value-type="float" office:value="0.004360714">
            <text:p>0.004360714</text:p>
          </table:table-cell>
          <table:table-cell table:number-columns-repeated="4"/>
        </table:table-row>
        <table:table-row table:style-name="ro1">
          <table:table-cell office:value-type="float" office:value="555.863403320313">
            <text:p>555.8634033203</text:p>
          </table:table-cell>
          <table:table-cell office:value-type="float" office:value="-0.005670453">
            <text:p>-0.005670453</text:p>
          </table:table-cell>
          <table:table-cell table:number-columns-repeated="4"/>
        </table:table-row>
        <table:table-row table:style-name="ro1">
          <table:table-cell office:value-type="float" office:value="555.981323242188">
            <text:p>555.9813232422</text:p>
          </table:table-cell>
          <table:table-cell office:value-type="float" office:value="0.001514808">
            <text:p>0.001514808</text:p>
          </table:table-cell>
          <table:table-cell table:number-columns-repeated="4"/>
        </table:table-row>
        <table:table-row table:style-name="ro1">
          <table:table-cell office:value-type="float" office:value="556.099243164063">
            <text:p>556.0992431641</text:p>
          </table:table-cell>
          <table:table-cell office:value-type="float" office:value="-0.003827488">
            <text:p>-0.003827488</text:p>
          </table:table-cell>
          <table:table-cell table:number-columns-repeated="4"/>
        </table:table-row>
        <table:table-row table:style-name="ro1">
          <table:table-cell office:value-type="float" office:value="556.217102050781">
            <text:p>556.2171020508</text:p>
          </table:table-cell>
          <table:table-cell office:value-type="float" office:value="0.008742821">
            <text:p>0.008742821</text:p>
          </table:table-cell>
          <table:table-cell table:number-columns-repeated="4"/>
        </table:table-row>
        <table:table-row table:style-name="ro1">
          <table:table-cell office:value-type="float" office:value="556.335021972656">
            <text:p>556.3350219727</text:p>
          </table:table-cell>
          <table:table-cell office:value-type="float" office:value="0.01032272">
            <text:p>0.01032272</text:p>
          </table:table-cell>
          <table:table-cell table:number-columns-repeated="4"/>
        </table:table-row>
        <table:table-row table:style-name="ro1">
          <table:table-cell office:value-type="float" office:value="556.452941894531">
            <text:p>556.4529418945</text:p>
          </table:table-cell>
          <table:table-cell office:value-type="float" office:value="0.003602754">
            <text:p>0.003602754</text:p>
          </table:table-cell>
          <table:table-cell table:number-columns-repeated="4"/>
        </table:table-row>
        <table:table-row table:style-name="ro1">
          <table:table-cell office:value-type="float" office:value="556.57080078125">
            <text:p>556.5708007813</text:p>
          </table:table-cell>
          <table:table-cell office:value-type="float" office:value="0.00229935">
            <text:p>0.00229935</text:p>
          </table:table-cell>
          <table:table-cell table:number-columns-repeated="4"/>
        </table:table-row>
        <table:table-row table:style-name="ro1">
          <table:table-cell office:value-type="float" office:value="556.688720703125">
            <text:p>556.6887207031</text:p>
          </table:table-cell>
          <table:table-cell office:value-type="float" office:value="0.001142375">
            <text:p>0.001142375</text:p>
          </table:table-cell>
          <table:table-cell table:number-columns-repeated="4"/>
        </table:table-row>
        <table:table-row table:style-name="ro1">
          <table:table-cell office:value-type="float" office:value="556.806640625">
            <text:p>556.806640625</text:p>
          </table:table-cell>
          <table:table-cell office:value-type="float" office:value="0.001085518">
            <text:p>0.001085518</text:p>
          </table:table-cell>
          <table:table-cell table:number-columns-repeated="4"/>
        </table:table-row>
        <table:table-row table:style-name="ro1">
          <table:table-cell office:value-type="float" office:value="556.924560546875">
            <text:p>556.9245605469</text:p>
          </table:table-cell>
          <table:table-cell office:value-type="float" office:value="0.007195636">
            <text:p>0.007195636</text:p>
          </table:table-cell>
          <table:table-cell table:number-columns-repeated="4"/>
        </table:table-row>
        <table:table-row table:style-name="ro1">
          <table:table-cell office:value-type="float" office:value="557.04248046875">
            <text:p>557.0424804688</text:p>
          </table:table-cell>
          <table:table-cell office:value-type="float" office:value="0.0008972253">
            <text:p>0.0008972253</text:p>
          </table:table-cell>
          <table:table-cell table:number-columns-repeated="4"/>
        </table:table-row>
        <table:table-row table:style-name="ro1">
          <table:table-cell office:value-type="float" office:value="557.160400390625">
            <text:p>557.1604003906</text:p>
          </table:table-cell>
          <table:table-cell office:value-type="float" office:value="-0.004278118">
            <text:p>-0.004278118</text:p>
          </table:table-cell>
          <table:table-cell table:number-columns-repeated="4"/>
        </table:table-row>
        <table:table-row table:style-name="ro1">
          <table:table-cell office:value-type="float" office:value="557.2783203125">
            <text:p>557.2783203125</text:p>
          </table:table-cell>
          <table:table-cell office:value-type="float" office:value="0.01517464">
            <text:p>0.01517464</text:p>
          </table:table-cell>
          <table:table-cell table:number-columns-repeated="4"/>
        </table:table-row>
        <table:table-row table:style-name="ro1">
          <table:table-cell office:value-type="float" office:value="557.396240234375">
            <text:p>557.3962402344</text:p>
          </table:table-cell>
          <table:table-cell office:value-type="float" office:value="0.0008238092">
            <text:p>0.0008238092</text:p>
          </table:table-cell>
          <table:table-cell table:number-columns-repeated="4"/>
        </table:table-row>
        <table:table-row table:style-name="ro1">
          <table:table-cell office:value-type="float" office:value="557.51416015625">
            <text:p>557.5141601563</text:p>
          </table:table-cell>
          <table:table-cell office:value-type="float" office:value="-0.008052503">
            <text:p>-0.008052503</text:p>
          </table:table-cell>
          <table:table-cell table:number-columns-repeated="4"/>
        </table:table-row>
        <table:table-row table:style-name="ro1">
          <table:table-cell office:value-type="float" office:value="557.632141113281">
            <text:p>557.6321411133</text:p>
          </table:table-cell>
          <table:table-cell office:value-type="float" office:value="0.001831399">
            <text:p>0.001831399</text:p>
          </table:table-cell>
          <table:table-cell table:number-columns-repeated="4"/>
        </table:table-row>
        <table:table-row table:style-name="ro1">
          <table:table-cell office:value-type="float" office:value="557.750061035156">
            <text:p>557.7500610352</text:p>
          </table:table-cell>
          <table:table-cell office:value-type="float" office:value="-0.001704449">
            <text:p>-0.001704449</text:p>
          </table:table-cell>
          <table:table-cell table:number-columns-repeated="4"/>
        </table:table-row>
        <table:table-row table:style-name="ro1">
          <table:table-cell office:value-type="float" office:value="557.867980957031">
            <text:p>557.867980957</text:p>
          </table:table-cell>
          <table:table-cell office:value-type="float" office:value="0.001126169">
            <text:p>0.001126169</text:p>
          </table:table-cell>
          <table:table-cell table:number-columns-repeated="4"/>
        </table:table-row>
        <table:table-row table:style-name="ro1">
          <table:table-cell office:value-type="float" office:value="557.985961914063">
            <text:p>557.9859619141</text:p>
          </table:table-cell>
          <table:table-cell office:value-type="float" office:value="-0.009538309">
            <text:p>-0.009538309</text:p>
          </table:table-cell>
          <table:table-cell table:number-columns-repeated="4"/>
        </table:table-row>
        <table:table-row table:style-name="ro1">
          <table:table-cell office:value-type="float" office:value="558.103881835938">
            <text:p>558.1038818359</text:p>
          </table:table-cell>
          <table:table-cell office:value-type="float" office:value="-0.006705628">
            <text:p>-0.006705628</text:p>
          </table:table-cell>
          <table:table-cell table:number-columns-repeated="4"/>
        </table:table-row>
        <table:table-row table:style-name="ro1">
          <table:table-cell office:value-type="float" office:value="558.221801757813">
            <text:p>558.2218017578</text:p>
          </table:table-cell>
          <table:table-cell office:value-type="float" office:value="-0.002687008">
            <text:p>-0.002687008</text:p>
          </table:table-cell>
          <table:table-cell table:number-columns-repeated="4"/>
        </table:table-row>
        <table:table-row table:style-name="ro1">
          <table:table-cell office:value-type="float" office:value="558.339782714844">
            <text:p>558.3397827148</text:p>
          </table:table-cell>
          <table:table-cell office:value-type="float" office:value="0.007952477">
            <text:p>0.007952477</text:p>
          </table:table-cell>
          <table:table-cell table:number-columns-repeated="4"/>
        </table:table-row>
        <table:table-row table:style-name="ro1">
          <table:table-cell office:value-type="float" office:value="558.457702636719">
            <text:p>558.4577026367</text:p>
          </table:table-cell>
          <table:table-cell office:value-type="float" office:value="-0.00315871">
            <text:p>-0.00315871</text:p>
          </table:table-cell>
          <table:table-cell table:number-columns-repeated="4"/>
        </table:table-row>
        <table:table-row table:style-name="ro1">
          <table:table-cell office:value-type="float" office:value="558.57568359375">
            <text:p>558.5756835938</text:p>
          </table:table-cell>
          <table:table-cell office:value-type="float" office:value="0.001041715">
            <text:p>0.001041715</text:p>
          </table:table-cell>
          <table:table-cell table:number-columns-repeated="4"/>
        </table:table-row>
        <table:table-row table:style-name="ro1">
          <table:table-cell office:value-type="float" office:value="558.693664550781">
            <text:p>558.6936645508</text:p>
          </table:table-cell>
          <table:table-cell office:value-type="float" office:value="0.005580686">
            <text:p>0.005580686</text:p>
          </table:table-cell>
          <table:table-cell table:number-columns-repeated="4"/>
        </table:table-row>
        <table:table-row table:style-name="ro1">
          <table:table-cell office:value-type="float" office:value="558.811584472656">
            <text:p>558.8115844727</text:p>
          </table:table-cell>
          <table:table-cell office:value-type="float" office:value="0.006952159">
            <text:p>0.006952159</text:p>
          </table:table-cell>
          <table:table-cell table:number-columns-repeated="4"/>
        </table:table-row>
        <table:table-row table:style-name="ro1">
          <table:table-cell office:value-type="float" office:value="558.929565429688">
            <text:p>558.9295654297</text:p>
          </table:table-cell>
          <table:table-cell office:value-type="float" office:value="-0.002700699">
            <text:p>-0.002700699</text:p>
          </table:table-cell>
          <table:table-cell table:number-columns-repeated="4"/>
        </table:table-row>
        <table:table-row table:style-name="ro1">
          <table:table-cell office:value-type="float" office:value="559.047546386719">
            <text:p>559.0475463867</text:p>
          </table:table-cell>
          <table:table-cell office:value-type="float" office:value="0.002636894">
            <text:p>0.002636894</text:p>
          </table:table-cell>
          <table:table-cell table:number-columns-repeated="4"/>
        </table:table-row>
        <table:table-row table:style-name="ro1">
          <table:table-cell office:value-type="float" office:value="559.16552734375">
            <text:p>559.1655273438</text:p>
          </table:table-cell>
          <table:table-cell office:value-type="float" office:value="0.00170646">
            <text:p>0.00170646</text:p>
          </table:table-cell>
          <table:table-cell table:number-columns-repeated="4"/>
        </table:table-row>
        <table:table-row table:style-name="ro1">
          <table:table-cell office:value-type="float" office:value="559.283508300781">
            <text:p>559.2835083008</text:p>
          </table:table-cell>
          <table:table-cell office:value-type="float" office:value="0.0001900353">
            <text:p>0.0001900353</text:p>
          </table:table-cell>
          <table:table-cell table:number-columns-repeated="4"/>
        </table:table-row>
        <table:table-row table:style-name="ro1">
          <table:table-cell office:value-type="float" office:value="559.401489257813">
            <text:p>559.4014892578</text:p>
          </table:table-cell>
          <table:table-cell office:value-type="float" office:value="0.005467399">
            <text:p>0.005467399</text:p>
          </table:table-cell>
          <table:table-cell table:number-columns-repeated="4"/>
        </table:table-row>
        <table:table-row table:style-name="ro1">
          <table:table-cell office:value-type="float" office:value="559.519470214844">
            <text:p>559.5194702148</text:p>
          </table:table-cell>
          <table:table-cell office:value-type="float" office:value="-0.008661398">
            <text:p>-0.008661398</text:p>
          </table:table-cell>
          <table:table-cell table:number-columns-repeated="4"/>
        </table:table-row>
        <table:table-row table:style-name="ro1">
          <table:table-cell office:value-type="float" office:value="559.637451171875">
            <text:p>559.6374511719</text:p>
          </table:table-cell>
          <table:table-cell office:value-type="float" office:value="0.002601767">
            <text:p>0.002601767</text:p>
          </table:table-cell>
          <table:table-cell table:number-columns-repeated="4"/>
        </table:table-row>
        <table:table-row table:style-name="ro1">
          <table:table-cell office:value-type="float" office:value="559.755432128906">
            <text:p>559.7554321289</text:p>
          </table:table-cell>
          <table:table-cell office:value-type="float" office:value="0.007952768">
            <text:p>0.007952768</text:p>
          </table:table-cell>
          <table:table-cell table:number-columns-repeated="4"/>
        </table:table-row>
        <table:table-row table:style-name="ro1">
          <table:table-cell office:value-type="float" office:value="559.873413085938">
            <text:p>559.8734130859</text:p>
          </table:table-cell>
          <table:table-cell office:value-type="float" office:value="-0.001638047">
            <text:p>-0.001638047</text:p>
          </table:table-cell>
          <table:table-cell table:number-columns-repeated="4"/>
        </table:table-row>
        <table:table-row table:style-name="ro1">
          <table:table-cell office:value-type="float" office:value="559.991394042969">
            <text:p>559.991394043</text:p>
          </table:table-cell>
          <table:table-cell office:value-type="float" office:value="0.003305102">
            <text:p>0.003305102</text:p>
          </table:table-cell>
          <table:table-cell table:number-columns-repeated="4"/>
        </table:table-row>
        <table:table-row table:style-name="ro1">
          <table:table-cell office:value-type="float" office:value="560.109375">
            <text:p>560.109375</text:p>
          </table:table-cell>
          <table:table-cell office:value-type="float" office:value="0.006221542">
            <text:p>0.006221542</text:p>
          </table:table-cell>
          <table:table-cell table:number-columns-repeated="4"/>
        </table:table-row>
        <table:table-row table:style-name="ro1">
          <table:table-cell office:value-type="float" office:value="560.227416992188">
            <text:p>560.2274169922</text:p>
          </table:table-cell>
          <table:table-cell office:value-type="float" office:value="-0.001072972">
            <text:p>-0.001072972</text:p>
          </table:table-cell>
          <table:table-cell table:number-columns-repeated="4"/>
        </table:table-row>
        <table:table-row table:style-name="ro1">
          <table:table-cell office:value-type="float" office:value="560.345397949219">
            <text:p>560.3453979492</text:p>
          </table:table-cell>
          <table:table-cell office:value-type="float" office:value="-0.00672131">
            <text:p>-0.00672131</text:p>
          </table:table-cell>
          <table:table-cell table:number-columns-repeated="4"/>
        </table:table-row>
        <table:table-row table:style-name="ro1">
          <table:table-cell office:value-type="float" office:value="560.46337890625">
            <text:p>560.4633789063</text:p>
          </table:table-cell>
          <table:table-cell office:value-type="float" office:value="0.005578114">
            <text:p>0.005578114</text:p>
          </table:table-cell>
          <table:table-cell table:number-columns-repeated="4"/>
        </table:table-row>
        <table:table-row table:style-name="ro1">
          <table:table-cell office:value-type="float" office:value="560.581420898438">
            <text:p>560.5814208984</text:p>
          </table:table-cell>
          <table:table-cell office:value-type="float" office:value="0.02454605">
            <text:p>0.02454605</text:p>
          </table:table-cell>
          <table:table-cell table:number-columns-repeated="4"/>
        </table:table-row>
        <table:table-row table:style-name="ro1">
          <table:table-cell office:value-type="float" office:value="560.699401855469">
            <text:p>560.6994018555</text:p>
          </table:table-cell>
          <table:table-cell office:value-type="float" office:value="-0.004640031">
            <text:p>-0.004640031</text:p>
          </table:table-cell>
          <table:table-cell table:number-columns-repeated="4"/>
        </table:table-row>
        <table:table-row table:style-name="ro1">
          <table:table-cell office:value-type="float" office:value="560.817443847656">
            <text:p>560.8174438477</text:p>
          </table:table-cell>
          <table:table-cell office:value-type="float" office:value="-0.003324388">
            <text:p>-0.003324388</text:p>
          </table:table-cell>
          <table:table-cell table:number-columns-repeated="4"/>
        </table:table-row>
        <table:table-row table:style-name="ro1">
          <table:table-cell office:value-type="float" office:value="560.935424804688">
            <text:p>560.9354248047</text:p>
          </table:table-cell>
          <table:table-cell office:value-type="float" office:value="0.006600443">
            <text:p>0.006600443</text:p>
          </table:table-cell>
          <table:table-cell table:number-columns-repeated="4"/>
        </table:table-row>
        <table:table-row table:style-name="ro1">
          <table:table-cell office:value-type="float" office:value="561.053466796875">
            <text:p>561.0534667969</text:p>
          </table:table-cell>
          <table:table-cell office:value-type="float" office:value="0.001689864">
            <text:p>0.001689864</text:p>
          </table:table-cell>
          <table:table-cell table:number-columns-repeated="4"/>
        </table:table-row>
        <table:table-row table:style-name="ro1">
          <table:table-cell office:value-type="float" office:value="561.171508789063">
            <text:p>561.1715087891</text:p>
          </table:table-cell>
          <table:table-cell office:value-type="float" office:value="-0.002090413">
            <text:p>-0.002090413</text:p>
          </table:table-cell>
          <table:table-cell table:number-columns-repeated="4"/>
        </table:table-row>
        <table:table-row table:style-name="ro1">
          <table:table-cell office:value-type="float" office:value="561.289489746094">
            <text:p>561.2894897461</text:p>
          </table:table-cell>
          <table:table-cell office:value-type="float" office:value="0.00708345">
            <text:p>0.00708345</text:p>
          </table:table-cell>
          <table:table-cell table:number-columns-repeated="4"/>
        </table:table-row>
        <table:table-row table:style-name="ro1">
          <table:table-cell office:value-type="float" office:value="561.407531738281">
            <text:p>561.4075317383</text:p>
          </table:table-cell>
          <table:table-cell office:value-type="float" office:value="-0.001863885">
            <text:p>-0.001863885</text:p>
          </table:table-cell>
          <table:table-cell table:number-columns-repeated="4"/>
        </table:table-row>
        <table:table-row table:style-name="ro1">
          <table:table-cell office:value-type="float" office:value="561.525573730469">
            <text:p>561.5255737305</text:p>
          </table:table-cell>
          <table:table-cell office:value-type="float" office:value="0.0126936">
            <text:p>0.0126936</text:p>
          </table:table-cell>
          <table:table-cell table:number-columns-repeated="4"/>
        </table:table-row>
        <table:table-row table:style-name="ro1">
          <table:table-cell office:value-type="float" office:value="561.643615722656">
            <text:p>561.6436157227</text:p>
          </table:table-cell>
          <table:table-cell office:value-type="float" office:value="-0.003153109">
            <text:p>-0.003153109</text:p>
          </table:table-cell>
          <table:table-cell table:number-columns-repeated="4"/>
        </table:table-row>
        <table:table-row table:style-name="ro1">
          <table:table-cell office:value-type="float" office:value="561.761657714844">
            <text:p>561.7616577148</text:p>
          </table:table-cell>
          <table:table-cell office:value-type="float" office:value="-0.006815967">
            <text:p>-0.006815967</text:p>
          </table:table-cell>
          <table:table-cell table:number-columns-repeated="4"/>
        </table:table-row>
        <table:table-row table:style-name="ro1">
          <table:table-cell office:value-type="float" office:value="561.879699707031">
            <text:p>561.879699707</text:p>
          </table:table-cell>
          <table:table-cell office:value-type="float" office:value="0.01018528">
            <text:p>0.01018528</text:p>
          </table:table-cell>
          <table:table-cell table:number-columns-repeated="4"/>
        </table:table-row>
        <table:table-row table:style-name="ro1">
          <table:table-cell office:value-type="float" office:value="561.997741699219">
            <text:p>561.9977416992</text:p>
          </table:table-cell>
          <table:table-cell office:value-type="float" office:value="0.01742851">
            <text:p>0.01742851</text:p>
          </table:table-cell>
          <table:table-cell table:number-columns-repeated="4"/>
        </table:table-row>
        <table:table-row table:style-name="ro1">
          <table:table-cell office:value-type="float" office:value="562.115783691406">
            <text:p>562.1157836914</text:p>
          </table:table-cell>
          <table:table-cell office:value-type="float" office:value="-0.004251859">
            <text:p>-0.004251859</text:p>
          </table:table-cell>
          <table:table-cell table:number-columns-repeated="4"/>
        </table:table-row>
        <table:table-row table:style-name="ro1">
          <table:table-cell office:value-type="float" office:value="562.233825683594">
            <text:p>562.2338256836</text:p>
          </table:table-cell>
          <table:table-cell office:value-type="float" office:value="0.009165815">
            <text:p>0.009165815</text:p>
          </table:table-cell>
          <table:table-cell table:number-columns-repeated="4"/>
        </table:table-row>
        <table:table-row table:style-name="ro1">
          <table:table-cell office:value-type="float" office:value="562.351867675781">
            <text:p>562.3518676758</text:p>
          </table:table-cell>
          <table:table-cell office:value-type="float" office:value="0.00677416">
            <text:p>0.00677416</text:p>
          </table:table-cell>
          <table:table-cell table:number-columns-repeated="4"/>
        </table:table-row>
        <table:table-row table:style-name="ro1">
          <table:table-cell office:value-type="float" office:value="562.469909667969">
            <text:p>562.469909668</text:p>
          </table:table-cell>
          <table:table-cell office:value-type="float" office:value="0.00550796">
            <text:p>0.00550796</text:p>
          </table:table-cell>
          <table:table-cell table:number-columns-repeated="4"/>
        </table:table-row>
        <table:table-row table:style-name="ro1">
          <table:table-cell office:value-type="float" office:value="562.588012695313">
            <text:p>562.5880126953</text:p>
          </table:table-cell>
          <table:table-cell office:value-type="float" office:value="0.003082458">
            <text:p>0.003082458</text:p>
          </table:table-cell>
          <table:table-cell table:number-columns-repeated="4"/>
        </table:table-row>
        <table:table-row table:style-name="ro1">
          <table:table-cell office:value-type="float" office:value="562.7060546875">
            <text:p>562.7060546875</text:p>
          </table:table-cell>
          <table:table-cell office:value-type="float" office:value="-0.007353052">
            <text:p>-0.007353052</text:p>
          </table:table-cell>
          <table:table-cell table:number-columns-repeated="4"/>
        </table:table-row>
        <table:table-row table:style-name="ro1">
          <table:table-cell office:value-type="float" office:value="562.824096679688">
            <text:p>562.8240966797</text:p>
          </table:table-cell>
          <table:table-cell office:value-type="float" office:value="-0.003132128">
            <text:p>-0.003132128</text:p>
          </table:table-cell>
          <table:table-cell table:number-columns-repeated="4"/>
        </table:table-row>
        <table:table-row table:style-name="ro1">
          <table:table-cell office:value-type="float" office:value="562.942199707031">
            <text:p>562.942199707</text:p>
          </table:table-cell>
          <table:table-cell office:value-type="float" office:value="-0.003477871">
            <text:p>-0.003477871</text:p>
          </table:table-cell>
          <table:table-cell table:number-columns-repeated="4"/>
        </table:table-row>
        <table:table-row table:style-name="ro1">
          <table:table-cell office:value-type="float" office:value="563.060241699219">
            <text:p>563.0602416992</text:p>
          </table:table-cell>
          <table:table-cell office:value-type="float" office:value="0.00504289">
            <text:p>0.00504289</text:p>
          </table:table-cell>
          <table:table-cell table:number-columns-repeated="4"/>
        </table:table-row>
        <table:table-row table:style-name="ro1">
          <table:table-cell office:value-type="float" office:value="563.178344726563">
            <text:p>563.1783447266</text:p>
          </table:table-cell>
          <table:table-cell office:value-type="float" office:value="0.01439479">
            <text:p>0.01439479</text:p>
          </table:table-cell>
          <table:table-cell table:number-columns-repeated="4"/>
        </table:table-row>
        <table:table-row table:style-name="ro1">
          <table:table-cell office:value-type="float" office:value="563.29638671875">
            <text:p>563.2963867188</text:p>
          </table:table-cell>
          <table:table-cell office:value-type="float" office:value="-0.003721931">
            <text:p>-0.003721931</text:p>
          </table:table-cell>
          <table:table-cell table:number-columns-repeated="4"/>
        </table:table-row>
        <table:table-row table:style-name="ro1">
          <table:table-cell office:value-type="float" office:value="563.414489746094">
            <text:p>563.4144897461</text:p>
          </table:table-cell>
          <table:table-cell office:value-type="float" office:value="0.007621369">
            <text:p>0.007621369</text:p>
          </table:table-cell>
          <table:table-cell table:number-columns-repeated="4"/>
        </table:table-row>
        <table:table-row table:style-name="ro1">
          <table:table-cell office:value-type="float" office:value="563.532531738281">
            <text:p>563.5325317383</text:p>
          </table:table-cell>
          <table:table-cell office:value-type="float" office:value="0.01578031">
            <text:p>0.01578031</text:p>
          </table:table-cell>
          <table:table-cell table:number-columns-repeated="4"/>
        </table:table-row>
        <table:table-row table:style-name="ro1">
          <table:table-cell office:value-type="float" office:value="563.650634765625">
            <text:p>563.6506347656</text:p>
          </table:table-cell>
          <table:table-cell office:value-type="float" office:value="-0.002686039">
            <text:p>-0.002686039</text:p>
          </table:table-cell>
          <table:table-cell table:number-columns-repeated="4"/>
        </table:table-row>
        <table:table-row table:style-name="ro1">
          <table:table-cell office:value-type="float" office:value="563.768737792969">
            <text:p>563.768737793</text:p>
          </table:table-cell>
          <table:table-cell office:value-type="float" office:value="-0.003433146">
            <text:p>-0.003433146</text:p>
          </table:table-cell>
          <table:table-cell table:number-columns-repeated="4"/>
        </table:table-row>
        <table:table-row table:style-name="ro1">
          <table:table-cell office:value-type="float" office:value="563.886779785156">
            <text:p>563.8867797852</text:p>
          </table:table-cell>
          <table:table-cell office:value-type="float" office:value="0.004661099">
            <text:p>0.004661099</text:p>
          </table:table-cell>
          <table:table-cell table:number-columns-repeated="4"/>
        </table:table-row>
        <table:table-row table:style-name="ro1">
          <table:table-cell office:value-type="float" office:value="564.0048828125">
            <text:p>564.0048828125</text:p>
          </table:table-cell>
          <table:table-cell office:value-type="float" office:value="-0.001719699">
            <text:p>-0.001719699</text:p>
          </table:table-cell>
          <table:table-cell table:number-columns-repeated="4"/>
        </table:table-row>
        <table:table-row table:style-name="ro1">
          <table:table-cell office:value-type="float" office:value="564.122985839844">
            <text:p>564.1229858398</text:p>
          </table:table-cell>
          <table:table-cell office:value-type="float" office:value="-0.00653011">
            <text:p>-0.00653011</text:p>
          </table:table-cell>
          <table:table-cell table:number-columns-repeated="4"/>
        </table:table-row>
        <table:table-row table:style-name="ro1">
          <table:table-cell office:value-type="float" office:value="564.241088867188">
            <text:p>564.2410888672</text:p>
          </table:table-cell>
          <table:table-cell office:value-type="float" office:value="0.01121446">
            <text:p>0.01121446</text:p>
          </table:table-cell>
          <table:table-cell table:number-columns-repeated="4"/>
        </table:table-row>
        <table:table-row table:style-name="ro1">
          <table:table-cell office:value-type="float" office:value="564.359191894531">
            <text:p>564.3591918945</text:p>
          </table:table-cell>
          <table:table-cell office:value-type="float" office:value="0.009801475">
            <text:p>0.009801475</text:p>
          </table:table-cell>
          <table:table-cell table:number-columns-repeated="4"/>
        </table:table-row>
        <table:table-row table:style-name="ro1">
          <table:table-cell office:value-type="float" office:value="564.477294921875">
            <text:p>564.4772949219</text:p>
          </table:table-cell>
          <table:table-cell office:value-type="float" office:value="0.003533794">
            <text:p>0.003533794</text:p>
          </table:table-cell>
          <table:table-cell table:number-columns-repeated="4"/>
        </table:table-row>
        <table:table-row table:style-name="ro1">
          <table:table-cell office:value-type="float" office:value="564.595397949219">
            <text:p>564.5953979492</text:p>
          </table:table-cell>
          <table:table-cell office:value-type="float" office:value="0.01003265">
            <text:p>0.01003265</text:p>
          </table:table-cell>
          <table:table-cell table:number-columns-repeated="4"/>
        </table:table-row>
        <table:table-row table:style-name="ro1">
          <table:table-cell office:value-type="float" office:value="564.713500976563">
            <text:p>564.7135009766</text:p>
          </table:table-cell>
          <table:table-cell office:value-type="float" office:value="0.03675501">
            <text:p>0.03675501</text:p>
          </table:table-cell>
          <table:table-cell table:number-columns-repeated="4"/>
        </table:table-row>
        <table:table-row table:style-name="ro1">
          <table:table-cell office:value-type="float" office:value="564.831604003906">
            <text:p>564.8316040039</text:p>
          </table:table-cell>
          <table:table-cell office:value-type="float" office:value="0.004248451">
            <text:p>0.004248451</text:p>
          </table:table-cell>
          <table:table-cell table:number-columns-repeated="4"/>
        </table:table-row>
        <table:table-row table:style-name="ro1">
          <table:table-cell office:value-type="float" office:value="564.949768066406">
            <text:p>564.9497680664</text:p>
          </table:table-cell>
          <table:table-cell office:value-type="float" office:value="0.006786022">
            <text:p>0.006786022</text:p>
          </table:table-cell>
          <table:table-cell table:number-columns-repeated="4"/>
        </table:table-row>
        <table:table-row table:style-name="ro1">
          <table:table-cell office:value-type="float" office:value="565.06787109375">
            <text:p>565.0678710938</text:p>
          </table:table-cell>
          <table:table-cell office:value-type="float" office:value="0.01262431">
            <text:p>0.01262431</text:p>
          </table:table-cell>
          <table:table-cell table:number-columns-repeated="4"/>
        </table:table-row>
        <table:table-row table:style-name="ro1">
          <table:table-cell office:value-type="float" office:value="565.185974121094">
            <text:p>565.1859741211</text:p>
          </table:table-cell>
          <table:table-cell office:value-type="float" office:value="0.00885351">
            <text:p>0.00885351</text:p>
          </table:table-cell>
          <table:table-cell table:number-columns-repeated="4"/>
        </table:table-row>
        <table:table-row table:style-name="ro1">
          <table:table-cell office:value-type="float" office:value="565.304077148438">
            <text:p>565.3040771484</text:p>
          </table:table-cell>
          <table:table-cell office:value-type="float" office:value="-0.003070716">
            <text:p>-0.003070716</text:p>
          </table:table-cell>
          <table:table-cell table:number-columns-repeated="4"/>
        </table:table-row>
        <table:table-row table:style-name="ro1">
          <table:table-cell office:value-type="float" office:value="565.422241210938">
            <text:p>565.4222412109</text:p>
          </table:table-cell>
          <table:table-cell office:value-type="float" office:value="0.005270809">
            <text:p>0.005270809</text:p>
          </table:table-cell>
          <table:table-cell table:number-columns-repeated="4"/>
        </table:table-row>
        <table:table-row table:style-name="ro1">
          <table:table-cell office:value-type="float" office:value="565.540344238281">
            <text:p>565.5403442383</text:p>
          </table:table-cell>
          <table:table-cell office:value-type="float" office:value="-0.0005017594">
            <text:p>-0.0005017594</text:p>
          </table:table-cell>
          <table:table-cell table:number-columns-repeated="4"/>
        </table:table-row>
        <table:table-row table:style-name="ro1">
          <table:table-cell office:value-type="float" office:value="565.658508300781">
            <text:p>565.6585083008</text:p>
          </table:table-cell>
          <table:table-cell office:value-type="float" office:value="0.01071688">
            <text:p>0.01071688</text:p>
          </table:table-cell>
          <table:table-cell table:number-columns-repeated="4"/>
        </table:table-row>
        <table:table-row table:style-name="ro1">
          <table:table-cell office:value-type="float" office:value="565.776611328125">
            <text:p>565.7766113281</text:p>
          </table:table-cell>
          <table:table-cell office:value-type="float" office:value="0.007453801">
            <text:p>0.007453801</text:p>
          </table:table-cell>
          <table:table-cell table:number-columns-repeated="4"/>
        </table:table-row>
        <table:table-row table:style-name="ro1">
          <table:table-cell office:value-type="float" office:value="565.894775390625">
            <text:p>565.8947753906</text:p>
          </table:table-cell>
          <table:table-cell office:value-type="float" office:value="0.01832343">
            <text:p>0.01832343</text:p>
          </table:table-cell>
          <table:table-cell table:number-columns-repeated="4"/>
        </table:table-row>
        <table:table-row table:style-name="ro1">
          <table:table-cell office:value-type="float" office:value="566.012878417969">
            <text:p>566.012878418</text:p>
          </table:table-cell>
          <table:table-cell office:value-type="float" office:value="0.008019983">
            <text:p>0.008019983</text:p>
          </table:table-cell>
          <table:table-cell table:number-columns-repeated="4"/>
        </table:table-row>
        <table:table-row table:style-name="ro1">
          <table:table-cell office:value-type="float" office:value="566.131042480469">
            <text:p>566.1310424805</text:p>
          </table:table-cell>
          <table:table-cell office:value-type="float" office:value="0.006060471">
            <text:p>0.006060471</text:p>
          </table:table-cell>
          <table:table-cell table:number-columns-repeated="4"/>
        </table:table-row>
        <table:table-row table:style-name="ro1">
          <table:table-cell office:value-type="float" office:value="566.249206542969">
            <text:p>566.249206543</text:p>
          </table:table-cell>
          <table:table-cell office:value-type="float" office:value="0.00814076">
            <text:p>0.00814076</text:p>
          </table:table-cell>
          <table:table-cell table:number-columns-repeated="4"/>
        </table:table-row>
        <table:table-row table:style-name="ro1">
          <table:table-cell office:value-type="float" office:value="566.367370605469">
            <text:p>566.3673706055</text:p>
          </table:table-cell>
          <table:table-cell office:value-type="float" office:value="0.01116513">
            <text:p>0.01116513</text:p>
          </table:table-cell>
          <table:table-cell table:number-columns-repeated="4"/>
        </table:table-row>
        <table:table-row table:style-name="ro1">
          <table:table-cell office:value-type="float" office:value="566.485473632813">
            <text:p>566.4854736328</text:p>
          </table:table-cell>
          <table:table-cell office:value-type="float" office:value="-0.001065365">
            <text:p>-0.001065365</text:p>
          </table:table-cell>
          <table:table-cell table:number-columns-repeated="4"/>
        </table:table-row>
        <table:table-row table:style-name="ro1">
          <table:table-cell office:value-type="float" office:value="566.603637695313">
            <text:p>566.6036376953</text:p>
          </table:table-cell>
          <table:table-cell office:value-type="float" office:value="0.02452376">
            <text:p>0.02452376</text:p>
          </table:table-cell>
          <table:table-cell table:number-columns-repeated="4"/>
        </table:table-row>
        <table:table-row table:style-name="ro1">
          <table:table-cell office:value-type="float" office:value="566.721801757813">
            <text:p>566.7218017578</text:p>
          </table:table-cell>
          <table:table-cell office:value-type="float" office:value="0.01094427">
            <text:p>0.01094427</text:p>
          </table:table-cell>
          <table:table-cell table:number-columns-repeated="4"/>
        </table:table-row>
        <table:table-row table:style-name="ro1">
          <table:table-cell office:value-type="float" office:value="566.839965820313">
            <text:p>566.8399658203</text:p>
          </table:table-cell>
          <table:table-cell office:value-type="float" office:value="0.005486497">
            <text:p>0.005486497</text:p>
          </table:table-cell>
          <table:table-cell table:number-columns-repeated="4"/>
        </table:table-row>
        <table:table-row table:style-name="ro1">
          <table:table-cell office:value-type="float" office:value="566.958129882813">
            <text:p>566.9581298828</text:p>
          </table:table-cell>
          <table:table-cell office:value-type="float" office:value="0.01367364">
            <text:p>0.01367364</text:p>
          </table:table-cell>
          <table:table-cell table:number-columns-repeated="4"/>
        </table:table-row>
        <table:table-row table:style-name="ro1">
          <table:table-cell office:value-type="float" office:value="567.076293945313">
            <text:p>567.0762939453</text:p>
          </table:table-cell>
          <table:table-cell office:value-type="float" office:value="0.02654258">
            <text:p>0.02654258</text:p>
          </table:table-cell>
          <table:table-cell table:number-columns-repeated="4"/>
        </table:table-row>
        <table:table-row table:style-name="ro1">
          <table:table-cell office:value-type="float" office:value="567.194458007813">
            <text:p>567.1944580078</text:p>
          </table:table-cell>
          <table:table-cell office:value-type="float" office:value="0.01760965">
            <text:p>0.01760965</text:p>
          </table:table-cell>
          <table:table-cell table:number-columns-repeated="4"/>
        </table:table-row>
        <table:table-row table:style-name="ro1">
          <table:table-cell office:value-type="float" office:value="567.312622070313">
            <text:p>567.3126220703</text:p>
          </table:table-cell>
          <table:table-cell office:value-type="float" office:value="0.01134522">
            <text:p>0.01134522</text:p>
          </table:table-cell>
          <table:table-cell table:number-columns-repeated="4"/>
        </table:table-row>
        <table:table-row table:style-name="ro1">
          <table:table-cell office:value-type="float" office:value="567.430847167969">
            <text:p>567.430847168</text:p>
          </table:table-cell>
          <table:table-cell office:value-type="float" office:value="0.006451666">
            <text:p>0.006451666</text:p>
          </table:table-cell>
          <table:table-cell table:number-columns-repeated="4"/>
        </table:table-row>
        <table:table-row table:style-name="ro1">
          <table:table-cell office:value-type="float" office:value="567.549011230469">
            <text:p>567.5490112305</text:p>
          </table:table-cell>
          <table:table-cell office:value-type="float" office:value="0.02098036">
            <text:p>0.02098036</text:p>
          </table:table-cell>
          <table:table-cell table:number-columns-repeated="4"/>
        </table:table-row>
        <table:table-row table:style-name="ro1">
          <table:table-cell office:value-type="float" office:value="567.667175292969">
            <text:p>567.667175293</text:p>
          </table:table-cell>
          <table:table-cell office:value-type="float" office:value="0.01327275">
            <text:p>0.01327275</text:p>
          </table:table-cell>
          <table:table-cell table:number-columns-repeated="4"/>
        </table:table-row>
        <table:table-row table:style-name="ro1">
          <table:table-cell office:value-type="float" office:value="567.785339355469">
            <text:p>567.7853393555</text:p>
          </table:table-cell>
          <table:table-cell office:value-type="float" office:value="0.0154693">
            <text:p>0.0154693</text:p>
          </table:table-cell>
          <table:table-cell table:number-columns-repeated="4"/>
        </table:table-row>
        <table:table-row table:style-name="ro1">
          <table:table-cell office:value-type="float" office:value="567.903564453125">
            <text:p>567.9035644531</text:p>
          </table:table-cell>
          <table:table-cell office:value-type="float" office:value="0.009262316">
            <text:p>0.009262316</text:p>
          </table:table-cell>
          <table:table-cell table:number-columns-repeated="4"/>
        </table:table-row>
        <table:table-row table:style-name="ro1">
          <table:table-cell office:value-type="float" office:value="568.021728515625">
            <text:p>568.0217285156</text:p>
          </table:table-cell>
          <table:table-cell office:value-type="float" office:value="0.03452197">
            <text:p>0.03452197</text:p>
          </table:table-cell>
          <table:table-cell table:number-columns-repeated="4"/>
        </table:table-row>
        <table:table-row table:style-name="ro1">
          <table:table-cell office:value-type="float" office:value="568.139953613281">
            <text:p>568.1399536133</text:p>
          </table:table-cell>
          <table:table-cell office:value-type="float" office:value="0.03630224">
            <text:p>0.03630224</text:p>
          </table:table-cell>
          <table:table-cell table:number-columns-repeated="4"/>
        </table:table-row>
        <table:table-row table:style-name="ro1">
          <table:table-cell office:value-type="float" office:value="568.258117675781">
            <text:p>568.2581176758</text:p>
          </table:table-cell>
          <table:table-cell office:value-type="float" office:value="0.004601407">
            <text:p>0.004601407</text:p>
          </table:table-cell>
          <table:table-cell table:number-columns-repeated="4"/>
        </table:table-row>
        <table:table-row table:style-name="ro1">
          <table:table-cell office:value-type="float" office:value="568.376342773438">
            <text:p>568.3763427734</text:p>
          </table:table-cell>
          <table:table-cell office:value-type="float" office:value="0.01019491">
            <text:p>0.01019491</text:p>
          </table:table-cell>
          <table:table-cell table:number-columns-repeated="4"/>
        </table:table-row>
        <table:table-row table:style-name="ro1">
          <table:table-cell office:value-type="float" office:value="568.494506835938">
            <text:p>568.4945068359</text:p>
          </table:table-cell>
          <table:table-cell office:value-type="float" office:value="0.02058775">
            <text:p>0.02058775</text:p>
          </table:table-cell>
          <table:table-cell table:number-columns-repeated="4"/>
        </table:table-row>
        <table:table-row table:style-name="ro1">
          <table:table-cell office:value-type="float" office:value="568.612731933594">
            <text:p>568.6127319336</text:p>
          </table:table-cell>
          <table:table-cell office:value-type="float" office:value="0.02114812">
            <text:p>0.02114812</text:p>
          </table:table-cell>
          <table:table-cell table:number-columns-repeated="4"/>
        </table:table-row>
        <table:table-row table:style-name="ro1">
          <table:table-cell office:value-type="float" office:value="568.73095703125">
            <text:p>568.7309570313</text:p>
          </table:table-cell>
          <table:table-cell office:value-type="float" office:value="-0.0005680143">
            <text:p>-0.0005680143</text:p>
          </table:table-cell>
          <table:table-cell table:number-columns-repeated="4"/>
        </table:table-row>
        <table:table-row table:style-name="ro1">
          <table:table-cell office:value-type="float" office:value="568.84912109375">
            <text:p>568.8491210938</text:p>
          </table:table-cell>
          <table:table-cell office:value-type="float" office:value="0.01680195">
            <text:p>0.01680195</text:p>
          </table:table-cell>
          <table:table-cell table:number-columns-repeated="4"/>
        </table:table-row>
        <table:table-row table:style-name="ro1">
          <table:table-cell office:value-type="float" office:value="568.967346191406">
            <text:p>568.9673461914</text:p>
          </table:table-cell>
          <table:table-cell office:value-type="float" office:value="0.0197243">
            <text:p>0.0197243</text:p>
          </table:table-cell>
          <table:table-cell table:number-columns-repeated="4"/>
        </table:table-row>
        <table:table-row table:style-name="ro1">
          <table:table-cell office:value-type="float" office:value="569.085571289063">
            <text:p>569.0855712891</text:p>
          </table:table-cell>
          <table:table-cell office:value-type="float" office:value="0.0311477">
            <text:p>0.0311477</text:p>
          </table:table-cell>
          <table:table-cell table:number-columns-repeated="4"/>
        </table:table-row>
        <table:table-row table:style-name="ro1">
          <table:table-cell office:value-type="float" office:value="569.203796386719">
            <text:p>569.2037963867</text:p>
          </table:table-cell>
          <table:table-cell office:value-type="float" office:value="0.002380025">
            <text:p>0.002380025</text:p>
          </table:table-cell>
          <table:table-cell table:number-columns-repeated="4"/>
        </table:table-row>
        <table:table-row table:style-name="ro1">
          <table:table-cell office:value-type="float" office:value="569.322021484375">
            <text:p>569.3220214844</text:p>
          </table:table-cell>
          <table:table-cell office:value-type="float" office:value="0.01554163">
            <text:p>0.01554163</text:p>
          </table:table-cell>
          <table:table-cell table:number-columns-repeated="4"/>
        </table:table-row>
        <table:table-row table:style-name="ro1">
          <table:table-cell office:value-type="float" office:value="569.440246582031">
            <text:p>569.440246582</text:p>
          </table:table-cell>
          <table:table-cell office:value-type="float" office:value="0.01698428">
            <text:p>0.01698428</text:p>
          </table:table-cell>
          <table:table-cell table:number-columns-repeated="4"/>
        </table:table-row>
        <table:table-row table:style-name="ro1">
          <table:table-cell office:value-type="float" office:value="569.558471679688">
            <text:p>569.5584716797</text:p>
          </table:table-cell>
          <table:table-cell office:value-type="float" office:value="0.02354242">
            <text:p>0.02354242</text:p>
          </table:table-cell>
          <table:table-cell table:number-columns-repeated="4"/>
        </table:table-row>
        <table:table-row table:style-name="ro1">
          <table:table-cell office:value-type="float" office:value="569.676696777344">
            <text:p>569.6766967773</text:p>
          </table:table-cell>
          <table:table-cell office:value-type="float" office:value="0.01657418">
            <text:p>0.01657418</text:p>
          </table:table-cell>
          <table:table-cell table:number-columns-repeated="4"/>
        </table:table-row>
        <table:table-row table:style-name="ro1">
          <table:table-cell office:value-type="float" office:value="569.794921875">
            <text:p>569.794921875</text:p>
          </table:table-cell>
          <table:table-cell office:value-type="float" office:value="0.006413321">
            <text:p>0.006413321</text:p>
          </table:table-cell>
          <table:table-cell table:number-columns-repeated="4"/>
        </table:table-row>
        <table:table-row table:style-name="ro1">
          <table:table-cell office:value-type="float" office:value="569.913146972656">
            <text:p>569.9131469727</text:p>
          </table:table-cell>
          <table:table-cell office:value-type="float" office:value="0.005457285">
            <text:p>0.005457285</text:p>
          </table:table-cell>
          <table:table-cell table:number-columns-repeated="4"/>
        </table:table-row>
        <table:table-row table:style-name="ro1">
          <table:table-cell office:value-type="float" office:value="570.031372070313">
            <text:p>570.0313720703</text:p>
          </table:table-cell>
          <table:table-cell office:value-type="float" office:value="0.01265597">
            <text:p>0.01265597</text:p>
          </table:table-cell>
          <table:table-cell table:number-columns-repeated="4"/>
        </table:table-row>
        <table:table-row table:style-name="ro1">
          <table:table-cell office:value-type="float" office:value="570.149597167969">
            <text:p>570.149597168</text:p>
          </table:table-cell>
          <table:table-cell office:value-type="float" office:value="0.01526569">
            <text:p>0.01526569</text:p>
          </table:table-cell>
          <table:table-cell table:number-columns-repeated="4"/>
        </table:table-row>
        <table:table-row table:style-name="ro1">
          <table:table-cell office:value-type="float" office:value="570.267883300781">
            <text:p>570.2678833008</text:p>
          </table:table-cell>
          <table:table-cell office:value-type="float" office:value="0.001724071">
            <text:p>0.001724071</text:p>
          </table:table-cell>
          <table:table-cell table:number-columns-repeated="4"/>
        </table:table-row>
        <table:table-row table:style-name="ro1">
          <table:table-cell office:value-type="float" office:value="570.386108398438">
            <text:p>570.3861083984</text:p>
          </table:table-cell>
          <table:table-cell office:value-type="float" office:value="0.01345213">
            <text:p>0.01345213</text:p>
          </table:table-cell>
          <table:table-cell table:number-columns-repeated="4"/>
        </table:table-row>
        <table:table-row table:style-name="ro1">
          <table:table-cell office:value-type="float" office:value="570.504333496094">
            <text:p>570.5043334961</text:p>
          </table:table-cell>
          <table:table-cell office:value-type="float" office:value="0.02652727">
            <text:p>0.02652727</text:p>
          </table:table-cell>
          <table:table-cell table:number-columns-repeated="4"/>
        </table:table-row>
        <table:table-row table:style-name="ro1">
          <table:table-cell office:value-type="float" office:value="570.622619628906">
            <text:p>570.6226196289</text:p>
          </table:table-cell>
          <table:table-cell office:value-type="float" office:value="0.02779332">
            <text:p>0.02779332</text:p>
          </table:table-cell>
          <table:table-cell table:number-columns-repeated="4"/>
        </table:table-row>
        <table:table-row table:style-name="ro1">
          <table:table-cell office:value-type="float" office:value="570.740844726563">
            <text:p>570.7408447266</text:p>
          </table:table-cell>
          <table:table-cell office:value-type="float" office:value="0.01262966">
            <text:p>0.01262966</text:p>
          </table:table-cell>
          <table:table-cell table:number-columns-repeated="4"/>
        </table:table-row>
        <table:table-row table:style-name="ro1">
          <table:table-cell office:value-type="float" office:value="570.859130859375">
            <text:p>570.8591308594</text:p>
          </table:table-cell>
          <table:table-cell office:value-type="float" office:value="0.01046282">
            <text:p>0.01046282</text:p>
          </table:table-cell>
          <table:table-cell table:number-columns-repeated="4"/>
        </table:table-row>
        <table:table-row table:style-name="ro1">
          <table:table-cell office:value-type="float" office:value="570.977355957031">
            <text:p>570.977355957</text:p>
          </table:table-cell>
          <table:table-cell office:value-type="float" office:value="0.01829056">
            <text:p>0.01829056</text:p>
          </table:table-cell>
          <table:table-cell table:number-columns-repeated="4"/>
        </table:table-row>
        <table:table-row table:style-name="ro1">
          <table:table-cell office:value-type="float" office:value="571.095642089844">
            <text:p>571.0956420898</text:p>
          </table:table-cell>
          <table:table-cell office:value-type="float" office:value="0.008590775">
            <text:p>0.008590775</text:p>
          </table:table-cell>
          <table:table-cell table:number-columns-repeated="4"/>
        </table:table-row>
        <table:table-row table:style-name="ro1">
          <table:table-cell office:value-type="float" office:value="571.213928222656">
            <text:p>571.2139282227</text:p>
          </table:table-cell>
          <table:table-cell office:value-type="float" office:value="0.01696561">
            <text:p>0.01696561</text:p>
          </table:table-cell>
          <table:table-cell table:number-columns-repeated="4"/>
        </table:table-row>
        <table:table-row table:style-name="ro1">
          <table:table-cell office:value-type="float" office:value="571.332153320313">
            <text:p>571.3321533203</text:p>
          </table:table-cell>
          <table:table-cell office:value-type="float" office:value="0.01938187">
            <text:p>0.01938187</text:p>
          </table:table-cell>
          <table:table-cell table:number-columns-repeated="4"/>
        </table:table-row>
        <table:table-row table:style-name="ro1">
          <table:table-cell office:value-type="float" office:value="571.450439453125">
            <text:p>571.4504394531</text:p>
          </table:table-cell>
          <table:table-cell office:value-type="float" office:value="0.01826726">
            <text:p>0.01826726</text:p>
          </table:table-cell>
          <table:table-cell table:number-columns-repeated="4"/>
        </table:table-row>
        <table:table-row table:style-name="ro1">
          <table:table-cell office:value-type="float" office:value="571.568725585938">
            <text:p>571.5687255859</text:p>
          </table:table-cell>
          <table:table-cell office:value-type="float" office:value="0.008051809">
            <text:p>0.008051809</text:p>
          </table:table-cell>
          <table:table-cell table:number-columns-repeated="4"/>
        </table:table-row>
        <table:table-row table:style-name="ro1">
          <table:table-cell office:value-type="float" office:value="571.68701171875">
            <text:p>571.6870117188</text:p>
          </table:table-cell>
          <table:table-cell office:value-type="float" office:value="0.02454633">
            <text:p>0.02454633</text:p>
          </table:table-cell>
          <table:table-cell table:number-columns-repeated="4"/>
        </table:table-row>
        <table:table-row table:style-name="ro1">
          <table:table-cell office:value-type="float" office:value="571.805297851563">
            <text:p>571.8052978516</text:p>
          </table:table-cell>
          <table:table-cell office:value-type="float" office:value="0.01357776">
            <text:p>0.01357776</text:p>
          </table:table-cell>
          <table:table-cell table:number-columns-repeated="4"/>
        </table:table-row>
        <table:table-row table:style-name="ro1">
          <table:table-cell office:value-type="float" office:value="571.923583984375">
            <text:p>571.9235839844</text:p>
          </table:table-cell>
          <table:table-cell office:value-type="float" office:value="0.03554651">
            <text:p>0.03554651</text:p>
          </table:table-cell>
          <table:table-cell table:number-columns-repeated="4"/>
        </table:table-row>
        <table:table-row table:style-name="ro1">
          <table:table-cell office:value-type="float" office:value="572.041870117188">
            <text:p>572.0418701172</text:p>
          </table:table-cell>
          <table:table-cell office:value-type="float" office:value="0.01491808">
            <text:p>0.01491808</text:p>
          </table:table-cell>
          <table:table-cell table:number-columns-repeated="4"/>
        </table:table-row>
        <table:table-row table:style-name="ro1">
          <table:table-cell office:value-type="float" office:value="572.16015625">
            <text:p>572.16015625</text:p>
          </table:table-cell>
          <table:table-cell office:value-type="float" office:value="0.02705599">
            <text:p>0.02705599</text:p>
          </table:table-cell>
          <table:table-cell table:number-columns-repeated="4"/>
        </table:table-row>
        <table:table-row table:style-name="ro1">
          <table:table-cell office:value-type="float" office:value="572.278442382813">
            <text:p>572.2784423828</text:p>
          </table:table-cell>
          <table:table-cell office:value-type="float" office:value="0.01453923">
            <text:p>0.01453923</text:p>
          </table:table-cell>
          <table:table-cell table:number-columns-repeated="4"/>
        </table:table-row>
        <table:table-row table:style-name="ro1">
          <table:table-cell office:value-type="float" office:value="572.396728515625">
            <text:p>572.3967285156</text:p>
          </table:table-cell>
          <table:table-cell office:value-type="float" office:value="0.01393111">
            <text:p>0.01393111</text:p>
          </table:table-cell>
          <table:table-cell table:number-columns-repeated="4"/>
        </table:table-row>
        <table:table-row table:style-name="ro1">
          <table:table-cell office:value-type="float" office:value="572.515014648438">
            <text:p>572.5150146484</text:p>
          </table:table-cell>
          <table:table-cell office:value-type="float" office:value="0.0120483">
            <text:p>0.0120483</text:p>
          </table:table-cell>
          <table:table-cell table:number-columns-repeated="4"/>
        </table:table-row>
        <table:table-row table:style-name="ro1">
          <table:table-cell office:value-type="float" office:value="572.63330078125">
            <text:p>572.6333007813</text:p>
          </table:table-cell>
          <table:table-cell office:value-type="float" office:value="0.01733471">
            <text:p>0.01733471</text:p>
          </table:table-cell>
          <table:table-cell table:number-columns-repeated="4"/>
        </table:table-row>
        <table:table-row table:style-name="ro1">
          <table:table-cell office:value-type="float" office:value="572.751586914063">
            <text:p>572.7515869141</text:p>
          </table:table-cell>
          <table:table-cell office:value-type="float" office:value="0.02425522">
            <text:p>0.02425522</text:p>
          </table:table-cell>
          <table:table-cell table:number-columns-repeated="4"/>
        </table:table-row>
        <table:table-row table:style-name="ro1">
          <table:table-cell office:value-type="float" office:value="572.869934082031">
            <text:p>572.869934082</text:p>
          </table:table-cell>
          <table:table-cell office:value-type="float" office:value="0.01284584">
            <text:p>0.01284584</text:p>
          </table:table-cell>
          <table:table-cell table:number-columns-repeated="4"/>
        </table:table-row>
        <table:table-row table:style-name="ro1">
          <table:table-cell office:value-type="float" office:value="572.988220214844">
            <text:p>572.9882202148</text:p>
          </table:table-cell>
          <table:table-cell office:value-type="float" office:value="0.01208161">
            <text:p>0.01208161</text:p>
          </table:table-cell>
          <table:table-cell table:number-columns-repeated="4"/>
        </table:table-row>
        <table:table-row table:style-name="ro1">
          <table:table-cell office:value-type="float" office:value="573.106506347656">
            <text:p>573.1065063477</text:p>
          </table:table-cell>
          <table:table-cell office:value-type="float" office:value="0.02446262">
            <text:p>0.02446262</text:p>
          </table:table-cell>
          <table:table-cell table:number-columns-repeated="4"/>
        </table:table-row>
        <table:table-row table:style-name="ro1">
          <table:table-cell office:value-type="float" office:value="573.224853515625">
            <text:p>573.2248535156</text:p>
          </table:table-cell>
          <table:table-cell office:value-type="float" office:value="0.01775305">
            <text:p>0.01775305</text:p>
          </table:table-cell>
          <table:table-cell table:number-columns-repeated="4"/>
        </table:table-row>
        <table:table-row table:style-name="ro1">
          <table:table-cell office:value-type="float" office:value="573.343139648438">
            <text:p>573.3431396484</text:p>
          </table:table-cell>
          <table:table-cell office:value-type="float" office:value="0.01954619">
            <text:p>0.01954619</text:p>
          </table:table-cell>
          <table:table-cell table:number-columns-repeated="4"/>
        </table:table-row>
        <table:table-row table:style-name="ro1">
          <table:table-cell office:value-type="float" office:value="573.461486816406">
            <text:p>573.4614868164</text:p>
          </table:table-cell>
          <table:table-cell office:value-type="float" office:value="0.02789421">
            <text:p>0.02789421</text:p>
          </table:table-cell>
          <table:table-cell table:number-columns-repeated="4"/>
        </table:table-row>
        <table:table-row table:style-name="ro1">
          <table:table-cell office:value-type="float" office:value="573.579772949219">
            <text:p>573.5797729492</text:p>
          </table:table-cell>
          <table:table-cell office:value-type="float" office:value="0.01893836">
            <text:p>0.01893836</text:p>
          </table:table-cell>
          <table:table-cell table:number-columns-repeated="4"/>
        </table:table-row>
        <table:table-row table:style-name="ro1">
          <table:table-cell office:value-type="float" office:value="573.698120117188">
            <text:p>573.6981201172</text:p>
          </table:table-cell>
          <table:table-cell office:value-type="float" office:value="0.02485241">
            <text:p>0.02485241</text:p>
          </table:table-cell>
          <table:table-cell table:number-columns-repeated="4"/>
        </table:table-row>
        <table:table-row table:style-name="ro1">
          <table:table-cell office:value-type="float" office:value="573.81640625">
            <text:p>573.81640625</text:p>
          </table:table-cell>
          <table:table-cell office:value-type="float" office:value="0.01793671">
            <text:p>0.01793671</text:p>
          </table:table-cell>
          <table:table-cell table:number-columns-repeated="4"/>
        </table:table-row>
        <table:table-row table:style-name="ro1">
          <table:table-cell office:value-type="float" office:value="573.934753417969">
            <text:p>573.934753418</text:p>
          </table:table-cell>
          <table:table-cell office:value-type="float" office:value="0.02161399">
            <text:p>0.02161399</text:p>
          </table:table-cell>
          <table:table-cell table:number-columns-repeated="4"/>
        </table:table-row>
        <table:table-row table:style-name="ro1">
          <table:table-cell office:value-type="float" office:value="574.053100585938">
            <text:p>574.0531005859</text:p>
          </table:table-cell>
          <table:table-cell office:value-type="float" office:value="0.01798413">
            <text:p>0.01798413</text:p>
          </table:table-cell>
          <table:table-cell table:number-columns-repeated="4"/>
        </table:table-row>
        <table:table-row table:style-name="ro1">
          <table:table-cell office:value-type="float" office:value="574.171447753906">
            <text:p>574.1714477539</text:p>
          </table:table-cell>
          <table:table-cell office:value-type="float" office:value="0.01987418">
            <text:p>0.01987418</text:p>
          </table:table-cell>
          <table:table-cell table:number-columns-repeated="4"/>
        </table:table-row>
        <table:table-row table:style-name="ro1">
          <table:table-cell office:value-type="float" office:value="574.289733886719">
            <text:p>574.2897338867</text:p>
          </table:table-cell>
          <table:table-cell office:value-type="float" office:value="0.0186566">
            <text:p>0.0186566</text:p>
          </table:table-cell>
          <table:table-cell table:number-columns-repeated="4"/>
        </table:table-row>
        <table:table-row table:style-name="ro1">
          <table:table-cell office:value-type="float" office:value="574.408081054688">
            <text:p>574.4080810547</text:p>
          </table:table-cell>
          <table:table-cell office:value-type="float" office:value="0.02730194">
            <text:p>0.02730194</text:p>
          </table:table-cell>
          <table:table-cell table:number-columns-repeated="4"/>
        </table:table-row>
        <table:table-row table:style-name="ro1">
          <table:table-cell office:value-type="float" office:value="574.526428222656">
            <text:p>574.5264282227</text:p>
          </table:table-cell>
          <table:table-cell office:value-type="float" office:value="0.02677056">
            <text:p>0.02677056</text:p>
          </table:table-cell>
          <table:table-cell table:number-columns-repeated="4"/>
        </table:table-row>
        <table:table-row table:style-name="ro1">
          <table:table-cell office:value-type="float" office:value="574.644775390625">
            <text:p>574.6447753906</text:p>
          </table:table-cell>
          <table:table-cell office:value-type="float" office:value="0.02702999">
            <text:p>0.02702999</text:p>
          </table:table-cell>
          <table:table-cell table:number-columns-repeated="4"/>
        </table:table-row>
        <table:table-row table:style-name="ro1">
          <table:table-cell office:value-type="float" office:value="574.763122558594">
            <text:p>574.7631225586</text:p>
          </table:table-cell>
          <table:table-cell office:value-type="float" office:value="0.02926317">
            <text:p>0.02926317</text:p>
          </table:table-cell>
          <table:table-cell table:number-columns-repeated="4"/>
        </table:table-row>
        <table:table-row table:style-name="ro1">
          <table:table-cell office:value-type="float" office:value="574.881469726563">
            <text:p>574.8814697266</text:p>
          </table:table-cell>
          <table:table-cell office:value-type="float" office:value="0.03181193">
            <text:p>0.03181193</text:p>
          </table:table-cell>
          <table:table-cell table:number-columns-repeated="4"/>
        </table:table-row>
        <table:table-row table:style-name="ro1">
          <table:table-cell office:value-type="float" office:value="574.999816894531">
            <text:p>574.9998168945</text:p>
          </table:table-cell>
          <table:table-cell office:value-type="float" office:value="0.02178904">
            <text:p>0.02178904</text:p>
          </table:table-cell>
          <table:table-cell table:number-columns-repeated="4"/>
        </table:table-row>
        <table:table-row table:style-name="ro1">
          <table:table-cell office:value-type="float" office:value="575.1181640625">
            <text:p>575.1181640625</text:p>
          </table:table-cell>
          <table:table-cell office:value-type="float" office:value="0.04507702">
            <text:p>0.04507702</text:p>
          </table:table-cell>
          <table:table-cell table:number-columns-repeated="4"/>
        </table:table-row>
        <table:table-row table:style-name="ro1">
          <table:table-cell office:value-type="float" office:value="575.236572265625">
            <text:p>575.2365722656</text:p>
          </table:table-cell>
          <table:table-cell office:value-type="float" office:value="0.02210472">
            <text:p>0.02210472</text:p>
          </table:table-cell>
          <table:table-cell table:number-columns-repeated="4"/>
        </table:table-row>
        <table:table-row table:style-name="ro1">
          <table:table-cell office:value-type="float" office:value="575.354919433594">
            <text:p>575.3549194336</text:p>
          </table:table-cell>
          <table:table-cell office:value-type="float" office:value="0.03749003">
            <text:p>0.03749003</text:p>
          </table:table-cell>
          <table:table-cell table:number-columns-repeated="4"/>
        </table:table-row>
        <table:table-row table:style-name="ro1">
          <table:table-cell office:value-type="float" office:value="575.473266601563">
            <text:p>575.4732666016</text:p>
          </table:table-cell>
          <table:table-cell office:value-type="float" office:value="0.02231448">
            <text:p>0.02231448</text:p>
          </table:table-cell>
          <table:table-cell table:number-columns-repeated="4"/>
        </table:table-row>
        <table:table-row table:style-name="ro1">
          <table:table-cell office:value-type="float" office:value="575.591613769531">
            <text:p>575.5916137695</text:p>
          </table:table-cell>
          <table:table-cell office:value-type="float" office:value="0.02227305">
            <text:p>0.02227305</text:p>
          </table:table-cell>
          <table:table-cell table:number-columns-repeated="4"/>
        </table:table-row>
        <table:table-row table:style-name="ro1">
          <table:table-cell office:value-type="float" office:value="575.710021972656">
            <text:p>575.7100219727</text:p>
          </table:table-cell>
          <table:table-cell office:value-type="float" office:value="0.02377392">
            <text:p>0.02377392</text:p>
          </table:table-cell>
          <table:table-cell table:number-columns-repeated="4"/>
        </table:table-row>
        <table:table-row table:style-name="ro1">
          <table:table-cell office:value-type="float" office:value="575.828369140625">
            <text:p>575.8283691406</text:p>
          </table:table-cell>
          <table:table-cell office:value-type="float" office:value="0.02513613">
            <text:p>0.02513613</text:p>
          </table:table-cell>
          <table:table-cell table:number-columns-repeated="4"/>
        </table:table-row>
        <table:table-row table:style-name="ro1">
          <table:table-cell office:value-type="float" office:value="575.94677734375">
            <text:p>575.9467773438</text:p>
          </table:table-cell>
          <table:table-cell office:value-type="float" office:value="0.03384813">
            <text:p>0.03384813</text:p>
          </table:table-cell>
          <table:table-cell table:number-columns-repeated="4"/>
        </table:table-row>
        <table:table-row table:style-name="ro1">
          <table:table-cell office:value-type="float" office:value="576.065124511719">
            <text:p>576.0651245117</text:p>
          </table:table-cell>
          <table:table-cell office:value-type="float" office:value="0.03229728">
            <text:p>0.03229728</text:p>
          </table:table-cell>
          <table:table-cell table:number-columns-repeated="4"/>
        </table:table-row>
        <table:table-row table:style-name="ro1">
          <table:table-cell office:value-type="float" office:value="576.183532714844">
            <text:p>576.1835327148</text:p>
          </table:table-cell>
          <table:table-cell office:value-type="float" office:value="0.02404959">
            <text:p>0.02404959</text:p>
          </table:table-cell>
          <table:table-cell table:number-columns-repeated="4"/>
        </table:table-row>
        <table:table-row table:style-name="ro1">
          <table:table-cell office:value-type="float" office:value="576.301879882813">
            <text:p>576.3018798828</text:p>
          </table:table-cell>
          <table:table-cell office:value-type="float" office:value="0.03824266">
            <text:p>0.03824266</text:p>
          </table:table-cell>
          <table:table-cell table:number-columns-repeated="4"/>
        </table:table-row>
        <table:table-row table:style-name="ro1">
          <table:table-cell office:value-type="float" office:value="576.420288085938">
            <text:p>576.4202880859</text:p>
          </table:table-cell>
          <table:table-cell office:value-type="float" office:value="0.0403163">
            <text:p>0.0403163</text:p>
          </table:table-cell>
          <table:table-cell table:number-columns-repeated="4"/>
        </table:table-row>
        <table:table-row table:style-name="ro1">
          <table:table-cell office:value-type="float" office:value="576.538635253906">
            <text:p>576.5386352539</text:p>
          </table:table-cell>
          <table:table-cell office:value-type="float" office:value="0.02883597">
            <text:p>0.02883597</text:p>
          </table:table-cell>
          <table:table-cell table:number-columns-repeated="4"/>
        </table:table-row>
        <table:table-row table:style-name="ro1">
          <table:table-cell office:value-type="float" office:value="576.657043457031">
            <text:p>576.657043457</text:p>
          </table:table-cell>
          <table:table-cell office:value-type="float" office:value="0.04481611">
            <text:p>0.04481611</text:p>
          </table:table-cell>
          <table:table-cell table:number-columns-repeated="4"/>
        </table:table-row>
        <table:table-row table:style-name="ro1">
          <table:table-cell office:value-type="float" office:value="576.775451660156">
            <text:p>576.7754516602</text:p>
          </table:table-cell>
          <table:table-cell office:value-type="float" office:value="0.02550036">
            <text:p>0.02550036</text:p>
          </table:table-cell>
          <table:table-cell table:number-columns-repeated="4"/>
        </table:table-row>
        <table:table-row table:style-name="ro1">
          <table:table-cell office:value-type="float" office:value="576.893859863281">
            <text:p>576.8938598633</text:p>
          </table:table-cell>
          <table:table-cell office:value-type="float" office:value="0.0309416">
            <text:p>0.0309416</text:p>
          </table:table-cell>
          <table:table-cell table:number-columns-repeated="4"/>
        </table:table-row>
        <table:table-row table:style-name="ro1">
          <table:table-cell office:value-type="float" office:value="577.012268066406">
            <text:p>577.0122680664</text:p>
          </table:table-cell>
          <table:table-cell office:value-type="float" office:value="0.04199861">
            <text:p>0.04199861</text:p>
          </table:table-cell>
          <table:table-cell table:number-columns-repeated="4"/>
        </table:table-row>
        <table:table-row table:style-name="ro1">
          <table:table-cell office:value-type="float" office:value="577.130615234375">
            <text:p>577.1306152344</text:p>
          </table:table-cell>
          <table:table-cell office:value-type="float" office:value="0.03573779">
            <text:p>0.03573779</text:p>
          </table:table-cell>
          <table:table-cell table:number-columns-repeated="4"/>
        </table:table-row>
        <table:table-row table:style-name="ro1">
          <table:table-cell office:value-type="float" office:value="577.2490234375">
            <text:p>577.2490234375</text:p>
          </table:table-cell>
          <table:table-cell office:value-type="float" office:value="0.04007959">
            <text:p>0.04007959</text:p>
          </table:table-cell>
          <table:table-cell table:number-columns-repeated="4"/>
        </table:table-row>
        <table:table-row table:style-name="ro1">
          <table:table-cell office:value-type="float" office:value="577.367431640625">
            <text:p>577.3674316406</text:p>
          </table:table-cell>
          <table:table-cell office:value-type="float" office:value="0.02690662">
            <text:p>0.02690662</text:p>
          </table:table-cell>
          <table:table-cell table:number-columns-repeated="4"/>
        </table:table-row>
        <table:table-row table:style-name="ro1">
          <table:table-cell office:value-type="float" office:value="577.48583984375">
            <text:p>577.4858398438</text:p>
          </table:table-cell>
          <table:table-cell office:value-type="float" office:value="0.04068393">
            <text:p>0.04068393</text:p>
          </table:table-cell>
          <table:table-cell table:number-columns-repeated="4"/>
        </table:table-row>
        <table:table-row table:style-name="ro1">
          <table:table-cell office:value-type="float" office:value="577.604248046875">
            <text:p>577.6042480469</text:p>
          </table:table-cell>
          <table:table-cell office:value-type="float" office:value="0.02842202">
            <text:p>0.02842202</text:p>
          </table:table-cell>
          <table:table-cell table:number-columns-repeated="4"/>
        </table:table-row>
        <table:table-row table:style-name="ro1">
          <table:table-cell office:value-type="float" office:value="577.722717285156">
            <text:p>577.7227172852</text:p>
          </table:table-cell>
          <table:table-cell office:value-type="float" office:value="0.03232991">
            <text:p>0.03232991</text:p>
          </table:table-cell>
          <table:table-cell table:number-columns-repeated="4"/>
        </table:table-row>
        <table:table-row table:style-name="ro1">
          <table:table-cell office:value-type="float" office:value="577.841125488281">
            <text:p>577.8411254883</text:p>
          </table:table-cell>
          <table:table-cell office:value-type="float" office:value="0.03692088">
            <text:p>0.03692088</text:p>
          </table:table-cell>
          <table:table-cell table:number-columns-repeated="4"/>
        </table:table-row>
        <table:table-row table:style-name="ro1">
          <table:table-cell office:value-type="float" office:value="577.959533691406">
            <text:p>577.9595336914</text:p>
          </table:table-cell>
          <table:table-cell office:value-type="float" office:value="0.03234201">
            <text:p>0.03234201</text:p>
          </table:table-cell>
          <table:table-cell table:number-columns-repeated="4"/>
        </table:table-row>
        <table:table-row table:style-name="ro1">
          <table:table-cell office:value-type="float" office:value="578.077941894531">
            <text:p>578.0779418945</text:p>
          </table:table-cell>
          <table:table-cell office:value-type="float" office:value="0.05183181">
            <text:p>0.05183181</text:p>
          </table:table-cell>
          <table:table-cell table:number-columns-repeated="4"/>
        </table:table-row>
        <table:table-row table:style-name="ro1">
          <table:table-cell office:value-type="float" office:value="578.196350097656">
            <text:p>578.1963500977</text:p>
          </table:table-cell>
          <table:table-cell office:value-type="float" office:value="0.03460188">
            <text:p>0.03460188</text:p>
          </table:table-cell>
          <table:table-cell table:number-columns-repeated="4"/>
        </table:table-row>
        <table:table-row table:style-name="ro1">
          <table:table-cell office:value-type="float" office:value="578.314819335938">
            <text:p>578.3148193359</text:p>
          </table:table-cell>
          <table:table-cell office:value-type="float" office:value="0.03483243">
            <text:p>0.03483243</text:p>
          </table:table-cell>
          <table:table-cell table:number-columns-repeated="4"/>
        </table:table-row>
        <table:table-row table:style-name="ro1">
          <table:table-cell office:value-type="float" office:value="578.433227539063">
            <text:p>578.4332275391</text:p>
          </table:table-cell>
          <table:table-cell office:value-type="float" office:value="0.03737918">
            <text:p>0.03737918</text:p>
          </table:table-cell>
          <table:table-cell table:number-columns-repeated="4"/>
        </table:table-row>
        <table:table-row table:style-name="ro1">
          <table:table-cell office:value-type="float" office:value="578.551635742188">
            <text:p>578.5516357422</text:p>
          </table:table-cell>
          <table:table-cell office:value-type="float" office:value="0.04000118">
            <text:p>0.04000118</text:p>
          </table:table-cell>
          <table:table-cell table:number-columns-repeated="4"/>
        </table:table-row>
        <table:table-row table:style-name="ro1">
          <table:table-cell office:value-type="float" office:value="578.670104980469">
            <text:p>578.6701049805</text:p>
          </table:table-cell>
          <table:table-cell office:value-type="float" office:value="0.04914309">
            <text:p>0.04914309</text:p>
          </table:table-cell>
          <table:table-cell table:number-columns-repeated="4"/>
        </table:table-row>
        <table:table-row table:style-name="ro1">
          <table:table-cell office:value-type="float" office:value="578.788513183594">
            <text:p>578.7885131836</text:p>
          </table:table-cell>
          <table:table-cell office:value-type="float" office:value="0.06754397">
            <text:p>0.06754397</text:p>
          </table:table-cell>
          <table:table-cell table:number-columns-repeated="4"/>
        </table:table-row>
        <table:table-row table:style-name="ro1">
          <table:table-cell office:value-type="float" office:value="578.906982421875">
            <text:p>578.9069824219</text:p>
          </table:table-cell>
          <table:table-cell office:value-type="float" office:value="0.03377702">
            <text:p>0.03377702</text:p>
          </table:table-cell>
          <table:table-cell table:number-columns-repeated="4"/>
        </table:table-row>
        <table:table-row table:style-name="ro1">
          <table:table-cell office:value-type="float" office:value="579.025451660156">
            <text:p>579.0254516602</text:p>
          </table:table-cell>
          <table:table-cell office:value-type="float" office:value="0.04147177">
            <text:p>0.04147177</text:p>
          </table:table-cell>
          <table:table-cell table:number-columns-repeated="4"/>
        </table:table-row>
        <table:table-row table:style-name="ro1">
          <table:table-cell office:value-type="float" office:value="579.143859863281">
            <text:p>579.1438598633</text:p>
          </table:table-cell>
          <table:table-cell office:value-type="float" office:value="0.04581973">
            <text:p>0.04581973</text:p>
          </table:table-cell>
          <table:table-cell table:number-columns-repeated="4"/>
        </table:table-row>
        <table:table-row table:style-name="ro1">
          <table:table-cell office:value-type="float" office:value="579.262329101563">
            <text:p>579.2623291016</text:p>
          </table:table-cell>
          <table:table-cell office:value-type="float" office:value="0.04020733">
            <text:p>0.04020733</text:p>
          </table:table-cell>
          <table:table-cell table:number-columns-repeated="4"/>
        </table:table-row>
        <table:table-row table:style-name="ro1">
          <table:table-cell office:value-type="float" office:value="579.380798339844">
            <text:p>579.3807983398</text:p>
          </table:table-cell>
          <table:table-cell office:value-type="float" office:value="0.04542449">
            <text:p>0.04542449</text:p>
          </table:table-cell>
          <table:table-cell table:number-columns-repeated="4"/>
        </table:table-row>
        <table:table-row table:style-name="ro1">
          <table:table-cell office:value-type="float" office:value="579.499206542969">
            <text:p>579.499206543</text:p>
          </table:table-cell>
          <table:table-cell office:value-type="float" office:value="0.03938628">
            <text:p>0.03938628</text:p>
          </table:table-cell>
          <table:table-cell table:number-columns-repeated="4"/>
        </table:table-row>
        <table:table-row table:style-name="ro1">
          <table:table-cell office:value-type="float" office:value="579.61767578125">
            <text:p>579.6176757813</text:p>
          </table:table-cell>
          <table:table-cell office:value-type="float" office:value="0.04135035">
            <text:p>0.04135035</text:p>
          </table:table-cell>
          <table:table-cell table:number-columns-repeated="4"/>
        </table:table-row>
        <table:table-row table:style-name="ro1">
          <table:table-cell office:value-type="float" office:value="579.736145019531">
            <text:p>579.7361450195</text:p>
          </table:table-cell>
          <table:table-cell office:value-type="float" office:value="0.0429216">
            <text:p>0.0429216</text:p>
          </table:table-cell>
          <table:table-cell table:number-columns-repeated="4"/>
        </table:table-row>
        <table:table-row table:style-name="ro1">
          <table:table-cell office:value-type="float" office:value="579.854614257813">
            <text:p>579.8546142578</text:p>
          </table:table-cell>
          <table:table-cell office:value-type="float" office:value="0.03758421">
            <text:p>0.03758421</text:p>
          </table:table-cell>
          <table:table-cell table:number-columns-repeated="4"/>
        </table:table-row>
        <table:table-row table:style-name="ro1">
          <table:table-cell office:value-type="float" office:value="579.973083496094">
            <text:p>579.9730834961</text:p>
          </table:table-cell>
          <table:table-cell office:value-type="float" office:value="0.03901349">
            <text:p>0.03901349</text:p>
          </table:table-cell>
          <table:table-cell table:number-columns-repeated="4"/>
        </table:table-row>
        <table:table-row table:style-name="ro1">
          <table:table-cell office:value-type="float" office:value="580.091552734375">
            <text:p>580.0915527344</text:p>
          </table:table-cell>
          <table:table-cell office:value-type="float" office:value="0.04911252">
            <text:p>0.04911252</text:p>
          </table:table-cell>
          <table:table-cell table:number-columns-repeated="4"/>
        </table:table-row>
        <table:table-row table:style-name="ro1">
          <table:table-cell office:value-type="float" office:value="580.210021972656">
            <text:p>580.2100219727</text:p>
          </table:table-cell>
          <table:table-cell office:value-type="float" office:value="0.06080056">
            <text:p>0.06080056</text:p>
          </table:table-cell>
          <table:table-cell table:number-columns-repeated="4"/>
        </table:table-row>
        <table:table-row table:style-name="ro1">
          <table:table-cell office:value-type="float" office:value="580.328491210938">
            <text:p>580.3284912109</text:p>
          </table:table-cell>
          <table:table-cell office:value-type="float" office:value="0.05049696">
            <text:p>0.05049696</text:p>
          </table:table-cell>
          <table:table-cell table:number-columns-repeated="4"/>
        </table:table-row>
        <table:table-row table:style-name="ro1">
          <table:table-cell office:value-type="float" office:value="580.446960449219">
            <text:p>580.4469604492</text:p>
          </table:table-cell>
          <table:table-cell office:value-type="float" office:value="0.04694174">
            <text:p>0.04694174</text:p>
          </table:table-cell>
          <table:table-cell table:number-columns-repeated="4"/>
        </table:table-row>
        <table:table-row table:style-name="ro1">
          <table:table-cell office:value-type="float" office:value="580.5654296875">
            <text:p>580.5654296875</text:p>
          </table:table-cell>
          <table:table-cell office:value-type="float" office:value="0.04654874">
            <text:p>0.04654874</text:p>
          </table:table-cell>
          <table:table-cell table:number-columns-repeated="4"/>
        </table:table-row>
        <table:table-row table:style-name="ro1">
          <table:table-cell office:value-type="float" office:value="580.683898925781">
            <text:p>580.6838989258</text:p>
          </table:table-cell>
          <table:table-cell office:value-type="float" office:value="0.05772126">
            <text:p>0.05772126</text:p>
          </table:table-cell>
          <table:table-cell table:number-columns-repeated="4"/>
        </table:table-row>
        <table:table-row table:style-name="ro1">
          <table:table-cell office:value-type="float" office:value="580.802368164063">
            <text:p>580.8023681641</text:p>
          </table:table-cell>
          <table:table-cell office:value-type="float" office:value="0.05239709">
            <text:p>0.05239709</text:p>
          </table:table-cell>
          <table:table-cell table:number-columns-repeated="4"/>
        </table:table-row>
        <table:table-row table:style-name="ro1">
          <table:table-cell office:value-type="float" office:value="580.9208984375">
            <text:p>580.9208984375</text:p>
          </table:table-cell>
          <table:table-cell office:value-type="float" office:value="0.05048412">
            <text:p>0.05048412</text:p>
          </table:table-cell>
          <table:table-cell table:number-columns-repeated="4"/>
        </table:table-row>
        <table:table-row table:style-name="ro1">
          <table:table-cell office:value-type="float" office:value="581.039367675781">
            <text:p>581.0393676758</text:p>
          </table:table-cell>
          <table:table-cell office:value-type="float" office:value="0.04951985">
            <text:p>0.04951985</text:p>
          </table:table-cell>
          <table:table-cell table:number-columns-repeated="4"/>
        </table:table-row>
        <table:table-row table:style-name="ro1">
          <table:table-cell office:value-type="float" office:value="581.157836914063">
            <text:p>581.1578369141</text:p>
          </table:table-cell>
          <table:table-cell office:value-type="float" office:value="0.05950654">
            <text:p>0.05950654</text:p>
          </table:table-cell>
          <table:table-cell table:number-columns-repeated="4"/>
        </table:table-row>
        <table:table-row table:style-name="ro1">
          <table:table-cell office:value-type="float" office:value="581.2763671875">
            <text:p>581.2763671875</text:p>
          </table:table-cell>
          <table:table-cell office:value-type="float" office:value="0.06323834">
            <text:p>0.06323834</text:p>
          </table:table-cell>
          <table:table-cell table:number-columns-repeated="4"/>
        </table:table-row>
        <table:table-row table:style-name="ro1">
          <table:table-cell office:value-type="float" office:value="581.394836425781">
            <text:p>581.3948364258</text:p>
          </table:table-cell>
          <table:table-cell office:value-type="float" office:value="0.05452256">
            <text:p>0.05452256</text:p>
          </table:table-cell>
          <table:table-cell table:number-columns-repeated="4"/>
        </table:table-row>
        <table:table-row table:style-name="ro1">
          <table:table-cell office:value-type="float" office:value="581.513366699219">
            <text:p>581.5133666992</text:p>
          </table:table-cell>
          <table:table-cell office:value-type="float" office:value="0.06241779">
            <text:p>0.06241779</text:p>
          </table:table-cell>
          <table:table-cell table:number-columns-repeated="4"/>
        </table:table-row>
        <table:table-row table:style-name="ro1">
          <table:table-cell office:value-type="float" office:value="581.6318359375">
            <text:p>581.6318359375</text:p>
          </table:table-cell>
          <table:table-cell office:value-type="float" office:value="0.0510954">
            <text:p>0.0510954</text:p>
          </table:table-cell>
          <table:table-cell table:number-columns-repeated="4"/>
        </table:table-row>
        <table:table-row table:style-name="ro1">
          <table:table-cell office:value-type="float" office:value="581.750366210938">
            <text:p>581.7503662109</text:p>
          </table:table-cell>
          <table:table-cell office:value-type="float" office:value="0.04725478">
            <text:p>0.04725478</text:p>
          </table:table-cell>
          <table:table-cell table:number-columns-repeated="4"/>
        </table:table-row>
        <table:table-row table:style-name="ro1">
          <table:table-cell office:value-type="float" office:value="581.868835449219">
            <text:p>581.8688354492</text:p>
          </table:table-cell>
          <table:table-cell office:value-type="float" office:value="0.05050663">
            <text:p>0.05050663</text:p>
          </table:table-cell>
          <table:table-cell table:number-columns-repeated="4"/>
        </table:table-row>
        <table:table-row table:style-name="ro1">
          <table:table-cell office:value-type="float" office:value="581.987365722656">
            <text:p>581.9873657227</text:p>
          </table:table-cell>
          <table:table-cell office:value-type="float" office:value="0.05266214">
            <text:p>0.05266214</text:p>
          </table:table-cell>
          <table:table-cell table:number-columns-repeated="4"/>
        </table:table-row>
        <table:table-row table:style-name="ro1">
          <table:table-cell office:value-type="float" office:value="582.105895996094">
            <text:p>582.1058959961</text:p>
          </table:table-cell>
          <table:table-cell office:value-type="float" office:value="0.05527688">
            <text:p>0.05527688</text:p>
          </table:table-cell>
          <table:table-cell table:number-columns-repeated="4"/>
        </table:table-row>
        <table:table-row table:style-name="ro1">
          <table:table-cell office:value-type="float" office:value="582.224365234375">
            <text:p>582.2243652344</text:p>
          </table:table-cell>
          <table:table-cell office:value-type="float" office:value="0.05817101">
            <text:p>0.05817101</text:p>
          </table:table-cell>
          <table:table-cell table:number-columns-repeated="4"/>
        </table:table-row>
        <table:table-row table:style-name="ro1">
          <table:table-cell office:value-type="float" office:value="582.342895507813">
            <text:p>582.3428955078</text:p>
          </table:table-cell>
          <table:table-cell office:value-type="float" office:value="0.05393649">
            <text:p>0.05393649</text:p>
          </table:table-cell>
          <table:table-cell table:number-columns-repeated="4"/>
        </table:table-row>
        <table:table-row table:style-name="ro1">
          <table:table-cell office:value-type="float" office:value="582.46142578125">
            <text:p>582.4614257813</text:p>
          </table:table-cell>
          <table:table-cell office:value-type="float" office:value="0.05564649">
            <text:p>0.05564649</text:p>
          </table:table-cell>
          <table:table-cell table:number-columns-repeated="4"/>
        </table:table-row>
        <table:table-row table:style-name="ro1">
          <table:table-cell office:value-type="float" office:value="582.579956054688">
            <text:p>582.5799560547</text:p>
          </table:table-cell>
          <table:table-cell office:value-type="float" office:value="0.05240703">
            <text:p>0.05240703</text:p>
          </table:table-cell>
          <table:table-cell table:number-columns-repeated="4"/>
        </table:table-row>
        <table:table-row table:style-name="ro1">
          <table:table-cell office:value-type="float" office:value="582.698486328125">
            <text:p>582.6984863281</text:p>
          </table:table-cell>
          <table:table-cell office:value-type="float" office:value="0.05115781">
            <text:p>0.05115781</text:p>
          </table:table-cell>
          <table:table-cell table:number-columns-repeated="4"/>
        </table:table-row>
        <table:table-row table:style-name="ro1">
          <table:table-cell office:value-type="float" office:value="582.817016601563">
            <text:p>582.8170166016</text:p>
          </table:table-cell>
          <table:table-cell office:value-type="float" office:value="0.05879853">
            <text:p>0.05879853</text:p>
          </table:table-cell>
          <table:table-cell table:number-columns-repeated="4"/>
        </table:table-row>
        <table:table-row table:style-name="ro1">
          <table:table-cell office:value-type="float" office:value="582.935546875">
            <text:p>582.935546875</text:p>
          </table:table-cell>
          <table:table-cell office:value-type="float" office:value="0.04978561">
            <text:p>0.04978561</text:p>
          </table:table-cell>
          <table:table-cell table:number-columns-repeated="4"/>
        </table:table-row>
        <table:table-row table:style-name="ro1">
          <table:table-cell office:value-type="float" office:value="583.054077148438">
            <text:p>583.0540771484</text:p>
          </table:table-cell>
          <table:table-cell office:value-type="float" office:value="0.05378873">
            <text:p>0.05378873</text:p>
          </table:table-cell>
          <table:table-cell table:number-columns-repeated="4"/>
        </table:table-row>
        <table:table-row table:style-name="ro1">
          <table:table-cell office:value-type="float" office:value="583.172607421875">
            <text:p>583.1726074219</text:p>
          </table:table-cell>
          <table:table-cell office:value-type="float" office:value="0.08286398">
            <text:p>0.08286398</text:p>
          </table:table-cell>
          <table:table-cell table:number-columns-repeated="4"/>
        </table:table-row>
        <table:table-row table:style-name="ro1">
          <table:table-cell office:value-type="float" office:value="583.291137695313">
            <text:p>583.2911376953</text:p>
          </table:table-cell>
          <table:table-cell office:value-type="float" office:value="0.05705805">
            <text:p>0.05705805</text:p>
          </table:table-cell>
          <table:table-cell table:number-columns-repeated="4"/>
        </table:table-row>
        <table:table-row table:style-name="ro1">
          <table:table-cell office:value-type="float" office:value="583.40966796875">
            <text:p>583.4096679688</text:p>
          </table:table-cell>
          <table:table-cell office:value-type="float" office:value="0.05246162">
            <text:p>0.05246162</text:p>
          </table:table-cell>
          <table:table-cell table:number-columns-repeated="4"/>
        </table:table-row>
        <table:table-row table:style-name="ro1">
          <table:table-cell office:value-type="float" office:value="583.528198242188">
            <text:p>583.5281982422</text:p>
          </table:table-cell>
          <table:table-cell office:value-type="float" office:value="0.05859808">
            <text:p>0.05859808</text:p>
          </table:table-cell>
          <table:table-cell table:number-columns-repeated="4"/>
        </table:table-row>
        <table:table-row table:style-name="ro1">
          <table:table-cell office:value-type="float" office:value="583.646789550781">
            <text:p>583.6467895508</text:p>
          </table:table-cell>
          <table:table-cell office:value-type="float" office:value="0.05371648">
            <text:p>0.05371648</text:p>
          </table:table-cell>
          <table:table-cell table:number-columns-repeated="4"/>
        </table:table-row>
        <table:table-row table:style-name="ro1">
          <table:table-cell office:value-type="float" office:value="583.765319824219">
            <text:p>583.7653198242</text:p>
          </table:table-cell>
          <table:table-cell office:value-type="float" office:value="0.052482">
            <text:p>0.052482</text:p>
          </table:table-cell>
          <table:table-cell table:number-columns-repeated="4"/>
        </table:table-row>
        <table:table-row table:style-name="ro1">
          <table:table-cell office:value-type="float" office:value="583.883850097656">
            <text:p>583.8838500977</text:p>
          </table:table-cell>
          <table:table-cell office:value-type="float" office:value="0.06427883">
            <text:p>0.06427883</text:p>
          </table:table-cell>
          <table:table-cell table:number-columns-repeated="4"/>
        </table:table-row>
        <table:table-row table:style-name="ro1">
          <table:table-cell office:value-type="float" office:value="584.00244140625">
            <text:p>584.0024414063</text:p>
          </table:table-cell>
          <table:table-cell office:value-type="float" office:value="0.04984769">
            <text:p>0.04984769</text:p>
          </table:table-cell>
          <table:table-cell table:number-columns-repeated="4"/>
        </table:table-row>
        <table:table-row table:style-name="ro1">
          <table:table-cell office:value-type="float" office:value="584.120971679688">
            <text:p>584.1209716797</text:p>
          </table:table-cell>
          <table:table-cell office:value-type="float" office:value="0.06532711">
            <text:p>0.06532711</text:p>
          </table:table-cell>
          <table:table-cell table:number-columns-repeated="4"/>
        </table:table-row>
        <table:table-row table:style-name="ro1">
          <table:table-cell office:value-type="float" office:value="584.239501953125">
            <text:p>584.2395019531</text:p>
          </table:table-cell>
          <table:table-cell office:value-type="float" office:value="0.06128922">
            <text:p>0.06128922</text:p>
          </table:table-cell>
          <table:table-cell table:number-columns-repeated="4"/>
        </table:table-row>
        <table:table-row table:style-name="ro1">
          <table:table-cell office:value-type="float" office:value="584.358093261719">
            <text:p>584.3580932617</text:p>
          </table:table-cell>
          <table:table-cell office:value-type="float" office:value="0.05703655">
            <text:p>0.05703655</text:p>
          </table:table-cell>
          <table:table-cell table:number-columns-repeated="4"/>
        </table:table-row>
        <table:table-row table:style-name="ro1">
          <table:table-cell office:value-type="float" office:value="584.476623535156">
            <text:p>584.4766235352</text:p>
          </table:table-cell>
          <table:table-cell office:value-type="float" office:value="0.06554951">
            <text:p>0.06554951</text:p>
          </table:table-cell>
          <table:table-cell table:number-columns-repeated="4"/>
        </table:table-row>
        <table:table-row table:style-name="ro1">
          <table:table-cell office:value-type="float" office:value="584.59521484375">
            <text:p>584.5952148438</text:p>
          </table:table-cell>
          <table:table-cell office:value-type="float" office:value="0.06816577">
            <text:p>0.06816577</text:p>
          </table:table-cell>
          <table:table-cell table:number-columns-repeated="4"/>
        </table:table-row>
        <table:table-row table:style-name="ro1">
          <table:table-cell office:value-type="float" office:value="584.713806152344">
            <text:p>584.7138061523</text:p>
          </table:table-cell>
          <table:table-cell office:value-type="float" office:value="0.06035993">
            <text:p>0.06035993</text:p>
          </table:table-cell>
          <table:table-cell table:number-columns-repeated="4"/>
        </table:table-row>
        <table:table-row table:style-name="ro1">
          <table:table-cell office:value-type="float" office:value="584.832336425781">
            <text:p>584.8323364258</text:p>
          </table:table-cell>
          <table:table-cell office:value-type="float" office:value="0.06165403">
            <text:p>0.06165403</text:p>
          </table:table-cell>
          <table:table-cell table:number-columns-repeated="4"/>
        </table:table-row>
        <table:table-row table:style-name="ro1">
          <table:table-cell office:value-type="float" office:value="584.950927734375">
            <text:p>584.9509277344</text:p>
          </table:table-cell>
          <table:table-cell office:value-type="float" office:value="0.06054195">
            <text:p>0.06054195</text:p>
          </table:table-cell>
          <table:table-cell table:number-columns-repeated="4"/>
        </table:table-row>
        <table:table-row table:style-name="ro1">
          <table:table-cell office:value-type="float" office:value="585.069519042969">
            <text:p>585.069519043</text:p>
          </table:table-cell>
          <table:table-cell office:value-type="float" office:value="0.05165631">
            <text:p>0.05165631</text:p>
          </table:table-cell>
          <table:table-cell table:number-columns-repeated="4"/>
        </table:table-row>
        <table:table-row table:style-name="ro1">
          <table:table-cell office:value-type="float" office:value="585.188110351563">
            <text:p>585.1881103516</text:p>
          </table:table-cell>
          <table:table-cell office:value-type="float" office:value="0.06555058">
            <text:p>0.06555058</text:p>
          </table:table-cell>
          <table:table-cell table:number-columns-repeated="4"/>
        </table:table-row>
        <table:table-row table:style-name="ro1">
          <table:table-cell office:value-type="float" office:value="585.306640625">
            <text:p>585.306640625</text:p>
          </table:table-cell>
          <table:table-cell office:value-type="float" office:value="0.0669904">
            <text:p>0.0669904</text:p>
          </table:table-cell>
          <table:table-cell table:number-columns-repeated="4"/>
        </table:table-row>
        <table:table-row table:style-name="ro1">
          <table:table-cell office:value-type="float" office:value="585.425231933594">
            <text:p>585.4252319336</text:p>
          </table:table-cell>
          <table:table-cell office:value-type="float" office:value="0.05853108">
            <text:p>0.05853108</text:p>
          </table:table-cell>
          <table:table-cell table:number-columns-repeated="4"/>
        </table:table-row>
        <table:table-row table:style-name="ro1">
          <table:table-cell office:value-type="float" office:value="585.543823242188">
            <text:p>585.5438232422</text:p>
          </table:table-cell>
          <table:table-cell office:value-type="float" office:value="0.08164143">
            <text:p>0.08164143</text:p>
          </table:table-cell>
          <table:table-cell table:number-columns-repeated="4"/>
        </table:table-row>
        <table:table-row table:style-name="ro1">
          <table:table-cell office:value-type="float" office:value="585.662414550781">
            <text:p>585.6624145508</text:p>
          </table:table-cell>
          <table:table-cell office:value-type="float" office:value="0.05392791">
            <text:p>0.05392791</text:p>
          </table:table-cell>
          <table:table-cell table:number-columns-repeated="4"/>
        </table:table-row>
        <table:table-row table:style-name="ro1">
          <table:table-cell office:value-type="float" office:value="585.781005859375">
            <text:p>585.7810058594</text:p>
          </table:table-cell>
          <table:table-cell office:value-type="float" office:value="0.06256644">
            <text:p>0.06256644</text:p>
          </table:table-cell>
          <table:table-cell table:number-columns-repeated="4"/>
        </table:table-row>
        <table:table-row table:style-name="ro1">
          <table:table-cell office:value-type="float" office:value="585.899597167969">
            <text:p>585.899597168</text:p>
          </table:table-cell>
          <table:table-cell office:value-type="float" office:value="0.06731129">
            <text:p>0.06731129</text:p>
          </table:table-cell>
          <table:table-cell table:number-columns-repeated="4"/>
        </table:table-row>
        <table:table-row table:style-name="ro1">
          <table:table-cell office:value-type="float" office:value="586.018188476563">
            <text:p>586.0181884766</text:p>
          </table:table-cell>
          <table:table-cell office:value-type="float" office:value="0.05405388">
            <text:p>0.05405388</text:p>
          </table:table-cell>
          <table:table-cell table:number-columns-repeated="4"/>
        </table:table-row>
        <table:table-row table:style-name="ro1">
          <table:table-cell office:value-type="float" office:value="586.136779785156">
            <text:p>586.1367797852</text:p>
          </table:table-cell>
          <table:table-cell office:value-type="float" office:value="0.05621513">
            <text:p>0.05621513</text:p>
          </table:table-cell>
          <table:table-cell table:number-columns-repeated="4"/>
        </table:table-row>
        <table:table-row table:style-name="ro1">
          <table:table-cell office:value-type="float" office:value="586.255432128906">
            <text:p>586.2554321289</text:p>
          </table:table-cell>
          <table:table-cell office:value-type="float" office:value="0.06412507">
            <text:p>0.06412507</text:p>
          </table:table-cell>
          <table:table-cell table:number-columns-repeated="4"/>
        </table:table-row>
        <table:table-row table:style-name="ro1">
          <table:table-cell office:value-type="float" office:value="586.3740234375">
            <text:p>586.3740234375</text:p>
          </table:table-cell>
          <table:table-cell office:value-type="float" office:value="0.06604523">
            <text:p>0.06604523</text:p>
          </table:table-cell>
          <table:table-cell table:number-columns-repeated="4"/>
        </table:table-row>
        <table:table-row table:style-name="ro1">
          <table:table-cell office:value-type="float" office:value="586.492614746094">
            <text:p>586.4926147461</text:p>
          </table:table-cell>
          <table:table-cell office:value-type="float" office:value="0.0648888">
            <text:p>0.0648888</text:p>
          </table:table-cell>
          <table:table-cell table:number-columns-repeated="4"/>
        </table:table-row>
        <table:table-row table:style-name="ro1">
          <table:table-cell office:value-type="float" office:value="586.611206054688">
            <text:p>586.6112060547</text:p>
          </table:table-cell>
          <table:table-cell office:value-type="float" office:value="0.07361701">
            <text:p>0.07361701</text:p>
          </table:table-cell>
          <table:table-cell table:number-columns-repeated="4"/>
        </table:table-row>
        <table:table-row table:style-name="ro1">
          <table:table-cell office:value-type="float" office:value="586.729858398438">
            <text:p>586.7298583984</text:p>
          </table:table-cell>
          <table:table-cell office:value-type="float" office:value="0.06922843">
            <text:p>0.06922843</text:p>
          </table:table-cell>
          <table:table-cell table:number-columns-repeated="4"/>
        </table:table-row>
        <table:table-row table:style-name="ro1">
          <table:table-cell office:value-type="float" office:value="586.848449707031">
            <text:p>586.848449707</text:p>
          </table:table-cell>
          <table:table-cell office:value-type="float" office:value="0.07185283">
            <text:p>0.07185283</text:p>
          </table:table-cell>
          <table:table-cell table:number-columns-repeated="4"/>
        </table:table-row>
        <table:table-row table:style-name="ro1">
          <table:table-cell office:value-type="float" office:value="586.967041015625">
            <text:p>586.9670410156</text:p>
          </table:table-cell>
          <table:table-cell office:value-type="float" office:value="0.05845758">
            <text:p>0.05845758</text:p>
          </table:table-cell>
          <table:table-cell table:number-columns-repeated="4"/>
        </table:table-row>
        <table:table-row table:style-name="ro1">
          <table:table-cell office:value-type="float" office:value="587.085693359375">
            <text:p>587.0856933594</text:p>
          </table:table-cell>
          <table:table-cell office:value-type="float" office:value="0.06044449">
            <text:p>0.06044449</text:p>
          </table:table-cell>
          <table:table-cell table:number-columns-repeated="4"/>
        </table:table-row>
        <table:table-row table:style-name="ro1">
          <table:table-cell office:value-type="float" office:value="587.204284667969">
            <text:p>587.204284668</text:p>
          </table:table-cell>
          <table:table-cell office:value-type="float" office:value="0.07315487">
            <text:p>0.07315487</text:p>
          </table:table-cell>
          <table:table-cell table:number-columns-repeated="4"/>
        </table:table-row>
        <table:table-row table:style-name="ro1">
          <table:table-cell office:value-type="float" office:value="587.322937011719">
            <text:p>587.3229370117</text:p>
          </table:table-cell>
          <table:table-cell office:value-type="float" office:value="0.06690219">
            <text:p>0.06690219</text:p>
          </table:table-cell>
          <table:table-cell table:number-columns-repeated="4"/>
        </table:table-row>
        <table:table-row table:style-name="ro1">
          <table:table-cell office:value-type="float" office:value="587.441589355469">
            <text:p>587.4415893555</text:p>
          </table:table-cell>
          <table:table-cell office:value-type="float" office:value="0.07213283">
            <text:p>0.07213283</text:p>
          </table:table-cell>
          <table:table-cell table:number-columns-repeated="4"/>
        </table:table-row>
        <table:table-row table:style-name="ro1">
          <table:table-cell office:value-type="float" office:value="587.560180664063">
            <text:p>587.5601806641</text:p>
          </table:table-cell>
          <table:table-cell office:value-type="float" office:value="0.05720401">
            <text:p>0.05720401</text:p>
          </table:table-cell>
          <table:table-cell table:number-columns-repeated="4"/>
        </table:table-row>
        <table:table-row table:style-name="ro1">
          <table:table-cell office:value-type="float" office:value="587.678833007813">
            <text:p>587.6788330078</text:p>
          </table:table-cell>
          <table:table-cell office:value-type="float" office:value="0.06717189">
            <text:p>0.06717189</text:p>
          </table:table-cell>
          <table:table-cell table:number-columns-repeated="4"/>
        </table:table-row>
        <table:table-row table:style-name="ro1">
          <table:table-cell office:value-type="float" office:value="587.797424316406">
            <text:p>587.7974243164</text:p>
          </table:table-cell>
          <table:table-cell office:value-type="float" office:value="0.07093441">
            <text:p>0.07093441</text:p>
          </table:table-cell>
          <table:table-cell table:number-columns-repeated="4"/>
        </table:table-row>
        <table:table-row table:style-name="ro1">
          <table:table-cell office:value-type="float" office:value="587.916076660156">
            <text:p>587.9160766602</text:p>
          </table:table-cell>
          <table:table-cell office:value-type="float" office:value="0.0752249">
            <text:p>0.0752249</text:p>
          </table:table-cell>
          <table:table-cell table:number-columns-repeated="4"/>
        </table:table-row>
        <table:table-row table:style-name="ro1">
          <table:table-cell office:value-type="float" office:value="588.034729003906">
            <text:p>588.0347290039</text:p>
          </table:table-cell>
          <table:table-cell office:value-type="float" office:value="0.06655303">
            <text:p>0.06655303</text:p>
          </table:table-cell>
          <table:table-cell table:number-columns-repeated="4"/>
        </table:table-row>
        <table:table-row table:style-name="ro1">
          <table:table-cell office:value-type="float" office:value="588.153381347656">
            <text:p>588.1533813477</text:p>
          </table:table-cell>
          <table:table-cell office:value-type="float" office:value="0.06730177">
            <text:p>0.06730177</text:p>
          </table:table-cell>
          <table:table-cell table:number-columns-repeated="4"/>
        </table:table-row>
        <table:table-row table:style-name="ro1">
          <table:table-cell office:value-type="float" office:value="588.272033691406">
            <text:p>588.2720336914</text:p>
          </table:table-cell>
          <table:table-cell office:value-type="float" office:value="0.06807898">
            <text:p>0.06807898</text:p>
          </table:table-cell>
          <table:table-cell table:number-columns-repeated="4"/>
        </table:table-row>
        <table:table-row table:style-name="ro1">
          <table:table-cell office:value-type="float" office:value="588.390686035156">
            <text:p>588.3906860352</text:p>
          </table:table-cell>
          <table:table-cell office:value-type="float" office:value="0.07607718">
            <text:p>0.07607718</text:p>
          </table:table-cell>
          <table:table-cell table:number-columns-repeated="4"/>
        </table:table-row>
        <table:table-row table:style-name="ro1">
          <table:table-cell office:value-type="float" office:value="588.509338378906">
            <text:p>588.5093383789</text:p>
          </table:table-cell>
          <table:table-cell office:value-type="float" office:value="0.06615271">
            <text:p>0.06615271</text:p>
          </table:table-cell>
          <table:table-cell table:number-columns-repeated="4"/>
        </table:table-row>
        <table:table-row table:style-name="ro1">
          <table:table-cell office:value-type="float" office:value="588.627990722656">
            <text:p>588.6279907227</text:p>
          </table:table-cell>
          <table:table-cell office:value-type="float" office:value="0.06194573">
            <text:p>0.06194573</text:p>
          </table:table-cell>
          <table:table-cell table:number-columns-repeated="4"/>
        </table:table-row>
        <table:table-row table:style-name="ro1">
          <table:table-cell office:value-type="float" office:value="588.746643066406">
            <text:p>588.7466430664</text:p>
          </table:table-cell>
          <table:table-cell office:value-type="float" office:value="0.06118713">
            <text:p>0.06118713</text:p>
          </table:table-cell>
          <table:table-cell table:number-columns-repeated="4"/>
        </table:table-row>
        <table:table-row table:style-name="ro1">
          <table:table-cell office:value-type="float" office:value="588.865295410156">
            <text:p>588.8652954102</text:p>
          </table:table-cell>
          <table:table-cell office:value-type="float" office:value="0.0649662">
            <text:p>0.0649662</text:p>
          </table:table-cell>
          <table:table-cell table:number-columns-repeated="4"/>
        </table:table-row>
        <table:table-row table:style-name="ro1">
          <table:table-cell office:value-type="float" office:value="588.983947753906">
            <text:p>588.9839477539</text:p>
          </table:table-cell>
          <table:table-cell office:value-type="float" office:value="0.06123689">
            <text:p>0.06123689</text:p>
          </table:table-cell>
          <table:table-cell table:number-columns-repeated="4"/>
        </table:table-row>
        <table:table-row table:style-name="ro1">
          <table:table-cell office:value-type="float" office:value="589.102600097656">
            <text:p>589.1026000977</text:p>
          </table:table-cell>
          <table:table-cell office:value-type="float" office:value="0.0713557">
            <text:p>0.0713557</text:p>
          </table:table-cell>
          <table:table-cell table:number-columns-repeated="4"/>
        </table:table-row>
        <table:table-row table:style-name="ro1">
          <table:table-cell office:value-type="float" office:value="589.221252441406">
            <text:p>589.2212524414</text:p>
          </table:table-cell>
          <table:table-cell office:value-type="float" office:value="0.05897234">
            <text:p>0.05897234</text:p>
          </table:table-cell>
          <table:table-cell table:number-columns-repeated="4"/>
        </table:table-row>
        <table:table-row table:style-name="ro1">
          <table:table-cell office:value-type="float" office:value="589.339904785156">
            <text:p>589.3399047852</text:p>
          </table:table-cell>
          <table:table-cell office:value-type="float" office:value="0.06315892">
            <text:p>0.06315892</text:p>
          </table:table-cell>
          <table:table-cell table:number-columns-repeated="4"/>
        </table:table-row>
        <table:table-row table:style-name="ro1">
          <table:table-cell office:value-type="float" office:value="589.458618164063">
            <text:p>589.4586181641</text:p>
          </table:table-cell>
          <table:table-cell office:value-type="float" office:value="0.06154817">
            <text:p>0.06154817</text:p>
          </table:table-cell>
          <table:table-cell table:number-columns-repeated="4"/>
        </table:table-row>
        <table:table-row table:style-name="ro1">
          <table:table-cell office:value-type="float" office:value="589.577270507813">
            <text:p>589.5772705078</text:p>
          </table:table-cell>
          <table:table-cell office:value-type="float" office:value="0.05807408">
            <text:p>0.05807408</text:p>
          </table:table-cell>
          <table:table-cell table:number-columns-repeated="4"/>
        </table:table-row>
        <table:table-row table:style-name="ro1">
          <table:table-cell office:value-type="float" office:value="589.695922851563">
            <text:p>589.6959228516</text:p>
          </table:table-cell>
          <table:table-cell office:value-type="float" office:value="0.07051561">
            <text:p>0.07051561</text:p>
          </table:table-cell>
          <table:table-cell table:number-columns-repeated="4"/>
        </table:table-row>
        <table:table-row table:style-name="ro1">
          <table:table-cell office:value-type="float" office:value="589.814636230469">
            <text:p>589.8146362305</text:p>
          </table:table-cell>
          <table:table-cell office:value-type="float" office:value="0.05896735">
            <text:p>0.05896735</text:p>
          </table:table-cell>
          <table:table-cell table:number-columns-repeated="4"/>
        </table:table-row>
        <table:table-row table:style-name="ro1">
          <table:table-cell office:value-type="float" office:value="589.933288574219">
            <text:p>589.9332885742</text:p>
          </table:table-cell>
          <table:table-cell office:value-type="float" office:value="0.06476592">
            <text:p>0.06476592</text:p>
          </table:table-cell>
          <table:table-cell table:number-columns-repeated="4"/>
        </table:table-row>
        <table:table-row table:style-name="ro1">
          <table:table-cell office:value-type="float" office:value="590.052001953125">
            <text:p>590.0520019531</text:p>
          </table:table-cell>
          <table:table-cell office:value-type="float" office:value="0.06017366">
            <text:p>0.06017366</text:p>
          </table:table-cell>
          <table:table-cell table:number-columns-repeated="4"/>
        </table:table-row>
        <table:table-row table:style-name="ro1">
          <table:table-cell office:value-type="float" office:value="590.170654296875">
            <text:p>590.1706542969</text:p>
          </table:table-cell>
          <table:table-cell office:value-type="float" office:value="0.06443559">
            <text:p>0.06443559</text:p>
          </table:table-cell>
          <table:table-cell table:number-columns-repeated="4"/>
        </table:table-row>
        <table:table-row table:style-name="ro1">
          <table:table-cell office:value-type="float" office:value="590.289367675781">
            <text:p>590.2893676758</text:p>
          </table:table-cell>
          <table:table-cell office:value-type="float" office:value="0.05588059">
            <text:p>0.05588059</text:p>
          </table:table-cell>
          <table:table-cell table:number-columns-repeated="4"/>
        </table:table-row>
        <table:table-row table:style-name="ro1">
          <table:table-cell office:value-type="float" office:value="590.408020019531">
            <text:p>590.4080200195</text:p>
          </table:table-cell>
          <table:table-cell office:value-type="float" office:value="0.0992908">
            <text:p>0.0992908</text:p>
          </table:table-cell>
          <table:table-cell table:number-columns-repeated="4"/>
        </table:table-row>
        <table:table-row table:style-name="ro1">
          <table:table-cell office:value-type="float" office:value="590.526733398438">
            <text:p>590.5267333984</text:p>
          </table:table-cell>
          <table:table-cell office:value-type="float" office:value="0.07053819">
            <text:p>0.07053819</text:p>
          </table:table-cell>
          <table:table-cell table:number-columns-repeated="4"/>
        </table:table-row>
        <table:table-row table:style-name="ro1">
          <table:table-cell office:value-type="float" office:value="590.645446777344">
            <text:p>590.6454467773</text:p>
          </table:table-cell>
          <table:table-cell office:value-type="float" office:value="0.05965809">
            <text:p>0.05965809</text:p>
          </table:table-cell>
          <table:table-cell table:number-columns-repeated="4"/>
        </table:table-row>
        <table:table-row table:style-name="ro1">
          <table:table-cell office:value-type="float" office:value="590.764099121094">
            <text:p>590.7640991211</text:p>
          </table:table-cell>
          <table:table-cell office:value-type="float" office:value="0.06007259">
            <text:p>0.06007259</text:p>
          </table:table-cell>
          <table:table-cell table:number-columns-repeated="4"/>
        </table:table-row>
        <table:table-row table:style-name="ro1">
          <table:table-cell office:value-type="float" office:value="590.8828125">
            <text:p>590.8828125</text:p>
          </table:table-cell>
          <table:table-cell office:value-type="float" office:value="0.07018391">
            <text:p>0.07018391</text:p>
          </table:table-cell>
          <table:table-cell table:number-columns-repeated="4"/>
        </table:table-row>
        <table:table-row table:style-name="ro1">
          <table:table-cell office:value-type="float" office:value="591.001525878906">
            <text:p>591.0015258789</text:p>
          </table:table-cell>
          <table:table-cell office:value-type="float" office:value="0.07094803">
            <text:p>0.07094803</text:p>
          </table:table-cell>
          <table:table-cell table:number-columns-repeated="4"/>
        </table:table-row>
        <table:table-row table:style-name="ro1">
          <table:table-cell office:value-type="float" office:value="591.120239257813">
            <text:p>591.1202392578</text:p>
          </table:table-cell>
          <table:table-cell office:value-type="float" office:value="0.0593214">
            <text:p>0.0593214</text:p>
          </table:table-cell>
          <table:table-cell table:number-columns-repeated="4"/>
        </table:table-row>
        <table:table-row table:style-name="ro1">
          <table:table-cell office:value-type="float" office:value="591.238891601563">
            <text:p>591.2388916016</text:p>
          </table:table-cell>
          <table:table-cell office:value-type="float" office:value="0.0587827">
            <text:p>0.0587827</text:p>
          </table:table-cell>
          <table:table-cell table:number-columns-repeated="4"/>
        </table:table-row>
        <table:table-row table:style-name="ro1">
          <table:table-cell office:value-type="float" office:value="591.357604980469">
            <text:p>591.3576049805</text:p>
          </table:table-cell>
          <table:table-cell office:value-type="float" office:value="0.07001258">
            <text:p>0.07001258</text:p>
          </table:table-cell>
          <table:table-cell table:number-columns-repeated="4"/>
        </table:table-row>
        <table:table-row table:style-name="ro1">
          <table:table-cell office:value-type="float" office:value="591.476318359375">
            <text:p>591.4763183594</text:p>
          </table:table-cell>
          <table:table-cell office:value-type="float" office:value="0.06072926">
            <text:p>0.06072926</text:p>
          </table:table-cell>
          <table:table-cell table:number-columns-repeated="4"/>
        </table:table-row>
        <table:table-row table:style-name="ro1">
          <table:table-cell office:value-type="float" office:value="591.595031738281">
            <text:p>591.5950317383</text:p>
          </table:table-cell>
          <table:table-cell office:value-type="float" office:value="0.07590725">
            <text:p>0.07590725</text:p>
          </table:table-cell>
          <table:table-cell table:number-columns-repeated="4"/>
        </table:table-row>
        <table:table-row table:style-name="ro1">
          <table:table-cell office:value-type="float" office:value="591.713745117188">
            <text:p>591.7137451172</text:p>
          </table:table-cell>
          <table:table-cell office:value-type="float" office:value="0.06173186">
            <text:p>0.06173186</text:p>
          </table:table-cell>
          <table:table-cell table:number-columns-repeated="4"/>
        </table:table-row>
        <table:table-row table:style-name="ro1">
          <table:table-cell office:value-type="float" office:value="591.832458496094">
            <text:p>591.8324584961</text:p>
          </table:table-cell>
          <table:table-cell office:value-type="float" office:value="0.07529833">
            <text:p>0.07529833</text:p>
          </table:table-cell>
          <table:table-cell table:number-columns-repeated="4"/>
        </table:table-row>
        <table:table-row table:style-name="ro1">
          <table:table-cell office:value-type="float" office:value="591.951232910156">
            <text:p>591.9512329102</text:p>
          </table:table-cell>
          <table:table-cell office:value-type="float" office:value="0.0635967">
            <text:p>0.0635967</text:p>
          </table:table-cell>
          <table:table-cell table:number-columns-repeated="4"/>
        </table:table-row>
        <table:table-row table:style-name="ro1">
          <table:table-cell office:value-type="float" office:value="592.069946289063">
            <text:p>592.0699462891</text:p>
          </table:table-cell>
          <table:table-cell office:value-type="float" office:value="0.0667967">
            <text:p>0.0667967</text:p>
          </table:table-cell>
          <table:table-cell table:number-columns-repeated="4"/>
        </table:table-row>
        <table:table-row table:style-name="ro1">
          <table:table-cell office:value-type="float" office:value="592.188659667969">
            <text:p>592.188659668</text:p>
          </table:table-cell>
          <table:table-cell office:value-type="float" office:value="0.05570273">
            <text:p>0.05570273</text:p>
          </table:table-cell>
          <table:table-cell table:number-columns-repeated="4"/>
        </table:table-row>
        <table:table-row table:style-name="ro1">
          <table:table-cell office:value-type="float" office:value="592.307373046875">
            <text:p>592.3073730469</text:p>
          </table:table-cell>
          <table:table-cell office:value-type="float" office:value="0.05775579">
            <text:p>0.05775579</text:p>
          </table:table-cell>
          <table:table-cell table:number-columns-repeated="4"/>
        </table:table-row>
        <table:table-row table:style-name="ro1">
          <table:table-cell office:value-type="float" office:value="592.426086425781">
            <text:p>592.4260864258</text:p>
          </table:table-cell>
          <table:table-cell office:value-type="float" office:value="0.07919753">
            <text:p>0.07919753</text:p>
          </table:table-cell>
          <table:table-cell table:number-columns-repeated="4"/>
        </table:table-row>
        <table:table-row table:style-name="ro1">
          <table:table-cell office:value-type="float" office:value="592.544860839844">
            <text:p>592.5448608398</text:p>
          </table:table-cell>
          <table:table-cell office:value-type="float" office:value="0.05877206">
            <text:p>0.05877206</text:p>
          </table:table-cell>
          <table:table-cell table:number-columns-repeated="4"/>
        </table:table-row>
        <table:table-row table:style-name="ro1">
          <table:table-cell office:value-type="float" office:value="592.66357421875">
            <text:p>592.6635742188</text:p>
          </table:table-cell>
          <table:table-cell office:value-type="float" office:value="0.05501594">
            <text:p>0.05501594</text:p>
          </table:table-cell>
          <table:table-cell table:number-columns-repeated="4"/>
        </table:table-row>
        <table:table-row table:style-name="ro1">
          <table:table-cell office:value-type="float" office:value="592.782348632813">
            <text:p>592.7823486328</text:p>
          </table:table-cell>
          <table:table-cell office:value-type="float" office:value="0.05467993">
            <text:p>0.05467993</text:p>
          </table:table-cell>
          <table:table-cell table:number-columns-repeated="4"/>
        </table:table-row>
        <table:table-row table:style-name="ro1">
          <table:table-cell office:value-type="float" office:value="592.901062011719">
            <text:p>592.9010620117</text:p>
          </table:table-cell>
          <table:table-cell office:value-type="float" office:value="0.06082034">
            <text:p>0.06082034</text:p>
          </table:table-cell>
          <table:table-cell table:number-columns-repeated="4"/>
        </table:table-row>
        <table:table-row table:style-name="ro1">
          <table:table-cell office:value-type="float" office:value="593.019775390625">
            <text:p>593.0197753906</text:p>
          </table:table-cell>
          <table:table-cell office:value-type="float" office:value="0.05548487">
            <text:p>0.05548487</text:p>
          </table:table-cell>
          <table:table-cell table:number-columns-repeated="4"/>
        </table:table-row>
        <table:table-row table:style-name="ro1">
          <table:table-cell office:value-type="float" office:value="593.138549804688">
            <text:p>593.1385498047</text:p>
          </table:table-cell>
          <table:table-cell office:value-type="float" office:value="0.05282445">
            <text:p>0.05282445</text:p>
          </table:table-cell>
          <table:table-cell table:number-columns-repeated="4"/>
        </table:table-row>
        <table:table-row table:style-name="ro1">
          <table:table-cell office:value-type="float" office:value="593.257263183594">
            <text:p>593.2572631836</text:p>
          </table:table-cell>
          <table:table-cell office:value-type="float" office:value="0.05199073">
            <text:p>0.05199073</text:p>
          </table:table-cell>
          <table:table-cell table:number-columns-repeated="4"/>
        </table:table-row>
        <table:table-row table:style-name="ro1">
          <table:table-cell office:value-type="float" office:value="593.376037597656">
            <text:p>593.3760375977</text:p>
          </table:table-cell>
          <table:table-cell office:value-type="float" office:value="0.04855083">
            <text:p>0.04855083</text:p>
          </table:table-cell>
          <table:table-cell table:number-columns-repeated="4"/>
        </table:table-row>
        <table:table-row table:style-name="ro1">
          <table:table-cell office:value-type="float" office:value="593.494812011719">
            <text:p>593.4948120117</text:p>
          </table:table-cell>
          <table:table-cell office:value-type="float" office:value="0.06539553">
            <text:p>0.06539553</text:p>
          </table:table-cell>
          <table:table-cell table:number-columns-repeated="4"/>
        </table:table-row>
        <table:table-row table:style-name="ro1">
          <table:table-cell office:value-type="float" office:value="593.613525390625">
            <text:p>593.6135253906</text:p>
          </table:table-cell>
          <table:table-cell office:value-type="float" office:value="0.0548143">
            <text:p>0.0548143</text:p>
          </table:table-cell>
          <table:table-cell table:number-columns-repeated="4"/>
        </table:table-row>
        <table:table-row table:style-name="ro1">
          <table:table-cell office:value-type="float" office:value="593.732299804688">
            <text:p>593.7322998047</text:p>
          </table:table-cell>
          <table:table-cell office:value-type="float" office:value="0.05670599">
            <text:p>0.05670599</text:p>
          </table:table-cell>
          <table:table-cell table:number-columns-repeated="4"/>
        </table:table-row>
        <table:table-row table:style-name="ro1">
          <table:table-cell office:value-type="float" office:value="593.85107421875">
            <text:p>593.8510742188</text:p>
          </table:table-cell>
          <table:table-cell office:value-type="float" office:value="0.05836488">
            <text:p>0.05836488</text:p>
          </table:table-cell>
          <table:table-cell table:number-columns-repeated="4"/>
        </table:table-row>
        <table:table-row table:style-name="ro1">
          <table:table-cell office:value-type="float" office:value="593.969848632813">
            <text:p>593.9698486328</text:p>
          </table:table-cell>
          <table:table-cell office:value-type="float" office:value="0.05641627">
            <text:p>0.05641627</text:p>
          </table:table-cell>
          <table:table-cell table:number-columns-repeated="4"/>
        </table:table-row>
        <table:table-row table:style-name="ro1">
          <table:table-cell office:value-type="float" office:value="594.088562011719">
            <text:p>594.0885620117</text:p>
          </table:table-cell>
          <table:table-cell office:value-type="float" office:value="0.05566565">
            <text:p>0.05566565</text:p>
          </table:table-cell>
          <table:table-cell table:number-columns-repeated="4"/>
        </table:table-row>
        <table:table-row table:style-name="ro1">
          <table:table-cell office:value-type="float" office:value="594.207336425781">
            <text:p>594.2073364258</text:p>
          </table:table-cell>
          <table:table-cell office:value-type="float" office:value="0.05724059">
            <text:p>0.05724059</text:p>
          </table:table-cell>
          <table:table-cell table:number-columns-repeated="4"/>
        </table:table-row>
        <table:table-row table:style-name="ro1">
          <table:table-cell office:value-type="float" office:value="594.326110839844">
            <text:p>594.3261108398</text:p>
          </table:table-cell>
          <table:table-cell office:value-type="float" office:value="0.06341349">
            <text:p>0.06341349</text:p>
          </table:table-cell>
          <table:table-cell table:number-columns-repeated="4"/>
        </table:table-row>
        <table:table-row table:style-name="ro1">
          <table:table-cell office:value-type="float" office:value="594.444885253906">
            <text:p>594.4448852539</text:p>
          </table:table-cell>
          <table:table-cell office:value-type="float" office:value="0.05253549">
            <text:p>0.05253549</text:p>
          </table:table-cell>
          <table:table-cell table:number-columns-repeated="4"/>
        </table:table-row>
        <table:table-row table:style-name="ro1">
          <table:table-cell office:value-type="float" office:value="594.563659667969">
            <text:p>594.563659668</text:p>
          </table:table-cell>
          <table:table-cell office:value-type="float" office:value="0.05548703">
            <text:p>0.05548703</text:p>
          </table:table-cell>
          <table:table-cell table:number-columns-repeated="4"/>
        </table:table-row>
        <table:table-row table:style-name="ro1">
          <table:table-cell office:value-type="float" office:value="594.682434082031">
            <text:p>594.682434082</text:p>
          </table:table-cell>
          <table:table-cell office:value-type="float" office:value="0.05999939">
            <text:p>0.05999939</text:p>
          </table:table-cell>
          <table:table-cell table:number-columns-repeated="4"/>
        </table:table-row>
        <table:table-row table:style-name="ro1">
          <table:table-cell office:value-type="float" office:value="594.801208496094">
            <text:p>594.8012084961</text:p>
          </table:table-cell>
          <table:table-cell office:value-type="float" office:value="0.05680389">
            <text:p>0.05680389</text:p>
          </table:table-cell>
          <table:table-cell table:number-columns-repeated="4"/>
        </table:table-row>
        <table:table-row table:style-name="ro1">
          <table:table-cell office:value-type="float" office:value="594.919982910156">
            <text:p>594.9199829102</text:p>
          </table:table-cell>
          <table:table-cell office:value-type="float" office:value="0.05389862">
            <text:p>0.05389862</text:p>
          </table:table-cell>
          <table:table-cell table:number-columns-repeated="4"/>
        </table:table-row>
        <table:table-row table:style-name="ro1">
          <table:table-cell office:value-type="float" office:value="595.038818359375">
            <text:p>595.0388183594</text:p>
          </table:table-cell>
          <table:table-cell office:value-type="float" office:value="0.05744709">
            <text:p>0.05744709</text:p>
          </table:table-cell>
          <table:table-cell table:number-columns-repeated="4"/>
        </table:table-row>
        <table:table-row table:style-name="ro1">
          <table:table-cell office:value-type="float" office:value="595.157592773438">
            <text:p>595.1575927734</text:p>
          </table:table-cell>
          <table:table-cell office:value-type="float" office:value="0.06890994">
            <text:p>0.06890994</text:p>
          </table:table-cell>
          <table:table-cell table:number-columns-repeated="4"/>
        </table:table-row>
        <table:table-row table:style-name="ro1">
          <table:table-cell office:value-type="float" office:value="595.2763671875">
            <text:p>595.2763671875</text:p>
          </table:table-cell>
          <table:table-cell office:value-type="float" office:value="0.08024329">
            <text:p>0.08024329</text:p>
          </table:table-cell>
          <table:table-cell table:number-columns-repeated="4"/>
        </table:table-row>
        <table:table-row table:style-name="ro1">
          <table:table-cell office:value-type="float" office:value="595.395141601563">
            <text:p>595.3951416016</text:p>
          </table:table-cell>
          <table:table-cell office:value-type="float" office:value="0.05869028">
            <text:p>0.05869028</text:p>
          </table:table-cell>
          <table:table-cell table:number-columns-repeated="4"/>
        </table:table-row>
        <table:table-row table:style-name="ro1">
          <table:table-cell office:value-type="float" office:value="595.513916015625">
            <text:p>595.5139160156</text:p>
          </table:table-cell>
          <table:table-cell office:value-type="float" office:value="0.06667128">
            <text:p>0.06667128</text:p>
          </table:table-cell>
          <table:table-cell table:number-columns-repeated="4"/>
        </table:table-row>
        <table:table-row table:style-name="ro1">
          <table:table-cell office:value-type="float" office:value="595.632751464844">
            <text:p>595.6327514648</text:p>
          </table:table-cell>
          <table:table-cell office:value-type="float" office:value="0.05054905">
            <text:p>0.05054905</text:p>
          </table:table-cell>
          <table:table-cell table:number-columns-repeated="4"/>
        </table:table-row>
        <table:table-row table:style-name="ro1">
          <table:table-cell office:value-type="float" office:value="595.751525878906">
            <text:p>595.7515258789</text:p>
          </table:table-cell>
          <table:table-cell office:value-type="float" office:value="0.05591746">
            <text:p>0.05591746</text:p>
          </table:table-cell>
          <table:table-cell table:number-columns-repeated="4"/>
        </table:table-row>
        <table:table-row table:style-name="ro1">
          <table:table-cell office:value-type="float" office:value="595.870361328125">
            <text:p>595.8703613281</text:p>
          </table:table-cell>
          <table:table-cell office:value-type="float" office:value="0.05512265">
            <text:p>0.05512265</text:p>
          </table:table-cell>
          <table:table-cell table:number-columns-repeated="4"/>
        </table:table-row>
        <table:table-row table:style-name="ro1">
          <table:table-cell office:value-type="float" office:value="595.989135742188">
            <text:p>595.9891357422</text:p>
          </table:table-cell>
          <table:table-cell office:value-type="float" office:value="0.06361802">
            <text:p>0.06361802</text:p>
          </table:table-cell>
          <table:table-cell table:number-columns-repeated="4"/>
        </table:table-row>
        <table:table-row table:style-name="ro1">
          <table:table-cell office:value-type="float" office:value="596.107971191406">
            <text:p>596.1079711914</text:p>
          </table:table-cell>
          <table:table-cell office:value-type="float" office:value="0.05632193">
            <text:p>0.05632193</text:p>
          </table:table-cell>
          <table:table-cell table:number-columns-repeated="4"/>
        </table:table-row>
        <table:table-row table:style-name="ro1">
          <table:table-cell office:value-type="float" office:value="596.226745605469">
            <text:p>596.2267456055</text:p>
          </table:table-cell>
          <table:table-cell office:value-type="float" office:value="0.0602713">
            <text:p>0.0602713</text:p>
          </table:table-cell>
          <table:table-cell table:number-columns-repeated="4"/>
        </table:table-row>
        <table:table-row table:style-name="ro1">
          <table:table-cell office:value-type="float" office:value="596.345581054688">
            <text:p>596.3455810547</text:p>
          </table:table-cell>
          <table:table-cell office:value-type="float" office:value="0.0540983">
            <text:p>0.0540983</text:p>
          </table:table-cell>
          <table:table-cell table:number-columns-repeated="4"/>
        </table:table-row>
        <table:table-row table:style-name="ro1">
          <table:table-cell office:value-type="float" office:value="596.46435546875">
            <text:p>596.4643554688</text:p>
          </table:table-cell>
          <table:table-cell office:value-type="float" office:value="0.06856671">
            <text:p>0.06856671</text:p>
          </table:table-cell>
          <table:table-cell table:number-columns-repeated="4"/>
        </table:table-row>
        <table:table-row table:style-name="ro1">
          <table:table-cell office:value-type="float" office:value="596.583190917969">
            <text:p>596.583190918</text:p>
          </table:table-cell>
          <table:table-cell office:value-type="float" office:value="0.05411542">
            <text:p>0.05411542</text:p>
          </table:table-cell>
          <table:table-cell table:number-columns-repeated="4"/>
        </table:table-row>
        <table:table-row table:style-name="ro1">
          <table:table-cell office:value-type="float" office:value="596.702026367188">
            <text:p>596.7020263672</text:p>
          </table:table-cell>
          <table:table-cell office:value-type="float" office:value="0.05755145">
            <text:p>0.05755145</text:p>
          </table:table-cell>
          <table:table-cell table:number-columns-repeated="4"/>
        </table:table-row>
        <table:table-row table:style-name="ro1">
          <table:table-cell office:value-type="float" office:value="596.82080078125">
            <text:p>596.8208007813</text:p>
          </table:table-cell>
          <table:table-cell office:value-type="float" office:value="0.05453214">
            <text:p>0.05453214</text:p>
          </table:table-cell>
          <table:table-cell table:number-columns-repeated="4"/>
        </table:table-row>
        <table:table-row table:style-name="ro1">
          <table:table-cell office:value-type="float" office:value="596.939636230469">
            <text:p>596.9396362305</text:p>
          </table:table-cell>
          <table:table-cell office:value-type="float" office:value="0.05138877">
            <text:p>0.05138877</text:p>
          </table:table-cell>
          <table:table-cell table:number-columns-repeated="4"/>
        </table:table-row>
        <table:table-row table:style-name="ro1">
          <table:table-cell office:value-type="float" office:value="597.058471679688">
            <text:p>597.0584716797</text:p>
          </table:table-cell>
          <table:table-cell office:value-type="float" office:value="0.05471387">
            <text:p>0.05471387</text:p>
          </table:table-cell>
          <table:table-cell table:number-columns-repeated="4"/>
        </table:table-row>
        <table:table-row table:style-name="ro1">
          <table:table-cell office:value-type="float" office:value="597.177307128906">
            <text:p>597.1773071289</text:p>
          </table:table-cell>
          <table:table-cell office:value-type="float" office:value="0.05348027">
            <text:p>0.05348027</text:p>
          </table:table-cell>
          <table:table-cell table:number-columns-repeated="4"/>
        </table:table-row>
        <table:table-row table:style-name="ro1">
          <table:table-cell office:value-type="float" office:value="597.296142578125">
            <text:p>597.2961425781</text:p>
          </table:table-cell>
          <table:table-cell office:value-type="float" office:value="0.06645393">
            <text:p>0.06645393</text:p>
          </table:table-cell>
          <table:table-cell table:number-columns-repeated="4"/>
        </table:table-row>
        <table:table-row table:style-name="ro1">
          <table:table-cell office:value-type="float" office:value="597.414978027344">
            <text:p>597.4149780273</text:p>
          </table:table-cell>
          <table:table-cell office:value-type="float" office:value="0.05322763">
            <text:p>0.05322763</text:p>
          </table:table-cell>
          <table:table-cell table:number-columns-repeated="4"/>
        </table:table-row>
        <table:table-row table:style-name="ro1">
          <table:table-cell office:value-type="float" office:value="597.533752441406">
            <text:p>597.5337524414</text:p>
          </table:table-cell>
          <table:table-cell office:value-type="float" office:value="0.04842407">
            <text:p>0.04842407</text:p>
          </table:table-cell>
          <table:table-cell table:number-columns-repeated="4"/>
        </table:table-row>
        <table:table-row table:style-name="ro1">
          <table:table-cell office:value-type="float" office:value="597.652587890625">
            <text:p>597.6525878906</text:p>
          </table:table-cell>
          <table:table-cell office:value-type="float" office:value="0.07289144">
            <text:p>0.07289144</text:p>
          </table:table-cell>
          <table:table-cell table:number-columns-repeated="4"/>
        </table:table-row>
        <table:table-row table:style-name="ro1">
          <table:table-cell office:value-type="float" office:value="597.771423339844">
            <text:p>597.7714233398</text:p>
          </table:table-cell>
          <table:table-cell office:value-type="float" office:value="0.0582926">
            <text:p>0.0582926</text:p>
          </table:table-cell>
          <table:table-cell table:number-columns-repeated="4"/>
        </table:table-row>
        <table:table-row table:style-name="ro1">
          <table:table-cell office:value-type="float" office:value="597.890319824219">
            <text:p>597.8903198242</text:p>
          </table:table-cell>
          <table:table-cell office:value-type="float" office:value="0.05980928">
            <text:p>0.05980928</text:p>
          </table:table-cell>
          <table:table-cell table:number-columns-repeated="4"/>
        </table:table-row>
        <table:table-row table:style-name="ro1">
          <table:table-cell office:value-type="float" office:value="598.009155273438">
            <text:p>598.0091552734</text:p>
          </table:table-cell>
          <table:table-cell office:value-type="float" office:value="0.05317305">
            <text:p>0.05317305</text:p>
          </table:table-cell>
          <table:table-cell table:number-columns-repeated="4"/>
        </table:table-row>
        <table:table-row table:style-name="ro1">
          <table:table-cell office:value-type="float" office:value="598.127990722656">
            <text:p>598.1279907227</text:p>
          </table:table-cell>
          <table:table-cell office:value-type="float" office:value="0.04962216">
            <text:p>0.04962216</text:p>
          </table:table-cell>
          <table:table-cell table:number-columns-repeated="4"/>
        </table:table-row>
        <table:table-row table:style-name="ro1">
          <table:table-cell office:value-type="float" office:value="598.246826171875">
            <text:p>598.2468261719</text:p>
          </table:table-cell>
          <table:table-cell office:value-type="float" office:value="0.0611816">
            <text:p>0.0611816</text:p>
          </table:table-cell>
          <table:table-cell table:number-columns-repeated="4"/>
        </table:table-row>
        <table:table-row table:style-name="ro1">
          <table:table-cell office:value-type="float" office:value="598.365661621094">
            <text:p>598.3656616211</text:p>
          </table:table-cell>
          <table:table-cell office:value-type="float" office:value="0.0570641">
            <text:p>0.0570641</text:p>
          </table:table-cell>
          <table:table-cell table:number-columns-repeated="4"/>
        </table:table-row>
        <table:table-row table:style-name="ro1">
          <table:table-cell office:value-type="float" office:value="598.484497070313">
            <text:p>598.4844970703</text:p>
          </table:table-cell>
          <table:table-cell office:value-type="float" office:value="0.0524403">
            <text:p>0.0524403</text:p>
          </table:table-cell>
          <table:table-cell table:number-columns-repeated="4"/>
        </table:table-row>
        <table:table-row table:style-name="ro1">
          <table:table-cell office:value-type="float" office:value="598.603393554688">
            <text:p>598.6033935547</text:p>
          </table:table-cell>
          <table:table-cell office:value-type="float" office:value="0.06036831">
            <text:p>0.06036831</text:p>
          </table:table-cell>
          <table:table-cell table:number-columns-repeated="4"/>
        </table:table-row>
        <table:table-row table:style-name="ro1">
          <table:table-cell office:value-type="float" office:value="598.722229003906">
            <text:p>598.7222290039</text:p>
          </table:table-cell>
          <table:table-cell office:value-type="float" office:value="0.04760778">
            <text:p>0.04760778</text:p>
          </table:table-cell>
          <table:table-cell table:number-columns-repeated="4"/>
        </table:table-row>
        <table:table-row table:style-name="ro1">
          <table:table-cell office:value-type="float" office:value="598.841064453125">
            <text:p>598.8410644531</text:p>
          </table:table-cell>
          <table:table-cell office:value-type="float" office:value="0.05126869">
            <text:p>0.05126869</text:p>
          </table:table-cell>
          <table:table-cell table:number-columns-repeated="4"/>
        </table:table-row>
        <table:table-row table:style-name="ro1">
          <table:table-cell office:value-type="float" office:value="598.9599609375">
            <text:p>598.9599609375</text:p>
          </table:table-cell>
          <table:table-cell office:value-type="float" office:value="0.06323466">
            <text:p>0.06323466</text:p>
          </table:table-cell>
          <table:table-cell table:number-columns-repeated="4"/>
        </table:table-row>
        <table:table-row table:style-name="ro1">
          <table:table-cell office:value-type="float" office:value="599.078796386719">
            <text:p>599.0787963867</text:p>
          </table:table-cell>
          <table:table-cell office:value-type="float" office:value="0.06229156">
            <text:p>0.06229156</text:p>
          </table:table-cell>
          <table:table-cell table:number-columns-repeated="4"/>
        </table:table-row>
        <table:table-row table:style-name="ro1">
          <table:table-cell office:value-type="float" office:value="599.197692871094">
            <text:p>599.1976928711</text:p>
          </table:table-cell>
          <table:table-cell office:value-type="float" office:value="0.05454541">
            <text:p>0.05454541</text:p>
          </table:table-cell>
          <table:table-cell table:number-columns-repeated="4"/>
        </table:table-row>
        <table:table-row table:style-name="ro1">
          <table:table-cell office:value-type="float" office:value="599.316528320313">
            <text:p>599.3165283203</text:p>
          </table:table-cell>
          <table:table-cell office:value-type="float" office:value="0.03990676">
            <text:p>0.03990676</text:p>
          </table:table-cell>
          <table:table-cell table:number-columns-repeated="4"/>
        </table:table-row>
        <table:table-row table:style-name="ro1">
          <table:table-cell office:value-type="float" office:value="599.435424804688">
            <text:p>599.4354248047</text:p>
          </table:table-cell>
          <table:table-cell office:value-type="float" office:value="0.05729939">
            <text:p>0.05729939</text:p>
          </table:table-cell>
          <table:table-cell table:number-columns-repeated="4"/>
        </table:table-row>
        <table:table-row table:style-name="ro1">
          <table:table-cell office:value-type="float" office:value="599.554321289063">
            <text:p>599.5543212891</text:p>
          </table:table-cell>
          <table:table-cell office:value-type="float" office:value="0.04438716">
            <text:p>0.04438716</text:p>
          </table:table-cell>
          <table:table-cell table:number-columns-repeated="4"/>
        </table:table-row>
        <table:table-row table:style-name="ro1">
          <table:table-cell office:value-type="float" office:value="599.673156738281">
            <text:p>599.6731567383</text:p>
          </table:table-cell>
          <table:table-cell office:value-type="float" office:value="0.04806478">
            <text:p>0.04806478</text:p>
          </table:table-cell>
          <table:table-cell table:number-columns-repeated="4"/>
        </table:table-row>
        <table:table-row table:style-name="ro1">
          <table:table-cell office:value-type="float" office:value="599.792053222656">
            <text:p>599.7920532227</text:p>
          </table:table-cell>
          <table:table-cell office:value-type="float" office:value="0.05439336">
            <text:p>0.05439336</text:p>
          </table:table-cell>
          <table:table-cell table:number-columns-repeated="4"/>
        </table:table-row>
        <table:table-row table:style-name="ro1">
          <table:table-cell office:value-type="float" office:value="599.910949707031">
            <text:p>599.910949707</text:p>
          </table:table-cell>
          <table:table-cell office:value-type="float" office:value="0.05663595">
            <text:p>0.05663595</text:p>
          </table:table-cell>
          <table:table-cell table:number-columns-repeated="4"/>
        </table:table-row>
        <table:table-row table:style-name="ro1">
          <table:table-cell office:value-type="float" office:value="600.02978515625">
            <text:p>600.0297851563</text:p>
          </table:table-cell>
          <table:table-cell office:value-type="float" office:value="0.04875765">
            <text:p>0.04875765</text:p>
          </table:table-cell>
          <table:table-cell table:number-columns-repeated="4"/>
        </table:table-row>
        <table:table-row table:style-name="ro1">
          <table:table-cell office:value-type="float" office:value="600.148681640625">
            <text:p>600.1486816406</text:p>
          </table:table-cell>
          <table:table-cell office:value-type="float" office:value="0.05549631">
            <text:p>0.05549631</text:p>
          </table:table-cell>
          <table:table-cell table:number-columns-repeated="4"/>
        </table:table-row>
        <table:table-row table:style-name="ro1">
          <table:table-cell office:value-type="float" office:value="600.267578125">
            <text:p>600.267578125</text:p>
          </table:table-cell>
          <table:table-cell office:value-type="float" office:value="0.04671475">
            <text:p>0.04671475</text:p>
          </table:table-cell>
          <table:table-cell table:number-columns-repeated="4"/>
        </table:table-row>
        <table:table-row table:style-name="ro1">
          <table:table-cell office:value-type="float" office:value="600.386474609375">
            <text:p>600.3864746094</text:p>
          </table:table-cell>
          <table:table-cell office:value-type="float" office:value="0.0440623">
            <text:p>0.0440623</text:p>
          </table:table-cell>
          <table:table-cell table:number-columns-repeated="4"/>
        </table:table-row>
        <table:table-row table:style-name="ro1">
          <table:table-cell office:value-type="float" office:value="600.50537109375">
            <text:p>600.5053710938</text:p>
          </table:table-cell>
          <table:table-cell office:value-type="float" office:value="0.07133812">
            <text:p>0.07133812</text:p>
          </table:table-cell>
          <table:table-cell table:number-columns-repeated="4"/>
        </table:table-row>
        <table:table-row table:style-name="ro1">
          <table:table-cell office:value-type="float" office:value="600.624267578125">
            <text:p>600.6242675781</text:p>
          </table:table-cell>
          <table:table-cell office:value-type="float" office:value="0.04257375">
            <text:p>0.04257375</text:p>
          </table:table-cell>
          <table:table-cell table:number-columns-repeated="4"/>
        </table:table-row>
        <table:table-row table:style-name="ro1">
          <table:table-cell office:value-type="float" office:value="600.7431640625">
            <text:p>600.7431640625</text:p>
          </table:table-cell>
          <table:table-cell office:value-type="float" office:value="0.04715254">
            <text:p>0.04715254</text:p>
          </table:table-cell>
          <table:table-cell table:number-columns-repeated="4"/>
        </table:table-row>
        <table:table-row table:style-name="ro1">
          <table:table-cell office:value-type="float" office:value="600.862060546875">
            <text:p>600.8620605469</text:p>
          </table:table-cell>
          <table:table-cell office:value-type="float" office:value="0.03860454">
            <text:p>0.03860454</text:p>
          </table:table-cell>
          <table:table-cell table:number-columns-repeated="4"/>
        </table:table-row>
        <table:table-row table:style-name="ro1">
          <table:table-cell office:value-type="float" office:value="600.98095703125">
            <text:p>600.9809570313</text:p>
          </table:table-cell>
          <table:table-cell office:value-type="float" office:value="0.04934552">
            <text:p>0.04934552</text:p>
          </table:table-cell>
          <table:table-cell table:number-columns-repeated="4"/>
        </table:table-row>
        <table:table-row table:style-name="ro1">
          <table:table-cell office:value-type="float" office:value="601.099853515625">
            <text:p>601.0998535156</text:p>
          </table:table-cell>
          <table:table-cell office:value-type="float" office:value="0.03944971">
            <text:p>0.03944971</text:p>
          </table:table-cell>
          <table:table-cell table:number-columns-repeated="4"/>
        </table:table-row>
        <table:table-row table:style-name="ro1">
          <table:table-cell office:value-type="float" office:value="601.21875">
            <text:p>601.21875</text:p>
          </table:table-cell>
          <table:table-cell office:value-type="float" office:value="0.05085667">
            <text:p>0.05085667</text:p>
          </table:table-cell>
          <table:table-cell table:number-columns-repeated="4"/>
        </table:table-row>
        <table:table-row table:style-name="ro1">
          <table:table-cell office:value-type="float" office:value="601.337646484375">
            <text:p>601.3376464844</text:p>
          </table:table-cell>
          <table:table-cell office:value-type="float" office:value="0.04858397">
            <text:p>0.04858397</text:p>
          </table:table-cell>
          <table:table-cell table:number-columns-repeated="4"/>
        </table:table-row>
        <table:table-row table:style-name="ro1">
          <table:table-cell office:value-type="float" office:value="601.45654296875">
            <text:p>601.4565429688</text:p>
          </table:table-cell>
          <table:table-cell office:value-type="float" office:value="0.04699912">
            <text:p>0.04699912</text:p>
          </table:table-cell>
          <table:table-cell table:number-columns-repeated="4"/>
        </table:table-row>
        <table:table-row table:style-name="ro1">
          <table:table-cell office:value-type="float" office:value="601.575500488281">
            <text:p>601.5755004883</text:p>
          </table:table-cell>
          <table:table-cell office:value-type="float" office:value="0.04437888">
            <text:p>0.04437888</text:p>
          </table:table-cell>
          <table:table-cell table:number-columns-repeated="4"/>
        </table:table-row>
        <table:table-row table:style-name="ro1">
          <table:table-cell office:value-type="float" office:value="601.694396972656">
            <text:p>601.6943969727</text:p>
          </table:table-cell>
          <table:table-cell office:value-type="float" office:value="0.04721567">
            <text:p>0.04721567</text:p>
          </table:table-cell>
          <table:table-cell table:number-columns-repeated="4"/>
        </table:table-row>
        <table:table-row table:style-name="ro1">
          <table:table-cell office:value-type="float" office:value="601.813293457031">
            <text:p>601.813293457</text:p>
          </table:table-cell>
          <table:table-cell office:value-type="float" office:value="0.04791403">
            <text:p>0.04791403</text:p>
          </table:table-cell>
          <table:table-cell table:number-columns-repeated="4"/>
        </table:table-row>
        <table:table-row table:style-name="ro1">
          <table:table-cell office:value-type="float" office:value="601.932250976563">
            <text:p>601.9322509766</text:p>
          </table:table-cell>
          <table:table-cell office:value-type="float" office:value="0.04208422">
            <text:p>0.04208422</text:p>
          </table:table-cell>
          <table:table-cell table:number-columns-repeated="4"/>
        </table:table-row>
        <table:table-row table:style-name="ro1">
          <table:table-cell office:value-type="float" office:value="602.051147460938">
            <text:p>602.0511474609</text:p>
          </table:table-cell>
          <table:table-cell office:value-type="float" office:value="0.05038489">
            <text:p>0.05038489</text:p>
          </table:table-cell>
          <table:table-cell table:number-columns-repeated="4"/>
        </table:table-row>
        <table:table-row table:style-name="ro1">
          <table:table-cell office:value-type="float" office:value="602.170043945313">
            <text:p>602.1700439453</text:p>
          </table:table-cell>
          <table:table-cell office:value-type="float" office:value="0.05386261">
            <text:p>0.05386261</text:p>
          </table:table-cell>
          <table:table-cell table:number-columns-repeated="4"/>
        </table:table-row>
        <table:table-row table:style-name="ro1">
          <table:table-cell office:value-type="float" office:value="602.289001464844">
            <text:p>602.2890014648</text:p>
          </table:table-cell>
          <table:table-cell office:value-type="float" office:value="0.03682963">
            <text:p>0.03682963</text:p>
          </table:table-cell>
          <table:table-cell table:number-columns-repeated="4"/>
        </table:table-row>
        <table:table-row table:style-name="ro1">
          <table:table-cell office:value-type="float" office:value="602.407897949219">
            <text:p>602.4078979492</text:p>
          </table:table-cell>
          <table:table-cell office:value-type="float" office:value="0.0486796">
            <text:p>0.0486796</text:p>
          </table:table-cell>
          <table:table-cell table:number-columns-repeated="4"/>
        </table:table-row>
        <table:table-row table:style-name="ro1">
          <table:table-cell office:value-type="float" office:value="602.52685546875">
            <text:p>602.5268554688</text:p>
          </table:table-cell>
          <table:table-cell office:value-type="float" office:value="0.05094865">
            <text:p>0.05094865</text:p>
          </table:table-cell>
          <table:table-cell table:number-columns-repeated="4"/>
        </table:table-row>
        <table:table-row table:style-name="ro1">
          <table:table-cell office:value-type="float" office:value="602.645751953125">
            <text:p>602.6457519531</text:p>
          </table:table-cell>
          <table:table-cell office:value-type="float" office:value="0.03747429">
            <text:p>0.03747429</text:p>
          </table:table-cell>
          <table:table-cell table:number-columns-repeated="4"/>
        </table:table-row>
        <table:table-row table:style-name="ro1">
          <table:table-cell office:value-type="float" office:value="602.764709472656">
            <text:p>602.7647094727</text:p>
          </table:table-cell>
          <table:table-cell office:value-type="float" office:value="0.04070592">
            <text:p>0.04070592</text:p>
          </table:table-cell>
          <table:table-cell table:number-columns-repeated="4"/>
        </table:table-row>
        <table:table-row table:style-name="ro1">
          <table:table-cell office:value-type="float" office:value="602.883666992188">
            <text:p>602.8836669922</text:p>
          </table:table-cell>
          <table:table-cell office:value-type="float" office:value="0.03071403">
            <text:p>0.03071403</text:p>
          </table:table-cell>
          <table:table-cell table:number-columns-repeated="4"/>
        </table:table-row>
        <table:table-row table:style-name="ro1">
          <table:table-cell office:value-type="float" office:value="603.002563476563">
            <text:p>603.0025634766</text:p>
          </table:table-cell>
          <table:table-cell office:value-type="float" office:value="0.04365326">
            <text:p>0.04365326</text:p>
          </table:table-cell>
          <table:table-cell table:number-columns-repeated="4"/>
        </table:table-row>
        <table:table-row table:style-name="ro1">
          <table:table-cell office:value-type="float" office:value="603.121520996094">
            <text:p>603.1215209961</text:p>
          </table:table-cell>
          <table:table-cell office:value-type="float" office:value="0.04605981">
            <text:p>0.04605981</text:p>
          </table:table-cell>
          <table:table-cell table:number-columns-repeated="4"/>
        </table:table-row>
        <table:table-row table:style-name="ro1">
          <table:table-cell office:value-type="float" office:value="603.240478515625">
            <text:p>603.2404785156</text:p>
          </table:table-cell>
          <table:table-cell office:value-type="float" office:value="0.05076181">
            <text:p>0.05076181</text:p>
          </table:table-cell>
          <table:table-cell table:number-columns-repeated="4"/>
        </table:table-row>
        <table:table-row table:style-name="ro1">
          <table:table-cell office:value-type="float" office:value="603.359436035156">
            <text:p>603.3594360352</text:p>
          </table:table-cell>
          <table:table-cell office:value-type="float" office:value="0.05033858">
            <text:p>0.05033858</text:p>
          </table:table-cell>
          <table:table-cell table:number-columns-repeated="4"/>
        </table:table-row>
        <table:table-row table:style-name="ro1">
          <table:table-cell office:value-type="float" office:value="603.478393554688">
            <text:p>603.4783935547</text:p>
          </table:table-cell>
          <table:table-cell office:value-type="float" office:value="0.04337413">
            <text:p>0.04337413</text:p>
          </table:table-cell>
          <table:table-cell table:number-columns-repeated="4"/>
        </table:table-row>
        <table:table-row table:style-name="ro1">
          <table:table-cell office:value-type="float" office:value="603.597290039063">
            <text:p>603.5972900391</text:p>
          </table:table-cell>
          <table:table-cell office:value-type="float" office:value="0.04250252">
            <text:p>0.04250252</text:p>
          </table:table-cell>
          <table:table-cell table:number-columns-repeated="4"/>
        </table:table-row>
        <table:table-row table:style-name="ro1">
          <table:table-cell office:value-type="float" office:value="603.716247558594">
            <text:p>603.7162475586</text:p>
          </table:table-cell>
          <table:table-cell office:value-type="float" office:value="0.04095682">
            <text:p>0.04095682</text:p>
          </table:table-cell>
          <table:table-cell table:number-columns-repeated="4"/>
        </table:table-row>
        <table:table-row table:style-name="ro1">
          <table:table-cell office:value-type="float" office:value="603.835205078125">
            <text:p>603.8352050781</text:p>
          </table:table-cell>
          <table:table-cell office:value-type="float" office:value="0.0347727">
            <text:p>0.0347727</text:p>
          </table:table-cell>
          <table:table-cell table:number-columns-repeated="4"/>
        </table:table-row>
        <table:table-row table:style-name="ro1">
          <table:table-cell office:value-type="float" office:value="603.954162597656">
            <text:p>603.9541625977</text:p>
          </table:table-cell>
          <table:table-cell office:value-type="float" office:value="0.03661086">
            <text:p>0.03661086</text:p>
          </table:table-cell>
          <table:table-cell table:number-columns-repeated="4"/>
        </table:table-row>
        <table:table-row table:style-name="ro1">
          <table:table-cell office:value-type="float" office:value="604.073120117188">
            <text:p>604.0731201172</text:p>
          </table:table-cell>
          <table:table-cell office:value-type="float" office:value="0.03786879">
            <text:p>0.03786879</text:p>
          </table:table-cell>
          <table:table-cell table:number-columns-repeated="4"/>
        </table:table-row>
        <table:table-row table:style-name="ro1">
          <table:table-cell office:value-type="float" office:value="604.192077636719">
            <text:p>604.1920776367</text:p>
          </table:table-cell>
          <table:table-cell office:value-type="float" office:value="0.03407663">
            <text:p>0.03407663</text:p>
          </table:table-cell>
          <table:table-cell table:number-columns-repeated="4"/>
        </table:table-row>
        <table:table-row table:style-name="ro1">
          <table:table-cell office:value-type="float" office:value="604.31103515625">
            <text:p>604.3110351563</text:p>
          </table:table-cell>
          <table:table-cell office:value-type="float" office:value="0.05576443">
            <text:p>0.05576443</text:p>
          </table:table-cell>
          <table:table-cell table:number-columns-repeated="4"/>
        </table:table-row>
        <table:table-row table:style-name="ro1">
          <table:table-cell office:value-type="float" office:value="604.430053710938">
            <text:p>604.4300537109</text:p>
          </table:table-cell>
          <table:table-cell office:value-type="float" office:value="0.04107532">
            <text:p>0.04107532</text:p>
          </table:table-cell>
          <table:table-cell table:number-columns-repeated="4"/>
        </table:table-row>
        <table:table-row table:style-name="ro1">
          <table:table-cell office:value-type="float" office:value="604.549011230469">
            <text:p>604.5490112305</text:p>
          </table:table-cell>
          <table:table-cell office:value-type="float" office:value="0.0376205">
            <text:p>0.0376205</text:p>
          </table:table-cell>
          <table:table-cell table:number-columns-repeated="4"/>
        </table:table-row>
        <table:table-row table:style-name="ro1">
          <table:table-cell office:value-type="float" office:value="604.66796875">
            <text:p>604.66796875</text:p>
          </table:table-cell>
          <table:table-cell office:value-type="float" office:value="0.04103987">
            <text:p>0.04103987</text:p>
          </table:table-cell>
          <table:table-cell table:number-columns-repeated="4"/>
        </table:table-row>
        <table:table-row table:style-name="ro1">
          <table:table-cell office:value-type="float" office:value="604.786926269531">
            <text:p>604.7869262695</text:p>
          </table:table-cell>
          <table:table-cell office:value-type="float" office:value="0.05143226">
            <text:p>0.05143226</text:p>
          </table:table-cell>
          <table:table-cell table:number-columns-repeated="4"/>
        </table:table-row>
        <table:table-row table:style-name="ro1">
          <table:table-cell office:value-type="float" office:value="604.905883789063">
            <text:p>604.9058837891</text:p>
          </table:table-cell>
          <table:table-cell office:value-type="float" office:value="0.0495224">
            <text:p>0.0495224</text:p>
          </table:table-cell>
          <table:table-cell table:number-columns-repeated="4"/>
        </table:table-row>
        <table:table-row table:style-name="ro1">
          <table:table-cell office:value-type="float" office:value="605.02490234375">
            <text:p>605.0249023438</text:p>
          </table:table-cell>
          <table:table-cell office:value-type="float" office:value="0.03838304">
            <text:p>0.03838304</text:p>
          </table:table-cell>
          <table:table-cell table:number-columns-repeated="4"/>
        </table:table-row>
        <table:table-row table:style-name="ro1">
          <table:table-cell office:value-type="float" office:value="605.143859863281">
            <text:p>605.1438598633</text:p>
          </table:table-cell>
          <table:table-cell office:value-type="float" office:value="0.03443548">
            <text:p>0.03443548</text:p>
          </table:table-cell>
          <table:table-cell table:number-columns-repeated="4"/>
        </table:table-row>
        <table:table-row table:style-name="ro1">
          <table:table-cell office:value-type="float" office:value="605.262817382813">
            <text:p>605.2628173828</text:p>
          </table:table-cell>
          <table:table-cell office:value-type="float" office:value="0.03312023">
            <text:p>0.03312023</text:p>
          </table:table-cell>
          <table:table-cell table:number-columns-repeated="4"/>
        </table:table-row>
        <table:table-row table:style-name="ro1">
          <table:table-cell office:value-type="float" office:value="605.3818359375">
            <text:p>605.3818359375</text:p>
          </table:table-cell>
          <table:table-cell office:value-type="float" office:value="0.04124334">
            <text:p>0.04124334</text:p>
          </table:table-cell>
          <table:table-cell table:number-columns-repeated="4"/>
        </table:table-row>
        <table:table-row table:style-name="ro1">
          <table:table-cell office:value-type="float" office:value="605.500793457031">
            <text:p>605.500793457</text:p>
          </table:table-cell>
          <table:table-cell office:value-type="float" office:value="0.03689588">
            <text:p>0.03689588</text:p>
          </table:table-cell>
          <table:table-cell table:number-columns-repeated="4"/>
        </table:table-row>
        <table:table-row table:style-name="ro1">
          <table:table-cell office:value-type="float" office:value="605.619812011719">
            <text:p>605.6198120117</text:p>
          </table:table-cell>
          <table:table-cell office:value-type="float" office:value="0.03987096">
            <text:p>0.03987096</text:p>
          </table:table-cell>
          <table:table-cell table:number-columns-repeated="4"/>
        </table:table-row>
        <table:table-row table:style-name="ro1">
          <table:table-cell office:value-type="float" office:value="605.73876953125">
            <text:p>605.7387695313</text:p>
          </table:table-cell>
          <table:table-cell office:value-type="float" office:value="0.03483188">
            <text:p>0.03483188</text:p>
          </table:table-cell>
          <table:table-cell table:number-columns-repeated="4"/>
        </table:table-row>
        <table:table-row table:style-name="ro1">
          <table:table-cell office:value-type="float" office:value="605.857788085938">
            <text:p>605.8577880859</text:p>
          </table:table-cell>
          <table:table-cell office:value-type="float" office:value="0.04795521">
            <text:p>0.04795521</text:p>
          </table:table-cell>
          <table:table-cell table:number-columns-repeated="4"/>
        </table:table-row>
        <table:table-row table:style-name="ro1">
          <table:table-cell office:value-type="float" office:value="605.976806640625">
            <text:p>605.9768066406</text:p>
          </table:table-cell>
          <table:table-cell office:value-type="float" office:value="0.04950788">
            <text:p>0.04950788</text:p>
          </table:table-cell>
          <table:table-cell table:number-columns-repeated="4"/>
        </table:table-row>
        <table:table-row table:style-name="ro1">
          <table:table-cell office:value-type="float" office:value="606.095764160156">
            <text:p>606.0957641602</text:p>
          </table:table-cell>
          <table:table-cell office:value-type="float" office:value="0.04229129">
            <text:p>0.04229129</text:p>
          </table:table-cell>
          <table:table-cell table:number-columns-repeated="4"/>
        </table:table-row>
        <table:table-row table:style-name="ro1">
          <table:table-cell office:value-type="float" office:value="606.214782714844">
            <text:p>606.2147827148</text:p>
          </table:table-cell>
          <table:table-cell office:value-type="float" office:value="0.0501301">
            <text:p>0.0501301</text:p>
          </table:table-cell>
          <table:table-cell table:number-columns-repeated="4"/>
        </table:table-row>
        <table:table-row table:style-name="ro1">
          <table:table-cell office:value-type="float" office:value="606.333801269531">
            <text:p>606.3338012695</text:p>
          </table:table-cell>
          <table:table-cell office:value-type="float" office:value="0.03305322">
            <text:p>0.03305322</text:p>
          </table:table-cell>
          <table:table-cell table:number-columns-repeated="4"/>
        </table:table-row>
        <table:table-row table:style-name="ro1">
          <table:table-cell office:value-type="float" office:value="606.452758789063">
            <text:p>606.4527587891</text:p>
          </table:table-cell>
          <table:table-cell office:value-type="float" office:value="0.04618126">
            <text:p>0.04618126</text:p>
          </table:table-cell>
          <table:table-cell table:number-columns-repeated="4"/>
        </table:table-row>
        <table:table-row table:style-name="ro1">
          <table:table-cell office:value-type="float" office:value="606.57177734375">
            <text:p>606.5717773438</text:p>
          </table:table-cell>
          <table:table-cell office:value-type="float" office:value="0.03449994">
            <text:p>0.03449994</text:p>
          </table:table-cell>
          <table:table-cell table:number-columns-repeated="4"/>
        </table:table-row>
        <table:table-row table:style-name="ro1">
          <table:table-cell office:value-type="float" office:value="606.690795898438">
            <text:p>606.6907958984</text:p>
          </table:table-cell>
          <table:table-cell office:value-type="float" office:value="0.04047007">
            <text:p>0.04047007</text:p>
          </table:table-cell>
          <table:table-cell table:number-columns-repeated="4"/>
        </table:table-row>
        <table:table-row table:style-name="ro1">
          <table:table-cell office:value-type="float" office:value="606.809814453125">
            <text:p>606.8098144531</text:p>
          </table:table-cell>
          <table:table-cell office:value-type="float" office:value="0.0327298">
            <text:p>0.0327298</text:p>
          </table:table-cell>
          <table:table-cell table:number-columns-repeated="4"/>
        </table:table-row>
        <table:table-row table:style-name="ro1">
          <table:table-cell office:value-type="float" office:value="606.928833007813">
            <text:p>606.9288330078</text:p>
          </table:table-cell>
          <table:table-cell office:value-type="float" office:value="0.03335853">
            <text:p>0.03335853</text:p>
          </table:table-cell>
          <table:table-cell table:number-columns-repeated="4"/>
        </table:table-row>
        <table:table-row table:style-name="ro1">
          <table:table-cell office:value-type="float" office:value="607.0478515625">
            <text:p>607.0478515625</text:p>
          </table:table-cell>
          <table:table-cell office:value-type="float" office:value="0.03165238">
            <text:p>0.03165238</text:p>
          </table:table-cell>
          <table:table-cell table:number-columns-repeated="4"/>
        </table:table-row>
        <table:table-row table:style-name="ro1">
          <table:table-cell office:value-type="float" office:value="607.166870117188">
            <text:p>607.1668701172</text:p>
          </table:table-cell>
          <table:table-cell office:value-type="float" office:value="0.05479298">
            <text:p>0.05479298</text:p>
          </table:table-cell>
          <table:table-cell table:number-columns-repeated="4"/>
        </table:table-row>
        <table:table-row table:style-name="ro1">
          <table:table-cell office:value-type="float" office:value="607.285888671875">
            <text:p>607.2858886719</text:p>
          </table:table-cell>
          <table:table-cell office:value-type="float" office:value="0.04608797">
            <text:p>0.04608797</text:p>
          </table:table-cell>
          <table:table-cell table:number-columns-repeated="4"/>
        </table:table-row>
        <table:table-row table:style-name="ro1">
          <table:table-cell office:value-type="float" office:value="607.404907226563">
            <text:p>607.4049072266</text:p>
          </table:table-cell>
          <table:table-cell office:value-type="float" office:value="0.04084063">
            <text:p>0.04084063</text:p>
          </table:table-cell>
          <table:table-cell table:number-columns-repeated="4"/>
        </table:table-row>
        <table:table-row table:style-name="ro1">
          <table:table-cell office:value-type="float" office:value="607.52392578125">
            <text:p>607.5239257813</text:p>
          </table:table-cell>
          <table:table-cell office:value-type="float" office:value="0.03857685">
            <text:p>0.03857685</text:p>
          </table:table-cell>
          <table:table-cell table:number-columns-repeated="4"/>
        </table:table-row>
        <table:table-row table:style-name="ro1">
          <table:table-cell office:value-type="float" office:value="607.642944335938">
            <text:p>607.6429443359</text:p>
          </table:table-cell>
          <table:table-cell office:value-type="float" office:value="0.04353052">
            <text:p>0.04353052</text:p>
          </table:table-cell>
          <table:table-cell table:number-columns-repeated="4"/>
        </table:table-row>
        <table:table-row table:style-name="ro1">
          <table:table-cell office:value-type="float" office:value="607.761962890625">
            <text:p>607.7619628906</text:p>
          </table:table-cell>
          <table:table-cell office:value-type="float" office:value="0.05529744">
            <text:p>0.05529744</text:p>
          </table:table-cell>
          <table:table-cell table:number-columns-repeated="4"/>
        </table:table-row>
        <table:table-row table:style-name="ro1">
          <table:table-cell office:value-type="float" office:value="607.880981445313">
            <text:p>607.8809814453</text:p>
          </table:table-cell>
          <table:table-cell office:value-type="float" office:value="0.04540056">
            <text:p>0.04540056</text:p>
          </table:table-cell>
          <table:table-cell table:number-columns-repeated="4"/>
        </table:table-row>
        <table:table-row table:style-name="ro1">
          <table:table-cell office:value-type="float" office:value="608">
            <text:p>608</text:p>
          </table:table-cell>
          <table:table-cell office:value-type="float" office:value="0.03037697">
            <text:p>0.03037697</text:p>
          </table:table-cell>
          <table:table-cell table:number-columns-repeated="4"/>
        </table:table-row>
        <table:table-row table:style-name="ro1">
          <table:table-cell office:value-type="float" office:value="608.119079589844">
            <text:p>608.1190795898</text:p>
          </table:table-cell>
          <table:table-cell office:value-type="float" office:value="0.03579152">
            <text:p>0.03579152</text:p>
          </table:table-cell>
          <table:table-cell table:number-columns-repeated="4"/>
        </table:table-row>
        <table:table-row table:style-name="ro1">
          <table:table-cell office:value-type="float" office:value="608.238098144531">
            <text:p>608.2380981445</text:p>
          </table:table-cell>
          <table:table-cell office:value-type="float" office:value="0.03475645">
            <text:p>0.03475645</text:p>
          </table:table-cell>
          <table:table-cell table:number-columns-repeated="4"/>
        </table:table-row>
        <table:table-row table:style-name="ro1">
          <table:table-cell office:value-type="float" office:value="608.357116699219">
            <text:p>608.3571166992</text:p>
          </table:table-cell>
          <table:table-cell office:value-type="float" office:value="0.03334149">
            <text:p>0.03334149</text:p>
          </table:table-cell>
          <table:table-cell table:number-columns-repeated="4"/>
        </table:table-row>
        <table:table-row table:style-name="ro1">
          <table:table-cell office:value-type="float" office:value="608.476196289063">
            <text:p>608.4761962891</text:p>
          </table:table-cell>
          <table:table-cell office:value-type="float" office:value="0.0397685">
            <text:p>0.0397685</text:p>
          </table:table-cell>
          <table:table-cell table:number-columns-repeated="4"/>
        </table:table-row>
        <table:table-row table:style-name="ro1">
          <table:table-cell office:value-type="float" office:value="608.59521484375">
            <text:p>608.5952148438</text:p>
          </table:table-cell>
          <table:table-cell office:value-type="float" office:value="0.05001714">
            <text:p>0.05001714</text:p>
          </table:table-cell>
          <table:table-cell table:number-columns-repeated="4"/>
        </table:table-row>
        <table:table-row table:style-name="ro1">
          <table:table-cell office:value-type="float" office:value="608.714233398438">
            <text:p>608.7142333984</text:p>
          </table:table-cell>
          <table:table-cell office:value-type="float" office:value="0.0385209">
            <text:p>0.0385209</text:p>
          </table:table-cell>
          <table:table-cell table:number-columns-repeated="4"/>
        </table:table-row>
        <table:table-row table:style-name="ro1">
          <table:table-cell office:value-type="float" office:value="608.833312988281">
            <text:p>608.8333129883</text:p>
          </table:table-cell>
          <table:table-cell office:value-type="float" office:value="0.03820467">
            <text:p>0.03820467</text:p>
          </table:table-cell>
          <table:table-cell table:number-columns-repeated="4"/>
        </table:table-row>
        <table:table-row table:style-name="ro1">
          <table:table-cell office:value-type="float" office:value="608.952331542969">
            <text:p>608.952331543</text:p>
          </table:table-cell>
          <table:table-cell office:value-type="float" office:value="0.02640747">
            <text:p>0.02640747</text:p>
          </table:table-cell>
          <table:table-cell table:number-columns-repeated="4"/>
        </table:table-row>
        <table:table-row table:style-name="ro1">
          <table:table-cell office:value-type="float" office:value="609.071411132813">
            <text:p>609.0714111328</text:p>
          </table:table-cell>
          <table:table-cell office:value-type="float" office:value="0.03055809">
            <text:p>0.03055809</text:p>
          </table:table-cell>
          <table:table-cell table:number-columns-repeated="4"/>
        </table:table-row>
        <table:table-row table:style-name="ro1">
          <table:table-cell office:value-type="float" office:value="609.1904296875">
            <text:p>609.1904296875</text:p>
          </table:table-cell>
          <table:table-cell office:value-type="float" office:value="0.02883648">
            <text:p>0.02883648</text:p>
          </table:table-cell>
          <table:table-cell table:number-columns-repeated="4"/>
        </table:table-row>
        <table:table-row table:style-name="ro1">
          <table:table-cell office:value-type="float" office:value="609.309509277344">
            <text:p>609.3095092773</text:p>
          </table:table-cell>
          <table:table-cell office:value-type="float" office:value="0.04750919">
            <text:p>0.04750919</text:p>
          </table:table-cell>
          <table:table-cell table:number-columns-repeated="4"/>
        </table:table-row>
        <table:table-row table:style-name="ro1">
          <table:table-cell office:value-type="float" office:value="609.428588867188">
            <text:p>609.4285888672</text:p>
          </table:table-cell>
          <table:table-cell office:value-type="float" office:value="0.03921575">
            <text:p>0.03921575</text:p>
          </table:table-cell>
          <table:table-cell table:number-columns-repeated="4"/>
        </table:table-row>
        <table:table-row table:style-name="ro1">
          <table:table-cell office:value-type="float" office:value="609.547607421875">
            <text:p>609.5476074219</text:p>
          </table:table-cell>
          <table:table-cell office:value-type="float" office:value="0.03712172">
            <text:p>0.03712172</text:p>
          </table:table-cell>
          <table:table-cell table:number-columns-repeated="4"/>
        </table:table-row>
        <table:table-row table:style-name="ro1">
          <table:table-cell office:value-type="float" office:value="609.666687011719">
            <text:p>609.6666870117</text:p>
          </table:table-cell>
          <table:table-cell office:value-type="float" office:value="0.03403766">
            <text:p>0.03403766</text:p>
          </table:table-cell>
          <table:table-cell table:number-columns-repeated="4"/>
        </table:table-row>
        <table:table-row table:style-name="ro1">
          <table:table-cell office:value-type="float" office:value="609.785766601563">
            <text:p>609.7857666016</text:p>
          </table:table-cell>
          <table:table-cell office:value-type="float" office:value="0.03384694">
            <text:p>0.03384694</text:p>
          </table:table-cell>
          <table:table-cell table:number-columns-repeated="4"/>
        </table:table-row>
        <table:table-row table:style-name="ro1">
          <table:table-cell office:value-type="float" office:value="609.904846191406">
            <text:p>609.9048461914</text:p>
          </table:table-cell>
          <table:table-cell office:value-type="float" office:value="0.03590201">
            <text:p>0.03590201</text:p>
          </table:table-cell>
          <table:table-cell table:number-columns-repeated="4"/>
        </table:table-row>
        <table:table-row table:style-name="ro1">
          <table:table-cell office:value-type="float" office:value="610.023864746094">
            <text:p>610.0238647461</text:p>
          </table:table-cell>
          <table:table-cell office:value-type="float" office:value="0.0320651">
            <text:p>0.0320651</text:p>
          </table:table-cell>
          <table:table-cell table:number-columns-repeated="4"/>
        </table:table-row>
        <table:table-row table:style-name="ro1">
          <table:table-cell office:value-type="float" office:value="610.142944335938">
            <text:p>610.1429443359</text:p>
          </table:table-cell>
          <table:table-cell office:value-type="float" office:value="0.03185294">
            <text:p>0.03185294</text:p>
          </table:table-cell>
          <table:table-cell table:number-columns-repeated="4"/>
        </table:table-row>
        <table:table-row table:style-name="ro1">
          <table:table-cell office:value-type="float" office:value="610.262023925781">
            <text:p>610.2620239258</text:p>
          </table:table-cell>
          <table:table-cell office:value-type="float" office:value="0.04919217">
            <text:p>0.04919217</text:p>
          </table:table-cell>
          <table:table-cell table:number-columns-repeated="4"/>
        </table:table-row>
        <table:table-row table:style-name="ro1">
          <table:table-cell office:value-type="float" office:value="610.381103515625">
            <text:p>610.3811035156</text:p>
          </table:table-cell>
          <table:table-cell office:value-type="float" office:value="0.03761367">
            <text:p>0.03761367</text:p>
          </table:table-cell>
          <table:table-cell table:number-columns-repeated="4"/>
        </table:table-row>
        <table:table-row table:style-name="ro1">
          <table:table-cell office:value-type="float" office:value="610.500183105469">
            <text:p>610.5001831055</text:p>
          </table:table-cell>
          <table:table-cell office:value-type="float" office:value="0.03300733">
            <text:p>0.03300733</text:p>
          </table:table-cell>
          <table:table-cell table:number-columns-repeated="4"/>
        </table:table-row>
        <table:table-row table:style-name="ro1">
          <table:table-cell office:value-type="float" office:value="610.619262695313">
            <text:p>610.6192626953</text:p>
          </table:table-cell>
          <table:table-cell office:value-type="float" office:value="0.02866756">
            <text:p>0.02866756</text:p>
          </table:table-cell>
          <table:table-cell table:number-columns-repeated="4"/>
        </table:table-row>
        <table:table-row table:style-name="ro1">
          <table:table-cell office:value-type="float" office:value="610.738342285156">
            <text:p>610.7383422852</text:p>
          </table:table-cell>
          <table:table-cell office:value-type="float" office:value="0.03612615">
            <text:p>0.03612615</text:p>
          </table:table-cell>
          <table:table-cell table:number-columns-repeated="4"/>
        </table:table-row>
        <table:table-row table:style-name="ro1">
          <table:table-cell office:value-type="float" office:value="610.857421875">
            <text:p>610.857421875</text:p>
          </table:table-cell>
          <table:table-cell office:value-type="float" office:value="0.02973387">
            <text:p>0.02973387</text:p>
          </table:table-cell>
          <table:table-cell table:number-columns-repeated="4"/>
        </table:table-row>
        <table:table-row table:style-name="ro1">
          <table:table-cell office:value-type="float" office:value="610.976501464844">
            <text:p>610.9765014648</text:p>
          </table:table-cell>
          <table:table-cell office:value-type="float" office:value="0.03944598">
            <text:p>0.03944598</text:p>
          </table:table-cell>
          <table:table-cell table:number-columns-repeated="4"/>
        </table:table-row>
        <table:table-row table:style-name="ro1">
          <table:table-cell office:value-type="float" office:value="611.095581054688">
            <text:p>611.0955810547</text:p>
          </table:table-cell>
          <table:table-cell office:value-type="float" office:value="0.03598917">
            <text:p>0.03598917</text:p>
          </table:table-cell>
          <table:table-cell table:number-columns-repeated="4"/>
        </table:table-row>
        <table:table-row table:style-name="ro1">
          <table:table-cell office:value-type="float" office:value="611.214660644531">
            <text:p>611.2146606445</text:p>
          </table:table-cell>
          <table:table-cell office:value-type="float" office:value="0.03283359">
            <text:p>0.03283359</text:p>
          </table:table-cell>
          <table:table-cell table:number-columns-repeated="4"/>
        </table:table-row>
        <table:table-row table:style-name="ro1">
          <table:table-cell office:value-type="float" office:value="611.333801269531">
            <text:p>611.3338012695</text:p>
          </table:table-cell>
          <table:table-cell office:value-type="float" office:value="0.029225">
            <text:p>0.029225</text:p>
          </table:table-cell>
          <table:table-cell table:number-columns-repeated="4"/>
        </table:table-row>
        <table:table-row table:style-name="ro1">
          <table:table-cell office:value-type="float" office:value="611.452880859375">
            <text:p>611.4528808594</text:p>
          </table:table-cell>
          <table:table-cell office:value-type="float" office:value="0.0236058">
            <text:p>0.0236058</text:p>
          </table:table-cell>
          <table:table-cell table:number-columns-repeated="4"/>
        </table:table-row>
        <table:table-row table:style-name="ro1">
          <table:table-cell office:value-type="float" office:value="611.571960449219">
            <text:p>611.5719604492</text:p>
          </table:table-cell>
          <table:table-cell office:value-type="float" office:value="0.03584212">
            <text:p>0.03584212</text:p>
          </table:table-cell>
          <table:table-cell table:number-columns-repeated="4"/>
        </table:table-row>
        <table:table-row table:style-name="ro1">
          <table:table-cell office:value-type="float" office:value="611.691040039063">
            <text:p>611.6910400391</text:p>
          </table:table-cell>
          <table:table-cell office:value-type="float" office:value="0.03545346">
            <text:p>0.03545346</text:p>
          </table:table-cell>
          <table:table-cell table:number-columns-repeated="4"/>
        </table:table-row>
        <table:table-row table:style-name="ro1">
          <table:table-cell office:value-type="float" office:value="611.810180664063">
            <text:p>611.8101806641</text:p>
          </table:table-cell>
          <table:table-cell office:value-type="float" office:value="0.0348944">
            <text:p>0.0348944</text:p>
          </table:table-cell>
          <table:table-cell table:number-columns-repeated="4"/>
        </table:table-row>
        <table:table-row table:style-name="ro1">
          <table:table-cell office:value-type="float" office:value="611.929260253906">
            <text:p>611.9292602539</text:p>
          </table:table-cell>
          <table:table-cell office:value-type="float" office:value="0.03346588">
            <text:p>0.03346588</text:p>
          </table:table-cell>
          <table:table-cell table:number-columns-repeated="4"/>
        </table:table-row>
        <table:table-row table:style-name="ro1">
          <table:table-cell office:value-type="float" office:value="612.048400878906">
            <text:p>612.0484008789</text:p>
          </table:table-cell>
          <table:table-cell office:value-type="float" office:value="0.03589097">
            <text:p>0.03589097</text:p>
          </table:table-cell>
          <table:table-cell table:number-columns-repeated="4"/>
        </table:table-row>
        <table:table-row table:style-name="ro1">
          <table:table-cell office:value-type="float" office:value="612.16748046875">
            <text:p>612.1674804688</text:p>
          </table:table-cell>
          <table:table-cell office:value-type="float" office:value="0.02887048">
            <text:p>0.02887048</text:p>
          </table:table-cell>
          <table:table-cell table:number-columns-repeated="4"/>
        </table:table-row>
        <table:table-row table:style-name="ro1">
          <table:table-cell office:value-type="float" office:value="612.286560058594">
            <text:p>612.2865600586</text:p>
          </table:table-cell>
          <table:table-cell office:value-type="float" office:value="0.03942188">
            <text:p>0.03942188</text:p>
          </table:table-cell>
          <table:table-cell table:number-columns-repeated="4"/>
        </table:table-row>
        <table:table-row table:style-name="ro1">
          <table:table-cell office:value-type="float" office:value="612.405700683594">
            <text:p>612.4057006836</text:p>
          </table:table-cell>
          <table:table-cell office:value-type="float" office:value="0.04128834">
            <text:p>0.04128834</text:p>
          </table:table-cell>
          <table:table-cell table:number-columns-repeated="4"/>
        </table:table-row>
        <table:table-row table:style-name="ro1">
          <table:table-cell office:value-type="float" office:value="612.524780273438">
            <text:p>612.5247802734</text:p>
          </table:table-cell>
          <table:table-cell office:value-type="float" office:value="0.02997218">
            <text:p>0.02997218</text:p>
          </table:table-cell>
          <table:table-cell table:number-columns-repeated="4"/>
        </table:table-row>
        <table:table-row table:style-name="ro1">
          <table:table-cell office:value-type="float" office:value="612.643920898438">
            <text:p>612.6439208984</text:p>
          </table:table-cell>
          <table:table-cell office:value-type="float" office:value="0.02500407">
            <text:p>0.02500407</text:p>
          </table:table-cell>
          <table:table-cell table:number-columns-repeated="4"/>
        </table:table-row>
        <table:table-row table:style-name="ro1">
          <table:table-cell office:value-type="float" office:value="612.763061523438">
            <text:p>612.7630615234</text:p>
          </table:table-cell>
          <table:table-cell office:value-type="float" office:value="0.04222997">
            <text:p>0.04222997</text:p>
          </table:table-cell>
          <table:table-cell table:number-columns-repeated="4"/>
        </table:table-row>
        <table:table-row table:style-name="ro1">
          <table:table-cell office:value-type="float" office:value="612.882141113281">
            <text:p>612.8821411133</text:p>
          </table:table-cell>
          <table:table-cell office:value-type="float" office:value="0.02638978">
            <text:p>0.02638978</text:p>
          </table:table-cell>
          <table:table-cell table:number-columns-repeated="4"/>
        </table:table-row>
        <table:table-row table:style-name="ro1">
          <table:table-cell office:value-type="float" office:value="613.001281738281">
            <text:p>613.0012817383</text:p>
          </table:table-cell>
          <table:table-cell office:value-type="float" office:value="0.03290628">
            <text:p>0.03290628</text:p>
          </table:table-cell>
          <table:table-cell table:number-columns-repeated="4"/>
        </table:table-row>
        <table:table-row table:style-name="ro1">
          <table:table-cell office:value-type="float" office:value="613.120422363281">
            <text:p>613.1204223633</text:p>
          </table:table-cell>
          <table:table-cell office:value-type="float" office:value="0.0285523">
            <text:p>0.0285523</text:p>
          </table:table-cell>
          <table:table-cell table:number-columns-repeated="4"/>
        </table:table-row>
        <table:table-row table:style-name="ro1">
          <table:table-cell office:value-type="float" office:value="613.239501953125">
            <text:p>613.2395019531</text:p>
          </table:table-cell>
          <table:table-cell office:value-type="float" office:value="0.03277157">
            <text:p>0.03277157</text:p>
          </table:table-cell>
          <table:table-cell table:number-columns-repeated="4"/>
        </table:table-row>
        <table:table-row table:style-name="ro1">
          <table:table-cell office:value-type="float" office:value="613.358642578125">
            <text:p>613.3586425781</text:p>
          </table:table-cell>
          <table:table-cell office:value-type="float" office:value="0.03623016">
            <text:p>0.03623016</text:p>
          </table:table-cell>
          <table:table-cell table:number-columns-repeated="4"/>
        </table:table-row>
        <table:table-row table:style-name="ro1">
          <table:table-cell office:value-type="float" office:value="613.477783203125">
            <text:p>613.4777832031</text:p>
          </table:table-cell>
          <table:table-cell office:value-type="float" office:value="0.02759152">
            <text:p>0.02759152</text:p>
          </table:table-cell>
          <table:table-cell table:number-columns-repeated="4"/>
        </table:table-row>
        <table:table-row table:style-name="ro1">
          <table:table-cell office:value-type="float" office:value="613.596923828125">
            <text:p>613.5969238281</text:p>
          </table:table-cell>
          <table:table-cell office:value-type="float" office:value="0.02169788">
            <text:p>0.02169788</text:p>
          </table:table-cell>
          <table:table-cell table:number-columns-repeated="4"/>
        </table:table-row>
        <table:table-row table:style-name="ro1">
          <table:table-cell office:value-type="float" office:value="613.716064453125">
            <text:p>613.7160644531</text:p>
          </table:table-cell>
          <table:table-cell office:value-type="float" office:value="0.02693464">
            <text:p>0.02693464</text:p>
          </table:table-cell>
          <table:table-cell table:number-columns-repeated="4"/>
        </table:table-row>
        <table:table-row table:style-name="ro1">
          <table:table-cell office:value-type="float" office:value="613.835205078125">
            <text:p>613.8352050781</text:p>
          </table:table-cell>
          <table:table-cell office:value-type="float" office:value="0.02455391">
            <text:p>0.02455391</text:p>
          </table:table-cell>
          <table:table-cell table:number-columns-repeated="4"/>
        </table:table-row>
        <table:table-row table:style-name="ro1">
          <table:table-cell office:value-type="float" office:value="613.954345703125">
            <text:p>613.9543457031</text:p>
          </table:table-cell>
          <table:table-cell office:value-type="float" office:value="0.02021104">
            <text:p>0.02021104</text:p>
          </table:table-cell>
          <table:table-cell table:number-columns-repeated="4"/>
        </table:table-row>
        <table:table-row table:style-name="ro1">
          <table:table-cell office:value-type="float" office:value="614.073486328125">
            <text:p>614.0734863281</text:p>
          </table:table-cell>
          <table:table-cell office:value-type="float" office:value="0.02683665">
            <text:p>0.02683665</text:p>
          </table:table-cell>
          <table:table-cell table:number-columns-repeated="4"/>
        </table:table-row>
        <table:table-row table:style-name="ro1">
          <table:table-cell office:value-type="float" office:value="614.192626953125">
            <text:p>614.1926269531</text:p>
          </table:table-cell>
          <table:table-cell office:value-type="float" office:value="0.04567907">
            <text:p>0.04567907</text:p>
          </table:table-cell>
          <table:table-cell table:number-columns-repeated="4"/>
        </table:table-row>
        <table:table-row table:style-name="ro1">
          <table:table-cell office:value-type="float" office:value="614.311767578125">
            <text:p>614.3117675781</text:p>
          </table:table-cell>
          <table:table-cell office:value-type="float" office:value="0.02435028">
            <text:p>0.02435028</text:p>
          </table:table-cell>
          <table:table-cell table:number-columns-repeated="4"/>
        </table:table-row>
        <table:table-row table:style-name="ro1">
          <table:table-cell office:value-type="float" office:value="614.430908203125">
            <text:p>614.4309082031</text:p>
          </table:table-cell>
          <table:table-cell office:value-type="float" office:value="0.0247476">
            <text:p>0.0247476</text:p>
          </table:table-cell>
          <table:table-cell table:number-columns-repeated="4"/>
        </table:table-row>
        <table:table-row table:style-name="ro1">
          <table:table-cell office:value-type="float" office:value="614.550048828125">
            <text:p>614.5500488281</text:p>
          </table:table-cell>
          <table:table-cell office:value-type="float" office:value="0.02402847">
            <text:p>0.02402847</text:p>
          </table:table-cell>
          <table:table-cell table:number-columns-repeated="4"/>
        </table:table-row>
        <table:table-row table:style-name="ro1">
          <table:table-cell office:value-type="float" office:value="614.669189453125">
            <text:p>614.6691894531</text:p>
          </table:table-cell>
          <table:table-cell office:value-type="float" office:value="0.03576382">
            <text:p>0.03576382</text:p>
          </table:table-cell>
          <table:table-cell table:number-columns-repeated="4"/>
        </table:table-row>
        <table:table-row table:style-name="ro1">
          <table:table-cell office:value-type="float" office:value="614.788330078125">
            <text:p>614.7883300781</text:p>
          </table:table-cell>
          <table:table-cell office:value-type="float" office:value="0.02526077">
            <text:p>0.02526077</text:p>
          </table:table-cell>
          <table:table-cell table:number-columns-repeated="4"/>
        </table:table-row>
        <table:table-row table:style-name="ro1">
          <table:table-cell office:value-type="float" office:value="614.907531738281">
            <text:p>614.9075317383</text:p>
          </table:table-cell>
          <table:table-cell office:value-type="float" office:value="0.03185734">
            <text:p>0.03185734</text:p>
          </table:table-cell>
          <table:table-cell table:number-columns-repeated="4"/>
        </table:table-row>
        <table:table-row table:style-name="ro1">
          <table:table-cell office:value-type="float" office:value="615.026672363281">
            <text:p>615.0266723633</text:p>
          </table:table-cell>
          <table:table-cell office:value-type="float" office:value="0.03029802">
            <text:p>0.03029802</text:p>
          </table:table-cell>
          <table:table-cell table:number-columns-repeated="4"/>
        </table:table-row>
        <table:table-row table:style-name="ro1">
          <table:table-cell office:value-type="float" office:value="615.145812988281">
            <text:p>615.1458129883</text:p>
          </table:table-cell>
          <table:table-cell office:value-type="float" office:value="0.0534166">
            <text:p>0.0534166</text:p>
          </table:table-cell>
          <table:table-cell table:number-columns-repeated="4"/>
        </table:table-row>
        <table:table-row table:style-name="ro1">
          <table:table-cell office:value-type="float" office:value="615.264953613281">
            <text:p>615.2649536133</text:p>
          </table:table-cell>
          <table:table-cell office:value-type="float" office:value="0.03202809">
            <text:p>0.03202809</text:p>
          </table:table-cell>
          <table:table-cell table:number-columns-repeated="4"/>
        </table:table-row>
        <table:table-row table:style-name="ro1">
          <table:table-cell office:value-type="float" office:value="615.384155273438">
            <text:p>615.3841552734</text:p>
          </table:table-cell>
          <table:table-cell office:value-type="float" office:value="0.0324078">
            <text:p>0.0324078</text:p>
          </table:table-cell>
          <table:table-cell table:number-columns-repeated="4"/>
        </table:table-row>
        <table:table-row table:style-name="ro1">
          <table:table-cell office:value-type="float" office:value="615.503295898438">
            <text:p>615.5032958984</text:p>
          </table:table-cell>
          <table:table-cell office:value-type="float" office:value="0.02591865">
            <text:p>0.02591865</text:p>
          </table:table-cell>
          <table:table-cell table:number-columns-repeated="4"/>
        </table:table-row>
        <table:table-row table:style-name="ro1">
          <table:table-cell office:value-type="float" office:value="615.622497558594">
            <text:p>615.6224975586</text:p>
          </table:table-cell>
          <table:table-cell office:value-type="float" office:value="0.03733561">
            <text:p>0.03733561</text:p>
          </table:table-cell>
          <table:table-cell table:number-columns-repeated="4"/>
        </table:table-row>
        <table:table-row table:style-name="ro1">
          <table:table-cell office:value-type="float" office:value="615.741638183594">
            <text:p>615.7416381836</text:p>
          </table:table-cell>
          <table:table-cell office:value-type="float" office:value="0.02609815">
            <text:p>0.02609815</text:p>
          </table:table-cell>
          <table:table-cell table:number-columns-repeated="4"/>
        </table:table-row>
        <table:table-row table:style-name="ro1">
          <table:table-cell office:value-type="float" office:value="615.86083984375">
            <text:p>615.8608398438</text:p>
          </table:table-cell>
          <table:table-cell office:value-type="float" office:value="0.02924038">
            <text:p>0.02924038</text:p>
          </table:table-cell>
          <table:table-cell table:number-columns-repeated="4"/>
        </table:table-row>
        <table:table-row table:style-name="ro1">
          <table:table-cell office:value-type="float" office:value="615.97998046875">
            <text:p>615.9799804688</text:p>
          </table:table-cell>
          <table:table-cell office:value-type="float" office:value="0.02652024">
            <text:p>0.02652024</text:p>
          </table:table-cell>
          <table:table-cell table:number-columns-repeated="4"/>
        </table:table-row>
        <table:table-row table:style-name="ro1">
          <table:table-cell office:value-type="float" office:value="616.099182128906">
            <text:p>616.0991821289</text:p>
          </table:table-cell>
          <table:table-cell office:value-type="float" office:value="0.02919809">
            <text:p>0.02919809</text:p>
          </table:table-cell>
          <table:table-cell table:number-columns-repeated="4"/>
        </table:table-row>
        <table:table-row table:style-name="ro1">
          <table:table-cell office:value-type="float" office:value="616.218322753906">
            <text:p>616.2183227539</text:p>
          </table:table-cell>
          <table:table-cell office:value-type="float" office:value="0.03435883">
            <text:p>0.03435883</text:p>
          </table:table-cell>
          <table:table-cell table:number-columns-repeated="4"/>
        </table:table-row>
        <table:table-row table:style-name="ro1">
          <table:table-cell office:value-type="float" office:value="616.337524414063">
            <text:p>616.3375244141</text:p>
          </table:table-cell>
          <table:table-cell office:value-type="float" office:value="0.02454119">
            <text:p>0.02454119</text:p>
          </table:table-cell>
          <table:table-cell table:number-columns-repeated="4"/>
        </table:table-row>
        <table:table-row table:style-name="ro1">
          <table:table-cell office:value-type="float" office:value="616.456726074219">
            <text:p>616.4567260742</text:p>
          </table:table-cell>
          <table:table-cell office:value-type="float" office:value="0.04119616">
            <text:p>0.04119616</text:p>
          </table:table-cell>
          <table:table-cell table:number-columns-repeated="4"/>
        </table:table-row>
        <table:table-row table:style-name="ro1">
          <table:table-cell office:value-type="float" office:value="616.575866699219">
            <text:p>616.5758666992</text:p>
          </table:table-cell>
          <table:table-cell office:value-type="float" office:value="0.02384203">
            <text:p>0.02384203</text:p>
          </table:table-cell>
          <table:table-cell table:number-columns-repeated="4"/>
        </table:table-row>
        <table:table-row table:style-name="ro1">
          <table:table-cell office:value-type="float" office:value="616.695068359375">
            <text:p>616.6950683594</text:p>
          </table:table-cell>
          <table:table-cell office:value-type="float" office:value="0.01980103">
            <text:p>0.01980103</text:p>
          </table:table-cell>
          <table:table-cell table:number-columns-repeated="4"/>
        </table:table-row>
        <table:table-row table:style-name="ro1">
          <table:table-cell office:value-type="float" office:value="616.814270019531">
            <text:p>616.8142700195</text:p>
          </table:table-cell>
          <table:table-cell office:value-type="float" office:value="0.02347163">
            <text:p>0.02347163</text:p>
          </table:table-cell>
          <table:table-cell table:number-columns-repeated="4"/>
        </table:table-row>
        <table:table-row table:style-name="ro1">
          <table:table-cell office:value-type="float" office:value="616.933471679688">
            <text:p>616.9334716797</text:p>
          </table:table-cell>
          <table:table-cell office:value-type="float" office:value="0.03020926">
            <text:p>0.03020926</text:p>
          </table:table-cell>
          <table:table-cell table:number-columns-repeated="4"/>
        </table:table-row>
        <table:table-row table:style-name="ro1">
          <table:table-cell office:value-type="float" office:value="617.052612304688">
            <text:p>617.0526123047</text:p>
          </table:table-cell>
          <table:table-cell office:value-type="float" office:value="0.0261095">
            <text:p>0.0261095</text:p>
          </table:table-cell>
          <table:table-cell table:number-columns-repeated="4"/>
        </table:table-row>
        <table:table-row table:style-name="ro1">
          <table:table-cell office:value-type="float" office:value="617.171813964844">
            <text:p>617.1718139648</text:p>
          </table:table-cell>
          <table:table-cell office:value-type="float" office:value="0.03580819">
            <text:p>0.03580819</text:p>
          </table:table-cell>
          <table:table-cell table:number-columns-repeated="4"/>
        </table:table-row>
        <table:table-row table:style-name="ro1">
          <table:table-cell office:value-type="float" office:value="617.291015625">
            <text:p>617.291015625</text:p>
          </table:table-cell>
          <table:table-cell office:value-type="float" office:value="0.02201742">
            <text:p>0.02201742</text:p>
          </table:table-cell>
          <table:table-cell table:number-columns-repeated="4"/>
        </table:table-row>
        <table:table-row table:style-name="ro1">
          <table:table-cell office:value-type="float" office:value="617.410217285156">
            <text:p>617.4102172852</text:p>
          </table:table-cell>
          <table:table-cell office:value-type="float" office:value="0.02770252">
            <text:p>0.02770252</text:p>
          </table:table-cell>
          <table:table-cell table:number-columns-repeated="4"/>
        </table:table-row>
        <table:table-row table:style-name="ro1">
          <table:table-cell office:value-type="float" office:value="617.529418945313">
            <text:p>617.5294189453</text:p>
          </table:table-cell>
          <table:table-cell office:value-type="float" office:value="0.03413773">
            <text:p>0.03413773</text:p>
          </table:table-cell>
          <table:table-cell table:number-columns-repeated="4"/>
        </table:table-row>
        <table:table-row table:style-name="ro1">
          <table:table-cell office:value-type="float" office:value="617.648620605469">
            <text:p>617.6486206055</text:p>
          </table:table-cell>
          <table:table-cell office:value-type="float" office:value="0.02666333">
            <text:p>0.02666333</text:p>
          </table:table-cell>
          <table:table-cell table:number-columns-repeated="4"/>
        </table:table-row>
        <table:table-row table:style-name="ro1">
          <table:table-cell office:value-type="float" office:value="617.767822265625">
            <text:p>617.7678222656</text:p>
          </table:table-cell>
          <table:table-cell office:value-type="float" office:value="0.04764834">
            <text:p>0.04764834</text:p>
          </table:table-cell>
          <table:table-cell table:number-columns-repeated="4"/>
        </table:table-row>
        <table:table-row table:style-name="ro1">
          <table:table-cell office:value-type="float" office:value="617.887023925781">
            <text:p>617.8870239258</text:p>
          </table:table-cell>
          <table:table-cell office:value-type="float" office:value="0.03362041">
            <text:p>0.03362041</text:p>
          </table:table-cell>
          <table:table-cell table:number-columns-repeated="4"/>
        </table:table-row>
        <table:table-row table:style-name="ro1">
          <table:table-cell office:value-type="float" office:value="618.006225585938">
            <text:p>618.0062255859</text:p>
          </table:table-cell>
          <table:table-cell office:value-type="float" office:value="0.02530161">
            <text:p>0.02530161</text:p>
          </table:table-cell>
          <table:table-cell table:number-columns-repeated="4"/>
        </table:table-row>
        <table:table-row table:style-name="ro1">
          <table:table-cell office:value-type="float" office:value="618.125427246094">
            <text:p>618.1254272461</text:p>
          </table:table-cell>
          <table:table-cell office:value-type="float" office:value="0.03179073">
            <text:p>0.03179073</text:p>
          </table:table-cell>
          <table:table-cell table:number-columns-repeated="4"/>
        </table:table-row>
        <table:table-row table:style-name="ro1">
          <table:table-cell office:value-type="float" office:value="618.24462890625">
            <text:p>618.2446289063</text:p>
          </table:table-cell>
          <table:table-cell office:value-type="float" office:value="0.03432507">
            <text:p>0.03432507</text:p>
          </table:table-cell>
          <table:table-cell table:number-columns-repeated="4"/>
        </table:table-row>
        <table:table-row table:style-name="ro1">
          <table:table-cell office:value-type="float" office:value="618.363891601563">
            <text:p>618.3638916016</text:p>
          </table:table-cell>
          <table:table-cell office:value-type="float" office:value="0.03515846">
            <text:p>0.03515846</text:p>
          </table:table-cell>
          <table:table-cell table:number-columns-repeated="4"/>
        </table:table-row>
        <table:table-row table:style-name="ro1">
          <table:table-cell office:value-type="float" office:value="618.483093261719">
            <text:p>618.4830932617</text:p>
          </table:table-cell>
          <table:table-cell office:value-type="float" office:value="0.02491647">
            <text:p>0.02491647</text:p>
          </table:table-cell>
          <table:table-cell table:number-columns-repeated="4"/>
        </table:table-row>
        <table:table-row table:style-name="ro1">
          <table:table-cell office:value-type="float" office:value="618.602294921875">
            <text:p>618.6022949219</text:p>
          </table:table-cell>
          <table:table-cell office:value-type="float" office:value="0.02886762">
            <text:p>0.02886762</text:p>
          </table:table-cell>
          <table:table-cell table:number-columns-repeated="4"/>
        </table:table-row>
        <table:table-row table:style-name="ro1">
          <table:table-cell office:value-type="float" office:value="618.721496582031">
            <text:p>618.721496582</text:p>
          </table:table-cell>
          <table:table-cell office:value-type="float" office:value="0.04238151">
            <text:p>0.04238151</text:p>
          </table:table-cell>
          <table:table-cell table:number-columns-repeated="4"/>
        </table:table-row>
        <table:table-row table:style-name="ro1">
          <table:table-cell office:value-type="float" office:value="618.840759277344">
            <text:p>618.8407592773</text:p>
          </table:table-cell>
          <table:table-cell office:value-type="float" office:value="0.02183864">
            <text:p>0.02183864</text:p>
          </table:table-cell>
          <table:table-cell table:number-columns-repeated="4"/>
        </table:table-row>
        <table:table-row table:style-name="ro1">
          <table:table-cell office:value-type="float" office:value="618.9599609375">
            <text:p>618.9599609375</text:p>
          </table:table-cell>
          <table:table-cell office:value-type="float" office:value="0.0339255">
            <text:p>0.0339255</text:p>
          </table:table-cell>
          <table:table-cell table:number-columns-repeated="4"/>
        </table:table-row>
        <table:table-row table:style-name="ro1">
          <table:table-cell office:value-type="float" office:value="619.079162597656">
            <text:p>619.0791625977</text:p>
          </table:table-cell>
          <table:table-cell office:value-type="float" office:value="0.01868253">
            <text:p>0.01868253</text:p>
          </table:table-cell>
          <table:table-cell table:number-columns-repeated="4"/>
        </table:table-row>
        <table:table-row table:style-name="ro1">
          <table:table-cell office:value-type="float" office:value="619.198425292969">
            <text:p>619.198425293</text:p>
          </table:table-cell>
          <table:table-cell office:value-type="float" office:value="0.03974087">
            <text:p>0.03974087</text:p>
          </table:table-cell>
          <table:table-cell table:number-columns-repeated="4"/>
        </table:table-row>
        <table:table-row table:style-name="ro1">
          <table:table-cell office:value-type="float" office:value="619.317626953125">
            <text:p>619.3176269531</text:p>
          </table:table-cell>
          <table:table-cell office:value-type="float" office:value="0.02308198">
            <text:p>0.02308198</text:p>
          </table:table-cell>
          <table:table-cell table:number-columns-repeated="4"/>
        </table:table-row>
        <table:table-row table:style-name="ro1">
          <table:table-cell office:value-type="float" office:value="619.436889648438">
            <text:p>619.4368896484</text:p>
          </table:table-cell>
          <table:table-cell office:value-type="float" office:value="0.03288371">
            <text:p>0.03288371</text:p>
          </table:table-cell>
          <table:table-cell table:number-columns-repeated="4"/>
        </table:table-row>
        <table:table-row table:style-name="ro1">
          <table:table-cell office:value-type="float" office:value="619.556091308594">
            <text:p>619.5560913086</text:p>
          </table:table-cell>
          <table:table-cell office:value-type="float" office:value="0.02775352">
            <text:p>0.02775352</text:p>
          </table:table-cell>
          <table:table-cell table:number-columns-repeated="4"/>
        </table:table-row>
        <table:table-row table:style-name="ro1">
          <table:table-cell office:value-type="float" office:value="619.675354003906">
            <text:p>619.6753540039</text:p>
          </table:table-cell>
          <table:table-cell office:value-type="float" office:value="0.02248587">
            <text:p>0.02248587</text:p>
          </table:table-cell>
          <table:table-cell table:number-columns-repeated="4"/>
        </table:table-row>
        <table:table-row table:style-name="ro1">
          <table:table-cell office:value-type="float" office:value="619.794616699219">
            <text:p>619.7946166992</text:p>
          </table:table-cell>
          <table:table-cell office:value-type="float" office:value="0.0289802">
            <text:p>0.0289802</text:p>
          </table:table-cell>
          <table:table-cell table:number-columns-repeated="4"/>
        </table:table-row>
        <table:table-row table:style-name="ro1">
          <table:table-cell office:value-type="float" office:value="619.913818359375">
            <text:p>619.9138183594</text:p>
          </table:table-cell>
          <table:table-cell office:value-type="float" office:value="0.01783742">
            <text:p>0.01783742</text:p>
          </table:table-cell>
          <table:table-cell table:number-columns-repeated="4"/>
        </table:table-row>
        <table:table-row table:style-name="ro1">
          <table:table-cell office:value-type="float" office:value="620.033081054688">
            <text:p>620.0330810547</text:p>
          </table:table-cell>
          <table:table-cell office:value-type="float" office:value="0.04337174">
            <text:p>0.04337174</text:p>
          </table:table-cell>
          <table:table-cell table:number-columns-repeated="4"/>
        </table:table-row>
        <table:table-row table:style-name="ro1">
          <table:table-cell office:value-type="float" office:value="620.152282714844">
            <text:p>620.1522827148</text:p>
          </table:table-cell>
          <table:table-cell office:value-type="float" office:value="0.03154453">
            <text:p>0.03154453</text:p>
          </table:table-cell>
          <table:table-cell table:number-columns-repeated="4"/>
        </table:table-row>
        <table:table-row table:style-name="ro1">
          <table:table-cell office:value-type="float" office:value="620.271545410156">
            <text:p>620.2715454102</text:p>
          </table:table-cell>
          <table:table-cell office:value-type="float" office:value="0.02952743">
            <text:p>0.02952743</text:p>
          </table:table-cell>
          <table:table-cell table:number-columns-repeated="4"/>
        </table:table-row>
        <table:table-row table:style-name="ro1">
          <table:table-cell office:value-type="float" office:value="620.390808105469">
            <text:p>620.3908081055</text:p>
          </table:table-cell>
          <table:table-cell office:value-type="float" office:value="0.01940649">
            <text:p>0.01940649</text:p>
          </table:table-cell>
          <table:table-cell table:number-columns-repeated="4"/>
        </table:table-row>
        <table:table-row table:style-name="ro1">
          <table:table-cell office:value-type="float" office:value="620.510070800781">
            <text:p>620.5100708008</text:p>
          </table:table-cell>
          <table:table-cell office:value-type="float" office:value="0.02358482">
            <text:p>0.02358482</text:p>
          </table:table-cell>
          <table:table-cell table:number-columns-repeated="4"/>
        </table:table-row>
        <table:table-row table:style-name="ro1">
          <table:table-cell office:value-type="float" office:value="620.629333496094">
            <text:p>620.6293334961</text:p>
          </table:table-cell>
          <table:table-cell office:value-type="float" office:value="0.02316257">
            <text:p>0.02316257</text:p>
          </table:table-cell>
          <table:table-cell table:number-columns-repeated="4"/>
        </table:table-row>
        <table:table-row table:style-name="ro1">
          <table:table-cell office:value-type="float" office:value="620.74853515625">
            <text:p>620.7485351563</text:p>
          </table:table-cell>
          <table:table-cell office:value-type="float" office:value="0.01709275">
            <text:p>0.01709275</text:p>
          </table:table-cell>
          <table:table-cell table:number-columns-repeated="4"/>
        </table:table-row>
        <table:table-row table:style-name="ro1">
          <table:table-cell office:value-type="float" office:value="620.867797851563">
            <text:p>620.8677978516</text:p>
          </table:table-cell>
          <table:table-cell office:value-type="float" office:value="0.04912564">
            <text:p>0.04912564</text:p>
          </table:table-cell>
          <table:table-cell table:number-columns-repeated="4"/>
        </table:table-row>
        <table:table-row table:style-name="ro1">
          <table:table-cell office:value-type="float" office:value="620.987060546875">
            <text:p>620.9870605469</text:p>
          </table:table-cell>
          <table:table-cell office:value-type="float" office:value="0.02159933">
            <text:p>0.02159933</text:p>
          </table:table-cell>
          <table:table-cell table:number-columns-repeated="4"/>
        </table:table-row>
        <table:table-row table:style-name="ro1">
          <table:table-cell office:value-type="float" office:value="621.106323242188">
            <text:p>621.1063232422</text:p>
          </table:table-cell>
          <table:table-cell office:value-type="float" office:value="0.02223479">
            <text:p>0.02223479</text:p>
          </table:table-cell>
          <table:table-cell table:number-columns-repeated="4"/>
        </table:table-row>
        <table:table-row table:style-name="ro1">
          <table:table-cell office:value-type="float" office:value="621.2255859375">
            <text:p>621.2255859375</text:p>
          </table:table-cell>
          <table:table-cell office:value-type="float" office:value="0.02775159">
            <text:p>0.02775159</text:p>
          </table:table-cell>
          <table:table-cell table:number-columns-repeated="4"/>
        </table:table-row>
        <table:table-row table:style-name="ro1">
          <table:table-cell office:value-type="float" office:value="621.344848632813">
            <text:p>621.3448486328</text:p>
          </table:table-cell>
          <table:table-cell office:value-type="float" office:value="0.01858521">
            <text:p>0.01858521</text:p>
          </table:table-cell>
          <table:table-cell table:number-columns-repeated="4"/>
        </table:table-row>
        <table:table-row table:style-name="ro1">
          <table:table-cell office:value-type="float" office:value="621.464111328125">
            <text:p>621.4641113281</text:p>
          </table:table-cell>
          <table:table-cell office:value-type="float" office:value="0.01968508">
            <text:p>0.01968508</text:p>
          </table:table-cell>
          <table:table-cell table:number-columns-repeated="4"/>
        </table:table-row>
        <table:table-row table:style-name="ro1">
          <table:table-cell office:value-type="float" office:value="621.583374023438">
            <text:p>621.5833740234</text:p>
          </table:table-cell>
          <table:table-cell office:value-type="float" office:value="0.04557902">
            <text:p>0.04557902</text:p>
          </table:table-cell>
          <table:table-cell table:number-columns-repeated="4"/>
        </table:table-row>
        <table:table-row table:style-name="ro1">
          <table:table-cell office:value-type="float" office:value="621.70263671875">
            <text:p>621.7026367188</text:p>
          </table:table-cell>
          <table:table-cell office:value-type="float" office:value="0.02605396">
            <text:p>0.02605396</text:p>
          </table:table-cell>
          <table:table-cell table:number-columns-repeated="4"/>
        </table:table-row>
        <table:table-row table:style-name="ro1">
          <table:table-cell office:value-type="float" office:value="621.821899414063">
            <text:p>621.8218994141</text:p>
          </table:table-cell>
          <table:table-cell office:value-type="float" office:value="0.04993718">
            <text:p>0.04993718</text:p>
          </table:table-cell>
          <table:table-cell table:number-columns-repeated="4"/>
        </table:table-row>
        <table:table-row table:style-name="ro1">
          <table:table-cell office:value-type="float" office:value="621.941223144531">
            <text:p>621.9412231445</text:p>
          </table:table-cell>
          <table:table-cell office:value-type="float" office:value="0.01480378">
            <text:p>0.01480378</text:p>
          </table:table-cell>
          <table:table-cell table:number-columns-repeated="4"/>
        </table:table-row>
        <table:table-row table:style-name="ro1">
          <table:table-cell office:value-type="float" office:value="622.060485839844">
            <text:p>622.0604858398</text:p>
          </table:table-cell>
          <table:table-cell office:value-type="float" office:value="0.03364963">
            <text:p>0.03364963</text:p>
          </table:table-cell>
          <table:table-cell table:number-columns-repeated="4"/>
        </table:table-row>
        <table:table-row table:style-name="ro1">
          <table:table-cell office:value-type="float" office:value="622.179748535156">
            <text:p>622.1797485352</text:p>
          </table:table-cell>
          <table:table-cell office:value-type="float" office:value="0.03652554">
            <text:p>0.03652554</text:p>
          </table:table-cell>
          <table:table-cell table:number-columns-repeated="4"/>
        </table:table-row>
        <table:table-row table:style-name="ro1">
          <table:table-cell office:value-type="float" office:value="622.299011230469">
            <text:p>622.2990112305</text:p>
          </table:table-cell>
          <table:table-cell office:value-type="float" office:value="0.02144845">
            <text:p>0.02144845</text:p>
          </table:table-cell>
          <table:table-cell table:number-columns-repeated="4"/>
        </table:table-row>
        <table:table-row table:style-name="ro1">
          <table:table-cell office:value-type="float" office:value="622.418334960938">
            <text:p>622.4183349609</text:p>
          </table:table-cell>
          <table:table-cell office:value-type="float" office:value="0.02372826">
            <text:p>0.02372826</text:p>
          </table:table-cell>
          <table:table-cell table:number-columns-repeated="4"/>
        </table:table-row>
        <table:table-row table:style-name="ro1">
          <table:table-cell office:value-type="float" office:value="622.53759765625">
            <text:p>622.5375976563</text:p>
          </table:table-cell>
          <table:table-cell office:value-type="float" office:value="0.02331152">
            <text:p>0.02331152</text:p>
          </table:table-cell>
          <table:table-cell table:number-columns-repeated="4"/>
        </table:table-row>
        <table:table-row table:style-name="ro1">
          <table:table-cell office:value-type="float" office:value="622.656860351563">
            <text:p>622.6568603516</text:p>
          </table:table-cell>
          <table:table-cell office:value-type="float" office:value="0.02010478">
            <text:p>0.02010478</text:p>
          </table:table-cell>
          <table:table-cell table:number-columns-repeated="4"/>
        </table:table-row>
        <table:table-row table:style-name="ro1">
          <table:table-cell office:value-type="float" office:value="622.776184082031">
            <text:p>622.776184082</text:p>
          </table:table-cell>
          <table:table-cell office:value-type="float" office:value="0.02705469">
            <text:p>0.02705469</text:p>
          </table:table-cell>
          <table:table-cell table:number-columns-repeated="4"/>
        </table:table-row>
        <table:table-row table:style-name="ro1">
          <table:table-cell office:value-type="float" office:value="622.895446777344">
            <text:p>622.8954467773</text:p>
          </table:table-cell>
          <table:table-cell office:value-type="float" office:value="0.02780242">
            <text:p>0.02780242</text:p>
          </table:table-cell>
          <table:table-cell table:number-columns-repeated="4"/>
        </table:table-row>
        <table:table-row table:style-name="ro1">
          <table:table-cell office:value-type="float" office:value="623.014709472656">
            <text:p>623.0147094727</text:p>
          </table:table-cell>
          <table:table-cell office:value-type="float" office:value="0.02532327">
            <text:p>0.02532327</text:p>
          </table:table-cell>
          <table:table-cell table:number-columns-repeated="4"/>
        </table:table-row>
        <table:table-row table:style-name="ro1">
          <table:table-cell office:value-type="float" office:value="623.134033203125">
            <text:p>623.1340332031</text:p>
          </table:table-cell>
          <table:table-cell office:value-type="float" office:value="0.01690191">
            <text:p>0.01690191</text:p>
          </table:table-cell>
          <table:table-cell table:number-columns-repeated="4"/>
        </table:table-row>
        <table:table-row table:style-name="ro1">
          <table:table-cell office:value-type="float" office:value="623.253295898438">
            <text:p>623.2532958984</text:p>
          </table:table-cell>
          <table:table-cell office:value-type="float" office:value="0.02003003">
            <text:p>0.02003003</text:p>
          </table:table-cell>
          <table:table-cell table:number-columns-repeated="4"/>
        </table:table-row>
        <table:table-row table:style-name="ro1">
          <table:table-cell office:value-type="float" office:value="623.372619628906">
            <text:p>623.3726196289</text:p>
          </table:table-cell>
          <table:table-cell office:value-type="float" office:value="0.02906436">
            <text:p>0.02906436</text:p>
          </table:table-cell>
          <table:table-cell table:number-columns-repeated="4"/>
        </table:table-row>
        <table:table-row table:style-name="ro1">
          <table:table-cell office:value-type="float" office:value="623.491943359375">
            <text:p>623.4919433594</text:p>
          </table:table-cell>
          <table:table-cell office:value-type="float" office:value="0.02429199">
            <text:p>0.02429199</text:p>
          </table:table-cell>
          <table:table-cell table:number-columns-repeated="4"/>
        </table:table-row>
        <table:table-row table:style-name="ro1">
          <table:table-cell office:value-type="float" office:value="623.611206054688">
            <text:p>623.6112060547</text:p>
          </table:table-cell>
          <table:table-cell office:value-type="float" office:value="0.01935852">
            <text:p>0.01935852</text:p>
          </table:table-cell>
          <table:table-cell table:number-columns-repeated="4"/>
        </table:table-row>
        <table:table-row table:style-name="ro1">
          <table:table-cell office:value-type="float" office:value="623.730529785156">
            <text:p>623.7305297852</text:p>
          </table:table-cell>
          <table:table-cell office:value-type="float" office:value="0.02483746">
            <text:p>0.02483746</text:p>
          </table:table-cell>
          <table:table-cell table:number-columns-repeated="4"/>
        </table:table-row>
        <table:table-row table:style-name="ro1">
          <table:table-cell office:value-type="float" office:value="623.849853515625">
            <text:p>623.8498535156</text:p>
          </table:table-cell>
          <table:table-cell office:value-type="float" office:value="0.02363098">
            <text:p>0.02363098</text:p>
          </table:table-cell>
          <table:table-cell table:number-columns-repeated="4"/>
        </table:table-row>
        <table:table-row table:style-name="ro1">
          <table:table-cell office:value-type="float" office:value="623.969116210938">
            <text:p>623.9691162109</text:p>
          </table:table-cell>
          <table:table-cell office:value-type="float" office:value="0.0225094">
            <text:p>0.0225094</text:p>
          </table:table-cell>
          <table:table-cell table:number-columns-repeated="4"/>
        </table:table-row>
        <table:table-row table:style-name="ro1">
          <table:table-cell office:value-type="float" office:value="624.088439941406">
            <text:p>624.0884399414</text:p>
          </table:table-cell>
          <table:table-cell office:value-type="float" office:value="0.01444706">
            <text:p>0.01444706</text:p>
          </table:table-cell>
          <table:table-cell table:number-columns-repeated="4"/>
        </table:table-row>
        <table:table-row table:style-name="ro1">
          <table:table-cell office:value-type="float" office:value="624.207763671875">
            <text:p>624.2077636719</text:p>
          </table:table-cell>
          <table:table-cell office:value-type="float" office:value="0.01378742">
            <text:p>0.01378742</text:p>
          </table:table-cell>
          <table:table-cell table:number-columns-repeated="4"/>
        </table:table-row>
        <table:table-row table:style-name="ro1">
          <table:table-cell office:value-type="float" office:value="624.327087402344">
            <text:p>624.3270874023</text:p>
          </table:table-cell>
          <table:table-cell office:value-type="float" office:value="0.02227167">
            <text:p>0.02227167</text:p>
          </table:table-cell>
          <table:table-cell table:number-columns-repeated="4"/>
        </table:table-row>
        <table:table-row table:style-name="ro1">
          <table:table-cell office:value-type="float" office:value="624.446350097656">
            <text:p>624.4463500977</text:p>
          </table:table-cell>
          <table:table-cell office:value-type="float" office:value="0.03652363">
            <text:p>0.03652363</text:p>
          </table:table-cell>
          <table:table-cell table:number-columns-repeated="4"/>
        </table:table-row>
        <table:table-row table:style-name="ro1">
          <table:table-cell office:value-type="float" office:value="624.565673828125">
            <text:p>624.5656738281</text:p>
          </table:table-cell>
          <table:table-cell office:value-type="float" office:value="0.02838964">
            <text:p>0.02838964</text:p>
          </table:table-cell>
          <table:table-cell table:number-columns-repeated="4"/>
        </table:table-row>
        <table:table-row table:style-name="ro1">
          <table:table-cell office:value-type="float" office:value="624.684997558594">
            <text:p>624.6849975586</text:p>
          </table:table-cell>
          <table:table-cell office:value-type="float" office:value="0.02520244">
            <text:p>0.02520244</text:p>
          </table:table-cell>
          <table:table-cell table:number-columns-repeated="4"/>
        </table:table-row>
        <table:table-row table:style-name="ro1">
          <table:table-cell office:value-type="float" office:value="624.804321289063">
            <text:p>624.8043212891</text:p>
          </table:table-cell>
          <table:table-cell office:value-type="float" office:value="0.02278046">
            <text:p>0.02278046</text:p>
          </table:table-cell>
          <table:table-cell table:number-columns-repeated="4"/>
        </table:table-row>
        <table:table-row table:style-name="ro1">
          <table:table-cell office:value-type="float" office:value="624.923645019531">
            <text:p>624.9236450195</text:p>
          </table:table-cell>
          <table:table-cell office:value-type="float" office:value="0.02757182">
            <text:p>0.02757182</text:p>
          </table:table-cell>
          <table:table-cell table:number-columns-repeated="4"/>
        </table:table-row>
        <table:table-row table:style-name="ro1">
          <table:table-cell office:value-type="float" office:value="625.04296875">
            <text:p>625.04296875</text:p>
          </table:table-cell>
          <table:table-cell office:value-type="float" office:value="0.01528615">
            <text:p>0.01528615</text:p>
          </table:table-cell>
          <table:table-cell table:number-columns-repeated="4"/>
        </table:table-row>
        <table:table-row table:style-name="ro1">
          <table:table-cell office:value-type="float" office:value="625.162292480469">
            <text:p>625.1622924805</text:p>
          </table:table-cell>
          <table:table-cell office:value-type="float" office:value="0.02096114">
            <text:p>0.02096114</text:p>
          </table:table-cell>
          <table:table-cell table:number-columns-repeated="4"/>
        </table:table-row>
        <table:table-row table:style-name="ro1">
          <table:table-cell office:value-type="float" office:value="625.281616210938">
            <text:p>625.2816162109</text:p>
          </table:table-cell>
          <table:table-cell office:value-type="float" office:value="0.02736201">
            <text:p>0.02736201</text:p>
          </table:table-cell>
          <table:table-cell table:number-columns-repeated="4"/>
        </table:table-row>
        <table:table-row table:style-name="ro1">
          <table:table-cell office:value-type="float" office:value="625.400939941406">
            <text:p>625.4009399414</text:p>
          </table:table-cell>
          <table:table-cell office:value-type="float" office:value="0.0219597">
            <text:p>0.0219597</text:p>
          </table:table-cell>
          <table:table-cell table:number-columns-repeated="4"/>
        </table:table-row>
        <table:table-row table:style-name="ro1">
          <table:table-cell office:value-type="float" office:value="625.520263671875">
            <text:p>625.5202636719</text:p>
          </table:table-cell>
          <table:table-cell office:value-type="float" office:value="0.01949801">
            <text:p>0.01949801</text:p>
          </table:table-cell>
          <table:table-cell table:number-columns-repeated="4"/>
        </table:table-row>
        <table:table-row table:style-name="ro1">
          <table:table-cell office:value-type="float" office:value="625.639587402344">
            <text:p>625.6395874023</text:p>
          </table:table-cell>
          <table:table-cell office:value-type="float" office:value="0.02563316">
            <text:p>0.02563316</text:p>
          </table:table-cell>
          <table:table-cell table:number-columns-repeated="4"/>
        </table:table-row>
        <table:table-row table:style-name="ro1">
          <table:table-cell office:value-type="float" office:value="625.758911132813">
            <text:p>625.7589111328</text:p>
          </table:table-cell>
          <table:table-cell office:value-type="float" office:value="0.02751541">
            <text:p>0.02751541</text:p>
          </table:table-cell>
          <table:table-cell table:number-columns-repeated="4"/>
        </table:table-row>
        <table:table-row table:style-name="ro1">
          <table:table-cell office:value-type="float" office:value="625.878295898438">
            <text:p>625.8782958984</text:p>
          </table:table-cell>
          <table:table-cell office:value-type="float" office:value="0.0173525">
            <text:p>0.0173525</text:p>
          </table:table-cell>
          <table:table-cell table:number-columns-repeated="4"/>
        </table:table-row>
        <table:table-row table:style-name="ro1">
          <table:table-cell office:value-type="float" office:value="625.997619628906">
            <text:p>625.9976196289</text:p>
          </table:table-cell>
          <table:table-cell office:value-type="float" office:value="0.0156661">
            <text:p>0.0156661</text:p>
          </table:table-cell>
          <table:table-cell table:number-columns-repeated="4"/>
        </table:table-row>
        <table:table-row table:style-name="ro1">
          <table:table-cell office:value-type="float" office:value="626.116943359375">
            <text:p>626.1169433594</text:p>
          </table:table-cell>
          <table:table-cell office:value-type="float" office:value="0.02450865">
            <text:p>0.02450865</text:p>
          </table:table-cell>
          <table:table-cell table:number-columns-repeated="4"/>
        </table:table-row>
        <table:table-row table:style-name="ro1">
          <table:table-cell office:value-type="float" office:value="626.236267089844">
            <text:p>626.2362670898</text:p>
          </table:table-cell>
          <table:table-cell office:value-type="float" office:value="0.02676607">
            <text:p>0.02676607</text:p>
          </table:table-cell>
          <table:table-cell table:number-columns-repeated="4"/>
        </table:table-row>
        <table:table-row table:style-name="ro1">
          <table:table-cell office:value-type="float" office:value="626.355651855469">
            <text:p>626.3556518555</text:p>
          </table:table-cell>
          <table:table-cell office:value-type="float" office:value="0.03903966">
            <text:p>0.03903966</text:p>
          </table:table-cell>
          <table:table-cell table:number-columns-repeated="4"/>
        </table:table-row>
        <table:table-row table:style-name="ro1">
          <table:table-cell office:value-type="float" office:value="626.474975585938">
            <text:p>626.4749755859</text:p>
          </table:table-cell>
          <table:table-cell office:value-type="float" office:value="0.01423414">
            <text:p>0.01423414</text:p>
          </table:table-cell>
          <table:table-cell table:number-columns-repeated="4"/>
        </table:table-row>
        <table:table-row table:style-name="ro1">
          <table:table-cell office:value-type="float" office:value="626.594360351563">
            <text:p>626.5943603516</text:p>
          </table:table-cell>
          <table:table-cell office:value-type="float" office:value="0.035092">
            <text:p>0.035092</text:p>
          </table:table-cell>
          <table:table-cell table:number-columns-repeated="4"/>
        </table:table-row>
        <table:table-row table:style-name="ro1">
          <table:table-cell office:value-type="float" office:value="626.713684082031">
            <text:p>626.713684082</text:p>
          </table:table-cell>
          <table:table-cell office:value-type="float" office:value="0.02123821">
            <text:p>0.02123821</text:p>
          </table:table-cell>
          <table:table-cell table:number-columns-repeated="4"/>
        </table:table-row>
        <table:table-row table:style-name="ro1">
          <table:table-cell office:value-type="float" office:value="626.8330078125">
            <text:p>626.8330078125</text:p>
          </table:table-cell>
          <table:table-cell office:value-type="float" office:value="0.03559837">
            <text:p>0.03559837</text:p>
          </table:table-cell>
          <table:table-cell table:number-columns-repeated="4"/>
        </table:table-row>
        <table:table-row table:style-name="ro1">
          <table:table-cell office:value-type="float" office:value="626.952392578125">
            <text:p>626.9523925781</text:p>
          </table:table-cell>
          <table:table-cell office:value-type="float" office:value="0.0280792">
            <text:p>0.0280792</text:p>
          </table:table-cell>
          <table:table-cell table:number-columns-repeated="4"/>
        </table:table-row>
        <table:table-row table:style-name="ro1">
          <table:table-cell office:value-type="float" office:value="627.071716308594">
            <text:p>627.0717163086</text:p>
          </table:table-cell>
          <table:table-cell office:value-type="float" office:value="0.03007879">
            <text:p>0.03007879</text:p>
          </table:table-cell>
          <table:table-cell table:number-columns-repeated="4"/>
        </table:table-row>
        <table:table-row table:style-name="ro1">
          <table:table-cell office:value-type="float" office:value="627.191101074219">
            <text:p>627.1911010742</text:p>
          </table:table-cell>
          <table:table-cell office:value-type="float" office:value="0.03399619">
            <text:p>0.03399619</text:p>
          </table:table-cell>
          <table:table-cell table:number-columns-repeated="4"/>
        </table:table-row>
        <table:table-row table:style-name="ro1">
          <table:table-cell office:value-type="float" office:value="627.310424804688">
            <text:p>627.3104248047</text:p>
          </table:table-cell>
          <table:table-cell office:value-type="float" office:value="0.02336506">
            <text:p>0.02336506</text:p>
          </table:table-cell>
          <table:table-cell table:number-columns-repeated="4"/>
        </table:table-row>
        <table:table-row table:style-name="ro1">
          <table:table-cell office:value-type="float" office:value="627.429809570313">
            <text:p>627.4298095703</text:p>
          </table:table-cell>
          <table:table-cell office:value-type="float" office:value="0.01535561">
            <text:p>0.01535561</text:p>
          </table:table-cell>
          <table:table-cell table:number-columns-repeated="4"/>
        </table:table-row>
        <table:table-row table:style-name="ro1">
          <table:table-cell office:value-type="float" office:value="627.549194335938">
            <text:p>627.5491943359</text:p>
          </table:table-cell>
          <table:table-cell office:value-type="float" office:value="0.01742611">
            <text:p>0.01742611</text:p>
          </table:table-cell>
          <table:table-cell table:number-columns-repeated="4"/>
        </table:table-row>
        <table:table-row table:style-name="ro1">
          <table:table-cell office:value-type="float" office:value="627.668518066406">
            <text:p>627.6685180664</text:p>
          </table:table-cell>
          <table:table-cell office:value-type="float" office:value="0.03067031">
            <text:p>0.03067031</text:p>
          </table:table-cell>
          <table:table-cell table:number-columns-repeated="4"/>
        </table:table-row>
        <table:table-row table:style-name="ro1">
          <table:table-cell office:value-type="float" office:value="627.787902832031">
            <text:p>627.787902832</text:p>
          </table:table-cell>
          <table:table-cell office:value-type="float" office:value="0.02749037">
            <text:p>0.02749037</text:p>
          </table:table-cell>
          <table:table-cell table:number-columns-repeated="4"/>
        </table:table-row>
        <table:table-row table:style-name="ro1">
          <table:table-cell office:value-type="float" office:value="627.907287597656">
            <text:p>627.9072875977</text:p>
          </table:table-cell>
          <table:table-cell office:value-type="float" office:value="0.01983012">
            <text:p>0.01983012</text:p>
          </table:table-cell>
          <table:table-cell table:number-columns-repeated="4"/>
        </table:table-row>
        <table:table-row table:style-name="ro1">
          <table:table-cell office:value-type="float" office:value="628.026672363281">
            <text:p>628.0266723633</text:p>
          </table:table-cell>
          <table:table-cell office:value-type="float" office:value="0.01633272">
            <text:p>0.01633272</text:p>
          </table:table-cell>
          <table:table-cell table:number-columns-repeated="4"/>
        </table:table-row>
        <table:table-row table:style-name="ro1">
          <table:table-cell office:value-type="float" office:value="628.14599609375">
            <text:p>628.1459960938</text:p>
          </table:table-cell>
          <table:table-cell office:value-type="float" office:value="0.01435209">
            <text:p>0.01435209</text:p>
          </table:table-cell>
          <table:table-cell table:number-columns-repeated="4"/>
        </table:table-row>
        <table:table-row table:style-name="ro1">
          <table:table-cell office:value-type="float" office:value="628.265380859375">
            <text:p>628.2653808594</text:p>
          </table:table-cell>
          <table:table-cell office:value-type="float" office:value="0.02737569">
            <text:p>0.02737569</text:p>
          </table:table-cell>
          <table:table-cell table:number-columns-repeated="4"/>
        </table:table-row>
        <table:table-row table:style-name="ro1">
          <table:table-cell office:value-type="float" office:value="628.384765625">
            <text:p>628.384765625</text:p>
          </table:table-cell>
          <table:table-cell office:value-type="float" office:value="0.0320086">
            <text:p>0.0320086</text:p>
          </table:table-cell>
          <table:table-cell table:number-columns-repeated="4"/>
        </table:table-row>
        <table:table-row table:style-name="ro1">
          <table:table-cell office:value-type="float" office:value="628.504150390625">
            <text:p>628.5041503906</text:p>
          </table:table-cell>
          <table:table-cell office:value-type="float" office:value="0.0120963">
            <text:p>0.0120963</text:p>
          </table:table-cell>
          <table:table-cell table:number-columns-repeated="4"/>
        </table:table-row>
        <table:table-row table:style-name="ro1">
          <table:table-cell office:value-type="float" office:value="628.62353515625">
            <text:p>628.6235351563</text:p>
          </table:table-cell>
          <table:table-cell office:value-type="float" office:value="0.02406584">
            <text:p>0.02406584</text:p>
          </table:table-cell>
          <table:table-cell table:number-columns-repeated="4"/>
        </table:table-row>
        <table:table-row table:style-name="ro1">
          <table:table-cell office:value-type="float" office:value="628.742919921875">
            <text:p>628.7429199219</text:p>
          </table:table-cell>
          <table:table-cell office:value-type="float" office:value="0.01396328">
            <text:p>0.01396328</text:p>
          </table:table-cell>
          <table:table-cell table:number-columns-repeated="4"/>
        </table:table-row>
        <table:table-row table:style-name="ro1">
          <table:table-cell office:value-type="float" office:value="628.8623046875">
            <text:p>628.8623046875</text:p>
          </table:table-cell>
          <table:table-cell office:value-type="float" office:value="0.01722139">
            <text:p>0.01722139</text:p>
          </table:table-cell>
          <table:table-cell table:number-columns-repeated="4"/>
        </table:table-row>
        <table:table-row table:style-name="ro1">
          <table:table-cell office:value-type="float" office:value="628.981689453125">
            <text:p>628.9816894531</text:p>
          </table:table-cell>
          <table:table-cell office:value-type="float" office:value="0.01686453">
            <text:p>0.01686453</text:p>
          </table:table-cell>
          <table:table-cell table:number-columns-repeated="4"/>
        </table:table-row>
        <table:table-row table:style-name="ro1">
          <table:table-cell office:value-type="float" office:value="629.10107421875">
            <text:p>629.1010742188</text:p>
          </table:table-cell>
          <table:table-cell office:value-type="float" office:value="0.01417559">
            <text:p>0.01417559</text:p>
          </table:table-cell>
          <table:table-cell table:number-columns-repeated="4"/>
        </table:table-row>
        <table:table-row table:style-name="ro1">
          <table:table-cell office:value-type="float" office:value="629.220458984375">
            <text:p>629.2204589844</text:p>
          </table:table-cell>
          <table:table-cell office:value-type="float" office:value="0.03950415">
            <text:p>0.03950415</text:p>
          </table:table-cell>
          <table:table-cell table:number-columns-repeated="4"/>
        </table:table-row>
        <table:table-row table:style-name="ro1">
          <table:table-cell office:value-type="float" office:value="629.33984375">
            <text:p>629.33984375</text:p>
          </table:table-cell>
          <table:table-cell office:value-type="float" office:value="0.03092351">
            <text:p>0.03092351</text:p>
          </table:table-cell>
          <table:table-cell table:number-columns-repeated="4"/>
        </table:table-row>
        <table:table-row table:style-name="ro1">
          <table:table-cell office:value-type="float" office:value="629.459228515625">
            <text:p>629.4592285156</text:p>
          </table:table-cell>
          <table:table-cell office:value-type="float" office:value="0.03009755">
            <text:p>0.03009755</text:p>
          </table:table-cell>
          <table:table-cell table:number-columns-repeated="4"/>
        </table:table-row>
        <table:table-row table:style-name="ro1">
          <table:table-cell office:value-type="float" office:value="629.57861328125">
            <text:p>629.5786132813</text:p>
          </table:table-cell>
          <table:table-cell office:value-type="float" office:value="0.01409204">
            <text:p>0.01409204</text:p>
          </table:table-cell>
          <table:table-cell table:number-columns-repeated="4"/>
        </table:table-row>
        <table:table-row table:style-name="ro1">
          <table:table-cell office:value-type="float" office:value="629.697998046875">
            <text:p>629.6979980469</text:p>
          </table:table-cell>
          <table:table-cell office:value-type="float" office:value="0.01872547">
            <text:p>0.01872547</text:p>
          </table:table-cell>
          <table:table-cell table:number-columns-repeated="4"/>
        </table:table-row>
        <table:table-row table:style-name="ro1">
          <table:table-cell office:value-type="float" office:value="629.8173828125">
            <text:p>629.8173828125</text:p>
          </table:table-cell>
          <table:table-cell office:value-type="float" office:value="0.0211507">
            <text:p>0.0211507</text:p>
          </table:table-cell>
          <table:table-cell table:number-columns-repeated="4"/>
        </table:table-row>
        <table:table-row table:style-name="ro1">
          <table:table-cell office:value-type="float" office:value="629.936828613281">
            <text:p>629.9368286133</text:p>
          </table:table-cell>
          <table:table-cell office:value-type="float" office:value="0.04600231">
            <text:p>0.04600231</text:p>
          </table:table-cell>
          <table:table-cell table:number-columns-repeated="4"/>
        </table:table-row>
        <table:table-row table:style-name="ro1">
          <table:table-cell office:value-type="float" office:value="630.056213378906">
            <text:p>630.0562133789</text:p>
          </table:table-cell>
          <table:table-cell office:value-type="float" office:value="0.03155007">
            <text:p>0.03155007</text:p>
          </table:table-cell>
          <table:table-cell table:number-columns-repeated="4"/>
        </table:table-row>
        <table:table-row table:style-name="ro1">
          <table:table-cell office:value-type="float" office:value="630.175598144531">
            <text:p>630.1755981445</text:p>
          </table:table-cell>
          <table:table-cell office:value-type="float" office:value="0.0305301">
            <text:p>0.0305301</text:p>
          </table:table-cell>
          <table:table-cell table:number-columns-repeated="4"/>
        </table:table-row>
        <table:table-row table:style-name="ro1">
          <table:table-cell office:value-type="float" office:value="630.295043945313">
            <text:p>630.2950439453</text:p>
          </table:table-cell>
          <table:table-cell office:value-type="float" office:value="0.01511349">
            <text:p>0.01511349</text:p>
          </table:table-cell>
          <table:table-cell table:number-columns-repeated="4"/>
        </table:table-row>
        <table:table-row table:style-name="ro1">
          <table:table-cell office:value-type="float" office:value="630.414428710938">
            <text:p>630.4144287109</text:p>
          </table:table-cell>
          <table:table-cell office:value-type="float" office:value="0.0266965">
            <text:p>0.0266965</text:p>
          </table:table-cell>
          <table:table-cell table:number-columns-repeated="4"/>
        </table:table-row>
        <table:table-row table:style-name="ro1">
          <table:table-cell office:value-type="float" office:value="630.533813476563">
            <text:p>630.5338134766</text:p>
          </table:table-cell>
          <table:table-cell office:value-type="float" office:value="0.01939887">
            <text:p>0.01939887</text:p>
          </table:table-cell>
          <table:table-cell table:number-columns-repeated="4"/>
        </table:table-row>
        <table:table-row table:style-name="ro1">
          <table:table-cell office:value-type="float" office:value="630.653259277344">
            <text:p>630.6532592773</text:p>
          </table:table-cell>
          <table:table-cell office:value-type="float" office:value="0.01326936">
            <text:p>0.01326936</text:p>
          </table:table-cell>
          <table:table-cell table:number-columns-repeated="4"/>
        </table:table-row>
        <table:table-row table:style-name="ro1">
          <table:table-cell office:value-type="float" office:value="630.772644042969">
            <text:p>630.772644043</text:p>
          </table:table-cell>
          <table:table-cell office:value-type="float" office:value="0.01888506">
            <text:p>0.01888506</text:p>
          </table:table-cell>
          <table:table-cell table:number-columns-repeated="4"/>
        </table:table-row>
        <table:table-row table:style-name="ro1">
          <table:table-cell office:value-type="float" office:value="630.89208984375">
            <text:p>630.8920898438</text:p>
          </table:table-cell>
          <table:table-cell office:value-type="float" office:value="0.02279223">
            <text:p>0.02279223</text:p>
          </table:table-cell>
          <table:table-cell table:number-columns-repeated="4"/>
        </table:table-row>
        <table:table-row table:style-name="ro1">
          <table:table-cell office:value-type="float" office:value="631.011474609375">
            <text:p>631.0114746094</text:p>
          </table:table-cell>
          <table:table-cell office:value-type="float" office:value="0.02933423">
            <text:p>0.02933423</text:p>
          </table:table-cell>
          <table:table-cell table:number-columns-repeated="4"/>
        </table:table-row>
        <table:table-row table:style-name="ro1">
          <table:table-cell office:value-type="float" office:value="631.130920410156">
            <text:p>631.1309204102</text:p>
          </table:table-cell>
          <table:table-cell office:value-type="float" office:value="0.02044096">
            <text:p>0.02044096</text:p>
          </table:table-cell>
          <table:table-cell table:number-columns-repeated="4"/>
        </table:table-row>
        <table:table-row table:style-name="ro1">
          <table:table-cell office:value-type="float" office:value="631.250305175781">
            <text:p>631.2503051758</text:p>
          </table:table-cell>
          <table:table-cell office:value-type="float" office:value="0.01953465">
            <text:p>0.01953465</text:p>
          </table:table-cell>
          <table:table-cell table:number-columns-repeated="4"/>
        </table:table-row>
        <table:table-row table:style-name="ro1">
          <table:table-cell office:value-type="float" office:value="631.369750976563">
            <text:p>631.3697509766</text:p>
          </table:table-cell>
          <table:table-cell office:value-type="float" office:value="0.02654358">
            <text:p>0.02654358</text:p>
          </table:table-cell>
          <table:table-cell table:number-columns-repeated="4"/>
        </table:table-row>
        <table:table-row table:style-name="ro1">
          <table:table-cell office:value-type="float" office:value="631.489135742188">
            <text:p>631.4891357422</text:p>
          </table:table-cell>
          <table:table-cell office:value-type="float" office:value="0.03118962">
            <text:p>0.03118962</text:p>
          </table:table-cell>
          <table:table-cell table:number-columns-repeated="4"/>
        </table:table-row>
        <table:table-row table:style-name="ro1">
          <table:table-cell office:value-type="float" office:value="631.608581542969">
            <text:p>631.608581543</text:p>
          </table:table-cell>
          <table:table-cell office:value-type="float" office:value="0.01469481">
            <text:p>0.01469481</text:p>
          </table:table-cell>
          <table:table-cell table:number-columns-repeated="4"/>
        </table:table-row>
        <table:table-row table:style-name="ro1">
          <table:table-cell office:value-type="float" office:value="631.72802734375">
            <text:p>631.7280273438</text:p>
          </table:table-cell>
          <table:table-cell office:value-type="float" office:value="0.02754704">
            <text:p>0.02754704</text:p>
          </table:table-cell>
          <table:table-cell table:number-columns-repeated="4"/>
        </table:table-row>
        <table:table-row table:style-name="ro1">
          <table:table-cell office:value-type="float" office:value="631.847412109375">
            <text:p>631.8474121094</text:p>
          </table:table-cell>
          <table:table-cell office:value-type="float" office:value="0.01779413">
            <text:p>0.01779413</text:p>
          </table:table-cell>
          <table:table-cell table:number-columns-repeated="4"/>
        </table:table-row>
        <table:table-row table:style-name="ro1">
          <table:table-cell office:value-type="float" office:value="631.966857910156">
            <text:p>631.9668579102</text:p>
          </table:table-cell>
          <table:table-cell office:value-type="float" office:value="0.03530321">
            <text:p>0.03530321</text:p>
          </table:table-cell>
          <table:table-cell table:number-columns-repeated="4"/>
        </table:table-row>
        <table:table-row table:style-name="ro1">
          <table:table-cell office:value-type="float" office:value="632.086303710938">
            <text:p>632.0863037109</text:p>
          </table:table-cell>
          <table:table-cell office:value-type="float" office:value="0.01248402">
            <text:p>0.01248402</text:p>
          </table:table-cell>
          <table:table-cell table:number-columns-repeated="4"/>
        </table:table-row>
        <table:table-row table:style-name="ro1">
          <table:table-cell office:value-type="float" office:value="632.205749511719">
            <text:p>632.2057495117</text:p>
          </table:table-cell>
          <table:table-cell office:value-type="float" office:value="0.02036069">
            <text:p>0.02036069</text:p>
          </table:table-cell>
          <table:table-cell table:number-columns-repeated="4"/>
        </table:table-row>
        <table:table-row table:style-name="ro1">
          <table:table-cell office:value-type="float" office:value="632.3251953125">
            <text:p>632.3251953125</text:p>
          </table:table-cell>
          <table:table-cell office:value-type="float" office:value="0.01940487">
            <text:p>0.01940487</text:p>
          </table:table-cell>
          <table:table-cell table:number-columns-repeated="4"/>
        </table:table-row>
        <table:table-row table:style-name="ro1">
          <table:table-cell office:value-type="float" office:value="632.444580078125">
            <text:p>632.4445800781</text:p>
          </table:table-cell>
          <table:table-cell office:value-type="float" office:value="0.02887116">
            <text:p>0.02887116</text:p>
          </table:table-cell>
          <table:table-cell table:number-columns-repeated="4"/>
        </table:table-row>
        <table:table-row table:style-name="ro1">
          <table:table-cell office:value-type="float" office:value="632.564025878906">
            <text:p>632.5640258789</text:p>
          </table:table-cell>
          <table:table-cell office:value-type="float" office:value="0.01939833">
            <text:p>0.01939833</text:p>
          </table:table-cell>
          <table:table-cell table:number-columns-repeated="4"/>
        </table:table-row>
        <table:table-row table:style-name="ro1">
          <table:table-cell office:value-type="float" office:value="632.683471679688">
            <text:p>632.6834716797</text:p>
          </table:table-cell>
          <table:table-cell office:value-type="float" office:value="0.02118307">
            <text:p>0.02118307</text:p>
          </table:table-cell>
          <table:table-cell table:number-columns-repeated="4"/>
        </table:table-row>
        <table:table-row table:style-name="ro1">
          <table:table-cell office:value-type="float" office:value="632.802917480469">
            <text:p>632.8029174805</text:p>
          </table:table-cell>
          <table:table-cell office:value-type="float" office:value="0.01615693">
            <text:p>0.01615693</text:p>
          </table:table-cell>
          <table:table-cell table:number-columns-repeated="4"/>
        </table:table-row>
        <table:table-row table:style-name="ro1">
          <table:table-cell office:value-type="float" office:value="632.92236328125">
            <text:p>632.9223632813</text:p>
          </table:table-cell>
          <table:table-cell office:value-type="float" office:value="0.01190057">
            <text:p>0.01190057</text:p>
          </table:table-cell>
          <table:table-cell table:number-columns-repeated="4"/>
        </table:table-row>
        <table:table-row table:style-name="ro1">
          <table:table-cell office:value-type="float" office:value="633.041809082031">
            <text:p>633.041809082</text:p>
          </table:table-cell>
          <table:table-cell office:value-type="float" office:value="0.0266248">
            <text:p>0.0266248</text:p>
          </table:table-cell>
          <table:table-cell table:number-columns-repeated="4"/>
        </table:table-row>
        <table:table-row table:style-name="ro1">
          <table:table-cell office:value-type="float" office:value="633.161254882813">
            <text:p>633.1612548828</text:p>
          </table:table-cell>
          <table:table-cell office:value-type="float" office:value="0.04766572">
            <text:p>0.04766572</text:p>
          </table:table-cell>
          <table:table-cell table:number-columns-repeated="4"/>
        </table:table-row>
        <table:table-row table:style-name="ro1">
          <table:table-cell office:value-type="float" office:value="633.280700683594">
            <text:p>633.2807006836</text:p>
          </table:table-cell>
          <table:table-cell office:value-type="float" office:value="0.0127773">
            <text:p>0.0127773</text:p>
          </table:table-cell>
          <table:table-cell table:number-columns-repeated="4"/>
        </table:table-row>
        <table:table-row table:style-name="ro1">
          <table:table-cell office:value-type="float" office:value="633.400146484375">
            <text:p>633.4001464844</text:p>
          </table:table-cell>
          <table:table-cell office:value-type="float" office:value="0.01717298">
            <text:p>0.01717298</text:p>
          </table:table-cell>
          <table:table-cell table:number-columns-repeated="4"/>
        </table:table-row>
        <table:table-row table:style-name="ro1">
          <table:table-cell office:value-type="float" office:value="633.519592285156">
            <text:p>633.5195922852</text:p>
          </table:table-cell>
          <table:table-cell office:value-type="float" office:value="0.01431439">
            <text:p>0.01431439</text:p>
          </table:table-cell>
          <table:table-cell table:number-columns-repeated="4"/>
        </table:table-row>
        <table:table-row table:style-name="ro1">
          <table:table-cell office:value-type="float" office:value="633.639038085938">
            <text:p>633.6390380859</text:p>
          </table:table-cell>
          <table:table-cell office:value-type="float" office:value="0.02829592">
            <text:p>0.02829592</text:p>
          </table:table-cell>
          <table:table-cell table:number-columns-repeated="4"/>
        </table:table-row>
        <table:table-row table:style-name="ro1">
          <table:table-cell office:value-type="float" office:value="633.758544921875">
            <text:p>633.7585449219</text:p>
          </table:table-cell>
          <table:table-cell office:value-type="float" office:value="0.01121341">
            <text:p>0.01121341</text:p>
          </table:table-cell>
          <table:table-cell table:number-columns-repeated="4"/>
        </table:table-row>
        <table:table-row table:style-name="ro1">
          <table:table-cell office:value-type="float" office:value="633.877990722656">
            <text:p>633.8779907227</text:p>
          </table:table-cell>
          <table:table-cell office:value-type="float" office:value="0.0190186">
            <text:p>0.0190186</text:p>
          </table:table-cell>
          <table:table-cell table:number-columns-repeated="4"/>
        </table:table-row>
        <table:table-row table:style-name="ro1">
          <table:table-cell office:value-type="float" office:value="633.997436523438">
            <text:p>633.9974365234</text:p>
          </table:table-cell>
          <table:table-cell office:value-type="float" office:value="0.01721388">
            <text:p>0.01721388</text:p>
          </table:table-cell>
          <table:table-cell table:number-columns-repeated="4"/>
        </table:table-row>
        <table:table-row table:style-name="ro1">
          <table:table-cell office:value-type="float" office:value="634.116882324219">
            <text:p>634.1168823242</text:p>
          </table:table-cell>
          <table:table-cell office:value-type="float" office:value="0.01325432">
            <text:p>0.01325432</text:p>
          </table:table-cell>
          <table:table-cell table:number-columns-repeated="4"/>
        </table:table-row>
        <table:table-row table:style-name="ro1">
          <table:table-cell office:value-type="float" office:value="634.236389160156">
            <text:p>634.2363891602</text:p>
          </table:table-cell>
          <table:table-cell office:value-type="float" office:value="0.01273514">
            <text:p>0.01273514</text:p>
          </table:table-cell>
          <table:table-cell table:number-columns-repeated="4"/>
        </table:table-row>
        <table:table-row table:style-name="ro1">
          <table:table-cell office:value-type="float" office:value="634.355834960938">
            <text:p>634.3558349609</text:p>
          </table:table-cell>
          <table:table-cell office:value-type="float" office:value="0.01817745">
            <text:p>0.01817745</text:p>
          </table:table-cell>
          <table:table-cell table:number-columns-repeated="4"/>
        </table:table-row>
        <table:table-row table:style-name="ro1">
          <table:table-cell office:value-type="float" office:value="634.475280761719">
            <text:p>634.4752807617</text:p>
          </table:table-cell>
          <table:table-cell office:value-type="float" office:value="0.01435152">
            <text:p>0.01435152</text:p>
          </table:table-cell>
          <table:table-cell table:number-columns-repeated="4"/>
        </table:table-row>
        <table:table-row table:style-name="ro1">
          <table:table-cell office:value-type="float" office:value="634.594787597656">
            <text:p>634.5947875977</text:p>
          </table:table-cell>
          <table:table-cell office:value-type="float" office:value="0.0375439">
            <text:p>0.0375439</text:p>
          </table:table-cell>
          <table:table-cell table:number-columns-repeated="4"/>
        </table:table-row>
        <table:table-row table:style-name="ro1">
          <table:table-cell office:value-type="float" office:value="634.714233398438">
            <text:p>634.7142333984</text:p>
          </table:table-cell>
          <table:table-cell office:value-type="float" office:value="0.0132858">
            <text:p>0.0132858</text:p>
          </table:table-cell>
          <table:table-cell table:number-columns-repeated="4"/>
        </table:table-row>
        <table:table-row table:style-name="ro1">
          <table:table-cell office:value-type="float" office:value="634.833679199219">
            <text:p>634.8336791992</text:p>
          </table:table-cell>
          <table:table-cell office:value-type="float" office:value="0.01076884">
            <text:p>0.01076884</text:p>
          </table:table-cell>
          <table:table-cell table:number-columns-repeated="4"/>
        </table:table-row>
        <table:table-row table:style-name="ro1">
          <table:table-cell office:value-type="float" office:value="634.953186035156">
            <text:p>634.9531860352</text:p>
          </table:table-cell>
          <table:table-cell office:value-type="float" office:value="0.02239677">
            <text:p>0.02239677</text:p>
          </table:table-cell>
          <table:table-cell table:number-columns-repeated="4"/>
        </table:table-row>
        <table:table-row table:style-name="ro1">
          <table:table-cell office:value-type="float" office:value="635.072631835938">
            <text:p>635.0726318359</text:p>
          </table:table-cell>
          <table:table-cell office:value-type="float" office:value="0.02518495">
            <text:p>0.02518495</text:p>
          </table:table-cell>
          <table:table-cell table:number-columns-repeated="4"/>
        </table:table-row>
        <table:table-row table:style-name="ro1">
          <table:table-cell office:value-type="float" office:value="635.192138671875">
            <text:p>635.1921386719</text:p>
          </table:table-cell>
          <table:table-cell office:value-type="float" office:value="0.01614714">
            <text:p>0.01614714</text:p>
          </table:table-cell>
          <table:table-cell table:number-columns-repeated="4"/>
        </table:table-row>
        <table:table-row table:style-name="ro1">
          <table:table-cell office:value-type="float" office:value="635.311584472656">
            <text:p>635.3115844727</text:p>
          </table:table-cell>
          <table:table-cell office:value-type="float" office:value="0.00749823">
            <text:p>0.00749823</text:p>
          </table:table-cell>
          <table:table-cell table:number-columns-repeated="4"/>
        </table:table-row>
        <table:table-row table:style-name="ro1">
          <table:table-cell office:value-type="float" office:value="635.431091308594">
            <text:p>635.4310913086</text:p>
          </table:table-cell>
          <table:table-cell office:value-type="float" office:value="0.03350684">
            <text:p>0.03350684</text:p>
          </table:table-cell>
          <table:table-cell table:number-columns-repeated="4"/>
        </table:table-row>
        <table:table-row table:style-name="ro1">
          <table:table-cell office:value-type="float" office:value="635.550598144531">
            <text:p>635.5505981445</text:p>
          </table:table-cell>
          <table:table-cell office:value-type="float" office:value="0.02351603">
            <text:p>0.02351603</text:p>
          </table:table-cell>
          <table:table-cell table:number-columns-repeated="4"/>
        </table:table-row>
        <table:table-row table:style-name="ro1">
          <table:table-cell office:value-type="float" office:value="635.670043945313">
            <text:p>635.6700439453</text:p>
          </table:table-cell>
          <table:table-cell office:value-type="float" office:value="0.01111197">
            <text:p>0.01111197</text:p>
          </table:table-cell>
          <table:table-cell table:number-columns-repeated="4"/>
        </table:table-row>
        <table:table-row table:style-name="ro1">
          <table:table-cell office:value-type="float" office:value="635.78955078125">
            <text:p>635.7895507813</text:p>
          </table:table-cell>
          <table:table-cell office:value-type="float" office:value="0.01897503">
            <text:p>0.01897503</text:p>
          </table:table-cell>
          <table:table-cell table:number-columns-repeated="4"/>
        </table:table-row>
        <table:table-row table:style-name="ro1">
          <table:table-cell office:value-type="float" office:value="635.909057617188">
            <text:p>635.9090576172</text:p>
          </table:table-cell>
          <table:table-cell office:value-type="float" office:value="0.01641889">
            <text:p>0.01641889</text:p>
          </table:table-cell>
          <table:table-cell table:number-columns-repeated="4"/>
        </table:table-row>
        <table:table-row table:style-name="ro1">
          <table:table-cell office:value-type="float" office:value="636.028503417969">
            <text:p>636.028503418</text:p>
          </table:table-cell>
          <table:table-cell office:value-type="float" office:value="0.01305857">
            <text:p>0.01305857</text:p>
          </table:table-cell>
          <table:table-cell table:number-columns-repeated="4"/>
        </table:table-row>
        <table:table-row table:style-name="ro1">
          <table:table-cell office:value-type="float" office:value="636.148010253906">
            <text:p>636.1480102539</text:p>
          </table:table-cell>
          <table:table-cell office:value-type="float" office:value="0.01270274">
            <text:p>0.01270274</text:p>
          </table:table-cell>
          <table:table-cell table:number-columns-repeated="4"/>
        </table:table-row>
        <table:table-row table:style-name="ro1">
          <table:table-cell office:value-type="float" office:value="636.267517089844">
            <text:p>636.2675170898</text:p>
          </table:table-cell>
          <table:table-cell office:value-type="float" office:value="0.02599901">
            <text:p>0.02599901</text:p>
          </table:table-cell>
          <table:table-cell table:number-columns-repeated="4"/>
        </table:table-row>
        <table:table-row table:style-name="ro1">
          <table:table-cell office:value-type="float" office:value="636.387023925781">
            <text:p>636.3870239258</text:p>
          </table:table-cell>
          <table:table-cell office:value-type="float" office:value="0.02688795">
            <text:p>0.02688795</text:p>
          </table:table-cell>
          <table:table-cell table:number-columns-repeated="4"/>
        </table:table-row>
        <table:table-row table:style-name="ro1">
          <table:table-cell office:value-type="float" office:value="636.506469726563">
            <text:p>636.5064697266</text:p>
          </table:table-cell>
          <table:table-cell office:value-type="float" office:value="0.0185369">
            <text:p>0.0185369</text:p>
          </table:table-cell>
          <table:table-cell table:number-columns-repeated="4"/>
        </table:table-row>
        <table:table-row table:style-name="ro1">
          <table:table-cell office:value-type="float" office:value="636.6259765625">
            <text:p>636.6259765625</text:p>
          </table:table-cell>
          <table:table-cell office:value-type="float" office:value="0.02625916">
            <text:p>0.02625916</text:p>
          </table:table-cell>
          <table:table-cell table:number-columns-repeated="4"/>
        </table:table-row>
        <table:table-row table:style-name="ro1">
          <table:table-cell office:value-type="float" office:value="636.745483398438">
            <text:p>636.7454833984</text:p>
          </table:table-cell>
          <table:table-cell office:value-type="float" office:value="0.009534664">
            <text:p>0.009534664</text:p>
          </table:table-cell>
          <table:table-cell table:number-columns-repeated="4"/>
        </table:table-row>
        <table:table-row table:style-name="ro1">
          <table:table-cell office:value-type="float" office:value="636.864990234375">
            <text:p>636.8649902344</text:p>
          </table:table-cell>
          <table:table-cell office:value-type="float" office:value="0.01466212">
            <text:p>0.01466212</text:p>
          </table:table-cell>
          <table:table-cell table:number-columns-repeated="4"/>
        </table:table-row>
        <table:table-row table:style-name="ro1">
          <table:table-cell office:value-type="float" office:value="636.984497070313">
            <text:p>636.9844970703</text:p>
          </table:table-cell>
          <table:table-cell office:value-type="float" office:value="0.009490166">
            <text:p>0.009490166</text:p>
          </table:table-cell>
          <table:table-cell table:number-columns-repeated="4"/>
        </table:table-row>
        <table:table-row table:style-name="ro1">
          <table:table-cell office:value-type="float" office:value="637.10400390625">
            <text:p>637.1040039063</text:p>
          </table:table-cell>
          <table:table-cell office:value-type="float" office:value="0.009904582">
            <text:p>0.009904582</text:p>
          </table:table-cell>
          <table:table-cell table:number-columns-repeated="4"/>
        </table:table-row>
        <table:table-row table:style-name="ro1">
          <table:table-cell office:value-type="float" office:value="637.223510742188">
            <text:p>637.2235107422</text:p>
          </table:table-cell>
          <table:table-cell office:value-type="float" office:value="0.01880211">
            <text:p>0.01880211</text:p>
          </table:table-cell>
          <table:table-cell table:number-columns-repeated="4"/>
        </table:table-row>
        <table:table-row table:style-name="ro1">
          <table:table-cell office:value-type="float" office:value="637.343017578125">
            <text:p>637.3430175781</text:p>
          </table:table-cell>
          <table:table-cell office:value-type="float" office:value="0.02700509">
            <text:p>0.02700509</text:p>
          </table:table-cell>
          <table:table-cell table:number-columns-repeated="4"/>
        </table:table-row>
        <table:table-row table:style-name="ro1">
          <table:table-cell office:value-type="float" office:value="637.462524414063">
            <text:p>637.4625244141</text:p>
          </table:table-cell>
          <table:table-cell office:value-type="float" office:value="0.009370959">
            <text:p>0.009370959</text:p>
          </table:table-cell>
          <table:table-cell table:number-columns-repeated="4"/>
        </table:table-row>
        <table:table-row table:style-name="ro1">
          <table:table-cell office:value-type="float" office:value="637.58203125">
            <text:p>637.58203125</text:p>
          </table:table-cell>
          <table:table-cell office:value-type="float" office:value="0.03610576">
            <text:p>0.03610576</text:p>
          </table:table-cell>
          <table:table-cell table:number-columns-repeated="4"/>
        </table:table-row>
        <table:table-row table:style-name="ro1">
          <table:table-cell office:value-type="float" office:value="637.701538085938">
            <text:p>637.7015380859</text:p>
          </table:table-cell>
          <table:table-cell office:value-type="float" office:value="0.01637461">
            <text:p>0.01637461</text:p>
          </table:table-cell>
          <table:table-cell table:number-columns-repeated="4"/>
        </table:table-row>
        <table:table-row table:style-name="ro1">
          <table:table-cell office:value-type="float" office:value="637.821044921875">
            <text:p>637.8210449219</text:p>
          </table:table-cell>
          <table:table-cell office:value-type="float" office:value="0.01367568">
            <text:p>0.01367568</text:p>
          </table:table-cell>
          <table:table-cell table:number-columns-repeated="4"/>
        </table:table-row>
        <table:table-row table:style-name="ro1">
          <table:table-cell office:value-type="float" office:value="637.940551757813">
            <text:p>637.9405517578</text:p>
          </table:table-cell>
          <table:table-cell office:value-type="float" office:value="0.008626311">
            <text:p>0.008626311</text:p>
          </table:table-cell>
          <table:table-cell table:number-columns-repeated="4"/>
        </table:table-row>
        <table:table-row table:style-name="ro1">
          <table:table-cell office:value-type="float" office:value="638.060119628906">
            <text:p>638.0601196289</text:p>
          </table:table-cell>
          <table:table-cell office:value-type="float" office:value="0.00727386">
            <text:p>0.00727386</text:p>
          </table:table-cell>
          <table:table-cell table:number-columns-repeated="4"/>
        </table:table-row>
        <table:table-row table:style-name="ro1">
          <table:table-cell office:value-type="float" office:value="638.179626464844">
            <text:p>638.1796264648</text:p>
          </table:table-cell>
          <table:table-cell office:value-type="float" office:value="0.009873094">
            <text:p>0.009873094</text:p>
          </table:table-cell>
          <table:table-cell table:number-columns-repeated="4"/>
        </table:table-row>
        <table:table-row table:style-name="ro1">
          <table:table-cell office:value-type="float" office:value="638.299133300781">
            <text:p>638.2991333008</text:p>
          </table:table-cell>
          <table:table-cell office:value-type="float" office:value="0.02653459">
            <text:p>0.02653459</text:p>
          </table:table-cell>
          <table:table-cell table:number-columns-repeated="4"/>
        </table:table-row>
        <table:table-row table:style-name="ro1">
          <table:table-cell office:value-type="float" office:value="638.418640136719">
            <text:p>638.4186401367</text:p>
          </table:table-cell>
          <table:table-cell office:value-type="float" office:value="0.0305562">
            <text:p>0.0305562</text:p>
          </table:table-cell>
          <table:table-cell table:number-columns-repeated="4"/>
        </table:table-row>
        <table:table-row table:style-name="ro1">
          <table:table-cell office:value-type="float" office:value="638.538208007813">
            <text:p>638.5382080078</text:p>
          </table:table-cell>
          <table:table-cell office:value-type="float" office:value="0.01148179">
            <text:p>0.01148179</text:p>
          </table:table-cell>
          <table:table-cell table:number-columns-repeated="4"/>
        </table:table-row>
        <table:table-row table:style-name="ro1">
          <table:table-cell office:value-type="float" office:value="638.65771484375">
            <text:p>638.6577148438</text:p>
          </table:table-cell>
          <table:table-cell office:value-type="float" office:value="0.01285211">
            <text:p>0.01285211</text:p>
          </table:table-cell>
          <table:table-cell table:number-columns-repeated="4"/>
        </table:table-row>
        <table:table-row table:style-name="ro1">
          <table:table-cell office:value-type="float" office:value="638.777221679688">
            <text:p>638.7772216797</text:p>
          </table:table-cell>
          <table:table-cell office:value-type="float" office:value="0.009698222">
            <text:p>0.009698222</text:p>
          </table:table-cell>
          <table:table-cell table:number-columns-repeated="4"/>
        </table:table-row>
        <table:table-row table:style-name="ro1">
          <table:table-cell office:value-type="float" office:value="638.896789550781">
            <text:p>638.8967895508</text:p>
          </table:table-cell>
          <table:table-cell office:value-type="float" office:value="0.02690989">
            <text:p>0.02690989</text:p>
          </table:table-cell>
          <table:table-cell table:number-columns-repeated="4"/>
        </table:table-row>
        <table:table-row table:style-name="ro1">
          <table:table-cell office:value-type="float" office:value="639.016296386719">
            <text:p>639.0162963867</text:p>
          </table:table-cell>
          <table:table-cell office:value-type="float" office:value="0.01710601">
            <text:p>0.01710601</text:p>
          </table:table-cell>
          <table:table-cell table:number-columns-repeated="4"/>
        </table:table-row>
        <table:table-row table:style-name="ro1">
          <table:table-cell office:value-type="float" office:value="639.135864257813">
            <text:p>639.1358642578</text:p>
          </table:table-cell>
          <table:table-cell office:value-type="float" office:value="0.004467327">
            <text:p>0.004467327</text:p>
          </table:table-cell>
          <table:table-cell table:number-columns-repeated="4"/>
        </table:table-row>
        <table:table-row table:style-name="ro1">
          <table:table-cell office:value-type="float" office:value="639.25537109375">
            <text:p>639.2553710938</text:p>
          </table:table-cell>
          <table:table-cell office:value-type="float" office:value="0.01149942">
            <text:p>0.01149942</text:p>
          </table:table-cell>
          <table:table-cell table:number-columns-repeated="4"/>
        </table:table-row>
        <table:table-row table:style-name="ro1">
          <table:table-cell office:value-type="float" office:value="639.374938964844">
            <text:p>639.3749389648</text:p>
          </table:table-cell>
          <table:table-cell office:value-type="float" office:value="0.01759095">
            <text:p>0.01759095</text:p>
          </table:table-cell>
          <table:table-cell table:number-columns-repeated="4"/>
        </table:table-row>
        <table:table-row table:style-name="ro1">
          <table:table-cell office:value-type="float" office:value="639.494445800781">
            <text:p>639.4944458008</text:p>
          </table:table-cell>
          <table:table-cell office:value-type="float" office:value="0.01158802">
            <text:p>0.01158802</text:p>
          </table:table-cell>
          <table:table-cell table:number-columns-repeated="4"/>
        </table:table-row>
        <table:table-row table:style-name="ro1">
          <table:table-cell office:value-type="float" office:value="639.614013671875">
            <text:p>639.6140136719</text:p>
          </table:table-cell>
          <table:table-cell office:value-type="float" office:value="0.01227225">
            <text:p>0.01227225</text:p>
          </table:table-cell>
          <table:table-cell table:number-columns-repeated="4"/>
        </table:table-row>
        <table:table-row table:style-name="ro1">
          <table:table-cell office:value-type="float" office:value="639.733520507813">
            <text:p>639.7335205078</text:p>
          </table:table-cell>
          <table:table-cell office:value-type="float" office:value="0.02804287">
            <text:p>0.02804287</text:p>
          </table:table-cell>
          <table:table-cell table:number-columns-repeated="4"/>
        </table:table-row>
        <table:table-row table:style-name="ro1">
          <table:table-cell office:value-type="float" office:value="639.853088378906">
            <text:p>639.8530883789</text:p>
          </table:table-cell>
          <table:table-cell office:value-type="float" office:value="0.00989447">
            <text:p>0.00989447</text:p>
          </table:table-cell>
          <table:table-cell table:number-columns-repeated="4"/>
        </table:table-row>
        <table:table-row table:style-name="ro1">
          <table:table-cell office:value-type="float" office:value="639.972595214844">
            <text:p>639.9725952148</text:p>
          </table:table-cell>
          <table:table-cell office:value-type="float" office:value="0.02707065">
            <text:p>0.02707065</text:p>
          </table:table-cell>
          <table:table-cell table:number-columns-repeated="4"/>
        </table:table-row>
        <table:table-row table:style-name="ro1">
          <table:table-cell office:value-type="float" office:value="640.092163085938">
            <text:p>640.0921630859</text:p>
          </table:table-cell>
          <table:table-cell office:value-type="float" office:value="0.009434109">
            <text:p>0.009434109</text:p>
          </table:table-cell>
          <table:table-cell table:number-columns-repeated="4"/>
        </table:table-row>
        <table:table-row table:style-name="ro1">
          <table:table-cell office:value-type="float" office:value="640.211730957031">
            <text:p>640.211730957</text:p>
          </table:table-cell>
          <table:table-cell office:value-type="float" office:value="0.02423559">
            <text:p>0.02423559</text:p>
          </table:table-cell>
          <table:table-cell table:number-columns-repeated="4"/>
        </table:table-row>
        <table:table-row table:style-name="ro1">
          <table:table-cell office:value-type="float" office:value="640.331237792969">
            <text:p>640.331237793</text:p>
          </table:table-cell>
          <table:table-cell office:value-type="float" office:value="0.01511749">
            <text:p>0.01511749</text:p>
          </table:table-cell>
          <table:table-cell table:number-columns-repeated="4"/>
        </table:table-row>
        <table:table-row table:style-name="ro1">
          <table:table-cell office:value-type="float" office:value="640.450805664063">
            <text:p>640.4508056641</text:p>
          </table:table-cell>
          <table:table-cell office:value-type="float" office:value="0.008642527">
            <text:p>0.008642527</text:p>
          </table:table-cell>
          <table:table-cell table:number-columns-repeated="4"/>
        </table:table-row>
        <table:table-row table:style-name="ro1">
          <table:table-cell office:value-type="float" office:value="640.570373535156">
            <text:p>640.5703735352</text:p>
          </table:table-cell>
          <table:table-cell office:value-type="float" office:value="0.02158027">
            <text:p>0.02158027</text:p>
          </table:table-cell>
          <table:table-cell table:number-columns-repeated="4"/>
        </table:table-row>
        <table:table-row table:style-name="ro1">
          <table:table-cell office:value-type="float" office:value="640.68994140625">
            <text:p>640.6899414063</text:p>
          </table:table-cell>
          <table:table-cell office:value-type="float" office:value="0.02233489">
            <text:p>0.02233489</text:p>
          </table:table-cell>
          <table:table-cell table:number-columns-repeated="4"/>
        </table:table-row>
        <table:table-row table:style-name="ro1">
          <table:table-cell office:value-type="float" office:value="640.809509277344">
            <text:p>640.8095092773</text:p>
          </table:table-cell>
          <table:table-cell office:value-type="float" office:value="0.009137603">
            <text:p>0.009137603</text:p>
          </table:table-cell>
          <table:table-cell table:number-columns-repeated="4"/>
        </table:table-row>
        <table:table-row table:style-name="ro1">
          <table:table-cell office:value-type="float" office:value="640.929016113281">
            <text:p>640.9290161133</text:p>
          </table:table-cell>
          <table:table-cell office:value-type="float" office:value="0.004863025">
            <text:p>0.004863025</text:p>
          </table:table-cell>
          <table:table-cell table:number-columns-repeated="4"/>
        </table:table-row>
        <table:table-row table:style-name="ro1">
          <table:table-cell office:value-type="float" office:value="641.048583984375">
            <text:p>641.0485839844</text:p>
          </table:table-cell>
          <table:table-cell office:value-type="float" office:value="0.004291133">
            <text:p>0.004291133</text:p>
          </table:table-cell>
          <table:table-cell table:number-columns-repeated="4"/>
        </table:table-row>
        <table:table-row table:style-name="ro1">
          <table:table-cell office:value-type="float" office:value="641.168151855469">
            <text:p>641.1681518555</text:p>
          </table:table-cell>
          <table:table-cell office:value-type="float" office:value="0.009835289">
            <text:p>0.009835289</text:p>
          </table:table-cell>
          <table:table-cell table:number-columns-repeated="4"/>
        </table:table-row>
        <table:table-row table:style-name="ro1">
          <table:table-cell office:value-type="float" office:value="641.287719726563">
            <text:p>641.2877197266</text:p>
          </table:table-cell>
          <table:table-cell office:value-type="float" office:value="0.009935444">
            <text:p>0.009935444</text:p>
          </table:table-cell>
          <table:table-cell table:number-columns-repeated="4"/>
        </table:table-row>
        <table:table-row table:style-name="ro1">
          <table:table-cell office:value-type="float" office:value="641.407287597656">
            <text:p>641.4072875977</text:p>
          </table:table-cell>
          <table:table-cell office:value-type="float" office:value="0.01618">
            <text:p>0.01618</text:p>
          </table:table-cell>
          <table:table-cell table:number-columns-repeated="4"/>
        </table:table-row>
        <table:table-row table:style-name="ro1">
          <table:table-cell office:value-type="float" office:value="641.52685546875">
            <text:p>641.5268554688</text:p>
          </table:table-cell>
          <table:table-cell office:value-type="float" office:value="0.02151936">
            <text:p>0.02151936</text:p>
          </table:table-cell>
          <table:table-cell table:number-columns-repeated="4"/>
        </table:table-row>
        <table:table-row table:style-name="ro1">
          <table:table-cell office:value-type="float" office:value="641.646423339844">
            <text:p>641.6464233398</text:p>
          </table:table-cell>
          <table:table-cell office:value-type="float" office:value="0.01283511">
            <text:p>0.01283511</text:p>
          </table:table-cell>
          <table:table-cell table:number-columns-repeated="4"/>
        </table:table-row>
        <table:table-row table:style-name="ro1">
          <table:table-cell office:value-type="float" office:value="641.765991210938">
            <text:p>641.7659912109</text:p>
          </table:table-cell>
          <table:table-cell office:value-type="float" office:value="0.007607091">
            <text:p>0.007607091</text:p>
          </table:table-cell>
          <table:table-cell table:number-columns-repeated="4"/>
        </table:table-row>
        <table:table-row table:style-name="ro1">
          <table:table-cell office:value-type="float" office:value="641.885559082031">
            <text:p>641.885559082</text:p>
          </table:table-cell>
          <table:table-cell office:value-type="float" office:value="0.01712299">
            <text:p>0.01712299</text:p>
          </table:table-cell>
          <table:table-cell table:number-columns-repeated="4"/>
        </table:table-row>
        <table:table-row table:style-name="ro1">
          <table:table-cell office:value-type="float" office:value="642.005126953125">
            <text:p>642.0051269531</text:p>
          </table:table-cell>
          <table:table-cell office:value-type="float" office:value="0.01111696">
            <text:p>0.01111696</text:p>
          </table:table-cell>
          <table:table-cell table:number-columns-repeated="4"/>
        </table:table-row>
        <table:table-row table:style-name="ro1">
          <table:table-cell office:value-type="float" office:value="642.124694824219">
            <text:p>642.1246948242</text:p>
          </table:table-cell>
          <table:table-cell office:value-type="float" office:value="0.01439466">
            <text:p>0.01439466</text:p>
          </table:table-cell>
          <table:table-cell table:number-columns-repeated="4"/>
        </table:table-row>
        <table:table-row table:style-name="ro1">
          <table:table-cell office:value-type="float" office:value="642.244262695313">
            <text:p>642.2442626953</text:p>
          </table:table-cell>
          <table:table-cell office:value-type="float" office:value="0.009545214">
            <text:p>0.009545214</text:p>
          </table:table-cell>
          <table:table-cell table:number-columns-repeated="4"/>
        </table:table-row>
        <table:table-row table:style-name="ro1">
          <table:table-cell office:value-type="float" office:value="642.363891601563">
            <text:p>642.3638916016</text:p>
          </table:table-cell>
          <table:table-cell office:value-type="float" office:value="0.006967168">
            <text:p>0.006967168</text:p>
          </table:table-cell>
          <table:table-cell table:number-columns-repeated="4"/>
        </table:table-row>
        <table:table-row table:style-name="ro1">
          <table:table-cell office:value-type="float" office:value="642.483459472656">
            <text:p>642.4834594727</text:p>
          </table:table-cell>
          <table:table-cell office:value-type="float" office:value="0.009809165">
            <text:p>0.009809165</text:p>
          </table:table-cell>
          <table:table-cell table:number-columns-repeated="4"/>
        </table:table-row>
        <table:table-row table:style-name="ro1">
          <table:table-cell office:value-type="float" office:value="642.60302734375">
            <text:p>642.6030273438</text:p>
          </table:table-cell>
          <table:table-cell office:value-type="float" office:value="0.02117056">
            <text:p>0.02117056</text:p>
          </table:table-cell>
          <table:table-cell table:number-columns-repeated="4"/>
        </table:table-row>
        <table:table-row table:style-name="ro1">
          <table:table-cell office:value-type="float" office:value="642.722595214844">
            <text:p>642.7225952148</text:p>
          </table:table-cell>
          <table:table-cell office:value-type="float" office:value="0.006095086">
            <text:p>0.006095086</text:p>
          </table:table-cell>
          <table:table-cell table:number-columns-repeated="4"/>
        </table:table-row>
        <table:table-row table:style-name="ro1">
          <table:table-cell office:value-type="float" office:value="642.842163085938">
            <text:p>642.8421630859</text:p>
          </table:table-cell>
          <table:table-cell office:value-type="float" office:value="0.008596573">
            <text:p>0.008596573</text:p>
          </table:table-cell>
          <table:table-cell table:number-columns-repeated="4"/>
        </table:table-row>
        <table:table-row table:style-name="ro1">
          <table:table-cell office:value-type="float" office:value="642.961791992188">
            <text:p>642.9617919922</text:p>
          </table:table-cell>
          <table:table-cell office:value-type="float" office:value="0.01178028">
            <text:p>0.01178028</text:p>
          </table:table-cell>
          <table:table-cell table:number-columns-repeated="4"/>
        </table:table-row>
        <table:table-row table:style-name="ro1">
          <table:table-cell office:value-type="float" office:value="643.081359863281">
            <text:p>643.0813598633</text:p>
          </table:table-cell>
          <table:table-cell office:value-type="float" office:value="0.01924822">
            <text:p>0.01924822</text:p>
          </table:table-cell>
          <table:table-cell table:number-columns-repeated="4"/>
        </table:table-row>
        <table:table-row table:style-name="ro1">
          <table:table-cell office:value-type="float" office:value="643.200927734375">
            <text:p>643.2009277344</text:p>
          </table:table-cell>
          <table:table-cell office:value-type="float" office:value="0.01489904">
            <text:p>0.01489904</text:p>
          </table:table-cell>
          <table:table-cell table:number-columns-repeated="4"/>
        </table:table-row>
        <table:table-row table:style-name="ro1">
          <table:table-cell office:value-type="float" office:value="643.320556640625">
            <text:p>643.3205566406</text:p>
          </table:table-cell>
          <table:table-cell office:value-type="float" office:value="0.01240424">
            <text:p>0.01240424</text:p>
          </table:table-cell>
          <table:table-cell table:number-columns-repeated="4"/>
        </table:table-row>
        <table:table-row table:style-name="ro1">
          <table:table-cell office:value-type="float" office:value="643.440124511719">
            <text:p>643.4401245117</text:p>
          </table:table-cell>
          <table:table-cell office:value-type="float" office:value="0.02310305">
            <text:p>0.02310305</text:p>
          </table:table-cell>
          <table:table-cell table:number-columns-repeated="4"/>
        </table:table-row>
        <table:table-row table:style-name="ro1">
          <table:table-cell office:value-type="float" office:value="643.559753417969">
            <text:p>643.559753418</text:p>
          </table:table-cell>
          <table:table-cell office:value-type="float" office:value="0.02134624">
            <text:p>0.02134624</text:p>
          </table:table-cell>
          <table:table-cell table:number-columns-repeated="4"/>
        </table:table-row>
        <table:table-row table:style-name="ro1">
          <table:table-cell office:value-type="float" office:value="643.679321289063">
            <text:p>643.6793212891</text:p>
          </table:table-cell>
          <table:table-cell office:value-type="float" office:value="0.01724784">
            <text:p>0.01724784</text:p>
          </table:table-cell>
          <table:table-cell table:number-columns-repeated="4"/>
        </table:table-row>
        <table:table-row table:style-name="ro1">
          <table:table-cell office:value-type="float" office:value="643.798950195313">
            <text:p>643.7989501953</text:p>
          </table:table-cell>
          <table:table-cell office:value-type="float" office:value="0.01259693">
            <text:p>0.01259693</text:p>
          </table:table-cell>
          <table:table-cell table:number-columns-repeated="4"/>
        </table:table-row>
        <table:table-row table:style-name="ro1">
          <table:table-cell office:value-type="float" office:value="643.918518066406">
            <text:p>643.9185180664</text:p>
          </table:table-cell>
          <table:table-cell office:value-type="float" office:value="0.01105509">
            <text:p>0.01105509</text:p>
          </table:table-cell>
          <table:table-cell table:number-columns-repeated="4"/>
        </table:table-row>
        <table:table-row table:style-name="ro1">
          <table:table-cell office:value-type="float" office:value="644.038146972656">
            <text:p>644.0381469727</text:p>
          </table:table-cell>
          <table:table-cell office:value-type="float" office:value="0.02757867">
            <text:p>0.02757867</text:p>
          </table:table-cell>
          <table:table-cell table:number-columns-repeated="4"/>
        </table:table-row>
        <table:table-row table:style-name="ro1">
          <table:table-cell office:value-type="float" office:value="644.15771484375">
            <text:p>644.1577148438</text:p>
          </table:table-cell>
          <table:table-cell office:value-type="float" office:value="0.005910462">
            <text:p>0.005910462</text:p>
          </table:table-cell>
          <table:table-cell table:number-columns-repeated="4"/>
        </table:table-row>
        <table:table-row table:style-name="ro1">
          <table:table-cell office:value-type="float" office:value="644.27734375">
            <text:p>644.27734375</text:p>
          </table:table-cell>
          <table:table-cell office:value-type="float" office:value="0.007076684">
            <text:p>0.007076684</text:p>
          </table:table-cell>
          <table:table-cell table:number-columns-repeated="4"/>
        </table:table-row>
        <table:table-row table:style-name="ro1">
          <table:table-cell office:value-type="float" office:value="644.396911621094">
            <text:p>644.3969116211</text:p>
          </table:table-cell>
          <table:table-cell office:value-type="float" office:value="0.009576532">
            <text:p>0.009576532</text:p>
          </table:table-cell>
          <table:table-cell table:number-columns-repeated="4"/>
        </table:table-row>
        <table:table-row table:style-name="ro1">
          <table:table-cell office:value-type="float" office:value="644.516540527344">
            <text:p>644.5165405273</text:p>
          </table:table-cell>
          <table:table-cell office:value-type="float" office:value="0.009847437">
            <text:p>0.009847437</text:p>
          </table:table-cell>
          <table:table-cell table:number-columns-repeated="4"/>
        </table:table-row>
        <table:table-row table:style-name="ro1">
          <table:table-cell office:value-type="float" office:value="644.636169433594">
            <text:p>644.6361694336</text:p>
          </table:table-cell>
          <table:table-cell office:value-type="float" office:value="0.007316547">
            <text:p>0.007316547</text:p>
          </table:table-cell>
          <table:table-cell table:number-columns-repeated="4"/>
        </table:table-row>
        <table:table-row table:style-name="ro1">
          <table:table-cell office:value-type="float" office:value="644.755737304688">
            <text:p>644.7557373047</text:p>
          </table:table-cell>
          <table:table-cell office:value-type="float" office:value="0.008500637">
            <text:p>0.008500637</text:p>
          </table:table-cell>
          <table:table-cell table:number-columns-repeated="4"/>
        </table:table-row>
        <table:table-row table:style-name="ro1">
          <table:table-cell office:value-type="float" office:value="644.875366210938">
            <text:p>644.8753662109</text:p>
          </table:table-cell>
          <table:table-cell office:value-type="float" office:value="0.01835435">
            <text:p>0.01835435</text:p>
          </table:table-cell>
          <table:table-cell table:number-columns-repeated="4"/>
        </table:table-row>
        <table:table-row table:style-name="ro1">
          <table:table-cell office:value-type="float" office:value="644.994995117188">
            <text:p>644.9949951172</text:p>
          </table:table-cell>
          <table:table-cell office:value-type="float" office:value="0.0184627">
            <text:p>0.0184627</text:p>
          </table:table-cell>
          <table:table-cell table:number-columns-repeated="4"/>
        </table:table-row>
        <table:table-row table:style-name="ro1">
          <table:table-cell office:value-type="float" office:value="645.114562988281">
            <text:p>645.1145629883</text:p>
          </table:table-cell>
          <table:table-cell office:value-type="float" office:value="0.02138804">
            <text:p>0.02138804</text:p>
          </table:table-cell>
          <table:table-cell table:number-columns-repeated="4"/>
        </table:table-row>
        <table:table-row table:style-name="ro1">
          <table:table-cell office:value-type="float" office:value="645.234191894531">
            <text:p>645.2341918945</text:p>
          </table:table-cell>
          <table:table-cell office:value-type="float" office:value="0.01984472">
            <text:p>0.01984472</text:p>
          </table:table-cell>
          <table:table-cell table:number-columns-repeated="4"/>
        </table:table-row>
        <table:table-row table:style-name="ro1">
          <table:table-cell office:value-type="float" office:value="645.353820800781">
            <text:p>645.3538208008</text:p>
          </table:table-cell>
          <table:table-cell office:value-type="float" office:value="0.01208567">
            <text:p>0.01208567</text:p>
          </table:table-cell>
          <table:table-cell table:number-columns-repeated="4"/>
        </table:table-row>
        <table:table-row table:style-name="ro1">
          <table:table-cell office:value-type="float" office:value="645.473449707031">
            <text:p>645.473449707</text:p>
          </table:table-cell>
          <table:table-cell office:value-type="float" office:value="0.007194391">
            <text:p>0.007194391</text:p>
          </table:table-cell>
          <table:table-cell table:number-columns-repeated="4"/>
        </table:table-row>
        <table:table-row table:style-name="ro1">
          <table:table-cell office:value-type="float" office:value="645.593078613281">
            <text:p>645.5930786133</text:p>
          </table:table-cell>
          <table:table-cell office:value-type="float" office:value="0.01201029">
            <text:p>0.01201029</text:p>
          </table:table-cell>
          <table:table-cell table:number-columns-repeated="4"/>
        </table:table-row>
        <table:table-row table:style-name="ro1">
          <table:table-cell office:value-type="float" office:value="645.712707519531">
            <text:p>645.7127075195</text:p>
          </table:table-cell>
          <table:table-cell office:value-type="float" office:value="0.00879756">
            <text:p>0.00879756</text:p>
          </table:table-cell>
          <table:table-cell table:number-columns-repeated="4"/>
        </table:table-row>
        <table:table-row table:style-name="ro1">
          <table:table-cell office:value-type="float" office:value="645.832336425781">
            <text:p>645.8323364258</text:p>
          </table:table-cell>
          <table:table-cell office:value-type="float" office:value="0.00753851">
            <text:p>0.00753851</text:p>
          </table:table-cell>
          <table:table-cell table:number-columns-repeated="4"/>
        </table:table-row>
        <table:table-row table:style-name="ro1">
          <table:table-cell office:value-type="float" office:value="645.951965332031">
            <text:p>645.951965332</text:p>
          </table:table-cell>
          <table:table-cell office:value-type="float" office:value="0.01101021">
            <text:p>0.01101021</text:p>
          </table:table-cell>
          <table:table-cell table:number-columns-repeated="4"/>
        </table:table-row>
        <table:table-row table:style-name="ro1">
          <table:table-cell office:value-type="float" office:value="646.071533203125">
            <text:p>646.0715332031</text:p>
          </table:table-cell>
          <table:table-cell office:value-type="float" office:value="0.00878159">
            <text:p>0.00878159</text:p>
          </table:table-cell>
          <table:table-cell table:number-columns-repeated="4"/>
        </table:table-row>
        <table:table-row table:style-name="ro1">
          <table:table-cell office:value-type="float" office:value="646.191162109375">
            <text:p>646.1911621094</text:p>
          </table:table-cell>
          <table:table-cell office:value-type="float" office:value="0.004537057">
            <text:p>0.004537057</text:p>
          </table:table-cell>
          <table:table-cell table:number-columns-repeated="4"/>
        </table:table-row>
        <table:table-row table:style-name="ro1">
          <table:table-cell office:value-type="float" office:value="646.310852050781">
            <text:p>646.3108520508</text:p>
          </table:table-cell>
          <table:table-cell office:value-type="float" office:value="0.01842096">
            <text:p>0.01842096</text:p>
          </table:table-cell>
          <table:table-cell table:number-columns-repeated="4"/>
        </table:table-row>
        <table:table-row table:style-name="ro1">
          <table:table-cell office:value-type="float" office:value="646.430480957031">
            <text:p>646.430480957</text:p>
          </table:table-cell>
          <table:table-cell office:value-type="float" office:value="0.01314149">
            <text:p>0.01314149</text:p>
          </table:table-cell>
          <table:table-cell table:number-columns-repeated="4"/>
        </table:table-row>
        <table:table-row table:style-name="ro1">
          <table:table-cell office:value-type="float" office:value="646.550109863281">
            <text:p>646.5501098633</text:p>
          </table:table-cell>
          <table:table-cell office:value-type="float" office:value="0.02140882">
            <text:p>0.02140882</text:p>
          </table:table-cell>
          <table:table-cell table:number-columns-repeated="4"/>
        </table:table-row>
        <table:table-row table:style-name="ro1">
          <table:table-cell office:value-type="float" office:value="646.669738769531">
            <text:p>646.6697387695</text:p>
          </table:table-cell>
          <table:table-cell office:value-type="float" office:value="0.008594112">
            <text:p>0.008594112</text:p>
          </table:table-cell>
          <table:table-cell table:number-columns-repeated="4"/>
        </table:table-row>
        <table:table-row table:style-name="ro1">
          <table:table-cell office:value-type="float" office:value="646.789367675781">
            <text:p>646.7893676758</text:p>
          </table:table-cell>
          <table:table-cell office:value-type="float" office:value="0.01573137">
            <text:p>0.01573137</text:p>
          </table:table-cell>
          <table:table-cell table:number-columns-repeated="4"/>
        </table:table-row>
        <table:table-row table:style-name="ro1">
          <table:table-cell office:value-type="float" office:value="646.908996582031">
            <text:p>646.908996582</text:p>
          </table:table-cell>
          <table:table-cell office:value-type="float" office:value="0.03355594">
            <text:p>0.03355594</text:p>
          </table:table-cell>
          <table:table-cell table:number-columns-repeated="4"/>
        </table:table-row>
        <table:table-row table:style-name="ro1">
          <table:table-cell office:value-type="float" office:value="647.028625488281">
            <text:p>647.0286254883</text:p>
          </table:table-cell>
          <table:table-cell office:value-type="float" office:value="0.01516171">
            <text:p>0.01516171</text:p>
          </table:table-cell>
          <table:table-cell table:number-columns-repeated="4"/>
        </table:table-row>
        <table:table-row table:style-name="ro1">
          <table:table-cell office:value-type="float" office:value="647.148254394531">
            <text:p>647.1482543945</text:p>
          </table:table-cell>
          <table:table-cell office:value-type="float" office:value="0.009415761">
            <text:p>0.009415761</text:p>
          </table:table-cell>
          <table:table-cell table:number-columns-repeated="4"/>
        </table:table-row>
        <table:table-row table:style-name="ro1">
          <table:table-cell office:value-type="float" office:value="647.267944335938">
            <text:p>647.2679443359</text:p>
          </table:table-cell>
          <table:table-cell office:value-type="float" office:value="0.008882134">
            <text:p>0.008882134</text:p>
          </table:table-cell>
          <table:table-cell table:number-columns-repeated="4"/>
        </table:table-row>
        <table:table-row table:style-name="ro1">
          <table:table-cell office:value-type="float" office:value="647.387573242188">
            <text:p>647.3875732422</text:p>
          </table:table-cell>
          <table:table-cell office:value-type="float" office:value="0.01556019">
            <text:p>0.01556019</text:p>
          </table:table-cell>
          <table:table-cell table:number-columns-repeated="4"/>
        </table:table-row>
        <table:table-row table:style-name="ro1">
          <table:table-cell office:value-type="float" office:value="647.507202148438">
            <text:p>647.5072021484</text:p>
          </table:table-cell>
          <table:table-cell office:value-type="float" office:value="0.008721806">
            <text:p>0.008721806</text:p>
          </table:table-cell>
          <table:table-cell table:number-columns-repeated="4"/>
        </table:table-row>
        <table:table-row table:style-name="ro1">
          <table:table-cell office:value-type="float" office:value="647.626831054688">
            <text:p>647.6268310547</text:p>
          </table:table-cell>
          <table:table-cell office:value-type="float" office:value="0.01334448">
            <text:p>0.01334448</text:p>
          </table:table-cell>
          <table:table-cell table:number-columns-repeated="4"/>
        </table:table-row>
        <table:table-row table:style-name="ro1">
          <table:table-cell office:value-type="float" office:value="647.746520996094">
            <text:p>647.7465209961</text:p>
          </table:table-cell>
          <table:table-cell office:value-type="float" office:value="0.03405957">
            <text:p>0.03405957</text:p>
          </table:table-cell>
          <table:table-cell table:number-columns-repeated="4"/>
        </table:table-row>
        <table:table-row table:style-name="ro1">
          <table:table-cell office:value-type="float" office:value="647.866149902344">
            <text:p>647.8661499023</text:p>
          </table:table-cell>
          <table:table-cell office:value-type="float" office:value="0.00541277">
            <text:p>0.00541277</text:p>
          </table:table-cell>
          <table:table-cell table:number-columns-repeated="4"/>
        </table:table-row>
        <table:table-row table:style-name="ro1">
          <table:table-cell office:value-type="float" office:value="647.985778808594">
            <text:p>647.9857788086</text:p>
          </table:table-cell>
          <table:table-cell office:value-type="float" office:value="0.03162937">
            <text:p>0.03162937</text:p>
          </table:table-cell>
          <table:table-cell table:number-columns-repeated="4"/>
        </table:table-row>
        <table:table-row table:style-name="ro1">
          <table:table-cell office:value-type="float" office:value="648.10546875">
            <text:p>648.10546875</text:p>
          </table:table-cell>
          <table:table-cell office:value-type="float" office:value="0.003589959">
            <text:p>0.003589959</text:p>
          </table:table-cell>
          <table:table-cell table:number-columns-repeated="4"/>
        </table:table-row>
        <table:table-row table:style-name="ro1">
          <table:table-cell office:value-type="float" office:value="648.22509765625">
            <text:p>648.2250976563</text:p>
          </table:table-cell>
          <table:table-cell office:value-type="float" office:value="0.02866096">
            <text:p>0.02866096</text:p>
          </table:table-cell>
          <table:table-cell table:number-columns-repeated="4"/>
        </table:table-row>
        <table:table-row table:style-name="ro1">
          <table:table-cell office:value-type="float" office:value="648.344787597656">
            <text:p>648.3447875977</text:p>
          </table:table-cell>
          <table:table-cell office:value-type="float" office:value="0.01823479">
            <text:p>0.01823479</text:p>
          </table:table-cell>
          <table:table-cell table:number-columns-repeated="4"/>
        </table:table-row>
        <table:table-row table:style-name="ro1">
          <table:table-cell office:value-type="float" office:value="648.464416503906">
            <text:p>648.4644165039</text:p>
          </table:table-cell>
          <table:table-cell office:value-type="float" office:value="0.009603359">
            <text:p>0.009603359</text:p>
          </table:table-cell>
          <table:table-cell table:number-columns-repeated="4"/>
        </table:table-row>
        <table:table-row table:style-name="ro1">
          <table:table-cell office:value-type="float" office:value="648.584106445313">
            <text:p>648.5841064453</text:p>
          </table:table-cell>
          <table:table-cell office:value-type="float" office:value="0.01276145">
            <text:p>0.01276145</text:p>
          </table:table-cell>
          <table:table-cell table:number-columns-repeated="4"/>
        </table:table-row>
        <table:table-row table:style-name="ro1">
          <table:table-cell office:value-type="float" office:value="648.703735351563">
            <text:p>648.7037353516</text:p>
          </table:table-cell>
          <table:table-cell office:value-type="float" office:value="0.01046107">
            <text:p>0.01046107</text:p>
          </table:table-cell>
          <table:table-cell table:number-columns-repeated="4"/>
        </table:table-row>
        <table:table-row table:style-name="ro1">
          <table:table-cell office:value-type="float" office:value="648.823425292969">
            <text:p>648.823425293</text:p>
          </table:table-cell>
          <table:table-cell office:value-type="float" office:value="0.001263538">
            <text:p>0.001263538</text:p>
          </table:table-cell>
          <table:table-cell table:number-columns-repeated="4"/>
        </table:table-row>
        <table:table-row table:style-name="ro1">
          <table:table-cell office:value-type="float" office:value="648.943054199219">
            <text:p>648.9430541992</text:p>
          </table:table-cell>
          <table:table-cell office:value-type="float" office:value="0.006272221">
            <text:p>0.006272221</text:p>
          </table:table-cell>
          <table:table-cell table:number-columns-repeated="4"/>
        </table:table-row>
        <table:table-row table:style-name="ro1">
          <table:table-cell office:value-type="float" office:value="649.062744140625">
            <text:p>649.0627441406</text:p>
          </table:table-cell>
          <table:table-cell office:value-type="float" office:value="0.009462691">
            <text:p>0.009462691</text:p>
          </table:table-cell>
          <table:table-cell table:number-columns-repeated="4"/>
        </table:table-row>
        <table:table-row table:style-name="ro1">
          <table:table-cell office:value-type="float" office:value="649.182434082031">
            <text:p>649.182434082</text:p>
          </table:table-cell>
          <table:table-cell office:value-type="float" office:value="0.01108488">
            <text:p>0.01108488</text:p>
          </table:table-cell>
          <table:table-cell table:number-columns-repeated="4"/>
        </table:table-row>
        <table:table-row table:style-name="ro1">
          <table:table-cell office:value-type="float" office:value="649.302062988281">
            <text:p>649.3020629883</text:p>
          </table:table-cell>
          <table:table-cell office:value-type="float" office:value="0.01530596">
            <text:p>0.01530596</text:p>
          </table:table-cell>
          <table:table-cell table:number-columns-repeated="4"/>
        </table:table-row>
        <table:table-row table:style-name="ro1">
          <table:table-cell office:value-type="float" office:value="649.421752929688">
            <text:p>649.4217529297</text:p>
          </table:table-cell>
          <table:table-cell office:value-type="float" office:value="0.003553063">
            <text:p>0.003553063</text:p>
          </table:table-cell>
          <table:table-cell table:number-columns-repeated="4"/>
        </table:table-row>
        <table:table-row table:style-name="ro1">
          <table:table-cell office:value-type="float" office:value="649.541442871094">
            <text:p>649.5414428711</text:p>
          </table:table-cell>
          <table:table-cell office:value-type="float" office:value="0.008208418">
            <text:p>0.008208418</text:p>
          </table:table-cell>
          <table:table-cell table:number-columns-repeated="4"/>
        </table:table-row>
        <table:table-row table:style-name="ro1">
          <table:table-cell office:value-type="float" office:value="649.661071777344">
            <text:p>649.6610717773</text:p>
          </table:table-cell>
          <table:table-cell office:value-type="float" office:value="0.02646182">
            <text:p>0.02646182</text:p>
          </table:table-cell>
          <table:table-cell table:number-columns-repeated="4"/>
        </table:table-row>
        <table:table-row table:style-name="ro1">
          <table:table-cell office:value-type="float" office:value="649.78076171875">
            <text:p>649.7807617188</text:p>
          </table:table-cell>
          <table:table-cell office:value-type="float" office:value="0.0133843">
            <text:p>0.0133843</text:p>
          </table:table-cell>
          <table:table-cell table:number-columns-repeated="4"/>
        </table:table-row>
        <table:table-row table:style-name="ro1">
          <table:table-cell office:value-type="float" office:value="649.900451660156">
            <text:p>649.9004516602</text:p>
          </table:table-cell>
          <table:table-cell office:value-type="float" office:value="0.01414921">
            <text:p>0.01414921</text:p>
          </table:table-cell>
          <table:table-cell table:number-columns-repeated="4"/>
        </table:table-row>
        <table:table-row table:style-name="ro1">
          <table:table-cell office:value-type="float" office:value="650.020141601563">
            <text:p>650.0201416016</text:p>
          </table:table-cell>
          <table:table-cell office:value-type="float" office:value="0.005551107">
            <text:p>0.005551107</text:p>
          </table:table-cell>
          <table:table-cell table:number-columns-repeated="4"/>
        </table:table-row>
        <table:table-row table:style-name="ro1">
          <table:table-cell office:value-type="float" office:value="650.139770507813">
            <text:p>650.1397705078</text:p>
          </table:table-cell>
          <table:table-cell office:value-type="float" office:value="0.002202006">
            <text:p>0.002202006</text:p>
          </table:table-cell>
          <table:table-cell table:number-columns-repeated="4"/>
        </table:table-row>
        <table:table-row table:style-name="ro1">
          <table:table-cell office:value-type="float" office:value="650.259460449219">
            <text:p>650.2594604492</text:p>
          </table:table-cell>
          <table:table-cell office:value-type="float" office:value="0.004069135">
            <text:p>0.004069135</text:p>
          </table:table-cell>
          <table:table-cell table:number-columns-repeated="4"/>
        </table:table-row>
        <table:table-row table:style-name="ro1">
          <table:table-cell office:value-type="float" office:value="650.379150390625">
            <text:p>650.3791503906</text:p>
          </table:table-cell>
          <table:table-cell office:value-type="float" office:value="0.008802599">
            <text:p>0.008802599</text:p>
          </table:table-cell>
          <table:table-cell table:number-columns-repeated="4"/>
        </table:table-row>
        <table:table-row table:style-name="ro1">
          <table:table-cell office:value-type="float" office:value="650.498840332031">
            <text:p>650.498840332</text:p>
          </table:table-cell>
          <table:table-cell office:value-type="float" office:value="0.005725478">
            <text:p>0.005725478</text:p>
          </table:table-cell>
          <table:table-cell table:number-columns-repeated="4"/>
        </table:table-row>
        <table:table-row table:style-name="ro1">
          <table:table-cell office:value-type="float" office:value="650.618530273438">
            <text:p>650.6185302734</text:p>
          </table:table-cell>
          <table:table-cell office:value-type="float" office:value="0.01271717">
            <text:p>0.01271717</text:p>
          </table:table-cell>
          <table:table-cell table:number-columns-repeated="4"/>
        </table:table-row>
        <table:table-row table:style-name="ro1">
          <table:table-cell office:value-type="float" office:value="650.738220214844">
            <text:p>650.7382202148</text:p>
          </table:table-cell>
          <table:table-cell office:value-type="float" office:value="0.006778624">
            <text:p>0.006778624</text:p>
          </table:table-cell>
          <table:table-cell table:number-columns-repeated="4"/>
        </table:table-row>
        <table:table-row table:style-name="ro1">
          <table:table-cell office:value-type="float" office:value="650.85791015625">
            <text:p>650.8579101563</text:p>
          </table:table-cell>
          <table:table-cell office:value-type="float" office:value="0.01481309">
            <text:p>0.01481309</text:p>
          </table:table-cell>
          <table:table-cell table:number-columns-repeated="4"/>
        </table:table-row>
        <table:table-row table:style-name="ro1">
          <table:table-cell office:value-type="float" office:value="650.977600097656">
            <text:p>650.9776000977</text:p>
          </table:table-cell>
          <table:table-cell office:value-type="float" office:value="0.01617921">
            <text:p>0.01617921</text:p>
          </table:table-cell>
          <table:table-cell table:number-columns-repeated="4"/>
        </table:table-row>
        <table:table-row table:style-name="ro1">
          <table:table-cell office:value-type="float" office:value="651.097290039063">
            <text:p>651.0972900391</text:p>
          </table:table-cell>
          <table:table-cell office:value-type="float" office:value="0.009922319">
            <text:p>0.009922319</text:p>
          </table:table-cell>
          <table:table-cell table:number-columns-repeated="4"/>
        </table:table-row>
        <table:table-row table:style-name="ro1">
          <table:table-cell office:value-type="float" office:value="651.216979980469">
            <text:p>651.2169799805</text:p>
          </table:table-cell>
          <table:table-cell office:value-type="float" office:value="0.01866562">
            <text:p>0.01866562</text:p>
          </table:table-cell>
          <table:table-cell table:number-columns-repeated="4"/>
        </table:table-row>
        <table:table-row table:style-name="ro1">
          <table:table-cell office:value-type="float" office:value="651.336669921875">
            <text:p>651.3366699219</text:p>
          </table:table-cell>
          <table:table-cell office:value-type="float" office:value="0.009365151">
            <text:p>0.009365151</text:p>
          </table:table-cell>
          <table:table-cell table:number-columns-repeated="4"/>
        </table:table-row>
        <table:table-row table:style-name="ro1">
          <table:table-cell office:value-type="float" office:value="651.456359863281">
            <text:p>651.4563598633</text:p>
          </table:table-cell>
          <table:table-cell office:value-type="float" office:value="0.008939601">
            <text:p>0.008939601</text:p>
          </table:table-cell>
          <table:table-cell table:number-columns-repeated="4"/>
        </table:table-row>
        <table:table-row table:style-name="ro1">
          <table:table-cell office:value-type="float" office:value="651.576049804688">
            <text:p>651.5760498047</text:p>
          </table:table-cell>
          <table:table-cell office:value-type="float" office:value="0.00678005">
            <text:p>0.00678005</text:p>
          </table:table-cell>
          <table:table-cell table:number-columns-repeated="4"/>
        </table:table-row>
        <table:table-row table:style-name="ro1">
          <table:table-cell office:value-type="float" office:value="651.695739746094">
            <text:p>651.6957397461</text:p>
          </table:table-cell>
          <table:table-cell office:value-type="float" office:value="0.01501196">
            <text:p>0.01501196</text:p>
          </table:table-cell>
          <table:table-cell table:number-columns-repeated="4"/>
        </table:table-row>
        <table:table-row table:style-name="ro1">
          <table:table-cell office:value-type="float" office:value="651.8154296875">
            <text:p>651.8154296875</text:p>
          </table:table-cell>
          <table:table-cell office:value-type="float" office:value="0.008051045">
            <text:p>0.008051045</text:p>
          </table:table-cell>
          <table:table-cell table:number-columns-repeated="4"/>
        </table:table-row>
        <table:table-row table:style-name="ro1">
          <table:table-cell office:value-type="float" office:value="651.935180664063">
            <text:p>651.9351806641</text:p>
          </table:table-cell>
          <table:table-cell office:value-type="float" office:value="0.003506976">
            <text:p>0.003506976</text:p>
          </table:table-cell>
          <table:table-cell table:number-columns-repeated="4"/>
        </table:table-row>
        <table:table-row table:style-name="ro1">
          <table:table-cell office:value-type="float" office:value="652.054870605469">
            <text:p>652.0548706055</text:p>
          </table:table-cell>
          <table:table-cell office:value-type="float" office:value="0.01139641">
            <text:p>0.01139641</text:p>
          </table:table-cell>
          <table:table-cell table:number-columns-repeated="4"/>
        </table:table-row>
        <table:table-row table:style-name="ro1">
          <table:table-cell office:value-type="float" office:value="652.174560546875">
            <text:p>652.1745605469</text:p>
          </table:table-cell>
          <table:table-cell office:value-type="float" office:value="0.005320783">
            <text:p>0.005320783</text:p>
          </table:table-cell>
          <table:table-cell table:number-columns-repeated="4"/>
        </table:table-row>
        <table:table-row table:style-name="ro1">
          <table:table-cell office:value-type="float" office:value="652.294250488281">
            <text:p>652.2942504883</text:p>
          </table:table-cell>
          <table:table-cell office:value-type="float" office:value="0.006459804">
            <text:p>0.006459804</text:p>
          </table:table-cell>
          <table:table-cell table:number-columns-repeated="4"/>
        </table:table-row>
        <table:table-row table:style-name="ro1">
          <table:table-cell office:value-type="float" office:value="652.414001464844">
            <text:p>652.4140014648</text:p>
          </table:table-cell>
          <table:table-cell office:value-type="float" office:value="0.01148876">
            <text:p>0.01148876</text:p>
          </table:table-cell>
          <table:table-cell table:number-columns-repeated="4"/>
        </table:table-row>
        <table:table-row table:style-name="ro1">
          <table:table-cell office:value-type="float" office:value="652.53369140625">
            <text:p>652.5336914063</text:p>
          </table:table-cell>
          <table:table-cell office:value-type="float" office:value="0.002280146">
            <text:p>0.002280146</text:p>
          </table:table-cell>
          <table:table-cell table:number-columns-repeated="4"/>
        </table:table-row>
        <table:table-row table:style-name="ro1">
          <table:table-cell office:value-type="float" office:value="652.653381347656">
            <text:p>652.6533813477</text:p>
          </table:table-cell>
          <table:table-cell office:value-type="float" office:value="0.008255884">
            <text:p>0.008255884</text:p>
          </table:table-cell>
          <table:table-cell table:number-columns-repeated="4"/>
        </table:table-row>
        <table:table-row table:style-name="ro1">
          <table:table-cell office:value-type="float" office:value="652.773071289063">
            <text:p>652.7730712891</text:p>
          </table:table-cell>
          <table:table-cell office:value-type="float" office:value="0.001364072">
            <text:p>0.001364072</text:p>
          </table:table-cell>
          <table:table-cell table:number-columns-repeated="4"/>
        </table:table-row>
        <table:table-row table:style-name="ro1">
          <table:table-cell office:value-type="float" office:value="652.892822265625">
            <text:p>652.8928222656</text:p>
          </table:table-cell>
          <table:table-cell office:value-type="float" office:value="0.01270351">
            <text:p>0.01270351</text:p>
          </table:table-cell>
          <table:table-cell table:number-columns-repeated="4"/>
        </table:table-row>
        <table:table-row table:style-name="ro1">
          <table:table-cell office:value-type="float" office:value="653.012512207031">
            <text:p>653.012512207</text:p>
          </table:table-cell>
          <table:table-cell office:value-type="float" office:value="0.004026807">
            <text:p>0.004026807</text:p>
          </table:table-cell>
          <table:table-cell table:number-columns-repeated="4"/>
        </table:table-row>
        <table:table-row table:style-name="ro1">
          <table:table-cell office:value-type="float" office:value="653.132263183594">
            <text:p>653.1322631836</text:p>
          </table:table-cell>
          <table:table-cell office:value-type="float" office:value="0.01067777">
            <text:p>0.01067777</text:p>
          </table:table-cell>
          <table:table-cell table:number-columns-repeated="4"/>
        </table:table-row>
        <table:table-row table:style-name="ro1">
          <table:table-cell office:value-type="float" office:value="653.251953125">
            <text:p>653.251953125</text:p>
          </table:table-cell>
          <table:table-cell office:value-type="float" office:value="0.003373145">
            <text:p>0.003373145</text:p>
          </table:table-cell>
          <table:table-cell table:number-columns-repeated="4"/>
        </table:table-row>
        <table:table-row table:style-name="ro1">
          <table:table-cell office:value-type="float" office:value="653.371704101563">
            <text:p>653.3717041016</text:p>
          </table:table-cell>
          <table:table-cell office:value-type="float" office:value="0.01148955">
            <text:p>0.01148955</text:p>
          </table:table-cell>
          <table:table-cell table:number-columns-repeated="4"/>
        </table:table-row>
        <table:table-row table:style-name="ro1">
          <table:table-cell office:value-type="float" office:value="653.491394042969">
            <text:p>653.491394043</text:p>
          </table:table-cell>
          <table:table-cell office:value-type="float" office:value="0.02459685">
            <text:p>0.02459685</text:p>
          </table:table-cell>
          <table:table-cell table:number-columns-repeated="4"/>
        </table:table-row>
        <table:table-row table:style-name="ro1">
          <table:table-cell office:value-type="float" office:value="653.611145019531">
            <text:p>653.6111450195</text:p>
          </table:table-cell>
          <table:table-cell office:value-type="float" office:value="0.01243724">
            <text:p>0.01243724</text:p>
          </table:table-cell>
          <table:table-cell table:number-columns-repeated="4"/>
        </table:table-row>
        <table:table-row table:style-name="ro1">
          <table:table-cell office:value-type="float" office:value="653.730834960938">
            <text:p>653.7308349609</text:p>
          </table:table-cell>
          <table:table-cell office:value-type="float" office:value="0.0277903">
            <text:p>0.0277903</text:p>
          </table:table-cell>
          <table:table-cell table:number-columns-repeated="4"/>
        </table:table-row>
        <table:table-row table:style-name="ro1">
          <table:table-cell office:value-type="float" office:value="653.8505859375">
            <text:p>653.8505859375</text:p>
          </table:table-cell>
          <table:table-cell office:value-type="float" office:value="0.01122942">
            <text:p>0.01122942</text:p>
          </table:table-cell>
          <table:table-cell table:number-columns-repeated="4"/>
        </table:table-row>
        <table:table-row table:style-name="ro1">
          <table:table-cell office:value-type="float" office:value="653.970275878906">
            <text:p>653.9702758789</text:p>
          </table:table-cell>
          <table:table-cell office:value-type="float" office:value="0.02277788">
            <text:p>0.02277788</text:p>
          </table:table-cell>
          <table:table-cell table:number-columns-repeated="4"/>
        </table:table-row>
        <table:table-row table:style-name="ro1">
          <table:table-cell office:value-type="float" office:value="654.090026855469">
            <text:p>654.0900268555</text:p>
          </table:table-cell>
          <table:table-cell office:value-type="float" office:value="0.001930629">
            <text:p>0.001930629</text:p>
          </table:table-cell>
          <table:table-cell table:number-columns-repeated="4"/>
        </table:table-row>
        <table:table-row table:style-name="ro1">
          <table:table-cell office:value-type="float" office:value="654.209716796875">
            <text:p>654.2097167969</text:p>
          </table:table-cell>
          <table:table-cell office:value-type="float" office:value="0.002900729">
            <text:p>0.002900729</text:p>
          </table:table-cell>
          <table:table-cell table:number-columns-repeated="4"/>
        </table:table-row>
        <table:table-row table:style-name="ro1">
          <table:table-cell office:value-type="float" office:value="654.329467773438">
            <text:p>654.3294677734</text:p>
          </table:table-cell>
          <table:table-cell office:value-type="float" office:value="-0.002912702">
            <text:p>-0.002912702</text:p>
          </table:table-cell>
          <table:table-cell table:number-columns-repeated="4"/>
        </table:table-row>
        <table:table-row table:style-name="ro1">
          <table:table-cell office:value-type="float" office:value="654.44921875">
            <text:p>654.44921875</text:p>
          </table:table-cell>
          <table:table-cell office:value-type="float" office:value="0.01555886">
            <text:p>0.01555886</text:p>
          </table:table-cell>
          <table:table-cell table:number-columns-repeated="4"/>
        </table:table-row>
        <table:table-row table:style-name="ro1">
          <table:table-cell office:value-type="float" office:value="654.568969726563">
            <text:p>654.5689697266</text:p>
          </table:table-cell>
          <table:table-cell office:value-type="float" office:value="0.003877038">
            <text:p>0.003877038</text:p>
          </table:table-cell>
          <table:table-cell table:number-columns-repeated="4"/>
        </table:table-row>
        <table:table-row table:style-name="ro1">
          <table:table-cell office:value-type="float" office:value="654.688659667969">
            <text:p>654.688659668</text:p>
          </table:table-cell>
          <table:table-cell office:value-type="float" office:value="0.01157518">
            <text:p>0.01157518</text:p>
          </table:table-cell>
          <table:table-cell table:number-columns-repeated="4"/>
        </table:table-row>
        <table:table-row table:style-name="ro1">
          <table:table-cell office:value-type="float" office:value="654.808410644531">
            <text:p>654.8084106445</text:p>
          </table:table-cell>
          <table:table-cell office:value-type="float" office:value="0.006623632">
            <text:p>0.006623632</text:p>
          </table:table-cell>
          <table:table-cell table:number-columns-repeated="4"/>
        </table:table-row>
        <table:table-row table:style-name="ro1">
          <table:table-cell office:value-type="float" office:value="654.928161621094">
            <text:p>654.9281616211</text:p>
          </table:table-cell>
          <table:table-cell office:value-type="float" office:value="0.006500551">
            <text:p>0.006500551</text:p>
          </table:table-cell>
          <table:table-cell table:number-columns-repeated="4"/>
        </table:table-row>
        <table:table-row table:style-name="ro1">
          <table:table-cell office:value-type="float" office:value="655.047912597656">
            <text:p>655.0479125977</text:p>
          </table:table-cell>
          <table:table-cell office:value-type="float" office:value="0.02221763">
            <text:p>0.02221763</text:p>
          </table:table-cell>
          <table:table-cell table:number-columns-repeated="4"/>
        </table:table-row>
        <table:table-row table:style-name="ro1">
          <table:table-cell office:value-type="float" office:value="655.167602539063">
            <text:p>655.1676025391</text:p>
          </table:table-cell>
          <table:table-cell office:value-type="float" office:value="0.005590382">
            <text:p>0.005590382</text:p>
          </table:table-cell>
          <table:table-cell table:number-columns-repeated="4"/>
        </table:table-row>
        <table:table-row table:style-name="ro1">
          <table:table-cell office:value-type="float" office:value="655.287353515625">
            <text:p>655.2873535156</text:p>
          </table:table-cell>
          <table:table-cell office:value-type="float" office:value="0.01445286">
            <text:p>0.01445286</text:p>
          </table:table-cell>
          <table:table-cell table:number-columns-repeated="4"/>
        </table:table-row>
        <table:table-row table:style-name="ro1">
          <table:table-cell office:value-type="float" office:value="655.407104492188">
            <text:p>655.4071044922</text:p>
          </table:table-cell>
          <table:table-cell office:value-type="float" office:value="-0.0007637039">
            <text:p>-0.0007637039</text:p>
          </table:table-cell>
          <table:table-cell table:number-columns-repeated="4"/>
        </table:table-row>
        <table:table-row table:style-name="ro1">
          <table:table-cell office:value-type="float" office:value="655.52685546875">
            <text:p>655.5268554688</text:p>
          </table:table-cell>
          <table:table-cell office:value-type="float" office:value="0.007283968">
            <text:p>0.007283968</text:p>
          </table:table-cell>
          <table:table-cell table:number-columns-repeated="4"/>
        </table:table-row>
        <table:table-row table:style-name="ro1">
          <table:table-cell office:value-type="float" office:value="655.646606445313">
            <text:p>655.6466064453</text:p>
          </table:table-cell>
          <table:table-cell office:value-type="float" office:value="-0.001927682">
            <text:p>-0.001927682</text:p>
          </table:table-cell>
          <table:table-cell table:number-columns-repeated="4"/>
        </table:table-row>
        <table:table-row table:style-name="ro1">
          <table:table-cell office:value-type="float" office:value="655.766357421875">
            <text:p>655.7663574219</text:p>
          </table:table-cell>
          <table:table-cell office:value-type="float" office:value="0.007243987">
            <text:p>0.007243987</text:p>
          </table:table-cell>
          <table:table-cell table:number-columns-repeated="4"/>
        </table:table-row>
        <table:table-row table:style-name="ro1">
          <table:table-cell office:value-type="float" office:value="655.886108398438">
            <text:p>655.8861083984</text:p>
          </table:table-cell>
          <table:table-cell office:value-type="string">
            <text:p>-2.356432E-05</text:p>
          </table:table-cell>
          <table:table-cell table:number-columns-repeated="4"/>
        </table:table-row>
        <table:table-row table:style-name="ro1">
          <table:table-cell office:value-type="float" office:value="656.005859375">
            <text:p>656.005859375</text:p>
          </table:table-cell>
          <table:table-cell office:value-type="float" office:value="-0.002180574">
            <text:p>-0.002180574</text:p>
          </table:table-cell>
          <table:table-cell table:number-columns-repeated="4"/>
        </table:table-row>
        <table:table-row table:style-name="ro1">
          <table:table-cell office:value-type="float" office:value="656.125610351563">
            <text:p>656.1256103516</text:p>
          </table:table-cell>
          <table:table-cell office:value-type="float" office:value="0.009262347">
            <text:p>0.009262347</text:p>
          </table:table-cell>
          <table:table-cell table:number-columns-repeated="4"/>
        </table:table-row>
        <table:table-row table:style-name="ro1">
          <table:table-cell office:value-type="float" office:value="656.245361328125">
            <text:p>656.2453613281</text:p>
          </table:table-cell>
          <table:table-cell office:value-type="float" office:value="0.004636849">
            <text:p>0.004636849</text:p>
          </table:table-cell>
          <table:table-cell table:number-columns-repeated="4"/>
        </table:table-row>
        <table:table-row table:style-name="ro1">
          <table:table-cell office:value-type="float" office:value="656.365112304688">
            <text:p>656.3651123047</text:p>
          </table:table-cell>
          <table:table-cell office:value-type="float" office:value="0.02176062">
            <text:p>0.02176062</text:p>
          </table:table-cell>
          <table:table-cell table:number-columns-repeated="4"/>
        </table:table-row>
        <table:table-row table:style-name="ro1">
          <table:table-cell office:value-type="float" office:value="656.48486328125">
            <text:p>656.4848632813</text:p>
          </table:table-cell>
          <table:table-cell office:value-type="float" office:value="0.005302597">
            <text:p>0.005302597</text:p>
          </table:table-cell>
          <table:table-cell table:number-columns-repeated="4"/>
        </table:table-row>
        <table:table-row table:style-name="ro1">
          <table:table-cell office:value-type="float" office:value="656.604614257813">
            <text:p>656.6046142578</text:p>
          </table:table-cell>
          <table:table-cell office:value-type="float" office:value="0.008691884">
            <text:p>0.008691884</text:p>
          </table:table-cell>
          <table:table-cell table:number-columns-repeated="4"/>
        </table:table-row>
        <table:table-row table:style-name="ro1">
          <table:table-cell office:value-type="float" office:value="656.724365234375">
            <text:p>656.7243652344</text:p>
          </table:table-cell>
          <table:table-cell office:value-type="float" office:value="0.02294194">
            <text:p>0.02294194</text:p>
          </table:table-cell>
          <table:table-cell table:number-columns-repeated="4"/>
        </table:table-row>
        <table:table-row table:style-name="ro1">
          <table:table-cell office:value-type="float" office:value="656.844116210938">
            <text:p>656.8441162109</text:p>
          </table:table-cell>
          <table:table-cell office:value-type="float" office:value="0.007512545">
            <text:p>0.007512545</text:p>
          </table:table-cell>
          <table:table-cell table:number-columns-repeated="4"/>
        </table:table-row>
        <table:table-row table:style-name="ro1">
          <table:table-cell office:value-type="float" office:value="656.9638671875">
            <text:p>656.9638671875</text:p>
          </table:table-cell>
          <table:table-cell office:value-type="float" office:value="0.005017269">
            <text:p>0.005017269</text:p>
          </table:table-cell>
          <table:table-cell table:number-columns-repeated="4"/>
        </table:table-row>
        <table:table-row table:style-name="ro1">
          <table:table-cell office:value-type="float" office:value="657.083679199219">
            <text:p>657.0836791992</text:p>
          </table:table-cell>
          <table:table-cell office:value-type="float" office:value="0.009760964">
            <text:p>0.009760964</text:p>
          </table:table-cell>
          <table:table-cell table:number-columns-repeated="4"/>
        </table:table-row>
        <table:table-row table:style-name="ro1">
          <table:table-cell office:value-type="float" office:value="657.203430175781">
            <text:p>657.2034301758</text:p>
          </table:table-cell>
          <table:table-cell office:value-type="float" office:value="0.002764681">
            <text:p>0.002764681</text:p>
          </table:table-cell>
          <table:table-cell table:number-columns-repeated="4"/>
        </table:table-row>
        <table:table-row table:style-name="ro1">
          <table:table-cell office:value-type="float" office:value="657.323181152344">
            <text:p>657.3231811523</text:p>
          </table:table-cell>
          <table:table-cell office:value-type="float" office:value="0.01972405">
            <text:p>0.01972405</text:p>
          </table:table-cell>
          <table:table-cell table:number-columns-repeated="4"/>
        </table:table-row>
        <table:table-row table:style-name="ro1">
          <table:table-cell office:value-type="float" office:value="657.442932128906">
            <text:p>657.4429321289</text:p>
          </table:table-cell>
          <table:table-cell office:value-type="float" office:value="0.01413029">
            <text:p>0.01413029</text:p>
          </table:table-cell>
          <table:table-cell table:number-columns-repeated="4"/>
        </table:table-row>
        <table:table-row table:style-name="ro1">
          <table:table-cell office:value-type="float" office:value="657.562744140625">
            <text:p>657.5627441406</text:p>
          </table:table-cell>
          <table:table-cell office:value-type="float" office:value="0.01079757">
            <text:p>0.01079757</text:p>
          </table:table-cell>
          <table:table-cell table:number-columns-repeated="4"/>
        </table:table-row>
        <table:table-row table:style-name="ro1">
          <table:table-cell office:value-type="float" office:value="657.682495117188">
            <text:p>657.6824951172</text:p>
          </table:table-cell>
          <table:table-cell office:value-type="float" office:value="0.01931846">
            <text:p>0.01931846</text:p>
          </table:table-cell>
          <table:table-cell table:number-columns-repeated="4"/>
        </table:table-row>
        <table:table-row table:style-name="ro1">
          <table:table-cell office:value-type="float" office:value="657.80224609375">
            <text:p>657.8022460938</text:p>
          </table:table-cell>
          <table:table-cell office:value-type="float" office:value="0.01375982">
            <text:p>0.01375982</text:p>
          </table:table-cell>
          <table:table-cell table:number-columns-repeated="4"/>
        </table:table-row>
        <table:table-row table:style-name="ro1">
          <table:table-cell office:value-type="float" office:value="657.921997070313">
            <text:p>657.9219970703</text:p>
          </table:table-cell>
          <table:table-cell office:value-type="float" office:value="0.001573172">
            <text:p>0.001573172</text:p>
          </table:table-cell>
          <table:table-cell table:number-columns-repeated="4"/>
        </table:table-row>
        <table:table-row table:style-name="ro1">
          <table:table-cell office:value-type="float" office:value="658.041809082031">
            <text:p>658.041809082</text:p>
          </table:table-cell>
          <table:table-cell office:value-type="float" office:value="0.002737466">
            <text:p>0.002737466</text:p>
          </table:table-cell>
          <table:table-cell table:number-columns-repeated="4"/>
        </table:table-row>
        <table:table-row table:style-name="ro1">
          <table:table-cell office:value-type="float" office:value="658.161560058594">
            <text:p>658.1615600586</text:p>
          </table:table-cell>
          <table:table-cell office:value-type="float" office:value="-0.001485215">
            <text:p>-0.001485215</text:p>
          </table:table-cell>
          <table:table-cell table:number-columns-repeated="4"/>
        </table:table-row>
        <table:table-row table:style-name="ro1">
          <table:table-cell office:value-type="float" office:value="658.281372070313">
            <text:p>658.2813720703</text:p>
          </table:table-cell>
          <table:table-cell office:value-type="float" office:value="0.01888507">
            <text:p>0.01888507</text:p>
          </table:table-cell>
          <table:table-cell table:number-columns-repeated="4"/>
        </table:table-row>
        <table:table-row table:style-name="ro1">
          <table:table-cell office:value-type="float" office:value="658.401123046875">
            <text:p>658.4011230469</text:p>
          </table:table-cell>
          <table:table-cell office:value-type="float" office:value="0.0331987">
            <text:p>0.0331987</text:p>
          </table:table-cell>
          <table:table-cell table:number-columns-repeated="4"/>
        </table:table-row>
        <table:table-row table:style-name="ro1">
          <table:table-cell office:value-type="float" office:value="658.520935058594">
            <text:p>658.5209350586</text:p>
          </table:table-cell>
          <table:table-cell office:value-type="float" office:value="0.00294624">
            <text:p>0.00294624</text:p>
          </table:table-cell>
          <table:table-cell table:number-columns-repeated="4"/>
        </table:table-row>
        <table:table-row table:style-name="ro1">
          <table:table-cell office:value-type="float" office:value="658.640686035156">
            <text:p>658.6406860352</text:p>
          </table:table-cell>
          <table:table-cell office:value-type="float" office:value="0.0008641123">
            <text:p>0.0008641123</text:p>
          </table:table-cell>
          <table:table-cell table:number-columns-repeated="4"/>
        </table:table-row>
        <table:table-row table:style-name="ro1">
          <table:table-cell office:value-type="float" office:value="658.760437011719">
            <text:p>658.7604370117</text:p>
          </table:table-cell>
          <table:table-cell office:value-type="float" office:value="0.005442338">
            <text:p>0.005442338</text:p>
          </table:table-cell>
          <table:table-cell table:number-columns-repeated="4"/>
        </table:table-row>
        <table:table-row table:style-name="ro1">
          <table:table-cell office:value-type="float" office:value="658.880249023438">
            <text:p>658.8802490234</text:p>
          </table:table-cell>
          <table:table-cell office:value-type="float" office:value="0.0008445584">
            <text:p>0.0008445584</text:p>
          </table:table-cell>
          <table:table-cell table:number-columns-repeated="4"/>
        </table:table-row>
        <table:table-row table:style-name="ro1">
          <table:table-cell office:value-type="float" office:value="659.000061035156">
            <text:p>659.0000610352</text:p>
          </table:table-cell>
          <table:table-cell office:value-type="float" office:value="0.002348008">
            <text:p>0.002348008</text:p>
          </table:table-cell>
          <table:table-cell table:number-columns-repeated="4"/>
        </table:table-row>
        <table:table-row table:style-name="ro1">
          <table:table-cell office:value-type="float" office:value="659.119812011719">
            <text:p>659.1198120117</text:p>
          </table:table-cell>
          <table:table-cell office:value-type="float" office:value="-0.0003270197">
            <text:p>-0.0003270197</text:p>
          </table:table-cell>
          <table:table-cell table:number-columns-repeated="4"/>
        </table:table-row>
        <table:table-row table:style-name="ro1">
          <table:table-cell office:value-type="float" office:value="659.239624023438">
            <text:p>659.2396240234</text:p>
          </table:table-cell>
          <table:table-cell office:value-type="float" office:value="0.0109247">
            <text:p>0.0109247</text:p>
          </table:table-cell>
          <table:table-cell table:number-columns-repeated="4"/>
        </table:table-row>
        <table:table-row table:style-name="ro1">
          <table:table-cell office:value-type="float" office:value="659.359375">
            <text:p>659.359375</text:p>
          </table:table-cell>
          <table:table-cell office:value-type="float" office:value="0.00879136">
            <text:p>0.00879136</text:p>
          </table:table-cell>
          <table:table-cell table:number-columns-repeated="4"/>
        </table:table-row>
        <table:table-row table:style-name="ro1">
          <table:table-cell office:value-type="float" office:value="659.479187011719">
            <text:p>659.4791870117</text:p>
          </table:table-cell>
          <table:table-cell office:value-type="float" office:value="0.006017691">
            <text:p>0.006017691</text:p>
          </table:table-cell>
          <table:table-cell table:number-columns-repeated="4"/>
        </table:table-row>
        <table:table-row table:style-name="ro1">
          <table:table-cell office:value-type="float" office:value="659.598999023438">
            <text:p>659.5989990234</text:p>
          </table:table-cell>
          <table:table-cell office:value-type="float" office:value="0.006885707">
            <text:p>0.006885707</text:p>
          </table:table-cell>
          <table:table-cell table:number-columns-repeated="4"/>
        </table:table-row>
        <table:table-row table:style-name="ro1">
          <table:table-cell office:value-type="float" office:value="659.71875">
            <text:p>659.71875</text:p>
          </table:table-cell>
          <table:table-cell office:value-type="float" office:value="0.008565065">
            <text:p>0.008565065</text:p>
          </table:table-cell>
          <table:table-cell table:number-columns-repeated="4"/>
        </table:table-row>
        <table:table-row table:style-name="ro1">
          <table:table-cell office:value-type="float" office:value="659.838562011719">
            <text:p>659.8385620117</text:p>
          </table:table-cell>
          <table:table-cell office:value-type="float" office:value="-0.0003689989">
            <text:p>-0.0003689989</text:p>
          </table:table-cell>
          <table:table-cell table:number-columns-repeated="4"/>
        </table:table-row>
        <table:table-row table:style-name="ro1">
          <table:table-cell office:value-type="float" office:value="659.958374023438">
            <text:p>659.9583740234</text:p>
          </table:table-cell>
          <table:table-cell office:value-type="float" office:value="0.002938776">
            <text:p>0.002938776</text:p>
          </table:table-cell>
          <table:table-cell table:number-columns-repeated="4"/>
        </table:table-row>
        <table:table-row table:style-name="ro1">
          <table:table-cell office:value-type="float" office:value="660.078125">
            <text:p>660.078125</text:p>
          </table:table-cell>
          <table:table-cell office:value-type="float" office:value="-0.002402501">
            <text:p>-0.002402501</text:p>
          </table:table-cell>
          <table:table-cell table:number-columns-repeated="4"/>
        </table:table-row>
        <table:table-row table:style-name="ro1">
          <table:table-cell office:value-type="float" office:value="660.197937011719">
            <text:p>660.1979370117</text:p>
          </table:table-cell>
          <table:table-cell office:value-type="float" office:value="0.01121699">
            <text:p>0.01121699</text:p>
          </table:table-cell>
          <table:table-cell table:number-columns-repeated="4"/>
        </table:table-row>
        <table:table-row table:style-name="ro1">
          <table:table-cell office:value-type="float" office:value="660.317749023438">
            <text:p>660.3177490234</text:p>
          </table:table-cell>
          <table:table-cell office:value-type="float" office:value="0.008309595">
            <text:p>0.008309595</text:p>
          </table:table-cell>
          <table:table-cell table:number-columns-repeated="4"/>
        </table:table-row>
        <table:table-row table:style-name="ro1">
          <table:table-cell office:value-type="float" office:value="660.437561035156">
            <text:p>660.4375610352</text:p>
          </table:table-cell>
          <table:table-cell office:value-type="float" office:value="0.01897284">
            <text:p>0.01897284</text:p>
          </table:table-cell>
          <table:table-cell table:number-columns-repeated="4"/>
        </table:table-row>
        <table:table-row table:style-name="ro1">
          <table:table-cell office:value-type="float" office:value="660.557373046875">
            <text:p>660.5573730469</text:p>
          </table:table-cell>
          <table:table-cell office:value-type="float" office:value="-0.004400309">
            <text:p>-0.004400309</text:p>
          </table:table-cell>
          <table:table-cell table:number-columns-repeated="4"/>
        </table:table-row>
        <table:table-row table:style-name="ro1">
          <table:table-cell office:value-type="float" office:value="660.677124023438">
            <text:p>660.6771240234</text:p>
          </table:table-cell>
          <table:table-cell office:value-type="string">
            <text:p>-8.289523E-05</text:p>
          </table:table-cell>
          <table:table-cell table:number-columns-repeated="4"/>
        </table:table-row>
        <table:table-row table:style-name="ro1">
          <table:table-cell office:value-type="float" office:value="660.796936035156">
            <text:p>660.7969360352</text:p>
          </table:table-cell>
          <table:table-cell office:value-type="float" office:value="0.005507776">
            <text:p>0.005507776</text:p>
          </table:table-cell>
          <table:table-cell table:number-columns-repeated="4"/>
        </table:table-row>
        <table:table-row table:style-name="ro1">
          <table:table-cell office:value-type="float" office:value="660.916748046875">
            <text:p>660.9167480469</text:p>
          </table:table-cell>
          <table:table-cell office:value-type="float" office:value="-0.002814697">
            <text:p>-0.002814697</text:p>
          </table:table-cell>
          <table:table-cell table:number-columns-repeated="4"/>
        </table:table-row>
        <table:table-row table:style-name="ro1">
          <table:table-cell office:value-type="float" office:value="661.036560058594">
            <text:p>661.0365600586</text:p>
          </table:table-cell>
          <table:table-cell office:value-type="float" office:value="0.009099719">
            <text:p>0.009099719</text:p>
          </table:table-cell>
          <table:table-cell table:number-columns-repeated="4"/>
        </table:table-row>
        <table:table-row table:style-name="ro1">
          <table:table-cell office:value-type="float" office:value="661.156372070313">
            <text:p>661.1563720703</text:p>
          </table:table-cell>
          <table:table-cell office:value-type="float" office:value="0.0102937">
            <text:p>0.0102937</text:p>
          </table:table-cell>
          <table:table-cell table:number-columns-repeated="4"/>
        </table:table-row>
        <table:table-row table:style-name="ro1">
          <table:table-cell office:value-type="float" office:value="661.276184082031">
            <text:p>661.276184082</text:p>
          </table:table-cell>
          <table:table-cell office:value-type="float" office:value="0.004507679">
            <text:p>0.004507679</text:p>
          </table:table-cell>
          <table:table-cell table:number-columns-repeated="4"/>
        </table:table-row>
        <table:table-row table:style-name="ro1">
          <table:table-cell office:value-type="float" office:value="661.39599609375">
            <text:p>661.3959960938</text:p>
          </table:table-cell>
          <table:table-cell office:value-type="float" office:value="0.005944868">
            <text:p>0.005944868</text:p>
          </table:table-cell>
          <table:table-cell table:number-columns-repeated="4"/>
        </table:table-row>
        <table:table-row table:style-name="ro1">
          <table:table-cell office:value-type="float" office:value="661.515808105469">
            <text:p>661.5158081055</text:p>
          </table:table-cell>
          <table:table-cell office:value-type="float" office:value="0.01488553">
            <text:p>0.01488553</text:p>
          </table:table-cell>
          <table:table-cell table:number-columns-repeated="4"/>
        </table:table-row>
        <table:table-row table:style-name="ro1">
          <table:table-cell office:value-type="float" office:value="661.635620117188">
            <text:p>661.6356201172</text:p>
          </table:table-cell>
          <table:table-cell office:value-type="float" office:value="0.001485756">
            <text:p>0.001485756</text:p>
          </table:table-cell>
          <table:table-cell table:number-columns-repeated="4"/>
        </table:table-row>
        <table:table-row table:style-name="ro1">
          <table:table-cell office:value-type="float" office:value="661.755432128906">
            <text:p>661.7554321289</text:p>
          </table:table-cell>
          <table:table-cell office:value-type="float" office:value="0.00884927">
            <text:p>0.00884927</text:p>
          </table:table-cell>
          <table:table-cell table:number-columns-repeated="4"/>
        </table:table-row>
        <table:table-row table:style-name="ro1">
          <table:table-cell office:value-type="float" office:value="661.875244140625">
            <text:p>661.8752441406</text:p>
          </table:table-cell>
          <table:table-cell office:value-type="float" office:value="0.01327405">
            <text:p>0.01327405</text:p>
          </table:table-cell>
          <table:table-cell table:number-columns-repeated="4"/>
        </table:table-row>
        <table:table-row table:style-name="ro1">
          <table:table-cell office:value-type="float" office:value="661.995056152344">
            <text:p>661.9950561523</text:p>
          </table:table-cell>
          <table:table-cell office:value-type="float" office:value="0.006662859">
            <text:p>0.006662859</text:p>
          </table:table-cell>
          <table:table-cell table:number-columns-repeated="4"/>
        </table:table-row>
        <table:table-row table:style-name="ro1">
          <table:table-cell office:value-type="float" office:value="662.114868164063">
            <text:p>662.1148681641</text:p>
          </table:table-cell>
          <table:table-cell office:value-type="float" office:value="0.001731413">
            <text:p>0.001731413</text:p>
          </table:table-cell>
          <table:table-cell table:number-columns-repeated="4"/>
        </table:table-row>
        <table:table-row table:style-name="ro1">
          <table:table-cell office:value-type="float" office:value="662.234680175781">
            <text:p>662.2346801758</text:p>
          </table:table-cell>
          <table:table-cell office:value-type="float" office:value="0.0003505957">
            <text:p>0.0003505957</text:p>
          </table:table-cell>
          <table:table-cell table:number-columns-repeated="4"/>
        </table:table-row>
        <table:table-row table:style-name="ro1">
          <table:table-cell office:value-type="float" office:value="662.354553222656">
            <text:p>662.3545532227</text:p>
          </table:table-cell>
          <table:table-cell office:value-type="float" office:value="-0.0001779783">
            <text:p>-0.0001779783</text:p>
          </table:table-cell>
          <table:table-cell table:number-columns-repeated="4"/>
        </table:table-row>
        <table:table-row table:style-name="ro1">
          <table:table-cell office:value-type="float" office:value="662.474365234375">
            <text:p>662.4743652344</text:p>
          </table:table-cell>
          <table:table-cell office:value-type="float" office:value="0.00405843">
            <text:p>0.00405843</text:p>
          </table:table-cell>
          <table:table-cell table:number-columns-repeated="4"/>
        </table:table-row>
        <table:table-row table:style-name="ro1">
          <table:table-cell office:value-type="float" office:value="662.594177246094">
            <text:p>662.5941772461</text:p>
          </table:table-cell>
          <table:table-cell office:value-type="float" office:value="0.007401334">
            <text:p>0.007401334</text:p>
          </table:table-cell>
          <table:table-cell table:number-columns-repeated="4"/>
        </table:table-row>
        <table:table-row table:style-name="ro1">
          <table:table-cell office:value-type="float" office:value="662.713989257813">
            <text:p>662.7139892578</text:p>
          </table:table-cell>
          <table:table-cell office:value-type="float" office:value="0.01135593">
            <text:p>0.01135593</text:p>
          </table:table-cell>
          <table:table-cell table:number-columns-repeated="4"/>
        </table:table-row>
        <table:table-row table:style-name="ro1">
          <table:table-cell office:value-type="float" office:value="662.833801269531">
            <text:p>662.8338012695</text:p>
          </table:table-cell>
          <table:table-cell office:value-type="float" office:value="-0.003412382">
            <text:p>-0.003412382</text:p>
          </table:table-cell>
          <table:table-cell table:number-columns-repeated="4"/>
        </table:table-row>
        <table:table-row table:style-name="ro1">
          <table:table-cell office:value-type="float" office:value="662.953674316406">
            <text:p>662.9536743164</text:p>
          </table:table-cell>
          <table:table-cell office:value-type="float" office:value="0.001518658">
            <text:p>0.001518658</text:p>
          </table:table-cell>
          <table:table-cell table:number-columns-repeated="4"/>
        </table:table-row>
        <table:table-row table:style-name="ro1">
          <table:table-cell office:value-type="float" office:value="663.073486328125">
            <text:p>663.0734863281</text:p>
          </table:table-cell>
          <table:table-cell office:value-type="float" office:value="0.00379568">
            <text:p>0.00379568</text:p>
          </table:table-cell>
          <table:table-cell table:number-columns-repeated="4"/>
        </table:table-row>
        <table:table-row table:style-name="ro1">
          <table:table-cell office:value-type="float" office:value="663.193298339844">
            <text:p>663.1932983398</text:p>
          </table:table-cell>
          <table:table-cell office:value-type="float" office:value="0.00432698">
            <text:p>0.00432698</text:p>
          </table:table-cell>
          <table:table-cell table:number-columns-repeated="4"/>
        </table:table-row>
        <table:table-row table:style-name="ro1">
          <table:table-cell office:value-type="float" office:value="663.313110351563">
            <text:p>663.3131103516</text:p>
          </table:table-cell>
          <table:table-cell office:value-type="float" office:value="0.006271384">
            <text:p>0.006271384</text:p>
          </table:table-cell>
          <table:table-cell table:number-columns-repeated="4"/>
        </table:table-row>
        <table:table-row table:style-name="ro1">
          <table:table-cell office:value-type="float" office:value="663.432983398438">
            <text:p>663.4329833984</text:p>
          </table:table-cell>
          <table:table-cell office:value-type="float" office:value="0.004797389">
            <text:p>0.004797389</text:p>
          </table:table-cell>
          <table:table-cell table:number-columns-repeated="4"/>
        </table:table-row>
        <table:table-row table:style-name="ro1">
          <table:table-cell office:value-type="float" office:value="663.552795410156">
            <text:p>663.5527954102</text:p>
          </table:table-cell>
          <table:table-cell office:value-type="float" office:value="0.007038312">
            <text:p>0.007038312</text:p>
          </table:table-cell>
          <table:table-cell table:number-columns-repeated="4"/>
        </table:table-row>
        <table:table-row table:style-name="ro1">
          <table:table-cell office:value-type="float" office:value="663.672668457031">
            <text:p>663.672668457</text:p>
          </table:table-cell>
          <table:table-cell office:value-type="float" office:value="0.003881505">
            <text:p>0.003881505</text:p>
          </table:table-cell>
          <table:table-cell table:number-columns-repeated="4"/>
        </table:table-row>
        <table:table-row table:style-name="ro1">
          <table:table-cell office:value-type="float" office:value="663.79248046875">
            <text:p>663.7924804688</text:p>
          </table:table-cell>
          <table:table-cell office:value-type="float" office:value="0.006159374">
            <text:p>0.006159374</text:p>
          </table:table-cell>
          <table:table-cell table:number-columns-repeated="4"/>
        </table:table-row>
        <table:table-row table:style-name="ro1">
          <table:table-cell office:value-type="float" office:value="663.912292480469">
            <text:p>663.9122924805</text:p>
          </table:table-cell>
          <table:table-cell office:value-type="float" office:value="0.004100549">
            <text:p>0.004100549</text:p>
          </table:table-cell>
          <table:table-cell table:number-columns-repeated="4"/>
        </table:table-row>
        <table:table-row table:style-name="ro1">
          <table:table-cell office:value-type="float" office:value="664.032165527344">
            <text:p>664.0321655273</text:p>
          </table:table-cell>
          <table:table-cell office:value-type="float" office:value="0.008053749">
            <text:p>0.008053749</text:p>
          </table:table-cell>
          <table:table-cell table:number-columns-repeated="4"/>
        </table:table-row>
        <table:table-row table:style-name="ro1">
          <table:table-cell office:value-type="float" office:value="664.151977539063">
            <text:p>664.1519775391</text:p>
          </table:table-cell>
          <table:table-cell office:value-type="float" office:value="0.003904164">
            <text:p>0.003904164</text:p>
          </table:table-cell>
          <table:table-cell table:number-columns-repeated="4"/>
        </table:table-row>
        <table:table-row table:style-name="ro1">
          <table:table-cell office:value-type="float" office:value="664.271850585938">
            <text:p>664.2718505859</text:p>
          </table:table-cell>
          <table:table-cell office:value-type="float" office:value="-0.002318447">
            <text:p>-0.002318447</text:p>
          </table:table-cell>
          <table:table-cell table:number-columns-repeated="4"/>
        </table:table-row>
        <table:table-row table:style-name="ro1">
          <table:table-cell office:value-type="float" office:value="664.391662597656">
            <text:p>664.3916625977</text:p>
          </table:table-cell>
          <table:table-cell office:value-type="float" office:value="0.003418324">
            <text:p>0.003418324</text:p>
          </table:table-cell>
          <table:table-cell table:number-columns-repeated="4"/>
        </table:table-row>
        <table:table-row table:style-name="ro1">
          <table:table-cell office:value-type="float" office:value="664.511535644531">
            <text:p>664.5115356445</text:p>
          </table:table-cell>
          <table:table-cell office:value-type="float" office:value="0.007280321">
            <text:p>0.007280321</text:p>
          </table:table-cell>
          <table:table-cell table:number-columns-repeated="4"/>
        </table:table-row>
        <table:table-row table:style-name="ro1">
          <table:table-cell office:value-type="float" office:value="664.63134765625">
            <text:p>664.6313476563</text:p>
          </table:table-cell>
          <table:table-cell office:value-type="float" office:value="0.002766202">
            <text:p>0.002766202</text:p>
          </table:table-cell>
          <table:table-cell table:number-columns-repeated="4"/>
        </table:table-row>
        <table:table-row table:style-name="ro1">
          <table:table-cell office:value-type="float" office:value="664.751220703125">
            <text:p>664.7512207031</text:p>
          </table:table-cell>
          <table:table-cell office:value-type="float" office:value="-0.002767056">
            <text:p>-0.002767056</text:p>
          </table:table-cell>
          <table:table-cell table:number-columns-repeated="4"/>
        </table:table-row>
        <table:table-row table:style-name="ro1">
          <table:table-cell office:value-type="float" office:value="664.87109375">
            <text:p>664.87109375</text:p>
          </table:table-cell>
          <table:table-cell office:value-type="float" office:value="0.009448473">
            <text:p>0.009448473</text:p>
          </table:table-cell>
          <table:table-cell table:number-columns-repeated="4"/>
        </table:table-row>
        <table:table-row table:style-name="ro1">
          <table:table-cell office:value-type="float" office:value="664.990905761719">
            <text:p>664.9909057617</text:p>
          </table:table-cell>
          <table:table-cell office:value-type="float" office:value="0.009698477">
            <text:p>0.009698477</text:p>
          </table:table-cell>
          <table:table-cell table:number-columns-repeated="4"/>
        </table:table-row>
        <table:table-row table:style-name="ro1">
          <table:table-cell office:value-type="float" office:value="665.110778808594">
            <text:p>665.1107788086</text:p>
          </table:table-cell>
          <table:table-cell office:value-type="float" office:value="0.003933507">
            <text:p>0.003933507</text:p>
          </table:table-cell>
          <table:table-cell table:number-columns-repeated="4"/>
        </table:table-row>
        <table:table-row table:style-name="ro1">
          <table:table-cell office:value-type="float" office:value="665.230590820313">
            <text:p>665.2305908203</text:p>
          </table:table-cell>
          <table:table-cell office:value-type="float" office:value="0.01048914">
            <text:p>0.01048914</text:p>
          </table:table-cell>
          <table:table-cell table:number-columns-repeated="4"/>
        </table:table-row>
        <table:table-row table:style-name="ro1">
          <table:table-cell office:value-type="float" office:value="665.350463867188">
            <text:p>665.3504638672</text:p>
          </table:table-cell>
          <table:table-cell office:value-type="float" office:value="-0.002500416">
            <text:p>-0.002500416</text:p>
          </table:table-cell>
          <table:table-cell table:number-columns-repeated="4"/>
        </table:table-row>
        <table:table-row table:style-name="ro1">
          <table:table-cell office:value-type="float" office:value="665.470336914063">
            <text:p>665.4703369141</text:p>
          </table:table-cell>
          <table:table-cell office:value-type="float" office:value="0.01547288">
            <text:p>0.01547288</text:p>
          </table:table-cell>
          <table:table-cell table:number-columns-repeated="4"/>
        </table:table-row>
        <table:table-row table:style-name="ro1">
          <table:table-cell office:value-type="float" office:value="665.590148925781">
            <text:p>665.5901489258</text:p>
          </table:table-cell>
          <table:table-cell office:value-type="float" office:value="0.01187826">
            <text:p>0.01187826</text:p>
          </table:table-cell>
          <table:table-cell table:number-columns-repeated="4"/>
        </table:table-row>
        <table:table-row table:style-name="ro1">
          <table:table-cell office:value-type="float" office:value="665.710021972656">
            <text:p>665.7100219727</text:p>
          </table:table-cell>
          <table:table-cell office:value-type="float" office:value="0.004128171">
            <text:p>0.004128171</text:p>
          </table:table-cell>
          <table:table-cell table:number-columns-repeated="4"/>
        </table:table-row>
        <table:table-row table:style-name="ro1">
          <table:table-cell office:value-type="float" office:value="665.829895019531">
            <text:p>665.8298950195</text:p>
          </table:table-cell>
          <table:table-cell office:value-type="float" office:value="-0.0006930178">
            <text:p>-0.0006930178</text:p>
          </table:table-cell>
          <table:table-cell table:number-columns-repeated="4"/>
        </table:table-row>
        <table:table-row table:style-name="ro1">
          <table:table-cell office:value-type="float" office:value="665.949768066406">
            <text:p>665.9497680664</text:p>
          </table:table-cell>
          <table:table-cell office:value-type="float" office:value="0.01731898">
            <text:p>0.01731898</text:p>
          </table:table-cell>
          <table:table-cell table:number-columns-repeated="4"/>
        </table:table-row>
        <table:table-row table:style-name="ro1">
          <table:table-cell office:value-type="float" office:value="666.069580078125">
            <text:p>666.0695800781</text:p>
          </table:table-cell>
          <table:table-cell office:value-type="float" office:value="-0.0009561866">
            <text:p>-0.0009561866</text:p>
          </table:table-cell>
          <table:table-cell table:number-columns-repeated="4"/>
        </table:table-row>
        <table:table-row table:style-name="ro1">
          <table:table-cell office:value-type="float" office:value="666.189453125">
            <text:p>666.189453125</text:p>
          </table:table-cell>
          <table:table-cell office:value-type="float" office:value="0.01923173">
            <text:p>0.01923173</text:p>
          </table:table-cell>
          <table:table-cell table:number-columns-repeated="4"/>
        </table:table-row>
        <table:table-row table:style-name="ro1">
          <table:table-cell office:value-type="float" office:value="666.309326171875">
            <text:p>666.3093261719</text:p>
          </table:table-cell>
          <table:table-cell office:value-type="string">
            <text:p>9.31658E-05</text:p>
          </table:table-cell>
          <table:table-cell table:number-columns-repeated="4"/>
        </table:table-row>
        <table:table-row table:style-name="ro1">
          <table:table-cell office:value-type="float" office:value="666.42919921875">
            <text:p>666.4291992188</text:p>
          </table:table-cell>
          <table:table-cell office:value-type="float" office:value="0.01178315">
            <text:p>0.01178315</text:p>
          </table:table-cell>
          <table:table-cell table:number-columns-repeated="4"/>
        </table:table-row>
        <table:table-row table:style-name="ro1">
          <table:table-cell office:value-type="float" office:value="666.549072265625">
            <text:p>666.5490722656</text:p>
          </table:table-cell>
          <table:table-cell office:value-type="float" office:value="0.01057345">
            <text:p>0.01057345</text:p>
          </table:table-cell>
          <table:table-cell table:number-columns-repeated="4"/>
        </table:table-row>
        <table:table-row table:style-name="ro1">
          <table:table-cell office:value-type="float" office:value="666.6689453125">
            <text:p>666.6689453125</text:p>
          </table:table-cell>
          <table:table-cell office:value-type="float" office:value="0.004644519">
            <text:p>0.004644519</text:p>
          </table:table-cell>
          <table:table-cell table:number-columns-repeated="4"/>
        </table:table-row>
        <table:table-row table:style-name="ro1">
          <table:table-cell office:value-type="float" office:value="666.788818359375">
            <text:p>666.7888183594</text:p>
          </table:table-cell>
          <table:table-cell office:value-type="float" office:value="0.003745771">
            <text:p>0.003745771</text:p>
          </table:table-cell>
          <table:table-cell table:number-columns-repeated="4"/>
        </table:table-row>
        <table:table-row table:style-name="ro1">
          <table:table-cell office:value-type="float" office:value="666.90869140625">
            <text:p>666.9086914063</text:p>
          </table:table-cell>
          <table:table-cell office:value-type="float" office:value="0.0003631292">
            <text:p>0.0003631292</text:p>
          </table:table-cell>
          <table:table-cell table:number-columns-repeated="4"/>
        </table:table-row>
        <table:table-row table:style-name="ro1">
          <table:table-cell office:value-type="float" office:value="667.028564453125">
            <text:p>667.0285644531</text:p>
          </table:table-cell>
          <table:table-cell office:value-type="float" office:value="0.00601881">
            <text:p>0.00601881</text:p>
          </table:table-cell>
          <table:table-cell table:number-columns-repeated="4"/>
        </table:table-row>
        <table:table-row table:style-name="ro1">
          <table:table-cell office:value-type="float" office:value="667.1484375">
            <text:p>667.1484375</text:p>
          </table:table-cell>
          <table:table-cell office:value-type="float" office:value="0.006115448">
            <text:p>0.006115448</text:p>
          </table:table-cell>
          <table:table-cell table:number-columns-repeated="4"/>
        </table:table-row>
        <table:table-row table:style-name="ro1">
          <table:table-cell office:value-type="float" office:value="667.268310546875">
            <text:p>667.2683105469</text:p>
          </table:table-cell>
          <table:table-cell office:value-type="float" office:value="0.005152446">
            <text:p>0.005152446</text:p>
          </table:table-cell>
          <table:table-cell table:number-columns-repeated="4"/>
        </table:table-row>
        <table:table-row table:style-name="ro1">
          <table:table-cell office:value-type="float" office:value="667.38818359375">
            <text:p>667.3881835938</text:p>
          </table:table-cell>
          <table:table-cell office:value-type="float" office:value="0.01290313">
            <text:p>0.01290313</text:p>
          </table:table-cell>
          <table:table-cell table:number-columns-repeated="4"/>
        </table:table-row>
        <table:table-row table:style-name="ro1">
          <table:table-cell office:value-type="float" office:value="667.508056640625">
            <text:p>667.5080566406</text:p>
          </table:table-cell>
          <table:table-cell office:value-type="float" office:value="0.0005083215">
            <text:p>0.0005083215</text:p>
          </table:table-cell>
          <table:table-cell table:number-columns-repeated="4"/>
        </table:table-row>
        <table:table-row table:style-name="ro1">
          <table:table-cell office:value-type="float" office:value="667.6279296875">
            <text:p>667.6279296875</text:p>
          </table:table-cell>
          <table:table-cell office:value-type="float" office:value="-0.001155584">
            <text:p>-0.001155584</text:p>
          </table:table-cell>
          <table:table-cell table:number-columns-repeated="4"/>
        </table:table-row>
        <table:table-row table:style-name="ro1">
          <table:table-cell office:value-type="float" office:value="667.747802734375">
            <text:p>667.7478027344</text:p>
          </table:table-cell>
          <table:table-cell office:value-type="float" office:value="-0.00137882">
            <text:p>-0.00137882</text:p>
          </table:table-cell>
          <table:table-cell table:number-columns-repeated="4"/>
        </table:table-row>
        <table:table-row table:style-name="ro1">
          <table:table-cell office:value-type="float" office:value="667.86767578125">
            <text:p>667.8676757813</text:p>
          </table:table-cell>
          <table:table-cell office:value-type="float" office:value="-0.007111214">
            <text:p>-0.007111214</text:p>
          </table:table-cell>
          <table:table-cell table:number-columns-repeated="4"/>
        </table:table-row>
        <table:table-row table:style-name="ro1">
          <table:table-cell office:value-type="float" office:value="667.987548828125">
            <text:p>667.9875488281</text:p>
          </table:table-cell>
          <table:table-cell office:value-type="float" office:value="0.009502877">
            <text:p>0.009502877</text:p>
          </table:table-cell>
          <table:table-cell table:number-columns-repeated="4"/>
        </table:table-row>
        <table:table-row table:style-name="ro1">
          <table:table-cell office:value-type="float" office:value="668.107421875">
            <text:p>668.107421875</text:p>
          </table:table-cell>
          <table:table-cell office:value-type="float" office:value="-0.006595147">
            <text:p>-0.006595147</text:p>
          </table:table-cell>
          <table:table-cell table:number-columns-repeated="4"/>
        </table:table-row>
        <table:table-row table:style-name="ro1">
          <table:table-cell office:value-type="float" office:value="668.227294921875">
            <text:p>668.2272949219</text:p>
          </table:table-cell>
          <table:table-cell office:value-type="float" office:value="0.003914833">
            <text:p>0.003914833</text:p>
          </table:table-cell>
          <table:table-cell table:number-columns-repeated="4"/>
        </table:table-row>
        <table:table-row table:style-name="ro1">
          <table:table-cell office:value-type="float" office:value="668.34716796875">
            <text:p>668.3471679688</text:p>
          </table:table-cell>
          <table:table-cell office:value-type="float" office:value="0.008331811">
            <text:p>0.008331811</text:p>
          </table:table-cell>
          <table:table-cell table:number-columns-repeated="4"/>
        </table:table-row>
        <table:table-row table:style-name="ro1">
          <table:table-cell office:value-type="float" office:value="668.467102050781">
            <text:p>668.4671020508</text:p>
          </table:table-cell>
          <table:table-cell office:value-type="float" office:value="0.003866931">
            <text:p>0.003866931</text:p>
          </table:table-cell>
          <table:table-cell table:number-columns-repeated="4"/>
        </table:table-row>
        <table:table-row table:style-name="ro1">
          <table:table-cell office:value-type="float" office:value="668.586975097656">
            <text:p>668.5869750977</text:p>
          </table:table-cell>
          <table:table-cell office:value-type="float" office:value="0.001344367">
            <text:p>0.001344367</text:p>
          </table:table-cell>
          <table:table-cell table:number-columns-repeated="4"/>
        </table:table-row>
        <table:table-row table:style-name="ro1">
          <table:table-cell office:value-type="float" office:value="668.706848144531">
            <text:p>668.7068481445</text:p>
          </table:table-cell>
          <table:table-cell office:value-type="float" office:value="0.001030214">
            <text:p>0.001030214</text:p>
          </table:table-cell>
          <table:table-cell table:number-columns-repeated="4"/>
        </table:table-row>
        <table:table-row table:style-name="ro1">
          <table:table-cell office:value-type="float" office:value="668.826721191406">
            <text:p>668.8267211914</text:p>
          </table:table-cell>
          <table:table-cell office:value-type="float" office:value="0.001125649">
            <text:p>0.001125649</text:p>
          </table:table-cell>
          <table:table-cell table:number-columns-repeated="4"/>
        </table:table-row>
        <table:table-row table:style-name="ro1">
          <table:table-cell office:value-type="float" office:value="668.946594238281">
            <text:p>668.9465942383</text:p>
          </table:table-cell>
          <table:table-cell office:value-type="float" office:value="0.01033949">
            <text:p>0.01033949</text:p>
          </table:table-cell>
          <table:table-cell table:number-columns-repeated="4"/>
        </table:table-row>
        <table:table-row table:style-name="ro1">
          <table:table-cell office:value-type="float" office:value="669.066528320313">
            <text:p>669.0665283203</text:p>
          </table:table-cell>
          <table:table-cell office:value-type="float" office:value="0.005738116">
            <text:p>0.005738116</text:p>
          </table:table-cell>
          <table:table-cell table:number-columns-repeated="4"/>
        </table:table-row>
        <table:table-row table:style-name="ro1">
          <table:table-cell office:value-type="float" office:value="669.186401367188">
            <text:p>669.1864013672</text:p>
          </table:table-cell>
          <table:table-cell office:value-type="float" office:value="-0.002516721">
            <text:p>-0.002516721</text:p>
          </table:table-cell>
          <table:table-cell table:number-columns-repeated="4"/>
        </table:table-row>
        <table:table-row table:style-name="ro1">
          <table:table-cell office:value-type="float" office:value="669.306274414063">
            <text:p>669.3062744141</text:p>
          </table:table-cell>
          <table:table-cell office:value-type="float" office:value="0.01434975">
            <text:p>0.01434975</text:p>
          </table:table-cell>
          <table:table-cell table:number-columns-repeated="4"/>
        </table:table-row>
        <table:table-row table:style-name="ro1">
          <table:table-cell office:value-type="float" office:value="669.426208496094">
            <text:p>669.4262084961</text:p>
          </table:table-cell>
          <table:table-cell office:value-type="float" office:value="0.007299925">
            <text:p>0.007299925</text:p>
          </table:table-cell>
          <table:table-cell table:number-columns-repeated="4"/>
        </table:table-row>
        <table:table-row table:style-name="ro1">
          <table:table-cell office:value-type="float" office:value="669.546081542969">
            <text:p>669.546081543</text:p>
          </table:table-cell>
          <table:table-cell office:value-type="float" office:value="-0.0007621516">
            <text:p>-0.0007621516</text:p>
          </table:table-cell>
          <table:table-cell table:number-columns-repeated="4"/>
        </table:table-row>
        <table:table-row table:style-name="ro1">
          <table:table-cell office:value-type="float" office:value="669.665954589844">
            <text:p>669.6659545898</text:p>
          </table:table-cell>
          <table:table-cell office:value-type="float" office:value="-0.001571867">
            <text:p>-0.001571867</text:p>
          </table:table-cell>
          <table:table-cell table:number-columns-repeated="4"/>
        </table:table-row>
        <table:table-row table:style-name="ro1">
          <table:table-cell office:value-type="float" office:value="669.785888671875">
            <text:p>669.7858886719</text:p>
          </table:table-cell>
          <table:table-cell office:value-type="float" office:value="0.004017912">
            <text:p>0.004017912</text:p>
          </table:table-cell>
          <table:table-cell table:number-columns-repeated="4"/>
        </table:table-row>
        <table:table-row table:style-name="ro1">
          <table:table-cell office:value-type="float" office:value="669.90576171875">
            <text:p>669.9057617188</text:p>
          </table:table-cell>
          <table:table-cell office:value-type="float" office:value="0.003650361">
            <text:p>0.003650361</text:p>
          </table:table-cell>
          <table:table-cell table:number-columns-repeated="4"/>
        </table:table-row>
        <table:table-row table:style-name="ro1">
          <table:table-cell office:value-type="float" office:value="670.025695800781">
            <text:p>670.0256958008</text:p>
          </table:table-cell>
          <table:table-cell office:value-type="float" office:value="-0.002914492">
            <text:p>-0.002914492</text:p>
          </table:table-cell>
          <table:table-cell table:number-columns-repeated="4"/>
        </table:table-row>
        <table:table-row table:style-name="ro1">
          <table:table-cell office:value-type="float" office:value="670.145568847656">
            <text:p>670.1455688477</text:p>
          </table:table-cell>
          <table:table-cell office:value-type="float" office:value="0.0151808">
            <text:p>0.0151808</text:p>
          </table:table-cell>
          <table:table-cell table:number-columns-repeated="4"/>
        </table:table-row>
        <table:table-row table:style-name="ro1">
          <table:table-cell office:value-type="float" office:value="670.265502929688">
            <text:p>670.2655029297</text:p>
          </table:table-cell>
          <table:table-cell office:value-type="float" office:value="0.007059491">
            <text:p>0.007059491</text:p>
          </table:table-cell>
          <table:table-cell table:number-columns-repeated="4"/>
        </table:table-row>
        <table:table-row table:style-name="ro1">
          <table:table-cell office:value-type="float" office:value="670.385375976563">
            <text:p>670.3853759766</text:p>
          </table:table-cell>
          <table:table-cell office:value-type="float" office:value="0.0143137">
            <text:p>0.0143137</text:p>
          </table:table-cell>
          <table:table-cell table:number-columns-repeated="4"/>
        </table:table-row>
        <table:table-row table:style-name="ro1">
          <table:table-cell office:value-type="float" office:value="670.505310058594">
            <text:p>670.5053100586</text:p>
          </table:table-cell>
          <table:table-cell office:value-type="float" office:value="0.005986982">
            <text:p>0.005986982</text:p>
          </table:table-cell>
          <table:table-cell table:number-columns-repeated="4"/>
        </table:table-row>
        <table:table-row table:style-name="ro1">
          <table:table-cell office:value-type="float" office:value="670.625183105469">
            <text:p>670.6251831055</text:p>
          </table:table-cell>
          <table:table-cell office:value-type="float" office:value="0.009090474">
            <text:p>0.009090474</text:p>
          </table:table-cell>
          <table:table-cell table:number-columns-repeated="4"/>
        </table:table-row>
        <table:table-row table:style-name="ro1">
          <table:table-cell office:value-type="float" office:value="670.7451171875">
            <text:p>670.7451171875</text:p>
          </table:table-cell>
          <table:table-cell office:value-type="float" office:value="0.003038526">
            <text:p>0.003038526</text:p>
          </table:table-cell>
          <table:table-cell table:number-columns-repeated="4"/>
        </table:table-row>
        <table:table-row table:style-name="ro1">
          <table:table-cell office:value-type="float" office:value="670.864990234375">
            <text:p>670.8649902344</text:p>
          </table:table-cell>
          <table:table-cell office:value-type="float" office:value="0.01102928">
            <text:p>0.01102928</text:p>
          </table:table-cell>
          <table:table-cell table:number-columns-repeated="4"/>
        </table:table-row>
        <table:table-row table:style-name="ro1">
          <table:table-cell office:value-type="float" office:value="670.984924316406">
            <text:p>670.9849243164</text:p>
          </table:table-cell>
          <table:table-cell office:value-type="float" office:value="0.009195708">
            <text:p>0.009195708</text:p>
          </table:table-cell>
          <table:table-cell table:number-columns-repeated="4"/>
        </table:table-row>
        <table:table-row table:style-name="ro1">
          <table:table-cell office:value-type="float" office:value="671.104858398438">
            <text:p>671.1048583984</text:p>
          </table:table-cell>
          <table:table-cell office:value-type="float" office:value="-0.002542047">
            <text:p>-0.002542047</text:p>
          </table:table-cell>
          <table:table-cell table:number-columns-repeated="4"/>
        </table:table-row>
        <table:table-row table:style-name="ro1">
          <table:table-cell office:value-type="float" office:value="671.224731445313">
            <text:p>671.2247314453</text:p>
          </table:table-cell>
          <table:table-cell office:value-type="float" office:value="0.004648893">
            <text:p>0.004648893</text:p>
          </table:table-cell>
          <table:table-cell table:number-columns-repeated="4"/>
        </table:table-row>
        <table:table-row table:style-name="ro1">
          <table:table-cell office:value-type="float" office:value="671.344665527344">
            <text:p>671.3446655273</text:p>
          </table:table-cell>
          <table:table-cell office:value-type="float" office:value="0.00965042">
            <text:p>0.00965042</text:p>
          </table:table-cell>
          <table:table-cell table:number-columns-repeated="4"/>
        </table:table-row>
        <table:table-row table:style-name="ro1">
          <table:table-cell office:value-type="float" office:value="671.464599609375">
            <text:p>671.4645996094</text:p>
          </table:table-cell>
          <table:table-cell office:value-type="float" office:value="-0.003981163">
            <text:p>-0.003981163</text:p>
          </table:table-cell>
          <table:table-cell table:number-columns-repeated="4"/>
        </table:table-row>
        <table:table-row table:style-name="ro1">
          <table:table-cell office:value-type="float" office:value="671.58447265625">
            <text:p>671.5844726563</text:p>
          </table:table-cell>
          <table:table-cell office:value-type="float" office:value="-0.0007956034">
            <text:p>-0.0007956034</text:p>
          </table:table-cell>
          <table:table-cell table:number-columns-repeated="4"/>
        </table:table-row>
        <table:table-row table:style-name="ro1">
          <table:table-cell office:value-type="float" office:value="671.704406738281">
            <text:p>671.7044067383</text:p>
          </table:table-cell>
          <table:table-cell office:value-type="float" office:value="0.01073016">
            <text:p>0.01073016</text:p>
          </table:table-cell>
          <table:table-cell table:number-columns-repeated="4"/>
        </table:table-row>
        <table:table-row table:style-name="ro1">
          <table:table-cell office:value-type="float" office:value="671.824340820313">
            <text:p>671.8243408203</text:p>
          </table:table-cell>
          <table:table-cell office:value-type="float" office:value="0.002769263">
            <text:p>0.002769263</text:p>
          </table:table-cell>
          <table:table-cell table:number-columns-repeated="4"/>
        </table:table-row>
        <table:table-row table:style-name="ro1">
          <table:table-cell office:value-type="float" office:value="671.944213867188">
            <text:p>671.9442138672</text:p>
          </table:table-cell>
          <table:table-cell office:value-type="float" office:value="0.00234445">
            <text:p>0.00234445</text:p>
          </table:table-cell>
          <table:table-cell table:number-columns-repeated="4"/>
        </table:table-row>
        <table:table-row table:style-name="ro1">
          <table:table-cell office:value-type="float" office:value="672.064147949219">
            <text:p>672.0641479492</text:p>
          </table:table-cell>
          <table:table-cell office:value-type="string">
            <text:p>8.691556E-05</text:p>
          </table:table-cell>
          <table:table-cell table:number-columns-repeated="4"/>
        </table:table-row>
        <table:table-row table:style-name="ro1">
          <table:table-cell office:value-type="float" office:value="672.18408203125">
            <text:p>672.1840820313</text:p>
          </table:table-cell>
          <table:table-cell office:value-type="float" office:value="0.002200599">
            <text:p>0.002200599</text:p>
          </table:table-cell>
          <table:table-cell table:number-columns-repeated="4"/>
        </table:table-row>
        <table:table-row table:style-name="ro1">
          <table:table-cell office:value-type="float" office:value="672.304016113281">
            <text:p>672.3040161133</text:p>
          </table:table-cell>
          <table:table-cell office:value-type="float" office:value="-0.002252783">
            <text:p>-0.002252783</text:p>
          </table:table-cell>
          <table:table-cell table:number-columns-repeated="4"/>
        </table:table-row>
        <table:table-row table:style-name="ro1">
          <table:table-cell office:value-type="float" office:value="672.423950195313">
            <text:p>672.4239501953</text:p>
          </table:table-cell>
          <table:table-cell office:value-type="float" office:value="-0.005682367">
            <text:p>-0.005682367</text:p>
          </table:table-cell>
          <table:table-cell table:number-columns-repeated="4"/>
        </table:table-row>
        <table:table-row table:style-name="ro1">
          <table:table-cell office:value-type="float" office:value="672.543823242188">
            <text:p>672.5438232422</text:p>
          </table:table-cell>
          <table:table-cell office:value-type="float" office:value="-0.002742401">
            <text:p>-0.002742401</text:p>
          </table:table-cell>
          <table:table-cell table:number-columns-repeated="4"/>
        </table:table-row>
        <table:table-row table:style-name="ro1">
          <table:table-cell office:value-type="float" office:value="672.663757324219">
            <text:p>672.6637573242</text:p>
          </table:table-cell>
          <table:table-cell office:value-type="float" office:value="0.006372362">
            <text:p>0.006372362</text:p>
          </table:table-cell>
          <table:table-cell table:number-columns-repeated="4"/>
        </table:table-row>
        <table:table-row table:style-name="ro1">
          <table:table-cell office:value-type="float" office:value="672.78369140625">
            <text:p>672.7836914063</text:p>
          </table:table-cell>
          <table:table-cell office:value-type="float" office:value="0.003976265">
            <text:p>0.003976265</text:p>
          </table:table-cell>
          <table:table-cell table:number-columns-repeated="4"/>
        </table:table-row>
        <table:table-row table:style-name="ro1">
          <table:table-cell office:value-type="float" office:value="672.903625488281">
            <text:p>672.9036254883</text:p>
          </table:table-cell>
          <table:table-cell office:value-type="float" office:value="0.01501166">
            <text:p>0.01501166</text:p>
          </table:table-cell>
          <table:table-cell table:number-columns-repeated="4"/>
        </table:table-row>
        <table:table-row table:style-name="ro1">
          <table:table-cell office:value-type="float" office:value="673.023559570313">
            <text:p>673.0235595703</text:p>
          </table:table-cell>
          <table:table-cell office:value-type="float" office:value="0.01144064">
            <text:p>0.01144064</text:p>
          </table:table-cell>
          <table:table-cell table:number-columns-repeated="4"/>
        </table:table-row>
        <table:table-row table:style-name="ro1">
          <table:table-cell office:value-type="float" office:value="673.143493652344">
            <text:p>673.1434936523</text:p>
          </table:table-cell>
          <table:table-cell office:value-type="float" office:value="0.004739627">
            <text:p>0.004739627</text:p>
          </table:table-cell>
          <table:table-cell table:number-columns-repeated="4"/>
        </table:table-row>
        <table:table-row table:style-name="ro1">
          <table:table-cell office:value-type="float" office:value="673.263427734375">
            <text:p>673.2634277344</text:p>
          </table:table-cell>
          <table:table-cell office:value-type="float" office:value="-0.006972679">
            <text:p>-0.006972679</text:p>
          </table:table-cell>
          <table:table-cell table:number-columns-repeated="4"/>
        </table:table-row>
        <table:table-row table:style-name="ro1">
          <table:table-cell office:value-type="float" office:value="673.383361816406">
            <text:p>673.3833618164</text:p>
          </table:table-cell>
          <table:table-cell office:value-type="float" office:value="0.01961195">
            <text:p>0.01961195</text:p>
          </table:table-cell>
          <table:table-cell table:number-columns-repeated="4"/>
        </table:table-row>
        <table:table-row table:style-name="ro1">
          <table:table-cell office:value-type="float" office:value="673.503295898438">
            <text:p>673.5032958984</text:p>
          </table:table-cell>
          <table:table-cell office:value-type="float" office:value="-0.006641528">
            <text:p>-0.006641528</text:p>
          </table:table-cell>
          <table:table-cell table:number-columns-repeated="4"/>
        </table:table-row>
        <table:table-row table:style-name="ro1">
          <table:table-cell office:value-type="float" office:value="673.623229980469">
            <text:p>673.6232299805</text:p>
          </table:table-cell>
          <table:table-cell office:value-type="string">
            <text:p>-3.708506E-05</text:p>
          </table:table-cell>
          <table:table-cell table:number-columns-repeated="4"/>
        </table:table-row>
        <table:table-row table:style-name="ro1">
          <table:table-cell office:value-type="float" office:value="673.7431640625">
            <text:p>673.7431640625</text:p>
          </table:table-cell>
          <table:table-cell office:value-type="float" office:value="0.00023119">
            <text:p>0.00023119</text:p>
          </table:table-cell>
          <table:table-cell table:number-columns-repeated="4"/>
        </table:table-row>
        <table:table-row table:style-name="ro1">
          <table:table-cell office:value-type="float" office:value="673.863098144531">
            <text:p>673.8630981445</text:p>
          </table:table-cell>
          <table:table-cell office:value-type="float" office:value="0.005794134">
            <text:p>0.005794134</text:p>
          </table:table-cell>
          <table:table-cell table:number-columns-repeated="4"/>
        </table:table-row>
        <table:table-row table:style-name="ro1">
          <table:table-cell office:value-type="float" office:value="673.983032226563">
            <text:p>673.9830322266</text:p>
          </table:table-cell>
          <table:table-cell office:value-type="float" office:value="0.0009500713">
            <text:p>0.0009500713</text:p>
          </table:table-cell>
          <table:table-cell table:number-columns-repeated="4"/>
        </table:table-row>
        <table:table-row table:style-name="ro1">
          <table:table-cell office:value-type="float" office:value="674.102966308594">
            <text:p>674.1029663086</text:p>
          </table:table-cell>
          <table:table-cell office:value-type="float" office:value="0.008563614">
            <text:p>0.008563614</text:p>
          </table:table-cell>
          <table:table-cell table:number-columns-repeated="4"/>
        </table:table-row>
        <table:table-row table:style-name="ro1">
          <table:table-cell office:value-type="float" office:value="674.222900390625">
            <text:p>674.2229003906</text:p>
          </table:table-cell>
          <table:table-cell office:value-type="float" office:value="-0.004534661">
            <text:p>-0.004534661</text:p>
          </table:table-cell>
          <table:table-cell table:number-columns-repeated="4"/>
        </table:table-row>
        <table:table-row table:style-name="ro1">
          <table:table-cell office:value-type="float" office:value="674.342834472656">
            <text:p>674.3428344727</text:p>
          </table:table-cell>
          <table:table-cell office:value-type="float" office:value="-0.006279507">
            <text:p>-0.006279507</text:p>
          </table:table-cell>
          <table:table-cell table:number-columns-repeated="4"/>
        </table:table-row>
        <table:table-row table:style-name="ro1">
          <table:table-cell office:value-type="float" office:value="674.462768554688">
            <text:p>674.4627685547</text:p>
          </table:table-cell>
          <table:table-cell office:value-type="float" office:value="0.004535147">
            <text:p>0.004535147</text:p>
          </table:table-cell>
          <table:table-cell table:number-columns-repeated="4"/>
        </table:table-row>
        <table:table-row table:style-name="ro1">
          <table:table-cell office:value-type="float" office:value="674.582702636719">
            <text:p>674.5827026367</text:p>
          </table:table-cell>
          <table:table-cell office:value-type="float" office:value="0.005396221">
            <text:p>0.005396221</text:p>
          </table:table-cell>
          <table:table-cell table:number-columns-repeated="4"/>
        </table:table-row>
        <table:table-row table:style-name="ro1">
          <table:table-cell office:value-type="float" office:value="674.702697753906">
            <text:p>674.7026977539</text:p>
          </table:table-cell>
          <table:table-cell office:value-type="float" office:value="0.008249104">
            <text:p>0.008249104</text:p>
          </table:table-cell>
          <table:table-cell table:number-columns-repeated="4"/>
        </table:table-row>
        <table:table-row table:style-name="ro1">
          <table:table-cell office:value-type="float" office:value="674.822631835938">
            <text:p>674.8226318359</text:p>
          </table:table-cell>
          <table:table-cell office:value-type="float" office:value="-0.001145029">
            <text:p>-0.001145029</text:p>
          </table:table-cell>
          <table:table-cell table:number-columns-repeated="4"/>
        </table:table-row>
        <table:table-row table:style-name="ro1">
          <table:table-cell office:value-type="float" office:value="674.942565917969">
            <text:p>674.942565918</text:p>
          </table:table-cell>
          <table:table-cell office:value-type="float" office:value="0.01261828">
            <text:p>0.01261828</text:p>
          </table:table-cell>
          <table:table-cell table:number-columns-repeated="4"/>
        </table:table-row>
        <table:table-row table:style-name="ro1">
          <table:table-cell office:value-type="float" office:value="675.0625">
            <text:p>675.0625</text:p>
          </table:table-cell>
          <table:table-cell office:value-type="float" office:value="-0.00303611">
            <text:p>-0.00303611</text:p>
          </table:table-cell>
          <table:table-cell table:number-columns-repeated="4"/>
        </table:table-row>
        <table:table-row table:style-name="ro1">
          <table:table-cell office:value-type="float" office:value="675.182495117188">
            <text:p>675.1824951172</text:p>
          </table:table-cell>
          <table:table-cell office:value-type="float" office:value="-0.001560983">
            <text:p>-0.001560983</text:p>
          </table:table-cell>
          <table:table-cell table:number-columns-repeated="4"/>
        </table:table-row>
        <table:table-row table:style-name="ro1">
          <table:table-cell office:value-type="float" office:value="675.302429199219">
            <text:p>675.3024291992</text:p>
          </table:table-cell>
          <table:table-cell office:value-type="float" office:value="0.005706828">
            <text:p>0.005706828</text:p>
          </table:table-cell>
          <table:table-cell table:number-columns-repeated="4"/>
        </table:table-row>
        <table:table-row table:style-name="ro1">
          <table:table-cell office:value-type="float" office:value="675.42236328125">
            <text:p>675.4223632813</text:p>
          </table:table-cell>
          <table:table-cell office:value-type="float" office:value="0.01260708">
            <text:p>0.01260708</text:p>
          </table:table-cell>
          <table:table-cell table:number-columns-repeated="4"/>
        </table:table-row>
        <table:table-row table:style-name="ro1">
          <table:table-cell office:value-type="float" office:value="675.542297363281">
            <text:p>675.5422973633</text:p>
          </table:table-cell>
          <table:table-cell office:value-type="float" office:value="0.01215482">
            <text:p>0.01215482</text:p>
          </table:table-cell>
          <table:table-cell table:number-columns-repeated="4"/>
        </table:table-row>
        <table:table-row table:style-name="ro1">
          <table:table-cell office:value-type="float" office:value="675.662292480469">
            <text:p>675.6622924805</text:p>
          </table:table-cell>
          <table:table-cell office:value-type="float" office:value="0.006956536">
            <text:p>0.006956536</text:p>
          </table:table-cell>
          <table:table-cell table:number-columns-repeated="4"/>
        </table:table-row>
        <table:table-row table:style-name="ro1">
          <table:table-cell office:value-type="float" office:value="675.7822265625">
            <text:p>675.7822265625</text:p>
          </table:table-cell>
          <table:table-cell office:value-type="float" office:value="0.008863514">
            <text:p>0.008863514</text:p>
          </table:table-cell>
          <table:table-cell table:number-columns-repeated="4"/>
        </table:table-row>
        <table:table-row table:style-name="ro1">
          <table:table-cell office:value-type="float" office:value="675.902160644531">
            <text:p>675.9021606445</text:p>
          </table:table-cell>
          <table:table-cell office:value-type="float" office:value="-0.004688901">
            <text:p>-0.004688901</text:p>
          </table:table-cell>
          <table:table-cell table:number-columns-repeated="4"/>
        </table:table-row>
        <table:table-row table:style-name="ro1">
          <table:table-cell office:value-type="float" office:value="676.022155761719">
            <text:p>676.0221557617</text:p>
          </table:table-cell>
          <table:table-cell office:value-type="float" office:value="0.009879598">
            <text:p>0.009879598</text:p>
          </table:table-cell>
          <table:table-cell table:number-columns-repeated="4"/>
        </table:table-row>
        <table:table-row table:style-name="ro1">
          <table:table-cell office:value-type="float" office:value="676.14208984375">
            <text:p>676.1420898438</text:p>
          </table:table-cell>
          <table:table-cell office:value-type="float" office:value="0.002196962">
            <text:p>0.002196962</text:p>
          </table:table-cell>
          <table:table-cell table:number-columns-repeated="4"/>
        </table:table-row>
        <table:table-row table:style-name="ro1">
          <table:table-cell office:value-type="float" office:value="676.262023925781">
            <text:p>676.2620239258</text:p>
          </table:table-cell>
          <table:table-cell office:value-type="float" office:value="-0.004279924">
            <text:p>-0.004279924</text:p>
          </table:table-cell>
          <table:table-cell table:number-columns-repeated="4"/>
        </table:table-row>
        <table:table-row table:style-name="ro1">
          <table:table-cell office:value-type="float" office:value="676.382019042969">
            <text:p>676.382019043</text:p>
          </table:table-cell>
          <table:table-cell office:value-type="float" office:value="0.01020849">
            <text:p>0.01020849</text:p>
          </table:table-cell>
          <table:table-cell table:number-columns-repeated="4"/>
        </table:table-row>
        <table:table-row table:style-name="ro1">
          <table:table-cell office:value-type="float" office:value="676.501953125">
            <text:p>676.501953125</text:p>
          </table:table-cell>
          <table:table-cell office:value-type="float" office:value="0.002898449">
            <text:p>0.002898449</text:p>
          </table:table-cell>
          <table:table-cell table:number-columns-repeated="4"/>
        </table:table-row>
        <table:table-row table:style-name="ro1">
          <table:table-cell office:value-type="float" office:value="676.621948242188">
            <text:p>676.6219482422</text:p>
          </table:table-cell>
          <table:table-cell office:value-type="float" office:value="-0.004419505">
            <text:p>-0.004419505</text:p>
          </table:table-cell>
          <table:table-cell table:number-columns-repeated="4"/>
        </table:table-row>
        <table:table-row table:style-name="ro1">
          <table:table-cell office:value-type="float" office:value="676.741882324219">
            <text:p>676.7418823242</text:p>
          </table:table-cell>
          <table:table-cell office:value-type="float" office:value="-0.008172921">
            <text:p>-0.008172921</text:p>
          </table:table-cell>
          <table:table-cell table:number-columns-repeated="4"/>
        </table:table-row>
        <table:table-row table:style-name="ro1">
          <table:table-cell office:value-type="float" office:value="676.861877441406">
            <text:p>676.8618774414</text:p>
          </table:table-cell>
          <table:table-cell office:value-type="float" office:value="0.001046263">
            <text:p>0.001046263</text:p>
          </table:table-cell>
          <table:table-cell table:number-columns-repeated="4"/>
        </table:table-row>
        <table:table-row table:style-name="ro1">
          <table:table-cell office:value-type="float" office:value="676.981811523438">
            <text:p>676.9818115234</text:p>
          </table:table-cell>
          <table:table-cell office:value-type="float" office:value="0.004055373">
            <text:p>0.004055373</text:p>
          </table:table-cell>
          <table:table-cell table:number-columns-repeated="4"/>
        </table:table-row>
        <table:table-row table:style-name="ro1">
          <table:table-cell office:value-type="float" office:value="677.101806640625">
            <text:p>677.1018066406</text:p>
          </table:table-cell>
          <table:table-cell office:value-type="float" office:value="0.002512383">
            <text:p>0.002512383</text:p>
          </table:table-cell>
          <table:table-cell table:number-columns-repeated="4"/>
        </table:table-row>
        <table:table-row table:style-name="ro1">
          <table:table-cell office:value-type="float" office:value="677.221740722656">
            <text:p>677.2217407227</text:p>
          </table:table-cell>
          <table:table-cell office:value-type="float" office:value="-0.002649581">
            <text:p>-0.002649581</text:p>
          </table:table-cell>
          <table:table-cell table:number-columns-repeated="4"/>
        </table:table-row>
        <table:table-row table:style-name="ro1">
          <table:table-cell office:value-type="float" office:value="677.341735839844">
            <text:p>677.3417358398</text:p>
          </table:table-cell>
          <table:table-cell office:value-type="float" office:value="0.00947703">
            <text:p>0.00947703</text:p>
          </table:table-cell>
          <table:table-cell table:number-columns-repeated="4"/>
        </table:table-row>
        <table:table-row table:style-name="ro1">
          <table:table-cell office:value-type="float" office:value="677.461669921875">
            <text:p>677.4616699219</text:p>
          </table:table-cell>
          <table:table-cell office:value-type="float" office:value="-0.0007174698">
            <text:p>-0.0007174698</text:p>
          </table:table-cell>
          <table:table-cell table:number-columns-repeated="4"/>
        </table:table-row>
        <table:table-row table:style-name="ro1">
          <table:table-cell office:value-type="float" office:value="677.581665039063">
            <text:p>677.5816650391</text:p>
          </table:table-cell>
          <table:table-cell office:value-type="float" office:value="0.004651621">
            <text:p>0.004651621</text:p>
          </table:table-cell>
          <table:table-cell table:number-columns-repeated="4"/>
        </table:table-row>
        <table:table-row table:style-name="ro1">
          <table:table-cell office:value-type="float" office:value="677.70166015625">
            <text:p>677.7016601563</text:p>
          </table:table-cell>
          <table:table-cell office:value-type="float" office:value="-0.001582968">
            <text:p>-0.001582968</text:p>
          </table:table-cell>
          <table:table-cell table:number-columns-repeated="4"/>
        </table:table-row>
        <table:table-row table:style-name="ro1">
          <table:table-cell office:value-type="float" office:value="677.821594238281">
            <text:p>677.8215942383</text:p>
          </table:table-cell>
          <table:table-cell office:value-type="float" office:value="0.006040333">
            <text:p>0.006040333</text:p>
          </table:table-cell>
          <table:table-cell table:number-columns-repeated="4"/>
        </table:table-row>
        <table:table-row table:style-name="ro1">
          <table:table-cell office:value-type="float" office:value="677.941589355469">
            <text:p>677.9415893555</text:p>
          </table:table-cell>
          <table:table-cell office:value-type="float" office:value="0.002328324">
            <text:p>0.002328324</text:p>
          </table:table-cell>
          <table:table-cell table:number-columns-repeated="4"/>
        </table:table-row>
        <table:table-row table:style-name="ro1">
          <table:table-cell office:value-type="float" office:value="678.061584472656">
            <text:p>678.0615844727</text:p>
          </table:table-cell>
          <table:table-cell office:value-type="float" office:value="-0.0003970255">
            <text:p>-0.0003970255</text:p>
          </table:table-cell>
          <table:table-cell table:number-columns-repeated="4"/>
        </table:table-row>
        <table:table-row table:style-name="ro1">
          <table:table-cell office:value-type="float" office:value="678.181518554688">
            <text:p>678.1815185547</text:p>
          </table:table-cell>
          <table:table-cell office:value-type="float" office:value="-0.001510191">
            <text:p>-0.001510191</text:p>
          </table:table-cell>
          <table:table-cell table:number-columns-repeated="4"/>
        </table:table-row>
        <table:table-row table:style-name="ro1">
          <table:table-cell office:value-type="float" office:value="678.301513671875">
            <text:p>678.3015136719</text:p>
          </table:table-cell>
          <table:table-cell office:value-type="float" office:value="0.00379384">
            <text:p>0.00379384</text:p>
          </table:table-cell>
          <table:table-cell table:number-columns-repeated="4"/>
        </table:table-row>
        <table:table-row table:style-name="ro1">
          <table:table-cell office:value-type="float" office:value="678.421508789063">
            <text:p>678.4215087891</text:p>
          </table:table-cell>
          <table:table-cell office:value-type="float" office:value="-0.002404731">
            <text:p>-0.002404731</text:p>
          </table:table-cell>
          <table:table-cell table:number-columns-repeated="4"/>
        </table:table-row>
        <table:table-row table:style-name="ro1">
          <table:table-cell office:value-type="float" office:value="678.541442871094">
            <text:p>678.5414428711</text:p>
          </table:table-cell>
          <table:table-cell office:value-type="float" office:value="0.0154198">
            <text:p>0.0154198</text:p>
          </table:table-cell>
          <table:table-cell table:number-columns-repeated="4"/>
        </table:table-row>
        <table:table-row table:style-name="ro1">
          <table:table-cell office:value-type="float" office:value="678.661437988281">
            <text:p>678.6614379883</text:p>
          </table:table-cell>
          <table:table-cell office:value-type="string">
            <text:p>-6.518929E-05</text:p>
          </table:table-cell>
          <table:table-cell table:number-columns-repeated="4"/>
        </table:table-row>
        <table:table-row table:style-name="ro1">
          <table:table-cell office:value-type="float" office:value="678.781433105469">
            <text:p>678.7814331055</text:p>
          </table:table-cell>
          <table:table-cell office:value-type="float" office:value="0.0045058">
            <text:p>0.0045058</text:p>
          </table:table-cell>
          <table:table-cell table:number-columns-repeated="4"/>
        </table:table-row>
        <table:table-row table:style-name="ro1">
          <table:table-cell office:value-type="float" office:value="678.901428222656">
            <text:p>678.9014282227</text:p>
          </table:table-cell>
          <table:table-cell office:value-type="float" office:value="0.006749366">
            <text:p>0.006749366</text:p>
          </table:table-cell>
          <table:table-cell table:number-columns-repeated="4"/>
        </table:table-row>
        <table:table-row table:style-name="ro1">
          <table:table-cell office:value-type="float" office:value="679.021362304688">
            <text:p>679.0213623047</text:p>
          </table:table-cell>
          <table:table-cell office:value-type="float" office:value="0.004954498">
            <text:p>0.004954498</text:p>
          </table:table-cell>
          <table:table-cell table:number-columns-repeated="4"/>
        </table:table-row>
        <table:table-row table:style-name="ro1">
          <table:table-cell office:value-type="float" office:value="679.141357421875">
            <text:p>679.1413574219</text:p>
          </table:table-cell>
          <table:table-cell office:value-type="float" office:value="0.001509238">
            <text:p>0.001509238</text:p>
          </table:table-cell>
          <table:table-cell table:number-columns-repeated="4"/>
        </table:table-row>
        <table:table-row table:style-name="ro1">
          <table:table-cell office:value-type="float" office:value="679.261352539063">
            <text:p>679.2613525391</text:p>
          </table:table-cell>
          <table:table-cell office:value-type="float" office:value="0.007918522">
            <text:p>0.007918522</text:p>
          </table:table-cell>
          <table:table-cell table:number-columns-repeated="4"/>
        </table:table-row>
        <table:table-row table:style-name="ro1">
          <table:table-cell office:value-type="float" office:value="679.38134765625">
            <text:p>679.3813476563</text:p>
          </table:table-cell>
          <table:table-cell office:value-type="float" office:value="0.00879342">
            <text:p>0.00879342</text:p>
          </table:table-cell>
          <table:table-cell table:number-columns-repeated="4"/>
        </table:table-row>
        <table:table-row table:style-name="ro1">
          <table:table-cell office:value-type="float" office:value="679.501342773438">
            <text:p>679.5013427734</text:p>
          </table:table-cell>
          <table:table-cell office:value-type="float" office:value="-0.002778969">
            <text:p>-0.002778969</text:p>
          </table:table-cell>
          <table:table-cell table:number-columns-repeated="4"/>
        </table:table-row>
        <table:table-row table:style-name="ro1">
          <table:table-cell office:value-type="float" office:value="679.621337890625">
            <text:p>679.6213378906</text:p>
          </table:table-cell>
          <table:table-cell office:value-type="float" office:value="0.005817332">
            <text:p>0.005817332</text:p>
          </table:table-cell>
          <table:table-cell table:number-columns-repeated="4"/>
        </table:table-row>
        <table:table-row table:style-name="ro1">
          <table:table-cell office:value-type="float" office:value="679.741333007813">
            <text:p>679.7413330078</text:p>
          </table:table-cell>
          <table:table-cell office:value-type="float" office:value="0.003003959">
            <text:p>0.003003959</text:p>
          </table:table-cell>
          <table:table-cell table:number-columns-repeated="4"/>
        </table:table-row>
        <table:table-row table:style-name="ro1">
          <table:table-cell office:value-type="float" office:value="679.861267089844">
            <text:p>679.8612670898</text:p>
          </table:table-cell>
          <table:table-cell office:value-type="float" office:value="0.004635262">
            <text:p>0.004635262</text:p>
          </table:table-cell>
          <table:table-cell table:number-columns-repeated="4"/>
        </table:table-row>
        <table:table-row table:style-name="ro1">
          <table:table-cell office:value-type="float" office:value="679.981262207031">
            <text:p>679.981262207</text:p>
          </table:table-cell>
          <table:table-cell office:value-type="float" office:value="0.0002036656">
            <text:p>0.0002036656</text:p>
          </table:table-cell>
          <table:table-cell table:number-columns-repeated="4"/>
        </table:table-row>
        <table:table-row table:style-name="ro1">
          <table:table-cell office:value-type="float" office:value="680.101257324219">
            <text:p>680.1012573242</text:p>
          </table:table-cell>
          <table:table-cell office:value-type="float" office:value="-0.003559782">
            <text:p>-0.003559782</text:p>
          </table:table-cell>
          <table:table-cell table:number-columns-repeated="4"/>
        </table:table-row>
        <table:table-row table:style-name="ro1">
          <table:table-cell office:value-type="float" office:value="680.221252441406">
            <text:p>680.2212524414</text:p>
          </table:table-cell>
          <table:table-cell office:value-type="float" office:value="0.01017107">
            <text:p>0.01017107</text:p>
          </table:table-cell>
          <table:table-cell table:number-columns-repeated="4"/>
        </table:table-row>
        <table:table-row table:style-name="ro1">
          <table:table-cell office:value-type="float" office:value="680.341247558594">
            <text:p>680.3412475586</text:p>
          </table:table-cell>
          <table:table-cell office:value-type="float" office:value="-0.00205051">
            <text:p>-0.00205051</text:p>
          </table:table-cell>
          <table:table-cell table:number-columns-repeated="4"/>
        </table:table-row>
        <table:table-row table:style-name="ro1">
          <table:table-cell office:value-type="float" office:value="680.461242675781">
            <text:p>680.4612426758</text:p>
          </table:table-cell>
          <table:table-cell office:value-type="float" office:value="-0.001699138">
            <text:p>-0.001699138</text:p>
          </table:table-cell>
          <table:table-cell table:number-columns-repeated="4"/>
        </table:table-row>
        <table:table-row table:style-name="ro1">
          <table:table-cell office:value-type="float" office:value="680.581237792969">
            <text:p>680.581237793</text:p>
          </table:table-cell>
          <table:table-cell office:value-type="float" office:value="0.00163497">
            <text:p>0.00163497</text:p>
          </table:table-cell>
          <table:table-cell table:number-columns-repeated="4"/>
        </table:table-row>
        <table:table-row table:style-name="ro1">
          <table:table-cell office:value-type="float" office:value="680.701232910156">
            <text:p>680.7012329102</text:p>
          </table:table-cell>
          <table:table-cell office:value-type="float" office:value="0.004946897">
            <text:p>0.004946897</text:p>
          </table:table-cell>
          <table:table-cell table:number-columns-repeated="4"/>
        </table:table-row>
        <table:table-row table:style-name="ro1">
          <table:table-cell office:value-type="float" office:value="680.821228027344">
            <text:p>680.8212280273</text:p>
          </table:table-cell>
          <table:table-cell office:value-type="float" office:value="0.004985277">
            <text:p>0.004985277</text:p>
          </table:table-cell>
          <table:table-cell table:number-columns-repeated="4"/>
        </table:table-row>
        <table:table-row table:style-name="ro1">
          <table:table-cell office:value-type="float" office:value="680.941223144531">
            <text:p>680.9412231445</text:p>
          </table:table-cell>
          <table:table-cell office:value-type="float" office:value="0.0008899443">
            <text:p>0.0008899443</text:p>
          </table:table-cell>
          <table:table-cell table:number-columns-repeated="4"/>
        </table:table-row>
        <table:table-row table:style-name="ro1">
          <table:table-cell office:value-type="float" office:value="681.061218261719">
            <text:p>681.0612182617</text:p>
          </table:table-cell>
          <table:table-cell office:value-type="float" office:value="-0.0003022234">
            <text:p>-0.0003022234</text:p>
          </table:table-cell>
          <table:table-cell table:number-columns-repeated="4"/>
        </table:table-row>
        <table:table-row table:style-name="ro1">
          <table:table-cell office:value-type="float" office:value="681.181274414063">
            <text:p>681.1812744141</text:p>
          </table:table-cell>
          <table:table-cell office:value-type="string">
            <text:p>3.140164E-06</text:p>
          </table:table-cell>
          <table:table-cell table:number-columns-repeated="4"/>
        </table:table-row>
        <table:table-row table:style-name="ro1">
          <table:table-cell office:value-type="float" office:value="681.30126953125">
            <text:p>681.3012695313</text:p>
          </table:table-cell>
          <table:table-cell office:value-type="float" office:value="0.004155833">
            <text:p>0.004155833</text:p>
          </table:table-cell>
          <table:table-cell table:number-columns-repeated="4"/>
        </table:table-row>
        <table:table-row table:style-name="ro1">
          <table:table-cell office:value-type="float" office:value="681.421264648438">
            <text:p>681.4212646484</text:p>
          </table:table-cell>
          <table:table-cell office:value-type="float" office:value="0.00594867">
            <text:p>0.00594867</text:p>
          </table:table-cell>
          <table:table-cell table:number-columns-repeated="4"/>
        </table:table-row>
        <table:table-row table:style-name="ro1">
          <table:table-cell office:value-type="float" office:value="681.541259765625">
            <text:p>681.5412597656</text:p>
          </table:table-cell>
          <table:table-cell office:value-type="float" office:value="-0.008061353">
            <text:p>-0.008061353</text:p>
          </table:table-cell>
          <table:table-cell table:number-columns-repeated="4"/>
        </table:table-row>
        <table:table-row table:style-name="ro1">
          <table:table-cell office:value-type="float" office:value="681.661254882813">
            <text:p>681.6612548828</text:p>
          </table:table-cell>
          <table:table-cell office:value-type="float" office:value="0.00378444">
            <text:p>0.00378444</text:p>
          </table:table-cell>
          <table:table-cell table:number-columns-repeated="4"/>
        </table:table-row>
        <table:table-row table:style-name="ro1">
          <table:table-cell office:value-type="float" office:value="681.78125">
            <text:p>681.78125</text:p>
          </table:table-cell>
          <table:table-cell office:value-type="float" office:value="-0.004433668">
            <text:p>-0.004433668</text:p>
          </table:table-cell>
          <table:table-cell table:number-columns-repeated="4"/>
        </table:table-row>
        <table:table-row table:style-name="ro1">
          <table:table-cell office:value-type="float" office:value="681.901245117188">
            <text:p>681.9012451172</text:p>
          </table:table-cell>
          <table:table-cell office:value-type="float" office:value="0.004273194">
            <text:p>0.004273194</text:p>
          </table:table-cell>
          <table:table-cell table:number-columns-repeated="4"/>
        </table:table-row>
        <table:table-row table:style-name="ro1">
          <table:table-cell office:value-type="float" office:value="682.021301269531">
            <text:p>682.0213012695</text:p>
          </table:table-cell>
          <table:table-cell office:value-type="float" office:value="-0.001628016">
            <text:p>-0.001628016</text:p>
          </table:table-cell>
          <table:table-cell table:number-columns-repeated="4"/>
        </table:table-row>
        <table:table-row table:style-name="ro1">
          <table:table-cell office:value-type="float" office:value="682.141296386719">
            <text:p>682.1412963867</text:p>
          </table:table-cell>
          <table:table-cell office:value-type="float" office:value="-0.002745304">
            <text:p>-0.002745304</text:p>
          </table:table-cell>
          <table:table-cell table:number-columns-repeated="4"/>
        </table:table-row>
        <table:table-row table:style-name="ro1">
          <table:table-cell office:value-type="float" office:value="682.261291503906">
            <text:p>682.2612915039</text:p>
          </table:table-cell>
          <table:table-cell office:value-type="float" office:value="-0.002263146">
            <text:p>-0.002263146</text:p>
          </table:table-cell>
          <table:table-cell table:number-columns-repeated="4"/>
        </table:table-row>
        <table:table-row table:style-name="ro1">
          <table:table-cell office:value-type="float" office:value="682.381286621094">
            <text:p>682.3812866211</text:p>
          </table:table-cell>
          <table:table-cell office:value-type="float" office:value="0.000715784">
            <text:p>0.000715784</text:p>
          </table:table-cell>
          <table:table-cell table:number-columns-repeated="4"/>
        </table:table-row>
        <table:table-row table:style-name="ro1">
          <table:table-cell office:value-type="float" office:value="682.501342773438">
            <text:p>682.5013427734</text:p>
          </table:table-cell>
          <table:table-cell office:value-type="float" office:value="0.004833795">
            <text:p>0.004833795</text:p>
          </table:table-cell>
          <table:table-cell table:number-columns-repeated="4"/>
        </table:table-row>
        <table:table-row table:style-name="ro1">
          <table:table-cell office:value-type="float" office:value="682.621337890625">
            <text:p>682.6213378906</text:p>
          </table:table-cell>
          <table:table-cell office:value-type="float" office:value="0.0001134677">
            <text:p>0.0001134677</text:p>
          </table:table-cell>
          <table:table-cell table:number-columns-repeated="4"/>
        </table:table-row>
        <table:table-row table:style-name="ro1">
          <table:table-cell office:value-type="float" office:value="682.741333007813">
            <text:p>682.7413330078</text:p>
          </table:table-cell>
          <table:table-cell office:value-type="float" office:value="-0.001347513">
            <text:p>-0.001347513</text:p>
          </table:table-cell>
          <table:table-cell table:number-columns-repeated="4"/>
        </table:table-row>
        <table:table-row table:style-name="ro1">
          <table:table-cell office:value-type="float" office:value="682.861389160156">
            <text:p>682.8613891602</text:p>
          </table:table-cell>
          <table:table-cell office:value-type="float" office:value="0.001604414">
            <text:p>0.001604414</text:p>
          </table:table-cell>
          <table:table-cell table:number-columns-repeated="4"/>
        </table:table-row>
        <table:table-row table:style-name="ro1">
          <table:table-cell office:value-type="float" office:value="682.981384277344">
            <text:p>682.9813842773</text:p>
          </table:table-cell>
          <table:table-cell office:value-type="float" office:value="0.00268558">
            <text:p>0.00268558</text:p>
          </table:table-cell>
          <table:table-cell table:number-columns-repeated="4"/>
        </table:table-row>
        <table:table-row table:style-name="ro1">
          <table:table-cell office:value-type="float" office:value="683.101379394531">
            <text:p>683.1013793945</text:p>
          </table:table-cell>
          <table:table-cell office:value-type="float" office:value="-0.00478486">
            <text:p>-0.00478486</text:p>
          </table:table-cell>
          <table:table-cell table:number-columns-repeated="4"/>
        </table:table-row>
        <table:table-row table:style-name="ro1">
          <table:table-cell office:value-type="float" office:value="683.221435546875">
            <text:p>683.2214355469</text:p>
          </table:table-cell>
          <table:table-cell office:value-type="float" office:value="0.001316709">
            <text:p>0.001316709</text:p>
          </table:table-cell>
          <table:table-cell table:number-columns-repeated="4"/>
        </table:table-row>
        <table:table-row table:style-name="ro1">
          <table:table-cell office:value-type="float" office:value="683.341430664063">
            <text:p>683.3414306641</text:p>
          </table:table-cell>
          <table:table-cell office:value-type="float" office:value="-0.00650036">
            <text:p>-0.00650036</text:p>
          </table:table-cell>
          <table:table-cell table:number-columns-repeated="4"/>
        </table:table-row>
        <table:table-row table:style-name="ro1">
          <table:table-cell office:value-type="float" office:value="683.46142578125">
            <text:p>683.4614257813</text:p>
          </table:table-cell>
          <table:table-cell office:value-type="float" office:value="-0.005794793">
            <text:p>-0.005794793</text:p>
          </table:table-cell>
          <table:table-cell table:number-columns-repeated="4"/>
        </table:table-row>
        <table:table-row table:style-name="ro1">
          <table:table-cell office:value-type="float" office:value="683.581481933594">
            <text:p>683.5814819336</text:p>
          </table:table-cell>
          <table:table-cell office:value-type="float" office:value="-0.002582148">
            <text:p>-0.002582148</text:p>
          </table:table-cell>
          <table:table-cell table:number-columns-repeated="4"/>
        </table:table-row>
        <table:table-row table:style-name="ro1">
          <table:table-cell office:value-type="float" office:value="683.701477050781">
            <text:p>683.7014770508</text:p>
          </table:table-cell>
          <table:table-cell office:value-type="float" office:value="-0.000703382">
            <text:p>-0.000703382</text:p>
          </table:table-cell>
          <table:table-cell table:number-columns-repeated="4"/>
        </table:table-row>
        <table:table-row table:style-name="ro1">
          <table:table-cell office:value-type="float" office:value="683.821533203125">
            <text:p>683.8215332031</text:p>
          </table:table-cell>
          <table:table-cell office:value-type="float" office:value="-0.003560994">
            <text:p>-0.003560994</text:p>
          </table:table-cell>
          <table:table-cell table:number-columns-repeated="4"/>
        </table:table-row>
        <table:table-row table:style-name="ro1">
          <table:table-cell office:value-type="float" office:value="683.941528320313">
            <text:p>683.9415283203</text:p>
          </table:table-cell>
          <table:table-cell office:value-type="float" office:value="-0.004197573">
            <text:p>-0.004197573</text:p>
          </table:table-cell>
          <table:table-cell table:number-columns-repeated="4"/>
        </table:table-row>
        <table:table-row table:style-name="ro1">
          <table:table-cell office:value-type="float" office:value="684.061584472656">
            <text:p>684.0615844727</text:p>
          </table:table-cell>
          <table:table-cell office:value-type="float" office:value="0.005127713">
            <text:p>0.005127713</text:p>
          </table:table-cell>
          <table:table-cell table:number-columns-repeated="4"/>
        </table:table-row>
        <table:table-row table:style-name="ro1">
          <table:table-cell office:value-type="float" office:value="684.181579589844">
            <text:p>684.1815795898</text:p>
          </table:table-cell>
          <table:table-cell office:value-type="float" office:value="-0.008847977">
            <text:p>-0.008847977</text:p>
          </table:table-cell>
          <table:table-cell table:number-columns-repeated="4"/>
        </table:table-row>
        <table:table-row table:style-name="ro1">
          <table:table-cell office:value-type="float" office:value="684.301635742188">
            <text:p>684.3016357422</text:p>
          </table:table-cell>
          <table:table-cell office:value-type="float" office:value="-0.003655374">
            <text:p>-0.003655374</text:p>
          </table:table-cell>
          <table:table-cell table:number-columns-repeated="4"/>
        </table:table-row>
        <table:table-row table:style-name="ro1">
          <table:table-cell office:value-type="float" office:value="684.421630859375">
            <text:p>684.4216308594</text:p>
          </table:table-cell>
          <table:table-cell office:value-type="float" office:value="-0.005880857">
            <text:p>-0.005880857</text:p>
          </table:table-cell>
          <table:table-cell table:number-columns-repeated="4"/>
        </table:table-row>
        <table:table-row table:style-name="ro1">
          <table:table-cell office:value-type="float" office:value="684.541687011719">
            <text:p>684.5416870117</text:p>
          </table:table-cell>
          <table:table-cell office:value-type="float" office:value="0.006040442">
            <text:p>0.006040442</text:p>
          </table:table-cell>
          <table:table-cell table:number-columns-repeated="4"/>
        </table:table-row>
        <table:table-row table:style-name="ro1">
          <table:table-cell office:value-type="float" office:value="684.661682128906">
            <text:p>684.6616821289</text:p>
          </table:table-cell>
          <table:table-cell office:value-type="float" office:value="-0.003267033">
            <text:p>-0.003267033</text:p>
          </table:table-cell>
          <table:table-cell table:number-columns-repeated="4"/>
        </table:table-row>
        <table:table-row table:style-name="ro1">
          <table:table-cell office:value-type="float" office:value="684.78173828125">
            <text:p>684.7817382813</text:p>
          </table:table-cell>
          <table:table-cell office:value-type="float" office:value="0.008025996">
            <text:p>0.008025996</text:p>
          </table:table-cell>
          <table:table-cell table:number-columns-repeated="4"/>
        </table:table-row>
        <table:table-row table:style-name="ro1">
          <table:table-cell office:value-type="float" office:value="684.901733398438">
            <text:p>684.9017333984</text:p>
          </table:table-cell>
          <table:table-cell office:value-type="float" office:value="0.009317241">
            <text:p>0.009317241</text:p>
          </table:table-cell>
          <table:table-cell table:number-columns-repeated="4"/>
        </table:table-row>
        <table:table-row table:style-name="ro1">
          <table:table-cell office:value-type="float" office:value="685.021789550781">
            <text:p>685.0217895508</text:p>
          </table:table-cell>
          <table:table-cell office:value-type="float" office:value="-0.002490516">
            <text:p>-0.002490516</text:p>
          </table:table-cell>
          <table:table-cell table:number-columns-repeated="4"/>
        </table:table-row>
        <table:table-row table:style-name="ro1">
          <table:table-cell office:value-type="float" office:value="685.141784667969">
            <text:p>685.141784668</text:p>
          </table:table-cell>
          <table:table-cell office:value-type="float" office:value="0.002223937">
            <text:p>0.002223937</text:p>
          </table:table-cell>
          <table:table-cell table:number-columns-repeated="4"/>
        </table:table-row>
        <table:table-row table:style-name="ro1">
          <table:table-cell office:value-type="float" office:value="685.261840820313">
            <text:p>685.2618408203</text:p>
          </table:table-cell>
          <table:table-cell office:value-type="float" office:value="0.01065745">
            <text:p>0.01065745</text:p>
          </table:table-cell>
          <table:table-cell table:number-columns-repeated="4"/>
        </table:table-row>
        <table:table-row table:style-name="ro1">
          <table:table-cell office:value-type="float" office:value="685.381896972656">
            <text:p>685.3818969727</text:p>
          </table:table-cell>
          <table:table-cell office:value-type="float" office:value="0.00343798">
            <text:p>0.00343798</text:p>
          </table:table-cell>
          <table:table-cell table:number-columns-repeated="4"/>
        </table:table-row>
        <table:table-row table:style-name="ro1">
          <table:table-cell office:value-type="float" office:value="685.501892089844">
            <text:p>685.5018920898</text:p>
          </table:table-cell>
          <table:table-cell office:value-type="float" office:value="-0.00208197">
            <text:p>-0.00208197</text:p>
          </table:table-cell>
          <table:table-cell table:number-columns-repeated="4"/>
        </table:table-row>
        <table:table-row table:style-name="ro1">
          <table:table-cell office:value-type="float" office:value="685.621948242188">
            <text:p>685.6219482422</text:p>
          </table:table-cell>
          <table:table-cell office:value-type="float" office:value="0.01194208">
            <text:p>0.01194208</text:p>
          </table:table-cell>
          <table:table-cell table:number-columns-repeated="4"/>
        </table:table-row>
        <table:table-row table:style-name="ro1">
          <table:table-cell office:value-type="float" office:value="685.742004394531">
            <text:p>685.7420043945</text:p>
          </table:table-cell>
          <table:table-cell office:value-type="float" office:value="0.0005923983">
            <text:p>0.0005923983</text:p>
          </table:table-cell>
          <table:table-cell table:number-columns-repeated="4"/>
        </table:table-row>
        <table:table-row table:style-name="ro1">
          <table:table-cell office:value-type="float" office:value="685.861999511719">
            <text:p>685.8619995117</text:p>
          </table:table-cell>
          <table:table-cell office:value-type="float" office:value="0.001695004">
            <text:p>0.001695004</text:p>
          </table:table-cell>
          <table:table-cell table:number-columns-repeated="4"/>
        </table:table-row>
        <table:table-row table:style-name="ro1">
          <table:table-cell office:value-type="float" office:value="685.982055664063">
            <text:p>685.9820556641</text:p>
          </table:table-cell>
          <table:table-cell office:value-type="float" office:value="-0.002337741">
            <text:p>-0.002337741</text:p>
          </table:table-cell>
          <table:table-cell table:number-columns-repeated="4"/>
        </table:table-row>
        <table:table-row table:style-name="ro1">
          <table:table-cell office:value-type="float" office:value="686.102111816406">
            <text:p>686.1021118164</text:p>
          </table:table-cell>
          <table:table-cell office:value-type="float" office:value="0.003194155">
            <text:p>0.003194155</text:p>
          </table:table-cell>
          <table:table-cell table:number-columns-repeated="4"/>
        </table:table-row>
        <table:table-row table:style-name="ro1">
          <table:table-cell office:value-type="float" office:value="686.22216796875">
            <text:p>686.2221679688</text:p>
          </table:table-cell>
          <table:table-cell office:value-type="float" office:value="-0.00601769">
            <text:p>-0.00601769</text:p>
          </table:table-cell>
          <table:table-cell table:number-columns-repeated="4"/>
        </table:table-row>
        <table:table-row table:style-name="ro1">
          <table:table-cell office:value-type="float" office:value="686.342163085938">
            <text:p>686.3421630859</text:p>
          </table:table-cell>
          <table:table-cell office:value-type="float" office:value="-0.005338161">
            <text:p>-0.005338161</text:p>
          </table:table-cell>
          <table:table-cell table:number-columns-repeated="4"/>
        </table:table-row>
        <table:table-row table:style-name="ro1">
          <table:table-cell office:value-type="float" office:value="686.462219238281">
            <text:p>686.4622192383</text:p>
          </table:table-cell>
          <table:table-cell office:value-type="float" office:value="0.002460359">
            <text:p>0.002460359</text:p>
          </table:table-cell>
          <table:table-cell table:number-columns-repeated="4"/>
        </table:table-row>
        <table:table-row table:style-name="ro1">
          <table:table-cell office:value-type="float" office:value="686.582275390625">
            <text:p>686.5822753906</text:p>
          </table:table-cell>
          <table:table-cell office:value-type="float" office:value="0.000611349">
            <text:p>0.000611349</text:p>
          </table:table-cell>
          <table:table-cell table:number-columns-repeated="4"/>
        </table:table-row>
        <table:table-row table:style-name="ro1">
          <table:table-cell office:value-type="float" office:value="686.702331542969">
            <text:p>686.702331543</text:p>
          </table:table-cell>
          <table:table-cell office:value-type="float" office:value="0.003505973">
            <text:p>0.003505973</text:p>
          </table:table-cell>
          <table:table-cell table:number-columns-repeated="4"/>
        </table:table-row>
        <table:table-row table:style-name="ro1">
          <table:table-cell office:value-type="float" office:value="686.822387695313">
            <text:p>686.8223876953</text:p>
          </table:table-cell>
          <table:table-cell office:value-type="float" office:value="-0.000753834">
            <text:p>-0.000753834</text:p>
          </table:table-cell>
          <table:table-cell table:number-columns-repeated="4"/>
        </table:table-row>
        <table:table-row table:style-name="ro1">
          <table:table-cell office:value-type="float" office:value="686.9423828125">
            <text:p>686.9423828125</text:p>
          </table:table-cell>
          <table:table-cell office:value-type="float" office:value="0.008899356">
            <text:p>0.008899356</text:p>
          </table:table-cell>
          <table:table-cell table:number-columns-repeated="4"/>
        </table:table-row>
        <table:table-row table:style-name="ro1">
          <table:table-cell office:value-type="float" office:value="687.062438964844">
            <text:p>687.0624389648</text:p>
          </table:table-cell>
          <table:table-cell office:value-type="float" office:value="0.003281465">
            <text:p>0.003281465</text:p>
          </table:table-cell>
          <table:table-cell table:number-columns-repeated="4"/>
        </table:table-row>
        <table:table-row table:style-name="ro1">
          <table:table-cell office:value-type="float" office:value="687.182495117188">
            <text:p>687.1824951172</text:p>
          </table:table-cell>
          <table:table-cell office:value-type="float" office:value="-0.006933053">
            <text:p>-0.006933053</text:p>
          </table:table-cell>
          <table:table-cell table:number-columns-repeated="4"/>
        </table:table-row>
        <table:table-row table:style-name="ro1">
          <table:table-cell office:value-type="float" office:value="687.302551269531">
            <text:p>687.3025512695</text:p>
          </table:table-cell>
          <table:table-cell office:value-type="float" office:value="0.003065407">
            <text:p>0.003065407</text:p>
          </table:table-cell>
          <table:table-cell table:number-columns-repeated="4"/>
        </table:table-row>
        <table:table-row table:style-name="ro1">
          <table:table-cell office:value-type="float" office:value="687.422607421875">
            <text:p>687.4226074219</text:p>
          </table:table-cell>
          <table:table-cell office:value-type="float" office:value="-0.00451622">
            <text:p>-0.00451622</text:p>
          </table:table-cell>
          <table:table-cell table:number-columns-repeated="4"/>
        </table:table-row>
        <table:table-row table:style-name="ro1">
          <table:table-cell office:value-type="float" office:value="687.542663574219">
            <text:p>687.5426635742</text:p>
          </table:table-cell>
          <table:table-cell office:value-type="float" office:value="-0.006575387">
            <text:p>-0.006575387</text:p>
          </table:table-cell>
          <table:table-cell table:number-columns-repeated="4"/>
        </table:table-row>
        <table:table-row table:style-name="ro1">
          <table:table-cell office:value-type="float" office:value="687.662719726563">
            <text:p>687.6627197266</text:p>
          </table:table-cell>
          <table:table-cell office:value-type="float" office:value="0.01079255">
            <text:p>0.01079255</text:p>
          </table:table-cell>
          <table:table-cell table:number-columns-repeated="4"/>
        </table:table-row>
        <table:table-row table:style-name="ro1">
          <table:table-cell office:value-type="float" office:value="687.782775878906">
            <text:p>687.7827758789</text:p>
          </table:table-cell>
          <table:table-cell office:value-type="float" office:value="0.0005300021">
            <text:p>0.0005300021</text:p>
          </table:table-cell>
          <table:table-cell table:number-columns-repeated="4"/>
        </table:table-row>
        <table:table-row table:style-name="ro1">
          <table:table-cell office:value-type="float" office:value="687.90283203125">
            <text:p>687.9028320313</text:p>
          </table:table-cell>
          <table:table-cell office:value-type="float" office:value="0.007149386">
            <text:p>0.007149386</text:p>
          </table:table-cell>
          <table:table-cell table:number-columns-repeated="4"/>
        </table:table-row>
        <table:table-row table:style-name="ro1">
          <table:table-cell office:value-type="float" office:value="688.022888183594">
            <text:p>688.0228881836</text:p>
          </table:table-cell>
          <table:table-cell office:value-type="float" office:value="0.009125958">
            <text:p>0.009125958</text:p>
          </table:table-cell>
          <table:table-cell table:number-columns-repeated="4"/>
        </table:table-row>
        <table:table-row table:style-name="ro1">
          <table:table-cell office:value-type="float" office:value="688.142944335938">
            <text:p>688.1429443359</text:p>
          </table:table-cell>
          <table:table-cell office:value-type="float" office:value="0.004840758">
            <text:p>0.004840758</text:p>
          </table:table-cell>
          <table:table-cell table:number-columns-repeated="4"/>
        </table:table-row>
        <table:table-row table:style-name="ro1">
          <table:table-cell office:value-type="float" office:value="688.263000488281">
            <text:p>688.2630004883</text:p>
          </table:table-cell>
          <table:table-cell office:value-type="float" office:value="-0.003067049">
            <text:p>-0.003067049</text:p>
          </table:table-cell>
          <table:table-cell table:number-columns-repeated="4"/>
        </table:table-row>
        <table:table-row table:style-name="ro1">
          <table:table-cell office:value-type="float" office:value="688.383056640625">
            <text:p>688.3830566406</text:p>
          </table:table-cell>
          <table:table-cell office:value-type="float" office:value="-0.001335628">
            <text:p>-0.001335628</text:p>
          </table:table-cell>
          <table:table-cell table:number-columns-repeated="4"/>
        </table:table-row>
        <table:table-row table:style-name="ro1">
          <table:table-cell office:value-type="float" office:value="688.503112792969">
            <text:p>688.503112793</text:p>
          </table:table-cell>
          <table:table-cell office:value-type="float" office:value="-0.00373065">
            <text:p>-0.00373065</text:p>
          </table:table-cell>
          <table:table-cell table:number-columns-repeated="4"/>
        </table:table-row>
        <table:table-row table:style-name="ro1">
          <table:table-cell office:value-type="float" office:value="688.623168945313">
            <text:p>688.6231689453</text:p>
          </table:table-cell>
          <table:table-cell office:value-type="float" office:value="-0.004461955">
            <text:p>-0.004461955</text:p>
          </table:table-cell>
          <table:table-cell table:number-columns-repeated="4"/>
        </table:table-row>
        <table:table-row table:style-name="ro1">
          <table:table-cell office:value-type="float" office:value="688.743225097656">
            <text:p>688.7432250977</text:p>
          </table:table-cell>
          <table:table-cell office:value-type="float" office:value="-0.002859153">
            <text:p>-0.002859153</text:p>
          </table:table-cell>
          <table:table-cell table:number-columns-repeated="4"/>
        </table:table-row>
        <table:table-row table:style-name="ro1">
          <table:table-cell office:value-type="float" office:value="688.86328125">
            <text:p>688.86328125</text:p>
          </table:table-cell>
          <table:table-cell office:value-type="float" office:value="-0.001897443">
            <text:p>-0.001897443</text:p>
          </table:table-cell>
          <table:table-cell table:number-columns-repeated="4"/>
        </table:table-row>
        <table:table-row table:style-name="ro1">
          <table:table-cell office:value-type="float" office:value="688.983337402344">
            <text:p>688.9833374023</text:p>
          </table:table-cell>
          <table:table-cell office:value-type="float" office:value="-0.002523322">
            <text:p>-0.002523322</text:p>
          </table:table-cell>
          <table:table-cell table:number-columns-repeated="4"/>
        </table:table-row>
        <table:table-row table:style-name="ro1">
          <table:table-cell office:value-type="float" office:value="689.103393554688">
            <text:p>689.1033935547</text:p>
          </table:table-cell>
          <table:table-cell office:value-type="float" office:value="0.001680458">
            <text:p>0.001680458</text:p>
          </table:table-cell>
          <table:table-cell table:number-columns-repeated="4"/>
        </table:table-row>
        <table:table-row table:style-name="ro1">
          <table:table-cell office:value-type="float" office:value="689.223449707031">
            <text:p>689.223449707</text:p>
          </table:table-cell>
          <table:table-cell office:value-type="float" office:value="0.0003855186">
            <text:p>0.0003855186</text:p>
          </table:table-cell>
          <table:table-cell table:number-columns-repeated="4"/>
        </table:table-row>
        <table:table-row table:style-name="ro1">
          <table:table-cell office:value-type="float" office:value="689.343505859375">
            <text:p>689.3435058594</text:p>
          </table:table-cell>
          <table:table-cell office:value-type="float" office:value="0.01591511">
            <text:p>0.01591511</text:p>
          </table:table-cell>
          <table:table-cell table:number-columns-repeated="4"/>
        </table:table-row>
        <table:table-row table:style-name="ro1">
          <table:table-cell office:value-type="float" office:value="689.463562011719">
            <text:p>689.4635620117</text:p>
          </table:table-cell>
          <table:table-cell office:value-type="float" office:value="0.004158763">
            <text:p>0.004158763</text:p>
          </table:table-cell>
          <table:table-cell table:number-columns-repeated="4"/>
        </table:table-row>
        <table:table-row table:style-name="ro1">
          <table:table-cell office:value-type="float" office:value="689.583679199219">
            <text:p>689.5836791992</text:p>
          </table:table-cell>
          <table:table-cell office:value-type="float" office:value="0.005851747">
            <text:p>0.005851747</text:p>
          </table:table-cell>
          <table:table-cell table:number-columns-repeated="4"/>
        </table:table-row>
        <table:table-row table:style-name="ro1">
          <table:table-cell office:value-type="float" office:value="689.703735351563">
            <text:p>689.7037353516</text:p>
          </table:table-cell>
          <table:table-cell office:value-type="float" office:value="0.005096139">
            <text:p>0.005096139</text:p>
          </table:table-cell>
          <table:table-cell table:number-columns-repeated="4"/>
        </table:table-row>
        <table:table-row table:style-name="ro1">
          <table:table-cell office:value-type="float" office:value="689.823791503906">
            <text:p>689.8237915039</text:p>
          </table:table-cell>
          <table:table-cell office:value-type="float" office:value="-0.002144831">
            <text:p>-0.002144831</text:p>
          </table:table-cell>
          <table:table-cell table:number-columns-repeated="4"/>
        </table:table-row>
        <table:table-row table:style-name="ro1">
          <table:table-cell office:value-type="float" office:value="689.94384765625">
            <text:p>689.9438476563</text:p>
          </table:table-cell>
          <table:table-cell office:value-type="float" office:value="-0.002756779">
            <text:p>-0.002756779</text:p>
          </table:table-cell>
          <table:table-cell table:number-columns-repeated="4"/>
        </table:table-row>
        <table:table-row table:style-name="ro1">
          <table:table-cell office:value-type="float" office:value="690.063903808594">
            <text:p>690.0639038086</text:p>
          </table:table-cell>
          <table:table-cell office:value-type="float" office:value="0.004776738">
            <text:p>0.004776738</text:p>
          </table:table-cell>
          <table:table-cell table:number-columns-repeated="4"/>
        </table:table-row>
        <table:table-row table:style-name="ro1">
          <table:table-cell office:value-type="float" office:value="690.184020996094">
            <text:p>690.1840209961</text:p>
          </table:table-cell>
          <table:table-cell office:value-type="float" office:value="0.00199559">
            <text:p>0.00199559</text:p>
          </table:table-cell>
          <table:table-cell table:number-columns-repeated="4"/>
        </table:table-row>
        <table:table-row table:style-name="ro1">
          <table:table-cell office:value-type="float" office:value="690.304077148438">
            <text:p>690.3040771484</text:p>
          </table:table-cell>
          <table:table-cell office:value-type="float" office:value="0.000758764">
            <text:p>0.000758764</text:p>
          </table:table-cell>
          <table:table-cell table:number-columns-repeated="4"/>
        </table:table-row>
        <table:table-row table:style-name="ro1">
          <table:table-cell office:value-type="float" office:value="690.424133300781">
            <text:p>690.4241333008</text:p>
          </table:table-cell>
          <table:table-cell office:value-type="float" office:value="0.003452528">
            <text:p>0.003452528</text:p>
          </table:table-cell>
          <table:table-cell table:number-columns-repeated="4"/>
        </table:table-row>
        <table:table-row table:style-name="ro1">
          <table:table-cell office:value-type="float" office:value="690.544189453125">
            <text:p>690.5441894531</text:p>
          </table:table-cell>
          <table:table-cell office:value-type="float" office:value="0.02048681">
            <text:p>0.02048681</text:p>
          </table:table-cell>
          <table:table-cell table:number-columns-repeated="4"/>
        </table:table-row>
        <table:table-row table:style-name="ro1">
          <table:table-cell office:value-type="float" office:value="690.664306640625">
            <text:p>690.6643066406</text:p>
          </table:table-cell>
          <table:table-cell office:value-type="float" office:value="-0.005264486">
            <text:p>-0.005264486</text:p>
          </table:table-cell>
          <table:table-cell table:number-columns-repeated="4"/>
        </table:table-row>
        <table:table-row table:style-name="ro1">
          <table:table-cell office:value-type="float" office:value="690.784362792969">
            <text:p>690.784362793</text:p>
          </table:table-cell>
          <table:table-cell office:value-type="float" office:value="0.001006853">
            <text:p>0.001006853</text:p>
          </table:table-cell>
          <table:table-cell table:number-columns-repeated="4"/>
        </table:table-row>
        <table:table-row table:style-name="ro1">
          <table:table-cell office:value-type="float" office:value="690.904418945313">
            <text:p>690.9044189453</text:p>
          </table:table-cell>
          <table:table-cell office:value-type="float" office:value="0.03639975">
            <text:p>0.03639975</text:p>
          </table:table-cell>
          <table:table-cell table:number-columns-repeated="4"/>
        </table:table-row>
        <table:table-row table:style-name="ro1">
          <table:table-cell office:value-type="float" office:value="691.024475097656">
            <text:p>691.0244750977</text:p>
          </table:table-cell>
          <table:table-cell office:value-type="float" office:value="0.003417463">
            <text:p>0.003417463</text:p>
          </table:table-cell>
          <table:table-cell table:number-columns-repeated="4"/>
        </table:table-row>
        <table:table-row table:style-name="ro1">
          <table:table-cell office:value-type="float" office:value="691.144592285156">
            <text:p>691.1445922852</text:p>
          </table:table-cell>
          <table:table-cell office:value-type="float" office:value="0.003534222">
            <text:p>0.003534222</text:p>
          </table:table-cell>
          <table:table-cell table:number-columns-repeated="4"/>
        </table:table-row>
        <table:table-row table:style-name="ro1">
          <table:table-cell office:value-type="float" office:value="691.2646484375">
            <text:p>691.2646484375</text:p>
          </table:table-cell>
          <table:table-cell office:value-type="float" office:value="-0.0009823567">
            <text:p>-0.0009823567</text:p>
          </table:table-cell>
          <table:table-cell table:number-columns-repeated="4"/>
        </table:table-row>
        <table:table-row table:style-name="ro1">
          <table:table-cell office:value-type="float" office:value="691.384765625">
            <text:p>691.384765625</text:p>
          </table:table-cell>
          <table:table-cell office:value-type="float" office:value="0.01260238">
            <text:p>0.01260238</text:p>
          </table:table-cell>
          <table:table-cell table:number-columns-repeated="4"/>
        </table:table-row>
        <table:table-row table:style-name="ro1">
          <table:table-cell office:value-type="float" office:value="691.504821777344">
            <text:p>691.5048217773</text:p>
          </table:table-cell>
          <table:table-cell office:value-type="float" office:value="0.003129168">
            <text:p>0.003129168</text:p>
          </table:table-cell>
          <table:table-cell table:number-columns-repeated="4"/>
        </table:table-row>
        <table:table-row table:style-name="ro1">
          <table:table-cell office:value-type="float" office:value="691.624877929688">
            <text:p>691.6248779297</text:p>
          </table:table-cell>
          <table:table-cell office:value-type="float" office:value="-0.007807147">
            <text:p>-0.007807147</text:p>
          </table:table-cell>
          <table:table-cell table:number-columns-repeated="4"/>
        </table:table-row>
        <table:table-row table:style-name="ro1">
          <table:table-cell office:value-type="float" office:value="691.744995117188">
            <text:p>691.7449951172</text:p>
          </table:table-cell>
          <table:table-cell office:value-type="float" office:value="0.009944392">
            <text:p>0.009944392</text:p>
          </table:table-cell>
          <table:table-cell table:number-columns-repeated="4"/>
        </table:table-row>
        <table:table-row table:style-name="ro1">
          <table:table-cell office:value-type="float" office:value="691.865051269531">
            <text:p>691.8650512695</text:p>
          </table:table-cell>
          <table:table-cell office:value-type="float" office:value="-0.00498485">
            <text:p>-0.00498485</text:p>
          </table:table-cell>
          <table:table-cell table:number-columns-repeated="4"/>
        </table:table-row>
        <table:table-row table:style-name="ro1">
          <table:table-cell office:value-type="float" office:value="691.985168457031">
            <text:p>691.985168457</text:p>
          </table:table-cell>
          <table:table-cell office:value-type="float" office:value="-0.00310885">
            <text:p>-0.00310885</text:p>
          </table:table-cell>
          <table:table-cell table:number-columns-repeated="4"/>
        </table:table-row>
        <table:table-row table:style-name="ro1">
          <table:table-cell office:value-type="float" office:value="692.105224609375">
            <text:p>692.1052246094</text:p>
          </table:table-cell>
          <table:table-cell office:value-type="float" office:value="0.00865744">
            <text:p>0.00865744</text:p>
          </table:table-cell>
          <table:table-cell table:number-columns-repeated="4"/>
        </table:table-row>
        <table:table-row table:style-name="ro1">
          <table:table-cell office:value-type="float" office:value="692.225280761719">
            <text:p>692.2252807617</text:p>
          </table:table-cell>
          <table:table-cell office:value-type="float" office:value="0.004062576">
            <text:p>0.004062576</text:p>
          </table:table-cell>
          <table:table-cell table:number-columns-repeated="4"/>
        </table:table-row>
        <table:table-row table:style-name="ro1">
          <table:table-cell office:value-type="float" office:value="692.345397949219">
            <text:p>692.3453979492</text:p>
          </table:table-cell>
          <table:table-cell office:value-type="float" office:value="0.01236575">
            <text:p>0.01236575</text:p>
          </table:table-cell>
          <table:table-cell table:number-columns-repeated="4"/>
        </table:table-row>
        <table:table-row table:style-name="ro1">
          <table:table-cell office:value-type="float" office:value="692.465454101563">
            <text:p>692.4654541016</text:p>
          </table:table-cell>
          <table:table-cell office:value-type="float" office:value="0.004821416">
            <text:p>0.004821416</text:p>
          </table:table-cell>
          <table:table-cell table:number-columns-repeated="4"/>
        </table:table-row>
        <table:table-row table:style-name="ro1">
          <table:table-cell office:value-type="float" office:value="692.585571289063">
            <text:p>692.5855712891</text:p>
          </table:table-cell>
          <table:table-cell office:value-type="float" office:value="0.006445215">
            <text:p>0.006445215</text:p>
          </table:table-cell>
          <table:table-cell table:number-columns-repeated="4"/>
        </table:table-row>
        <table:table-row table:style-name="ro1">
          <table:table-cell office:value-type="float" office:value="692.705627441406">
            <text:p>692.7056274414</text:p>
          </table:table-cell>
          <table:table-cell office:value-type="float" office:value="0.0006153981">
            <text:p>0.0006153981</text:p>
          </table:table-cell>
          <table:table-cell table:number-columns-repeated="4"/>
        </table:table-row>
        <table:table-row table:style-name="ro1">
          <table:table-cell office:value-type="float" office:value="692.825744628906">
            <text:p>692.8257446289</text:p>
          </table:table-cell>
          <table:table-cell office:value-type="float" office:value="0.001802208">
            <text:p>0.001802208</text:p>
          </table:table-cell>
          <table:table-cell table:number-columns-repeated="4"/>
        </table:table-row>
        <table:table-row table:style-name="ro1">
          <table:table-cell office:value-type="float" office:value="692.94580078125">
            <text:p>692.9458007813</text:p>
          </table:table-cell>
          <table:table-cell office:value-type="float" office:value="0.0004302939">
            <text:p>0.0004302939</text:p>
          </table:table-cell>
          <table:table-cell table:number-columns-repeated="4"/>
        </table:table-row>
        <table:table-row table:style-name="ro1">
          <table:table-cell office:value-type="float" office:value="693.06591796875">
            <text:p>693.0659179688</text:p>
          </table:table-cell>
          <table:table-cell office:value-type="float" office:value="0.0006763716">
            <text:p>0.0006763716</text:p>
          </table:table-cell>
          <table:table-cell table:number-columns-repeated="4"/>
        </table:table-row>
        <table:table-row table:style-name="ro1">
          <table:table-cell office:value-type="float" office:value="693.18603515625">
            <text:p>693.1860351563</text:p>
          </table:table-cell>
          <table:table-cell office:value-type="float" office:value="-0.007167641">
            <text:p>-0.007167641</text:p>
          </table:table-cell>
          <table:table-cell table:number-columns-repeated="4"/>
        </table:table-row>
        <table:table-row table:style-name="ro1">
          <table:table-cell office:value-type="float" office:value="693.306091308594">
            <text:p>693.3060913086</text:p>
          </table:table-cell>
          <table:table-cell office:value-type="float" office:value="-0.003852262">
            <text:p>-0.003852262</text:p>
          </table:table-cell>
          <table:table-cell table:number-columns-repeated="4"/>
        </table:table-row>
        <table:table-row table:style-name="ro1">
          <table:table-cell office:value-type="float" office:value="693.426208496094">
            <text:p>693.4262084961</text:p>
          </table:table-cell>
          <table:table-cell office:value-type="float" office:value="-0.009627986">
            <text:p>-0.009627986</text:p>
          </table:table-cell>
          <table:table-cell table:number-columns-repeated="4"/>
        </table:table-row>
        <table:table-row table:style-name="ro1">
          <table:table-cell office:value-type="float" office:value="693.546264648438">
            <text:p>693.5462646484</text:p>
          </table:table-cell>
          <table:table-cell office:value-type="string">
            <text:p>-8.333896E-05</text:p>
          </table:table-cell>
          <table:table-cell table:number-columns-repeated="4"/>
        </table:table-row>
        <table:table-row table:style-name="ro1">
          <table:table-cell office:value-type="float" office:value="693.666381835938">
            <text:p>693.6663818359</text:p>
          </table:table-cell>
          <table:table-cell office:value-type="float" office:value="-0.003484337">
            <text:p>-0.003484337</text:p>
          </table:table-cell>
          <table:table-cell table:number-columns-repeated="4"/>
        </table:table-row>
        <table:table-row table:style-name="ro1">
          <table:table-cell office:value-type="float" office:value="693.786499023438">
            <text:p>693.7864990234</text:p>
          </table:table-cell>
          <table:table-cell office:value-type="float" office:value="0.01162337">
            <text:p>0.01162337</text:p>
          </table:table-cell>
          <table:table-cell table:number-columns-repeated="4"/>
        </table:table-row>
        <table:table-row table:style-name="ro1">
          <table:table-cell office:value-type="float" office:value="693.906555175781">
            <text:p>693.9065551758</text:p>
          </table:table-cell>
          <table:table-cell office:value-type="float" office:value="-0.005419781">
            <text:p>-0.005419781</text:p>
          </table:table-cell>
          <table:table-cell table:number-columns-repeated="4"/>
        </table:table-row>
        <table:table-row table:style-name="ro1">
          <table:table-cell office:value-type="float" office:value="694.026672363281">
            <text:p>694.0266723633</text:p>
          </table:table-cell>
          <table:table-cell office:value-type="float" office:value="-0.000441752">
            <text:p>-0.000441752</text:p>
          </table:table-cell>
          <table:table-cell table:number-columns-repeated="4"/>
        </table:table-row>
        <table:table-row table:style-name="ro1">
          <table:table-cell office:value-type="float" office:value="694.146728515625">
            <text:p>694.1467285156</text:p>
          </table:table-cell>
          <table:table-cell office:value-type="float" office:value="-0.0003623539">
            <text:p>-0.0003623539</text:p>
          </table:table-cell>
          <table:table-cell table:number-columns-repeated="4"/>
        </table:table-row>
        <table:table-row table:style-name="ro1">
          <table:table-cell office:value-type="float" office:value="694.266845703125">
            <text:p>694.2668457031</text:p>
          </table:table-cell>
          <table:table-cell office:value-type="float" office:value="-0.0003997482">
            <text:p>-0.0003997482</text:p>
          </table:table-cell>
          <table:table-cell table:number-columns-repeated="4"/>
        </table:table-row>
        <table:table-row table:style-name="ro1">
          <table:table-cell office:value-type="float" office:value="694.386962890625">
            <text:p>694.3869628906</text:p>
          </table:table-cell>
          <table:table-cell office:value-type="string">
            <text:p>-2.279944E-05</text:p>
          </table:table-cell>
          <table:table-cell table:number-columns-repeated="4"/>
        </table:table-row>
        <table:table-row table:style-name="ro1">
          <table:table-cell office:value-type="float" office:value="694.507080078125">
            <text:p>694.5070800781</text:p>
          </table:table-cell>
          <table:table-cell office:value-type="float" office:value="0.008664372">
            <text:p>0.008664372</text:p>
          </table:table-cell>
          <table:table-cell table:number-columns-repeated="4"/>
        </table:table-row>
        <table:table-row table:style-name="ro1">
          <table:table-cell office:value-type="float" office:value="694.627136230469">
            <text:p>694.6271362305</text:p>
          </table:table-cell>
          <table:table-cell office:value-type="float" office:value="-0.0002151744">
            <text:p>-0.0002151744</text:p>
          </table:table-cell>
          <table:table-cell table:number-columns-repeated="4"/>
        </table:table-row>
        <table:table-row table:style-name="ro1">
          <table:table-cell office:value-type="float" office:value="694.747253417969">
            <text:p>694.747253418</text:p>
          </table:table-cell>
          <table:table-cell office:value-type="float" office:value="-0.002571444">
            <text:p>-0.002571444</text:p>
          </table:table-cell>
          <table:table-cell table:number-columns-repeated="4"/>
        </table:table-row>
        <table:table-row table:style-name="ro1">
          <table:table-cell office:value-type="float" office:value="694.867370605469">
            <text:p>694.8673706055</text:p>
          </table:table-cell>
          <table:table-cell office:value-type="float" office:value="-0.007715923">
            <text:p>-0.007715923</text:p>
          </table:table-cell>
          <table:table-cell table:number-columns-repeated="4"/>
        </table:table-row>
        <table:table-row table:style-name="ro1">
          <table:table-cell office:value-type="float" office:value="694.987426757813">
            <text:p>694.9874267578</text:p>
          </table:table-cell>
          <table:table-cell office:value-type="float" office:value="-0.0007190168">
            <text:p>-0.0007190168</text:p>
          </table:table-cell>
          <table:table-cell table:number-columns-repeated="4"/>
        </table:table-row>
        <table:table-row table:style-name="ro1">
          <table:table-cell office:value-type="float" office:value="695.107543945313">
            <text:p>695.1075439453</text:p>
          </table:table-cell>
          <table:table-cell office:value-type="float" office:value="0.002922368">
            <text:p>0.002922368</text:p>
          </table:table-cell>
          <table:table-cell table:number-columns-repeated="4"/>
        </table:table-row>
        <table:table-row table:style-name="ro1">
          <table:table-cell office:value-type="float" office:value="695.227661132813">
            <text:p>695.2276611328</text:p>
          </table:table-cell>
          <table:table-cell office:value-type="float" office:value="0.00301789">
            <text:p>0.00301789</text:p>
          </table:table-cell>
          <table:table-cell table:number-columns-repeated="4"/>
        </table:table-row>
        <table:table-row table:style-name="ro1">
          <table:table-cell office:value-type="float" office:value="695.347778320313">
            <text:p>695.3477783203</text:p>
          </table:table-cell>
          <table:table-cell office:value-type="float" office:value="-0.005335401">
            <text:p>-0.005335401</text:p>
          </table:table-cell>
          <table:table-cell table:number-columns-repeated="4"/>
        </table:table-row>
        <table:table-row table:style-name="ro1">
          <table:table-cell office:value-type="float" office:value="695.467895507813">
            <text:p>695.4678955078</text:p>
          </table:table-cell>
          <table:table-cell office:value-type="float" office:value="-0.007294464">
            <text:p>-0.007294464</text:p>
          </table:table-cell>
          <table:table-cell table:number-columns-repeated="4"/>
        </table:table-row>
        <table:table-row table:style-name="ro1">
          <table:table-cell office:value-type="float" office:value="695.587951660156">
            <text:p>695.5879516602</text:p>
          </table:table-cell>
          <table:table-cell office:value-type="float" office:value="0.009758742">
            <text:p>0.009758742</text:p>
          </table:table-cell>
          <table:table-cell table:number-columns-repeated="4"/>
        </table:table-row>
        <table:table-row table:style-name="ro1">
          <table:table-cell office:value-type="float" office:value="695.708068847656">
            <text:p>695.7080688477</text:p>
          </table:table-cell>
          <table:table-cell office:value-type="float" office:value="0.00279092">
            <text:p>0.00279092</text:p>
          </table:table-cell>
          <table:table-cell table:number-columns-repeated="4"/>
        </table:table-row>
        <table:table-row table:style-name="ro1">
          <table:table-cell office:value-type="float" office:value="695.828186035156">
            <text:p>695.8281860352</text:p>
          </table:table-cell>
          <table:table-cell office:value-type="float" office:value="-0.002078582">
            <text:p>-0.002078582</text:p>
          </table:table-cell>
          <table:table-cell table:number-columns-repeated="4"/>
        </table:table-row>
        <table:table-row table:style-name="ro1">
          <table:table-cell office:value-type="float" office:value="695.948303222656">
            <text:p>695.9483032227</text:p>
          </table:table-cell>
          <table:table-cell office:value-type="float" office:value="-0.0008787105">
            <text:p>-0.0008787105</text:p>
          </table:table-cell>
          <table:table-cell table:number-columns-repeated="4"/>
        </table:table-row>
        <table:table-row table:style-name="ro1">
          <table:table-cell office:value-type="float" office:value="696.068420410156">
            <text:p>696.0684204102</text:p>
          </table:table-cell>
          <table:table-cell office:value-type="float" office:value="-0.005684642">
            <text:p>-0.005684642</text:p>
          </table:table-cell>
          <table:table-cell table:number-columns-repeated="4"/>
        </table:table-row>
        <table:table-row table:style-name="ro1">
          <table:table-cell office:value-type="float" office:value="696.188537597656">
            <text:p>696.1885375977</text:p>
          </table:table-cell>
          <table:table-cell office:value-type="float" office:value="0.02322341">
            <text:p>0.02322341</text:p>
          </table:table-cell>
          <table:table-cell table:number-columns-repeated="4"/>
        </table:table-row>
        <table:table-row table:style-name="ro1">
          <table:table-cell office:value-type="float" office:value="696.308654785156">
            <text:p>696.3086547852</text:p>
          </table:table-cell>
          <table:table-cell office:value-type="float" office:value="-0.006671898">
            <text:p>-0.006671898</text:p>
          </table:table-cell>
          <table:table-cell table:number-columns-repeated="4"/>
        </table:table-row>
        <table:table-row table:style-name="ro1">
          <table:table-cell office:value-type="float" office:value="696.428771972656">
            <text:p>696.4287719727</text:p>
          </table:table-cell>
          <table:table-cell office:value-type="float" office:value="0.01288478">
            <text:p>0.01288478</text:p>
          </table:table-cell>
          <table:table-cell table:number-columns-repeated="4"/>
        </table:table-row>
        <table:table-row table:style-name="ro1">
          <table:table-cell office:value-type="float" office:value="696.548828125">
            <text:p>696.548828125</text:p>
          </table:table-cell>
          <table:table-cell office:value-type="float" office:value="-0.005529307">
            <text:p>-0.005529307</text:p>
          </table:table-cell>
          <table:table-cell table:number-columns-repeated="4"/>
        </table:table-row>
        <table:table-row table:style-name="ro1">
          <table:table-cell office:value-type="float" office:value="696.6689453125">
            <text:p>696.6689453125</text:p>
          </table:table-cell>
          <table:table-cell office:value-type="float" office:value="-0.004155164">
            <text:p>-0.004155164</text:p>
          </table:table-cell>
          <table:table-cell table:number-columns-repeated="4"/>
        </table:table-row>
        <table:table-row table:style-name="ro1">
          <table:table-cell office:value-type="float" office:value="696.7890625">
            <text:p>696.7890625</text:p>
          </table:table-cell>
          <table:table-cell office:value-type="float" office:value="-0.007317858">
            <text:p>-0.007317858</text:p>
          </table:table-cell>
          <table:table-cell table:number-columns-repeated="4"/>
        </table:table-row>
        <table:table-row table:style-name="ro1">
          <table:table-cell office:value-type="float" office:value="696.9091796875">
            <text:p>696.9091796875</text:p>
          </table:table-cell>
          <table:table-cell office:value-type="float" office:value="-0.005904271">
            <text:p>-0.005904271</text:p>
          </table:table-cell>
          <table:table-cell table:number-columns-repeated="4"/>
        </table:table-row>
        <table:table-row table:style-name="ro1">
          <table:table-cell office:value-type="float" office:value="697.029296875">
            <text:p>697.029296875</text:p>
          </table:table-cell>
          <table:table-cell office:value-type="float" office:value="-0.009926587">
            <text:p>-0.009926587</text:p>
          </table:table-cell>
          <table:table-cell table:number-columns-repeated="4"/>
        </table:table-row>
        <table:table-row table:style-name="ro1">
          <table:table-cell office:value-type="float" office:value="697.1494140625">
            <text:p>697.1494140625</text:p>
          </table:table-cell>
          <table:table-cell office:value-type="float" office:value="0.007922808">
            <text:p>0.007922808</text:p>
          </table:table-cell>
          <table:table-cell table:number-columns-repeated="4"/>
        </table:table-row>
        <table:table-row table:style-name="ro1">
          <table:table-cell office:value-type="float" office:value="697.26953125">
            <text:p>697.26953125</text:p>
          </table:table-cell>
          <table:table-cell office:value-type="float" office:value="0.004448511">
            <text:p>0.004448511</text:p>
          </table:table-cell>
          <table:table-cell table:number-columns-repeated="4"/>
        </table:table-row>
        <table:table-row table:style-name="ro1">
          <table:table-cell office:value-type="float" office:value="697.3896484375">
            <text:p>697.3896484375</text:p>
          </table:table-cell>
          <table:table-cell office:value-type="float" office:value="-0.005747221">
            <text:p>-0.005747221</text:p>
          </table:table-cell>
          <table:table-cell table:number-columns-repeated="4"/>
        </table:table-row>
        <table:table-row table:style-name="ro1">
          <table:table-cell office:value-type="float" office:value="697.509765625">
            <text:p>697.509765625</text:p>
          </table:table-cell>
          <table:table-cell office:value-type="float" office:value="0.001487683">
            <text:p>0.001487683</text:p>
          </table:table-cell>
          <table:table-cell table:number-columns-repeated="4"/>
        </table:table-row>
        <table:table-row table:style-name="ro1">
          <table:table-cell office:value-type="float" office:value="697.6298828125">
            <text:p>697.6298828125</text:p>
          </table:table-cell>
          <table:table-cell office:value-type="float" office:value="-0.004928245">
            <text:p>-0.004928245</text:p>
          </table:table-cell>
          <table:table-cell table:number-columns-repeated="4"/>
        </table:table-row>
        <table:table-row table:style-name="ro1">
          <table:table-cell office:value-type="float" office:value="697.75">
            <text:p>697.75</text:p>
          </table:table-cell>
          <table:table-cell office:value-type="float" office:value="0.02341817">
            <text:p>0.02341817</text:p>
          </table:table-cell>
          <table:table-cell table:number-columns-repeated="4"/>
        </table:table-row>
        <table:table-row table:style-name="ro1">
          <table:table-cell office:value-type="float" office:value="697.8701171875">
            <text:p>697.8701171875</text:p>
          </table:table-cell>
          <table:table-cell office:value-type="float" office:value="0.006174988">
            <text:p>0.006174988</text:p>
          </table:table-cell>
          <table:table-cell table:number-columns-repeated="4"/>
        </table:table-row>
        <table:table-row table:style-name="ro1">
          <table:table-cell office:value-type="float" office:value="697.990234375">
            <text:p>697.990234375</text:p>
          </table:table-cell>
          <table:table-cell office:value-type="float" office:value="0.01311363">
            <text:p>0.01311363</text:p>
          </table:table-cell>
          <table:table-cell table:number-columns-repeated="4"/>
        </table:table-row>
        <table:table-row table:style-name="ro1">
          <table:table-cell office:value-type="float" office:value="698.1103515625">
            <text:p>698.1103515625</text:p>
          </table:table-cell>
          <table:table-cell office:value-type="float" office:value="0.003759778">
            <text:p>0.003759778</text:p>
          </table:table-cell>
          <table:table-cell table:number-columns-repeated="4"/>
        </table:table-row>
        <table:table-row table:style-name="ro1">
          <table:table-cell office:value-type="float" office:value="698.23046875">
            <text:p>698.23046875</text:p>
          </table:table-cell>
          <table:table-cell office:value-type="float" office:value="-0.006895541">
            <text:p>-0.006895541</text:p>
          </table:table-cell>
          <table:table-cell table:number-columns-repeated="4"/>
        </table:table-row>
        <table:table-row table:style-name="ro1">
          <table:table-cell office:value-type="float" office:value="698.350646972656">
            <text:p>698.3506469727</text:p>
          </table:table-cell>
          <table:table-cell office:value-type="float" office:value="-0.00312993">
            <text:p>-0.00312993</text:p>
          </table:table-cell>
          <table:table-cell table:number-columns-repeated="4"/>
        </table:table-row>
        <table:table-row table:style-name="ro1">
          <table:table-cell office:value-type="float" office:value="698.470764160156">
            <text:p>698.4707641602</text:p>
          </table:table-cell>
          <table:table-cell office:value-type="float" office:value="0.004145362">
            <text:p>0.004145362</text:p>
          </table:table-cell>
          <table:table-cell table:number-columns-repeated="4"/>
        </table:table-row>
        <table:table-row table:style-name="ro1">
          <table:table-cell office:value-type="float" office:value="698.590881347656">
            <text:p>698.5908813477</text:p>
          </table:table-cell>
          <table:table-cell office:value-type="float" office:value="0.002849575">
            <text:p>0.002849575</text:p>
          </table:table-cell>
          <table:table-cell table:number-columns-repeated="4"/>
        </table:table-row>
        <table:table-row table:style-name="ro1">
          <table:table-cell office:value-type="float" office:value="698.710998535156">
            <text:p>698.7109985352</text:p>
          </table:table-cell>
          <table:table-cell office:value-type="float" office:value="0.02284955">
            <text:p>0.02284955</text:p>
          </table:table-cell>
          <table:table-cell table:number-columns-repeated="4"/>
        </table:table-row>
        <table:table-row table:style-name="ro1">
          <table:table-cell office:value-type="float" office:value="698.831115722656">
            <text:p>698.8311157227</text:p>
          </table:table-cell>
          <table:table-cell office:value-type="float" office:value="-0.0006546343">
            <text:p>-0.0006546343</text:p>
          </table:table-cell>
          <table:table-cell table:number-columns-repeated="4"/>
        </table:table-row>
        <table:table-row table:style-name="ro1">
          <table:table-cell office:value-type="float" office:value="698.951232910156">
            <text:p>698.9512329102</text:p>
          </table:table-cell>
          <table:table-cell office:value-type="float" office:value="0.00102145">
            <text:p>0.00102145</text:p>
          </table:table-cell>
          <table:table-cell table:number-columns-repeated="4"/>
        </table:table-row>
        <table:table-row table:style-name="ro1">
          <table:table-cell office:value-type="float" office:value="699.071350097656">
            <text:p>699.0713500977</text:p>
          </table:table-cell>
          <table:table-cell office:value-type="float" office:value="0.005108735">
            <text:p>0.005108735</text:p>
          </table:table-cell>
          <table:table-cell table:number-columns-repeated="4"/>
        </table:table-row>
        <table:table-row table:style-name="ro1">
          <table:table-cell office:value-type="float" office:value="699.191528320313">
            <text:p>699.1915283203</text:p>
          </table:table-cell>
          <table:table-cell office:value-type="float" office:value="0.0002873113">
            <text:p>0.0002873113</text:p>
          </table:table-cell>
          <table:table-cell table:number-columns-repeated="4"/>
        </table:table-row>
        <table:table-row table:style-name="ro1">
          <table:table-cell office:value-type="float" office:value="699.311645507813">
            <text:p>699.3116455078</text:p>
          </table:table-cell>
          <table:table-cell office:value-type="float" office:value="0.002749223">
            <text:p>0.002749223</text:p>
          </table:table-cell>
          <table:table-cell table:number-columns-repeated="4"/>
        </table:table-row>
        <table:table-row table:style-name="ro1">
          <table:table-cell office:value-type="float" office:value="699.431762695313">
            <text:p>699.4317626953</text:p>
          </table:table-cell>
          <table:table-cell office:value-type="float" office:value="0.004306627">
            <text:p>0.004306627</text:p>
          </table:table-cell>
          <table:table-cell table:number-columns-repeated="4"/>
        </table:table-row>
        <table:table-row table:style-name="ro1">
          <table:table-cell office:value-type="float" office:value="699.551879882813">
            <text:p>699.5518798828</text:p>
          </table:table-cell>
          <table:table-cell office:value-type="float" office:value="0.009117719">
            <text:p>0.009117719</text:p>
          </table:table-cell>
          <table:table-cell table:number-columns-repeated="4"/>
        </table:table-row>
        <table:table-row table:style-name="ro1">
          <table:table-cell office:value-type="float" office:value="699.671997070313">
            <text:p>699.6719970703</text:p>
          </table:table-cell>
          <table:table-cell office:value-type="float" office:value="-0.0005532946">
            <text:p>-0.0005532946</text:p>
          </table:table-cell>
          <table:table-cell table:number-columns-repeated="4"/>
        </table:table-row>
        <table:table-row table:style-name="ro1">
          <table:table-cell office:value-type="float" office:value="699.792175292969">
            <text:p>699.792175293</text:p>
          </table:table-cell>
          <table:table-cell office:value-type="float" office:value="-0.002378831">
            <text:p>-0.002378831</text:p>
          </table:table-cell>
          <table:table-cell table:number-columns-repeated="4"/>
        </table:table-row>
        <table:table-row table:style-name="ro1">
          <table:table-cell office:value-type="float" office:value="699.912292480469">
            <text:p>699.9122924805</text:p>
          </table:table-cell>
          <table:table-cell office:value-type="float" office:value="0.02292999">
            <text:p>0.02292999</text:p>
          </table:table-cell>
          <table:table-cell table:number-columns-repeated="4"/>
        </table:table-row>
        <table:table-row table:style-name="ro1">
          <table:table-cell office:value-type="float" office:value="700.032409667969">
            <text:p>700.032409668</text:p>
          </table:table-cell>
          <table:table-cell office:value-type="float" office:value="0.009698197">
            <text:p>0.009698197</text:p>
          </table:table-cell>
          <table:table-cell table:number-columns-repeated="4"/>
        </table:table-row>
        <table:table-row table:style-name="ro1">
          <table:table-cell office:value-type="float" office:value="700.152526855469">
            <text:p>700.1525268555</text:p>
          </table:table-cell>
          <table:table-cell office:value-type="float" office:value="0.001652365">
            <text:p>0.001652365</text:p>
          </table:table-cell>
          <table:table-cell table:number-columns-repeated="4"/>
        </table:table-row>
        <table:table-row table:style-name="ro1">
          <table:table-cell office:value-type="float" office:value="700.272705078125">
            <text:p>700.2727050781</text:p>
          </table:table-cell>
          <table:table-cell office:value-type="float" office:value="-0.000834994">
            <text:p>-0.000834994</text:p>
          </table:table-cell>
          <table:table-cell table:number-columns-repeated="4"/>
        </table:table-row>
        <table:table-row table:style-name="ro1">
          <table:table-cell office:value-type="float" office:value="700.392822265625">
            <text:p>700.3928222656</text:p>
          </table:table-cell>
          <table:table-cell office:value-type="float" office:value="0.003135733">
            <text:p>0.003135733</text:p>
          </table:table-cell>
          <table:table-cell table:number-columns-repeated="4"/>
        </table:table-row>
        <table:table-row table:style-name="ro1">
          <table:table-cell office:value-type="float" office:value="700.512939453125">
            <text:p>700.5129394531</text:p>
          </table:table-cell>
          <table:table-cell office:value-type="float" office:value="0.0104529">
            <text:p>0.0104529</text:p>
          </table:table-cell>
          <table:table-cell table:number-columns-repeated="4"/>
        </table:table-row>
        <table:table-row table:style-name="ro1">
          <table:table-cell office:value-type="float" office:value="700.633117675781">
            <text:p>700.6331176758</text:p>
          </table:table-cell>
          <table:table-cell office:value-type="float" office:value="0.001965175">
            <text:p>0.001965175</text:p>
          </table:table-cell>
          <table:table-cell table:number-columns-repeated="4"/>
        </table:table-row>
        <table:table-row table:style-name="ro1">
          <table:table-cell office:value-type="float" office:value="700.753234863281">
            <text:p>700.7532348633</text:p>
          </table:table-cell>
          <table:table-cell office:value-type="float" office:value="0.001986771">
            <text:p>0.001986771</text:p>
          </table:table-cell>
          <table:table-cell table:number-columns-repeated="4"/>
        </table:table-row>
        <table:table-row table:style-name="ro1">
          <table:table-cell office:value-type="float" office:value="700.873352050781">
            <text:p>700.8733520508</text:p>
          </table:table-cell>
          <table:table-cell office:value-type="float" office:value="-0.004780861">
            <text:p>-0.004780861</text:p>
          </table:table-cell>
          <table:table-cell table:number-columns-repeated="4"/>
        </table:table-row>
        <table:table-row table:style-name="ro1">
          <table:table-cell office:value-type="float" office:value="700.993530273438">
            <text:p>700.9935302734</text:p>
          </table:table-cell>
          <table:table-cell office:value-type="float" office:value="-0.002490119">
            <text:p>-0.002490119</text:p>
          </table:table-cell>
          <table:table-cell table:number-columns-repeated="4"/>
        </table:table-row>
        <table:table-row table:style-name="ro1">
          <table:table-cell office:value-type="float" office:value="701.113647460938">
            <text:p>701.1136474609</text:p>
          </table:table-cell>
          <table:table-cell office:value-type="float" office:value="0.0034421">
            <text:p>0.0034421</text:p>
          </table:table-cell>
          <table:table-cell table:number-columns-repeated="4"/>
        </table:table-row>
        <table:table-row table:style-name="ro1">
          <table:table-cell office:value-type="float" office:value="701.233764648438">
            <text:p>701.2337646484</text:p>
          </table:table-cell>
          <table:table-cell office:value-type="float" office:value="-0.002897219">
            <text:p>-0.002897219</text:p>
          </table:table-cell>
          <table:table-cell table:number-columns-repeated="4"/>
        </table:table-row>
        <table:table-row table:style-name="ro1">
          <table:table-cell office:value-type="float" office:value="701.353942871094">
            <text:p>701.3539428711</text:p>
          </table:table-cell>
          <table:table-cell office:value-type="float" office:value="0.01437277">
            <text:p>0.01437277</text:p>
          </table:table-cell>
          <table:table-cell table:number-columns-repeated="4"/>
        </table:table-row>
        <table:table-row table:style-name="ro1">
          <table:table-cell office:value-type="float" office:value="701.474060058594">
            <text:p>701.4740600586</text:p>
          </table:table-cell>
          <table:table-cell office:value-type="float" office:value="0.006968318">
            <text:p>0.006968318</text:p>
          </table:table-cell>
          <table:table-cell table:number-columns-repeated="4"/>
        </table:table-row>
        <table:table-row table:style-name="ro1">
          <table:table-cell office:value-type="float" office:value="701.594177246094">
            <text:p>701.5941772461</text:p>
          </table:table-cell>
          <table:table-cell office:value-type="float" office:value="-0.003146744">
            <text:p>-0.003146744</text:p>
          </table:table-cell>
          <table:table-cell table:number-columns-repeated="4"/>
        </table:table-row>
        <table:table-row table:style-name="ro1">
          <table:table-cell office:value-type="float" office:value="701.71435546875">
            <text:p>701.7143554688</text:p>
          </table:table-cell>
          <table:table-cell office:value-type="float" office:value="0.00610029">
            <text:p>0.00610029</text:p>
          </table:table-cell>
          <table:table-cell table:number-columns-repeated="4"/>
        </table:table-row>
        <table:table-row table:style-name="ro1">
          <table:table-cell office:value-type="float" office:value="701.83447265625">
            <text:p>701.8344726563</text:p>
          </table:table-cell>
          <table:table-cell office:value-type="float" office:value="-0.008286441">
            <text:p>-0.008286441</text:p>
          </table:table-cell>
          <table:table-cell table:number-columns-repeated="4"/>
        </table:table-row>
        <table:table-row table:style-name="ro1">
          <table:table-cell office:value-type="float" office:value="701.954650878906">
            <text:p>701.9546508789</text:p>
          </table:table-cell>
          <table:table-cell office:value-type="float" office:value="-0.004617907">
            <text:p>-0.004617907</text:p>
          </table:table-cell>
          <table:table-cell table:number-columns-repeated="4"/>
        </table:table-row>
        <table:table-row table:style-name="ro1">
          <table:table-cell office:value-type="float" office:value="702.074768066406">
            <text:p>702.0747680664</text:p>
          </table:table-cell>
          <table:table-cell office:value-type="float" office:value="0.006051569">
            <text:p>0.006051569</text:p>
          </table:table-cell>
          <table:table-cell table:number-columns-repeated="4"/>
        </table:table-row>
        <table:table-row table:style-name="ro1">
          <table:table-cell office:value-type="float" office:value="702.194946289063">
            <text:p>702.1949462891</text:p>
          </table:table-cell>
          <table:table-cell office:value-type="float" office:value="0.01009587">
            <text:p>0.01009587</text:p>
          </table:table-cell>
          <table:table-cell table:number-columns-repeated="4"/>
        </table:table-row>
        <table:table-row table:style-name="ro1">
          <table:table-cell office:value-type="float" office:value="702.315063476563">
            <text:p>702.3150634766</text:p>
          </table:table-cell>
          <table:table-cell office:value-type="float" office:value="-0.003382937">
            <text:p>-0.003382937</text:p>
          </table:table-cell>
          <table:table-cell table:number-columns-repeated="4"/>
        </table:table-row>
        <table:table-row table:style-name="ro1">
          <table:table-cell office:value-type="float" office:value="702.435241699219">
            <text:p>702.4352416992</text:p>
          </table:table-cell>
          <table:table-cell office:value-type="float" office:value="-0.003203401">
            <text:p>-0.003203401</text:p>
          </table:table-cell>
          <table:table-cell table:number-columns-repeated="4"/>
        </table:table-row>
        <table:table-row table:style-name="ro1">
          <table:table-cell office:value-type="float" office:value="702.555358886719">
            <text:p>702.5553588867</text:p>
          </table:table-cell>
          <table:table-cell office:value-type="float" office:value="0.008627772">
            <text:p>0.008627772</text:p>
          </table:table-cell>
          <table:table-cell table:number-columns-repeated="4"/>
        </table:table-row>
        <table:table-row table:style-name="ro1">
          <table:table-cell office:value-type="float" office:value="702.675537109375">
            <text:p>702.6755371094</text:p>
          </table:table-cell>
          <table:table-cell office:value-type="float" office:value="0.0160468">
            <text:p>0.0160468</text:p>
          </table:table-cell>
          <table:table-cell table:number-columns-repeated="4"/>
        </table:table-row>
        <table:table-row table:style-name="ro1">
          <table:table-cell office:value-type="float" office:value="702.795654296875">
            <text:p>702.7956542969</text:p>
          </table:table-cell>
          <table:table-cell office:value-type="float" office:value="-0.0005245743">
            <text:p>-0.0005245743</text:p>
          </table:table-cell>
          <table:table-cell table:number-columns-repeated="4"/>
        </table:table-row>
        <table:table-row table:style-name="ro1">
          <table:table-cell office:value-type="float" office:value="702.915832519531">
            <text:p>702.9158325195</text:p>
          </table:table-cell>
          <table:table-cell office:value-type="float" office:value="0.001783655">
            <text:p>0.001783655</text:p>
          </table:table-cell>
          <table:table-cell table:number-columns-repeated="4"/>
        </table:table-row>
        <table:table-row table:style-name="ro1">
          <table:table-cell office:value-type="float" office:value="703.035949707031">
            <text:p>703.035949707</text:p>
          </table:table-cell>
          <table:table-cell office:value-type="float" office:value="-0.002167393">
            <text:p>-0.002167393</text:p>
          </table:table-cell>
          <table:table-cell table:number-columns-repeated="4"/>
        </table:table-row>
        <table:table-row table:style-name="ro1">
          <table:table-cell office:value-type="float" office:value="703.156127929688">
            <text:p>703.1561279297</text:p>
          </table:table-cell>
          <table:table-cell office:value-type="float" office:value="-0.0007580562">
            <text:p>-0.0007580562</text:p>
          </table:table-cell>
          <table:table-cell table:number-columns-repeated="4"/>
        </table:table-row>
        <table:table-row table:style-name="ro1">
          <table:table-cell office:value-type="float" office:value="703.276245117188">
            <text:p>703.2762451172</text:p>
          </table:table-cell>
          <table:table-cell office:value-type="float" office:value="-0.000913398">
            <text:p>-0.000913398</text:p>
          </table:table-cell>
          <table:table-cell table:number-columns-repeated="4"/>
        </table:table-row>
        <table:table-row table:style-name="ro1">
          <table:table-cell office:value-type="float" office:value="703.396423339844">
            <text:p>703.3964233398</text:p>
          </table:table-cell>
          <table:table-cell office:value-type="float" office:value="-0.00369806">
            <text:p>-0.00369806</text:p>
          </table:table-cell>
          <table:table-cell table:number-columns-repeated="4"/>
        </table:table-row>
        <table:table-row table:style-name="ro1">
          <table:table-cell office:value-type="float" office:value="703.516540527344">
            <text:p>703.5165405273</text:p>
          </table:table-cell>
          <table:table-cell office:value-type="float" office:value="0.0001463142">
            <text:p>0.0001463142</text:p>
          </table:table-cell>
          <table:table-cell table:number-columns-repeated="4"/>
        </table:table-row>
        <table:table-row table:style-name="ro1">
          <table:table-cell office:value-type="float" office:value="703.63671875">
            <text:p>703.63671875</text:p>
          </table:table-cell>
          <table:table-cell office:value-type="float" office:value="0.01134187">
            <text:p>0.01134187</text:p>
          </table:table-cell>
          <table:table-cell table:number-columns-repeated="4"/>
        </table:table-row>
        <table:table-row table:style-name="ro1">
          <table:table-cell office:value-type="float" office:value="703.756896972656">
            <text:p>703.7568969727</text:p>
          </table:table-cell>
          <table:table-cell office:value-type="float" office:value="-0.008274177">
            <text:p>-0.008274177</text:p>
          </table:table-cell>
          <table:table-cell table:number-columns-repeated="4"/>
        </table:table-row>
        <table:table-row table:style-name="ro1">
          <table:table-cell office:value-type="float" office:value="703.877014160156">
            <text:p>703.8770141602</text:p>
          </table:table-cell>
          <table:table-cell office:value-type="float" office:value="0.006738579">
            <text:p>0.006738579</text:p>
          </table:table-cell>
          <table:table-cell table:number-columns-repeated="4"/>
        </table:table-row>
        <table:table-row table:style-name="ro1">
          <table:table-cell office:value-type="float" office:value="703.997192382813">
            <text:p>703.9971923828</text:p>
          </table:table-cell>
          <table:table-cell office:value-type="float" office:value="-0.004377778">
            <text:p>-0.004377778</text:p>
          </table:table-cell>
          <table:table-cell table:number-columns-repeated="4"/>
        </table:table-row>
        <table:table-row table:style-name="ro1">
          <table:table-cell office:value-type="float" office:value="704.117309570313">
            <text:p>704.1173095703</text:p>
          </table:table-cell>
          <table:table-cell office:value-type="float" office:value="-0.001817425">
            <text:p>-0.001817425</text:p>
          </table:table-cell>
          <table:table-cell table:number-columns-repeated="4"/>
        </table:table-row>
        <table:table-row table:style-name="ro1">
          <table:table-cell office:value-type="float" office:value="704.237487792969">
            <text:p>704.237487793</text:p>
          </table:table-cell>
          <table:table-cell office:value-type="float" office:value="-0.004099404">
            <text:p>-0.004099404</text:p>
          </table:table-cell>
          <table:table-cell table:number-columns-repeated="4"/>
        </table:table-row>
        <table:table-row table:style-name="ro1">
          <table:table-cell office:value-type="float" office:value="704.357666015625">
            <text:p>704.3576660156</text:p>
          </table:table-cell>
          <table:table-cell office:value-type="float" office:value="-0.004062967">
            <text:p>-0.004062967</text:p>
          </table:table-cell>
          <table:table-cell table:number-columns-repeated="4"/>
        </table:table-row>
        <table:table-row table:style-name="ro1">
          <table:table-cell office:value-type="float" office:value="704.477783203125">
            <text:p>704.4777832031</text:p>
          </table:table-cell>
          <table:table-cell office:value-type="float" office:value="0.01030926">
            <text:p>0.01030926</text:p>
          </table:table-cell>
          <table:table-cell table:number-columns-repeated="4"/>
        </table:table-row>
        <table:table-row table:style-name="ro1">
          <table:table-cell office:value-type="float" office:value="704.597961425781">
            <text:p>704.5979614258</text:p>
          </table:table-cell>
          <table:table-cell office:value-type="float" office:value="-0.003001351">
            <text:p>-0.003001351</text:p>
          </table:table-cell>
          <table:table-cell table:number-columns-repeated="4"/>
        </table:table-row>
        <table:table-row table:style-name="ro1">
          <table:table-cell office:value-type="float" office:value="704.718139648438">
            <text:p>704.7181396484</text:p>
          </table:table-cell>
          <table:table-cell office:value-type="float" office:value="-0.005081459">
            <text:p>-0.005081459</text:p>
          </table:table-cell>
          <table:table-cell table:number-columns-repeated="4"/>
        </table:table-row>
        <table:table-row table:style-name="ro1">
          <table:table-cell office:value-type="float" office:value="704.838256835938">
            <text:p>704.8382568359</text:p>
          </table:table-cell>
          <table:table-cell office:value-type="float" office:value="-0.007656829">
            <text:p>-0.007656829</text:p>
          </table:table-cell>
          <table:table-cell table:number-columns-repeated="4"/>
        </table:table-row>
        <table:table-row table:style-name="ro1">
          <table:table-cell office:value-type="float" office:value="704.958435058594">
            <text:p>704.9584350586</text:p>
          </table:table-cell>
          <table:table-cell office:value-type="float" office:value="-0.007214858">
            <text:p>-0.007214858</text:p>
          </table:table-cell>
          <table:table-cell table:number-columns-repeated="4"/>
        </table:table-row>
        <table:table-row table:style-name="ro1">
          <table:table-cell office:value-type="float" office:value="705.07861328125">
            <text:p>705.0786132813</text:p>
          </table:table-cell>
          <table:table-cell office:value-type="float" office:value="0.002819249">
            <text:p>0.002819249</text:p>
          </table:table-cell>
          <table:table-cell table:number-columns-repeated="4"/>
        </table:table-row>
        <table:table-row table:style-name="ro1">
          <table:table-cell office:value-type="float" office:value="705.19873046875">
            <text:p>705.1987304688</text:p>
          </table:table-cell>
          <table:table-cell office:value-type="float" office:value="0.001700117">
            <text:p>0.001700117</text:p>
          </table:table-cell>
          <table:table-cell table:number-columns-repeated="4"/>
        </table:table-row>
        <table:table-row table:style-name="ro1">
          <table:table-cell office:value-type="float" office:value="705.318908691406">
            <text:p>705.3189086914</text:p>
          </table:table-cell>
          <table:table-cell office:value-type="float" office:value="-0.002899622">
            <text:p>-0.002899622</text:p>
          </table:table-cell>
          <table:table-cell table:number-columns-repeated="4"/>
        </table:table-row>
        <table:table-row table:style-name="ro1">
          <table:table-cell office:value-type="float" office:value="705.439086914063">
            <text:p>705.4390869141</text:p>
          </table:table-cell>
          <table:table-cell office:value-type="float" office:value="0.01090263">
            <text:p>0.01090263</text:p>
          </table:table-cell>
          <table:table-cell table:number-columns-repeated="4"/>
        </table:table-row>
        <table:table-row table:style-name="ro1">
          <table:table-cell office:value-type="float" office:value="705.559265136719">
            <text:p>705.5592651367</text:p>
          </table:table-cell>
          <table:table-cell office:value-type="float" office:value="-0.0002487874">
            <text:p>-0.0002487874</text:p>
          </table:table-cell>
          <table:table-cell table:number-columns-repeated="4"/>
        </table:table-row>
        <table:table-row table:style-name="ro1">
          <table:table-cell office:value-type="float" office:value="705.679382324219">
            <text:p>705.6793823242</text:p>
          </table:table-cell>
          <table:table-cell office:value-type="float" office:value="0.002249723">
            <text:p>0.002249723</text:p>
          </table:table-cell>
          <table:table-cell table:number-columns-repeated="4"/>
        </table:table-row>
        <table:table-row table:style-name="ro1">
          <table:table-cell office:value-type="float" office:value="705.799560546875">
            <text:p>705.7995605469</text:p>
          </table:table-cell>
          <table:table-cell office:value-type="float" office:value="0.01169786">
            <text:p>0.01169786</text:p>
          </table:table-cell>
          <table:table-cell table:number-columns-repeated="4"/>
        </table:table-row>
        <table:table-row table:style-name="ro1">
          <table:table-cell office:value-type="float" office:value="705.919738769531">
            <text:p>705.9197387695</text:p>
          </table:table-cell>
          <table:table-cell office:value-type="float" office:value="-0.001791916">
            <text:p>-0.001791916</text:p>
          </table:table-cell>
          <table:table-cell table:number-columns-repeated="4"/>
        </table:table-row>
        <table:table-row table:style-name="ro1">
          <table:table-cell office:value-type="float" office:value="706.039916992188">
            <text:p>706.0399169922</text:p>
          </table:table-cell>
          <table:table-cell office:value-type="float" office:value="-0.001250667">
            <text:p>-0.001250667</text:p>
          </table:table-cell>
          <table:table-cell table:number-columns-repeated="4"/>
        </table:table-row>
        <table:table-row table:style-name="ro1">
          <table:table-cell office:value-type="float" office:value="706.160034179688">
            <text:p>706.1600341797</text:p>
          </table:table-cell>
          <table:table-cell office:value-type="float" office:value="0.01785824">
            <text:p>0.01785824</text:p>
          </table:table-cell>
          <table:table-cell table:number-columns-repeated="4"/>
        </table:table-row>
        <table:table-row table:style-name="ro1">
          <table:table-cell office:value-type="float" office:value="706.280212402344">
            <text:p>706.2802124023</text:p>
          </table:table-cell>
          <table:table-cell office:value-type="float" office:value="-0.001063641">
            <text:p>-0.001063641</text:p>
          </table:table-cell>
          <table:table-cell table:number-columns-repeated="4"/>
        </table:table-row>
        <table:table-row table:style-name="ro1">
          <table:table-cell office:value-type="float" office:value="706.400390625">
            <text:p>706.400390625</text:p>
          </table:table-cell>
          <table:table-cell office:value-type="float" office:value="0.003320461">
            <text:p>0.003320461</text:p>
          </table:table-cell>
          <table:table-cell table:number-columns-repeated="4"/>
        </table:table-row>
        <table:table-row table:style-name="ro1">
          <table:table-cell office:value-type="float" office:value="706.520568847656">
            <text:p>706.5205688477</text:p>
          </table:table-cell>
          <table:table-cell office:value-type="float" office:value="0.004077821">
            <text:p>0.004077821</text:p>
          </table:table-cell>
          <table:table-cell table:number-columns-repeated="4"/>
        </table:table-row>
        <table:table-row table:style-name="ro1">
          <table:table-cell office:value-type="float" office:value="706.640747070313">
            <text:p>706.6407470703</text:p>
          </table:table-cell>
          <table:table-cell office:value-type="float" office:value="-0.003439496">
            <text:p>-0.003439496</text:p>
          </table:table-cell>
          <table:table-cell table:number-columns-repeated="4"/>
        </table:table-row>
        <table:table-row table:style-name="ro1">
          <table:table-cell office:value-type="float" office:value="706.760925292969">
            <text:p>706.760925293</text:p>
          </table:table-cell>
          <table:table-cell office:value-type="float" office:value="0.008606535">
            <text:p>0.008606535</text:p>
          </table:table-cell>
          <table:table-cell table:number-columns-repeated="4"/>
        </table:table-row>
        <table:table-row table:style-name="ro1">
          <table:table-cell office:value-type="float" office:value="706.881042480469">
            <text:p>706.8810424805</text:p>
          </table:table-cell>
          <table:table-cell office:value-type="float" office:value="0.001091984">
            <text:p>0.001091984</text:p>
          </table:table-cell>
          <table:table-cell table:number-columns-repeated="4"/>
        </table:table-row>
        <table:table-row table:style-name="ro1">
          <table:table-cell office:value-type="float" office:value="707.001220703125">
            <text:p>707.0012207031</text:p>
          </table:table-cell>
          <table:table-cell office:value-type="float" office:value="-0.007413562">
            <text:p>-0.007413562</text:p>
          </table:table-cell>
          <table:table-cell table:number-columns-repeated="4"/>
        </table:table-row>
        <table:table-row table:style-name="ro1">
          <table:table-cell office:value-type="float" office:value="707.121398925781">
            <text:p>707.1213989258</text:p>
          </table:table-cell>
          <table:table-cell office:value-type="float" office:value="-0.007969207">
            <text:p>-0.007969207</text:p>
          </table:table-cell>
          <table:table-cell table:number-columns-repeated="4"/>
        </table:table-row>
        <table:table-row table:style-name="ro1">
          <table:table-cell office:value-type="float" office:value="707.241577148438">
            <text:p>707.2415771484</text:p>
          </table:table-cell>
          <table:table-cell office:value-type="float" office:value="0.002839049">
            <text:p>0.002839049</text:p>
          </table:table-cell>
          <table:table-cell table:number-columns-repeated="4"/>
        </table:table-row>
        <table:table-row table:style-name="ro1">
          <table:table-cell office:value-type="float" office:value="707.361755371094">
            <text:p>707.3617553711</text:p>
          </table:table-cell>
          <table:table-cell office:value-type="float" office:value="0.00453481">
            <text:p>0.00453481</text:p>
          </table:table-cell>
          <table:table-cell table:number-columns-repeated="4"/>
        </table:table-row>
        <table:table-row table:style-name="ro1">
          <table:table-cell office:value-type="float" office:value="707.48193359375">
            <text:p>707.4819335938</text:p>
          </table:table-cell>
          <table:table-cell office:value-type="float" office:value="0.004855369">
            <text:p>0.004855369</text:p>
          </table:table-cell>
          <table:table-cell table:number-columns-repeated="4"/>
        </table:table-row>
        <table:table-row table:style-name="ro1">
          <table:table-cell office:value-type="float" office:value="707.602111816406">
            <text:p>707.6021118164</text:p>
          </table:table-cell>
          <table:table-cell office:value-type="float" office:value="-0.005679691">
            <text:p>-0.005679691</text:p>
          </table:table-cell>
          <table:table-cell table:number-columns-repeated="4"/>
        </table:table-row>
        <table:table-row table:style-name="ro1">
          <table:table-cell office:value-type="float" office:value="707.722290039063">
            <text:p>707.7222900391</text:p>
          </table:table-cell>
          <table:table-cell office:value-type="float" office:value="0.002114321">
            <text:p>0.002114321</text:p>
          </table:table-cell>
          <table:table-cell table:number-columns-repeated="4"/>
        </table:table-row>
        <table:table-row table:style-name="ro1">
          <table:table-cell office:value-type="float" office:value="707.842468261719">
            <text:p>707.8424682617</text:p>
          </table:table-cell>
          <table:table-cell office:value-type="float" office:value="0.004356852">
            <text:p>0.004356852</text:p>
          </table:table-cell>
          <table:table-cell table:number-columns-repeated="4"/>
        </table:table-row>
        <table:table-row table:style-name="ro1">
          <table:table-cell office:value-type="float" office:value="707.962646484375">
            <text:p>707.9626464844</text:p>
          </table:table-cell>
          <table:table-cell office:value-type="float" office:value="0.008154686">
            <text:p>0.008154686</text:p>
          </table:table-cell>
          <table:table-cell table:number-columns-repeated="4"/>
        </table:table-row>
        <table:table-row table:style-name="ro1">
          <table:table-cell office:value-type="float" office:value="708.082763671875">
            <text:p>708.0827636719</text:p>
          </table:table-cell>
          <table:table-cell office:value-type="float" office:value="-0.001947136">
            <text:p>-0.001947136</text:p>
          </table:table-cell>
          <table:table-cell table:number-columns-repeated="4"/>
        </table:table-row>
        <table:table-row table:style-name="ro1">
          <table:table-cell office:value-type="float" office:value="708.202941894531">
            <text:p>708.2029418945</text:p>
          </table:table-cell>
          <table:table-cell office:value-type="float" office:value="0.00226494">
            <text:p>0.00226494</text:p>
          </table:table-cell>
          <table:table-cell table:number-columns-repeated="4"/>
        </table:table-row>
        <table:table-row table:style-name="ro1">
          <table:table-cell office:value-type="float" office:value="708.323120117188">
            <text:p>708.3231201172</text:p>
          </table:table-cell>
          <table:table-cell office:value-type="float" office:value="0.003961134">
            <text:p>0.003961134</text:p>
          </table:table-cell>
          <table:table-cell table:number-columns-repeated="4"/>
        </table:table-row>
        <table:table-row table:style-name="ro1">
          <table:table-cell office:value-type="float" office:value="708.443298339844">
            <text:p>708.4432983398</text:p>
          </table:table-cell>
          <table:table-cell office:value-type="float" office:value="-0.003433915">
            <text:p>-0.003433915</text:p>
          </table:table-cell>
          <table:table-cell table:number-columns-repeated="4"/>
        </table:table-row>
        <table:table-row table:style-name="ro1">
          <table:table-cell office:value-type="float" office:value="708.5634765625">
            <text:p>708.5634765625</text:p>
          </table:table-cell>
          <table:table-cell office:value-type="float" office:value="-0.002640396">
            <text:p>-0.002640396</text:p>
          </table:table-cell>
          <table:table-cell table:number-columns-repeated="4"/>
        </table:table-row>
        <table:table-row table:style-name="ro1">
          <table:table-cell office:value-type="float" office:value="708.683654785156">
            <text:p>708.6836547852</text:p>
          </table:table-cell>
          <table:table-cell office:value-type="float" office:value="-0.003058407">
            <text:p>-0.003058407</text:p>
          </table:table-cell>
          <table:table-cell table:number-columns-repeated="4"/>
        </table:table-row>
        <table:table-row table:style-name="ro1">
          <table:table-cell office:value-type="float" office:value="708.803833007813">
            <text:p>708.8038330078</text:p>
          </table:table-cell>
          <table:table-cell office:value-type="float" office:value="0.01133624">
            <text:p>0.01133624</text:p>
          </table:table-cell>
          <table:table-cell table:number-columns-repeated="4"/>
        </table:table-row>
        <table:table-row table:style-name="ro1">
          <table:table-cell office:value-type="float" office:value="708.924011230469">
            <text:p>708.9240112305</text:p>
          </table:table-cell>
          <table:table-cell office:value-type="float" office:value="-0.008098125">
            <text:p>-0.008098125</text:p>
          </table:table-cell>
          <table:table-cell table:number-columns-repeated="4"/>
        </table:table-row>
        <table:table-row table:style-name="ro1">
          <table:table-cell office:value-type="float" office:value="709.044189453125">
            <text:p>709.0441894531</text:p>
          </table:table-cell>
          <table:table-cell office:value-type="float" office:value="-0.0003844616">
            <text:p>-0.0003844616</text:p>
          </table:table-cell>
          <table:table-cell table:number-columns-repeated="4"/>
        </table:table-row>
        <table:table-row table:style-name="ro1">
          <table:table-cell office:value-type="float" office:value="709.164367675781">
            <text:p>709.1643676758</text:p>
          </table:table-cell>
          <table:table-cell office:value-type="float" office:value="0.002762773">
            <text:p>0.002762773</text:p>
          </table:table-cell>
          <table:table-cell table:number-columns-repeated="4"/>
        </table:table-row>
        <table:table-row table:style-name="ro1">
          <table:table-cell office:value-type="float" office:value="709.284545898438">
            <text:p>709.2845458984</text:p>
          </table:table-cell>
          <table:table-cell office:value-type="float" office:value="0.0022752">
            <text:p>0.0022752</text:p>
          </table:table-cell>
          <table:table-cell table:number-columns-repeated="4"/>
        </table:table-row>
        <table:table-row table:style-name="ro1">
          <table:table-cell office:value-type="float" office:value="709.404724121094">
            <text:p>709.4047241211</text:p>
          </table:table-cell>
          <table:table-cell office:value-type="float" office:value="0.002241939">
            <text:p>0.002241939</text:p>
          </table:table-cell>
          <table:table-cell table:number-columns-repeated="4"/>
        </table:table-row>
        <table:table-row table:style-name="ro1">
          <table:table-cell office:value-type="float" office:value="709.52490234375">
            <text:p>709.5249023438</text:p>
          </table:table-cell>
          <table:table-cell office:value-type="float" office:value="-0.004372701">
            <text:p>-0.004372701</text:p>
          </table:table-cell>
          <table:table-cell table:number-columns-repeated="4"/>
        </table:table-row>
        <table:table-row table:style-name="ro1">
          <table:table-cell office:value-type="float" office:value="709.645141601563">
            <text:p>709.6451416016</text:p>
          </table:table-cell>
          <table:table-cell office:value-type="float" office:value="-0.005320447">
            <text:p>-0.005320447</text:p>
          </table:table-cell>
          <table:table-cell table:number-columns-repeated="4"/>
        </table:table-row>
        <table:table-row table:style-name="ro1">
          <table:table-cell office:value-type="float" office:value="709.765319824219">
            <text:p>709.7653198242</text:p>
          </table:table-cell>
          <table:table-cell office:value-type="float" office:value="0.003162876">
            <text:p>0.003162876</text:p>
          </table:table-cell>
          <table:table-cell table:number-columns-repeated="4"/>
        </table:table-row>
        <table:table-row table:style-name="ro1">
          <table:table-cell office:value-type="float" office:value="709.885498046875">
            <text:p>709.8854980469</text:p>
          </table:table-cell>
          <table:table-cell office:value-type="float" office:value="-0.001300561">
            <text:p>-0.001300561</text:p>
          </table:table-cell>
          <table:table-cell table:number-columns-repeated="4"/>
        </table:table-row>
        <table:table-row table:style-name="ro1">
          <table:table-cell office:value-type="float" office:value="710.005676269531">
            <text:p>710.0056762695</text:p>
          </table:table-cell>
          <table:table-cell office:value-type="float" office:value="-0.001845141">
            <text:p>-0.001845141</text:p>
          </table:table-cell>
          <table:table-cell table:number-columns-repeated="4"/>
        </table:table-row>
        <table:table-row table:style-name="ro1">
          <table:table-cell office:value-type="float" office:value="710.125854492188">
            <text:p>710.1258544922</text:p>
          </table:table-cell>
          <table:table-cell office:value-type="float" office:value="0.005399942">
            <text:p>0.005399942</text:p>
          </table:table-cell>
          <table:table-cell table:number-columns-repeated="4"/>
        </table:table-row>
        <table:table-row table:style-name="ro1">
          <table:table-cell office:value-type="float" office:value="710.246032714844">
            <text:p>710.2460327148</text:p>
          </table:table-cell>
          <table:table-cell office:value-type="float" office:value="0.002298365">
            <text:p>0.002298365</text:p>
          </table:table-cell>
          <table:table-cell table:number-columns-repeated="4"/>
        </table:table-row>
        <table:table-row table:style-name="ro1">
          <table:table-cell office:value-type="float" office:value="710.3662109375">
            <text:p>710.3662109375</text:p>
          </table:table-cell>
          <table:table-cell office:value-type="float" office:value="-0.006657101">
            <text:p>-0.006657101</text:p>
          </table:table-cell>
          <table:table-cell table:number-columns-repeated="4"/>
        </table:table-row>
        <table:table-row table:style-name="ro1">
          <table:table-cell office:value-type="float" office:value="710.486389160156">
            <text:p>710.4863891602</text:p>
          </table:table-cell>
          <table:table-cell office:value-type="float" office:value="0.008566272">
            <text:p>0.008566272</text:p>
          </table:table-cell>
          <table:table-cell table:number-columns-repeated="4"/>
        </table:table-row>
        <table:table-row table:style-name="ro1">
          <table:table-cell office:value-type="float" office:value="710.606567382813">
            <text:p>710.6065673828</text:p>
          </table:table-cell>
          <table:table-cell office:value-type="float" office:value="-0.001341311">
            <text:p>-0.001341311</text:p>
          </table:table-cell>
          <table:table-cell table:number-columns-repeated="4"/>
        </table:table-row>
        <table:table-row table:style-name="ro1">
          <table:table-cell office:value-type="float" office:value="710.726745605469">
            <text:p>710.7267456055</text:p>
          </table:table-cell>
          <table:table-cell office:value-type="float" office:value="-0.005737657">
            <text:p>-0.005737657</text:p>
          </table:table-cell>
          <table:table-cell table:number-columns-repeated="4"/>
        </table:table-row>
        <table:table-row table:style-name="ro1">
          <table:table-cell office:value-type="float" office:value="710.846984863281">
            <text:p>710.8469848633</text:p>
          </table:table-cell>
          <table:table-cell office:value-type="float" office:value="0.00210641">
            <text:p>0.00210641</text:p>
          </table:table-cell>
          <table:table-cell table:number-columns-repeated="4"/>
        </table:table-row>
        <table:table-row table:style-name="ro1">
          <table:table-cell office:value-type="float" office:value="710.967163085938">
            <text:p>710.9671630859</text:p>
          </table:table-cell>
          <table:table-cell office:value-type="float" office:value="-0.0005381737">
            <text:p>-0.0005381737</text:p>
          </table:table-cell>
          <table:table-cell table:number-columns-repeated="4"/>
        </table:table-row>
        <table:table-row table:style-name="ro1">
          <table:table-cell office:value-type="float" office:value="711.087341308594">
            <text:p>711.0873413086</text:p>
          </table:table-cell>
          <table:table-cell office:value-type="float" office:value="0.0007577126">
            <text:p>0.0007577126</text:p>
          </table:table-cell>
          <table:table-cell table:number-columns-repeated="4"/>
        </table:table-row>
        <table:table-row table:style-name="ro1">
          <table:table-cell office:value-type="float" office:value="711.20751953125">
            <text:p>711.2075195313</text:p>
          </table:table-cell>
          <table:table-cell office:value-type="float" office:value="-0.008266308">
            <text:p>-0.008266308</text:p>
          </table:table-cell>
          <table:table-cell table:number-columns-repeated="4"/>
        </table:table-row>
        <table:table-row table:style-name="ro1">
          <table:table-cell office:value-type="float" office:value="711.327697753906">
            <text:p>711.3276977539</text:p>
          </table:table-cell>
          <table:table-cell office:value-type="float" office:value="-0.005930777">
            <text:p>-0.005930777</text:p>
          </table:table-cell>
          <table:table-cell table:number-columns-repeated="4"/>
        </table:table-row>
        <table:table-row table:style-name="ro1">
          <table:table-cell office:value-type="float" office:value="711.447875976563">
            <text:p>711.4478759766</text:p>
          </table:table-cell>
          <table:table-cell office:value-type="float" office:value="0.002874481">
            <text:p>0.002874481</text:p>
          </table:table-cell>
          <table:table-cell table:number-columns-repeated="4"/>
        </table:table-row>
        <table:table-row table:style-name="ro1">
          <table:table-cell office:value-type="float" office:value="711.568115234375">
            <text:p>711.5681152344</text:p>
          </table:table-cell>
          <table:table-cell office:value-type="float" office:value="-0.002382708">
            <text:p>-0.002382708</text:p>
          </table:table-cell>
          <table:table-cell table:number-columns-repeated="4"/>
        </table:table-row>
        <table:table-row table:style-name="ro1">
          <table:table-cell office:value-type="float" office:value="711.688293457031">
            <text:p>711.688293457</text:p>
          </table:table-cell>
          <table:table-cell office:value-type="float" office:value="0.01291781">
            <text:p>0.01291781</text:p>
          </table:table-cell>
          <table:table-cell table:number-columns-repeated="4"/>
        </table:table-row>
        <table:table-row table:style-name="ro1">
          <table:table-cell office:value-type="float" office:value="711.808471679688">
            <text:p>711.8084716797</text:p>
          </table:table-cell>
          <table:table-cell office:value-type="float" office:value="-0.006950131">
            <text:p>-0.006950131</text:p>
          </table:table-cell>
          <table:table-cell table:number-columns-repeated="4"/>
        </table:table-row>
        <table:table-row table:style-name="ro1">
          <table:table-cell office:value-type="float" office:value="711.928649902344">
            <text:p>711.9286499023</text:p>
          </table:table-cell>
          <table:table-cell office:value-type="float" office:value="-0.003405792">
            <text:p>-0.003405792</text:p>
          </table:table-cell>
          <table:table-cell table:number-columns-repeated="4"/>
        </table:table-row>
        <table:table-row table:style-name="ro1">
          <table:table-cell office:value-type="float" office:value="712.048889160156">
            <text:p>712.0488891602</text:p>
          </table:table-cell>
          <table:table-cell office:value-type="float" office:value="-0.0004433275">
            <text:p>-0.0004433275</text:p>
          </table:table-cell>
          <table:table-cell table:number-columns-repeated="4"/>
        </table:table-row>
        <table:table-row table:style-name="ro1">
          <table:table-cell office:value-type="float" office:value="712.169067382813">
            <text:p>712.1690673828</text:p>
          </table:table-cell>
          <table:table-cell office:value-type="float" office:value="0.007537205">
            <text:p>0.007537205</text:p>
          </table:table-cell>
          <table:table-cell table:number-columns-repeated="4"/>
        </table:table-row>
        <table:table-row table:style-name="ro1">
          <table:table-cell office:value-type="float" office:value="712.289245605469">
            <text:p>712.2892456055</text:p>
          </table:table-cell>
          <table:table-cell office:value-type="float" office:value="0.004624633">
            <text:p>0.004624633</text:p>
          </table:table-cell>
          <table:table-cell table:number-columns-repeated="4"/>
        </table:table-row>
        <table:table-row table:style-name="ro1">
          <table:table-cell office:value-type="float" office:value="712.409423828125">
            <text:p>712.4094238281</text:p>
          </table:table-cell>
          <table:table-cell office:value-type="float" office:value="-0.005430746">
            <text:p>-0.005430746</text:p>
          </table:table-cell>
          <table:table-cell table:number-columns-repeated="4"/>
        </table:table-row>
        <table:table-row table:style-name="ro1">
          <table:table-cell office:value-type="float" office:value="712.529663085938">
            <text:p>712.5296630859</text:p>
          </table:table-cell>
          <table:table-cell office:value-type="float" office:value="0.006832753">
            <text:p>0.006832753</text:p>
          </table:table-cell>
          <table:table-cell table:number-columns-repeated="4"/>
        </table:table-row>
        <table:table-row table:style-name="ro1">
          <table:table-cell office:value-type="float" office:value="712.649841308594">
            <text:p>712.6498413086</text:p>
          </table:table-cell>
          <table:table-cell office:value-type="float" office:value="-0.004500734">
            <text:p>-0.004500734</text:p>
          </table:table-cell>
          <table:table-cell table:number-columns-repeated="4"/>
        </table:table-row>
        <table:table-row table:style-name="ro1">
          <table:table-cell office:value-type="float" office:value="712.77001953125">
            <text:p>712.7700195313</text:p>
          </table:table-cell>
          <table:table-cell office:value-type="float" office:value="-0.01001948">
            <text:p>-0.01001948</text:p>
          </table:table-cell>
          <table:table-cell table:number-columns-repeated="4"/>
        </table:table-row>
        <table:table-row table:style-name="ro1">
          <table:table-cell office:value-type="float" office:value="712.890197753906">
            <text:p>712.8901977539</text:p>
          </table:table-cell>
          <table:table-cell office:value-type="float" office:value="-0.003832438">
            <text:p>-0.003832438</text:p>
          </table:table-cell>
          <table:table-cell table:number-columns-repeated="4"/>
        </table:table-row>
        <table:table-row table:style-name="ro1">
          <table:table-cell office:value-type="float" office:value="713.010437011719">
            <text:p>713.0104370117</text:p>
          </table:table-cell>
          <table:table-cell office:value-type="float" office:value="0.01541056">
            <text:p>0.01541056</text:p>
          </table:table-cell>
          <table:table-cell table:number-columns-repeated="4"/>
        </table:table-row>
        <table:table-row table:style-name="ro1">
          <table:table-cell office:value-type="float" office:value="713.130615234375">
            <text:p>713.1306152344</text:p>
          </table:table-cell>
          <table:table-cell office:value-type="float" office:value="0.01551844">
            <text:p>0.01551844</text:p>
          </table:table-cell>
          <table:table-cell table:number-columns-repeated="4"/>
        </table:table-row>
        <table:table-row table:style-name="ro1">
          <table:table-cell office:value-type="float" office:value="713.250793457031">
            <text:p>713.250793457</text:p>
          </table:table-cell>
          <table:table-cell office:value-type="float" office:value="0.01455694">
            <text:p>0.01455694</text:p>
          </table:table-cell>
          <table:table-cell table:number-columns-repeated="4"/>
        </table:table-row>
        <table:table-row table:style-name="ro1">
          <table:table-cell office:value-type="float" office:value="713.371032714844">
            <text:p>713.3710327148</text:p>
          </table:table-cell>
          <table:table-cell office:value-type="float" office:value="-0.00787468">
            <text:p>-0.00787468</text:p>
          </table:table-cell>
          <table:table-cell table:number-columns-repeated="4"/>
        </table:table-row>
        <table:table-row table:style-name="ro1">
          <table:table-cell office:value-type="float" office:value="713.4912109375">
            <text:p>713.4912109375</text:p>
          </table:table-cell>
          <table:table-cell office:value-type="float" office:value="-0.0004913063">
            <text:p>-0.0004913063</text:p>
          </table:table-cell>
          <table:table-cell table:number-columns-repeated="4"/>
        </table:table-row>
        <table:table-row table:style-name="ro1">
          <table:table-cell office:value-type="float" office:value="713.611389160156">
            <text:p>713.6113891602</text:p>
          </table:table-cell>
          <table:table-cell office:value-type="float" office:value="0.004416187">
            <text:p>0.004416187</text:p>
          </table:table-cell>
          <table:table-cell table:number-columns-repeated="4"/>
        </table:table-row>
        <table:table-row table:style-name="ro1">
          <table:table-cell office:value-type="float" office:value="713.731628417969">
            <text:p>713.731628418</text:p>
          </table:table-cell>
          <table:table-cell office:value-type="float" office:value="0.004763456">
            <text:p>0.004763456</text:p>
          </table:table-cell>
          <table:table-cell table:number-columns-repeated="4"/>
        </table:table-row>
        <table:table-row table:style-name="ro1">
          <table:table-cell office:value-type="float" office:value="713.851806640625">
            <text:p>713.8518066406</text:p>
          </table:table-cell>
          <table:table-cell office:value-type="float" office:value="-0.005812995">
            <text:p>-0.005812995</text:p>
          </table:table-cell>
          <table:table-cell table:number-columns-repeated="4"/>
        </table:table-row>
        <table:table-row table:style-name="ro1">
          <table:table-cell office:value-type="float" office:value="713.971984863281">
            <text:p>713.9719848633</text:p>
          </table:table-cell>
          <table:table-cell office:value-type="float" office:value="-0.002107219">
            <text:p>-0.002107219</text:p>
          </table:table-cell>
          <table:table-cell table:number-columns-repeated="4"/>
        </table:table-row>
        <table:table-row table:style-name="ro1">
          <table:table-cell office:value-type="float" office:value="714.092224121094">
            <text:p>714.0922241211</text:p>
          </table:table-cell>
          <table:table-cell office:value-type="float" office:value="-0.009214915">
            <text:p>-0.009214915</text:p>
          </table:table-cell>
          <table:table-cell table:number-columns-repeated="4"/>
        </table:table-row>
        <table:table-row table:style-name="ro1">
          <table:table-cell office:value-type="float" office:value="714.21240234375">
            <text:p>714.2124023438</text:p>
          </table:table-cell>
          <table:table-cell office:value-type="float" office:value="0.009284977">
            <text:p>0.009284977</text:p>
          </table:table-cell>
          <table:table-cell table:number-columns-repeated="4"/>
        </table:table-row>
        <table:table-row table:style-name="ro1">
          <table:table-cell office:value-type="float" office:value="714.332580566406">
            <text:p>714.3325805664</text:p>
          </table:table-cell>
          <table:table-cell office:value-type="float" office:value="0.004031877">
            <text:p>0.004031877</text:p>
          </table:table-cell>
          <table:table-cell table:number-columns-repeated="4"/>
        </table:table-row>
        <table:table-row table:style-name="ro1">
          <table:table-cell office:value-type="float" office:value="714.452819824219">
            <text:p>714.4528198242</text:p>
          </table:table-cell>
          <table:table-cell office:value-type="float" office:value="0.0007670776">
            <text:p>0.0007670776</text:p>
          </table:table-cell>
          <table:table-cell table:number-columns-repeated="4"/>
        </table:table-row>
        <table:table-row table:style-name="ro1">
          <table:table-cell office:value-type="float" office:value="714.572998046875">
            <text:p>714.5729980469</text:p>
          </table:table-cell>
          <table:table-cell office:value-type="float" office:value="0.004331596">
            <text:p>0.004331596</text:p>
          </table:table-cell>
          <table:table-cell table:number-columns-repeated="4"/>
        </table:table-row>
        <table:table-row table:style-name="ro1">
          <table:table-cell office:value-type="float" office:value="714.693237304688">
            <text:p>714.6932373047</text:p>
          </table:table-cell>
          <table:table-cell office:value-type="float" office:value="0.01322642">
            <text:p>0.01322642</text:p>
          </table:table-cell>
          <table:table-cell table:number-columns-repeated="4"/>
        </table:table-row>
        <table:table-row table:style-name="ro1">
          <table:table-cell office:value-type="float" office:value="714.813415527344">
            <text:p>714.8134155273</text:p>
          </table:table-cell>
          <table:table-cell office:value-type="float" office:value="-0.002395277">
            <text:p>-0.002395277</text:p>
          </table:table-cell>
          <table:table-cell table:number-columns-repeated="4"/>
        </table:table-row>
        <table:table-row table:style-name="ro1">
          <table:table-cell office:value-type="float" office:value="714.93359375">
            <text:p>714.93359375</text:p>
          </table:table-cell>
          <table:table-cell office:value-type="float" office:value="0.00347229">
            <text:p>0.00347229</text:p>
          </table:table-cell>
          <table:table-cell table:number-columns-repeated="4"/>
        </table:table-row>
        <table:table-row table:style-name="ro1">
          <table:table-cell office:value-type="float" office:value="715.053833007813">
            <text:p>715.0538330078</text:p>
          </table:table-cell>
          <table:table-cell office:value-type="float" office:value="0.00264078">
            <text:p>0.00264078</text:p>
          </table:table-cell>
          <table:table-cell table:number-columns-repeated="4"/>
        </table:table-row>
        <table:table-row table:style-name="ro1">
          <table:table-cell office:value-type="float" office:value="715.174011230469">
            <text:p>715.1740112305</text:p>
          </table:table-cell>
          <table:table-cell office:value-type="float" office:value="0.003342304">
            <text:p>0.003342304</text:p>
          </table:table-cell>
          <table:table-cell table:number-columns-repeated="4"/>
        </table:table-row>
        <table:table-row table:style-name="ro1">
          <table:table-cell office:value-type="float" office:value="715.294250488281">
            <text:p>715.2942504883</text:p>
          </table:table-cell>
          <table:table-cell office:value-type="float" office:value="-0.007834637">
            <text:p>-0.007834637</text:p>
          </table:table-cell>
          <table:table-cell table:number-columns-repeated="4"/>
        </table:table-row>
        <table:table-row table:style-name="ro1">
          <table:table-cell office:value-type="float" office:value="715.414428710938">
            <text:p>715.4144287109</text:p>
          </table:table-cell>
          <table:table-cell office:value-type="float" office:value="-0.003313234">
            <text:p>-0.003313234</text:p>
          </table:table-cell>
          <table:table-cell table:number-columns-repeated="4"/>
        </table:table-row>
        <table:table-row table:style-name="ro1">
          <table:table-cell office:value-type="float" office:value="715.53466796875">
            <text:p>715.5346679688</text:p>
          </table:table-cell>
          <table:table-cell office:value-type="float" office:value="0.001064964">
            <text:p>0.001064964</text:p>
          </table:table-cell>
          <table:table-cell table:number-columns-repeated="4"/>
        </table:table-row>
        <table:table-row table:style-name="ro1">
          <table:table-cell office:value-type="float" office:value="715.654846191406">
            <text:p>715.6548461914</text:p>
          </table:table-cell>
          <table:table-cell office:value-type="float" office:value="-0.005864693">
            <text:p>-0.005864693</text:p>
          </table:table-cell>
          <table:table-cell table:number-columns-repeated="4"/>
        </table:table-row>
        <table:table-row table:style-name="ro1">
          <table:table-cell office:value-type="float" office:value="715.775024414063">
            <text:p>715.7750244141</text:p>
          </table:table-cell>
          <table:table-cell office:value-type="float" office:value="0.001994503">
            <text:p>0.001994503</text:p>
          </table:table-cell>
          <table:table-cell table:number-columns-repeated="4"/>
        </table:table-row>
        <table:table-row table:style-name="ro1">
          <table:table-cell office:value-type="float" office:value="715.895263671875">
            <text:p>715.8952636719</text:p>
          </table:table-cell>
          <table:table-cell office:value-type="float" office:value="-0.001221175">
            <text:p>-0.001221175</text:p>
          </table:table-cell>
          <table:table-cell table:number-columns-repeated="4"/>
        </table:table-row>
        <table:table-row table:style-name="ro1">
          <table:table-cell office:value-type="float" office:value="716.015441894531">
            <text:p>716.0154418945</text:p>
          </table:table-cell>
          <table:table-cell office:value-type="float" office:value="-0.0048779">
            <text:p>-0.0048779</text:p>
          </table:table-cell>
          <table:table-cell table:number-columns-repeated="4"/>
        </table:table-row>
        <table:table-row table:style-name="ro1">
          <table:table-cell office:value-type="float" office:value="716.135681152344">
            <text:p>716.1356811523</text:p>
          </table:table-cell>
          <table:table-cell office:value-type="float" office:value="0.0005220451">
            <text:p>0.0005220451</text:p>
          </table:table-cell>
          <table:table-cell table:number-columns-repeated="4"/>
        </table:table-row>
        <table:table-row table:style-name="ro1">
          <table:table-cell office:value-type="float" office:value="716.255859375">
            <text:p>716.255859375</text:p>
          </table:table-cell>
          <table:table-cell office:value-type="float" office:value="-0.006943037">
            <text:p>-0.006943037</text:p>
          </table:table-cell>
          <table:table-cell table:number-columns-repeated="4"/>
        </table:table-row>
        <table:table-row table:style-name="ro1">
          <table:table-cell office:value-type="float" office:value="716.376098632813">
            <text:p>716.3760986328</text:p>
          </table:table-cell>
          <table:table-cell office:value-type="float" office:value="-0.009286469">
            <text:p>-0.009286469</text:p>
          </table:table-cell>
          <table:table-cell table:number-columns-repeated="4"/>
        </table:table-row>
        <table:table-row table:style-name="ro1">
          <table:table-cell office:value-type="float" office:value="716.496276855469">
            <text:p>716.4962768555</text:p>
          </table:table-cell>
          <table:table-cell office:value-type="float" office:value="0.006079987">
            <text:p>0.006079987</text:p>
          </table:table-cell>
          <table:table-cell table:number-columns-repeated="4"/>
        </table:table-row>
        <table:table-row table:style-name="ro1">
          <table:table-cell office:value-type="float" office:value="716.616516113281">
            <text:p>716.6165161133</text:p>
          </table:table-cell>
          <table:table-cell office:value-type="float" office:value="0.001437404">
            <text:p>0.001437404</text:p>
          </table:table-cell>
          <table:table-cell table:number-columns-repeated="4"/>
        </table:table-row>
        <table:table-row table:style-name="ro1">
          <table:table-cell office:value-type="float" office:value="716.736694335938">
            <text:p>716.7366943359</text:p>
          </table:table-cell>
          <table:table-cell office:value-type="float" office:value="0.001009258">
            <text:p>0.001009258</text:p>
          </table:table-cell>
          <table:table-cell table:number-columns-repeated="4"/>
        </table:table-row>
        <table:table-row table:style-name="ro1">
          <table:table-cell office:value-type="float" office:value="716.85693359375">
            <text:p>716.8569335938</text:p>
          </table:table-cell>
          <table:table-cell office:value-type="float" office:value="-0.0001180013">
            <text:p>-0.0001180013</text:p>
          </table:table-cell>
          <table:table-cell table:number-columns-repeated="4"/>
        </table:table-row>
        <table:table-row table:style-name="ro1">
          <table:table-cell office:value-type="float" office:value="716.977172851563">
            <text:p>716.9771728516</text:p>
          </table:table-cell>
          <table:table-cell office:value-type="float" office:value="0.00117246">
            <text:p>0.00117246</text:p>
          </table:table-cell>
          <table:table-cell table:number-columns-repeated="4"/>
        </table:table-row>
        <table:table-row table:style-name="ro1">
          <table:table-cell office:value-type="float" office:value="717.097351074219">
            <text:p>717.0973510742</text:p>
          </table:table-cell>
          <table:table-cell office:value-type="float" office:value="0.005047176">
            <text:p>0.005047176</text:p>
          </table:table-cell>
          <table:table-cell table:number-columns-repeated="4"/>
        </table:table-row>
        <table:table-row table:style-name="ro1">
          <table:table-cell office:value-type="float" office:value="717.217590332031">
            <text:p>717.217590332</text:p>
          </table:table-cell>
          <table:table-cell office:value-type="float" office:value="-0.005762232">
            <text:p>-0.005762232</text:p>
          </table:table-cell>
          <table:table-cell table:number-columns-repeated="4"/>
        </table:table-row>
        <table:table-row table:style-name="ro1">
          <table:table-cell office:value-type="float" office:value="717.337768554688">
            <text:p>717.3377685547</text:p>
          </table:table-cell>
          <table:table-cell office:value-type="float" office:value="-0.008719893">
            <text:p>-0.008719893</text:p>
          </table:table-cell>
          <table:table-cell table:number-columns-repeated="4"/>
        </table:table-row>
        <table:table-row table:style-name="ro1">
          <table:table-cell office:value-type="float" office:value="717.4580078125">
            <text:p>717.4580078125</text:p>
          </table:table-cell>
          <table:table-cell office:value-type="float" office:value="0.0006852187">
            <text:p>0.0006852187</text:p>
          </table:table-cell>
          <table:table-cell table:number-columns-repeated="4"/>
        </table:table-row>
        <table:table-row table:style-name="ro1">
          <table:table-cell office:value-type="float" office:value="717.578186035156">
            <text:p>717.5781860352</text:p>
          </table:table-cell>
          <table:table-cell office:value-type="float" office:value="-0.0009713885">
            <text:p>-0.0009713885</text:p>
          </table:table-cell>
          <table:table-cell table:number-columns-repeated="4"/>
        </table:table-row>
        <table:table-row table:style-name="ro1">
          <table:table-cell office:value-type="float" office:value="717.698425292969">
            <text:p>717.698425293</text:p>
          </table:table-cell>
          <table:table-cell office:value-type="float" office:value="0.001045854">
            <text:p>0.001045854</text:p>
          </table:table-cell>
          <table:table-cell table:number-columns-repeated="4"/>
        </table:table-row>
        <table:table-row table:style-name="ro1">
          <table:table-cell office:value-type="float" office:value="717.818603515625">
            <text:p>717.8186035156</text:p>
          </table:table-cell>
          <table:table-cell office:value-type="float" office:value="0.0004692967">
            <text:p>0.0004692967</text:p>
          </table:table-cell>
          <table:table-cell table:number-columns-repeated="4"/>
        </table:table-row>
        <table:table-row table:style-name="ro1">
          <table:table-cell office:value-type="float" office:value="717.938842773438">
            <text:p>717.9388427734</text:p>
          </table:table-cell>
          <table:table-cell office:value-type="float" office:value="-0.00153959">
            <text:p>-0.00153959</text:p>
          </table:table-cell>
          <table:table-cell table:number-columns-repeated="4"/>
        </table:table-row>
        <table:table-row table:style-name="ro1">
          <table:table-cell office:value-type="float" office:value="718.05908203125">
            <text:p>718.0590820313</text:p>
          </table:table-cell>
          <table:table-cell office:value-type="float" office:value="0.0009511203">
            <text:p>0.0009511203</text:p>
          </table:table-cell>
          <table:table-cell table:number-columns-repeated="4"/>
        </table:table-row>
        <table:table-row table:style-name="ro1">
          <table:table-cell office:value-type="float" office:value="718.179260253906">
            <text:p>718.1792602539</text:p>
          </table:table-cell>
          <table:table-cell office:value-type="float" office:value="-0.004571853">
            <text:p>-0.004571853</text:p>
          </table:table-cell>
          <table:table-cell table:number-columns-repeated="4"/>
        </table:table-row>
        <table:table-row table:style-name="ro1">
          <table:table-cell office:value-type="float" office:value="718.299499511719">
            <text:p>718.2994995117</text:p>
          </table:table-cell>
          <table:table-cell office:value-type="float" office:value="0.005627657">
            <text:p>0.005627657</text:p>
          </table:table-cell>
          <table:table-cell table:number-columns-repeated="4"/>
        </table:table-row>
        <table:table-row table:style-name="ro1">
          <table:table-cell office:value-type="float" office:value="718.419677734375">
            <text:p>718.4196777344</text:p>
          </table:table-cell>
          <table:table-cell office:value-type="float" office:value="-0.0004368861">
            <text:p>-0.0004368861</text:p>
          </table:table-cell>
          <table:table-cell table:number-columns-repeated="4"/>
        </table:table-row>
        <table:table-row table:style-name="ro1">
          <table:table-cell office:value-type="float" office:value="718.539916992188">
            <text:p>718.5399169922</text:p>
          </table:table-cell>
          <table:table-cell office:value-type="float" office:value="-0.005191264">
            <text:p>-0.005191264</text:p>
          </table:table-cell>
          <table:table-cell table:number-columns-repeated="4"/>
        </table:table-row>
        <table:table-row table:style-name="ro1">
          <table:table-cell office:value-type="float" office:value="718.66015625">
            <text:p>718.66015625</text:p>
          </table:table-cell>
          <table:table-cell office:value-type="float" office:value="0.001319241">
            <text:p>0.001319241</text:p>
          </table:table-cell>
          <table:table-cell table:number-columns-repeated="4"/>
        </table:table-row>
        <table:table-row table:style-name="ro1">
          <table:table-cell office:value-type="float" office:value="718.780334472656">
            <text:p>718.7803344727</text:p>
          </table:table-cell>
          <table:table-cell office:value-type="float" office:value="-0.001464682">
            <text:p>-0.001464682</text:p>
          </table:table-cell>
          <table:table-cell table:number-columns-repeated="4"/>
        </table:table-row>
        <table:table-row table:style-name="ro1">
          <table:table-cell office:value-type="float" office:value="718.900573730469">
            <text:p>718.9005737305</text:p>
          </table:table-cell>
          <table:table-cell office:value-type="float" office:value="0.001868289">
            <text:p>0.001868289</text:p>
          </table:table-cell>
          <table:table-cell table:number-columns-repeated="4"/>
        </table:table-row>
        <table:table-row table:style-name="ro1">
          <table:table-cell office:value-type="float" office:value="719.020812988281">
            <text:p>719.0208129883</text:p>
          </table:table-cell>
          <table:table-cell office:value-type="float" office:value="0.004194565">
            <text:p>0.004194565</text:p>
          </table:table-cell>
          <table:table-cell table:number-columns-repeated="4"/>
        </table:table-row>
        <table:table-row table:style-name="ro1">
          <table:table-cell office:value-type="float" office:value="719.140991210938">
            <text:p>719.1409912109</text:p>
          </table:table-cell>
          <table:table-cell office:value-type="float" office:value="0.007280202">
            <text:p>0.007280202</text:p>
          </table:table-cell>
          <table:table-cell table:number-columns-repeated="4"/>
        </table:table-row>
        <table:table-row table:style-name="ro1">
          <table:table-cell office:value-type="float" office:value="719.26123046875">
            <text:p>719.2612304688</text:p>
          </table:table-cell>
          <table:table-cell office:value-type="float" office:value="-0.0004583912">
            <text:p>-0.0004583912</text:p>
          </table:table-cell>
          <table:table-cell table:number-columns-repeated="4"/>
        </table:table-row>
        <table:table-row table:style-name="ro1">
          <table:table-cell office:value-type="float" office:value="719.381469726563">
            <text:p>719.3814697266</text:p>
          </table:table-cell>
          <table:table-cell office:value-type="float" office:value="-0.003346604">
            <text:p>-0.003346604</text:p>
          </table:table-cell>
          <table:table-cell table:number-columns-repeated="4"/>
        </table:table-row>
        <table:table-row table:style-name="ro1">
          <table:table-cell office:value-type="float" office:value="719.501647949219">
            <text:p>719.5016479492</text:p>
          </table:table-cell>
          <table:table-cell office:value-type="float" office:value="0.008070744">
            <text:p>0.008070744</text:p>
          </table:table-cell>
          <table:table-cell table:number-columns-repeated="4"/>
        </table:table-row>
        <table:table-row table:style-name="ro1">
          <table:table-cell office:value-type="float" office:value="719.621887207031">
            <text:p>719.621887207</text:p>
          </table:table-cell>
          <table:table-cell office:value-type="float" office:value="-0.003424563">
            <text:p>-0.003424563</text:p>
          </table:table-cell>
          <table:table-cell table:number-columns-repeated="4"/>
        </table:table-row>
        <table:table-row table:style-name="ro1">
          <table:table-cell office:value-type="float" office:value="719.742126464844">
            <text:p>719.7421264648</text:p>
          </table:table-cell>
          <table:table-cell office:value-type="float" office:value="-0.008376519">
            <text:p>-0.008376519</text:p>
          </table:table-cell>
          <table:table-cell table:number-columns-repeated="4"/>
        </table:table-row>
        <table:table-row table:style-name="ro1">
          <table:table-cell office:value-type="float" office:value="719.8623046875">
            <text:p>719.8623046875</text:p>
          </table:table-cell>
          <table:table-cell office:value-type="float" office:value="-0.008064253">
            <text:p>-0.008064253</text:p>
          </table:table-cell>
          <table:table-cell table:number-columns-repeated="4"/>
        </table:table-row>
        <table:table-row table:style-name="ro1">
          <table:table-cell office:value-type="float" office:value="719.982543945313">
            <text:p>719.9825439453</text:p>
          </table:table-cell>
          <table:table-cell office:value-type="float" office:value="0.004461408">
            <text:p>0.004461408</text:p>
          </table:table-cell>
          <table:table-cell table:number-columns-repeated="4"/>
        </table:table-row>
        <table:table-row table:style-name="ro1">
          <table:table-cell office:value-type="float" office:value="720.102783203125">
            <text:p>720.1027832031</text:p>
          </table:table-cell>
          <table:table-cell office:value-type="float" office:value="-0.005204618">
            <text:p>-0.005204618</text:p>
          </table:table-cell>
          <table:table-cell table:number-columns-repeated="4"/>
        </table:table-row>
        <table:table-row table:style-name="ro1">
          <table:table-cell office:value-type="float" office:value="720.222961425781">
            <text:p>720.2229614258</text:p>
          </table:table-cell>
          <table:table-cell office:value-type="float" office:value="0.008672654">
            <text:p>0.008672654</text:p>
          </table:table-cell>
          <table:table-cell table:number-columns-repeated="4"/>
        </table:table-row>
        <table:table-row table:style-name="ro1">
          <table:table-cell office:value-type="float" office:value="720.343200683594">
            <text:p>720.3432006836</text:p>
          </table:table-cell>
          <table:table-cell office:value-type="float" office:value="-0.008514166">
            <text:p>-0.008514166</text:p>
          </table:table-cell>
          <table:table-cell table:number-columns-repeated="4"/>
        </table:table-row>
        <table:table-row table:style-name="ro1">
          <table:table-cell office:value-type="float" office:value="720.463439941406">
            <text:p>720.4634399414</text:p>
          </table:table-cell>
          <table:table-cell office:value-type="float" office:value="0.001198151">
            <text:p>0.001198151</text:p>
          </table:table-cell>
          <table:table-cell table:number-columns-repeated="4"/>
        </table:table-row>
        <table:table-row table:style-name="ro1">
          <table:table-cell office:value-type="float" office:value="720.583679199219">
            <text:p>720.5836791992</text:p>
          </table:table-cell>
          <table:table-cell office:value-type="float" office:value="0.02099409">
            <text:p>0.02099409</text:p>
          </table:table-cell>
          <table:table-cell table:number-columns-repeated="4"/>
        </table:table-row>
        <table:table-row table:style-name="ro1">
          <table:table-cell office:value-type="float" office:value="720.703857421875">
            <text:p>720.7038574219</text:p>
          </table:table-cell>
          <table:table-cell office:value-type="float" office:value="0.0009540316">
            <text:p>0.0009540316</text:p>
          </table:table-cell>
          <table:table-cell table:number-columns-repeated="4"/>
        </table:table-row>
        <table:table-row table:style-name="ro1">
          <table:table-cell office:value-type="float" office:value="720.824096679688">
            <text:p>720.8240966797</text:p>
          </table:table-cell>
          <table:table-cell office:value-type="float" office:value="0.001383136">
            <text:p>0.001383136</text:p>
          </table:table-cell>
          <table:table-cell table:number-columns-repeated="4"/>
        </table:table-row>
        <table:table-row table:style-name="ro1">
          <table:table-cell office:value-type="float" office:value="720.9443359375">
            <text:p>720.9443359375</text:p>
          </table:table-cell>
          <table:table-cell office:value-type="float" office:value="0.005601403">
            <text:p>0.005601403</text:p>
          </table:table-cell>
          <table:table-cell table:number-columns-repeated="4"/>
        </table:table-row>
        <table:table-row table:style-name="ro1">
          <table:table-cell office:value-type="float" office:value="721.064575195313">
            <text:p>721.0645751953</text:p>
          </table:table-cell>
          <table:table-cell office:value-type="float" office:value="0.004691109">
            <text:p>0.004691109</text:p>
          </table:table-cell>
          <table:table-cell table:number-columns-repeated="4"/>
        </table:table-row>
        <table:table-row table:style-name="ro1">
          <table:table-cell office:value-type="float" office:value="721.184753417969">
            <text:p>721.184753418</text:p>
          </table:table-cell>
          <table:table-cell office:value-type="float" office:value="-0.002846084">
            <text:p>-0.002846084</text:p>
          </table:table-cell>
          <table:table-cell table:number-columns-repeated="4"/>
        </table:table-row>
        <table:table-row table:style-name="ro1">
          <table:table-cell office:value-type="float" office:value="721.304992675781">
            <text:p>721.3049926758</text:p>
          </table:table-cell>
          <table:table-cell office:value-type="float" office:value="0.001046667">
            <text:p>0.001046667</text:p>
          </table:table-cell>
          <table:table-cell table:number-columns-repeated="4"/>
        </table:table-row>
        <table:table-row table:style-name="ro1">
          <table:table-cell office:value-type="float" office:value="721.425231933594">
            <text:p>721.4252319336</text:p>
          </table:table-cell>
          <table:table-cell office:value-type="float" office:value="0.00094276">
            <text:p>0.00094276</text:p>
          </table:table-cell>
          <table:table-cell table:number-columns-repeated="4"/>
        </table:table-row>
        <table:table-row table:style-name="ro1">
          <table:table-cell office:value-type="float" office:value="721.545471191406">
            <text:p>721.5454711914</text:p>
          </table:table-cell>
          <table:table-cell office:value-type="float" office:value="0.01733431">
            <text:p>0.01733431</text:p>
          </table:table-cell>
          <table:table-cell table:number-columns-repeated="4"/>
        </table:table-row>
        <table:table-row table:style-name="ro1">
          <table:table-cell office:value-type="float" office:value="721.665649414063">
            <text:p>721.6656494141</text:p>
          </table:table-cell>
          <table:table-cell office:value-type="float" office:value="-0.008396394">
            <text:p>-0.008396394</text:p>
          </table:table-cell>
          <table:table-cell table:number-columns-repeated="4"/>
        </table:table-row>
        <table:table-row table:style-name="ro1">
          <table:table-cell office:value-type="float" office:value="721.785888671875">
            <text:p>721.7858886719</text:p>
          </table:table-cell>
          <table:table-cell office:value-type="float" office:value="0.01515106">
            <text:p>0.01515106</text:p>
          </table:table-cell>
          <table:table-cell table:number-columns-repeated="4"/>
        </table:table-row>
        <table:table-row table:style-name="ro1">
          <table:table-cell office:value-type="float" office:value="721.906127929688">
            <text:p>721.9061279297</text:p>
          </table:table-cell>
          <table:table-cell office:value-type="float" office:value="-0.001758672">
            <text:p>-0.001758672</text:p>
          </table:table-cell>
          <table:table-cell table:number-columns-repeated="4"/>
        </table:table-row>
        <table:table-row table:style-name="ro1">
          <table:table-cell office:value-type="float" office:value="722.0263671875">
            <text:p>722.0263671875</text:p>
          </table:table-cell>
          <table:table-cell office:value-type="float" office:value="-0.006347612">
            <text:p>-0.006347612</text:p>
          </table:table-cell>
          <table:table-cell table:number-columns-repeated="4"/>
        </table:table-row>
        <table:table-row table:style-name="ro1">
          <table:table-cell office:value-type="float" office:value="722.146606445313">
            <text:p>722.1466064453</text:p>
          </table:table-cell>
          <table:table-cell office:value-type="float" office:value="0.01374444">
            <text:p>0.01374444</text:p>
          </table:table-cell>
          <table:table-cell table:number-columns-repeated="4"/>
        </table:table-row>
        <table:table-row table:style-name="ro1">
          <table:table-cell office:value-type="float" office:value="722.266784667969">
            <text:p>722.266784668</text:p>
          </table:table-cell>
          <table:table-cell office:value-type="float" office:value="-0.002716166">
            <text:p>-0.002716166</text:p>
          </table:table-cell>
          <table:table-cell table:number-columns-repeated="4"/>
        </table:table-row>
        <table:table-row table:style-name="ro1">
          <table:table-cell office:value-type="float" office:value="722.387023925781">
            <text:p>722.3870239258</text:p>
          </table:table-cell>
          <table:table-cell office:value-type="float" office:value="-0.006713513">
            <text:p>-0.006713513</text:p>
          </table:table-cell>
          <table:table-cell table:number-columns-repeated="4"/>
        </table:table-row>
        <table:table-row table:style-name="ro1">
          <table:table-cell office:value-type="float" office:value="722.507263183594">
            <text:p>722.5072631836</text:p>
          </table:table-cell>
          <table:table-cell office:value-type="float" office:value="-0.008400442">
            <text:p>-0.008400442</text:p>
          </table:table-cell>
          <table:table-cell table:number-columns-repeated="4"/>
        </table:table-row>
        <table:table-row table:style-name="ro1">
          <table:table-cell office:value-type="float" office:value="722.627502441406">
            <text:p>722.6275024414</text:p>
          </table:table-cell>
          <table:table-cell office:value-type="float" office:value="-0.004379559">
            <text:p>-0.004379559</text:p>
          </table:table-cell>
          <table:table-cell table:number-columns-repeated="4"/>
        </table:table-row>
        <table:table-row table:style-name="ro1">
          <table:table-cell office:value-type="float" office:value="722.747741699219">
            <text:p>722.7477416992</text:p>
          </table:table-cell>
          <table:table-cell office:value-type="float" office:value="0.002719858">
            <text:p>0.002719858</text:p>
          </table:table-cell>
          <table:table-cell table:number-columns-repeated="4"/>
        </table:table-row>
        <table:table-row table:style-name="ro1">
          <table:table-cell office:value-type="float" office:value="722.867980957031">
            <text:p>722.867980957</text:p>
          </table:table-cell>
          <table:table-cell office:value-type="float" office:value="-0.006753061">
            <text:p>-0.006753061</text:p>
          </table:table-cell>
          <table:table-cell table:number-columns-repeated="4"/>
        </table:table-row>
        <table:table-row table:style-name="ro1">
          <table:table-cell office:value-type="float" office:value="722.988159179688">
            <text:p>722.9881591797</text:p>
          </table:table-cell>
          <table:table-cell office:value-type="float" office:value="0.001335823">
            <text:p>0.001335823</text:p>
          </table:table-cell>
          <table:table-cell table:number-columns-repeated="4"/>
        </table:table-row>
        <table:table-row table:style-name="ro1">
          <table:table-cell office:value-type="float" office:value="723.1083984375">
            <text:p>723.1083984375</text:p>
          </table:table-cell>
          <table:table-cell office:value-type="float" office:value="0.00460119">
            <text:p>0.00460119</text:p>
          </table:table-cell>
          <table:table-cell table:number-columns-repeated="4"/>
        </table:table-row>
        <table:table-row table:style-name="ro1">
          <table:table-cell office:value-type="float" office:value="723.228637695313">
            <text:p>723.2286376953</text:p>
          </table:table-cell>
          <table:table-cell office:value-type="float" office:value="0.01502969">
            <text:p>0.01502969</text:p>
          </table:table-cell>
          <table:table-cell table:number-columns-repeated="4"/>
        </table:table-row>
        <table:table-row table:style-name="ro1">
          <table:table-cell office:value-type="float" office:value="723.348876953125">
            <text:p>723.3488769531</text:p>
          </table:table-cell>
          <table:table-cell office:value-type="float" office:value="0.001970056">
            <text:p>0.001970056</text:p>
          </table:table-cell>
          <table:table-cell table:number-columns-repeated="4"/>
        </table:table-row>
        <table:table-row table:style-name="ro1">
          <table:table-cell office:value-type="float" office:value="723.469116210938">
            <text:p>723.4691162109</text:p>
          </table:table-cell>
          <table:table-cell office:value-type="float" office:value="-0.004483329">
            <text:p>-0.004483329</text:p>
          </table:table-cell>
          <table:table-cell table:number-columns-repeated="4"/>
        </table:table-row>
        <table:table-row table:style-name="ro1">
          <table:table-cell office:value-type="float" office:value="723.58935546875">
            <text:p>723.5893554688</text:p>
          </table:table-cell>
          <table:table-cell office:value-type="float" office:value="0.00197138">
            <text:p>0.00197138</text:p>
          </table:table-cell>
          <table:table-cell table:number-columns-repeated="4"/>
        </table:table-row>
        <table:table-row table:style-name="ro1">
          <table:table-cell office:value-type="float" office:value="723.709594726563">
            <text:p>723.7095947266</text:p>
          </table:table-cell>
          <table:table-cell office:value-type="float" office:value="-0.005013044">
            <text:p>-0.005013044</text:p>
          </table:table-cell>
          <table:table-cell table:number-columns-repeated="4"/>
        </table:table-row>
        <table:table-row table:style-name="ro1">
          <table:table-cell office:value-type="float" office:value="723.829772949219">
            <text:p>723.8297729492</text:p>
          </table:table-cell>
          <table:table-cell office:value-type="float" office:value="-0.005013217">
            <text:p>-0.005013217</text:p>
          </table:table-cell>
          <table:table-cell table:number-columns-repeated="4"/>
        </table:table-row>
        <table:table-row table:style-name="ro1">
          <table:table-cell office:value-type="float" office:value="723.950012207031">
            <text:p>723.950012207</text:p>
          </table:table-cell>
          <table:table-cell office:value-type="float" office:value="0.003191313">
            <text:p>0.003191313</text:p>
          </table:table-cell>
          <table:table-cell table:number-columns-repeated="4"/>
        </table:table-row>
        <table:table-row table:style-name="ro1">
          <table:table-cell office:value-type="float" office:value="724.070251464844">
            <text:p>724.0702514648</text:p>
          </table:table-cell>
          <table:table-cell office:value-type="float" office:value="-0.0001735524">
            <text:p>-0.0001735524</text:p>
          </table:table-cell>
          <table:table-cell table:number-columns-repeated="4"/>
        </table:table-row>
        <table:table-row table:style-name="ro1">
          <table:table-cell office:value-type="float" office:value="724.190490722656">
            <text:p>724.1904907227</text:p>
          </table:table-cell>
          <table:table-cell office:value-type="float" office:value="-0.01188548">
            <text:p>-0.01188548</text:p>
          </table:table-cell>
          <table:table-cell table:number-columns-repeated="4"/>
        </table:table-row>
        <table:table-row table:style-name="ro1">
          <table:table-cell office:value-type="float" office:value="724.310729980469">
            <text:p>724.3107299805</text:p>
          </table:table-cell>
          <table:table-cell office:value-type="float" office:value="-0.007114904">
            <text:p>-0.007114904</text:p>
          </table:table-cell>
          <table:table-cell table:number-columns-repeated="4"/>
        </table:table-row>
        <table:table-row table:style-name="ro1">
          <table:table-cell office:value-type="float" office:value="724.430969238281">
            <text:p>724.4309692383</text:p>
          </table:table-cell>
          <table:table-cell office:value-type="float" office:value="-0.008086678">
            <text:p>-0.008086678</text:p>
          </table:table-cell>
          <table:table-cell table:number-columns-repeated="4"/>
        </table:table-row>
        <table:table-row table:style-name="ro1">
          <table:table-cell office:value-type="float" office:value="724.551208496094">
            <text:p>724.5512084961</text:p>
          </table:table-cell>
          <table:table-cell office:value-type="float" office:value="-0.009855859">
            <text:p>-0.009855859</text:p>
          </table:table-cell>
          <table:table-cell table:number-columns-repeated="4"/>
        </table:table-row>
        <table:table-row table:style-name="ro1">
          <table:table-cell office:value-type="float" office:value="724.671447753906">
            <text:p>724.6714477539</text:p>
          </table:table-cell>
          <table:table-cell office:value-type="float" office:value="0.005849948">
            <text:p>0.005849948</text:p>
          </table:table-cell>
          <table:table-cell table:number-columns-repeated="4"/>
        </table:table-row>
        <table:table-row table:style-name="ro1">
          <table:table-cell office:value-type="float" office:value="724.791687011719">
            <text:p>724.7916870117</text:p>
          </table:table-cell>
          <table:table-cell office:value-type="float" office:value="-0.007944665">
            <text:p>-0.007944665</text:p>
          </table:table-cell>
          <table:table-cell table:number-columns-repeated="4"/>
        </table:table-row>
        <table:table-row table:style-name="ro1">
          <table:table-cell office:value-type="float" office:value="724.911865234375">
            <text:p>724.9118652344</text:p>
          </table:table-cell>
          <table:table-cell office:value-type="float" office:value="-0.007735487">
            <text:p>-0.007735487</text:p>
          </table:table-cell>
          <table:table-cell table:number-columns-repeated="4"/>
        </table:table-row>
        <table:table-row table:style-name="ro1">
          <table:table-cell office:value-type="float" office:value="725.032104492188">
            <text:p>725.0321044922</text:p>
          </table:table-cell>
          <table:table-cell office:value-type="float" office:value="0.004000041">
            <text:p>0.004000041</text:p>
          </table:table-cell>
          <table:table-cell table:number-columns-repeated="4"/>
        </table:table-row>
        <table:table-row table:style-name="ro1">
          <table:table-cell office:value-type="float" office:value="725.15234375">
            <text:p>725.15234375</text:p>
          </table:table-cell>
          <table:table-cell office:value-type="float" office:value="-0.005902996">
            <text:p>-0.005902996</text:p>
          </table:table-cell>
          <table:table-cell table:number-columns-repeated="4"/>
        </table:table-row>
        <table:table-row table:style-name="ro1">
          <table:table-cell office:value-type="float" office:value="725.272583007813">
            <text:p>725.2725830078</text:p>
          </table:table-cell>
          <table:table-cell office:value-type="float" office:value="-0.007473409">
            <text:p>-0.007473409</text:p>
          </table:table-cell>
          <table:table-cell table:number-columns-repeated="4"/>
        </table:table-row>
        <table:table-row table:style-name="ro1">
          <table:table-cell office:value-type="float" office:value="725.392822265625">
            <text:p>725.3928222656</text:p>
          </table:table-cell>
          <table:table-cell office:value-type="float" office:value="0.02284088">
            <text:p>0.02284088</text:p>
          </table:table-cell>
          <table:table-cell table:number-columns-repeated="4"/>
        </table:table-row>
        <table:table-row table:style-name="ro1">
          <table:table-cell office:value-type="float" office:value="725.513061523438">
            <text:p>725.5130615234</text:p>
          </table:table-cell>
          <table:table-cell office:value-type="float" office:value="-0.000778455">
            <text:p>-0.000778455</text:p>
          </table:table-cell>
          <table:table-cell table:number-columns-repeated="4"/>
        </table:table-row>
        <table:table-row table:style-name="ro1">
          <table:table-cell office:value-type="float" office:value="725.63330078125">
            <text:p>725.6333007813</text:p>
          </table:table-cell>
          <table:table-cell office:value-type="float" office:value="-0.0008043367">
            <text:p>-0.0008043367</text:p>
          </table:table-cell>
          <table:table-cell table:number-columns-repeated="4"/>
        </table:table-row>
        <table:table-row table:style-name="ro1">
          <table:table-cell office:value-type="float" office:value="725.753540039063">
            <text:p>725.7535400391</text:p>
          </table:table-cell>
          <table:table-cell office:value-type="float" office:value="-0.006569275">
            <text:p>-0.006569275</text:p>
          </table:table-cell>
          <table:table-cell table:number-columns-repeated="4"/>
        </table:table-row>
        <table:table-row table:style-name="ro1">
          <table:table-cell office:value-type="float" office:value="725.873779296875">
            <text:p>725.8737792969</text:p>
          </table:table-cell>
          <table:table-cell office:value-type="float" office:value="0.001271431">
            <text:p>0.001271431</text:p>
          </table:table-cell>
          <table:table-cell table:number-columns-repeated="4"/>
        </table:table-row>
        <table:table-row table:style-name="ro1">
          <table:table-cell office:value-type="float" office:value="725.994018554688">
            <text:p>725.9940185547</text:p>
          </table:table-cell>
          <table:table-cell office:value-type="float" office:value="-0.001776692">
            <text:p>-0.001776692</text:p>
          </table:table-cell>
          <table:table-cell table:number-columns-repeated="4"/>
        </table:table-row>
        <table:table-row table:style-name="ro1">
          <table:table-cell office:value-type="float" office:value="726.1142578125">
            <text:p>726.1142578125</text:p>
          </table:table-cell>
          <table:table-cell office:value-type="float" office:value="0.001003736">
            <text:p>0.001003736</text:p>
          </table:table-cell>
          <table:table-cell table:number-columns-repeated="4"/>
        </table:table-row>
        <table:table-row table:style-name="ro1">
          <table:table-cell office:value-type="float" office:value="726.234497070313">
            <text:p>726.2344970703</text:p>
          </table:table-cell>
          <table:table-cell office:value-type="float" office:value="-0.003428824">
            <text:p>-0.003428824</text:p>
          </table:table-cell>
          <table:table-cell table:number-columns-repeated="4"/>
        </table:table-row>
        <table:table-row table:style-name="ro1">
          <table:table-cell office:value-type="float" office:value="726.354736328125">
            <text:p>726.3547363281</text:p>
          </table:table-cell>
          <table:table-cell office:value-type="float" office:value="0.00766238">
            <text:p>0.00766238</text:p>
          </table:table-cell>
          <table:table-cell table:number-columns-repeated="4"/>
        </table:table-row>
        <table:table-row table:style-name="ro1">
          <table:table-cell office:value-type="float" office:value="726.474975585938">
            <text:p>726.4749755859</text:p>
          </table:table-cell>
          <table:table-cell office:value-type="float" office:value="-0.0004592312">
            <text:p>-0.0004592312</text:p>
          </table:table-cell>
          <table:table-cell table:number-columns-repeated="4"/>
        </table:table-row>
        <table:table-row table:style-name="ro1">
          <table:table-cell office:value-type="float" office:value="726.59521484375">
            <text:p>726.5952148438</text:p>
          </table:table-cell>
          <table:table-cell office:value-type="float" office:value="0.0007895475">
            <text:p>0.0007895475</text:p>
          </table:table-cell>
          <table:table-cell table:number-columns-repeated="4"/>
        </table:table-row>
        <table:table-row table:style-name="ro1">
          <table:table-cell office:value-type="float" office:value="726.715454101563">
            <text:p>726.7154541016</text:p>
          </table:table-cell>
          <table:table-cell office:value-type="float" office:value="-0.004035849">
            <text:p>-0.004035849</text:p>
          </table:table-cell>
          <table:table-cell table:number-columns-repeated="4"/>
        </table:table-row>
        <table:table-row table:style-name="ro1">
          <table:table-cell office:value-type="float" office:value="726.835693359375">
            <text:p>726.8356933594</text:p>
          </table:table-cell>
          <table:table-cell office:value-type="float" office:value="-0.004343844">
            <text:p>-0.004343844</text:p>
          </table:table-cell>
          <table:table-cell table:number-columns-repeated="4"/>
        </table:table-row>
        <table:table-row table:style-name="ro1">
          <table:table-cell office:value-type="float" office:value="726.955932617188">
            <text:p>726.9559326172</text:p>
          </table:table-cell>
          <table:table-cell office:value-type="float" office:value="-0.009761786">
            <text:p>-0.009761786</text:p>
          </table:table-cell>
          <table:table-cell table:number-columns-repeated="4"/>
        </table:table-row>
        <table:table-row table:style-name="ro1">
          <table:table-cell office:value-type="float" office:value="727.076171875">
            <text:p>727.076171875</text:p>
          </table:table-cell>
          <table:table-cell office:value-type="float" office:value="0.006006376">
            <text:p>0.006006376</text:p>
          </table:table-cell>
          <table:table-cell table:number-columns-repeated="4"/>
        </table:table-row>
        <table:table-row table:style-name="ro1">
          <table:table-cell office:value-type="float" office:value="727.196411132813">
            <text:p>727.1964111328</text:p>
          </table:table-cell>
          <table:table-cell office:value-type="float" office:value="-0.001092501">
            <text:p>-0.001092501</text:p>
          </table:table-cell>
          <table:table-cell table:number-columns-repeated="4"/>
        </table:table-row>
        <table:table-row table:style-name="ro1">
          <table:table-cell office:value-type="float" office:value="727.316650390625">
            <text:p>727.3166503906</text:p>
          </table:table-cell>
          <table:table-cell office:value-type="float" office:value="0.01202672">
            <text:p>0.01202672</text:p>
          </table:table-cell>
          <table:table-cell table:number-columns-repeated="4"/>
        </table:table-row>
        <table:table-row table:style-name="ro1">
          <table:table-cell office:value-type="float" office:value="727.436889648438">
            <text:p>727.4368896484</text:p>
          </table:table-cell>
          <table:table-cell office:value-type="float" office:value="-0.0008133307">
            <text:p>-0.0008133307</text:p>
          </table:table-cell>
          <table:table-cell table:number-columns-repeated="4"/>
        </table:table-row>
        <table:table-row table:style-name="ro1">
          <table:table-cell office:value-type="float" office:value="727.55712890625">
            <text:p>727.5571289063</text:p>
          </table:table-cell>
          <table:table-cell office:value-type="float" office:value="0.0005633875">
            <text:p>0.0005633875</text:p>
          </table:table-cell>
          <table:table-cell table:number-columns-repeated="4"/>
        </table:table-row>
        <table:table-row table:style-name="ro1">
          <table:table-cell office:value-type="float" office:value="727.677368164063">
            <text:p>727.6773681641</text:p>
          </table:table-cell>
          <table:table-cell office:value-type="float" office:value="-0.001262657">
            <text:p>-0.001262657</text:p>
          </table:table-cell>
          <table:table-cell table:number-columns-repeated="4"/>
        </table:table-row>
        <table:table-row table:style-name="ro1">
          <table:table-cell office:value-type="float" office:value="727.797607421875">
            <text:p>727.7976074219</text:p>
          </table:table-cell>
          <table:table-cell office:value-type="float" office:value="-0.007570581">
            <text:p>-0.007570581</text:p>
          </table:table-cell>
          <table:table-cell table:number-columns-repeated="4"/>
        </table:table-row>
        <table:table-row table:style-name="ro1">
          <table:table-cell office:value-type="float" office:value="727.917846679688">
            <text:p>727.9178466797</text:p>
          </table:table-cell>
          <table:table-cell office:value-type="float" office:value="-0.0104638">
            <text:p>-0.0104638</text:p>
          </table:table-cell>
          <table:table-cell table:number-columns-repeated="4"/>
        </table:table-row>
        <table:table-row table:style-name="ro1">
          <table:table-cell office:value-type="float" office:value="728.0380859375">
            <text:p>728.0380859375</text:p>
          </table:table-cell>
          <table:table-cell office:value-type="float" office:value="0.002682857">
            <text:p>0.002682857</text:p>
          </table:table-cell>
          <table:table-cell table:number-columns-repeated="4"/>
        </table:table-row>
        <table:table-row table:style-name="ro1">
          <table:table-cell office:value-type="float" office:value="728.158325195313">
            <text:p>728.1583251953</text:p>
          </table:table-cell>
          <table:table-cell office:value-type="float" office:value="-0.009369816">
            <text:p>-0.009369816</text:p>
          </table:table-cell>
          <table:table-cell table:number-columns-repeated="4"/>
        </table:table-row>
        <table:table-row table:style-name="ro1">
          <table:table-cell office:value-type="float" office:value="728.278564453125">
            <text:p>728.2785644531</text:p>
          </table:table-cell>
          <table:table-cell office:value-type="float" office:value="-0.004431478">
            <text:p>-0.004431478</text:p>
          </table:table-cell>
          <table:table-cell table:number-columns-repeated="4"/>
        </table:table-row>
        <table:table-row table:style-name="ro1">
          <table:table-cell office:value-type="float" office:value="728.398803710938">
            <text:p>728.3988037109</text:p>
          </table:table-cell>
          <table:table-cell office:value-type="float" office:value="-0.008335817">
            <text:p>-0.008335817</text:p>
          </table:table-cell>
          <table:table-cell table:number-columns-repeated="4"/>
        </table:table-row>
        <table:table-row table:style-name="ro1">
          <table:table-cell office:value-type="float" office:value="728.51904296875">
            <text:p>728.5190429688</text:p>
          </table:table-cell>
          <table:table-cell office:value-type="float" office:value="0.004324475">
            <text:p>0.004324475</text:p>
          </table:table-cell>
          <table:table-cell table:number-columns-repeated="4"/>
        </table:table-row>
        <table:table-row table:style-name="ro1">
          <table:table-cell office:value-type="float" office:value="728.639282226563">
            <text:p>728.6392822266</text:p>
          </table:table-cell>
          <table:table-cell office:value-type="float" office:value="-0.009104784">
            <text:p>-0.009104784</text:p>
          </table:table-cell>
          <table:table-cell table:number-columns-repeated="4"/>
        </table:table-row>
        <table:table-row table:style-name="ro1">
          <table:table-cell office:value-type="float" office:value="728.759521484375">
            <text:p>728.7595214844</text:p>
          </table:table-cell>
          <table:table-cell office:value-type="string">
            <text:p>9.959005E-06</text:p>
          </table:table-cell>
          <table:table-cell table:number-columns-repeated="4"/>
        </table:table-row>
        <table:table-row table:style-name="ro1">
          <table:table-cell office:value-type="float" office:value="728.879760742188">
            <text:p>728.8797607422</text:p>
          </table:table-cell>
          <table:table-cell office:value-type="float" office:value="0.003297847">
            <text:p>0.003297847</text:p>
          </table:table-cell>
          <table:table-cell table:number-columns-repeated="4"/>
        </table:table-row>
        <table:table-row table:style-name="ro1">
          <table:table-cell office:value-type="float" office:value="729">
            <text:p>729</text:p>
          </table:table-cell>
          <table:table-cell office:value-type="float" office:value="-0.006133133">
            <text:p>-0.006133133</text:p>
          </table:table-cell>
          <table:table-cell table:number-columns-repeated="4"/>
        </table:table-row>
        <table:table-row table:style-name="ro1">
          <table:table-cell office:value-type="float" office:value="729.120239257813">
            <text:p>729.1202392578</text:p>
          </table:table-cell>
          <table:table-cell office:value-type="string">
            <text:p>4.517574E-05</text:p>
          </table:table-cell>
          <table:table-cell table:number-columns-repeated="4"/>
        </table:table-row>
        <table:table-row table:style-name="ro1">
          <table:table-cell office:value-type="float" office:value="729.240478515625">
            <text:p>729.2404785156</text:p>
          </table:table-cell>
          <table:table-cell office:value-type="float" office:value="0.007784419">
            <text:p>0.007784419</text:p>
          </table:table-cell>
          <table:table-cell table:number-columns-repeated="4"/>
        </table:table-row>
        <table:table-row table:style-name="ro1">
          <table:table-cell office:value-type="float" office:value="729.360778808594">
            <text:p>729.3607788086</text:p>
          </table:table-cell>
          <table:table-cell office:value-type="float" office:value="0.002817189">
            <text:p>0.002817189</text:p>
          </table:table-cell>
          <table:table-cell table:number-columns-repeated="4"/>
        </table:table-row>
        <table:table-row table:style-name="ro1">
          <table:table-cell office:value-type="float" office:value="729.481018066406">
            <text:p>729.4810180664</text:p>
          </table:table-cell>
          <table:table-cell office:value-type="float" office:value="0.000135907">
            <text:p>0.000135907</text:p>
          </table:table-cell>
          <table:table-cell table:number-columns-repeated="4"/>
        </table:table-row>
        <table:table-row table:style-name="ro1">
          <table:table-cell office:value-type="float" office:value="729.601257324219">
            <text:p>729.6012573242</text:p>
          </table:table-cell>
          <table:table-cell office:value-type="float" office:value="0.005308925">
            <text:p>0.005308925</text:p>
          </table:table-cell>
          <table:table-cell table:number-columns-repeated="4"/>
        </table:table-row>
        <table:table-row table:style-name="ro1">
          <table:table-cell office:value-type="float" office:value="729.721496582031">
            <text:p>729.721496582</text:p>
          </table:table-cell>
          <table:table-cell office:value-type="float" office:value="0.02118913">
            <text:p>0.02118913</text:p>
          </table:table-cell>
          <table:table-cell table:number-columns-repeated="4"/>
        </table:table-row>
        <table:table-row table:style-name="ro1">
          <table:table-cell office:value-type="float" office:value="729.841735839844">
            <text:p>729.8417358398</text:p>
          </table:table-cell>
          <table:table-cell office:value-type="float" office:value="-0.005855647">
            <text:p>-0.005855647</text:p>
          </table:table-cell>
          <table:table-cell table:number-columns-repeated="4"/>
        </table:table-row>
        <table:table-row table:style-name="ro1">
          <table:table-cell office:value-type="float" office:value="729.961975097656">
            <text:p>729.9619750977</text:p>
          </table:table-cell>
          <table:table-cell office:value-type="float" office:value="-0.006660544">
            <text:p>-0.006660544</text:p>
          </table:table-cell>
          <table:table-cell table:number-columns-repeated="4"/>
        </table:table-row>
        <table:table-row table:style-name="ro1">
          <table:table-cell office:value-type="float" office:value="730.082214355469">
            <text:p>730.0822143555</text:p>
          </table:table-cell>
          <table:table-cell office:value-type="float" office:value="0.008282153">
            <text:p>0.008282153</text:p>
          </table:table-cell>
          <table:table-cell table:number-columns-repeated="4"/>
        </table:table-row>
        <table:table-row table:style-name="ro1">
          <table:table-cell office:value-type="float" office:value="730.202453613281">
            <text:p>730.2024536133</text:p>
          </table:table-cell>
          <table:table-cell office:value-type="float" office:value="0.004463824">
            <text:p>0.004463824</text:p>
          </table:table-cell>
          <table:table-cell table:number-columns-repeated="4"/>
        </table:table-row>
        <table:table-row table:style-name="ro1">
          <table:table-cell office:value-type="float" office:value="730.322692871094">
            <text:p>730.3226928711</text:p>
          </table:table-cell>
          <table:table-cell office:value-type="float" office:value="-0.002067608">
            <text:p>-0.002067608</text:p>
          </table:table-cell>
          <table:table-cell table:number-columns-repeated="4"/>
        </table:table-row>
        <table:table-row table:style-name="ro1">
          <table:table-cell office:value-type="float" office:value="730.442932128906">
            <text:p>730.4429321289</text:p>
          </table:table-cell>
          <table:table-cell office:value-type="float" office:value="0.002771492">
            <text:p>0.002771492</text:p>
          </table:table-cell>
          <table:table-cell table:number-columns-repeated="4"/>
        </table:table-row>
        <table:table-row table:style-name="ro1">
          <table:table-cell office:value-type="float" office:value="730.563171386719">
            <text:p>730.5631713867</text:p>
          </table:table-cell>
          <table:table-cell office:value-type="float" office:value="0.005455011">
            <text:p>0.005455011</text:p>
          </table:table-cell>
          <table:table-cell table:number-columns-repeated="4"/>
        </table:table-row>
        <table:table-row table:style-name="ro1">
          <table:table-cell office:value-type="float" office:value="730.683471679688">
            <text:p>730.6834716797</text:p>
          </table:table-cell>
          <table:table-cell office:value-type="float" office:value="-0.001614089">
            <text:p>-0.001614089</text:p>
          </table:table-cell>
          <table:table-cell table:number-columns-repeated="4"/>
        </table:table-row>
        <table:table-row table:style-name="ro1">
          <table:table-cell office:value-type="float" office:value="730.8037109375">
            <text:p>730.8037109375</text:p>
          </table:table-cell>
          <table:table-cell office:value-type="float" office:value="0.01142221">
            <text:p>0.01142221</text:p>
          </table:table-cell>
          <table:table-cell table:number-columns-repeated="4"/>
        </table:table-row>
        <table:table-row table:style-name="ro1">
          <table:table-cell office:value-type="float" office:value="730.923950195313">
            <text:p>730.9239501953</text:p>
          </table:table-cell>
          <table:table-cell office:value-type="float" office:value="0.00595021">
            <text:p>0.00595021</text:p>
          </table:table-cell>
          <table:table-cell table:number-columns-repeated="4"/>
        </table:table-row>
        <table:table-row table:style-name="ro1">
          <table:table-cell office:value-type="float" office:value="731.044189453125">
            <text:p>731.0441894531</text:p>
          </table:table-cell>
          <table:table-cell office:value-type="float" office:value="0.01213364">
            <text:p>0.01213364</text:p>
          </table:table-cell>
          <table:table-cell table:number-columns-repeated="4"/>
        </table:table-row>
        <table:table-row table:style-name="ro1">
          <table:table-cell office:value-type="float" office:value="731.164428710938">
            <text:p>731.1644287109</text:p>
          </table:table-cell>
          <table:table-cell office:value-type="float" office:value="-0.00489608">
            <text:p>-0.00489608</text:p>
          </table:table-cell>
          <table:table-cell table:number-columns-repeated="4"/>
        </table:table-row>
        <table:table-row table:style-name="ro1">
          <table:table-cell office:value-type="float" office:value="731.28466796875">
            <text:p>731.2846679688</text:p>
          </table:table-cell>
          <table:table-cell office:value-type="float" office:value="0.0006254372">
            <text:p>0.0006254372</text:p>
          </table:table-cell>
          <table:table-cell table:number-columns-repeated="4"/>
        </table:table-row>
        <table:table-row table:style-name="ro1">
          <table:table-cell office:value-type="float" office:value="731.404907226563">
            <text:p>731.4049072266</text:p>
          </table:table-cell>
          <table:table-cell office:value-type="float" office:value="-0.006607329">
            <text:p>-0.006607329</text:p>
          </table:table-cell>
          <table:table-cell table:number-columns-repeated="4"/>
        </table:table-row>
        <table:table-row table:style-name="ro1">
          <table:table-cell office:value-type="float" office:value="731.525146484375">
            <text:p>731.5251464844</text:p>
          </table:table-cell>
          <table:table-cell office:value-type="float" office:value="-0.002526157">
            <text:p>-0.002526157</text:p>
          </table:table-cell>
          <table:table-cell table:number-columns-repeated="4"/>
        </table:table-row>
        <table:table-row table:style-name="ro1">
          <table:table-cell office:value-type="float" office:value="731.645446777344">
            <text:p>731.6454467773</text:p>
          </table:table-cell>
          <table:table-cell office:value-type="float" office:value="0.007415151">
            <text:p>0.007415151</text:p>
          </table:table-cell>
          <table:table-cell table:number-columns-repeated="4"/>
        </table:table-row>
        <table:table-row table:style-name="ro1">
          <table:table-cell office:value-type="float" office:value="731.765686035156">
            <text:p>731.7656860352</text:p>
          </table:table-cell>
          <table:table-cell office:value-type="float" office:value="0.007642058">
            <text:p>0.007642058</text:p>
          </table:table-cell>
          <table:table-cell table:number-columns-repeated="4"/>
        </table:table-row>
        <table:table-row table:style-name="ro1">
          <table:table-cell office:value-type="float" office:value="731.885925292969">
            <text:p>731.885925293</text:p>
          </table:table-cell>
          <table:table-cell office:value-type="float" office:value="0.004899257">
            <text:p>0.004899257</text:p>
          </table:table-cell>
          <table:table-cell table:number-columns-repeated="4"/>
        </table:table-row>
        <table:table-row table:style-name="ro1">
          <table:table-cell office:value-type="float" office:value="732.006164550781">
            <text:p>732.0061645508</text:p>
          </table:table-cell>
          <table:table-cell office:value-type="float" office:value="-0.002898239">
            <text:p>-0.002898239</text:p>
          </table:table-cell>
          <table:table-cell table:number-columns-repeated="4"/>
        </table:table-row>
        <table:table-row table:style-name="ro1">
          <table:table-cell office:value-type="float" office:value="732.126403808594">
            <text:p>732.1264038086</text:p>
          </table:table-cell>
          <table:table-cell office:value-type="float" office:value="0.01612643">
            <text:p>0.01612643</text:p>
          </table:table-cell>
          <table:table-cell table:number-columns-repeated="4"/>
        </table:table-row>
        <table:table-row table:style-name="ro1">
          <table:table-cell office:value-type="float" office:value="732.246643066406">
            <text:p>732.2466430664</text:p>
          </table:table-cell>
          <table:table-cell office:value-type="float" office:value="-0.004573049">
            <text:p>-0.004573049</text:p>
          </table:table-cell>
          <table:table-cell table:number-columns-repeated="4"/>
        </table:table-row>
        <table:table-row table:style-name="ro1">
          <table:table-cell office:value-type="float" office:value="732.366882324219">
            <text:p>732.3668823242</text:p>
          </table:table-cell>
          <table:table-cell office:value-type="float" office:value="-0.004819736">
            <text:p>-0.004819736</text:p>
          </table:table-cell>
          <table:table-cell table:number-columns-repeated="4"/>
        </table:table-row>
        <table:table-row table:style-name="ro1">
          <table:table-cell office:value-type="float" office:value="732.487182617188">
            <text:p>732.4871826172</text:p>
          </table:table-cell>
          <table:table-cell office:value-type="float" office:value="-0.005981402">
            <text:p>-0.005981402</text:p>
          </table:table-cell>
          <table:table-cell table:number-columns-repeated="4"/>
        </table:table-row>
        <table:table-row table:style-name="ro1">
          <table:table-cell office:value-type="float" office:value="732.607421875">
            <text:p>732.607421875</text:p>
          </table:table-cell>
          <table:table-cell office:value-type="float" office:value="-0.002446438">
            <text:p>-0.002446438</text:p>
          </table:table-cell>
          <table:table-cell table:number-columns-repeated="4"/>
        </table:table-row>
        <table:table-row table:style-name="ro1">
          <table:table-cell office:value-type="float" office:value="732.727661132813">
            <text:p>732.7276611328</text:p>
          </table:table-cell>
          <table:table-cell office:value-type="float" office:value="0.003437385">
            <text:p>0.003437385</text:p>
          </table:table-cell>
          <table:table-cell table:number-columns-repeated="4"/>
        </table:table-row>
        <table:table-row table:style-name="ro1">
          <table:table-cell office:value-type="float" office:value="732.847900390625">
            <text:p>732.8479003906</text:p>
          </table:table-cell>
          <table:table-cell office:value-type="float" office:value="-0.003117522">
            <text:p>-0.003117522</text:p>
          </table:table-cell>
          <table:table-cell table:number-columns-repeated="4"/>
        </table:table-row>
        <table:table-row table:style-name="ro1">
          <table:table-cell office:value-type="float" office:value="732.968139648438">
            <text:p>732.9681396484</text:p>
          </table:table-cell>
          <table:table-cell office:value-type="float" office:value="-0.002798424">
            <text:p>-0.002798424</text:p>
          </table:table-cell>
          <table:table-cell table:number-columns-repeated="4"/>
        </table:table-row>
        <table:table-row table:style-name="ro1">
          <table:table-cell office:value-type="float" office:value="733.08837890625">
            <text:p>733.0883789063</text:p>
          </table:table-cell>
          <table:table-cell office:value-type="float" office:value="-0.005454395">
            <text:p>-0.005454395</text:p>
          </table:table-cell>
          <table:table-cell table:number-columns-repeated="4"/>
        </table:table-row>
        <table:table-row table:style-name="ro1">
          <table:table-cell office:value-type="float" office:value="733.208679199219">
            <text:p>733.2086791992</text:p>
          </table:table-cell>
          <table:table-cell office:value-type="float" office:value="-0.007402246">
            <text:p>-0.007402246</text:p>
          </table:table-cell>
          <table:table-cell table:number-columns-repeated="4"/>
        </table:table-row>
        <table:table-row table:style-name="ro1">
          <table:table-cell office:value-type="float" office:value="733.328918457031">
            <text:p>733.328918457</text:p>
          </table:table-cell>
          <table:table-cell office:value-type="float" office:value="-0.003575177">
            <text:p>-0.003575177</text:p>
          </table:table-cell>
          <table:table-cell table:number-columns-repeated="4"/>
        </table:table-row>
        <table:table-row table:style-name="ro1">
          <table:table-cell office:value-type="float" office:value="733.449157714844">
            <text:p>733.4491577148</text:p>
          </table:table-cell>
          <table:table-cell office:value-type="float" office:value="-0.0007696258">
            <text:p>-0.0007696258</text:p>
          </table:table-cell>
          <table:table-cell table:number-columns-repeated="4"/>
        </table:table-row>
        <table:table-row table:style-name="ro1">
          <table:table-cell office:value-type="float" office:value="733.569396972656">
            <text:p>733.5693969727</text:p>
          </table:table-cell>
          <table:table-cell office:value-type="float" office:value="0.002106322">
            <text:p>0.002106322</text:p>
          </table:table-cell>
          <table:table-cell table:number-columns-repeated="4"/>
        </table:table-row>
        <table:table-row table:style-name="ro1">
          <table:table-cell office:value-type="float" office:value="733.689636230469">
            <text:p>733.6896362305</text:p>
          </table:table-cell>
          <table:table-cell office:value-type="float" office:value="-0.002036323">
            <text:p>-0.002036323</text:p>
          </table:table-cell>
          <table:table-cell table:number-columns-repeated="4"/>
        </table:table-row>
        <table:table-row table:style-name="ro1">
          <table:table-cell office:value-type="float" office:value="733.809936523438">
            <text:p>733.8099365234</text:p>
          </table:table-cell>
          <table:table-cell office:value-type="string">
            <text:p>-2.401768E-05</text:p>
          </table:table-cell>
          <table:table-cell table:number-columns-repeated="4"/>
        </table:table-row>
        <table:table-row table:style-name="ro1">
          <table:table-cell office:value-type="float" office:value="733.93017578125">
            <text:p>733.9301757813</text:p>
          </table:table-cell>
          <table:table-cell office:value-type="float" office:value="0.006829578">
            <text:p>0.006829578</text:p>
          </table:table-cell>
          <table:table-cell table:number-columns-repeated="4"/>
        </table:table-row>
        <table:table-row table:style-name="ro1">
          <table:table-cell office:value-type="float" office:value="734.050415039063">
            <text:p>734.0504150391</text:p>
          </table:table-cell>
          <table:table-cell office:value-type="float" office:value="0.001263805">
            <text:p>0.001263805</text:p>
          </table:table-cell>
          <table:table-cell table:number-columns-repeated="4"/>
        </table:table-row>
        <table:table-row table:style-name="ro1">
          <table:table-cell office:value-type="float" office:value="734.170654296875">
            <text:p>734.1706542969</text:p>
          </table:table-cell>
          <table:table-cell office:value-type="float" office:value="0.006777517">
            <text:p>0.006777517</text:p>
          </table:table-cell>
          <table:table-cell table:number-columns-repeated="4"/>
        </table:table-row>
        <table:table-row table:style-name="ro1">
          <table:table-cell office:value-type="float" office:value="734.290893554688">
            <text:p>734.2908935547</text:p>
          </table:table-cell>
          <table:table-cell office:value-type="float" office:value="-0.007313723">
            <text:p>-0.007313723</text:p>
          </table:table-cell>
          <table:table-cell table:number-columns-repeated="4"/>
        </table:table-row>
        <table:table-row table:style-name="ro1">
          <table:table-cell office:value-type="float" office:value="734.4111328125">
            <text:p>734.4111328125</text:p>
          </table:table-cell>
          <table:table-cell office:value-type="float" office:value="-0.007842532">
            <text:p>-0.007842532</text:p>
          </table:table-cell>
          <table:table-cell table:number-columns-repeated="4"/>
        </table:table-row>
        <table:table-row table:style-name="ro1">
          <table:table-cell office:value-type="float" office:value="734.531433105469">
            <text:p>734.5314331055</text:p>
          </table:table-cell>
          <table:table-cell office:value-type="float" office:value="-0.002254732">
            <text:p>-0.002254732</text:p>
          </table:table-cell>
          <table:table-cell table:number-columns-repeated="4"/>
        </table:table-row>
        <table:table-row table:style-name="ro1">
          <table:table-cell office:value-type="float" office:value="734.651672363281">
            <text:p>734.6516723633</text:p>
          </table:table-cell>
          <table:table-cell office:value-type="float" office:value="0.006489584">
            <text:p>0.006489584</text:p>
          </table:table-cell>
          <table:table-cell table:number-columns-repeated="4"/>
        </table:table-row>
        <table:table-row table:style-name="ro1">
          <table:table-cell office:value-type="float" office:value="734.771911621094">
            <text:p>734.7719116211</text:p>
          </table:table-cell>
          <table:table-cell office:value-type="float" office:value="-0.0002049722">
            <text:p>-0.0002049722</text:p>
          </table:table-cell>
          <table:table-cell table:number-columns-repeated="4"/>
        </table:table-row>
        <table:table-row table:style-name="ro1">
          <table:table-cell office:value-type="float" office:value="734.892150878906">
            <text:p>734.8921508789</text:p>
          </table:table-cell>
          <table:table-cell office:value-type="float" office:value="-0.006652401">
            <text:p>-0.006652401</text:p>
          </table:table-cell>
          <table:table-cell table:number-columns-repeated="4"/>
        </table:table-row>
        <table:table-row table:style-name="ro1">
          <table:table-cell office:value-type="float" office:value="735.012451171875">
            <text:p>735.0124511719</text:p>
          </table:table-cell>
          <table:table-cell office:value-type="float" office:value="-0.006172734">
            <text:p>-0.006172734</text:p>
          </table:table-cell>
          <table:table-cell table:number-columns-repeated="4"/>
        </table:table-row>
        <table:table-row table:style-name="ro1">
          <table:table-cell office:value-type="float" office:value="735.132690429688">
            <text:p>735.1326904297</text:p>
          </table:table-cell>
          <table:table-cell office:value-type="string">
            <text:p>-3.501011E-05</text:p>
          </table:table-cell>
          <table:table-cell table:number-columns-repeated="4"/>
        </table:table-row>
        <table:table-row table:style-name="ro1">
          <table:table-cell office:value-type="float" office:value="735.2529296875">
            <text:p>735.2529296875</text:p>
          </table:table-cell>
          <table:table-cell office:value-type="float" office:value="0.01654438">
            <text:p>0.01654438</text:p>
          </table:table-cell>
          <table:table-cell table:number-columns-repeated="4"/>
        </table:table-row>
        <table:table-row table:style-name="ro1">
          <table:table-cell office:value-type="float" office:value="735.373168945313">
            <text:p>735.3731689453</text:p>
          </table:table-cell>
          <table:table-cell office:value-type="float" office:value="0.003865267">
            <text:p>0.003865267</text:p>
          </table:table-cell>
          <table:table-cell table:number-columns-repeated="4"/>
        </table:table-row>
        <table:table-row table:style-name="ro1">
          <table:table-cell office:value-type="float" office:value="735.493408203125">
            <text:p>735.4934082031</text:p>
          </table:table-cell>
          <table:table-cell office:value-type="float" office:value="-0.00102458">
            <text:p>-0.00102458</text:p>
          </table:table-cell>
          <table:table-cell table:number-columns-repeated="4"/>
        </table:table-row>
        <table:table-row table:style-name="ro1">
          <table:table-cell office:value-type="float" office:value="735.613708496094">
            <text:p>735.6137084961</text:p>
          </table:table-cell>
          <table:table-cell office:value-type="float" office:value="0.00224182">
            <text:p>0.00224182</text:p>
          </table:table-cell>
          <table:table-cell table:number-columns-repeated="4"/>
        </table:table-row>
        <table:table-row table:style-name="ro1">
          <table:table-cell office:value-type="float" office:value="735.733947753906">
            <text:p>735.7339477539</text:p>
          </table:table-cell>
          <table:table-cell office:value-type="float" office:value="0.005059972">
            <text:p>0.005059972</text:p>
          </table:table-cell>
          <table:table-cell table:number-columns-repeated="4"/>
        </table:table-row>
        <table:table-row table:style-name="ro1">
          <table:table-cell office:value-type="float" office:value="735.854187011719">
            <text:p>735.8541870117</text:p>
          </table:table-cell>
          <table:table-cell office:value-type="float" office:value="0.007961347">
            <text:p>0.007961347</text:p>
          </table:table-cell>
          <table:table-cell table:number-columns-repeated="4"/>
        </table:table-row>
        <table:table-row table:style-name="ro1">
          <table:table-cell office:value-type="float" office:value="735.974426269531">
            <text:p>735.9744262695</text:p>
          </table:table-cell>
          <table:table-cell office:value-type="float" office:value="0.002794058">
            <text:p>0.002794058</text:p>
          </table:table-cell>
          <table:table-cell table:number-columns-repeated="4"/>
        </table:table-row>
        <table:table-row table:style-name="ro1">
          <table:table-cell office:value-type="float" office:value="736.094665527344">
            <text:p>736.0946655273</text:p>
          </table:table-cell>
          <table:table-cell office:value-type="float" office:value="0.002777906">
            <text:p>0.002777906</text:p>
          </table:table-cell>
          <table:table-cell table:number-columns-repeated="4"/>
        </table:table-row>
        <table:table-row table:style-name="ro1">
          <table:table-cell office:value-type="float" office:value="736.214965820313">
            <text:p>736.2149658203</text:p>
          </table:table-cell>
          <table:table-cell office:value-type="float" office:value="-0.004512061">
            <text:p>-0.004512061</text:p>
          </table:table-cell>
          <table:table-cell table:number-columns-repeated="4"/>
        </table:table-row>
        <table:table-row table:style-name="ro1">
          <table:table-cell office:value-type="float" office:value="736.335205078125">
            <text:p>736.3352050781</text:p>
          </table:table-cell>
          <table:table-cell office:value-type="float" office:value="0.0005544168">
            <text:p>0.0005544168</text:p>
          </table:table-cell>
          <table:table-cell table:number-columns-repeated="4"/>
        </table:table-row>
        <table:table-row table:style-name="ro1">
          <table:table-cell office:value-type="float" office:value="736.455444335938">
            <text:p>736.4554443359</text:p>
          </table:table-cell>
          <table:table-cell office:value-type="float" office:value="0.004827369">
            <text:p>0.004827369</text:p>
          </table:table-cell>
          <table:table-cell table:number-columns-repeated="4"/>
        </table:table-row>
        <table:table-row table:style-name="ro1">
          <table:table-cell office:value-type="float" office:value="736.57568359375">
            <text:p>736.5756835938</text:p>
          </table:table-cell>
          <table:table-cell office:value-type="float" office:value="0.00270424">
            <text:p>0.00270424</text:p>
          </table:table-cell>
          <table:table-cell table:number-columns-repeated="4"/>
        </table:table-row>
        <table:table-row table:style-name="ro1">
          <table:table-cell office:value-type="float" office:value="736.695983886719">
            <text:p>736.6959838867</text:p>
          </table:table-cell>
          <table:table-cell office:value-type="float" office:value="0.01129091">
            <text:p>0.01129091</text:p>
          </table:table-cell>
          <table:table-cell table:number-columns-repeated="4"/>
        </table:table-row>
        <table:table-row table:style-name="ro1">
          <table:table-cell office:value-type="float" office:value="736.816223144531">
            <text:p>736.8162231445</text:p>
          </table:table-cell>
          <table:table-cell office:value-type="float" office:value="0.006560386">
            <text:p>0.006560386</text:p>
          </table:table-cell>
          <table:table-cell table:number-columns-repeated="4"/>
        </table:table-row>
        <table:table-row table:style-name="ro1">
          <table:table-cell office:value-type="float" office:value="736.936462402344">
            <text:p>736.9364624023</text:p>
          </table:table-cell>
          <table:table-cell office:value-type="float" office:value="0.01050243">
            <text:p>0.01050243</text:p>
          </table:table-cell>
          <table:table-cell table:number-columns-repeated="4"/>
        </table:table-row>
        <table:table-row table:style-name="ro1">
          <table:table-cell office:value-type="float" office:value="737.056701660156">
            <text:p>737.0567016602</text:p>
          </table:table-cell>
          <table:table-cell office:value-type="float" office:value="-0.001088252">
            <text:p>-0.001088252</text:p>
          </table:table-cell>
          <table:table-cell table:number-columns-repeated="4"/>
        </table:table-row>
        <table:table-row table:style-name="ro1">
          <table:table-cell office:value-type="float" office:value="737.177001953125">
            <text:p>737.1770019531</text:p>
          </table:table-cell>
          <table:table-cell office:value-type="float" office:value="0.004452866">
            <text:p>0.004452866</text:p>
          </table:table-cell>
          <table:table-cell table:number-columns-repeated="4"/>
        </table:table-row>
        <table:table-row table:style-name="ro1">
          <table:table-cell office:value-type="float" office:value="737.297241210938">
            <text:p>737.2972412109</text:p>
          </table:table-cell>
          <table:table-cell office:value-type="float" office:value="0.005189405">
            <text:p>0.005189405</text:p>
          </table:table-cell>
          <table:table-cell table:number-columns-repeated="4"/>
        </table:table-row>
        <table:table-row table:style-name="ro1">
          <table:table-cell office:value-type="float" office:value="737.41748046875">
            <text:p>737.4174804688</text:p>
          </table:table-cell>
          <table:table-cell office:value-type="float" office:value="0.003112115">
            <text:p>0.003112115</text:p>
          </table:table-cell>
          <table:table-cell table:number-columns-repeated="4"/>
        </table:table-row>
        <table:table-row table:style-name="ro1">
          <table:table-cell office:value-type="float" office:value="737.537719726563">
            <text:p>737.5377197266</text:p>
          </table:table-cell>
          <table:table-cell office:value-type="float" office:value="0.002928647">
            <text:p>0.002928647</text:p>
          </table:table-cell>
          <table:table-cell table:number-columns-repeated="4"/>
        </table:table-row>
        <table:table-row table:style-name="ro1">
          <table:table-cell office:value-type="float" office:value="737.658020019531">
            <text:p>737.6580200195</text:p>
          </table:table-cell>
          <table:table-cell office:value-type="float" office:value="-0.008219481">
            <text:p>-0.008219481</text:p>
          </table:table-cell>
          <table:table-cell table:number-columns-repeated="4"/>
        </table:table-row>
        <table:table-row table:style-name="ro1">
          <table:table-cell office:value-type="float" office:value="737.778259277344">
            <text:p>737.7782592773</text:p>
          </table:table-cell>
          <table:table-cell office:value-type="float" office:value="0.004846072">
            <text:p>0.004846072</text:p>
          </table:table-cell>
          <table:table-cell table:number-columns-repeated="4"/>
        </table:table-row>
        <table:table-row table:style-name="ro1">
          <table:table-cell office:value-type="float" office:value="737.898498535156">
            <text:p>737.8984985352</text:p>
          </table:table-cell>
          <table:table-cell office:value-type="float" office:value="0.00246843">
            <text:p>0.00246843</text:p>
          </table:table-cell>
          <table:table-cell table:number-columns-repeated="4"/>
        </table:table-row>
        <table:table-row table:style-name="ro1">
          <table:table-cell office:value-type="float" office:value="738.018737792969">
            <text:p>738.018737793</text:p>
          </table:table-cell>
          <table:table-cell office:value-type="float" office:value="0.004509348">
            <text:p>0.004509348</text:p>
          </table:table-cell>
          <table:table-cell table:number-columns-repeated="4"/>
        </table:table-row>
        <table:table-row table:style-name="ro1">
          <table:table-cell office:value-type="float" office:value="738.139038085938">
            <text:p>738.1390380859</text:p>
          </table:table-cell>
          <table:table-cell office:value-type="float" office:value="0.004272419">
            <text:p>0.004272419</text:p>
          </table:table-cell>
          <table:table-cell table:number-columns-repeated="4"/>
        </table:table-row>
        <table:table-row table:style-name="ro1">
          <table:table-cell office:value-type="float" office:value="738.25927734375">
            <text:p>738.2592773438</text:p>
          </table:table-cell>
          <table:table-cell office:value-type="float" office:value="-0.00201429">
            <text:p>-0.00201429</text:p>
          </table:table-cell>
          <table:table-cell table:number-columns-repeated="4"/>
        </table:table-row>
        <table:table-row table:style-name="ro1">
          <table:table-cell office:value-type="float" office:value="738.379516601563">
            <text:p>738.3795166016</text:p>
          </table:table-cell>
          <table:table-cell office:value-type="float" office:value="0.01393956">
            <text:p>0.01393956</text:p>
          </table:table-cell>
          <table:table-cell table:number-columns-repeated="4"/>
        </table:table-row>
        <table:table-row table:style-name="ro1">
          <table:table-cell office:value-type="float" office:value="738.499755859375">
            <text:p>738.4997558594</text:p>
          </table:table-cell>
          <table:table-cell office:value-type="float" office:value="0.004463307">
            <text:p>0.004463307</text:p>
          </table:table-cell>
          <table:table-cell table:number-columns-repeated="4"/>
        </table:table-row>
        <table:table-row table:style-name="ro1">
          <table:table-cell office:value-type="float" office:value="738.620056152344">
            <text:p>738.6200561523</text:p>
          </table:table-cell>
          <table:table-cell office:value-type="float" office:value="-0.004559968">
            <text:p>-0.004559968</text:p>
          </table:table-cell>
          <table:table-cell table:number-columns-repeated="4"/>
        </table:table-row>
        <table:table-row table:style-name="ro1">
          <table:table-cell office:value-type="float" office:value="738.740295410156">
            <text:p>738.7402954102</text:p>
          </table:table-cell>
          <table:table-cell office:value-type="float" office:value="-0.0008570961">
            <text:p>-0.0008570961</text:p>
          </table:table-cell>
          <table:table-cell table:number-columns-repeated="4"/>
        </table:table-row>
        <table:table-row table:style-name="ro1">
          <table:table-cell office:value-type="float" office:value="738.860534667969">
            <text:p>738.860534668</text:p>
          </table:table-cell>
          <table:table-cell office:value-type="float" office:value="-0.004728673">
            <text:p>-0.004728673</text:p>
          </table:table-cell>
          <table:table-cell table:number-columns-repeated="4"/>
        </table:table-row>
        <table:table-row table:style-name="ro1">
          <table:table-cell office:value-type="float" office:value="738.980773925781">
            <text:p>738.9807739258</text:p>
          </table:table-cell>
          <table:table-cell office:value-type="float" office:value="0.01167291">
            <text:p>0.01167291</text:p>
          </table:table-cell>
          <table:table-cell table:number-columns-repeated="4"/>
        </table:table-row>
        <table:table-row table:style-name="ro1">
          <table:table-cell office:value-type="float" office:value="739.10107421875">
            <text:p>739.1010742188</text:p>
          </table:table-cell>
          <table:table-cell office:value-type="float" office:value="-0.003598294">
            <text:p>-0.003598294</text:p>
          </table:table-cell>
          <table:table-cell table:number-columns-repeated="4"/>
        </table:table-row>
        <table:table-row table:style-name="ro1">
          <table:table-cell office:value-type="float" office:value="739.221313476563">
            <text:p>739.2213134766</text:p>
          </table:table-cell>
          <table:table-cell office:value-type="float" office:value="0.006974582">
            <text:p>0.006974582</text:p>
          </table:table-cell>
          <table:table-cell table:number-columns-repeated="4"/>
        </table:table-row>
        <table:table-row table:style-name="ro1">
          <table:table-cell office:value-type="float" office:value="739.341552734375">
            <text:p>739.3415527344</text:p>
          </table:table-cell>
          <table:table-cell office:value-type="string">
            <text:p>8.978601E-05</text:p>
          </table:table-cell>
          <table:table-cell table:number-columns-repeated="4"/>
        </table:table-row>
        <table:table-row table:style-name="ro1">
          <table:table-cell office:value-type="float" office:value="739.461791992188">
            <text:p>739.4617919922</text:p>
          </table:table-cell>
          <table:table-cell office:value-type="float" office:value="0.0001195212">
            <text:p>0.0001195212</text:p>
          </table:table-cell>
          <table:table-cell table:number-columns-repeated="4"/>
        </table:table-row>
        <table:table-row table:style-name="ro1">
          <table:table-cell office:value-type="float" office:value="739.582092285156">
            <text:p>739.5820922852</text:p>
          </table:table-cell>
          <table:table-cell office:value-type="float" office:value="-0.004632917">
            <text:p>-0.004632917</text:p>
          </table:table-cell>
          <table:table-cell table:number-columns-repeated="4"/>
        </table:table-row>
        <table:table-row table:style-name="ro1">
          <table:table-cell office:value-type="float" office:value="739.702331542969">
            <text:p>739.702331543</text:p>
          </table:table-cell>
          <table:table-cell office:value-type="float" office:value="-0.009244405">
            <text:p>-0.009244405</text:p>
          </table:table-cell>
          <table:table-cell table:number-columns-repeated="4"/>
        </table:table-row>
        <table:table-row table:style-name="ro1">
          <table:table-cell office:value-type="float" office:value="739.822570800781">
            <text:p>739.8225708008</text:p>
          </table:table-cell>
          <table:table-cell office:value-type="float" office:value="-0.003175896">
            <text:p>-0.003175896</text:p>
          </table:table-cell>
          <table:table-cell table:number-columns-repeated="4"/>
        </table:table-row>
        <table:table-row table:style-name="ro1">
          <table:table-cell office:value-type="float" office:value="739.942810058594">
            <text:p>739.9428100586</text:p>
          </table:table-cell>
          <table:table-cell office:value-type="float" office:value="-0.01003124">
            <text:p>-0.01003124</text:p>
          </table:table-cell>
          <table:table-cell table:number-columns-repeated="4"/>
        </table:table-row>
        <table:table-row table:style-name="ro1">
          <table:table-cell office:value-type="float" office:value="740.063110351563">
            <text:p>740.0631103516</text:p>
          </table:table-cell>
          <table:table-cell office:value-type="float" office:value="-0.004512441">
            <text:p>-0.004512441</text:p>
          </table:table-cell>
          <table:table-cell table:number-columns-repeated="4"/>
        </table:table-row>
        <table:table-row table:style-name="ro1">
          <table:table-cell office:value-type="float" office:value="740.183349609375">
            <text:p>740.1833496094</text:p>
          </table:table-cell>
          <table:table-cell office:value-type="float" office:value="-0.002788797">
            <text:p>-0.002788797</text:p>
          </table:table-cell>
          <table:table-cell table:number-columns-repeated="4"/>
        </table:table-row>
        <table:table-row table:style-name="ro1">
          <table:table-cell office:value-type="float" office:value="740.303588867188">
            <text:p>740.3035888672</text:p>
          </table:table-cell>
          <table:table-cell office:value-type="float" office:value="-0.0008104361">
            <text:p>-0.0008104361</text:p>
          </table:table-cell>
          <table:table-cell table:number-columns-repeated="4"/>
        </table:table-row>
        <table:table-row table:style-name="ro1">
          <table:table-cell office:value-type="float" office:value="740.423889160156">
            <text:p>740.4238891602</text:p>
          </table:table-cell>
          <table:table-cell office:value-type="float" office:value="0.009043">
            <text:p>0.009043</text:p>
          </table:table-cell>
          <table:table-cell table:number-columns-repeated="4"/>
        </table:table-row>
        <table:table-row table:style-name="ro1">
          <table:table-cell office:value-type="float" office:value="740.544128417969">
            <text:p>740.544128418</text:p>
          </table:table-cell>
          <table:table-cell office:value-type="float" office:value="0.01281781">
            <text:p>0.01281781</text:p>
          </table:table-cell>
          <table:table-cell table:number-columns-repeated="4"/>
        </table:table-row>
        <table:table-row table:style-name="ro1">
          <table:table-cell office:value-type="float" office:value="740.664367675781">
            <text:p>740.6643676758</text:p>
          </table:table-cell>
          <table:table-cell office:value-type="float" office:value="-0.006709137">
            <text:p>-0.006709137</text:p>
          </table:table-cell>
          <table:table-cell table:number-columns-repeated="4"/>
        </table:table-row>
        <table:table-row table:style-name="ro1">
          <table:table-cell office:value-type="float" office:value="740.784606933594">
            <text:p>740.7846069336</text:p>
          </table:table-cell>
          <table:table-cell office:value-type="float" office:value="0.008542291">
            <text:p>0.008542291</text:p>
          </table:table-cell>
          <table:table-cell table:number-columns-repeated="4"/>
        </table:table-row>
        <table:table-row table:style-name="ro1">
          <table:table-cell office:value-type="float" office:value="740.904907226563">
            <text:p>740.9049072266</text:p>
          </table:table-cell>
          <table:table-cell office:value-type="float" office:value="0.002022861">
            <text:p>0.002022861</text:p>
          </table:table-cell>
          <table:table-cell table:number-columns-repeated="4"/>
        </table:table-row>
        <table:table-row table:style-name="ro1">
          <table:table-cell office:value-type="float" office:value="741.025146484375">
            <text:p>741.0251464844</text:p>
          </table:table-cell>
          <table:table-cell office:value-type="float" office:value="-0.005929402">
            <text:p>-0.005929402</text:p>
          </table:table-cell>
          <table:table-cell table:number-columns-repeated="4"/>
        </table:table-row>
        <table:table-row table:style-name="ro1">
          <table:table-cell office:value-type="float" office:value="741.145385742188">
            <text:p>741.1453857422</text:p>
          </table:table-cell>
          <table:table-cell office:value-type="float" office:value="-0.00443158">
            <text:p>-0.00443158</text:p>
          </table:table-cell>
          <table:table-cell table:number-columns-repeated="4"/>
        </table:table-row>
        <table:table-row table:style-name="ro1">
          <table:table-cell office:value-type="float" office:value="741.265625">
            <text:p>741.265625</text:p>
          </table:table-cell>
          <table:table-cell office:value-type="float" office:value="0.02115045">
            <text:p>0.02115045</text:p>
          </table:table-cell>
          <table:table-cell table:number-columns-repeated="4"/>
        </table:table-row>
        <table:table-row table:style-name="ro1">
          <table:table-cell office:value-type="float" office:value="741.385925292969">
            <text:p>741.385925293</text:p>
          </table:table-cell>
          <table:table-cell office:value-type="float" office:value="-0.005302818">
            <text:p>-0.005302818</text:p>
          </table:table-cell>
          <table:table-cell table:number-columns-repeated="4"/>
        </table:table-row>
        <table:table-row table:style-name="ro1">
          <table:table-cell office:value-type="float" office:value="741.506164550781">
            <text:p>741.5061645508</text:p>
          </table:table-cell>
          <table:table-cell office:value-type="float" office:value="-0.0004888167">
            <text:p>-0.0004888167</text:p>
          </table:table-cell>
          <table:table-cell table:number-columns-repeated="4"/>
        </table:table-row>
        <table:table-row table:style-name="ro1">
          <table:table-cell office:value-type="float" office:value="741.626403808594">
            <text:p>741.6264038086</text:p>
          </table:table-cell>
          <table:table-cell office:value-type="float" office:value="0.00772407">
            <text:p>0.00772407</text:p>
          </table:table-cell>
          <table:table-cell table:number-columns-repeated="4"/>
        </table:table-row>
        <table:table-row table:style-name="ro1">
          <table:table-cell office:value-type="float" office:value="741.746704101563">
            <text:p>741.7467041016</text:p>
          </table:table-cell>
          <table:table-cell office:value-type="float" office:value="-0.0005913894">
            <text:p>-0.0005913894</text:p>
          </table:table-cell>
          <table:table-cell table:number-columns-repeated="4"/>
        </table:table-row>
        <table:table-row table:style-name="ro1">
          <table:table-cell office:value-type="float" office:value="741.866943359375">
            <text:p>741.8669433594</text:p>
          </table:table-cell>
          <table:table-cell office:value-type="float" office:value="0.0170593">
            <text:p>0.0170593</text:p>
          </table:table-cell>
          <table:table-cell table:number-columns-repeated="4"/>
        </table:table-row>
        <table:table-row table:style-name="ro1">
          <table:table-cell office:value-type="float" office:value="741.987182617188">
            <text:p>741.9871826172</text:p>
          </table:table-cell>
          <table:table-cell office:value-type="float" office:value="-0.002890004">
            <text:p>-0.002890004</text:p>
          </table:table-cell>
          <table:table-cell table:number-columns-repeated="4"/>
        </table:table-row>
        <table:table-row table:style-name="ro1">
          <table:table-cell office:value-type="float" office:value="742.107421875">
            <text:p>742.107421875</text:p>
          </table:table-cell>
          <table:table-cell office:value-type="float" office:value="0.0057363">
            <text:p>0.0057363</text:p>
          </table:table-cell>
          <table:table-cell table:number-columns-repeated="4"/>
        </table:table-row>
        <table:table-row table:style-name="ro1">
          <table:table-cell office:value-type="float" office:value="742.227722167969">
            <text:p>742.227722168</text:p>
          </table:table-cell>
          <table:table-cell office:value-type="float" office:value="0.006445434">
            <text:p>0.006445434</text:p>
          </table:table-cell>
          <table:table-cell table:number-columns-repeated="4"/>
        </table:table-row>
        <table:table-row table:style-name="ro1">
          <table:table-cell office:value-type="float" office:value="742.347961425781">
            <text:p>742.3479614258</text:p>
          </table:table-cell>
          <table:table-cell office:value-type="float" office:value="0.002233427">
            <text:p>0.002233427</text:p>
          </table:table-cell>
          <table:table-cell table:number-columns-repeated="4"/>
        </table:table-row>
        <table:table-row table:style-name="ro1">
          <table:table-cell office:value-type="float" office:value="742.468200683594">
            <text:p>742.4682006836</text:p>
          </table:table-cell>
          <table:table-cell office:value-type="float" office:value="-0.004742227">
            <text:p>-0.004742227</text:p>
          </table:table-cell>
          <table:table-cell table:number-columns-repeated="4"/>
        </table:table-row>
        <table:table-row table:style-name="ro1">
          <table:table-cell office:value-type="float" office:value="742.588439941406">
            <text:p>742.5884399414</text:p>
          </table:table-cell>
          <table:table-cell office:value-type="float" office:value="0.0002690025">
            <text:p>0.0002690025</text:p>
          </table:table-cell>
          <table:table-cell table:number-columns-repeated="4"/>
        </table:table-row>
        <table:table-row table:style-name="ro1">
          <table:table-cell office:value-type="float" office:value="742.708740234375">
            <text:p>742.7087402344</text:p>
          </table:table-cell>
          <table:table-cell office:value-type="float" office:value="-0.002327554">
            <text:p>-0.002327554</text:p>
          </table:table-cell>
          <table:table-cell table:number-columns-repeated="4"/>
        </table:table-row>
        <table:table-row table:style-name="ro1">
          <table:table-cell office:value-type="float" office:value="742.828979492188">
            <text:p>742.8289794922</text:p>
          </table:table-cell>
          <table:table-cell office:value-type="float" office:value="-0.002363154">
            <text:p>-0.002363154</text:p>
          </table:table-cell>
          <table:table-cell table:number-columns-repeated="4"/>
        </table:table-row>
        <table:table-row table:style-name="ro1">
          <table:table-cell office:value-type="float" office:value="742.94921875">
            <text:p>742.94921875</text:p>
          </table:table-cell>
          <table:table-cell office:value-type="float" office:value="0.004480058">
            <text:p>0.004480058</text:p>
          </table:table-cell>
          <table:table-cell table:number-columns-repeated="4"/>
        </table:table-row>
        <table:table-row table:style-name="ro1">
          <table:table-cell office:value-type="float" office:value="743.069519042969">
            <text:p>743.069519043</text:p>
          </table:table-cell>
          <table:table-cell office:value-type="float" office:value="0.01098586">
            <text:p>0.01098586</text:p>
          </table:table-cell>
          <table:table-cell table:number-columns-repeated="4"/>
        </table:table-row>
        <table:table-row table:style-name="ro1">
          <table:table-cell office:value-type="float" office:value="743.189758300781">
            <text:p>743.1897583008</text:p>
          </table:table-cell>
          <table:table-cell office:value-type="float" office:value="0.001043033">
            <text:p>0.001043033</text:p>
          </table:table-cell>
          <table:table-cell table:number-columns-repeated="4"/>
        </table:table-row>
        <table:table-row table:style-name="ro1">
          <table:table-cell office:value-type="float" office:value="743.309997558594">
            <text:p>743.3099975586</text:p>
          </table:table-cell>
          <table:table-cell office:value-type="float" office:value="-0.009361899">
            <text:p>-0.009361899</text:p>
          </table:table-cell>
          <table:table-cell table:number-columns-repeated="4"/>
        </table:table-row>
        <table:table-row table:style-name="ro1">
          <table:table-cell office:value-type="float" office:value="743.430236816406">
            <text:p>743.4302368164</text:p>
          </table:table-cell>
          <table:table-cell office:value-type="float" office:value="0.003119204">
            <text:p>0.003119204</text:p>
          </table:table-cell>
          <table:table-cell table:number-columns-repeated="4"/>
        </table:table-row>
        <table:table-row table:style-name="ro1">
          <table:table-cell office:value-type="float" office:value="743.550537109375">
            <text:p>743.5505371094</text:p>
          </table:table-cell>
          <table:table-cell office:value-type="float" office:value="-0.008157416">
            <text:p>-0.008157416</text:p>
          </table:table-cell>
          <table:table-cell table:number-columns-repeated="4"/>
        </table:table-row>
        <table:table-row table:style-name="ro1">
          <table:table-cell office:value-type="float" office:value="743.670776367188">
            <text:p>743.6707763672</text:p>
          </table:table-cell>
          <table:table-cell office:value-type="float" office:value="-0.006272774">
            <text:p>-0.006272774</text:p>
          </table:table-cell>
          <table:table-cell table:number-columns-repeated="4"/>
        </table:table-row>
        <table:table-row table:style-name="ro1">
          <table:table-cell office:value-type="float" office:value="743.791015625">
            <text:p>743.791015625</text:p>
          </table:table-cell>
          <table:table-cell office:value-type="float" office:value="-0.006665548">
            <text:p>-0.006665548</text:p>
          </table:table-cell>
          <table:table-cell table:number-columns-repeated="4"/>
        </table:table-row>
        <table:table-row table:style-name="ro1">
          <table:table-cell office:value-type="float" office:value="743.911254882813">
            <text:p>743.9112548828</text:p>
          </table:table-cell>
          <table:table-cell office:value-type="float" office:value="0.02837793">
            <text:p>0.02837793</text:p>
          </table:table-cell>
          <table:table-cell table:number-columns-repeated="4"/>
        </table:table-row>
        <table:table-row table:style-name="ro1">
          <table:table-cell office:value-type="float" office:value="744.031555175781">
            <text:p>744.0315551758</text:p>
          </table:table-cell>
          <table:table-cell office:value-type="float" office:value="-0.007157257">
            <text:p>-0.007157257</text:p>
          </table:table-cell>
          <table:table-cell table:number-columns-repeated="4"/>
        </table:table-row>
        <table:table-row table:style-name="ro1">
          <table:table-cell office:value-type="float" office:value="744.151794433594">
            <text:p>744.1517944336</text:p>
          </table:table-cell>
          <table:table-cell office:value-type="float" office:value="-0.05616599">
            <text:p>-0.05616599</text:p>
          </table:table-cell>
          <table:table-cell table:number-columns-repeated="4"/>
        </table:table-row>
        <table:table-row table:style-name="ro1">
          <table:table-cell office:value-type="float" office:value="744.272033691406">
            <text:p>744.2720336914</text:p>
          </table:table-cell>
          <table:table-cell office:value-type="float" office:value="-0.05737171">
            <text:p>-0.05737171</text:p>
          </table:table-cell>
          <table:table-cell table:number-columns-repeated="4"/>
        </table:table-row>
        <table:table-row table:style-name="ro1">
          <table:table-cell office:value-type="float" office:value="744.392333984375">
            <text:p>744.3923339844</text:p>
          </table:table-cell>
          <table:table-cell office:value-type="float" office:value="-0.05955383">
            <text:p>-0.05955383</text:p>
          </table:table-cell>
          <table:table-cell table:number-columns-repeated="4"/>
        </table:table-row>
        <table:table-row table:style-name="ro1">
          <table:table-cell office:value-type="float" office:value="744.512573242188">
            <text:p>744.5125732422</text:p>
          </table:table-cell>
          <table:table-cell office:value-type="float" office:value="-0.05903655">
            <text:p>-0.05903655</text:p>
          </table:table-cell>
          <table:table-cell table:number-columns-repeated="4"/>
        </table:table-row>
        <table:table-row table:style-name="ro1">
          <table:table-cell office:value-type="float" office:value="744.6328125">
            <text:p>744.6328125</text:p>
          </table:table-cell>
          <table:table-cell office:value-type="float" office:value="-0.06006065">
            <text:p>-0.06006065</text:p>
          </table:table-cell>
          <table:table-cell table:number-columns-repeated="4"/>
        </table:table-row>
        <table:table-row table:style-name="ro1">
          <table:table-cell office:value-type="float" office:value="744.753051757813">
            <text:p>744.7530517578</text:p>
          </table:table-cell>
          <table:table-cell office:value-type="float" office:value="-0.0597744">
            <text:p>-0.0597744</text:p>
          </table:table-cell>
          <table:table-cell table:number-columns-repeated="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6-06-29">06/29/2026</text:date>, <text:time>12:43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6-06-29T12:04:29.74</meta:creation-date>
    <dc:date>2026-06-29T12:43:17.50</dc:date>
    <meta:editing-duration>PT7M20S</meta:editing-duration>
    <meta:editing-cycles>1</meta:editing-cycles>
    <meta:generator>OpenOffice/4.1.10$Win32 OpenOffice.org_project/4110m2$Build-9807</meta:generator>
    <meta:document-statistic meta:table-count="3" meta:cell-count="729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393cm" svg:y="4.188cm" style:legend-expansion="high" chart:style-name="ch2"/>
        <chart:plot-area chart:style-name="ch3" table:cell-range-address="Sheet1.A1:Sheet1.B3649" chart:data-source-has-labels="row" svg:x="0.77cm" svg:y="0.855cm" svg:width="11.983cm" svg:height="7.545cm">
          <chartooo:coordinate-region svg:x="1.788cm" svg:y="1.067cm" svg:width="10.685cm" svg:height="7.12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3649" chart:label-cell-address="Sheet1.B1:Sheet1.B1" chart:class="chart:scatter">
            <chart:domain table:cell-range-address="Sheet1.A2:Sheet1.A3649"/>
            <chart:data-point chart:repeated="364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Y [Intensity]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21.5908203125">
                <text:p>321.5908203125</text:p>
                <draw:g>
                  <svg:desc>Sheet1.A2:Sheet1.A3649</svg:desc>
                </draw:g>
              </table:table-cell>
              <table:table-cell office:value-type="float" office:value="0.006218733">
                <text:p>0.006218733</text:p>
                <draw:g>
                  <svg:desc>Sheet1.B2:Sheet1.B364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21.698333740234">
                <text:p>321.698333740234</text:p>
              </table:table-cell>
              <table:table-cell office:value-type="float" office:value="0.001599127">
                <text:p>0.00159912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21.805877685547">
                <text:p>321.805877685547</text:p>
              </table:table-cell>
              <table:table-cell office:value-type="float" office:value="0.002960364">
                <text:p>0.00296036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21.913421630859">
                <text:p>321.913421630859</text:p>
              </table:table-cell>
              <table:table-cell office:value-type="float" office:value="0.0117084">
                <text:p>0.011708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22.020965576172">
                <text:p>322.020965576172</text:p>
              </table:table-cell>
              <table:table-cell office:value-type="float" office:value="0.007223422">
                <text:p>0.00722342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2.128540039063">
                <text:p>322.128540039063</text:p>
              </table:table-cell>
              <table:table-cell office:value-type="float" office:value="0.003958338">
                <text:p>0.00395833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22.236083984375">
                <text:p>322.236083984375</text:p>
              </table:table-cell>
              <table:table-cell office:value-type="float" office:value="0.01609373">
                <text:p>0.0160937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22.343658447266">
                <text:p>322.343658447266</text:p>
              </table:table-cell>
              <table:table-cell office:value-type="float" office:value="-0.00168408">
                <text:p>-0.0016840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22.451232910156">
                <text:p>322.451232910156</text:p>
              </table:table-cell>
              <table:table-cell office:value-type="float" office:value="-0.0003126213">
                <text:p>-0.000312621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22.558837890625">
                <text:p>322.558837890625</text:p>
              </table:table-cell>
              <table:table-cell office:value-type="float" office:value="0.006792164">
                <text:p>0.00679216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22.666412353516">
                <text:p>322.666412353516</text:p>
              </table:table-cell>
              <table:table-cell office:value-type="float" office:value="0.009125953">
                <text:p>0.00912595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22.774017333984">
                <text:p>322.774017333984</text:p>
              </table:table-cell>
              <table:table-cell office:value-type="float" office:value="0.01134551">
                <text:p>0.0113455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22.881622314453">
                <text:p>322.881622314453</text:p>
              </table:table-cell>
              <table:table-cell office:value-type="float" office:value="-0.002442798">
                <text:p>-0.00244279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22.989227294922">
                <text:p>322.989227294922</text:p>
              </table:table-cell>
              <table:table-cell office:value-type="float" office:value="0.002626309">
                <text:p>0.00262630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23.096862792969">
                <text:p>323.096862792969</text:p>
              </table:table-cell>
              <table:table-cell office:value-type="float" office:value="0.001522871">
                <text:p>0.00152287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23.204498291016">
                <text:p>323.204498291016</text:p>
              </table:table-cell>
              <table:table-cell office:value-type="float" office:value="0.007261261">
                <text:p>0.00726126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23.312133789063">
                <text:p>323.312133789063</text:p>
              </table:table-cell>
              <table:table-cell office:value-type="float" office:value="-0.001251786">
                <text:p>-0.00125178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23.419769287109">
                <text:p>323.419769287109</text:p>
              </table:table-cell>
              <table:table-cell office:value-type="float" office:value="0.003696201">
                <text:p>0.00369620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23.527404785156">
                <text:p>323.527404785156</text:p>
              </table:table-cell>
              <table:table-cell office:value-type="float" office:value="0.03821716">
                <text:p>0.0382171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23.635070800781">
                <text:p>323.635070800781</text:p>
              </table:table-cell>
              <table:table-cell office:value-type="float" office:value="-0.006628186">
                <text:p>-0.00662818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23.742736816406">
                <text:p>323.742736816406</text:p>
              </table:table-cell>
              <table:table-cell office:value-type="float" office:value="-0.00358998">
                <text:p>-0.0035899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23.850402832031">
                <text:p>323.850402832031</text:p>
              </table:table-cell>
              <table:table-cell office:value-type="float" office:value="0.01034994">
                <text:p>0.0103499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23.958068847656">
                <text:p>323.958068847656</text:p>
              </table:table-cell>
              <table:table-cell office:value-type="float" office:value="0.01684279">
                <text:p>0.0168427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24.065765380859">
                <text:p>324.065765380859</text:p>
              </table:table-cell>
              <table:table-cell office:value-type="float" office:value="-0.001376737">
                <text:p>-0.00137673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24.173461914063">
                <text:p>324.173461914063</text:p>
              </table:table-cell>
              <table:table-cell office:value-type="float" office:value="-0.005598779">
                <text:p>-0.00559877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24.281158447266">
                <text:p>324.281158447266</text:p>
              </table:table-cell>
              <table:table-cell office:value-type="float" office:value="0.003475914">
                <text:p>0.00347591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24.388854980469">
                <text:p>324.388854980469</text:p>
              </table:table-cell>
              <table:table-cell office:value-type="float" office:value="-0.002992577">
                <text:p>-0.00299257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24.496551513672">
                <text:p>324.496551513672</text:p>
              </table:table-cell>
              <table:table-cell office:value-type="float" office:value="0.002371167">
                <text:p>0.00237116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24.604278564453">
                <text:p>324.604278564453</text:p>
              </table:table-cell>
              <table:table-cell office:value-type="float" office:value="0.007189238">
                <text:p>0.00718923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24.712005615234">
                <text:p>324.712005615234</text:p>
              </table:table-cell>
              <table:table-cell office:value-type="float" office:value="0.003238156">
                <text:p>0.00323815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24.819732666016">
                <text:p>324.819732666016</text:p>
              </table:table-cell>
              <table:table-cell office:value-type="float" office:value="0.002350102">
                <text:p>0.00235010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4.927490234375">
                <text:p>324.927490234375</text:p>
              </table:table-cell>
              <table:table-cell office:value-type="float" office:value="0.01631283">
                <text:p>0.0163128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5.035217285156">
                <text:p>325.035217285156</text:p>
              </table:table-cell>
              <table:table-cell office:value-type="float" office:value="-0.007664563">
                <text:p>-0.00766456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25.142974853516">
                <text:p>325.142974853516</text:p>
              </table:table-cell>
              <table:table-cell office:value-type="float" office:value="0.002007358">
                <text:p>0.00200735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25.250732421875">
                <text:p>325.250732421875</text:p>
              </table:table-cell>
              <table:table-cell office:value-type="float" office:value="0.0006600439">
                <text:p>0.000660043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25.358489990234">
                <text:p>325.358489990234</text:p>
              </table:table-cell>
              <table:table-cell office:value-type="float" office:value="-0.003535759">
                <text:p>-0.00353575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25.466278076172">
                <text:p>325.466278076172</text:p>
              </table:table-cell>
              <table:table-cell office:value-type="float" office:value="0.003005787">
                <text:p>0.00300578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25.574066162109">
                <text:p>325.574066162109</text:p>
              </table:table-cell>
              <table:table-cell office:value-type="float" office:value="0.005312101">
                <text:p>0.00531210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25.681854248047">
                <text:p>325.681854248047</text:p>
              </table:table-cell>
              <table:table-cell office:value-type="float" office:value="0.004306723">
                <text:p>0.00430672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25.789642333984">
                <text:p>325.789642333984</text:p>
              </table:table-cell>
              <table:table-cell office:value-type="float" office:value="0.005500186">
                <text:p>0.00550018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25.897430419922">
                <text:p>325.897430419922</text:p>
              </table:table-cell>
              <table:table-cell office:value-type="float" office:value="0.002477835">
                <text:p>0.00247783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26.005249023438">
                <text:p>326.005249023438</text:p>
              </table:table-cell>
              <table:table-cell office:value-type="float" office:value="0.001173407">
                <text:p>0.00117340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26.113067626953">
                <text:p>326.113067626953</text:p>
              </table:table-cell>
              <table:table-cell office:value-type="float" office:value="0.007369981">
                <text:p>0.00736998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26.220886230469">
                <text:p>326.220886230469</text:p>
              </table:table-cell>
              <table:table-cell office:value-type="float" office:value="0.01568188">
                <text:p>0.0156818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26.328704833984">
                <text:p>326.328704833984</text:p>
              </table:table-cell>
              <table:table-cell office:value-type="float" office:value="-0.0041801">
                <text:p>-0.004180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26.436553955078">
                <text:p>326.436553955078</text:p>
              </table:table-cell>
              <table:table-cell office:value-type="float" office:value="0.008567971">
                <text:p>0.00856797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26.544403076172">
                <text:p>326.544403076172</text:p>
              </table:table-cell>
              <table:table-cell office:value-type="float" office:value="0.02277227">
                <text:p>0.0227722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26.652252197266">
                <text:p>326.652252197266</text:p>
              </table:table-cell>
              <table:table-cell office:value-type="float" office:value="0.01691746">
                <text:p>0.0169174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26.760101318359">
                <text:p>326.760101318359</text:p>
              </table:table-cell>
              <table:table-cell office:value-type="float" office:value="0.00542776">
                <text:p>0.0054277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26.867950439453">
                <text:p>326.867950439453</text:p>
              </table:table-cell>
              <table:table-cell office:value-type="float" office:value="0.00958849">
                <text:p>0.0095884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26.975830078125">
                <text:p>326.975830078125</text:p>
              </table:table-cell>
              <table:table-cell office:value-type="float" office:value="0.004009557">
                <text:p>0.00400955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27.083709716797">
                <text:p>327.083709716797</text:p>
              </table:table-cell>
              <table:table-cell office:value-type="float" office:value="0.007268567">
                <text:p>0.00726856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27.191589355469">
                <text:p>327.191589355469</text:p>
              </table:table-cell>
              <table:table-cell office:value-type="float" office:value="-0.001349773">
                <text:p>-0.00134977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27.299499511719">
                <text:p>327.299499511719</text:p>
              </table:table-cell>
              <table:table-cell office:value-type="float" office:value="0.006117597">
                <text:p>0.00611759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27.407379150391">
                <text:p>327.407379150391</text:p>
              </table:table-cell>
              <table:table-cell office:value-type="float" office:value="0.0184645">
                <text:p>0.018464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27.515289306641">
                <text:p>327.515289306641</text:p>
              </table:table-cell>
              <table:table-cell office:value-type="float" office:value="-0.002181496">
                <text:p>-0.00218149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27.623199462891">
                <text:p>327.623199462891</text:p>
              </table:table-cell>
              <table:table-cell office:value-type="float" office:value="0.008856415">
                <text:p>0.00885641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27.731109619141">
                <text:p>327.731109619141</text:p>
              </table:table-cell>
              <table:table-cell office:value-type="float" office:value="-0.002685407">
                <text:p>-0.00268540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27.839050292969">
                <text:p>327.839050292969</text:p>
              </table:table-cell>
              <table:table-cell office:value-type="float" office:value="-0.006016334">
                <text:p>-0.00601633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27.946990966797">
                <text:p>327.946990966797</text:p>
              </table:table-cell>
              <table:table-cell office:value-type="float" office:value="-0.001164905">
                <text:p>-0.00116490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28.054931640625">
                <text:p>328.054931640625</text:p>
              </table:table-cell>
              <table:table-cell office:value-type="float" office:value="0.003647109">
                <text:p>0.00364710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28.162872314453">
                <text:p>328.162872314453</text:p>
              </table:table-cell>
              <table:table-cell office:value-type="float" office:value="0.006102612">
                <text:p>0.00610261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28.270812988281">
                <text:p>328.270812988281</text:p>
              </table:table-cell>
              <table:table-cell office:value-type="float" office:value="-0.002060826">
                <text:p>-0.00206082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28.378784179688">
                <text:p>328.378784179688</text:p>
              </table:table-cell>
              <table:table-cell office:value-type="float" office:value="-0.001305884">
                <text:p>-0.00130588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28.486755371094">
                <text:p>328.486755371094</text:p>
              </table:table-cell>
              <table:table-cell office:value-type="float" office:value="-0.009398081">
                <text:p>-0.00939808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28.5947265625">
                <text:p>328.5947265625</text:p>
              </table:table-cell>
              <table:table-cell office:value-type="float" office:value="0.002300603">
                <text:p>0.00230060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28.702697753906">
                <text:p>328.702697753906</text:p>
              </table:table-cell>
              <table:table-cell office:value-type="float" office:value="0.02151375">
                <text:p>0.0215137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28.810699462891">
                <text:p>328.810699462891</text:p>
              </table:table-cell>
              <table:table-cell office:value-type="float" office:value="0.001436442">
                <text:p>0.00143644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28.918670654297">
                <text:p>328.918670654297</text:p>
              </table:table-cell>
              <table:table-cell office:value-type="float" office:value="0.007540838">
                <text:p>0.00754083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29.026672363281">
                <text:p>329.026672363281</text:p>
              </table:table-cell>
              <table:table-cell office:value-type="float" office:value="0.00919826">
                <text:p>0.0091982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29.134704589844">
                <text:p>329.134704589844</text:p>
              </table:table-cell>
              <table:table-cell office:value-type="float" office:value="0.0166553">
                <text:p>0.016655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29.242706298828">
                <text:p>329.242706298828</text:p>
              </table:table-cell>
              <table:table-cell office:value-type="float" office:value="-0.001937518">
                <text:p>-0.00193751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29.350738525391">
                <text:p>329.350738525391</text:p>
              </table:table-cell>
              <table:table-cell office:value-type="float" office:value="-0.002399474">
                <text:p>-0.00239947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29.458770751953">
                <text:p>329.458770751953</text:p>
              </table:table-cell>
              <table:table-cell office:value-type="float" office:value="0.002017929">
                <text:p>0.00201792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29.566802978516">
                <text:p>329.566802978516</text:p>
              </table:table-cell>
              <table:table-cell office:value-type="float" office:value="0.003432544">
                <text:p>0.00343254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29.674835205078">
                <text:p>329.674835205078</text:p>
              </table:table-cell>
              <table:table-cell office:value-type="float" office:value="-0.002248784">
                <text:p>-0.00224878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29.782897949219">
                <text:p>329.782897949219</text:p>
              </table:table-cell>
              <table:table-cell office:value-type="float" office:value="0.00783221">
                <text:p>0.0078322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29.890960693359">
                <text:p>329.890960693359</text:p>
              </table:table-cell>
              <table:table-cell office:value-type="float" office:value="0.03876593">
                <text:p>0.0387659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29.9990234375">
                <text:p>329.9990234375</text:p>
              </table:table-cell>
              <table:table-cell office:value-type="float" office:value="0.002656442">
                <text:p>0.00265644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30.107086181641">
                <text:p>330.107086181641</text:p>
              </table:table-cell>
              <table:table-cell office:value-type="float" office:value="0.001294865">
                <text:p>0.00129486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30.215148925781">
                <text:p>330.215148925781</text:p>
              </table:table-cell>
              <table:table-cell office:value-type="float" office:value="-0.00693481">
                <text:p>-0.0069348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30.3232421875">
                <text:p>330.3232421875</text:p>
              </table:table-cell>
              <table:table-cell office:value-type="float" office:value="0.01561821">
                <text:p>0.0156182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30.431335449219">
                <text:p>330.431335449219</text:p>
              </table:table-cell>
              <table:table-cell office:value-type="float" office:value="0.009394303">
                <text:p>0.00939430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30.539428710938">
                <text:p>330.539428710938</text:p>
              </table:table-cell>
              <table:table-cell office:value-type="float" office:value="0.008358868">
                <text:p>0.00835886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30.647521972656">
                <text:p>330.647521972656</text:p>
              </table:table-cell>
              <table:table-cell office:value-type="float" office:value="-0.00327752">
                <text:p>-0.0032775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30.755645751953">
                <text:p>330.755645751953</text:p>
              </table:table-cell>
              <table:table-cell office:value-type="float" office:value="0.005475027">
                <text:p>0.00547502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30.86376953125">
                <text:p>330.86376953125</text:p>
              </table:table-cell>
              <table:table-cell office:value-type="float" office:value="0.0162225">
                <text:p>0.016222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30.971893310547">
                <text:p>330.971893310547</text:p>
              </table:table-cell>
              <table:table-cell office:value-type="float" office:value="0.01082199">
                <text:p>0.0108219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31.080017089844">
                <text:p>331.080017089844</text:p>
              </table:table-cell>
              <table:table-cell office:value-type="float" office:value="0.02783186">
                <text:p>0.0278318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31.188171386719">
                <text:p>331.188171386719</text:p>
              </table:table-cell>
              <table:table-cell office:value-type="float" office:value="0.01069262">
                <text:p>0.0106926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31.296295166016">
                <text:p>331.296295166016</text:p>
              </table:table-cell>
              <table:table-cell office:value-type="float" office:value="0.01944631">
                <text:p>0.0194463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31.404449462891">
                <text:p>331.404449462891</text:p>
              </table:table-cell>
              <table:table-cell office:value-type="float" office:value="-0.00356965">
                <text:p>-0.0035696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31.512603759766">
                <text:p>331.512603759766</text:p>
              </table:table-cell>
              <table:table-cell office:value-type="float" office:value="-0.003688099">
                <text:p>-0.00368809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31.620788574219">
                <text:p>331.620788574219</text:p>
              </table:table-cell>
              <table:table-cell office:value-type="float" office:value="0.003351351">
                <text:p>0.00335135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31.728942871094">
                <text:p>331.728942871094</text:p>
              </table:table-cell>
              <table:table-cell office:value-type="float" office:value="0.009048153">
                <text:p>0.00904815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31.837127685547">
                <text:p>331.837127685547</text:p>
              </table:table-cell>
              <table:table-cell office:value-type="float" office:value="-0.0009116158">
                <text:p>-0.000911615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31.9453125">
                <text:p>331.9453125</text:p>
              </table:table-cell>
              <table:table-cell office:value-type="float" office:value="-0.002742466">
                <text:p>-0.00274246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32.053527832031">
                <text:p>332.053527832031</text:p>
              </table:table-cell>
              <table:table-cell office:value-type="float" office:value="0.007150551">
                <text:p>0.00715055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32.161712646484">
                <text:p>332.1617126464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32.269927978516">
                <text:p>332.269927978516</text:p>
              </table:table-cell>
              <table:table-cell office:value-type="float" office:value="-0.008865872">
                <text:p>-0.00886587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32.378143310547">
                <text:p>332.378143310547</text:p>
              </table:table-cell>
              <table:table-cell office:value-type="float" office:value="-0.003283694">
                <text:p>-0.00328369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32.486358642578">
                <text:p>332.486358642578</text:p>
              </table:table-cell>
              <table:table-cell office:value-type="float" office:value="0.01917746">
                <text:p>0.0191774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32.594573974609">
                <text:p>332.594573974609</text:p>
              </table:table-cell>
              <table:table-cell office:value-type="float" office:value="0.01121046">
                <text:p>0.0112104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32.702819824219">
                <text:p>332.702819824219</text:p>
              </table:table-cell>
              <table:table-cell office:value-type="float" office:value="0.003380249">
                <text:p>0.00338024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32.811065673828">
                <text:p>332.811065673828</text:p>
              </table:table-cell>
              <table:table-cell office:value-type="float" office:value="-0.008360771">
                <text:p>-0.00836077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32.919311523438">
                <text:p>332.919311523438</text:p>
              </table:table-cell>
              <table:table-cell office:value-type="float" office:value="0.0007755967">
                <text:p>0.000775596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33.027557373047">
                <text:p>333.027557373047</text:p>
              </table:table-cell>
              <table:table-cell office:value-type="float" office:value="0.0005296157">
                <text:p>0.000529615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33.135833740234">
                <text:p>333.135833740234</text:p>
              </table:table-cell>
              <table:table-cell office:value-type="float" office:value="0.005652049">
                <text:p>0.00565204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33.244079589844">
                <text:p>333.244079589844</text:p>
              </table:table-cell>
              <table:table-cell office:value-type="float" office:value="0.0462161">
                <text:p>0.046216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33.352355957031">
                <text:p>333.352355957031</text:p>
              </table:table-cell>
              <table:table-cell office:value-type="float" office:value="-0.001892966">
                <text:p>-0.00189296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33.460662841797">
                <text:p>333.460662841797</text:p>
              </table:table-cell>
              <table:table-cell office:value-type="float" office:value="0.003482694">
                <text:p>0.00348269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33.568939208984">
                <text:p>333.568939208984</text:p>
              </table:table-cell>
              <table:table-cell office:value-type="float" office:value="0.001883788">
                <text:p>0.00188378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33.67724609375">
                <text:p>333.67724609375</text:p>
              </table:table-cell>
              <table:table-cell office:value-type="float" office:value="-0.005750307">
                <text:p>-0.00575030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33.785552978516">
                <text:p>333.785552978516</text:p>
              </table:table-cell>
              <table:table-cell office:value-type="float" office:value="0.007908233">
                <text:p>0.00790823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33.893859863281">
                <text:p>333.893859863281</text:p>
              </table:table-cell>
              <table:table-cell office:value-type="float" office:value="0.004098916">
                <text:p>0.00409891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34.002166748047">
                <text:p>334.002166748047</text:p>
              </table:table-cell>
              <table:table-cell office:value-type="float" office:value="-0.01021996">
                <text:p>-0.0102199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34.110473632813">
                <text:p>334.110473632813</text:p>
              </table:table-cell>
              <table:table-cell office:value-type="float" office:value="0.001075465">
                <text:p>0.00107546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34.218811035156">
                <text:p>334.218811035156</text:p>
              </table:table-cell>
              <table:table-cell office:value-type="float" office:value="0.004422773">
                <text:p>0.00442277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34.3271484375">
                <text:p>334.3271484375</text:p>
              </table:table-cell>
              <table:table-cell office:value-type="float" office:value="-0.0003532021">
                <text:p>-0.000353202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34.435485839844">
                <text:p>334.435485839844</text:p>
              </table:table-cell>
              <table:table-cell office:value-type="float" office:value="0.0005803109">
                <text:p>0.000580310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34.543853759766">
                <text:p>334.543853759766</text:p>
              </table:table-cell>
              <table:table-cell office:value-type="float" office:value="-0.005902335">
                <text:p>-0.00590233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34.652191162109">
                <text:p>334.652191162109</text:p>
              </table:table-cell>
              <table:table-cell office:value-type="float" office:value="0.01652069">
                <text:p>0.0165206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34.760559082031">
                <text:p>334.760559082031</text:p>
              </table:table-cell>
              <table:table-cell office:value-type="float" office:value="-0.0007274459">
                <text:p>-0.000727445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34.868927001953">
                <text:p>334.868927001953</text:p>
              </table:table-cell>
              <table:table-cell office:value-type="float" office:value="0.008622251">
                <text:p>0.00862225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34.977325439453">
                <text:p>334.977325439453</text:p>
              </table:table-cell>
              <table:table-cell office:value-type="float" office:value="0.006635866">
                <text:p>0.00663586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35.085693359375">
                <text:p>335.085693359375</text:p>
              </table:table-cell>
              <table:table-cell office:value-type="float" office:value="0.009521038">
                <text:p>0.00952103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35.194091796875">
                <text:p>335.194091796875</text:p>
              </table:table-cell>
              <table:table-cell office:value-type="float" office:value="0.0005959093">
                <text:p>0.000595909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35.302490234375">
                <text:p>335.302490234375</text:p>
              </table:table-cell>
              <table:table-cell office:value-type="float" office:value="0.006804112">
                <text:p>0.00680411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35.410888671875">
                <text:p>335.410888671875</text:p>
              </table:table-cell>
              <table:table-cell office:value-type="float" office:value="0.006296795">
                <text:p>0.00629679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35.519287109375">
                <text:p>335.519287109375</text:p>
              </table:table-cell>
              <table:table-cell office:value-type="float" office:value="0.02995386">
                <text:p>0.0299538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35.627716064453">
                <text:p>335.627716064453</text:p>
              </table:table-cell>
              <table:table-cell office:value-type="float" office:value="0.009235655">
                <text:p>0.00923565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35.736145019531">
                <text:p>335.736145019531</text:p>
              </table:table-cell>
              <table:table-cell office:value-type="float" office:value="0.006857804">
                <text:p>0.00685780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35.844573974609">
                <text:p>335.844573974609</text:p>
              </table:table-cell>
              <table:table-cell office:value-type="float" office:value="-0.0007319871">
                <text:p>-0.000731987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35.953002929688">
                <text:p>335.953002929688</text:p>
              </table:table-cell>
              <table:table-cell office:value-type="float" office:value="0.01065848">
                <text:p>0.0106584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36.061462402344">
                <text:p>336.061462402344</text:p>
              </table:table-cell>
              <table:table-cell office:value-type="float" office:value="0.02015739">
                <text:p>0.0201573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36.169891357422">
                <text:p>336.169891357422</text:p>
              </table:table-cell>
              <table:table-cell office:value-type="float" office:value="-0.005254204">
                <text:p>-0.00525420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36.278350830078">
                <text:p>336.278350830078</text:p>
              </table:table-cell>
              <table:table-cell office:value-type="float" office:value="0.001879733">
                <text:p>0.00187973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36.386840820313">
                <text:p>336.386840820313</text:p>
              </table:table-cell>
              <table:table-cell office:value-type="float" office:value="0.01722241">
                <text:p>0.0172224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36.495300292969">
                <text:p>336.495300292969</text:p>
              </table:table-cell>
              <table:table-cell office:value-type="float" office:value="0.004620183">
                <text:p>0.00462018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36.603790283203">
                <text:p>336.603790283203</text:p>
              </table:table-cell>
              <table:table-cell office:value-type="float" office:value="-0.004552136">
                <text:p>-0.00455213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36.712249755859">
                <text:p>336.712249755859</text:p>
              </table:table-cell>
              <table:table-cell office:value-type="float" office:value="-0.003075159">
                <text:p>-0.00307515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36.820770263672">
                <text:p>336.820770263672</text:p>
              </table:table-cell>
              <table:table-cell office:value-type="float" office:value="-0.0001460452">
                <text:p>-0.000146045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36.929260253906">
                <text:p>336.929260253906</text:p>
              </table:table-cell>
              <table:table-cell office:value-type="float" office:value="0.002407169">
                <text:p>0.00240716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37.037750244141">
                <text:p>337.037750244141</text:p>
              </table:table-cell>
              <table:table-cell office:value-type="float" office:value="-0.005810536">
                <text:p>-0.00581053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37.146270751953">
                <text:p>337.146270751953</text:p>
              </table:table-cell>
              <table:table-cell office:value-type="float" office:value="-0.008828025">
                <text:p>-0.00882802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37.254791259766">
                <text:p>337.254791259766</text:p>
              </table:table-cell>
              <table:table-cell office:value-type="float" office:value="0.02401995">
                <text:p>0.0240199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337.363311767578">
                <text:p>337.363311767578</text:p>
              </table:table-cell>
              <table:table-cell office:value-type="float" office:value="0.002049132">
                <text:p>0.00204913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37.471862792969">
                <text:p>337.471862792969</text:p>
              </table:table-cell>
              <table:table-cell office:value-type="float" office:value="0.004007961">
                <text:p>0.00400796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37.580383300781">
                <text:p>337.580383300781</text:p>
              </table:table-cell>
              <table:table-cell office:value-type="float" office:value="-0.002775744">
                <text:p>-0.00277574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37.688934326172">
                <text:p>337.688934326172</text:p>
              </table:table-cell>
              <table:table-cell office:value-type="float" office:value="-0.0008238127">
                <text:p>-0.000823812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37.797485351563">
                <text:p>337.797485351563</text:p>
              </table:table-cell>
              <table:table-cell office:value-type="float" office:value="-0.002561667">
                <text:p>-0.00256166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37.906036376953">
                <text:p>337.906036376953</text:p>
              </table:table-cell>
              <table:table-cell office:value-type="float" office:value="-0.003514041">
                <text:p>-0.00351404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38.014617919922">
                <text:p>338.014617919922</text:p>
              </table:table-cell>
              <table:table-cell office:value-type="float" office:value="-0.002400032">
                <text:p>-0.00240003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38.123168945313">
                <text:p>338.123168945313</text:p>
              </table:table-cell>
              <table:table-cell office:value-type="float" office:value="0.01214103">
                <text:p>0.0121410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38.231750488281">
                <text:p>338.231750488281</text:p>
              </table:table-cell>
              <table:table-cell office:value-type="float" office:value="0.01067724">
                <text:p>0.0106772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38.340362548828">
                <text:p>338.340362548828</text:p>
              </table:table-cell>
              <table:table-cell office:value-type="float" office:value="-0.002861963">
                <text:p>-0.00286196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38.448944091797">
                <text:p>338.448944091797</text:p>
              </table:table-cell>
              <table:table-cell office:value-type="float" office:value="0.02335574">
                <text:p>0.0233557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38.557525634766">
                <text:p>338.557525634766</text:p>
              </table:table-cell>
              <table:table-cell office:value-type="float" office:value="0.006017238">
                <text:p>0.00601723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38.666137695313">
                <text:p>338.666137695313</text:p>
              </table:table-cell>
              <table:table-cell office:value-type="float" office:value="0.01244948">
                <text:p>0.0124494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38.774749755859">
                <text:p>338.774749755859</text:p>
              </table:table-cell>
              <table:table-cell office:value-type="float" office:value="-0.004140259">
                <text:p>-0.00414025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38.883392333984">
                <text:p>338.883392333984</text:p>
              </table:table-cell>
              <table:table-cell office:value-type="float" office:value="-0.003281065">
                <text:p>-0.00328106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38.992004394531">
                <text:p>338.992004394531</text:p>
              </table:table-cell>
              <table:table-cell office:value-type="float" office:value="0.003717221">
                <text:p>0.00371722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39.100646972656">
                <text:p>339.100646972656</text:p>
              </table:table-cell>
              <table:table-cell office:value-type="float" office:value="0.009512516">
                <text:p>0.00951251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39.209289550781">
                <text:p>339.209289550781</text:p>
              </table:table-cell>
              <table:table-cell office:value-type="float" office:value="-0.00453648">
                <text:p>-0.0045364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39.317932128906">
                <text:p>339.317932128906</text:p>
              </table:table-cell>
              <table:table-cell office:value-type="float" office:value="0.00956223">
                <text:p>0.0095622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39.426574707031">
                <text:p>339.426574707031</text:p>
              </table:table-cell>
              <table:table-cell office:value-type="float" office:value="0.003208381">
                <text:p>0.00320838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39.535247802734">
                <text:p>339.535247802734</text:p>
              </table:table-cell>
              <table:table-cell office:value-type="float" office:value="0.01093836">
                <text:p>0.0109383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39.643890380859">
                <text:p>339.643890380859</text:p>
              </table:table-cell>
              <table:table-cell office:value-type="float" office:value="0.002856623">
                <text:p>0.00285662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39.752563476563">
                <text:p>339.752563476563</text:p>
              </table:table-cell>
              <table:table-cell office:value-type="float" office:value="0.004852612">
                <text:p>0.00485261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39.861267089844">
                <text:p>339.861267089844</text:p>
              </table:table-cell>
              <table:table-cell office:value-type="float" office:value="0.001050118">
                <text:p>0.00105011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39.969940185547">
                <text:p>339.969940185547</text:p>
              </table:table-cell>
              <table:table-cell office:value-type="float" office:value="0.01700081">
                <text:p>0.0170008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40.078643798828">
                <text:p>340.078643798828</text:p>
              </table:table-cell>
              <table:table-cell office:value-type="float" office:value="0.00269694">
                <text:p>0.0026969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40.187347412109">
                <text:p>340.187347412109</text:p>
              </table:table-cell>
              <table:table-cell office:value-type="float" office:value="0.01748537">
                <text:p>0.0174853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40.296051025391">
                <text:p>340.296051025391</text:p>
              </table:table-cell>
              <table:table-cell office:value-type="float" office:value="0.005937403">
                <text:p>0.00593740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40.404754638672">
                <text:p>340.404754638672</text:p>
              </table:table-cell>
              <table:table-cell office:value-type="float" office:value="0.008058106">
                <text:p>0.00805810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40.513488769531">
                <text:p>340.513488769531</text:p>
              </table:table-cell>
              <table:table-cell office:value-type="float" office:value="-0.007693402">
                <text:p>-0.00769340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40.622192382813">
                <text:p>340.622192382813</text:p>
              </table:table-cell>
              <table:table-cell office:value-type="float" office:value="0.01624333">
                <text:p>0.0162433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40.730926513672">
                <text:p>340.730926513672</text:p>
              </table:table-cell>
              <table:table-cell office:value-type="float" office:value="0.01562953">
                <text:p>0.0156295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40.839660644531">
                <text:p>340.839660644531</text:p>
              </table:table-cell>
              <table:table-cell office:value-type="float" office:value="0.01380964">
                <text:p>0.0138096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40.948425292969">
                <text:p>340.948425292969</text:p>
              </table:table-cell>
              <table:table-cell office:value-type="float" office:value="-0.004802159">
                <text:p>-0.00480215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41.057159423828">
                <text:p>341.057159423828</text:p>
              </table:table-cell>
              <table:table-cell office:value-type="float" office:value="-0.0004409676">
                <text:p>-0.000440967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41.165924072266">
                <text:p>341.165924072266</text:p>
              </table:table-cell>
              <table:table-cell office:value-type="float" office:value="-0.001888667">
                <text:p>-0.00188866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41.274688720703">
                <text:p>341.274688720703</text:p>
              </table:table-cell>
              <table:table-cell office:value-type="float" office:value="-0.002632621">
                <text:p>-0.00263262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41.383483886719">
                <text:p>341.383483886719</text:p>
              </table:table-cell>
              <table:table-cell office:value-type="float" office:value="0.01538179">
                <text:p>0.0153817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41.492248535156">
                <text:p>341.492248535156</text:p>
              </table:table-cell>
              <table:table-cell office:value-type="float" office:value="0.004694498">
                <text:p>0.00469449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41.601043701172">
                <text:p>341.601043701172</text:p>
              </table:table-cell>
              <table:table-cell office:value-type="float" office:value="0.02312859">
                <text:p>0.0231285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41.709838867188">
                <text:p>341.709838867188</text:p>
              </table:table-cell>
              <table:table-cell office:value-type="float" office:value="0.01962086">
                <text:p>0.0196208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41.818634033203">
                <text:p>341.818634033203</text:p>
              </table:table-cell>
              <table:table-cell office:value-type="float" office:value="0.01392837">
                <text:p>0.01392837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41.927429199219">
                <text:p>341.927429199219</text:p>
              </table:table-cell>
              <table:table-cell office:value-type="float" office:value="-0.001728931">
                <text:p>-0.00172893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42.036254882813">
                <text:p>342.036254882813</text:p>
              </table:table-cell>
              <table:table-cell office:value-type="float" office:value="-0.001946321">
                <text:p>-0.00194632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42.145080566406">
                <text:p>342.145080566406</text:p>
              </table:table-cell>
              <table:table-cell office:value-type="float" office:value="0.001215377">
                <text:p>0.00121537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42.25390625">
                <text:p>342.25390625</text:p>
              </table:table-cell>
              <table:table-cell office:value-type="float" office:value="0.00987272">
                <text:p>0.0098727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42.362731933594">
                <text:p>342.362731933594</text:p>
              </table:table-cell>
              <table:table-cell office:value-type="float" office:value="0.004473263">
                <text:p>0.00447326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42.471557617188">
                <text:p>342.471557617188</text:p>
              </table:table-cell>
              <table:table-cell office:value-type="float" office:value="-0.000528093">
                <text:p>-0.00052809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42.580413818359">
                <text:p>342.580413818359</text:p>
              </table:table-cell>
              <table:table-cell office:value-type="float" office:value="0.01087721">
                <text:p>0.0108772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42.689270019531">
                <text:p>342.689270019531</text:p>
              </table:table-cell>
              <table:table-cell office:value-type="float" office:value="-0.00452268">
                <text:p>-0.0045226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42.798126220703">
                <text:p>342.798126220703</text:p>
              </table:table-cell>
              <table:table-cell office:value-type="float" office:value="0.007195025">
                <text:p>0.00719502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42.906982421875">
                <text:p>342.906982421875</text:p>
              </table:table-cell>
              <table:table-cell office:value-type="float" office:value="0.01509177">
                <text:p>0.0150917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43.015869140625">
                <text:p>343.015869140625</text:p>
              </table:table-cell>
              <table:table-cell office:value-type="float" office:value="0.01278942">
                <text:p>0.0127894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43.124755859375">
                <text:p>343.124755859375</text:p>
              </table:table-cell>
              <table:table-cell office:value-type="float" office:value="-0.002042797">
                <text:p>-0.002042797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343.233642578125">
                <text:p>343.233642578125</text:p>
              </table:table-cell>
              <table:table-cell office:value-type="float" office:value="-0.007437596">
                <text:p>-0.00743759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343.342529296875">
                <text:p>343.342529296875</text:p>
              </table:table-cell>
              <table:table-cell office:value-type="float" office:value="0.01001283">
                <text:p>0.01001283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343.451416015625">
                <text:p>343.451416015625</text:p>
              </table:table-cell>
              <table:table-cell office:value-type="float" office:value="0.001478224">
                <text:p>0.00147822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343.560333251953">
                <text:p>343.560333251953</text:p>
              </table:table-cell>
              <table:table-cell office:value-type="float" office:value="-0.002281962">
                <text:p>-0.00228196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343.669250488281">
                <text:p>343.669250488281</text:p>
              </table:table-cell>
              <table:table-cell office:value-type="float" office:value="-0.003004008">
                <text:p>-0.003004008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343.778167724609">
                <text:p>343.778167724609</text:p>
              </table:table-cell>
              <table:table-cell office:value-type="float" office:value="0.00190221">
                <text:p>0.0019022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343.887084960938">
                <text:p>343.887084960938</text:p>
              </table:table-cell>
              <table:table-cell office:value-type="float" office:value="0.005123079">
                <text:p>0.005123079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343.996032714844">
                <text:p>343.996032714844</text:p>
              </table:table-cell>
              <table:table-cell office:value-type="float" office:value="-0.007347775">
                <text:p>-0.00734777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344.104949951172">
                <text:p>344.104949951172</text:p>
              </table:table-cell>
              <table:table-cell office:value-type="float" office:value="0.009167842">
                <text:p>0.00916784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344.213897705078">
                <text:p>344.213897705078</text:p>
              </table:table-cell>
              <table:table-cell office:value-type="float" office:value="-0.002273619">
                <text:p>-0.002273619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344.322845458984">
                <text:p>344.322845458984</text:p>
              </table:table-cell>
              <table:table-cell office:value-type="float" office:value="0.007143619">
                <text:p>0.007143619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344.431823730469">
                <text:p>344.431823730469</text:p>
              </table:table-cell>
              <table:table-cell office:value-type="float" office:value="-0.00397339">
                <text:p>-0.00397339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344.540771484375">
                <text:p>344.540771484375</text:p>
              </table:table-cell>
              <table:table-cell office:value-type="float" office:value="-0.0002317824">
                <text:p>-0.0002317824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344.649749755859">
                <text:p>344.649749755859</text:p>
              </table:table-cell>
              <table:table-cell office:value-type="float" office:value="-0.0005669877">
                <text:p>-0.0005669877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344.758728027344">
                <text:p>344.758728027344</text:p>
              </table:table-cell>
              <table:table-cell office:value-type="float" office:value="0.0003654267">
                <text:p>0.0003654267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344.867706298828">
                <text:p>344.867706298828</text:p>
              </table:table-cell>
              <table:table-cell office:value-type="float" office:value="0.006453316">
                <text:p>0.006453316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344.976715087891">
                <text:p>344.976715087891</text:p>
              </table:table-cell>
              <table:table-cell office:value-type="float" office:value="0.01027341">
                <text:p>0.0102734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345.085723876953">
                <text:p>345.085723876953</text:p>
              </table:table-cell>
              <table:table-cell office:value-type="float" office:value="-0.001061965">
                <text:p>-0.00106196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345.194702148438">
                <text:p>345.194702148438</text:p>
              </table:table-cell>
              <table:table-cell office:value-type="float" office:value="0.002092758">
                <text:p>0.002092758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345.303741455078">
                <text:p>345.303741455078</text:p>
              </table:table-cell>
              <table:table-cell office:value-type="float" office:value="0.02281353">
                <text:p>0.02281353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345.412750244141">
                <text:p>345.412750244141</text:p>
              </table:table-cell>
              <table:table-cell office:value-type="float" office:value="-0.006383666">
                <text:p>-0.006383666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345.521759033203">
                <text:p>345.521759033203</text:p>
              </table:table-cell>
              <table:table-cell office:value-type="float" office:value="-0.00398756">
                <text:p>-0.00398756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345.630798339844">
                <text:p>345.630798339844</text:p>
              </table:table-cell>
              <table:table-cell office:value-type="float" office:value="0.003327788">
                <text:p>0.003327788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345.739837646484">
                <text:p>345.739837646484</text:p>
              </table:table-cell>
              <table:table-cell office:value-type="float" office:value="-0.0013943">
                <text:p>-0.0013943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345.848876953125">
                <text:p>345.848876953125</text:p>
              </table:table-cell>
              <table:table-cell office:value-type="float" office:value="0.01065182">
                <text:p>0.01065182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345.957946777344">
                <text:p>345.957946777344</text:p>
              </table:table-cell>
              <table:table-cell office:value-type="float" office:value="0.01182742">
                <text:p>0.01182742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346.066986083984">
                <text:p>346.066986083984</text:p>
              </table:table-cell>
              <table:table-cell office:value-type="float" office:value="-0.001249664">
                <text:p>-0.001249664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346.176055908203">
                <text:p>346.176055908203</text:p>
              </table:table-cell>
              <table:table-cell office:value-type="float" office:value="-0.002938719">
                <text:p>-0.002938719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346.285125732422">
                <text:p>346.285125732422</text:p>
              </table:table-cell>
              <table:table-cell office:value-type="float" office:value="-0.003655192">
                <text:p>-0.00365519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346.394195556641">
                <text:p>346.394195556641</text:p>
              </table:table-cell>
              <table:table-cell office:value-type="float" office:value="0.003389608">
                <text:p>0.003389608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346.503295898438">
                <text:p>346.503295898438</text:p>
              </table:table-cell>
              <table:table-cell office:value-type="float" office:value="-0.002411122">
                <text:p>-0.002411122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346.612365722656">
                <text:p>346.612365722656</text:p>
              </table:table-cell>
              <table:table-cell office:value-type="float" office:value="-0.004003591">
                <text:p>-0.004003591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346.721466064453">
                <text:p>346.721466064453</text:p>
              </table:table-cell>
              <table:table-cell office:value-type="float" office:value="0.0003392881">
                <text:p>0.000339288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346.83056640625">
                <text:p>346.83056640625</text:p>
              </table:table-cell>
              <table:table-cell office:value-type="float" office:value="0.01146071">
                <text:p>0.0114607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346.939697265625">
                <text:p>346.939697265625</text:p>
              </table:table-cell>
              <table:table-cell office:value-type="float" office:value="0.02884848">
                <text:p>0.02884848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347.048797607422">
                <text:p>347.048797607422</text:p>
              </table:table-cell>
              <table:table-cell office:value-type="float" office:value="-0.008834707">
                <text:p>-0.008834707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347.157928466797">
                <text:p>347.157928466797</text:p>
              </table:table-cell>
              <table:table-cell office:value-type="float" office:value="-0.008115877">
                <text:p>-0.008115877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347.267059326172">
                <text:p>347.267059326172</text:p>
              </table:table-cell>
              <table:table-cell office:value-type="float" office:value="0.00359454">
                <text:p>0.00359454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347.376190185547">
                <text:p>347.376190185547</text:p>
              </table:table-cell>
              <table:table-cell office:value-type="float" office:value="-0.001781359">
                <text:p>-0.001781359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347.4853515625">
                <text:p>347.4853515625</text:p>
              </table:table-cell>
              <table:table-cell office:value-type="float" office:value="0.005728514">
                <text:p>0.005728514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347.594482421875">
                <text:p>347.594482421875</text:p>
              </table:table-cell>
              <table:table-cell office:value-type="float" office:value="-0.01140095">
                <text:p>-0.0114009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347.703643798828">
                <text:p>347.703643798828</text:p>
              </table:table-cell>
              <table:table-cell office:value-type="float" office:value="0.004815455">
                <text:p>0.00481545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347.812805175781">
                <text:p>347.812805175781</text:p>
              </table:table-cell>
              <table:table-cell office:value-type="float" office:value="-0.0008226375">
                <text:p>-0.000822637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347.921966552734">
                <text:p>347.921966552734</text:p>
              </table:table-cell>
              <table:table-cell office:value-type="float" office:value="0.002206141">
                <text:p>0.002206141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348.031158447266">
                <text:p>348.031158447266</text:p>
              </table:table-cell>
              <table:table-cell office:value-type="float" office:value="0.006533248">
                <text:p>0.006533248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348.140319824219">
                <text:p>348.140319824219</text:p>
              </table:table-cell>
              <table:table-cell office:value-type="float" office:value="0.001932776">
                <text:p>0.001932776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348.24951171875">
                <text:p>348.24951171875</text:p>
              </table:table-cell>
              <table:table-cell office:value-type="float" office:value="0.01275481">
                <text:p>0.01275481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348.358703613281">
                <text:p>348.358703613281</text:p>
              </table:table-cell>
              <table:table-cell office:value-type="float" office:value="-0.008010908">
                <text:p>-0.008010908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348.467926025391">
                <text:p>348.467926025391</text:p>
              </table:table-cell>
              <table:table-cell office:value-type="float" office:value="-0.0004561633">
                <text:p>-0.0004561633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348.577117919922">
                <text:p>348.577117919922</text:p>
              </table:table-cell>
              <table:table-cell office:value-type="float" office:value="-0.001507252">
                <text:p>-0.001507252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348.686340332031">
                <text:p>348.686340332031</text:p>
              </table:table-cell>
              <table:table-cell office:value-type="float" office:value="0.0199255">
                <text:p>0.0199255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348.795562744141">
                <text:p>348.795562744141</text:p>
              </table:table-cell>
              <table:table-cell office:value-type="float" office:value="0.0001396089">
                <text:p>0.0001396089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348.90478515625">
                <text:p>348.90478515625</text:p>
              </table:table-cell>
              <table:table-cell office:value-type="float" office:value="0.005034908">
                <text:p>0.005034908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349.014038085938">
                <text:p>349.014038085938</text:p>
              </table:table-cell>
              <table:table-cell office:value-type="float" office:value="0.00157937">
                <text:p>0.00157937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349.123260498047">
                <text:p>349.123260498047</text:p>
              </table:table-cell>
              <table:table-cell office:value-type="float" office:value="0.01073753">
                <text:p>0.01073753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349.232513427734">
                <text:p>349.232513427734</text:p>
              </table:table-cell>
              <table:table-cell office:value-type="float" office:value="-0.008293407">
                <text:p>-0.008293407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349.341766357422">
                <text:p>349.341766357422</text:p>
              </table:table-cell>
              <table:table-cell office:value-type="float" office:value="-0.00947667">
                <text:p>-0.00947667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349.451019287109">
                <text:p>349.451019287109</text:p>
              </table:table-cell>
              <table:table-cell office:value-type="float" office:value="0.009164323">
                <text:p>0.009164323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349.560302734375">
                <text:p>349.560302734375</text:p>
              </table:table-cell>
              <table:table-cell office:value-type="float" office:value="0.003872725">
                <text:p>0.003872725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349.669586181641">
                <text:p>349.669586181641</text:p>
              </table:table-cell>
              <table:table-cell office:value-type="float" office:value="-0.00684892">
                <text:p>-0.00684892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349.778839111328">
                <text:p>349.778839111328</text:p>
              </table:table-cell>
              <table:table-cell office:value-type="float" office:value="-0.004017809">
                <text:p>-0.004017809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349.888153076172">
                <text:p>349.888153076172</text:p>
              </table:table-cell>
              <table:table-cell office:value-type="float" office:value="0.01421935">
                <text:p>0.01421935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349.997436523438">
                <text:p>349.997436523438</text:p>
              </table:table-cell>
              <table:table-cell office:value-type="float" office:value="0.01055092">
                <text:p>0.01055092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350.106719970703">
                <text:p>350.106719970703</text:p>
              </table:table-cell>
              <table:table-cell office:value-type="float" office:value="0.00944795">
                <text:p>0.00944795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350.216033935547">
                <text:p>350.216033935547</text:p>
              </table:table-cell>
              <table:table-cell office:value-type="float" office:value="-0.007081197">
                <text:p>-0.007081197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350.325347900391">
                <text:p>350.325347900391</text:p>
              </table:table-cell>
              <table:table-cell office:value-type="float" office:value="-0.0009661023">
                <text:p>-0.0009661023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350.434661865234">
                <text:p>350.434661865234</text:p>
              </table:table-cell>
              <table:table-cell office:value-type="float" office:value="0.005747964">
                <text:p>0.005747964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350.544006347656">
                <text:p>350.544006347656</text:p>
              </table:table-cell>
              <table:table-cell office:value-type="float" office:value="0.003055668">
                <text:p>0.003055668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350.6533203125">
                <text:p>350.6533203125</text:p>
              </table:table-cell>
              <table:table-cell office:value-type="float" office:value="0.005094968">
                <text:p>0.005094968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350.762664794922">
                <text:p>350.762664794922</text:p>
              </table:table-cell>
              <table:table-cell office:value-type="float" office:value="0.004542768">
                <text:p>0.004542768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350.872009277344">
                <text:p>350.872009277344</text:p>
              </table:table-cell>
              <table:table-cell office:value-type="float" office:value="0.01328672">
                <text:p>0.01328672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350.981353759766">
                <text:p>350.981353759766</text:p>
              </table:table-cell>
              <table:table-cell office:value-type="float" office:value="-0.01018512">
                <text:p>-0.01018512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351.090728759766">
                <text:p>351.090728759766</text:p>
              </table:table-cell>
              <table:table-cell office:value-type="float" office:value="0.003682714">
                <text:p>0.003682714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351.200073242188">
                <text:p>351.200073242188</text:p>
              </table:table-cell>
              <table:table-cell office:value-type="float" office:value="0.002374007">
                <text:p>0.002374007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351.309448242188">
                <text:p>351.309448242188</text:p>
              </table:table-cell>
              <table:table-cell office:value-type="float" office:value="0.01130918">
                <text:p>0.01130918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351.418823242188">
                <text:p>351.418823242188</text:p>
              </table:table-cell>
              <table:table-cell office:value-type="float" office:value="0.008975402">
                <text:p>0.008975402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351.528228759766">
                <text:p>351.528228759766</text:p>
              </table:table-cell>
              <table:table-cell office:value-type="float" office:value="-0.008373418">
                <text:p>-0.008373418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351.637603759766">
                <text:p>351.637603759766</text:p>
              </table:table-cell>
              <table:table-cell office:value-type="float" office:value="0.01028907">
                <text:p>0.01028907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351.747009277344">
                <text:p>351.747009277344</text:p>
              </table:table-cell>
              <table:table-cell office:value-type="float" office:value="0.002110752">
                <text:p>0.002110752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351.856414794922">
                <text:p>351.856414794922</text:p>
              </table:table-cell>
              <table:table-cell office:value-type="float" office:value="-0.007761524">
                <text:p>-0.007761524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351.9658203125">
                <text:p>351.9658203125</text:p>
              </table:table-cell>
              <table:table-cell office:value-type="float" office:value="0.001946572">
                <text:p>0.001946572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352.075225830078">
                <text:p>352.075225830078</text:p>
              </table:table-cell>
              <table:table-cell office:value-type="float" office:value="0.0002459385">
                <text:p>0.0002459385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352.184661865234">
                <text:p>352.184661865234</text:p>
              </table:table-cell>
              <table:table-cell office:value-type="float" office:value="0.003526335">
                <text:p>0.003526335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352.294097900391">
                <text:p>352.294097900391</text:p>
              </table:table-cell>
              <table:table-cell office:value-type="float" office:value="0.005660586">
                <text:p>0.005660586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352.403533935547">
                <text:p>352.403533935547</text:p>
              </table:table-cell>
              <table:table-cell office:value-type="float" office:value="-0.002515419">
                <text:p>-0.002515419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352.512969970703">
                <text:p>352.512969970703</text:p>
              </table:table-cell>
              <table:table-cell office:value-type="float" office:value="0.002752216">
                <text:p>0.002752216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352.622406005859">
                <text:p>352.622406005859</text:p>
              </table:table-cell>
              <table:table-cell office:value-type="float" office:value="0.0166616">
                <text:p>0.0166616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352.731872558594">
                <text:p>352.731872558594</text:p>
              </table:table-cell>
              <table:table-cell office:value-type="float" office:value="-0.005082215">
                <text:p>-0.005082215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352.841339111328">
                <text:p>352.841339111328</text:p>
              </table:table-cell>
              <table:table-cell office:value-type="float" office:value="-0.006531085">
                <text:p>-0.006531085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352.950805664063">
                <text:p>352.950805664063</text:p>
              </table:table-cell>
              <table:table-cell office:value-type="float" office:value="0.01492016">
                <text:p>0.01492016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353.060272216797">
                <text:p>353.060272216797</text:p>
              </table:table-cell>
              <table:table-cell office:value-type="float" office:value="0.01127692">
                <text:p>0.01127692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353.169738769531">
                <text:p>353.169738769531</text:p>
              </table:table-cell>
              <table:table-cell office:value-type="float" office:value="-0.0006091557">
                <text:p>-0.0006091557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353.279235839844">
                <text:p>353.279235839844</text:p>
              </table:table-cell>
              <table:table-cell office:value-type="float" office:value="-0.002362323">
                <text:p>-0.002362323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353.388732910156">
                <text:p>353.388732910156</text:p>
              </table:table-cell>
              <table:table-cell office:value-type="float" office:value="0.005905028">
                <text:p>0.005905028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353.498229980469">
                <text:p>353.498229980469</text:p>
              </table:table-cell>
              <table:table-cell office:value-type="float" office:value="0.004757206">
                <text:p>0.004757206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353.607727050781">
                <text:p>353.607727050781</text:p>
              </table:table-cell>
              <table:table-cell office:value-type="float" office:value="0.008387554">
                <text:p>0.008387554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353.717254638672">
                <text:p>353.717254638672</text:p>
              </table:table-cell>
              <table:table-cell office:value-type="float" office:value="-0.001461426">
                <text:p>-0.001461426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353.826782226563">
                <text:p>353.826782226563</text:p>
              </table:table-cell>
              <table:table-cell office:value-type="float" office:value="-0.003676355">
                <text:p>-0.003676355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353.936309814453">
                <text:p>353.936309814453</text:p>
              </table:table-cell>
              <table:table-cell office:value-type="float" office:value="0.0149446">
                <text:p>0.0149446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54.045837402344">
                <text:p>354.045837402344</text:p>
              </table:table-cell>
              <table:table-cell office:value-type="float" office:value="-0.003848333">
                <text:p>-0.003848333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54.155364990234">
                <text:p>354.155364990234</text:p>
              </table:table-cell>
              <table:table-cell office:value-type="float" office:value="0.004716874">
                <text:p>0.004716874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54.264923095703">
                <text:p>354.264923095703</text:p>
              </table:table-cell>
              <table:table-cell office:value-type="float" office:value="0.002574306">
                <text:p>0.002574306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54.374481201172">
                <text:p>354.374481201172</text:p>
              </table:table-cell>
              <table:table-cell office:value-type="float" office:value="0.005975682">
                <text:p>0.005975682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54.484039306641">
                <text:p>354.484039306641</text:p>
              </table:table-cell>
              <table:table-cell office:value-type="float" office:value="0.003748706">
                <text:p>0.003748706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54.593597412109">
                <text:p>354.593597412109</text:p>
              </table:table-cell>
              <table:table-cell office:value-type="float" office:value="0.003727892">
                <text:p>0.003727892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54.703155517578">
                <text:p>354.703155517578</text:p>
              </table:table-cell>
              <table:table-cell office:value-type="float" office:value="0.001693255">
                <text:p>0.001693255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54.812744140625">
                <text:p>354.812744140625</text:p>
              </table:table-cell>
              <table:table-cell office:value-type="float" office:value="0.01075017">
                <text:p>0.01075017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54.922332763672">
                <text:p>354.922332763672</text:p>
              </table:table-cell>
              <table:table-cell office:value-type="float" office:value="0.001132658">
                <text:p>0.001132658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55.031921386719">
                <text:p>355.031921386719</text:p>
              </table:table-cell>
              <table:table-cell office:value-type="float" office:value="0.007258897">
                <text:p>0.007258897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55.141510009766">
                <text:p>355.141510009766</text:p>
              </table:table-cell>
              <table:table-cell office:value-type="float" office:value="-0.001670081">
                <text:p>-0.001670081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55.251129150391">
                <text:p>355.251129150391</text:p>
              </table:table-cell>
              <table:table-cell office:value-type="float" office:value="0.003886174">
                <text:p>0.003886174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55.360717773438">
                <text:p>355.360717773438</text:p>
              </table:table-cell>
              <table:table-cell office:value-type="float" office:value="0.003531013">
                <text:p>0.003531013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55.470336914063">
                <text:p>355.470336914063</text:p>
              </table:table-cell>
              <table:table-cell office:value-type="float" office:value="0.001468979">
                <text:p>0.001468979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55.579956054688">
                <text:p>355.579956054688</text:p>
              </table:table-cell>
              <table:table-cell office:value-type="float" office:value="0.008217505">
                <text:p>0.008217505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55.689605712891">
                <text:p>355.689605712891</text:p>
              </table:table-cell>
              <table:table-cell office:value-type="float" office:value="0.0131818">
                <text:p>0.0131818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55.799224853516">
                <text:p>355.799224853516</text:p>
              </table:table-cell>
              <table:table-cell office:value-type="float" office:value="0.01436488">
                <text:p>0.01436488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55.908874511719">
                <text:p>355.908874511719</text:p>
              </table:table-cell>
              <table:table-cell office:value-type="float" office:value="-0.006429988">
                <text:p>-0.006429988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56.018524169922">
                <text:p>356.018524169922</text:p>
              </table:table-cell>
              <table:table-cell office:value-type="float" office:value="0.01067379">
                <text:p>0.01067379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56.128173828125">
                <text:p>356.128173828125</text:p>
              </table:table-cell>
              <table:table-cell office:value-type="float" office:value="-0.001914587">
                <text:p>-0.001914587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56.237823486328">
                <text:p>356.237823486328</text:p>
              </table:table-cell>
              <table:table-cell office:value-type="float" office:value="-0.005379538">
                <text:p>-0.005379538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56.347503662109">
                <text:p>356.347503662109</text:p>
              </table:table-cell>
              <table:table-cell office:value-type="float" office:value="0.00441166">
                <text:p>0.00441166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56.457183837891">
                <text:p>356.457183837891</text:p>
              </table:table-cell>
              <table:table-cell office:value-type="float" office:value="0.003359868">
                <text:p>0.003359868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56.566864013672">
                <text:p>356.566864013672</text:p>
              </table:table-cell>
              <table:table-cell office:value-type="float" office:value="0.0007775459">
                <text:p>0.0007775459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56.676544189453">
                <text:p>356.676544189453</text:p>
              </table:table-cell>
              <table:table-cell office:value-type="float" office:value="-0.005815506">
                <text:p>-0.005815506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56.786224365234">
                <text:p>356.786224365234</text:p>
              </table:table-cell>
              <table:table-cell office:value-type="float" office:value="-0.00595167">
                <text:p>-0.00595167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56.895935058594">
                <text:p>356.895935058594</text:p>
              </table:table-cell>
              <table:table-cell office:value-type="float" office:value="-0.006057066">
                <text:p>-0.006057066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57.005645751953">
                <text:p>357.005645751953</text:p>
              </table:table-cell>
              <table:table-cell office:value-type="float" office:value="-0.00824776">
                <text:p>-0.00824776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57.115356445313">
                <text:p>357.1153564453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57.225067138672">
                <text:p>357.225067138672</text:p>
              </table:table-cell>
              <table:table-cell office:value-type="float" office:value="0.005028727">
                <text:p>0.005028727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57.334777832031">
                <text:p>357.334777832031</text:p>
              </table:table-cell>
              <table:table-cell office:value-type="float" office:value="0.003626795">
                <text:p>0.003626795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57.444519042969">
                <text:p>357.444519042969</text:p>
              </table:table-cell>
              <table:table-cell office:value-type="float" office:value="0.008610913">
                <text:p>0.008610913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57.554260253906">
                <text:p>357.554260253906</text:p>
              </table:table-cell>
              <table:table-cell office:value-type="float" office:value="-0.003377572">
                <text:p>-0.003377572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57.664001464844">
                <text:p>357.664001464844</text:p>
              </table:table-cell>
              <table:table-cell office:value-type="float" office:value="0.0001006705">
                <text:p>0.0001006705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57.773742675781">
                <text:p>357.773742675781</text:p>
              </table:table-cell>
              <table:table-cell office:value-type="float" office:value="0.01547694">
                <text:p>0.01547694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57.883514404297">
                <text:p>357.883514404297</text:p>
              </table:table-cell>
              <table:table-cell office:value-type="float" office:value="0.00191394">
                <text:p>0.00191394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57.993286132813">
                <text:p>357.993286132813</text:p>
              </table:table-cell>
              <table:table-cell office:value-type="float" office:value="-0.0004092612">
                <text:p>-0.0004092612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58.10302734375">
                <text:p>358.10302734375</text:p>
              </table:table-cell>
              <table:table-cell office:value-type="float" office:value="0.01045102">
                <text:p>0.01045102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58.212829589844">
                <text:p>358.212829589844</text:p>
              </table:table-cell>
              <table:table-cell office:value-type="float" office:value="0.010793">
                <text:p>0.010793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58.322601318359">
                <text:p>358.322601318359</text:p>
              </table:table-cell>
              <table:table-cell office:value-type="float" office:value="0.00195138">
                <text:p>0.00195138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58.432373046875">
                <text:p>358.432373046875</text:p>
              </table:table-cell>
              <table:table-cell office:value-type="float" office:value="0.007413924">
                <text:p>0.007413924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58.542175292969">
                <text:p>358.542175292969</text:p>
              </table:table-cell>
              <table:table-cell office:value-type="float" office:value="-0.00524208">
                <text:p>-0.00524208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58.651977539063">
                <text:p>358.651977539063</text:p>
              </table:table-cell>
              <table:table-cell office:value-type="float" office:value="0.001692767">
                <text:p>0.001692767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58.761779785156">
                <text:p>358.761779785156</text:p>
              </table:table-cell>
              <table:table-cell office:value-type="float" office:value="0.01008613">
                <text:p>0.01008613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58.871612548828">
                <text:p>358.871612548828</text:p>
              </table:table-cell>
              <table:table-cell office:value-type="float" office:value="-0.005646914">
                <text:p>-0.005646914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58.981414794922">
                <text:p>358.981414794922</text:p>
              </table:table-cell>
              <table:table-cell office:value-type="float" office:value="0.00225921">
                <text:p>0.00225921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59.091247558594">
                <text:p>359.091247558594</text:p>
              </table:table-cell>
              <table:table-cell office:value-type="float" office:value="0.0141791">
                <text:p>0.0141791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59.201080322266">
                <text:p>359.201080322266</text:p>
              </table:table-cell>
              <table:table-cell office:value-type="float" office:value="0.004862783">
                <text:p>0.004862783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59.310913085938">
                <text:p>359.310913085938</text:p>
              </table:table-cell>
              <table:table-cell office:value-type="float" office:value="0.001739042">
                <text:p>0.001739042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59.420776367188">
                <text:p>359.420776367188</text:p>
              </table:table-cell>
              <table:table-cell office:value-type="float" office:value="-0.008885347">
                <text:p>-0.008885347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59.530609130859">
                <text:p>359.530609130859</text:p>
              </table:table-cell>
              <table:table-cell office:value-type="float" office:value="0.01137665">
                <text:p>0.01137665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9.640472412109">
                <text:p>359.640472412109</text:p>
              </table:table-cell>
              <table:table-cell office:value-type="float" office:value="-0.0001335075">
                <text:p>-0.0001335075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9.750335693359">
                <text:p>359.750335693359</text:p>
              </table:table-cell>
              <table:table-cell office:value-type="float" office:value="-0.002278226">
                <text:p>-0.002278226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9.860198974609">
                <text:p>359.860198974609</text:p>
              </table:table-cell>
              <table:table-cell office:value-type="float" office:value="0.001133477">
                <text:p>0.001133477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9.970092773438">
                <text:p>359.970092773438</text:p>
              </table:table-cell>
              <table:table-cell office:value-type="float" office:value="0.007249283">
                <text:p>0.007249283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60.079986572266">
                <text:p>360.079986572266</text:p>
              </table:table-cell>
              <table:table-cell office:value-type="float" office:value="-0.005007308">
                <text:p>-0.005007308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60.189849853516">
                <text:p>360.189849853516</text:p>
              </table:table-cell>
              <table:table-cell office:value-type="float" office:value="0.01262464">
                <text:p>0.01262464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60.299743652344">
                <text:p>360.299743652344</text:p>
              </table:table-cell>
              <table:table-cell office:value-type="float" office:value="0.0107405">
                <text:p>0.0107405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60.40966796875">
                <text:p>360.40966796875</text:p>
              </table:table-cell>
              <table:table-cell office:value-type="float" office:value="0.009785679">
                <text:p>0.009785679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60.519561767578">
                <text:p>360.519561767578</text:p>
              </table:table-cell>
              <table:table-cell office:value-type="float" office:value="0.003415834">
                <text:p>0.003415834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60.629486083984">
                <text:p>360.629486083984</text:p>
              </table:table-cell>
              <table:table-cell office:value-type="float" office:value="0.003111318">
                <text:p>0.003111318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0.739410400391">
                <text:p>360.739410400391</text:p>
              </table:table-cell>
              <table:table-cell office:value-type="float" office:value="-0.003701995">
                <text:p>-0.003701995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0.849334716797">
                <text:p>360.849334716797</text:p>
              </table:table-cell>
              <table:table-cell office:value-type="float" office:value="0.005854544">
                <text:p>0.005854544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0.959259033203">
                <text:p>360.959259033203</text:p>
              </table:table-cell>
              <table:table-cell office:value-type="float" office:value="-0.007717555">
                <text:p>-0.007717555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1.069213867188">
                <text:p>361.069213867188</text:p>
              </table:table-cell>
              <table:table-cell office:value-type="float" office:value="-0.0007150375">
                <text:p>-0.0007150375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1.179168701172">
                <text:p>361.179168701172</text:p>
              </table:table-cell>
              <table:table-cell office:value-type="float" office:value="-0.0001336818">
                <text:p>-0.0001336818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1.289093017578">
                <text:p>361.289093017578</text:p>
              </table:table-cell>
              <table:table-cell office:value-type="float" office:value="0.001448922">
                <text:p>0.001448922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1.399078369141">
                <text:p>361.399078369141</text:p>
              </table:table-cell>
              <table:table-cell office:value-type="float" office:value="0.003138722">
                <text:p>0.003138722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1.509033203125">
                <text:p>361.509033203125</text:p>
              </table:table-cell>
              <table:table-cell office:value-type="float" office:value="-0.006327847">
                <text:p>-0.006327847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1.619018554688">
                <text:p>361.619018554688</text:p>
              </table:table-cell>
              <table:table-cell office:value-type="float" office:value="-0.004577815">
                <text:p>-0.004577815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61.728973388672">
                <text:p>361.728973388672</text:p>
              </table:table-cell>
              <table:table-cell office:value-type="float" office:value="0.00832888">
                <text:p>0.00832888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61.838958740234">
                <text:p>361.838958740234</text:p>
              </table:table-cell>
              <table:table-cell office:value-type="float" office:value="0.003203273">
                <text:p>0.003203273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61.948944091797">
                <text:p>361.948944091797</text:p>
              </table:table-cell>
              <table:table-cell office:value-type="float" office:value="0.0006169681">
                <text:p>0.0006169681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62.058959960938">
                <text:p>362.058959960938</text:p>
              </table:table-cell>
              <table:table-cell office:value-type="float" office:value="-0.0002669657">
                <text:p>-0.0002669657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62.1689453125">
                <text:p>362.1689453125</text:p>
              </table:table-cell>
              <table:table-cell office:value-type="float" office:value="0.004627885">
                <text:p>0.004627885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62.278961181641">
                <text:p>362.278961181641</text:p>
              </table:table-cell>
              <table:table-cell office:value-type="float" office:value="0.01684645">
                <text:p>0.01684645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62.388977050781">
                <text:p>362.388977050781</text:p>
              </table:table-cell>
              <table:table-cell office:value-type="float" office:value="0.01035036">
                <text:p>0.01035036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62.498992919922">
                <text:p>362.498992919922</text:p>
              </table:table-cell>
              <table:table-cell office:value-type="float" office:value="-0.0008122845">
                <text:p>-0.0008122845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62.609039306641">
                <text:p>362.609039306641</text:p>
              </table:table-cell>
              <table:table-cell office:value-type="float" office:value="-0.001335138">
                <text:p>-0.001335138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62.719055175781">
                <text:p>362.719055175781</text:p>
              </table:table-cell>
              <table:table-cell office:value-type="float" office:value="0.007873639">
                <text:p>0.007873639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62.8291015625">
                <text:p>362.8291015625</text:p>
              </table:table-cell>
              <table:table-cell office:value-type="float" office:value="0.01216897">
                <text:p>0.01216897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62.939147949219">
                <text:p>362.939147949219</text:p>
              </table:table-cell>
              <table:table-cell office:value-type="float" office:value="0.001134294">
                <text:p>0.001134294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63.049224853516">
                <text:p>363.049224853516</text:p>
              </table:table-cell>
              <table:table-cell office:value-type="float" office:value="-0.0007055345">
                <text:p>-0.0007055345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63.159271240234">
                <text:p>363.159271240234</text:p>
              </table:table-cell>
              <table:table-cell office:value-type="float" office:value="-0.001417372">
                <text:p>-0.001417372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63.269348144531">
                <text:p>363.269348144531</text:p>
              </table:table-cell>
              <table:table-cell office:value-type="float" office:value="0.006148978">
                <text:p>0.006148978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63.37939453125">
                <text:p>363.37939453125</text:p>
              </table:table-cell>
              <table:table-cell office:value-type="float" office:value="0.006079016">
                <text:p>0.006079016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63.489501953125">
                <text:p>363.489501953125</text:p>
              </table:table-cell>
              <table:table-cell office:value-type="float" office:value="-0.006290577">
                <text:p>-0.006290577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63.599578857422">
                <text:p>363.599578857422</text:p>
              </table:table-cell>
              <table:table-cell office:value-type="float" office:value="0.01214847">
                <text:p>0.01214847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63.709655761719">
                <text:p>363.709655761719</text:p>
              </table:table-cell>
              <table:table-cell office:value-type="float" office:value="0.007901618">
                <text:p>0.007901618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63.819763183594">
                <text:p>363.819763183594</text:p>
              </table:table-cell>
              <table:table-cell office:value-type="float" office:value="0.00529257">
                <text:p>0.00529257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63.929870605469">
                <text:p>363.929870605469</text:p>
              </table:table-cell>
              <table:table-cell office:value-type="float" office:value="-0.004888298">
                <text:p>-0.004888298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64.039978027344">
                <text:p>364.039978027344</text:p>
              </table:table-cell>
              <table:table-cell office:value-type="float" office:value="-0.006179174">
                <text:p>-0.006179174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64.150085449219">
                <text:p>364.150085449219</text:p>
              </table:table-cell>
              <table:table-cell office:value-type="float" office:value="-0.003563055">
                <text:p>-0.003563055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64.260223388672">
                <text:p>364.260223388672</text:p>
              </table:table-cell>
              <table:table-cell office:value-type="float" office:value="-0.002093201">
                <text:p>-0.002093201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64.370330810547">
                <text:p>364.370330810547</text:p>
              </table:table-cell>
              <table:table-cell office:value-type="float" office:value="-0.004535302">
                <text:p>-0.004535302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64.48046875">
                <text:p>364.48046875</text:p>
              </table:table-cell>
              <table:table-cell office:value-type="float" office:value="0.006594639">
                <text:p>0.006594639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64.590606689453">
                <text:p>364.590606689453</text:p>
              </table:table-cell>
              <table:table-cell office:value-type="float" office:value="0.008715565">
                <text:p>0.008715565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64.700775146484">
                <text:p>364.700775146484</text:p>
              </table:table-cell>
              <table:table-cell office:value-type="float" office:value="0.003268448">
                <text:p>0.003268448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64.810913085938">
                <text:p>364.810913085938</text:p>
              </table:table-cell>
              <table:table-cell office:value-type="float" office:value="0.005446161">
                <text:p>0.005446161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64.921081542969">
                <text:p>364.921081542969</text:p>
              </table:table-cell>
              <table:table-cell office:value-type="float" office:value="-0.003238857">
                <text:p>-0.003238857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365.03125">
                <text:p>365.03125</text:p>
              </table:table-cell>
              <table:table-cell office:value-type="float" office:value="-0.005911515">
                <text:p>-0.005911515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365.141418457031">
                <text:p>365.141418457031</text:p>
              </table:table-cell>
              <table:table-cell office:value-type="float" office:value="-0.009151408">
                <text:p>-0.009151408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365.251586914063">
                <text:p>365.251586914063</text:p>
              </table:table-cell>
              <table:table-cell office:value-type="float" office:value="0.009656004">
                <text:p>0.009656004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365.361785888672">
                <text:p>365.361785888672</text:p>
              </table:table-cell>
              <table:table-cell office:value-type="float" office:value="0.02651109">
                <text:p>0.02651109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365.471984863281">
                <text:p>365.471984863281</text:p>
              </table:table-cell>
              <table:table-cell office:value-type="float" office:value="0.003478841">
                <text:p>0.003478841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365.582183837891">
                <text:p>365.582183837891</text:p>
              </table:table-cell>
              <table:table-cell office:value-type="float" office:value="0.00765947">
                <text:p>0.00765947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365.6923828125">
                <text:p>365.6923828125</text:p>
              </table:table-cell>
              <table:table-cell office:value-type="float" office:value="0.00895765">
                <text:p>0.00895765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365.802581787109">
                <text:p>365.8025817871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365.912811279297">
                <text:p>365.912811279297</text:p>
              </table:table-cell>
              <table:table-cell office:value-type="float" office:value="0.00946229">
                <text:p>0.00946229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366.023010253906">
                <text:p>366.023010253906</text:p>
              </table:table-cell>
              <table:table-cell office:value-type="float" office:value="0.004100331">
                <text:p>0.004100331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366.133239746094">
                <text:p>366.133239746094</text:p>
              </table:table-cell>
              <table:table-cell office:value-type="float" office:value="0.005448647">
                <text:p>0.005448647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366.243499755859">
                <text:p>366.243499755859</text:p>
              </table:table-cell>
              <table:table-cell office:value-type="float" office:value="-0.001743189">
                <text:p>-0.001743189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366.353729248047">
                <text:p>366.353729248047</text:p>
              </table:table-cell>
              <table:table-cell office:value-type="float" office:value="-0.0001713471">
                <text:p>-0.0001713471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366.463989257813">
                <text:p>366.463989257813</text:p>
              </table:table-cell>
              <table:table-cell office:value-type="float" office:value="-0.000219509">
                <text:p>-0.000219509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366.57421875">
                <text:p>366.57421875</text:p>
              </table:table-cell>
              <table:table-cell office:value-type="float" office:value="0.002527403">
                <text:p>0.002527403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366.684478759766">
                <text:p>366.684478759766</text:p>
              </table:table-cell>
              <table:table-cell office:value-type="float" office:value="-0.0002925211">
                <text:p>-0.0002925211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366.794738769531">
                <text:p>366.794738769531</text:p>
              </table:table-cell>
              <table:table-cell office:value-type="float" office:value="0.00929031">
                <text:p>0.00929031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366.905029296875">
                <text:p>366.905029296875</text:p>
              </table:table-cell>
              <table:table-cell office:value-type="float" office:value="-0.003228152">
                <text:p>-0.003228152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367.015289306641">
                <text:p>367.015289306641</text:p>
              </table:table-cell>
              <table:table-cell office:value-type="float" office:value="0.0006543446">
                <text:p>0.0006543446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367.125579833984">
                <text:p>367.125579833984</text:p>
              </table:table-cell>
              <table:table-cell office:value-type="float" office:value="0.01162082">
                <text:p>0.01162082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367.235870361328">
                <text:p>367.235870361328</text:p>
              </table:table-cell>
              <table:table-cell office:value-type="float" office:value="0.01457024">
                <text:p>0.01457024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367.346160888672">
                <text:p>367.346160888672</text:p>
              </table:table-cell>
              <table:table-cell office:value-type="float" office:value="0.01846875">
                <text:p>0.01846875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367.456481933594">
                <text:p>367.456481933594</text:p>
              </table:table-cell>
              <table:table-cell office:value-type="float" office:value="0.009678283">
                <text:p>0.009678283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367.566772460938">
                <text:p>367.566772460938</text:p>
              </table:table-cell>
              <table:table-cell office:value-type="float" office:value="-0.00577548">
                <text:p>-0.00577548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367.677093505859">
                <text:p>367.677093505859</text:p>
              </table:table-cell>
              <table:table-cell office:value-type="float" office:value="-0.002305053">
                <text:p>-0.002305053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367.787414550781">
                <text:p>367.787414550781</text:p>
              </table:table-cell>
              <table:table-cell office:value-type="float" office:value="-0.0074646">
                <text:p>-0.0074646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367.897766113281">
                <text:p>367.897766113281</text:p>
              </table:table-cell>
              <table:table-cell office:value-type="float" office:value="-0.007825905">
                <text:p>-0.007825905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368.008087158203">
                <text:p>368.008087158203</text:p>
              </table:table-cell>
              <table:table-cell office:value-type="float" office:value="0.000313405">
                <text:p>0.000313405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368.118438720703">
                <text:p>368.118438720703</text:p>
              </table:table-cell>
              <table:table-cell office:value-type="float" office:value="-0.001848331">
                <text:p>-0.001848331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368.228759765625">
                <text:p>368.228759765625</text:p>
              </table:table-cell>
              <table:table-cell office:value-type="float" office:value="0.0009870304">
                <text:p>0.0009870304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368.339111328125">
                <text:p>368.339111328125</text:p>
              </table:table-cell>
              <table:table-cell office:value-type="float" office:value="-0.0008167243">
                <text:p>-0.0008167243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368.449493408203">
                <text:p>368.449493408203</text:p>
              </table:table-cell>
              <table:table-cell office:value-type="float" office:value="0.003153848">
                <text:p>0.003153848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368.559844970703">
                <text:p>368.559844970703</text:p>
              </table:table-cell>
              <table:table-cell office:value-type="float" office:value="0.007937831">
                <text:p>0.007937831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368.670227050781">
                <text:p>368.670227050781</text:p>
              </table:table-cell>
              <table:table-cell office:value-type="float" office:value="-0.005994183">
                <text:p>-0.005994183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368.780609130859">
                <text:p>368.780609130859</text:p>
              </table:table-cell>
              <table:table-cell office:value-type="float" office:value="-0.002271183">
                <text:p>-0.002271183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368.890991210938">
                <text:p>368.890991210938</text:p>
              </table:table-cell>
              <table:table-cell office:value-type="float" office:value="-0.009343528">
                <text:p>-0.009343528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369.001373291016">
                <text:p>369.001373291016</text:p>
              </table:table-cell>
              <table:table-cell office:value-type="float" office:value="0.0002384742">
                <text:p>0.0002384742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369.111755371094">
                <text:p>369.111755371094</text:p>
              </table:table-cell>
              <table:table-cell office:value-type="float" office:value="-0.008436749">
                <text:p>-0.008436749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369.22216796875">
                <text:p>369.22216796875</text:p>
              </table:table-cell>
              <table:table-cell office:value-type="float" office:value="-0.007842171">
                <text:p>-0.007842171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369.332580566406">
                <text:p>369.332580566406</text:p>
              </table:table-cell>
              <table:table-cell office:value-type="float" office:value="-0.007967264">
                <text:p>-0.007967264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369.442993164063">
                <text:p>369.442993164063</text:p>
              </table:table-cell>
              <table:table-cell office:value-type="float" office:value="-0.0003733889">
                <text:p>-0.0003733889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369.553405761719">
                <text:p>369.553405761719</text:p>
              </table:table-cell>
              <table:table-cell office:value-type="float" office:value="0.003704077">
                <text:p>0.003704077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369.663848876953">
                <text:p>369.663848876953</text:p>
              </table:table-cell>
              <table:table-cell office:value-type="float" office:value="0.006044782">
                <text:p>0.006044782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369.774261474609">
                <text:p>369.774261474609</text:p>
              </table:table-cell>
              <table:table-cell office:value-type="float" office:value="-0.00358943">
                <text:p>-0.00358943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369.884704589844">
                <text:p>369.884704589844</text:p>
              </table:table-cell>
              <table:table-cell office:value-type="float" office:value="0.002663332">
                <text:p>0.002663332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369.995147705078">
                <text:p>369.995147705078</text:p>
              </table:table-cell>
              <table:table-cell office:value-type="float" office:value="-0.005299336">
                <text:p>-0.005299336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370.105621337891">
                <text:p>370.105621337891</text:p>
              </table:table-cell>
              <table:table-cell office:value-type="float" office:value="0.009963589">
                <text:p>0.009963589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370.216064453125">
                <text:p>370.216064453125</text:p>
              </table:table-cell>
              <table:table-cell office:value-type="float" office:value="0.008831318">
                <text:p>0.008831318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370.326538085938">
                <text:p>370.326538085938</text:p>
              </table:table-cell>
              <table:table-cell office:value-type="float" office:value="0.01916484">
                <text:p>0.01916484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370.43701171875">
                <text:p>370.43701171875</text:p>
              </table:table-cell>
              <table:table-cell office:value-type="float" office:value="0.01125161">
                <text:p>0.01125161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370.547485351563">
                <text:p>370.547485351563</text:p>
              </table:table-cell>
              <table:table-cell office:value-type="float" office:value="0.002721426">
                <text:p>0.002721426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370.657958984375">
                <text:p>370.657958984375</text:p>
              </table:table-cell>
              <table:table-cell office:value-type="float" office:value="-0.003657638">
                <text:p>-0.003657638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370.768432617188">
                <text:p>370.768432617188</text:p>
              </table:table-cell>
              <table:table-cell office:value-type="float" office:value="-0.00858808">
                <text:p>-0.00858808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370.878936767578">
                <text:p>370.878936767578</text:p>
              </table:table-cell>
              <table:table-cell office:value-type="float" office:value="0.006680244">
                <text:p>0.006680244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370.989440917969">
                <text:p>370.989440917969</text:p>
              </table:table-cell>
              <table:table-cell office:value-type="float" office:value="-0.006269492">
                <text:p>-0.006269492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371.099945068359">
                <text:p>371.099945068359</text:p>
              </table:table-cell>
              <table:table-cell office:value-type="float" office:value="0.004006838">
                <text:p>0.004006838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371.21044921875">
                <text:p>371.21044921875</text:p>
              </table:table-cell>
              <table:table-cell office:value-type="float" office:value="-0.005484415">
                <text:p>-0.005484415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371.320983886719">
                <text:p>371.320983886719</text:p>
              </table:table-cell>
              <table:table-cell office:value-type="float" office:value="-0.00480634">
                <text:p>-0.00480634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371.431488037109">
                <text:p>371.431488037109</text:p>
              </table:table-cell>
              <table:table-cell office:value-type="float" office:value="0.001086923">
                <text:p>0.001086923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371.542022705078">
                <text:p>371.542022705078</text:p>
              </table:table-cell>
              <table:table-cell office:value-type="float" office:value="0.01225183">
                <text:p>0.01225183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371.652557373047">
                <text:p>371.652557373047</text:p>
              </table:table-cell>
              <table:table-cell office:value-type="float" office:value="-0.00740518">
                <text:p>-0.00740518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371.763122558594">
                <text:p>371.763122558594</text:p>
              </table:table-cell>
              <table:table-cell office:value-type="float" office:value="-0.004731469">
                <text:p>-0.004731469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371.873657226563">
                <text:p>371.873657226563</text:p>
              </table:table-cell>
              <table:table-cell office:value-type="float" office:value="-0.007232938">
                <text:p>-0.007232938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371.984222412109">
                <text:p>371.984222412109</text:p>
              </table:table-cell>
              <table:table-cell office:value-type="float" office:value="0.003443719">
                <text:p>0.003443719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372.094787597656">
                <text:p>372.094787597656</text:p>
              </table:table-cell>
              <table:table-cell office:value-type="float" office:value="-0.005231549">
                <text:p>-0.005231549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372.205352783203">
                <text:p>372.205352783203</text:p>
              </table:table-cell>
              <table:table-cell office:value-type="float" office:value="-0.005307059">
                <text:p>-0.005307059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372.31591796875">
                <text:p>372.31591796875</text:p>
              </table:table-cell>
              <table:table-cell office:value-type="float" office:value="-0.005095069">
                <text:p>-0.005095069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372.426513671875">
                <text:p>372.426513671875</text:p>
              </table:table-cell>
              <table:table-cell office:value-type="float" office:value="-0.0004686886">
                <text:p>-0.0004686886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372.537078857422">
                <text:p>372.537078857422</text:p>
              </table:table-cell>
              <table:table-cell office:value-type="float" office:value="0.002450607">
                <text:p>0.002450607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372.647674560547">
                <text:p>372.647674560547</text:p>
              </table:table-cell>
              <table:table-cell office:value-type="float" office:value="-0.009104523">
                <text:p>-0.009104523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372.758270263672">
                <text:p>372.758270263672</text:p>
              </table:table-cell>
              <table:table-cell office:value-type="float" office:value="0.00060732">
                <text:p>0.00060732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372.868896484375">
                <text:p>372.868896484375</text:p>
              </table:table-cell>
              <table:table-cell office:value-type="float" office:value="0.005987398">
                <text:p>0.005987398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372.9794921875">
                <text:p>372.9794921875</text:p>
              </table:table-cell>
              <table:table-cell office:value-type="float" office:value="-0.008823807">
                <text:p>-0.008823807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373.090118408203">
                <text:p>373.090118408203</text:p>
              </table:table-cell>
              <table:table-cell office:value-type="float" office:value="-0.001015915">
                <text:p>-0.001015915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373.200744628906">
                <text:p>373.200744628906</text:p>
              </table:table-cell>
              <table:table-cell office:value-type="float" office:value="0.02803411">
                <text:p>0.02803411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373.311370849609">
                <text:p>373.311370849609</text:p>
              </table:table-cell>
              <table:table-cell office:value-type="float" office:value="-0.001481927">
                <text:p>-0.001481927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373.421997070313">
                <text:p>373.421997070313</text:p>
              </table:table-cell>
              <table:table-cell office:value-type="float" office:value="0.0005231059">
                <text:p>0.0005231059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373.532623291016">
                <text:p>373.532623291016</text:p>
              </table:table-cell>
              <table:table-cell office:value-type="float" office:value="-0.00641981">
                <text:p>-0.00641981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373.643280029297">
                <text:p>373.643280029297</text:p>
              </table:table-cell>
              <table:table-cell office:value-type="float" office:value="0.01059369">
                <text:p>0.01059369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373.753936767578">
                <text:p>373.753936767578</text:p>
              </table:table-cell>
              <table:table-cell office:value-type="float" office:value="0.007335454">
                <text:p>0.007335454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373.864593505859">
                <text:p>373.864593505859</text:p>
              </table:table-cell>
              <table:table-cell office:value-type="float" office:value="-0.004780602">
                <text:p>-0.004780602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373.975250244141">
                <text:p>373.975250244141</text:p>
              </table:table-cell>
              <table:table-cell office:value-type="float" office:value="-0.0001730608">
                <text:p>-0.0001730608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374.0859375">
                <text:p>374.0859375</text:p>
              </table:table-cell>
              <table:table-cell office:value-type="float" office:value="-0.004482026">
                <text:p>-0.004482026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374.196624755859">
                <text:p>374.196624755859</text:p>
              </table:table-cell>
              <table:table-cell office:value-type="float" office:value="-0.008002925">
                <text:p>-0.008002925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374.307281494141">
                <text:p>374.307281494141</text:p>
              </table:table-cell>
              <table:table-cell office:value-type="float" office:value="-0.002701156">
                <text:p>-0.002701156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374.417999267578">
                <text:p>374.417999267578</text:p>
              </table:table-cell>
              <table:table-cell office:value-type="float" office:value="-0.004870604">
                <text:p>-0.004870604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374.528686523438">
                <text:p>374.528686523438</text:p>
              </table:table-cell>
              <table:table-cell office:value-type="float" office:value="0.006893461">
                <text:p>0.006893461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374.639373779297">
                <text:p>374.639373779297</text:p>
              </table:table-cell>
              <table:table-cell office:value-type="float" office:value="0.008848209">
                <text:p>0.008848209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374.750091552734">
                <text:p>374.750091552734</text:p>
              </table:table-cell>
              <table:table-cell office:value-type="float" office:value="-0.004389537">
                <text:p>-0.004389537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374.860809326172">
                <text:p>374.860809326172</text:p>
              </table:table-cell>
              <table:table-cell office:value-type="float" office:value="-0.001135797">
                <text:p>-0.001135797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374.971527099609">
                <text:p>374.971527099609</text:p>
              </table:table-cell>
              <table:table-cell office:value-type="float" office:value="0.0004838388">
                <text:p>0.0004838388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375.082244873047">
                <text:p>375.0822448730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375.192993164063">
                <text:p>375.192993164063</text:p>
              </table:table-cell>
              <table:table-cell office:value-type="float" office:value="-0.003150775">
                <text:p>-0.003150775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375.3037109375">
                <text:p>375.3037109375</text:p>
              </table:table-cell>
              <table:table-cell office:value-type="float" office:value="-0.008218387">
                <text:p>-0.008218387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375.414459228516">
                <text:p>375.414459228516</text:p>
              </table:table-cell>
              <table:table-cell office:value-type="float" office:value="0.004188553">
                <text:p>0.004188553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375.525207519531">
                <text:p>375.525207519531</text:p>
              </table:table-cell>
              <table:table-cell office:value-type="float" office:value="-0.0008093031">
                <text:p>-0.0008093031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375.635986328125">
                <text:p>375.635986328125</text:p>
              </table:table-cell>
              <table:table-cell office:value-type="float" office:value="0.006933371">
                <text:p>0.006933371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375.746734619141">
                <text:p>375.746734619141</text:p>
              </table:table-cell>
              <table:table-cell office:value-type="float" office:value="-0.0009124616">
                <text:p>-0.0009124616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375.857513427734">
                <text:p>375.857513427734</text:p>
              </table:table-cell>
              <table:table-cell office:value-type="float" office:value="-0.003560593">
                <text:p>-0.003560593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375.968292236328">
                <text:p>375.968292236328</text:p>
              </table:table-cell>
              <table:table-cell office:value-type="float" office:value="-0.002556443">
                <text:p>-0.002556443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376.079071044922">
                <text:p>376.079071044922</text:p>
              </table:table-cell>
              <table:table-cell office:value-type="float" office:value="-0.006093824">
                <text:p>-0.006093824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376.189849853516">
                <text:p>376.189849853516</text:p>
              </table:table-cell>
              <table:table-cell office:value-type="float" office:value="0.001834723">
                <text:p>0.001834723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376.300628662109">
                <text:p>376.300628662109</text:p>
              </table:table-cell>
              <table:table-cell office:value-type="float" office:value="-0.001880754">
                <text:p>-0.001880754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376.411437988281">
                <text:p>376.411437988281</text:p>
              </table:table-cell>
              <table:table-cell office:value-type="float" office:value="-0.009704887">
                <text:p>-0.009704887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376.522247314453">
                <text:p>376.522247314453</text:p>
              </table:table-cell>
              <table:table-cell office:value-type="float" office:value="0.0002331619">
                <text:p>0.0002331619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376.633056640625">
                <text:p>376.633056640625</text:p>
              </table:table-cell>
              <table:table-cell office:value-type="float" office:value="-0.0007740876">
                <text:p>-0.0007740876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376.743865966797">
                <text:p>376.743865966797</text:p>
              </table:table-cell>
              <table:table-cell office:value-type="float" office:value="0.00173211">
                <text:p>0.00173211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376.854705810547">
                <text:p>376.854705810547</text:p>
              </table:table-cell>
              <table:table-cell office:value-type="float" office:value="0.01230021">
                <text:p>0.01230021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376.965515136719">
                <text:p>376.965515136719</text:p>
              </table:table-cell>
              <table:table-cell office:value-type="float" office:value="0.01515999">
                <text:p>0.01515999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377.076354980469">
                <text:p>377.076354980469</text:p>
              </table:table-cell>
              <table:table-cell office:value-type="float" office:value="-0.004822276">
                <text:p>-0.004822276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377.187194824219">
                <text:p>377.187194824219</text:p>
              </table:table-cell>
              <table:table-cell office:value-type="float" office:value="0.003753003">
                <text:p>0.003753003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377.298034667969">
                <text:p>377.298034667969</text:p>
              </table:table-cell>
              <table:table-cell office:value-type="float" office:value="-0.006526306">
                <text:p>-0.006526306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377.408905029297">
                <text:p>377.408905029297</text:p>
              </table:table-cell>
              <table:table-cell office:value-type="float" office:value="0.006164149">
                <text:p>0.006164149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377.519744873047">
                <text:p>377.519744873047</text:p>
              </table:table-cell>
              <table:table-cell office:value-type="float" office:value="-0.004422721">
                <text:p>-0.004422721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377.630615234375">
                <text:p>377.630615234375</text:p>
              </table:table-cell>
              <table:table-cell office:value-type="float" office:value="0.001622891">
                <text:p>0.001622891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377.741485595703">
                <text:p>377.741485595703</text:p>
              </table:table-cell>
              <table:table-cell office:value-type="float" office:value="-0.005119889">
                <text:p>-0.005119889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377.852355957031">
                <text:p>377.852355957031</text:p>
              </table:table-cell>
              <table:table-cell office:value-type="float" office:value="-0.006591336">
                <text:p>-0.006591336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377.963256835938">
                <text:p>377.963256835938</text:p>
              </table:table-cell>
              <table:table-cell office:value-type="float" office:value="-0.00320563">
                <text:p>-0.00320563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378.074157714844">
                <text:p>378.074157714844</text:p>
              </table:table-cell>
              <table:table-cell office:value-type="float" office:value="0.01123181">
                <text:p>0.01123181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378.185028076172">
                <text:p>378.185028076172</text:p>
              </table:table-cell>
              <table:table-cell office:value-type="float" office:value="0.009523823">
                <text:p>0.009523823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378.295928955078">
                <text:p>378.295928955078</text:p>
              </table:table-cell>
              <table:table-cell office:value-type="float" office:value="-0.006915656">
                <text:p>-0.006915656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378.406860351563">
                <text:p>378.406860351563</text:p>
              </table:table-cell>
              <table:table-cell office:value-type="float" office:value="-0.0001761334">
                <text:p>-0.0001761334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378.517761230469">
                <text:p>378.517761230469</text:p>
              </table:table-cell>
              <table:table-cell office:value-type="float" office:value="0.004510526">
                <text:p>0.004510526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378.628692626953">
                <text:p>378.628692626953</text:p>
              </table:table-cell>
              <table:table-cell office:value-type="float" office:value="0.001466432">
                <text:p>0.001466432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378.739593505859">
                <text:p>378.739593505859</text:p>
              </table:table-cell>
              <table:table-cell office:value-type="float" office:value="0.001770503">
                <text:p>0.001770503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378.850524902344">
                <text:p>378.850524902344</text:p>
              </table:table-cell>
              <table:table-cell office:value-type="float" office:value="0.002708828">
                <text:p>0.002708828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378.961486816406">
                <text:p>378.961486816406</text:p>
              </table:table-cell>
              <table:table-cell office:value-type="float" office:value="0.004775828">
                <text:p>0.004775828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379.072418212891">
                <text:p>379.072418212891</text:p>
              </table:table-cell>
              <table:table-cell office:value-type="float" office:value="0.009980114">
                <text:p>0.009980114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379.183380126953">
                <text:p>379.183380126953</text:p>
              </table:table-cell>
              <table:table-cell office:value-type="float" office:value="-0.006718231">
                <text:p>-0.006718231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379.294311523438">
                <text:p>379.294311523438</text:p>
              </table:table-cell>
              <table:table-cell office:value-type="float" office:value="0.005408967">
                <text:p>0.005408967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379.4052734375">
                <text:p>379.4052734375</text:p>
              </table:table-cell>
              <table:table-cell office:value-type="float" office:value="-0.00891036">
                <text:p>-0.00891036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379.516235351563">
                <text:p>379.516235351563</text:p>
              </table:table-cell>
              <table:table-cell office:value-type="float" office:value="-0.00674939">
                <text:p>-0.00674939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379.627227783203">
                <text:p>379.627227783203</text:p>
              </table:table-cell>
              <table:table-cell office:value-type="float" office:value="-0.002599912">
                <text:p>-0.002599912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379.738189697266">
                <text:p>379.738189697266</text:p>
              </table:table-cell>
              <table:table-cell office:value-type="float" office:value="0.01056387">
                <text:p>0.01056387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379.849182128906">
                <text:p>379.849182128906</text:p>
              </table:table-cell>
              <table:table-cell office:value-type="float" office:value="-0.004801949">
                <text:p>-0.004801949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379.960174560547">
                <text:p>379.960174560547</text:p>
              </table:table-cell>
              <table:table-cell office:value-type="float" office:value="-0.001334504">
                <text:p>-0.001334504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380.071166992188">
                <text:p>380.071166992188</text:p>
              </table:table-cell>
              <table:table-cell office:value-type="float" office:value="-0.004677659">
                <text:p>-0.004677659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380.182189941406">
                <text:p>380.182189941406</text:p>
              </table:table-cell>
              <table:table-cell office:value-type="float" office:value="0.009946878">
                <text:p>0.009946878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380.293182373047">
                <text:p>380.293182373047</text:p>
              </table:table-cell>
              <table:table-cell office:value-type="float" office:value="0.005906184">
                <text:p>0.005906184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380.404205322266">
                <text:p>380.404205322266</text:p>
              </table:table-cell>
              <table:table-cell office:value-type="float" office:value="-0.01157378">
                <text:p>-0.01157378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380.515228271484">
                <text:p>380.515228271484</text:p>
              </table:table-cell>
              <table:table-cell office:value-type="float" office:value="-0.007032962">
                <text:p>-0.007032962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380.626251220703">
                <text:p>380.626251220703</text:p>
              </table:table-cell>
              <table:table-cell office:value-type="float" office:value="-0.0004532201">
                <text:p>-0.0004532201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380.737274169922">
                <text:p>380.737274169922</text:p>
              </table:table-cell>
              <table:table-cell office:value-type="float" office:value="-0.009341548">
                <text:p>-0.009341548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380.848327636719">
                <text:p>380.848327636719</text:p>
              </table:table-cell>
              <table:table-cell office:value-type="float" office:value="0.01422705">
                <text:p>0.01422705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380.959381103516">
                <text:p>380.959381103516</text:p>
              </table:table-cell>
              <table:table-cell office:value-type="float" office:value="-0.001066544">
                <text:p>-0.001066544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381.070404052734">
                <text:p>381.070404052734</text:p>
              </table:table-cell>
              <table:table-cell office:value-type="float" office:value="-0.00446419">
                <text:p>-0.00446419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381.181488037109">
                <text:p>381.181488037109</text:p>
              </table:table-cell>
              <table:table-cell office:value-type="float" office:value="-0.005529759">
                <text:p>-0.005529759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381.292541503906">
                <text:p>381.292541503906</text:p>
              </table:table-cell>
              <table:table-cell office:value-type="float" office:value="-0.004145672">
                <text:p>-0.004145672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381.403594970703">
                <text:p>381.403594970703</text:p>
              </table:table-cell>
              <table:table-cell office:value-type="float" office:value="0.01129669">
                <text:p>0.01129669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381.514678955078">
                <text:p>381.514678955078</text:p>
              </table:table-cell>
              <table:table-cell office:value-type="float" office:value="0.009740371">
                <text:p>0.009740371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381.625762939453">
                <text:p>381.625762939453</text:p>
              </table:table-cell>
              <table:table-cell office:value-type="float" office:value="0.01148488">
                <text:p>0.01148488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381.736846923828">
                <text:p>381.736846923828</text:p>
              </table:table-cell>
              <table:table-cell office:value-type="float" office:value="0.008342922">
                <text:p>0.008342922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381.847930908203">
                <text:p>381.847930908203</text:p>
              </table:table-cell>
              <table:table-cell office:value-type="float" office:value="-0.005960368">
                <text:p>-0.005960368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381.959045410156">
                <text:p>381.959045410156</text:p>
              </table:table-cell>
              <table:table-cell office:value-type="float" office:value="0.008234232">
                <text:p>0.008234232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382.070129394531">
                <text:p>382.070129394531</text:p>
              </table:table-cell>
              <table:table-cell office:value-type="float" office:value="0.001198114">
                <text:p>0.001198114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382.181243896484">
                <text:p>382.181243896484</text:p>
              </table:table-cell>
              <table:table-cell office:value-type="float" office:value="0.004793785">
                <text:p>0.004793785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382.292358398438">
                <text:p>382.292358398438</text:p>
              </table:table-cell>
              <table:table-cell office:value-type="float" office:value="-0.003781458">
                <text:p>-0.003781458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382.403503417969">
                <text:p>382.403503417969</text:p>
              </table:table-cell>
              <table:table-cell office:value-type="float" office:value="0.004407111">
                <text:p>0.004407111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382.514617919922">
                <text:p>382.514617919922</text:p>
              </table:table-cell>
              <table:table-cell office:value-type="float" office:value="0.01562442">
                <text:p>0.01562442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382.625762939453">
                <text:p>382.625762939453</text:p>
              </table:table-cell>
              <table:table-cell office:value-type="float" office:value="-0.001663968">
                <text:p>-0.001663968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382.736907958984">
                <text:p>382.736907958984</text:p>
              </table:table-cell>
              <table:table-cell office:value-type="float" office:value="0.007453039">
                <text:p>0.007453039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382.848052978516">
                <text:p>382.848052978516</text:p>
              </table:table-cell>
              <table:table-cell office:value-type="float" office:value="0.004028356">
                <text:p>0.004028356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382.959197998047">
                <text:p>382.959197998047</text:p>
              </table:table-cell>
              <table:table-cell office:value-type="float" office:value="0.008648969">
                <text:p>0.008648969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383.070343017578">
                <text:p>383.070343017578</text:p>
              </table:table-cell>
              <table:table-cell office:value-type="float" office:value="0.003836031">
                <text:p>0.003836031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383.181518554688">
                <text:p>383.181518554688</text:p>
              </table:table-cell>
              <table:table-cell office:value-type="float" office:value="0.01328681">
                <text:p>0.01328681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383.292694091797">
                <text:p>383.292694091797</text:p>
              </table:table-cell>
              <table:table-cell office:value-type="float" office:value="0.002967611">
                <text:p>0.002967611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383.403869628906">
                <text:p>383.403869628906</text:p>
              </table:table-cell>
              <table:table-cell office:value-type="float" office:value="-0.00202377">
                <text:p>-0.00202377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383.515045166016">
                <text:p>383.515045166016</text:p>
              </table:table-cell>
              <table:table-cell office:value-type="float" office:value="-0.0009261724">
                <text:p>-0.0009261724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383.626220703125">
                <text:p>383.626220703125</text:p>
              </table:table-cell>
              <table:table-cell office:value-type="float" office:value="0.01115507">
                <text:p>0.01115507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383.737426757813">
                <text:p>383.737426757813</text:p>
              </table:table-cell>
              <table:table-cell office:value-type="float" office:value="0.01270508">
                <text:p>0.01270508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383.8486328125">
                <text:p>383.8486328125</text:p>
              </table:table-cell>
              <table:table-cell office:value-type="float" office:value="0.0004727395">
                <text:p>0.0004727395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383.959838867188">
                <text:p>383.959838867188</text:p>
              </table:table-cell>
              <table:table-cell office:value-type="float" office:value="-0.0008086697">
                <text:p>-0.0008086697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384.071044921875">
                <text:p>384.071044921875</text:p>
              </table:table-cell>
              <table:table-cell office:value-type="float" office:value="-0.008059311">
                <text:p>-0.008059311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384.182250976563">
                <text:p>384.182250976563</text:p>
              </table:table-cell>
              <table:table-cell office:value-type="float" office:value="0.01012702">
                <text:p>0.01012702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384.293487548828">
                <text:p>384.293487548828</text:p>
              </table:table-cell>
              <table:table-cell office:value-type="float" office:value="-0.007039455">
                <text:p>-0.007039455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384.404693603516">
                <text:p>384.404693603516</text:p>
              </table:table-cell>
              <table:table-cell office:value-type="float" office:value="0.01124955">
                <text:p>0.01124955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384.515930175781">
                <text:p>384.515930175781</text:p>
              </table:table-cell>
              <table:table-cell office:value-type="float" office:value="0.01148207">
                <text:p>0.01148207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384.627197265625">
                <text:p>384.627197265625</text:p>
              </table:table-cell>
              <table:table-cell office:value-type="float" office:value="-0.008677459">
                <text:p>-0.008677459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384.738433837891">
                <text:p>384.738433837891</text:p>
              </table:table-cell>
              <table:table-cell office:value-type="float" office:value="-0.002883961">
                <text:p>-0.002883961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384.849670410156">
                <text:p>384.849670410156</text:p>
              </table:table-cell>
              <table:table-cell office:value-type="float" office:value="0.01613582">
                <text:p>0.01613582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384.9609375">
                <text:p>384.9609375</text:p>
              </table:table-cell>
              <table:table-cell office:value-type="float" office:value="0.0132735">
                <text:p>0.0132735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385.072204589844">
                <text:p>385.072204589844</text:p>
              </table:table-cell>
              <table:table-cell office:value-type="float" office:value="-0.004195221">
                <text:p>-0.004195221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385.183471679688">
                <text:p>385.183471679688</text:p>
              </table:table-cell>
              <table:table-cell office:value-type="float" office:value="0.01318866">
                <text:p>0.01318866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385.294738769531">
                <text:p>385.294738769531</text:p>
              </table:table-cell>
              <table:table-cell office:value-type="float" office:value="0.008056658">
                <text:p>0.008056658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385.406036376953">
                <text:p>385.406036376953</text:p>
              </table:table-cell>
              <table:table-cell office:value-type="float" office:value="-0.002659528">
                <text:p>-0.002659528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385.517333984375">
                <text:p>385.517333984375</text:p>
              </table:table-cell>
              <table:table-cell office:value-type="float" office:value="0.004581318">
                <text:p>0.004581318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385.628601074219">
                <text:p>385.628601074219</text:p>
              </table:table-cell>
              <table:table-cell office:value-type="float" office:value="-0.003876351">
                <text:p>-0.003876351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385.739898681641">
                <text:p>385.739898681641</text:p>
              </table:table-cell>
              <table:table-cell office:value-type="float" office:value="-0.007487557">
                <text:p>-0.007487557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385.851226806641">
                <text:p>385.851226806641</text:p>
              </table:table-cell>
              <table:table-cell office:value-type="float" office:value="0.01177296">
                <text:p>0.01177296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385.962524414063">
                <text:p>385.962524414063</text:p>
              </table:table-cell>
              <table:table-cell office:value-type="float" office:value="-0.003691101">
                <text:p>-0.003691101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386.073852539063">
                <text:p>386.073852539063</text:p>
              </table:table-cell>
              <table:table-cell office:value-type="float" office:value="0.01243559">
                <text:p>0.01243559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386.185180664063">
                <text:p>386.185180664063</text:p>
              </table:table-cell>
              <table:table-cell office:value-type="float" office:value="0.0006096518">
                <text:p>0.0006096518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386.296508789063">
                <text:p>386.296508789063</text:p>
              </table:table-cell>
              <table:table-cell office:value-type="float" office:value="0.00660978">
                <text:p>0.00660978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386.407836914063">
                <text:p>386.407836914063</text:p>
              </table:table-cell>
              <table:table-cell office:value-type="float" office:value="0.002236468">
                <text:p>0.002236468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386.519165039063">
                <text:p>386.519165039063</text:p>
              </table:table-cell>
              <table:table-cell office:value-type="float" office:value="0.002783222">
                <text:p>0.002783222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386.630523681641">
                <text:p>386.630523681641</text:p>
              </table:table-cell>
              <table:table-cell office:value-type="float" office:value="0.003575768">
                <text:p>0.003575768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386.741882324219">
                <text:p>386.741882324219</text:p>
              </table:table-cell>
              <table:table-cell office:value-type="float" office:value="0.001350982">
                <text:p>0.001350982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386.853240966797">
                <text:p>386.853240966797</text:p>
              </table:table-cell>
              <table:table-cell office:value-type="float" office:value="-0.002247466">
                <text:p>-0.002247466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386.964599609375">
                <text:p>386.964599609375</text:p>
              </table:table-cell>
              <table:table-cell office:value-type="float" office:value="-0.004321664">
                <text:p>-0.004321664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387.075958251953">
                <text:p>387.075958251953</text:p>
              </table:table-cell>
              <table:table-cell office:value-type="float" office:value="0.00831529">
                <text:p>0.00831529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387.187347412109">
                <text:p>387.187347412109</text:p>
              </table:table-cell>
              <table:table-cell office:value-type="float" office:value="-0.004760192">
                <text:p>-0.004760192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387.298736572266">
                <text:p>387.298736572266</text:p>
              </table:table-cell>
              <table:table-cell office:value-type="float" office:value="0.01415788">
                <text:p>0.01415788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387.410095214844">
                <text:p>387.410095214844</text:p>
              </table:table-cell>
              <table:table-cell office:value-type="float" office:value="0.004054716">
                <text:p>0.004054716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387.521514892578">
                <text:p>387.521514892578</text:p>
              </table:table-cell>
              <table:table-cell office:value-type="float" office:value="-0.0004664132">
                <text:p>-0.0004664132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387.632904052734">
                <text:p>387.632904052734</text:p>
              </table:table-cell>
              <table:table-cell office:value-type="float" office:value="0.0003000647">
                <text:p>0.0003000647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387.744293212891">
                <text:p>387.744293212891</text:p>
              </table:table-cell>
              <table:table-cell office:value-type="float" office:value="0.01179017">
                <text:p>0.01179017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387.855712890625">
                <text:p>387.855712890625</text:p>
              </table:table-cell>
              <table:table-cell office:value-type="float" office:value="0.001182516">
                <text:p>0.001182516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387.967132568359">
                <text:p>387.967132568359</text:p>
              </table:table-cell>
              <table:table-cell office:value-type="float" office:value="0.00422885">
                <text:p>0.00422885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388.078552246094">
                <text:p>388.078552246094</text:p>
              </table:table-cell>
              <table:table-cell office:value-type="float" office:value="0.001815396">
                <text:p>0.001815396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388.189971923828">
                <text:p>388.189971923828</text:p>
              </table:table-cell>
              <table:table-cell office:value-type="float" office:value="0.0008025427">
                <text:p>0.0008025427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388.301422119141">
                <text:p>388.301422119141</text:p>
              </table:table-cell>
              <table:table-cell office:value-type="float" office:value="-0.004596362">
                <text:p>-0.004596362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388.412872314453">
                <text:p>388.412872314453</text:p>
              </table:table-cell>
              <table:table-cell office:value-type="float" office:value="-0.007911222">
                <text:p>-0.007911222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388.524291992188">
                <text:p>388.524291992188</text:p>
              </table:table-cell>
              <table:table-cell office:value-type="float" office:value="0.005966521">
                <text:p>0.005966521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388.635772705078">
                <text:p>388.635772705078</text:p>
              </table:table-cell>
              <table:table-cell office:value-type="float" office:value="0.005032437">
                <text:p>0.005032437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388.747222900391">
                <text:p>388.7472229003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388.858673095703">
                <text:p>388.858673095703</text:p>
              </table:table-cell>
              <table:table-cell office:value-type="float" office:value="-0.007570819">
                <text:p>-0.007570819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388.970153808594">
                <text:p>388.970153808594</text:p>
              </table:table-cell>
              <table:table-cell office:value-type="float" office:value="0.003313559">
                <text:p>0.003313559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389.081634521484">
                <text:p>389.081634521484</text:p>
              </table:table-cell>
              <table:table-cell office:value-type="float" office:value="-0.0003711076">
                <text:p>-0.0003711076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389.193115234375">
                <text:p>389.193115234375</text:p>
              </table:table-cell>
              <table:table-cell office:value-type="float" office:value="0.002330969">
                <text:p>0.002330969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389.304595947266">
                <text:p>389.304595947266</text:p>
              </table:table-cell>
              <table:table-cell office:value-type="float" office:value="-0.0007356796">
                <text:p>-0.0007356796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389.416076660156">
                <text:p>389.416076660156</text:p>
              </table:table-cell>
              <table:table-cell office:value-type="float" office:value="0.004041775">
                <text:p>0.004041775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389.527587890625">
                <text:p>389.527587890625</text:p>
              </table:table-cell>
              <table:table-cell office:value-type="float" office:value="-0.00275337">
                <text:p>-0.00275337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389.639099121094">
                <text:p>389.639099121094</text:p>
              </table:table-cell>
              <table:table-cell office:value-type="float" office:value="0.01276773">
                <text:p>0.01276773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389.750610351563">
                <text:p>389.750610351563</text:p>
              </table:table-cell>
              <table:table-cell office:value-type="float" office:value="-0.002926678">
                <text:p>-0.002926678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389.862121582031">
                <text:p>389.862121582031</text:p>
              </table:table-cell>
              <table:table-cell office:value-type="float" office:value="-0.003698326">
                <text:p>-0.003698326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389.9736328125">
                <text:p>389.9736328125</text:p>
              </table:table-cell>
              <table:table-cell office:value-type="float" office:value="-0.001449366">
                <text:p>-0.001449366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390.085174560547">
                <text:p>390.085174560547</text:p>
              </table:table-cell>
              <table:table-cell office:value-type="float" office:value="-0.002801628">
                <text:p>-0.002801628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390.196685791016">
                <text:p>390.196685791016</text:p>
              </table:table-cell>
              <table:table-cell office:value-type="float" office:value="0.01284008">
                <text:p>0.01284008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390.308227539063">
                <text:p>390.308227539063</text:p>
              </table:table-cell>
              <table:table-cell office:value-type="float" office:value="-0.0004065255">
                <text:p>-0.0004065255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390.419769287109">
                <text:p>390.419769287109</text:p>
              </table:table-cell>
              <table:table-cell office:value-type="float" office:value="0.00119354">
                <text:p>0.00119354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390.531341552734">
                <text:p>390.531341552734</text:p>
              </table:table-cell>
              <table:table-cell office:value-type="float" office:value="0.00151803">
                <text:p>0.00151803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390.642883300781">
                <text:p>390.642883300781</text:p>
              </table:table-cell>
              <table:table-cell office:value-type="float" office:value="-0.003226363">
                <text:p>-0.003226363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390.754455566406">
                <text:p>390.754455566406</text:p>
              </table:table-cell>
              <table:table-cell office:value-type="float" office:value="0.01475021">
                <text:p>0.01475021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390.866027832031">
                <text:p>390.866027832031</text:p>
              </table:table-cell>
              <table:table-cell office:value-type="float" office:value="0.0003682736">
                <text:p>0.0003682736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390.977600097656">
                <text:p>390.977600097656</text:p>
              </table:table-cell>
              <table:table-cell office:value-type="float" office:value="0.000464812">
                <text:p>0.000464812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391.089172363281">
                <text:p>391.089172363281</text:p>
              </table:table-cell>
              <table:table-cell office:value-type="float" office:value="-0.005487393">
                <text:p>-0.005487393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391.200744628906">
                <text:p>391.200744628906</text:p>
              </table:table-cell>
              <table:table-cell office:value-type="float" office:value="0.0153013">
                <text:p>0.0153013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391.312347412109">
                <text:p>391.312347412109</text:p>
              </table:table-cell>
              <table:table-cell office:value-type="float" office:value="-0.001190712">
                <text:p>-0.001190712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391.423950195313">
                <text:p>391.423950195313</text:p>
              </table:table-cell>
              <table:table-cell office:value-type="float" office:value="0.01111891">
                <text:p>0.01111891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391.535552978516">
                <text:p>391.535552978516</text:p>
              </table:table-cell>
              <table:table-cell office:value-type="float" office:value="-0.008379362">
                <text:p>-0.008379362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391.647155761719">
                <text:p>391.647155761719</text:p>
              </table:table-cell>
              <table:table-cell office:value-type="float" office:value="0.004441823">
                <text:p>0.004441823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391.758758544922">
                <text:p>391.758758544922</text:p>
              </table:table-cell>
              <table:table-cell office:value-type="float" office:value="-0.009395885">
                <text:p>-0.009395885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391.870391845703">
                <text:p>391.870391845703</text:p>
              </table:table-cell>
              <table:table-cell office:value-type="float" office:value="0.01125628">
                <text:p>0.01125628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391.982025146484">
                <text:p>391.982025146484</text:p>
              </table:table-cell>
              <table:table-cell office:value-type="float" office:value="0.00214792">
                <text:p>0.00214792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392.093658447266">
                <text:p>392.093658447266</text:p>
              </table:table-cell>
              <table:table-cell office:value-type="float" office:value="-0.007591855">
                <text:p>-0.007591855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392.205291748047">
                <text:p>392.205291748047</text:p>
              </table:table-cell>
              <table:table-cell office:value-type="float" office:value="0.000631284">
                <text:p>0.000631284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392.316925048828">
                <text:p>392.316925048828</text:p>
              </table:table-cell>
              <table:table-cell office:value-type="float" office:value="0.01457062">
                <text:p>0.01457062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392.428558349609">
                <text:p>392.428558349609</text:p>
              </table:table-cell>
              <table:table-cell office:value-type="float" office:value="0.01042542">
                <text:p>0.01042542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392.540222167969">
                <text:p>392.540222167969</text:p>
              </table:table-cell>
              <table:table-cell office:value-type="float" office:value="-0.003984471">
                <text:p>-0.003984471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392.651885986328">
                <text:p>392.651885986328</text:p>
              </table:table-cell>
              <table:table-cell office:value-type="float" office:value="-0.006706753">
                <text:p>-0.006706753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392.763549804688">
                <text:p>392.763549804688</text:p>
              </table:table-cell>
              <table:table-cell office:value-type="float" office:value="-0.0002310461">
                <text:p>-0.0002310461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392.875213623047">
                <text:p>392.875213623047</text:p>
              </table:table-cell>
              <table:table-cell office:value-type="float" office:value="0.0007736936">
                <text:p>0.0007736936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392.986907958984">
                <text:p>392.986907958984</text:p>
              </table:table-cell>
              <table:table-cell office:value-type="float" office:value="0.004847923">
                <text:p>0.004847923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393.098602294922">
                <text:p>393.098602294922</text:p>
              </table:table-cell>
              <table:table-cell office:value-type="float" office:value="0.0132448">
                <text:p>0.0132448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393.210266113281">
                <text:p>393.210266113281</text:p>
              </table:table-cell>
              <table:table-cell office:value-type="float" office:value="-0.001761166">
                <text:p>-0.001761166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393.321960449219">
                <text:p>393.321960449219</text:p>
              </table:table-cell>
              <table:table-cell office:value-type="float" office:value="-0.001310684">
                <text:p>-0.001310684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393.433685302734">
                <text:p>393.433685302734</text:p>
              </table:table-cell>
              <table:table-cell office:value-type="float" office:value="-0.004515582">
                <text:p>-0.004515582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393.545379638672">
                <text:p>393.545379638672</text:p>
              </table:table-cell>
              <table:table-cell office:value-type="float" office:value="-0.008833586">
                <text:p>-0.008833586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393.657104492188">
                <text:p>393.657104492188</text:p>
              </table:table-cell>
              <table:table-cell office:value-type="float" office:value="0.001012618">
                <text:p>0.001012618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393.768798828125">
                <text:p>393.768798828125</text:p>
              </table:table-cell>
              <table:table-cell office:value-type="float" office:value="-0.0052054">
                <text:p>-0.0052054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393.880523681641">
                <text:p>393.880523681641</text:p>
              </table:table-cell>
              <table:table-cell office:value-type="float" office:value="0.01120887">
                <text:p>0.01120887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393.992248535156">
                <text:p>393.992248535156</text:p>
              </table:table-cell>
              <table:table-cell office:value-type="float" office:value="0.02014236">
                <text:p>0.02014236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394.10400390625">
                <text:p>394.10400390625</text:p>
              </table:table-cell>
              <table:table-cell office:value-type="float" office:value="-0.005747321">
                <text:p>-0.005747321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394.215728759766">
                <text:p>394.215728759766</text:p>
              </table:table-cell>
              <table:table-cell office:value-type="float" office:value="0.001270522">
                <text:p>0.001270522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394.327484130859">
                <text:p>394.327484130859</text:p>
              </table:table-cell>
              <table:table-cell office:value-type="float" office:value="0.005771514">
                <text:p>0.005771514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394.439239501953">
                <text:p>394.439239501953</text:p>
              </table:table-cell>
              <table:table-cell office:value-type="float" office:value="-0.002180484">
                <text:p>-0.002180484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394.550994873047">
                <text:p>394.550994873047</text:p>
              </table:table-cell>
              <table:table-cell office:value-type="float" office:value="-0.007352633">
                <text:p>-0.007352633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394.662750244141">
                <text:p>394.662750244141</text:p>
              </table:table-cell>
              <table:table-cell office:value-type="float" office:value="0.003281886">
                <text:p>0.003281886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394.774536132813">
                <text:p>394.774536132813</text:p>
              </table:table-cell>
              <table:table-cell office:value-type="float" office:value="-0.002740707">
                <text:p>-0.002740707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394.886291503906">
                <text:p>394.886291503906</text:p>
              </table:table-cell>
              <table:table-cell office:value-type="float" office:value="0.00759888">
                <text:p>0.00759888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394.998077392578">
                <text:p>394.998077392578</text:p>
              </table:table-cell>
              <table:table-cell office:value-type="float" office:value="-0.002141156">
                <text:p>-0.002141156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395.10986328125">
                <text:p>395.10986328125</text:p>
              </table:table-cell>
              <table:table-cell office:value-type="float" office:value="0.009061393">
                <text:p>0.009061393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395.221649169922">
                <text:p>395.221649169922</text:p>
              </table:table-cell>
              <table:table-cell office:value-type="float" office:value="-0.001201032">
                <text:p>-0.001201032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395.333465576172">
                <text:p>395.333465576172</text:p>
              </table:table-cell>
              <table:table-cell office:value-type="float" office:value="-0.007520015">
                <text:p>-0.007520015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395.445251464844">
                <text:p>395.445251464844</text:p>
              </table:table-cell>
              <table:table-cell office:value-type="float" office:value="-0.001963187">
                <text:p>-0.001963187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395.557067871094">
                <text:p>395.557067871094</text:p>
              </table:table-cell>
              <table:table-cell office:value-type="float" office:value="-0.005131487">
                <text:p>-0.005131487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395.668884277344">
                <text:p>395.668884277344</text:p>
              </table:table-cell>
              <table:table-cell office:value-type="float" office:value="0.04090488">
                <text:p>0.04090488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395.780700683594">
                <text:p>395.780700683594</text:p>
              </table:table-cell>
              <table:table-cell office:value-type="float" office:value="-0.003430501">
                <text:p>-0.003430501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395.892547607422">
                <text:p>395.892547607422</text:p>
              </table:table-cell>
              <table:table-cell office:value-type="float" office:value="0.003224533">
                <text:p>0.003224533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396.004364013672">
                <text:p>396.004364013672</text:p>
              </table:table-cell>
              <table:table-cell office:value-type="float" office:value="0.002267021">
                <text:p>0.002267021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396.1162109375">
                <text:p>396.1162109375</text:p>
              </table:table-cell>
              <table:table-cell office:value-type="float" office:value="0.04419417">
                <text:p>0.04419417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396.228057861328">
                <text:p>396.228057861328</text:p>
              </table:table-cell>
              <table:table-cell office:value-type="float" office:value="-0.0005701693">
                <text:p>-0.0005701693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396.339904785156">
                <text:p>396.339904785156</text:p>
              </table:table-cell>
              <table:table-cell office:value-type="float" office:value="-0.001598075">
                <text:p>-0.001598075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396.451751708984">
                <text:p>396.451751708984</text:p>
              </table:table-cell>
              <table:table-cell office:value-type="float" office:value="-0.004317311">
                <text:p>-0.004317311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396.563629150391">
                <text:p>396.563629150391</text:p>
              </table:table-cell>
              <table:table-cell office:value-type="float" office:value="-0.006614219">
                <text:p>-0.006614219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396.675476074219">
                <text:p>396.675476074219</text:p>
              </table:table-cell>
              <table:table-cell office:value-type="float" office:value="-0.003279729">
                <text:p>-0.003279729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396.787353515625">
                <text:p>396.787353515625</text:p>
              </table:table-cell>
              <table:table-cell office:value-type="float" office:value="0.01077397">
                <text:p>0.01077397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396.899230957031">
                <text:p>396.899230957031</text:p>
              </table:table-cell>
              <table:table-cell office:value-type="float" office:value="-0.003777896">
                <text:p>-0.003777896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397.011108398438">
                <text:p>397.011108398438</text:p>
              </table:table-cell>
              <table:table-cell office:value-type="float" office:value="0.001418787">
                <text:p>0.001418787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397.123016357422">
                <text:p>397.123016357422</text:p>
              </table:table-cell>
              <table:table-cell office:value-type="float" office:value="-0.003186792">
                <text:p>-0.003186792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397.234893798828">
                <text:p>397.234893798828</text:p>
              </table:table-cell>
              <table:table-cell office:value-type="float" office:value="0.005968565">
                <text:p>0.005968565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397.346801757813">
                <text:p>397.346801757813</text:p>
              </table:table-cell>
              <table:table-cell office:value-type="float" office:value="0.003654947">
                <text:p>0.003654947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397.458709716797">
                <text:p>397.458709716797</text:p>
              </table:table-cell>
              <table:table-cell office:value-type="float" office:value="-0.001617992">
                <text:p>-0.001617992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397.570617675781">
                <text:p>397.570617675781</text:p>
              </table:table-cell>
              <table:table-cell office:value-type="float" office:value="0.005781503">
                <text:p>0.005781503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397.682525634766">
                <text:p>397.682525634766</text:p>
              </table:table-cell>
              <table:table-cell office:value-type="float" office:value="-0.002446963">
                <text:p>-0.002446963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397.794464111328">
                <text:p>397.794464111328</text:p>
              </table:table-cell>
              <table:table-cell office:value-type="float" office:value="0.00258593">
                <text:p>0.00258593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397.906402587891">
                <text:p>397.906402587891</text:p>
              </table:table-cell>
              <table:table-cell office:value-type="float" office:value="0.001666301">
                <text:p>0.001666301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398.018310546875">
                <text:p>398.018310546875</text:p>
              </table:table-cell>
              <table:table-cell office:value-type="float" office:value="0.00576617">
                <text:p>0.00576617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398.130249023438">
                <text:p>398.130249023438</text:p>
              </table:table-cell>
              <table:table-cell office:value-type="float" office:value="-0.003174592">
                <text:p>-0.003174592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398.242218017578">
                <text:p>398.242218017578</text:p>
              </table:table-cell>
              <table:table-cell office:value-type="float" office:value="-0.0002645222">
                <text:p>-0.0002645222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398.354156494141">
                <text:p>398.354156494141</text:p>
              </table:table-cell>
              <table:table-cell office:value-type="float" office:value="-0.002876712">
                <text:p>-0.002876712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398.466125488281">
                <text:p>398.466125488281</text:p>
              </table:table-cell>
              <table:table-cell office:value-type="float" office:value="-0.002045406">
                <text:p>-0.002045406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398.578094482422">
                <text:p>398.578094482422</text:p>
              </table:table-cell>
              <table:table-cell office:value-type="float" office:value="-0.001442131">
                <text:p>-0.001442131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398.690063476563">
                <text:p>398.690063476563</text:p>
              </table:table-cell>
              <table:table-cell office:value-type="float" office:value="-0.006018423">
                <text:p>-0.006018423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398.802032470703">
                <text:p>398.802032470703</text:p>
              </table:table-cell>
              <table:table-cell office:value-type="float" office:value="-0.005098545">
                <text:p>-0.005098545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398.914001464844">
                <text:p>398.914001464844</text:p>
              </table:table-cell>
              <table:table-cell office:value-type="float" office:value="-0.003082282">
                <text:p>-0.003082282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399.026000976563">
                <text:p>399.026000976563</text:p>
              </table:table-cell>
              <table:table-cell office:value-type="float" office:value="0.01979387">
                <text:p>0.01979387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399.137969970703">
                <text:p>399.137969970703</text:p>
              </table:table-cell>
              <table:table-cell office:value-type="float" office:value="-0.001588056">
                <text:p>-0.001588056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399.249969482422">
                <text:p>399.249969482422</text:p>
              </table:table-cell>
              <table:table-cell office:value-type="float" office:value="0.01605304">
                <text:p>0.01605304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399.361968994141">
                <text:p>399.361968994141</text:p>
              </table:table-cell>
              <table:table-cell office:value-type="float" office:value="-0.001958644">
                <text:p>-0.001958644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399.473999023438">
                <text:p>399.473999023438</text:p>
              </table:table-cell>
              <table:table-cell office:value-type="float" office:value="0.008756663">
                <text:p>0.008756663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399.585998535156">
                <text:p>399.5859985351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399.698028564453">
                <text:p>399.698028564453</text:p>
              </table:table-cell>
              <table:table-cell office:value-type="float" office:value="-0.001313306">
                <text:p>-0.001313306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399.81005859375">
                <text:p>399.81005859375</text:p>
              </table:table-cell>
              <table:table-cell office:value-type="float" office:value="-0.00612706">
                <text:p>-0.00612706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399.922088623047">
                <text:p>399.922088623047</text:p>
              </table:table-cell>
              <table:table-cell office:value-type="float" office:value="-0.002088777">
                <text:p>-0.002088777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400.034118652344">
                <text:p>400.034118652344</text:p>
              </table:table-cell>
              <table:table-cell office:value-type="float" office:value="-0.005699728">
                <text:p>-0.005699728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400.146148681641">
                <text:p>400.1461486816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400.258209228516">
                <text:p>400.258209228516</text:p>
              </table:table-cell>
              <table:table-cell office:value-type="float" office:value="-0.002858762">
                <text:p>-0.002858762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400.370269775391">
                <text:p>400.370269775391</text:p>
              </table:table-cell>
              <table:table-cell office:value-type="float" office:value="0.00290687">
                <text:p>0.00290687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400.482330322266">
                <text:p>400.482330322266</text:p>
              </table:table-cell>
              <table:table-cell office:value-type="float" office:value="-0.001640559">
                <text:p>-0.001640559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400.594390869141">
                <text:p>400.594390869141</text:p>
              </table:table-cell>
              <table:table-cell office:value-type="float" office:value="0.006048443">
                <text:p>0.006048443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400.706451416016">
                <text:p>400.706451416016</text:p>
              </table:table-cell>
              <table:table-cell office:value-type="float" office:value="-0.003831885">
                <text:p>-0.003831885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400.818511962891">
                <text:p>400.818511962891</text:p>
              </table:table-cell>
              <table:table-cell office:value-type="float" office:value="0.00562185">
                <text:p>0.00562185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400.930603027344">
                <text:p>400.930603027344</text:p>
              </table:table-cell>
              <table:table-cell office:value-type="float" office:value="0.005975419">
                <text:p>0.005975419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401.042694091797">
                <text:p>401.042694091797</text:p>
              </table:table-cell>
              <table:table-cell office:value-type="float" office:value="-0.001100668">
                <text:p>-0.001100668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401.15478515625">
                <text:p>401.15478515625</text:p>
              </table:table-cell>
              <table:table-cell office:value-type="float" office:value="0.005314692">
                <text:p>0.005314692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401.266876220703">
                <text:p>401.266876220703</text:p>
              </table:table-cell>
              <table:table-cell office:value-type="float" office:value="0.004145966">
                <text:p>0.004145966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401.378997802734">
                <text:p>401.378997802734</text:p>
              </table:table-cell>
              <table:table-cell office:value-type="float" office:value="0.001240911">
                <text:p>0.001240911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401.491088867188">
                <text:p>401.491088867188</text:p>
              </table:table-cell>
              <table:table-cell office:value-type="float" office:value="-0.0009505711">
                <text:p>-0.0009505711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401.603210449219">
                <text:p>401.603210449219</text:p>
              </table:table-cell>
              <table:table-cell office:value-type="float" office:value="0.000273756">
                <text:p>0.000273756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401.71533203125">
                <text:p>401.71533203125</text:p>
              </table:table-cell>
              <table:table-cell office:value-type="float" office:value="-0.00239604">
                <text:p>-0.00239604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401.827453613281">
                <text:p>401.827453613281</text:p>
              </table:table-cell>
              <table:table-cell office:value-type="float" office:value="0.001021624">
                <text:p>0.001021624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401.939605712891">
                <text:p>401.939605712891</text:p>
              </table:table-cell>
              <table:table-cell office:value-type="float" office:value="0.002747826">
                <text:p>0.002747826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402.051727294922">
                <text:p>402.051727294922</text:p>
              </table:table-cell>
              <table:table-cell office:value-type="float" office:value="-0.005010919">
                <text:p>-0.005010919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402.163879394531">
                <text:p>402.163879394531</text:p>
              </table:table-cell>
              <table:table-cell office:value-type="float" office:value="0.00987155">
                <text:p>0.00987155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402.276031494141">
                <text:p>402.276031494141</text:p>
              </table:table-cell>
              <table:table-cell office:value-type="float" office:value="-0.002467701">
                <text:p>-0.002467701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402.38818359375">
                <text:p>402.38818359375</text:p>
              </table:table-cell>
              <table:table-cell office:value-type="float" office:value="-0.001086711">
                <text:p>-0.001086711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402.500335693359">
                <text:p>402.500335693359</text:p>
              </table:table-cell>
              <table:table-cell office:value-type="float" office:value="0.000328202">
                <text:p>0.000328202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402.612487792969">
                <text:p>402.612487792969</text:p>
              </table:table-cell>
              <table:table-cell office:value-type="float" office:value="0.005265553">
                <text:p>0.005265553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402.724670410156">
                <text:p>402.724670410156</text:p>
              </table:table-cell>
              <table:table-cell office:value-type="float" office:value="0.005393303">
                <text:p>0.005393303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402.836853027344">
                <text:p>402.836853027344</text:p>
              </table:table-cell>
              <table:table-cell office:value-type="float" office:value="0.00368353">
                <text:p>0.00368353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402.949035644531">
                <text:p>402.949035644531</text:p>
              </table:table-cell>
              <table:table-cell office:value-type="float" office:value="0.01200878">
                <text:p>0.01200878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403.061218261719">
                <text:p>403.061218261719</text:p>
              </table:table-cell>
              <table:table-cell office:value-type="float" office:value="0.002208778">
                <text:p>0.002208778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403.173400878906">
                <text:p>403.173400878906</text:p>
              </table:table-cell>
              <table:table-cell office:value-type="float" office:value="0.01106674">
                <text:p>0.01106674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403.285614013672">
                <text:p>403.285614013672</text:p>
              </table:table-cell>
              <table:table-cell office:value-type="float" office:value="-0.0006595896">
                <text:p>-0.0006595896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403.397827148438">
                <text:p>403.397827148438</text:p>
              </table:table-cell>
              <table:table-cell office:value-type="float" office:value="-0.004920744">
                <text:p>-0.004920744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403.510040283203">
                <text:p>403.510040283203</text:p>
              </table:table-cell>
              <table:table-cell office:value-type="float" office:value="0.002256899">
                <text:p>0.002256899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403.622253417969">
                <text:p>403.622253417969</text:p>
              </table:table-cell>
              <table:table-cell office:value-type="float" office:value="-0.00654726">
                <text:p>-0.00654726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403.734466552734">
                <text:p>403.734466552734</text:p>
              </table:table-cell>
              <table:table-cell office:value-type="float" office:value="0.003329775">
                <text:p>0.003329775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403.8466796875">
                <text:p>403.8466796875</text:p>
              </table:table-cell>
              <table:table-cell office:value-type="float" office:value="-0.001774471">
                <text:p>-0.001774471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403.958923339844">
                <text:p>403.958923339844</text:p>
              </table:table-cell>
              <table:table-cell office:value-type="float" office:value="-0.0004570163">
                <text:p>-0.0004570163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404.071166992188">
                <text:p>404.0711669921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404.183410644531">
                <text:p>404.183410644531</text:p>
              </table:table-cell>
              <table:table-cell office:value-type="float" office:value="-0.007940236">
                <text:p>-0.007940236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404.295654296875">
                <text:p>404.295654296875</text:p>
              </table:table-cell>
              <table:table-cell office:value-type="float" office:value="0.009211433">
                <text:p>0.009211433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404.407897949219">
                <text:p>404.407897949219</text:p>
              </table:table-cell>
              <table:table-cell office:value-type="float" office:value="-0.008041281">
                <text:p>-0.008041281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404.520172119141">
                <text:p>404.520172119141</text:p>
              </table:table-cell>
              <table:table-cell office:value-type="float" office:value="0.00506149">
                <text:p>0.00506149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404.632446289063">
                <text:p>404.632446289063</text:p>
              </table:table-cell>
              <table:table-cell office:value-type="float" office:value="0.004574956">
                <text:p>0.004574956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404.744689941406">
                <text:p>404.744689941406</text:p>
              </table:table-cell>
              <table:table-cell office:value-type="float" office:value="0.005686322">
                <text:p>0.005686322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404.856994628906">
                <text:p>404.856994628906</text:p>
              </table:table-cell>
              <table:table-cell office:value-type="float" office:value="-0.00874085">
                <text:p>-0.00874085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404.969268798828">
                <text:p>404.969268798828</text:p>
              </table:table-cell>
              <table:table-cell office:value-type="float" office:value="0.002298879">
                <text:p>0.002298879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405.08154296875">
                <text:p>405.08154296875</text:p>
              </table:table-cell>
              <table:table-cell office:value-type="float" office:value="0.01311435">
                <text:p>0.01311435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405.19384765625">
                <text:p>405.19384765625</text:p>
              </table:table-cell>
              <table:table-cell office:value-type="float" office:value="-0.004140037">
                <text:p>-0.004140037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405.30615234375">
                <text:p>405.30615234375</text:p>
              </table:table-cell>
              <table:table-cell office:value-type="float" office:value="0.0002259846">
                <text:p>0.0002259846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405.41845703125">
                <text:p>405.41845703125</text:p>
              </table:table-cell>
              <table:table-cell office:value-type="float" office:value="0.0005360107">
                <text:p>0.0005360107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405.53076171875">
                <text:p>405.53076171875</text:p>
              </table:table-cell>
              <table:table-cell office:value-type="float" office:value="0.01030836">
                <text:p>0.01030836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405.64306640625">
                <text:p>405.64306640625</text:p>
              </table:table-cell>
              <table:table-cell office:value-type="float" office:value="-0.001373001">
                <text:p>-0.001373001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405.755401611328">
                <text:p>405.755401611328</text:p>
              </table:table-cell>
              <table:table-cell office:value-type="float" office:value="-0.00184067">
                <text:p>-0.00184067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405.867706298828">
                <text:p>405.867706298828</text:p>
              </table:table-cell>
              <table:table-cell office:value-type="float" office:value="-0.002533681">
                <text:p>-0.002533681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405.980041503906">
                <text:p>405.980041503906</text:p>
              </table:table-cell>
              <table:table-cell office:value-type="float" office:value="0.0158213">
                <text:p>0.0158213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406.092376708984">
                <text:p>406.092376708984</text:p>
              </table:table-cell>
              <table:table-cell office:value-type="float" office:value="-0.006934342">
                <text:p>-0.006934342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406.204742431641">
                <text:p>406.204742431641</text:p>
              </table:table-cell>
              <table:table-cell office:value-type="float" office:value="0.00677868">
                <text:p>0.00677868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406.317077636719">
                <text:p>406.317077636719</text:p>
              </table:table-cell>
              <table:table-cell office:value-type="float" office:value="-0.0004604452">
                <text:p>-0.0004604452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406.429443359375">
                <text:p>406.429443359375</text:p>
              </table:table-cell>
              <table:table-cell office:value-type="float" office:value="-0.006683283">
                <text:p>-0.006683283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406.541809082031">
                <text:p>406.541809082031</text:p>
              </table:table-cell>
              <table:table-cell office:value-type="float" office:value="0.001121659">
                <text:p>0.001121659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406.654174804688">
                <text:p>406.654174804688</text:p>
              </table:table-cell>
              <table:table-cell office:value-type="float" office:value="-0.00664537">
                <text:p>-0.00664537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406.766540527344">
                <text:p>406.766540527344</text:p>
              </table:table-cell>
              <table:table-cell office:value-type="float" office:value="-0.007349579">
                <text:p>-0.007349579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406.87890625">
                <text:p>406.87890625</text:p>
              </table:table-cell>
              <table:table-cell office:value-type="float" office:value="-0.004225899">
                <text:p>-0.004225899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406.991302490234">
                <text:p>406.991302490234</text:p>
              </table:table-cell>
              <table:table-cell office:value-type="float" office:value="0.001225925">
                <text:p>0.001225925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407.103668212891">
                <text:p>407.103668212891</text:p>
              </table:table-cell>
              <table:table-cell office:value-type="float" office:value="-0.004488784">
                <text:p>-0.004488784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407.216064453125">
                <text:p>407.216064453125</text:p>
              </table:table-cell>
              <table:table-cell office:value-type="float" office:value="0.01520679">
                <text:p>0.01520679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407.328460693359">
                <text:p>407.328460693359</text:p>
              </table:table-cell>
              <table:table-cell office:value-type="float" office:value="0.004272343">
                <text:p>0.004272343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407.440887451172">
                <text:p>407.440887451172</text:p>
              </table:table-cell>
              <table:table-cell office:value-type="float" office:value="-0.001248572">
                <text:p>-0.001248572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407.553283691406">
                <text:p>407.553283691406</text:p>
              </table:table-cell>
              <table:table-cell office:value-type="float" office:value="0.008531196">
                <text:p>0.008531196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407.665710449219">
                <text:p>407.665710449219</text:p>
              </table:table-cell>
              <table:table-cell office:value-type="float" office:value="-0.002358258">
                <text:p>-0.002358258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407.778106689453">
                <text:p>407.778106689453</text:p>
              </table:table-cell>
              <table:table-cell office:value-type="float" office:value="0.01241722">
                <text:p>0.01241722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407.890533447266">
                <text:p>407.890533447266</text:p>
              </table:table-cell>
              <table:table-cell office:value-type="float" office:value="0.006174815">
                <text:p>0.006174815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408.002990722656">
                <text:p>408.002990722656</text:p>
              </table:table-cell>
              <table:table-cell office:value-type="float" office:value="0.007971249">
                <text:p>0.007971249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408.115417480469">
                <text:p>408.115417480469</text:p>
              </table:table-cell>
              <table:table-cell office:value-type="float" office:value="0.003045191">
                <text:p>0.003045191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408.227844238281">
                <text:p>408.227844238281</text:p>
              </table:table-cell>
              <table:table-cell office:value-type="float" office:value="0.01952296">
                <text:p>0.01952296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408.340301513672">
                <text:p>408.340301513672</text:p>
              </table:table-cell>
              <table:table-cell office:value-type="float" office:value="-0.009697677">
                <text:p>-0.009697677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408.452758789063">
                <text:p>408.452758789063</text:p>
              </table:table-cell>
              <table:table-cell office:value-type="float" office:value="-0.002427259">
                <text:p>-0.002427259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408.565216064453">
                <text:p>408.565216064453</text:p>
              </table:table-cell>
              <table:table-cell office:value-type="float" office:value="-0.005452243">
                <text:p>-0.005452243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408.677673339844">
                <text:p>408.677673339844</text:p>
              </table:table-cell>
              <table:table-cell office:value-type="float" office:value="-0.001129663">
                <text:p>-0.001129663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408.790161132813">
                <text:p>408.790161132813</text:p>
              </table:table-cell>
              <table:table-cell office:value-type="float" office:value="-0.003472723">
                <text:p>-0.003472723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408.902618408203">
                <text:p>408.902618408203</text:p>
              </table:table-cell>
              <table:table-cell office:value-type="float" office:value="-0.002917008">
                <text:p>-0.002917008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409.015106201172">
                <text:p>409.015106201172</text:p>
              </table:table-cell>
              <table:table-cell office:value-type="float" office:value="-0.006086962">
                <text:p>-0.006086962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409.127593994141">
                <text:p>409.127593994141</text:p>
              </table:table-cell>
              <table:table-cell office:value-type="float" office:value="0.001733716">
                <text:p>0.001733716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409.240081787109">
                <text:p>409.240081787109</text:p>
              </table:table-cell>
              <table:table-cell office:value-type="float" office:value="0.001229001">
                <text:p>0.001229001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409.352569580078">
                <text:p>409.352569580078</text:p>
              </table:table-cell>
              <table:table-cell office:value-type="float" office:value="-0.008028002">
                <text:p>-0.008028002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409.465087890625">
                <text:p>409.465087890625</text:p>
              </table:table-cell>
              <table:table-cell office:value-type="float" office:value="-0.002522548">
                <text:p>-0.002522548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409.577606201172">
                <text:p>409.577606201172</text:p>
              </table:table-cell>
              <table:table-cell office:value-type="float" office:value="-0.005853468">
                <text:p>-0.005853468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409.690093994141">
                <text:p>409.690093994141</text:p>
              </table:table-cell>
              <table:table-cell office:value-type="float" office:value="0.001879517">
                <text:p>0.001879517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409.802612304688">
                <text:p>409.802612304688</text:p>
              </table:table-cell>
              <table:table-cell office:value-type="float" office:value="-0.0006809168">
                <text:p>-0.0006809168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409.915161132813">
                <text:p>409.915161132813</text:p>
              </table:table-cell>
              <table:table-cell office:value-type="float" office:value="0.001777696">
                <text:p>0.001777696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410.027679443359">
                <text:p>410.027679443359</text:p>
              </table:table-cell>
              <table:table-cell office:value-type="float" office:value="-0.0007832352">
                <text:p>-0.0007832352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410.140228271484">
                <text:p>410.140228271484</text:p>
              </table:table-cell>
              <table:table-cell office:value-type="float" office:value="0.003595357">
                <text:p>0.003595357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410.252746582031">
                <text:p>410.252746582031</text:p>
              </table:table-cell>
              <table:table-cell office:value-type="float" office:value="0.001996275">
                <text:p>0.001996275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410.365295410156">
                <text:p>410.365295410156</text:p>
              </table:table-cell>
              <table:table-cell office:value-type="float" office:value="-0.001194">
                <text:p>-0.001194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410.477844238281">
                <text:p>410.477844238281</text:p>
              </table:table-cell>
              <table:table-cell office:value-type="float" office:value="0.01844108">
                <text:p>0.01844108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410.590423583984">
                <text:p>410.590423583984</text:p>
              </table:table-cell>
              <table:table-cell office:value-type="float" office:value="0.007813272">
                <text:p>0.007813272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410.702972412109">
                <text:p>410.702972412109</text:p>
              </table:table-cell>
              <table:table-cell office:value-type="float" office:value="-0.003568987">
                <text:p>-0.003568987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410.815551757813">
                <text:p>410.815551757813</text:p>
              </table:table-cell>
              <table:table-cell office:value-type="float" office:value="0.002014653">
                <text:p>0.002014653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410.928131103516">
                <text:p>410.928131103516</text:p>
              </table:table-cell>
              <table:table-cell office:value-type="float" office:value="0.02540089">
                <text:p>0.02540089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411.040679931641">
                <text:p>411.040679931641</text:p>
              </table:table-cell>
              <table:table-cell office:value-type="float" office:value="0.005974116">
                <text:p>0.005974116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411.153289794922">
                <text:p>411.153289794922</text:p>
              </table:table-cell>
              <table:table-cell office:value-type="float" office:value="0.01205425">
                <text:p>0.01205425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411.265869140625">
                <text:p>411.265869140625</text:p>
              </table:table-cell>
              <table:table-cell office:value-type="float" office:value="0.006121538">
                <text:p>0.006121538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411.378479003906">
                <text:p>411.378479003906</text:p>
              </table:table-cell>
              <table:table-cell office:value-type="float" office:value="0.002582499">
                <text:p>0.002582499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411.491058349609">
                <text:p>411.491058349609</text:p>
              </table:table-cell>
              <table:table-cell office:value-type="float" office:value="0.0235571">
                <text:p>0.0235571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411.603668212891">
                <text:p>411.603668212891</text:p>
              </table:table-cell>
              <table:table-cell office:value-type="float" office:value="0.002941641">
                <text:p>0.002941641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411.716278076172">
                <text:p>411.716278076172</text:p>
              </table:table-cell>
              <table:table-cell office:value-type="float" office:value="0.0219634">
                <text:p>0.0219634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411.828887939453">
                <text:p>411.828887939453</text:p>
              </table:table-cell>
              <table:table-cell office:value-type="float" office:value="0.001527636">
                <text:p>0.001527636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411.941528320313">
                <text:p>411.941528320313</text:p>
              </table:table-cell>
              <table:table-cell office:value-type="float" office:value="0.002612635">
                <text:p>0.002612635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412.054138183594">
                <text:p>412.054138183594</text:p>
              </table:table-cell>
              <table:table-cell office:value-type="float" office:value="0.001157479">
                <text:p>0.001157479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412.166778564453">
                <text:p>412.166778564453</text:p>
              </table:table-cell>
              <table:table-cell office:value-type="float" office:value="-0.007199971">
                <text:p>-0.007199971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412.279418945313">
                <text:p>412.279418945313</text:p>
              </table:table-cell>
              <table:table-cell office:value-type="float" office:value="0.008583926">
                <text:p>0.008583926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412.392059326172">
                <text:p>412.392059326172</text:p>
              </table:table-cell>
              <table:table-cell office:value-type="float" office:value="0.002391253">
                <text:p>0.002391253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412.504730224609">
                <text:p>412.504730224609</text:p>
              </table:table-cell>
              <table:table-cell office:value-type="float" office:value="-0.007468534">
                <text:p>-0.007468534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412.617370605469">
                <text:p>412.617370605469</text:p>
              </table:table-cell>
              <table:table-cell office:value-type="float" office:value="-0.001903547">
                <text:p>-0.001903547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412.730041503906">
                <text:p>412.730041503906</text:p>
              </table:table-cell>
              <table:table-cell office:value-type="float" office:value="0.0006104452">
                <text:p>0.0006104452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412.842712402344">
                <text:p>412.842712402344</text:p>
              </table:table-cell>
              <table:table-cell office:value-type="float" office:value="-0.0006554447">
                <text:p>-0.0006554447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412.955383300781">
                <text:p>412.955383300781</text:p>
              </table:table-cell>
              <table:table-cell office:value-type="float" office:value="-0.008914857">
                <text:p>-0.008914857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413.068054199219">
                <text:p>413.068054199219</text:p>
              </table:table-cell>
              <table:table-cell office:value-type="float" office:value="-0.005549447">
                <text:p>-0.005549447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413.180725097656">
                <text:p>413.1807250976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413.293426513672">
                <text:p>413.293426513672</text:p>
              </table:table-cell>
              <table:table-cell office:value-type="float" office:value="-0.0002712096">
                <text:p>-0.0002712096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413.406097412109">
                <text:p>413.406097412109</text:p>
              </table:table-cell>
              <table:table-cell office:value-type="float" office:value="-0.003175538">
                <text:p>-0.003175538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413.518798828125">
                <text:p>413.518798828125</text:p>
              </table:table-cell>
              <table:table-cell office:value-type="float" office:value="-0.001850737">
                <text:p>-0.001850737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413.631500244141">
                <text:p>413.631500244141</text:p>
              </table:table-cell>
              <table:table-cell office:value-type="float" office:value="-0.006817286">
                <text:p>-0.006817286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413.744232177734">
                <text:p>413.744232177734</text:p>
              </table:table-cell>
              <table:table-cell office:value-type="float" office:value="0.002153651">
                <text:p>0.002153651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413.85693359375">
                <text:p>413.85693359375</text:p>
              </table:table-cell>
              <table:table-cell office:value-type="float" office:value="0.002095897">
                <text:p>0.002095897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413.969665527344">
                <text:p>413.969665527344</text:p>
              </table:table-cell>
              <table:table-cell office:value-type="float" office:value="-0.001765201">
                <text:p>-0.001765201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414.082366943359">
                <text:p>414.082366943359</text:p>
              </table:table-cell>
              <table:table-cell office:value-type="float" office:value="0.01182778">
                <text:p>0.01182778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414.195098876953">
                <text:p>414.195098876953</text:p>
              </table:table-cell>
              <table:table-cell office:value-type="float" office:value="0.002242427">
                <text:p>0.002242427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414.307861328125">
                <text:p>414.307861328125</text:p>
              </table:table-cell>
              <table:table-cell office:value-type="float" office:value="0.008467028">
                <text:p>0.008467028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414.420593261719">
                <text:p>414.420593261719</text:p>
              </table:table-cell>
              <table:table-cell office:value-type="float" office:value="-0.008514777">
                <text:p>-0.008514777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414.533325195313">
                <text:p>414.533325195313</text:p>
              </table:table-cell>
              <table:table-cell office:value-type="float" office:value="0.006731597">
                <text:p>0.006731597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414.646087646484">
                <text:p>414.646087646484</text:p>
              </table:table-cell>
              <table:table-cell office:value-type="float" office:value="-0.003476334">
                <text:p>-0.003476334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414.758850097656">
                <text:p>414.758850097656</text:p>
              </table:table-cell>
              <table:table-cell office:value-type="float" office:value="-0.003064088">
                <text:p>-0.003064088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414.871612548828">
                <text:p>414.871612548828</text:p>
              </table:table-cell>
              <table:table-cell office:value-type="float" office:value="0.004403215">
                <text:p>0.004403215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414.984375">
                <text:p>414.984375</text:p>
              </table:table-cell>
              <table:table-cell office:value-type="float" office:value="0.00352238">
                <text:p>0.00352238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415.09716796875">
                <text:p>415.09716796875</text:p>
              </table:table-cell>
              <table:table-cell office:value-type="float" office:value="0.0002263986">
                <text:p>0.0002263986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415.209930419922">
                <text:p>415.209930419922</text:p>
              </table:table-cell>
              <table:table-cell office:value-type="float" office:value="-0.003690352">
                <text:p>-0.003690352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415.322723388672">
                <text:p>415.322723388672</text:p>
              </table:table-cell>
              <table:table-cell office:value-type="float" office:value="-0.002867825">
                <text:p>-0.002867825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415.435516357422">
                <text:p>415.435516357422</text:p>
              </table:table-cell>
              <table:table-cell office:value-type="float" office:value="-0.004003081">
                <text:p>-0.004003081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415.548309326172">
                <text:p>415.548309326172</text:p>
              </table:table-cell>
              <table:table-cell office:value-type="float" office:value="0.0009154966">
                <text:p>0.0009154966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415.661102294922">
                <text:p>415.661102294922</text:p>
              </table:table-cell>
              <table:table-cell office:value-type="float" office:value="-0.006041618">
                <text:p>-0.006041618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415.773895263672">
                <text:p>415.773895263672</text:p>
              </table:table-cell>
              <table:table-cell office:value-type="float" office:value="0.005391041">
                <text:p>0.005391041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415.88671875">
                <text:p>415.88671875</text:p>
              </table:table-cell>
              <table:table-cell office:value-type="float" office:value="-0.004788213">
                <text:p>-0.004788213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415.999542236328">
                <text:p>415.999542236328</text:p>
              </table:table-cell>
              <table:table-cell office:value-type="float" office:value="-0.008666575">
                <text:p>-0.008666575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416.112365722656">
                <text:p>416.112365722656</text:p>
              </table:table-cell>
              <table:table-cell office:value-type="float" office:value="-0.00824669">
                <text:p>-0.00824669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416.225189208984">
                <text:p>416.225189208984</text:p>
              </table:table-cell>
              <table:table-cell office:value-type="float" office:value="-0.0001736371">
                <text:p>-0.0001736371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416.338012695313">
                <text:p>416.338012695313</text:p>
              </table:table-cell>
              <table:table-cell office:value-type="float" office:value="-0.002070487">
                <text:p>-0.002070487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416.450866699219">
                <text:p>416.450866699219</text:p>
              </table:table-cell>
              <table:table-cell office:value-type="float" office:value="0.0006246497">
                <text:p>0.0006246497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416.563690185547">
                <text:p>416.563690185547</text:p>
              </table:table-cell>
              <table:table-cell office:value-type="float" office:value="-0.003182289">
                <text:p>-0.003182289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416.676544189453">
                <text:p>416.676544189453</text:p>
              </table:table-cell>
              <table:table-cell office:value-type="float" office:value="-0.003903253">
                <text:p>-0.003903253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416.789398193359">
                <text:p>416.789398193359</text:p>
              </table:table-cell>
              <table:table-cell office:value-type="float" office:value="0.001482465">
                <text:p>0.001482465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416.902252197266">
                <text:p>416.902252197266</text:p>
              </table:table-cell>
              <table:table-cell office:value-type="float" office:value="-0.00266364">
                <text:p>-0.00266364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417.01513671875">
                <text:p>417.01513671875</text:p>
              </table:table-cell>
              <table:table-cell office:value-type="float" office:value="-0.0025574">
                <text:p>-0.0025574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417.127990722656">
                <text:p>417.127990722656</text:p>
              </table:table-cell>
              <table:table-cell office:value-type="float" office:value="0.01212146">
                <text:p>0.01212146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417.240875244141">
                <text:p>417.240875244141</text:p>
              </table:table-cell>
              <table:table-cell office:value-type="float" office:value="0.003753794">
                <text:p>0.003753794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417.353759765625">
                <text:p>417.353759765625</text:p>
              </table:table-cell>
              <table:table-cell office:value-type="float" office:value="0.01950768">
                <text:p>0.01950768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417.466644287109">
                <text:p>417.466644287109</text:p>
              </table:table-cell>
              <table:table-cell office:value-type="float" office:value="-0.009404738">
                <text:p>-0.009404738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417.579528808594">
                <text:p>417.579528808594</text:p>
              </table:table-cell>
              <table:table-cell office:value-type="float" office:value="-0.006151777">
                <text:p>-0.006151777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417.692443847656">
                <text:p>417.692443847656</text:p>
              </table:table-cell>
              <table:table-cell office:value-type="float" office:value="0.001221781">
                <text:p>0.001221781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417.805328369141">
                <text:p>417.805328369141</text:p>
              </table:table-cell>
              <table:table-cell office:value-type="float" office:value="0.002888185">
                <text:p>0.002888185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417.918243408203">
                <text:p>417.918243408203</text:p>
              </table:table-cell>
              <table:table-cell office:value-type="float" office:value="-0.01463507">
                <text:p>-0.01463507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418.031158447266">
                <text:p>418.031158447266</text:p>
              </table:table-cell>
              <table:table-cell office:value-type="float" office:value="-0.007993084">
                <text:p>-0.007993084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418.144073486328">
                <text:p>418.144073486328</text:p>
              </table:table-cell>
              <table:table-cell office:value-type="float" office:value="0.02920197">
                <text:p>0.02920197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418.256988525391">
                <text:p>418.256988525391</text:p>
              </table:table-cell>
              <table:table-cell office:value-type="float" office:value="0.01452223">
                <text:p>0.01452223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418.369934082031">
                <text:p>418.369934082031</text:p>
              </table:table-cell>
              <table:table-cell office:value-type="float" office:value="0.005588329">
                <text:p>0.005588329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418.482849121094">
                <text:p>418.482849121094</text:p>
              </table:table-cell>
              <table:table-cell office:value-type="float" office:value="0.004728617">
                <text:p>0.004728617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418.595794677734">
                <text:p>418.595794677734</text:p>
              </table:table-cell>
              <table:table-cell office:value-type="float" office:value="0.0004590876">
                <text:p>0.0004590876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418.708740234375">
                <text:p>418.708740234375</text:p>
              </table:table-cell>
              <table:table-cell office:value-type="float" office:value="0.001242443">
                <text:p>0.001242443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418.821685791016">
                <text:p>418.821685791016</text:p>
              </table:table-cell>
              <table:table-cell office:value-type="float" office:value="0.001676148">
                <text:p>0.001676148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418.934661865234">
                <text:p>418.934661865234</text:p>
              </table:table-cell>
              <table:table-cell office:value-type="float" office:value="0.003753381">
                <text:p>0.003753381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419.047607421875">
                <text:p>419.047607421875</text:p>
              </table:table-cell>
              <table:table-cell office:value-type="float" office:value="-0.003373288">
                <text:p>-0.003373288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419.160583496094">
                <text:p>419.160583496094</text:p>
              </table:table-cell>
              <table:table-cell office:value-type="float" office:value="-0.007680501">
                <text:p>-0.007680501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419.273559570313">
                <text:p>419.273559570313</text:p>
              </table:table-cell>
              <table:table-cell office:value-type="float" office:value="-0.005803587">
                <text:p>-0.005803587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419.386535644531">
                <text:p>419.386535644531</text:p>
              </table:table-cell>
              <table:table-cell office:value-type="float" office:value="-0.0003978944">
                <text:p>-0.0003978944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419.49951171875">
                <text:p>419.49951171875</text:p>
              </table:table-cell>
              <table:table-cell office:value-type="float" office:value="0.009863282">
                <text:p>0.009863282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419.612487792969">
                <text:p>419.612487792969</text:p>
              </table:table-cell>
              <table:table-cell office:value-type="float" office:value="0.006056131">
                <text:p>0.006056131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419.725494384766">
                <text:p>419.725494384766</text:p>
              </table:table-cell>
              <table:table-cell office:value-type="float" office:value="0.008217057">
                <text:p>0.008217057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419.838470458984">
                <text:p>419.838470458984</text:p>
              </table:table-cell>
              <table:table-cell office:value-type="float" office:value="0.0007590328">
                <text:p>0.0007590328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419.951477050781">
                <text:p>419.951477050781</text:p>
              </table:table-cell>
              <table:table-cell office:value-type="float" office:value="0.01171621">
                <text:p>0.01171621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420.064483642578">
                <text:p>420.064483642578</text:p>
              </table:table-cell>
              <table:table-cell office:value-type="float" office:value="-0.002311971">
                <text:p>-0.002311971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420.177520751953">
                <text:p>420.1775207519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420.29052734375">
                <text:p>420.29052734375</text:p>
              </table:table-cell>
              <table:table-cell office:value-type="float" office:value="-0.007017438">
                <text:p>-0.007017438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420.403564453125">
                <text:p>420.403564453125</text:p>
              </table:table-cell>
              <table:table-cell office:value-type="float" office:value="-0.004750987">
                <text:p>-0.004750987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420.516571044922">
                <text:p>420.516571044922</text:p>
              </table:table-cell>
              <table:table-cell office:value-type="float" office:value="-0.003221323">
                <text:p>-0.003221323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420.629608154297">
                <text:p>420.629608154297</text:p>
              </table:table-cell>
              <table:table-cell office:value-type="float" office:value="0.001993384">
                <text:p>0.001993384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420.742645263672">
                <text:p>420.742645263672</text:p>
              </table:table-cell>
              <table:table-cell office:value-type="float" office:value="0.004134569">
                <text:p>0.004134569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420.855712890625">
                <text:p>420.855712890625</text:p>
              </table:table-cell>
              <table:table-cell office:value-type="float" office:value="0.005755753">
                <text:p>0.005755753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420.96875">
                <text:p>420.96875</text:p>
              </table:table-cell>
              <table:table-cell office:value-type="float" office:value="0.0133656">
                <text:p>0.0133656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421.081817626953">
                <text:p>421.081817626953</text:p>
              </table:table-cell>
              <table:table-cell office:value-type="float" office:value="-0.002023526">
                <text:p>-0.002023526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421.194854736328">
                <text:p>421.194854736328</text:p>
              </table:table-cell>
              <table:table-cell office:value-type="float" office:value="-0.004779955">
                <text:p>-0.004779955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421.307922363281">
                <text:p>421.307922363281</text:p>
              </table:table-cell>
              <table:table-cell office:value-type="float" office:value="0.002383973">
                <text:p>0.002383973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421.421020507813">
                <text:p>421.421020507813</text:p>
              </table:table-cell>
              <table:table-cell office:value-type="float" office:value="0.01053416">
                <text:p>0.01053416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421.534088134766">
                <text:p>421.534088134766</text:p>
              </table:table-cell>
              <table:table-cell office:value-type="float" office:value="-0.008253216">
                <text:p>-0.008253216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421.647155761719">
                <text:p>421.647155761719</text:p>
              </table:table-cell>
              <table:table-cell office:value-type="float" office:value="0.003638663">
                <text:p>0.003638663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421.76025390625">
                <text:p>421.76025390625</text:p>
              </table:table-cell>
              <table:table-cell office:value-type="float" office:value="-0.001779708">
                <text:p>-0.001779708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421.873352050781">
                <text:p>421.873352050781</text:p>
              </table:table-cell>
              <table:table-cell office:value-type="float" office:value="0.006868467">
                <text:p>0.006868467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421.986450195313">
                <text:p>421.986450195313</text:p>
              </table:table-cell>
              <table:table-cell office:value-type="float" office:value="0.005133217">
                <text:p>0.005133217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422.099548339844">
                <text:p>422.099548339844</text:p>
              </table:table-cell>
              <table:table-cell office:value-type="float" office:value="-0.001684428">
                <text:p>-0.001684428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422.212646484375">
                <text:p>422.212646484375</text:p>
              </table:table-cell>
              <table:table-cell office:value-type="float" office:value="0.02081948">
                <text:p>0.02081948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422.325775146484">
                <text:p>422.325775146484</text:p>
              </table:table-cell>
              <table:table-cell office:value-type="float" office:value="-0.00301849">
                <text:p>-0.00301849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422.438903808594">
                <text:p>422.438903808594</text:p>
              </table:table-cell>
              <table:table-cell office:value-type="float" office:value="-0.007347972">
                <text:p>-0.007347972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422.552001953125">
                <text:p>422.552001953125</text:p>
              </table:table-cell>
              <table:table-cell office:value-type="float" office:value="-0.007732293">
                <text:p>-0.007732293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422.665130615234">
                <text:p>422.665130615234</text:p>
              </table:table-cell>
              <table:table-cell office:value-type="float" office:value="0.008555517">
                <text:p>0.008555517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422.778289794922">
                <text:p>422.778289794922</text:p>
              </table:table-cell>
              <table:table-cell office:value-type="float" office:value="-0.005014373">
                <text:p>-0.005014373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422.891418457031">
                <text:p>422.891418457031</text:p>
              </table:table-cell>
              <table:table-cell office:value-type="float" office:value="0.01082126">
                <text:p>0.01082126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423.004577636719">
                <text:p>423.004577636719</text:p>
              </table:table-cell>
              <table:table-cell office:value-type="float" office:value="0.006218763">
                <text:p>0.006218763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423.117706298828">
                <text:p>423.117706298828</text:p>
              </table:table-cell>
              <table:table-cell office:value-type="float" office:value="-0.00184953">
                <text:p>-0.00184953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423.230865478516">
                <text:p>423.230865478516</text:p>
              </table:table-cell>
              <table:table-cell office:value-type="float" office:value="-0.003619681">
                <text:p>-0.003619681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423.344024658203">
                <text:p>423.344024658203</text:p>
              </table:table-cell>
              <table:table-cell office:value-type="float" office:value="0.002985301">
                <text:p>0.002985301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423.457183837891">
                <text:p>423.457183837891</text:p>
              </table:table-cell>
              <table:table-cell office:value-type="float" office:value="-0.008319216">
                <text:p>-0.008319216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423.570373535156">
                <text:p>423.570373535156</text:p>
              </table:table-cell>
              <table:table-cell office:value-type="float" office:value="0.01059797">
                <text:p>0.01059797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423.683532714844">
                <text:p>423.683532714844</text:p>
              </table:table-cell>
              <table:table-cell office:value-type="float" office:value="-0.0002423461">
                <text:p>-0.0002423461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423.796722412109">
                <text:p>423.796722412109</text:p>
              </table:table-cell>
              <table:table-cell office:value-type="float" office:value="-0.004140993">
                <text:p>-0.004140993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423.909912109375">
                <text:p>423.909912109375</text:p>
              </table:table-cell>
              <table:table-cell office:value-type="float" office:value="-0.01012414">
                <text:p>-0.01012414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424.023101806641">
                <text:p>424.023101806641</text:p>
              </table:table-cell>
              <table:table-cell office:value-type="float" office:value="0.004126194">
                <text:p>0.004126194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424.136291503906">
                <text:p>424.136291503906</text:p>
              </table:table-cell>
              <table:table-cell office:value-type="float" office:value="0.009972911">
                <text:p>0.009972911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424.24951171875">
                <text:p>424.24951171875</text:p>
              </table:table-cell>
              <table:table-cell office:value-type="float" office:value="0.004995078">
                <text:p>0.004995078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424.362701416016">
                <text:p>424.362701416016</text:p>
              </table:table-cell>
              <table:table-cell office:value-type="float" office:value="-0.004108304">
                <text:p>-0.004108304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424.475921630859">
                <text:p>424.475921630859</text:p>
              </table:table-cell>
              <table:table-cell office:value-type="float" office:value="0.002302469">
                <text:p>0.002302469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424.589141845703">
                <text:p>424.589141845703</text:p>
              </table:table-cell>
              <table:table-cell office:value-type="float" office:value="-0.0001900741">
                <text:p>-0.0001900741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424.702362060547">
                <text:p>424.702362060547</text:p>
              </table:table-cell>
              <table:table-cell office:value-type="float" office:value="-0.005805772">
                <text:p>-0.005805772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424.815612792969">
                <text:p>424.815612792969</text:p>
              </table:table-cell>
              <table:table-cell office:value-type="float" office:value="-0.002490383">
                <text:p>-0.002490383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424.928833007813">
                <text:p>424.928833007813</text:p>
              </table:table-cell>
              <table:table-cell office:value-type="float" office:value="0.01467029">
                <text:p>0.01467029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425.042083740234">
                <text:p>425.042083740234</text:p>
              </table:table-cell>
              <table:table-cell office:value-type="float" office:value="-0.004126628">
                <text:p>-0.004126628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425.155303955078">
                <text:p>425.155303955078</text:p>
              </table:table-cell>
              <table:table-cell office:value-type="float" office:value="-0.002320399">
                <text:p>-0.002320399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425.2685546875">
                <text:p>425.2685546875</text:p>
              </table:table-cell>
              <table:table-cell office:value-type="float" office:value="-0.01268254">
                <text:p>-0.01268254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425.3818359375">
                <text:p>425.3818359375</text:p>
              </table:table-cell>
              <table:table-cell office:value-type="float" office:value="-0.0009609694">
                <text:p>-0.0009609694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425.495086669922">
                <text:p>425.495086669922</text:p>
              </table:table-cell>
              <table:table-cell office:value-type="float" office:value="0.006208846">
                <text:p>0.006208846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425.608337402344">
                <text:p>425.608337402344</text:p>
              </table:table-cell>
              <table:table-cell office:value-type="float" office:value="0.005139114">
                <text:p>0.005139114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425.721618652344">
                <text:p>425.721618652344</text:p>
              </table:table-cell>
              <table:table-cell office:value-type="float" office:value="-0.005830664">
                <text:p>-0.005830664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425.834899902344">
                <text:p>425.834899902344</text:p>
              </table:table-cell>
              <table:table-cell office:value-type="float" office:value="-0.006406088">
                <text:p>-0.006406088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425.948181152344">
                <text:p>425.948181152344</text:p>
              </table:table-cell>
              <table:table-cell office:value-type="float" office:value="0.003455328">
                <text:p>0.003455328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426.061462402344">
                <text:p>426.061462402344</text:p>
              </table:table-cell>
              <table:table-cell office:value-type="float" office:value="0.01084411">
                <text:p>0.01084411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426.174743652344">
                <text:p>426.174743652344</text:p>
              </table:table-cell>
              <table:table-cell office:value-type="float" office:value="-0.00512562">
                <text:p>-0.00512562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426.288055419922">
                <text:p>426.288055419922</text:p>
              </table:table-cell>
              <table:table-cell office:value-type="float" office:value="0.009180652">
                <text:p>0.009180652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426.401336669922">
                <text:p>426.401336669922</text:p>
              </table:table-cell>
              <table:table-cell office:value-type="float" office:value="-0.0003855143">
                <text:p>-0.0003855143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426.5146484375">
                <text:p>426.5146484375</text:p>
              </table:table-cell>
              <table:table-cell office:value-type="float" office:value="-0.002949013">
                <text:p>-0.002949013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426.627960205078">
                <text:p>426.627960205078</text:p>
              </table:table-cell>
              <table:table-cell office:value-type="float" office:value="0.002878217">
                <text:p>0.002878217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426.741271972656">
                <text:p>426.741271972656</text:p>
              </table:table-cell>
              <table:table-cell office:value-type="float" office:value="0.008626665">
                <text:p>0.008626665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426.854614257813">
                <text:p>426.854614257813</text:p>
              </table:table-cell>
              <table:table-cell office:value-type="float" office:value="0.008850499">
                <text:p>0.008850499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426.967926025391">
                <text:p>426.967926025391</text:p>
              </table:table-cell>
              <table:table-cell office:value-type="float" office:value="-0.003591889">
                <text:p>-0.003591889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427.081268310547">
                <text:p>427.081268310547</text:p>
              </table:table-cell>
              <table:table-cell office:value-type="float" office:value="-0.00407816">
                <text:p>-0.00407816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427.194610595703">
                <text:p>427.194610595703</text:p>
              </table:table-cell>
              <table:table-cell office:value-type="float" office:value="0.003573681">
                <text:p>0.003573681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427.307952880859">
                <text:p>427.307952880859</text:p>
              </table:table-cell>
              <table:table-cell office:value-type="float" office:value="0.003159936">
                <text:p>0.003159936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427.421295166016">
                <text:p>427.421295166016</text:p>
              </table:table-cell>
              <table:table-cell office:value-type="float" office:value="0.000982658">
                <text:p>0.000982658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427.534637451172">
                <text:p>427.534637451172</text:p>
              </table:table-cell>
              <table:table-cell office:value-type="float" office:value="-0.009146406">
                <text:p>-0.009146406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427.648010253906">
                <text:p>427.648010253906</text:p>
              </table:table-cell>
              <table:table-cell office:value-type="float" office:value="0.003497795">
                <text:p>0.003497795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427.761383056641">
                <text:p>427.761383056641</text:p>
              </table:table-cell>
              <table:table-cell office:value-type="float" office:value="0.004986029">
                <text:p>0.004986029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427.874755859375">
                <text:p>427.874755859375</text:p>
              </table:table-cell>
              <table:table-cell office:value-type="float" office:value="-0.006978349">
                <text:p>-0.006978349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427.988128662109">
                <text:p>427.988128662109</text:p>
              </table:table-cell>
              <table:table-cell office:value-type="float" office:value="-0.009602075">
                <text:p>-0.009602075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428.101501464844">
                <text:p>428.101501464844</text:p>
              </table:table-cell>
              <table:table-cell office:value-type="float" office:value="-0.001652948">
                <text:p>-0.001652948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428.214874267578">
                <text:p>428.214874267578</text:p>
              </table:table-cell>
              <table:table-cell office:value-type="float" office:value="0.007690751">
                <text:p>0.007690751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428.328277587891">
                <text:p>428.328277587891</text:p>
              </table:table-cell>
              <table:table-cell office:value-type="float" office:value="-0.003020382">
                <text:p>-0.003020382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428.441650390625">
                <text:p>428.441650390625</text:p>
              </table:table-cell>
              <table:table-cell office:value-type="float" office:value="-0.007187179">
                <text:p>-0.007187179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428.555053710938">
                <text:p>428.555053710938</text:p>
              </table:table-cell>
              <table:table-cell office:value-type="float" office:value="-0.003794784">
                <text:p>-0.003794784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428.66845703125">
                <text:p>428.66845703125</text:p>
              </table:table-cell>
              <table:table-cell office:value-type="float" office:value="0.00259564">
                <text:p>0.00259564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428.781890869141">
                <text:p>428.781890869141</text:p>
              </table:table-cell>
              <table:table-cell office:value-type="float" office:value="-0.0005744736">
                <text:p>-0.0005744736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428.895294189453">
                <text:p>428.895294189453</text:p>
              </table:table-cell>
              <table:table-cell office:value-type="float" office:value="0.006487902">
                <text:p>0.006487902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429.008728027344">
                <text:p>429.008728027344</text:p>
              </table:table-cell>
              <table:table-cell office:value-type="float" office:value="-0.00672072">
                <text:p>-0.00672072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429.122131347656">
                <text:p>429.122131347656</text:p>
              </table:table-cell>
              <table:table-cell office:value-type="float" office:value="-0.003984527">
                <text:p>-0.003984527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429.235565185547">
                <text:p>429.235565185547</text:p>
              </table:table-cell>
              <table:table-cell office:value-type="float" office:value="-0.005027947">
                <text:p>-0.005027947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429.348999023438">
                <text:p>429.348999023438</text:p>
              </table:table-cell>
              <table:table-cell office:value-type="float" office:value="0.01622462">
                <text:p>0.01622462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429.462432861328">
                <text:p>429.462432861328</text:p>
              </table:table-cell>
              <table:table-cell office:value-type="float" office:value="0.02441058">
                <text:p>0.02441058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429.575897216797">
                <text:p>429.575897216797</text:p>
              </table:table-cell>
              <table:table-cell office:value-type="float" office:value="0.0004567842">
                <text:p>0.0004567842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429.689331054688">
                <text:p>429.689331054688</text:p>
              </table:table-cell>
              <table:table-cell office:value-type="float" office:value="-0.004876096">
                <text:p>-0.004876096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429.802795410156">
                <text:p>429.802795410156</text:p>
              </table:table-cell>
              <table:table-cell office:value-type="float" office:value="0.007282503">
                <text:p>0.007282503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429.916259765625">
                <text:p>429.916259765625</text:p>
              </table:table-cell>
              <table:table-cell office:value-type="float" office:value="0.0004892436">
                <text:p>0.0004892436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430.029724121094">
                <text:p>430.029724121094</text:p>
              </table:table-cell>
              <table:table-cell office:value-type="float" office:value="0.007624339">
                <text:p>0.007624339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430.143188476563">
                <text:p>430.143188476563</text:p>
              </table:table-cell>
              <table:table-cell office:value-type="float" office:value="0.007276546">
                <text:p>0.007276546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430.256683349609">
                <text:p>430.256683349609</text:p>
              </table:table-cell>
              <table:table-cell office:value-type="float" office:value="-0.003611089">
                <text:p>-0.003611089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430.370147705078">
                <text:p>430.370147705078</text:p>
              </table:table-cell>
              <table:table-cell office:value-type="float" office:value="0.01063873">
                <text:p>0.01063873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430.483642578125">
                <text:p>430.483642578125</text:p>
              </table:table-cell>
              <table:table-cell office:value-type="float" office:value="-0.002377968">
                <text:p>-0.002377968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430.597137451172">
                <text:p>430.597137451172</text:p>
              </table:table-cell>
              <table:table-cell office:value-type="float" office:value="-0.0001403402">
                <text:p>-0.0001403402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430.710632324219">
                <text:p>430.710632324219</text:p>
              </table:table-cell>
              <table:table-cell office:value-type="float" office:value="-0.002766193">
                <text:p>-0.002766193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430.824127197266">
                <text:p>430.824127197266</text:p>
              </table:table-cell>
              <table:table-cell office:value-type="float" office:value="0.006115543">
                <text:p>0.006115543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430.937652587891">
                <text:p>430.937652587891</text:p>
              </table:table-cell>
              <table:table-cell office:value-type="float" office:value="-0.00113827">
                <text:p>-0.00113827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431.051147460938">
                <text:p>431.051147460938</text:p>
              </table:table-cell>
              <table:table-cell office:value-type="float" office:value="-0.003598407">
                <text:p>-0.003598407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431.164672851563">
                <text:p>431.164672851563</text:p>
              </table:table-cell>
              <table:table-cell office:value-type="float" office:value="-0.00539037">
                <text:p>-0.00539037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431.278198242188">
                <text:p>431.278198242188</text:p>
              </table:table-cell>
              <table:table-cell office:value-type="float" office:value="0.003523763">
                <text:p>0.003523763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431.391723632813">
                <text:p>431.391723632813</text:p>
              </table:table-cell>
              <table:table-cell office:value-type="float" office:value="-0.004506574">
                <text:p>-0.004506574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431.505249023438">
                <text:p>431.505249023438</text:p>
              </table:table-cell>
              <table:table-cell office:value-type="float" office:value="-0.001349679">
                <text:p>-0.001349679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431.618804931641">
                <text:p>431.618804931641</text:p>
              </table:table-cell>
              <table:table-cell office:value-type="float" office:value="-0.002606906">
                <text:p>-0.002606906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431.732330322266">
                <text:p>431.732330322266</text:p>
              </table:table-cell>
              <table:table-cell office:value-type="float" office:value="0.008572627">
                <text:p>0.008572627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431.845886230469">
                <text:p>431.845886230469</text:p>
              </table:table-cell>
              <table:table-cell office:value-type="float" office:value="0.009654361">
                <text:p>0.009654361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431.959442138672">
                <text:p>431.959442138672</text:p>
              </table:table-cell>
              <table:table-cell office:value-type="float" office:value="0.006672879">
                <text:p>0.006672879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432.072998046875">
                <text:p>432.072998046875</text:p>
              </table:table-cell>
              <table:table-cell office:value-type="float" office:value="0.01802168">
                <text:p>0.01802168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432.186553955078">
                <text:p>432.186553955078</text:p>
              </table:table-cell>
              <table:table-cell office:value-type="float" office:value="-0.005822503">
                <text:p>-0.005822503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432.300140380859">
                <text:p>432.300140380859</text:p>
              </table:table-cell>
              <table:table-cell office:value-type="float" office:value="-0.002250184">
                <text:p>-0.002250184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432.413696289063">
                <text:p>432.413696289063</text:p>
              </table:table-cell>
              <table:table-cell office:value-type="float" office:value="0.0003599591">
                <text:p>0.0003599591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432.527282714844">
                <text:p>432.527282714844</text:p>
              </table:table-cell>
              <table:table-cell office:value-type="float" office:value="0.00425845">
                <text:p>0.00425845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432.640869140625">
                <text:p>432.640869140625</text:p>
              </table:table-cell>
              <table:table-cell office:value-type="float" office:value="-0.003403175">
                <text:p>-0.003403175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432.754455566406">
                <text:p>432.754455566406</text:p>
              </table:table-cell>
              <table:table-cell office:value-type="float" office:value="0.01101162">
                <text:p>0.01101162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432.868041992188">
                <text:p>432.868041992188</text:p>
              </table:table-cell>
              <table:table-cell office:value-type="float" office:value="0.01587727">
                <text:p>0.01587727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432.981658935547">
                <text:p>432.981658935547</text:p>
              </table:table-cell>
              <table:table-cell office:value-type="float" office:value="0.008416751">
                <text:p>0.008416751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433.095245361328">
                <text:p>433.095245361328</text:p>
              </table:table-cell>
              <table:table-cell office:value-type="float" office:value="0.00293742">
                <text:p>0.00293742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433.208862304688">
                <text:p>433.208862304688</text:p>
              </table:table-cell>
              <table:table-cell office:value-type="float" office:value="0.003469985">
                <text:p>0.003469985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433.322479248047">
                <text:p>433.322479248047</text:p>
              </table:table-cell>
              <table:table-cell office:value-type="float" office:value="-0.001514921">
                <text:p>-0.001514921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433.436096191406">
                <text:p>433.436096191406</text:p>
              </table:table-cell>
              <table:table-cell office:value-type="float" office:value="0.005013661">
                <text:p>0.005013661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433.549713134766">
                <text:p>433.549713134766</text:p>
              </table:table-cell>
              <table:table-cell office:value-type="float" office:value="-0.001688834">
                <text:p>-0.001688834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433.663330078125">
                <text:p>433.663330078125</text:p>
              </table:table-cell>
              <table:table-cell office:value-type="float" office:value="-0.00370837">
                <text:p>-0.00370837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433.776977539063">
                <text:p>433.776977539063</text:p>
              </table:table-cell>
              <table:table-cell office:value-type="float" office:value="-0.004647433">
                <text:p>-0.004647433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433.890625">
                <text:p>433.890625</text:p>
              </table:table-cell>
              <table:table-cell office:value-type="float" office:value="0.01382707">
                <text:p>0.01382707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434.004272460938">
                <text:p>434.004272460938</text:p>
              </table:table-cell>
              <table:table-cell office:value-type="float" office:value="-0.001268749">
                <text:p>-0.001268749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434.117919921875">
                <text:p>434.117919921875</text:p>
              </table:table-cell>
              <table:table-cell office:value-type="float" office:value="0.003032392">
                <text:p>0.003032392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434.231567382813">
                <text:p>434.231567382813</text:p>
              </table:table-cell>
              <table:table-cell office:value-type="float" office:value="-0.008022274">
                <text:p>-0.008022274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434.34521484375">
                <text:p>434.34521484375</text:p>
              </table:table-cell>
              <table:table-cell office:value-type="float" office:value="-0.005817882">
                <text:p>-0.005817882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434.458892822266">
                <text:p>434.458892822266</text:p>
              </table:table-cell>
              <table:table-cell office:value-type="float" office:value="0.01919799">
                <text:p>0.01919799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434.572570800781">
                <text:p>434.572570800781</text:p>
              </table:table-cell>
              <table:table-cell office:value-type="float" office:value="-0.004652433">
                <text:p>-0.004652433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434.686248779297">
                <text:p>434.686248779297</text:p>
              </table:table-cell>
              <table:table-cell office:value-type="float" office:value="-0.002846102">
                <text:p>-0.002846102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434.799926757813">
                <text:p>434.799926757813</text:p>
              </table:table-cell>
              <table:table-cell office:value-type="float" office:value="-0.003845216">
                <text:p>-0.003845216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434.913604736328">
                <text:p>434.913604736328</text:p>
              </table:table-cell>
              <table:table-cell office:value-type="float" office:value="0.001970784">
                <text:p>0.001970784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435.027282714844">
                <text:p>435.027282714844</text:p>
              </table:table-cell>
              <table:table-cell office:value-type="float" office:value="-0.002799915">
                <text:p>-0.002799915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435.140991210938">
                <text:p>435.140991210938</text:p>
              </table:table-cell>
              <table:table-cell office:value-type="float" office:value="-0.001643972">
                <text:p>-0.001643972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435.254669189453">
                <text:p>435.254669189453</text:p>
              </table:table-cell>
              <table:table-cell office:value-type="float" office:value="0.00673777">
                <text:p>0.00673777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435.368377685547">
                <text:p>435.368377685547</text:p>
              </table:table-cell>
              <table:table-cell office:value-type="float" office:value="-0.008144984">
                <text:p>-0.008144984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435.482086181641">
                <text:p>435.482086181641</text:p>
              </table:table-cell>
              <table:table-cell office:value-type="float" office:value="-0.007830827">
                <text:p>-0.007830827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435.595825195313">
                <text:p>435.595825195313</text:p>
              </table:table-cell>
              <table:table-cell office:value-type="float" office:value="-0.003961495">
                <text:p>-0.003961495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435.709533691406">
                <text:p>435.709533691406</text:p>
              </table:table-cell>
              <table:table-cell office:value-type="float" office:value="0.01172793">
                <text:p>0.01172793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435.823272705078">
                <text:p>435.823272705078</text:p>
              </table:table-cell>
              <table:table-cell office:value-type="float" office:value="0.003544166">
                <text:p>0.003544166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435.936981201172">
                <text:p>435.936981201172</text:p>
              </table:table-cell>
              <table:table-cell office:value-type="float" office:value="-0.008833027">
                <text:p>-0.008833027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436.050720214844">
                <text:p>436.050720214844</text:p>
              </table:table-cell>
              <table:table-cell office:value-type="float" office:value="0.003247371">
                <text:p>0.003247371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436.164459228516">
                <text:p>436.164459228516</text:p>
              </table:table-cell>
              <table:table-cell office:value-type="float" office:value="-0.001783987">
                <text:p>-0.001783987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436.278198242188">
                <text:p>436.278198242188</text:p>
              </table:table-cell>
              <table:table-cell office:value-type="float" office:value="0.02456505">
                <text:p>0.02456505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436.391967773438">
                <text:p>436.391967773438</text:p>
              </table:table-cell>
              <table:table-cell office:value-type="float" office:value="-0.0006054072">
                <text:p>-0.0006054072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436.505706787109">
                <text:p>436.505706787109</text:p>
              </table:table-cell>
              <table:table-cell office:value-type="float" office:value="-0.002269463">
                <text:p>-0.002269463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436.619476318359">
                <text:p>436.619476318359</text:p>
              </table:table-cell>
              <table:table-cell office:value-type="float" office:value="0.0045281">
                <text:p>0.0045281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436.733245849609">
                <text:p>436.733245849609</text:p>
              </table:table-cell>
              <table:table-cell office:value-type="float" office:value="0.00263323">
                <text:p>0.00263323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436.847015380859">
                <text:p>436.847015380859</text:p>
              </table:table-cell>
              <table:table-cell office:value-type="float" office:value="-0.009195467">
                <text:p>-0.009195467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436.960784912109">
                <text:p>436.960784912109</text:p>
              </table:table-cell>
              <table:table-cell office:value-type="float" office:value="0.004693047">
                <text:p>0.004693047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437.074554443359">
                <text:p>437.074554443359</text:p>
              </table:table-cell>
              <table:table-cell office:value-type="float" office:value="0.002429946">
                <text:p>0.002429946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437.188354492188">
                <text:p>437.188354492188</text:p>
              </table:table-cell>
              <table:table-cell office:value-type="float" office:value="-0.0006091322">
                <text:p>-0.0006091322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437.302154541016">
                <text:p>437.302154541016</text:p>
              </table:table-cell>
              <table:table-cell office:value-type="float" office:value="0.002823791">
                <text:p>0.002823791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437.415924072266">
                <text:p>437.415924072266</text:p>
              </table:table-cell>
              <table:table-cell office:value-type="float" office:value="0.002898669">
                <text:p>0.002898669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437.529724121094">
                <text:p>437.529724121094</text:p>
              </table:table-cell>
              <table:table-cell office:value-type="float" office:value="0.0003683329">
                <text:p>0.0003683329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437.6435546875">
                <text:p>437.6435546875</text:p>
              </table:table-cell>
              <table:table-cell office:value-type="float" office:value="-0.0002539828">
                <text:p>-0.0002539828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437.757354736328">
                <text:p>437.757354736328</text:p>
              </table:table-cell>
              <table:table-cell office:value-type="float" office:value="0.004753695">
                <text:p>0.004753695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437.871154785156">
                <text:p>437.871154785156</text:p>
              </table:table-cell>
              <table:table-cell office:value-type="float" office:value="-0.003066138">
                <text:p>-0.003066138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437.984985351563">
                <text:p>437.984985351563</text:p>
              </table:table-cell>
              <table:table-cell office:value-type="float" office:value="0.0150827">
                <text:p>0.0150827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438.098815917969">
                <text:p>438.098815917969</text:p>
              </table:table-cell>
              <table:table-cell office:value-type="float" office:value="0.004520911">
                <text:p>0.004520911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438.212646484375">
                <text:p>438.212646484375</text:p>
              </table:table-cell>
              <table:table-cell office:value-type="float" office:value="-0.006127033">
                <text:p>-0.006127033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438.326477050781">
                <text:p>438.326477050781</text:p>
              </table:table-cell>
              <table:table-cell office:value-type="float" office:value="-0.01001878">
                <text:p>-0.01001878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438.440307617188">
                <text:p>438.440307617188</text:p>
              </table:table-cell>
              <table:table-cell office:value-type="float" office:value="-0.0002910751">
                <text:p>-0.0002910751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438.554168701172">
                <text:p>438.554168701172</text:p>
              </table:table-cell>
              <table:table-cell office:value-type="float" office:value="0.007388079">
                <text:p>0.007388079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438.667999267578">
                <text:p>438.667999267578</text:p>
              </table:table-cell>
              <table:table-cell office:value-type="float" office:value="-0.008366279">
                <text:p>-0.008366279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438.781860351563">
                <text:p>438.781860351563</text:p>
              </table:table-cell>
              <table:table-cell office:value-type="float" office:value="-0.01222518">
                <text:p>-0.01222518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438.895721435547">
                <text:p>438.895721435547</text:p>
              </table:table-cell>
              <table:table-cell office:value-type="float" office:value="-0.002691053">
                <text:p>-0.002691053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439.009582519531">
                <text:p>439.009582519531</text:p>
              </table:table-cell>
              <table:table-cell office:value-type="float" office:value="0.002475586">
                <text:p>0.002475586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439.123474121094">
                <text:p>439.123474121094</text:p>
              </table:table-cell>
              <table:table-cell office:value-type="float" office:value="-0.008669664">
                <text:p>-0.008669664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439.237335205078">
                <text:p>439.237335205078</text:p>
              </table:table-cell>
              <table:table-cell office:value-type="float" office:value="-0.007136977">
                <text:p>-0.007136977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439.351226806641">
                <text:p>439.351226806641</text:p>
              </table:table-cell>
              <table:table-cell office:value-type="float" office:value="0.00372469">
                <text:p>0.00372469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439.465087890625">
                <text:p>439.465087890625</text:p>
              </table:table-cell>
              <table:table-cell office:value-type="float" office:value="0.01952327">
                <text:p>0.01952327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439.578979492188">
                <text:p>439.578979492188</text:p>
              </table:table-cell>
              <table:table-cell office:value-type="float" office:value="-0.004754614">
                <text:p>-0.004754614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439.69287109375">
                <text:p>439.69287109375</text:p>
              </table:table-cell>
              <table:table-cell office:value-type="float" office:value="-0.007883477">
                <text:p>-0.007883477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439.806793212891">
                <text:p>439.806793212891</text:p>
              </table:table-cell>
              <table:table-cell office:value-type="float" office:value="-0.005904732">
                <text:p>-0.005904732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439.920684814453">
                <text:p>439.920684814453</text:p>
              </table:table-cell>
              <table:table-cell office:value-type="float" office:value="0.05499396">
                <text:p>0.05499396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440.034606933594">
                <text:p>440.034606933594</text:p>
              </table:table-cell>
              <table:table-cell office:value-type="float" office:value="-0.0002084111">
                <text:p>-0.0002084111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440.148498535156">
                <text:p>440.148498535156</text:p>
              </table:table-cell>
              <table:table-cell office:value-type="float" office:value="-0.002356118">
                <text:p>-0.002356118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440.262420654297">
                <text:p>440.262420654297</text:p>
              </table:table-cell>
              <table:table-cell office:value-type="float" office:value="0.00673952">
                <text:p>0.00673952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440.376342773438">
                <text:p>440.376342773438</text:p>
              </table:table-cell>
              <table:table-cell office:value-type="float" office:value="0.03017448">
                <text:p>0.03017448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440.490295410156">
                <text:p>440.490295410156</text:p>
              </table:table-cell>
              <table:table-cell office:value-type="float" office:value="-0.001294442">
                <text:p>-0.001294442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440.604217529297">
                <text:p>440.604217529297</text:p>
              </table:table-cell>
              <table:table-cell office:value-type="float" office:value="-0.01597958">
                <text:p>-0.01597958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440.718170166016">
                <text:p>440.718170166016</text:p>
              </table:table-cell>
              <table:table-cell office:value-type="float" office:value="0.01843569">
                <text:p>0.01843569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440.832092285156">
                <text:p>440.832092285156</text:p>
              </table:table-cell>
              <table:table-cell office:value-type="float" office:value="0.009420058">
                <text:p>0.009420058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440.946044921875">
                <text:p>440.946044921875</text:p>
              </table:table-cell>
              <table:table-cell office:value-type="float" office:value="-0.002648288">
                <text:p>-0.002648288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441.059997558594">
                <text:p>441.059997558594</text:p>
              </table:table-cell>
              <table:table-cell office:value-type="float" office:value="-0.002703514">
                <text:p>-0.002703514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441.173950195313">
                <text:p>441.173950195313</text:p>
              </table:table-cell>
              <table:table-cell office:value-type="float" office:value="0.005391055">
                <text:p>0.005391055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441.287933349609">
                <text:p>441.287933349609</text:p>
              </table:table-cell>
              <table:table-cell office:value-type="float" office:value="-0.0004883867">
                <text:p>-0.0004883867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441.401885986328">
                <text:p>441.4018859863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441.515869140625">
                <text:p>441.515869140625</text:p>
              </table:table-cell>
              <table:table-cell office:value-type="float" office:value="0.01418502">
                <text:p>0.01418502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441.629852294922">
                <text:p>441.629852294922</text:p>
              </table:table-cell>
              <table:table-cell office:value-type="float" office:value="0.001773631">
                <text:p>0.001773631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441.743835449219">
                <text:p>441.743835449219</text:p>
              </table:table-cell>
              <table:table-cell office:value-type="float" office:value="0.006015456">
                <text:p>0.006015456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441.857818603516">
                <text:p>441.857818603516</text:p>
              </table:table-cell>
              <table:table-cell office:value-type="float" office:value="-0.00961569">
                <text:p>-0.00961569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441.971801757813">
                <text:p>441.971801757813</text:p>
              </table:table-cell>
              <table:table-cell office:value-type="float" office:value="0.0009023961">
                <text:p>0.0009023961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442.085815429688">
                <text:p>442.085815429688</text:p>
              </table:table-cell>
              <table:table-cell office:value-type="float" office:value="0.008761689">
                <text:p>0.008761689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442.199829101563">
                <text:p>442.199829101563</text:p>
              </table:table-cell>
              <table:table-cell office:value-type="float" office:value="-0.004325564">
                <text:p>-0.004325564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442.313812255859">
                <text:p>442.313812255859</text:p>
              </table:table-cell>
              <table:table-cell office:value-type="float" office:value="0.0002452072">
                <text:p>0.0002452072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442.427825927734">
                <text:p>442.427825927734</text:p>
              </table:table-cell>
              <table:table-cell office:value-type="float" office:value="0.01835181">
                <text:p>0.01835181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442.541839599609">
                <text:p>442.541839599609</text:p>
              </table:table-cell>
              <table:table-cell office:value-type="float" office:value="0.002413699">
                <text:p>0.002413699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442.655883789063">
                <text:p>442.655883789063</text:p>
              </table:table-cell>
              <table:table-cell office:value-type="float" office:value="-0.001689179">
                <text:p>-0.001689179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442.769897460938">
                <text:p>442.769897460938</text:p>
              </table:table-cell>
              <table:table-cell office:value-type="float" office:value="-0.0007784946">
                <text:p>-0.0007784946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442.883941650391">
                <text:p>442.883941650391</text:p>
              </table:table-cell>
              <table:table-cell office:value-type="float" office:value="-0.003311593">
                <text:p>-0.003311593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442.997985839844">
                <text:p>442.997985839844</text:p>
              </table:table-cell>
              <table:table-cell office:value-type="float" office:value="0.00731426">
                <text:p>0.00731426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443.112030029297">
                <text:p>443.112030029297</text:p>
              </table:table-cell>
              <table:table-cell office:value-type="float" office:value="0.003192305">
                <text:p>0.003192305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443.22607421875">
                <text:p>443.22607421875</text:p>
              </table:table-cell>
              <table:table-cell office:value-type="float" office:value="-0.005473884">
                <text:p>-0.005473884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443.340118408203">
                <text:p>443.340118408203</text:p>
              </table:table-cell>
              <table:table-cell office:value-type="float" office:value="-0.0004354766">
                <text:p>-0.0004354766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443.454162597656">
                <text:p>443.454162597656</text:p>
              </table:table-cell>
              <table:table-cell office:value-type="float" office:value="0.003573655">
                <text:p>0.003573655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443.568237304688">
                <text:p>443.568237304688</text:p>
              </table:table-cell>
              <table:table-cell office:value-type="float" office:value="-0.004867427">
                <text:p>-0.004867427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443.682312011719">
                <text:p>443.682312011719</text:p>
              </table:table-cell>
              <table:table-cell office:value-type="float" office:value="-0.008990115">
                <text:p>-0.008990115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443.79638671875">
                <text:p>443.79638671875</text:p>
              </table:table-cell>
              <table:table-cell office:value-type="float" office:value="0.002054312">
                <text:p>0.002054312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443.910461425781">
                <text:p>443.910461425781</text:p>
              </table:table-cell>
              <table:table-cell office:value-type="float" office:value="-0.003455867">
                <text:p>-0.003455867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444.024536132813">
                <text:p>444.024536132813</text:p>
              </table:table-cell>
              <table:table-cell office:value-type="float" office:value="0.005398909">
                <text:p>0.005398909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444.138610839844">
                <text:p>444.138610839844</text:p>
              </table:table-cell>
              <table:table-cell office:value-type="float" office:value="0.02350338">
                <text:p>0.02350338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444.252716064453">
                <text:p>444.252716064453</text:p>
              </table:table-cell>
              <table:table-cell office:value-type="float" office:value="-0.003735405">
                <text:p>-0.003735405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444.366821289063">
                <text:p>444.366821289063</text:p>
              </table:table-cell>
              <table:table-cell office:value-type="float" office:value="0.0004687199">
                <text:p>0.0004687199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444.480895996094">
                <text:p>444.480895996094</text:p>
              </table:table-cell>
              <table:table-cell office:value-type="float" office:value="0.002117947">
                <text:p>0.002117947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444.595001220703">
                <text:p>444.595001220703</text:p>
              </table:table-cell>
              <table:table-cell office:value-type="float" office:value="-0.003357878">
                <text:p>-0.003357878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444.709136962891">
                <text:p>444.709136962891</text:p>
              </table:table-cell>
              <table:table-cell office:value-type="float" office:value="-0.001987277">
                <text:p>-0.001987277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444.8232421875">
                <text:p>444.8232421875</text:p>
              </table:table-cell>
              <table:table-cell office:value-type="float" office:value="0.004893109">
                <text:p>0.004893109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444.937347412109">
                <text:p>444.937347412109</text:p>
              </table:table-cell>
              <table:table-cell office:value-type="float" office:value="0.006281064">
                <text:p>0.006281064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445.051483154297">
                <text:p>445.051483154297</text:p>
              </table:table-cell>
              <table:table-cell office:value-type="float" office:value="-0.003538803">
                <text:p>-0.003538803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445.165618896484">
                <text:p>445.165618896484</text:p>
              </table:table-cell>
              <table:table-cell office:value-type="float" office:value="-0.00964825">
                <text:p>-0.00964825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445.279754638672">
                <text:p>445.279754638672</text:p>
              </table:table-cell>
              <table:table-cell office:value-type="float" office:value="0.005440158">
                <text:p>0.005440158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445.393890380859">
                <text:p>445.393890380859</text:p>
              </table:table-cell>
              <table:table-cell office:value-type="float" office:value="-0.0008290447">
                <text:p>-0.0008290447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445.508026123047">
                <text:p>445.508026123047</text:p>
              </table:table-cell>
              <table:table-cell office:value-type="float" office:value="-0.006506532">
                <text:p>-0.006506532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445.622192382813">
                <text:p>445.622192382813</text:p>
              </table:table-cell>
              <table:table-cell office:value-type="float" office:value="0.0006686468">
                <text:p>0.0006686468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445.736328125">
                <text:p>445.736328125</text:p>
              </table:table-cell>
              <table:table-cell office:value-type="float" office:value="0.001526226">
                <text:p>0.001526226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445.850494384766">
                <text:p>445.850494384766</text:p>
              </table:table-cell>
              <table:table-cell office:value-type="float" office:value="0.004812592">
                <text:p>0.004812592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445.964660644531">
                <text:p>445.964660644531</text:p>
              </table:table-cell>
              <table:table-cell office:value-type="float" office:value="-0.004545171">
                <text:p>-0.004545171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446.078826904297">
                <text:p>446.078826904297</text:p>
              </table:table-cell>
              <table:table-cell office:value-type="float" office:value="-0.000731369">
                <text:p>-0.000731369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446.192993164063">
                <text:p>446.192993164063</text:p>
              </table:table-cell>
              <table:table-cell office:value-type="float" office:value="0.005316391">
                <text:p>0.005316391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446.307189941406">
                <text:p>446.307189941406</text:p>
              </table:table-cell>
              <table:table-cell office:value-type="float" office:value="0.004490589">
                <text:p>0.004490589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446.421356201172">
                <text:p>446.421356201172</text:p>
              </table:table-cell>
              <table:table-cell office:value-type="float" office:value="-0.004078029">
                <text:p>-0.004078029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446.535552978516">
                <text:p>446.535552978516</text:p>
              </table:table-cell>
              <table:table-cell office:value-type="float" office:value="0.001606959">
                <text:p>0.001606959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446.649749755859">
                <text:p>446.649749755859</text:p>
              </table:table-cell>
              <table:table-cell office:value-type="float" office:value="0.01275077">
                <text:p>0.01275077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446.763946533203">
                <text:p>446.763946533203</text:p>
              </table:table-cell>
              <table:table-cell office:value-type="float" office:value="-0.002103605">
                <text:p>-0.002103605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446.878143310547">
                <text:p>446.878143310547</text:p>
              </table:table-cell>
              <table:table-cell office:value-type="float" office:value="-0.001598909">
                <text:p>-0.001598909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446.992370605469">
                <text:p>446.992370605469</text:p>
              </table:table-cell>
              <table:table-cell office:value-type="float" office:value="-0.002946174">
                <text:p>-0.002946174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447.106567382813">
                <text:p>447.106567382813</text:p>
              </table:table-cell>
              <table:table-cell office:value-type="float" office:value="0.01347492">
                <text:p>0.01347492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447.220794677734">
                <text:p>447.220794677734</text:p>
              </table:table-cell>
              <table:table-cell office:value-type="float" office:value="0.001781226">
                <text:p>0.001781226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447.335021972656">
                <text:p>447.335021972656</text:p>
              </table:table-cell>
              <table:table-cell office:value-type="float" office:value="0.003300244">
                <text:p>0.003300244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447.449249267578">
                <text:p>447.449249267578</text:p>
              </table:table-cell>
              <table:table-cell office:value-type="float" office:value="0.007786409">
                <text:p>0.007786409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447.5634765625">
                <text:p>447.5634765625</text:p>
              </table:table-cell>
              <table:table-cell office:value-type="float" office:value="0.001226972">
                <text:p>0.001226972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447.677703857422">
                <text:p>447.677703857422</text:p>
              </table:table-cell>
              <table:table-cell office:value-type="float" office:value="0.003318536">
                <text:p>0.003318536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447.791961669922">
                <text:p>447.791961669922</text:p>
              </table:table-cell>
              <table:table-cell office:value-type="float" office:value="-0.006618979">
                <text:p>-0.006618979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447.906188964844">
                <text:p>447.906188964844</text:p>
              </table:table-cell>
              <table:table-cell office:value-type="float" office:value="-0.007578065">
                <text:p>-0.007578065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448.020446777344">
                <text:p>448.020446777344</text:p>
              </table:table-cell>
              <table:table-cell office:value-type="float" office:value="-0.005608231">
                <text:p>-0.005608231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448.134704589844">
                <text:p>448.134704589844</text:p>
              </table:table-cell>
              <table:table-cell office:value-type="float" office:value="0.01187086">
                <text:p>0.01187086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448.248962402344">
                <text:p>448.248962402344</text:p>
              </table:table-cell>
              <table:table-cell office:value-type="float" office:value="-0.007454613">
                <text:p>-0.007454613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448.363220214844">
                <text:p>448.363220214844</text:p>
              </table:table-cell>
              <table:table-cell office:value-type="float" office:value="-0.002079828">
                <text:p>-0.002079828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448.477508544922">
                <text:p>448.477508544922</text:p>
              </table:table-cell>
              <table:table-cell office:value-type="float" office:value="0.007708652">
                <text:p>0.007708652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448.591766357422">
                <text:p>448.591766357422</text:p>
              </table:table-cell>
              <table:table-cell office:value-type="float" office:value="0.01011891">
                <text:p>0.01011891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448.7060546875">
                <text:p>448.7060546875</text:p>
              </table:table-cell>
              <table:table-cell office:value-type="float" office:value="0.01009853">
                <text:p>0.01009853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448.820343017578">
                <text:p>448.820343017578</text:p>
              </table:table-cell>
              <table:table-cell office:value-type="float" office:value="-0.007952846">
                <text:p>-0.007952846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448.934631347656">
                <text:p>448.934631347656</text:p>
              </table:table-cell>
              <table:table-cell office:value-type="float" office:value="-0.0008618123">
                <text:p>-0.0008618123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449.048919677734">
                <text:p>449.048919677734</text:p>
              </table:table-cell>
              <table:table-cell office:value-type="float" office:value="-0.002153406">
                <text:p>-0.002153406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449.163238525391">
                <text:p>449.163238525391</text:p>
              </table:table-cell>
              <table:table-cell office:value-type="float" office:value="-0.01040481">
                <text:p>-0.01040481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449.277526855469">
                <text:p>449.277526855469</text:p>
              </table:table-cell>
              <table:table-cell office:value-type="float" office:value="0.0003271958">
                <text:p>0.0003271958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449.391845703125">
                <text:p>449.391845703125</text:p>
              </table:table-cell>
              <table:table-cell office:value-type="float" office:value="0.01363706">
                <text:p>0.01363706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449.506164550781">
                <text:p>449.506164550781</text:p>
              </table:table-cell>
              <table:table-cell office:value-type="float" office:value="0.0007790584">
                <text:p>0.0007790584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449.620483398438">
                <text:p>449.620483398438</text:p>
              </table:table-cell>
              <table:table-cell office:value-type="float" office:value="0.007993995">
                <text:p>0.007993995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449.734802246094">
                <text:p>449.734802246094</text:p>
              </table:table-cell>
              <table:table-cell office:value-type="float" office:value="-0.01003489">
                <text:p>-0.01003489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449.84912109375">
                <text:p>449.84912109375</text:p>
              </table:table-cell>
              <table:table-cell office:value-type="float" office:value="0.006717833">
                <text:p>0.006717833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449.963439941406">
                <text:p>449.963439941406</text:p>
              </table:table-cell>
              <table:table-cell office:value-type="float" office:value="-0.003859197">
                <text:p>-0.003859197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450.077789306641">
                <text:p>450.077789306641</text:p>
              </table:table-cell>
              <table:table-cell office:value-type="float" office:value="-0.002276119">
                <text:p>-0.002276119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450.192138671875">
                <text:p>450.192138671875</text:p>
              </table:table-cell>
              <table:table-cell office:value-type="float" office:value="-0.01278835">
                <text:p>-0.01278835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450.306488037109">
                <text:p>450.306488037109</text:p>
              </table:table-cell>
              <table:table-cell office:value-type="float" office:value="0.006823399">
                <text:p>0.006823399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450.420837402344">
                <text:p>450.420837402344</text:p>
              </table:table-cell>
              <table:table-cell office:value-type="float" office:value="0.002755719">
                <text:p>0.002755719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450.535186767578">
                <text:p>450.535186767578</text:p>
              </table:table-cell>
              <table:table-cell office:value-type="float" office:value="0.0006537001">
                <text:p>0.0006537001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450.649536132813">
                <text:p>450.649536132813</text:p>
              </table:table-cell>
              <table:table-cell office:value-type="float" office:value="-0.0118872">
                <text:p>-0.0118872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450.763916015625">
                <text:p>450.763916015625</text:p>
              </table:table-cell>
              <table:table-cell office:value-type="float" office:value="0.008646712">
                <text:p>0.008646712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450.878295898438">
                <text:p>450.878295898438</text:p>
              </table:table-cell>
              <table:table-cell office:value-type="float" office:value="-0.004270425">
                <text:p>-0.004270425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450.99267578125">
                <text:p>450.99267578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451.107055664063">
                <text:p>451.107055664063</text:p>
              </table:table-cell>
              <table:table-cell office:value-type="float" office:value="-0.01332995">
                <text:p>-0.01332995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451.221435546875">
                <text:p>451.221435546875</text:p>
              </table:table-cell>
              <table:table-cell office:value-type="float" office:value="0.0003553693">
                <text:p>0.0003553693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451.335815429688">
                <text:p>451.335815429688</text:p>
              </table:table-cell>
              <table:table-cell office:value-type="float" office:value="0.0120033">
                <text:p>0.0120033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451.450225830078">
                <text:p>451.450225830078</text:p>
              </table:table-cell>
              <table:table-cell office:value-type="float" office:value="0.001438251">
                <text:p>0.001438251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451.564605712891">
                <text:p>451.564605712891</text:p>
              </table:table-cell>
              <table:table-cell office:value-type="float" office:value="-0.0128956">
                <text:p>-0.0128956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451.679016113281">
                <text:p>451.679016113281</text:p>
              </table:table-cell>
              <table:table-cell office:value-type="float" office:value="0.007225335">
                <text:p>0.007225335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451.793426513672">
                <text:p>451.793426513672</text:p>
              </table:table-cell>
              <table:table-cell office:value-type="float" office:value="0.009445696">
                <text:p>0.009445696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451.907836914063">
                <text:p>451.907836914063</text:p>
              </table:table-cell>
              <table:table-cell office:value-type="float" office:value="-0.006431235">
                <text:p>-0.006431235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452.022247314453">
                <text:p>452.022247314453</text:p>
              </table:table-cell>
              <table:table-cell office:value-type="float" office:value="-0.003669839">
                <text:p>-0.003669839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452.136688232422">
                <text:p>452.136688232422</text:p>
              </table:table-cell>
              <table:table-cell office:value-type="float" office:value="0.003200527">
                <text:p>0.003200527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452.251098632813">
                <text:p>452.251098632813</text:p>
              </table:table-cell>
              <table:table-cell office:value-type="float" office:value="0.007500846">
                <text:p>0.007500846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452.365539550781">
                <text:p>452.365539550781</text:p>
              </table:table-cell>
              <table:table-cell office:value-type="float" office:value="-0.009560239">
                <text:p>-0.009560239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452.47998046875">
                <text:p>452.47998046875</text:p>
              </table:table-cell>
              <table:table-cell office:value-type="float" office:value="0.002793174">
                <text:p>0.002793174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452.594421386719">
                <text:p>452.594421386719</text:p>
              </table:table-cell>
              <table:table-cell office:value-type="float" office:value="0.009651322">
                <text:p>0.009651322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452.708862304688">
                <text:p>452.708862304688</text:p>
              </table:table-cell>
              <table:table-cell office:value-type="float" office:value="0.00574888">
                <text:p>0.00574888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452.823333740234">
                <text:p>452.823333740234</text:p>
              </table:table-cell>
              <table:table-cell office:value-type="float" office:value="0.008409975">
                <text:p>0.008409975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452.937774658203">
                <text:p>452.937774658203</text:p>
              </table:table-cell>
              <table:table-cell office:value-type="float" office:value="-0.006466214">
                <text:p>-0.006466214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453.05224609375">
                <text:p>453.05224609375</text:p>
              </table:table-cell>
              <table:table-cell office:value-type="float" office:value="-0.001639853">
                <text:p>-0.001639853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453.166717529297">
                <text:p>453.166717529297</text:p>
              </table:table-cell>
              <table:table-cell office:value-type="float" office:value="0.007070418">
                <text:p>0.007070418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453.281188964844">
                <text:p>453.281188964844</text:p>
              </table:table-cell>
              <table:table-cell office:value-type="float" office:value="-0.009934698">
                <text:p>-0.009934698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453.395660400391">
                <text:p>453.395660400391</text:p>
              </table:table-cell>
              <table:table-cell office:value-type="float" office:value="-0.002936454">
                <text:p>-0.002936454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453.510131835938">
                <text:p>453.510131835938</text:p>
              </table:table-cell>
              <table:table-cell office:value-type="float" office:value="0.01538199">
                <text:p>0.01538199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453.624603271484">
                <text:p>453.624603271484</text:p>
              </table:table-cell>
              <table:table-cell office:value-type="float" office:value="-0.005759727">
                <text:p>-0.005759727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453.739105224609">
                <text:p>453.739105224609</text:p>
              </table:table-cell>
              <table:table-cell office:value-type="float" office:value="-0.004322282">
                <text:p>-0.004322282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453.853607177734">
                <text:p>453.853607177734</text:p>
              </table:table-cell>
              <table:table-cell office:value-type="float" office:value="-0.003578571">
                <text:p>-0.003578571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453.968109130859">
                <text:p>453.968109130859</text:p>
              </table:table-cell>
              <table:table-cell office:value-type="float" office:value="0.002230419">
                <text:p>0.002230419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454.082611083984">
                <text:p>454.082611083984</text:p>
              </table:table-cell>
              <table:table-cell office:value-type="float" office:value="-0.001305144">
                <text:p>-0.001305144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454.197113037109">
                <text:p>454.197113037109</text:p>
              </table:table-cell>
              <table:table-cell office:value-type="float" office:value="-0.01020626">
                <text:p>-0.01020626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454.311614990234">
                <text:p>454.311614990234</text:p>
              </table:table-cell>
              <table:table-cell office:value-type="float" office:value="-0.01493955">
                <text:p>-0.01493955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454.426147460938">
                <text:p>454.426147460938</text:p>
              </table:table-cell>
              <table:table-cell office:value-type="float" office:value="0.006181602">
                <text:p>0.006181602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454.540649414063">
                <text:p>454.540649414063</text:p>
              </table:table-cell>
              <table:table-cell office:value-type="float" office:value="0.008752788">
                <text:p>0.008752788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454.655181884766">
                <text:p>454.655181884766</text:p>
              </table:table-cell>
              <table:table-cell office:value-type="float" office:value="-0.005646859">
                <text:p>-0.005646859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454.769714355469">
                <text:p>454.769714355469</text:p>
              </table:table-cell>
              <table:table-cell office:value-type="float" office:value="-0.002414186">
                <text:p>-0.002414186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454.884246826172">
                <text:p>454.884246826172</text:p>
              </table:table-cell>
              <table:table-cell office:value-type="float" office:value="0.0100296">
                <text:p>0.0100296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454.998809814453">
                <text:p>454.998809814453</text:p>
              </table:table-cell>
              <table:table-cell office:value-type="float" office:value="0.01179276">
                <text:p>0.01179276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455.113342285156">
                <text:p>455.113342285156</text:p>
              </table:table-cell>
              <table:table-cell office:value-type="float" office:value="-0.005764169">
                <text:p>-0.005764169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455.227905273438">
                <text:p>455.227905273438</text:p>
              </table:table-cell>
              <table:table-cell office:value-type="float" office:value="-0.004034984">
                <text:p>-0.004034984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455.342468261719">
                <text:p>455.342468261719</text:p>
              </table:table-cell>
              <table:table-cell office:value-type="float" office:value="0.007748742">
                <text:p>0.007748742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455.457000732422">
                <text:p>455.457000732422</text:p>
              </table:table-cell>
              <table:table-cell office:value-type="float" office:value="0.008531372">
                <text:p>0.008531372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455.571563720703">
                <text:p>455.571563720703</text:p>
              </table:table-cell>
              <table:table-cell office:value-type="float" office:value="-0.00885684">
                <text:p>-0.00885684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455.686157226563">
                <text:p>455.686157226563</text:p>
              </table:table-cell>
              <table:table-cell office:value-type="float" office:value="-0.01002599">
                <text:p>-0.01002599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455.800720214844">
                <text:p>455.800720214844</text:p>
              </table:table-cell>
              <table:table-cell office:value-type="float" office:value="0.01084867">
                <text:p>0.01084867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455.915313720703">
                <text:p>455.915313720703</text:p>
              </table:table-cell>
              <table:table-cell office:value-type="float" office:value="-0.0003913153">
                <text:p>-0.0003913153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456.029876708984">
                <text:p>456.029876708984</text:p>
              </table:table-cell>
              <table:table-cell office:value-type="float" office:value="-0.007040241">
                <text:p>-0.007040241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456.144470214844">
                <text:p>456.144470214844</text:p>
              </table:table-cell>
              <table:table-cell office:value-type="float" office:value="-0.004118278">
                <text:p>-0.004118278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456.259063720703">
                <text:p>456.259063720703</text:p>
              </table:table-cell>
              <table:table-cell office:value-type="float" office:value="-0.004097493">
                <text:p>-0.004097493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456.373657226563">
                <text:p>456.373657226563</text:p>
              </table:table-cell>
              <table:table-cell office:value-type="float" office:value="0.00865913">
                <text:p>0.00865913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456.488250732422">
                <text:p>456.488250732422</text:p>
              </table:table-cell>
              <table:table-cell office:value-type="float" office:value="-0.01003328">
                <text:p>-0.01003328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456.602874755859">
                <text:p>456.602874755859</text:p>
              </table:table-cell>
              <table:table-cell office:value-type="float" office:value="-0.01359212">
                <text:p>-0.01359212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456.717468261719">
                <text:p>456.717468261719</text:p>
              </table:table-cell>
              <table:table-cell office:value-type="float" office:value="0.01414785">
                <text:p>0.01414785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456.832092285156">
                <text:p>456.832092285156</text:p>
              </table:table-cell>
              <table:table-cell office:value-type="float" office:value="0.0007202075">
                <text:p>0.0007202075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456.946716308594">
                <text:p>456.946716308594</text:p>
              </table:table-cell>
              <table:table-cell office:value-type="float" office:value="-0.009483664">
                <text:p>-0.009483664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457.061340332031">
                <text:p>457.061340332031</text:p>
              </table:table-cell>
              <table:table-cell office:value-type="float" office:value="0.008170106">
                <text:p>0.008170106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457.175964355469">
                <text:p>457.175964355469</text:p>
              </table:table-cell>
              <table:table-cell office:value-type="float" office:value="0.004090678">
                <text:p>0.004090678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457.290618896484">
                <text:p>457.290618896484</text:p>
              </table:table-cell>
              <table:table-cell office:value-type="float" office:value="0.002947817">
                <text:p>0.002947817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457.405242919922">
                <text:p>457.405242919922</text:p>
              </table:table-cell>
              <table:table-cell office:value-type="float" office:value="-0.01280815">
                <text:p>-0.01280815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457.519897460938">
                <text:p>457.519897460938</text:p>
              </table:table-cell>
              <table:table-cell office:value-type="float" office:value="0.01599739">
                <text:p>0.01599739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457.634552001953">
                <text:p>457.634552001953</text:p>
              </table:table-cell>
              <table:table-cell office:value-type="float" office:value="0.008740897">
                <text:p>0.008740897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457.749206542969">
                <text:p>457.749206542969</text:p>
              </table:table-cell>
              <table:table-cell office:value-type="float" office:value="0.01096754">
                <text:p>0.01096754</text:p>
              </table:table-cell>
            </table:table-row>
            <table:table-row>
              <table:table-cell office:value-type="string">
                <text:p>1225</text:p>
              </table:table-cell>
              <table:table-cell office:value-type="float" office:value="457.863861083984">
                <text:p>457.863861083984</text:p>
              </table:table-cell>
              <table:table-cell office:value-type="float" office:value="-0.001412155">
                <text:p>-0.001412155</text:p>
              </table:table-cell>
            </table:table-row>
            <table:table-row>
              <table:table-cell office:value-type="string">
                <text:p>1226</text:p>
              </table:table-cell>
              <table:table-cell office:value-type="float" office:value="457.978515625">
                <text:p>457.978515625</text:p>
              </table:table-cell>
              <table:table-cell office:value-type="float" office:value="-0.001344411">
                <text:p>-0.001344411</text:p>
              </table:table-cell>
            </table:table-row>
            <table:table-row>
              <table:table-cell office:value-type="string">
                <text:p>1227</text:p>
              </table:table-cell>
              <table:table-cell office:value-type="float" office:value="458.093200683594">
                <text:p>458.093200683594</text:p>
              </table:table-cell>
              <table:table-cell office:value-type="float" office:value="-0.002023675">
                <text:p>-0.002023675</text:p>
              </table:table-cell>
            </table:table-row>
            <table:table-row>
              <table:table-cell office:value-type="string">
                <text:p>1228</text:p>
              </table:table-cell>
              <table:table-cell office:value-type="float" office:value="458.207855224609">
                <text:p>458.207855224609</text:p>
              </table:table-cell>
              <table:table-cell office:value-type="float" office:value="0.007047583">
                <text:p>0.007047583</text:p>
              </table:table-cell>
            </table:table-row>
            <table:table-row>
              <table:table-cell office:value-type="string">
                <text:p>1229</text:p>
              </table:table-cell>
              <table:table-cell office:value-type="float" office:value="458.322540283203">
                <text:p>458.322540283203</text:p>
              </table:table-cell>
              <table:table-cell office:value-type="float" office:value="0.01029635">
                <text:p>0.01029635</text:p>
              </table:table-cell>
            </table:table-row>
            <table:table-row>
              <table:table-cell office:value-type="string">
                <text:p>1230</text:p>
              </table:table-cell>
              <table:table-cell office:value-type="float" office:value="458.437225341797">
                <text:p>458.437225341797</text:p>
              </table:table-cell>
              <table:table-cell office:value-type="float" office:value="0.000216672">
                <text:p>0.000216672</text:p>
              </table:table-cell>
            </table:table-row>
            <table:table-row>
              <table:table-cell office:value-type="string">
                <text:p>1231</text:p>
              </table:table-cell>
              <table:table-cell office:value-type="float" office:value="458.551910400391">
                <text:p>458.551910400391</text:p>
              </table:table-cell>
              <table:table-cell office:value-type="float" office:value="0.007563733">
                <text:p>0.007563733</text:p>
              </table:table-cell>
            </table:table-row>
            <table:table-row>
              <table:table-cell office:value-type="string">
                <text:p>1232</text:p>
              </table:table-cell>
              <table:table-cell office:value-type="float" office:value="458.666595458984">
                <text:p>458.666595458984</text:p>
              </table:table-cell>
              <table:table-cell office:value-type="float" office:value="0.01511192">
                <text:p>0.01511192</text:p>
              </table:table-cell>
            </table:table-row>
            <table:table-row>
              <table:table-cell office:value-type="string">
                <text:p>1233</text:p>
              </table:table-cell>
              <table:table-cell office:value-type="float" office:value="458.781280517578">
                <text:p>458.781280517578</text:p>
              </table:table-cell>
              <table:table-cell office:value-type="float" office:value="-0.005795273">
                <text:p>-0.005795273</text:p>
              </table:table-cell>
            </table:table-row>
            <table:table-row>
              <table:table-cell office:value-type="string">
                <text:p>1234</text:p>
              </table:table-cell>
              <table:table-cell office:value-type="float" office:value="458.89599609375">
                <text:p>458.89599609375</text:p>
              </table:table-cell>
              <table:table-cell office:value-type="float" office:value="-0.001695699">
                <text:p>-0.001695699</text:p>
              </table:table-cell>
            </table:table-row>
            <table:table-row>
              <table:table-cell office:value-type="string">
                <text:p>1235</text:p>
              </table:table-cell>
              <table:table-cell office:value-type="float" office:value="459.010681152344">
                <text:p>459.010681152344</text:p>
              </table:table-cell>
              <table:table-cell office:value-type="float" office:value="0.01091462">
                <text:p>0.01091462</text:p>
              </table:table-cell>
            </table:table-row>
            <table:table-row>
              <table:table-cell office:value-type="string">
                <text:p>1236</text:p>
              </table:table-cell>
              <table:table-cell office:value-type="float" office:value="459.125396728516">
                <text:p>459.125396728516</text:p>
              </table:table-cell>
              <table:table-cell office:value-type="float" office:value="0.03199485">
                <text:p>0.03199485</text:p>
              </table:table-cell>
            </table:table-row>
            <table:table-row>
              <table:table-cell office:value-type="string">
                <text:p>1237</text:p>
              </table:table-cell>
              <table:table-cell office:value-type="float" office:value="459.240112304688">
                <text:p>459.240112304688</text:p>
              </table:table-cell>
              <table:table-cell office:value-type="float" office:value="0.009757375">
                <text:p>0.009757375</text:p>
              </table:table-cell>
            </table:table-row>
            <table:table-row>
              <table:table-cell office:value-type="string">
                <text:p>1238</text:p>
              </table:table-cell>
              <table:table-cell office:value-type="float" office:value="459.354827880859">
                <text:p>459.354827880859</text:p>
              </table:table-cell>
              <table:table-cell office:value-type="float" office:value="-0.006731304">
                <text:p>-0.006731304</text:p>
              </table:table-cell>
            </table:table-row>
            <table:table-row>
              <table:table-cell office:value-type="string">
                <text:p>1239</text:p>
              </table:table-cell>
              <table:table-cell office:value-type="float" office:value="459.469543457031">
                <text:p>459.469543457031</text:p>
              </table:table-cell>
              <table:table-cell office:value-type="float" office:value="0.004703616">
                <text:p>0.004703616</text:p>
              </table:table-cell>
            </table:table-row>
            <table:table-row>
              <table:table-cell office:value-type="string">
                <text:p>1240</text:p>
              </table:table-cell>
              <table:table-cell office:value-type="float" office:value="459.584289550781">
                <text:p>459.584289550781</text:p>
              </table:table-cell>
              <table:table-cell office:value-type="float" office:value="0.0004437476">
                <text:p>0.0004437476</text:p>
              </table:table-cell>
            </table:table-row>
            <table:table-row>
              <table:table-cell office:value-type="string">
                <text:p>1241</text:p>
              </table:table-cell>
              <table:table-cell office:value-type="float" office:value="459.699005126953">
                <text:p>459.699005126953</text:p>
              </table:table-cell>
              <table:table-cell office:value-type="float" office:value="0.005758418">
                <text:p>0.005758418</text:p>
              </table:table-cell>
            </table:table-row>
            <table:table-row>
              <table:table-cell office:value-type="string">
                <text:p>1242</text:p>
              </table:table-cell>
              <table:table-cell office:value-type="float" office:value="459.813751220703">
                <text:p>459.813751220703</text:p>
              </table:table-cell>
              <table:table-cell office:value-type="float" office:value="-0.005025982">
                <text:p>-0.005025982</text:p>
              </table:table-cell>
            </table:table-row>
            <table:table-row>
              <table:table-cell office:value-type="string">
                <text:p>1243</text:p>
              </table:table-cell>
              <table:table-cell office:value-type="float" office:value="459.928497314453">
                <text:p>459.928497314453</text:p>
              </table:table-cell>
              <table:table-cell office:value-type="float" office:value="0.007602708">
                <text:p>0.007602708</text:p>
              </table:table-cell>
            </table:table-row>
            <table:table-row>
              <table:table-cell office:value-type="string">
                <text:p>1244</text:p>
              </table:table-cell>
              <table:table-cell office:value-type="float" office:value="460.043243408203">
                <text:p>460.043243408203</text:p>
              </table:table-cell>
              <table:table-cell office:value-type="float" office:value="0.03479741">
                <text:p>0.03479741</text:p>
              </table:table-cell>
            </table:table-row>
            <table:table-row>
              <table:table-cell office:value-type="string">
                <text:p>1245</text:p>
              </table:table-cell>
              <table:table-cell office:value-type="float" office:value="460.157989501953">
                <text:p>460.157989501953</text:p>
              </table:table-cell>
              <table:table-cell office:value-type="float" office:value="0.01298271">
                <text:p>0.01298271</text:p>
              </table:table-cell>
            </table:table-row>
            <table:table-row>
              <table:table-cell office:value-type="string">
                <text:p>1246</text:p>
              </table:table-cell>
              <table:table-cell office:value-type="float" office:value="460.272735595703">
                <text:p>460.272735595703</text:p>
              </table:table-cell>
              <table:table-cell office:value-type="float" office:value="-0.01045016">
                <text:p>-0.01045016</text:p>
              </table:table-cell>
            </table:table-row>
            <table:table-row>
              <table:table-cell office:value-type="string">
                <text:p>1247</text:p>
              </table:table-cell>
              <table:table-cell office:value-type="float" office:value="460.387512207031">
                <text:p>460.387512207031</text:p>
              </table:table-cell>
              <table:table-cell office:value-type="float" office:value="-0.00280323">
                <text:p>-0.00280323</text:p>
              </table:table-cell>
            </table:table-row>
            <table:table-row>
              <table:table-cell office:value-type="string">
                <text:p>1248</text:p>
              </table:table-cell>
              <table:table-cell office:value-type="float" office:value="460.502258300781">
                <text:p>460.502258300781</text:p>
              </table:table-cell>
              <table:table-cell office:value-type="float" office:value="0.01008694">
                <text:p>0.01008694</text:p>
              </table:table-cell>
            </table:table-row>
            <table:table-row>
              <table:table-cell office:value-type="string">
                <text:p>1249</text:p>
              </table:table-cell>
              <table:table-cell office:value-type="float" office:value="460.617034912109">
                <text:p>460.617034912109</text:p>
              </table:table-cell>
              <table:table-cell office:value-type="float" office:value="-0.002404027">
                <text:p>-0.002404027</text:p>
              </table:table-cell>
            </table:table-row>
            <table:table-row>
              <table:table-cell office:value-type="string">
                <text:p>1250</text:p>
              </table:table-cell>
              <table:table-cell office:value-type="float" office:value="460.731811523438">
                <text:p>460.731811523438</text:p>
              </table:table-cell>
              <table:table-cell office:value-type="float" office:value="0.007890158">
                <text:p>0.007890158</text:p>
              </table:table-cell>
            </table:table-row>
            <table:table-row>
              <table:table-cell office:value-type="string">
                <text:p>1251</text:p>
              </table:table-cell>
              <table:table-cell office:value-type="float" office:value="460.846588134766">
                <text:p>460.846588134766</text:p>
              </table:table-cell>
              <table:table-cell office:value-type="float" office:value="0.01279604">
                <text:p>0.01279604</text:p>
              </table:table-cell>
            </table:table-row>
            <table:table-row>
              <table:table-cell office:value-type="string">
                <text:p>1252</text:p>
              </table:table-cell>
              <table:table-cell office:value-type="float" office:value="460.961364746094">
                <text:p>460.961364746094</text:p>
              </table:table-cell>
              <table:table-cell office:value-type="float" office:value="-0.001245443">
                <text:p>-0.001245443</text:p>
              </table:table-cell>
            </table:table-row>
            <table:table-row>
              <table:table-cell office:value-type="string">
                <text:p>1253</text:p>
              </table:table-cell>
              <table:table-cell office:value-type="float" office:value="461.076171875">
                <text:p>461.076171875</text:p>
              </table:table-cell>
              <table:table-cell office:value-type="float" office:value="-0.01011755">
                <text:p>-0.01011755</text:p>
              </table:table-cell>
            </table:table-row>
            <table:table-row>
              <table:table-cell office:value-type="string">
                <text:p>1254</text:p>
              </table:table-cell>
              <table:table-cell office:value-type="float" office:value="461.190948486328">
                <text:p>461.190948486328</text:p>
              </table:table-cell>
              <table:table-cell office:value-type="float" office:value="-0.0002007391">
                <text:p>-0.0002007391</text:p>
              </table:table-cell>
            </table:table-row>
            <table:table-row>
              <table:table-cell office:value-type="string">
                <text:p>1255</text:p>
              </table:table-cell>
              <table:table-cell office:value-type="float" office:value="461.305755615234">
                <text:p>461.305755615234</text:p>
              </table:table-cell>
              <table:table-cell office:value-type="float" office:value="0.005474839">
                <text:p>0.005474839</text:p>
              </table:table-cell>
            </table:table-row>
            <table:table-row>
              <table:table-cell office:value-type="string">
                <text:p>1256</text:p>
              </table:table-cell>
              <table:table-cell office:value-type="float" office:value="461.420562744141">
                <text:p>461.420562744141</text:p>
              </table:table-cell>
              <table:table-cell office:value-type="float" office:value="-0.001282535">
                <text:p>-0.001282535</text:p>
              </table:table-cell>
            </table:table-row>
            <table:table-row>
              <table:table-cell office:value-type="string">
                <text:p>1257</text:p>
              </table:table-cell>
              <table:table-cell office:value-type="float" office:value="461.535369873047">
                <text:p>461.535369873047</text:p>
              </table:table-cell>
              <table:table-cell office:value-type="float" office:value="-0.009004084">
                <text:p>-0.009004084</text:p>
              </table:table-cell>
            </table:table-row>
            <table:table-row>
              <table:table-cell office:value-type="string">
                <text:p>1258</text:p>
              </table:table-cell>
              <table:table-cell office:value-type="float" office:value="461.650177001953">
                <text:p>461.650177001953</text:p>
              </table:table-cell>
              <table:table-cell office:value-type="float" office:value="0.007748539">
                <text:p>0.007748539</text:p>
              </table:table-cell>
            </table:table-row>
            <table:table-row>
              <table:table-cell office:value-type="string">
                <text:p>1259</text:p>
              </table:table-cell>
              <table:table-cell office:value-type="float" office:value="461.764984130859">
                <text:p>461.764984130859</text:p>
              </table:table-cell>
              <table:table-cell office:value-type="float" office:value="0.003045518">
                <text:p>0.003045518</text:p>
              </table:table-cell>
            </table:table-row>
            <table:table-row>
              <table:table-cell office:value-type="string">
                <text:p>1260</text:p>
              </table:table-cell>
              <table:table-cell office:value-type="float" office:value="461.879791259766">
                <text:p>461.879791259766</text:p>
              </table:table-cell>
              <table:table-cell office:value-type="float" office:value="0.005748794">
                <text:p>0.005748794</text:p>
              </table:table-cell>
            </table:table-row>
            <table:table-row>
              <table:table-cell office:value-type="string">
                <text:p>1261</text:p>
              </table:table-cell>
              <table:table-cell office:value-type="float" office:value="461.99462890625">
                <text:p>461.99462890625</text:p>
              </table:table-cell>
              <table:table-cell office:value-type="float" office:value="-0.003392869">
                <text:p>-0.003392869</text:p>
              </table:table-cell>
            </table:table-row>
            <table:table-row>
              <table:table-cell office:value-type="string">
                <text:p>1262</text:p>
              </table:table-cell>
              <table:table-cell office:value-type="float" office:value="462.109466552734">
                <text:p>462.109466552734</text:p>
              </table:table-cell>
              <table:table-cell office:value-type="float" office:value="0.005376709">
                <text:p>0.005376709</text:p>
              </table:table-cell>
            </table:table-row>
            <table:table-row>
              <table:table-cell office:value-type="string">
                <text:p>1263</text:p>
              </table:table-cell>
              <table:table-cell office:value-type="float" office:value="462.224304199219">
                <text:p>462.224304199219</text:p>
              </table:table-cell>
              <table:table-cell office:value-type="float" office:value="0.001190242">
                <text:p>0.001190242</text:p>
              </table:table-cell>
            </table:table-row>
            <table:table-row>
              <table:table-cell office:value-type="string">
                <text:p>1264</text:p>
              </table:table-cell>
              <table:table-cell office:value-type="float" office:value="462.339141845703">
                <text:p>462.339141845703</text:p>
              </table:table-cell>
              <table:table-cell office:value-type="float" office:value="0.008572418">
                <text:p>0.008572418</text:p>
              </table:table-cell>
            </table:table-row>
            <table:table-row>
              <table:table-cell office:value-type="string">
                <text:p>1265</text:p>
              </table:table-cell>
              <table:table-cell office:value-type="float" office:value="462.453979492188">
                <text:p>462.453979492188</text:p>
              </table:table-cell>
              <table:table-cell office:value-type="float" office:value="-0.0009307576">
                <text:p>-0.0009307576</text:p>
              </table:table-cell>
            </table:table-row>
            <table:table-row>
              <table:table-cell office:value-type="string">
                <text:p>1266</text:p>
              </table:table-cell>
              <table:table-cell office:value-type="float" office:value="462.568817138672">
                <text:p>462.568817138672</text:p>
              </table:table-cell>
              <table:table-cell office:value-type="float" office:value="0.003130932">
                <text:p>0.003130932</text:p>
              </table:table-cell>
            </table:table-row>
            <table:table-row>
              <table:table-cell office:value-type="string">
                <text:p>1267</text:p>
              </table:table-cell>
              <table:table-cell office:value-type="float" office:value="462.683654785156">
                <text:p>462.683654785156</text:p>
              </table:table-cell>
              <table:table-cell office:value-type="float" office:value="0.01172821">
                <text:p>0.01172821</text:p>
              </table:table-cell>
            </table:table-row>
            <table:table-row>
              <table:table-cell office:value-type="string">
                <text:p>1268</text:p>
              </table:table-cell>
              <table:table-cell office:value-type="float" office:value="462.798522949219">
                <text:p>462.798522949219</text:p>
              </table:table-cell>
              <table:table-cell office:value-type="float" office:value="-0.008271471">
                <text:p>-0.008271471</text:p>
              </table:table-cell>
            </table:table-row>
            <table:table-row>
              <table:table-cell office:value-type="string">
                <text:p>1269</text:p>
              </table:table-cell>
              <table:table-cell office:value-type="float" office:value="462.913391113281">
                <text:p>462.913391113281</text:p>
              </table:table-cell>
              <table:table-cell office:value-type="float" office:value="-0.005325734">
                <text:p>-0.005325734</text:p>
              </table:table-cell>
            </table:table-row>
            <table:table-row>
              <table:table-cell office:value-type="string">
                <text:p>1270</text:p>
              </table:table-cell>
              <table:table-cell office:value-type="float" office:value="463.028259277344">
                <text:p>463.028259277344</text:p>
              </table:table-cell>
              <table:table-cell office:value-type="float" office:value="0.006385648">
                <text:p>0.006385648</text:p>
              </table:table-cell>
            </table:table-row>
            <table:table-row>
              <table:table-cell office:value-type="string">
                <text:p>1271</text:p>
              </table:table-cell>
              <table:table-cell office:value-type="float" office:value="463.143127441406">
                <text:p>463.143127441406</text:p>
              </table:table-cell>
              <table:table-cell office:value-type="float" office:value="0.005972693">
                <text:p>0.005972693</text:p>
              </table:table-cell>
            </table:table-row>
            <table:table-row>
              <table:table-cell office:value-type="string">
                <text:p>1272</text:p>
              </table:table-cell>
              <table:table-cell office:value-type="float" office:value="463.257995605469">
                <text:p>463.257995605469</text:p>
              </table:table-cell>
              <table:table-cell office:value-type="float" office:value="-0.007643347">
                <text:p>-0.007643347</text:p>
              </table:table-cell>
            </table:table-row>
            <table:table-row>
              <table:table-cell office:value-type="string">
                <text:p>1273</text:p>
              </table:table-cell>
              <table:table-cell office:value-type="float" office:value="463.372863769531">
                <text:p>463.372863769531</text:p>
              </table:table-cell>
              <table:table-cell office:value-type="float" office:value="0.01253285">
                <text:p>0.01253285</text:p>
              </table:table-cell>
            </table:table-row>
            <table:table-row>
              <table:table-cell office:value-type="string">
                <text:p>1274</text:p>
              </table:table-cell>
              <table:table-cell office:value-type="float" office:value="463.487762451172">
                <text:p>463.487762451172</text:p>
              </table:table-cell>
              <table:table-cell office:value-type="float" office:value="0.006767015">
                <text:p>0.006767015</text:p>
              </table:table-cell>
            </table:table-row>
            <table:table-row>
              <table:table-cell office:value-type="string">
                <text:p>1275</text:p>
              </table:table-cell>
              <table:table-cell office:value-type="float" office:value="463.602661132813">
                <text:p>463.602661132813</text:p>
              </table:table-cell>
              <table:table-cell office:value-type="float" office:value="0.006903361">
                <text:p>0.006903361</text:p>
              </table:table-cell>
            </table:table-row>
            <table:table-row>
              <table:table-cell office:value-type="string">
                <text:p>1276</text:p>
              </table:table-cell>
              <table:table-cell office:value-type="float" office:value="463.717529296875">
                <text:p>463.717529296875</text:p>
              </table:table-cell>
              <table:table-cell office:value-type="float" office:value="-0.001867501">
                <text:p>-0.001867501</text:p>
              </table:table-cell>
            </table:table-row>
            <table:table-row>
              <table:table-cell office:value-type="string">
                <text:p>1277</text:p>
              </table:table-cell>
              <table:table-cell office:value-type="float" office:value="463.832427978516">
                <text:p>463.832427978516</text:p>
              </table:table-cell>
              <table:table-cell office:value-type="float" office:value="-0.01015917">
                <text:p>-0.01015917</text:p>
              </table:table-cell>
            </table:table-row>
            <table:table-row>
              <table:table-cell office:value-type="string">
                <text:p>1278</text:p>
              </table:table-cell>
              <table:table-cell office:value-type="float" office:value="463.947326660156">
                <text:p>463.947326660156</text:p>
              </table:table-cell>
              <table:table-cell office:value-type="float" office:value="0.002355546">
                <text:p>0.002355546</text:p>
              </table:table-cell>
            </table:table-row>
            <table:table-row>
              <table:table-cell office:value-type="string">
                <text:p>1279</text:p>
              </table:table-cell>
              <table:table-cell office:value-type="float" office:value="464.062255859375">
                <text:p>464.062255859375</text:p>
              </table:table-cell>
              <table:table-cell office:value-type="float" office:value="-0.004269926">
                <text:p>-0.004269926</text:p>
              </table:table-cell>
            </table:table-row>
            <table:table-row>
              <table:table-cell office:value-type="string">
                <text:p>1280</text:p>
              </table:table-cell>
              <table:table-cell office:value-type="float" office:value="464.177154541016">
                <text:p>464.177154541016</text:p>
              </table:table-cell>
              <table:table-cell office:value-type="float" office:value="-0.005666158">
                <text:p>-0.005666158</text:p>
              </table:table-cell>
            </table:table-row>
            <table:table-row>
              <table:table-cell office:value-type="string">
                <text:p>1281</text:p>
              </table:table-cell>
              <table:table-cell office:value-type="float" office:value="464.292083740234">
                <text:p>464.292083740234</text:p>
              </table:table-cell>
              <table:table-cell office:value-type="float" office:value="-0.008966136">
                <text:p>-0.008966136</text:p>
              </table:table-cell>
            </table:table-row>
            <table:table-row>
              <table:table-cell office:value-type="string">
                <text:p>1282</text:p>
              </table:table-cell>
              <table:table-cell office:value-type="float" office:value="464.406982421875">
                <text:p>464.406982421875</text:p>
              </table:table-cell>
              <table:table-cell office:value-type="float" office:value="0.006248052">
                <text:p>0.006248052</text:p>
              </table:table-cell>
            </table:table-row>
            <table:table-row>
              <table:table-cell office:value-type="string">
                <text:p>1283</text:p>
              </table:table-cell>
              <table:table-cell office:value-type="float" office:value="464.521911621094">
                <text:p>464.521911621094</text:p>
              </table:table-cell>
              <table:table-cell office:value-type="float" office:value="-0.004114914">
                <text:p>-0.004114914</text:p>
              </table:table-cell>
            </table:table-row>
            <table:table-row>
              <table:table-cell office:value-type="string">
                <text:p>1284</text:p>
              </table:table-cell>
              <table:table-cell office:value-type="float" office:value="464.636840820313">
                <text:p>464.636840820313</text:p>
              </table:table-cell>
              <table:table-cell office:value-type="float" office:value="-0.003526712">
                <text:p>-0.003526712</text:p>
              </table:table-cell>
            </table:table-row>
            <table:table-row>
              <table:table-cell office:value-type="string">
                <text:p>1285</text:p>
              </table:table-cell>
              <table:table-cell office:value-type="float" office:value="464.751770019531">
                <text:p>464.751770019531</text:p>
              </table:table-cell>
              <table:table-cell office:value-type="float" office:value="-0.007684425">
                <text:p>-0.007684425</text:p>
              </table:table-cell>
            </table:table-row>
            <table:table-row>
              <table:table-cell office:value-type="string">
                <text:p>1286</text:p>
              </table:table-cell>
              <table:table-cell office:value-type="float" office:value="464.866729736328">
                <text:p>464.866729736328</text:p>
              </table:table-cell>
              <table:table-cell office:value-type="float" office:value="0.003812834">
                <text:p>0.003812834</text:p>
              </table:table-cell>
            </table:table-row>
            <table:table-row>
              <table:table-cell office:value-type="string">
                <text:p>1287</text:p>
              </table:table-cell>
              <table:table-cell office:value-type="float" office:value="464.981658935547">
                <text:p>464.981658935547</text:p>
              </table:table-cell>
              <table:table-cell office:value-type="float" office:value="0.01325939">
                <text:p>0.01325939</text:p>
              </table:table-cell>
            </table:table-row>
            <table:table-row>
              <table:table-cell office:value-type="string">
                <text:p>1288</text:p>
              </table:table-cell>
              <table:table-cell office:value-type="float" office:value="465.096618652344">
                <text:p>465.096618652344</text:p>
              </table:table-cell>
              <table:table-cell office:value-type="float" office:value="-0.006460841">
                <text:p>-0.006460841</text:p>
              </table:table-cell>
            </table:table-row>
            <table:table-row>
              <table:table-cell office:value-type="string">
                <text:p>1289</text:p>
              </table:table-cell>
              <table:table-cell office:value-type="float" office:value="465.211547851563">
                <text:p>465.211547851563</text:p>
              </table:table-cell>
              <table:table-cell office:value-type="float" office:value="-0.01253736">
                <text:p>-0.01253736</text:p>
              </table:table-cell>
            </table:table-row>
            <table:table-row>
              <table:table-cell office:value-type="string">
                <text:p>1290</text:p>
              </table:table-cell>
              <table:table-cell office:value-type="float" office:value="465.326507568359">
                <text:p>465.326507568359</text:p>
              </table:table-cell>
              <table:table-cell office:value-type="float" office:value="-0.007548583">
                <text:p>-0.007548583</text:p>
              </table:table-cell>
            </table:table-row>
            <table:table-row>
              <table:table-cell office:value-type="string">
                <text:p>1291</text:p>
              </table:table-cell>
              <table:table-cell office:value-type="float" office:value="465.441467285156">
                <text:p>465.441467285156</text:p>
              </table:table-cell>
              <table:table-cell office:value-type="float" office:value="0.002299049">
                <text:p>0.002299049</text:p>
              </table:table-cell>
            </table:table-row>
            <table:table-row>
              <table:table-cell office:value-type="string">
                <text:p>1292</text:p>
              </table:table-cell>
              <table:table-cell office:value-type="float" office:value="465.556427001953">
                <text:p>465.556427001953</text:p>
              </table:table-cell>
              <table:table-cell office:value-type="float" office:value="-0.00393872">
                <text:p>-0.00393872</text:p>
              </table:table-cell>
            </table:table-row>
            <table:table-row>
              <table:table-cell office:value-type="string">
                <text:p>1293</text:p>
              </table:table-cell>
              <table:table-cell office:value-type="float" office:value="465.671417236328">
                <text:p>465.671417236328</text:p>
              </table:table-cell>
              <table:table-cell office:value-type="float" office:value="-0.007006244">
                <text:p>-0.007006244</text:p>
              </table:table-cell>
            </table:table-row>
            <table:table-row>
              <table:table-cell office:value-type="string">
                <text:p>1294</text:p>
              </table:table-cell>
              <table:table-cell office:value-type="float" office:value="465.786376953125">
                <text:p>465.786376953125</text:p>
              </table:table-cell>
              <table:table-cell office:value-type="float" office:value="0.004975195">
                <text:p>0.004975195</text:p>
              </table:table-cell>
            </table:table-row>
            <table:table-row>
              <table:table-cell office:value-type="string">
                <text:p>1295</text:p>
              </table:table-cell>
              <table:table-cell office:value-type="float" office:value="465.9013671875">
                <text:p>465.9013671875</text:p>
              </table:table-cell>
              <table:table-cell office:value-type="float" office:value="0.004990758">
                <text:p>0.004990758</text:p>
              </table:table-cell>
            </table:table-row>
            <table:table-row>
              <table:table-cell office:value-type="string">
                <text:p>1296</text:p>
              </table:table-cell>
              <table:table-cell office:value-type="float" office:value="466.016357421875">
                <text:p>466.016357421875</text:p>
              </table:table-cell>
              <table:table-cell office:value-type="float" office:value="-0.002011069">
                <text:p>-0.002011069</text:p>
              </table:table-cell>
            </table:table-row>
            <table:table-row>
              <table:table-cell office:value-type="string">
                <text:p>1297</text:p>
              </table:table-cell>
              <table:table-cell office:value-type="float" office:value="466.13134765625">
                <text:p>466.13134765625</text:p>
              </table:table-cell>
              <table:table-cell office:value-type="float" office:value="-0.008581454">
                <text:p>-0.008581454</text:p>
              </table:table-cell>
            </table:table-row>
            <table:table-row>
              <table:table-cell office:value-type="string">
                <text:p>1298</text:p>
              </table:table-cell>
              <table:table-cell office:value-type="float" office:value="466.246337890625">
                <text:p>466.246337890625</text:p>
              </table:table-cell>
              <table:table-cell office:value-type="float" office:value="0.01671099">
                <text:p>0.01671099</text:p>
              </table:table-cell>
            </table:table-row>
            <table:table-row>
              <table:table-cell office:value-type="string">
                <text:p>1299</text:p>
              </table:table-cell>
              <table:table-cell office:value-type="float" office:value="466.361328125">
                <text:p>466.361328125</text:p>
              </table:table-cell>
              <table:table-cell office:value-type="float" office:value="-0.002396022">
                <text:p>-0.002396022</text:p>
              </table:table-cell>
            </table:table-row>
            <table:table-row>
              <table:table-cell office:value-type="string">
                <text:p>1300</text:p>
              </table:table-cell>
              <table:table-cell office:value-type="float" office:value="466.476318359375">
                <text:p>466.476318359375</text:p>
              </table:table-cell>
              <table:table-cell office:value-type="float" office:value="-0.01226316">
                <text:p>-0.01226316</text:p>
              </table:table-cell>
            </table:table-row>
            <table:table-row>
              <table:table-cell office:value-type="string">
                <text:p>1301</text:p>
              </table:table-cell>
              <table:table-cell office:value-type="float" office:value="466.591339111328">
                <text:p>466.591339111328</text:p>
              </table:table-cell>
              <table:table-cell office:value-type="float" office:value="0.002997729">
                <text:p>0.002997729</text:p>
              </table:table-cell>
            </table:table-row>
            <table:table-row>
              <table:table-cell office:value-type="string">
                <text:p>1302</text:p>
              </table:table-cell>
              <table:table-cell office:value-type="float" office:value="466.706329345703">
                <text:p>466.706329345703</text:p>
              </table:table-cell>
              <table:table-cell office:value-type="float" office:value="0.02265209">
                <text:p>0.02265209</text:p>
              </table:table-cell>
            </table:table-row>
            <table:table-row>
              <table:table-cell office:value-type="string">
                <text:p>1303</text:p>
              </table:table-cell>
              <table:table-cell office:value-type="float" office:value="466.821350097656">
                <text:p>466.821350097656</text:p>
              </table:table-cell>
              <table:table-cell office:value-type="float" office:value="-0.001873595">
                <text:p>-0.001873595</text:p>
              </table:table-cell>
            </table:table-row>
            <table:table-row>
              <table:table-cell office:value-type="string">
                <text:p>1304</text:p>
              </table:table-cell>
              <table:table-cell office:value-type="float" office:value="466.936370849609">
                <text:p>466.936370849609</text:p>
              </table:table-cell>
              <table:table-cell office:value-type="float" office:value="-0.006089105">
                <text:p>-0.006089105</text:p>
              </table:table-cell>
            </table:table-row>
            <table:table-row>
              <table:table-cell office:value-type="string">
                <text:p>1305</text:p>
              </table:table-cell>
              <table:table-cell office:value-type="float" office:value="467.051391601563">
                <text:p>467.051391601563</text:p>
              </table:table-cell>
              <table:table-cell office:value-type="float" office:value="0.007267542">
                <text:p>0.007267542</text:p>
              </table:table-cell>
            </table:table-row>
            <table:table-row>
              <table:table-cell office:value-type="string">
                <text:p>1306</text:p>
              </table:table-cell>
              <table:table-cell office:value-type="float" office:value="467.166442871094">
                <text:p>467.166442871094</text:p>
              </table:table-cell>
              <table:table-cell office:value-type="float" office:value="-0.004449003">
                <text:p>-0.004449003</text:p>
              </table:table-cell>
            </table:table-row>
            <table:table-row>
              <table:table-cell office:value-type="string">
                <text:p>1307</text:p>
              </table:table-cell>
              <table:table-cell office:value-type="float" office:value="467.281463623047">
                <text:p>467.281463623047</text:p>
              </table:table-cell>
              <table:table-cell office:value-type="float" office:value="0.002113441">
                <text:p>0.002113441</text:p>
              </table:table-cell>
            </table:table-row>
            <table:table-row>
              <table:table-cell office:value-type="string">
                <text:p>1308</text:p>
              </table:table-cell>
              <table:table-cell office:value-type="float" office:value="467.396484375">
                <text:p>467.396484375</text:p>
              </table:table-cell>
              <table:table-cell office:value-type="float" office:value="-0.006481314">
                <text:p>-0.006481314</text:p>
              </table:table-cell>
            </table:table-row>
            <table:table-row>
              <table:table-cell office:value-type="string">
                <text:p>1309</text:p>
              </table:table-cell>
              <table:table-cell office:value-type="float" office:value="467.511535644531">
                <text:p>467.511535644531</text:p>
              </table:table-cell>
              <table:table-cell office:value-type="float" office:value="-0.008398138">
                <text:p>-0.008398138</text:p>
              </table:table-cell>
            </table:table-row>
            <table:table-row>
              <table:table-cell office:value-type="string">
                <text:p>1310</text:p>
              </table:table-cell>
              <table:table-cell office:value-type="float" office:value="467.626586914063">
                <text:p>467.626586914063</text:p>
              </table:table-cell>
              <table:table-cell office:value-type="float" office:value="0.002445267">
                <text:p>0.002445267</text:p>
              </table:table-cell>
            </table:table-row>
            <table:table-row>
              <table:table-cell office:value-type="string">
                <text:p>1311</text:p>
              </table:table-cell>
              <table:table-cell office:value-type="float" office:value="467.741638183594">
                <text:p>467.741638183594</text:p>
              </table:table-cell>
              <table:table-cell office:value-type="float" office:value="-0.009469284">
                <text:p>-0.009469284</text:p>
              </table:table-cell>
            </table:table-row>
            <table:table-row>
              <table:table-cell office:value-type="string">
                <text:p>1312</text:p>
              </table:table-cell>
              <table:table-cell office:value-type="float" office:value="467.856689453125">
                <text:p>467.856689453125</text:p>
              </table:table-cell>
              <table:table-cell office:value-type="float" office:value="-0.005587166">
                <text:p>-0.005587166</text:p>
              </table:table-cell>
            </table:table-row>
            <table:table-row>
              <table:table-cell office:value-type="string">
                <text:p>1313</text:p>
              </table:table-cell>
              <table:table-cell office:value-type="float" office:value="467.971740722656">
                <text:p>467.971740722656</text:p>
              </table:table-cell>
              <table:table-cell office:value-type="float" office:value="-0.007573757">
                <text:p>-0.007573757</text:p>
              </table:table-cell>
            </table:table-row>
            <table:table-row>
              <table:table-cell office:value-type="string">
                <text:p>1314</text:p>
              </table:table-cell>
              <table:table-cell office:value-type="float" office:value="468.086822509766">
                <text:p>468.086822509766</text:p>
              </table:table-cell>
              <table:table-cell office:value-type="float" office:value="-0.0002939502">
                <text:p>-0.0002939502</text:p>
              </table:table-cell>
            </table:table-row>
            <table:table-row>
              <table:table-cell office:value-type="string">
                <text:p>1315</text:p>
              </table:table-cell>
              <table:table-cell office:value-type="float" office:value="468.201873779297">
                <text:p>468.201873779297</text:p>
              </table:table-cell>
              <table:table-cell office:value-type="float" office:value="0.009317288">
                <text:p>0.009317288</text:p>
              </table:table-cell>
            </table:table-row>
            <table:table-row>
              <table:table-cell office:value-type="string">
                <text:p>1316</text:p>
              </table:table-cell>
              <table:table-cell office:value-type="float" office:value="468.316955566406">
                <text:p>468.316955566406</text:p>
              </table:table-cell>
              <table:table-cell office:value-type="float" office:value="-0.001477346">
                <text:p>-0.001477346</text:p>
              </table:table-cell>
            </table:table-row>
            <table:table-row>
              <table:table-cell office:value-type="string">
                <text:p>1317</text:p>
              </table:table-cell>
              <table:table-cell office:value-type="float" office:value="468.432037353516">
                <text:p>468.432037353516</text:p>
              </table:table-cell>
              <table:table-cell office:value-type="float" office:value="-0.002429493">
                <text:p>-0.002429493</text:p>
              </table:table-cell>
            </table:table-row>
            <table:table-row>
              <table:table-cell office:value-type="string">
                <text:p>1318</text:p>
              </table:table-cell>
              <table:table-cell office:value-type="float" office:value="468.547119140625">
                <text:p>468.547119140625</text:p>
              </table:table-cell>
              <table:table-cell office:value-type="float" office:value="-0.0003304803">
                <text:p>-0.0003304803</text:p>
              </table:table-cell>
            </table:table-row>
            <table:table-row>
              <table:table-cell office:value-type="string">
                <text:p>1319</text:p>
              </table:table-cell>
              <table:table-cell office:value-type="float" office:value="468.662200927734">
                <text:p>468.662200927734</text:p>
              </table:table-cell>
              <table:table-cell office:value-type="float" office:value="-0.006041169">
                <text:p>-0.006041169</text:p>
              </table:table-cell>
            </table:table-row>
            <table:table-row>
              <table:table-cell office:value-type="string">
                <text:p>1320</text:p>
              </table:table-cell>
              <table:table-cell office:value-type="float" office:value="468.777282714844">
                <text:p>468.777282714844</text:p>
              </table:table-cell>
              <table:table-cell office:value-type="float" office:value="-0.006917566">
                <text:p>-0.006917566</text:p>
              </table:table-cell>
            </table:table-row>
            <table:table-row>
              <table:table-cell office:value-type="string">
                <text:p>1321</text:p>
              </table:table-cell>
              <table:table-cell office:value-type="float" office:value="468.892395019531">
                <text:p>468.892395019531</text:p>
              </table:table-cell>
              <table:table-cell office:value-type="float" office:value="-0.005523594">
                <text:p>-0.005523594</text:p>
              </table:table-cell>
            </table:table-row>
            <table:table-row>
              <table:table-cell office:value-type="string">
                <text:p>1322</text:p>
              </table:table-cell>
              <table:table-cell office:value-type="float" office:value="469.007476806641">
                <text:p>469.007476806641</text:p>
              </table:table-cell>
              <table:table-cell office:value-type="float" office:value="0.02374534">
                <text:p>0.02374534</text:p>
              </table:table-cell>
            </table:table-row>
            <table:table-row>
              <table:table-cell office:value-type="string">
                <text:p>1323</text:p>
              </table:table-cell>
              <table:table-cell office:value-type="float" office:value="469.122589111328">
                <text:p>469.122589111328</text:p>
              </table:table-cell>
              <table:table-cell office:value-type="float" office:value="-0.0005143024">
                <text:p>-0.0005143024</text:p>
              </table:table-cell>
            </table:table-row>
            <table:table-row>
              <table:table-cell office:value-type="string">
                <text:p>1324</text:p>
              </table:table-cell>
              <table:table-cell office:value-type="float" office:value="469.237701416016">
                <text:p>469.237701416016</text:p>
              </table:table-cell>
              <table:table-cell office:value-type="float" office:value="0.003012771">
                <text:p>0.003012771</text:p>
              </table:table-cell>
            </table:table-row>
            <table:table-row>
              <table:table-cell office:value-type="string">
                <text:p>1325</text:p>
              </table:table-cell>
              <table:table-cell office:value-type="float" office:value="469.352813720703">
                <text:p>469.352813720703</text:p>
              </table:table-cell>
              <table:table-cell office:value-type="float" office:value="0.008939056">
                <text:p>0.008939056</text:p>
              </table:table-cell>
            </table:table-row>
            <table:table-row>
              <table:table-cell office:value-type="string">
                <text:p>1326</text:p>
              </table:table-cell>
              <table:table-cell office:value-type="float" office:value="469.467926025391">
                <text:p>469.467926025391</text:p>
              </table:table-cell>
              <table:table-cell office:value-type="float" office:value="0.008499378">
                <text:p>0.008499378</text:p>
              </table:table-cell>
            </table:table-row>
            <table:table-row>
              <table:table-cell office:value-type="string">
                <text:p>1327</text:p>
              </table:table-cell>
              <table:table-cell office:value-type="float" office:value="469.583068847656">
                <text:p>469.583068847656</text:p>
              </table:table-cell>
              <table:table-cell office:value-type="float" office:value="0.009154316">
                <text:p>0.009154316</text:p>
              </table:table-cell>
            </table:table-row>
            <table:table-row>
              <table:table-cell office:value-type="string">
                <text:p>1328</text:p>
              </table:table-cell>
              <table:table-cell office:value-type="float" office:value="469.698181152344">
                <text:p>469.698181152344</text:p>
              </table:table-cell>
              <table:table-cell office:value-type="float" office:value="0.0006466428">
                <text:p>0.0006466428</text:p>
              </table:table-cell>
            </table:table-row>
            <table:table-row>
              <table:table-cell office:value-type="string">
                <text:p>1329</text:p>
              </table:table-cell>
              <table:table-cell office:value-type="float" office:value="469.813323974609">
                <text:p>469.813323974609</text:p>
              </table:table-cell>
              <table:table-cell office:value-type="float" office:value="-0.005558756">
                <text:p>-0.005558756</text:p>
              </table:table-cell>
            </table:table-row>
            <table:table-row>
              <table:table-cell office:value-type="string">
                <text:p>1330</text:p>
              </table:table-cell>
              <table:table-cell office:value-type="float" office:value="469.928436279297">
                <text:p>469.928436279297</text:p>
              </table:table-cell>
              <table:table-cell office:value-type="float" office:value="-0.002583553">
                <text:p>-0.002583553</text:p>
              </table:table-cell>
            </table:table-row>
            <table:table-row>
              <table:table-cell office:value-type="string">
                <text:p>1331</text:p>
              </table:table-cell>
              <table:table-cell office:value-type="float" office:value="470.043579101563">
                <text:p>470.043579101563</text:p>
              </table:table-cell>
              <table:table-cell office:value-type="float" office:value="0.006083051">
                <text:p>0.006083051</text:p>
              </table:table-cell>
            </table:table-row>
            <table:table-row>
              <table:table-cell office:value-type="string">
                <text:p>1332</text:p>
              </table:table-cell>
              <table:table-cell office:value-type="float" office:value="470.158721923828">
                <text:p>470.158721923828</text:p>
              </table:table-cell>
              <table:table-cell office:value-type="float" office:value="-0.00985943">
                <text:p>-0.00985943</text:p>
              </table:table-cell>
            </table:table-row>
            <table:table-row>
              <table:table-cell office:value-type="string">
                <text:p>1333</text:p>
              </table:table-cell>
              <table:table-cell office:value-type="float" office:value="470.273895263672">
                <text:p>470.273895263672</text:p>
              </table:table-cell>
              <table:table-cell office:value-type="float" office:value="0.003892924">
                <text:p>0.003892924</text:p>
              </table:table-cell>
            </table:table-row>
            <table:table-row>
              <table:table-cell office:value-type="string">
                <text:p>1334</text:p>
              </table:table-cell>
              <table:table-cell office:value-type="float" office:value="470.389038085938">
                <text:p>470.389038085938</text:p>
              </table:table-cell>
              <table:table-cell office:value-type="float" office:value="0.005148243">
                <text:p>0.005148243</text:p>
              </table:table-cell>
            </table:table-row>
            <table:table-row>
              <table:table-cell office:value-type="string">
                <text:p>1335</text:p>
              </table:table-cell>
              <table:table-cell office:value-type="float" office:value="470.504180908203">
                <text:p>470.5041809082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6</text:p>
              </table:table-cell>
              <table:table-cell office:value-type="float" office:value="470.619354248047">
                <text:p>470.619354248047</text:p>
              </table:table-cell>
              <table:table-cell office:value-type="float" office:value="-0.008235204">
                <text:p>-0.008235204</text:p>
              </table:table-cell>
            </table:table-row>
            <table:table-row>
              <table:table-cell office:value-type="string">
                <text:p>1337</text:p>
              </table:table-cell>
              <table:table-cell office:value-type="float" office:value="470.734527587891">
                <text:p>470.734527587891</text:p>
              </table:table-cell>
              <table:table-cell office:value-type="float" office:value="0.009673507">
                <text:p>0.009673507</text:p>
              </table:table-cell>
            </table:table-row>
            <table:table-row>
              <table:table-cell office:value-type="string">
                <text:p>1338</text:p>
              </table:table-cell>
              <table:table-cell office:value-type="float" office:value="470.849700927734">
                <text:p>470.849700927734</text:p>
              </table:table-cell>
              <table:table-cell office:value-type="float" office:value="0.04094125">
                <text:p>0.04094125</text:p>
              </table:table-cell>
            </table:table-row>
            <table:table-row>
              <table:table-cell office:value-type="string">
                <text:p>1339</text:p>
              </table:table-cell>
              <table:table-cell office:value-type="float" office:value="470.964874267578">
                <text:p>470.964874267578</text:p>
              </table:table-cell>
              <table:table-cell office:value-type="float" office:value="0.001738107">
                <text:p>0.001738107</text:p>
              </table:table-cell>
            </table:table-row>
            <table:table-row>
              <table:table-cell office:value-type="string">
                <text:p>1340</text:p>
              </table:table-cell>
              <table:table-cell office:value-type="float" office:value="471.080047607422">
                <text:p>471.080047607422</text:p>
              </table:table-cell>
              <table:table-cell office:value-type="float" office:value="0.01532754">
                <text:p>0.01532754</text:p>
              </table:table-cell>
            </table:table-row>
            <table:table-row>
              <table:table-cell office:value-type="string">
                <text:p>1341</text:p>
              </table:table-cell>
              <table:table-cell office:value-type="float" office:value="471.195220947266">
                <text:p>471.195220947266</text:p>
              </table:table-cell>
              <table:table-cell office:value-type="float" office:value="-0.01150373">
                <text:p>-0.01150373</text:p>
              </table:table-cell>
            </table:table-row>
            <table:table-row>
              <table:table-cell office:value-type="string">
                <text:p>1342</text:p>
              </table:table-cell>
              <table:table-cell office:value-type="float" office:value="471.310424804688">
                <text:p>471.310424804688</text:p>
              </table:table-cell>
              <table:table-cell office:value-type="float" office:value="0.006961082">
                <text:p>0.006961082</text:p>
              </table:table-cell>
            </table:table-row>
            <table:table-row>
              <table:table-cell office:value-type="string">
                <text:p>1343</text:p>
              </table:table-cell>
              <table:table-cell office:value-type="float" office:value="471.425628662109">
                <text:p>471.425628662109</text:p>
              </table:table-cell>
              <table:table-cell office:value-type="float" office:value="0.003658751">
                <text:p>0.003658751</text:p>
              </table:table-cell>
            </table:table-row>
            <table:table-row>
              <table:table-cell office:value-type="string">
                <text:p>1344</text:p>
              </table:table-cell>
              <table:table-cell office:value-type="float" office:value="471.540802001953">
                <text:p>471.540802001953</text:p>
              </table:table-cell>
              <table:table-cell office:value-type="float" office:value="0.01432924">
                <text:p>0.01432924</text:p>
              </table:table-cell>
            </table:table-row>
            <table:table-row>
              <table:table-cell office:value-type="string">
                <text:p>1345</text:p>
              </table:table-cell>
              <table:table-cell office:value-type="float" office:value="471.656005859375">
                <text:p>471.656005859375</text:p>
              </table:table-cell>
              <table:table-cell office:value-type="float" office:value="-0.001712943">
                <text:p>-0.001712943</text:p>
              </table:table-cell>
            </table:table-row>
            <table:table-row>
              <table:table-cell office:value-type="string">
                <text:p>1346</text:p>
              </table:table-cell>
              <table:table-cell office:value-type="float" office:value="471.771209716797">
                <text:p>471.771209716797</text:p>
              </table:table-cell>
              <table:table-cell office:value-type="float" office:value="0.01922302">
                <text:p>0.01922302</text:p>
              </table:table-cell>
            </table:table-row>
            <table:table-row>
              <table:table-cell office:value-type="string">
                <text:p>1347</text:p>
              </table:table-cell>
              <table:table-cell office:value-type="float" office:value="471.886444091797">
                <text:p>471.886444091797</text:p>
              </table:table-cell>
              <table:table-cell office:value-type="float" office:value="0.01378861">
                <text:p>0.01378861</text:p>
              </table:table-cell>
            </table:table-row>
            <table:table-row>
              <table:table-cell office:value-type="string">
                <text:p>1348</text:p>
              </table:table-cell>
              <table:table-cell office:value-type="float" office:value="472.001647949219">
                <text:p>472.001647949219</text:p>
              </table:table-cell>
              <table:table-cell office:value-type="float" office:value="0.004957229">
                <text:p>0.004957229</text:p>
              </table:table-cell>
            </table:table-row>
            <table:table-row>
              <table:table-cell office:value-type="string">
                <text:p>1349</text:p>
              </table:table-cell>
              <table:table-cell office:value-type="float" office:value="472.116882324219">
                <text:p>472.116882324219</text:p>
              </table:table-cell>
              <table:table-cell office:value-type="float" office:value="-0.008223492">
                <text:p>-0.008223492</text:p>
              </table:table-cell>
            </table:table-row>
            <table:table-row>
              <table:table-cell office:value-type="string">
                <text:p>1350</text:p>
              </table:table-cell>
              <table:table-cell office:value-type="float" office:value="472.232086181641">
                <text:p>472.232086181641</text:p>
              </table:table-cell>
              <table:table-cell office:value-type="float" office:value="0.003861867">
                <text:p>0.003861867</text:p>
              </table:table-cell>
            </table:table-row>
            <table:table-row>
              <table:table-cell office:value-type="string">
                <text:p>1351</text:p>
              </table:table-cell>
              <table:table-cell office:value-type="float" office:value="472.347320556641">
                <text:p>472.347320556641</text:p>
              </table:table-cell>
              <table:table-cell office:value-type="float" office:value="0.001610812">
                <text:p>0.001610812</text:p>
              </table:table-cell>
            </table:table-row>
            <table:table-row>
              <table:table-cell office:value-type="string">
                <text:p>1352</text:p>
              </table:table-cell>
              <table:table-cell office:value-type="float" office:value="472.462554931641">
                <text:p>472.462554931641</text:p>
              </table:table-cell>
              <table:table-cell office:value-type="float" office:value="-0.01287526">
                <text:p>-0.01287526</text:p>
              </table:table-cell>
            </table:table-row>
            <table:table-row>
              <table:table-cell office:value-type="string">
                <text:p>1353</text:p>
              </table:table-cell>
              <table:table-cell office:value-type="float" office:value="472.577789306641">
                <text:p>472.577789306641</text:p>
              </table:table-cell>
              <table:table-cell office:value-type="float" office:value="-0.008520054">
                <text:p>-0.008520054</text:p>
              </table:table-cell>
            </table:table-row>
            <table:table-row>
              <table:table-cell office:value-type="string">
                <text:p>1354</text:p>
              </table:table-cell>
              <table:table-cell office:value-type="float" office:value="472.693023681641">
                <text:p>472.693023681641</text:p>
              </table:table-cell>
              <table:table-cell office:value-type="float" office:value="0.00821598">
                <text:p>0.00821598</text:p>
              </table:table-cell>
            </table:table-row>
            <table:table-row>
              <table:table-cell office:value-type="string">
                <text:p>1355</text:p>
              </table:table-cell>
              <table:table-cell office:value-type="float" office:value="472.808288574219">
                <text:p>472.808288574219</text:p>
              </table:table-cell>
              <table:table-cell office:value-type="float" office:value="-0.0008697776">
                <text:p>-0.0008697776</text:p>
              </table:table-cell>
            </table:table-row>
            <table:table-row>
              <table:table-cell office:value-type="string">
                <text:p>1356</text:p>
              </table:table-cell>
              <table:table-cell office:value-type="float" office:value="472.923522949219">
                <text:p>472.923522949219</text:p>
              </table:table-cell>
              <table:table-cell office:value-type="float" office:value="-0.007262242">
                <text:p>-0.007262242</text:p>
              </table:table-cell>
            </table:table-row>
            <table:table-row>
              <table:table-cell office:value-type="string">
                <text:p>1357</text:p>
              </table:table-cell>
              <table:table-cell office:value-type="float" office:value="473.038787841797">
                <text:p>473.038787841797</text:p>
              </table:table-cell>
              <table:table-cell office:value-type="float" office:value="-0.01060054">
                <text:p>-0.01060054</text:p>
              </table:table-cell>
            </table:table-row>
            <table:table-row>
              <table:table-cell office:value-type="string">
                <text:p>1358</text:p>
              </table:table-cell>
              <table:table-cell office:value-type="float" office:value="473.154052734375">
                <text:p>473.154052734375</text:p>
              </table:table-cell>
              <table:table-cell office:value-type="float" office:value="0.01233748">
                <text:p>0.01233748</text:p>
              </table:table-cell>
            </table:table-row>
            <table:table-row>
              <table:table-cell office:value-type="string">
                <text:p>1359</text:p>
              </table:table-cell>
              <table:table-cell office:value-type="float" office:value="473.269317626953">
                <text:p>473.269317626953</text:p>
              </table:table-cell>
              <table:table-cell office:value-type="float" office:value="0.006775979">
                <text:p>0.006775979</text:p>
              </table:table-cell>
            </table:table-row>
            <table:table-row>
              <table:table-cell office:value-type="string">
                <text:p>1360</text:p>
              </table:table-cell>
              <table:table-cell office:value-type="float" office:value="473.384582519531">
                <text:p>473.384582519531</text:p>
              </table:table-cell>
              <table:table-cell office:value-type="float" office:value="-0.00557491">
                <text:p>-0.00557491</text:p>
              </table:table-cell>
            </table:table-row>
            <table:table-row>
              <table:table-cell office:value-type="string">
                <text:p>1361</text:p>
              </table:table-cell>
              <table:table-cell office:value-type="float" office:value="473.499847412109">
                <text:p>473.499847412109</text:p>
              </table:table-cell>
              <table:table-cell office:value-type="float" office:value="-0.002756668">
                <text:p>-0.002756668</text:p>
              </table:table-cell>
            </table:table-row>
            <table:table-row>
              <table:table-cell office:value-type="string">
                <text:p>1362</text:p>
              </table:table-cell>
              <table:table-cell office:value-type="float" office:value="473.615112304688">
                <text:p>473.615112304688</text:p>
              </table:table-cell>
              <table:table-cell office:value-type="float" office:value="0.01476376">
                <text:p>0.01476376</text:p>
              </table:table-cell>
            </table:table-row>
            <table:table-row>
              <table:table-cell office:value-type="string">
                <text:p>1363</text:p>
              </table:table-cell>
              <table:table-cell office:value-type="float" office:value="473.730407714844">
                <text:p>473.730407714844</text:p>
              </table:table-cell>
              <table:table-cell office:value-type="float" office:value="0.02406246">
                <text:p>0.02406246</text:p>
              </table:table-cell>
            </table:table-row>
            <table:table-row>
              <table:table-cell office:value-type="string">
                <text:p>1364</text:p>
              </table:table-cell>
              <table:table-cell office:value-type="float" office:value="473.845703125">
                <text:p>473.845703125</text:p>
              </table:table-cell>
              <table:table-cell office:value-type="float" office:value="-0.004073996">
                <text:p>-0.004073996</text:p>
              </table:table-cell>
            </table:table-row>
            <table:table-row>
              <table:table-cell office:value-type="string">
                <text:p>1365</text:p>
              </table:table-cell>
              <table:table-cell office:value-type="float" office:value="473.960998535156">
                <text:p>473.960998535156</text:p>
              </table:table-cell>
              <table:table-cell office:value-type="float" office:value="0.002655835">
                <text:p>0.002655835</text:p>
              </table:table-cell>
            </table:table-row>
            <table:table-row>
              <table:table-cell office:value-type="string">
                <text:p>1366</text:p>
              </table:table-cell>
              <table:table-cell office:value-type="float" office:value="474.076263427734">
                <text:p>474.076263427734</text:p>
              </table:table-cell>
              <table:table-cell office:value-type="float" office:value="0.003344414">
                <text:p>0.003344414</text:p>
              </table:table-cell>
            </table:table-row>
            <table:table-row>
              <table:table-cell office:value-type="string">
                <text:p>1367</text:p>
              </table:table-cell>
              <table:table-cell office:value-type="float" office:value="474.191589355469">
                <text:p>474.191589355469</text:p>
              </table:table-cell>
              <table:table-cell office:value-type="float" office:value="0.01849372">
                <text:p>0.01849372</text:p>
              </table:table-cell>
            </table:table-row>
            <table:table-row>
              <table:table-cell office:value-type="string">
                <text:p>1368</text:p>
              </table:table-cell>
              <table:table-cell office:value-type="float" office:value="474.306884765625">
                <text:p>474.306884765625</text:p>
              </table:table-cell>
              <table:table-cell office:value-type="float" office:value="0.02004414">
                <text:p>0.02004414</text:p>
              </table:table-cell>
            </table:table-row>
            <table:table-row>
              <table:table-cell office:value-type="string">
                <text:p>1369</text:p>
              </table:table-cell>
              <table:table-cell office:value-type="float" office:value="474.422180175781">
                <text:p>474.422180175781</text:p>
              </table:table-cell>
              <table:table-cell office:value-type="float" office:value="-0.01195785">
                <text:p>-0.01195785</text:p>
              </table:table-cell>
            </table:table-row>
            <table:table-row>
              <table:table-cell office:value-type="string">
                <text:p>1370</text:p>
              </table:table-cell>
              <table:table-cell office:value-type="float" office:value="474.537506103516">
                <text:p>474.537506103516</text:p>
              </table:table-cell>
              <table:table-cell office:value-type="float" office:value="0.005309262">
                <text:p>0.005309262</text:p>
              </table:table-cell>
            </table:table-row>
            <table:table-row>
              <table:table-cell office:value-type="string">
                <text:p>1371</text:p>
              </table:table-cell>
              <table:table-cell office:value-type="float" office:value="474.652801513672">
                <text:p>474.652801513672</text:p>
              </table:table-cell>
              <table:table-cell office:value-type="float" office:value="-0.003913488">
                <text:p>-0.003913488</text:p>
              </table:table-cell>
            </table:table-row>
            <table:table-row>
              <table:table-cell office:value-type="string">
                <text:p>1372</text:p>
              </table:table-cell>
              <table:table-cell office:value-type="float" office:value="474.768127441406">
                <text:p>474.768127441406</text:p>
              </table:table-cell>
              <table:table-cell office:value-type="float" office:value="-0.008400773">
                <text:p>-0.008400773</text:p>
              </table:table-cell>
            </table:table-row>
            <table:table-row>
              <table:table-cell office:value-type="string">
                <text:p>1373</text:p>
              </table:table-cell>
              <table:table-cell office:value-type="float" office:value="474.883453369141">
                <text:p>474.883453369141</text:p>
              </table:table-cell>
              <table:table-cell office:value-type="float" office:value="-0.007338619">
                <text:p>-0.007338619</text:p>
              </table:table-cell>
            </table:table-row>
            <table:table-row>
              <table:table-cell office:value-type="string">
                <text:p>1374</text:p>
              </table:table-cell>
              <table:table-cell office:value-type="float" office:value="474.998779296875">
                <text:p>474.998779296875</text:p>
              </table:table-cell>
              <table:table-cell office:value-type="float" office:value="0.004868316">
                <text:p>0.004868316</text:p>
              </table:table-cell>
            </table:table-row>
            <table:table-row>
              <table:table-cell office:value-type="string">
                <text:p>1375</text:p>
              </table:table-cell>
              <table:table-cell office:value-type="float" office:value="475.114135742188">
                <text:p>475.114135742188</text:p>
              </table:table-cell>
              <table:table-cell office:value-type="float" office:value="-0.00599299">
                <text:p>-0.00599299</text:p>
              </table:table-cell>
            </table:table-row>
            <table:table-row>
              <table:table-cell office:value-type="string">
                <text:p>1376</text:p>
              </table:table-cell>
              <table:table-cell office:value-type="float" office:value="475.229461669922">
                <text:p>475.229461669922</text:p>
              </table:table-cell>
              <table:table-cell office:value-type="float" office:value="-0.006122907">
                <text:p>-0.006122907</text:p>
              </table:table-cell>
            </table:table-row>
            <table:table-row>
              <table:table-cell office:value-type="string">
                <text:p>1377</text:p>
              </table:table-cell>
              <table:table-cell office:value-type="float" office:value="475.344818115234">
                <text:p>475.344818115234</text:p>
              </table:table-cell>
              <table:table-cell office:value-type="float" office:value="0.0013595">
                <text:p>0.0013595</text:p>
              </table:table-cell>
            </table:table-row>
            <table:table-row>
              <table:table-cell office:value-type="string">
                <text:p>1378</text:p>
              </table:table-cell>
              <table:table-cell office:value-type="float" office:value="475.460144042969">
                <text:p>475.460144042969</text:p>
              </table:table-cell>
              <table:table-cell office:value-type="float" office:value="0.00774104">
                <text:p>0.00774104</text:p>
              </table:table-cell>
            </table:table-row>
            <table:table-row>
              <table:table-cell office:value-type="string">
                <text:p>1379</text:p>
              </table:table-cell>
              <table:table-cell office:value-type="float" office:value="475.575500488281">
                <text:p>475.575500488281</text:p>
              </table:table-cell>
              <table:table-cell office:value-type="float" office:value="0.001836566">
                <text:p>0.001836566</text:p>
              </table:table-cell>
            </table:table-row>
            <table:table-row>
              <table:table-cell office:value-type="string">
                <text:p>1380</text:p>
              </table:table-cell>
              <table:table-cell office:value-type="float" office:value="475.690856933594">
                <text:p>475.690856933594</text:p>
              </table:table-cell>
              <table:table-cell office:value-type="float" office:value="-0.0109275">
                <text:p>-0.0109275</text:p>
              </table:table-cell>
            </table:table-row>
            <table:table-row>
              <table:table-cell office:value-type="string">
                <text:p>1381</text:p>
              </table:table-cell>
              <table:table-cell office:value-type="float" office:value="475.806213378906">
                <text:p>475.806213378906</text:p>
              </table:table-cell>
              <table:table-cell office:value-type="float" office:value="-0.01138047">
                <text:p>-0.01138047</text:p>
              </table:table-cell>
            </table:table-row>
            <table:table-row>
              <table:table-cell office:value-type="string">
                <text:p>1382</text:p>
              </table:table-cell>
              <table:table-cell office:value-type="float" office:value="475.921569824219">
                <text:p>475.921569824219</text:p>
              </table:table-cell>
              <table:table-cell office:value-type="float" office:value="0.002115052">
                <text:p>0.002115052</text:p>
              </table:table-cell>
            </table:table-row>
            <table:table-row>
              <table:table-cell office:value-type="string">
                <text:p>1383</text:p>
              </table:table-cell>
              <table:table-cell office:value-type="float" office:value="476.036956787109">
                <text:p>476.036956787109</text:p>
              </table:table-cell>
              <table:table-cell office:value-type="float" office:value="0.006220316">
                <text:p>0.006220316</text:p>
              </table:table-cell>
            </table:table-row>
            <table:table-row>
              <table:table-cell office:value-type="string">
                <text:p>1384</text:p>
              </table:table-cell>
              <table:table-cell office:value-type="float" office:value="476.152313232422">
                <text:p>476.152313232422</text:p>
              </table:table-cell>
              <table:table-cell office:value-type="float" office:value="0.006109493">
                <text:p>0.006109493</text:p>
              </table:table-cell>
            </table:table-row>
            <table:table-row>
              <table:table-cell office:value-type="string">
                <text:p>1385</text:p>
              </table:table-cell>
              <table:table-cell office:value-type="float" office:value="476.267700195313">
                <text:p>476.267700195313</text:p>
              </table:table-cell>
              <table:table-cell office:value-type="float" office:value="-0.01219647">
                <text:p>-0.01219647</text:p>
              </table:table-cell>
            </table:table-row>
            <table:table-row>
              <table:table-cell office:value-type="string">
                <text:p>1386</text:p>
              </table:table-cell>
              <table:table-cell office:value-type="float" office:value="476.383087158203">
                <text:p>476.383087158203</text:p>
              </table:table-cell>
              <table:table-cell office:value-type="float" office:value="0.013596">
                <text:p>0.013596</text:p>
              </table:table-cell>
            </table:table-row>
            <table:table-row>
              <table:table-cell office:value-type="string">
                <text:p>1387</text:p>
              </table:table-cell>
              <table:table-cell office:value-type="float" office:value="476.498474121094">
                <text:p>476.498474121094</text:p>
              </table:table-cell>
              <table:table-cell office:value-type="float" office:value="0.000867445">
                <text:p>0.000867445</text:p>
              </table:table-cell>
            </table:table-row>
            <table:table-row>
              <table:table-cell office:value-type="string">
                <text:p>1388</text:p>
              </table:table-cell>
              <table:table-cell office:value-type="float" office:value="476.613861083984">
                <text:p>476.613861083984</text:p>
              </table:table-cell>
              <table:table-cell office:value-type="float" office:value="-0.007780048">
                <text:p>-0.007780048</text:p>
              </table:table-cell>
            </table:table-row>
            <table:table-row>
              <table:table-cell office:value-type="string">
                <text:p>1389</text:p>
              </table:table-cell>
              <table:table-cell office:value-type="float" office:value="476.729248046875">
                <text:p>476.729248046875</text:p>
              </table:table-cell>
              <table:table-cell office:value-type="float" office:value="-0.005762835">
                <text:p>-0.005762835</text:p>
              </table:table-cell>
            </table:table-row>
            <table:table-row>
              <table:table-cell office:value-type="string">
                <text:p>1390</text:p>
              </table:table-cell>
              <table:table-cell office:value-type="float" office:value="476.844665527344">
                <text:p>476.844665527344</text:p>
              </table:table-cell>
              <table:table-cell office:value-type="float" office:value="0.01515569">
                <text:p>0.01515569</text:p>
              </table:table-cell>
            </table:table-row>
            <table:table-row>
              <table:table-cell office:value-type="string">
                <text:p>1391</text:p>
              </table:table-cell>
              <table:table-cell office:value-type="float" office:value="476.960052490234">
                <text:p>476.960052490234</text:p>
              </table:table-cell>
              <table:table-cell office:value-type="float" office:value="0.001889517">
                <text:p>0.001889517</text:p>
              </table:table-cell>
            </table:table-row>
            <table:table-row>
              <table:table-cell office:value-type="string">
                <text:p>1392</text:p>
              </table:table-cell>
              <table:table-cell office:value-type="float" office:value="477.075469970703">
                <text:p>477.075469970703</text:p>
              </table:table-cell>
              <table:table-cell office:value-type="float" office:value="-0.01321137">
                <text:p>-0.01321137</text:p>
              </table:table-cell>
            </table:table-row>
            <table:table-row>
              <table:table-cell office:value-type="string">
                <text:p>1393</text:p>
              </table:table-cell>
              <table:table-cell office:value-type="float" office:value="477.190887451172">
                <text:p>477.190887451172</text:p>
              </table:table-cell>
              <table:table-cell office:value-type="float" office:value="-0.0076866">
                <text:p>-0.0076866</text:p>
              </table:table-cell>
            </table:table-row>
            <table:table-row>
              <table:table-cell office:value-type="string">
                <text:p>1394</text:p>
              </table:table-cell>
              <table:table-cell office:value-type="float" office:value="477.306304931641">
                <text:p>477.306304931641</text:p>
              </table:table-cell>
              <table:table-cell office:value-type="float" office:value="0.01433498">
                <text:p>0.01433498</text:p>
              </table:table-cell>
            </table:table-row>
            <table:table-row>
              <table:table-cell office:value-type="string">
                <text:p>1395</text:p>
              </table:table-cell>
              <table:table-cell office:value-type="float" office:value="477.421722412109">
                <text:p>477.421722412109</text:p>
              </table:table-cell>
              <table:table-cell office:value-type="float" office:value="-0.007647169">
                <text:p>-0.007647169</text:p>
              </table:table-cell>
            </table:table-row>
            <table:table-row>
              <table:table-cell office:value-type="string">
                <text:p>1396</text:p>
              </table:table-cell>
              <table:table-cell office:value-type="float" office:value="477.537139892578">
                <text:p>477.537139892578</text:p>
              </table:table-cell>
              <table:table-cell office:value-type="float" office:value="-0.005632555">
                <text:p>-0.005632555</text:p>
              </table:table-cell>
            </table:table-row>
            <table:table-row>
              <table:table-cell office:value-type="string">
                <text:p>1397</text:p>
              </table:table-cell>
              <table:table-cell office:value-type="float" office:value="477.652557373047">
                <text:p>477.652557373047</text:p>
              </table:table-cell>
              <table:table-cell office:value-type="float" office:value="-0.01245874">
                <text:p>-0.01245874</text:p>
              </table:table-cell>
            </table:table-row>
            <table:table-row>
              <table:table-cell office:value-type="string">
                <text:p>1398</text:p>
              </table:table-cell>
              <table:table-cell office:value-type="float" office:value="477.768005371094">
                <text:p>477.768005371094</text:p>
              </table:table-cell>
              <table:table-cell office:value-type="float" office:value="-0.005213653">
                <text:p>-0.005213653</text:p>
              </table:table-cell>
            </table:table-row>
            <table:table-row>
              <table:table-cell office:value-type="string">
                <text:p>1399</text:p>
              </table:table-cell>
              <table:table-cell office:value-type="float" office:value="477.883422851563">
                <text:p>477.883422851563</text:p>
              </table:table-cell>
              <table:table-cell office:value-type="float" office:value="0.0103522">
                <text:p>0.0103522</text:p>
              </table:table-cell>
            </table:table-row>
            <table:table-row>
              <table:table-cell office:value-type="string">
                <text:p>1400</text:p>
              </table:table-cell>
              <table:table-cell office:value-type="float" office:value="477.998870849609">
                <text:p>477.998870849609</text:p>
              </table:table-cell>
              <table:table-cell office:value-type="float" office:value="-0.01346915">
                <text:p>-0.01346915</text:p>
              </table:table-cell>
            </table:table-row>
            <table:table-row>
              <table:table-cell office:value-type="string">
                <text:p>1401</text:p>
              </table:table-cell>
              <table:table-cell office:value-type="float" office:value="478.114318847656">
                <text:p>478.114318847656</text:p>
              </table:table-cell>
              <table:table-cell office:value-type="float" office:value="-0.005310055">
                <text:p>-0.005310055</text:p>
              </table:table-cell>
            </table:table-row>
            <table:table-row>
              <table:table-cell office:value-type="string">
                <text:p>1402</text:p>
              </table:table-cell>
              <table:table-cell office:value-type="float" office:value="478.229766845703">
                <text:p>478.229766845703</text:p>
              </table:table-cell>
              <table:table-cell office:value-type="float" office:value="0.002985078">
                <text:p>0.002985078</text:p>
              </table:table-cell>
            </table:table-row>
            <table:table-row>
              <table:table-cell office:value-type="string">
                <text:p>1403</text:p>
              </table:table-cell>
              <table:table-cell office:value-type="float" office:value="478.345245361328">
                <text:p>478.345245361328</text:p>
              </table:table-cell>
              <table:table-cell office:value-type="float" office:value="0.000658094">
                <text:p>0.000658094</text:p>
              </table:table-cell>
            </table:table-row>
            <table:table-row>
              <table:table-cell office:value-type="string">
                <text:p>1404</text:p>
              </table:table-cell>
              <table:table-cell office:value-type="float" office:value="478.460693359375">
                <text:p>478.460693359375</text:p>
              </table:table-cell>
              <table:table-cell office:value-type="float" office:value="-0.01107436">
                <text:p>-0.01107436</text:p>
              </table:table-cell>
            </table:table-row>
            <table:table-row>
              <table:table-cell office:value-type="string">
                <text:p>1405</text:p>
              </table:table-cell>
              <table:table-cell office:value-type="float" office:value="478.576141357422">
                <text:p>478.576141357422</text:p>
              </table:table-cell>
              <table:table-cell office:value-type="float" office:value="-0.005830835">
                <text:p>-0.005830835</text:p>
              </table:table-cell>
            </table:table-row>
            <table:table-row>
              <table:table-cell office:value-type="string">
                <text:p>1406</text:p>
              </table:table-cell>
              <table:table-cell office:value-type="float" office:value="478.691619873047">
                <text:p>478.691619873047</text:p>
              </table:table-cell>
              <table:table-cell office:value-type="float" office:value="0.01177152">
                <text:p>0.01177152</text:p>
              </table:table-cell>
            </table:table-row>
            <table:table-row>
              <table:table-cell office:value-type="string">
                <text:p>1407</text:p>
              </table:table-cell>
              <table:table-cell office:value-type="float" office:value="478.807098388672">
                <text:p>478.807098388672</text:p>
              </table:table-cell>
              <table:table-cell office:value-type="float" office:value="-0.001904674">
                <text:p>-0.001904674</text:p>
              </table:table-cell>
            </table:table-row>
            <table:table-row>
              <table:table-cell office:value-type="string">
                <text:p>1408</text:p>
              </table:table-cell>
              <table:table-cell office:value-type="float" office:value="478.922576904297">
                <text:p>478.922576904297</text:p>
              </table:table-cell>
              <table:table-cell office:value-type="float" office:value="-0.00332491">
                <text:p>-0.00332491</text:p>
              </table:table-cell>
            </table:table-row>
            <table:table-row>
              <table:table-cell office:value-type="string">
                <text:p>1409</text:p>
              </table:table-cell>
              <table:table-cell office:value-type="float" office:value="479.038055419922">
                <text:p>479.038055419922</text:p>
              </table:table-cell>
              <table:table-cell office:value-type="float" office:value="-0.01148949">
                <text:p>-0.01148949</text:p>
              </table:table-cell>
            </table:table-row>
            <table:table-row>
              <table:table-cell office:value-type="string">
                <text:p>1410</text:p>
              </table:table-cell>
              <table:table-cell office:value-type="float" office:value="479.153533935547">
                <text:p>479.153533935547</text:p>
              </table:table-cell>
              <table:table-cell office:value-type="float" office:value="-0.001651747">
                <text:p>-0.001651747</text:p>
              </table:table-cell>
            </table:table-row>
            <table:table-row>
              <table:table-cell office:value-type="string">
                <text:p>1411</text:p>
              </table:table-cell>
              <table:table-cell office:value-type="float" office:value="479.269012451172">
                <text:p>479.269012451172</text:p>
              </table:table-cell>
              <table:table-cell office:value-type="float" office:value="0.01840026">
                <text:p>0.01840026</text:p>
              </table:table-cell>
            </table:table-row>
            <table:table-row>
              <table:table-cell office:value-type="string">
                <text:p>1412</text:p>
              </table:table-cell>
              <table:table-cell office:value-type="float" office:value="479.384521484375">
                <text:p>479.384521484375</text:p>
              </table:table-cell>
              <table:table-cell office:value-type="float" office:value="-0.008887157">
                <text:p>-0.008887157</text:p>
              </table:table-cell>
            </table:table-row>
            <table:table-row>
              <table:table-cell office:value-type="string">
                <text:p>1413</text:p>
              </table:table-cell>
              <table:table-cell office:value-type="float" office:value="479.500030517578">
                <text:p>479.500030517578</text:p>
              </table:table-cell>
              <table:table-cell office:value-type="float" office:value="-0.006676401">
                <text:p>-0.006676401</text:p>
              </table:table-cell>
            </table:table-row>
            <table:table-row>
              <table:table-cell office:value-type="string">
                <text:p>1414</text:p>
              </table:table-cell>
              <table:table-cell office:value-type="float" office:value="479.615509033203">
                <text:p>479.615509033203</text:p>
              </table:table-cell>
              <table:table-cell office:value-type="float" office:value="0.002588008">
                <text:p>0.002588008</text:p>
              </table:table-cell>
            </table:table-row>
            <table:table-row>
              <table:table-cell office:value-type="string">
                <text:p>1415</text:p>
              </table:table-cell>
              <table:table-cell office:value-type="float" office:value="479.731018066406">
                <text:p>479.731018066406</text:p>
              </table:table-cell>
              <table:table-cell office:value-type="float" office:value="0.001521646">
                <text:p>0.001521646</text:p>
              </table:table-cell>
            </table:table-row>
            <table:table-row>
              <table:table-cell office:value-type="string">
                <text:p>1416</text:p>
              </table:table-cell>
              <table:table-cell office:value-type="float" office:value="479.846527099609">
                <text:p>479.846527099609</text:p>
              </table:table-cell>
              <table:table-cell office:value-type="float" office:value="-0.005405684">
                <text:p>-0.005405684</text:p>
              </table:table-cell>
            </table:table-row>
            <table:table-row>
              <table:table-cell office:value-type="string">
                <text:p>1417</text:p>
              </table:table-cell>
              <table:table-cell office:value-type="float" office:value="479.962066650391">
                <text:p>479.962066650391</text:p>
              </table:table-cell>
              <table:table-cell office:value-type="float" office:value="-0.004226811">
                <text:p>-0.004226811</text:p>
              </table:table-cell>
            </table:table-row>
            <table:table-row>
              <table:table-cell office:value-type="string">
                <text:p>1418</text:p>
              </table:table-cell>
              <table:table-cell office:value-type="float" office:value="480.077575683594">
                <text:p>480.077575683594</text:p>
              </table:table-cell>
              <table:table-cell office:value-type="float" office:value="0.002989752">
                <text:p>0.002989752</text:p>
              </table:table-cell>
            </table:table-row>
            <table:table-row>
              <table:table-cell office:value-type="string">
                <text:p>1419</text:p>
              </table:table-cell>
              <table:table-cell office:value-type="float" office:value="480.193084716797">
                <text:p>480.193084716797</text:p>
              </table:table-cell>
              <table:table-cell office:value-type="float" office:value="0.01273088">
                <text:p>0.01273088</text:p>
              </table:table-cell>
            </table:table-row>
            <table:table-row>
              <table:table-cell office:value-type="string">
                <text:p>1420</text:p>
              </table:table-cell>
              <table:table-cell office:value-type="float" office:value="480.308624267578">
                <text:p>480.308624267578</text:p>
              </table:table-cell>
              <table:table-cell office:value-type="float" office:value="-0.005606724">
                <text:p>-0.005606724</text:p>
              </table:table-cell>
            </table:table-row>
            <table:table-row>
              <table:table-cell office:value-type="string">
                <text:p>1421</text:p>
              </table:table-cell>
              <table:table-cell office:value-type="float" office:value="480.424163818359">
                <text:p>480.424163818359</text:p>
              </table:table-cell>
              <table:table-cell office:value-type="float" office:value="-0.005175236">
                <text:p>-0.005175236</text:p>
              </table:table-cell>
            </table:table-row>
            <table:table-row>
              <table:table-cell office:value-type="string">
                <text:p>1422</text:p>
              </table:table-cell>
              <table:table-cell office:value-type="float" office:value="480.539703369141">
                <text:p>480.539703369141</text:p>
              </table:table-cell>
              <table:table-cell office:value-type="float" office:value="0.006955054">
                <text:p>0.006955054</text:p>
              </table:table-cell>
            </table:table-row>
            <table:table-row>
              <table:table-cell office:value-type="string">
                <text:p>1423</text:p>
              </table:table-cell>
              <table:table-cell office:value-type="float" office:value="480.655242919922">
                <text:p>480.655242919922</text:p>
              </table:table-cell>
              <table:table-cell office:value-type="float" office:value="-0.00281553">
                <text:p>-0.00281553</text:p>
              </table:table-cell>
            </table:table-row>
            <table:table-row>
              <table:table-cell office:value-type="string">
                <text:p>1424</text:p>
              </table:table-cell>
              <table:table-cell office:value-type="float" office:value="480.770782470703">
                <text:p>480.770782470703</text:p>
              </table:table-cell>
              <table:table-cell office:value-type="float" office:value="-0.009505508">
                <text:p>-0.009505508</text:p>
              </table:table-cell>
            </table:table-row>
            <table:table-row>
              <table:table-cell office:value-type="string">
                <text:p>1425</text:p>
              </table:table-cell>
              <table:table-cell office:value-type="float" office:value="480.886322021484">
                <text:p>480.886322021484</text:p>
              </table:table-cell>
              <table:table-cell office:value-type="float" office:value="-0.005556089">
                <text:p>-0.005556089</text:p>
              </table:table-cell>
            </table:table-row>
            <table:table-row>
              <table:table-cell office:value-type="string">
                <text:p>1426</text:p>
              </table:table-cell>
              <table:table-cell office:value-type="float" office:value="481.001892089844">
                <text:p>481.001892089844</text:p>
              </table:table-cell>
              <table:table-cell office:value-type="float" office:value="0.002163868">
                <text:p>0.002163868</text:p>
              </table:table-cell>
            </table:table-row>
            <table:table-row>
              <table:table-cell office:value-type="string">
                <text:p>1427</text:p>
              </table:table-cell>
              <table:table-cell office:value-type="float" office:value="481.117431640625">
                <text:p>481.117431640625</text:p>
              </table:table-cell>
              <table:table-cell office:value-type="float" office:value="0.004171134">
                <text:p>0.004171134</text:p>
              </table:table-cell>
            </table:table-row>
            <table:table-row>
              <table:table-cell office:value-type="string">
                <text:p>1428</text:p>
              </table:table-cell>
              <table:table-cell office:value-type="float" office:value="481.233001708984">
                <text:p>481.233001708984</text:p>
              </table:table-cell>
              <table:table-cell office:value-type="float" office:value="0.003146388">
                <text:p>0.003146388</text:p>
              </table:table-cell>
            </table:table-row>
            <table:table-row>
              <table:table-cell office:value-type="string">
                <text:p>1429</text:p>
              </table:table-cell>
              <table:table-cell office:value-type="float" office:value="481.348571777344">
                <text:p>481.348571777344</text:p>
              </table:table-cell>
              <table:table-cell office:value-type="float" office:value="-0.01055811">
                <text:p>-0.01055811</text:p>
              </table:table-cell>
            </table:table-row>
            <table:table-row>
              <table:table-cell office:value-type="string">
                <text:p>1430</text:p>
              </table:table-cell>
              <table:table-cell office:value-type="float" office:value="481.464141845703">
                <text:p>481.464141845703</text:p>
              </table:table-cell>
              <table:table-cell office:value-type="float" office:value="-0.004830192">
                <text:p>-0.004830192</text:p>
              </table:table-cell>
            </table:table-row>
            <table:table-row>
              <table:table-cell office:value-type="string">
                <text:p>1431</text:p>
              </table:table-cell>
              <table:table-cell office:value-type="float" office:value="481.579711914063">
                <text:p>481.579711914063</text:p>
              </table:table-cell>
              <table:table-cell office:value-type="float" office:value="0.003676412">
                <text:p>0.003676412</text:p>
              </table:table-cell>
            </table:table-row>
            <table:table-row>
              <table:table-cell office:value-type="string">
                <text:p>1432</text:p>
              </table:table-cell>
              <table:table-cell office:value-type="float" office:value="481.695281982422">
                <text:p>481.695281982422</text:p>
              </table:table-cell>
              <table:table-cell office:value-type="float" office:value="-0.01005893">
                <text:p>-0.01005893</text:p>
              </table:table-cell>
            </table:table-row>
            <table:table-row>
              <table:table-cell office:value-type="string">
                <text:p>1433</text:p>
              </table:table-cell>
              <table:table-cell office:value-type="float" office:value="481.810882568359">
                <text:p>481.810882568359</text:p>
              </table:table-cell>
              <table:table-cell office:value-type="float" office:value="-0.005021922">
                <text:p>-0.005021922</text:p>
              </table:table-cell>
            </table:table-row>
            <table:table-row>
              <table:table-cell office:value-type="string">
                <text:p>1434</text:p>
              </table:table-cell>
              <table:table-cell office:value-type="float" office:value="481.926452636719">
                <text:p>481.926452636719</text:p>
              </table:table-cell>
              <table:table-cell office:value-type="float" office:value="-0.002864691">
                <text:p>-0.002864691</text:p>
              </table:table-cell>
            </table:table-row>
            <table:table-row>
              <table:table-cell office:value-type="string">
                <text:p>1435</text:p>
              </table:table-cell>
              <table:table-cell office:value-type="float" office:value="482.042053222656">
                <text:p>482.042053222656</text:p>
              </table:table-cell>
              <table:table-cell office:value-type="float" office:value="0.0141093">
                <text:p>0.0141093</text:p>
              </table:table-cell>
            </table:table-row>
            <table:table-row>
              <table:table-cell office:value-type="string">
                <text:p>1436</text:p>
              </table:table-cell>
              <table:table-cell office:value-type="float" office:value="482.157653808594">
                <text:p>482.157653808594</text:p>
              </table:table-cell>
              <table:table-cell office:value-type="float" office:value="-0.008373532">
                <text:p>-0.008373532</text:p>
              </table:table-cell>
            </table:table-row>
            <table:table-row>
              <table:table-cell office:value-type="string">
                <text:p>1437</text:p>
              </table:table-cell>
              <table:table-cell office:value-type="float" office:value="482.273254394531">
                <text:p>482.273254394531</text:p>
              </table:table-cell>
              <table:table-cell office:value-type="float" office:value="-0.00259692">
                <text:p>-0.00259692</text:p>
              </table:table-cell>
            </table:table-row>
            <table:table-row>
              <table:table-cell office:value-type="string">
                <text:p>1438</text:p>
              </table:table-cell>
              <table:table-cell office:value-type="float" office:value="482.388854980469">
                <text:p>482.388854980469</text:p>
              </table:table-cell>
              <table:table-cell office:value-type="float" office:value="0.0114522">
                <text:p>0.0114522</text:p>
              </table:table-cell>
            </table:table-row>
            <table:table-row>
              <table:table-cell office:value-type="string">
                <text:p>1439</text:p>
              </table:table-cell>
              <table:table-cell office:value-type="float" office:value="482.504455566406">
                <text:p>482.504455566406</text:p>
              </table:table-cell>
              <table:table-cell office:value-type="float" office:value="0.01588655">
                <text:p>0.01588655</text:p>
              </table:table-cell>
            </table:table-row>
            <table:table-row>
              <table:table-cell office:value-type="string">
                <text:p>1440</text:p>
              </table:table-cell>
              <table:table-cell office:value-type="float" office:value="482.620086669922">
                <text:p>482.620086669922</text:p>
              </table:table-cell>
              <table:table-cell office:value-type="float" office:value="-0.007685413">
                <text:p>-0.007685413</text:p>
              </table:table-cell>
            </table:table-row>
            <table:table-row>
              <table:table-cell office:value-type="string">
                <text:p>1441</text:p>
              </table:table-cell>
              <table:table-cell office:value-type="float" office:value="482.735687255859">
                <text:p>482.735687255859</text:p>
              </table:table-cell>
              <table:table-cell office:value-type="float" office:value="0.001953851">
                <text:p>0.001953851</text:p>
              </table:table-cell>
            </table:table-row>
            <table:table-row>
              <table:table-cell office:value-type="string">
                <text:p>1442</text:p>
              </table:table-cell>
              <table:table-cell office:value-type="float" office:value="482.851318359375">
                <text:p>482.851318359375</text:p>
              </table:table-cell>
              <table:table-cell office:value-type="float" office:value="-0.005053786">
                <text:p>-0.005053786</text:p>
              </table:table-cell>
            </table:table-row>
            <table:table-row>
              <table:table-cell office:value-type="string">
                <text:p>1443</text:p>
              </table:table-cell>
              <table:table-cell office:value-type="float" office:value="482.966949462891">
                <text:p>482.966949462891</text:p>
              </table:table-cell>
              <table:table-cell office:value-type="float" office:value="0.00737689">
                <text:p>0.00737689</text:p>
              </table:table-cell>
            </table:table-row>
            <table:table-row>
              <table:table-cell office:value-type="string">
                <text:p>1444</text:p>
              </table:table-cell>
              <table:table-cell office:value-type="float" office:value="483.082580566406">
                <text:p>483.082580566406</text:p>
              </table:table-cell>
              <table:table-cell office:value-type="float" office:value="-0.01442056">
                <text:p>-0.01442056</text:p>
              </table:table-cell>
            </table:table-row>
            <table:table-row>
              <table:table-cell office:value-type="string">
                <text:p>1445</text:p>
              </table:table-cell>
              <table:table-cell office:value-type="float" office:value="483.198211669922">
                <text:p>483.198211669922</text:p>
              </table:table-cell>
              <table:table-cell office:value-type="float" office:value="0.0002854902">
                <text:p>0.0002854902</text:p>
              </table:table-cell>
            </table:table-row>
            <table:table-row>
              <table:table-cell office:value-type="string">
                <text:p>1446</text:p>
              </table:table-cell>
              <table:table-cell office:value-type="float" office:value="483.313842773438">
                <text:p>483.313842773438</text:p>
              </table:table-cell>
              <table:table-cell office:value-type="float" office:value="0.004712459">
                <text:p>0.004712459</text:p>
              </table:table-cell>
            </table:table-row>
            <table:table-row>
              <table:table-cell office:value-type="string">
                <text:p>1447</text:p>
              </table:table-cell>
              <table:table-cell office:value-type="float" office:value="483.429473876953">
                <text:p>483.429473876953</text:p>
              </table:table-cell>
              <table:table-cell office:value-type="float" office:value="0.01015335">
                <text:p>0.01015335</text:p>
              </table:table-cell>
            </table:table-row>
            <table:table-row>
              <table:table-cell office:value-type="string">
                <text:p>1448</text:p>
              </table:table-cell>
              <table:table-cell office:value-type="float" office:value="483.545135498047">
                <text:p>483.545135498047</text:p>
              </table:table-cell>
              <table:table-cell office:value-type="float" office:value="-0.002713885">
                <text:p>-0.002713885</text:p>
              </table:table-cell>
            </table:table-row>
            <table:table-row>
              <table:table-cell office:value-type="string">
                <text:p>1449</text:p>
              </table:table-cell>
              <table:table-cell office:value-type="float" office:value="483.660797119141">
                <text:p>483.660797119141</text:p>
              </table:table-cell>
              <table:table-cell office:value-type="float" office:value="-0.008773318">
                <text:p>-0.008773318</text:p>
              </table:table-cell>
            </table:table-row>
            <table:table-row>
              <table:table-cell office:value-type="string">
                <text:p>1450</text:p>
              </table:table-cell>
              <table:table-cell office:value-type="float" office:value="483.776428222656">
                <text:p>483.776428222656</text:p>
              </table:table-cell>
              <table:table-cell office:value-type="float" office:value="0.002603983">
                <text:p>0.002603983</text:p>
              </table:table-cell>
            </table:table-row>
            <table:table-row>
              <table:table-cell office:value-type="string">
                <text:p>1451</text:p>
              </table:table-cell>
              <table:table-cell office:value-type="float" office:value="483.89208984375">
                <text:p>483.89208984375</text:p>
              </table:table-cell>
              <table:table-cell office:value-type="float" office:value="0.01535252">
                <text:p>0.01535252</text:p>
              </table:table-cell>
            </table:table-row>
            <table:table-row>
              <table:table-cell office:value-type="string">
                <text:p>1452</text:p>
              </table:table-cell>
              <table:table-cell office:value-type="float" office:value="484.007751464844">
                <text:p>484.007751464844</text:p>
              </table:table-cell>
              <table:table-cell office:value-type="float" office:value="-0.01174382">
                <text:p>-0.01174382</text:p>
              </table:table-cell>
            </table:table-row>
            <table:table-row>
              <table:table-cell office:value-type="string">
                <text:p>1453</text:p>
              </table:table-cell>
              <table:table-cell office:value-type="float" office:value="484.123413085938">
                <text:p>484.123413085938</text:p>
              </table:table-cell>
              <table:table-cell office:value-type="float" office:value="-0.01473968">
                <text:p>-0.01473968</text:p>
              </table:table-cell>
            </table:table-row>
            <table:table-row>
              <table:table-cell office:value-type="string">
                <text:p>1454</text:p>
              </table:table-cell>
              <table:table-cell office:value-type="float" office:value="484.239105224609">
                <text:p>484.239105224609</text:p>
              </table:table-cell>
              <table:table-cell office:value-type="float" office:value="0.007465701">
                <text:p>0.007465701</text:p>
              </table:table-cell>
            </table:table-row>
            <table:table-row>
              <table:table-cell office:value-type="string">
                <text:p>1455</text:p>
              </table:table-cell>
              <table:table-cell office:value-type="float" office:value="484.354766845703">
                <text:p>484.354766845703</text:p>
              </table:table-cell>
              <table:table-cell office:value-type="float" office:value="-0.0005730155">
                <text:p>-0.0005730155</text:p>
              </table:table-cell>
            </table:table-row>
            <table:table-row>
              <table:table-cell office:value-type="string">
                <text:p>1456</text:p>
              </table:table-cell>
              <table:table-cell office:value-type="float" office:value="484.470458984375">
                <text:p>484.470458984375</text:p>
              </table:table-cell>
              <table:table-cell office:value-type="float" office:value="-0.002869045">
                <text:p>-0.002869045</text:p>
              </table:table-cell>
            </table:table-row>
            <table:table-row>
              <table:table-cell office:value-type="string">
                <text:p>1457</text:p>
              </table:table-cell>
              <table:table-cell office:value-type="float" office:value="484.586151123047">
                <text:p>484.586151123047</text:p>
              </table:table-cell>
              <table:table-cell office:value-type="float" office:value="-0.01003371">
                <text:p>-0.01003371</text:p>
              </table:table-cell>
            </table:table-row>
            <table:table-row>
              <table:table-cell office:value-type="string">
                <text:p>1458</text:p>
              </table:table-cell>
              <table:table-cell office:value-type="float" office:value="484.701843261719">
                <text:p>484.701843261719</text:p>
              </table:table-cell>
              <table:table-cell office:value-type="float" office:value="-0.00188562">
                <text:p>-0.00188562</text:p>
              </table:table-cell>
            </table:table-row>
            <table:table-row>
              <table:table-cell office:value-type="string">
                <text:p>1459</text:p>
              </table:table-cell>
              <table:table-cell office:value-type="float" office:value="484.817535400391">
                <text:p>484.817535400391</text:p>
              </table:table-cell>
              <table:table-cell office:value-type="float" office:value="0.00394034">
                <text:p>0.00394034</text:p>
              </table:table-cell>
            </table:table-row>
            <table:table-row>
              <table:table-cell office:value-type="string">
                <text:p>1460</text:p>
              </table:table-cell>
              <table:table-cell office:value-type="float" office:value="484.933227539063">
                <text:p>484.933227539063</text:p>
              </table:table-cell>
              <table:table-cell office:value-type="float" office:value="-0.01201624">
                <text:p>-0.01201624</text:p>
              </table:table-cell>
            </table:table-row>
            <table:table-row>
              <table:table-cell office:value-type="string">
                <text:p>1461</text:p>
              </table:table-cell>
              <table:table-cell office:value-type="float" office:value="485.048919677734">
                <text:p>485.048919677734</text:p>
              </table:table-cell>
              <table:table-cell office:value-type="float" office:value="-0.005275983">
                <text:p>-0.005275983</text:p>
              </table:table-cell>
            </table:table-row>
            <table:table-row>
              <table:table-cell office:value-type="string">
                <text:p>1462</text:p>
              </table:table-cell>
              <table:table-cell office:value-type="float" office:value="485.164642333984">
                <text:p>485.164642333984</text:p>
              </table:table-cell>
              <table:table-cell office:value-type="float" office:value="0.01313214">
                <text:p>0.01313214</text:p>
              </table:table-cell>
            </table:table-row>
            <table:table-row>
              <table:table-cell office:value-type="string">
                <text:p>1463</text:p>
              </table:table-cell>
              <table:table-cell office:value-type="float" office:value="485.280334472656">
                <text:p>485.280334472656</text:p>
              </table:table-cell>
              <table:table-cell office:value-type="float" office:value="0.001881214">
                <text:p>0.001881214</text:p>
              </table:table-cell>
            </table:table-row>
            <table:table-row>
              <table:table-cell office:value-type="string">
                <text:p>1464</text:p>
              </table:table-cell>
              <table:table-cell office:value-type="float" office:value="485.396057128906">
                <text:p>485.396057128906</text:p>
              </table:table-cell>
              <table:table-cell office:value-type="float" office:value="0.006115751">
                <text:p>0.006115751</text:p>
              </table:table-cell>
            </table:table-row>
            <table:table-row>
              <table:table-cell office:value-type="string">
                <text:p>1465</text:p>
              </table:table-cell>
              <table:table-cell office:value-type="float" office:value="485.511779785156">
                <text:p>485.511779785156</text:p>
              </table:table-cell>
              <table:table-cell office:value-type="float" office:value="-0.007984725">
                <text:p>-0.007984725</text:p>
              </table:table-cell>
            </table:table-row>
            <table:table-row>
              <table:table-cell office:value-type="string">
                <text:p>1466</text:p>
              </table:table-cell>
              <table:table-cell office:value-type="float" office:value="485.627502441406">
                <text:p>485.627502441406</text:p>
              </table:table-cell>
              <table:table-cell office:value-type="float" office:value="-0.001633322">
                <text:p>-0.001633322</text:p>
              </table:table-cell>
            </table:table-row>
            <table:table-row>
              <table:table-cell office:value-type="string">
                <text:p>1467</text:p>
              </table:table-cell>
              <table:table-cell office:value-type="float" office:value="485.743225097656">
                <text:p>485.743225097656</text:p>
              </table:table-cell>
              <table:table-cell office:value-type="float" office:value="0.0208698">
                <text:p>0.0208698</text:p>
              </table:table-cell>
            </table:table-row>
            <table:table-row>
              <table:table-cell office:value-type="string">
                <text:p>1468</text:p>
              </table:table-cell>
              <table:table-cell office:value-type="float" office:value="485.858947753906">
                <text:p>485.858947753906</text:p>
              </table:table-cell>
              <table:table-cell office:value-type="float" office:value="-0.01125749">
                <text:p>-0.01125749</text:p>
              </table:table-cell>
            </table:table-row>
            <table:table-row>
              <table:table-cell office:value-type="string">
                <text:p>1469</text:p>
              </table:table-cell>
              <table:table-cell office:value-type="float" office:value="485.974670410156">
                <text:p>485.974670410156</text:p>
              </table:table-cell>
              <table:table-cell office:value-type="float" office:value="-0.008454743">
                <text:p>-0.008454743</text:p>
              </table:table-cell>
            </table:table-row>
            <table:table-row>
              <table:table-cell office:value-type="string">
                <text:p>1470</text:p>
              </table:table-cell>
              <table:table-cell office:value-type="float" office:value="486.090423583984">
                <text:p>486.090423583984</text:p>
              </table:table-cell>
              <table:table-cell office:value-type="float" office:value="0.01945709">
                <text:p>0.01945709</text:p>
              </table:table-cell>
            </table:table-row>
            <table:table-row>
              <table:table-cell office:value-type="string">
                <text:p>1471</text:p>
              </table:table-cell>
              <table:table-cell office:value-type="float" office:value="486.206176757813">
                <text:p>486.206176757813</text:p>
              </table:table-cell>
              <table:table-cell office:value-type="float" office:value="0.0008279003">
                <text:p>0.0008279003</text:p>
              </table:table-cell>
            </table:table-row>
            <table:table-row>
              <table:table-cell office:value-type="string">
                <text:p>1472</text:p>
              </table:table-cell>
              <table:table-cell office:value-type="float" office:value="486.321899414063">
                <text:p>486.321899414063</text:p>
              </table:table-cell>
              <table:table-cell office:value-type="float" office:value="-0.003299104">
                <text:p>-0.003299104</text:p>
              </table:table-cell>
            </table:table-row>
            <table:table-row>
              <table:table-cell office:value-type="string">
                <text:p>1473</text:p>
              </table:table-cell>
              <table:table-cell office:value-type="float" office:value="486.437652587891">
                <text:p>486.437652587891</text:p>
              </table:table-cell>
              <table:table-cell office:value-type="float" office:value="-0.002976158">
                <text:p>-0.002976158</text:p>
              </table:table-cell>
            </table:table-row>
            <table:table-row>
              <table:table-cell office:value-type="string">
                <text:p>1474</text:p>
              </table:table-cell>
              <table:table-cell office:value-type="float" office:value="486.553436279297">
                <text:p>486.553436279297</text:p>
              </table:table-cell>
              <table:table-cell office:value-type="float" office:value="0.005366139">
                <text:p>0.005366139</text:p>
              </table:table-cell>
            </table:table-row>
            <table:table-row>
              <table:table-cell office:value-type="string">
                <text:p>1475</text:p>
              </table:table-cell>
              <table:table-cell office:value-type="float" office:value="486.669189453125">
                <text:p>486.669189453125</text:p>
              </table:table-cell>
              <table:table-cell office:value-type="float" office:value="0.00160918">
                <text:p>0.00160918</text:p>
              </table:table-cell>
            </table:table-row>
            <table:table-row>
              <table:table-cell office:value-type="string">
                <text:p>1476</text:p>
              </table:table-cell>
              <table:table-cell office:value-type="float" office:value="486.784942626953">
                <text:p>486.784942626953</text:p>
              </table:table-cell>
              <table:table-cell office:value-type="float" office:value="0.0004764845">
                <text:p>0.0004764845</text:p>
              </table:table-cell>
            </table:table-row>
            <table:table-row>
              <table:table-cell office:value-type="string">
                <text:p>1477</text:p>
              </table:table-cell>
              <table:table-cell office:value-type="float" office:value="486.900726318359">
                <text:p>486.900726318359</text:p>
              </table:table-cell>
              <table:table-cell office:value-type="float" office:value="-0.004634081">
                <text:p>-0.004634081</text:p>
              </table:table-cell>
            </table:table-row>
            <table:table-row>
              <table:table-cell office:value-type="string">
                <text:p>1478</text:p>
              </table:table-cell>
              <table:table-cell office:value-type="float" office:value="487.016479492188">
                <text:p>487.016479492188</text:p>
              </table:table-cell>
              <table:table-cell office:value-type="float" office:value="0.008790337">
                <text:p>0.008790337</text:p>
              </table:table-cell>
            </table:table-row>
            <table:table-row>
              <table:table-cell office:value-type="string">
                <text:p>1479</text:p>
              </table:table-cell>
              <table:table-cell office:value-type="float" office:value="487.132263183594">
                <text:p>487.132263183594</text:p>
              </table:table-cell>
              <table:table-cell office:value-type="float" office:value="-0.003265635">
                <text:p>-0.003265635</text:p>
              </table:table-cell>
            </table:table-row>
            <table:table-row>
              <table:table-cell office:value-type="string">
                <text:p>1480</text:p>
              </table:table-cell>
              <table:table-cell office:value-type="float" office:value="487.248046875">
                <text:p>487.248046875</text:p>
              </table:table-cell>
              <table:table-cell office:value-type="float" office:value="0.009937464">
                <text:p>0.009937464</text:p>
              </table:table-cell>
            </table:table-row>
            <table:table-row>
              <table:table-cell office:value-type="string">
                <text:p>1481</text:p>
              </table:table-cell>
              <table:table-cell office:value-type="float" office:value="487.363830566406">
                <text:p>487.363830566406</text:p>
              </table:table-cell>
              <table:table-cell office:value-type="float" office:value="0.001073063">
                <text:p>0.001073063</text:p>
              </table:table-cell>
            </table:table-row>
            <table:table-row>
              <table:table-cell office:value-type="string">
                <text:p>1482</text:p>
              </table:table-cell>
              <table:table-cell office:value-type="float" office:value="487.479614257813">
                <text:p>487.479614257813</text:p>
              </table:table-cell>
              <table:table-cell office:value-type="float" office:value="0.006665479">
                <text:p>0.006665479</text:p>
              </table:table-cell>
            </table:table-row>
            <table:table-row>
              <table:table-cell office:value-type="string">
                <text:p>1483</text:p>
              </table:table-cell>
              <table:table-cell office:value-type="float" office:value="487.595397949219">
                <text:p>487.595397949219</text:p>
              </table:table-cell>
              <table:table-cell office:value-type="float" office:value="0.007054868">
                <text:p>0.007054868</text:p>
              </table:table-cell>
            </table:table-row>
            <table:table-row>
              <table:table-cell office:value-type="string">
                <text:p>1484</text:p>
              </table:table-cell>
              <table:table-cell office:value-type="float" office:value="487.711212158203">
                <text:p>487.711212158203</text:p>
              </table:table-cell>
              <table:table-cell office:value-type="float" office:value="0.005752117">
                <text:p>0.005752117</text:p>
              </table:table-cell>
            </table:table-row>
            <table:table-row>
              <table:table-cell office:value-type="string">
                <text:p>1485</text:p>
              </table:table-cell>
              <table:table-cell office:value-type="float" office:value="487.826995849609">
                <text:p>487.826995849609</text:p>
              </table:table-cell>
              <table:table-cell office:value-type="float" office:value="-0.009299902">
                <text:p>-0.009299902</text:p>
              </table:table-cell>
            </table:table-row>
            <table:table-row>
              <table:table-cell office:value-type="string">
                <text:p>1486</text:p>
              </table:table-cell>
              <table:table-cell office:value-type="float" office:value="487.942810058594">
                <text:p>487.942810058594</text:p>
              </table:table-cell>
              <table:table-cell office:value-type="float" office:value="0.004256518">
                <text:p>0.004256518</text:p>
              </table:table-cell>
            </table:table-row>
            <table:table-row>
              <table:table-cell office:value-type="string">
                <text:p>1487</text:p>
              </table:table-cell>
              <table:table-cell office:value-type="float" office:value="488.058624267578">
                <text:p>488.058624267578</text:p>
              </table:table-cell>
              <table:table-cell office:value-type="float" office:value="0.01637192">
                <text:p>0.01637192</text:p>
              </table:table-cell>
            </table:table-row>
            <table:table-row>
              <table:table-cell office:value-type="string">
                <text:p>1488</text:p>
              </table:table-cell>
              <table:table-cell office:value-type="float" office:value="488.174438476563">
                <text:p>488.174438476563</text:p>
              </table:table-cell>
              <table:table-cell office:value-type="float" office:value="-0.0053939">
                <text:p>-0.0053939</text:p>
              </table:table-cell>
            </table:table-row>
            <table:table-row>
              <table:table-cell office:value-type="string">
                <text:p>1489</text:p>
              </table:table-cell>
              <table:table-cell office:value-type="float" office:value="488.290252685547">
                <text:p>488.290252685547</text:p>
              </table:table-cell>
              <table:table-cell office:value-type="float" office:value="-0.01154384">
                <text:p>-0.01154384</text:p>
              </table:table-cell>
            </table:table-row>
            <table:table-row>
              <table:table-cell office:value-type="string">
                <text:p>1490</text:p>
              </table:table-cell>
              <table:table-cell office:value-type="float" office:value="488.406066894531">
                <text:p>488.406066894531</text:p>
              </table:table-cell>
              <table:table-cell office:value-type="float" office:value="0.005580831">
                <text:p>0.005580831</text:p>
              </table:table-cell>
            </table:table-row>
            <table:table-row>
              <table:table-cell office:value-type="string">
                <text:p>1491</text:p>
              </table:table-cell>
              <table:table-cell office:value-type="float" office:value="488.521911621094">
                <text:p>488.521911621094</text:p>
              </table:table-cell>
              <table:table-cell office:value-type="float" office:value="-0.002123624">
                <text:p>-0.002123624</text:p>
              </table:table-cell>
            </table:table-row>
            <table:table-row>
              <table:table-cell office:value-type="string">
                <text:p>1492</text:p>
              </table:table-cell>
              <table:table-cell office:value-type="float" office:value="488.637725830078">
                <text:p>488.637725830078</text:p>
              </table:table-cell>
              <table:table-cell office:value-type="float" office:value="-0.01290294">
                <text:p>-0.01290294</text:p>
              </table:table-cell>
            </table:table-row>
            <table:table-row>
              <table:table-cell office:value-type="string">
                <text:p>1493</text:p>
              </table:table-cell>
              <table:table-cell office:value-type="float" office:value="488.753570556641">
                <text:p>488.753570556641</text:p>
              </table:table-cell>
              <table:table-cell office:value-type="float" office:value="-0.01294771">
                <text:p>-0.01294771</text:p>
              </table:table-cell>
            </table:table-row>
            <table:table-row>
              <table:table-cell office:value-type="string">
                <text:p>1494</text:p>
              </table:table-cell>
              <table:table-cell office:value-type="float" office:value="488.869415283203">
                <text:p>488.869415283203</text:p>
              </table:table-cell>
              <table:table-cell office:value-type="float" office:value="0.007058056">
                <text:p>0.007058056</text:p>
              </table:table-cell>
            </table:table-row>
            <table:table-row>
              <table:table-cell office:value-type="string">
                <text:p>1495</text:p>
              </table:table-cell>
              <table:table-cell office:value-type="float" office:value="488.985260009766">
                <text:p>488.985260009766</text:p>
              </table:table-cell>
              <table:table-cell office:value-type="float" office:value="-0.001491124">
                <text:p>-0.001491124</text:p>
              </table:table-cell>
            </table:table-row>
            <table:table-row>
              <table:table-cell office:value-type="string">
                <text:p>1496</text:p>
              </table:table-cell>
              <table:table-cell office:value-type="float" office:value="489.101104736328">
                <text:p>489.101104736328</text:p>
              </table:table-cell>
              <table:table-cell office:value-type="float" office:value="-0.002315711">
                <text:p>-0.002315711</text:p>
              </table:table-cell>
            </table:table-row>
            <table:table-row>
              <table:table-cell office:value-type="string">
                <text:p>1497</text:p>
              </table:table-cell>
              <table:table-cell office:value-type="float" office:value="489.216949462891">
                <text:p>489.216949462891</text:p>
              </table:table-cell>
              <table:table-cell office:value-type="float" office:value="-0.007432114">
                <text:p>-0.007432114</text:p>
              </table:table-cell>
            </table:table-row>
            <table:table-row>
              <table:table-cell office:value-type="string">
                <text:p>1498</text:p>
              </table:table-cell>
              <table:table-cell office:value-type="float" office:value="489.332794189453">
                <text:p>489.332794189453</text:p>
              </table:table-cell>
              <table:table-cell office:value-type="float" office:value="0.004604662">
                <text:p>0.004604662</text:p>
              </table:table-cell>
            </table:table-row>
            <table:table-row>
              <table:table-cell office:value-type="string">
                <text:p>1499</text:p>
              </table:table-cell>
              <table:table-cell office:value-type="float" office:value="489.448669433594">
                <text:p>489.448669433594</text:p>
              </table:table-cell>
              <table:table-cell office:value-type="float" office:value="0.004206823">
                <text:p>0.004206823</text:p>
              </table:table-cell>
            </table:table-row>
            <table:table-row>
              <table:table-cell office:value-type="string">
                <text:p>1500</text:p>
              </table:table-cell>
              <table:table-cell office:value-type="float" office:value="489.564544677734">
                <text:p>489.564544677734</text:p>
              </table:table-cell>
              <table:table-cell office:value-type="float" office:value="-0.01399839">
                <text:p>-0.01399839</text:p>
              </table:table-cell>
            </table:table-row>
            <table:table-row>
              <table:table-cell office:value-type="string">
                <text:p>1501</text:p>
              </table:table-cell>
              <table:table-cell office:value-type="float" office:value="489.680389404297">
                <text:p>489.680389404297</text:p>
              </table:table-cell>
              <table:table-cell office:value-type="float" office:value="-0.006343198">
                <text:p>-0.006343198</text:p>
              </table:table-cell>
            </table:table-row>
            <table:table-row>
              <table:table-cell office:value-type="string">
                <text:p>1502</text:p>
              </table:table-cell>
              <table:table-cell office:value-type="float" office:value="489.796264648438">
                <text:p>489.796264648438</text:p>
              </table:table-cell>
              <table:table-cell office:value-type="float" office:value="0.006971222">
                <text:p>0.006971222</text:p>
              </table:table-cell>
            </table:table-row>
            <table:table-row>
              <table:table-cell office:value-type="string">
                <text:p>1503</text:p>
              </table:table-cell>
              <table:table-cell office:value-type="float" office:value="489.912139892578">
                <text:p>489.912139892578</text:p>
              </table:table-cell>
              <table:table-cell office:value-type="float" office:value="0.001351826">
                <text:p>0.001351826</text:p>
              </table:table-cell>
            </table:table-row>
            <table:table-row>
              <table:table-cell office:value-type="string">
                <text:p>1504</text:p>
              </table:table-cell>
              <table:table-cell office:value-type="float" office:value="490.028015136719">
                <text:p>490.028015136719</text:p>
              </table:table-cell>
              <table:table-cell office:value-type="float" office:value="-0.0112979">
                <text:p>-0.0112979</text:p>
              </table:table-cell>
            </table:table-row>
            <table:table-row>
              <table:table-cell office:value-type="string">
                <text:p>1505</text:p>
              </table:table-cell>
              <table:table-cell office:value-type="float" office:value="490.143920898438">
                <text:p>490.143920898438</text:p>
              </table:table-cell>
              <table:table-cell office:value-type="float" office:value="0.01161907">
                <text:p>0.01161907</text:p>
              </table:table-cell>
            </table:table-row>
            <table:table-row>
              <table:table-cell office:value-type="string">
                <text:p>1506</text:p>
              </table:table-cell>
              <table:table-cell office:value-type="float" office:value="490.259796142578">
                <text:p>490.259796142578</text:p>
              </table:table-cell>
              <table:table-cell office:value-type="float" office:value="0.004774013">
                <text:p>0.004774013</text:p>
              </table:table-cell>
            </table:table-row>
            <table:table-row>
              <table:table-cell office:value-type="string">
                <text:p>1507</text:p>
              </table:table-cell>
              <table:table-cell office:value-type="float" office:value="490.375701904297">
                <text:p>490.375701904297</text:p>
              </table:table-cell>
              <table:table-cell office:value-type="float" office:value="-0.0124148">
                <text:p>-0.0124148</text:p>
              </table:table-cell>
            </table:table-row>
            <table:table-row>
              <table:table-cell office:value-type="string">
                <text:p>1508</text:p>
              </table:table-cell>
              <table:table-cell office:value-type="float" office:value="490.491577148438">
                <text:p>490.491577148438</text:p>
              </table:table-cell>
              <table:table-cell office:value-type="float" office:value="-0.002180003">
                <text:p>-0.002180003</text:p>
              </table:table-cell>
            </table:table-row>
            <table:table-row>
              <table:table-cell office:value-type="string">
                <text:p>1509</text:p>
              </table:table-cell>
              <table:table-cell office:value-type="float" office:value="490.607482910156">
                <text:p>490.607482910156</text:p>
              </table:table-cell>
              <table:table-cell office:value-type="float" office:value="-0.004052337">
                <text:p>-0.004052337</text:p>
              </table:table-cell>
            </table:table-row>
            <table:table-row>
              <table:table-cell office:value-type="string">
                <text:p>1510</text:p>
              </table:table-cell>
              <table:table-cell office:value-type="float" office:value="490.723388671875">
                <text:p>490.723388671875</text:p>
              </table:table-cell>
              <table:table-cell office:value-type="float" office:value="0.008931533">
                <text:p>0.008931533</text:p>
              </table:table-cell>
            </table:table-row>
            <table:table-row>
              <table:table-cell office:value-type="string">
                <text:p>1511</text:p>
              </table:table-cell>
              <table:table-cell office:value-type="float" office:value="490.839294433594">
                <text:p>490.839294433594</text:p>
              </table:table-cell>
              <table:table-cell office:value-type="float" office:value="-0.0001621154">
                <text:p>-0.0001621154</text:p>
              </table:table-cell>
            </table:table-row>
            <table:table-row>
              <table:table-cell office:value-type="string">
                <text:p>1512</text:p>
              </table:table-cell>
              <table:table-cell office:value-type="float" office:value="490.955200195313">
                <text:p>490.955200195313</text:p>
              </table:table-cell>
              <table:table-cell office:value-type="float" office:value="-0.00399268">
                <text:p>-0.00399268</text:p>
              </table:table-cell>
            </table:table-row>
            <table:table-row>
              <table:table-cell office:value-type="string">
                <text:p>1513</text:p>
              </table:table-cell>
              <table:table-cell office:value-type="float" office:value="491.071136474609">
                <text:p>491.071136474609</text:p>
              </table:table-cell>
              <table:table-cell office:value-type="float" office:value="0.001571145">
                <text:p>0.001571145</text:p>
              </table:table-cell>
            </table:table-row>
            <table:table-row>
              <table:table-cell office:value-type="string">
                <text:p>1514</text:p>
              </table:table-cell>
              <table:table-cell office:value-type="float" office:value="491.187042236328">
                <text:p>491.187042236328</text:p>
              </table:table-cell>
              <table:table-cell office:value-type="float" office:value="0.01032363">
                <text:p>0.01032363</text:p>
              </table:table-cell>
            </table:table-row>
            <table:table-row>
              <table:table-cell office:value-type="string">
                <text:p>1515</text:p>
              </table:table-cell>
              <table:table-cell office:value-type="float" office:value="491.302978515625">
                <text:p>491.302978515625</text:p>
              </table:table-cell>
              <table:table-cell office:value-type="float" office:value="-0.003268585">
                <text:p>-0.003268585</text:p>
              </table:table-cell>
            </table:table-row>
            <table:table-row>
              <table:table-cell office:value-type="string">
                <text:p>1516</text:p>
              </table:table-cell>
              <table:table-cell office:value-type="float" office:value="491.418914794922">
                <text:p>491.418914794922</text:p>
              </table:table-cell>
              <table:table-cell office:value-type="float" office:value="-0.01001999">
                <text:p>-0.01001999</text:p>
              </table:table-cell>
            </table:table-row>
            <table:table-row>
              <table:table-cell office:value-type="string">
                <text:p>1517</text:p>
              </table:table-cell>
              <table:table-cell office:value-type="float" office:value="491.534851074219">
                <text:p>491.534851074219</text:p>
              </table:table-cell>
              <table:table-cell office:value-type="float" office:value="0.009227526">
                <text:p>0.009227526</text:p>
              </table:table-cell>
            </table:table-row>
            <table:table-row>
              <table:table-cell office:value-type="string">
                <text:p>1518</text:p>
              </table:table-cell>
              <table:table-cell office:value-type="float" office:value="491.650787353516">
                <text:p>491.650787353516</text:p>
              </table:table-cell>
              <table:table-cell office:value-type="float" office:value="0.000824909">
                <text:p>0.000824909</text:p>
              </table:table-cell>
            </table:table-row>
            <table:table-row>
              <table:table-cell office:value-type="string">
                <text:p>1519</text:p>
              </table:table-cell>
              <table:table-cell office:value-type="float" office:value="491.766723632813">
                <text:p>491.766723632813</text:p>
              </table:table-cell>
              <table:table-cell office:value-type="float" office:value="-0.004623311">
                <text:p>-0.004623311</text:p>
              </table:table-cell>
            </table:table-row>
            <table:table-row>
              <table:table-cell office:value-type="string">
                <text:p>1520</text:p>
              </table:table-cell>
              <table:table-cell office:value-type="float" office:value="491.882659912109">
                <text:p>491.882659912109</text:p>
              </table:table-cell>
              <table:table-cell office:value-type="float" office:value="-0.01164072">
                <text:p>-0.01164072</text:p>
              </table:table-cell>
            </table:table-row>
            <table:table-row>
              <table:table-cell office:value-type="string">
                <text:p>1521</text:p>
              </table:table-cell>
              <table:table-cell office:value-type="float" office:value="491.998596191406">
                <text:p>491.998596191406</text:p>
              </table:table-cell>
              <table:table-cell office:value-type="float" office:value="0.004264628">
                <text:p>0.004264628</text:p>
              </table:table-cell>
            </table:table-row>
            <table:table-row>
              <table:table-cell office:value-type="string">
                <text:p>1522</text:p>
              </table:table-cell>
              <table:table-cell office:value-type="float" office:value="492.114562988281">
                <text:p>492.114562988281</text:p>
              </table:table-cell>
              <table:table-cell office:value-type="float" office:value="0.003683736">
                <text:p>0.003683736</text:p>
              </table:table-cell>
            </table:table-row>
            <table:table-row>
              <table:table-cell office:value-type="string">
                <text:p>1523</text:p>
              </table:table-cell>
              <table:table-cell office:value-type="float" office:value="492.230529785156">
                <text:p>492.230529785156</text:p>
              </table:table-cell>
              <table:table-cell office:value-type="float" office:value="-0.01176367">
                <text:p>-0.01176367</text:p>
              </table:table-cell>
            </table:table-row>
            <table:table-row>
              <table:table-cell office:value-type="string">
                <text:p>1524</text:p>
              </table:table-cell>
              <table:table-cell office:value-type="float" office:value="492.346496582031">
                <text:p>492.346496582031</text:p>
              </table:table-cell>
              <table:table-cell office:value-type="float" office:value="0.0006881253">
                <text:p>0.0006881253</text:p>
              </table:table-cell>
            </table:table-row>
            <table:table-row>
              <table:table-cell office:value-type="string">
                <text:p>1525</text:p>
              </table:table-cell>
              <table:table-cell office:value-type="float" office:value="492.462463378906">
                <text:p>492.462463378906</text:p>
              </table:table-cell>
              <table:table-cell office:value-type="float" office:value="0.00119582">
                <text:p>0.00119582</text:p>
              </table:table-cell>
            </table:table-row>
            <table:table-row>
              <table:table-cell office:value-type="string">
                <text:p>1526</text:p>
              </table:table-cell>
              <table:table-cell office:value-type="float" office:value="492.578430175781">
                <text:p>492.578430175781</text:p>
              </table:table-cell>
              <table:table-cell office:value-type="float" office:value="0.002540395">
                <text:p>0.002540395</text:p>
              </table:table-cell>
            </table:table-row>
            <table:table-row>
              <table:table-cell office:value-type="string">
                <text:p>1527</text:p>
              </table:table-cell>
              <table:table-cell office:value-type="float" office:value="492.694396972656">
                <text:p>492.694396972656</text:p>
              </table:table-cell>
              <table:table-cell office:value-type="float" office:value="-0.005971536">
                <text:p>-0.005971536</text:p>
              </table:table-cell>
            </table:table-row>
            <table:table-row>
              <table:table-cell office:value-type="string">
                <text:p>1528</text:p>
              </table:table-cell>
              <table:table-cell office:value-type="float" office:value="492.810363769531">
                <text:p>492.810363769531</text:p>
              </table:table-cell>
              <table:table-cell office:value-type="float" office:value="-0.008541859">
                <text:p>-0.008541859</text:p>
              </table:table-cell>
            </table:table-row>
            <table:table-row>
              <table:table-cell office:value-type="string">
                <text:p>1529</text:p>
              </table:table-cell>
              <table:table-cell office:value-type="float" office:value="492.926361083984">
                <text:p>492.926361083984</text:p>
              </table:table-cell>
              <table:table-cell office:value-type="float" office:value="0.009767124">
                <text:p>0.009767124</text:p>
              </table:table-cell>
            </table:table-row>
            <table:table-row>
              <table:table-cell office:value-type="string">
                <text:p>1530</text:p>
              </table:table-cell>
              <table:table-cell office:value-type="float" office:value="493.042327880859">
                <text:p>493.042327880859</text:p>
              </table:table-cell>
              <table:table-cell office:value-type="float" office:value="-0.003994735">
                <text:p>-0.003994735</text:p>
              </table:table-cell>
            </table:table-row>
            <table:table-row>
              <table:table-cell office:value-type="string">
                <text:p>1531</text:p>
              </table:table-cell>
              <table:table-cell office:value-type="float" office:value="493.158325195313">
                <text:p>493.158325195313</text:p>
              </table:table-cell>
              <table:table-cell office:value-type="float" office:value="-0.007600968">
                <text:p>-0.007600968</text:p>
              </table:table-cell>
            </table:table-row>
            <table:table-row>
              <table:table-cell office:value-type="string">
                <text:p>1532</text:p>
              </table:table-cell>
              <table:table-cell office:value-type="float" office:value="493.274322509766">
                <text:p>493.274322509766</text:p>
              </table:table-cell>
              <table:table-cell office:value-type="float" office:value="-0.001081893">
                <text:p>-0.001081893</text:p>
              </table:table-cell>
            </table:table-row>
            <table:table-row>
              <table:table-cell office:value-type="string">
                <text:p>1533</text:p>
              </table:table-cell>
              <table:table-cell office:value-type="float" office:value="493.390319824219">
                <text:p>493.390319824219</text:p>
              </table:table-cell>
              <table:table-cell office:value-type="float" office:value="0.01095348">
                <text:p>0.01095348</text:p>
              </table:table-cell>
            </table:table-row>
            <table:table-row>
              <table:table-cell office:value-type="string">
                <text:p>1534</text:p>
              </table:table-cell>
              <table:table-cell office:value-type="float" office:value="493.506317138672">
                <text:p>493.506317138672</text:p>
              </table:table-cell>
              <table:table-cell office:value-type="float" office:value="0.004007446">
                <text:p>0.004007446</text:p>
              </table:table-cell>
            </table:table-row>
            <table:table-row>
              <table:table-cell office:value-type="string">
                <text:p>1535</text:p>
              </table:table-cell>
              <table:table-cell office:value-type="float" office:value="493.622344970703">
                <text:p>493.622344970703</text:p>
              </table:table-cell>
              <table:table-cell office:value-type="float" office:value="0.0001050611">
                <text:p>0.0001050611</text:p>
              </table:table-cell>
            </table:table-row>
            <table:table-row>
              <table:table-cell office:value-type="string">
                <text:p>1536</text:p>
              </table:table-cell>
              <table:table-cell office:value-type="float" office:value="493.738342285156">
                <text:p>493.738342285156</text:p>
              </table:table-cell>
              <table:table-cell office:value-type="float" office:value="-0.01093438">
                <text:p>-0.01093438</text:p>
              </table:table-cell>
            </table:table-row>
            <table:table-row>
              <table:table-cell office:value-type="string">
                <text:p>1537</text:p>
              </table:table-cell>
              <table:table-cell office:value-type="float" office:value="493.854370117188">
                <text:p>493.854370117188</text:p>
              </table:table-cell>
              <table:table-cell office:value-type="float" office:value="-0.00388062">
                <text:p>-0.00388062</text:p>
              </table:table-cell>
            </table:table-row>
            <table:table-row>
              <table:table-cell office:value-type="string">
                <text:p>1538</text:p>
              </table:table-cell>
              <table:table-cell office:value-type="float" office:value="493.970367431641">
                <text:p>493.970367431641</text:p>
              </table:table-cell>
              <table:table-cell office:value-type="float" office:value="0.005745733">
                <text:p>0.005745733</text:p>
              </table:table-cell>
            </table:table-row>
            <table:table-row>
              <table:table-cell office:value-type="string">
                <text:p>1539</text:p>
              </table:table-cell>
              <table:table-cell office:value-type="float" office:value="494.086395263672">
                <text:p>494.086395263672</text:p>
              </table:table-cell>
              <table:table-cell office:value-type="float" office:value="0.001454064">
                <text:p>0.001454064</text:p>
              </table:table-cell>
            </table:table-row>
            <table:table-row>
              <table:table-cell office:value-type="string">
                <text:p>1540</text:p>
              </table:table-cell>
              <table:table-cell office:value-type="float" office:value="494.202423095703">
                <text:p>494.202423095703</text:p>
              </table:table-cell>
              <table:table-cell office:value-type="float" office:value="-0.001370649">
                <text:p>-0.001370649</text:p>
              </table:table-cell>
            </table:table-row>
            <table:table-row>
              <table:table-cell office:value-type="string">
                <text:p>1541</text:p>
              </table:table-cell>
              <table:table-cell office:value-type="float" office:value="494.318450927734">
                <text:p>494.318450927734</text:p>
              </table:table-cell>
              <table:table-cell office:value-type="float" office:value="-0.003491227">
                <text:p>-0.003491227</text:p>
              </table:table-cell>
            </table:table-row>
            <table:table-row>
              <table:table-cell office:value-type="string">
                <text:p>1542</text:p>
              </table:table-cell>
              <table:table-cell office:value-type="float" office:value="494.434478759766">
                <text:p>494.434478759766</text:p>
              </table:table-cell>
              <table:table-cell office:value-type="float" office:value="-0.001349194">
                <text:p>-0.001349194</text:p>
              </table:table-cell>
            </table:table-row>
            <table:table-row>
              <table:table-cell office:value-type="string">
                <text:p>1543</text:p>
              </table:table-cell>
              <table:table-cell office:value-type="float" office:value="494.550537109375">
                <text:p>494.550537109375</text:p>
              </table:table-cell>
              <table:table-cell office:value-type="float" office:value="-0.006255955">
                <text:p>-0.006255955</text:p>
              </table:table-cell>
            </table:table-row>
            <table:table-row>
              <table:table-cell office:value-type="string">
                <text:p>1544</text:p>
              </table:table-cell>
              <table:table-cell office:value-type="float" office:value="494.666564941406">
                <text:p>494.666564941406</text:p>
              </table:table-cell>
              <table:table-cell office:value-type="float" office:value="-0.006073845">
                <text:p>-0.006073845</text:p>
              </table:table-cell>
            </table:table-row>
            <table:table-row>
              <table:table-cell office:value-type="string">
                <text:p>1545</text:p>
              </table:table-cell>
              <table:table-cell office:value-type="float" office:value="494.782623291016">
                <text:p>494.782623291016</text:p>
              </table:table-cell>
              <table:table-cell office:value-type="float" office:value="-0.002196514">
                <text:p>-0.002196514</text:p>
              </table:table-cell>
            </table:table-row>
            <table:table-row>
              <table:table-cell office:value-type="string">
                <text:p>1546</text:p>
              </table:table-cell>
              <table:table-cell office:value-type="float" office:value="494.898681640625">
                <text:p>494.898681640625</text:p>
              </table:table-cell>
              <table:table-cell office:value-type="float" office:value="0.0058486">
                <text:p>0.0058486</text:p>
              </table:table-cell>
            </table:table-row>
            <table:table-row>
              <table:table-cell office:value-type="string">
                <text:p>1547</text:p>
              </table:table-cell>
              <table:table-cell office:value-type="float" office:value="495.014739990234">
                <text:p>495.014739990234</text:p>
              </table:table-cell>
              <table:table-cell office:value-type="float" office:value="-0.01152522">
                <text:p>-0.01152522</text:p>
              </table:table-cell>
            </table:table-row>
            <table:table-row>
              <table:table-cell office:value-type="string">
                <text:p>1548</text:p>
              </table:table-cell>
              <table:table-cell office:value-type="float" office:value="495.130798339844">
                <text:p>495.130798339844</text:p>
              </table:table-cell>
              <table:table-cell office:value-type="float" office:value="-0.01085865">
                <text:p>-0.01085865</text:p>
              </table:table-cell>
            </table:table-row>
            <table:table-row>
              <table:table-cell office:value-type="string">
                <text:p>1549</text:p>
              </table:table-cell>
              <table:table-cell office:value-type="float" office:value="495.246856689453">
                <text:p>495.246856689453</text:p>
              </table:table-cell>
              <table:table-cell office:value-type="float" office:value="0.004071865">
                <text:p>0.004071865</text:p>
              </table:table-cell>
            </table:table-row>
            <table:table-row>
              <table:table-cell office:value-type="string">
                <text:p>1550</text:p>
              </table:table-cell>
              <table:table-cell office:value-type="float" office:value="495.362915039063">
                <text:p>495.362915039063</text:p>
              </table:table-cell>
              <table:table-cell office:value-type="float" office:value="0.007429295">
                <text:p>0.007429295</text:p>
              </table:table-cell>
            </table:table-row>
            <table:table-row>
              <table:table-cell office:value-type="string">
                <text:p>1551</text:p>
              </table:table-cell>
              <table:table-cell office:value-type="float" office:value="495.478973388672">
                <text:p>495.478973388672</text:p>
              </table:table-cell>
              <table:table-cell office:value-type="float" office:value="-0.01168476">
                <text:p>-0.01168476</text:p>
              </table:table-cell>
            </table:table-row>
            <table:table-row>
              <table:table-cell office:value-type="string">
                <text:p>1552</text:p>
              </table:table-cell>
              <table:table-cell office:value-type="float" office:value="495.595062255859">
                <text:p>495.595062255859</text:p>
              </table:table-cell>
              <table:table-cell office:value-type="float" office:value="0.00425601">
                <text:p>0.00425601</text:p>
              </table:table-cell>
            </table:table-row>
            <table:table-row>
              <table:table-cell office:value-type="string">
                <text:p>1553</text:p>
              </table:table-cell>
              <table:table-cell office:value-type="float" office:value="495.711151123047">
                <text:p>495.711151123047</text:p>
              </table:table-cell>
              <table:table-cell office:value-type="float" office:value="-0.003240332">
                <text:p>-0.003240332</text:p>
              </table:table-cell>
            </table:table-row>
            <table:table-row>
              <table:table-cell office:value-type="string">
                <text:p>1554</text:p>
              </table:table-cell>
              <table:table-cell office:value-type="float" office:value="495.827209472656">
                <text:p>495.827209472656</text:p>
              </table:table-cell>
              <table:table-cell office:value-type="float" office:value="0.02526594">
                <text:p>0.02526594</text:p>
              </table:table-cell>
            </table:table-row>
            <table:table-row>
              <table:table-cell office:value-type="string">
                <text:p>1555</text:p>
              </table:table-cell>
              <table:table-cell office:value-type="float" office:value="495.943298339844">
                <text:p>495.943298339844</text:p>
              </table:table-cell>
              <table:table-cell office:value-type="float" office:value="-0.001462687">
                <text:p>-0.001462687</text:p>
              </table:table-cell>
            </table:table-row>
            <table:table-row>
              <table:table-cell office:value-type="string">
                <text:p>1556</text:p>
              </table:table-cell>
              <table:table-cell office:value-type="float" office:value="496.059387207031">
                <text:p>496.059387207031</text:p>
              </table:table-cell>
              <table:table-cell office:value-type="float" office:value="0.008707207">
                <text:p>0.008707207</text:p>
              </table:table-cell>
            </table:table-row>
            <table:table-row>
              <table:table-cell office:value-type="string">
                <text:p>1557</text:p>
              </table:table-cell>
              <table:table-cell office:value-type="float" office:value="496.175506591797">
                <text:p>496.175506591797</text:p>
              </table:table-cell>
              <table:table-cell office:value-type="float" office:value="-0.00361604">
                <text:p>-0.00361604</text:p>
              </table:table-cell>
            </table:table-row>
            <table:table-row>
              <table:table-cell office:value-type="string">
                <text:p>1558</text:p>
              </table:table-cell>
              <table:table-cell office:value-type="float" office:value="496.291595458984">
                <text:p>496.291595458984</text:p>
              </table:table-cell>
              <table:table-cell office:value-type="float" office:value="-0.005535142">
                <text:p>-0.005535142</text:p>
              </table:table-cell>
            </table:table-row>
            <table:table-row>
              <table:table-cell office:value-type="string">
                <text:p>1559</text:p>
              </table:table-cell>
              <table:table-cell office:value-type="float" office:value="496.407684326172">
                <text:p>496.407684326172</text:p>
              </table:table-cell>
              <table:table-cell office:value-type="float" office:value="0.01002386">
                <text:p>0.01002386</text:p>
              </table:table-cell>
            </table:table-row>
            <table:table-row>
              <table:table-cell office:value-type="string">
                <text:p>1560</text:p>
              </table:table-cell>
              <table:table-cell office:value-type="float" office:value="496.523803710938">
                <text:p>496.523803710938</text:p>
              </table:table-cell>
              <table:table-cell office:value-type="float" office:value="-0.01017453">
                <text:p>-0.01017453</text:p>
              </table:table-cell>
            </table:table-row>
            <table:table-row>
              <table:table-cell office:value-type="string">
                <text:p>1561</text:p>
              </table:table-cell>
              <table:table-cell office:value-type="float" office:value="496.639923095703">
                <text:p>496.639923095703</text:p>
              </table:table-cell>
              <table:table-cell office:value-type="float" office:value="0.007981933">
                <text:p>0.007981933</text:p>
              </table:table-cell>
            </table:table-row>
            <table:table-row>
              <table:table-cell office:value-type="string">
                <text:p>1562</text:p>
              </table:table-cell>
              <table:table-cell office:value-type="float" office:value="496.756042480469">
                <text:p>496.756042480469</text:p>
              </table:table-cell>
              <table:table-cell office:value-type="float" office:value="0.004825311">
                <text:p>0.004825311</text:p>
              </table:table-cell>
            </table:table-row>
            <table:table-row>
              <table:table-cell office:value-type="string">
                <text:p>1563</text:p>
              </table:table-cell>
              <table:table-cell office:value-type="float" office:value="496.872161865234">
                <text:p>496.872161865234</text:p>
              </table:table-cell>
              <table:table-cell office:value-type="float" office:value="-0.004850983">
                <text:p>-0.004850983</text:p>
              </table:table-cell>
            </table:table-row>
            <table:table-row>
              <table:table-cell office:value-type="string">
                <text:p>1564</text:p>
              </table:table-cell>
              <table:table-cell office:value-type="float" office:value="496.98828125">
                <text:p>496.98828125</text:p>
              </table:table-cell>
              <table:table-cell office:value-type="float" office:value="0.001523794">
                <text:p>0.001523794</text:p>
              </table:table-cell>
            </table:table-row>
            <table:table-row>
              <table:table-cell office:value-type="string">
                <text:p>1565</text:p>
              </table:table-cell>
              <table:table-cell office:value-type="float" office:value="497.104400634766">
                <text:p>497.104400634766</text:p>
              </table:table-cell>
              <table:table-cell office:value-type="float" office:value="0.01980464">
                <text:p>0.01980464</text:p>
              </table:table-cell>
            </table:table-row>
            <table:table-row>
              <table:table-cell office:value-type="string">
                <text:p>1566</text:p>
              </table:table-cell>
              <table:table-cell office:value-type="float" office:value="497.220520019531">
                <text:p>497.220520019531</text:p>
              </table:table-cell>
              <table:table-cell office:value-type="float" office:value="0.002918393">
                <text:p>0.002918393</text:p>
              </table:table-cell>
            </table:table-row>
            <table:table-row>
              <table:table-cell office:value-type="string">
                <text:p>1567</text:p>
              </table:table-cell>
              <table:table-cell office:value-type="float" office:value="497.336669921875">
                <text:p>497.336669921875</text:p>
              </table:table-cell>
              <table:table-cell office:value-type="float" office:value="-0.002922388">
                <text:p>-0.002922388</text:p>
              </table:table-cell>
            </table:table-row>
            <table:table-row>
              <table:table-cell office:value-type="string">
                <text:p>1568</text:p>
              </table:table-cell>
              <table:table-cell office:value-type="float" office:value="497.452819824219">
                <text:p>497.452819824219</text:p>
              </table:table-cell>
              <table:table-cell office:value-type="float" office:value="-0.00877501">
                <text:p>-0.00877501</text:p>
              </table:table-cell>
            </table:table-row>
            <table:table-row>
              <table:table-cell office:value-type="string">
                <text:p>1569</text:p>
              </table:table-cell>
              <table:table-cell office:value-type="float" office:value="497.568939208984">
                <text:p>497.568939208984</text:p>
              </table:table-cell>
              <table:table-cell office:value-type="float" office:value="0.005307929">
                <text:p>0.005307929</text:p>
              </table:table-cell>
            </table:table-row>
            <table:table-row>
              <table:table-cell office:value-type="string">
                <text:p>1570</text:p>
              </table:table-cell>
              <table:table-cell office:value-type="float" office:value="497.685089111328">
                <text:p>497.685089111328</text:p>
              </table:table-cell>
              <table:table-cell office:value-type="float" office:value="0.005941094">
                <text:p>0.005941094</text:p>
              </table:table-cell>
            </table:table-row>
            <table:table-row>
              <table:table-cell office:value-type="string">
                <text:p>1571</text:p>
              </table:table-cell>
              <table:table-cell office:value-type="float" office:value="497.801239013672">
                <text:p>497.801239013672</text:p>
              </table:table-cell>
              <table:table-cell office:value-type="float" office:value="-0.0001650181">
                <text:p>-0.0001650181</text:p>
              </table:table-cell>
            </table:table-row>
            <table:table-row>
              <table:table-cell office:value-type="string">
                <text:p>1572</text:p>
              </table:table-cell>
              <table:table-cell office:value-type="float" office:value="497.917388916016">
                <text:p>497.917388916016</text:p>
              </table:table-cell>
              <table:table-cell office:value-type="float" office:value="-0.01012371">
                <text:p>-0.01012371</text:p>
              </table:table-cell>
            </table:table-row>
            <table:table-row>
              <table:table-cell office:value-type="string">
                <text:p>1573</text:p>
              </table:table-cell>
              <table:table-cell office:value-type="float" office:value="498.033569335938">
                <text:p>498.033569335938</text:p>
              </table:table-cell>
              <table:table-cell office:value-type="float" office:value="0.006081481">
                <text:p>0.006081481</text:p>
              </table:table-cell>
            </table:table-row>
            <table:table-row>
              <table:table-cell office:value-type="string">
                <text:p>1574</text:p>
              </table:table-cell>
              <table:table-cell office:value-type="float" office:value="498.149719238281">
                <text:p>498.149719238281</text:p>
              </table:table-cell>
              <table:table-cell office:value-type="float" office:value="0.01678798">
                <text:p>0.01678798</text:p>
              </table:table-cell>
            </table:table-row>
            <table:table-row>
              <table:table-cell office:value-type="string">
                <text:p>1575</text:p>
              </table:table-cell>
              <table:table-cell office:value-type="float" office:value="498.265899658203">
                <text:p>498.265899658203</text:p>
              </table:table-cell>
              <table:table-cell office:value-type="float" office:value="-0.004106972">
                <text:p>-0.004106972</text:p>
              </table:table-cell>
            </table:table-row>
            <table:table-row>
              <table:table-cell office:value-type="string">
                <text:p>1576</text:p>
              </table:table-cell>
              <table:table-cell office:value-type="float" office:value="498.382049560547">
                <text:p>498.382049560547</text:p>
              </table:table-cell>
              <table:table-cell office:value-type="float" office:value="-0.001203434">
                <text:p>-0.001203434</text:p>
              </table:table-cell>
            </table:table-row>
            <table:table-row>
              <table:table-cell office:value-type="string">
                <text:p>1577</text:p>
              </table:table-cell>
              <table:table-cell office:value-type="float" office:value="498.498229980469">
                <text:p>498.498229980469</text:p>
              </table:table-cell>
              <table:table-cell office:value-type="float" office:value="0.01400301">
                <text:p>0.01400301</text:p>
              </table:table-cell>
            </table:table-row>
            <table:table-row>
              <table:table-cell office:value-type="string">
                <text:p>1578</text:p>
              </table:table-cell>
              <table:table-cell office:value-type="float" office:value="498.614410400391">
                <text:p>498.614410400391</text:p>
              </table:table-cell>
              <table:table-cell office:value-type="float" office:value="-0.0003465297">
                <text:p>-0.0003465297</text:p>
              </table:table-cell>
            </table:table-row>
            <table:table-row>
              <table:table-cell office:value-type="string">
                <text:p>1579</text:p>
              </table:table-cell>
              <table:table-cell office:value-type="float" office:value="498.730590820313">
                <text:p>498.730590820313</text:p>
              </table:table-cell>
              <table:table-cell office:value-type="float" office:value="0.001281599">
                <text:p>0.001281599</text:p>
              </table:table-cell>
            </table:table-row>
            <table:table-row>
              <table:table-cell office:value-type="string">
                <text:p>1580</text:p>
              </table:table-cell>
              <table:table-cell office:value-type="float" office:value="498.846771240234">
                <text:p>498.846771240234</text:p>
              </table:table-cell>
              <table:table-cell office:value-type="float" office:value="-0.01323937">
                <text:p>-0.01323937</text:p>
              </table:table-cell>
            </table:table-row>
            <table:table-row>
              <table:table-cell office:value-type="string">
                <text:p>1581</text:p>
              </table:table-cell>
              <table:table-cell office:value-type="float" office:value="498.962982177734">
                <text:p>498.962982177734</text:p>
              </table:table-cell>
              <table:table-cell office:value-type="float" office:value="0.002937769">
                <text:p>0.002937769</text:p>
              </table:table-cell>
            </table:table-row>
            <table:table-row>
              <table:table-cell office:value-type="string">
                <text:p>1582</text:p>
              </table:table-cell>
              <table:table-cell office:value-type="float" office:value="499.079162597656">
                <text:p>499.079162597656</text:p>
              </table:table-cell>
              <table:table-cell office:value-type="float" office:value="0.025212">
                <text:p>0.025212</text:p>
              </table:table-cell>
            </table:table-row>
            <table:table-row>
              <table:table-cell office:value-type="string">
                <text:p>1583</text:p>
              </table:table-cell>
              <table:table-cell office:value-type="float" office:value="499.195373535156">
                <text:p>499.195373535156</text:p>
              </table:table-cell>
              <table:table-cell office:value-type="float" office:value="-0.007178034">
                <text:p>-0.007178034</text:p>
              </table:table-cell>
            </table:table-row>
            <table:table-row>
              <table:table-cell office:value-type="string">
                <text:p>1584</text:p>
              </table:table-cell>
              <table:table-cell office:value-type="float" office:value="499.311584472656">
                <text:p>499.311584472656</text:p>
              </table:table-cell>
              <table:table-cell office:value-type="float" office:value="-0.005664381">
                <text:p>-0.005664381</text:p>
              </table:table-cell>
            </table:table-row>
            <table:table-row>
              <table:table-cell office:value-type="string">
                <text:p>1585</text:p>
              </table:table-cell>
              <table:table-cell office:value-type="float" office:value="499.427764892578">
                <text:p>499.427764892578</text:p>
              </table:table-cell>
              <table:table-cell office:value-type="float" office:value="0.008020683">
                <text:p>0.008020683</text:p>
              </table:table-cell>
            </table:table-row>
            <table:table-row>
              <table:table-cell office:value-type="string">
                <text:p>1586</text:p>
              </table:table-cell>
              <table:table-cell office:value-type="float" office:value="499.543975830078">
                <text:p>499.543975830078</text:p>
              </table:table-cell>
              <table:table-cell office:value-type="float" office:value="-0.001296649">
                <text:p>-0.001296649</text:p>
              </table:table-cell>
            </table:table-row>
            <table:table-row>
              <table:table-cell office:value-type="string">
                <text:p>1587</text:p>
              </table:table-cell>
              <table:table-cell office:value-type="float" office:value="499.660217285156">
                <text:p>499.660217285156</text:p>
              </table:table-cell>
              <table:table-cell office:value-type="float" office:value="-0.006899703">
                <text:p>-0.006899703</text:p>
              </table:table-cell>
            </table:table-row>
            <table:table-row>
              <table:table-cell office:value-type="string">
                <text:p>1588</text:p>
              </table:table-cell>
              <table:table-cell office:value-type="float" office:value="499.776428222656">
                <text:p>499.776428222656</text:p>
              </table:table-cell>
              <table:table-cell office:value-type="float" office:value="-0.01344801">
                <text:p>-0.01344801</text:p>
              </table:table-cell>
            </table:table-row>
            <table:table-row>
              <table:table-cell office:value-type="string">
                <text:p>1589</text:p>
              </table:table-cell>
              <table:table-cell office:value-type="float" office:value="499.892639160156">
                <text:p>499.892639160156</text:p>
              </table:table-cell>
              <table:table-cell office:value-type="float" office:value="0.0004476679">
                <text:p>0.0004476679</text:p>
              </table:table-cell>
            </table:table-row>
            <table:table-row>
              <table:table-cell office:value-type="string">
                <text:p>1590</text:p>
              </table:table-cell>
              <table:table-cell office:value-type="float" office:value="500.008880615234">
                <text:p>500.008880615234</text:p>
              </table:table-cell>
              <table:table-cell office:value-type="float" office:value="0.02513922">
                <text:p>0.02513922</text:p>
              </table:table-cell>
            </table:table-row>
            <table:table-row>
              <table:table-cell office:value-type="string">
                <text:p>1591</text:p>
              </table:table-cell>
              <table:table-cell office:value-type="float" office:value="500.125091552734">
                <text:p>500.125091552734</text:p>
              </table:table-cell>
              <table:table-cell office:value-type="float" office:value="-0.003083435">
                <text:p>-0.003083435</text:p>
              </table:table-cell>
            </table:table-row>
            <table:table-row>
              <table:table-cell office:value-type="string">
                <text:p>1592</text:p>
              </table:table-cell>
              <table:table-cell office:value-type="float" office:value="500.241333007813">
                <text:p>500.241333007813</text:p>
              </table:table-cell>
              <table:table-cell office:value-type="float" office:value="0.00159155">
                <text:p>0.00159155</text:p>
              </table:table-cell>
            </table:table-row>
            <table:table-row>
              <table:table-cell office:value-type="string">
                <text:p>1593</text:p>
              </table:table-cell>
              <table:table-cell office:value-type="float" office:value="500.357574462891">
                <text:p>500.357574462891</text:p>
              </table:table-cell>
              <table:table-cell office:value-type="float" office:value="0.002338897">
                <text:p>0.002338897</text:p>
              </table:table-cell>
            </table:table-row>
            <table:table-row>
              <table:table-cell office:value-type="string">
                <text:p>1594</text:p>
              </table:table-cell>
              <table:table-cell office:value-type="float" office:value="500.473815917969">
                <text:p>500.473815917969</text:p>
              </table:table-cell>
              <table:table-cell office:value-type="float" office:value="0.002187543">
                <text:p>0.002187543</text:p>
              </table:table-cell>
            </table:table-row>
            <table:table-row>
              <table:table-cell office:value-type="string">
                <text:p>1595</text:p>
              </table:table-cell>
              <table:table-cell office:value-type="float" office:value="500.590057373047">
                <text:p>500.590057373047</text:p>
              </table:table-cell>
              <table:table-cell office:value-type="float" office:value="-0.008742812">
                <text:p>-0.008742812</text:p>
              </table:table-cell>
            </table:table-row>
            <table:table-row>
              <table:table-cell office:value-type="string">
                <text:p>1596</text:p>
              </table:table-cell>
              <table:table-cell office:value-type="float" office:value="500.706298828125">
                <text:p>500.706298828125</text:p>
              </table:table-cell>
              <table:table-cell office:value-type="float" office:value="-0.01013513">
                <text:p>-0.01013513</text:p>
              </table:table-cell>
            </table:table-row>
            <table:table-row>
              <table:table-cell office:value-type="string">
                <text:p>1597</text:p>
              </table:table-cell>
              <table:table-cell office:value-type="float" office:value="500.822570800781">
                <text:p>500.822570800781</text:p>
              </table:table-cell>
              <table:table-cell office:value-type="float" office:value="0.0007559019">
                <text:p>0.0007559019</text:p>
              </table:table-cell>
            </table:table-row>
            <table:table-row>
              <table:table-cell office:value-type="string">
                <text:p>1598</text:p>
              </table:table-cell>
              <table:table-cell office:value-type="float" office:value="500.938812255859">
                <text:p>500.938812255859</text:p>
              </table:table-cell>
              <table:table-cell office:value-type="float" office:value="0.001974243">
                <text:p>0.001974243</text:p>
              </table:table-cell>
            </table:table-row>
            <table:table-row>
              <table:table-cell office:value-type="string">
                <text:p>1599</text:p>
              </table:table-cell>
              <table:table-cell office:value-type="float" office:value="501.055084228516">
                <text:p>501.055084228516</text:p>
              </table:table-cell>
              <table:table-cell office:value-type="float" office:value="-0.0118928">
                <text:p>-0.0118928</text:p>
              </table:table-cell>
            </table:table-row>
            <table:table-row>
              <table:table-cell office:value-type="string">
                <text:p>1600</text:p>
              </table:table-cell>
              <table:table-cell office:value-type="float" office:value="501.171356201172">
                <text:p>501.171356201172</text:p>
              </table:table-cell>
              <table:table-cell office:value-type="float" office:value="-0.004119006">
                <text:p>-0.004119006</text:p>
              </table:table-cell>
            </table:table-row>
            <table:table-row>
              <table:table-cell office:value-type="string">
                <text:p>1601</text:p>
              </table:table-cell>
              <table:table-cell office:value-type="float" office:value="501.287628173828">
                <text:p>501.287628173828</text:p>
              </table:table-cell>
              <table:table-cell office:value-type="float" office:value="0.006074985">
                <text:p>0.006074985</text:p>
              </table:table-cell>
            </table:table-row>
            <table:table-row>
              <table:table-cell office:value-type="string">
                <text:p>1602</text:p>
              </table:table-cell>
              <table:table-cell office:value-type="float" office:value="501.403900146484">
                <text:p>501.403900146484</text:p>
              </table:table-cell>
              <table:table-cell office:value-type="float" office:value="0.001134912">
                <text:p>0.001134912</text:p>
              </table:table-cell>
            </table:table-row>
            <table:table-row>
              <table:table-cell office:value-type="string">
                <text:p>1603</text:p>
              </table:table-cell>
              <table:table-cell office:value-type="float" office:value="501.520172119141">
                <text:p>501.520172119141</text:p>
              </table:table-cell>
              <table:table-cell office:value-type="float" office:value="-0.003581522">
                <text:p>-0.003581522</text:p>
              </table:table-cell>
            </table:table-row>
            <table:table-row>
              <table:table-cell office:value-type="string">
                <text:p>1604</text:p>
              </table:table-cell>
              <table:table-cell office:value-type="float" office:value="501.636444091797">
                <text:p>501.636444091797</text:p>
              </table:table-cell>
              <table:table-cell office:value-type="float" office:value="0.0599647">
                <text:p>0.0599647</text:p>
              </table:table-cell>
            </table:table-row>
            <table:table-row>
              <table:table-cell office:value-type="string">
                <text:p>1605</text:p>
              </table:table-cell>
              <table:table-cell office:value-type="float" office:value="501.752746582031">
                <text:p>501.752746582031</text:p>
              </table:table-cell>
              <table:table-cell office:value-type="float" office:value="0.000115062">
                <text:p>0.000115062</text:p>
              </table:table-cell>
            </table:table-row>
            <table:table-row>
              <table:table-cell office:value-type="string">
                <text:p>1606</text:p>
              </table:table-cell>
              <table:table-cell office:value-type="float" office:value="501.869018554688">
                <text:p>501.869018554688</text:p>
              </table:table-cell>
              <table:table-cell office:value-type="float" office:value="-0.001520244">
                <text:p>-0.001520244</text:p>
              </table:table-cell>
            </table:table-row>
            <table:table-row>
              <table:table-cell office:value-type="string">
                <text:p>1607</text:p>
              </table:table-cell>
              <table:table-cell office:value-type="float" office:value="501.985321044922">
                <text:p>501.985321044922</text:p>
              </table:table-cell>
              <table:table-cell office:value-type="float" office:value="0.002392809">
                <text:p>0.002392809</text:p>
              </table:table-cell>
            </table:table-row>
            <table:table-row>
              <table:table-cell office:value-type="string">
                <text:p>1608</text:p>
              </table:table-cell>
              <table:table-cell office:value-type="float" office:value="502.101623535156">
                <text:p>502.101623535156</text:p>
              </table:table-cell>
              <table:table-cell office:value-type="float" office:value="-0.01069377">
                <text:p>-0.01069377</text:p>
              </table:table-cell>
            </table:table-row>
            <table:table-row>
              <table:table-cell office:value-type="string">
                <text:p>1609</text:p>
              </table:table-cell>
              <table:table-cell office:value-type="float" office:value="502.217926025391">
                <text:p>502.217926025391</text:p>
              </table:table-cell>
              <table:table-cell office:value-type="float" office:value="0.002271967">
                <text:p>0.002271967</text:p>
              </table:table-cell>
            </table:table-row>
            <table:table-row>
              <table:table-cell office:value-type="string">
                <text:p>1610</text:p>
              </table:table-cell>
              <table:table-cell office:value-type="float" office:value="502.334228515625">
                <text:p>502.334228515625</text:p>
              </table:table-cell>
              <table:table-cell office:value-type="float" office:value="-0.003291933">
                <text:p>-0.003291933</text:p>
              </table:table-cell>
            </table:table-row>
            <table:table-row>
              <table:table-cell office:value-type="string">
                <text:p>1611</text:p>
              </table:table-cell>
              <table:table-cell office:value-type="float" office:value="502.450531005859">
                <text:p>502.450531005859</text:p>
              </table:table-cell>
              <table:table-cell office:value-type="float" office:value="-0.008391961">
                <text:p>-0.008391961</text:p>
              </table:table-cell>
            </table:table-row>
            <table:table-row>
              <table:table-cell office:value-type="string">
                <text:p>1612</text:p>
              </table:table-cell>
              <table:table-cell office:value-type="float" office:value="502.566833496094">
                <text:p>502.566833496094</text:p>
              </table:table-cell>
              <table:table-cell office:value-type="float" office:value="-0.0002985714">
                <text:p>-0.0002985714</text:p>
              </table:table-cell>
            </table:table-row>
            <table:table-row>
              <table:table-cell office:value-type="string">
                <text:p>1613</text:p>
              </table:table-cell>
              <table:table-cell office:value-type="float" office:value="502.683166503906">
                <text:p>502.683166503906</text:p>
              </table:table-cell>
              <table:table-cell office:value-type="float" office:value="0.004073979">
                <text:p>0.004073979</text:p>
              </table:table-cell>
            </table:table-row>
            <table:table-row>
              <table:table-cell office:value-type="string">
                <text:p>1614</text:p>
              </table:table-cell>
              <table:table-cell office:value-type="float" office:value="502.799468994141">
                <text:p>502.799468994141</text:p>
              </table:table-cell>
              <table:table-cell office:value-type="float" office:value="-0.0004728034">
                <text:p>-0.0004728034</text:p>
              </table:table-cell>
            </table:table-row>
            <table:table-row>
              <table:table-cell office:value-type="string">
                <text:p>1615</text:p>
              </table:table-cell>
              <table:table-cell office:value-type="float" office:value="502.915802001953">
                <text:p>502.915802001953</text:p>
              </table:table-cell>
              <table:table-cell office:value-type="float" office:value="-0.00627456">
                <text:p>-0.00627456</text:p>
              </table:table-cell>
            </table:table-row>
            <table:table-row>
              <table:table-cell office:value-type="string">
                <text:p>1616</text:p>
              </table:table-cell>
              <table:table-cell office:value-type="float" office:value="503.032135009766">
                <text:p>503.032135009766</text:p>
              </table:table-cell>
              <table:table-cell office:value-type="float" office:value="-0.008874428">
                <text:p>-0.008874428</text:p>
              </table:table-cell>
            </table:table-row>
            <table:table-row>
              <table:table-cell office:value-type="string">
                <text:p>1617</text:p>
              </table:table-cell>
              <table:table-cell office:value-type="float" office:value="503.148468017578">
                <text:p>503.148468017578</text:p>
              </table:table-cell>
              <table:table-cell office:value-type="float" office:value="-0.002077671">
                <text:p>-0.002077671</text:p>
              </table:table-cell>
            </table:table-row>
            <table:table-row>
              <table:table-cell office:value-type="string">
                <text:p>1618</text:p>
              </table:table-cell>
              <table:table-cell office:value-type="float" office:value="503.264801025391">
                <text:p>503.264801025391</text:p>
              </table:table-cell>
              <table:table-cell office:value-type="float" office:value="0.005360707">
                <text:p>0.005360707</text:p>
              </table:table-cell>
            </table:table-row>
            <table:table-row>
              <table:table-cell office:value-type="string">
                <text:p>1619</text:p>
              </table:table-cell>
              <table:table-cell office:value-type="float" office:value="503.381134033203">
                <text:p>503.381134033203</text:p>
              </table:table-cell>
              <table:table-cell office:value-type="float" office:value="-0.00967215">
                <text:p>-0.00967215</text:p>
              </table:table-cell>
            </table:table-row>
            <table:table-row>
              <table:table-cell office:value-type="string">
                <text:p>1620</text:p>
              </table:table-cell>
              <table:table-cell office:value-type="float" office:value="503.497497558594">
                <text:p>503.497497558594</text:p>
              </table:table-cell>
              <table:table-cell office:value-type="float" office:value="-0.006309487">
                <text:p>-0.006309487</text:p>
              </table:table-cell>
            </table:table-row>
            <table:table-row>
              <table:table-cell office:value-type="string">
                <text:p>1621</text:p>
              </table:table-cell>
              <table:table-cell office:value-type="float" office:value="503.613830566406">
                <text:p>503.613830566406</text:p>
              </table:table-cell>
              <table:table-cell office:value-type="float" office:value="-0.0002002222">
                <text:p>-0.0002002222</text:p>
              </table:table-cell>
            </table:table-row>
            <table:table-row>
              <table:table-cell office:value-type="string">
                <text:p>1622</text:p>
              </table:table-cell>
              <table:table-cell office:value-type="float" office:value="503.730194091797">
                <text:p>503.730194091797</text:p>
              </table:table-cell>
              <table:table-cell office:value-type="float" office:value="-0.002589292">
                <text:p>-0.002589292</text:p>
              </table:table-cell>
            </table:table-row>
            <table:table-row>
              <table:table-cell office:value-type="string">
                <text:p>1623</text:p>
              </table:table-cell>
              <table:table-cell office:value-type="float" office:value="503.846527099609">
                <text:p>503.846527099609</text:p>
              </table:table-cell>
              <table:table-cell office:value-type="float" office:value="-0.0009901524">
                <text:p>-0.0009901524</text:p>
              </table:table-cell>
            </table:table-row>
            <table:table-row>
              <table:table-cell office:value-type="string">
                <text:p>1624</text:p>
              </table:table-cell>
              <table:table-cell office:value-type="float" office:value="503.962890625">
                <text:p>503.962890625</text:p>
              </table:table-cell>
              <table:table-cell office:value-type="float" office:value="-0.01093326">
                <text:p>-0.01093326</text:p>
              </table:table-cell>
            </table:table-row>
            <table:table-row>
              <table:table-cell office:value-type="string">
                <text:p>1625</text:p>
              </table:table-cell>
              <table:table-cell office:value-type="float" office:value="504.079254150391">
                <text:p>504.079254150391</text:p>
              </table:table-cell>
              <table:table-cell office:value-type="float" office:value="-0.0004459469">
                <text:p>-0.0004459469</text:p>
              </table:table-cell>
            </table:table-row>
            <table:table-row>
              <table:table-cell office:value-type="string">
                <text:p>1626</text:p>
              </table:table-cell>
              <table:table-cell office:value-type="float" office:value="504.195617675781">
                <text:p>504.195617675781</text:p>
              </table:table-cell>
              <table:table-cell office:value-type="float" office:value="0.00527734">
                <text:p>0.00527734</text:p>
              </table:table-cell>
            </table:table-row>
            <table:table-row>
              <table:table-cell office:value-type="string">
                <text:p>1627</text:p>
              </table:table-cell>
              <table:table-cell office:value-type="float" office:value="504.31201171875">
                <text:p>504.31201171875</text:p>
              </table:table-cell>
              <table:table-cell office:value-type="float" office:value="0.004689271">
                <text:p>0.004689271</text:p>
              </table:table-cell>
            </table:table-row>
            <table:table-row>
              <table:table-cell office:value-type="string">
                <text:p>1628</text:p>
              </table:table-cell>
              <table:table-cell office:value-type="float" office:value="504.428375244141">
                <text:p>504.428375244141</text:p>
              </table:table-cell>
              <table:table-cell office:value-type="float" office:value="-0.007935079">
                <text:p>-0.007935079</text:p>
              </table:table-cell>
            </table:table-row>
            <table:table-row>
              <table:table-cell office:value-type="string">
                <text:p>1629</text:p>
              </table:table-cell>
              <table:table-cell office:value-type="float" office:value="504.544738769531">
                <text:p>504.544738769531</text:p>
              </table:table-cell>
              <table:table-cell office:value-type="float" office:value="-0.001815738">
                <text:p>-0.001815738</text:p>
              </table:table-cell>
            </table:table-row>
            <table:table-row>
              <table:table-cell office:value-type="string">
                <text:p>1630</text:p>
              </table:table-cell>
              <table:table-cell office:value-type="float" office:value="504.6611328125">
                <text:p>504.6611328125</text:p>
              </table:table-cell>
              <table:table-cell office:value-type="float" office:value="0.0005434715">
                <text:p>0.0005434715</text:p>
              </table:table-cell>
            </table:table-row>
            <table:table-row>
              <table:table-cell office:value-type="string">
                <text:p>1631</text:p>
              </table:table-cell>
              <table:table-cell office:value-type="float" office:value="504.777526855469">
                <text:p>504.777526855469</text:p>
              </table:table-cell>
              <table:table-cell office:value-type="float" office:value="-0.002477728">
                <text:p>-0.002477728</text:p>
              </table:table-cell>
            </table:table-row>
            <table:table-row>
              <table:table-cell office:value-type="string">
                <text:p>1632</text:p>
              </table:table-cell>
              <table:table-cell office:value-type="float" office:value="504.893920898438">
                <text:p>504.893920898438</text:p>
              </table:table-cell>
              <table:table-cell office:value-type="float" office:value="-0.002460059">
                <text:p>-0.002460059</text:p>
              </table:table-cell>
            </table:table-row>
            <table:table-row>
              <table:table-cell office:value-type="string">
                <text:p>1633</text:p>
              </table:table-cell>
              <table:table-cell office:value-type="float" office:value="505.010314941406">
                <text:p>505.010314941406</text:p>
              </table:table-cell>
              <table:table-cell office:value-type="float" office:value="0.007418207">
                <text:p>0.007418207</text:p>
              </table:table-cell>
            </table:table-row>
            <table:table-row>
              <table:table-cell office:value-type="string">
                <text:p>1634</text:p>
              </table:table-cell>
              <table:table-cell office:value-type="float" office:value="505.126708984375">
                <text:p>505.126708984375</text:p>
              </table:table-cell>
              <table:table-cell office:value-type="float" office:value="0.02236496">
                <text:p>0.02236496</text:p>
              </table:table-cell>
            </table:table-row>
            <table:table-row>
              <table:table-cell office:value-type="string">
                <text:p>1635</text:p>
              </table:table-cell>
              <table:table-cell office:value-type="float" office:value="505.243103027344">
                <text:p>505.243103027344</text:p>
              </table:table-cell>
              <table:table-cell office:value-type="float" office:value="-0.001272713">
                <text:p>-0.001272713</text:p>
              </table:table-cell>
            </table:table-row>
            <table:table-row>
              <table:table-cell office:value-type="string">
                <text:p>1636</text:p>
              </table:table-cell>
              <table:table-cell office:value-type="float" office:value="505.359497070313">
                <text:p>505.359497070313</text:p>
              </table:table-cell>
              <table:table-cell office:value-type="float" office:value="-0.00542597">
                <text:p>-0.00542597</text:p>
              </table:table-cell>
            </table:table-row>
            <table:table-row>
              <table:table-cell office:value-type="string">
                <text:p>1637</text:p>
              </table:table-cell>
              <table:table-cell office:value-type="float" office:value="505.475921630859">
                <text:p>505.475921630859</text:p>
              </table:table-cell>
              <table:table-cell office:value-type="float" office:value="0.002462597">
                <text:p>0.002462597</text:p>
              </table:table-cell>
            </table:table-row>
            <table:table-row>
              <table:table-cell office:value-type="string">
                <text:p>1638</text:p>
              </table:table-cell>
              <table:table-cell office:value-type="float" office:value="505.592346191406">
                <text:p>505.592346191406</text:p>
              </table:table-cell>
              <table:table-cell office:value-type="float" office:value="0.01040615">
                <text:p>0.01040615</text:p>
              </table:table-cell>
            </table:table-row>
            <table:table-row>
              <table:table-cell office:value-type="string">
                <text:p>1639</text:p>
              </table:table-cell>
              <table:table-cell office:value-type="float" office:value="505.708740234375">
                <text:p>505.708740234375</text:p>
              </table:table-cell>
              <table:table-cell office:value-type="float" office:value="-0.007693753">
                <text:p>-0.007693753</text:p>
              </table:table-cell>
            </table:table-row>
            <table:table-row>
              <table:table-cell office:value-type="string">
                <text:p>1640</text:p>
              </table:table-cell>
              <table:table-cell office:value-type="float" office:value="505.825164794922">
                <text:p>505.825164794922</text:p>
              </table:table-cell>
              <table:table-cell office:value-type="float" office:value="-0.005694194">
                <text:p>-0.005694194</text:p>
              </table:table-cell>
            </table:table-row>
            <table:table-row>
              <table:table-cell office:value-type="string">
                <text:p>1641</text:p>
              </table:table-cell>
              <table:table-cell office:value-type="float" office:value="505.941589355469">
                <text:p>505.941589355469</text:p>
              </table:table-cell>
              <table:table-cell office:value-type="float" office:value="0.001258002">
                <text:p>0.001258002</text:p>
              </table:table-cell>
            </table:table-row>
            <table:table-row>
              <table:table-cell office:value-type="string">
                <text:p>1642</text:p>
              </table:table-cell>
              <table:table-cell office:value-type="float" office:value="506.058013916016">
                <text:p>506.058013916016</text:p>
              </table:table-cell>
              <table:table-cell office:value-type="float" office:value="0.001342339">
                <text:p>0.001342339</text:p>
              </table:table-cell>
            </table:table-row>
            <table:table-row>
              <table:table-cell office:value-type="string">
                <text:p>1643</text:p>
              </table:table-cell>
              <table:table-cell office:value-type="float" office:value="506.174468994141">
                <text:p>506.174468994141</text:p>
              </table:table-cell>
              <table:table-cell office:value-type="float" office:value="0.001575542">
                <text:p>0.001575542</text:p>
              </table:table-cell>
            </table:table-row>
            <table:table-row>
              <table:table-cell office:value-type="string">
                <text:p>1644</text:p>
              </table:table-cell>
              <table:table-cell office:value-type="float" office:value="506.290893554688">
                <text:p>506.290893554688</text:p>
              </table:table-cell>
              <table:table-cell office:value-type="float" office:value="-0.004417768">
                <text:p>-0.004417768</text:p>
              </table:table-cell>
            </table:table-row>
            <table:table-row>
              <table:table-cell office:value-type="string">
                <text:p>1645</text:p>
              </table:table-cell>
              <table:table-cell office:value-type="float" office:value="506.407348632813">
                <text:p>506.407348632813</text:p>
              </table:table-cell>
              <table:table-cell office:value-type="float" office:value="0.00732464">
                <text:p>0.00732464</text:p>
              </table:table-cell>
            </table:table-row>
            <table:table-row>
              <table:table-cell office:value-type="string">
                <text:p>1646</text:p>
              </table:table-cell>
              <table:table-cell office:value-type="float" office:value="506.523773193359">
                <text:p>506.5237731933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7</text:p>
              </table:table-cell>
              <table:table-cell office:value-type="float" office:value="506.640228271484">
                <text:p>506.640228271484</text:p>
              </table:table-cell>
              <table:table-cell office:value-type="float" office:value="0.0005475098">
                <text:p>0.0005475098</text:p>
              </table:table-cell>
            </table:table-row>
            <table:table-row>
              <table:table-cell office:value-type="string">
                <text:p>1648</text:p>
              </table:table-cell>
              <table:table-cell office:value-type="float" office:value="506.756683349609">
                <text:p>506.756683349609</text:p>
              </table:table-cell>
              <table:table-cell office:value-type="float" office:value="0.0036773">
                <text:p>0.0036773</text:p>
              </table:table-cell>
            </table:table-row>
            <table:table-row>
              <table:table-cell office:value-type="string">
                <text:p>1649</text:p>
              </table:table-cell>
              <table:table-cell office:value-type="float" office:value="506.873138427734">
                <text:p>506.873138427734</text:p>
              </table:table-cell>
              <table:table-cell office:value-type="float" office:value="0.0089436">
                <text:p>0.0089436</text:p>
              </table:table-cell>
            </table:table-row>
            <table:table-row>
              <table:table-cell office:value-type="string">
                <text:p>1650</text:p>
              </table:table-cell>
              <table:table-cell office:value-type="float" office:value="506.989593505859">
                <text:p>506.989593505859</text:p>
              </table:table-cell>
              <table:table-cell office:value-type="float" office:value="-0.0009477767">
                <text:p>-0.0009477767</text:p>
              </table:table-cell>
            </table:table-row>
            <table:table-row>
              <table:table-cell office:value-type="string">
                <text:p>1651</text:p>
              </table:table-cell>
              <table:table-cell office:value-type="float" office:value="507.106048583984">
                <text:p>507.106048583984</text:p>
              </table:table-cell>
              <table:table-cell office:value-type="float" office:value="-0.005478796">
                <text:p>-0.005478796</text:p>
              </table:table-cell>
            </table:table-row>
            <table:table-row>
              <table:table-cell office:value-type="string">
                <text:p>1652</text:p>
              </table:table-cell>
              <table:table-cell office:value-type="float" office:value="507.222534179688">
                <text:p>507.222534179688</text:p>
              </table:table-cell>
              <table:table-cell office:value-type="float" office:value="-0.0126552">
                <text:p>-0.0126552</text:p>
              </table:table-cell>
            </table:table-row>
            <table:table-row>
              <table:table-cell office:value-type="string">
                <text:p>1653</text:p>
              </table:table-cell>
              <table:table-cell office:value-type="float" office:value="507.338989257813">
                <text:p>507.338989257813</text:p>
              </table:table-cell>
              <table:table-cell office:value-type="float" office:value="-0.00522864">
                <text:p>-0.00522864</text:p>
              </table:table-cell>
            </table:table-row>
            <table:table-row>
              <table:table-cell office:value-type="string">
                <text:p>1654</text:p>
              </table:table-cell>
              <table:table-cell office:value-type="float" office:value="507.455474853516">
                <text:p>507.455474853516</text:p>
              </table:table-cell>
              <table:table-cell office:value-type="float" office:value="-0.0007870281">
                <text:p>-0.0007870281</text:p>
              </table:table-cell>
            </table:table-row>
            <table:table-row>
              <table:table-cell office:value-type="string">
                <text:p>1655</text:p>
              </table:table-cell>
              <table:table-cell office:value-type="float" office:value="507.571960449219">
                <text:p>507.571960449219</text:p>
              </table:table-cell>
              <table:table-cell office:value-type="float" office:value="-0.01221433">
                <text:p>-0.01221433</text:p>
              </table:table-cell>
            </table:table-row>
            <table:table-row>
              <table:table-cell office:value-type="string">
                <text:p>1656</text:p>
              </table:table-cell>
              <table:table-cell office:value-type="float" office:value="507.688446044922">
                <text:p>507.688446044922</text:p>
              </table:table-cell>
              <table:table-cell office:value-type="float" office:value="-0.00837951">
                <text:p>-0.00837951</text:p>
              </table:table-cell>
            </table:table-row>
            <table:table-row>
              <table:table-cell office:value-type="string">
                <text:p>1657</text:p>
              </table:table-cell>
              <table:table-cell office:value-type="float" office:value="507.804931640625">
                <text:p>507.804931640625</text:p>
              </table:table-cell>
              <table:table-cell office:value-type="float" office:value="-0.002383277">
                <text:p>-0.002383277</text:p>
              </table:table-cell>
            </table:table-row>
            <table:table-row>
              <table:table-cell office:value-type="string">
                <text:p>1658</text:p>
              </table:table-cell>
              <table:table-cell office:value-type="float" office:value="507.921417236328">
                <text:p>507.921417236328</text:p>
              </table:table-cell>
              <table:table-cell office:value-type="float" office:value="-0.0006707013">
                <text:p>-0.0006707013</text:p>
              </table:table-cell>
            </table:table-row>
            <table:table-row>
              <table:table-cell office:value-type="string">
                <text:p>1659</text:p>
              </table:table-cell>
              <table:table-cell office:value-type="float" office:value="508.037902832031">
                <text:p>508.037902832031</text:p>
              </table:table-cell>
              <table:table-cell office:value-type="float" office:value="-0.005076052">
                <text:p>-0.005076052</text:p>
              </table:table-cell>
            </table:table-row>
            <table:table-row>
              <table:table-cell office:value-type="string">
                <text:p>1660</text:p>
              </table:table-cell>
              <table:table-cell office:value-type="float" office:value="508.154388427734">
                <text:p>508.154388427734</text:p>
              </table:table-cell>
              <table:table-cell office:value-type="float" office:value="-0.000763318">
                <text:p>-0.000763318</text:p>
              </table:table-cell>
            </table:table-row>
            <table:table-row>
              <table:table-cell office:value-type="string">
                <text:p>1661</text:p>
              </table:table-cell>
              <table:table-cell office:value-type="float" office:value="508.270904541016">
                <text:p>508.270904541016</text:p>
              </table:table-cell>
              <table:table-cell office:value-type="float" office:value="0.001093041">
                <text:p>0.001093041</text:p>
              </table:table-cell>
            </table:table-row>
            <table:table-row>
              <table:table-cell office:value-type="string">
                <text:p>1662</text:p>
              </table:table-cell>
              <table:table-cell office:value-type="float" office:value="508.387420654297">
                <text:p>508.387420654297</text:p>
              </table:table-cell>
              <table:table-cell office:value-type="float" office:value="-0.005205887">
                <text:p>-0.005205887</text:p>
              </table:table-cell>
            </table:table-row>
            <table:table-row>
              <table:table-cell office:value-type="string">
                <text:p>1663</text:p>
              </table:table-cell>
              <table:table-cell office:value-type="float" office:value="508.50390625">
                <text:p>508.50390625</text:p>
              </table:table-cell>
              <table:table-cell office:value-type="float" office:value="-0.006367331">
                <text:p>-0.006367331</text:p>
              </table:table-cell>
            </table:table-row>
            <table:table-row>
              <table:table-cell office:value-type="string">
                <text:p>1664</text:p>
              </table:table-cell>
              <table:table-cell office:value-type="float" office:value="508.620422363281">
                <text:p>508.620422363281</text:p>
              </table:table-cell>
              <table:table-cell office:value-type="float" office:value="-0.008288643">
                <text:p>-0.008288643</text:p>
              </table:table-cell>
            </table:table-row>
            <table:table-row>
              <table:table-cell office:value-type="string">
                <text:p>1665</text:p>
              </table:table-cell>
              <table:table-cell office:value-type="float" office:value="508.736938476563">
                <text:p>508.736938476563</text:p>
              </table:table-cell>
              <table:table-cell office:value-type="float" office:value="0.0177598">
                <text:p>0.0177598</text:p>
              </table:table-cell>
            </table:table-row>
            <table:table-row>
              <table:table-cell office:value-type="string">
                <text:p>1666</text:p>
              </table:table-cell>
              <table:table-cell office:value-type="float" office:value="508.853454589844">
                <text:p>508.853454589844</text:p>
              </table:table-cell>
              <table:table-cell office:value-type="float" office:value="0.005000292">
                <text:p>0.005000292</text:p>
              </table:table-cell>
            </table:table-row>
            <table:table-row>
              <table:table-cell office:value-type="string">
                <text:p>1667</text:p>
              </table:table-cell>
              <table:table-cell office:value-type="float" office:value="508.970001220703">
                <text:p>508.970001220703</text:p>
              </table:table-cell>
              <table:table-cell office:value-type="float" office:value="-0.004797883">
                <text:p>-0.004797883</text:p>
              </table:table-cell>
            </table:table-row>
            <table:table-row>
              <table:table-cell office:value-type="string">
                <text:p>1668</text:p>
              </table:table-cell>
              <table:table-cell office:value-type="float" office:value="509.086517333984">
                <text:p>509.086517333984</text:p>
              </table:table-cell>
              <table:table-cell office:value-type="float" office:value="-0.001841093">
                <text:p>-0.001841093</text:p>
              </table:table-cell>
            </table:table-row>
            <table:table-row>
              <table:table-cell office:value-type="string">
                <text:p>1669</text:p>
              </table:table-cell>
              <table:table-cell office:value-type="float" office:value="509.203063964844">
                <text:p>509.203063964844</text:p>
              </table:table-cell>
              <table:table-cell office:value-type="float" office:value="0.01269561">
                <text:p>0.01269561</text:p>
              </table:table-cell>
            </table:table-row>
            <table:table-row>
              <table:table-cell office:value-type="string">
                <text:p>1670</text:p>
              </table:table-cell>
              <table:table-cell office:value-type="float" office:value="509.319580078125">
                <text:p>509.319580078125</text:p>
              </table:table-cell>
              <table:table-cell office:value-type="float" office:value="-0.002073216">
                <text:p>-0.002073216</text:p>
              </table:table-cell>
            </table:table-row>
            <table:table-row>
              <table:table-cell office:value-type="string">
                <text:p>1671</text:p>
              </table:table-cell>
              <table:table-cell office:value-type="float" office:value="509.436126708984">
                <text:p>509.436126708984</text:p>
              </table:table-cell>
              <table:table-cell office:value-type="float" office:value="-0.003030538">
                <text:p>-0.003030538</text:p>
              </table:table-cell>
            </table:table-row>
            <table:table-row>
              <table:table-cell office:value-type="string">
                <text:p>1672</text:p>
              </table:table-cell>
              <table:table-cell office:value-type="float" office:value="509.552673339844">
                <text:p>509.552673339844</text:p>
              </table:table-cell>
              <table:table-cell office:value-type="float" office:value="-0.005387852">
                <text:p>-0.005387852</text:p>
              </table:table-cell>
            </table:table-row>
            <table:table-row>
              <table:table-cell office:value-type="string">
                <text:p>1673</text:p>
              </table:table-cell>
              <table:table-cell office:value-type="float" office:value="509.669219970703">
                <text:p>509.669219970703</text:p>
              </table:table-cell>
              <table:table-cell office:value-type="float" office:value="0.006845759">
                <text:p>0.006845759</text:p>
              </table:table-cell>
            </table:table-row>
            <table:table-row>
              <table:table-cell office:value-type="string">
                <text:p>1674</text:p>
              </table:table-cell>
              <table:table-cell office:value-type="float" office:value="509.785766601563">
                <text:p>509.785766601563</text:p>
              </table:table-cell>
              <table:table-cell office:value-type="float" office:value="0.002628666">
                <text:p>0.002628666</text:p>
              </table:table-cell>
            </table:table-row>
            <table:table-row>
              <table:table-cell office:value-type="string">
                <text:p>1675</text:p>
              </table:table-cell>
              <table:table-cell office:value-type="float" office:value="509.902313232422">
                <text:p>509.902313232422</text:p>
              </table:table-cell>
              <table:table-cell office:value-type="float" office:value="-0.001931533">
                <text:p>-0.001931533</text:p>
              </table:table-cell>
            </table:table-row>
            <table:table-row>
              <table:table-cell office:value-type="string">
                <text:p>1676</text:p>
              </table:table-cell>
              <table:table-cell office:value-type="float" office:value="510.018890380859">
                <text:p>510.018890380859</text:p>
              </table:table-cell>
              <table:table-cell office:value-type="float" office:value="-0.008938275">
                <text:p>-0.008938275</text:p>
              </table:table-cell>
            </table:table-row>
            <table:table-row>
              <table:table-cell office:value-type="string">
                <text:p>1677</text:p>
              </table:table-cell>
              <table:table-cell office:value-type="float" office:value="510.135437011719">
                <text:p>510.135437011719</text:p>
              </table:table-cell>
              <table:table-cell office:value-type="float" office:value="-0.002843422">
                <text:p>-0.002843422</text:p>
              </table:table-cell>
            </table:table-row>
            <table:table-row>
              <table:table-cell office:value-type="string">
                <text:p>1678</text:p>
              </table:table-cell>
              <table:table-cell office:value-type="float" office:value="510.252014160156">
                <text:p>510.252014160156</text:p>
              </table:table-cell>
              <table:table-cell office:value-type="float" office:value="0.00316698">
                <text:p>0.00316698</text:p>
              </table:table-cell>
            </table:table-row>
            <table:table-row>
              <table:table-cell office:value-type="string">
                <text:p>1679</text:p>
              </table:table-cell>
              <table:table-cell office:value-type="float" office:value="510.368560791016">
                <text:p>510.368560791016</text:p>
              </table:table-cell>
              <table:table-cell office:value-type="float" office:value="-0.003850039">
                <text:p>-0.003850039</text:p>
              </table:table-cell>
            </table:table-row>
            <table:table-row>
              <table:table-cell office:value-type="string">
                <text:p>1680</text:p>
              </table:table-cell>
              <table:table-cell office:value-type="float" office:value="510.485137939453">
                <text:p>510.485137939453</text:p>
              </table:table-cell>
              <table:table-cell office:value-type="float" office:value="-0.01092095">
                <text:p>-0.01092095</text:p>
              </table:table-cell>
            </table:table-row>
            <table:table-row>
              <table:table-cell office:value-type="string">
                <text:p>1681</text:p>
              </table:table-cell>
              <table:table-cell office:value-type="float" office:value="510.601715087891">
                <text:p>510.601715087891</text:p>
              </table:table-cell>
              <table:table-cell office:value-type="float" office:value="0.004780001">
                <text:p>0.004780001</text:p>
              </table:table-cell>
            </table:table-row>
            <table:table-row>
              <table:table-cell office:value-type="string">
                <text:p>1682</text:p>
              </table:table-cell>
              <table:table-cell office:value-type="float" office:value="510.718322753906">
                <text:p>510.718322753906</text:p>
              </table:table-cell>
              <table:table-cell office:value-type="float" office:value="0.001972387">
                <text:p>0.001972387</text:p>
              </table:table-cell>
            </table:table-row>
            <table:table-row>
              <table:table-cell office:value-type="string">
                <text:p>1683</text:p>
              </table:table-cell>
              <table:table-cell office:value-type="float" office:value="510.834899902344">
                <text:p>510.834899902344</text:p>
              </table:table-cell>
              <table:table-cell office:value-type="float" office:value="-0.01097349">
                <text:p>-0.01097349</text:p>
              </table:table-cell>
            </table:table-row>
            <table:table-row>
              <table:table-cell office:value-type="string">
                <text:p>1684</text:p>
              </table:table-cell>
              <table:table-cell office:value-type="float" office:value="510.951477050781">
                <text:p>510.951477050781</text:p>
              </table:table-cell>
              <table:table-cell office:value-type="float" office:value="0.008663321">
                <text:p>0.008663321</text:p>
              </table:table-cell>
            </table:table-row>
            <table:table-row>
              <table:table-cell office:value-type="string">
                <text:p>1685</text:p>
              </table:table-cell>
              <table:table-cell office:value-type="float" office:value="511.068084716797">
                <text:p>511.068084716797</text:p>
              </table:table-cell>
              <table:table-cell office:value-type="float" office:value="-0.002215628">
                <text:p>-0.002215628</text:p>
              </table:table-cell>
            </table:table-row>
            <table:table-row>
              <table:table-cell office:value-type="string">
                <text:p>1686</text:p>
              </table:table-cell>
              <table:table-cell office:value-type="float" office:value="511.184661865234">
                <text:p>511.184661865234</text:p>
              </table:table-cell>
              <table:table-cell office:value-type="float" office:value="-0.004423099">
                <text:p>-0.004423099</text:p>
              </table:table-cell>
            </table:table-row>
            <table:table-row>
              <table:table-cell office:value-type="string">
                <text:p>1687</text:p>
              </table:table-cell>
              <table:table-cell office:value-type="float" office:value="511.30126953125">
                <text:p>511.30126953125</text:p>
              </table:table-cell>
              <table:table-cell office:value-type="float" office:value="-0.01024582">
                <text:p>-0.01024582</text:p>
              </table:table-cell>
            </table:table-row>
            <table:table-row>
              <table:table-cell office:value-type="string">
                <text:p>1688</text:p>
              </table:table-cell>
              <table:table-cell office:value-type="float" office:value="511.417877197266">
                <text:p>511.417877197266</text:p>
              </table:table-cell>
              <table:table-cell office:value-type="float" office:value="-0.01185762">
                <text:p>-0.01185762</text:p>
              </table:table-cell>
            </table:table-row>
            <table:table-row>
              <table:table-cell office:value-type="string">
                <text:p>1689</text:p>
              </table:table-cell>
              <table:table-cell office:value-type="float" office:value="511.534484863281">
                <text:p>511.534484863281</text:p>
              </table:table-cell>
              <table:table-cell office:value-type="float" office:value="-0.003872104">
                <text:p>-0.003872104</text:p>
              </table:table-cell>
            </table:table-row>
            <table:table-row>
              <table:table-cell office:value-type="string">
                <text:p>1690</text:p>
              </table:table-cell>
              <table:table-cell office:value-type="float" office:value="511.651092529297">
                <text:p>511.651092529297</text:p>
              </table:table-cell>
              <table:table-cell office:value-type="float" office:value="-0.005036884">
                <text:p>-0.005036884</text:p>
              </table:table-cell>
            </table:table-row>
            <table:table-row>
              <table:table-cell office:value-type="string">
                <text:p>1691</text:p>
              </table:table-cell>
              <table:table-cell office:value-type="float" office:value="511.767700195313">
                <text:p>511.767700195313</text:p>
              </table:table-cell>
              <table:table-cell office:value-type="float" office:value="-0.002493268">
                <text:p>-0.002493268</text:p>
              </table:table-cell>
            </table:table-row>
            <table:table-row>
              <table:table-cell office:value-type="string">
                <text:p>1692</text:p>
              </table:table-cell>
              <table:table-cell office:value-type="float" office:value="511.884338378906">
                <text:p>511.884338378906</text:p>
              </table:table-cell>
              <table:table-cell office:value-type="float" office:value="-0.004014847">
                <text:p>-0.004014847</text:p>
              </table:table-cell>
            </table:table-row>
            <table:table-row>
              <table:table-cell office:value-type="string">
                <text:p>1693</text:p>
              </table:table-cell>
              <table:table-cell office:value-type="float" office:value="512.0009765625">
                <text:p>512.0009765625</text:p>
              </table:table-cell>
              <table:table-cell office:value-type="float" office:value="-0.004081539">
                <text:p>-0.004081539</text:p>
              </table:table-cell>
            </table:table-row>
            <table:table-row>
              <table:table-cell office:value-type="string">
                <text:p>1694</text:p>
              </table:table-cell>
              <table:table-cell office:value-type="float" office:value="512.117553710938">
                <text:p>512.117553710938</text:p>
              </table:table-cell>
              <table:table-cell office:value-type="float" office:value="0.00451191">
                <text:p>0.00451191</text:p>
              </table:table-cell>
            </table:table-row>
            <table:table-row>
              <table:table-cell office:value-type="string">
                <text:p>1695</text:p>
              </table:table-cell>
              <table:table-cell office:value-type="float" office:value="512.234191894531">
                <text:p>512.234191894531</text:p>
              </table:table-cell>
              <table:table-cell office:value-type="float" office:value="0.0464294">
                <text:p>0.0464294</text:p>
              </table:table-cell>
            </table:table-row>
            <table:table-row>
              <table:table-cell office:value-type="string">
                <text:p>1696</text:p>
              </table:table-cell>
              <table:table-cell office:value-type="float" office:value="512.350830078125">
                <text:p>512.350830078125</text:p>
              </table:table-cell>
              <table:table-cell office:value-type="float" office:value="-0.001749419">
                <text:p>-0.001749419</text:p>
              </table:table-cell>
            </table:table-row>
            <table:table-row>
              <table:table-cell office:value-type="string">
                <text:p>1697</text:p>
              </table:table-cell>
              <table:table-cell office:value-type="float" office:value="512.467468261719">
                <text:p>512.467468261719</text:p>
              </table:table-cell>
              <table:table-cell office:value-type="float" office:value="0.009470003">
                <text:p>0.009470003</text:p>
              </table:table-cell>
            </table:table-row>
            <table:table-row>
              <table:table-cell office:value-type="string">
                <text:p>1698</text:p>
              </table:table-cell>
              <table:table-cell office:value-type="float" office:value="512.584106445313">
                <text:p>512.584106445313</text:p>
              </table:table-cell>
              <table:table-cell office:value-type="float" office:value="-0.002251327">
                <text:p>-0.002251327</text:p>
              </table:table-cell>
            </table:table-row>
            <table:table-row>
              <table:table-cell office:value-type="string">
                <text:p>1699</text:p>
              </table:table-cell>
              <table:table-cell office:value-type="float" office:value="512.700744628906">
                <text:p>512.700744628906</text:p>
              </table:table-cell>
              <table:table-cell office:value-type="float" office:value="0.01827677">
                <text:p>0.01827677</text:p>
              </table:table-cell>
            </table:table-row>
            <table:table-row>
              <table:table-cell office:value-type="string">
                <text:p>1700</text:p>
              </table:table-cell>
              <table:table-cell office:value-type="float" office:value="512.8173828125">
                <text:p>512.8173828125</text:p>
              </table:table-cell>
              <table:table-cell office:value-type="float" office:value="-0.01029209">
                <text:p>-0.01029209</text:p>
              </table:table-cell>
            </table:table-row>
            <table:table-row>
              <table:table-cell office:value-type="string">
                <text:p>1701</text:p>
              </table:table-cell>
              <table:table-cell office:value-type="float" office:value="512.93408203125">
                <text:p>512.93408203125</text:p>
              </table:table-cell>
              <table:table-cell office:value-type="float" office:value="0.00514459">
                <text:p>0.00514459</text:p>
              </table:table-cell>
            </table:table-row>
            <table:table-row>
              <table:table-cell office:value-type="string">
                <text:p>1702</text:p>
              </table:table-cell>
              <table:table-cell office:value-type="float" office:value="513.050720214844">
                <text:p>513.050720214844</text:p>
              </table:table-cell>
              <table:table-cell office:value-type="float" office:value="0.004415323">
                <text:p>0.004415323</text:p>
              </table:table-cell>
            </table:table-row>
            <table:table-row>
              <table:table-cell office:value-type="string">
                <text:p>1703</text:p>
              </table:table-cell>
              <table:table-cell office:value-type="float" office:value="513.167358398438">
                <text:p>513.167358398438</text:p>
              </table:table-cell>
              <table:table-cell office:value-type="float" office:value="-0.008909199">
                <text:p>-0.008909199</text:p>
              </table:table-cell>
            </table:table-row>
            <table:table-row>
              <table:table-cell office:value-type="string">
                <text:p>1704</text:p>
              </table:table-cell>
              <table:table-cell office:value-type="float" office:value="513.284057617188">
                <text:p>513.284057617188</text:p>
              </table:table-cell>
              <table:table-cell office:value-type="float" office:value="-0.009909864">
                <text:p>-0.009909864</text:p>
              </table:table-cell>
            </table:table-row>
            <table:table-row>
              <table:table-cell office:value-type="string">
                <text:p>1705</text:p>
              </table:table-cell>
              <table:table-cell office:value-type="float" office:value="513.400695800781">
                <text:p>513.400695800781</text:p>
              </table:table-cell>
              <table:table-cell office:value-type="float" office:value="0.00875008">
                <text:p>0.00875008</text:p>
              </table:table-cell>
            </table:table-row>
            <table:table-row>
              <table:table-cell office:value-type="string">
                <text:p>1706</text:p>
              </table:table-cell>
              <table:table-cell office:value-type="float" office:value="513.517395019531">
                <text:p>513.517395019531</text:p>
              </table:table-cell>
              <table:table-cell office:value-type="float" office:value="0.004923943">
                <text:p>0.004923943</text:p>
              </table:table-cell>
            </table:table-row>
            <table:table-row>
              <table:table-cell office:value-type="string">
                <text:p>1707</text:p>
              </table:table-cell>
              <table:table-cell office:value-type="float" office:value="513.634033203125">
                <text:p>513.634033203125</text:p>
              </table:table-cell>
              <table:table-cell office:value-type="float" office:value="-0.005272465">
                <text:p>-0.005272465</text:p>
              </table:table-cell>
            </table:table-row>
            <table:table-row>
              <table:table-cell office:value-type="string">
                <text:p>1708</text:p>
              </table:table-cell>
              <table:table-cell office:value-type="float" office:value="513.750732421875">
                <text:p>513.750732421875</text:p>
              </table:table-cell>
              <table:table-cell office:value-type="float" office:value="0.005224629">
                <text:p>0.005224629</text:p>
              </table:table-cell>
            </table:table-row>
            <table:table-row>
              <table:table-cell office:value-type="string">
                <text:p>1709</text:p>
              </table:table-cell>
              <table:table-cell office:value-type="float" office:value="513.867431640625">
                <text:p>513.867431640625</text:p>
              </table:table-cell>
              <table:table-cell office:value-type="float" office:value="0.005207377">
                <text:p>0.005207377</text:p>
              </table:table-cell>
            </table:table-row>
            <table:table-row>
              <table:table-cell office:value-type="string">
                <text:p>1710</text:p>
              </table:table-cell>
              <table:table-cell office:value-type="float" office:value="513.984069824219">
                <text:p>513.984069824219</text:p>
              </table:table-cell>
              <table:table-cell office:value-type="float" office:value="0.005958734">
                <text:p>0.005958734</text:p>
              </table:table-cell>
            </table:table-row>
            <table:table-row>
              <table:table-cell office:value-type="string">
                <text:p>1711</text:p>
              </table:table-cell>
              <table:table-cell office:value-type="float" office:value="514.100769042969">
                <text:p>514.100769042969</text:p>
              </table:table-cell>
              <table:table-cell office:value-type="float" office:value="0.007592415">
                <text:p>0.007592415</text:p>
              </table:table-cell>
            </table:table-row>
            <table:table-row>
              <table:table-cell office:value-type="string">
                <text:p>1712</text:p>
              </table:table-cell>
              <table:table-cell office:value-type="float" office:value="514.217468261719">
                <text:p>514.217468261719</text:p>
              </table:table-cell>
              <table:table-cell office:value-type="float" office:value="-0.003425659">
                <text:p>-0.003425659</text:p>
              </table:table-cell>
            </table:table-row>
            <table:table-row>
              <table:table-cell office:value-type="string">
                <text:p>1713</text:p>
              </table:table-cell>
              <table:table-cell office:value-type="float" office:value="514.334167480469">
                <text:p>514.334167480469</text:p>
              </table:table-cell>
              <table:table-cell office:value-type="float" office:value="0.00078978">
                <text:p>0.00078978</text:p>
              </table:table-cell>
            </table:table-row>
            <table:table-row>
              <table:table-cell office:value-type="string">
                <text:p>1714</text:p>
              </table:table-cell>
              <table:table-cell office:value-type="float" office:value="514.450866699219">
                <text:p>514.450866699219</text:p>
              </table:table-cell>
              <table:table-cell office:value-type="float" office:value="0.005865072">
                <text:p>0.005865072</text:p>
              </table:table-cell>
            </table:table-row>
            <table:table-row>
              <table:table-cell office:value-type="string">
                <text:p>1715</text:p>
              </table:table-cell>
              <table:table-cell office:value-type="float" office:value="514.567565917969">
                <text:p>514.567565917969</text:p>
              </table:table-cell>
              <table:table-cell office:value-type="float" office:value="-0.006472215">
                <text:p>-0.006472215</text:p>
              </table:table-cell>
            </table:table-row>
            <table:table-row>
              <table:table-cell office:value-type="string">
                <text:p>1716</text:p>
              </table:table-cell>
              <table:table-cell office:value-type="float" office:value="514.684265136719">
                <text:p>514.684265136719</text:p>
              </table:table-cell>
              <table:table-cell office:value-type="float" office:value="0.001085046">
                <text:p>0.001085046</text:p>
              </table:table-cell>
            </table:table-row>
            <table:table-row>
              <table:table-cell office:value-type="string">
                <text:p>1717</text:p>
              </table:table-cell>
              <table:table-cell office:value-type="float" office:value="514.801025390625">
                <text:p>514.801025390625</text:p>
              </table:table-cell>
              <table:table-cell office:value-type="float" office:value="-0.0001939719">
                <text:p>-0.0001939719</text:p>
              </table:table-cell>
            </table:table-row>
            <table:table-row>
              <table:table-cell office:value-type="string">
                <text:p>1718</text:p>
              </table:table-cell>
              <table:table-cell office:value-type="float" office:value="514.917724609375">
                <text:p>514.917724609375</text:p>
              </table:table-cell>
              <table:table-cell office:value-type="float" office:value="0.004440976">
                <text:p>0.004440976</text:p>
              </table:table-cell>
            </table:table-row>
            <table:table-row>
              <table:table-cell office:value-type="string">
                <text:p>1719</text:p>
              </table:table-cell>
              <table:table-cell office:value-type="float" office:value="515.034423828125">
                <text:p>515.034423828125</text:p>
              </table:table-cell>
              <table:table-cell office:value-type="float" office:value="-0.004262262">
                <text:p>-0.004262262</text:p>
              </table:table-cell>
            </table:table-row>
            <table:table-row>
              <table:table-cell office:value-type="string">
                <text:p>1720</text:p>
              </table:table-cell>
              <table:table-cell office:value-type="float" office:value="515.151184082031">
                <text:p>515.151184082031</text:p>
              </table:table-cell>
              <table:table-cell office:value-type="float" office:value="-0.01176643">
                <text:p>-0.01176643</text:p>
              </table:table-cell>
            </table:table-row>
            <table:table-row>
              <table:table-cell office:value-type="string">
                <text:p>1721</text:p>
              </table:table-cell>
              <table:table-cell office:value-type="float" office:value="515.267883300781">
                <text:p>515.267883300781</text:p>
              </table:table-cell>
              <table:table-cell office:value-type="float" office:value="-0.001614727">
                <text:p>-0.001614727</text:p>
              </table:table-cell>
            </table:table-row>
            <table:table-row>
              <table:table-cell office:value-type="string">
                <text:p>1722</text:p>
              </table:table-cell>
              <table:table-cell office:value-type="float" office:value="515.384643554688">
                <text:p>515.384643554688</text:p>
              </table:table-cell>
              <table:table-cell office:value-type="float" office:value="0.005003976">
                <text:p>0.005003976</text:p>
              </table:table-cell>
            </table:table-row>
            <table:table-row>
              <table:table-cell office:value-type="string">
                <text:p>1723</text:p>
              </table:table-cell>
              <table:table-cell office:value-type="float" office:value="515.501342773438">
                <text:p>515.501342773438</text:p>
              </table:table-cell>
              <table:table-cell office:value-type="float" office:value="-0.001106455">
                <text:p>-0.001106455</text:p>
              </table:table-cell>
            </table:table-row>
            <table:table-row>
              <table:table-cell office:value-type="string">
                <text:p>1724</text:p>
              </table:table-cell>
              <table:table-cell office:value-type="float" office:value="515.618103027344">
                <text:p>515.618103027344</text:p>
              </table:table-cell>
              <table:table-cell office:value-type="float" office:value="0.00167073">
                <text:p>0.00167073</text:p>
              </table:table-cell>
            </table:table-row>
            <table:table-row>
              <table:table-cell office:value-type="string">
                <text:p>1725</text:p>
              </table:table-cell>
              <table:table-cell office:value-type="float" office:value="515.734802246094">
                <text:p>515.734802246094</text:p>
              </table:table-cell>
              <table:table-cell office:value-type="float" office:value="-0.001859322">
                <text:p>-0.001859322</text:p>
              </table:table-cell>
            </table:table-row>
            <table:table-row>
              <table:table-cell office:value-type="string">
                <text:p>1726</text:p>
              </table:table-cell>
              <table:table-cell office:value-type="float" office:value="515.8515625">
                <text:p>515.8515625</text:p>
              </table:table-cell>
              <table:table-cell office:value-type="float" office:value="0.01298772">
                <text:p>0.01298772</text:p>
              </table:table-cell>
            </table:table-row>
            <table:table-row>
              <table:table-cell office:value-type="string">
                <text:p>1727</text:p>
              </table:table-cell>
              <table:table-cell office:value-type="float" office:value="515.968322753906">
                <text:p>515.968322753906</text:p>
              </table:table-cell>
              <table:table-cell office:value-type="float" office:value="-0.00044942">
                <text:p>-0.00044942</text:p>
              </table:table-cell>
            </table:table-row>
            <table:table-row>
              <table:table-cell office:value-type="string">
                <text:p>1728</text:p>
              </table:table-cell>
              <table:table-cell office:value-type="float" office:value="516.085083007813">
                <text:p>516.085083007813</text:p>
              </table:table-cell>
              <table:table-cell office:value-type="float" office:value="0.001031951">
                <text:p>0.001031951</text:p>
              </table:table-cell>
            </table:table-row>
            <table:table-row>
              <table:table-cell office:value-type="string">
                <text:p>1729</text:p>
              </table:table-cell>
              <table:table-cell office:value-type="float" office:value="516.201843261719">
                <text:p>516.201843261719</text:p>
              </table:table-cell>
              <table:table-cell office:value-type="float" office:value="-0.001823038">
                <text:p>-0.001823038</text:p>
              </table:table-cell>
            </table:table-row>
            <table:table-row>
              <table:table-cell office:value-type="string">
                <text:p>1730</text:p>
              </table:table-cell>
              <table:table-cell office:value-type="float" office:value="516.318603515625">
                <text:p>516.318603515625</text:p>
              </table:table-cell>
              <table:table-cell office:value-type="float" office:value="-0.003760601">
                <text:p>-0.003760601</text:p>
              </table:table-cell>
            </table:table-row>
            <table:table-row>
              <table:table-cell office:value-type="string">
                <text:p>1731</text:p>
              </table:table-cell>
              <table:table-cell office:value-type="float" office:value="516.435363769531">
                <text:p>516.435363769531</text:p>
              </table:table-cell>
              <table:table-cell office:value-type="float" office:value="-0.006606572">
                <text:p>-0.006606572</text:p>
              </table:table-cell>
            </table:table-row>
            <table:table-row>
              <table:table-cell office:value-type="string">
                <text:p>1732</text:p>
              </table:table-cell>
              <table:table-cell office:value-type="float" office:value="516.552124023438">
                <text:p>516.552124023438</text:p>
              </table:table-cell>
              <table:table-cell office:value-type="float" office:value="-0.002569052">
                <text:p>-0.002569052</text:p>
              </table:table-cell>
            </table:table-row>
            <table:table-row>
              <table:table-cell office:value-type="string">
                <text:p>1733</text:p>
              </table:table-cell>
              <table:table-cell office:value-type="float" office:value="516.668884277344">
                <text:p>516.668884277344</text:p>
              </table:table-cell>
              <table:table-cell office:value-type="float" office:value="-0.002068059">
                <text:p>-0.002068059</text:p>
              </table:table-cell>
            </table:table-row>
            <table:table-row>
              <table:table-cell office:value-type="string">
                <text:p>1734</text:p>
              </table:table-cell>
              <table:table-cell office:value-type="float" office:value="516.78564453125">
                <text:p>516.78564453125</text:p>
              </table:table-cell>
              <table:table-cell office:value-type="float" office:value="0.01183421">
                <text:p>0.01183421</text:p>
              </table:table-cell>
            </table:table-row>
            <table:table-row>
              <table:table-cell office:value-type="string">
                <text:p>1735</text:p>
              </table:table-cell>
              <table:table-cell office:value-type="float" office:value="516.902465820313">
                <text:p>516.902465820313</text:p>
              </table:table-cell>
              <table:table-cell office:value-type="float" office:value="0.02751169">
                <text:p>0.02751169</text:p>
              </table:table-cell>
            </table:table-row>
            <table:table-row>
              <table:table-cell office:value-type="string">
                <text:p>1736</text:p>
              </table:table-cell>
              <table:table-cell office:value-type="float" office:value="517.019226074219">
                <text:p>517.019226074219</text:p>
              </table:table-cell>
              <table:table-cell office:value-type="float" office:value="-0.006115084">
                <text:p>-0.006115084</text:p>
              </table:table-cell>
            </table:table-row>
            <table:table-row>
              <table:table-cell office:value-type="string">
                <text:p>1737</text:p>
              </table:table-cell>
              <table:table-cell office:value-type="float" office:value="517.135986328125">
                <text:p>517.135986328125</text:p>
              </table:table-cell>
              <table:table-cell office:value-type="float" office:value="0.0003077183">
                <text:p>0.0003077183</text:p>
              </table:table-cell>
            </table:table-row>
            <table:table-row>
              <table:table-cell office:value-type="string">
                <text:p>1738</text:p>
              </table:table-cell>
              <table:table-cell office:value-type="float" office:value="517.252807617188">
                <text:p>517.252807617188</text:p>
              </table:table-cell>
              <table:table-cell office:value-type="float" office:value="0.005789003">
                <text:p>0.005789003</text:p>
              </table:table-cell>
            </table:table-row>
            <table:table-row>
              <table:table-cell office:value-type="string">
                <text:p>1739</text:p>
              </table:table-cell>
              <table:table-cell office:value-type="float" office:value="517.369567871094">
                <text:p>517.369567871094</text:p>
              </table:table-cell>
              <table:table-cell office:value-type="float" office:value="-0.006555823">
                <text:p>-0.006555823</text:p>
              </table:table-cell>
            </table:table-row>
            <table:table-row>
              <table:table-cell office:value-type="string">
                <text:p>1740</text:p>
              </table:table-cell>
              <table:table-cell office:value-type="float" office:value="517.486389160156">
                <text:p>517.4863891601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1</text:p>
              </table:table-cell>
              <table:table-cell office:value-type="float" office:value="517.603210449219">
                <text:p>517.603210449219</text:p>
              </table:table-cell>
              <table:table-cell office:value-type="float" office:value="0.01167934">
                <text:p>0.01167934</text:p>
              </table:table-cell>
            </table:table-row>
            <table:table-row>
              <table:table-cell office:value-type="string">
                <text:p>1742</text:p>
              </table:table-cell>
              <table:table-cell office:value-type="float" office:value="517.719970703125">
                <text:p>517.719970703125</text:p>
              </table:table-cell>
              <table:table-cell office:value-type="float" office:value="0.001247008">
                <text:p>0.001247008</text:p>
              </table:table-cell>
            </table:table-row>
            <table:table-row>
              <table:table-cell office:value-type="string">
                <text:p>1743</text:p>
              </table:table-cell>
              <table:table-cell office:value-type="float" office:value="517.836791992188">
                <text:p>517.836791992188</text:p>
              </table:table-cell>
              <table:table-cell office:value-type="float" office:value="0.003115467">
                <text:p>0.003115467</text:p>
              </table:table-cell>
            </table:table-row>
            <table:table-row>
              <table:table-cell office:value-type="string">
                <text:p>1744</text:p>
              </table:table-cell>
              <table:table-cell office:value-type="float" office:value="517.95361328125">
                <text:p>517.95361328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5</text:p>
              </table:table-cell>
              <table:table-cell office:value-type="float" office:value="518.070434570313">
                <text:p>518.070434570313</text:p>
              </table:table-cell>
              <table:table-cell office:value-type="float" office:value="-0.002994521">
                <text:p>-0.002994521</text:p>
              </table:table-cell>
            </table:table-row>
            <table:table-row>
              <table:table-cell office:value-type="string">
                <text:p>1746</text:p>
              </table:table-cell>
              <table:table-cell office:value-type="float" office:value="518.187255859375">
                <text:p>518.187255859375</text:p>
              </table:table-cell>
              <table:table-cell office:value-type="float" office:value="0.005229549">
                <text:p>0.005229549</text:p>
              </table:table-cell>
            </table:table-row>
            <table:table-row>
              <table:table-cell office:value-type="string">
                <text:p>1747</text:p>
              </table:table-cell>
              <table:table-cell office:value-type="float" office:value="518.304077148438">
                <text:p>518.304077148438</text:p>
              </table:table-cell>
              <table:table-cell office:value-type="float" office:value="0.01150906">
                <text:p>0.01150906</text:p>
              </table:table-cell>
            </table:table-row>
            <table:table-row>
              <table:table-cell office:value-type="string">
                <text:p>1748</text:p>
              </table:table-cell>
              <table:table-cell office:value-type="float" office:value="518.4208984375">
                <text:p>518.4208984375</text:p>
              </table:table-cell>
              <table:table-cell office:value-type="float" office:value="0.004078928">
                <text:p>0.004078928</text:p>
              </table:table-cell>
            </table:table-row>
            <table:table-row>
              <table:table-cell office:value-type="string">
                <text:p>1749</text:p>
              </table:table-cell>
              <table:table-cell office:value-type="float" office:value="518.537719726563">
                <text:p>518.537719726563</text:p>
              </table:table-cell>
              <table:table-cell office:value-type="float" office:value="0.0177419">
                <text:p>0.0177419</text:p>
              </table:table-cell>
            </table:table-row>
            <table:table-row>
              <table:table-cell office:value-type="string">
                <text:p>1750</text:p>
              </table:table-cell>
              <table:table-cell office:value-type="float" office:value="518.654541015625">
                <text:p>518.654541015625</text:p>
              </table:table-cell>
              <table:table-cell office:value-type="float" office:value="0.006995969">
                <text:p>0.006995969</text:p>
              </table:table-cell>
            </table:table-row>
            <table:table-row>
              <table:table-cell office:value-type="string">
                <text:p>1751</text:p>
              </table:table-cell>
              <table:table-cell office:value-type="float" office:value="518.771362304688">
                <text:p>518.771362304688</text:p>
              </table:table-cell>
              <table:table-cell office:value-type="float" office:value="-0.008352427">
                <text:p>-0.008352427</text:p>
              </table:table-cell>
            </table:table-row>
            <table:table-row>
              <table:table-cell office:value-type="string">
                <text:p>1752</text:p>
              </table:table-cell>
              <table:table-cell office:value-type="float" office:value="518.888244628906">
                <text:p>518.888244628906</text:p>
              </table:table-cell>
              <table:table-cell office:value-type="float" office:value="-0.00866734">
                <text:p>-0.00866734</text:p>
              </table:table-cell>
            </table:table-row>
            <table:table-row>
              <table:table-cell office:value-type="string">
                <text:p>1753</text:p>
              </table:table-cell>
              <table:table-cell office:value-type="float" office:value="519.005065917969">
                <text:p>519.005065917969</text:p>
              </table:table-cell>
              <table:table-cell office:value-type="float" office:value="0.00221999">
                <text:p>0.00221999</text:p>
              </table:table-cell>
            </table:table-row>
            <table:table-row>
              <table:table-cell office:value-type="string">
                <text:p>1754</text:p>
              </table:table-cell>
              <table:table-cell office:value-type="float" office:value="519.121887207031">
                <text:p>519.121887207031</text:p>
              </table:table-cell>
              <table:table-cell office:value-type="float" office:value="-0.001030606">
                <text:p>-0.001030606</text:p>
              </table:table-cell>
            </table:table-row>
            <table:table-row>
              <table:table-cell office:value-type="string">
                <text:p>1755</text:p>
              </table:table-cell>
              <table:table-cell office:value-type="float" office:value="519.23876953125">
                <text:p>519.23876953125</text:p>
              </table:table-cell>
              <table:table-cell office:value-type="float" office:value="0.003748715">
                <text:p>0.003748715</text:p>
              </table:table-cell>
            </table:table-row>
            <table:table-row>
              <table:table-cell office:value-type="string">
                <text:p>1756</text:p>
              </table:table-cell>
              <table:table-cell office:value-type="float" office:value="519.355590820313">
                <text:p>519.355590820313</text:p>
              </table:table-cell>
              <table:table-cell office:value-type="float" office:value="-0.003309974">
                <text:p>-0.003309974</text:p>
              </table:table-cell>
            </table:table-row>
            <table:table-row>
              <table:table-cell office:value-type="string">
                <text:p>1757</text:p>
              </table:table-cell>
              <table:table-cell office:value-type="float" office:value="519.472473144531">
                <text:p>519.472473144531</text:p>
              </table:table-cell>
              <table:table-cell office:value-type="float" office:value="0.003067646">
                <text:p>0.003067646</text:p>
              </table:table-cell>
            </table:table-row>
            <table:table-row>
              <table:table-cell office:value-type="string">
                <text:p>1758</text:p>
              </table:table-cell>
              <table:table-cell office:value-type="float" office:value="519.58935546875">
                <text:p>519.58935546875</text:p>
              </table:table-cell>
              <table:table-cell office:value-type="float" office:value="0.001302447">
                <text:p>0.001302447</text:p>
              </table:table-cell>
            </table:table-row>
            <table:table-row>
              <table:table-cell office:value-type="string">
                <text:p>1759</text:p>
              </table:table-cell>
              <table:table-cell office:value-type="float" office:value="519.706176757813">
                <text:p>519.706176757813</text:p>
              </table:table-cell>
              <table:table-cell office:value-type="float" office:value="-0.003514391">
                <text:p>-0.003514391</text:p>
              </table:table-cell>
            </table:table-row>
            <table:table-row>
              <table:table-cell office:value-type="string">
                <text:p>1760</text:p>
              </table:table-cell>
              <table:table-cell office:value-type="float" office:value="519.823059082031">
                <text:p>519.823059082031</text:p>
              </table:table-cell>
              <table:table-cell office:value-type="float" office:value="-0.006861347">
                <text:p>-0.006861347</text:p>
              </table:table-cell>
            </table:table-row>
            <table:table-row>
              <table:table-cell office:value-type="string">
                <text:p>1761</text:p>
              </table:table-cell>
              <table:table-cell office:value-type="float" office:value="519.93994140625">
                <text:p>519.93994140625</text:p>
              </table:table-cell>
              <table:table-cell office:value-type="float" office:value="0.01426388">
                <text:p>0.01426388</text:p>
              </table:table-cell>
            </table:table-row>
            <table:table-row>
              <table:table-cell office:value-type="string">
                <text:p>1762</text:p>
              </table:table-cell>
              <table:table-cell office:value-type="float" office:value="520.056823730469">
                <text:p>520.056823730469</text:p>
              </table:table-cell>
              <table:table-cell office:value-type="float" office:value="-0.004168718">
                <text:p>-0.004168718</text:p>
              </table:table-cell>
            </table:table-row>
            <table:table-row>
              <table:table-cell office:value-type="string">
                <text:p>1763</text:p>
              </table:table-cell>
              <table:table-cell office:value-type="float" office:value="520.173706054688">
                <text:p>520.1737060546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4</text:p>
              </table:table-cell>
              <table:table-cell office:value-type="float" office:value="520.290588378906">
                <text:p>520.290588378906</text:p>
              </table:table-cell>
              <table:table-cell office:value-type="float" office:value="-0.005683539">
                <text:p>-0.005683539</text:p>
              </table:table-cell>
            </table:table-row>
            <table:table-row>
              <table:table-cell office:value-type="string">
                <text:p>1765</text:p>
              </table:table-cell>
              <table:table-cell office:value-type="float" office:value="520.407470703125">
                <text:p>520.407470703125</text:p>
              </table:table-cell>
              <table:table-cell office:value-type="float" office:value="-0.001610329">
                <text:p>-0.001610329</text:p>
              </table:table-cell>
            </table:table-row>
            <table:table-row>
              <table:table-cell office:value-type="string">
                <text:p>1766</text:p>
              </table:table-cell>
              <table:table-cell office:value-type="float" office:value="520.524353027344">
                <text:p>520.524353027344</text:p>
              </table:table-cell>
              <table:table-cell office:value-type="float" office:value="-0.004848645">
                <text:p>-0.004848645</text:p>
              </table:table-cell>
            </table:table-row>
            <table:table-row>
              <table:table-cell office:value-type="string">
                <text:p>1767</text:p>
              </table:table-cell>
              <table:table-cell office:value-type="float" office:value="520.641235351563">
                <text:p>520.641235351563</text:p>
              </table:table-cell>
              <table:table-cell office:value-type="float" office:value="-0.007346387">
                <text:p>-0.007346387</text:p>
              </table:table-cell>
            </table:table-row>
            <table:table-row>
              <table:table-cell office:value-type="string">
                <text:p>1768</text:p>
              </table:table-cell>
              <table:table-cell office:value-type="float" office:value="520.758178710938">
                <text:p>520.758178710938</text:p>
              </table:table-cell>
              <table:table-cell office:value-type="float" office:value="-0.002121676">
                <text:p>-0.002121676</text:p>
              </table:table-cell>
            </table:table-row>
            <table:table-row>
              <table:table-cell office:value-type="string">
                <text:p>1769</text:p>
              </table:table-cell>
              <table:table-cell office:value-type="float" office:value="520.875061035156">
                <text:p>520.875061035156</text:p>
              </table:table-cell>
              <table:table-cell office:value-type="float" office:value="0.02067209">
                <text:p>0.02067209</text:p>
              </table:table-cell>
            </table:table-row>
            <table:table-row>
              <table:table-cell office:value-type="string">
                <text:p>1770</text:p>
              </table:table-cell>
              <table:table-cell office:value-type="float" office:value="520.991943359375">
                <text:p>520.991943359375</text:p>
              </table:table-cell>
              <table:table-cell office:value-type="float" office:value="0.001910565">
                <text:p>0.001910565</text:p>
              </table:table-cell>
            </table:table-row>
            <table:table-row>
              <table:table-cell office:value-type="string">
                <text:p>1771</text:p>
              </table:table-cell>
              <table:table-cell office:value-type="float" office:value="521.10888671875">
                <text:p>521.10888671875</text:p>
              </table:table-cell>
              <table:table-cell office:value-type="float" office:value="-0.007952635">
                <text:p>-0.007952635</text:p>
              </table:table-cell>
            </table:table-row>
            <table:table-row>
              <table:table-cell office:value-type="string">
                <text:p>1772</text:p>
              </table:table-cell>
              <table:table-cell office:value-type="float" office:value="521.225769042969">
                <text:p>521.225769042969</text:p>
              </table:table-cell>
              <table:table-cell office:value-type="float" office:value="0.001358741">
                <text:p>0.001358741</text:p>
              </table:table-cell>
            </table:table-row>
            <table:table-row>
              <table:table-cell office:value-type="string">
                <text:p>1773</text:p>
              </table:table-cell>
              <table:table-cell office:value-type="float" office:value="521.342712402344">
                <text:p>521.342712402344</text:p>
              </table:table-cell>
              <table:table-cell office:value-type="float" office:value="0.007041009">
                <text:p>0.007041009</text:p>
              </table:table-cell>
            </table:table-row>
            <table:table-row>
              <table:table-cell office:value-type="string">
                <text:p>1774</text:p>
              </table:table-cell>
              <table:table-cell office:value-type="float" office:value="521.459594726563">
                <text:p>521.459594726563</text:p>
              </table:table-cell>
              <table:table-cell office:value-type="float" office:value="-0.006149629">
                <text:p>-0.006149629</text:p>
              </table:table-cell>
            </table:table-row>
            <table:table-row>
              <table:table-cell office:value-type="string">
                <text:p>1775</text:p>
              </table:table-cell>
              <table:table-cell office:value-type="float" office:value="521.576538085938">
                <text:p>521.576538085938</text:p>
              </table:table-cell>
              <table:table-cell office:value-type="float" office:value="-0.004892885">
                <text:p>-0.004892885</text:p>
              </table:table-cell>
            </table:table-row>
            <table:table-row>
              <table:table-cell office:value-type="string">
                <text:p>1776</text:p>
              </table:table-cell>
              <table:table-cell office:value-type="float" office:value="521.693481445313">
                <text:p>521.693481445313</text:p>
              </table:table-cell>
              <table:table-cell office:value-type="float" office:value="-0.001413394">
                <text:p>-0.001413394</text:p>
              </table:table-cell>
            </table:table-row>
            <table:table-row>
              <table:table-cell office:value-type="string">
                <text:p>1777</text:p>
              </table:table-cell>
              <table:table-cell office:value-type="float" office:value="521.810424804688">
                <text:p>521.810424804688</text:p>
              </table:table-cell>
              <table:table-cell office:value-type="float" office:value="-0.005281766">
                <text:p>-0.005281766</text:p>
              </table:table-cell>
            </table:table-row>
            <table:table-row>
              <table:table-cell office:value-type="string">
                <text:p>1778</text:p>
              </table:table-cell>
              <table:table-cell office:value-type="float" office:value="521.927307128906">
                <text:p>521.927307128906</text:p>
              </table:table-cell>
              <table:table-cell office:value-type="float" office:value="0.0108478">
                <text:p>0.0108478</text:p>
              </table:table-cell>
            </table:table-row>
            <table:table-row>
              <table:table-cell office:value-type="string">
                <text:p>1779</text:p>
              </table:table-cell>
              <table:table-cell office:value-type="float" office:value="522.044250488281">
                <text:p>522.044250488281</text:p>
              </table:table-cell>
              <table:table-cell office:value-type="float" office:value="0.001524671">
                <text:p>0.001524671</text:p>
              </table:table-cell>
            </table:table-row>
            <table:table-row>
              <table:table-cell office:value-type="string">
                <text:p>1780</text:p>
              </table:table-cell>
              <table:table-cell office:value-type="float" office:value="522.161193847656">
                <text:p>522.161193847656</text:p>
              </table:table-cell>
              <table:table-cell office:value-type="float" office:value="0.03690556">
                <text:p>0.03690556</text:p>
              </table:table-cell>
            </table:table-row>
            <table:table-row>
              <table:table-cell office:value-type="string">
                <text:p>1781</text:p>
              </table:table-cell>
              <table:table-cell office:value-type="float" office:value="522.278137207031">
                <text:p>522.278137207031</text:p>
              </table:table-cell>
              <table:table-cell office:value-type="float" office:value="0.008808685">
                <text:p>0.008808685</text:p>
              </table:table-cell>
            </table:table-row>
            <table:table-row>
              <table:table-cell office:value-type="string">
                <text:p>1782</text:p>
              </table:table-cell>
              <table:table-cell office:value-type="float" office:value="522.395080566406">
                <text:p>522.395080566406</text:p>
              </table:table-cell>
              <table:table-cell office:value-type="float" office:value="0.001069703">
                <text:p>0.001069703</text:p>
              </table:table-cell>
            </table:table-row>
            <table:table-row>
              <table:table-cell office:value-type="string">
                <text:p>1783</text:p>
              </table:table-cell>
              <table:table-cell office:value-type="float" office:value="522.512023925781">
                <text:p>522.512023925781</text:p>
              </table:table-cell>
              <table:table-cell office:value-type="float" office:value="-0.005290363">
                <text:p>-0.005290363</text:p>
              </table:table-cell>
            </table:table-row>
            <table:table-row>
              <table:table-cell office:value-type="string">
                <text:p>1784</text:p>
              </table:table-cell>
              <table:table-cell office:value-type="float" office:value="522.629028320313">
                <text:p>522.629028320313</text:p>
              </table:table-cell>
              <table:table-cell office:value-type="float" office:value="0.002215858">
                <text:p>0.002215858</text:p>
              </table:table-cell>
            </table:table-row>
            <table:table-row>
              <table:table-cell office:value-type="string">
                <text:p>1785</text:p>
              </table:table-cell>
              <table:table-cell office:value-type="float" office:value="522.745971679688">
                <text:p>522.745971679688</text:p>
              </table:table-cell>
              <table:table-cell office:value-type="float" office:value="0.0003517264">
                <text:p>0.0003517264</text:p>
              </table:table-cell>
            </table:table-row>
            <table:table-row>
              <table:table-cell office:value-type="string">
                <text:p>1786</text:p>
              </table:table-cell>
              <table:table-cell office:value-type="float" office:value="522.862915039063">
                <text:p>522.862915039063</text:p>
              </table:table-cell>
              <table:table-cell office:value-type="float" office:value="0.01444339">
                <text:p>0.01444339</text:p>
              </table:table-cell>
            </table:table-row>
            <table:table-row>
              <table:table-cell office:value-type="string">
                <text:p>1787</text:p>
              </table:table-cell>
              <table:table-cell office:value-type="float" office:value="522.979919433594">
                <text:p>522.979919433594</text:p>
              </table:table-cell>
              <table:table-cell office:value-type="float" office:value="-0.009791109">
                <text:p>-0.009791109</text:p>
              </table:table-cell>
            </table:table-row>
            <table:table-row>
              <table:table-cell office:value-type="string">
                <text:p>1788</text:p>
              </table:table-cell>
              <table:table-cell office:value-type="float" office:value="523.096862792969">
                <text:p>523.096862792969</text:p>
              </table:table-cell>
              <table:table-cell office:value-type="float" office:value="0.01517284">
                <text:p>0.01517284</text:p>
              </table:table-cell>
            </table:table-row>
            <table:table-row>
              <table:table-cell office:value-type="string">
                <text:p>1789</text:p>
              </table:table-cell>
              <table:table-cell office:value-type="float" office:value="523.2138671875">
                <text:p>523.2138671875</text:p>
              </table:table-cell>
              <table:table-cell office:value-type="float" office:value="0.004988997">
                <text:p>0.004988997</text:p>
              </table:table-cell>
            </table:table-row>
            <table:table-row>
              <table:table-cell office:value-type="string">
                <text:p>1790</text:p>
              </table:table-cell>
              <table:table-cell office:value-type="float" office:value="523.330810546875">
                <text:p>523.330810546875</text:p>
              </table:table-cell>
              <table:table-cell office:value-type="float" office:value="0.0011436">
                <text:p>0.0011436</text:p>
              </table:table-cell>
            </table:table-row>
            <table:table-row>
              <table:table-cell office:value-type="string">
                <text:p>1791</text:p>
              </table:table-cell>
              <table:table-cell office:value-type="float" office:value="523.447814941406">
                <text:p>523.447814941406</text:p>
              </table:table-cell>
              <table:table-cell office:value-type="float" office:value="0.0005998926">
                <text:p>0.0005998926</text:p>
              </table:table-cell>
            </table:table-row>
            <table:table-row>
              <table:table-cell office:value-type="string">
                <text:p>1792</text:p>
              </table:table-cell>
              <table:table-cell office:value-type="float" office:value="523.564758300781">
                <text:p>523.564758300781</text:p>
              </table:table-cell>
              <table:table-cell office:value-type="float" office:value="0.002450176">
                <text:p>0.002450176</text:p>
              </table:table-cell>
            </table:table-row>
            <table:table-row>
              <table:table-cell office:value-type="string">
                <text:p>1793</text:p>
              </table:table-cell>
              <table:table-cell office:value-type="float" office:value="523.681762695313">
                <text:p>523.681762695313</text:p>
              </table:table-cell>
              <table:table-cell office:value-type="float" office:value="-0.002654854">
                <text:p>-0.002654854</text:p>
              </table:table-cell>
            </table:table-row>
            <table:table-row>
              <table:table-cell office:value-type="string">
                <text:p>1794</text:p>
              </table:table-cell>
              <table:table-cell office:value-type="float" office:value="523.798767089844">
                <text:p>523.798767089844</text:p>
              </table:table-cell>
              <table:table-cell office:value-type="float" office:value="-0.006718704">
                <text:p>-0.006718704</text:p>
              </table:table-cell>
            </table:table-row>
            <table:table-row>
              <table:table-cell office:value-type="string">
                <text:p>1795</text:p>
              </table:table-cell>
              <table:table-cell office:value-type="float" office:value="523.915771484375">
                <text:p>523.915771484375</text:p>
              </table:table-cell>
              <table:table-cell office:value-type="float" office:value="-0.01047529">
                <text:p>-0.01047529</text:p>
              </table:table-cell>
            </table:table-row>
            <table:table-row>
              <table:table-cell office:value-type="string">
                <text:p>1796</text:p>
              </table:table-cell>
              <table:table-cell office:value-type="float" office:value="524.032775878906">
                <text:p>524.032775878906</text:p>
              </table:table-cell>
              <table:table-cell office:value-type="float" office:value="0.008011894">
                <text:p>0.008011894</text:p>
              </table:table-cell>
            </table:table-row>
            <table:table-row>
              <table:table-cell office:value-type="string">
                <text:p>1797</text:p>
              </table:table-cell>
              <table:table-cell office:value-type="float" office:value="524.149719238281">
                <text:p>524.149719238281</text:p>
              </table:table-cell>
              <table:table-cell office:value-type="float" office:value="0.003771387">
                <text:p>0.003771387</text:p>
              </table:table-cell>
            </table:table-row>
            <table:table-row>
              <table:table-cell office:value-type="string">
                <text:p>1798</text:p>
              </table:table-cell>
              <table:table-cell office:value-type="float" office:value="524.266723632813">
                <text:p>524.266723632813</text:p>
              </table:table-cell>
              <table:table-cell office:value-type="float" office:value="0.00392483">
                <text:p>0.00392483</text:p>
              </table:table-cell>
            </table:table-row>
            <table:table-row>
              <table:table-cell office:value-type="string">
                <text:p>1799</text:p>
              </table:table-cell>
              <table:table-cell office:value-type="float" office:value="524.3837890625">
                <text:p>524.3837890625</text:p>
              </table:table-cell>
              <table:table-cell office:value-type="float" office:value="-0.01076427">
                <text:p>-0.01076427</text:p>
              </table:table-cell>
            </table:table-row>
            <table:table-row>
              <table:table-cell office:value-type="string">
                <text:p>1800</text:p>
              </table:table-cell>
              <table:table-cell office:value-type="float" office:value="524.500793457031">
                <text:p>524.500793457031</text:p>
              </table:table-cell>
              <table:table-cell office:value-type="float" office:value="0.01868411">
                <text:p>0.01868411</text:p>
              </table:table-cell>
            </table:table-row>
            <table:table-row>
              <table:table-cell office:value-type="string">
                <text:p>1801</text:p>
              </table:table-cell>
              <table:table-cell office:value-type="float" office:value="524.617797851563">
                <text:p>524.617797851563</text:p>
              </table:table-cell>
              <table:table-cell office:value-type="float" office:value="0.0062186">
                <text:p>0.0062186</text:p>
              </table:table-cell>
            </table:table-row>
            <table:table-row>
              <table:table-cell office:value-type="string">
                <text:p>1802</text:p>
              </table:table-cell>
              <table:table-cell office:value-type="float" office:value="524.734802246094">
                <text:p>524.734802246094</text:p>
              </table:table-cell>
              <table:table-cell office:value-type="float" office:value="-0.008258958">
                <text:p>-0.008258958</text:p>
              </table:table-cell>
            </table:table-row>
            <table:table-row>
              <table:table-cell office:value-type="string">
                <text:p>1803</text:p>
              </table:table-cell>
              <table:table-cell office:value-type="float" office:value="524.851806640625">
                <text:p>524.851806640625</text:p>
              </table:table-cell>
              <table:table-cell office:value-type="float" office:value="-0.00784347">
                <text:p>-0.00784347</text:p>
              </table:table-cell>
            </table:table-row>
            <table:table-row>
              <table:table-cell office:value-type="string">
                <text:p>1804</text:p>
              </table:table-cell>
              <table:table-cell office:value-type="float" office:value="524.968872070313">
                <text:p>524.968872070313</text:p>
              </table:table-cell>
              <table:table-cell office:value-type="float" office:value="0.001337547">
                <text:p>0.001337547</text:p>
              </table:table-cell>
            </table:table-row>
            <table:table-row>
              <table:table-cell office:value-type="string">
                <text:p>1805</text:p>
              </table:table-cell>
              <table:table-cell office:value-type="float" office:value="525.085876464844">
                <text:p>525.085876464844</text:p>
              </table:table-cell>
              <table:table-cell office:value-type="float" office:value="0.01858683">
                <text:p>0.01858683</text:p>
              </table:table-cell>
            </table:table-row>
            <table:table-row>
              <table:table-cell office:value-type="string">
                <text:p>1806</text:p>
              </table:table-cell>
              <table:table-cell office:value-type="float" office:value="525.202941894531">
                <text:p>525.202941894531</text:p>
              </table:table-cell>
              <table:table-cell office:value-type="float" office:value="-0.00456954">
                <text:p>-0.00456954</text:p>
              </table:table-cell>
            </table:table-row>
            <table:table-row>
              <table:table-cell office:value-type="string">
                <text:p>1807</text:p>
              </table:table-cell>
              <table:table-cell office:value-type="float" office:value="525.319946289063">
                <text:p>525.319946289063</text:p>
              </table:table-cell>
              <table:table-cell office:value-type="float" office:value="-0.004351737">
                <text:p>-0.004351737</text:p>
              </table:table-cell>
            </table:table-row>
            <table:table-row>
              <table:table-cell office:value-type="string">
                <text:p>1808</text:p>
              </table:table-cell>
              <table:table-cell office:value-type="float" office:value="525.43701171875">
                <text:p>525.43701171875</text:p>
              </table:table-cell>
              <table:table-cell office:value-type="float" office:value="0.006409964">
                <text:p>0.006409964</text:p>
              </table:table-cell>
            </table:table-row>
            <table:table-row>
              <table:table-cell office:value-type="string">
                <text:p>1809</text:p>
              </table:table-cell>
              <table:table-cell office:value-type="float" office:value="525.554016113281">
                <text:p>525.554016113281</text:p>
              </table:table-cell>
              <table:table-cell office:value-type="float" office:value="0.005309313">
                <text:p>0.005309313</text:p>
              </table:table-cell>
            </table:table-row>
            <table:table-row>
              <table:table-cell office:value-type="string">
                <text:p>1810</text:p>
              </table:table-cell>
              <table:table-cell office:value-type="float" office:value="525.671081542969">
                <text:p>525.671081542969</text:p>
              </table:table-cell>
              <table:table-cell office:value-type="float" office:value="-0.00457406">
                <text:p>-0.00457406</text:p>
              </table:table-cell>
            </table:table-row>
            <table:table-row>
              <table:table-cell office:value-type="string">
                <text:p>1811</text:p>
              </table:table-cell>
              <table:table-cell office:value-type="float" office:value="525.788146972656">
                <text:p>525.788146972656</text:p>
              </table:table-cell>
              <table:table-cell office:value-type="float" office:value="-0.01295808">
                <text:p>-0.01295808</text:p>
              </table:table-cell>
            </table:table-row>
            <table:table-row>
              <table:table-cell office:value-type="string">
                <text:p>1812</text:p>
              </table:table-cell>
              <table:table-cell office:value-type="float" office:value="525.905212402344">
                <text:p>525.905212402344</text:p>
              </table:table-cell>
              <table:table-cell office:value-type="float" office:value="-0.00239911">
                <text:p>-0.00239911</text:p>
              </table:table-cell>
            </table:table-row>
            <table:table-row>
              <table:table-cell office:value-type="string">
                <text:p>1813</text:p>
              </table:table-cell>
              <table:table-cell office:value-type="float" office:value="526.022277832031">
                <text:p>526.022277832031</text:p>
              </table:table-cell>
              <table:table-cell office:value-type="float" office:value="-0.005058528">
                <text:p>-0.005058528</text:p>
              </table:table-cell>
            </table:table-row>
            <table:table-row>
              <table:table-cell office:value-type="string">
                <text:p>1814</text:p>
              </table:table-cell>
              <table:table-cell office:value-type="float" office:value="526.139282226563">
                <text:p>526.139282226563</text:p>
              </table:table-cell>
              <table:table-cell office:value-type="float" office:value="-0.004377417">
                <text:p>-0.004377417</text:p>
              </table:table-cell>
            </table:table-row>
            <table:table-row>
              <table:table-cell office:value-type="string">
                <text:p>1815</text:p>
              </table:table-cell>
              <table:table-cell office:value-type="float" office:value="526.25634765625">
                <text:p>526.25634765625</text:p>
              </table:table-cell>
              <table:table-cell office:value-type="float" office:value="0.00999106">
                <text:p>0.00999106</text:p>
              </table:table-cell>
            </table:table-row>
            <table:table-row>
              <table:table-cell office:value-type="string">
                <text:p>1816</text:p>
              </table:table-cell>
              <table:table-cell office:value-type="float" office:value="526.373474121094">
                <text:p>526.373474121094</text:p>
              </table:table-cell>
              <table:table-cell office:value-type="float" office:value="-0.005117532">
                <text:p>-0.005117532</text:p>
              </table:table-cell>
            </table:table-row>
            <table:table-row>
              <table:table-cell office:value-type="string">
                <text:p>1817</text:p>
              </table:table-cell>
              <table:table-cell office:value-type="float" office:value="526.490539550781">
                <text:p>526.490539550781</text:p>
              </table:table-cell>
              <table:table-cell office:value-type="float" office:value="0.01180183">
                <text:p>0.01180183</text:p>
              </table:table-cell>
            </table:table-row>
            <table:table-row>
              <table:table-cell office:value-type="string">
                <text:p>1818</text:p>
              </table:table-cell>
              <table:table-cell office:value-type="float" office:value="526.607604980469">
                <text:p>526.607604980469</text:p>
              </table:table-cell>
              <table:table-cell office:value-type="float" office:value="-0.005841537">
                <text:p>-0.005841537</text:p>
              </table:table-cell>
            </table:table-row>
            <table:table-row>
              <table:table-cell office:value-type="string">
                <text:p>1819</text:p>
              </table:table-cell>
              <table:table-cell office:value-type="float" office:value="526.724670410156">
                <text:p>526.724670410156</text:p>
              </table:table-cell>
              <table:table-cell office:value-type="float" office:value="0.006268666">
                <text:p>0.006268666</text:p>
              </table:table-cell>
            </table:table-row>
            <table:table-row>
              <table:table-cell office:value-type="string">
                <text:p>1820</text:p>
              </table:table-cell>
              <table:table-cell office:value-type="float" office:value="526.841735839844">
                <text:p>526.841735839844</text:p>
              </table:table-cell>
              <table:table-cell office:value-type="float" office:value="0.01045189">
                <text:p>0.01045189</text:p>
              </table:table-cell>
            </table:table-row>
            <table:table-row>
              <table:table-cell office:value-type="string">
                <text:p>1821</text:p>
              </table:table-cell>
              <table:table-cell office:value-type="float" office:value="526.958862304688">
                <text:p>526.958862304688</text:p>
              </table:table-cell>
              <table:table-cell office:value-type="float" office:value="0.001783844">
                <text:p>0.001783844</text:p>
              </table:table-cell>
            </table:table-row>
            <table:table-row>
              <table:table-cell office:value-type="string">
                <text:p>1822</text:p>
              </table:table-cell>
              <table:table-cell office:value-type="float" office:value="527.075927734375">
                <text:p>527.075927734375</text:p>
              </table:table-cell>
              <table:table-cell office:value-type="float" office:value="0.0156644">
                <text:p>0.0156644</text:p>
              </table:table-cell>
            </table:table-row>
            <table:table-row>
              <table:table-cell office:value-type="string">
                <text:p>1823</text:p>
              </table:table-cell>
              <table:table-cell office:value-type="float" office:value="527.192993164063">
                <text:p>527.192993164063</text:p>
              </table:table-cell>
              <table:table-cell office:value-type="float" office:value="-0.008377002">
                <text:p>-0.008377002</text:p>
              </table:table-cell>
            </table:table-row>
            <table:table-row>
              <table:table-cell office:value-type="string">
                <text:p>1824</text:p>
              </table:table-cell>
              <table:table-cell office:value-type="float" office:value="527.310119628906">
                <text:p>527.310119628906</text:p>
              </table:table-cell>
              <table:table-cell office:value-type="float" office:value="0.002458217">
                <text:p>0.002458217</text:p>
              </table:table-cell>
            </table:table-row>
            <table:table-row>
              <table:table-cell office:value-type="string">
                <text:p>1825</text:p>
              </table:table-cell>
              <table:table-cell office:value-type="float" office:value="527.42724609375">
                <text:p>527.42724609375</text:p>
              </table:table-cell>
              <table:table-cell office:value-type="float" office:value="-0.002041494">
                <text:p>-0.002041494</text:p>
              </table:table-cell>
            </table:table-row>
            <table:table-row>
              <table:table-cell office:value-type="string">
                <text:p>1826</text:p>
              </table:table-cell>
              <table:table-cell office:value-type="float" office:value="527.544311523438">
                <text:p>527.544311523438</text:p>
              </table:table-cell>
              <table:table-cell office:value-type="float" office:value="-0.008025332">
                <text:p>-0.008025332</text:p>
              </table:table-cell>
            </table:table-row>
            <table:table-row>
              <table:table-cell office:value-type="string">
                <text:p>1827</text:p>
              </table:table-cell>
              <table:table-cell office:value-type="float" office:value="527.661437988281">
                <text:p>527.661437988281</text:p>
              </table:table-cell>
              <table:table-cell office:value-type="float" office:value="-0.01201082">
                <text:p>-0.01201082</text:p>
              </table:table-cell>
            </table:table-row>
            <table:table-row>
              <table:table-cell office:value-type="string">
                <text:p>1828</text:p>
              </table:table-cell>
              <table:table-cell office:value-type="float" office:value="527.778564453125">
                <text:p>527.778564453125</text:p>
              </table:table-cell>
              <table:table-cell office:value-type="float" office:value="0.006036963">
                <text:p>0.006036963</text:p>
              </table:table-cell>
            </table:table-row>
            <table:table-row>
              <table:table-cell office:value-type="string">
                <text:p>1829</text:p>
              </table:table-cell>
              <table:table-cell office:value-type="float" office:value="527.895629882813">
                <text:p>527.895629882813</text:p>
              </table:table-cell>
              <table:table-cell office:value-type="float" office:value="0.003226754">
                <text:p>0.003226754</text:p>
              </table:table-cell>
            </table:table-row>
            <table:table-row>
              <table:table-cell office:value-type="string">
                <text:p>1830</text:p>
              </table:table-cell>
              <table:table-cell office:value-type="float" office:value="528.012756347656">
                <text:p>528.012756347656</text:p>
              </table:table-cell>
              <table:table-cell office:value-type="float" office:value="-0.008019785">
                <text:p>-0.008019785</text:p>
              </table:table-cell>
            </table:table-row>
            <table:table-row>
              <table:table-cell office:value-type="string">
                <text:p>1831</text:p>
              </table:table-cell>
              <table:table-cell office:value-type="float" office:value="528.1298828125">
                <text:p>528.1298828125</text:p>
              </table:table-cell>
              <table:table-cell office:value-type="float" office:value="-0.003195124">
                <text:p>-0.003195124</text:p>
              </table:table-cell>
            </table:table-row>
            <table:table-row>
              <table:table-cell office:value-type="string">
                <text:p>1832</text:p>
              </table:table-cell>
              <table:table-cell office:value-type="float" office:value="528.247009277344">
                <text:p>528.247009277344</text:p>
              </table:table-cell>
              <table:table-cell office:value-type="float" office:value="0.0101537">
                <text:p>0.0101537</text:p>
              </table:table-cell>
            </table:table-row>
            <table:table-row>
              <table:table-cell office:value-type="string">
                <text:p>1833</text:p>
              </table:table-cell>
              <table:table-cell office:value-type="float" office:value="528.364135742188">
                <text:p>528.364135742188</text:p>
              </table:table-cell>
              <table:table-cell office:value-type="float" office:value="-0.00610525">
                <text:p>-0.00610525</text:p>
              </table:table-cell>
            </table:table-row>
            <table:table-row>
              <table:table-cell office:value-type="string">
                <text:p>1834</text:p>
              </table:table-cell>
              <table:table-cell office:value-type="float" office:value="528.481262207031">
                <text:p>528.481262207031</text:p>
              </table:table-cell>
              <table:table-cell office:value-type="float" office:value="0.01653418">
                <text:p>0.01653418</text:p>
              </table:table-cell>
            </table:table-row>
            <table:table-row>
              <table:table-cell office:value-type="string">
                <text:p>1835</text:p>
              </table:table-cell>
              <table:table-cell office:value-type="float" office:value="528.598388671875">
                <text:p>528.598388671875</text:p>
              </table:table-cell>
              <table:table-cell office:value-type="float" office:value="0.01054654">
                <text:p>0.01054654</text:p>
              </table:table-cell>
            </table:table-row>
            <table:table-row>
              <table:table-cell office:value-type="string">
                <text:p>1836</text:p>
              </table:table-cell>
              <table:table-cell office:value-type="float" office:value="528.715576171875">
                <text:p>528.715576171875</text:p>
              </table:table-cell>
              <table:table-cell office:value-type="float" office:value="0.002029901">
                <text:p>0.002029901</text:p>
              </table:table-cell>
            </table:table-row>
            <table:table-row>
              <table:table-cell office:value-type="string">
                <text:p>1837</text:p>
              </table:table-cell>
              <table:table-cell office:value-type="float" office:value="528.832702636719">
                <text:p>528.832702636719</text:p>
              </table:table-cell>
              <table:table-cell office:value-type="float" office:value="0.001072922">
                <text:p>0.001072922</text:p>
              </table:table-cell>
            </table:table-row>
            <table:table-row>
              <table:table-cell office:value-type="string">
                <text:p>1838</text:p>
              </table:table-cell>
              <table:table-cell office:value-type="float" office:value="528.949829101563">
                <text:p>528.949829101563</text:p>
              </table:table-cell>
              <table:table-cell office:value-type="float" office:value="-0.004445925">
                <text:p>-0.004445925</text:p>
              </table:table-cell>
            </table:table-row>
            <table:table-row>
              <table:table-cell office:value-type="string">
                <text:p>1839</text:p>
              </table:table-cell>
              <table:table-cell office:value-type="float" office:value="529.066955566406">
                <text:p>529.066955566406</text:p>
              </table:table-cell>
              <table:table-cell office:value-type="float" office:value="-0.01217845">
                <text:p>-0.01217845</text:p>
              </table:table-cell>
            </table:table-row>
            <table:table-row>
              <table:table-cell office:value-type="string">
                <text:p>1840</text:p>
              </table:table-cell>
              <table:table-cell office:value-type="float" office:value="529.184143066406">
                <text:p>529.184143066406</text:p>
              </table:table-cell>
              <table:table-cell office:value-type="float" office:value="0.003780667">
                <text:p>0.003780667</text:p>
              </table:table-cell>
            </table:table-row>
            <table:table-row>
              <table:table-cell office:value-type="string">
                <text:p>1841</text:p>
              </table:table-cell>
              <table:table-cell office:value-type="float" office:value="529.30126953125">
                <text:p>529.30126953125</text:p>
              </table:table-cell>
              <table:table-cell office:value-type="float" office:value="0.01028922">
                <text:p>0.01028922</text:p>
              </table:table-cell>
            </table:table-row>
            <table:table-row>
              <table:table-cell office:value-type="string">
                <text:p>1842</text:p>
              </table:table-cell>
              <table:table-cell office:value-type="float" office:value="529.41845703125">
                <text:p>529.41845703125</text:p>
              </table:table-cell>
              <table:table-cell office:value-type="float" office:value="-0.003134813">
                <text:p>-0.003134813</text:p>
              </table:table-cell>
            </table:table-row>
            <table:table-row>
              <table:table-cell office:value-type="string">
                <text:p>1843</text:p>
              </table:table-cell>
              <table:table-cell office:value-type="float" office:value="529.535583496094">
                <text:p>529.535583496094</text:p>
              </table:table-cell>
              <table:table-cell office:value-type="float" office:value="0.002284158">
                <text:p>0.002284158</text:p>
              </table:table-cell>
            </table:table-row>
            <table:table-row>
              <table:table-cell office:value-type="string">
                <text:p>1844</text:p>
              </table:table-cell>
              <table:table-cell office:value-type="float" office:value="529.652770996094">
                <text:p>529.652770996094</text:p>
              </table:table-cell>
              <table:table-cell office:value-type="float" office:value="0.0002482768">
                <text:p>0.0002482768</text:p>
              </table:table-cell>
            </table:table-row>
            <table:table-row>
              <table:table-cell office:value-type="string">
                <text:p>1845</text:p>
              </table:table-cell>
              <table:table-cell office:value-type="float" office:value="529.769958496094">
                <text:p>529.769958496094</text:p>
              </table:table-cell>
              <table:table-cell office:value-type="float" office:value="0.0005162369">
                <text:p>0.0005162369</text:p>
              </table:table-cell>
            </table:table-row>
            <table:table-row>
              <table:table-cell office:value-type="string">
                <text:p>1846</text:p>
              </table:table-cell>
              <table:table-cell office:value-type="float" office:value="529.887145996094">
                <text:p>529.887145996094</text:p>
              </table:table-cell>
              <table:table-cell office:value-type="float" office:value="-0.001300373">
                <text:p>-0.001300373</text:p>
              </table:table-cell>
            </table:table-row>
            <table:table-row>
              <table:table-cell office:value-type="string">
                <text:p>1847</text:p>
              </table:table-cell>
              <table:table-cell office:value-type="float" office:value="530.004272460938">
                <text:p>530.004272460938</text:p>
              </table:table-cell>
              <table:table-cell office:value-type="float" office:value="0.0005861066">
                <text:p>0.0005861066</text:p>
              </table:table-cell>
            </table:table-row>
            <table:table-row>
              <table:table-cell office:value-type="string">
                <text:p>1848</text:p>
              </table:table-cell>
              <table:table-cell office:value-type="float" office:value="530.121459960938">
                <text:p>530.121459960938</text:p>
              </table:table-cell>
              <table:table-cell office:value-type="float" office:value="0.001276695">
                <text:p>0.001276695</text:p>
              </table:table-cell>
            </table:table-row>
            <table:table-row>
              <table:table-cell office:value-type="string">
                <text:p>1849</text:p>
              </table:table-cell>
              <table:table-cell office:value-type="float" office:value="530.238647460938">
                <text:p>530.238647460938</text:p>
              </table:table-cell>
              <table:table-cell office:value-type="float" office:value="-0.0008668745">
                <text:p>-0.0008668745</text:p>
              </table:table-cell>
            </table:table-row>
            <table:table-row>
              <table:table-cell office:value-type="string">
                <text:p>1850</text:p>
              </table:table-cell>
              <table:table-cell office:value-type="float" office:value="530.355834960938">
                <text:p>530.355834960938</text:p>
              </table:table-cell>
              <table:table-cell office:value-type="float" office:value="-0.007398854">
                <text:p>-0.007398854</text:p>
              </table:table-cell>
            </table:table-row>
            <table:table-row>
              <table:table-cell office:value-type="string">
                <text:p>1851</text:p>
              </table:table-cell>
              <table:table-cell office:value-type="float" office:value="530.473022460938">
                <text:p>530.473022460938</text:p>
              </table:table-cell>
              <table:table-cell office:value-type="float" office:value="-0.009990164">
                <text:p>-0.009990164</text:p>
              </table:table-cell>
            </table:table-row>
            <table:table-row>
              <table:table-cell office:value-type="string">
                <text:p>1852</text:p>
              </table:table-cell>
              <table:table-cell office:value-type="float" office:value="530.590209960938">
                <text:p>530.590209960938</text:p>
              </table:table-cell>
              <table:table-cell office:value-type="float" office:value="0.003573988">
                <text:p>0.003573988</text:p>
              </table:table-cell>
            </table:table-row>
            <table:table-row>
              <table:table-cell office:value-type="string">
                <text:p>1853</text:p>
              </table:table-cell>
              <table:table-cell office:value-type="float" office:value="530.707397460938">
                <text:p>530.707397460938</text:p>
              </table:table-cell>
              <table:table-cell office:value-type="float" office:value="0.04665372">
                <text:p>0.04665372</text:p>
              </table:table-cell>
            </table:table-row>
            <table:table-row>
              <table:table-cell office:value-type="string">
                <text:p>1854</text:p>
              </table:table-cell>
              <table:table-cell office:value-type="float" office:value="530.824645996094">
                <text:p>530.824645996094</text:p>
              </table:table-cell>
              <table:table-cell office:value-type="float" office:value="0.006570238">
                <text:p>0.006570238</text:p>
              </table:table-cell>
            </table:table-row>
            <table:table-row>
              <table:table-cell office:value-type="string">
                <text:p>1855</text:p>
              </table:table-cell>
              <table:table-cell office:value-type="float" office:value="530.941833496094">
                <text:p>530.941833496094</text:p>
              </table:table-cell>
              <table:table-cell office:value-type="float" office:value="0.001367266">
                <text:p>0.001367266</text:p>
              </table:table-cell>
            </table:table-row>
            <table:table-row>
              <table:table-cell office:value-type="string">
                <text:p>1856</text:p>
              </table:table-cell>
              <table:table-cell office:value-type="float" office:value="531.059020996094">
                <text:p>531.059020996094</text:p>
              </table:table-cell>
              <table:table-cell office:value-type="float" office:value="0.002639656">
                <text:p>0.002639656</text:p>
              </table:table-cell>
            </table:table-row>
            <table:table-row>
              <table:table-cell office:value-type="string">
                <text:p>1857</text:p>
              </table:table-cell>
              <table:table-cell office:value-type="float" office:value="531.17626953125">
                <text:p>531.17626953125</text:p>
              </table:table-cell>
              <table:table-cell office:value-type="float" office:value="-0.001283721">
                <text:p>-0.001283721</text:p>
              </table:table-cell>
            </table:table-row>
            <table:table-row>
              <table:table-cell office:value-type="string">
                <text:p>1858</text:p>
              </table:table-cell>
              <table:table-cell office:value-type="float" office:value="531.29345703125">
                <text:p>531.29345703125</text:p>
              </table:table-cell>
              <table:table-cell office:value-type="float" office:value="0.001154994">
                <text:p>0.001154994</text:p>
              </table:table-cell>
            </table:table-row>
            <table:table-row>
              <table:table-cell office:value-type="string">
                <text:p>1859</text:p>
              </table:table-cell>
              <table:table-cell office:value-type="float" office:value="531.410705566406">
                <text:p>531.410705566406</text:p>
              </table:table-cell>
              <table:table-cell office:value-type="float" office:value="0.002255753">
                <text:p>0.002255753</text:p>
              </table:table-cell>
            </table:table-row>
            <table:table-row>
              <table:table-cell office:value-type="string">
                <text:p>1860</text:p>
              </table:table-cell>
              <table:table-cell office:value-type="float" office:value="531.527893066406">
                <text:p>531.527893066406</text:p>
              </table:table-cell>
              <table:table-cell office:value-type="float" office:value="-0.003488387">
                <text:p>-0.003488387</text:p>
              </table:table-cell>
            </table:table-row>
            <table:table-row>
              <table:table-cell office:value-type="string">
                <text:p>1861</text:p>
              </table:table-cell>
              <table:table-cell office:value-type="float" office:value="531.645141601563">
                <text:p>531.645141601563</text:p>
              </table:table-cell>
              <table:table-cell office:value-type="float" office:value="-0.002067964">
                <text:p>-0.002067964</text:p>
              </table:table-cell>
            </table:table-row>
            <table:table-row>
              <table:table-cell office:value-type="string">
                <text:p>1862</text:p>
              </table:table-cell>
              <table:table-cell office:value-type="float" office:value="531.762329101563">
                <text:p>531.762329101563</text:p>
              </table:table-cell>
              <table:table-cell office:value-type="float" office:value="-0.0007837025">
                <text:p>-0.0007837025</text:p>
              </table:table-cell>
            </table:table-row>
            <table:table-row>
              <table:table-cell office:value-type="string">
                <text:p>1863</text:p>
              </table:table-cell>
              <table:table-cell office:value-type="float" office:value="531.879577636719">
                <text:p>531.879577636719</text:p>
              </table:table-cell>
              <table:table-cell office:value-type="float" office:value="-0.004240847">
                <text:p>-0.004240847</text:p>
              </table:table-cell>
            </table:table-row>
            <table:table-row>
              <table:table-cell office:value-type="string">
                <text:p>1864</text:p>
              </table:table-cell>
              <table:table-cell office:value-type="float" office:value="531.996826171875">
                <text:p>531.996826171875</text:p>
              </table:table-cell>
              <table:table-cell office:value-type="float" office:value="0.003570211">
                <text:p>0.003570211</text:p>
              </table:table-cell>
            </table:table-row>
            <table:table-row>
              <table:table-cell office:value-type="string">
                <text:p>1865</text:p>
              </table:table-cell>
              <table:table-cell office:value-type="float" office:value="532.114074707031">
                <text:p>532.114074707031</text:p>
              </table:table-cell>
              <table:table-cell office:value-type="float" office:value="0.02403075">
                <text:p>0.02403075</text:p>
              </table:table-cell>
            </table:table-row>
            <table:table-row>
              <table:table-cell office:value-type="string">
                <text:p>1866</text:p>
              </table:table-cell>
              <table:table-cell office:value-type="float" office:value="532.231323242188">
                <text:p>532.231323242188</text:p>
              </table:table-cell>
              <table:table-cell office:value-type="float" office:value="0.003488377">
                <text:p>0.003488377</text:p>
              </table:table-cell>
            </table:table-row>
            <table:table-row>
              <table:table-cell office:value-type="string">
                <text:p>1867</text:p>
              </table:table-cell>
              <table:table-cell office:value-type="float" office:value="532.348510742188">
                <text:p>532.348510742188</text:p>
              </table:table-cell>
              <table:table-cell office:value-type="float" office:value="0.01619132">
                <text:p>0.01619132</text:p>
              </table:table-cell>
            </table:table-row>
            <table:table-row>
              <table:table-cell office:value-type="string">
                <text:p>1868</text:p>
              </table:table-cell>
              <table:table-cell office:value-type="float" office:value="532.465759277344">
                <text:p>532.465759277344</text:p>
              </table:table-cell>
              <table:table-cell office:value-type="float" office:value="-0.005788868">
                <text:p>-0.005788868</text:p>
              </table:table-cell>
            </table:table-row>
            <table:table-row>
              <table:table-cell office:value-type="string">
                <text:p>1869</text:p>
              </table:table-cell>
              <table:table-cell office:value-type="float" office:value="532.583068847656">
                <text:p>532.583068847656</text:p>
              </table:table-cell>
              <table:table-cell office:value-type="float" office:value="-0.001924373">
                <text:p>-0.001924373</text:p>
              </table:table-cell>
            </table:table-row>
            <table:table-row>
              <table:table-cell office:value-type="string">
                <text:p>1870</text:p>
              </table:table-cell>
              <table:table-cell office:value-type="float" office:value="532.700317382813">
                <text:p>532.700317382813</text:p>
              </table:table-cell>
              <table:table-cell office:value-type="float" office:value="0.0004363689">
                <text:p>0.0004363689</text:p>
              </table:table-cell>
            </table:table-row>
            <table:table-row>
              <table:table-cell office:value-type="string">
                <text:p>1871</text:p>
              </table:table-cell>
              <table:table-cell office:value-type="float" office:value="532.817565917969">
                <text:p>532.817565917969</text:p>
              </table:table-cell>
              <table:table-cell office:value-type="float" office:value="-0.008970653">
                <text:p>-0.008970653</text:p>
              </table:table-cell>
            </table:table-row>
            <table:table-row>
              <table:table-cell office:value-type="string">
                <text:p>1872</text:p>
              </table:table-cell>
              <table:table-cell office:value-type="float" office:value="532.934814453125">
                <text:p>532.934814453125</text:p>
              </table:table-cell>
              <table:table-cell office:value-type="float" office:value="0.007106606">
                <text:p>0.007106606</text:p>
              </table:table-cell>
            </table:table-row>
            <table:table-row>
              <table:table-cell office:value-type="string">
                <text:p>1873</text:p>
              </table:table-cell>
              <table:table-cell office:value-type="float" office:value="533.052062988281">
                <text:p>533.052062988281</text:p>
              </table:table-cell>
              <table:table-cell office:value-type="float" office:value="-0.003898226">
                <text:p>-0.003898226</text:p>
              </table:table-cell>
            </table:table-row>
            <table:table-row>
              <table:table-cell office:value-type="string">
                <text:p>1874</text:p>
              </table:table-cell>
              <table:table-cell office:value-type="float" office:value="533.169372558594">
                <text:p>533.169372558594</text:p>
              </table:table-cell>
              <table:table-cell office:value-type="float" office:value="-0.005085732">
                <text:p>-0.005085732</text:p>
              </table:table-cell>
            </table:table-row>
            <table:table-row>
              <table:table-cell office:value-type="string">
                <text:p>1875</text:p>
              </table:table-cell>
              <table:table-cell office:value-type="float" office:value="533.28662109375">
                <text:p>533.28662109375</text:p>
              </table:table-cell>
              <table:table-cell office:value-type="float" office:value="0.02157227">
                <text:p>0.02157227</text:p>
              </table:table-cell>
            </table:table-row>
            <table:table-row>
              <table:table-cell office:value-type="string">
                <text:p>1876</text:p>
              </table:table-cell>
              <table:table-cell office:value-type="float" office:value="533.403869628906">
                <text:p>533.403869628906</text:p>
              </table:table-cell>
              <table:table-cell office:value-type="float" office:value="-0.0002339197">
                <text:p>-0.0002339197</text:p>
              </table:table-cell>
            </table:table-row>
            <table:table-row>
              <table:table-cell office:value-type="string">
                <text:p>1877</text:p>
              </table:table-cell>
              <table:table-cell office:value-type="float" office:value="533.521179199219">
                <text:p>533.521179199219</text:p>
              </table:table-cell>
              <table:table-cell office:value-type="float" office:value="0.007066214">
                <text:p>0.007066214</text:p>
              </table:table-cell>
            </table:table-row>
            <table:table-row>
              <table:table-cell office:value-type="string">
                <text:p>1878</text:p>
              </table:table-cell>
              <table:table-cell office:value-type="float" office:value="533.638427734375">
                <text:p>533.638427734375</text:p>
              </table:table-cell>
              <table:table-cell office:value-type="float" office:value="0.004239799">
                <text:p>0.004239799</text:p>
              </table:table-cell>
            </table:table-row>
            <table:table-row>
              <table:table-cell office:value-type="string">
                <text:p>1879</text:p>
              </table:table-cell>
              <table:table-cell office:value-type="float" office:value="533.755737304688">
                <text:p>533.755737304688</text:p>
              </table:table-cell>
              <table:table-cell office:value-type="float" office:value="-0.008001451">
                <text:p>-0.008001451</text:p>
              </table:table-cell>
            </table:table-row>
            <table:table-row>
              <table:table-cell office:value-type="string">
                <text:p>1880</text:p>
              </table:table-cell>
              <table:table-cell office:value-type="float" office:value="533.873046875">
                <text:p>533.873046875</text:p>
              </table:table-cell>
              <table:table-cell office:value-type="float" office:value="0.01160717">
                <text:p>0.01160717</text:p>
              </table:table-cell>
            </table:table-row>
            <table:table-row>
              <table:table-cell office:value-type="string">
                <text:p>1881</text:p>
              </table:table-cell>
              <table:table-cell office:value-type="float" office:value="533.990295410156">
                <text:p>533.990295410156</text:p>
              </table:table-cell>
              <table:table-cell office:value-type="float" office:value="0.007779868">
                <text:p>0.007779868</text:p>
              </table:table-cell>
            </table:table-row>
            <table:table-row>
              <table:table-cell office:value-type="string">
                <text:p>1882</text:p>
              </table:table-cell>
              <table:table-cell office:value-type="float" office:value="534.107604980469">
                <text:p>534.107604980469</text:p>
              </table:table-cell>
              <table:table-cell office:value-type="float" office:value="-0.0004195271">
                <text:p>-0.0004195271</text:p>
              </table:table-cell>
            </table:table-row>
            <table:table-row>
              <table:table-cell office:value-type="string">
                <text:p>1883</text:p>
              </table:table-cell>
              <table:table-cell office:value-type="float" office:value="534.224914550781">
                <text:p>534.224914550781</text:p>
              </table:table-cell>
              <table:table-cell office:value-type="float" office:value="0.005273935">
                <text:p>0.005273935</text:p>
              </table:table-cell>
            </table:table-row>
            <table:table-row>
              <table:table-cell office:value-type="string">
                <text:p>1884</text:p>
              </table:table-cell>
              <table:table-cell office:value-type="float" office:value="534.342224121094">
                <text:p>534.342224121094</text:p>
              </table:table-cell>
              <table:table-cell office:value-type="float" office:value="-0.004165124">
                <text:p>-0.004165124</text:p>
              </table:table-cell>
            </table:table-row>
            <table:table-row>
              <table:table-cell office:value-type="string">
                <text:p>1885</text:p>
              </table:table-cell>
              <table:table-cell office:value-type="float" office:value="534.459533691406">
                <text:p>534.459533691406</text:p>
              </table:table-cell>
              <table:table-cell office:value-type="float" office:value="-0.003391111">
                <text:p>-0.003391111</text:p>
              </table:table-cell>
            </table:table-row>
            <table:table-row>
              <table:table-cell office:value-type="string">
                <text:p>1886</text:p>
              </table:table-cell>
              <table:table-cell office:value-type="float" office:value="534.576843261719">
                <text:p>534.576843261719</text:p>
              </table:table-cell>
              <table:table-cell office:value-type="float" office:value="0.006659043">
                <text:p>0.006659043</text:p>
              </table:table-cell>
            </table:table-row>
            <table:table-row>
              <table:table-cell office:value-type="string">
                <text:p>1887</text:p>
              </table:table-cell>
              <table:table-cell office:value-type="float" office:value="534.694152832031">
                <text:p>534.694152832031</text:p>
              </table:table-cell>
              <table:table-cell office:value-type="float" office:value="-0.008057748">
                <text:p>-0.008057748</text:p>
              </table:table-cell>
            </table:table-row>
            <table:table-row>
              <table:table-cell office:value-type="string">
                <text:p>1888</text:p>
              </table:table-cell>
              <table:table-cell office:value-type="float" office:value="534.811462402344">
                <text:p>534.811462402344</text:p>
              </table:table-cell>
              <table:table-cell office:value-type="float" office:value="-0.000620102">
                <text:p>-0.000620102</text:p>
              </table:table-cell>
            </table:table-row>
            <table:table-row>
              <table:table-cell office:value-type="string">
                <text:p>1889</text:p>
              </table:table-cell>
              <table:table-cell office:value-type="float" office:value="534.928771972656">
                <text:p>534.928771972656</text:p>
              </table:table-cell>
              <table:table-cell office:value-type="float" office:value="-0.004785897">
                <text:p>-0.004785897</text:p>
              </table:table-cell>
            </table:table-row>
            <table:table-row>
              <table:table-cell office:value-type="string">
                <text:p>1890</text:p>
              </table:table-cell>
              <table:table-cell office:value-type="float" office:value="535.046081542969">
                <text:p>535.046081542969</text:p>
              </table:table-cell>
              <table:table-cell office:value-type="float" office:value="-0.007339288">
                <text:p>-0.007339288</text:p>
              </table:table-cell>
            </table:table-row>
            <table:table-row>
              <table:table-cell office:value-type="string">
                <text:p>1891</text:p>
              </table:table-cell>
              <table:table-cell office:value-type="float" office:value="535.163452148438">
                <text:p>535.163452148438</text:p>
              </table:table-cell>
              <table:table-cell office:value-type="float" office:value="0.004342816">
                <text:p>0.004342816</text:p>
              </table:table-cell>
            </table:table-row>
            <table:table-row>
              <table:table-cell office:value-type="string">
                <text:p>1892</text:p>
              </table:table-cell>
              <table:table-cell office:value-type="float" office:value="535.28076171875">
                <text:p>535.28076171875</text:p>
              </table:table-cell>
              <table:table-cell office:value-type="float" office:value="0.0006046427">
                <text:p>0.0006046427</text:p>
              </table:table-cell>
            </table:table-row>
            <table:table-row>
              <table:table-cell office:value-type="string">
                <text:p>1893</text:p>
              </table:table-cell>
              <table:table-cell office:value-type="float" office:value="535.398071289063">
                <text:p>535.398071289063</text:p>
              </table:table-cell>
              <table:table-cell office:value-type="float" office:value="0.001091011">
                <text:p>0.001091011</text:p>
              </table:table-cell>
            </table:table-row>
            <table:table-row>
              <table:table-cell office:value-type="string">
                <text:p>1894</text:p>
              </table:table-cell>
              <table:table-cell office:value-type="float" office:value="535.515441894531">
                <text:p>535.515441894531</text:p>
              </table:table-cell>
              <table:table-cell office:value-type="float" office:value="-0.00898036">
                <text:p>-0.00898036</text:p>
              </table:table-cell>
            </table:table-row>
            <table:table-row>
              <table:table-cell office:value-type="string">
                <text:p>1895</text:p>
              </table:table-cell>
              <table:table-cell office:value-type="float" office:value="535.632751464844">
                <text:p>535.632751464844</text:p>
              </table:table-cell>
              <table:table-cell office:value-type="float" office:value="-0.004589859">
                <text:p>-0.004589859</text:p>
              </table:table-cell>
            </table:table-row>
            <table:table-row>
              <table:table-cell office:value-type="string">
                <text:p>1896</text:p>
              </table:table-cell>
              <table:table-cell office:value-type="float" office:value="535.750122070313">
                <text:p>535.750122070313</text:p>
              </table:table-cell>
              <table:table-cell office:value-type="float" office:value="-0.002644232">
                <text:p>-0.002644232</text:p>
              </table:table-cell>
            </table:table-row>
            <table:table-row>
              <table:table-cell office:value-type="string">
                <text:p>1897</text:p>
              </table:table-cell>
              <table:table-cell office:value-type="float" office:value="535.867431640625">
                <text:p>535.867431640625</text:p>
              </table:table-cell>
              <table:table-cell office:value-type="float" office:value="0.004369848">
                <text:p>0.004369848</text:p>
              </table:table-cell>
            </table:table-row>
            <table:table-row>
              <table:table-cell office:value-type="string">
                <text:p>1898</text:p>
              </table:table-cell>
              <table:table-cell office:value-type="float" office:value="535.984802246094">
                <text:p>535.984802246094</text:p>
              </table:table-cell>
              <table:table-cell office:value-type="float" office:value="0.008386752">
                <text:p>0.008386752</text:p>
              </table:table-cell>
            </table:table-row>
            <table:table-row>
              <table:table-cell office:value-type="string">
                <text:p>1899</text:p>
              </table:table-cell>
              <table:table-cell office:value-type="float" office:value="536.102172851563">
                <text:p>536.102172851563</text:p>
              </table:table-cell>
              <table:table-cell office:value-type="float" office:value="0.006741751">
                <text:p>0.006741751</text:p>
              </table:table-cell>
            </table:table-row>
            <table:table-row>
              <table:table-cell office:value-type="string">
                <text:p>1900</text:p>
              </table:table-cell>
              <table:table-cell office:value-type="float" office:value="536.219543457031">
                <text:p>536.219543457031</text:p>
              </table:table-cell>
              <table:table-cell office:value-type="float" office:value="-0.001039685">
                <text:p>-0.001039685</text:p>
              </table:table-cell>
            </table:table-row>
            <table:table-row>
              <table:table-cell office:value-type="string">
                <text:p>1901</text:p>
              </table:table-cell>
              <table:table-cell office:value-type="float" office:value="536.336853027344">
                <text:p>536.336853027344</text:p>
              </table:table-cell>
              <table:table-cell office:value-type="float" office:value="-0.003140954">
                <text:p>-0.003140954</text:p>
              </table:table-cell>
            </table:table-row>
            <table:table-row>
              <table:table-cell office:value-type="string">
                <text:p>1902</text:p>
              </table:table-cell>
              <table:table-cell office:value-type="float" office:value="536.454223632813">
                <text:p>536.454223632813</text:p>
              </table:table-cell>
              <table:table-cell office:value-type="float" office:value="-0.01179466">
                <text:p>-0.01179466</text:p>
              </table:table-cell>
            </table:table-row>
            <table:table-row>
              <table:table-cell office:value-type="string">
                <text:p>1903</text:p>
              </table:table-cell>
              <table:table-cell office:value-type="float" office:value="536.571594238281">
                <text:p>536.571594238281</text:p>
              </table:table-cell>
              <table:table-cell office:value-type="float" office:value="-0.008449628">
                <text:p>-0.008449628</text:p>
              </table:table-cell>
            </table:table-row>
            <table:table-row>
              <table:table-cell office:value-type="string">
                <text:p>1904</text:p>
              </table:table-cell>
              <table:table-cell office:value-type="float" office:value="536.68896484375">
                <text:p>536.68896484375</text:p>
              </table:table-cell>
              <table:table-cell office:value-type="float" office:value="-0.002884774">
                <text:p>-0.002884774</text:p>
              </table:table-cell>
            </table:table-row>
            <table:table-row>
              <table:table-cell office:value-type="string">
                <text:p>1905</text:p>
              </table:table-cell>
              <table:table-cell office:value-type="float" office:value="536.806335449219">
                <text:p>536.806335449219</text:p>
              </table:table-cell>
              <table:table-cell office:value-type="float" office:value="0.0005086394">
                <text:p>0.0005086394</text:p>
              </table:table-cell>
            </table:table-row>
            <table:table-row>
              <table:table-cell office:value-type="string">
                <text:p>1906</text:p>
              </table:table-cell>
              <table:table-cell office:value-type="float" office:value="536.923706054688">
                <text:p>536.923706054688</text:p>
              </table:table-cell>
              <table:table-cell office:value-type="float" office:value="0.01881808">
                <text:p>0.01881808</text:p>
              </table:table-cell>
            </table:table-row>
            <table:table-row>
              <table:table-cell office:value-type="string">
                <text:p>1907</text:p>
              </table:table-cell>
              <table:table-cell office:value-type="float" office:value="537.041076660156">
                <text:p>537.041076660156</text:p>
              </table:table-cell>
              <table:table-cell office:value-type="float" office:value="-0.001686499">
                <text:p>-0.001686499</text:p>
              </table:table-cell>
            </table:table-row>
            <table:table-row>
              <table:table-cell office:value-type="string">
                <text:p>1908</text:p>
              </table:table-cell>
              <table:table-cell office:value-type="float" office:value="537.158508300781">
                <text:p>537.158508300781</text:p>
              </table:table-cell>
              <table:table-cell office:value-type="float" office:value="0.001754625">
                <text:p>0.001754625</text:p>
              </table:table-cell>
            </table:table-row>
            <table:table-row>
              <table:table-cell office:value-type="string">
                <text:p>1909</text:p>
              </table:table-cell>
              <table:table-cell office:value-type="float" office:value="537.27587890625">
                <text:p>537.27587890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0</text:p>
              </table:table-cell>
              <table:table-cell office:value-type="float" office:value="537.393249511719">
                <text:p>537.393249511719</text:p>
              </table:table-cell>
              <table:table-cell office:value-type="float" office:value="0.001956253">
                <text:p>0.001956253</text:p>
              </table:table-cell>
            </table:table-row>
            <table:table-row>
              <table:table-cell office:value-type="string">
                <text:p>1911</text:p>
              </table:table-cell>
              <table:table-cell office:value-type="float" office:value="537.510681152344">
                <text:p>537.510681152344</text:p>
              </table:table-cell>
              <table:table-cell office:value-type="float" office:value="-0.004124296">
                <text:p>-0.004124296</text:p>
              </table:table-cell>
            </table:table-row>
            <table:table-row>
              <table:table-cell office:value-type="string">
                <text:p>1912</text:p>
              </table:table-cell>
              <table:table-cell office:value-type="float" office:value="537.628051757813">
                <text:p>537.628051757813</text:p>
              </table:table-cell>
              <table:table-cell office:value-type="float" office:value="0.002217921">
                <text:p>0.002217921</text:p>
              </table:table-cell>
            </table:table-row>
            <table:table-row>
              <table:table-cell office:value-type="string">
                <text:p>1913</text:p>
              </table:table-cell>
              <table:table-cell office:value-type="float" office:value="537.745483398438">
                <text:p>537.745483398438</text:p>
              </table:table-cell>
              <table:table-cell office:value-type="float" office:value="-0.002081987">
                <text:p>-0.002081987</text:p>
              </table:table-cell>
            </table:table-row>
            <table:table-row>
              <table:table-cell office:value-type="string">
                <text:p>1914</text:p>
              </table:table-cell>
              <table:table-cell office:value-type="float" office:value="537.862854003906">
                <text:p>537.862854003906</text:p>
              </table:table-cell>
              <table:table-cell office:value-type="float" office:value="0.0004608184">
                <text:p>0.0004608184</text:p>
              </table:table-cell>
            </table:table-row>
            <table:table-row>
              <table:table-cell office:value-type="string">
                <text:p>1915</text:p>
              </table:table-cell>
              <table:table-cell office:value-type="float" office:value="537.980285644531">
                <text:p>537.980285644531</text:p>
              </table:table-cell>
              <table:table-cell office:value-type="float" office:value="-0.01257832">
                <text:p>-0.01257832</text:p>
              </table:table-cell>
            </table:table-row>
            <table:table-row>
              <table:table-cell office:value-type="string">
                <text:p>1916</text:p>
              </table:table-cell>
              <table:table-cell office:value-type="float" office:value="538.09765625">
                <text:p>538.09765625</text:p>
              </table:table-cell>
              <table:table-cell office:value-type="float" office:value="0.03035254">
                <text:p>0.03035254</text:p>
              </table:table-cell>
            </table:table-row>
            <table:table-row>
              <table:table-cell office:value-type="string">
                <text:p>1917</text:p>
              </table:table-cell>
              <table:table-cell office:value-type="float" office:value="538.215087890625">
                <text:p>538.215087890625</text:p>
              </table:table-cell>
              <table:table-cell office:value-type="float" office:value="0.001491152">
                <text:p>0.001491152</text:p>
              </table:table-cell>
            </table:table-row>
            <table:table-row>
              <table:table-cell office:value-type="string">
                <text:p>1918</text:p>
              </table:table-cell>
              <table:table-cell office:value-type="float" office:value="538.33251953125">
                <text:p>538.33251953125</text:p>
              </table:table-cell>
              <table:table-cell office:value-type="float" office:value="0.02512585">
                <text:p>0.02512585</text:p>
              </table:table-cell>
            </table:table-row>
            <table:table-row>
              <table:table-cell office:value-type="string">
                <text:p>1919</text:p>
              </table:table-cell>
              <table:table-cell office:value-type="float" office:value="538.449890136719">
                <text:p>538.449890136719</text:p>
              </table:table-cell>
              <table:table-cell office:value-type="float" office:value="0.0003119717">
                <text:p>0.0003119717</text:p>
              </table:table-cell>
            </table:table-row>
            <table:table-row>
              <table:table-cell office:value-type="string">
                <text:p>1920</text:p>
              </table:table-cell>
              <table:table-cell office:value-type="float" office:value="538.567321777344">
                <text:p>538.567321777344</text:p>
              </table:table-cell>
              <table:table-cell office:value-type="float" office:value="0.02919534">
                <text:p>0.02919534</text:p>
              </table:table-cell>
            </table:table-row>
            <table:table-row>
              <table:table-cell office:value-type="string">
                <text:p>1921</text:p>
              </table:table-cell>
              <table:table-cell office:value-type="float" office:value="538.684753417969">
                <text:p>538.684753417969</text:p>
              </table:table-cell>
              <table:table-cell office:value-type="float" office:value="-0.0007160752">
                <text:p>-0.0007160752</text:p>
              </table:table-cell>
            </table:table-row>
            <table:table-row>
              <table:table-cell office:value-type="string">
                <text:p>1922</text:p>
              </table:table-cell>
              <table:table-cell office:value-type="float" office:value="538.802185058594">
                <text:p>538.802185058594</text:p>
              </table:table-cell>
              <table:table-cell office:value-type="float" office:value="0.004087088">
                <text:p>0.004087088</text:p>
              </table:table-cell>
            </table:table-row>
            <table:table-row>
              <table:table-cell office:value-type="string">
                <text:p>1923</text:p>
              </table:table-cell>
              <table:table-cell office:value-type="float" office:value="538.919616699219">
                <text:p>538.919616699219</text:p>
              </table:table-cell>
              <table:table-cell office:value-type="float" office:value="-0.009170066">
                <text:p>-0.009170066</text:p>
              </table:table-cell>
            </table:table-row>
            <table:table-row>
              <table:table-cell office:value-type="string">
                <text:p>1924</text:p>
              </table:table-cell>
              <table:table-cell office:value-type="float" office:value="539.037048339844">
                <text:p>539.037048339844</text:p>
              </table:table-cell>
              <table:table-cell office:value-type="float" office:value="0.00777232">
                <text:p>0.00777232</text:p>
              </table:table-cell>
            </table:table-row>
            <table:table-row>
              <table:table-cell office:value-type="string">
                <text:p>1925</text:p>
              </table:table-cell>
              <table:table-cell office:value-type="float" office:value="539.154479980469">
                <text:p>539.154479980469</text:p>
              </table:table-cell>
              <table:table-cell office:value-type="float" office:value="0.001313031">
                <text:p>0.001313031</text:p>
              </table:table-cell>
            </table:table-row>
            <table:table-row>
              <table:table-cell office:value-type="string">
                <text:p>1926</text:p>
              </table:table-cell>
              <table:table-cell office:value-type="float" office:value="539.27197265625">
                <text:p>539.27197265625</text:p>
              </table:table-cell>
              <table:table-cell office:value-type="float" office:value="-0.008039316">
                <text:p>-0.008039316</text:p>
              </table:table-cell>
            </table:table-row>
            <table:table-row>
              <table:table-cell office:value-type="string">
                <text:p>1927</text:p>
              </table:table-cell>
              <table:table-cell office:value-type="float" office:value="539.389404296875">
                <text:p>539.389404296875</text:p>
              </table:table-cell>
              <table:table-cell office:value-type="float" office:value="0.0004678315">
                <text:p>0.0004678315</text:p>
              </table:table-cell>
            </table:table-row>
            <table:table-row>
              <table:table-cell office:value-type="string">
                <text:p>1928</text:p>
              </table:table-cell>
              <table:table-cell office:value-type="float" office:value="539.5068359375">
                <text:p>539.5068359375</text:p>
              </table:table-cell>
              <table:table-cell office:value-type="float" office:value="-0.001687358">
                <text:p>-0.001687358</text:p>
              </table:table-cell>
            </table:table-row>
            <table:table-row>
              <table:table-cell office:value-type="string">
                <text:p>1929</text:p>
              </table:table-cell>
              <table:table-cell office:value-type="float" office:value="539.624267578125">
                <text:p>539.624267578125</text:p>
              </table:table-cell>
              <table:table-cell office:value-type="float" office:value="-0.001839656">
                <text:p>-0.001839656</text:p>
              </table:table-cell>
            </table:table-row>
            <table:table-row>
              <table:table-cell office:value-type="string">
                <text:p>1930</text:p>
              </table:table-cell>
              <table:table-cell office:value-type="float" office:value="539.741760253906">
                <text:p>539.741760253906</text:p>
              </table:table-cell>
              <table:table-cell office:value-type="float" office:value="-0.003330146">
                <text:p>-0.003330146</text:p>
              </table:table-cell>
            </table:table-row>
            <table:table-row>
              <table:table-cell office:value-type="string">
                <text:p>1931</text:p>
              </table:table-cell>
              <table:table-cell office:value-type="float" office:value="539.859191894531">
                <text:p>539.859191894531</text:p>
              </table:table-cell>
              <table:table-cell office:value-type="float" office:value="-0.01100614">
                <text:p>-0.01100614</text:p>
              </table:table-cell>
            </table:table-row>
            <table:table-row>
              <table:table-cell office:value-type="string">
                <text:p>1932</text:p>
              </table:table-cell>
              <table:table-cell office:value-type="float" office:value="539.976684570313">
                <text:p>539.976684570313</text:p>
              </table:table-cell>
              <table:table-cell office:value-type="float" office:value="0.005256596">
                <text:p>0.005256596</text:p>
              </table:table-cell>
            </table:table-row>
            <table:table-row>
              <table:table-cell office:value-type="string">
                <text:p>1933</text:p>
              </table:table-cell>
              <table:table-cell office:value-type="float" office:value="540.094116210938">
                <text:p>540.094116210938</text:p>
              </table:table-cell>
              <table:table-cell office:value-type="float" office:value="-0.008464409">
                <text:p>-0.008464409</text:p>
              </table:table-cell>
            </table:table-row>
            <table:table-row>
              <table:table-cell office:value-type="string">
                <text:p>1934</text:p>
              </table:table-cell>
              <table:table-cell office:value-type="float" office:value="540.211608886719">
                <text:p>540.211608886719</text:p>
              </table:table-cell>
              <table:table-cell office:value-type="float" office:value="-0.008210744">
                <text:p>-0.008210744</text:p>
              </table:table-cell>
            </table:table-row>
            <table:table-row>
              <table:table-cell office:value-type="string">
                <text:p>1935</text:p>
              </table:table-cell>
              <table:table-cell office:value-type="float" office:value="540.3291015625">
                <text:p>540.3291015625</text:p>
              </table:table-cell>
              <table:table-cell office:value-type="float" office:value="-0.002908206">
                <text:p>-0.002908206</text:p>
              </table:table-cell>
            </table:table-row>
            <table:table-row>
              <table:table-cell office:value-type="string">
                <text:p>1936</text:p>
              </table:table-cell>
              <table:table-cell office:value-type="float" office:value="540.446533203125">
                <text:p>540.446533203125</text:p>
              </table:table-cell>
              <table:table-cell office:value-type="float" office:value="-0.004194406">
                <text:p>-0.004194406</text:p>
              </table:table-cell>
            </table:table-row>
            <table:table-row>
              <table:table-cell office:value-type="string">
                <text:p>1937</text:p>
              </table:table-cell>
              <table:table-cell office:value-type="float" office:value="540.564025878906">
                <text:p>540.564025878906</text:p>
              </table:table-cell>
              <table:table-cell office:value-type="float" office:value="0.01133051">
                <text:p>0.01133051</text:p>
              </table:table-cell>
            </table:table-row>
            <table:table-row>
              <table:table-cell office:value-type="string">
                <text:p>1938</text:p>
              </table:table-cell>
              <table:table-cell office:value-type="float" office:value="540.681518554688">
                <text:p>540.681518554688</text:p>
              </table:table-cell>
              <table:table-cell office:value-type="float" office:value="-0.003542278">
                <text:p>-0.003542278</text:p>
              </table:table-cell>
            </table:table-row>
            <table:table-row>
              <table:table-cell office:value-type="string">
                <text:p>1939</text:p>
              </table:table-cell>
              <table:table-cell office:value-type="float" office:value="540.799011230469">
                <text:p>540.799011230469</text:p>
              </table:table-cell>
              <table:table-cell office:value-type="float" office:value="-0.004952319">
                <text:p>-0.004952319</text:p>
              </table:table-cell>
            </table:table-row>
            <table:table-row>
              <table:table-cell office:value-type="string">
                <text:p>1940</text:p>
              </table:table-cell>
              <table:table-cell office:value-type="float" office:value="540.91650390625">
                <text:p>540.91650390625</text:p>
              </table:table-cell>
              <table:table-cell office:value-type="float" office:value="-0.008248225">
                <text:p>-0.008248225</text:p>
              </table:table-cell>
            </table:table-row>
            <table:table-row>
              <table:table-cell office:value-type="string">
                <text:p>1941</text:p>
              </table:table-cell>
              <table:table-cell office:value-type="float" office:value="541.033996582031">
                <text:p>541.033996582031</text:p>
              </table:table-cell>
              <table:table-cell office:value-type="float" office:value="-0.001979192">
                <text:p>-0.001979192</text:p>
              </table:table-cell>
            </table:table-row>
            <table:table-row>
              <table:table-cell office:value-type="string">
                <text:p>1942</text:p>
              </table:table-cell>
              <table:table-cell office:value-type="float" office:value="541.151489257813">
                <text:p>541.151489257813</text:p>
              </table:table-cell>
              <table:table-cell office:value-type="float" office:value="0.001039853">
                <text:p>0.001039853</text:p>
              </table:table-cell>
            </table:table-row>
            <table:table-row>
              <table:table-cell office:value-type="string">
                <text:p>1943</text:p>
              </table:table-cell>
              <table:table-cell office:value-type="float" office:value="541.268981933594">
                <text:p>541.268981933594</text:p>
              </table:table-cell>
              <table:table-cell office:value-type="float" office:value="-0.004445449">
                <text:p>-0.004445449</text:p>
              </table:table-cell>
            </table:table-row>
            <table:table-row>
              <table:table-cell office:value-type="string">
                <text:p>1944</text:p>
              </table:table-cell>
              <table:table-cell office:value-type="float" office:value="541.386474609375">
                <text:p>541.386474609375</text:p>
              </table:table-cell>
              <table:table-cell office:value-type="float" office:value="0.007823025">
                <text:p>0.007823025</text:p>
              </table:table-cell>
            </table:table-row>
            <table:table-row>
              <table:table-cell office:value-type="string">
                <text:p>1945</text:p>
              </table:table-cell>
              <table:table-cell office:value-type="float" office:value="541.503967285156">
                <text:p>541.503967285156</text:p>
              </table:table-cell>
              <table:table-cell office:value-type="float" office:value="-0.002908199">
                <text:p>-0.002908199</text:p>
              </table:table-cell>
            </table:table-row>
            <table:table-row>
              <table:table-cell office:value-type="string">
                <text:p>1946</text:p>
              </table:table-cell>
              <table:table-cell office:value-type="float" office:value="541.621459960938">
                <text:p>541.621459960938</text:p>
              </table:table-cell>
              <table:table-cell office:value-type="float" office:value="0.0008043637">
                <text:p>0.0008043637</text:p>
              </table:table-cell>
            </table:table-row>
            <table:table-row>
              <table:table-cell office:value-type="string">
                <text:p>1947</text:p>
              </table:table-cell>
              <table:table-cell office:value-type="float" office:value="541.739013671875">
                <text:p>541.739013671875</text:p>
              </table:table-cell>
              <table:table-cell office:value-type="float" office:value="0.01260142">
                <text:p>0.01260142</text:p>
              </table:table-cell>
            </table:table-row>
            <table:table-row>
              <table:table-cell office:value-type="string">
                <text:p>1948</text:p>
              </table:table-cell>
              <table:table-cell office:value-type="float" office:value="541.856506347656">
                <text:p>541.856506347656</text:p>
              </table:table-cell>
              <table:table-cell office:value-type="float" office:value="-0.002150688">
                <text:p>-0.002150688</text:p>
              </table:table-cell>
            </table:table-row>
            <table:table-row>
              <table:table-cell office:value-type="string">
                <text:p>1949</text:p>
              </table:table-cell>
              <table:table-cell office:value-type="float" office:value="541.974060058594">
                <text:p>541.974060058594</text:p>
              </table:table-cell>
              <table:table-cell office:value-type="float" office:value="-0.01066645">
                <text:p>-0.01066645</text:p>
              </table:table-cell>
            </table:table-row>
            <table:table-row>
              <table:table-cell office:value-type="string">
                <text:p>1950</text:p>
              </table:table-cell>
              <table:table-cell office:value-type="float" office:value="542.091552734375">
                <text:p>542.091552734375</text:p>
              </table:table-cell>
              <table:table-cell office:value-type="float" office:value="0.002258209">
                <text:p>0.002258209</text:p>
              </table:table-cell>
            </table:table-row>
            <table:table-row>
              <table:table-cell office:value-type="string">
                <text:p>1951</text:p>
              </table:table-cell>
              <table:table-cell office:value-type="float" office:value="542.209106445313">
                <text:p>542.209106445313</text:p>
              </table:table-cell>
              <table:table-cell office:value-type="float" office:value="0.0009534104">
                <text:p>0.0009534104</text:p>
              </table:table-cell>
            </table:table-row>
            <table:table-row>
              <table:table-cell office:value-type="string">
                <text:p>1952</text:p>
              </table:table-cell>
              <table:table-cell office:value-type="float" office:value="542.326599121094">
                <text:p>542.326599121094</text:p>
              </table:table-cell>
              <table:table-cell office:value-type="float" office:value="-0.00654868">
                <text:p>-0.00654868</text:p>
              </table:table-cell>
            </table:table-row>
            <table:table-row>
              <table:table-cell office:value-type="string">
                <text:p>1953</text:p>
              </table:table-cell>
              <table:table-cell office:value-type="float" office:value="542.444152832031">
                <text:p>542.444152832031</text:p>
              </table:table-cell>
              <table:table-cell office:value-type="float" office:value="0.007426661">
                <text:p>0.007426661</text:p>
              </table:table-cell>
            </table:table-row>
            <table:table-row>
              <table:table-cell office:value-type="string">
                <text:p>1954</text:p>
              </table:table-cell>
              <table:table-cell office:value-type="float" office:value="542.561645507813">
                <text:p>542.561645507813</text:p>
              </table:table-cell>
              <table:table-cell office:value-type="float" office:value="-0.002888826">
                <text:p>-0.002888826</text:p>
              </table:table-cell>
            </table:table-row>
            <table:table-row>
              <table:table-cell office:value-type="string">
                <text:p>1955</text:p>
              </table:table-cell>
              <table:table-cell office:value-type="float" office:value="542.67919921875">
                <text:p>542.67919921875</text:p>
              </table:table-cell>
              <table:table-cell office:value-type="float" office:value="-0.007578868">
                <text:p>-0.007578868</text:p>
              </table:table-cell>
            </table:table-row>
            <table:table-row>
              <table:table-cell office:value-type="string">
                <text:p>1956</text:p>
              </table:table-cell>
              <table:table-cell office:value-type="float" office:value="542.796752929688">
                <text:p>542.796752929688</text:p>
              </table:table-cell>
              <table:table-cell office:value-type="float" office:value="0.006539811">
                <text:p>0.006539811</text:p>
              </table:table-cell>
            </table:table-row>
            <table:table-row>
              <table:table-cell office:value-type="string">
                <text:p>1957</text:p>
              </table:table-cell>
              <table:table-cell office:value-type="float" office:value="542.914306640625">
                <text:p>542.914306640625</text:p>
              </table:table-cell>
              <table:table-cell office:value-type="float" office:value="-0.003887531">
                <text:p>-0.003887531</text:p>
              </table:table-cell>
            </table:table-row>
            <table:table-row>
              <table:table-cell office:value-type="string">
                <text:p>1958</text:p>
              </table:table-cell>
              <table:table-cell office:value-type="float" office:value="543.031860351563">
                <text:p>543.031860351563</text:p>
              </table:table-cell>
              <table:table-cell office:value-type="float" office:value="0.004713628">
                <text:p>0.004713628</text:p>
              </table:table-cell>
            </table:table-row>
            <table:table-row>
              <table:table-cell office:value-type="string">
                <text:p>1959</text:p>
              </table:table-cell>
              <table:table-cell office:value-type="float" office:value="543.1494140625">
                <text:p>543.1494140625</text:p>
              </table:table-cell>
              <table:table-cell office:value-type="float" office:value="-0.01104689">
                <text:p>-0.01104689</text:p>
              </table:table-cell>
            </table:table-row>
            <table:table-row>
              <table:table-cell office:value-type="string">
                <text:p>1960</text:p>
              </table:table-cell>
              <table:table-cell office:value-type="float" office:value="543.266967773438">
                <text:p>543.266967773438</text:p>
              </table:table-cell>
              <table:table-cell office:value-type="float" office:value="0.001615093">
                <text:p>0.001615093</text:p>
              </table:table-cell>
            </table:table-row>
            <table:table-row>
              <table:table-cell office:value-type="string">
                <text:p>1961</text:p>
              </table:table-cell>
              <table:table-cell office:value-type="float" office:value="543.384521484375">
                <text:p>543.384521484375</text:p>
              </table:table-cell>
              <table:table-cell office:value-type="float" office:value="0.004412105">
                <text:p>0.004412105</text:p>
              </table:table-cell>
            </table:table-row>
            <table:table-row>
              <table:table-cell office:value-type="string">
                <text:p>1962</text:p>
              </table:table-cell>
              <table:table-cell office:value-type="float" office:value="543.502075195313">
                <text:p>543.502075195313</text:p>
              </table:table-cell>
              <table:table-cell office:value-type="float" office:value="-0.008517262">
                <text:p>-0.008517262</text:p>
              </table:table-cell>
            </table:table-row>
            <table:table-row>
              <table:table-cell office:value-type="string">
                <text:p>1963</text:p>
              </table:table-cell>
              <table:table-cell office:value-type="float" office:value="543.61962890625">
                <text:p>543.61962890625</text:p>
              </table:table-cell>
              <table:table-cell office:value-type="float" office:value="0.001053742">
                <text:p>0.001053742</text:p>
              </table:table-cell>
            </table:table-row>
            <table:table-row>
              <table:table-cell office:value-type="string">
                <text:p>1964</text:p>
              </table:table-cell>
              <table:table-cell office:value-type="float" office:value="543.737182617188">
                <text:p>543.737182617188</text:p>
              </table:table-cell>
              <table:table-cell office:value-type="float" office:value="-0.005214158">
                <text:p>-0.005214158</text:p>
              </table:table-cell>
            </table:table-row>
            <table:table-row>
              <table:table-cell office:value-type="string">
                <text:p>1965</text:p>
              </table:table-cell>
              <table:table-cell office:value-type="float" office:value="543.854736328125">
                <text:p>543.854736328125</text:p>
              </table:table-cell>
              <table:table-cell office:value-type="float" office:value="-0.004426581">
                <text:p>-0.004426581</text:p>
              </table:table-cell>
            </table:table-row>
            <table:table-row>
              <table:table-cell office:value-type="string">
                <text:p>1966</text:p>
              </table:table-cell>
              <table:table-cell office:value-type="float" office:value="543.972351074219">
                <text:p>543.972351074219</text:p>
              </table:table-cell>
              <table:table-cell office:value-type="float" office:value="0.0005934566">
                <text:p>0.0005934566</text:p>
              </table:table-cell>
            </table:table-row>
            <table:table-row>
              <table:table-cell office:value-type="string">
                <text:p>1967</text:p>
              </table:table-cell>
              <table:table-cell office:value-type="float" office:value="544.089904785156">
                <text:p>544.089904785156</text:p>
              </table:table-cell>
              <table:table-cell office:value-type="float" office:value="-0.003138325">
                <text:p>-0.003138325</text:p>
              </table:table-cell>
            </table:table-row>
            <table:table-row>
              <table:table-cell office:value-type="string">
                <text:p>1968</text:p>
              </table:table-cell>
              <table:table-cell office:value-type="float" office:value="544.207458496094">
                <text:p>544.2074584960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9</text:p>
              </table:table-cell>
              <table:table-cell office:value-type="float" office:value="544.325073242188">
                <text:p>544.325073242188</text:p>
              </table:table-cell>
              <table:table-cell office:value-type="float" office:value="0.005073783">
                <text:p>0.005073783</text:p>
              </table:table-cell>
            </table:table-row>
            <table:table-row>
              <table:table-cell office:value-type="string">
                <text:p>1970</text:p>
              </table:table-cell>
              <table:table-cell office:value-type="float" office:value="544.442626953125">
                <text:p>544.442626953125</text:p>
              </table:table-cell>
              <table:table-cell office:value-type="float" office:value="-0.007362306">
                <text:p>-0.007362306</text:p>
              </table:table-cell>
            </table:table-row>
            <table:table-row>
              <table:table-cell office:value-type="string">
                <text:p>1971</text:p>
              </table:table-cell>
              <table:table-cell office:value-type="float" office:value="544.560241699219">
                <text:p>544.560241699219</text:p>
              </table:table-cell>
              <table:table-cell office:value-type="float" office:value="0.001057547">
                <text:p>0.001057547</text:p>
              </table:table-cell>
            </table:table-row>
            <table:table-row>
              <table:table-cell office:value-type="string">
                <text:p>1972</text:p>
              </table:table-cell>
              <table:table-cell office:value-type="float" office:value="544.677856445313">
                <text:p>544.677856445313</text:p>
              </table:table-cell>
              <table:table-cell office:value-type="float" office:value="0.001796931">
                <text:p>0.001796931</text:p>
              </table:table-cell>
            </table:table-row>
            <table:table-row>
              <table:table-cell office:value-type="string">
                <text:p>1973</text:p>
              </table:table-cell>
              <table:table-cell office:value-type="float" office:value="544.79541015625">
                <text:p>544.79541015625</text:p>
              </table:table-cell>
              <table:table-cell office:value-type="float" office:value="0.002382005">
                <text:p>0.002382005</text:p>
              </table:table-cell>
            </table:table-row>
            <table:table-row>
              <table:table-cell office:value-type="string">
                <text:p>1974</text:p>
              </table:table-cell>
              <table:table-cell office:value-type="float" office:value="544.913024902344">
                <text:p>544.913024902344</text:p>
              </table:table-cell>
              <table:table-cell office:value-type="float" office:value="-0.009762536">
                <text:p>-0.009762536</text:p>
              </table:table-cell>
            </table:table-row>
            <table:table-row>
              <table:table-cell office:value-type="string">
                <text:p>1975</text:p>
              </table:table-cell>
              <table:table-cell office:value-type="float" office:value="545.030639648438">
                <text:p>545.030639648438</text:p>
              </table:table-cell>
              <table:table-cell office:value-type="float" office:value="-0.00156365">
                <text:p>-0.00156365</text:p>
              </table:table-cell>
            </table:table-row>
            <table:table-row>
              <table:table-cell office:value-type="string">
                <text:p>1976</text:p>
              </table:table-cell>
              <table:table-cell office:value-type="float" office:value="545.148254394531">
                <text:p>545.148254394531</text:p>
              </table:table-cell>
              <table:table-cell office:value-type="float" office:value="0.002198757">
                <text:p>0.002198757</text:p>
              </table:table-cell>
            </table:table-row>
            <table:table-row>
              <table:table-cell office:value-type="string">
                <text:p>1977</text:p>
              </table:table-cell>
              <table:table-cell office:value-type="float" office:value="545.265869140625">
                <text:p>545.265869140625</text:p>
              </table:table-cell>
              <table:table-cell office:value-type="float" office:value="0.0019053">
                <text:p>0.0019053</text:p>
              </table:table-cell>
            </table:table-row>
            <table:table-row>
              <table:table-cell office:value-type="string">
                <text:p>1978</text:p>
              </table:table-cell>
              <table:table-cell office:value-type="float" office:value="545.383483886719">
                <text:p>545.383483886719</text:p>
              </table:table-cell>
              <table:table-cell office:value-type="float" office:value="-0.01158407">
                <text:p>-0.01158407</text:p>
              </table:table-cell>
            </table:table-row>
            <table:table-row>
              <table:table-cell office:value-type="string">
                <text:p>1979</text:p>
              </table:table-cell>
              <table:table-cell office:value-type="float" office:value="545.501098632813">
                <text:p>545.501098632813</text:p>
              </table:table-cell>
              <table:table-cell office:value-type="float" office:value="-0.0003691343">
                <text:p>-0.0003691343</text:p>
              </table:table-cell>
            </table:table-row>
            <table:table-row>
              <table:table-cell office:value-type="string">
                <text:p>1980</text:p>
              </table:table-cell>
              <table:table-cell office:value-type="float" office:value="545.618713378906">
                <text:p>545.618713378906</text:p>
              </table:table-cell>
              <table:table-cell office:value-type="float" office:value="0.005172255">
                <text:p>0.005172255</text:p>
              </table:table-cell>
            </table:table-row>
            <table:table-row>
              <table:table-cell office:value-type="string">
                <text:p>1981</text:p>
              </table:table-cell>
              <table:table-cell office:value-type="float" office:value="545.736328125">
                <text:p>545.736328125</text:p>
              </table:table-cell>
              <table:table-cell office:value-type="float" office:value="0.00464814">
                <text:p>0.00464814</text:p>
              </table:table-cell>
            </table:table-row>
            <table:table-row>
              <table:table-cell office:value-type="string">
                <text:p>1982</text:p>
              </table:table-cell>
              <table:table-cell office:value-type="float" office:value="545.853942871094">
                <text:p>545.853942871094</text:p>
              </table:table-cell>
              <table:table-cell office:value-type="float" office:value="0.0006922116">
                <text:p>0.0006922116</text:p>
              </table:table-cell>
            </table:table-row>
            <table:table-row>
              <table:table-cell office:value-type="string">
                <text:p>1983</text:p>
              </table:table-cell>
              <table:table-cell office:value-type="float" office:value="545.971557617188">
                <text:p>545.971557617188</text:p>
              </table:table-cell>
              <table:table-cell office:value-type="float" office:value="0.009004407">
                <text:p>0.009004407</text:p>
              </table:table-cell>
            </table:table-row>
            <table:table-row>
              <table:table-cell office:value-type="string">
                <text:p>1984</text:p>
              </table:table-cell>
              <table:table-cell office:value-type="float" office:value="546.089172363281">
                <text:p>546.089172363281</text:p>
              </table:table-cell>
              <table:table-cell office:value-type="float" office:value="0.01096169">
                <text:p>0.01096169</text:p>
              </table:table-cell>
            </table:table-row>
            <table:table-row>
              <table:table-cell office:value-type="string">
                <text:p>1985</text:p>
              </table:table-cell>
              <table:table-cell office:value-type="float" office:value="546.206848144531">
                <text:p>546.206848144531</text:p>
              </table:table-cell>
              <table:table-cell office:value-type="float" office:value="0.0101845">
                <text:p>0.0101845</text:p>
              </table:table-cell>
            </table:table-row>
            <table:table-row>
              <table:table-cell office:value-type="string">
                <text:p>1986</text:p>
              </table:table-cell>
              <table:table-cell office:value-type="float" office:value="546.324462890625">
                <text:p>546.324462890625</text:p>
              </table:table-cell>
              <table:table-cell office:value-type="float" office:value="-0.005450864">
                <text:p>-0.005450864</text:p>
              </table:table-cell>
            </table:table-row>
            <table:table-row>
              <table:table-cell office:value-type="string">
                <text:p>1987</text:p>
              </table:table-cell>
              <table:table-cell office:value-type="float" office:value="546.442077636719">
                <text:p>546.442077636719</text:p>
              </table:table-cell>
              <table:table-cell office:value-type="float" office:value="0.003038811">
                <text:p>0.003038811</text:p>
              </table:table-cell>
            </table:table-row>
            <table:table-row>
              <table:table-cell office:value-type="string">
                <text:p>1988</text:p>
              </table:table-cell>
              <table:table-cell office:value-type="float" office:value="546.559753417969">
                <text:p>546.559753417969</text:p>
              </table:table-cell>
              <table:table-cell office:value-type="float" office:value="0.003258564">
                <text:p>0.003258564</text:p>
              </table:table-cell>
            </table:table-row>
            <table:table-row>
              <table:table-cell office:value-type="string">
                <text:p>1989</text:p>
              </table:table-cell>
              <table:table-cell office:value-type="float" office:value="546.677368164063">
                <text:p>546.6773681640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0</text:p>
              </table:table-cell>
              <table:table-cell office:value-type="float" office:value="546.795043945313">
                <text:p>546.795043945313</text:p>
              </table:table-cell>
              <table:table-cell office:value-type="float" office:value="0.001511021">
                <text:p>0.001511021</text:p>
              </table:table-cell>
            </table:table-row>
            <table:table-row>
              <table:table-cell office:value-type="string">
                <text:p>1991</text:p>
              </table:table-cell>
              <table:table-cell office:value-type="float" office:value="546.912719726563">
                <text:p>546.912719726563</text:p>
              </table:table-cell>
              <table:table-cell office:value-type="float" office:value="0.004240058">
                <text:p>0.004240058</text:p>
              </table:table-cell>
            </table:table-row>
            <table:table-row>
              <table:table-cell office:value-type="string">
                <text:p>1992</text:p>
              </table:table-cell>
              <table:table-cell office:value-type="float" office:value="547.030334472656">
                <text:p>547.030334472656</text:p>
              </table:table-cell>
              <table:table-cell office:value-type="float" office:value="-0.002624619">
                <text:p>-0.002624619</text:p>
              </table:table-cell>
            </table:table-row>
            <table:table-row>
              <table:table-cell office:value-type="string">
                <text:p>1993</text:p>
              </table:table-cell>
              <table:table-cell office:value-type="float" office:value="547.148010253906">
                <text:p>547.148010253906</text:p>
              </table:table-cell>
              <table:table-cell office:value-type="float" office:value="0.003463542">
                <text:p>0.003463542</text:p>
              </table:table-cell>
            </table:table-row>
            <table:table-row>
              <table:table-cell office:value-type="string">
                <text:p>1994</text:p>
              </table:table-cell>
              <table:table-cell office:value-type="float" office:value="547.265686035156">
                <text:p>547.265686035156</text:p>
              </table:table-cell>
              <table:table-cell office:value-type="float" office:value="0.003672205">
                <text:p>0.003672205</text:p>
              </table:table-cell>
            </table:table-row>
            <table:table-row>
              <table:table-cell office:value-type="string">
                <text:p>1995</text:p>
              </table:table-cell>
              <table:table-cell office:value-type="float" office:value="547.383361816406">
                <text:p>547.383361816406</text:p>
              </table:table-cell>
              <table:table-cell office:value-type="float" office:value="0.005404846">
                <text:p>0.005404846</text:p>
              </table:table-cell>
            </table:table-row>
            <table:table-row>
              <table:table-cell office:value-type="string">
                <text:p>1996</text:p>
              </table:table-cell>
              <table:table-cell office:value-type="float" office:value="547.5009765625">
                <text:p>547.5009765625</text:p>
              </table:table-cell>
              <table:table-cell office:value-type="float" office:value="-0.006101203">
                <text:p>-0.006101203</text:p>
              </table:table-cell>
            </table:table-row>
            <table:table-row>
              <table:table-cell office:value-type="string">
                <text:p>1997</text:p>
              </table:table-cell>
              <table:table-cell office:value-type="float" office:value="547.61865234375">
                <text:p>547.61865234375</text:p>
              </table:table-cell>
              <table:table-cell office:value-type="float" office:value="0.001985235">
                <text:p>0.001985235</text:p>
              </table:table-cell>
            </table:table-row>
            <table:table-row>
              <table:table-cell office:value-type="string">
                <text:p>1998</text:p>
              </table:table-cell>
              <table:table-cell office:value-type="float" office:value="547.736328125">
                <text:p>547.736328125</text:p>
              </table:table-cell>
              <table:table-cell office:value-type="float" office:value="0.002435324">
                <text:p>0.002435324</text:p>
              </table:table-cell>
            </table:table-row>
            <table:table-row>
              <table:table-cell office:value-type="string">
                <text:p>1999</text:p>
              </table:table-cell>
              <table:table-cell office:value-type="float" office:value="547.85400390625">
                <text:p>547.85400390625</text:p>
              </table:table-cell>
              <table:table-cell office:value-type="float" office:value="-0.002266881">
                <text:p>-0.002266881</text:p>
              </table:table-cell>
            </table:table-row>
            <table:table-row>
              <table:table-cell office:value-type="string">
                <text:p>2000</text:p>
              </table:table-cell>
              <table:table-cell office:value-type="float" office:value="547.971740722656">
                <text:p>547.971740722656</text:p>
              </table:table-cell>
              <table:table-cell office:value-type="float" office:value="-0.01002513">
                <text:p>-0.01002513</text:p>
              </table:table-cell>
            </table:table-row>
            <table:table-row>
              <table:table-cell office:value-type="string">
                <text:p>2001</text:p>
              </table:table-cell>
              <table:table-cell office:value-type="float" office:value="548.089416503906">
                <text:p>548.089416503906</text:p>
              </table:table-cell>
              <table:table-cell office:value-type="float" office:value="-0.005737427">
                <text:p>-0.005737427</text:p>
              </table:table-cell>
            </table:table-row>
            <table:table-row>
              <table:table-cell office:value-type="string">
                <text:p>2002</text:p>
              </table:table-cell>
              <table:table-cell office:value-type="float" office:value="548.207092285156">
                <text:p>548.207092285156</text:p>
              </table:table-cell>
              <table:table-cell office:value-type="float" office:value="0.007068121">
                <text:p>0.007068121</text:p>
              </table:table-cell>
            </table:table-row>
            <table:table-row>
              <table:table-cell office:value-type="string">
                <text:p>2003</text:p>
              </table:table-cell>
              <table:table-cell office:value-type="float" office:value="548.324768066406">
                <text:p>548.324768066406</text:p>
              </table:table-cell>
              <table:table-cell office:value-type="float" office:value="-0.00760781">
                <text:p>-0.00760781</text:p>
              </table:table-cell>
            </table:table-row>
            <table:table-row>
              <table:table-cell office:value-type="string">
                <text:p>2004</text:p>
              </table:table-cell>
              <table:table-cell office:value-type="float" office:value="548.442443847656">
                <text:p>548.442443847656</text:p>
              </table:table-cell>
              <table:table-cell office:value-type="float" office:value="0.01193401">
                <text:p>0.01193401</text:p>
              </table:table-cell>
            </table:table-row>
            <table:table-row>
              <table:table-cell office:value-type="string">
                <text:p>2005</text:p>
              </table:table-cell>
              <table:table-cell office:value-type="float" office:value="548.560180664063">
                <text:p>548.560180664063</text:p>
              </table:table-cell>
              <table:table-cell office:value-type="float" office:value="-0.002895503">
                <text:p>-0.002895503</text:p>
              </table:table-cell>
            </table:table-row>
            <table:table-row>
              <table:table-cell office:value-type="string">
                <text:p>2006</text:p>
              </table:table-cell>
              <table:table-cell office:value-type="float" office:value="548.677856445313">
                <text:p>548.677856445313</text:p>
              </table:table-cell>
              <table:table-cell office:value-type="float" office:value="0.006817395">
                <text:p>0.006817395</text:p>
              </table:table-cell>
            </table:table-row>
            <table:table-row>
              <table:table-cell office:value-type="string">
                <text:p>2007</text:p>
              </table:table-cell>
              <table:table-cell office:value-type="float" office:value="548.795593261719">
                <text:p>548.795593261719</text:p>
              </table:table-cell>
              <table:table-cell office:value-type="float" office:value="-0.004610896">
                <text:p>-0.004610896</text:p>
              </table:table-cell>
            </table:table-row>
            <table:table-row>
              <table:table-cell office:value-type="string">
                <text:p>2008</text:p>
              </table:table-cell>
              <table:table-cell office:value-type="float" office:value="548.913269042969">
                <text:p>548.913269042969</text:p>
              </table:table-cell>
              <table:table-cell office:value-type="float" office:value="-0.005084909">
                <text:p>-0.005084909</text:p>
              </table:table-cell>
            </table:table-row>
            <table:table-row>
              <table:table-cell office:value-type="string">
                <text:p>2009</text:p>
              </table:table-cell>
              <table:table-cell office:value-type="float" office:value="549.031005859375">
                <text:p>549.031005859375</text:p>
              </table:table-cell>
              <table:table-cell office:value-type="float" office:value="-0.001870495">
                <text:p>-0.001870495</text:p>
              </table:table-cell>
            </table:table-row>
            <table:table-row>
              <table:table-cell office:value-type="string">
                <text:p>2010</text:p>
              </table:table-cell>
              <table:table-cell office:value-type="float" office:value="549.148681640625">
                <text:p>549.148681640625</text:p>
              </table:table-cell>
              <table:table-cell office:value-type="float" office:value="-0.004883188">
                <text:p>-0.004883188</text:p>
              </table:table-cell>
            </table:table-row>
            <table:table-row>
              <table:table-cell office:value-type="string">
                <text:p>2011</text:p>
              </table:table-cell>
              <table:table-cell office:value-type="float" office:value="549.266418457031">
                <text:p>549.266418457031</text:p>
              </table:table-cell>
              <table:table-cell office:value-type="float" office:value="0.004470018">
                <text:p>0.004470018</text:p>
              </table:table-cell>
            </table:table-row>
            <table:table-row>
              <table:table-cell office:value-type="string">
                <text:p>2012</text:p>
              </table:table-cell>
              <table:table-cell office:value-type="float" office:value="549.384155273438">
                <text:p>549.384155273438</text:p>
              </table:table-cell>
              <table:table-cell office:value-type="float" office:value="-0.0001414967">
                <text:p>-0.0001414967</text:p>
              </table:table-cell>
            </table:table-row>
            <table:table-row>
              <table:table-cell office:value-type="string">
                <text:p>2013</text:p>
              </table:table-cell>
              <table:table-cell office:value-type="float" office:value="549.501831054688">
                <text:p>549.501831054688</text:p>
              </table:table-cell>
              <table:table-cell office:value-type="float" office:value="0.002566601">
                <text:p>0.002566601</text:p>
              </table:table-cell>
            </table:table-row>
            <table:table-row>
              <table:table-cell office:value-type="string">
                <text:p>2014</text:p>
              </table:table-cell>
              <table:table-cell office:value-type="float" office:value="549.619567871094">
                <text:p>549.619567871094</text:p>
              </table:table-cell>
              <table:table-cell office:value-type="float" office:value="0.01273571">
                <text:p>0.01273571</text:p>
              </table:table-cell>
            </table:table-row>
            <table:table-row>
              <table:table-cell office:value-type="string">
                <text:p>2015</text:p>
              </table:table-cell>
              <table:table-cell office:value-type="float" office:value="549.7373046875">
                <text:p>549.7373046875</text:p>
              </table:table-cell>
              <table:table-cell office:value-type="float" office:value="0.006353207">
                <text:p>0.006353207</text:p>
              </table:table-cell>
            </table:table-row>
            <table:table-row>
              <table:table-cell office:value-type="string">
                <text:p>2016</text:p>
              </table:table-cell>
              <table:table-cell office:value-type="float" office:value="549.855041503906">
                <text:p>549.855041503906</text:p>
              </table:table-cell>
              <table:table-cell office:value-type="float" office:value="0.001946629">
                <text:p>0.001946629</text:p>
              </table:table-cell>
            </table:table-row>
            <table:table-row>
              <table:table-cell office:value-type="string">
                <text:p>2017</text:p>
              </table:table-cell>
              <table:table-cell office:value-type="float" office:value="549.972778320313">
                <text:p>549.972778320313</text:p>
              </table:table-cell>
              <table:table-cell office:value-type="float" office:value="0.007576847">
                <text:p>0.007576847</text:p>
              </table:table-cell>
            </table:table-row>
            <table:table-row>
              <table:table-cell office:value-type="string">
                <text:p>2018</text:p>
              </table:table-cell>
              <table:table-cell office:value-type="float" office:value="550.090515136719">
                <text:p>550.090515136719</text:p>
              </table:table-cell>
              <table:table-cell office:value-type="float" office:value="-0.009560183">
                <text:p>-0.009560183</text:p>
              </table:table-cell>
            </table:table-row>
            <table:table-row>
              <table:table-cell office:value-type="string">
                <text:p>2019</text:p>
              </table:table-cell>
              <table:table-cell office:value-type="float" office:value="550.208251953125">
                <text:p>550.208251953125</text:p>
              </table:table-cell>
              <table:table-cell office:value-type="float" office:value="0.002569754">
                <text:p>0.002569754</text:p>
              </table:table-cell>
            </table:table-row>
            <table:table-row>
              <table:table-cell office:value-type="string">
                <text:p>2020</text:p>
              </table:table-cell>
              <table:table-cell office:value-type="float" office:value="550.325988769531">
                <text:p>550.325988769531</text:p>
              </table:table-cell>
              <table:table-cell office:value-type="float" office:value="-0.004821185">
                <text:p>-0.004821185</text:p>
              </table:table-cell>
            </table:table-row>
            <table:table-row>
              <table:table-cell office:value-type="string">
                <text:p>2021</text:p>
              </table:table-cell>
              <table:table-cell office:value-type="float" office:value="550.443725585938">
                <text:p>550.443725585938</text:p>
              </table:table-cell>
              <table:table-cell office:value-type="float" office:value="-0.0002789313">
                <text:p>-0.0002789313</text:p>
              </table:table-cell>
            </table:table-row>
            <table:table-row>
              <table:table-cell office:value-type="string">
                <text:p>2022</text:p>
              </table:table-cell>
              <table:table-cell office:value-type="float" office:value="550.561462402344">
                <text:p>550.561462402344</text:p>
              </table:table-cell>
              <table:table-cell office:value-type="float" office:value="0.009004871">
                <text:p>0.009004871</text:p>
              </table:table-cell>
            </table:table-row>
            <table:table-row>
              <table:table-cell office:value-type="string">
                <text:p>2023</text:p>
              </table:table-cell>
              <table:table-cell office:value-type="float" office:value="550.679260253906">
                <text:p>550.679260253906</text:p>
              </table:table-cell>
              <table:table-cell office:value-type="float" office:value="0.003951249">
                <text:p>0.003951249</text:p>
              </table:table-cell>
            </table:table-row>
            <table:table-row>
              <table:table-cell office:value-type="string">
                <text:p>2024</text:p>
              </table:table-cell>
              <table:table-cell office:value-type="float" office:value="550.796997070313">
                <text:p>550.796997070313</text:p>
              </table:table-cell>
              <table:table-cell office:value-type="float" office:value="-0.0001393945">
                <text:p>-0.0001393945</text:p>
              </table:table-cell>
            </table:table-row>
            <table:table-row>
              <table:table-cell office:value-type="string">
                <text:p>2025</text:p>
              </table:table-cell>
              <table:table-cell office:value-type="float" office:value="550.914733886719">
                <text:p>550.914733886719</text:p>
              </table:table-cell>
              <table:table-cell office:value-type="float" office:value="0.003044639">
                <text:p>0.003044639</text:p>
              </table:table-cell>
            </table:table-row>
            <table:table-row>
              <table:table-cell office:value-type="string">
                <text:p>2026</text:p>
              </table:table-cell>
              <table:table-cell office:value-type="float" office:value="551.032531738281">
                <text:p>551.032531738281</text:p>
              </table:table-cell>
              <table:table-cell office:value-type="float" office:value="-0.00388699">
                <text:p>-0.00388699</text:p>
              </table:table-cell>
            </table:table-row>
            <table:table-row>
              <table:table-cell office:value-type="string">
                <text:p>2027</text:p>
              </table:table-cell>
              <table:table-cell office:value-type="float" office:value="551.150268554688">
                <text:p>551.150268554688</text:p>
              </table:table-cell>
              <table:table-cell office:value-type="float" office:value="0.004892637">
                <text:p>0.004892637</text:p>
              </table:table-cell>
            </table:table-row>
            <table:table-row>
              <table:table-cell office:value-type="string">
                <text:p>2028</text:p>
              </table:table-cell>
              <table:table-cell office:value-type="float" office:value="551.26806640625">
                <text:p>551.26806640625</text:p>
              </table:table-cell>
              <table:table-cell office:value-type="float" office:value="-0.008483278">
                <text:p>-0.008483278</text:p>
              </table:table-cell>
            </table:table-row>
            <table:table-row>
              <table:table-cell office:value-type="string">
                <text:p>2029</text:p>
              </table:table-cell>
              <table:table-cell office:value-type="float" office:value="551.385803222656">
                <text:p>551.385803222656</text:p>
              </table:table-cell>
              <table:table-cell office:value-type="float" office:value="0.003654446">
                <text:p>0.003654446</text:p>
              </table:table-cell>
            </table:table-row>
            <table:table-row>
              <table:table-cell office:value-type="string">
                <text:p>2030</text:p>
              </table:table-cell>
              <table:table-cell office:value-type="float" office:value="551.503601074219">
                <text:p>551.503601074219</text:p>
              </table:table-cell>
              <table:table-cell office:value-type="float" office:value="-0.007918596">
                <text:p>-0.007918596</text:p>
              </table:table-cell>
            </table:table-row>
            <table:table-row>
              <table:table-cell office:value-type="string">
                <text:p>2031</text:p>
              </table:table-cell>
              <table:table-cell office:value-type="float" office:value="551.621398925781">
                <text:p>551.621398925781</text:p>
              </table:table-cell>
              <table:table-cell office:value-type="float" office:value="0.013723">
                <text:p>0.013723</text:p>
              </table:table-cell>
            </table:table-row>
            <table:table-row>
              <table:table-cell office:value-type="string">
                <text:p>2032</text:p>
              </table:table-cell>
              <table:table-cell office:value-type="float" office:value="551.739135742188">
                <text:p>551.739135742188</text:p>
              </table:table-cell>
              <table:table-cell office:value-type="float" office:value="-0.001566997">
                <text:p>-0.001566997</text:p>
              </table:table-cell>
            </table:table-row>
            <table:table-row>
              <table:table-cell office:value-type="string">
                <text:p>2033</text:p>
              </table:table-cell>
              <table:table-cell office:value-type="float" office:value="551.85693359375">
                <text:p>551.85693359375</text:p>
              </table:table-cell>
              <table:table-cell office:value-type="float" office:value="-0.005526309">
                <text:p>-0.005526309</text:p>
              </table:table-cell>
            </table:table-row>
            <table:table-row>
              <table:table-cell office:value-type="string">
                <text:p>2034</text:p>
              </table:table-cell>
              <table:table-cell office:value-type="float" office:value="551.974731445313">
                <text:p>551.974731445313</text:p>
              </table:table-cell>
              <table:table-cell office:value-type="float" office:value="0.003840834">
                <text:p>0.003840834</text:p>
              </table:table-cell>
            </table:table-row>
            <table:table-row>
              <table:table-cell office:value-type="string">
                <text:p>2035</text:p>
              </table:table-cell>
              <table:table-cell office:value-type="float" office:value="552.092529296875">
                <text:p>552.092529296875</text:p>
              </table:table-cell>
              <table:table-cell office:value-type="float" office:value="-0.004416391">
                <text:p>-0.004416391</text:p>
              </table:table-cell>
            </table:table-row>
            <table:table-row>
              <table:table-cell office:value-type="string">
                <text:p>2036</text:p>
              </table:table-cell>
              <table:table-cell office:value-type="float" office:value="552.210327148438">
                <text:p>552.210327148438</text:p>
              </table:table-cell>
              <table:table-cell office:value-type="float" office:value="0.01003021">
                <text:p>0.01003021</text:p>
              </table:table-cell>
            </table:table-row>
            <table:table-row>
              <table:table-cell office:value-type="string">
                <text:p>2037</text:p>
              </table:table-cell>
              <table:table-cell office:value-type="float" office:value="552.328125">
                <text:p>552.328125</text:p>
              </table:table-cell>
              <table:table-cell office:value-type="float" office:value="-0.001237316">
                <text:p>-0.001237316</text:p>
              </table:table-cell>
            </table:table-row>
            <table:table-row>
              <table:table-cell office:value-type="string">
                <text:p>2038</text:p>
              </table:table-cell>
              <table:table-cell office:value-type="float" office:value="552.445922851563">
                <text:p>552.445922851563</text:p>
              </table:table-cell>
              <table:table-cell office:value-type="float" office:value="0.0003896933">
                <text:p>0.0003896933</text:p>
              </table:table-cell>
            </table:table-row>
            <table:table-row>
              <table:table-cell office:value-type="string">
                <text:p>2039</text:p>
              </table:table-cell>
              <table:table-cell office:value-type="float" office:value="552.563720703125">
                <text:p>552.563720703125</text:p>
              </table:table-cell>
              <table:table-cell office:value-type="float" office:value="0.01293872">
                <text:p>0.01293872</text:p>
              </table:table-cell>
            </table:table-row>
            <table:table-row>
              <table:table-cell office:value-type="string">
                <text:p>2040</text:p>
              </table:table-cell>
              <table:table-cell office:value-type="float" office:value="552.681518554688">
                <text:p>552.681518554688</text:p>
              </table:table-cell>
              <table:table-cell office:value-type="float" office:value="-0.001777756">
                <text:p>-0.001777756</text:p>
              </table:table-cell>
            </table:table-row>
            <table:table-row>
              <table:table-cell office:value-type="string">
                <text:p>2041</text:p>
              </table:table-cell>
              <table:table-cell office:value-type="float" office:value="552.79931640625">
                <text:p>552.79931640625</text:p>
              </table:table-cell>
              <table:table-cell office:value-type="float" office:value="-0.001835999">
                <text:p>-0.001835999</text:p>
              </table:table-cell>
            </table:table-row>
            <table:table-row>
              <table:table-cell office:value-type="string">
                <text:p>2042</text:p>
              </table:table-cell>
              <table:table-cell office:value-type="float" office:value="552.917114257813">
                <text:p>552.917114257813</text:p>
              </table:table-cell>
              <table:table-cell office:value-type="float" office:value="-0.003310523">
                <text:p>-0.003310523</text:p>
              </table:table-cell>
            </table:table-row>
            <table:table-row>
              <table:table-cell office:value-type="string">
                <text:p>2043</text:p>
              </table:table-cell>
              <table:table-cell office:value-type="float" office:value="553.034973144531">
                <text:p>553.034973144531</text:p>
              </table:table-cell>
              <table:table-cell office:value-type="float" office:value="-0.002127031">
                <text:p>-0.002127031</text:p>
              </table:table-cell>
            </table:table-row>
            <table:table-row>
              <table:table-cell office:value-type="string">
                <text:p>2044</text:p>
              </table:table-cell>
              <table:table-cell office:value-type="float" office:value="553.152770996094">
                <text:p>553.152770996094</text:p>
              </table:table-cell>
              <table:table-cell office:value-type="float" office:value="0.002626139">
                <text:p>0.002626139</text:p>
              </table:table-cell>
            </table:table-row>
            <table:table-row>
              <table:table-cell office:value-type="string">
                <text:p>2045</text:p>
              </table:table-cell>
              <table:table-cell office:value-type="float" office:value="553.270568847656">
                <text:p>553.270568847656</text:p>
              </table:table-cell>
              <table:table-cell office:value-type="float" office:value="0.01747547">
                <text:p>0.01747547</text:p>
              </table:table-cell>
            </table:table-row>
            <table:table-row>
              <table:table-cell office:value-type="string">
                <text:p>2046</text:p>
              </table:table-cell>
              <table:table-cell office:value-type="float" office:value="553.388427734375">
                <text:p>553.388427734375</text:p>
              </table:table-cell>
              <table:table-cell office:value-type="float" office:value="-0.006492659">
                <text:p>-0.006492659</text:p>
              </table:table-cell>
            </table:table-row>
            <table:table-row>
              <table:table-cell office:value-type="string">
                <text:p>2047</text:p>
              </table:table-cell>
              <table:table-cell office:value-type="float" office:value="553.506225585938">
                <text:p>553.506225585938</text:p>
              </table:table-cell>
              <table:table-cell office:value-type="float" office:value="0.01034015">
                <text:p>0.01034015</text:p>
              </table:table-cell>
            </table:table-row>
            <table:table-row>
              <table:table-cell office:value-type="string">
                <text:p>2048</text:p>
              </table:table-cell>
              <table:table-cell office:value-type="float" office:value="553.624084472656">
                <text:p>553.624084472656</text:p>
              </table:table-cell>
              <table:table-cell office:value-type="float" office:value="0.002057844">
                <text:p>0.002057844</text:p>
              </table:table-cell>
            </table:table-row>
            <table:table-row>
              <table:table-cell office:value-type="string">
                <text:p>2049</text:p>
              </table:table-cell>
              <table:table-cell office:value-type="float" office:value="553.741882324219">
                <text:p>553.741882324219</text:p>
              </table:table-cell>
              <table:table-cell office:value-type="float" office:value="-0.002392648">
                <text:p>-0.002392648</text:p>
              </table:table-cell>
            </table:table-row>
            <table:table-row>
              <table:table-cell office:value-type="string">
                <text:p>2050</text:p>
              </table:table-cell>
              <table:table-cell office:value-type="float" office:value="553.859741210938">
                <text:p>553.859741210938</text:p>
              </table:table-cell>
              <table:table-cell office:value-type="float" office:value="-0.009525708">
                <text:p>-0.009525708</text:p>
              </table:table-cell>
            </table:table-row>
            <table:table-row>
              <table:table-cell office:value-type="string">
                <text:p>2051</text:p>
              </table:table-cell>
              <table:table-cell office:value-type="float" office:value="553.977600097656">
                <text:p>553.977600097656</text:p>
              </table:table-cell>
              <table:table-cell office:value-type="float" office:value="0.0009831043">
                <text:p>0.0009831043</text:p>
              </table:table-cell>
            </table:table-row>
            <table:table-row>
              <table:table-cell office:value-type="string">
                <text:p>2052</text:p>
              </table:table-cell>
              <table:table-cell office:value-type="float" office:value="554.095458984375">
                <text:p>554.095458984375</text:p>
              </table:table-cell>
              <table:table-cell office:value-type="float" office:value="-0.002526525">
                <text:p>-0.002526525</text:p>
              </table:table-cell>
            </table:table-row>
            <table:table-row>
              <table:table-cell office:value-type="string">
                <text:p>2053</text:p>
              </table:table-cell>
              <table:table-cell office:value-type="float" office:value="554.213256835938">
                <text:p>554.213256835938</text:p>
              </table:table-cell>
              <table:table-cell office:value-type="float" office:value="0.01636608">
                <text:p>0.01636608</text:p>
              </table:table-cell>
            </table:table-row>
            <table:table-row>
              <table:table-cell office:value-type="string">
                <text:p>2054</text:p>
              </table:table-cell>
              <table:table-cell office:value-type="float" office:value="554.331115722656">
                <text:p>554.331115722656</text:p>
              </table:table-cell>
              <table:table-cell office:value-type="float" office:value="0.001877394">
                <text:p>0.001877394</text:p>
              </table:table-cell>
            </table:table-row>
            <table:table-row>
              <table:table-cell office:value-type="string">
                <text:p>2055</text:p>
              </table:table-cell>
              <table:table-cell office:value-type="float" office:value="554.448974609375">
                <text:p>554.448974609375</text:p>
              </table:table-cell>
              <table:table-cell office:value-type="float" office:value="0.001109839">
                <text:p>0.001109839</text:p>
              </table:table-cell>
            </table:table-row>
            <table:table-row>
              <table:table-cell office:value-type="string">
                <text:p>2056</text:p>
              </table:table-cell>
              <table:table-cell office:value-type="float" office:value="554.566833496094">
                <text:p>554.566833496094</text:p>
              </table:table-cell>
              <table:table-cell office:value-type="float" office:value="0.0007966246">
                <text:p>0.0007966246</text:p>
              </table:table-cell>
            </table:table-row>
            <table:table-row>
              <table:table-cell office:value-type="string">
                <text:p>2057</text:p>
              </table:table-cell>
              <table:table-cell office:value-type="float" office:value="554.684692382813">
                <text:p>554.684692382813</text:p>
              </table:table-cell>
              <table:table-cell office:value-type="float" office:value="-0.004696608">
                <text:p>-0.004696608</text:p>
              </table:table-cell>
            </table:table-row>
            <table:table-row>
              <table:table-cell office:value-type="string">
                <text:p>2058</text:p>
              </table:table-cell>
              <table:table-cell office:value-type="float" office:value="554.802551269531">
                <text:p>554.802551269531</text:p>
              </table:table-cell>
              <table:table-cell office:value-type="float" office:value="-0.003645296">
                <text:p>-0.003645296</text:p>
              </table:table-cell>
            </table:table-row>
            <table:table-row>
              <table:table-cell office:value-type="string">
                <text:p>2059</text:p>
              </table:table-cell>
              <table:table-cell office:value-type="float" office:value="554.92041015625">
                <text:p>554.92041015625</text:p>
              </table:table-cell>
              <table:table-cell office:value-type="float" office:value="-0.006061414">
                <text:p>-0.006061414</text:p>
              </table:table-cell>
            </table:table-row>
            <table:table-row>
              <table:table-cell office:value-type="string">
                <text:p>2060</text:p>
              </table:table-cell>
              <table:table-cell office:value-type="float" office:value="555.038269042969">
                <text:p>555.038269042969</text:p>
              </table:table-cell>
              <table:table-cell office:value-type="float" office:value="-0.0006299883">
                <text:p>-0.0006299883</text:p>
              </table:table-cell>
            </table:table-row>
            <table:table-row>
              <table:table-cell office:value-type="string">
                <text:p>2061</text:p>
              </table:table-cell>
              <table:table-cell office:value-type="float" office:value="555.156127929688">
                <text:p>555.156127929688</text:p>
              </table:table-cell>
              <table:table-cell office:value-type="float" office:value="-0.001315318">
                <text:p>-0.001315318</text:p>
              </table:table-cell>
            </table:table-row>
            <table:table-row>
              <table:table-cell office:value-type="string">
                <text:p>2062</text:p>
              </table:table-cell>
              <table:table-cell office:value-type="float" office:value="555.274047851563">
                <text:p>555.274047851563</text:p>
              </table:table-cell>
              <table:table-cell office:value-type="float" office:value="-0.0006065072">
                <text:p>-0.0006065072</text:p>
              </table:table-cell>
            </table:table-row>
            <table:table-row>
              <table:table-cell office:value-type="string">
                <text:p>2063</text:p>
              </table:table-cell>
              <table:table-cell office:value-type="float" office:value="555.391906738281">
                <text:p>555.391906738281</text:p>
              </table:table-cell>
              <table:table-cell office:value-type="float" office:value="0.001936668">
                <text:p>0.001936668</text:p>
              </table:table-cell>
            </table:table-row>
            <table:table-row>
              <table:table-cell office:value-type="string">
                <text:p>2064</text:p>
              </table:table-cell>
              <table:table-cell office:value-type="float" office:value="555.509765625">
                <text:p>555.509765625</text:p>
              </table:table-cell>
              <table:table-cell office:value-type="float" office:value="0.001116255">
                <text:p>0.001116255</text:p>
              </table:table-cell>
            </table:table-row>
            <table:table-row>
              <table:table-cell office:value-type="string">
                <text:p>2065</text:p>
              </table:table-cell>
              <table:table-cell office:value-type="float" office:value="555.627685546875">
                <text:p>555.627685546875</text:p>
              </table:table-cell>
              <table:table-cell office:value-type="float" office:value="0.007474428">
                <text:p>0.007474428</text:p>
              </table:table-cell>
            </table:table-row>
            <table:table-row>
              <table:table-cell office:value-type="string">
                <text:p>2066</text:p>
              </table:table-cell>
              <table:table-cell office:value-type="float" office:value="555.745544433594">
                <text:p>555.745544433594</text:p>
              </table:table-cell>
              <table:table-cell office:value-type="float" office:value="0.004360714">
                <text:p>0.004360714</text:p>
              </table:table-cell>
            </table:table-row>
            <table:table-row>
              <table:table-cell office:value-type="string">
                <text:p>2067</text:p>
              </table:table-cell>
              <table:table-cell office:value-type="float" office:value="555.863403320313">
                <text:p>555.863403320313</text:p>
              </table:table-cell>
              <table:table-cell office:value-type="float" office:value="-0.005670453">
                <text:p>-0.005670453</text:p>
              </table:table-cell>
            </table:table-row>
            <table:table-row>
              <table:table-cell office:value-type="string">
                <text:p>2068</text:p>
              </table:table-cell>
              <table:table-cell office:value-type="float" office:value="555.981323242188">
                <text:p>555.981323242188</text:p>
              </table:table-cell>
              <table:table-cell office:value-type="float" office:value="0.001514808">
                <text:p>0.001514808</text:p>
              </table:table-cell>
            </table:table-row>
            <table:table-row>
              <table:table-cell office:value-type="string">
                <text:p>2069</text:p>
              </table:table-cell>
              <table:table-cell office:value-type="float" office:value="556.099243164063">
                <text:p>556.099243164063</text:p>
              </table:table-cell>
              <table:table-cell office:value-type="float" office:value="-0.003827488">
                <text:p>-0.003827488</text:p>
              </table:table-cell>
            </table:table-row>
            <table:table-row>
              <table:table-cell office:value-type="string">
                <text:p>2070</text:p>
              </table:table-cell>
              <table:table-cell office:value-type="float" office:value="556.217102050781">
                <text:p>556.217102050781</text:p>
              </table:table-cell>
              <table:table-cell office:value-type="float" office:value="0.008742821">
                <text:p>0.008742821</text:p>
              </table:table-cell>
            </table:table-row>
            <table:table-row>
              <table:table-cell office:value-type="string">
                <text:p>2071</text:p>
              </table:table-cell>
              <table:table-cell office:value-type="float" office:value="556.335021972656">
                <text:p>556.335021972656</text:p>
              </table:table-cell>
              <table:table-cell office:value-type="float" office:value="0.01032272">
                <text:p>0.01032272</text:p>
              </table:table-cell>
            </table:table-row>
            <table:table-row>
              <table:table-cell office:value-type="string">
                <text:p>2072</text:p>
              </table:table-cell>
              <table:table-cell office:value-type="float" office:value="556.452941894531">
                <text:p>556.452941894531</text:p>
              </table:table-cell>
              <table:table-cell office:value-type="float" office:value="0.003602754">
                <text:p>0.003602754</text:p>
              </table:table-cell>
            </table:table-row>
            <table:table-row>
              <table:table-cell office:value-type="string">
                <text:p>2073</text:p>
              </table:table-cell>
              <table:table-cell office:value-type="float" office:value="556.57080078125">
                <text:p>556.57080078125</text:p>
              </table:table-cell>
              <table:table-cell office:value-type="float" office:value="0.00229935">
                <text:p>0.00229935</text:p>
              </table:table-cell>
            </table:table-row>
            <table:table-row>
              <table:table-cell office:value-type="string">
                <text:p>2074</text:p>
              </table:table-cell>
              <table:table-cell office:value-type="float" office:value="556.688720703125">
                <text:p>556.688720703125</text:p>
              </table:table-cell>
              <table:table-cell office:value-type="float" office:value="0.001142375">
                <text:p>0.001142375</text:p>
              </table:table-cell>
            </table:table-row>
            <table:table-row>
              <table:table-cell office:value-type="string">
                <text:p>2075</text:p>
              </table:table-cell>
              <table:table-cell office:value-type="float" office:value="556.806640625">
                <text:p>556.806640625</text:p>
              </table:table-cell>
              <table:table-cell office:value-type="float" office:value="0.001085518">
                <text:p>0.001085518</text:p>
              </table:table-cell>
            </table:table-row>
            <table:table-row>
              <table:table-cell office:value-type="string">
                <text:p>2076</text:p>
              </table:table-cell>
              <table:table-cell office:value-type="float" office:value="556.924560546875">
                <text:p>556.924560546875</text:p>
              </table:table-cell>
              <table:table-cell office:value-type="float" office:value="0.007195636">
                <text:p>0.007195636</text:p>
              </table:table-cell>
            </table:table-row>
            <table:table-row>
              <table:table-cell office:value-type="string">
                <text:p>2077</text:p>
              </table:table-cell>
              <table:table-cell office:value-type="float" office:value="557.04248046875">
                <text:p>557.04248046875</text:p>
              </table:table-cell>
              <table:table-cell office:value-type="float" office:value="0.0008972253">
                <text:p>0.0008972253</text:p>
              </table:table-cell>
            </table:table-row>
            <table:table-row>
              <table:table-cell office:value-type="string">
                <text:p>2078</text:p>
              </table:table-cell>
              <table:table-cell office:value-type="float" office:value="557.160400390625">
                <text:p>557.160400390625</text:p>
              </table:table-cell>
              <table:table-cell office:value-type="float" office:value="-0.004278118">
                <text:p>-0.004278118</text:p>
              </table:table-cell>
            </table:table-row>
            <table:table-row>
              <table:table-cell office:value-type="string">
                <text:p>2079</text:p>
              </table:table-cell>
              <table:table-cell office:value-type="float" office:value="557.2783203125">
                <text:p>557.2783203125</text:p>
              </table:table-cell>
              <table:table-cell office:value-type="float" office:value="0.01517464">
                <text:p>0.01517464</text:p>
              </table:table-cell>
            </table:table-row>
            <table:table-row>
              <table:table-cell office:value-type="string">
                <text:p>2080</text:p>
              </table:table-cell>
              <table:table-cell office:value-type="float" office:value="557.396240234375">
                <text:p>557.396240234375</text:p>
              </table:table-cell>
              <table:table-cell office:value-type="float" office:value="0.0008238092">
                <text:p>0.0008238092</text:p>
              </table:table-cell>
            </table:table-row>
            <table:table-row>
              <table:table-cell office:value-type="string">
                <text:p>2081</text:p>
              </table:table-cell>
              <table:table-cell office:value-type="float" office:value="557.51416015625">
                <text:p>557.51416015625</text:p>
              </table:table-cell>
              <table:table-cell office:value-type="float" office:value="-0.008052503">
                <text:p>-0.008052503</text:p>
              </table:table-cell>
            </table:table-row>
            <table:table-row>
              <table:table-cell office:value-type="string">
                <text:p>2082</text:p>
              </table:table-cell>
              <table:table-cell office:value-type="float" office:value="557.632141113281">
                <text:p>557.632141113281</text:p>
              </table:table-cell>
              <table:table-cell office:value-type="float" office:value="0.001831399">
                <text:p>0.001831399</text:p>
              </table:table-cell>
            </table:table-row>
            <table:table-row>
              <table:table-cell office:value-type="string">
                <text:p>2083</text:p>
              </table:table-cell>
              <table:table-cell office:value-type="float" office:value="557.750061035156">
                <text:p>557.750061035156</text:p>
              </table:table-cell>
              <table:table-cell office:value-type="float" office:value="-0.001704449">
                <text:p>-0.001704449</text:p>
              </table:table-cell>
            </table:table-row>
            <table:table-row>
              <table:table-cell office:value-type="string">
                <text:p>2084</text:p>
              </table:table-cell>
              <table:table-cell office:value-type="float" office:value="557.867980957031">
                <text:p>557.867980957031</text:p>
              </table:table-cell>
              <table:table-cell office:value-type="float" office:value="0.001126169">
                <text:p>0.001126169</text:p>
              </table:table-cell>
            </table:table-row>
            <table:table-row>
              <table:table-cell office:value-type="string">
                <text:p>2085</text:p>
              </table:table-cell>
              <table:table-cell office:value-type="float" office:value="557.985961914063">
                <text:p>557.985961914063</text:p>
              </table:table-cell>
              <table:table-cell office:value-type="float" office:value="-0.009538309">
                <text:p>-0.009538309</text:p>
              </table:table-cell>
            </table:table-row>
            <table:table-row>
              <table:table-cell office:value-type="string">
                <text:p>2086</text:p>
              </table:table-cell>
              <table:table-cell office:value-type="float" office:value="558.103881835938">
                <text:p>558.103881835938</text:p>
              </table:table-cell>
              <table:table-cell office:value-type="float" office:value="-0.006705628">
                <text:p>-0.006705628</text:p>
              </table:table-cell>
            </table:table-row>
            <table:table-row>
              <table:table-cell office:value-type="string">
                <text:p>2087</text:p>
              </table:table-cell>
              <table:table-cell office:value-type="float" office:value="558.221801757813">
                <text:p>558.221801757813</text:p>
              </table:table-cell>
              <table:table-cell office:value-type="float" office:value="-0.002687008">
                <text:p>-0.002687008</text:p>
              </table:table-cell>
            </table:table-row>
            <table:table-row>
              <table:table-cell office:value-type="string">
                <text:p>2088</text:p>
              </table:table-cell>
              <table:table-cell office:value-type="float" office:value="558.339782714844">
                <text:p>558.339782714844</text:p>
              </table:table-cell>
              <table:table-cell office:value-type="float" office:value="0.007952477">
                <text:p>0.007952477</text:p>
              </table:table-cell>
            </table:table-row>
            <table:table-row>
              <table:table-cell office:value-type="string">
                <text:p>2089</text:p>
              </table:table-cell>
              <table:table-cell office:value-type="float" office:value="558.457702636719">
                <text:p>558.457702636719</text:p>
              </table:table-cell>
              <table:table-cell office:value-type="float" office:value="-0.00315871">
                <text:p>-0.00315871</text:p>
              </table:table-cell>
            </table:table-row>
            <table:table-row>
              <table:table-cell office:value-type="string">
                <text:p>2090</text:p>
              </table:table-cell>
              <table:table-cell office:value-type="float" office:value="558.57568359375">
                <text:p>558.57568359375</text:p>
              </table:table-cell>
              <table:table-cell office:value-type="float" office:value="0.001041715">
                <text:p>0.001041715</text:p>
              </table:table-cell>
            </table:table-row>
            <table:table-row>
              <table:table-cell office:value-type="string">
                <text:p>2091</text:p>
              </table:table-cell>
              <table:table-cell office:value-type="float" office:value="558.693664550781">
                <text:p>558.693664550781</text:p>
              </table:table-cell>
              <table:table-cell office:value-type="float" office:value="0.005580686">
                <text:p>0.005580686</text:p>
              </table:table-cell>
            </table:table-row>
            <table:table-row>
              <table:table-cell office:value-type="string">
                <text:p>2092</text:p>
              </table:table-cell>
              <table:table-cell office:value-type="float" office:value="558.811584472656">
                <text:p>558.811584472656</text:p>
              </table:table-cell>
              <table:table-cell office:value-type="float" office:value="0.006952159">
                <text:p>0.006952159</text:p>
              </table:table-cell>
            </table:table-row>
            <table:table-row>
              <table:table-cell office:value-type="string">
                <text:p>2093</text:p>
              </table:table-cell>
              <table:table-cell office:value-type="float" office:value="558.929565429688">
                <text:p>558.929565429688</text:p>
              </table:table-cell>
              <table:table-cell office:value-type="float" office:value="-0.002700699">
                <text:p>-0.002700699</text:p>
              </table:table-cell>
            </table:table-row>
            <table:table-row>
              <table:table-cell office:value-type="string">
                <text:p>2094</text:p>
              </table:table-cell>
              <table:table-cell office:value-type="float" office:value="559.047546386719">
                <text:p>559.047546386719</text:p>
              </table:table-cell>
              <table:table-cell office:value-type="float" office:value="0.002636894">
                <text:p>0.002636894</text:p>
              </table:table-cell>
            </table:table-row>
            <table:table-row>
              <table:table-cell office:value-type="string">
                <text:p>2095</text:p>
              </table:table-cell>
              <table:table-cell office:value-type="float" office:value="559.16552734375">
                <text:p>559.16552734375</text:p>
              </table:table-cell>
              <table:table-cell office:value-type="float" office:value="0.00170646">
                <text:p>0.00170646</text:p>
              </table:table-cell>
            </table:table-row>
            <table:table-row>
              <table:table-cell office:value-type="string">
                <text:p>2096</text:p>
              </table:table-cell>
              <table:table-cell office:value-type="float" office:value="559.283508300781">
                <text:p>559.283508300781</text:p>
              </table:table-cell>
              <table:table-cell office:value-type="float" office:value="0.0001900353">
                <text:p>0.0001900353</text:p>
              </table:table-cell>
            </table:table-row>
            <table:table-row>
              <table:table-cell office:value-type="string">
                <text:p>2097</text:p>
              </table:table-cell>
              <table:table-cell office:value-type="float" office:value="559.401489257813">
                <text:p>559.401489257813</text:p>
              </table:table-cell>
              <table:table-cell office:value-type="float" office:value="0.005467399">
                <text:p>0.005467399</text:p>
              </table:table-cell>
            </table:table-row>
            <table:table-row>
              <table:table-cell office:value-type="string">
                <text:p>2098</text:p>
              </table:table-cell>
              <table:table-cell office:value-type="float" office:value="559.519470214844">
                <text:p>559.519470214844</text:p>
              </table:table-cell>
              <table:table-cell office:value-type="float" office:value="-0.008661398">
                <text:p>-0.008661398</text:p>
              </table:table-cell>
            </table:table-row>
            <table:table-row>
              <table:table-cell office:value-type="string">
                <text:p>2099</text:p>
              </table:table-cell>
              <table:table-cell office:value-type="float" office:value="559.637451171875">
                <text:p>559.637451171875</text:p>
              </table:table-cell>
              <table:table-cell office:value-type="float" office:value="0.002601767">
                <text:p>0.002601767</text:p>
              </table:table-cell>
            </table:table-row>
            <table:table-row>
              <table:table-cell office:value-type="string">
                <text:p>2100</text:p>
              </table:table-cell>
              <table:table-cell office:value-type="float" office:value="559.755432128906">
                <text:p>559.755432128906</text:p>
              </table:table-cell>
              <table:table-cell office:value-type="float" office:value="0.007952768">
                <text:p>0.007952768</text:p>
              </table:table-cell>
            </table:table-row>
            <table:table-row>
              <table:table-cell office:value-type="string">
                <text:p>2101</text:p>
              </table:table-cell>
              <table:table-cell office:value-type="float" office:value="559.873413085938">
                <text:p>559.873413085938</text:p>
              </table:table-cell>
              <table:table-cell office:value-type="float" office:value="-0.001638047">
                <text:p>-0.001638047</text:p>
              </table:table-cell>
            </table:table-row>
            <table:table-row>
              <table:table-cell office:value-type="string">
                <text:p>2102</text:p>
              </table:table-cell>
              <table:table-cell office:value-type="float" office:value="559.991394042969">
                <text:p>559.991394042969</text:p>
              </table:table-cell>
              <table:table-cell office:value-type="float" office:value="0.003305102">
                <text:p>0.003305102</text:p>
              </table:table-cell>
            </table:table-row>
            <table:table-row>
              <table:table-cell office:value-type="string">
                <text:p>2103</text:p>
              </table:table-cell>
              <table:table-cell office:value-type="float" office:value="560.109375">
                <text:p>560.109375</text:p>
              </table:table-cell>
              <table:table-cell office:value-type="float" office:value="0.006221542">
                <text:p>0.006221542</text:p>
              </table:table-cell>
            </table:table-row>
            <table:table-row>
              <table:table-cell office:value-type="string">
                <text:p>2104</text:p>
              </table:table-cell>
              <table:table-cell office:value-type="float" office:value="560.227416992188">
                <text:p>560.227416992188</text:p>
              </table:table-cell>
              <table:table-cell office:value-type="float" office:value="-0.001072972">
                <text:p>-0.001072972</text:p>
              </table:table-cell>
            </table:table-row>
            <table:table-row>
              <table:table-cell office:value-type="string">
                <text:p>2105</text:p>
              </table:table-cell>
              <table:table-cell office:value-type="float" office:value="560.345397949219">
                <text:p>560.345397949219</text:p>
              </table:table-cell>
              <table:table-cell office:value-type="float" office:value="-0.00672131">
                <text:p>-0.00672131</text:p>
              </table:table-cell>
            </table:table-row>
            <table:table-row>
              <table:table-cell office:value-type="string">
                <text:p>2106</text:p>
              </table:table-cell>
              <table:table-cell office:value-type="float" office:value="560.46337890625">
                <text:p>560.46337890625</text:p>
              </table:table-cell>
              <table:table-cell office:value-type="float" office:value="0.005578114">
                <text:p>0.005578114</text:p>
              </table:table-cell>
            </table:table-row>
            <table:table-row>
              <table:table-cell office:value-type="string">
                <text:p>2107</text:p>
              </table:table-cell>
              <table:table-cell office:value-type="float" office:value="560.581420898438">
                <text:p>560.581420898438</text:p>
              </table:table-cell>
              <table:table-cell office:value-type="float" office:value="0.02454605">
                <text:p>0.02454605</text:p>
              </table:table-cell>
            </table:table-row>
            <table:table-row>
              <table:table-cell office:value-type="string">
                <text:p>2108</text:p>
              </table:table-cell>
              <table:table-cell office:value-type="float" office:value="560.699401855469">
                <text:p>560.699401855469</text:p>
              </table:table-cell>
              <table:table-cell office:value-type="float" office:value="-0.004640031">
                <text:p>-0.004640031</text:p>
              </table:table-cell>
            </table:table-row>
            <table:table-row>
              <table:table-cell office:value-type="string">
                <text:p>2109</text:p>
              </table:table-cell>
              <table:table-cell office:value-type="float" office:value="560.817443847656">
                <text:p>560.817443847656</text:p>
              </table:table-cell>
              <table:table-cell office:value-type="float" office:value="-0.003324388">
                <text:p>-0.003324388</text:p>
              </table:table-cell>
            </table:table-row>
            <table:table-row>
              <table:table-cell office:value-type="string">
                <text:p>2110</text:p>
              </table:table-cell>
              <table:table-cell office:value-type="float" office:value="560.935424804688">
                <text:p>560.935424804688</text:p>
              </table:table-cell>
              <table:table-cell office:value-type="float" office:value="0.006600443">
                <text:p>0.006600443</text:p>
              </table:table-cell>
            </table:table-row>
            <table:table-row>
              <table:table-cell office:value-type="string">
                <text:p>2111</text:p>
              </table:table-cell>
              <table:table-cell office:value-type="float" office:value="561.053466796875">
                <text:p>561.053466796875</text:p>
              </table:table-cell>
              <table:table-cell office:value-type="float" office:value="0.001689864">
                <text:p>0.001689864</text:p>
              </table:table-cell>
            </table:table-row>
            <table:table-row>
              <table:table-cell office:value-type="string">
                <text:p>2112</text:p>
              </table:table-cell>
              <table:table-cell office:value-type="float" office:value="561.171508789063">
                <text:p>561.171508789063</text:p>
              </table:table-cell>
              <table:table-cell office:value-type="float" office:value="-0.002090413">
                <text:p>-0.002090413</text:p>
              </table:table-cell>
            </table:table-row>
            <table:table-row>
              <table:table-cell office:value-type="string">
                <text:p>2113</text:p>
              </table:table-cell>
              <table:table-cell office:value-type="float" office:value="561.289489746094">
                <text:p>561.289489746094</text:p>
              </table:table-cell>
              <table:table-cell office:value-type="float" office:value="0.00708345">
                <text:p>0.00708345</text:p>
              </table:table-cell>
            </table:table-row>
            <table:table-row>
              <table:table-cell office:value-type="string">
                <text:p>2114</text:p>
              </table:table-cell>
              <table:table-cell office:value-type="float" office:value="561.407531738281">
                <text:p>561.407531738281</text:p>
              </table:table-cell>
              <table:table-cell office:value-type="float" office:value="-0.001863885">
                <text:p>-0.001863885</text:p>
              </table:table-cell>
            </table:table-row>
            <table:table-row>
              <table:table-cell office:value-type="string">
                <text:p>2115</text:p>
              </table:table-cell>
              <table:table-cell office:value-type="float" office:value="561.525573730469">
                <text:p>561.525573730469</text:p>
              </table:table-cell>
              <table:table-cell office:value-type="float" office:value="0.0126936">
                <text:p>0.0126936</text:p>
              </table:table-cell>
            </table:table-row>
            <table:table-row>
              <table:table-cell office:value-type="string">
                <text:p>2116</text:p>
              </table:table-cell>
              <table:table-cell office:value-type="float" office:value="561.643615722656">
                <text:p>561.643615722656</text:p>
              </table:table-cell>
              <table:table-cell office:value-type="float" office:value="-0.003153109">
                <text:p>-0.003153109</text:p>
              </table:table-cell>
            </table:table-row>
            <table:table-row>
              <table:table-cell office:value-type="string">
                <text:p>2117</text:p>
              </table:table-cell>
              <table:table-cell office:value-type="float" office:value="561.761657714844">
                <text:p>561.761657714844</text:p>
              </table:table-cell>
              <table:table-cell office:value-type="float" office:value="-0.006815967">
                <text:p>-0.006815967</text:p>
              </table:table-cell>
            </table:table-row>
            <table:table-row>
              <table:table-cell office:value-type="string">
                <text:p>2118</text:p>
              </table:table-cell>
              <table:table-cell office:value-type="float" office:value="561.879699707031">
                <text:p>561.879699707031</text:p>
              </table:table-cell>
              <table:table-cell office:value-type="float" office:value="0.01018528">
                <text:p>0.01018528</text:p>
              </table:table-cell>
            </table:table-row>
            <table:table-row>
              <table:table-cell office:value-type="string">
                <text:p>2119</text:p>
              </table:table-cell>
              <table:table-cell office:value-type="float" office:value="561.997741699219">
                <text:p>561.997741699219</text:p>
              </table:table-cell>
              <table:table-cell office:value-type="float" office:value="0.01742851">
                <text:p>0.01742851</text:p>
              </table:table-cell>
            </table:table-row>
            <table:table-row>
              <table:table-cell office:value-type="string">
                <text:p>2120</text:p>
              </table:table-cell>
              <table:table-cell office:value-type="float" office:value="562.115783691406">
                <text:p>562.115783691406</text:p>
              </table:table-cell>
              <table:table-cell office:value-type="float" office:value="-0.004251859">
                <text:p>-0.004251859</text:p>
              </table:table-cell>
            </table:table-row>
            <table:table-row>
              <table:table-cell office:value-type="string">
                <text:p>2121</text:p>
              </table:table-cell>
              <table:table-cell office:value-type="float" office:value="562.233825683594">
                <text:p>562.233825683594</text:p>
              </table:table-cell>
              <table:table-cell office:value-type="float" office:value="0.009165815">
                <text:p>0.009165815</text:p>
              </table:table-cell>
            </table:table-row>
            <table:table-row>
              <table:table-cell office:value-type="string">
                <text:p>2122</text:p>
              </table:table-cell>
              <table:table-cell office:value-type="float" office:value="562.351867675781">
                <text:p>562.351867675781</text:p>
              </table:table-cell>
              <table:table-cell office:value-type="float" office:value="0.00677416">
                <text:p>0.00677416</text:p>
              </table:table-cell>
            </table:table-row>
            <table:table-row>
              <table:table-cell office:value-type="string">
                <text:p>2123</text:p>
              </table:table-cell>
              <table:table-cell office:value-type="float" office:value="562.469909667969">
                <text:p>562.469909667969</text:p>
              </table:table-cell>
              <table:table-cell office:value-type="float" office:value="0.00550796">
                <text:p>0.00550796</text:p>
              </table:table-cell>
            </table:table-row>
            <table:table-row>
              <table:table-cell office:value-type="string">
                <text:p>2124</text:p>
              </table:table-cell>
              <table:table-cell office:value-type="float" office:value="562.588012695313">
                <text:p>562.588012695313</text:p>
              </table:table-cell>
              <table:table-cell office:value-type="float" office:value="0.003082458">
                <text:p>0.003082458</text:p>
              </table:table-cell>
            </table:table-row>
            <table:table-row>
              <table:table-cell office:value-type="string">
                <text:p>2125</text:p>
              </table:table-cell>
              <table:table-cell office:value-type="float" office:value="562.7060546875">
                <text:p>562.7060546875</text:p>
              </table:table-cell>
              <table:table-cell office:value-type="float" office:value="-0.007353052">
                <text:p>-0.007353052</text:p>
              </table:table-cell>
            </table:table-row>
            <table:table-row>
              <table:table-cell office:value-type="string">
                <text:p>2126</text:p>
              </table:table-cell>
              <table:table-cell office:value-type="float" office:value="562.824096679688">
                <text:p>562.824096679688</text:p>
              </table:table-cell>
              <table:table-cell office:value-type="float" office:value="-0.003132128">
                <text:p>-0.003132128</text:p>
              </table:table-cell>
            </table:table-row>
            <table:table-row>
              <table:table-cell office:value-type="string">
                <text:p>2127</text:p>
              </table:table-cell>
              <table:table-cell office:value-type="float" office:value="562.942199707031">
                <text:p>562.942199707031</text:p>
              </table:table-cell>
              <table:table-cell office:value-type="float" office:value="-0.003477871">
                <text:p>-0.003477871</text:p>
              </table:table-cell>
            </table:table-row>
            <table:table-row>
              <table:table-cell office:value-type="string">
                <text:p>2128</text:p>
              </table:table-cell>
              <table:table-cell office:value-type="float" office:value="563.060241699219">
                <text:p>563.060241699219</text:p>
              </table:table-cell>
              <table:table-cell office:value-type="float" office:value="0.00504289">
                <text:p>0.00504289</text:p>
              </table:table-cell>
            </table:table-row>
            <table:table-row>
              <table:table-cell office:value-type="string">
                <text:p>2129</text:p>
              </table:table-cell>
              <table:table-cell office:value-type="float" office:value="563.178344726563">
                <text:p>563.178344726563</text:p>
              </table:table-cell>
              <table:table-cell office:value-type="float" office:value="0.01439479">
                <text:p>0.01439479</text:p>
              </table:table-cell>
            </table:table-row>
            <table:table-row>
              <table:table-cell office:value-type="string">
                <text:p>2130</text:p>
              </table:table-cell>
              <table:table-cell office:value-type="float" office:value="563.29638671875">
                <text:p>563.29638671875</text:p>
              </table:table-cell>
              <table:table-cell office:value-type="float" office:value="-0.003721931">
                <text:p>-0.003721931</text:p>
              </table:table-cell>
            </table:table-row>
            <table:table-row>
              <table:table-cell office:value-type="string">
                <text:p>2131</text:p>
              </table:table-cell>
              <table:table-cell office:value-type="float" office:value="563.414489746094">
                <text:p>563.414489746094</text:p>
              </table:table-cell>
              <table:table-cell office:value-type="float" office:value="0.007621369">
                <text:p>0.007621369</text:p>
              </table:table-cell>
            </table:table-row>
            <table:table-row>
              <table:table-cell office:value-type="string">
                <text:p>2132</text:p>
              </table:table-cell>
              <table:table-cell office:value-type="float" office:value="563.532531738281">
                <text:p>563.532531738281</text:p>
              </table:table-cell>
              <table:table-cell office:value-type="float" office:value="0.01578031">
                <text:p>0.01578031</text:p>
              </table:table-cell>
            </table:table-row>
            <table:table-row>
              <table:table-cell office:value-type="string">
                <text:p>2133</text:p>
              </table:table-cell>
              <table:table-cell office:value-type="float" office:value="563.650634765625">
                <text:p>563.650634765625</text:p>
              </table:table-cell>
              <table:table-cell office:value-type="float" office:value="-0.002686039">
                <text:p>-0.002686039</text:p>
              </table:table-cell>
            </table:table-row>
            <table:table-row>
              <table:table-cell office:value-type="string">
                <text:p>2134</text:p>
              </table:table-cell>
              <table:table-cell office:value-type="float" office:value="563.768737792969">
                <text:p>563.768737792969</text:p>
              </table:table-cell>
              <table:table-cell office:value-type="float" office:value="-0.003433146">
                <text:p>-0.003433146</text:p>
              </table:table-cell>
            </table:table-row>
            <table:table-row>
              <table:table-cell office:value-type="string">
                <text:p>2135</text:p>
              </table:table-cell>
              <table:table-cell office:value-type="float" office:value="563.886779785156">
                <text:p>563.886779785156</text:p>
              </table:table-cell>
              <table:table-cell office:value-type="float" office:value="0.004661099">
                <text:p>0.004661099</text:p>
              </table:table-cell>
            </table:table-row>
            <table:table-row>
              <table:table-cell office:value-type="string">
                <text:p>2136</text:p>
              </table:table-cell>
              <table:table-cell office:value-type="float" office:value="564.0048828125">
                <text:p>564.0048828125</text:p>
              </table:table-cell>
              <table:table-cell office:value-type="float" office:value="-0.001719699">
                <text:p>-0.001719699</text:p>
              </table:table-cell>
            </table:table-row>
            <table:table-row>
              <table:table-cell office:value-type="string">
                <text:p>2137</text:p>
              </table:table-cell>
              <table:table-cell office:value-type="float" office:value="564.122985839844">
                <text:p>564.122985839844</text:p>
              </table:table-cell>
              <table:table-cell office:value-type="float" office:value="-0.00653011">
                <text:p>-0.00653011</text:p>
              </table:table-cell>
            </table:table-row>
            <table:table-row>
              <table:table-cell office:value-type="string">
                <text:p>2138</text:p>
              </table:table-cell>
              <table:table-cell office:value-type="float" office:value="564.241088867188">
                <text:p>564.241088867188</text:p>
              </table:table-cell>
              <table:table-cell office:value-type="float" office:value="0.01121446">
                <text:p>0.01121446</text:p>
              </table:table-cell>
            </table:table-row>
            <table:table-row>
              <table:table-cell office:value-type="string">
                <text:p>2139</text:p>
              </table:table-cell>
              <table:table-cell office:value-type="float" office:value="564.359191894531">
                <text:p>564.359191894531</text:p>
              </table:table-cell>
              <table:table-cell office:value-type="float" office:value="0.009801475">
                <text:p>0.009801475</text:p>
              </table:table-cell>
            </table:table-row>
            <table:table-row>
              <table:table-cell office:value-type="string">
                <text:p>2140</text:p>
              </table:table-cell>
              <table:table-cell office:value-type="float" office:value="564.477294921875">
                <text:p>564.477294921875</text:p>
              </table:table-cell>
              <table:table-cell office:value-type="float" office:value="0.003533794">
                <text:p>0.003533794</text:p>
              </table:table-cell>
            </table:table-row>
            <table:table-row>
              <table:table-cell office:value-type="string">
                <text:p>2141</text:p>
              </table:table-cell>
              <table:table-cell office:value-type="float" office:value="564.595397949219">
                <text:p>564.595397949219</text:p>
              </table:table-cell>
              <table:table-cell office:value-type="float" office:value="0.01003265">
                <text:p>0.01003265</text:p>
              </table:table-cell>
            </table:table-row>
            <table:table-row>
              <table:table-cell office:value-type="string">
                <text:p>2142</text:p>
              </table:table-cell>
              <table:table-cell office:value-type="float" office:value="564.713500976563">
                <text:p>564.713500976563</text:p>
              </table:table-cell>
              <table:table-cell office:value-type="float" office:value="0.03675501">
                <text:p>0.03675501</text:p>
              </table:table-cell>
            </table:table-row>
            <table:table-row>
              <table:table-cell office:value-type="string">
                <text:p>2143</text:p>
              </table:table-cell>
              <table:table-cell office:value-type="float" office:value="564.831604003906">
                <text:p>564.831604003906</text:p>
              </table:table-cell>
              <table:table-cell office:value-type="float" office:value="0.004248451">
                <text:p>0.004248451</text:p>
              </table:table-cell>
            </table:table-row>
            <table:table-row>
              <table:table-cell office:value-type="string">
                <text:p>2144</text:p>
              </table:table-cell>
              <table:table-cell office:value-type="float" office:value="564.949768066406">
                <text:p>564.949768066406</text:p>
              </table:table-cell>
              <table:table-cell office:value-type="float" office:value="0.006786022">
                <text:p>0.006786022</text:p>
              </table:table-cell>
            </table:table-row>
            <table:table-row>
              <table:table-cell office:value-type="string">
                <text:p>2145</text:p>
              </table:table-cell>
              <table:table-cell office:value-type="float" office:value="565.06787109375">
                <text:p>565.06787109375</text:p>
              </table:table-cell>
              <table:table-cell office:value-type="float" office:value="0.01262431">
                <text:p>0.01262431</text:p>
              </table:table-cell>
            </table:table-row>
            <table:table-row>
              <table:table-cell office:value-type="string">
                <text:p>2146</text:p>
              </table:table-cell>
              <table:table-cell office:value-type="float" office:value="565.185974121094">
                <text:p>565.185974121094</text:p>
              </table:table-cell>
              <table:table-cell office:value-type="float" office:value="0.00885351">
                <text:p>0.00885351</text:p>
              </table:table-cell>
            </table:table-row>
            <table:table-row>
              <table:table-cell office:value-type="string">
                <text:p>2147</text:p>
              </table:table-cell>
              <table:table-cell office:value-type="float" office:value="565.304077148438">
                <text:p>565.304077148438</text:p>
              </table:table-cell>
              <table:table-cell office:value-type="float" office:value="-0.003070716">
                <text:p>-0.003070716</text:p>
              </table:table-cell>
            </table:table-row>
            <table:table-row>
              <table:table-cell office:value-type="string">
                <text:p>2148</text:p>
              </table:table-cell>
              <table:table-cell office:value-type="float" office:value="565.422241210938">
                <text:p>565.422241210938</text:p>
              </table:table-cell>
              <table:table-cell office:value-type="float" office:value="0.005270809">
                <text:p>0.005270809</text:p>
              </table:table-cell>
            </table:table-row>
            <table:table-row>
              <table:table-cell office:value-type="string">
                <text:p>2149</text:p>
              </table:table-cell>
              <table:table-cell office:value-type="float" office:value="565.540344238281">
                <text:p>565.540344238281</text:p>
              </table:table-cell>
              <table:table-cell office:value-type="float" office:value="-0.0005017594">
                <text:p>-0.0005017594</text:p>
              </table:table-cell>
            </table:table-row>
            <table:table-row>
              <table:table-cell office:value-type="string">
                <text:p>2150</text:p>
              </table:table-cell>
              <table:table-cell office:value-type="float" office:value="565.658508300781">
                <text:p>565.658508300781</text:p>
              </table:table-cell>
              <table:table-cell office:value-type="float" office:value="0.01071688">
                <text:p>0.01071688</text:p>
              </table:table-cell>
            </table:table-row>
            <table:table-row>
              <table:table-cell office:value-type="string">
                <text:p>2151</text:p>
              </table:table-cell>
              <table:table-cell office:value-type="float" office:value="565.776611328125">
                <text:p>565.776611328125</text:p>
              </table:table-cell>
              <table:table-cell office:value-type="float" office:value="0.007453801">
                <text:p>0.007453801</text:p>
              </table:table-cell>
            </table:table-row>
            <table:table-row>
              <table:table-cell office:value-type="string">
                <text:p>2152</text:p>
              </table:table-cell>
              <table:table-cell office:value-type="float" office:value="565.894775390625">
                <text:p>565.894775390625</text:p>
              </table:table-cell>
              <table:table-cell office:value-type="float" office:value="0.01832343">
                <text:p>0.01832343</text:p>
              </table:table-cell>
            </table:table-row>
            <table:table-row>
              <table:table-cell office:value-type="string">
                <text:p>2153</text:p>
              </table:table-cell>
              <table:table-cell office:value-type="float" office:value="566.012878417969">
                <text:p>566.012878417969</text:p>
              </table:table-cell>
              <table:table-cell office:value-type="float" office:value="0.008019983">
                <text:p>0.008019983</text:p>
              </table:table-cell>
            </table:table-row>
            <table:table-row>
              <table:table-cell office:value-type="string">
                <text:p>2154</text:p>
              </table:table-cell>
              <table:table-cell office:value-type="float" office:value="566.131042480469">
                <text:p>566.131042480469</text:p>
              </table:table-cell>
              <table:table-cell office:value-type="float" office:value="0.006060471">
                <text:p>0.006060471</text:p>
              </table:table-cell>
            </table:table-row>
            <table:table-row>
              <table:table-cell office:value-type="string">
                <text:p>2155</text:p>
              </table:table-cell>
              <table:table-cell office:value-type="float" office:value="566.249206542969">
                <text:p>566.249206542969</text:p>
              </table:table-cell>
              <table:table-cell office:value-type="float" office:value="0.00814076">
                <text:p>0.00814076</text:p>
              </table:table-cell>
            </table:table-row>
            <table:table-row>
              <table:table-cell office:value-type="string">
                <text:p>2156</text:p>
              </table:table-cell>
              <table:table-cell office:value-type="float" office:value="566.367370605469">
                <text:p>566.367370605469</text:p>
              </table:table-cell>
              <table:table-cell office:value-type="float" office:value="0.01116513">
                <text:p>0.01116513</text:p>
              </table:table-cell>
            </table:table-row>
            <table:table-row>
              <table:table-cell office:value-type="string">
                <text:p>2157</text:p>
              </table:table-cell>
              <table:table-cell office:value-type="float" office:value="566.485473632813">
                <text:p>566.485473632813</text:p>
              </table:table-cell>
              <table:table-cell office:value-type="float" office:value="-0.001065365">
                <text:p>-0.001065365</text:p>
              </table:table-cell>
            </table:table-row>
            <table:table-row>
              <table:table-cell office:value-type="string">
                <text:p>2158</text:p>
              </table:table-cell>
              <table:table-cell office:value-type="float" office:value="566.603637695313">
                <text:p>566.603637695313</text:p>
              </table:table-cell>
              <table:table-cell office:value-type="float" office:value="0.02452376">
                <text:p>0.02452376</text:p>
              </table:table-cell>
            </table:table-row>
            <table:table-row>
              <table:table-cell office:value-type="string">
                <text:p>2159</text:p>
              </table:table-cell>
              <table:table-cell office:value-type="float" office:value="566.721801757813">
                <text:p>566.721801757813</text:p>
              </table:table-cell>
              <table:table-cell office:value-type="float" office:value="0.01094427">
                <text:p>0.01094427</text:p>
              </table:table-cell>
            </table:table-row>
            <table:table-row>
              <table:table-cell office:value-type="string">
                <text:p>2160</text:p>
              </table:table-cell>
              <table:table-cell office:value-type="float" office:value="566.839965820313">
                <text:p>566.839965820313</text:p>
              </table:table-cell>
              <table:table-cell office:value-type="float" office:value="0.005486497">
                <text:p>0.005486497</text:p>
              </table:table-cell>
            </table:table-row>
            <table:table-row>
              <table:table-cell office:value-type="string">
                <text:p>2161</text:p>
              </table:table-cell>
              <table:table-cell office:value-type="float" office:value="566.958129882813">
                <text:p>566.958129882813</text:p>
              </table:table-cell>
              <table:table-cell office:value-type="float" office:value="0.01367364">
                <text:p>0.01367364</text:p>
              </table:table-cell>
            </table:table-row>
            <table:table-row>
              <table:table-cell office:value-type="string">
                <text:p>2162</text:p>
              </table:table-cell>
              <table:table-cell office:value-type="float" office:value="567.076293945313">
                <text:p>567.076293945313</text:p>
              </table:table-cell>
              <table:table-cell office:value-type="float" office:value="0.02654258">
                <text:p>0.02654258</text:p>
              </table:table-cell>
            </table:table-row>
            <table:table-row>
              <table:table-cell office:value-type="string">
                <text:p>2163</text:p>
              </table:table-cell>
              <table:table-cell office:value-type="float" office:value="567.194458007813">
                <text:p>567.194458007813</text:p>
              </table:table-cell>
              <table:table-cell office:value-type="float" office:value="0.01760965">
                <text:p>0.01760965</text:p>
              </table:table-cell>
            </table:table-row>
            <table:table-row>
              <table:table-cell office:value-type="string">
                <text:p>2164</text:p>
              </table:table-cell>
              <table:table-cell office:value-type="float" office:value="567.312622070313">
                <text:p>567.312622070313</text:p>
              </table:table-cell>
              <table:table-cell office:value-type="float" office:value="0.01134522">
                <text:p>0.01134522</text:p>
              </table:table-cell>
            </table:table-row>
            <table:table-row>
              <table:table-cell office:value-type="string">
                <text:p>2165</text:p>
              </table:table-cell>
              <table:table-cell office:value-type="float" office:value="567.430847167969">
                <text:p>567.430847167969</text:p>
              </table:table-cell>
              <table:table-cell office:value-type="float" office:value="0.006451666">
                <text:p>0.006451666</text:p>
              </table:table-cell>
            </table:table-row>
            <table:table-row>
              <table:table-cell office:value-type="string">
                <text:p>2166</text:p>
              </table:table-cell>
              <table:table-cell office:value-type="float" office:value="567.549011230469">
                <text:p>567.549011230469</text:p>
              </table:table-cell>
              <table:table-cell office:value-type="float" office:value="0.02098036">
                <text:p>0.02098036</text:p>
              </table:table-cell>
            </table:table-row>
            <table:table-row>
              <table:table-cell office:value-type="string">
                <text:p>2167</text:p>
              </table:table-cell>
              <table:table-cell office:value-type="float" office:value="567.667175292969">
                <text:p>567.667175292969</text:p>
              </table:table-cell>
              <table:table-cell office:value-type="float" office:value="0.01327275">
                <text:p>0.01327275</text:p>
              </table:table-cell>
            </table:table-row>
            <table:table-row>
              <table:table-cell office:value-type="string">
                <text:p>2168</text:p>
              </table:table-cell>
              <table:table-cell office:value-type="float" office:value="567.785339355469">
                <text:p>567.785339355469</text:p>
              </table:table-cell>
              <table:table-cell office:value-type="float" office:value="0.0154693">
                <text:p>0.0154693</text:p>
              </table:table-cell>
            </table:table-row>
            <table:table-row>
              <table:table-cell office:value-type="string">
                <text:p>2169</text:p>
              </table:table-cell>
              <table:table-cell office:value-type="float" office:value="567.903564453125">
                <text:p>567.903564453125</text:p>
              </table:table-cell>
              <table:table-cell office:value-type="float" office:value="0.009262316">
                <text:p>0.009262316</text:p>
              </table:table-cell>
            </table:table-row>
            <table:table-row>
              <table:table-cell office:value-type="string">
                <text:p>2170</text:p>
              </table:table-cell>
              <table:table-cell office:value-type="float" office:value="568.021728515625">
                <text:p>568.021728515625</text:p>
              </table:table-cell>
              <table:table-cell office:value-type="float" office:value="0.03452197">
                <text:p>0.03452197</text:p>
              </table:table-cell>
            </table:table-row>
            <table:table-row>
              <table:table-cell office:value-type="string">
                <text:p>2171</text:p>
              </table:table-cell>
              <table:table-cell office:value-type="float" office:value="568.139953613281">
                <text:p>568.139953613281</text:p>
              </table:table-cell>
              <table:table-cell office:value-type="float" office:value="0.03630224">
                <text:p>0.03630224</text:p>
              </table:table-cell>
            </table:table-row>
            <table:table-row>
              <table:table-cell office:value-type="string">
                <text:p>2172</text:p>
              </table:table-cell>
              <table:table-cell office:value-type="float" office:value="568.258117675781">
                <text:p>568.258117675781</text:p>
              </table:table-cell>
              <table:table-cell office:value-type="float" office:value="0.004601407">
                <text:p>0.004601407</text:p>
              </table:table-cell>
            </table:table-row>
            <table:table-row>
              <table:table-cell office:value-type="string">
                <text:p>2173</text:p>
              </table:table-cell>
              <table:table-cell office:value-type="float" office:value="568.376342773438">
                <text:p>568.376342773438</text:p>
              </table:table-cell>
              <table:table-cell office:value-type="float" office:value="0.01019491">
                <text:p>0.01019491</text:p>
              </table:table-cell>
            </table:table-row>
            <table:table-row>
              <table:table-cell office:value-type="string">
                <text:p>2174</text:p>
              </table:table-cell>
              <table:table-cell office:value-type="float" office:value="568.494506835938">
                <text:p>568.494506835938</text:p>
              </table:table-cell>
              <table:table-cell office:value-type="float" office:value="0.02058775">
                <text:p>0.02058775</text:p>
              </table:table-cell>
            </table:table-row>
            <table:table-row>
              <table:table-cell office:value-type="string">
                <text:p>2175</text:p>
              </table:table-cell>
              <table:table-cell office:value-type="float" office:value="568.612731933594">
                <text:p>568.612731933594</text:p>
              </table:table-cell>
              <table:table-cell office:value-type="float" office:value="0.02114812">
                <text:p>0.02114812</text:p>
              </table:table-cell>
            </table:table-row>
            <table:table-row>
              <table:table-cell office:value-type="string">
                <text:p>2176</text:p>
              </table:table-cell>
              <table:table-cell office:value-type="float" office:value="568.73095703125">
                <text:p>568.73095703125</text:p>
              </table:table-cell>
              <table:table-cell office:value-type="float" office:value="-0.0005680143">
                <text:p>-0.0005680143</text:p>
              </table:table-cell>
            </table:table-row>
            <table:table-row>
              <table:table-cell office:value-type="string">
                <text:p>2177</text:p>
              </table:table-cell>
              <table:table-cell office:value-type="float" office:value="568.84912109375">
                <text:p>568.84912109375</text:p>
              </table:table-cell>
              <table:table-cell office:value-type="float" office:value="0.01680195">
                <text:p>0.01680195</text:p>
              </table:table-cell>
            </table:table-row>
            <table:table-row>
              <table:table-cell office:value-type="string">
                <text:p>2178</text:p>
              </table:table-cell>
              <table:table-cell office:value-type="float" office:value="568.967346191406">
                <text:p>568.967346191406</text:p>
              </table:table-cell>
              <table:table-cell office:value-type="float" office:value="0.0197243">
                <text:p>0.0197243</text:p>
              </table:table-cell>
            </table:table-row>
            <table:table-row>
              <table:table-cell office:value-type="string">
                <text:p>2179</text:p>
              </table:table-cell>
              <table:table-cell office:value-type="float" office:value="569.085571289063">
                <text:p>569.085571289063</text:p>
              </table:table-cell>
              <table:table-cell office:value-type="float" office:value="0.0311477">
                <text:p>0.0311477</text:p>
              </table:table-cell>
            </table:table-row>
            <table:table-row>
              <table:table-cell office:value-type="string">
                <text:p>2180</text:p>
              </table:table-cell>
              <table:table-cell office:value-type="float" office:value="569.203796386719">
                <text:p>569.203796386719</text:p>
              </table:table-cell>
              <table:table-cell office:value-type="float" office:value="0.002380025">
                <text:p>0.002380025</text:p>
              </table:table-cell>
            </table:table-row>
            <table:table-row>
              <table:table-cell office:value-type="string">
                <text:p>2181</text:p>
              </table:table-cell>
              <table:table-cell office:value-type="float" office:value="569.322021484375">
                <text:p>569.322021484375</text:p>
              </table:table-cell>
              <table:table-cell office:value-type="float" office:value="0.01554163">
                <text:p>0.01554163</text:p>
              </table:table-cell>
            </table:table-row>
            <table:table-row>
              <table:table-cell office:value-type="string">
                <text:p>2182</text:p>
              </table:table-cell>
              <table:table-cell office:value-type="float" office:value="569.440246582031">
                <text:p>569.440246582031</text:p>
              </table:table-cell>
              <table:table-cell office:value-type="float" office:value="0.01698428">
                <text:p>0.01698428</text:p>
              </table:table-cell>
            </table:table-row>
            <table:table-row>
              <table:table-cell office:value-type="string">
                <text:p>2183</text:p>
              </table:table-cell>
              <table:table-cell office:value-type="float" office:value="569.558471679688">
                <text:p>569.558471679688</text:p>
              </table:table-cell>
              <table:table-cell office:value-type="float" office:value="0.02354242">
                <text:p>0.02354242</text:p>
              </table:table-cell>
            </table:table-row>
            <table:table-row>
              <table:table-cell office:value-type="string">
                <text:p>2184</text:p>
              </table:table-cell>
              <table:table-cell office:value-type="float" office:value="569.676696777344">
                <text:p>569.676696777344</text:p>
              </table:table-cell>
              <table:table-cell office:value-type="float" office:value="0.01657418">
                <text:p>0.01657418</text:p>
              </table:table-cell>
            </table:table-row>
            <table:table-row>
              <table:table-cell office:value-type="string">
                <text:p>2185</text:p>
              </table:table-cell>
              <table:table-cell office:value-type="float" office:value="569.794921875">
                <text:p>569.794921875</text:p>
              </table:table-cell>
              <table:table-cell office:value-type="float" office:value="0.006413321">
                <text:p>0.006413321</text:p>
              </table:table-cell>
            </table:table-row>
            <table:table-row>
              <table:table-cell office:value-type="string">
                <text:p>2186</text:p>
              </table:table-cell>
              <table:table-cell office:value-type="float" office:value="569.913146972656">
                <text:p>569.913146972656</text:p>
              </table:table-cell>
              <table:table-cell office:value-type="float" office:value="0.005457285">
                <text:p>0.005457285</text:p>
              </table:table-cell>
            </table:table-row>
            <table:table-row>
              <table:table-cell office:value-type="string">
                <text:p>2187</text:p>
              </table:table-cell>
              <table:table-cell office:value-type="float" office:value="570.031372070313">
                <text:p>570.031372070313</text:p>
              </table:table-cell>
              <table:table-cell office:value-type="float" office:value="0.01265597">
                <text:p>0.01265597</text:p>
              </table:table-cell>
            </table:table-row>
            <table:table-row>
              <table:table-cell office:value-type="string">
                <text:p>2188</text:p>
              </table:table-cell>
              <table:table-cell office:value-type="float" office:value="570.149597167969">
                <text:p>570.149597167969</text:p>
              </table:table-cell>
              <table:table-cell office:value-type="float" office:value="0.01526569">
                <text:p>0.01526569</text:p>
              </table:table-cell>
            </table:table-row>
            <table:table-row>
              <table:table-cell office:value-type="string">
                <text:p>2189</text:p>
              </table:table-cell>
              <table:table-cell office:value-type="float" office:value="570.267883300781">
                <text:p>570.267883300781</text:p>
              </table:table-cell>
              <table:table-cell office:value-type="float" office:value="0.001724071">
                <text:p>0.001724071</text:p>
              </table:table-cell>
            </table:table-row>
            <table:table-row>
              <table:table-cell office:value-type="string">
                <text:p>2190</text:p>
              </table:table-cell>
              <table:table-cell office:value-type="float" office:value="570.386108398438">
                <text:p>570.386108398438</text:p>
              </table:table-cell>
              <table:table-cell office:value-type="float" office:value="0.01345213">
                <text:p>0.01345213</text:p>
              </table:table-cell>
            </table:table-row>
            <table:table-row>
              <table:table-cell office:value-type="string">
                <text:p>2191</text:p>
              </table:table-cell>
              <table:table-cell office:value-type="float" office:value="570.504333496094">
                <text:p>570.504333496094</text:p>
              </table:table-cell>
              <table:table-cell office:value-type="float" office:value="0.02652727">
                <text:p>0.02652727</text:p>
              </table:table-cell>
            </table:table-row>
            <table:table-row>
              <table:table-cell office:value-type="string">
                <text:p>2192</text:p>
              </table:table-cell>
              <table:table-cell office:value-type="float" office:value="570.622619628906">
                <text:p>570.622619628906</text:p>
              </table:table-cell>
              <table:table-cell office:value-type="float" office:value="0.02779332">
                <text:p>0.02779332</text:p>
              </table:table-cell>
            </table:table-row>
            <table:table-row>
              <table:table-cell office:value-type="string">
                <text:p>2193</text:p>
              </table:table-cell>
              <table:table-cell office:value-type="float" office:value="570.740844726563">
                <text:p>570.740844726563</text:p>
              </table:table-cell>
              <table:table-cell office:value-type="float" office:value="0.01262966">
                <text:p>0.01262966</text:p>
              </table:table-cell>
            </table:table-row>
            <table:table-row>
              <table:table-cell office:value-type="string">
                <text:p>2194</text:p>
              </table:table-cell>
              <table:table-cell office:value-type="float" office:value="570.859130859375">
                <text:p>570.859130859375</text:p>
              </table:table-cell>
              <table:table-cell office:value-type="float" office:value="0.01046282">
                <text:p>0.01046282</text:p>
              </table:table-cell>
            </table:table-row>
            <table:table-row>
              <table:table-cell office:value-type="string">
                <text:p>2195</text:p>
              </table:table-cell>
              <table:table-cell office:value-type="float" office:value="570.977355957031">
                <text:p>570.977355957031</text:p>
              </table:table-cell>
              <table:table-cell office:value-type="float" office:value="0.01829056">
                <text:p>0.01829056</text:p>
              </table:table-cell>
            </table:table-row>
            <table:table-row>
              <table:table-cell office:value-type="string">
                <text:p>2196</text:p>
              </table:table-cell>
              <table:table-cell office:value-type="float" office:value="571.095642089844">
                <text:p>571.095642089844</text:p>
              </table:table-cell>
              <table:table-cell office:value-type="float" office:value="0.008590775">
                <text:p>0.008590775</text:p>
              </table:table-cell>
            </table:table-row>
            <table:table-row>
              <table:table-cell office:value-type="string">
                <text:p>2197</text:p>
              </table:table-cell>
              <table:table-cell office:value-type="float" office:value="571.213928222656">
                <text:p>571.213928222656</text:p>
              </table:table-cell>
              <table:table-cell office:value-type="float" office:value="0.01696561">
                <text:p>0.01696561</text:p>
              </table:table-cell>
            </table:table-row>
            <table:table-row>
              <table:table-cell office:value-type="string">
                <text:p>2198</text:p>
              </table:table-cell>
              <table:table-cell office:value-type="float" office:value="571.332153320313">
                <text:p>571.332153320313</text:p>
              </table:table-cell>
              <table:table-cell office:value-type="float" office:value="0.01938187">
                <text:p>0.01938187</text:p>
              </table:table-cell>
            </table:table-row>
            <table:table-row>
              <table:table-cell office:value-type="string">
                <text:p>2199</text:p>
              </table:table-cell>
              <table:table-cell office:value-type="float" office:value="571.450439453125">
                <text:p>571.450439453125</text:p>
              </table:table-cell>
              <table:table-cell office:value-type="float" office:value="0.01826726">
                <text:p>0.01826726</text:p>
              </table:table-cell>
            </table:table-row>
            <table:table-row>
              <table:table-cell office:value-type="string">
                <text:p>2200</text:p>
              </table:table-cell>
              <table:table-cell office:value-type="float" office:value="571.568725585938">
                <text:p>571.568725585938</text:p>
              </table:table-cell>
              <table:table-cell office:value-type="float" office:value="0.008051809">
                <text:p>0.008051809</text:p>
              </table:table-cell>
            </table:table-row>
            <table:table-row>
              <table:table-cell office:value-type="string">
                <text:p>2201</text:p>
              </table:table-cell>
              <table:table-cell office:value-type="float" office:value="571.68701171875">
                <text:p>571.68701171875</text:p>
              </table:table-cell>
              <table:table-cell office:value-type="float" office:value="0.02454633">
                <text:p>0.02454633</text:p>
              </table:table-cell>
            </table:table-row>
            <table:table-row>
              <table:table-cell office:value-type="string">
                <text:p>2202</text:p>
              </table:table-cell>
              <table:table-cell office:value-type="float" office:value="571.805297851563">
                <text:p>571.805297851563</text:p>
              </table:table-cell>
              <table:table-cell office:value-type="float" office:value="0.01357776">
                <text:p>0.01357776</text:p>
              </table:table-cell>
            </table:table-row>
            <table:table-row>
              <table:table-cell office:value-type="string">
                <text:p>2203</text:p>
              </table:table-cell>
              <table:table-cell office:value-type="float" office:value="571.923583984375">
                <text:p>571.923583984375</text:p>
              </table:table-cell>
              <table:table-cell office:value-type="float" office:value="0.03554651">
                <text:p>0.03554651</text:p>
              </table:table-cell>
            </table:table-row>
            <table:table-row>
              <table:table-cell office:value-type="string">
                <text:p>2204</text:p>
              </table:table-cell>
              <table:table-cell office:value-type="float" office:value="572.041870117188">
                <text:p>572.041870117188</text:p>
              </table:table-cell>
              <table:table-cell office:value-type="float" office:value="0.01491808">
                <text:p>0.01491808</text:p>
              </table:table-cell>
            </table:table-row>
            <table:table-row>
              <table:table-cell office:value-type="string">
                <text:p>2205</text:p>
              </table:table-cell>
              <table:table-cell office:value-type="float" office:value="572.16015625">
                <text:p>572.16015625</text:p>
              </table:table-cell>
              <table:table-cell office:value-type="float" office:value="0.02705599">
                <text:p>0.02705599</text:p>
              </table:table-cell>
            </table:table-row>
            <table:table-row>
              <table:table-cell office:value-type="string">
                <text:p>2206</text:p>
              </table:table-cell>
              <table:table-cell office:value-type="float" office:value="572.278442382813">
                <text:p>572.278442382813</text:p>
              </table:table-cell>
              <table:table-cell office:value-type="float" office:value="0.01453923">
                <text:p>0.01453923</text:p>
              </table:table-cell>
            </table:table-row>
            <table:table-row>
              <table:table-cell office:value-type="string">
                <text:p>2207</text:p>
              </table:table-cell>
              <table:table-cell office:value-type="float" office:value="572.396728515625">
                <text:p>572.396728515625</text:p>
              </table:table-cell>
              <table:table-cell office:value-type="float" office:value="0.01393111">
                <text:p>0.01393111</text:p>
              </table:table-cell>
            </table:table-row>
            <table:table-row>
              <table:table-cell office:value-type="string">
                <text:p>2208</text:p>
              </table:table-cell>
              <table:table-cell office:value-type="float" office:value="572.515014648438">
                <text:p>572.515014648438</text:p>
              </table:table-cell>
              <table:table-cell office:value-type="float" office:value="0.0120483">
                <text:p>0.0120483</text:p>
              </table:table-cell>
            </table:table-row>
            <table:table-row>
              <table:table-cell office:value-type="string">
                <text:p>2209</text:p>
              </table:table-cell>
              <table:table-cell office:value-type="float" office:value="572.63330078125">
                <text:p>572.63330078125</text:p>
              </table:table-cell>
              <table:table-cell office:value-type="float" office:value="0.01733471">
                <text:p>0.01733471</text:p>
              </table:table-cell>
            </table:table-row>
            <table:table-row>
              <table:table-cell office:value-type="string">
                <text:p>2210</text:p>
              </table:table-cell>
              <table:table-cell office:value-type="float" office:value="572.751586914063">
                <text:p>572.751586914063</text:p>
              </table:table-cell>
              <table:table-cell office:value-type="float" office:value="0.02425522">
                <text:p>0.02425522</text:p>
              </table:table-cell>
            </table:table-row>
            <table:table-row>
              <table:table-cell office:value-type="string">
                <text:p>2211</text:p>
              </table:table-cell>
              <table:table-cell office:value-type="float" office:value="572.869934082031">
                <text:p>572.869934082031</text:p>
              </table:table-cell>
              <table:table-cell office:value-type="float" office:value="0.01284584">
                <text:p>0.01284584</text:p>
              </table:table-cell>
            </table:table-row>
            <table:table-row>
              <table:table-cell office:value-type="string">
                <text:p>2212</text:p>
              </table:table-cell>
              <table:table-cell office:value-type="float" office:value="572.988220214844">
                <text:p>572.988220214844</text:p>
              </table:table-cell>
              <table:table-cell office:value-type="float" office:value="0.01208161">
                <text:p>0.01208161</text:p>
              </table:table-cell>
            </table:table-row>
            <table:table-row>
              <table:table-cell office:value-type="string">
                <text:p>2213</text:p>
              </table:table-cell>
              <table:table-cell office:value-type="float" office:value="573.106506347656">
                <text:p>573.106506347656</text:p>
              </table:table-cell>
              <table:table-cell office:value-type="float" office:value="0.02446262">
                <text:p>0.02446262</text:p>
              </table:table-cell>
            </table:table-row>
            <table:table-row>
              <table:table-cell office:value-type="string">
                <text:p>2214</text:p>
              </table:table-cell>
              <table:table-cell office:value-type="float" office:value="573.224853515625">
                <text:p>573.224853515625</text:p>
              </table:table-cell>
              <table:table-cell office:value-type="float" office:value="0.01775305">
                <text:p>0.01775305</text:p>
              </table:table-cell>
            </table:table-row>
            <table:table-row>
              <table:table-cell office:value-type="string">
                <text:p>2215</text:p>
              </table:table-cell>
              <table:table-cell office:value-type="float" office:value="573.343139648438">
                <text:p>573.343139648438</text:p>
              </table:table-cell>
              <table:table-cell office:value-type="float" office:value="0.01954619">
                <text:p>0.01954619</text:p>
              </table:table-cell>
            </table:table-row>
            <table:table-row>
              <table:table-cell office:value-type="string">
                <text:p>2216</text:p>
              </table:table-cell>
              <table:table-cell office:value-type="float" office:value="573.461486816406">
                <text:p>573.461486816406</text:p>
              </table:table-cell>
              <table:table-cell office:value-type="float" office:value="0.02789421">
                <text:p>0.02789421</text:p>
              </table:table-cell>
            </table:table-row>
            <table:table-row>
              <table:table-cell office:value-type="string">
                <text:p>2217</text:p>
              </table:table-cell>
              <table:table-cell office:value-type="float" office:value="573.579772949219">
                <text:p>573.579772949219</text:p>
              </table:table-cell>
              <table:table-cell office:value-type="float" office:value="0.01893836">
                <text:p>0.01893836</text:p>
              </table:table-cell>
            </table:table-row>
            <table:table-row>
              <table:table-cell office:value-type="string">
                <text:p>2218</text:p>
              </table:table-cell>
              <table:table-cell office:value-type="float" office:value="573.698120117188">
                <text:p>573.698120117188</text:p>
              </table:table-cell>
              <table:table-cell office:value-type="float" office:value="0.02485241">
                <text:p>0.02485241</text:p>
              </table:table-cell>
            </table:table-row>
            <table:table-row>
              <table:table-cell office:value-type="string">
                <text:p>2219</text:p>
              </table:table-cell>
              <table:table-cell office:value-type="float" office:value="573.81640625">
                <text:p>573.81640625</text:p>
              </table:table-cell>
              <table:table-cell office:value-type="float" office:value="0.01793671">
                <text:p>0.01793671</text:p>
              </table:table-cell>
            </table:table-row>
            <table:table-row>
              <table:table-cell office:value-type="string">
                <text:p>2220</text:p>
              </table:table-cell>
              <table:table-cell office:value-type="float" office:value="573.934753417969">
                <text:p>573.934753417969</text:p>
              </table:table-cell>
              <table:table-cell office:value-type="float" office:value="0.02161399">
                <text:p>0.02161399</text:p>
              </table:table-cell>
            </table:table-row>
            <table:table-row>
              <table:table-cell office:value-type="string">
                <text:p>2221</text:p>
              </table:table-cell>
              <table:table-cell office:value-type="float" office:value="574.053100585938">
                <text:p>574.053100585938</text:p>
              </table:table-cell>
              <table:table-cell office:value-type="float" office:value="0.01798413">
                <text:p>0.01798413</text:p>
              </table:table-cell>
            </table:table-row>
            <table:table-row>
              <table:table-cell office:value-type="string">
                <text:p>2222</text:p>
              </table:table-cell>
              <table:table-cell office:value-type="float" office:value="574.171447753906">
                <text:p>574.171447753906</text:p>
              </table:table-cell>
              <table:table-cell office:value-type="float" office:value="0.01987418">
                <text:p>0.01987418</text:p>
              </table:table-cell>
            </table:table-row>
            <table:table-row>
              <table:table-cell office:value-type="string">
                <text:p>2223</text:p>
              </table:table-cell>
              <table:table-cell office:value-type="float" office:value="574.289733886719">
                <text:p>574.289733886719</text:p>
              </table:table-cell>
              <table:table-cell office:value-type="float" office:value="0.0186566">
                <text:p>0.0186566</text:p>
              </table:table-cell>
            </table:table-row>
            <table:table-row>
              <table:table-cell office:value-type="string">
                <text:p>2224</text:p>
              </table:table-cell>
              <table:table-cell office:value-type="float" office:value="574.408081054688">
                <text:p>574.408081054688</text:p>
              </table:table-cell>
              <table:table-cell office:value-type="float" office:value="0.02730194">
                <text:p>0.02730194</text:p>
              </table:table-cell>
            </table:table-row>
            <table:table-row>
              <table:table-cell office:value-type="string">
                <text:p>2225</text:p>
              </table:table-cell>
              <table:table-cell office:value-type="float" office:value="574.526428222656">
                <text:p>574.526428222656</text:p>
              </table:table-cell>
              <table:table-cell office:value-type="float" office:value="0.02677056">
                <text:p>0.02677056</text:p>
              </table:table-cell>
            </table:table-row>
            <table:table-row>
              <table:table-cell office:value-type="string">
                <text:p>2226</text:p>
              </table:table-cell>
              <table:table-cell office:value-type="float" office:value="574.644775390625">
                <text:p>574.644775390625</text:p>
              </table:table-cell>
              <table:table-cell office:value-type="float" office:value="0.02702999">
                <text:p>0.02702999</text:p>
              </table:table-cell>
            </table:table-row>
            <table:table-row>
              <table:table-cell office:value-type="string">
                <text:p>2227</text:p>
              </table:table-cell>
              <table:table-cell office:value-type="float" office:value="574.763122558594">
                <text:p>574.763122558594</text:p>
              </table:table-cell>
              <table:table-cell office:value-type="float" office:value="0.02926317">
                <text:p>0.02926317</text:p>
              </table:table-cell>
            </table:table-row>
            <table:table-row>
              <table:table-cell office:value-type="string">
                <text:p>2228</text:p>
              </table:table-cell>
              <table:table-cell office:value-type="float" office:value="574.881469726563">
                <text:p>574.881469726563</text:p>
              </table:table-cell>
              <table:table-cell office:value-type="float" office:value="0.03181193">
                <text:p>0.03181193</text:p>
              </table:table-cell>
            </table:table-row>
            <table:table-row>
              <table:table-cell office:value-type="string">
                <text:p>2229</text:p>
              </table:table-cell>
              <table:table-cell office:value-type="float" office:value="574.999816894531">
                <text:p>574.999816894531</text:p>
              </table:table-cell>
              <table:table-cell office:value-type="float" office:value="0.02178904">
                <text:p>0.02178904</text:p>
              </table:table-cell>
            </table:table-row>
            <table:table-row>
              <table:table-cell office:value-type="string">
                <text:p>2230</text:p>
              </table:table-cell>
              <table:table-cell office:value-type="float" office:value="575.1181640625">
                <text:p>575.1181640625</text:p>
              </table:table-cell>
              <table:table-cell office:value-type="float" office:value="0.04507702">
                <text:p>0.04507702</text:p>
              </table:table-cell>
            </table:table-row>
            <table:table-row>
              <table:table-cell office:value-type="string">
                <text:p>2231</text:p>
              </table:table-cell>
              <table:table-cell office:value-type="float" office:value="575.236572265625">
                <text:p>575.236572265625</text:p>
              </table:table-cell>
              <table:table-cell office:value-type="float" office:value="0.02210472">
                <text:p>0.02210472</text:p>
              </table:table-cell>
            </table:table-row>
            <table:table-row>
              <table:table-cell office:value-type="string">
                <text:p>2232</text:p>
              </table:table-cell>
              <table:table-cell office:value-type="float" office:value="575.354919433594">
                <text:p>575.354919433594</text:p>
              </table:table-cell>
              <table:table-cell office:value-type="float" office:value="0.03749003">
                <text:p>0.03749003</text:p>
              </table:table-cell>
            </table:table-row>
            <table:table-row>
              <table:table-cell office:value-type="string">
                <text:p>2233</text:p>
              </table:table-cell>
              <table:table-cell office:value-type="float" office:value="575.473266601563">
                <text:p>575.473266601563</text:p>
              </table:table-cell>
              <table:table-cell office:value-type="float" office:value="0.02231448">
                <text:p>0.02231448</text:p>
              </table:table-cell>
            </table:table-row>
            <table:table-row>
              <table:table-cell office:value-type="string">
                <text:p>2234</text:p>
              </table:table-cell>
              <table:table-cell office:value-type="float" office:value="575.591613769531">
                <text:p>575.591613769531</text:p>
              </table:table-cell>
              <table:table-cell office:value-type="float" office:value="0.02227305">
                <text:p>0.02227305</text:p>
              </table:table-cell>
            </table:table-row>
            <table:table-row>
              <table:table-cell office:value-type="string">
                <text:p>2235</text:p>
              </table:table-cell>
              <table:table-cell office:value-type="float" office:value="575.710021972656">
                <text:p>575.710021972656</text:p>
              </table:table-cell>
              <table:table-cell office:value-type="float" office:value="0.02377392">
                <text:p>0.02377392</text:p>
              </table:table-cell>
            </table:table-row>
            <table:table-row>
              <table:table-cell office:value-type="string">
                <text:p>2236</text:p>
              </table:table-cell>
              <table:table-cell office:value-type="float" office:value="575.828369140625">
                <text:p>575.828369140625</text:p>
              </table:table-cell>
              <table:table-cell office:value-type="float" office:value="0.02513613">
                <text:p>0.02513613</text:p>
              </table:table-cell>
            </table:table-row>
            <table:table-row>
              <table:table-cell office:value-type="string">
                <text:p>2237</text:p>
              </table:table-cell>
              <table:table-cell office:value-type="float" office:value="575.94677734375">
                <text:p>575.94677734375</text:p>
              </table:table-cell>
              <table:table-cell office:value-type="float" office:value="0.03384813">
                <text:p>0.03384813</text:p>
              </table:table-cell>
            </table:table-row>
            <table:table-row>
              <table:table-cell office:value-type="string">
                <text:p>2238</text:p>
              </table:table-cell>
              <table:table-cell office:value-type="float" office:value="576.065124511719">
                <text:p>576.065124511719</text:p>
              </table:table-cell>
              <table:table-cell office:value-type="float" office:value="0.03229728">
                <text:p>0.03229728</text:p>
              </table:table-cell>
            </table:table-row>
            <table:table-row>
              <table:table-cell office:value-type="string">
                <text:p>2239</text:p>
              </table:table-cell>
              <table:table-cell office:value-type="float" office:value="576.183532714844">
                <text:p>576.183532714844</text:p>
              </table:table-cell>
              <table:table-cell office:value-type="float" office:value="0.02404959">
                <text:p>0.02404959</text:p>
              </table:table-cell>
            </table:table-row>
            <table:table-row>
              <table:table-cell office:value-type="string">
                <text:p>2240</text:p>
              </table:table-cell>
              <table:table-cell office:value-type="float" office:value="576.301879882813">
                <text:p>576.301879882813</text:p>
              </table:table-cell>
              <table:table-cell office:value-type="float" office:value="0.03824266">
                <text:p>0.03824266</text:p>
              </table:table-cell>
            </table:table-row>
            <table:table-row>
              <table:table-cell office:value-type="string">
                <text:p>2241</text:p>
              </table:table-cell>
              <table:table-cell office:value-type="float" office:value="576.420288085938">
                <text:p>576.420288085938</text:p>
              </table:table-cell>
              <table:table-cell office:value-type="float" office:value="0.0403163">
                <text:p>0.0403163</text:p>
              </table:table-cell>
            </table:table-row>
            <table:table-row>
              <table:table-cell office:value-type="string">
                <text:p>2242</text:p>
              </table:table-cell>
              <table:table-cell office:value-type="float" office:value="576.538635253906">
                <text:p>576.538635253906</text:p>
              </table:table-cell>
              <table:table-cell office:value-type="float" office:value="0.02883597">
                <text:p>0.02883597</text:p>
              </table:table-cell>
            </table:table-row>
            <table:table-row>
              <table:table-cell office:value-type="string">
                <text:p>2243</text:p>
              </table:table-cell>
              <table:table-cell office:value-type="float" office:value="576.657043457031">
                <text:p>576.657043457031</text:p>
              </table:table-cell>
              <table:table-cell office:value-type="float" office:value="0.04481611">
                <text:p>0.04481611</text:p>
              </table:table-cell>
            </table:table-row>
            <table:table-row>
              <table:table-cell office:value-type="string">
                <text:p>2244</text:p>
              </table:table-cell>
              <table:table-cell office:value-type="float" office:value="576.775451660156">
                <text:p>576.775451660156</text:p>
              </table:table-cell>
              <table:table-cell office:value-type="float" office:value="0.02550036">
                <text:p>0.02550036</text:p>
              </table:table-cell>
            </table:table-row>
            <table:table-row>
              <table:table-cell office:value-type="string">
                <text:p>2245</text:p>
              </table:table-cell>
              <table:table-cell office:value-type="float" office:value="576.893859863281">
                <text:p>576.893859863281</text:p>
              </table:table-cell>
              <table:table-cell office:value-type="float" office:value="0.0309416">
                <text:p>0.0309416</text:p>
              </table:table-cell>
            </table:table-row>
            <table:table-row>
              <table:table-cell office:value-type="string">
                <text:p>2246</text:p>
              </table:table-cell>
              <table:table-cell office:value-type="float" office:value="577.012268066406">
                <text:p>577.012268066406</text:p>
              </table:table-cell>
              <table:table-cell office:value-type="float" office:value="0.04199861">
                <text:p>0.04199861</text:p>
              </table:table-cell>
            </table:table-row>
            <table:table-row>
              <table:table-cell office:value-type="string">
                <text:p>2247</text:p>
              </table:table-cell>
              <table:table-cell office:value-type="float" office:value="577.130615234375">
                <text:p>577.130615234375</text:p>
              </table:table-cell>
              <table:table-cell office:value-type="float" office:value="0.03573779">
                <text:p>0.03573779</text:p>
              </table:table-cell>
            </table:table-row>
            <table:table-row>
              <table:table-cell office:value-type="string">
                <text:p>2248</text:p>
              </table:table-cell>
              <table:table-cell office:value-type="float" office:value="577.2490234375">
                <text:p>577.2490234375</text:p>
              </table:table-cell>
              <table:table-cell office:value-type="float" office:value="0.04007959">
                <text:p>0.04007959</text:p>
              </table:table-cell>
            </table:table-row>
            <table:table-row>
              <table:table-cell office:value-type="string">
                <text:p>2249</text:p>
              </table:table-cell>
              <table:table-cell office:value-type="float" office:value="577.367431640625">
                <text:p>577.367431640625</text:p>
              </table:table-cell>
              <table:table-cell office:value-type="float" office:value="0.02690662">
                <text:p>0.02690662</text:p>
              </table:table-cell>
            </table:table-row>
            <table:table-row>
              <table:table-cell office:value-type="string">
                <text:p>2250</text:p>
              </table:table-cell>
              <table:table-cell office:value-type="float" office:value="577.48583984375">
                <text:p>577.48583984375</text:p>
              </table:table-cell>
              <table:table-cell office:value-type="float" office:value="0.04068393">
                <text:p>0.04068393</text:p>
              </table:table-cell>
            </table:table-row>
            <table:table-row>
              <table:table-cell office:value-type="string">
                <text:p>2251</text:p>
              </table:table-cell>
              <table:table-cell office:value-type="float" office:value="577.604248046875">
                <text:p>577.604248046875</text:p>
              </table:table-cell>
              <table:table-cell office:value-type="float" office:value="0.02842202">
                <text:p>0.02842202</text:p>
              </table:table-cell>
            </table:table-row>
            <table:table-row>
              <table:table-cell office:value-type="string">
                <text:p>2252</text:p>
              </table:table-cell>
              <table:table-cell office:value-type="float" office:value="577.722717285156">
                <text:p>577.722717285156</text:p>
              </table:table-cell>
              <table:table-cell office:value-type="float" office:value="0.03232991">
                <text:p>0.03232991</text:p>
              </table:table-cell>
            </table:table-row>
            <table:table-row>
              <table:table-cell office:value-type="string">
                <text:p>2253</text:p>
              </table:table-cell>
              <table:table-cell office:value-type="float" office:value="577.841125488281">
                <text:p>577.841125488281</text:p>
              </table:table-cell>
              <table:table-cell office:value-type="float" office:value="0.03692088">
                <text:p>0.03692088</text:p>
              </table:table-cell>
            </table:table-row>
            <table:table-row>
              <table:table-cell office:value-type="string">
                <text:p>2254</text:p>
              </table:table-cell>
              <table:table-cell office:value-type="float" office:value="577.959533691406">
                <text:p>577.959533691406</text:p>
              </table:table-cell>
              <table:table-cell office:value-type="float" office:value="0.03234201">
                <text:p>0.03234201</text:p>
              </table:table-cell>
            </table:table-row>
            <table:table-row>
              <table:table-cell office:value-type="string">
                <text:p>2255</text:p>
              </table:table-cell>
              <table:table-cell office:value-type="float" office:value="578.077941894531">
                <text:p>578.077941894531</text:p>
              </table:table-cell>
              <table:table-cell office:value-type="float" office:value="0.05183181">
                <text:p>0.05183181</text:p>
              </table:table-cell>
            </table:table-row>
            <table:table-row>
              <table:table-cell office:value-type="string">
                <text:p>2256</text:p>
              </table:table-cell>
              <table:table-cell office:value-type="float" office:value="578.196350097656">
                <text:p>578.196350097656</text:p>
              </table:table-cell>
              <table:table-cell office:value-type="float" office:value="0.03460188">
                <text:p>0.03460188</text:p>
              </table:table-cell>
            </table:table-row>
            <table:table-row>
              <table:table-cell office:value-type="string">
                <text:p>2257</text:p>
              </table:table-cell>
              <table:table-cell office:value-type="float" office:value="578.314819335938">
                <text:p>578.314819335938</text:p>
              </table:table-cell>
              <table:table-cell office:value-type="float" office:value="0.03483243">
                <text:p>0.03483243</text:p>
              </table:table-cell>
            </table:table-row>
            <table:table-row>
              <table:table-cell office:value-type="string">
                <text:p>2258</text:p>
              </table:table-cell>
              <table:table-cell office:value-type="float" office:value="578.433227539063">
                <text:p>578.433227539063</text:p>
              </table:table-cell>
              <table:table-cell office:value-type="float" office:value="0.03737918">
                <text:p>0.03737918</text:p>
              </table:table-cell>
            </table:table-row>
            <table:table-row>
              <table:table-cell office:value-type="string">
                <text:p>2259</text:p>
              </table:table-cell>
              <table:table-cell office:value-type="float" office:value="578.551635742188">
                <text:p>578.551635742188</text:p>
              </table:table-cell>
              <table:table-cell office:value-type="float" office:value="0.04000118">
                <text:p>0.04000118</text:p>
              </table:table-cell>
            </table:table-row>
            <table:table-row>
              <table:table-cell office:value-type="string">
                <text:p>2260</text:p>
              </table:table-cell>
              <table:table-cell office:value-type="float" office:value="578.670104980469">
                <text:p>578.670104980469</text:p>
              </table:table-cell>
              <table:table-cell office:value-type="float" office:value="0.04914309">
                <text:p>0.04914309</text:p>
              </table:table-cell>
            </table:table-row>
            <table:table-row>
              <table:table-cell office:value-type="string">
                <text:p>2261</text:p>
              </table:table-cell>
              <table:table-cell office:value-type="float" office:value="578.788513183594">
                <text:p>578.788513183594</text:p>
              </table:table-cell>
              <table:table-cell office:value-type="float" office:value="0.06754397">
                <text:p>0.06754397</text:p>
              </table:table-cell>
            </table:table-row>
            <table:table-row>
              <table:table-cell office:value-type="string">
                <text:p>2262</text:p>
              </table:table-cell>
              <table:table-cell office:value-type="float" office:value="578.906982421875">
                <text:p>578.906982421875</text:p>
              </table:table-cell>
              <table:table-cell office:value-type="float" office:value="0.03377702">
                <text:p>0.03377702</text:p>
              </table:table-cell>
            </table:table-row>
            <table:table-row>
              <table:table-cell office:value-type="string">
                <text:p>2263</text:p>
              </table:table-cell>
              <table:table-cell office:value-type="float" office:value="579.025451660156">
                <text:p>579.025451660156</text:p>
              </table:table-cell>
              <table:table-cell office:value-type="float" office:value="0.04147177">
                <text:p>0.04147177</text:p>
              </table:table-cell>
            </table:table-row>
            <table:table-row>
              <table:table-cell office:value-type="string">
                <text:p>2264</text:p>
              </table:table-cell>
              <table:table-cell office:value-type="float" office:value="579.143859863281">
                <text:p>579.143859863281</text:p>
              </table:table-cell>
              <table:table-cell office:value-type="float" office:value="0.04581973">
                <text:p>0.04581973</text:p>
              </table:table-cell>
            </table:table-row>
            <table:table-row>
              <table:table-cell office:value-type="string">
                <text:p>2265</text:p>
              </table:table-cell>
              <table:table-cell office:value-type="float" office:value="579.262329101563">
                <text:p>579.262329101563</text:p>
              </table:table-cell>
              <table:table-cell office:value-type="float" office:value="0.04020733">
                <text:p>0.04020733</text:p>
              </table:table-cell>
            </table:table-row>
            <table:table-row>
              <table:table-cell office:value-type="string">
                <text:p>2266</text:p>
              </table:table-cell>
              <table:table-cell office:value-type="float" office:value="579.380798339844">
                <text:p>579.380798339844</text:p>
              </table:table-cell>
              <table:table-cell office:value-type="float" office:value="0.04542449">
                <text:p>0.04542449</text:p>
              </table:table-cell>
            </table:table-row>
            <table:table-row>
              <table:table-cell office:value-type="string">
                <text:p>2267</text:p>
              </table:table-cell>
              <table:table-cell office:value-type="float" office:value="579.499206542969">
                <text:p>579.499206542969</text:p>
              </table:table-cell>
              <table:table-cell office:value-type="float" office:value="0.03938628">
                <text:p>0.03938628</text:p>
              </table:table-cell>
            </table:table-row>
            <table:table-row>
              <table:table-cell office:value-type="string">
                <text:p>2268</text:p>
              </table:table-cell>
              <table:table-cell office:value-type="float" office:value="579.61767578125">
                <text:p>579.61767578125</text:p>
              </table:table-cell>
              <table:table-cell office:value-type="float" office:value="0.04135035">
                <text:p>0.04135035</text:p>
              </table:table-cell>
            </table:table-row>
            <table:table-row>
              <table:table-cell office:value-type="string">
                <text:p>2269</text:p>
              </table:table-cell>
              <table:table-cell office:value-type="float" office:value="579.736145019531">
                <text:p>579.736145019531</text:p>
              </table:table-cell>
              <table:table-cell office:value-type="float" office:value="0.0429216">
                <text:p>0.0429216</text:p>
              </table:table-cell>
            </table:table-row>
            <table:table-row>
              <table:table-cell office:value-type="string">
                <text:p>2270</text:p>
              </table:table-cell>
              <table:table-cell office:value-type="float" office:value="579.854614257813">
                <text:p>579.854614257813</text:p>
              </table:table-cell>
              <table:table-cell office:value-type="float" office:value="0.03758421">
                <text:p>0.03758421</text:p>
              </table:table-cell>
            </table:table-row>
            <table:table-row>
              <table:table-cell office:value-type="string">
                <text:p>2271</text:p>
              </table:table-cell>
              <table:table-cell office:value-type="float" office:value="579.973083496094">
                <text:p>579.973083496094</text:p>
              </table:table-cell>
              <table:table-cell office:value-type="float" office:value="0.03901349">
                <text:p>0.03901349</text:p>
              </table:table-cell>
            </table:table-row>
            <table:table-row>
              <table:table-cell office:value-type="string">
                <text:p>2272</text:p>
              </table:table-cell>
              <table:table-cell office:value-type="float" office:value="580.091552734375">
                <text:p>580.091552734375</text:p>
              </table:table-cell>
              <table:table-cell office:value-type="float" office:value="0.04911252">
                <text:p>0.04911252</text:p>
              </table:table-cell>
            </table:table-row>
            <table:table-row>
              <table:table-cell office:value-type="string">
                <text:p>2273</text:p>
              </table:table-cell>
              <table:table-cell office:value-type="float" office:value="580.210021972656">
                <text:p>580.210021972656</text:p>
              </table:table-cell>
              <table:table-cell office:value-type="float" office:value="0.06080056">
                <text:p>0.06080056</text:p>
              </table:table-cell>
            </table:table-row>
            <table:table-row>
              <table:table-cell office:value-type="string">
                <text:p>2274</text:p>
              </table:table-cell>
              <table:table-cell office:value-type="float" office:value="580.328491210938">
                <text:p>580.328491210938</text:p>
              </table:table-cell>
              <table:table-cell office:value-type="float" office:value="0.05049696">
                <text:p>0.05049696</text:p>
              </table:table-cell>
            </table:table-row>
            <table:table-row>
              <table:table-cell office:value-type="string">
                <text:p>2275</text:p>
              </table:table-cell>
              <table:table-cell office:value-type="float" office:value="580.446960449219">
                <text:p>580.446960449219</text:p>
              </table:table-cell>
              <table:table-cell office:value-type="float" office:value="0.04694174">
                <text:p>0.04694174</text:p>
              </table:table-cell>
            </table:table-row>
            <table:table-row>
              <table:table-cell office:value-type="string">
                <text:p>2276</text:p>
              </table:table-cell>
              <table:table-cell office:value-type="float" office:value="580.5654296875">
                <text:p>580.5654296875</text:p>
              </table:table-cell>
              <table:table-cell office:value-type="float" office:value="0.04654874">
                <text:p>0.04654874</text:p>
              </table:table-cell>
            </table:table-row>
            <table:table-row>
              <table:table-cell office:value-type="string">
                <text:p>2277</text:p>
              </table:table-cell>
              <table:table-cell office:value-type="float" office:value="580.683898925781">
                <text:p>580.683898925781</text:p>
              </table:table-cell>
              <table:table-cell office:value-type="float" office:value="0.05772126">
                <text:p>0.05772126</text:p>
              </table:table-cell>
            </table:table-row>
            <table:table-row>
              <table:table-cell office:value-type="string">
                <text:p>2278</text:p>
              </table:table-cell>
              <table:table-cell office:value-type="float" office:value="580.802368164063">
                <text:p>580.802368164063</text:p>
              </table:table-cell>
              <table:table-cell office:value-type="float" office:value="0.05239709">
                <text:p>0.05239709</text:p>
              </table:table-cell>
            </table:table-row>
            <table:table-row>
              <table:table-cell office:value-type="string">
                <text:p>2279</text:p>
              </table:table-cell>
              <table:table-cell office:value-type="float" office:value="580.9208984375">
                <text:p>580.9208984375</text:p>
              </table:table-cell>
              <table:table-cell office:value-type="float" office:value="0.05048412">
                <text:p>0.05048412</text:p>
              </table:table-cell>
            </table:table-row>
            <table:table-row>
              <table:table-cell office:value-type="string">
                <text:p>2280</text:p>
              </table:table-cell>
              <table:table-cell office:value-type="float" office:value="581.039367675781">
                <text:p>581.039367675781</text:p>
              </table:table-cell>
              <table:table-cell office:value-type="float" office:value="0.04951985">
                <text:p>0.04951985</text:p>
              </table:table-cell>
            </table:table-row>
            <table:table-row>
              <table:table-cell office:value-type="string">
                <text:p>2281</text:p>
              </table:table-cell>
              <table:table-cell office:value-type="float" office:value="581.157836914063">
                <text:p>581.157836914063</text:p>
              </table:table-cell>
              <table:table-cell office:value-type="float" office:value="0.05950654">
                <text:p>0.05950654</text:p>
              </table:table-cell>
            </table:table-row>
            <table:table-row>
              <table:table-cell office:value-type="string">
                <text:p>2282</text:p>
              </table:table-cell>
              <table:table-cell office:value-type="float" office:value="581.2763671875">
                <text:p>581.2763671875</text:p>
              </table:table-cell>
              <table:table-cell office:value-type="float" office:value="0.06323834">
                <text:p>0.06323834</text:p>
              </table:table-cell>
            </table:table-row>
            <table:table-row>
              <table:table-cell office:value-type="string">
                <text:p>2283</text:p>
              </table:table-cell>
              <table:table-cell office:value-type="float" office:value="581.394836425781">
                <text:p>581.394836425781</text:p>
              </table:table-cell>
              <table:table-cell office:value-type="float" office:value="0.05452256">
                <text:p>0.05452256</text:p>
              </table:table-cell>
            </table:table-row>
            <table:table-row>
              <table:table-cell office:value-type="string">
                <text:p>2284</text:p>
              </table:table-cell>
              <table:table-cell office:value-type="float" office:value="581.513366699219">
                <text:p>581.513366699219</text:p>
              </table:table-cell>
              <table:table-cell office:value-type="float" office:value="0.06241779">
                <text:p>0.06241779</text:p>
              </table:table-cell>
            </table:table-row>
            <table:table-row>
              <table:table-cell office:value-type="string">
                <text:p>2285</text:p>
              </table:table-cell>
              <table:table-cell office:value-type="float" office:value="581.6318359375">
                <text:p>581.6318359375</text:p>
              </table:table-cell>
              <table:table-cell office:value-type="float" office:value="0.0510954">
                <text:p>0.0510954</text:p>
              </table:table-cell>
            </table:table-row>
            <table:table-row>
              <table:table-cell office:value-type="string">
                <text:p>2286</text:p>
              </table:table-cell>
              <table:table-cell office:value-type="float" office:value="581.750366210938">
                <text:p>581.750366210938</text:p>
              </table:table-cell>
              <table:table-cell office:value-type="float" office:value="0.04725478">
                <text:p>0.04725478</text:p>
              </table:table-cell>
            </table:table-row>
            <table:table-row>
              <table:table-cell office:value-type="string">
                <text:p>2287</text:p>
              </table:table-cell>
              <table:table-cell office:value-type="float" office:value="581.868835449219">
                <text:p>581.868835449219</text:p>
              </table:table-cell>
              <table:table-cell office:value-type="float" office:value="0.05050663">
                <text:p>0.05050663</text:p>
              </table:table-cell>
            </table:table-row>
            <table:table-row>
              <table:table-cell office:value-type="string">
                <text:p>2288</text:p>
              </table:table-cell>
              <table:table-cell office:value-type="float" office:value="581.987365722656">
                <text:p>581.987365722656</text:p>
              </table:table-cell>
              <table:table-cell office:value-type="float" office:value="0.05266214">
                <text:p>0.05266214</text:p>
              </table:table-cell>
            </table:table-row>
            <table:table-row>
              <table:table-cell office:value-type="string">
                <text:p>2289</text:p>
              </table:table-cell>
              <table:table-cell office:value-type="float" office:value="582.105895996094">
                <text:p>582.105895996094</text:p>
              </table:table-cell>
              <table:table-cell office:value-type="float" office:value="0.05527688">
                <text:p>0.05527688</text:p>
              </table:table-cell>
            </table:table-row>
            <table:table-row>
              <table:table-cell office:value-type="string">
                <text:p>2290</text:p>
              </table:table-cell>
              <table:table-cell office:value-type="float" office:value="582.224365234375">
                <text:p>582.224365234375</text:p>
              </table:table-cell>
              <table:table-cell office:value-type="float" office:value="0.05817101">
                <text:p>0.05817101</text:p>
              </table:table-cell>
            </table:table-row>
            <table:table-row>
              <table:table-cell office:value-type="string">
                <text:p>2291</text:p>
              </table:table-cell>
              <table:table-cell office:value-type="float" office:value="582.342895507813">
                <text:p>582.342895507813</text:p>
              </table:table-cell>
              <table:table-cell office:value-type="float" office:value="0.05393649">
                <text:p>0.05393649</text:p>
              </table:table-cell>
            </table:table-row>
            <table:table-row>
              <table:table-cell office:value-type="string">
                <text:p>2292</text:p>
              </table:table-cell>
              <table:table-cell office:value-type="float" office:value="582.46142578125">
                <text:p>582.46142578125</text:p>
              </table:table-cell>
              <table:table-cell office:value-type="float" office:value="0.05564649">
                <text:p>0.05564649</text:p>
              </table:table-cell>
            </table:table-row>
            <table:table-row>
              <table:table-cell office:value-type="string">
                <text:p>2293</text:p>
              </table:table-cell>
              <table:table-cell office:value-type="float" office:value="582.579956054688">
                <text:p>582.579956054688</text:p>
              </table:table-cell>
              <table:table-cell office:value-type="float" office:value="0.05240703">
                <text:p>0.05240703</text:p>
              </table:table-cell>
            </table:table-row>
            <table:table-row>
              <table:table-cell office:value-type="string">
                <text:p>2294</text:p>
              </table:table-cell>
              <table:table-cell office:value-type="float" office:value="582.698486328125">
                <text:p>582.698486328125</text:p>
              </table:table-cell>
              <table:table-cell office:value-type="float" office:value="0.05115781">
                <text:p>0.05115781</text:p>
              </table:table-cell>
            </table:table-row>
            <table:table-row>
              <table:table-cell office:value-type="string">
                <text:p>2295</text:p>
              </table:table-cell>
              <table:table-cell office:value-type="float" office:value="582.817016601563">
                <text:p>582.817016601563</text:p>
              </table:table-cell>
              <table:table-cell office:value-type="float" office:value="0.05879853">
                <text:p>0.05879853</text:p>
              </table:table-cell>
            </table:table-row>
            <table:table-row>
              <table:table-cell office:value-type="string">
                <text:p>2296</text:p>
              </table:table-cell>
              <table:table-cell office:value-type="float" office:value="582.935546875">
                <text:p>582.935546875</text:p>
              </table:table-cell>
              <table:table-cell office:value-type="float" office:value="0.04978561">
                <text:p>0.04978561</text:p>
              </table:table-cell>
            </table:table-row>
            <table:table-row>
              <table:table-cell office:value-type="string">
                <text:p>2297</text:p>
              </table:table-cell>
              <table:table-cell office:value-type="float" office:value="583.054077148438">
                <text:p>583.054077148438</text:p>
              </table:table-cell>
              <table:table-cell office:value-type="float" office:value="0.05378873">
                <text:p>0.05378873</text:p>
              </table:table-cell>
            </table:table-row>
            <table:table-row>
              <table:table-cell office:value-type="string">
                <text:p>2298</text:p>
              </table:table-cell>
              <table:table-cell office:value-type="float" office:value="583.172607421875">
                <text:p>583.172607421875</text:p>
              </table:table-cell>
              <table:table-cell office:value-type="float" office:value="0.08286398">
                <text:p>0.08286398</text:p>
              </table:table-cell>
            </table:table-row>
            <table:table-row>
              <table:table-cell office:value-type="string">
                <text:p>2299</text:p>
              </table:table-cell>
              <table:table-cell office:value-type="float" office:value="583.291137695313">
                <text:p>583.291137695313</text:p>
              </table:table-cell>
              <table:table-cell office:value-type="float" office:value="0.05705805">
                <text:p>0.05705805</text:p>
              </table:table-cell>
            </table:table-row>
            <table:table-row>
              <table:table-cell office:value-type="string">
                <text:p>2300</text:p>
              </table:table-cell>
              <table:table-cell office:value-type="float" office:value="583.40966796875">
                <text:p>583.40966796875</text:p>
              </table:table-cell>
              <table:table-cell office:value-type="float" office:value="0.05246162">
                <text:p>0.05246162</text:p>
              </table:table-cell>
            </table:table-row>
            <table:table-row>
              <table:table-cell office:value-type="string">
                <text:p>2301</text:p>
              </table:table-cell>
              <table:table-cell office:value-type="float" office:value="583.528198242188">
                <text:p>583.528198242188</text:p>
              </table:table-cell>
              <table:table-cell office:value-type="float" office:value="0.05859808">
                <text:p>0.05859808</text:p>
              </table:table-cell>
            </table:table-row>
            <table:table-row>
              <table:table-cell office:value-type="string">
                <text:p>2302</text:p>
              </table:table-cell>
              <table:table-cell office:value-type="float" office:value="583.646789550781">
                <text:p>583.646789550781</text:p>
              </table:table-cell>
              <table:table-cell office:value-type="float" office:value="0.05371648">
                <text:p>0.05371648</text:p>
              </table:table-cell>
            </table:table-row>
            <table:table-row>
              <table:table-cell office:value-type="string">
                <text:p>2303</text:p>
              </table:table-cell>
              <table:table-cell office:value-type="float" office:value="583.765319824219">
                <text:p>583.765319824219</text:p>
              </table:table-cell>
              <table:table-cell office:value-type="float" office:value="0.052482">
                <text:p>0.052482</text:p>
              </table:table-cell>
            </table:table-row>
            <table:table-row>
              <table:table-cell office:value-type="string">
                <text:p>2304</text:p>
              </table:table-cell>
              <table:table-cell office:value-type="float" office:value="583.883850097656">
                <text:p>583.883850097656</text:p>
              </table:table-cell>
              <table:table-cell office:value-type="float" office:value="0.06427883">
                <text:p>0.06427883</text:p>
              </table:table-cell>
            </table:table-row>
            <table:table-row>
              <table:table-cell office:value-type="string">
                <text:p>2305</text:p>
              </table:table-cell>
              <table:table-cell office:value-type="float" office:value="584.00244140625">
                <text:p>584.00244140625</text:p>
              </table:table-cell>
              <table:table-cell office:value-type="float" office:value="0.04984769">
                <text:p>0.04984769</text:p>
              </table:table-cell>
            </table:table-row>
            <table:table-row>
              <table:table-cell office:value-type="string">
                <text:p>2306</text:p>
              </table:table-cell>
              <table:table-cell office:value-type="float" office:value="584.120971679688">
                <text:p>584.120971679688</text:p>
              </table:table-cell>
              <table:table-cell office:value-type="float" office:value="0.06532711">
                <text:p>0.06532711</text:p>
              </table:table-cell>
            </table:table-row>
            <table:table-row>
              <table:table-cell office:value-type="string">
                <text:p>2307</text:p>
              </table:table-cell>
              <table:table-cell office:value-type="float" office:value="584.239501953125">
                <text:p>584.239501953125</text:p>
              </table:table-cell>
              <table:table-cell office:value-type="float" office:value="0.06128922">
                <text:p>0.06128922</text:p>
              </table:table-cell>
            </table:table-row>
            <table:table-row>
              <table:table-cell office:value-type="string">
                <text:p>2308</text:p>
              </table:table-cell>
              <table:table-cell office:value-type="float" office:value="584.358093261719">
                <text:p>584.358093261719</text:p>
              </table:table-cell>
              <table:table-cell office:value-type="float" office:value="0.05703655">
                <text:p>0.05703655</text:p>
              </table:table-cell>
            </table:table-row>
            <table:table-row>
              <table:table-cell office:value-type="string">
                <text:p>2309</text:p>
              </table:table-cell>
              <table:table-cell office:value-type="float" office:value="584.476623535156">
                <text:p>584.476623535156</text:p>
              </table:table-cell>
              <table:table-cell office:value-type="float" office:value="0.06554951">
                <text:p>0.06554951</text:p>
              </table:table-cell>
            </table:table-row>
            <table:table-row>
              <table:table-cell office:value-type="string">
                <text:p>2310</text:p>
              </table:table-cell>
              <table:table-cell office:value-type="float" office:value="584.59521484375">
                <text:p>584.59521484375</text:p>
              </table:table-cell>
              <table:table-cell office:value-type="float" office:value="0.06816577">
                <text:p>0.06816577</text:p>
              </table:table-cell>
            </table:table-row>
            <table:table-row>
              <table:table-cell office:value-type="string">
                <text:p>2311</text:p>
              </table:table-cell>
              <table:table-cell office:value-type="float" office:value="584.713806152344">
                <text:p>584.713806152344</text:p>
              </table:table-cell>
              <table:table-cell office:value-type="float" office:value="0.06035993">
                <text:p>0.06035993</text:p>
              </table:table-cell>
            </table:table-row>
            <table:table-row>
              <table:table-cell office:value-type="string">
                <text:p>2312</text:p>
              </table:table-cell>
              <table:table-cell office:value-type="float" office:value="584.832336425781">
                <text:p>584.832336425781</text:p>
              </table:table-cell>
              <table:table-cell office:value-type="float" office:value="0.06165403">
                <text:p>0.06165403</text:p>
              </table:table-cell>
            </table:table-row>
            <table:table-row>
              <table:table-cell office:value-type="string">
                <text:p>2313</text:p>
              </table:table-cell>
              <table:table-cell office:value-type="float" office:value="584.950927734375">
                <text:p>584.950927734375</text:p>
              </table:table-cell>
              <table:table-cell office:value-type="float" office:value="0.06054195">
                <text:p>0.06054195</text:p>
              </table:table-cell>
            </table:table-row>
            <table:table-row>
              <table:table-cell office:value-type="string">
                <text:p>2314</text:p>
              </table:table-cell>
              <table:table-cell office:value-type="float" office:value="585.069519042969">
                <text:p>585.069519042969</text:p>
              </table:table-cell>
              <table:table-cell office:value-type="float" office:value="0.05165631">
                <text:p>0.05165631</text:p>
              </table:table-cell>
            </table:table-row>
            <table:table-row>
              <table:table-cell office:value-type="string">
                <text:p>2315</text:p>
              </table:table-cell>
              <table:table-cell office:value-type="float" office:value="585.188110351563">
                <text:p>585.188110351563</text:p>
              </table:table-cell>
              <table:table-cell office:value-type="float" office:value="0.06555058">
                <text:p>0.06555058</text:p>
              </table:table-cell>
            </table:table-row>
            <table:table-row>
              <table:table-cell office:value-type="string">
                <text:p>2316</text:p>
              </table:table-cell>
              <table:table-cell office:value-type="float" office:value="585.306640625">
                <text:p>585.306640625</text:p>
              </table:table-cell>
              <table:table-cell office:value-type="float" office:value="0.0669904">
                <text:p>0.0669904</text:p>
              </table:table-cell>
            </table:table-row>
            <table:table-row>
              <table:table-cell office:value-type="string">
                <text:p>2317</text:p>
              </table:table-cell>
              <table:table-cell office:value-type="float" office:value="585.425231933594">
                <text:p>585.425231933594</text:p>
              </table:table-cell>
              <table:table-cell office:value-type="float" office:value="0.05853108">
                <text:p>0.05853108</text:p>
              </table:table-cell>
            </table:table-row>
            <table:table-row>
              <table:table-cell office:value-type="string">
                <text:p>2318</text:p>
              </table:table-cell>
              <table:table-cell office:value-type="float" office:value="585.543823242188">
                <text:p>585.543823242188</text:p>
              </table:table-cell>
              <table:table-cell office:value-type="float" office:value="0.08164143">
                <text:p>0.08164143</text:p>
              </table:table-cell>
            </table:table-row>
            <table:table-row>
              <table:table-cell office:value-type="string">
                <text:p>2319</text:p>
              </table:table-cell>
              <table:table-cell office:value-type="float" office:value="585.662414550781">
                <text:p>585.662414550781</text:p>
              </table:table-cell>
              <table:table-cell office:value-type="float" office:value="0.05392791">
                <text:p>0.05392791</text:p>
              </table:table-cell>
            </table:table-row>
            <table:table-row>
              <table:table-cell office:value-type="string">
                <text:p>2320</text:p>
              </table:table-cell>
              <table:table-cell office:value-type="float" office:value="585.781005859375">
                <text:p>585.781005859375</text:p>
              </table:table-cell>
              <table:table-cell office:value-type="float" office:value="0.06256644">
                <text:p>0.06256644</text:p>
              </table:table-cell>
            </table:table-row>
            <table:table-row>
              <table:table-cell office:value-type="string">
                <text:p>2321</text:p>
              </table:table-cell>
              <table:table-cell office:value-type="float" office:value="585.899597167969">
                <text:p>585.899597167969</text:p>
              </table:table-cell>
              <table:table-cell office:value-type="float" office:value="0.06731129">
                <text:p>0.06731129</text:p>
              </table:table-cell>
            </table:table-row>
            <table:table-row>
              <table:table-cell office:value-type="string">
                <text:p>2322</text:p>
              </table:table-cell>
              <table:table-cell office:value-type="float" office:value="586.018188476563">
                <text:p>586.018188476563</text:p>
              </table:table-cell>
              <table:table-cell office:value-type="float" office:value="0.05405388">
                <text:p>0.05405388</text:p>
              </table:table-cell>
            </table:table-row>
            <table:table-row>
              <table:table-cell office:value-type="string">
                <text:p>2323</text:p>
              </table:table-cell>
              <table:table-cell office:value-type="float" office:value="586.136779785156">
                <text:p>586.136779785156</text:p>
              </table:table-cell>
              <table:table-cell office:value-type="float" office:value="0.05621513">
                <text:p>0.05621513</text:p>
              </table:table-cell>
            </table:table-row>
            <table:table-row>
              <table:table-cell office:value-type="string">
                <text:p>2324</text:p>
              </table:table-cell>
              <table:table-cell office:value-type="float" office:value="586.255432128906">
                <text:p>586.255432128906</text:p>
              </table:table-cell>
              <table:table-cell office:value-type="float" office:value="0.06412507">
                <text:p>0.06412507</text:p>
              </table:table-cell>
            </table:table-row>
            <table:table-row>
              <table:table-cell office:value-type="string">
                <text:p>2325</text:p>
              </table:table-cell>
              <table:table-cell office:value-type="float" office:value="586.3740234375">
                <text:p>586.3740234375</text:p>
              </table:table-cell>
              <table:table-cell office:value-type="float" office:value="0.06604523">
                <text:p>0.06604523</text:p>
              </table:table-cell>
            </table:table-row>
            <table:table-row>
              <table:table-cell office:value-type="string">
                <text:p>2326</text:p>
              </table:table-cell>
              <table:table-cell office:value-type="float" office:value="586.492614746094">
                <text:p>586.492614746094</text:p>
              </table:table-cell>
              <table:table-cell office:value-type="float" office:value="0.0648888">
                <text:p>0.0648888</text:p>
              </table:table-cell>
            </table:table-row>
            <table:table-row>
              <table:table-cell office:value-type="string">
                <text:p>2327</text:p>
              </table:table-cell>
              <table:table-cell office:value-type="float" office:value="586.611206054688">
                <text:p>586.611206054688</text:p>
              </table:table-cell>
              <table:table-cell office:value-type="float" office:value="0.07361701">
                <text:p>0.07361701</text:p>
              </table:table-cell>
            </table:table-row>
            <table:table-row>
              <table:table-cell office:value-type="string">
                <text:p>2328</text:p>
              </table:table-cell>
              <table:table-cell office:value-type="float" office:value="586.729858398438">
                <text:p>586.729858398438</text:p>
              </table:table-cell>
              <table:table-cell office:value-type="float" office:value="0.06922843">
                <text:p>0.06922843</text:p>
              </table:table-cell>
            </table:table-row>
            <table:table-row>
              <table:table-cell office:value-type="string">
                <text:p>2329</text:p>
              </table:table-cell>
              <table:table-cell office:value-type="float" office:value="586.848449707031">
                <text:p>586.848449707031</text:p>
              </table:table-cell>
              <table:table-cell office:value-type="float" office:value="0.07185283">
                <text:p>0.07185283</text:p>
              </table:table-cell>
            </table:table-row>
            <table:table-row>
              <table:table-cell office:value-type="string">
                <text:p>2330</text:p>
              </table:table-cell>
              <table:table-cell office:value-type="float" office:value="586.967041015625">
                <text:p>586.967041015625</text:p>
              </table:table-cell>
              <table:table-cell office:value-type="float" office:value="0.05845758">
                <text:p>0.05845758</text:p>
              </table:table-cell>
            </table:table-row>
            <table:table-row>
              <table:table-cell office:value-type="string">
                <text:p>2331</text:p>
              </table:table-cell>
              <table:table-cell office:value-type="float" office:value="587.085693359375">
                <text:p>587.085693359375</text:p>
              </table:table-cell>
              <table:table-cell office:value-type="float" office:value="0.06044449">
                <text:p>0.06044449</text:p>
              </table:table-cell>
            </table:table-row>
            <table:table-row>
              <table:table-cell office:value-type="string">
                <text:p>2332</text:p>
              </table:table-cell>
              <table:table-cell office:value-type="float" office:value="587.204284667969">
                <text:p>587.204284667969</text:p>
              </table:table-cell>
              <table:table-cell office:value-type="float" office:value="0.07315487">
                <text:p>0.07315487</text:p>
              </table:table-cell>
            </table:table-row>
            <table:table-row>
              <table:table-cell office:value-type="string">
                <text:p>2333</text:p>
              </table:table-cell>
              <table:table-cell office:value-type="float" office:value="587.322937011719">
                <text:p>587.322937011719</text:p>
              </table:table-cell>
              <table:table-cell office:value-type="float" office:value="0.06690219">
                <text:p>0.06690219</text:p>
              </table:table-cell>
            </table:table-row>
            <table:table-row>
              <table:table-cell office:value-type="string">
                <text:p>2334</text:p>
              </table:table-cell>
              <table:table-cell office:value-type="float" office:value="587.441589355469">
                <text:p>587.441589355469</text:p>
              </table:table-cell>
              <table:table-cell office:value-type="float" office:value="0.07213283">
                <text:p>0.07213283</text:p>
              </table:table-cell>
            </table:table-row>
            <table:table-row>
              <table:table-cell office:value-type="string">
                <text:p>2335</text:p>
              </table:table-cell>
              <table:table-cell office:value-type="float" office:value="587.560180664063">
                <text:p>587.560180664063</text:p>
              </table:table-cell>
              <table:table-cell office:value-type="float" office:value="0.05720401">
                <text:p>0.05720401</text:p>
              </table:table-cell>
            </table:table-row>
            <table:table-row>
              <table:table-cell office:value-type="string">
                <text:p>2336</text:p>
              </table:table-cell>
              <table:table-cell office:value-type="float" office:value="587.678833007813">
                <text:p>587.678833007813</text:p>
              </table:table-cell>
              <table:table-cell office:value-type="float" office:value="0.06717189">
                <text:p>0.06717189</text:p>
              </table:table-cell>
            </table:table-row>
            <table:table-row>
              <table:table-cell office:value-type="string">
                <text:p>2337</text:p>
              </table:table-cell>
              <table:table-cell office:value-type="float" office:value="587.797424316406">
                <text:p>587.797424316406</text:p>
              </table:table-cell>
              <table:table-cell office:value-type="float" office:value="0.07093441">
                <text:p>0.07093441</text:p>
              </table:table-cell>
            </table:table-row>
            <table:table-row>
              <table:table-cell office:value-type="string">
                <text:p>2338</text:p>
              </table:table-cell>
              <table:table-cell office:value-type="float" office:value="587.916076660156">
                <text:p>587.916076660156</text:p>
              </table:table-cell>
              <table:table-cell office:value-type="float" office:value="0.0752249">
                <text:p>0.0752249</text:p>
              </table:table-cell>
            </table:table-row>
            <table:table-row>
              <table:table-cell office:value-type="string">
                <text:p>2339</text:p>
              </table:table-cell>
              <table:table-cell office:value-type="float" office:value="588.034729003906">
                <text:p>588.034729003906</text:p>
              </table:table-cell>
              <table:table-cell office:value-type="float" office:value="0.06655303">
                <text:p>0.06655303</text:p>
              </table:table-cell>
            </table:table-row>
            <table:table-row>
              <table:table-cell office:value-type="string">
                <text:p>2340</text:p>
              </table:table-cell>
              <table:table-cell office:value-type="float" office:value="588.153381347656">
                <text:p>588.153381347656</text:p>
              </table:table-cell>
              <table:table-cell office:value-type="float" office:value="0.06730177">
                <text:p>0.06730177</text:p>
              </table:table-cell>
            </table:table-row>
            <table:table-row>
              <table:table-cell office:value-type="string">
                <text:p>2341</text:p>
              </table:table-cell>
              <table:table-cell office:value-type="float" office:value="588.272033691406">
                <text:p>588.272033691406</text:p>
              </table:table-cell>
              <table:table-cell office:value-type="float" office:value="0.06807898">
                <text:p>0.06807898</text:p>
              </table:table-cell>
            </table:table-row>
            <table:table-row>
              <table:table-cell office:value-type="string">
                <text:p>2342</text:p>
              </table:table-cell>
              <table:table-cell office:value-type="float" office:value="588.390686035156">
                <text:p>588.390686035156</text:p>
              </table:table-cell>
              <table:table-cell office:value-type="float" office:value="0.07607718">
                <text:p>0.07607718</text:p>
              </table:table-cell>
            </table:table-row>
            <table:table-row>
              <table:table-cell office:value-type="string">
                <text:p>2343</text:p>
              </table:table-cell>
              <table:table-cell office:value-type="float" office:value="588.509338378906">
                <text:p>588.509338378906</text:p>
              </table:table-cell>
              <table:table-cell office:value-type="float" office:value="0.06615271">
                <text:p>0.06615271</text:p>
              </table:table-cell>
            </table:table-row>
            <table:table-row>
              <table:table-cell office:value-type="string">
                <text:p>2344</text:p>
              </table:table-cell>
              <table:table-cell office:value-type="float" office:value="588.627990722656">
                <text:p>588.627990722656</text:p>
              </table:table-cell>
              <table:table-cell office:value-type="float" office:value="0.06194573">
                <text:p>0.06194573</text:p>
              </table:table-cell>
            </table:table-row>
            <table:table-row>
              <table:table-cell office:value-type="string">
                <text:p>2345</text:p>
              </table:table-cell>
              <table:table-cell office:value-type="float" office:value="588.746643066406">
                <text:p>588.746643066406</text:p>
              </table:table-cell>
              <table:table-cell office:value-type="float" office:value="0.06118713">
                <text:p>0.06118713</text:p>
              </table:table-cell>
            </table:table-row>
            <table:table-row>
              <table:table-cell office:value-type="string">
                <text:p>2346</text:p>
              </table:table-cell>
              <table:table-cell office:value-type="float" office:value="588.865295410156">
                <text:p>588.865295410156</text:p>
              </table:table-cell>
              <table:table-cell office:value-type="float" office:value="0.0649662">
                <text:p>0.0649662</text:p>
              </table:table-cell>
            </table:table-row>
            <table:table-row>
              <table:table-cell office:value-type="string">
                <text:p>2347</text:p>
              </table:table-cell>
              <table:table-cell office:value-type="float" office:value="588.983947753906">
                <text:p>588.983947753906</text:p>
              </table:table-cell>
              <table:table-cell office:value-type="float" office:value="0.06123689">
                <text:p>0.06123689</text:p>
              </table:table-cell>
            </table:table-row>
            <table:table-row>
              <table:table-cell office:value-type="string">
                <text:p>2348</text:p>
              </table:table-cell>
              <table:table-cell office:value-type="float" office:value="589.102600097656">
                <text:p>589.102600097656</text:p>
              </table:table-cell>
              <table:table-cell office:value-type="float" office:value="0.0713557">
                <text:p>0.0713557</text:p>
              </table:table-cell>
            </table:table-row>
            <table:table-row>
              <table:table-cell office:value-type="string">
                <text:p>2349</text:p>
              </table:table-cell>
              <table:table-cell office:value-type="float" office:value="589.221252441406">
                <text:p>589.221252441406</text:p>
              </table:table-cell>
              <table:table-cell office:value-type="float" office:value="0.05897234">
                <text:p>0.05897234</text:p>
              </table:table-cell>
            </table:table-row>
            <table:table-row>
              <table:table-cell office:value-type="string">
                <text:p>2350</text:p>
              </table:table-cell>
              <table:table-cell office:value-type="float" office:value="589.339904785156">
                <text:p>589.339904785156</text:p>
              </table:table-cell>
              <table:table-cell office:value-type="float" office:value="0.06315892">
                <text:p>0.06315892</text:p>
              </table:table-cell>
            </table:table-row>
            <table:table-row>
              <table:table-cell office:value-type="string">
                <text:p>2351</text:p>
              </table:table-cell>
              <table:table-cell office:value-type="float" office:value="589.458618164063">
                <text:p>589.458618164063</text:p>
              </table:table-cell>
              <table:table-cell office:value-type="float" office:value="0.06154817">
                <text:p>0.06154817</text:p>
              </table:table-cell>
            </table:table-row>
            <table:table-row>
              <table:table-cell office:value-type="string">
                <text:p>2352</text:p>
              </table:table-cell>
              <table:table-cell office:value-type="float" office:value="589.577270507813">
                <text:p>589.577270507813</text:p>
              </table:table-cell>
              <table:table-cell office:value-type="float" office:value="0.05807408">
                <text:p>0.05807408</text:p>
              </table:table-cell>
            </table:table-row>
            <table:table-row>
              <table:table-cell office:value-type="string">
                <text:p>2353</text:p>
              </table:table-cell>
              <table:table-cell office:value-type="float" office:value="589.695922851563">
                <text:p>589.695922851563</text:p>
              </table:table-cell>
              <table:table-cell office:value-type="float" office:value="0.07051561">
                <text:p>0.07051561</text:p>
              </table:table-cell>
            </table:table-row>
            <table:table-row>
              <table:table-cell office:value-type="string">
                <text:p>2354</text:p>
              </table:table-cell>
              <table:table-cell office:value-type="float" office:value="589.814636230469">
                <text:p>589.814636230469</text:p>
              </table:table-cell>
              <table:table-cell office:value-type="float" office:value="0.05896735">
                <text:p>0.05896735</text:p>
              </table:table-cell>
            </table:table-row>
            <table:table-row>
              <table:table-cell office:value-type="string">
                <text:p>2355</text:p>
              </table:table-cell>
              <table:table-cell office:value-type="float" office:value="589.933288574219">
                <text:p>589.933288574219</text:p>
              </table:table-cell>
              <table:table-cell office:value-type="float" office:value="0.06476592">
                <text:p>0.06476592</text:p>
              </table:table-cell>
            </table:table-row>
            <table:table-row>
              <table:table-cell office:value-type="string">
                <text:p>2356</text:p>
              </table:table-cell>
              <table:table-cell office:value-type="float" office:value="590.052001953125">
                <text:p>590.052001953125</text:p>
              </table:table-cell>
              <table:table-cell office:value-type="float" office:value="0.06017366">
                <text:p>0.06017366</text:p>
              </table:table-cell>
            </table:table-row>
            <table:table-row>
              <table:table-cell office:value-type="string">
                <text:p>2357</text:p>
              </table:table-cell>
              <table:table-cell office:value-type="float" office:value="590.170654296875">
                <text:p>590.170654296875</text:p>
              </table:table-cell>
              <table:table-cell office:value-type="float" office:value="0.06443559">
                <text:p>0.06443559</text:p>
              </table:table-cell>
            </table:table-row>
            <table:table-row>
              <table:table-cell office:value-type="string">
                <text:p>2358</text:p>
              </table:table-cell>
              <table:table-cell office:value-type="float" office:value="590.289367675781">
                <text:p>590.289367675781</text:p>
              </table:table-cell>
              <table:table-cell office:value-type="float" office:value="0.05588059">
                <text:p>0.05588059</text:p>
              </table:table-cell>
            </table:table-row>
            <table:table-row>
              <table:table-cell office:value-type="string">
                <text:p>2359</text:p>
              </table:table-cell>
              <table:table-cell office:value-type="float" office:value="590.408020019531">
                <text:p>590.408020019531</text:p>
              </table:table-cell>
              <table:table-cell office:value-type="float" office:value="0.0992908">
                <text:p>0.0992908</text:p>
              </table:table-cell>
            </table:table-row>
            <table:table-row>
              <table:table-cell office:value-type="string">
                <text:p>2360</text:p>
              </table:table-cell>
              <table:table-cell office:value-type="float" office:value="590.526733398438">
                <text:p>590.526733398438</text:p>
              </table:table-cell>
              <table:table-cell office:value-type="float" office:value="0.07053819">
                <text:p>0.07053819</text:p>
              </table:table-cell>
            </table:table-row>
            <table:table-row>
              <table:table-cell office:value-type="string">
                <text:p>2361</text:p>
              </table:table-cell>
              <table:table-cell office:value-type="float" office:value="590.645446777344">
                <text:p>590.645446777344</text:p>
              </table:table-cell>
              <table:table-cell office:value-type="float" office:value="0.05965809">
                <text:p>0.05965809</text:p>
              </table:table-cell>
            </table:table-row>
            <table:table-row>
              <table:table-cell office:value-type="string">
                <text:p>2362</text:p>
              </table:table-cell>
              <table:table-cell office:value-type="float" office:value="590.764099121094">
                <text:p>590.764099121094</text:p>
              </table:table-cell>
              <table:table-cell office:value-type="float" office:value="0.06007259">
                <text:p>0.06007259</text:p>
              </table:table-cell>
            </table:table-row>
            <table:table-row>
              <table:table-cell office:value-type="string">
                <text:p>2363</text:p>
              </table:table-cell>
              <table:table-cell office:value-type="float" office:value="590.8828125">
                <text:p>590.8828125</text:p>
              </table:table-cell>
              <table:table-cell office:value-type="float" office:value="0.07018391">
                <text:p>0.07018391</text:p>
              </table:table-cell>
            </table:table-row>
            <table:table-row>
              <table:table-cell office:value-type="string">
                <text:p>2364</text:p>
              </table:table-cell>
              <table:table-cell office:value-type="float" office:value="591.001525878906">
                <text:p>591.001525878906</text:p>
              </table:table-cell>
              <table:table-cell office:value-type="float" office:value="0.07094803">
                <text:p>0.07094803</text:p>
              </table:table-cell>
            </table:table-row>
            <table:table-row>
              <table:table-cell office:value-type="string">
                <text:p>2365</text:p>
              </table:table-cell>
              <table:table-cell office:value-type="float" office:value="591.120239257813">
                <text:p>591.120239257813</text:p>
              </table:table-cell>
              <table:table-cell office:value-type="float" office:value="0.0593214">
                <text:p>0.0593214</text:p>
              </table:table-cell>
            </table:table-row>
            <table:table-row>
              <table:table-cell office:value-type="string">
                <text:p>2366</text:p>
              </table:table-cell>
              <table:table-cell office:value-type="float" office:value="591.238891601563">
                <text:p>591.238891601563</text:p>
              </table:table-cell>
              <table:table-cell office:value-type="float" office:value="0.0587827">
                <text:p>0.0587827</text:p>
              </table:table-cell>
            </table:table-row>
            <table:table-row>
              <table:table-cell office:value-type="string">
                <text:p>2367</text:p>
              </table:table-cell>
              <table:table-cell office:value-type="float" office:value="591.357604980469">
                <text:p>591.357604980469</text:p>
              </table:table-cell>
              <table:table-cell office:value-type="float" office:value="0.07001258">
                <text:p>0.07001258</text:p>
              </table:table-cell>
            </table:table-row>
            <table:table-row>
              <table:table-cell office:value-type="string">
                <text:p>2368</text:p>
              </table:table-cell>
              <table:table-cell office:value-type="float" office:value="591.476318359375">
                <text:p>591.476318359375</text:p>
              </table:table-cell>
              <table:table-cell office:value-type="float" office:value="0.06072926">
                <text:p>0.06072926</text:p>
              </table:table-cell>
            </table:table-row>
            <table:table-row>
              <table:table-cell office:value-type="string">
                <text:p>2369</text:p>
              </table:table-cell>
              <table:table-cell office:value-type="float" office:value="591.595031738281">
                <text:p>591.595031738281</text:p>
              </table:table-cell>
              <table:table-cell office:value-type="float" office:value="0.07590725">
                <text:p>0.07590725</text:p>
              </table:table-cell>
            </table:table-row>
            <table:table-row>
              <table:table-cell office:value-type="string">
                <text:p>2370</text:p>
              </table:table-cell>
              <table:table-cell office:value-type="float" office:value="591.713745117188">
                <text:p>591.713745117188</text:p>
              </table:table-cell>
              <table:table-cell office:value-type="float" office:value="0.06173186">
                <text:p>0.06173186</text:p>
              </table:table-cell>
            </table:table-row>
            <table:table-row>
              <table:table-cell office:value-type="string">
                <text:p>2371</text:p>
              </table:table-cell>
              <table:table-cell office:value-type="float" office:value="591.832458496094">
                <text:p>591.832458496094</text:p>
              </table:table-cell>
              <table:table-cell office:value-type="float" office:value="0.07529833">
                <text:p>0.07529833</text:p>
              </table:table-cell>
            </table:table-row>
            <table:table-row>
              <table:table-cell office:value-type="string">
                <text:p>2372</text:p>
              </table:table-cell>
              <table:table-cell office:value-type="float" office:value="591.951232910156">
                <text:p>591.951232910156</text:p>
              </table:table-cell>
              <table:table-cell office:value-type="float" office:value="0.0635967">
                <text:p>0.0635967</text:p>
              </table:table-cell>
            </table:table-row>
            <table:table-row>
              <table:table-cell office:value-type="string">
                <text:p>2373</text:p>
              </table:table-cell>
              <table:table-cell office:value-type="float" office:value="592.069946289063">
                <text:p>592.069946289063</text:p>
              </table:table-cell>
              <table:table-cell office:value-type="float" office:value="0.0667967">
                <text:p>0.0667967</text:p>
              </table:table-cell>
            </table:table-row>
            <table:table-row>
              <table:table-cell office:value-type="string">
                <text:p>2374</text:p>
              </table:table-cell>
              <table:table-cell office:value-type="float" office:value="592.188659667969">
                <text:p>592.188659667969</text:p>
              </table:table-cell>
              <table:table-cell office:value-type="float" office:value="0.05570273">
                <text:p>0.05570273</text:p>
              </table:table-cell>
            </table:table-row>
            <table:table-row>
              <table:table-cell office:value-type="string">
                <text:p>2375</text:p>
              </table:table-cell>
              <table:table-cell office:value-type="float" office:value="592.307373046875">
                <text:p>592.307373046875</text:p>
              </table:table-cell>
              <table:table-cell office:value-type="float" office:value="0.05775579">
                <text:p>0.05775579</text:p>
              </table:table-cell>
            </table:table-row>
            <table:table-row>
              <table:table-cell office:value-type="string">
                <text:p>2376</text:p>
              </table:table-cell>
              <table:table-cell office:value-type="float" office:value="592.426086425781">
                <text:p>592.426086425781</text:p>
              </table:table-cell>
              <table:table-cell office:value-type="float" office:value="0.07919753">
                <text:p>0.07919753</text:p>
              </table:table-cell>
            </table:table-row>
            <table:table-row>
              <table:table-cell office:value-type="string">
                <text:p>2377</text:p>
              </table:table-cell>
              <table:table-cell office:value-type="float" office:value="592.544860839844">
                <text:p>592.544860839844</text:p>
              </table:table-cell>
              <table:table-cell office:value-type="float" office:value="0.05877206">
                <text:p>0.05877206</text:p>
              </table:table-cell>
            </table:table-row>
            <table:table-row>
              <table:table-cell office:value-type="string">
                <text:p>2378</text:p>
              </table:table-cell>
              <table:table-cell office:value-type="float" office:value="592.66357421875">
                <text:p>592.66357421875</text:p>
              </table:table-cell>
              <table:table-cell office:value-type="float" office:value="0.05501594">
                <text:p>0.05501594</text:p>
              </table:table-cell>
            </table:table-row>
            <table:table-row>
              <table:table-cell office:value-type="string">
                <text:p>2379</text:p>
              </table:table-cell>
              <table:table-cell office:value-type="float" office:value="592.782348632813">
                <text:p>592.782348632813</text:p>
              </table:table-cell>
              <table:table-cell office:value-type="float" office:value="0.05467993">
                <text:p>0.05467993</text:p>
              </table:table-cell>
            </table:table-row>
            <table:table-row>
              <table:table-cell office:value-type="string">
                <text:p>2380</text:p>
              </table:table-cell>
              <table:table-cell office:value-type="float" office:value="592.901062011719">
                <text:p>592.901062011719</text:p>
              </table:table-cell>
              <table:table-cell office:value-type="float" office:value="0.06082034">
                <text:p>0.06082034</text:p>
              </table:table-cell>
            </table:table-row>
            <table:table-row>
              <table:table-cell office:value-type="string">
                <text:p>2381</text:p>
              </table:table-cell>
              <table:table-cell office:value-type="float" office:value="593.019775390625">
                <text:p>593.019775390625</text:p>
              </table:table-cell>
              <table:table-cell office:value-type="float" office:value="0.05548487">
                <text:p>0.05548487</text:p>
              </table:table-cell>
            </table:table-row>
            <table:table-row>
              <table:table-cell office:value-type="string">
                <text:p>2382</text:p>
              </table:table-cell>
              <table:table-cell office:value-type="float" office:value="593.138549804688">
                <text:p>593.138549804688</text:p>
              </table:table-cell>
              <table:table-cell office:value-type="float" office:value="0.05282445">
                <text:p>0.05282445</text:p>
              </table:table-cell>
            </table:table-row>
            <table:table-row>
              <table:table-cell office:value-type="string">
                <text:p>2383</text:p>
              </table:table-cell>
              <table:table-cell office:value-type="float" office:value="593.257263183594">
                <text:p>593.257263183594</text:p>
              </table:table-cell>
              <table:table-cell office:value-type="float" office:value="0.05199073">
                <text:p>0.05199073</text:p>
              </table:table-cell>
            </table:table-row>
            <table:table-row>
              <table:table-cell office:value-type="string">
                <text:p>2384</text:p>
              </table:table-cell>
              <table:table-cell office:value-type="float" office:value="593.376037597656">
                <text:p>593.376037597656</text:p>
              </table:table-cell>
              <table:table-cell office:value-type="float" office:value="0.04855083">
                <text:p>0.04855083</text:p>
              </table:table-cell>
            </table:table-row>
            <table:table-row>
              <table:table-cell office:value-type="string">
                <text:p>2385</text:p>
              </table:table-cell>
              <table:table-cell office:value-type="float" office:value="593.494812011719">
                <text:p>593.494812011719</text:p>
              </table:table-cell>
              <table:table-cell office:value-type="float" office:value="0.06539553">
                <text:p>0.06539553</text:p>
              </table:table-cell>
            </table:table-row>
            <table:table-row>
              <table:table-cell office:value-type="string">
                <text:p>2386</text:p>
              </table:table-cell>
              <table:table-cell office:value-type="float" office:value="593.613525390625">
                <text:p>593.613525390625</text:p>
              </table:table-cell>
              <table:table-cell office:value-type="float" office:value="0.0548143">
                <text:p>0.0548143</text:p>
              </table:table-cell>
            </table:table-row>
            <table:table-row>
              <table:table-cell office:value-type="string">
                <text:p>2387</text:p>
              </table:table-cell>
              <table:table-cell office:value-type="float" office:value="593.732299804688">
                <text:p>593.732299804688</text:p>
              </table:table-cell>
              <table:table-cell office:value-type="float" office:value="0.05670599">
                <text:p>0.05670599</text:p>
              </table:table-cell>
            </table:table-row>
            <table:table-row>
              <table:table-cell office:value-type="string">
                <text:p>2388</text:p>
              </table:table-cell>
              <table:table-cell office:value-type="float" office:value="593.85107421875">
                <text:p>593.85107421875</text:p>
              </table:table-cell>
              <table:table-cell office:value-type="float" office:value="0.05836488">
                <text:p>0.05836488</text:p>
              </table:table-cell>
            </table:table-row>
            <table:table-row>
              <table:table-cell office:value-type="string">
                <text:p>2389</text:p>
              </table:table-cell>
              <table:table-cell office:value-type="float" office:value="593.969848632813">
                <text:p>593.969848632813</text:p>
              </table:table-cell>
              <table:table-cell office:value-type="float" office:value="0.05641627">
                <text:p>0.05641627</text:p>
              </table:table-cell>
            </table:table-row>
            <table:table-row>
              <table:table-cell office:value-type="string">
                <text:p>2390</text:p>
              </table:table-cell>
              <table:table-cell office:value-type="float" office:value="594.088562011719">
                <text:p>594.088562011719</text:p>
              </table:table-cell>
              <table:table-cell office:value-type="float" office:value="0.05566565">
                <text:p>0.05566565</text:p>
              </table:table-cell>
            </table:table-row>
            <table:table-row>
              <table:table-cell office:value-type="string">
                <text:p>2391</text:p>
              </table:table-cell>
              <table:table-cell office:value-type="float" office:value="594.207336425781">
                <text:p>594.207336425781</text:p>
              </table:table-cell>
              <table:table-cell office:value-type="float" office:value="0.05724059">
                <text:p>0.05724059</text:p>
              </table:table-cell>
            </table:table-row>
            <table:table-row>
              <table:table-cell office:value-type="string">
                <text:p>2392</text:p>
              </table:table-cell>
              <table:table-cell office:value-type="float" office:value="594.326110839844">
                <text:p>594.326110839844</text:p>
              </table:table-cell>
              <table:table-cell office:value-type="float" office:value="0.06341349">
                <text:p>0.06341349</text:p>
              </table:table-cell>
            </table:table-row>
            <table:table-row>
              <table:table-cell office:value-type="string">
                <text:p>2393</text:p>
              </table:table-cell>
              <table:table-cell office:value-type="float" office:value="594.444885253906">
                <text:p>594.444885253906</text:p>
              </table:table-cell>
              <table:table-cell office:value-type="float" office:value="0.05253549">
                <text:p>0.05253549</text:p>
              </table:table-cell>
            </table:table-row>
            <table:table-row>
              <table:table-cell office:value-type="string">
                <text:p>2394</text:p>
              </table:table-cell>
              <table:table-cell office:value-type="float" office:value="594.563659667969">
                <text:p>594.563659667969</text:p>
              </table:table-cell>
              <table:table-cell office:value-type="float" office:value="0.05548703">
                <text:p>0.05548703</text:p>
              </table:table-cell>
            </table:table-row>
            <table:table-row>
              <table:table-cell office:value-type="string">
                <text:p>2395</text:p>
              </table:table-cell>
              <table:table-cell office:value-type="float" office:value="594.682434082031">
                <text:p>594.682434082031</text:p>
              </table:table-cell>
              <table:table-cell office:value-type="float" office:value="0.05999939">
                <text:p>0.05999939</text:p>
              </table:table-cell>
            </table:table-row>
            <table:table-row>
              <table:table-cell office:value-type="string">
                <text:p>2396</text:p>
              </table:table-cell>
              <table:table-cell office:value-type="float" office:value="594.801208496094">
                <text:p>594.801208496094</text:p>
              </table:table-cell>
              <table:table-cell office:value-type="float" office:value="0.05680389">
                <text:p>0.05680389</text:p>
              </table:table-cell>
            </table:table-row>
            <table:table-row>
              <table:table-cell office:value-type="string">
                <text:p>2397</text:p>
              </table:table-cell>
              <table:table-cell office:value-type="float" office:value="594.919982910156">
                <text:p>594.919982910156</text:p>
              </table:table-cell>
              <table:table-cell office:value-type="float" office:value="0.05389862">
                <text:p>0.05389862</text:p>
              </table:table-cell>
            </table:table-row>
            <table:table-row>
              <table:table-cell office:value-type="string">
                <text:p>2398</text:p>
              </table:table-cell>
              <table:table-cell office:value-type="float" office:value="595.038818359375">
                <text:p>595.038818359375</text:p>
              </table:table-cell>
              <table:table-cell office:value-type="float" office:value="0.05744709">
                <text:p>0.05744709</text:p>
              </table:table-cell>
            </table:table-row>
            <table:table-row>
              <table:table-cell office:value-type="string">
                <text:p>2399</text:p>
              </table:table-cell>
              <table:table-cell office:value-type="float" office:value="595.157592773438">
                <text:p>595.157592773438</text:p>
              </table:table-cell>
              <table:table-cell office:value-type="float" office:value="0.06890994">
                <text:p>0.06890994</text:p>
              </table:table-cell>
            </table:table-row>
            <table:table-row>
              <table:table-cell office:value-type="string">
                <text:p>2400</text:p>
              </table:table-cell>
              <table:table-cell office:value-type="float" office:value="595.2763671875">
                <text:p>595.2763671875</text:p>
              </table:table-cell>
              <table:table-cell office:value-type="float" office:value="0.08024329">
                <text:p>0.08024329</text:p>
              </table:table-cell>
            </table:table-row>
            <table:table-row>
              <table:table-cell office:value-type="string">
                <text:p>2401</text:p>
              </table:table-cell>
              <table:table-cell office:value-type="float" office:value="595.395141601563">
                <text:p>595.395141601563</text:p>
              </table:table-cell>
              <table:table-cell office:value-type="float" office:value="0.05869028">
                <text:p>0.05869028</text:p>
              </table:table-cell>
            </table:table-row>
            <table:table-row>
              <table:table-cell office:value-type="string">
                <text:p>2402</text:p>
              </table:table-cell>
              <table:table-cell office:value-type="float" office:value="595.513916015625">
                <text:p>595.513916015625</text:p>
              </table:table-cell>
              <table:table-cell office:value-type="float" office:value="0.06667128">
                <text:p>0.06667128</text:p>
              </table:table-cell>
            </table:table-row>
            <table:table-row>
              <table:table-cell office:value-type="string">
                <text:p>2403</text:p>
              </table:table-cell>
              <table:table-cell office:value-type="float" office:value="595.632751464844">
                <text:p>595.632751464844</text:p>
              </table:table-cell>
              <table:table-cell office:value-type="float" office:value="0.05054905">
                <text:p>0.05054905</text:p>
              </table:table-cell>
            </table:table-row>
            <table:table-row>
              <table:table-cell office:value-type="string">
                <text:p>2404</text:p>
              </table:table-cell>
              <table:table-cell office:value-type="float" office:value="595.751525878906">
                <text:p>595.751525878906</text:p>
              </table:table-cell>
              <table:table-cell office:value-type="float" office:value="0.05591746">
                <text:p>0.05591746</text:p>
              </table:table-cell>
            </table:table-row>
            <table:table-row>
              <table:table-cell office:value-type="string">
                <text:p>2405</text:p>
              </table:table-cell>
              <table:table-cell office:value-type="float" office:value="595.870361328125">
                <text:p>595.870361328125</text:p>
              </table:table-cell>
              <table:table-cell office:value-type="float" office:value="0.05512265">
                <text:p>0.05512265</text:p>
              </table:table-cell>
            </table:table-row>
            <table:table-row>
              <table:table-cell office:value-type="string">
                <text:p>2406</text:p>
              </table:table-cell>
              <table:table-cell office:value-type="float" office:value="595.989135742188">
                <text:p>595.989135742188</text:p>
              </table:table-cell>
              <table:table-cell office:value-type="float" office:value="0.06361802">
                <text:p>0.06361802</text:p>
              </table:table-cell>
            </table:table-row>
            <table:table-row>
              <table:table-cell office:value-type="string">
                <text:p>2407</text:p>
              </table:table-cell>
              <table:table-cell office:value-type="float" office:value="596.107971191406">
                <text:p>596.107971191406</text:p>
              </table:table-cell>
              <table:table-cell office:value-type="float" office:value="0.05632193">
                <text:p>0.05632193</text:p>
              </table:table-cell>
            </table:table-row>
            <table:table-row>
              <table:table-cell office:value-type="string">
                <text:p>2408</text:p>
              </table:table-cell>
              <table:table-cell office:value-type="float" office:value="596.226745605469">
                <text:p>596.226745605469</text:p>
              </table:table-cell>
              <table:table-cell office:value-type="float" office:value="0.0602713">
                <text:p>0.0602713</text:p>
              </table:table-cell>
            </table:table-row>
            <table:table-row>
              <table:table-cell office:value-type="string">
                <text:p>2409</text:p>
              </table:table-cell>
              <table:table-cell office:value-type="float" office:value="596.345581054688">
                <text:p>596.345581054688</text:p>
              </table:table-cell>
              <table:table-cell office:value-type="float" office:value="0.0540983">
                <text:p>0.0540983</text:p>
              </table:table-cell>
            </table:table-row>
            <table:table-row>
              <table:table-cell office:value-type="string">
                <text:p>2410</text:p>
              </table:table-cell>
              <table:table-cell office:value-type="float" office:value="596.46435546875">
                <text:p>596.46435546875</text:p>
              </table:table-cell>
              <table:table-cell office:value-type="float" office:value="0.06856671">
                <text:p>0.06856671</text:p>
              </table:table-cell>
            </table:table-row>
            <table:table-row>
              <table:table-cell office:value-type="string">
                <text:p>2411</text:p>
              </table:table-cell>
              <table:table-cell office:value-type="float" office:value="596.583190917969">
                <text:p>596.583190917969</text:p>
              </table:table-cell>
              <table:table-cell office:value-type="float" office:value="0.05411542">
                <text:p>0.05411542</text:p>
              </table:table-cell>
            </table:table-row>
            <table:table-row>
              <table:table-cell office:value-type="string">
                <text:p>2412</text:p>
              </table:table-cell>
              <table:table-cell office:value-type="float" office:value="596.702026367188">
                <text:p>596.702026367188</text:p>
              </table:table-cell>
              <table:table-cell office:value-type="float" office:value="0.05755145">
                <text:p>0.05755145</text:p>
              </table:table-cell>
            </table:table-row>
            <table:table-row>
              <table:table-cell office:value-type="string">
                <text:p>2413</text:p>
              </table:table-cell>
              <table:table-cell office:value-type="float" office:value="596.82080078125">
                <text:p>596.82080078125</text:p>
              </table:table-cell>
              <table:table-cell office:value-type="float" office:value="0.05453214">
                <text:p>0.05453214</text:p>
              </table:table-cell>
            </table:table-row>
            <table:table-row>
              <table:table-cell office:value-type="string">
                <text:p>2414</text:p>
              </table:table-cell>
              <table:table-cell office:value-type="float" office:value="596.939636230469">
                <text:p>596.939636230469</text:p>
              </table:table-cell>
              <table:table-cell office:value-type="float" office:value="0.05138877">
                <text:p>0.05138877</text:p>
              </table:table-cell>
            </table:table-row>
            <table:table-row>
              <table:table-cell office:value-type="string">
                <text:p>2415</text:p>
              </table:table-cell>
              <table:table-cell office:value-type="float" office:value="597.058471679688">
                <text:p>597.058471679688</text:p>
              </table:table-cell>
              <table:table-cell office:value-type="float" office:value="0.05471387">
                <text:p>0.05471387</text:p>
              </table:table-cell>
            </table:table-row>
            <table:table-row>
              <table:table-cell office:value-type="string">
                <text:p>2416</text:p>
              </table:table-cell>
              <table:table-cell office:value-type="float" office:value="597.177307128906">
                <text:p>597.177307128906</text:p>
              </table:table-cell>
              <table:table-cell office:value-type="float" office:value="0.05348027">
                <text:p>0.05348027</text:p>
              </table:table-cell>
            </table:table-row>
            <table:table-row>
              <table:table-cell office:value-type="string">
                <text:p>2417</text:p>
              </table:table-cell>
              <table:table-cell office:value-type="float" office:value="597.296142578125">
                <text:p>597.296142578125</text:p>
              </table:table-cell>
              <table:table-cell office:value-type="float" office:value="0.06645393">
                <text:p>0.06645393</text:p>
              </table:table-cell>
            </table:table-row>
            <table:table-row>
              <table:table-cell office:value-type="string">
                <text:p>2418</text:p>
              </table:table-cell>
              <table:table-cell office:value-type="float" office:value="597.414978027344">
                <text:p>597.414978027344</text:p>
              </table:table-cell>
              <table:table-cell office:value-type="float" office:value="0.05322763">
                <text:p>0.05322763</text:p>
              </table:table-cell>
            </table:table-row>
            <table:table-row>
              <table:table-cell office:value-type="string">
                <text:p>2419</text:p>
              </table:table-cell>
              <table:table-cell office:value-type="float" office:value="597.533752441406">
                <text:p>597.533752441406</text:p>
              </table:table-cell>
              <table:table-cell office:value-type="float" office:value="0.04842407">
                <text:p>0.04842407</text:p>
              </table:table-cell>
            </table:table-row>
            <table:table-row>
              <table:table-cell office:value-type="string">
                <text:p>2420</text:p>
              </table:table-cell>
              <table:table-cell office:value-type="float" office:value="597.652587890625">
                <text:p>597.652587890625</text:p>
              </table:table-cell>
              <table:table-cell office:value-type="float" office:value="0.07289144">
                <text:p>0.07289144</text:p>
              </table:table-cell>
            </table:table-row>
            <table:table-row>
              <table:table-cell office:value-type="string">
                <text:p>2421</text:p>
              </table:table-cell>
              <table:table-cell office:value-type="float" office:value="597.771423339844">
                <text:p>597.771423339844</text:p>
              </table:table-cell>
              <table:table-cell office:value-type="float" office:value="0.0582926">
                <text:p>0.0582926</text:p>
              </table:table-cell>
            </table:table-row>
            <table:table-row>
              <table:table-cell office:value-type="string">
                <text:p>2422</text:p>
              </table:table-cell>
              <table:table-cell office:value-type="float" office:value="597.890319824219">
                <text:p>597.890319824219</text:p>
              </table:table-cell>
              <table:table-cell office:value-type="float" office:value="0.05980928">
                <text:p>0.05980928</text:p>
              </table:table-cell>
            </table:table-row>
            <table:table-row>
              <table:table-cell office:value-type="string">
                <text:p>2423</text:p>
              </table:table-cell>
              <table:table-cell office:value-type="float" office:value="598.009155273438">
                <text:p>598.009155273438</text:p>
              </table:table-cell>
              <table:table-cell office:value-type="float" office:value="0.05317305">
                <text:p>0.05317305</text:p>
              </table:table-cell>
            </table:table-row>
            <table:table-row>
              <table:table-cell office:value-type="string">
                <text:p>2424</text:p>
              </table:table-cell>
              <table:table-cell office:value-type="float" office:value="598.127990722656">
                <text:p>598.127990722656</text:p>
              </table:table-cell>
              <table:table-cell office:value-type="float" office:value="0.04962216">
                <text:p>0.04962216</text:p>
              </table:table-cell>
            </table:table-row>
            <table:table-row>
              <table:table-cell office:value-type="string">
                <text:p>2425</text:p>
              </table:table-cell>
              <table:table-cell office:value-type="float" office:value="598.246826171875">
                <text:p>598.246826171875</text:p>
              </table:table-cell>
              <table:table-cell office:value-type="float" office:value="0.0611816">
                <text:p>0.0611816</text:p>
              </table:table-cell>
            </table:table-row>
            <table:table-row>
              <table:table-cell office:value-type="string">
                <text:p>2426</text:p>
              </table:table-cell>
              <table:table-cell office:value-type="float" office:value="598.365661621094">
                <text:p>598.365661621094</text:p>
              </table:table-cell>
              <table:table-cell office:value-type="float" office:value="0.0570641">
                <text:p>0.0570641</text:p>
              </table:table-cell>
            </table:table-row>
            <table:table-row>
              <table:table-cell office:value-type="string">
                <text:p>2427</text:p>
              </table:table-cell>
              <table:table-cell office:value-type="float" office:value="598.484497070313">
                <text:p>598.484497070313</text:p>
              </table:table-cell>
              <table:table-cell office:value-type="float" office:value="0.0524403">
                <text:p>0.0524403</text:p>
              </table:table-cell>
            </table:table-row>
            <table:table-row>
              <table:table-cell office:value-type="string">
                <text:p>2428</text:p>
              </table:table-cell>
              <table:table-cell office:value-type="float" office:value="598.603393554688">
                <text:p>598.603393554688</text:p>
              </table:table-cell>
              <table:table-cell office:value-type="float" office:value="0.06036831">
                <text:p>0.06036831</text:p>
              </table:table-cell>
            </table:table-row>
            <table:table-row>
              <table:table-cell office:value-type="string">
                <text:p>2429</text:p>
              </table:table-cell>
              <table:table-cell office:value-type="float" office:value="598.722229003906">
                <text:p>598.722229003906</text:p>
              </table:table-cell>
              <table:table-cell office:value-type="float" office:value="0.04760778">
                <text:p>0.04760778</text:p>
              </table:table-cell>
            </table:table-row>
            <table:table-row>
              <table:table-cell office:value-type="string">
                <text:p>2430</text:p>
              </table:table-cell>
              <table:table-cell office:value-type="float" office:value="598.841064453125">
                <text:p>598.841064453125</text:p>
              </table:table-cell>
              <table:table-cell office:value-type="float" office:value="0.05126869">
                <text:p>0.05126869</text:p>
              </table:table-cell>
            </table:table-row>
            <table:table-row>
              <table:table-cell office:value-type="string">
                <text:p>2431</text:p>
              </table:table-cell>
              <table:table-cell office:value-type="float" office:value="598.9599609375">
                <text:p>598.9599609375</text:p>
              </table:table-cell>
              <table:table-cell office:value-type="float" office:value="0.06323466">
                <text:p>0.06323466</text:p>
              </table:table-cell>
            </table:table-row>
            <table:table-row>
              <table:table-cell office:value-type="string">
                <text:p>2432</text:p>
              </table:table-cell>
              <table:table-cell office:value-type="float" office:value="599.078796386719">
                <text:p>599.078796386719</text:p>
              </table:table-cell>
              <table:table-cell office:value-type="float" office:value="0.06229156">
                <text:p>0.06229156</text:p>
              </table:table-cell>
            </table:table-row>
            <table:table-row>
              <table:table-cell office:value-type="string">
                <text:p>2433</text:p>
              </table:table-cell>
              <table:table-cell office:value-type="float" office:value="599.197692871094">
                <text:p>599.197692871094</text:p>
              </table:table-cell>
              <table:table-cell office:value-type="float" office:value="0.05454541">
                <text:p>0.05454541</text:p>
              </table:table-cell>
            </table:table-row>
            <table:table-row>
              <table:table-cell office:value-type="string">
                <text:p>2434</text:p>
              </table:table-cell>
              <table:table-cell office:value-type="float" office:value="599.316528320313">
                <text:p>599.316528320313</text:p>
              </table:table-cell>
              <table:table-cell office:value-type="float" office:value="0.03990676">
                <text:p>0.03990676</text:p>
              </table:table-cell>
            </table:table-row>
            <table:table-row>
              <table:table-cell office:value-type="string">
                <text:p>2435</text:p>
              </table:table-cell>
              <table:table-cell office:value-type="float" office:value="599.435424804688">
                <text:p>599.435424804688</text:p>
              </table:table-cell>
              <table:table-cell office:value-type="float" office:value="0.05729939">
                <text:p>0.05729939</text:p>
              </table:table-cell>
            </table:table-row>
            <table:table-row>
              <table:table-cell office:value-type="string">
                <text:p>2436</text:p>
              </table:table-cell>
              <table:table-cell office:value-type="float" office:value="599.554321289063">
                <text:p>599.554321289063</text:p>
              </table:table-cell>
              <table:table-cell office:value-type="float" office:value="0.04438716">
                <text:p>0.04438716</text:p>
              </table:table-cell>
            </table:table-row>
            <table:table-row>
              <table:table-cell office:value-type="string">
                <text:p>2437</text:p>
              </table:table-cell>
              <table:table-cell office:value-type="float" office:value="599.673156738281">
                <text:p>599.673156738281</text:p>
              </table:table-cell>
              <table:table-cell office:value-type="float" office:value="0.04806478">
                <text:p>0.04806478</text:p>
              </table:table-cell>
            </table:table-row>
            <table:table-row>
              <table:table-cell office:value-type="string">
                <text:p>2438</text:p>
              </table:table-cell>
              <table:table-cell office:value-type="float" office:value="599.792053222656">
                <text:p>599.792053222656</text:p>
              </table:table-cell>
              <table:table-cell office:value-type="float" office:value="0.05439336">
                <text:p>0.05439336</text:p>
              </table:table-cell>
            </table:table-row>
            <table:table-row>
              <table:table-cell office:value-type="string">
                <text:p>2439</text:p>
              </table:table-cell>
              <table:table-cell office:value-type="float" office:value="599.910949707031">
                <text:p>599.910949707031</text:p>
              </table:table-cell>
              <table:table-cell office:value-type="float" office:value="0.05663595">
                <text:p>0.05663595</text:p>
              </table:table-cell>
            </table:table-row>
            <table:table-row>
              <table:table-cell office:value-type="string">
                <text:p>2440</text:p>
              </table:table-cell>
              <table:table-cell office:value-type="float" office:value="600.02978515625">
                <text:p>600.02978515625</text:p>
              </table:table-cell>
              <table:table-cell office:value-type="float" office:value="0.04875765">
                <text:p>0.04875765</text:p>
              </table:table-cell>
            </table:table-row>
            <table:table-row>
              <table:table-cell office:value-type="string">
                <text:p>2441</text:p>
              </table:table-cell>
              <table:table-cell office:value-type="float" office:value="600.148681640625">
                <text:p>600.148681640625</text:p>
              </table:table-cell>
              <table:table-cell office:value-type="float" office:value="0.05549631">
                <text:p>0.05549631</text:p>
              </table:table-cell>
            </table:table-row>
            <table:table-row>
              <table:table-cell office:value-type="string">
                <text:p>2442</text:p>
              </table:table-cell>
              <table:table-cell office:value-type="float" office:value="600.267578125">
                <text:p>600.267578125</text:p>
              </table:table-cell>
              <table:table-cell office:value-type="float" office:value="0.04671475">
                <text:p>0.04671475</text:p>
              </table:table-cell>
            </table:table-row>
            <table:table-row>
              <table:table-cell office:value-type="string">
                <text:p>2443</text:p>
              </table:table-cell>
              <table:table-cell office:value-type="float" office:value="600.386474609375">
                <text:p>600.386474609375</text:p>
              </table:table-cell>
              <table:table-cell office:value-type="float" office:value="0.0440623">
                <text:p>0.0440623</text:p>
              </table:table-cell>
            </table:table-row>
            <table:table-row>
              <table:table-cell office:value-type="string">
                <text:p>2444</text:p>
              </table:table-cell>
              <table:table-cell office:value-type="float" office:value="600.50537109375">
                <text:p>600.50537109375</text:p>
              </table:table-cell>
              <table:table-cell office:value-type="float" office:value="0.07133812">
                <text:p>0.07133812</text:p>
              </table:table-cell>
            </table:table-row>
            <table:table-row>
              <table:table-cell office:value-type="string">
                <text:p>2445</text:p>
              </table:table-cell>
              <table:table-cell office:value-type="float" office:value="600.624267578125">
                <text:p>600.624267578125</text:p>
              </table:table-cell>
              <table:table-cell office:value-type="float" office:value="0.04257375">
                <text:p>0.04257375</text:p>
              </table:table-cell>
            </table:table-row>
            <table:table-row>
              <table:table-cell office:value-type="string">
                <text:p>2446</text:p>
              </table:table-cell>
              <table:table-cell office:value-type="float" office:value="600.7431640625">
                <text:p>600.7431640625</text:p>
              </table:table-cell>
              <table:table-cell office:value-type="float" office:value="0.04715254">
                <text:p>0.04715254</text:p>
              </table:table-cell>
            </table:table-row>
            <table:table-row>
              <table:table-cell office:value-type="string">
                <text:p>2447</text:p>
              </table:table-cell>
              <table:table-cell office:value-type="float" office:value="600.862060546875">
                <text:p>600.862060546875</text:p>
              </table:table-cell>
              <table:table-cell office:value-type="float" office:value="0.03860454">
                <text:p>0.03860454</text:p>
              </table:table-cell>
            </table:table-row>
            <table:table-row>
              <table:table-cell office:value-type="string">
                <text:p>2448</text:p>
              </table:table-cell>
              <table:table-cell office:value-type="float" office:value="600.98095703125">
                <text:p>600.98095703125</text:p>
              </table:table-cell>
              <table:table-cell office:value-type="float" office:value="0.04934552">
                <text:p>0.04934552</text:p>
              </table:table-cell>
            </table:table-row>
            <table:table-row>
              <table:table-cell office:value-type="string">
                <text:p>2449</text:p>
              </table:table-cell>
              <table:table-cell office:value-type="float" office:value="601.099853515625">
                <text:p>601.099853515625</text:p>
              </table:table-cell>
              <table:table-cell office:value-type="float" office:value="0.03944971">
                <text:p>0.03944971</text:p>
              </table:table-cell>
            </table:table-row>
            <table:table-row>
              <table:table-cell office:value-type="string">
                <text:p>2450</text:p>
              </table:table-cell>
              <table:table-cell office:value-type="float" office:value="601.21875">
                <text:p>601.21875</text:p>
              </table:table-cell>
              <table:table-cell office:value-type="float" office:value="0.05085667">
                <text:p>0.05085667</text:p>
              </table:table-cell>
            </table:table-row>
            <table:table-row>
              <table:table-cell office:value-type="string">
                <text:p>2451</text:p>
              </table:table-cell>
              <table:table-cell office:value-type="float" office:value="601.337646484375">
                <text:p>601.337646484375</text:p>
              </table:table-cell>
              <table:table-cell office:value-type="float" office:value="0.04858397">
                <text:p>0.04858397</text:p>
              </table:table-cell>
            </table:table-row>
            <table:table-row>
              <table:table-cell office:value-type="string">
                <text:p>2452</text:p>
              </table:table-cell>
              <table:table-cell office:value-type="float" office:value="601.45654296875">
                <text:p>601.45654296875</text:p>
              </table:table-cell>
              <table:table-cell office:value-type="float" office:value="0.04699912">
                <text:p>0.04699912</text:p>
              </table:table-cell>
            </table:table-row>
            <table:table-row>
              <table:table-cell office:value-type="string">
                <text:p>2453</text:p>
              </table:table-cell>
              <table:table-cell office:value-type="float" office:value="601.575500488281">
                <text:p>601.575500488281</text:p>
              </table:table-cell>
              <table:table-cell office:value-type="float" office:value="0.04437888">
                <text:p>0.04437888</text:p>
              </table:table-cell>
            </table:table-row>
            <table:table-row>
              <table:table-cell office:value-type="string">
                <text:p>2454</text:p>
              </table:table-cell>
              <table:table-cell office:value-type="float" office:value="601.694396972656">
                <text:p>601.694396972656</text:p>
              </table:table-cell>
              <table:table-cell office:value-type="float" office:value="0.04721567">
                <text:p>0.04721567</text:p>
              </table:table-cell>
            </table:table-row>
            <table:table-row>
              <table:table-cell office:value-type="string">
                <text:p>2455</text:p>
              </table:table-cell>
              <table:table-cell office:value-type="float" office:value="601.813293457031">
                <text:p>601.813293457031</text:p>
              </table:table-cell>
              <table:table-cell office:value-type="float" office:value="0.04791403">
                <text:p>0.04791403</text:p>
              </table:table-cell>
            </table:table-row>
            <table:table-row>
              <table:table-cell office:value-type="string">
                <text:p>2456</text:p>
              </table:table-cell>
              <table:table-cell office:value-type="float" office:value="601.932250976563">
                <text:p>601.932250976563</text:p>
              </table:table-cell>
              <table:table-cell office:value-type="float" office:value="0.04208422">
                <text:p>0.04208422</text:p>
              </table:table-cell>
            </table:table-row>
            <table:table-row>
              <table:table-cell office:value-type="string">
                <text:p>2457</text:p>
              </table:table-cell>
              <table:table-cell office:value-type="float" office:value="602.051147460938">
                <text:p>602.051147460938</text:p>
              </table:table-cell>
              <table:table-cell office:value-type="float" office:value="0.05038489">
                <text:p>0.05038489</text:p>
              </table:table-cell>
            </table:table-row>
            <table:table-row>
              <table:table-cell office:value-type="string">
                <text:p>2458</text:p>
              </table:table-cell>
              <table:table-cell office:value-type="float" office:value="602.170043945313">
                <text:p>602.170043945313</text:p>
              </table:table-cell>
              <table:table-cell office:value-type="float" office:value="0.05386261">
                <text:p>0.05386261</text:p>
              </table:table-cell>
            </table:table-row>
            <table:table-row>
              <table:table-cell office:value-type="string">
                <text:p>2459</text:p>
              </table:table-cell>
              <table:table-cell office:value-type="float" office:value="602.289001464844">
                <text:p>602.289001464844</text:p>
              </table:table-cell>
              <table:table-cell office:value-type="float" office:value="0.03682963">
                <text:p>0.03682963</text:p>
              </table:table-cell>
            </table:table-row>
            <table:table-row>
              <table:table-cell office:value-type="string">
                <text:p>2460</text:p>
              </table:table-cell>
              <table:table-cell office:value-type="float" office:value="602.407897949219">
                <text:p>602.407897949219</text:p>
              </table:table-cell>
              <table:table-cell office:value-type="float" office:value="0.0486796">
                <text:p>0.0486796</text:p>
              </table:table-cell>
            </table:table-row>
            <table:table-row>
              <table:table-cell office:value-type="string">
                <text:p>2461</text:p>
              </table:table-cell>
              <table:table-cell office:value-type="float" office:value="602.52685546875">
                <text:p>602.52685546875</text:p>
              </table:table-cell>
              <table:table-cell office:value-type="float" office:value="0.05094865">
                <text:p>0.05094865</text:p>
              </table:table-cell>
            </table:table-row>
            <table:table-row>
              <table:table-cell office:value-type="string">
                <text:p>2462</text:p>
              </table:table-cell>
              <table:table-cell office:value-type="float" office:value="602.645751953125">
                <text:p>602.645751953125</text:p>
              </table:table-cell>
              <table:table-cell office:value-type="float" office:value="0.03747429">
                <text:p>0.03747429</text:p>
              </table:table-cell>
            </table:table-row>
            <table:table-row>
              <table:table-cell office:value-type="string">
                <text:p>2463</text:p>
              </table:table-cell>
              <table:table-cell office:value-type="float" office:value="602.764709472656">
                <text:p>602.764709472656</text:p>
              </table:table-cell>
              <table:table-cell office:value-type="float" office:value="0.04070592">
                <text:p>0.04070592</text:p>
              </table:table-cell>
            </table:table-row>
            <table:table-row>
              <table:table-cell office:value-type="string">
                <text:p>2464</text:p>
              </table:table-cell>
              <table:table-cell office:value-type="float" office:value="602.883666992188">
                <text:p>602.883666992188</text:p>
              </table:table-cell>
              <table:table-cell office:value-type="float" office:value="0.03071403">
                <text:p>0.03071403</text:p>
              </table:table-cell>
            </table:table-row>
            <table:table-row>
              <table:table-cell office:value-type="string">
                <text:p>2465</text:p>
              </table:table-cell>
              <table:table-cell office:value-type="float" office:value="603.002563476563">
                <text:p>603.002563476563</text:p>
              </table:table-cell>
              <table:table-cell office:value-type="float" office:value="0.04365326">
                <text:p>0.04365326</text:p>
              </table:table-cell>
            </table:table-row>
            <table:table-row>
              <table:table-cell office:value-type="string">
                <text:p>2466</text:p>
              </table:table-cell>
              <table:table-cell office:value-type="float" office:value="603.121520996094">
                <text:p>603.121520996094</text:p>
              </table:table-cell>
              <table:table-cell office:value-type="float" office:value="0.04605981">
                <text:p>0.04605981</text:p>
              </table:table-cell>
            </table:table-row>
            <table:table-row>
              <table:table-cell office:value-type="string">
                <text:p>2467</text:p>
              </table:table-cell>
              <table:table-cell office:value-type="float" office:value="603.240478515625">
                <text:p>603.240478515625</text:p>
              </table:table-cell>
              <table:table-cell office:value-type="float" office:value="0.05076181">
                <text:p>0.05076181</text:p>
              </table:table-cell>
            </table:table-row>
            <table:table-row>
              <table:table-cell office:value-type="string">
                <text:p>2468</text:p>
              </table:table-cell>
              <table:table-cell office:value-type="float" office:value="603.359436035156">
                <text:p>603.359436035156</text:p>
              </table:table-cell>
              <table:table-cell office:value-type="float" office:value="0.05033858">
                <text:p>0.05033858</text:p>
              </table:table-cell>
            </table:table-row>
            <table:table-row>
              <table:table-cell office:value-type="string">
                <text:p>2469</text:p>
              </table:table-cell>
              <table:table-cell office:value-type="float" office:value="603.478393554688">
                <text:p>603.478393554688</text:p>
              </table:table-cell>
              <table:table-cell office:value-type="float" office:value="0.04337413">
                <text:p>0.04337413</text:p>
              </table:table-cell>
            </table:table-row>
            <table:table-row>
              <table:table-cell office:value-type="string">
                <text:p>2470</text:p>
              </table:table-cell>
              <table:table-cell office:value-type="float" office:value="603.597290039063">
                <text:p>603.597290039063</text:p>
              </table:table-cell>
              <table:table-cell office:value-type="float" office:value="0.04250252">
                <text:p>0.04250252</text:p>
              </table:table-cell>
            </table:table-row>
            <table:table-row>
              <table:table-cell office:value-type="string">
                <text:p>2471</text:p>
              </table:table-cell>
              <table:table-cell office:value-type="float" office:value="603.716247558594">
                <text:p>603.716247558594</text:p>
              </table:table-cell>
              <table:table-cell office:value-type="float" office:value="0.04095682">
                <text:p>0.04095682</text:p>
              </table:table-cell>
            </table:table-row>
            <table:table-row>
              <table:table-cell office:value-type="string">
                <text:p>2472</text:p>
              </table:table-cell>
              <table:table-cell office:value-type="float" office:value="603.835205078125">
                <text:p>603.835205078125</text:p>
              </table:table-cell>
              <table:table-cell office:value-type="float" office:value="0.0347727">
                <text:p>0.0347727</text:p>
              </table:table-cell>
            </table:table-row>
            <table:table-row>
              <table:table-cell office:value-type="string">
                <text:p>2473</text:p>
              </table:table-cell>
              <table:table-cell office:value-type="float" office:value="603.954162597656">
                <text:p>603.954162597656</text:p>
              </table:table-cell>
              <table:table-cell office:value-type="float" office:value="0.03661086">
                <text:p>0.03661086</text:p>
              </table:table-cell>
            </table:table-row>
            <table:table-row>
              <table:table-cell office:value-type="string">
                <text:p>2474</text:p>
              </table:table-cell>
              <table:table-cell office:value-type="float" office:value="604.073120117188">
                <text:p>604.073120117188</text:p>
              </table:table-cell>
              <table:table-cell office:value-type="float" office:value="0.03786879">
                <text:p>0.03786879</text:p>
              </table:table-cell>
            </table:table-row>
            <table:table-row>
              <table:table-cell office:value-type="string">
                <text:p>2475</text:p>
              </table:table-cell>
              <table:table-cell office:value-type="float" office:value="604.192077636719">
                <text:p>604.192077636719</text:p>
              </table:table-cell>
              <table:table-cell office:value-type="float" office:value="0.03407663">
                <text:p>0.03407663</text:p>
              </table:table-cell>
            </table:table-row>
            <table:table-row>
              <table:table-cell office:value-type="string">
                <text:p>2476</text:p>
              </table:table-cell>
              <table:table-cell office:value-type="float" office:value="604.31103515625">
                <text:p>604.31103515625</text:p>
              </table:table-cell>
              <table:table-cell office:value-type="float" office:value="0.05576443">
                <text:p>0.05576443</text:p>
              </table:table-cell>
            </table:table-row>
            <table:table-row>
              <table:table-cell office:value-type="string">
                <text:p>2477</text:p>
              </table:table-cell>
              <table:table-cell office:value-type="float" office:value="604.430053710938">
                <text:p>604.430053710938</text:p>
              </table:table-cell>
              <table:table-cell office:value-type="float" office:value="0.04107532">
                <text:p>0.04107532</text:p>
              </table:table-cell>
            </table:table-row>
            <table:table-row>
              <table:table-cell office:value-type="string">
                <text:p>2478</text:p>
              </table:table-cell>
              <table:table-cell office:value-type="float" office:value="604.549011230469">
                <text:p>604.549011230469</text:p>
              </table:table-cell>
              <table:table-cell office:value-type="float" office:value="0.0376205">
                <text:p>0.0376205</text:p>
              </table:table-cell>
            </table:table-row>
            <table:table-row>
              <table:table-cell office:value-type="string">
                <text:p>2479</text:p>
              </table:table-cell>
              <table:table-cell office:value-type="float" office:value="604.66796875">
                <text:p>604.66796875</text:p>
              </table:table-cell>
              <table:table-cell office:value-type="float" office:value="0.04103987">
                <text:p>0.04103987</text:p>
              </table:table-cell>
            </table:table-row>
            <table:table-row>
              <table:table-cell office:value-type="string">
                <text:p>2480</text:p>
              </table:table-cell>
              <table:table-cell office:value-type="float" office:value="604.786926269531">
                <text:p>604.786926269531</text:p>
              </table:table-cell>
              <table:table-cell office:value-type="float" office:value="0.05143226">
                <text:p>0.05143226</text:p>
              </table:table-cell>
            </table:table-row>
            <table:table-row>
              <table:table-cell office:value-type="string">
                <text:p>2481</text:p>
              </table:table-cell>
              <table:table-cell office:value-type="float" office:value="604.905883789063">
                <text:p>604.905883789063</text:p>
              </table:table-cell>
              <table:table-cell office:value-type="float" office:value="0.0495224">
                <text:p>0.0495224</text:p>
              </table:table-cell>
            </table:table-row>
            <table:table-row>
              <table:table-cell office:value-type="string">
                <text:p>2482</text:p>
              </table:table-cell>
              <table:table-cell office:value-type="float" office:value="605.02490234375">
                <text:p>605.02490234375</text:p>
              </table:table-cell>
              <table:table-cell office:value-type="float" office:value="0.03838304">
                <text:p>0.03838304</text:p>
              </table:table-cell>
            </table:table-row>
            <table:table-row>
              <table:table-cell office:value-type="string">
                <text:p>2483</text:p>
              </table:table-cell>
              <table:table-cell office:value-type="float" office:value="605.143859863281">
                <text:p>605.143859863281</text:p>
              </table:table-cell>
              <table:table-cell office:value-type="float" office:value="0.03443548">
                <text:p>0.03443548</text:p>
              </table:table-cell>
            </table:table-row>
            <table:table-row>
              <table:table-cell office:value-type="string">
                <text:p>2484</text:p>
              </table:table-cell>
              <table:table-cell office:value-type="float" office:value="605.262817382813">
                <text:p>605.262817382813</text:p>
              </table:table-cell>
              <table:table-cell office:value-type="float" office:value="0.03312023">
                <text:p>0.03312023</text:p>
              </table:table-cell>
            </table:table-row>
            <table:table-row>
              <table:table-cell office:value-type="string">
                <text:p>2485</text:p>
              </table:table-cell>
              <table:table-cell office:value-type="float" office:value="605.3818359375">
                <text:p>605.3818359375</text:p>
              </table:table-cell>
              <table:table-cell office:value-type="float" office:value="0.04124334">
                <text:p>0.04124334</text:p>
              </table:table-cell>
            </table:table-row>
            <table:table-row>
              <table:table-cell office:value-type="string">
                <text:p>2486</text:p>
              </table:table-cell>
              <table:table-cell office:value-type="float" office:value="605.500793457031">
                <text:p>605.500793457031</text:p>
              </table:table-cell>
              <table:table-cell office:value-type="float" office:value="0.03689588">
                <text:p>0.03689588</text:p>
              </table:table-cell>
            </table:table-row>
            <table:table-row>
              <table:table-cell office:value-type="string">
                <text:p>2487</text:p>
              </table:table-cell>
              <table:table-cell office:value-type="float" office:value="605.619812011719">
                <text:p>605.619812011719</text:p>
              </table:table-cell>
              <table:table-cell office:value-type="float" office:value="0.03987096">
                <text:p>0.03987096</text:p>
              </table:table-cell>
            </table:table-row>
            <table:table-row>
              <table:table-cell office:value-type="string">
                <text:p>2488</text:p>
              </table:table-cell>
              <table:table-cell office:value-type="float" office:value="605.73876953125">
                <text:p>605.73876953125</text:p>
              </table:table-cell>
              <table:table-cell office:value-type="float" office:value="0.03483188">
                <text:p>0.03483188</text:p>
              </table:table-cell>
            </table:table-row>
            <table:table-row>
              <table:table-cell office:value-type="string">
                <text:p>2489</text:p>
              </table:table-cell>
              <table:table-cell office:value-type="float" office:value="605.857788085938">
                <text:p>605.857788085938</text:p>
              </table:table-cell>
              <table:table-cell office:value-type="float" office:value="0.04795521">
                <text:p>0.04795521</text:p>
              </table:table-cell>
            </table:table-row>
            <table:table-row>
              <table:table-cell office:value-type="string">
                <text:p>2490</text:p>
              </table:table-cell>
              <table:table-cell office:value-type="float" office:value="605.976806640625">
                <text:p>605.976806640625</text:p>
              </table:table-cell>
              <table:table-cell office:value-type="float" office:value="0.04950788">
                <text:p>0.04950788</text:p>
              </table:table-cell>
            </table:table-row>
            <table:table-row>
              <table:table-cell office:value-type="string">
                <text:p>2491</text:p>
              </table:table-cell>
              <table:table-cell office:value-type="float" office:value="606.095764160156">
                <text:p>606.095764160156</text:p>
              </table:table-cell>
              <table:table-cell office:value-type="float" office:value="0.04229129">
                <text:p>0.04229129</text:p>
              </table:table-cell>
            </table:table-row>
            <table:table-row>
              <table:table-cell office:value-type="string">
                <text:p>2492</text:p>
              </table:table-cell>
              <table:table-cell office:value-type="float" office:value="606.214782714844">
                <text:p>606.214782714844</text:p>
              </table:table-cell>
              <table:table-cell office:value-type="float" office:value="0.0501301">
                <text:p>0.0501301</text:p>
              </table:table-cell>
            </table:table-row>
            <table:table-row>
              <table:table-cell office:value-type="string">
                <text:p>2493</text:p>
              </table:table-cell>
              <table:table-cell office:value-type="float" office:value="606.333801269531">
                <text:p>606.333801269531</text:p>
              </table:table-cell>
              <table:table-cell office:value-type="float" office:value="0.03305322">
                <text:p>0.03305322</text:p>
              </table:table-cell>
            </table:table-row>
            <table:table-row>
              <table:table-cell office:value-type="string">
                <text:p>2494</text:p>
              </table:table-cell>
              <table:table-cell office:value-type="float" office:value="606.452758789063">
                <text:p>606.452758789063</text:p>
              </table:table-cell>
              <table:table-cell office:value-type="float" office:value="0.04618126">
                <text:p>0.04618126</text:p>
              </table:table-cell>
            </table:table-row>
            <table:table-row>
              <table:table-cell office:value-type="string">
                <text:p>2495</text:p>
              </table:table-cell>
              <table:table-cell office:value-type="float" office:value="606.57177734375">
                <text:p>606.57177734375</text:p>
              </table:table-cell>
              <table:table-cell office:value-type="float" office:value="0.03449994">
                <text:p>0.03449994</text:p>
              </table:table-cell>
            </table:table-row>
            <table:table-row>
              <table:table-cell office:value-type="string">
                <text:p>2496</text:p>
              </table:table-cell>
              <table:table-cell office:value-type="float" office:value="606.690795898438">
                <text:p>606.690795898438</text:p>
              </table:table-cell>
              <table:table-cell office:value-type="float" office:value="0.04047007">
                <text:p>0.04047007</text:p>
              </table:table-cell>
            </table:table-row>
            <table:table-row>
              <table:table-cell office:value-type="string">
                <text:p>2497</text:p>
              </table:table-cell>
              <table:table-cell office:value-type="float" office:value="606.809814453125">
                <text:p>606.809814453125</text:p>
              </table:table-cell>
              <table:table-cell office:value-type="float" office:value="0.0327298">
                <text:p>0.0327298</text:p>
              </table:table-cell>
            </table:table-row>
            <table:table-row>
              <table:table-cell office:value-type="string">
                <text:p>2498</text:p>
              </table:table-cell>
              <table:table-cell office:value-type="float" office:value="606.928833007813">
                <text:p>606.928833007813</text:p>
              </table:table-cell>
              <table:table-cell office:value-type="float" office:value="0.03335853">
                <text:p>0.03335853</text:p>
              </table:table-cell>
            </table:table-row>
            <table:table-row>
              <table:table-cell office:value-type="string">
                <text:p>2499</text:p>
              </table:table-cell>
              <table:table-cell office:value-type="float" office:value="607.0478515625">
                <text:p>607.0478515625</text:p>
              </table:table-cell>
              <table:table-cell office:value-type="float" office:value="0.03165238">
                <text:p>0.03165238</text:p>
              </table:table-cell>
            </table:table-row>
            <table:table-row>
              <table:table-cell office:value-type="string">
                <text:p>2500</text:p>
              </table:table-cell>
              <table:table-cell office:value-type="float" office:value="607.166870117188">
                <text:p>607.166870117188</text:p>
              </table:table-cell>
              <table:table-cell office:value-type="float" office:value="0.05479298">
                <text:p>0.05479298</text:p>
              </table:table-cell>
            </table:table-row>
            <table:table-row>
              <table:table-cell office:value-type="string">
                <text:p>2501</text:p>
              </table:table-cell>
              <table:table-cell office:value-type="float" office:value="607.285888671875">
                <text:p>607.285888671875</text:p>
              </table:table-cell>
              <table:table-cell office:value-type="float" office:value="0.04608797">
                <text:p>0.04608797</text:p>
              </table:table-cell>
            </table:table-row>
            <table:table-row>
              <table:table-cell office:value-type="string">
                <text:p>2502</text:p>
              </table:table-cell>
              <table:table-cell office:value-type="float" office:value="607.404907226563">
                <text:p>607.404907226563</text:p>
              </table:table-cell>
              <table:table-cell office:value-type="float" office:value="0.04084063">
                <text:p>0.04084063</text:p>
              </table:table-cell>
            </table:table-row>
            <table:table-row>
              <table:table-cell office:value-type="string">
                <text:p>2503</text:p>
              </table:table-cell>
              <table:table-cell office:value-type="float" office:value="607.52392578125">
                <text:p>607.52392578125</text:p>
              </table:table-cell>
              <table:table-cell office:value-type="float" office:value="0.03857685">
                <text:p>0.03857685</text:p>
              </table:table-cell>
            </table:table-row>
            <table:table-row>
              <table:table-cell office:value-type="string">
                <text:p>2504</text:p>
              </table:table-cell>
              <table:table-cell office:value-type="float" office:value="607.642944335938">
                <text:p>607.642944335938</text:p>
              </table:table-cell>
              <table:table-cell office:value-type="float" office:value="0.04353052">
                <text:p>0.04353052</text:p>
              </table:table-cell>
            </table:table-row>
            <table:table-row>
              <table:table-cell office:value-type="string">
                <text:p>2505</text:p>
              </table:table-cell>
              <table:table-cell office:value-type="float" office:value="607.761962890625">
                <text:p>607.761962890625</text:p>
              </table:table-cell>
              <table:table-cell office:value-type="float" office:value="0.05529744">
                <text:p>0.05529744</text:p>
              </table:table-cell>
            </table:table-row>
            <table:table-row>
              <table:table-cell office:value-type="string">
                <text:p>2506</text:p>
              </table:table-cell>
              <table:table-cell office:value-type="float" office:value="607.880981445313">
                <text:p>607.880981445313</text:p>
              </table:table-cell>
              <table:table-cell office:value-type="float" office:value="0.04540056">
                <text:p>0.04540056</text:p>
              </table:table-cell>
            </table:table-row>
            <table:table-row>
              <table:table-cell office:value-type="string">
                <text:p>2507</text:p>
              </table:table-cell>
              <table:table-cell office:value-type="float" office:value="608">
                <text:p>608</text:p>
              </table:table-cell>
              <table:table-cell office:value-type="float" office:value="0.03037697">
                <text:p>0.03037697</text:p>
              </table:table-cell>
            </table:table-row>
            <table:table-row>
              <table:table-cell office:value-type="string">
                <text:p>2508</text:p>
              </table:table-cell>
              <table:table-cell office:value-type="float" office:value="608.119079589844">
                <text:p>608.119079589844</text:p>
              </table:table-cell>
              <table:table-cell office:value-type="float" office:value="0.03579152">
                <text:p>0.03579152</text:p>
              </table:table-cell>
            </table:table-row>
            <table:table-row>
              <table:table-cell office:value-type="string">
                <text:p>2509</text:p>
              </table:table-cell>
              <table:table-cell office:value-type="float" office:value="608.238098144531">
                <text:p>608.238098144531</text:p>
              </table:table-cell>
              <table:table-cell office:value-type="float" office:value="0.03475645">
                <text:p>0.03475645</text:p>
              </table:table-cell>
            </table:table-row>
            <table:table-row>
              <table:table-cell office:value-type="string">
                <text:p>2510</text:p>
              </table:table-cell>
              <table:table-cell office:value-type="float" office:value="608.357116699219">
                <text:p>608.357116699219</text:p>
              </table:table-cell>
              <table:table-cell office:value-type="float" office:value="0.03334149">
                <text:p>0.03334149</text:p>
              </table:table-cell>
            </table:table-row>
            <table:table-row>
              <table:table-cell office:value-type="string">
                <text:p>2511</text:p>
              </table:table-cell>
              <table:table-cell office:value-type="float" office:value="608.476196289063">
                <text:p>608.476196289063</text:p>
              </table:table-cell>
              <table:table-cell office:value-type="float" office:value="0.0397685">
                <text:p>0.0397685</text:p>
              </table:table-cell>
            </table:table-row>
            <table:table-row>
              <table:table-cell office:value-type="string">
                <text:p>2512</text:p>
              </table:table-cell>
              <table:table-cell office:value-type="float" office:value="608.59521484375">
                <text:p>608.59521484375</text:p>
              </table:table-cell>
              <table:table-cell office:value-type="float" office:value="0.05001714">
                <text:p>0.05001714</text:p>
              </table:table-cell>
            </table:table-row>
            <table:table-row>
              <table:table-cell office:value-type="string">
                <text:p>2513</text:p>
              </table:table-cell>
              <table:table-cell office:value-type="float" office:value="608.714233398438">
                <text:p>608.714233398438</text:p>
              </table:table-cell>
              <table:table-cell office:value-type="float" office:value="0.0385209">
                <text:p>0.0385209</text:p>
              </table:table-cell>
            </table:table-row>
            <table:table-row>
              <table:table-cell office:value-type="string">
                <text:p>2514</text:p>
              </table:table-cell>
              <table:table-cell office:value-type="float" office:value="608.833312988281">
                <text:p>608.833312988281</text:p>
              </table:table-cell>
              <table:table-cell office:value-type="float" office:value="0.03820467">
                <text:p>0.03820467</text:p>
              </table:table-cell>
            </table:table-row>
            <table:table-row>
              <table:table-cell office:value-type="string">
                <text:p>2515</text:p>
              </table:table-cell>
              <table:table-cell office:value-type="float" office:value="608.952331542969">
                <text:p>608.952331542969</text:p>
              </table:table-cell>
              <table:table-cell office:value-type="float" office:value="0.02640747">
                <text:p>0.02640747</text:p>
              </table:table-cell>
            </table:table-row>
            <table:table-row>
              <table:table-cell office:value-type="string">
                <text:p>2516</text:p>
              </table:table-cell>
              <table:table-cell office:value-type="float" office:value="609.071411132813">
                <text:p>609.071411132813</text:p>
              </table:table-cell>
              <table:table-cell office:value-type="float" office:value="0.03055809">
                <text:p>0.03055809</text:p>
              </table:table-cell>
            </table:table-row>
            <table:table-row>
              <table:table-cell office:value-type="string">
                <text:p>2517</text:p>
              </table:table-cell>
              <table:table-cell office:value-type="float" office:value="609.1904296875">
                <text:p>609.1904296875</text:p>
              </table:table-cell>
              <table:table-cell office:value-type="float" office:value="0.02883648">
                <text:p>0.02883648</text:p>
              </table:table-cell>
            </table:table-row>
            <table:table-row>
              <table:table-cell office:value-type="string">
                <text:p>2518</text:p>
              </table:table-cell>
              <table:table-cell office:value-type="float" office:value="609.309509277344">
                <text:p>609.309509277344</text:p>
              </table:table-cell>
              <table:table-cell office:value-type="float" office:value="0.04750919">
                <text:p>0.04750919</text:p>
              </table:table-cell>
            </table:table-row>
            <table:table-row>
              <table:table-cell office:value-type="string">
                <text:p>2519</text:p>
              </table:table-cell>
              <table:table-cell office:value-type="float" office:value="609.428588867188">
                <text:p>609.428588867188</text:p>
              </table:table-cell>
              <table:table-cell office:value-type="float" office:value="0.03921575">
                <text:p>0.03921575</text:p>
              </table:table-cell>
            </table:table-row>
            <table:table-row>
              <table:table-cell office:value-type="string">
                <text:p>2520</text:p>
              </table:table-cell>
              <table:table-cell office:value-type="float" office:value="609.547607421875">
                <text:p>609.547607421875</text:p>
              </table:table-cell>
              <table:table-cell office:value-type="float" office:value="0.03712172">
                <text:p>0.03712172</text:p>
              </table:table-cell>
            </table:table-row>
            <table:table-row>
              <table:table-cell office:value-type="string">
                <text:p>2521</text:p>
              </table:table-cell>
              <table:table-cell office:value-type="float" office:value="609.666687011719">
                <text:p>609.666687011719</text:p>
              </table:table-cell>
              <table:table-cell office:value-type="float" office:value="0.03403766">
                <text:p>0.03403766</text:p>
              </table:table-cell>
            </table:table-row>
            <table:table-row>
              <table:table-cell office:value-type="string">
                <text:p>2522</text:p>
              </table:table-cell>
              <table:table-cell office:value-type="float" office:value="609.785766601563">
                <text:p>609.785766601563</text:p>
              </table:table-cell>
              <table:table-cell office:value-type="float" office:value="0.03384694">
                <text:p>0.03384694</text:p>
              </table:table-cell>
            </table:table-row>
            <table:table-row>
              <table:table-cell office:value-type="string">
                <text:p>2523</text:p>
              </table:table-cell>
              <table:table-cell office:value-type="float" office:value="609.904846191406">
                <text:p>609.904846191406</text:p>
              </table:table-cell>
              <table:table-cell office:value-type="float" office:value="0.03590201">
                <text:p>0.03590201</text:p>
              </table:table-cell>
            </table:table-row>
            <table:table-row>
              <table:table-cell office:value-type="string">
                <text:p>2524</text:p>
              </table:table-cell>
              <table:table-cell office:value-type="float" office:value="610.023864746094">
                <text:p>610.023864746094</text:p>
              </table:table-cell>
              <table:table-cell office:value-type="float" office:value="0.0320651">
                <text:p>0.0320651</text:p>
              </table:table-cell>
            </table:table-row>
            <table:table-row>
              <table:table-cell office:value-type="string">
                <text:p>2525</text:p>
              </table:table-cell>
              <table:table-cell office:value-type="float" office:value="610.142944335938">
                <text:p>610.142944335938</text:p>
              </table:table-cell>
              <table:table-cell office:value-type="float" office:value="0.03185294">
                <text:p>0.03185294</text:p>
              </table:table-cell>
            </table:table-row>
            <table:table-row>
              <table:table-cell office:value-type="string">
                <text:p>2526</text:p>
              </table:table-cell>
              <table:table-cell office:value-type="float" office:value="610.262023925781">
                <text:p>610.262023925781</text:p>
              </table:table-cell>
              <table:table-cell office:value-type="float" office:value="0.04919217">
                <text:p>0.04919217</text:p>
              </table:table-cell>
            </table:table-row>
            <table:table-row>
              <table:table-cell office:value-type="string">
                <text:p>2527</text:p>
              </table:table-cell>
              <table:table-cell office:value-type="float" office:value="610.381103515625">
                <text:p>610.381103515625</text:p>
              </table:table-cell>
              <table:table-cell office:value-type="float" office:value="0.03761367">
                <text:p>0.03761367</text:p>
              </table:table-cell>
            </table:table-row>
            <table:table-row>
              <table:table-cell office:value-type="string">
                <text:p>2528</text:p>
              </table:table-cell>
              <table:table-cell office:value-type="float" office:value="610.500183105469">
                <text:p>610.500183105469</text:p>
              </table:table-cell>
              <table:table-cell office:value-type="float" office:value="0.03300733">
                <text:p>0.03300733</text:p>
              </table:table-cell>
            </table:table-row>
            <table:table-row>
              <table:table-cell office:value-type="string">
                <text:p>2529</text:p>
              </table:table-cell>
              <table:table-cell office:value-type="float" office:value="610.619262695313">
                <text:p>610.619262695313</text:p>
              </table:table-cell>
              <table:table-cell office:value-type="float" office:value="0.02866756">
                <text:p>0.02866756</text:p>
              </table:table-cell>
            </table:table-row>
            <table:table-row>
              <table:table-cell office:value-type="string">
                <text:p>2530</text:p>
              </table:table-cell>
              <table:table-cell office:value-type="float" office:value="610.738342285156">
                <text:p>610.738342285156</text:p>
              </table:table-cell>
              <table:table-cell office:value-type="float" office:value="0.03612615">
                <text:p>0.03612615</text:p>
              </table:table-cell>
            </table:table-row>
            <table:table-row>
              <table:table-cell office:value-type="string">
                <text:p>2531</text:p>
              </table:table-cell>
              <table:table-cell office:value-type="float" office:value="610.857421875">
                <text:p>610.857421875</text:p>
              </table:table-cell>
              <table:table-cell office:value-type="float" office:value="0.02973387">
                <text:p>0.02973387</text:p>
              </table:table-cell>
            </table:table-row>
            <table:table-row>
              <table:table-cell office:value-type="string">
                <text:p>2532</text:p>
              </table:table-cell>
              <table:table-cell office:value-type="float" office:value="610.976501464844">
                <text:p>610.976501464844</text:p>
              </table:table-cell>
              <table:table-cell office:value-type="float" office:value="0.03944598">
                <text:p>0.03944598</text:p>
              </table:table-cell>
            </table:table-row>
            <table:table-row>
              <table:table-cell office:value-type="string">
                <text:p>2533</text:p>
              </table:table-cell>
              <table:table-cell office:value-type="float" office:value="611.095581054688">
                <text:p>611.095581054688</text:p>
              </table:table-cell>
              <table:table-cell office:value-type="float" office:value="0.03598917">
                <text:p>0.03598917</text:p>
              </table:table-cell>
            </table:table-row>
            <table:table-row>
              <table:table-cell office:value-type="string">
                <text:p>2534</text:p>
              </table:table-cell>
              <table:table-cell office:value-type="float" office:value="611.214660644531">
                <text:p>611.214660644531</text:p>
              </table:table-cell>
              <table:table-cell office:value-type="float" office:value="0.03283359">
                <text:p>0.03283359</text:p>
              </table:table-cell>
            </table:table-row>
            <table:table-row>
              <table:table-cell office:value-type="string">
                <text:p>2535</text:p>
              </table:table-cell>
              <table:table-cell office:value-type="float" office:value="611.333801269531">
                <text:p>611.333801269531</text:p>
              </table:table-cell>
              <table:table-cell office:value-type="float" office:value="0.029225">
                <text:p>0.029225</text:p>
              </table:table-cell>
            </table:table-row>
            <table:table-row>
              <table:table-cell office:value-type="string">
                <text:p>2536</text:p>
              </table:table-cell>
              <table:table-cell office:value-type="float" office:value="611.452880859375">
                <text:p>611.452880859375</text:p>
              </table:table-cell>
              <table:table-cell office:value-type="float" office:value="0.0236058">
                <text:p>0.0236058</text:p>
              </table:table-cell>
            </table:table-row>
            <table:table-row>
              <table:table-cell office:value-type="string">
                <text:p>2537</text:p>
              </table:table-cell>
              <table:table-cell office:value-type="float" office:value="611.571960449219">
                <text:p>611.571960449219</text:p>
              </table:table-cell>
              <table:table-cell office:value-type="float" office:value="0.03584212">
                <text:p>0.03584212</text:p>
              </table:table-cell>
            </table:table-row>
            <table:table-row>
              <table:table-cell office:value-type="string">
                <text:p>2538</text:p>
              </table:table-cell>
              <table:table-cell office:value-type="float" office:value="611.691040039063">
                <text:p>611.691040039063</text:p>
              </table:table-cell>
              <table:table-cell office:value-type="float" office:value="0.03545346">
                <text:p>0.03545346</text:p>
              </table:table-cell>
            </table:table-row>
            <table:table-row>
              <table:table-cell office:value-type="string">
                <text:p>2539</text:p>
              </table:table-cell>
              <table:table-cell office:value-type="float" office:value="611.810180664063">
                <text:p>611.810180664063</text:p>
              </table:table-cell>
              <table:table-cell office:value-type="float" office:value="0.0348944">
                <text:p>0.0348944</text:p>
              </table:table-cell>
            </table:table-row>
            <table:table-row>
              <table:table-cell office:value-type="string">
                <text:p>2540</text:p>
              </table:table-cell>
              <table:table-cell office:value-type="float" office:value="611.929260253906">
                <text:p>611.929260253906</text:p>
              </table:table-cell>
              <table:table-cell office:value-type="float" office:value="0.03346588">
                <text:p>0.03346588</text:p>
              </table:table-cell>
            </table:table-row>
            <table:table-row>
              <table:table-cell office:value-type="string">
                <text:p>2541</text:p>
              </table:table-cell>
              <table:table-cell office:value-type="float" office:value="612.048400878906">
                <text:p>612.048400878906</text:p>
              </table:table-cell>
              <table:table-cell office:value-type="float" office:value="0.03589097">
                <text:p>0.03589097</text:p>
              </table:table-cell>
            </table:table-row>
            <table:table-row>
              <table:table-cell office:value-type="string">
                <text:p>2542</text:p>
              </table:table-cell>
              <table:table-cell office:value-type="float" office:value="612.16748046875">
                <text:p>612.16748046875</text:p>
              </table:table-cell>
              <table:table-cell office:value-type="float" office:value="0.02887048">
                <text:p>0.02887048</text:p>
              </table:table-cell>
            </table:table-row>
            <table:table-row>
              <table:table-cell office:value-type="string">
                <text:p>2543</text:p>
              </table:table-cell>
              <table:table-cell office:value-type="float" office:value="612.286560058594">
                <text:p>612.286560058594</text:p>
              </table:table-cell>
              <table:table-cell office:value-type="float" office:value="0.03942188">
                <text:p>0.03942188</text:p>
              </table:table-cell>
            </table:table-row>
            <table:table-row>
              <table:table-cell office:value-type="string">
                <text:p>2544</text:p>
              </table:table-cell>
              <table:table-cell office:value-type="float" office:value="612.405700683594">
                <text:p>612.405700683594</text:p>
              </table:table-cell>
              <table:table-cell office:value-type="float" office:value="0.04128834">
                <text:p>0.04128834</text:p>
              </table:table-cell>
            </table:table-row>
            <table:table-row>
              <table:table-cell office:value-type="string">
                <text:p>2545</text:p>
              </table:table-cell>
              <table:table-cell office:value-type="float" office:value="612.524780273438">
                <text:p>612.524780273438</text:p>
              </table:table-cell>
              <table:table-cell office:value-type="float" office:value="0.02997218">
                <text:p>0.02997218</text:p>
              </table:table-cell>
            </table:table-row>
            <table:table-row>
              <table:table-cell office:value-type="string">
                <text:p>2546</text:p>
              </table:table-cell>
              <table:table-cell office:value-type="float" office:value="612.643920898438">
                <text:p>612.643920898438</text:p>
              </table:table-cell>
              <table:table-cell office:value-type="float" office:value="0.02500407">
                <text:p>0.02500407</text:p>
              </table:table-cell>
            </table:table-row>
            <table:table-row>
              <table:table-cell office:value-type="string">
                <text:p>2547</text:p>
              </table:table-cell>
              <table:table-cell office:value-type="float" office:value="612.763061523438">
                <text:p>612.763061523438</text:p>
              </table:table-cell>
              <table:table-cell office:value-type="float" office:value="0.04222997">
                <text:p>0.04222997</text:p>
              </table:table-cell>
            </table:table-row>
            <table:table-row>
              <table:table-cell office:value-type="string">
                <text:p>2548</text:p>
              </table:table-cell>
              <table:table-cell office:value-type="float" office:value="612.882141113281">
                <text:p>612.882141113281</text:p>
              </table:table-cell>
              <table:table-cell office:value-type="float" office:value="0.02638978">
                <text:p>0.02638978</text:p>
              </table:table-cell>
            </table:table-row>
            <table:table-row>
              <table:table-cell office:value-type="string">
                <text:p>2549</text:p>
              </table:table-cell>
              <table:table-cell office:value-type="float" office:value="613.001281738281">
                <text:p>613.001281738281</text:p>
              </table:table-cell>
              <table:table-cell office:value-type="float" office:value="0.03290628">
                <text:p>0.03290628</text:p>
              </table:table-cell>
            </table:table-row>
            <table:table-row>
              <table:table-cell office:value-type="string">
                <text:p>2550</text:p>
              </table:table-cell>
              <table:table-cell office:value-type="float" office:value="613.120422363281">
                <text:p>613.120422363281</text:p>
              </table:table-cell>
              <table:table-cell office:value-type="float" office:value="0.0285523">
                <text:p>0.0285523</text:p>
              </table:table-cell>
            </table:table-row>
            <table:table-row>
              <table:table-cell office:value-type="string">
                <text:p>2551</text:p>
              </table:table-cell>
              <table:table-cell office:value-type="float" office:value="613.239501953125">
                <text:p>613.239501953125</text:p>
              </table:table-cell>
              <table:table-cell office:value-type="float" office:value="0.03277157">
                <text:p>0.03277157</text:p>
              </table:table-cell>
            </table:table-row>
            <table:table-row>
              <table:table-cell office:value-type="string">
                <text:p>2552</text:p>
              </table:table-cell>
              <table:table-cell office:value-type="float" office:value="613.358642578125">
                <text:p>613.358642578125</text:p>
              </table:table-cell>
              <table:table-cell office:value-type="float" office:value="0.03623016">
                <text:p>0.03623016</text:p>
              </table:table-cell>
            </table:table-row>
            <table:table-row>
              <table:table-cell office:value-type="string">
                <text:p>2553</text:p>
              </table:table-cell>
              <table:table-cell office:value-type="float" office:value="613.477783203125">
                <text:p>613.477783203125</text:p>
              </table:table-cell>
              <table:table-cell office:value-type="float" office:value="0.02759152">
                <text:p>0.02759152</text:p>
              </table:table-cell>
            </table:table-row>
            <table:table-row>
              <table:table-cell office:value-type="string">
                <text:p>2554</text:p>
              </table:table-cell>
              <table:table-cell office:value-type="float" office:value="613.596923828125">
                <text:p>613.596923828125</text:p>
              </table:table-cell>
              <table:table-cell office:value-type="float" office:value="0.02169788">
                <text:p>0.02169788</text:p>
              </table:table-cell>
            </table:table-row>
            <table:table-row>
              <table:table-cell office:value-type="string">
                <text:p>2555</text:p>
              </table:table-cell>
              <table:table-cell office:value-type="float" office:value="613.716064453125">
                <text:p>613.716064453125</text:p>
              </table:table-cell>
              <table:table-cell office:value-type="float" office:value="0.02693464">
                <text:p>0.02693464</text:p>
              </table:table-cell>
            </table:table-row>
            <table:table-row>
              <table:table-cell office:value-type="string">
                <text:p>2556</text:p>
              </table:table-cell>
              <table:table-cell office:value-type="float" office:value="613.835205078125">
                <text:p>613.835205078125</text:p>
              </table:table-cell>
              <table:table-cell office:value-type="float" office:value="0.02455391">
                <text:p>0.02455391</text:p>
              </table:table-cell>
            </table:table-row>
            <table:table-row>
              <table:table-cell office:value-type="string">
                <text:p>2557</text:p>
              </table:table-cell>
              <table:table-cell office:value-type="float" office:value="613.954345703125">
                <text:p>613.954345703125</text:p>
              </table:table-cell>
              <table:table-cell office:value-type="float" office:value="0.02021104">
                <text:p>0.02021104</text:p>
              </table:table-cell>
            </table:table-row>
            <table:table-row>
              <table:table-cell office:value-type="string">
                <text:p>2558</text:p>
              </table:table-cell>
              <table:table-cell office:value-type="float" office:value="614.073486328125">
                <text:p>614.073486328125</text:p>
              </table:table-cell>
              <table:table-cell office:value-type="float" office:value="0.02683665">
                <text:p>0.02683665</text:p>
              </table:table-cell>
            </table:table-row>
            <table:table-row>
              <table:table-cell office:value-type="string">
                <text:p>2559</text:p>
              </table:table-cell>
              <table:table-cell office:value-type="float" office:value="614.192626953125">
                <text:p>614.192626953125</text:p>
              </table:table-cell>
              <table:table-cell office:value-type="float" office:value="0.04567907">
                <text:p>0.04567907</text:p>
              </table:table-cell>
            </table:table-row>
            <table:table-row>
              <table:table-cell office:value-type="string">
                <text:p>2560</text:p>
              </table:table-cell>
              <table:table-cell office:value-type="float" office:value="614.311767578125">
                <text:p>614.311767578125</text:p>
              </table:table-cell>
              <table:table-cell office:value-type="float" office:value="0.02435028">
                <text:p>0.02435028</text:p>
              </table:table-cell>
            </table:table-row>
            <table:table-row>
              <table:table-cell office:value-type="string">
                <text:p>2561</text:p>
              </table:table-cell>
              <table:table-cell office:value-type="float" office:value="614.430908203125">
                <text:p>614.430908203125</text:p>
              </table:table-cell>
              <table:table-cell office:value-type="float" office:value="0.0247476">
                <text:p>0.0247476</text:p>
              </table:table-cell>
            </table:table-row>
            <table:table-row>
              <table:table-cell office:value-type="string">
                <text:p>2562</text:p>
              </table:table-cell>
              <table:table-cell office:value-type="float" office:value="614.550048828125">
                <text:p>614.550048828125</text:p>
              </table:table-cell>
              <table:table-cell office:value-type="float" office:value="0.02402847">
                <text:p>0.02402847</text:p>
              </table:table-cell>
            </table:table-row>
            <table:table-row>
              <table:table-cell office:value-type="string">
                <text:p>2563</text:p>
              </table:table-cell>
              <table:table-cell office:value-type="float" office:value="614.669189453125">
                <text:p>614.669189453125</text:p>
              </table:table-cell>
              <table:table-cell office:value-type="float" office:value="0.03576382">
                <text:p>0.03576382</text:p>
              </table:table-cell>
            </table:table-row>
            <table:table-row>
              <table:table-cell office:value-type="string">
                <text:p>2564</text:p>
              </table:table-cell>
              <table:table-cell office:value-type="float" office:value="614.788330078125">
                <text:p>614.788330078125</text:p>
              </table:table-cell>
              <table:table-cell office:value-type="float" office:value="0.02526077">
                <text:p>0.02526077</text:p>
              </table:table-cell>
            </table:table-row>
            <table:table-row>
              <table:table-cell office:value-type="string">
                <text:p>2565</text:p>
              </table:table-cell>
              <table:table-cell office:value-type="float" office:value="614.907531738281">
                <text:p>614.907531738281</text:p>
              </table:table-cell>
              <table:table-cell office:value-type="float" office:value="0.03185734">
                <text:p>0.03185734</text:p>
              </table:table-cell>
            </table:table-row>
            <table:table-row>
              <table:table-cell office:value-type="string">
                <text:p>2566</text:p>
              </table:table-cell>
              <table:table-cell office:value-type="float" office:value="615.026672363281">
                <text:p>615.026672363281</text:p>
              </table:table-cell>
              <table:table-cell office:value-type="float" office:value="0.03029802">
                <text:p>0.03029802</text:p>
              </table:table-cell>
            </table:table-row>
            <table:table-row>
              <table:table-cell office:value-type="string">
                <text:p>2567</text:p>
              </table:table-cell>
              <table:table-cell office:value-type="float" office:value="615.145812988281">
                <text:p>615.145812988281</text:p>
              </table:table-cell>
              <table:table-cell office:value-type="float" office:value="0.0534166">
                <text:p>0.0534166</text:p>
              </table:table-cell>
            </table:table-row>
            <table:table-row>
              <table:table-cell office:value-type="string">
                <text:p>2568</text:p>
              </table:table-cell>
              <table:table-cell office:value-type="float" office:value="615.264953613281">
                <text:p>615.264953613281</text:p>
              </table:table-cell>
              <table:table-cell office:value-type="float" office:value="0.03202809">
                <text:p>0.03202809</text:p>
              </table:table-cell>
            </table:table-row>
            <table:table-row>
              <table:table-cell office:value-type="string">
                <text:p>2569</text:p>
              </table:table-cell>
              <table:table-cell office:value-type="float" office:value="615.384155273438">
                <text:p>615.384155273438</text:p>
              </table:table-cell>
              <table:table-cell office:value-type="float" office:value="0.0324078">
                <text:p>0.0324078</text:p>
              </table:table-cell>
            </table:table-row>
            <table:table-row>
              <table:table-cell office:value-type="string">
                <text:p>2570</text:p>
              </table:table-cell>
              <table:table-cell office:value-type="float" office:value="615.503295898438">
                <text:p>615.503295898438</text:p>
              </table:table-cell>
              <table:table-cell office:value-type="float" office:value="0.02591865">
                <text:p>0.02591865</text:p>
              </table:table-cell>
            </table:table-row>
            <table:table-row>
              <table:table-cell office:value-type="string">
                <text:p>2571</text:p>
              </table:table-cell>
              <table:table-cell office:value-type="float" office:value="615.622497558594">
                <text:p>615.622497558594</text:p>
              </table:table-cell>
              <table:table-cell office:value-type="float" office:value="0.03733561">
                <text:p>0.03733561</text:p>
              </table:table-cell>
            </table:table-row>
            <table:table-row>
              <table:table-cell office:value-type="string">
                <text:p>2572</text:p>
              </table:table-cell>
              <table:table-cell office:value-type="float" office:value="615.741638183594">
                <text:p>615.741638183594</text:p>
              </table:table-cell>
              <table:table-cell office:value-type="float" office:value="0.02609815">
                <text:p>0.02609815</text:p>
              </table:table-cell>
            </table:table-row>
            <table:table-row>
              <table:table-cell office:value-type="string">
                <text:p>2573</text:p>
              </table:table-cell>
              <table:table-cell office:value-type="float" office:value="615.86083984375">
                <text:p>615.86083984375</text:p>
              </table:table-cell>
              <table:table-cell office:value-type="float" office:value="0.02924038">
                <text:p>0.02924038</text:p>
              </table:table-cell>
            </table:table-row>
            <table:table-row>
              <table:table-cell office:value-type="string">
                <text:p>2574</text:p>
              </table:table-cell>
              <table:table-cell office:value-type="float" office:value="615.97998046875">
                <text:p>615.97998046875</text:p>
              </table:table-cell>
              <table:table-cell office:value-type="float" office:value="0.02652024">
                <text:p>0.02652024</text:p>
              </table:table-cell>
            </table:table-row>
            <table:table-row>
              <table:table-cell office:value-type="string">
                <text:p>2575</text:p>
              </table:table-cell>
              <table:table-cell office:value-type="float" office:value="616.099182128906">
                <text:p>616.099182128906</text:p>
              </table:table-cell>
              <table:table-cell office:value-type="float" office:value="0.02919809">
                <text:p>0.02919809</text:p>
              </table:table-cell>
            </table:table-row>
            <table:table-row>
              <table:table-cell office:value-type="string">
                <text:p>2576</text:p>
              </table:table-cell>
              <table:table-cell office:value-type="float" office:value="616.218322753906">
                <text:p>616.218322753906</text:p>
              </table:table-cell>
              <table:table-cell office:value-type="float" office:value="0.03435883">
                <text:p>0.03435883</text:p>
              </table:table-cell>
            </table:table-row>
            <table:table-row>
              <table:table-cell office:value-type="string">
                <text:p>2577</text:p>
              </table:table-cell>
              <table:table-cell office:value-type="float" office:value="616.337524414063">
                <text:p>616.337524414063</text:p>
              </table:table-cell>
              <table:table-cell office:value-type="float" office:value="0.02454119">
                <text:p>0.02454119</text:p>
              </table:table-cell>
            </table:table-row>
            <table:table-row>
              <table:table-cell office:value-type="string">
                <text:p>2578</text:p>
              </table:table-cell>
              <table:table-cell office:value-type="float" office:value="616.456726074219">
                <text:p>616.456726074219</text:p>
              </table:table-cell>
              <table:table-cell office:value-type="float" office:value="0.04119616">
                <text:p>0.04119616</text:p>
              </table:table-cell>
            </table:table-row>
            <table:table-row>
              <table:table-cell office:value-type="string">
                <text:p>2579</text:p>
              </table:table-cell>
              <table:table-cell office:value-type="float" office:value="616.575866699219">
                <text:p>616.575866699219</text:p>
              </table:table-cell>
              <table:table-cell office:value-type="float" office:value="0.02384203">
                <text:p>0.02384203</text:p>
              </table:table-cell>
            </table:table-row>
            <table:table-row>
              <table:table-cell office:value-type="string">
                <text:p>2580</text:p>
              </table:table-cell>
              <table:table-cell office:value-type="float" office:value="616.695068359375">
                <text:p>616.695068359375</text:p>
              </table:table-cell>
              <table:table-cell office:value-type="float" office:value="0.01980103">
                <text:p>0.01980103</text:p>
              </table:table-cell>
            </table:table-row>
            <table:table-row>
              <table:table-cell office:value-type="string">
                <text:p>2581</text:p>
              </table:table-cell>
              <table:table-cell office:value-type="float" office:value="616.814270019531">
                <text:p>616.814270019531</text:p>
              </table:table-cell>
              <table:table-cell office:value-type="float" office:value="0.02347163">
                <text:p>0.02347163</text:p>
              </table:table-cell>
            </table:table-row>
            <table:table-row>
              <table:table-cell office:value-type="string">
                <text:p>2582</text:p>
              </table:table-cell>
              <table:table-cell office:value-type="float" office:value="616.933471679688">
                <text:p>616.933471679688</text:p>
              </table:table-cell>
              <table:table-cell office:value-type="float" office:value="0.03020926">
                <text:p>0.03020926</text:p>
              </table:table-cell>
            </table:table-row>
            <table:table-row>
              <table:table-cell office:value-type="string">
                <text:p>2583</text:p>
              </table:table-cell>
              <table:table-cell office:value-type="float" office:value="617.052612304688">
                <text:p>617.052612304688</text:p>
              </table:table-cell>
              <table:table-cell office:value-type="float" office:value="0.0261095">
                <text:p>0.0261095</text:p>
              </table:table-cell>
            </table:table-row>
            <table:table-row>
              <table:table-cell office:value-type="string">
                <text:p>2584</text:p>
              </table:table-cell>
              <table:table-cell office:value-type="float" office:value="617.171813964844">
                <text:p>617.171813964844</text:p>
              </table:table-cell>
              <table:table-cell office:value-type="float" office:value="0.03580819">
                <text:p>0.03580819</text:p>
              </table:table-cell>
            </table:table-row>
            <table:table-row>
              <table:table-cell office:value-type="string">
                <text:p>2585</text:p>
              </table:table-cell>
              <table:table-cell office:value-type="float" office:value="617.291015625">
                <text:p>617.291015625</text:p>
              </table:table-cell>
              <table:table-cell office:value-type="float" office:value="0.02201742">
                <text:p>0.02201742</text:p>
              </table:table-cell>
            </table:table-row>
            <table:table-row>
              <table:table-cell office:value-type="string">
                <text:p>2586</text:p>
              </table:table-cell>
              <table:table-cell office:value-type="float" office:value="617.410217285156">
                <text:p>617.410217285156</text:p>
              </table:table-cell>
              <table:table-cell office:value-type="float" office:value="0.02770252">
                <text:p>0.02770252</text:p>
              </table:table-cell>
            </table:table-row>
            <table:table-row>
              <table:table-cell office:value-type="string">
                <text:p>2587</text:p>
              </table:table-cell>
              <table:table-cell office:value-type="float" office:value="617.529418945313">
                <text:p>617.529418945313</text:p>
              </table:table-cell>
              <table:table-cell office:value-type="float" office:value="0.03413773">
                <text:p>0.03413773</text:p>
              </table:table-cell>
            </table:table-row>
            <table:table-row>
              <table:table-cell office:value-type="string">
                <text:p>2588</text:p>
              </table:table-cell>
              <table:table-cell office:value-type="float" office:value="617.648620605469">
                <text:p>617.648620605469</text:p>
              </table:table-cell>
              <table:table-cell office:value-type="float" office:value="0.02666333">
                <text:p>0.02666333</text:p>
              </table:table-cell>
            </table:table-row>
            <table:table-row>
              <table:table-cell office:value-type="string">
                <text:p>2589</text:p>
              </table:table-cell>
              <table:table-cell office:value-type="float" office:value="617.767822265625">
                <text:p>617.767822265625</text:p>
              </table:table-cell>
              <table:table-cell office:value-type="float" office:value="0.04764834">
                <text:p>0.04764834</text:p>
              </table:table-cell>
            </table:table-row>
            <table:table-row>
              <table:table-cell office:value-type="string">
                <text:p>2590</text:p>
              </table:table-cell>
              <table:table-cell office:value-type="float" office:value="617.887023925781">
                <text:p>617.887023925781</text:p>
              </table:table-cell>
              <table:table-cell office:value-type="float" office:value="0.03362041">
                <text:p>0.03362041</text:p>
              </table:table-cell>
            </table:table-row>
            <table:table-row>
              <table:table-cell office:value-type="string">
                <text:p>2591</text:p>
              </table:table-cell>
              <table:table-cell office:value-type="float" office:value="618.006225585938">
                <text:p>618.006225585938</text:p>
              </table:table-cell>
              <table:table-cell office:value-type="float" office:value="0.02530161">
                <text:p>0.02530161</text:p>
              </table:table-cell>
            </table:table-row>
            <table:table-row>
              <table:table-cell office:value-type="string">
                <text:p>2592</text:p>
              </table:table-cell>
              <table:table-cell office:value-type="float" office:value="618.125427246094">
                <text:p>618.125427246094</text:p>
              </table:table-cell>
              <table:table-cell office:value-type="float" office:value="0.03179073">
                <text:p>0.03179073</text:p>
              </table:table-cell>
            </table:table-row>
            <table:table-row>
              <table:table-cell office:value-type="string">
                <text:p>2593</text:p>
              </table:table-cell>
              <table:table-cell office:value-type="float" office:value="618.24462890625">
                <text:p>618.24462890625</text:p>
              </table:table-cell>
              <table:table-cell office:value-type="float" office:value="0.03432507">
                <text:p>0.03432507</text:p>
              </table:table-cell>
            </table:table-row>
            <table:table-row>
              <table:table-cell office:value-type="string">
                <text:p>2594</text:p>
              </table:table-cell>
              <table:table-cell office:value-type="float" office:value="618.363891601563">
                <text:p>618.363891601563</text:p>
              </table:table-cell>
              <table:table-cell office:value-type="float" office:value="0.03515846">
                <text:p>0.03515846</text:p>
              </table:table-cell>
            </table:table-row>
            <table:table-row>
              <table:table-cell office:value-type="string">
                <text:p>2595</text:p>
              </table:table-cell>
              <table:table-cell office:value-type="float" office:value="618.483093261719">
                <text:p>618.483093261719</text:p>
              </table:table-cell>
              <table:table-cell office:value-type="float" office:value="0.02491647">
                <text:p>0.02491647</text:p>
              </table:table-cell>
            </table:table-row>
            <table:table-row>
              <table:table-cell office:value-type="string">
                <text:p>2596</text:p>
              </table:table-cell>
              <table:table-cell office:value-type="float" office:value="618.602294921875">
                <text:p>618.602294921875</text:p>
              </table:table-cell>
              <table:table-cell office:value-type="float" office:value="0.02886762">
                <text:p>0.02886762</text:p>
              </table:table-cell>
            </table:table-row>
            <table:table-row>
              <table:table-cell office:value-type="string">
                <text:p>2597</text:p>
              </table:table-cell>
              <table:table-cell office:value-type="float" office:value="618.721496582031">
                <text:p>618.721496582031</text:p>
              </table:table-cell>
              <table:table-cell office:value-type="float" office:value="0.04238151">
                <text:p>0.04238151</text:p>
              </table:table-cell>
            </table:table-row>
            <table:table-row>
              <table:table-cell office:value-type="string">
                <text:p>2598</text:p>
              </table:table-cell>
              <table:table-cell office:value-type="float" office:value="618.840759277344">
                <text:p>618.840759277344</text:p>
              </table:table-cell>
              <table:table-cell office:value-type="float" office:value="0.02183864">
                <text:p>0.02183864</text:p>
              </table:table-cell>
            </table:table-row>
            <table:table-row>
              <table:table-cell office:value-type="string">
                <text:p>2599</text:p>
              </table:table-cell>
              <table:table-cell office:value-type="float" office:value="618.9599609375">
                <text:p>618.9599609375</text:p>
              </table:table-cell>
              <table:table-cell office:value-type="float" office:value="0.0339255">
                <text:p>0.0339255</text:p>
              </table:table-cell>
            </table:table-row>
            <table:table-row>
              <table:table-cell office:value-type="string">
                <text:p>2600</text:p>
              </table:table-cell>
              <table:table-cell office:value-type="float" office:value="619.079162597656">
                <text:p>619.079162597656</text:p>
              </table:table-cell>
              <table:table-cell office:value-type="float" office:value="0.01868253">
                <text:p>0.01868253</text:p>
              </table:table-cell>
            </table:table-row>
            <table:table-row>
              <table:table-cell office:value-type="string">
                <text:p>2601</text:p>
              </table:table-cell>
              <table:table-cell office:value-type="float" office:value="619.198425292969">
                <text:p>619.198425292969</text:p>
              </table:table-cell>
              <table:table-cell office:value-type="float" office:value="0.03974087">
                <text:p>0.03974087</text:p>
              </table:table-cell>
            </table:table-row>
            <table:table-row>
              <table:table-cell office:value-type="string">
                <text:p>2602</text:p>
              </table:table-cell>
              <table:table-cell office:value-type="float" office:value="619.317626953125">
                <text:p>619.317626953125</text:p>
              </table:table-cell>
              <table:table-cell office:value-type="float" office:value="0.02308198">
                <text:p>0.02308198</text:p>
              </table:table-cell>
            </table:table-row>
            <table:table-row>
              <table:table-cell office:value-type="string">
                <text:p>2603</text:p>
              </table:table-cell>
              <table:table-cell office:value-type="float" office:value="619.436889648438">
                <text:p>619.436889648438</text:p>
              </table:table-cell>
              <table:table-cell office:value-type="float" office:value="0.03288371">
                <text:p>0.03288371</text:p>
              </table:table-cell>
            </table:table-row>
            <table:table-row>
              <table:table-cell office:value-type="string">
                <text:p>2604</text:p>
              </table:table-cell>
              <table:table-cell office:value-type="float" office:value="619.556091308594">
                <text:p>619.556091308594</text:p>
              </table:table-cell>
              <table:table-cell office:value-type="float" office:value="0.02775352">
                <text:p>0.02775352</text:p>
              </table:table-cell>
            </table:table-row>
            <table:table-row>
              <table:table-cell office:value-type="string">
                <text:p>2605</text:p>
              </table:table-cell>
              <table:table-cell office:value-type="float" office:value="619.675354003906">
                <text:p>619.675354003906</text:p>
              </table:table-cell>
              <table:table-cell office:value-type="float" office:value="0.02248587">
                <text:p>0.02248587</text:p>
              </table:table-cell>
            </table:table-row>
            <table:table-row>
              <table:table-cell office:value-type="string">
                <text:p>2606</text:p>
              </table:table-cell>
              <table:table-cell office:value-type="float" office:value="619.794616699219">
                <text:p>619.794616699219</text:p>
              </table:table-cell>
              <table:table-cell office:value-type="float" office:value="0.0289802">
                <text:p>0.0289802</text:p>
              </table:table-cell>
            </table:table-row>
            <table:table-row>
              <table:table-cell office:value-type="string">
                <text:p>2607</text:p>
              </table:table-cell>
              <table:table-cell office:value-type="float" office:value="619.913818359375">
                <text:p>619.913818359375</text:p>
              </table:table-cell>
              <table:table-cell office:value-type="float" office:value="0.01783742">
                <text:p>0.01783742</text:p>
              </table:table-cell>
            </table:table-row>
            <table:table-row>
              <table:table-cell office:value-type="string">
                <text:p>2608</text:p>
              </table:table-cell>
              <table:table-cell office:value-type="float" office:value="620.033081054688">
                <text:p>620.033081054688</text:p>
              </table:table-cell>
              <table:table-cell office:value-type="float" office:value="0.04337174">
                <text:p>0.04337174</text:p>
              </table:table-cell>
            </table:table-row>
            <table:table-row>
              <table:table-cell office:value-type="string">
                <text:p>2609</text:p>
              </table:table-cell>
              <table:table-cell office:value-type="float" office:value="620.152282714844">
                <text:p>620.152282714844</text:p>
              </table:table-cell>
              <table:table-cell office:value-type="float" office:value="0.03154453">
                <text:p>0.03154453</text:p>
              </table:table-cell>
            </table:table-row>
            <table:table-row>
              <table:table-cell office:value-type="string">
                <text:p>2610</text:p>
              </table:table-cell>
              <table:table-cell office:value-type="float" office:value="620.271545410156">
                <text:p>620.271545410156</text:p>
              </table:table-cell>
              <table:table-cell office:value-type="float" office:value="0.02952743">
                <text:p>0.02952743</text:p>
              </table:table-cell>
            </table:table-row>
            <table:table-row>
              <table:table-cell office:value-type="string">
                <text:p>2611</text:p>
              </table:table-cell>
              <table:table-cell office:value-type="float" office:value="620.390808105469">
                <text:p>620.390808105469</text:p>
              </table:table-cell>
              <table:table-cell office:value-type="float" office:value="0.01940649">
                <text:p>0.01940649</text:p>
              </table:table-cell>
            </table:table-row>
            <table:table-row>
              <table:table-cell office:value-type="string">
                <text:p>2612</text:p>
              </table:table-cell>
              <table:table-cell office:value-type="float" office:value="620.510070800781">
                <text:p>620.510070800781</text:p>
              </table:table-cell>
              <table:table-cell office:value-type="float" office:value="0.02358482">
                <text:p>0.02358482</text:p>
              </table:table-cell>
            </table:table-row>
            <table:table-row>
              <table:table-cell office:value-type="string">
                <text:p>2613</text:p>
              </table:table-cell>
              <table:table-cell office:value-type="float" office:value="620.629333496094">
                <text:p>620.629333496094</text:p>
              </table:table-cell>
              <table:table-cell office:value-type="float" office:value="0.02316257">
                <text:p>0.02316257</text:p>
              </table:table-cell>
            </table:table-row>
            <table:table-row>
              <table:table-cell office:value-type="string">
                <text:p>2614</text:p>
              </table:table-cell>
              <table:table-cell office:value-type="float" office:value="620.74853515625">
                <text:p>620.74853515625</text:p>
              </table:table-cell>
              <table:table-cell office:value-type="float" office:value="0.01709275">
                <text:p>0.01709275</text:p>
              </table:table-cell>
            </table:table-row>
            <table:table-row>
              <table:table-cell office:value-type="string">
                <text:p>2615</text:p>
              </table:table-cell>
              <table:table-cell office:value-type="float" office:value="620.867797851563">
                <text:p>620.867797851563</text:p>
              </table:table-cell>
              <table:table-cell office:value-type="float" office:value="0.04912564">
                <text:p>0.04912564</text:p>
              </table:table-cell>
            </table:table-row>
            <table:table-row>
              <table:table-cell office:value-type="string">
                <text:p>2616</text:p>
              </table:table-cell>
              <table:table-cell office:value-type="float" office:value="620.987060546875">
                <text:p>620.987060546875</text:p>
              </table:table-cell>
              <table:table-cell office:value-type="float" office:value="0.02159933">
                <text:p>0.02159933</text:p>
              </table:table-cell>
            </table:table-row>
            <table:table-row>
              <table:table-cell office:value-type="string">
                <text:p>2617</text:p>
              </table:table-cell>
              <table:table-cell office:value-type="float" office:value="621.106323242188">
                <text:p>621.106323242188</text:p>
              </table:table-cell>
              <table:table-cell office:value-type="float" office:value="0.02223479">
                <text:p>0.02223479</text:p>
              </table:table-cell>
            </table:table-row>
            <table:table-row>
              <table:table-cell office:value-type="string">
                <text:p>2618</text:p>
              </table:table-cell>
              <table:table-cell office:value-type="float" office:value="621.2255859375">
                <text:p>621.2255859375</text:p>
              </table:table-cell>
              <table:table-cell office:value-type="float" office:value="0.02775159">
                <text:p>0.02775159</text:p>
              </table:table-cell>
            </table:table-row>
            <table:table-row>
              <table:table-cell office:value-type="string">
                <text:p>2619</text:p>
              </table:table-cell>
              <table:table-cell office:value-type="float" office:value="621.344848632813">
                <text:p>621.344848632813</text:p>
              </table:table-cell>
              <table:table-cell office:value-type="float" office:value="0.01858521">
                <text:p>0.01858521</text:p>
              </table:table-cell>
            </table:table-row>
            <table:table-row>
              <table:table-cell office:value-type="string">
                <text:p>2620</text:p>
              </table:table-cell>
              <table:table-cell office:value-type="float" office:value="621.464111328125">
                <text:p>621.464111328125</text:p>
              </table:table-cell>
              <table:table-cell office:value-type="float" office:value="0.01968508">
                <text:p>0.01968508</text:p>
              </table:table-cell>
            </table:table-row>
            <table:table-row>
              <table:table-cell office:value-type="string">
                <text:p>2621</text:p>
              </table:table-cell>
              <table:table-cell office:value-type="float" office:value="621.583374023438">
                <text:p>621.583374023438</text:p>
              </table:table-cell>
              <table:table-cell office:value-type="float" office:value="0.04557902">
                <text:p>0.04557902</text:p>
              </table:table-cell>
            </table:table-row>
            <table:table-row>
              <table:table-cell office:value-type="string">
                <text:p>2622</text:p>
              </table:table-cell>
              <table:table-cell office:value-type="float" office:value="621.70263671875">
                <text:p>621.70263671875</text:p>
              </table:table-cell>
              <table:table-cell office:value-type="float" office:value="0.02605396">
                <text:p>0.02605396</text:p>
              </table:table-cell>
            </table:table-row>
            <table:table-row>
              <table:table-cell office:value-type="string">
                <text:p>2623</text:p>
              </table:table-cell>
              <table:table-cell office:value-type="float" office:value="621.821899414063">
                <text:p>621.821899414063</text:p>
              </table:table-cell>
              <table:table-cell office:value-type="float" office:value="0.04993718">
                <text:p>0.04993718</text:p>
              </table:table-cell>
            </table:table-row>
            <table:table-row>
              <table:table-cell office:value-type="string">
                <text:p>2624</text:p>
              </table:table-cell>
              <table:table-cell office:value-type="float" office:value="621.941223144531">
                <text:p>621.941223144531</text:p>
              </table:table-cell>
              <table:table-cell office:value-type="float" office:value="0.01480378">
                <text:p>0.01480378</text:p>
              </table:table-cell>
            </table:table-row>
            <table:table-row>
              <table:table-cell office:value-type="string">
                <text:p>2625</text:p>
              </table:table-cell>
              <table:table-cell office:value-type="float" office:value="622.060485839844">
                <text:p>622.060485839844</text:p>
              </table:table-cell>
              <table:table-cell office:value-type="float" office:value="0.03364963">
                <text:p>0.03364963</text:p>
              </table:table-cell>
            </table:table-row>
            <table:table-row>
              <table:table-cell office:value-type="string">
                <text:p>2626</text:p>
              </table:table-cell>
              <table:table-cell office:value-type="float" office:value="622.179748535156">
                <text:p>622.179748535156</text:p>
              </table:table-cell>
              <table:table-cell office:value-type="float" office:value="0.03652554">
                <text:p>0.03652554</text:p>
              </table:table-cell>
            </table:table-row>
            <table:table-row>
              <table:table-cell office:value-type="string">
                <text:p>2627</text:p>
              </table:table-cell>
              <table:table-cell office:value-type="float" office:value="622.299011230469">
                <text:p>622.299011230469</text:p>
              </table:table-cell>
              <table:table-cell office:value-type="float" office:value="0.02144845">
                <text:p>0.02144845</text:p>
              </table:table-cell>
            </table:table-row>
            <table:table-row>
              <table:table-cell office:value-type="string">
                <text:p>2628</text:p>
              </table:table-cell>
              <table:table-cell office:value-type="float" office:value="622.418334960938">
                <text:p>622.418334960938</text:p>
              </table:table-cell>
              <table:table-cell office:value-type="float" office:value="0.02372826">
                <text:p>0.02372826</text:p>
              </table:table-cell>
            </table:table-row>
            <table:table-row>
              <table:table-cell office:value-type="string">
                <text:p>2629</text:p>
              </table:table-cell>
              <table:table-cell office:value-type="float" office:value="622.53759765625">
                <text:p>622.53759765625</text:p>
              </table:table-cell>
              <table:table-cell office:value-type="float" office:value="0.02331152">
                <text:p>0.02331152</text:p>
              </table:table-cell>
            </table:table-row>
            <table:table-row>
              <table:table-cell office:value-type="string">
                <text:p>2630</text:p>
              </table:table-cell>
              <table:table-cell office:value-type="float" office:value="622.656860351563">
                <text:p>622.656860351563</text:p>
              </table:table-cell>
              <table:table-cell office:value-type="float" office:value="0.02010478">
                <text:p>0.02010478</text:p>
              </table:table-cell>
            </table:table-row>
            <table:table-row>
              <table:table-cell office:value-type="string">
                <text:p>2631</text:p>
              </table:table-cell>
              <table:table-cell office:value-type="float" office:value="622.776184082031">
                <text:p>622.776184082031</text:p>
              </table:table-cell>
              <table:table-cell office:value-type="float" office:value="0.02705469">
                <text:p>0.02705469</text:p>
              </table:table-cell>
            </table:table-row>
            <table:table-row>
              <table:table-cell office:value-type="string">
                <text:p>2632</text:p>
              </table:table-cell>
              <table:table-cell office:value-type="float" office:value="622.895446777344">
                <text:p>622.895446777344</text:p>
              </table:table-cell>
              <table:table-cell office:value-type="float" office:value="0.02780242">
                <text:p>0.02780242</text:p>
              </table:table-cell>
            </table:table-row>
            <table:table-row>
              <table:table-cell office:value-type="string">
                <text:p>2633</text:p>
              </table:table-cell>
              <table:table-cell office:value-type="float" office:value="623.014709472656">
                <text:p>623.014709472656</text:p>
              </table:table-cell>
              <table:table-cell office:value-type="float" office:value="0.02532327">
                <text:p>0.02532327</text:p>
              </table:table-cell>
            </table:table-row>
            <table:table-row>
              <table:table-cell office:value-type="string">
                <text:p>2634</text:p>
              </table:table-cell>
              <table:table-cell office:value-type="float" office:value="623.134033203125">
                <text:p>623.134033203125</text:p>
              </table:table-cell>
              <table:table-cell office:value-type="float" office:value="0.01690191">
                <text:p>0.01690191</text:p>
              </table:table-cell>
            </table:table-row>
            <table:table-row>
              <table:table-cell office:value-type="string">
                <text:p>2635</text:p>
              </table:table-cell>
              <table:table-cell office:value-type="float" office:value="623.253295898438">
                <text:p>623.253295898438</text:p>
              </table:table-cell>
              <table:table-cell office:value-type="float" office:value="0.02003003">
                <text:p>0.02003003</text:p>
              </table:table-cell>
            </table:table-row>
            <table:table-row>
              <table:table-cell office:value-type="string">
                <text:p>2636</text:p>
              </table:table-cell>
              <table:table-cell office:value-type="float" office:value="623.372619628906">
                <text:p>623.372619628906</text:p>
              </table:table-cell>
              <table:table-cell office:value-type="float" office:value="0.02906436">
                <text:p>0.02906436</text:p>
              </table:table-cell>
            </table:table-row>
            <table:table-row>
              <table:table-cell office:value-type="string">
                <text:p>2637</text:p>
              </table:table-cell>
              <table:table-cell office:value-type="float" office:value="623.491943359375">
                <text:p>623.491943359375</text:p>
              </table:table-cell>
              <table:table-cell office:value-type="float" office:value="0.02429199">
                <text:p>0.02429199</text:p>
              </table:table-cell>
            </table:table-row>
            <table:table-row>
              <table:table-cell office:value-type="string">
                <text:p>2638</text:p>
              </table:table-cell>
              <table:table-cell office:value-type="float" office:value="623.611206054688">
                <text:p>623.611206054688</text:p>
              </table:table-cell>
              <table:table-cell office:value-type="float" office:value="0.01935852">
                <text:p>0.01935852</text:p>
              </table:table-cell>
            </table:table-row>
            <table:table-row>
              <table:table-cell office:value-type="string">
                <text:p>2639</text:p>
              </table:table-cell>
              <table:table-cell office:value-type="float" office:value="623.730529785156">
                <text:p>623.730529785156</text:p>
              </table:table-cell>
              <table:table-cell office:value-type="float" office:value="0.02483746">
                <text:p>0.02483746</text:p>
              </table:table-cell>
            </table:table-row>
            <table:table-row>
              <table:table-cell office:value-type="string">
                <text:p>2640</text:p>
              </table:table-cell>
              <table:table-cell office:value-type="float" office:value="623.849853515625">
                <text:p>623.849853515625</text:p>
              </table:table-cell>
              <table:table-cell office:value-type="float" office:value="0.02363098">
                <text:p>0.02363098</text:p>
              </table:table-cell>
            </table:table-row>
            <table:table-row>
              <table:table-cell office:value-type="string">
                <text:p>2641</text:p>
              </table:table-cell>
              <table:table-cell office:value-type="float" office:value="623.969116210938">
                <text:p>623.969116210938</text:p>
              </table:table-cell>
              <table:table-cell office:value-type="float" office:value="0.0225094">
                <text:p>0.0225094</text:p>
              </table:table-cell>
            </table:table-row>
            <table:table-row>
              <table:table-cell office:value-type="string">
                <text:p>2642</text:p>
              </table:table-cell>
              <table:table-cell office:value-type="float" office:value="624.088439941406">
                <text:p>624.088439941406</text:p>
              </table:table-cell>
              <table:table-cell office:value-type="float" office:value="0.01444706">
                <text:p>0.01444706</text:p>
              </table:table-cell>
            </table:table-row>
            <table:table-row>
              <table:table-cell office:value-type="string">
                <text:p>2643</text:p>
              </table:table-cell>
              <table:table-cell office:value-type="float" office:value="624.207763671875">
                <text:p>624.207763671875</text:p>
              </table:table-cell>
              <table:table-cell office:value-type="float" office:value="0.01378742">
                <text:p>0.01378742</text:p>
              </table:table-cell>
            </table:table-row>
            <table:table-row>
              <table:table-cell office:value-type="string">
                <text:p>2644</text:p>
              </table:table-cell>
              <table:table-cell office:value-type="float" office:value="624.327087402344">
                <text:p>624.327087402344</text:p>
              </table:table-cell>
              <table:table-cell office:value-type="float" office:value="0.02227167">
                <text:p>0.02227167</text:p>
              </table:table-cell>
            </table:table-row>
            <table:table-row>
              <table:table-cell office:value-type="string">
                <text:p>2645</text:p>
              </table:table-cell>
              <table:table-cell office:value-type="float" office:value="624.446350097656">
                <text:p>624.446350097656</text:p>
              </table:table-cell>
              <table:table-cell office:value-type="float" office:value="0.03652363">
                <text:p>0.03652363</text:p>
              </table:table-cell>
            </table:table-row>
            <table:table-row>
              <table:table-cell office:value-type="string">
                <text:p>2646</text:p>
              </table:table-cell>
              <table:table-cell office:value-type="float" office:value="624.565673828125">
                <text:p>624.565673828125</text:p>
              </table:table-cell>
              <table:table-cell office:value-type="float" office:value="0.02838964">
                <text:p>0.02838964</text:p>
              </table:table-cell>
            </table:table-row>
            <table:table-row>
              <table:table-cell office:value-type="string">
                <text:p>2647</text:p>
              </table:table-cell>
              <table:table-cell office:value-type="float" office:value="624.684997558594">
                <text:p>624.684997558594</text:p>
              </table:table-cell>
              <table:table-cell office:value-type="float" office:value="0.02520244">
                <text:p>0.02520244</text:p>
              </table:table-cell>
            </table:table-row>
            <table:table-row>
              <table:table-cell office:value-type="string">
                <text:p>2648</text:p>
              </table:table-cell>
              <table:table-cell office:value-type="float" office:value="624.804321289063">
                <text:p>624.804321289063</text:p>
              </table:table-cell>
              <table:table-cell office:value-type="float" office:value="0.02278046">
                <text:p>0.02278046</text:p>
              </table:table-cell>
            </table:table-row>
            <table:table-row>
              <table:table-cell office:value-type="string">
                <text:p>2649</text:p>
              </table:table-cell>
              <table:table-cell office:value-type="float" office:value="624.923645019531">
                <text:p>624.923645019531</text:p>
              </table:table-cell>
              <table:table-cell office:value-type="float" office:value="0.02757182">
                <text:p>0.02757182</text:p>
              </table:table-cell>
            </table:table-row>
            <table:table-row>
              <table:table-cell office:value-type="string">
                <text:p>2650</text:p>
              </table:table-cell>
              <table:table-cell office:value-type="float" office:value="625.04296875">
                <text:p>625.04296875</text:p>
              </table:table-cell>
              <table:table-cell office:value-type="float" office:value="0.01528615">
                <text:p>0.01528615</text:p>
              </table:table-cell>
            </table:table-row>
            <table:table-row>
              <table:table-cell office:value-type="string">
                <text:p>2651</text:p>
              </table:table-cell>
              <table:table-cell office:value-type="float" office:value="625.162292480469">
                <text:p>625.162292480469</text:p>
              </table:table-cell>
              <table:table-cell office:value-type="float" office:value="0.02096114">
                <text:p>0.02096114</text:p>
              </table:table-cell>
            </table:table-row>
            <table:table-row>
              <table:table-cell office:value-type="string">
                <text:p>2652</text:p>
              </table:table-cell>
              <table:table-cell office:value-type="float" office:value="625.281616210938">
                <text:p>625.281616210938</text:p>
              </table:table-cell>
              <table:table-cell office:value-type="float" office:value="0.02736201">
                <text:p>0.02736201</text:p>
              </table:table-cell>
            </table:table-row>
            <table:table-row>
              <table:table-cell office:value-type="string">
                <text:p>2653</text:p>
              </table:table-cell>
              <table:table-cell office:value-type="float" office:value="625.400939941406">
                <text:p>625.400939941406</text:p>
              </table:table-cell>
              <table:table-cell office:value-type="float" office:value="0.0219597">
                <text:p>0.0219597</text:p>
              </table:table-cell>
            </table:table-row>
            <table:table-row>
              <table:table-cell office:value-type="string">
                <text:p>2654</text:p>
              </table:table-cell>
              <table:table-cell office:value-type="float" office:value="625.520263671875">
                <text:p>625.520263671875</text:p>
              </table:table-cell>
              <table:table-cell office:value-type="float" office:value="0.01949801">
                <text:p>0.01949801</text:p>
              </table:table-cell>
            </table:table-row>
            <table:table-row>
              <table:table-cell office:value-type="string">
                <text:p>2655</text:p>
              </table:table-cell>
              <table:table-cell office:value-type="float" office:value="625.639587402344">
                <text:p>625.639587402344</text:p>
              </table:table-cell>
              <table:table-cell office:value-type="float" office:value="0.02563316">
                <text:p>0.02563316</text:p>
              </table:table-cell>
            </table:table-row>
            <table:table-row>
              <table:table-cell office:value-type="string">
                <text:p>2656</text:p>
              </table:table-cell>
              <table:table-cell office:value-type="float" office:value="625.758911132813">
                <text:p>625.758911132813</text:p>
              </table:table-cell>
              <table:table-cell office:value-type="float" office:value="0.02751541">
                <text:p>0.02751541</text:p>
              </table:table-cell>
            </table:table-row>
            <table:table-row>
              <table:table-cell office:value-type="string">
                <text:p>2657</text:p>
              </table:table-cell>
              <table:table-cell office:value-type="float" office:value="625.878295898438">
                <text:p>625.878295898438</text:p>
              </table:table-cell>
              <table:table-cell office:value-type="float" office:value="0.0173525">
                <text:p>0.0173525</text:p>
              </table:table-cell>
            </table:table-row>
            <table:table-row>
              <table:table-cell office:value-type="string">
                <text:p>2658</text:p>
              </table:table-cell>
              <table:table-cell office:value-type="float" office:value="625.997619628906">
                <text:p>625.997619628906</text:p>
              </table:table-cell>
              <table:table-cell office:value-type="float" office:value="0.0156661">
                <text:p>0.0156661</text:p>
              </table:table-cell>
            </table:table-row>
            <table:table-row>
              <table:table-cell office:value-type="string">
                <text:p>2659</text:p>
              </table:table-cell>
              <table:table-cell office:value-type="float" office:value="626.116943359375">
                <text:p>626.116943359375</text:p>
              </table:table-cell>
              <table:table-cell office:value-type="float" office:value="0.02450865">
                <text:p>0.02450865</text:p>
              </table:table-cell>
            </table:table-row>
            <table:table-row>
              <table:table-cell office:value-type="string">
                <text:p>2660</text:p>
              </table:table-cell>
              <table:table-cell office:value-type="float" office:value="626.236267089844">
                <text:p>626.236267089844</text:p>
              </table:table-cell>
              <table:table-cell office:value-type="float" office:value="0.02676607">
                <text:p>0.02676607</text:p>
              </table:table-cell>
            </table:table-row>
            <table:table-row>
              <table:table-cell office:value-type="string">
                <text:p>2661</text:p>
              </table:table-cell>
              <table:table-cell office:value-type="float" office:value="626.355651855469">
                <text:p>626.355651855469</text:p>
              </table:table-cell>
              <table:table-cell office:value-type="float" office:value="0.03903966">
                <text:p>0.03903966</text:p>
              </table:table-cell>
            </table:table-row>
            <table:table-row>
              <table:table-cell office:value-type="string">
                <text:p>2662</text:p>
              </table:table-cell>
              <table:table-cell office:value-type="float" office:value="626.474975585938">
                <text:p>626.474975585938</text:p>
              </table:table-cell>
              <table:table-cell office:value-type="float" office:value="0.01423414">
                <text:p>0.01423414</text:p>
              </table:table-cell>
            </table:table-row>
            <table:table-row>
              <table:table-cell office:value-type="string">
                <text:p>2663</text:p>
              </table:table-cell>
              <table:table-cell office:value-type="float" office:value="626.594360351563">
                <text:p>626.594360351563</text:p>
              </table:table-cell>
              <table:table-cell office:value-type="float" office:value="0.035092">
                <text:p>0.035092</text:p>
              </table:table-cell>
            </table:table-row>
            <table:table-row>
              <table:table-cell office:value-type="string">
                <text:p>2664</text:p>
              </table:table-cell>
              <table:table-cell office:value-type="float" office:value="626.713684082031">
                <text:p>626.713684082031</text:p>
              </table:table-cell>
              <table:table-cell office:value-type="float" office:value="0.02123821">
                <text:p>0.02123821</text:p>
              </table:table-cell>
            </table:table-row>
            <table:table-row>
              <table:table-cell office:value-type="string">
                <text:p>2665</text:p>
              </table:table-cell>
              <table:table-cell office:value-type="float" office:value="626.8330078125">
                <text:p>626.8330078125</text:p>
              </table:table-cell>
              <table:table-cell office:value-type="float" office:value="0.03559837">
                <text:p>0.03559837</text:p>
              </table:table-cell>
            </table:table-row>
            <table:table-row>
              <table:table-cell office:value-type="string">
                <text:p>2666</text:p>
              </table:table-cell>
              <table:table-cell office:value-type="float" office:value="626.952392578125">
                <text:p>626.952392578125</text:p>
              </table:table-cell>
              <table:table-cell office:value-type="float" office:value="0.0280792">
                <text:p>0.0280792</text:p>
              </table:table-cell>
            </table:table-row>
            <table:table-row>
              <table:table-cell office:value-type="string">
                <text:p>2667</text:p>
              </table:table-cell>
              <table:table-cell office:value-type="float" office:value="627.071716308594">
                <text:p>627.071716308594</text:p>
              </table:table-cell>
              <table:table-cell office:value-type="float" office:value="0.03007879">
                <text:p>0.03007879</text:p>
              </table:table-cell>
            </table:table-row>
            <table:table-row>
              <table:table-cell office:value-type="string">
                <text:p>2668</text:p>
              </table:table-cell>
              <table:table-cell office:value-type="float" office:value="627.191101074219">
                <text:p>627.191101074219</text:p>
              </table:table-cell>
              <table:table-cell office:value-type="float" office:value="0.03399619">
                <text:p>0.03399619</text:p>
              </table:table-cell>
            </table:table-row>
            <table:table-row>
              <table:table-cell office:value-type="string">
                <text:p>2669</text:p>
              </table:table-cell>
              <table:table-cell office:value-type="float" office:value="627.310424804688">
                <text:p>627.310424804688</text:p>
              </table:table-cell>
              <table:table-cell office:value-type="float" office:value="0.02336506">
                <text:p>0.02336506</text:p>
              </table:table-cell>
            </table:table-row>
            <table:table-row>
              <table:table-cell office:value-type="string">
                <text:p>2670</text:p>
              </table:table-cell>
              <table:table-cell office:value-type="float" office:value="627.429809570313">
                <text:p>627.429809570313</text:p>
              </table:table-cell>
              <table:table-cell office:value-type="float" office:value="0.01535561">
                <text:p>0.01535561</text:p>
              </table:table-cell>
            </table:table-row>
            <table:table-row>
              <table:table-cell office:value-type="string">
                <text:p>2671</text:p>
              </table:table-cell>
              <table:table-cell office:value-type="float" office:value="627.549194335938">
                <text:p>627.549194335938</text:p>
              </table:table-cell>
              <table:table-cell office:value-type="float" office:value="0.01742611">
                <text:p>0.01742611</text:p>
              </table:table-cell>
            </table:table-row>
            <table:table-row>
              <table:table-cell office:value-type="string">
                <text:p>2672</text:p>
              </table:table-cell>
              <table:table-cell office:value-type="float" office:value="627.668518066406">
                <text:p>627.668518066406</text:p>
              </table:table-cell>
              <table:table-cell office:value-type="float" office:value="0.03067031">
                <text:p>0.03067031</text:p>
              </table:table-cell>
            </table:table-row>
            <table:table-row>
              <table:table-cell office:value-type="string">
                <text:p>2673</text:p>
              </table:table-cell>
              <table:table-cell office:value-type="float" office:value="627.787902832031">
                <text:p>627.787902832031</text:p>
              </table:table-cell>
              <table:table-cell office:value-type="float" office:value="0.02749037">
                <text:p>0.02749037</text:p>
              </table:table-cell>
            </table:table-row>
            <table:table-row>
              <table:table-cell office:value-type="string">
                <text:p>2674</text:p>
              </table:table-cell>
              <table:table-cell office:value-type="float" office:value="627.907287597656">
                <text:p>627.907287597656</text:p>
              </table:table-cell>
              <table:table-cell office:value-type="float" office:value="0.01983012">
                <text:p>0.01983012</text:p>
              </table:table-cell>
            </table:table-row>
            <table:table-row>
              <table:table-cell office:value-type="string">
                <text:p>2675</text:p>
              </table:table-cell>
              <table:table-cell office:value-type="float" office:value="628.026672363281">
                <text:p>628.026672363281</text:p>
              </table:table-cell>
              <table:table-cell office:value-type="float" office:value="0.01633272">
                <text:p>0.01633272</text:p>
              </table:table-cell>
            </table:table-row>
            <table:table-row>
              <table:table-cell office:value-type="string">
                <text:p>2676</text:p>
              </table:table-cell>
              <table:table-cell office:value-type="float" office:value="628.14599609375">
                <text:p>628.14599609375</text:p>
              </table:table-cell>
              <table:table-cell office:value-type="float" office:value="0.01435209">
                <text:p>0.01435209</text:p>
              </table:table-cell>
            </table:table-row>
            <table:table-row>
              <table:table-cell office:value-type="string">
                <text:p>2677</text:p>
              </table:table-cell>
              <table:table-cell office:value-type="float" office:value="628.265380859375">
                <text:p>628.265380859375</text:p>
              </table:table-cell>
              <table:table-cell office:value-type="float" office:value="0.02737569">
                <text:p>0.02737569</text:p>
              </table:table-cell>
            </table:table-row>
            <table:table-row>
              <table:table-cell office:value-type="string">
                <text:p>2678</text:p>
              </table:table-cell>
              <table:table-cell office:value-type="float" office:value="628.384765625">
                <text:p>628.384765625</text:p>
              </table:table-cell>
              <table:table-cell office:value-type="float" office:value="0.0320086">
                <text:p>0.0320086</text:p>
              </table:table-cell>
            </table:table-row>
            <table:table-row>
              <table:table-cell office:value-type="string">
                <text:p>2679</text:p>
              </table:table-cell>
              <table:table-cell office:value-type="float" office:value="628.504150390625">
                <text:p>628.504150390625</text:p>
              </table:table-cell>
              <table:table-cell office:value-type="float" office:value="0.0120963">
                <text:p>0.0120963</text:p>
              </table:table-cell>
            </table:table-row>
            <table:table-row>
              <table:table-cell office:value-type="string">
                <text:p>2680</text:p>
              </table:table-cell>
              <table:table-cell office:value-type="float" office:value="628.62353515625">
                <text:p>628.62353515625</text:p>
              </table:table-cell>
              <table:table-cell office:value-type="float" office:value="0.02406584">
                <text:p>0.02406584</text:p>
              </table:table-cell>
            </table:table-row>
            <table:table-row>
              <table:table-cell office:value-type="string">
                <text:p>2681</text:p>
              </table:table-cell>
              <table:table-cell office:value-type="float" office:value="628.742919921875">
                <text:p>628.742919921875</text:p>
              </table:table-cell>
              <table:table-cell office:value-type="float" office:value="0.01396328">
                <text:p>0.01396328</text:p>
              </table:table-cell>
            </table:table-row>
            <table:table-row>
              <table:table-cell office:value-type="string">
                <text:p>2682</text:p>
              </table:table-cell>
              <table:table-cell office:value-type="float" office:value="628.8623046875">
                <text:p>628.8623046875</text:p>
              </table:table-cell>
              <table:table-cell office:value-type="float" office:value="0.01722139">
                <text:p>0.01722139</text:p>
              </table:table-cell>
            </table:table-row>
            <table:table-row>
              <table:table-cell office:value-type="string">
                <text:p>2683</text:p>
              </table:table-cell>
              <table:table-cell office:value-type="float" office:value="628.981689453125">
                <text:p>628.981689453125</text:p>
              </table:table-cell>
              <table:table-cell office:value-type="float" office:value="0.01686453">
                <text:p>0.01686453</text:p>
              </table:table-cell>
            </table:table-row>
            <table:table-row>
              <table:table-cell office:value-type="string">
                <text:p>2684</text:p>
              </table:table-cell>
              <table:table-cell office:value-type="float" office:value="629.10107421875">
                <text:p>629.10107421875</text:p>
              </table:table-cell>
              <table:table-cell office:value-type="float" office:value="0.01417559">
                <text:p>0.01417559</text:p>
              </table:table-cell>
            </table:table-row>
            <table:table-row>
              <table:table-cell office:value-type="string">
                <text:p>2685</text:p>
              </table:table-cell>
              <table:table-cell office:value-type="float" office:value="629.220458984375">
                <text:p>629.220458984375</text:p>
              </table:table-cell>
              <table:table-cell office:value-type="float" office:value="0.03950415">
                <text:p>0.03950415</text:p>
              </table:table-cell>
            </table:table-row>
            <table:table-row>
              <table:table-cell office:value-type="string">
                <text:p>2686</text:p>
              </table:table-cell>
              <table:table-cell office:value-type="float" office:value="629.33984375">
                <text:p>629.33984375</text:p>
              </table:table-cell>
              <table:table-cell office:value-type="float" office:value="0.03092351">
                <text:p>0.03092351</text:p>
              </table:table-cell>
            </table:table-row>
            <table:table-row>
              <table:table-cell office:value-type="string">
                <text:p>2687</text:p>
              </table:table-cell>
              <table:table-cell office:value-type="float" office:value="629.459228515625">
                <text:p>629.459228515625</text:p>
              </table:table-cell>
              <table:table-cell office:value-type="float" office:value="0.03009755">
                <text:p>0.03009755</text:p>
              </table:table-cell>
            </table:table-row>
            <table:table-row>
              <table:table-cell office:value-type="string">
                <text:p>2688</text:p>
              </table:table-cell>
              <table:table-cell office:value-type="float" office:value="629.57861328125">
                <text:p>629.57861328125</text:p>
              </table:table-cell>
              <table:table-cell office:value-type="float" office:value="0.01409204">
                <text:p>0.01409204</text:p>
              </table:table-cell>
            </table:table-row>
            <table:table-row>
              <table:table-cell office:value-type="string">
                <text:p>2689</text:p>
              </table:table-cell>
              <table:table-cell office:value-type="float" office:value="629.697998046875">
                <text:p>629.697998046875</text:p>
              </table:table-cell>
              <table:table-cell office:value-type="float" office:value="0.01872547">
                <text:p>0.01872547</text:p>
              </table:table-cell>
            </table:table-row>
            <table:table-row>
              <table:table-cell office:value-type="string">
                <text:p>2690</text:p>
              </table:table-cell>
              <table:table-cell office:value-type="float" office:value="629.8173828125">
                <text:p>629.8173828125</text:p>
              </table:table-cell>
              <table:table-cell office:value-type="float" office:value="0.0211507">
                <text:p>0.0211507</text:p>
              </table:table-cell>
            </table:table-row>
            <table:table-row>
              <table:table-cell office:value-type="string">
                <text:p>2691</text:p>
              </table:table-cell>
              <table:table-cell office:value-type="float" office:value="629.936828613281">
                <text:p>629.936828613281</text:p>
              </table:table-cell>
              <table:table-cell office:value-type="float" office:value="0.04600231">
                <text:p>0.04600231</text:p>
              </table:table-cell>
            </table:table-row>
            <table:table-row>
              <table:table-cell office:value-type="string">
                <text:p>2692</text:p>
              </table:table-cell>
              <table:table-cell office:value-type="float" office:value="630.056213378906">
                <text:p>630.056213378906</text:p>
              </table:table-cell>
              <table:table-cell office:value-type="float" office:value="0.03155007">
                <text:p>0.03155007</text:p>
              </table:table-cell>
            </table:table-row>
            <table:table-row>
              <table:table-cell office:value-type="string">
                <text:p>2693</text:p>
              </table:table-cell>
              <table:table-cell office:value-type="float" office:value="630.175598144531">
                <text:p>630.175598144531</text:p>
              </table:table-cell>
              <table:table-cell office:value-type="float" office:value="0.0305301">
                <text:p>0.0305301</text:p>
              </table:table-cell>
            </table:table-row>
            <table:table-row>
              <table:table-cell office:value-type="string">
                <text:p>2694</text:p>
              </table:table-cell>
              <table:table-cell office:value-type="float" office:value="630.295043945313">
                <text:p>630.295043945313</text:p>
              </table:table-cell>
              <table:table-cell office:value-type="float" office:value="0.01511349">
                <text:p>0.01511349</text:p>
              </table:table-cell>
            </table:table-row>
            <table:table-row>
              <table:table-cell office:value-type="string">
                <text:p>2695</text:p>
              </table:table-cell>
              <table:table-cell office:value-type="float" office:value="630.414428710938">
                <text:p>630.414428710938</text:p>
              </table:table-cell>
              <table:table-cell office:value-type="float" office:value="0.0266965">
                <text:p>0.0266965</text:p>
              </table:table-cell>
            </table:table-row>
            <table:table-row>
              <table:table-cell office:value-type="string">
                <text:p>2696</text:p>
              </table:table-cell>
              <table:table-cell office:value-type="float" office:value="630.533813476563">
                <text:p>630.533813476563</text:p>
              </table:table-cell>
              <table:table-cell office:value-type="float" office:value="0.01939887">
                <text:p>0.01939887</text:p>
              </table:table-cell>
            </table:table-row>
            <table:table-row>
              <table:table-cell office:value-type="string">
                <text:p>2697</text:p>
              </table:table-cell>
              <table:table-cell office:value-type="float" office:value="630.653259277344">
                <text:p>630.653259277344</text:p>
              </table:table-cell>
              <table:table-cell office:value-type="float" office:value="0.01326936">
                <text:p>0.01326936</text:p>
              </table:table-cell>
            </table:table-row>
            <table:table-row>
              <table:table-cell office:value-type="string">
                <text:p>2698</text:p>
              </table:table-cell>
              <table:table-cell office:value-type="float" office:value="630.772644042969">
                <text:p>630.772644042969</text:p>
              </table:table-cell>
              <table:table-cell office:value-type="float" office:value="0.01888506">
                <text:p>0.01888506</text:p>
              </table:table-cell>
            </table:table-row>
            <table:table-row>
              <table:table-cell office:value-type="string">
                <text:p>2699</text:p>
              </table:table-cell>
              <table:table-cell office:value-type="float" office:value="630.89208984375">
                <text:p>630.89208984375</text:p>
              </table:table-cell>
              <table:table-cell office:value-type="float" office:value="0.02279223">
                <text:p>0.02279223</text:p>
              </table:table-cell>
            </table:table-row>
            <table:table-row>
              <table:table-cell office:value-type="string">
                <text:p>2700</text:p>
              </table:table-cell>
              <table:table-cell office:value-type="float" office:value="631.011474609375">
                <text:p>631.011474609375</text:p>
              </table:table-cell>
              <table:table-cell office:value-type="float" office:value="0.02933423">
                <text:p>0.02933423</text:p>
              </table:table-cell>
            </table:table-row>
            <table:table-row>
              <table:table-cell office:value-type="string">
                <text:p>2701</text:p>
              </table:table-cell>
              <table:table-cell office:value-type="float" office:value="631.130920410156">
                <text:p>631.130920410156</text:p>
              </table:table-cell>
              <table:table-cell office:value-type="float" office:value="0.02044096">
                <text:p>0.02044096</text:p>
              </table:table-cell>
            </table:table-row>
            <table:table-row>
              <table:table-cell office:value-type="string">
                <text:p>2702</text:p>
              </table:table-cell>
              <table:table-cell office:value-type="float" office:value="631.250305175781">
                <text:p>631.250305175781</text:p>
              </table:table-cell>
              <table:table-cell office:value-type="float" office:value="0.01953465">
                <text:p>0.01953465</text:p>
              </table:table-cell>
            </table:table-row>
            <table:table-row>
              <table:table-cell office:value-type="string">
                <text:p>2703</text:p>
              </table:table-cell>
              <table:table-cell office:value-type="float" office:value="631.369750976563">
                <text:p>631.369750976563</text:p>
              </table:table-cell>
              <table:table-cell office:value-type="float" office:value="0.02654358">
                <text:p>0.02654358</text:p>
              </table:table-cell>
            </table:table-row>
            <table:table-row>
              <table:table-cell office:value-type="string">
                <text:p>2704</text:p>
              </table:table-cell>
              <table:table-cell office:value-type="float" office:value="631.489135742188">
                <text:p>631.489135742188</text:p>
              </table:table-cell>
              <table:table-cell office:value-type="float" office:value="0.03118962">
                <text:p>0.03118962</text:p>
              </table:table-cell>
            </table:table-row>
            <table:table-row>
              <table:table-cell office:value-type="string">
                <text:p>2705</text:p>
              </table:table-cell>
              <table:table-cell office:value-type="float" office:value="631.608581542969">
                <text:p>631.608581542969</text:p>
              </table:table-cell>
              <table:table-cell office:value-type="float" office:value="0.01469481">
                <text:p>0.01469481</text:p>
              </table:table-cell>
            </table:table-row>
            <table:table-row>
              <table:table-cell office:value-type="string">
                <text:p>2706</text:p>
              </table:table-cell>
              <table:table-cell office:value-type="float" office:value="631.72802734375">
                <text:p>631.72802734375</text:p>
              </table:table-cell>
              <table:table-cell office:value-type="float" office:value="0.02754704">
                <text:p>0.02754704</text:p>
              </table:table-cell>
            </table:table-row>
            <table:table-row>
              <table:table-cell office:value-type="string">
                <text:p>2707</text:p>
              </table:table-cell>
              <table:table-cell office:value-type="float" office:value="631.847412109375">
                <text:p>631.847412109375</text:p>
              </table:table-cell>
              <table:table-cell office:value-type="float" office:value="0.01779413">
                <text:p>0.01779413</text:p>
              </table:table-cell>
            </table:table-row>
            <table:table-row>
              <table:table-cell office:value-type="string">
                <text:p>2708</text:p>
              </table:table-cell>
              <table:table-cell office:value-type="float" office:value="631.966857910156">
                <text:p>631.966857910156</text:p>
              </table:table-cell>
              <table:table-cell office:value-type="float" office:value="0.03530321">
                <text:p>0.03530321</text:p>
              </table:table-cell>
            </table:table-row>
            <table:table-row>
              <table:table-cell office:value-type="string">
                <text:p>2709</text:p>
              </table:table-cell>
              <table:table-cell office:value-type="float" office:value="632.086303710938">
                <text:p>632.086303710938</text:p>
              </table:table-cell>
              <table:table-cell office:value-type="float" office:value="0.01248402">
                <text:p>0.01248402</text:p>
              </table:table-cell>
            </table:table-row>
            <table:table-row>
              <table:table-cell office:value-type="string">
                <text:p>2710</text:p>
              </table:table-cell>
              <table:table-cell office:value-type="float" office:value="632.205749511719">
                <text:p>632.205749511719</text:p>
              </table:table-cell>
              <table:table-cell office:value-type="float" office:value="0.02036069">
                <text:p>0.02036069</text:p>
              </table:table-cell>
            </table:table-row>
            <table:table-row>
              <table:table-cell office:value-type="string">
                <text:p>2711</text:p>
              </table:table-cell>
              <table:table-cell office:value-type="float" office:value="632.3251953125">
                <text:p>632.3251953125</text:p>
              </table:table-cell>
              <table:table-cell office:value-type="float" office:value="0.01940487">
                <text:p>0.01940487</text:p>
              </table:table-cell>
            </table:table-row>
            <table:table-row>
              <table:table-cell office:value-type="string">
                <text:p>2712</text:p>
              </table:table-cell>
              <table:table-cell office:value-type="float" office:value="632.444580078125">
                <text:p>632.444580078125</text:p>
              </table:table-cell>
              <table:table-cell office:value-type="float" office:value="0.02887116">
                <text:p>0.02887116</text:p>
              </table:table-cell>
            </table:table-row>
            <table:table-row>
              <table:table-cell office:value-type="string">
                <text:p>2713</text:p>
              </table:table-cell>
              <table:table-cell office:value-type="float" office:value="632.564025878906">
                <text:p>632.564025878906</text:p>
              </table:table-cell>
              <table:table-cell office:value-type="float" office:value="0.01939833">
                <text:p>0.01939833</text:p>
              </table:table-cell>
            </table:table-row>
            <table:table-row>
              <table:table-cell office:value-type="string">
                <text:p>2714</text:p>
              </table:table-cell>
              <table:table-cell office:value-type="float" office:value="632.683471679688">
                <text:p>632.683471679688</text:p>
              </table:table-cell>
              <table:table-cell office:value-type="float" office:value="0.02118307">
                <text:p>0.02118307</text:p>
              </table:table-cell>
            </table:table-row>
            <table:table-row>
              <table:table-cell office:value-type="string">
                <text:p>2715</text:p>
              </table:table-cell>
              <table:table-cell office:value-type="float" office:value="632.802917480469">
                <text:p>632.802917480469</text:p>
              </table:table-cell>
              <table:table-cell office:value-type="float" office:value="0.01615693">
                <text:p>0.01615693</text:p>
              </table:table-cell>
            </table:table-row>
            <table:table-row>
              <table:table-cell office:value-type="string">
                <text:p>2716</text:p>
              </table:table-cell>
              <table:table-cell office:value-type="float" office:value="632.92236328125">
                <text:p>632.92236328125</text:p>
              </table:table-cell>
              <table:table-cell office:value-type="float" office:value="0.01190057">
                <text:p>0.01190057</text:p>
              </table:table-cell>
            </table:table-row>
            <table:table-row>
              <table:table-cell office:value-type="string">
                <text:p>2717</text:p>
              </table:table-cell>
              <table:table-cell office:value-type="float" office:value="633.041809082031">
                <text:p>633.041809082031</text:p>
              </table:table-cell>
              <table:table-cell office:value-type="float" office:value="0.0266248">
                <text:p>0.0266248</text:p>
              </table:table-cell>
            </table:table-row>
            <table:table-row>
              <table:table-cell office:value-type="string">
                <text:p>2718</text:p>
              </table:table-cell>
              <table:table-cell office:value-type="float" office:value="633.161254882813">
                <text:p>633.161254882813</text:p>
              </table:table-cell>
              <table:table-cell office:value-type="float" office:value="0.04766572">
                <text:p>0.04766572</text:p>
              </table:table-cell>
            </table:table-row>
            <table:table-row>
              <table:table-cell office:value-type="string">
                <text:p>2719</text:p>
              </table:table-cell>
              <table:table-cell office:value-type="float" office:value="633.280700683594">
                <text:p>633.280700683594</text:p>
              </table:table-cell>
              <table:table-cell office:value-type="float" office:value="0.0127773">
                <text:p>0.0127773</text:p>
              </table:table-cell>
            </table:table-row>
            <table:table-row>
              <table:table-cell office:value-type="string">
                <text:p>2720</text:p>
              </table:table-cell>
              <table:table-cell office:value-type="float" office:value="633.400146484375">
                <text:p>633.400146484375</text:p>
              </table:table-cell>
              <table:table-cell office:value-type="float" office:value="0.01717298">
                <text:p>0.01717298</text:p>
              </table:table-cell>
            </table:table-row>
            <table:table-row>
              <table:table-cell office:value-type="string">
                <text:p>2721</text:p>
              </table:table-cell>
              <table:table-cell office:value-type="float" office:value="633.519592285156">
                <text:p>633.519592285156</text:p>
              </table:table-cell>
              <table:table-cell office:value-type="float" office:value="0.01431439">
                <text:p>0.01431439</text:p>
              </table:table-cell>
            </table:table-row>
            <table:table-row>
              <table:table-cell office:value-type="string">
                <text:p>2722</text:p>
              </table:table-cell>
              <table:table-cell office:value-type="float" office:value="633.639038085938">
                <text:p>633.639038085938</text:p>
              </table:table-cell>
              <table:table-cell office:value-type="float" office:value="0.02829592">
                <text:p>0.02829592</text:p>
              </table:table-cell>
            </table:table-row>
            <table:table-row>
              <table:table-cell office:value-type="string">
                <text:p>2723</text:p>
              </table:table-cell>
              <table:table-cell office:value-type="float" office:value="633.758544921875">
                <text:p>633.758544921875</text:p>
              </table:table-cell>
              <table:table-cell office:value-type="float" office:value="0.01121341">
                <text:p>0.01121341</text:p>
              </table:table-cell>
            </table:table-row>
            <table:table-row>
              <table:table-cell office:value-type="string">
                <text:p>2724</text:p>
              </table:table-cell>
              <table:table-cell office:value-type="float" office:value="633.877990722656">
                <text:p>633.877990722656</text:p>
              </table:table-cell>
              <table:table-cell office:value-type="float" office:value="0.0190186">
                <text:p>0.0190186</text:p>
              </table:table-cell>
            </table:table-row>
            <table:table-row>
              <table:table-cell office:value-type="string">
                <text:p>2725</text:p>
              </table:table-cell>
              <table:table-cell office:value-type="float" office:value="633.997436523438">
                <text:p>633.997436523438</text:p>
              </table:table-cell>
              <table:table-cell office:value-type="float" office:value="0.01721388">
                <text:p>0.01721388</text:p>
              </table:table-cell>
            </table:table-row>
            <table:table-row>
              <table:table-cell office:value-type="string">
                <text:p>2726</text:p>
              </table:table-cell>
              <table:table-cell office:value-type="float" office:value="634.116882324219">
                <text:p>634.116882324219</text:p>
              </table:table-cell>
              <table:table-cell office:value-type="float" office:value="0.01325432">
                <text:p>0.01325432</text:p>
              </table:table-cell>
            </table:table-row>
            <table:table-row>
              <table:table-cell office:value-type="string">
                <text:p>2727</text:p>
              </table:table-cell>
              <table:table-cell office:value-type="float" office:value="634.236389160156">
                <text:p>634.236389160156</text:p>
              </table:table-cell>
              <table:table-cell office:value-type="float" office:value="0.01273514">
                <text:p>0.01273514</text:p>
              </table:table-cell>
            </table:table-row>
            <table:table-row>
              <table:table-cell office:value-type="string">
                <text:p>2728</text:p>
              </table:table-cell>
              <table:table-cell office:value-type="float" office:value="634.355834960938">
                <text:p>634.355834960938</text:p>
              </table:table-cell>
              <table:table-cell office:value-type="float" office:value="0.01817745">
                <text:p>0.01817745</text:p>
              </table:table-cell>
            </table:table-row>
            <table:table-row>
              <table:table-cell office:value-type="string">
                <text:p>2729</text:p>
              </table:table-cell>
              <table:table-cell office:value-type="float" office:value="634.475280761719">
                <text:p>634.475280761719</text:p>
              </table:table-cell>
              <table:table-cell office:value-type="float" office:value="0.01435152">
                <text:p>0.01435152</text:p>
              </table:table-cell>
            </table:table-row>
            <table:table-row>
              <table:table-cell office:value-type="string">
                <text:p>2730</text:p>
              </table:table-cell>
              <table:table-cell office:value-type="float" office:value="634.594787597656">
                <text:p>634.594787597656</text:p>
              </table:table-cell>
              <table:table-cell office:value-type="float" office:value="0.0375439">
                <text:p>0.0375439</text:p>
              </table:table-cell>
            </table:table-row>
            <table:table-row>
              <table:table-cell office:value-type="string">
                <text:p>2731</text:p>
              </table:table-cell>
              <table:table-cell office:value-type="float" office:value="634.714233398438">
                <text:p>634.714233398438</text:p>
              </table:table-cell>
              <table:table-cell office:value-type="float" office:value="0.0132858">
                <text:p>0.0132858</text:p>
              </table:table-cell>
            </table:table-row>
            <table:table-row>
              <table:table-cell office:value-type="string">
                <text:p>2732</text:p>
              </table:table-cell>
              <table:table-cell office:value-type="float" office:value="634.833679199219">
                <text:p>634.833679199219</text:p>
              </table:table-cell>
              <table:table-cell office:value-type="float" office:value="0.01076884">
                <text:p>0.01076884</text:p>
              </table:table-cell>
            </table:table-row>
            <table:table-row>
              <table:table-cell office:value-type="string">
                <text:p>2733</text:p>
              </table:table-cell>
              <table:table-cell office:value-type="float" office:value="634.953186035156">
                <text:p>634.953186035156</text:p>
              </table:table-cell>
              <table:table-cell office:value-type="float" office:value="0.02239677">
                <text:p>0.02239677</text:p>
              </table:table-cell>
            </table:table-row>
            <table:table-row>
              <table:table-cell office:value-type="string">
                <text:p>2734</text:p>
              </table:table-cell>
              <table:table-cell office:value-type="float" office:value="635.072631835938">
                <text:p>635.072631835938</text:p>
              </table:table-cell>
              <table:table-cell office:value-type="float" office:value="0.02518495">
                <text:p>0.02518495</text:p>
              </table:table-cell>
            </table:table-row>
            <table:table-row>
              <table:table-cell office:value-type="string">
                <text:p>2735</text:p>
              </table:table-cell>
              <table:table-cell office:value-type="float" office:value="635.192138671875">
                <text:p>635.192138671875</text:p>
              </table:table-cell>
              <table:table-cell office:value-type="float" office:value="0.01614714">
                <text:p>0.01614714</text:p>
              </table:table-cell>
            </table:table-row>
            <table:table-row>
              <table:table-cell office:value-type="string">
                <text:p>2736</text:p>
              </table:table-cell>
              <table:table-cell office:value-type="float" office:value="635.311584472656">
                <text:p>635.311584472656</text:p>
              </table:table-cell>
              <table:table-cell office:value-type="float" office:value="0.00749823">
                <text:p>0.00749823</text:p>
              </table:table-cell>
            </table:table-row>
            <table:table-row>
              <table:table-cell office:value-type="string">
                <text:p>2737</text:p>
              </table:table-cell>
              <table:table-cell office:value-type="float" office:value="635.431091308594">
                <text:p>635.431091308594</text:p>
              </table:table-cell>
              <table:table-cell office:value-type="float" office:value="0.03350684">
                <text:p>0.03350684</text:p>
              </table:table-cell>
            </table:table-row>
            <table:table-row>
              <table:table-cell office:value-type="string">
                <text:p>2738</text:p>
              </table:table-cell>
              <table:table-cell office:value-type="float" office:value="635.550598144531">
                <text:p>635.550598144531</text:p>
              </table:table-cell>
              <table:table-cell office:value-type="float" office:value="0.02351603">
                <text:p>0.02351603</text:p>
              </table:table-cell>
            </table:table-row>
            <table:table-row>
              <table:table-cell office:value-type="string">
                <text:p>2739</text:p>
              </table:table-cell>
              <table:table-cell office:value-type="float" office:value="635.670043945313">
                <text:p>635.670043945313</text:p>
              </table:table-cell>
              <table:table-cell office:value-type="float" office:value="0.01111197">
                <text:p>0.01111197</text:p>
              </table:table-cell>
            </table:table-row>
            <table:table-row>
              <table:table-cell office:value-type="string">
                <text:p>2740</text:p>
              </table:table-cell>
              <table:table-cell office:value-type="float" office:value="635.78955078125">
                <text:p>635.78955078125</text:p>
              </table:table-cell>
              <table:table-cell office:value-type="float" office:value="0.01897503">
                <text:p>0.01897503</text:p>
              </table:table-cell>
            </table:table-row>
            <table:table-row>
              <table:table-cell office:value-type="string">
                <text:p>2741</text:p>
              </table:table-cell>
              <table:table-cell office:value-type="float" office:value="635.909057617188">
                <text:p>635.909057617188</text:p>
              </table:table-cell>
              <table:table-cell office:value-type="float" office:value="0.01641889">
                <text:p>0.01641889</text:p>
              </table:table-cell>
            </table:table-row>
            <table:table-row>
              <table:table-cell office:value-type="string">
                <text:p>2742</text:p>
              </table:table-cell>
              <table:table-cell office:value-type="float" office:value="636.028503417969">
                <text:p>636.028503417969</text:p>
              </table:table-cell>
              <table:table-cell office:value-type="float" office:value="0.01305857">
                <text:p>0.01305857</text:p>
              </table:table-cell>
            </table:table-row>
            <table:table-row>
              <table:table-cell office:value-type="string">
                <text:p>2743</text:p>
              </table:table-cell>
              <table:table-cell office:value-type="float" office:value="636.148010253906">
                <text:p>636.148010253906</text:p>
              </table:table-cell>
              <table:table-cell office:value-type="float" office:value="0.01270274">
                <text:p>0.01270274</text:p>
              </table:table-cell>
            </table:table-row>
            <table:table-row>
              <table:table-cell office:value-type="string">
                <text:p>2744</text:p>
              </table:table-cell>
              <table:table-cell office:value-type="float" office:value="636.267517089844">
                <text:p>636.267517089844</text:p>
              </table:table-cell>
              <table:table-cell office:value-type="float" office:value="0.02599901">
                <text:p>0.02599901</text:p>
              </table:table-cell>
            </table:table-row>
            <table:table-row>
              <table:table-cell office:value-type="string">
                <text:p>2745</text:p>
              </table:table-cell>
              <table:table-cell office:value-type="float" office:value="636.387023925781">
                <text:p>636.387023925781</text:p>
              </table:table-cell>
              <table:table-cell office:value-type="float" office:value="0.02688795">
                <text:p>0.02688795</text:p>
              </table:table-cell>
            </table:table-row>
            <table:table-row>
              <table:table-cell office:value-type="string">
                <text:p>2746</text:p>
              </table:table-cell>
              <table:table-cell office:value-type="float" office:value="636.506469726563">
                <text:p>636.506469726563</text:p>
              </table:table-cell>
              <table:table-cell office:value-type="float" office:value="0.0185369">
                <text:p>0.0185369</text:p>
              </table:table-cell>
            </table:table-row>
            <table:table-row>
              <table:table-cell office:value-type="string">
                <text:p>2747</text:p>
              </table:table-cell>
              <table:table-cell office:value-type="float" office:value="636.6259765625">
                <text:p>636.6259765625</text:p>
              </table:table-cell>
              <table:table-cell office:value-type="float" office:value="0.02625916">
                <text:p>0.02625916</text:p>
              </table:table-cell>
            </table:table-row>
            <table:table-row>
              <table:table-cell office:value-type="string">
                <text:p>2748</text:p>
              </table:table-cell>
              <table:table-cell office:value-type="float" office:value="636.745483398438">
                <text:p>636.745483398438</text:p>
              </table:table-cell>
              <table:table-cell office:value-type="float" office:value="0.009534664">
                <text:p>0.009534664</text:p>
              </table:table-cell>
            </table:table-row>
            <table:table-row>
              <table:table-cell office:value-type="string">
                <text:p>2749</text:p>
              </table:table-cell>
              <table:table-cell office:value-type="float" office:value="636.864990234375">
                <text:p>636.864990234375</text:p>
              </table:table-cell>
              <table:table-cell office:value-type="float" office:value="0.01466212">
                <text:p>0.01466212</text:p>
              </table:table-cell>
            </table:table-row>
            <table:table-row>
              <table:table-cell office:value-type="string">
                <text:p>2750</text:p>
              </table:table-cell>
              <table:table-cell office:value-type="float" office:value="636.984497070313">
                <text:p>636.984497070313</text:p>
              </table:table-cell>
              <table:table-cell office:value-type="float" office:value="0.009490166">
                <text:p>0.009490166</text:p>
              </table:table-cell>
            </table:table-row>
            <table:table-row>
              <table:table-cell office:value-type="string">
                <text:p>2751</text:p>
              </table:table-cell>
              <table:table-cell office:value-type="float" office:value="637.10400390625">
                <text:p>637.10400390625</text:p>
              </table:table-cell>
              <table:table-cell office:value-type="float" office:value="0.009904582">
                <text:p>0.009904582</text:p>
              </table:table-cell>
            </table:table-row>
            <table:table-row>
              <table:table-cell office:value-type="string">
                <text:p>2752</text:p>
              </table:table-cell>
              <table:table-cell office:value-type="float" office:value="637.223510742188">
                <text:p>637.223510742188</text:p>
              </table:table-cell>
              <table:table-cell office:value-type="float" office:value="0.01880211">
                <text:p>0.01880211</text:p>
              </table:table-cell>
            </table:table-row>
            <table:table-row>
              <table:table-cell office:value-type="string">
                <text:p>2753</text:p>
              </table:table-cell>
              <table:table-cell office:value-type="float" office:value="637.343017578125">
                <text:p>637.343017578125</text:p>
              </table:table-cell>
              <table:table-cell office:value-type="float" office:value="0.02700509">
                <text:p>0.02700509</text:p>
              </table:table-cell>
            </table:table-row>
            <table:table-row>
              <table:table-cell office:value-type="string">
                <text:p>2754</text:p>
              </table:table-cell>
              <table:table-cell office:value-type="float" office:value="637.462524414063">
                <text:p>637.462524414063</text:p>
              </table:table-cell>
              <table:table-cell office:value-type="float" office:value="0.009370959">
                <text:p>0.009370959</text:p>
              </table:table-cell>
            </table:table-row>
            <table:table-row>
              <table:table-cell office:value-type="string">
                <text:p>2755</text:p>
              </table:table-cell>
              <table:table-cell office:value-type="float" office:value="637.58203125">
                <text:p>637.58203125</text:p>
              </table:table-cell>
              <table:table-cell office:value-type="float" office:value="0.03610576">
                <text:p>0.03610576</text:p>
              </table:table-cell>
            </table:table-row>
            <table:table-row>
              <table:table-cell office:value-type="string">
                <text:p>2756</text:p>
              </table:table-cell>
              <table:table-cell office:value-type="float" office:value="637.701538085938">
                <text:p>637.701538085938</text:p>
              </table:table-cell>
              <table:table-cell office:value-type="float" office:value="0.01637461">
                <text:p>0.01637461</text:p>
              </table:table-cell>
            </table:table-row>
            <table:table-row>
              <table:table-cell office:value-type="string">
                <text:p>2757</text:p>
              </table:table-cell>
              <table:table-cell office:value-type="float" office:value="637.821044921875">
                <text:p>637.821044921875</text:p>
              </table:table-cell>
              <table:table-cell office:value-type="float" office:value="0.01367568">
                <text:p>0.01367568</text:p>
              </table:table-cell>
            </table:table-row>
            <table:table-row>
              <table:table-cell office:value-type="string">
                <text:p>2758</text:p>
              </table:table-cell>
              <table:table-cell office:value-type="float" office:value="637.940551757813">
                <text:p>637.940551757813</text:p>
              </table:table-cell>
              <table:table-cell office:value-type="float" office:value="0.008626311">
                <text:p>0.008626311</text:p>
              </table:table-cell>
            </table:table-row>
            <table:table-row>
              <table:table-cell office:value-type="string">
                <text:p>2759</text:p>
              </table:table-cell>
              <table:table-cell office:value-type="float" office:value="638.060119628906">
                <text:p>638.060119628906</text:p>
              </table:table-cell>
              <table:table-cell office:value-type="float" office:value="0.00727386">
                <text:p>0.00727386</text:p>
              </table:table-cell>
            </table:table-row>
            <table:table-row>
              <table:table-cell office:value-type="string">
                <text:p>2760</text:p>
              </table:table-cell>
              <table:table-cell office:value-type="float" office:value="638.179626464844">
                <text:p>638.179626464844</text:p>
              </table:table-cell>
              <table:table-cell office:value-type="float" office:value="0.009873094">
                <text:p>0.009873094</text:p>
              </table:table-cell>
            </table:table-row>
            <table:table-row>
              <table:table-cell office:value-type="string">
                <text:p>2761</text:p>
              </table:table-cell>
              <table:table-cell office:value-type="float" office:value="638.299133300781">
                <text:p>638.299133300781</text:p>
              </table:table-cell>
              <table:table-cell office:value-type="float" office:value="0.02653459">
                <text:p>0.02653459</text:p>
              </table:table-cell>
            </table:table-row>
            <table:table-row>
              <table:table-cell office:value-type="string">
                <text:p>2762</text:p>
              </table:table-cell>
              <table:table-cell office:value-type="float" office:value="638.418640136719">
                <text:p>638.418640136719</text:p>
              </table:table-cell>
              <table:table-cell office:value-type="float" office:value="0.0305562">
                <text:p>0.0305562</text:p>
              </table:table-cell>
            </table:table-row>
            <table:table-row>
              <table:table-cell office:value-type="string">
                <text:p>2763</text:p>
              </table:table-cell>
              <table:table-cell office:value-type="float" office:value="638.538208007813">
                <text:p>638.538208007813</text:p>
              </table:table-cell>
              <table:table-cell office:value-type="float" office:value="0.01148179">
                <text:p>0.01148179</text:p>
              </table:table-cell>
            </table:table-row>
            <table:table-row>
              <table:table-cell office:value-type="string">
                <text:p>2764</text:p>
              </table:table-cell>
              <table:table-cell office:value-type="float" office:value="638.65771484375">
                <text:p>638.65771484375</text:p>
              </table:table-cell>
              <table:table-cell office:value-type="float" office:value="0.01285211">
                <text:p>0.01285211</text:p>
              </table:table-cell>
            </table:table-row>
            <table:table-row>
              <table:table-cell office:value-type="string">
                <text:p>2765</text:p>
              </table:table-cell>
              <table:table-cell office:value-type="float" office:value="638.777221679688">
                <text:p>638.777221679688</text:p>
              </table:table-cell>
              <table:table-cell office:value-type="float" office:value="0.009698222">
                <text:p>0.009698222</text:p>
              </table:table-cell>
            </table:table-row>
            <table:table-row>
              <table:table-cell office:value-type="string">
                <text:p>2766</text:p>
              </table:table-cell>
              <table:table-cell office:value-type="float" office:value="638.896789550781">
                <text:p>638.896789550781</text:p>
              </table:table-cell>
              <table:table-cell office:value-type="float" office:value="0.02690989">
                <text:p>0.02690989</text:p>
              </table:table-cell>
            </table:table-row>
            <table:table-row>
              <table:table-cell office:value-type="string">
                <text:p>2767</text:p>
              </table:table-cell>
              <table:table-cell office:value-type="float" office:value="639.016296386719">
                <text:p>639.016296386719</text:p>
              </table:table-cell>
              <table:table-cell office:value-type="float" office:value="0.01710601">
                <text:p>0.01710601</text:p>
              </table:table-cell>
            </table:table-row>
            <table:table-row>
              <table:table-cell office:value-type="string">
                <text:p>2768</text:p>
              </table:table-cell>
              <table:table-cell office:value-type="float" office:value="639.135864257813">
                <text:p>639.135864257813</text:p>
              </table:table-cell>
              <table:table-cell office:value-type="float" office:value="0.004467327">
                <text:p>0.004467327</text:p>
              </table:table-cell>
            </table:table-row>
            <table:table-row>
              <table:table-cell office:value-type="string">
                <text:p>2769</text:p>
              </table:table-cell>
              <table:table-cell office:value-type="float" office:value="639.25537109375">
                <text:p>639.25537109375</text:p>
              </table:table-cell>
              <table:table-cell office:value-type="float" office:value="0.01149942">
                <text:p>0.01149942</text:p>
              </table:table-cell>
            </table:table-row>
            <table:table-row>
              <table:table-cell office:value-type="string">
                <text:p>2770</text:p>
              </table:table-cell>
              <table:table-cell office:value-type="float" office:value="639.374938964844">
                <text:p>639.374938964844</text:p>
              </table:table-cell>
              <table:table-cell office:value-type="float" office:value="0.01759095">
                <text:p>0.01759095</text:p>
              </table:table-cell>
            </table:table-row>
            <table:table-row>
              <table:table-cell office:value-type="string">
                <text:p>2771</text:p>
              </table:table-cell>
              <table:table-cell office:value-type="float" office:value="639.494445800781">
                <text:p>639.494445800781</text:p>
              </table:table-cell>
              <table:table-cell office:value-type="float" office:value="0.01158802">
                <text:p>0.01158802</text:p>
              </table:table-cell>
            </table:table-row>
            <table:table-row>
              <table:table-cell office:value-type="string">
                <text:p>2772</text:p>
              </table:table-cell>
              <table:table-cell office:value-type="float" office:value="639.614013671875">
                <text:p>639.614013671875</text:p>
              </table:table-cell>
              <table:table-cell office:value-type="float" office:value="0.01227225">
                <text:p>0.01227225</text:p>
              </table:table-cell>
            </table:table-row>
            <table:table-row>
              <table:table-cell office:value-type="string">
                <text:p>2773</text:p>
              </table:table-cell>
              <table:table-cell office:value-type="float" office:value="639.733520507813">
                <text:p>639.733520507813</text:p>
              </table:table-cell>
              <table:table-cell office:value-type="float" office:value="0.02804287">
                <text:p>0.02804287</text:p>
              </table:table-cell>
            </table:table-row>
            <table:table-row>
              <table:table-cell office:value-type="string">
                <text:p>2774</text:p>
              </table:table-cell>
              <table:table-cell office:value-type="float" office:value="639.853088378906">
                <text:p>639.853088378906</text:p>
              </table:table-cell>
              <table:table-cell office:value-type="float" office:value="0.00989447">
                <text:p>0.00989447</text:p>
              </table:table-cell>
            </table:table-row>
            <table:table-row>
              <table:table-cell office:value-type="string">
                <text:p>2775</text:p>
              </table:table-cell>
              <table:table-cell office:value-type="float" office:value="639.972595214844">
                <text:p>639.972595214844</text:p>
              </table:table-cell>
              <table:table-cell office:value-type="float" office:value="0.02707065">
                <text:p>0.02707065</text:p>
              </table:table-cell>
            </table:table-row>
            <table:table-row>
              <table:table-cell office:value-type="string">
                <text:p>2776</text:p>
              </table:table-cell>
              <table:table-cell office:value-type="float" office:value="640.092163085938">
                <text:p>640.092163085938</text:p>
              </table:table-cell>
              <table:table-cell office:value-type="float" office:value="0.009434109">
                <text:p>0.009434109</text:p>
              </table:table-cell>
            </table:table-row>
            <table:table-row>
              <table:table-cell office:value-type="string">
                <text:p>2777</text:p>
              </table:table-cell>
              <table:table-cell office:value-type="float" office:value="640.211730957031">
                <text:p>640.211730957031</text:p>
              </table:table-cell>
              <table:table-cell office:value-type="float" office:value="0.02423559">
                <text:p>0.02423559</text:p>
              </table:table-cell>
            </table:table-row>
            <table:table-row>
              <table:table-cell office:value-type="string">
                <text:p>2778</text:p>
              </table:table-cell>
              <table:table-cell office:value-type="float" office:value="640.331237792969">
                <text:p>640.331237792969</text:p>
              </table:table-cell>
              <table:table-cell office:value-type="float" office:value="0.01511749">
                <text:p>0.01511749</text:p>
              </table:table-cell>
            </table:table-row>
            <table:table-row>
              <table:table-cell office:value-type="string">
                <text:p>2779</text:p>
              </table:table-cell>
              <table:table-cell office:value-type="float" office:value="640.450805664063">
                <text:p>640.450805664063</text:p>
              </table:table-cell>
              <table:table-cell office:value-type="float" office:value="0.008642527">
                <text:p>0.008642527</text:p>
              </table:table-cell>
            </table:table-row>
            <table:table-row>
              <table:table-cell office:value-type="string">
                <text:p>2780</text:p>
              </table:table-cell>
              <table:table-cell office:value-type="float" office:value="640.570373535156">
                <text:p>640.570373535156</text:p>
              </table:table-cell>
              <table:table-cell office:value-type="float" office:value="0.02158027">
                <text:p>0.02158027</text:p>
              </table:table-cell>
            </table:table-row>
            <table:table-row>
              <table:table-cell office:value-type="string">
                <text:p>2781</text:p>
              </table:table-cell>
              <table:table-cell office:value-type="float" office:value="640.68994140625">
                <text:p>640.68994140625</text:p>
              </table:table-cell>
              <table:table-cell office:value-type="float" office:value="0.02233489">
                <text:p>0.02233489</text:p>
              </table:table-cell>
            </table:table-row>
            <table:table-row>
              <table:table-cell office:value-type="string">
                <text:p>2782</text:p>
              </table:table-cell>
              <table:table-cell office:value-type="float" office:value="640.809509277344">
                <text:p>640.809509277344</text:p>
              </table:table-cell>
              <table:table-cell office:value-type="float" office:value="0.009137603">
                <text:p>0.009137603</text:p>
              </table:table-cell>
            </table:table-row>
            <table:table-row>
              <table:table-cell office:value-type="string">
                <text:p>2783</text:p>
              </table:table-cell>
              <table:table-cell office:value-type="float" office:value="640.929016113281">
                <text:p>640.929016113281</text:p>
              </table:table-cell>
              <table:table-cell office:value-type="float" office:value="0.004863025">
                <text:p>0.004863025</text:p>
              </table:table-cell>
            </table:table-row>
            <table:table-row>
              <table:table-cell office:value-type="string">
                <text:p>2784</text:p>
              </table:table-cell>
              <table:table-cell office:value-type="float" office:value="641.048583984375">
                <text:p>641.048583984375</text:p>
              </table:table-cell>
              <table:table-cell office:value-type="float" office:value="0.004291133">
                <text:p>0.004291133</text:p>
              </table:table-cell>
            </table:table-row>
            <table:table-row>
              <table:table-cell office:value-type="string">
                <text:p>2785</text:p>
              </table:table-cell>
              <table:table-cell office:value-type="float" office:value="641.168151855469">
                <text:p>641.168151855469</text:p>
              </table:table-cell>
              <table:table-cell office:value-type="float" office:value="0.009835289">
                <text:p>0.009835289</text:p>
              </table:table-cell>
            </table:table-row>
            <table:table-row>
              <table:table-cell office:value-type="string">
                <text:p>2786</text:p>
              </table:table-cell>
              <table:table-cell office:value-type="float" office:value="641.287719726563">
                <text:p>641.287719726563</text:p>
              </table:table-cell>
              <table:table-cell office:value-type="float" office:value="0.009935444">
                <text:p>0.009935444</text:p>
              </table:table-cell>
            </table:table-row>
            <table:table-row>
              <table:table-cell office:value-type="string">
                <text:p>2787</text:p>
              </table:table-cell>
              <table:table-cell office:value-type="float" office:value="641.407287597656">
                <text:p>641.407287597656</text:p>
              </table:table-cell>
              <table:table-cell office:value-type="float" office:value="0.01618">
                <text:p>0.01618</text:p>
              </table:table-cell>
            </table:table-row>
            <table:table-row>
              <table:table-cell office:value-type="string">
                <text:p>2788</text:p>
              </table:table-cell>
              <table:table-cell office:value-type="float" office:value="641.52685546875">
                <text:p>641.52685546875</text:p>
              </table:table-cell>
              <table:table-cell office:value-type="float" office:value="0.02151936">
                <text:p>0.02151936</text:p>
              </table:table-cell>
            </table:table-row>
            <table:table-row>
              <table:table-cell office:value-type="string">
                <text:p>2789</text:p>
              </table:table-cell>
              <table:table-cell office:value-type="float" office:value="641.646423339844">
                <text:p>641.646423339844</text:p>
              </table:table-cell>
              <table:table-cell office:value-type="float" office:value="0.01283511">
                <text:p>0.01283511</text:p>
              </table:table-cell>
            </table:table-row>
            <table:table-row>
              <table:table-cell office:value-type="string">
                <text:p>2790</text:p>
              </table:table-cell>
              <table:table-cell office:value-type="float" office:value="641.765991210938">
                <text:p>641.765991210938</text:p>
              </table:table-cell>
              <table:table-cell office:value-type="float" office:value="0.007607091">
                <text:p>0.007607091</text:p>
              </table:table-cell>
            </table:table-row>
            <table:table-row>
              <table:table-cell office:value-type="string">
                <text:p>2791</text:p>
              </table:table-cell>
              <table:table-cell office:value-type="float" office:value="641.885559082031">
                <text:p>641.885559082031</text:p>
              </table:table-cell>
              <table:table-cell office:value-type="float" office:value="0.01712299">
                <text:p>0.01712299</text:p>
              </table:table-cell>
            </table:table-row>
            <table:table-row>
              <table:table-cell office:value-type="string">
                <text:p>2792</text:p>
              </table:table-cell>
              <table:table-cell office:value-type="float" office:value="642.005126953125">
                <text:p>642.005126953125</text:p>
              </table:table-cell>
              <table:table-cell office:value-type="float" office:value="0.01111696">
                <text:p>0.01111696</text:p>
              </table:table-cell>
            </table:table-row>
            <table:table-row>
              <table:table-cell office:value-type="string">
                <text:p>2793</text:p>
              </table:table-cell>
              <table:table-cell office:value-type="float" office:value="642.124694824219">
                <text:p>642.124694824219</text:p>
              </table:table-cell>
              <table:table-cell office:value-type="float" office:value="0.01439466">
                <text:p>0.01439466</text:p>
              </table:table-cell>
            </table:table-row>
            <table:table-row>
              <table:table-cell office:value-type="string">
                <text:p>2794</text:p>
              </table:table-cell>
              <table:table-cell office:value-type="float" office:value="642.244262695313">
                <text:p>642.244262695313</text:p>
              </table:table-cell>
              <table:table-cell office:value-type="float" office:value="0.009545214">
                <text:p>0.009545214</text:p>
              </table:table-cell>
            </table:table-row>
            <table:table-row>
              <table:table-cell office:value-type="string">
                <text:p>2795</text:p>
              </table:table-cell>
              <table:table-cell office:value-type="float" office:value="642.363891601563">
                <text:p>642.363891601563</text:p>
              </table:table-cell>
              <table:table-cell office:value-type="float" office:value="0.006967168">
                <text:p>0.006967168</text:p>
              </table:table-cell>
            </table:table-row>
            <table:table-row>
              <table:table-cell office:value-type="string">
                <text:p>2796</text:p>
              </table:table-cell>
              <table:table-cell office:value-type="float" office:value="642.483459472656">
                <text:p>642.483459472656</text:p>
              </table:table-cell>
              <table:table-cell office:value-type="float" office:value="0.009809165">
                <text:p>0.009809165</text:p>
              </table:table-cell>
            </table:table-row>
            <table:table-row>
              <table:table-cell office:value-type="string">
                <text:p>2797</text:p>
              </table:table-cell>
              <table:table-cell office:value-type="float" office:value="642.60302734375">
                <text:p>642.60302734375</text:p>
              </table:table-cell>
              <table:table-cell office:value-type="float" office:value="0.02117056">
                <text:p>0.02117056</text:p>
              </table:table-cell>
            </table:table-row>
            <table:table-row>
              <table:table-cell office:value-type="string">
                <text:p>2798</text:p>
              </table:table-cell>
              <table:table-cell office:value-type="float" office:value="642.722595214844">
                <text:p>642.722595214844</text:p>
              </table:table-cell>
              <table:table-cell office:value-type="float" office:value="0.006095086">
                <text:p>0.006095086</text:p>
              </table:table-cell>
            </table:table-row>
            <table:table-row>
              <table:table-cell office:value-type="string">
                <text:p>2799</text:p>
              </table:table-cell>
              <table:table-cell office:value-type="float" office:value="642.842163085938">
                <text:p>642.842163085938</text:p>
              </table:table-cell>
              <table:table-cell office:value-type="float" office:value="0.008596573">
                <text:p>0.008596573</text:p>
              </table:table-cell>
            </table:table-row>
            <table:table-row>
              <table:table-cell office:value-type="string">
                <text:p>2800</text:p>
              </table:table-cell>
              <table:table-cell office:value-type="float" office:value="642.961791992188">
                <text:p>642.961791992188</text:p>
              </table:table-cell>
              <table:table-cell office:value-type="float" office:value="0.01178028">
                <text:p>0.01178028</text:p>
              </table:table-cell>
            </table:table-row>
            <table:table-row>
              <table:table-cell office:value-type="string">
                <text:p>2801</text:p>
              </table:table-cell>
              <table:table-cell office:value-type="float" office:value="643.081359863281">
                <text:p>643.081359863281</text:p>
              </table:table-cell>
              <table:table-cell office:value-type="float" office:value="0.01924822">
                <text:p>0.01924822</text:p>
              </table:table-cell>
            </table:table-row>
            <table:table-row>
              <table:table-cell office:value-type="string">
                <text:p>2802</text:p>
              </table:table-cell>
              <table:table-cell office:value-type="float" office:value="643.200927734375">
                <text:p>643.200927734375</text:p>
              </table:table-cell>
              <table:table-cell office:value-type="float" office:value="0.01489904">
                <text:p>0.01489904</text:p>
              </table:table-cell>
            </table:table-row>
            <table:table-row>
              <table:table-cell office:value-type="string">
                <text:p>2803</text:p>
              </table:table-cell>
              <table:table-cell office:value-type="float" office:value="643.320556640625">
                <text:p>643.320556640625</text:p>
              </table:table-cell>
              <table:table-cell office:value-type="float" office:value="0.01240424">
                <text:p>0.01240424</text:p>
              </table:table-cell>
            </table:table-row>
            <table:table-row>
              <table:table-cell office:value-type="string">
                <text:p>2804</text:p>
              </table:table-cell>
              <table:table-cell office:value-type="float" office:value="643.440124511719">
                <text:p>643.440124511719</text:p>
              </table:table-cell>
              <table:table-cell office:value-type="float" office:value="0.02310305">
                <text:p>0.02310305</text:p>
              </table:table-cell>
            </table:table-row>
            <table:table-row>
              <table:table-cell office:value-type="string">
                <text:p>2805</text:p>
              </table:table-cell>
              <table:table-cell office:value-type="float" office:value="643.559753417969">
                <text:p>643.559753417969</text:p>
              </table:table-cell>
              <table:table-cell office:value-type="float" office:value="0.02134624">
                <text:p>0.02134624</text:p>
              </table:table-cell>
            </table:table-row>
            <table:table-row>
              <table:table-cell office:value-type="string">
                <text:p>2806</text:p>
              </table:table-cell>
              <table:table-cell office:value-type="float" office:value="643.679321289063">
                <text:p>643.679321289063</text:p>
              </table:table-cell>
              <table:table-cell office:value-type="float" office:value="0.01724784">
                <text:p>0.01724784</text:p>
              </table:table-cell>
            </table:table-row>
            <table:table-row>
              <table:table-cell office:value-type="string">
                <text:p>2807</text:p>
              </table:table-cell>
              <table:table-cell office:value-type="float" office:value="643.798950195313">
                <text:p>643.798950195313</text:p>
              </table:table-cell>
              <table:table-cell office:value-type="float" office:value="0.01259693">
                <text:p>0.01259693</text:p>
              </table:table-cell>
            </table:table-row>
            <table:table-row>
              <table:table-cell office:value-type="string">
                <text:p>2808</text:p>
              </table:table-cell>
              <table:table-cell office:value-type="float" office:value="643.918518066406">
                <text:p>643.918518066406</text:p>
              </table:table-cell>
              <table:table-cell office:value-type="float" office:value="0.01105509">
                <text:p>0.01105509</text:p>
              </table:table-cell>
            </table:table-row>
            <table:table-row>
              <table:table-cell office:value-type="string">
                <text:p>2809</text:p>
              </table:table-cell>
              <table:table-cell office:value-type="float" office:value="644.038146972656">
                <text:p>644.038146972656</text:p>
              </table:table-cell>
              <table:table-cell office:value-type="float" office:value="0.02757867">
                <text:p>0.02757867</text:p>
              </table:table-cell>
            </table:table-row>
            <table:table-row>
              <table:table-cell office:value-type="string">
                <text:p>2810</text:p>
              </table:table-cell>
              <table:table-cell office:value-type="float" office:value="644.15771484375">
                <text:p>644.15771484375</text:p>
              </table:table-cell>
              <table:table-cell office:value-type="float" office:value="0.005910462">
                <text:p>0.005910462</text:p>
              </table:table-cell>
            </table:table-row>
            <table:table-row>
              <table:table-cell office:value-type="string">
                <text:p>2811</text:p>
              </table:table-cell>
              <table:table-cell office:value-type="float" office:value="644.27734375">
                <text:p>644.27734375</text:p>
              </table:table-cell>
              <table:table-cell office:value-type="float" office:value="0.007076684">
                <text:p>0.007076684</text:p>
              </table:table-cell>
            </table:table-row>
            <table:table-row>
              <table:table-cell office:value-type="string">
                <text:p>2812</text:p>
              </table:table-cell>
              <table:table-cell office:value-type="float" office:value="644.396911621094">
                <text:p>644.396911621094</text:p>
              </table:table-cell>
              <table:table-cell office:value-type="float" office:value="0.009576532">
                <text:p>0.009576532</text:p>
              </table:table-cell>
            </table:table-row>
            <table:table-row>
              <table:table-cell office:value-type="string">
                <text:p>2813</text:p>
              </table:table-cell>
              <table:table-cell office:value-type="float" office:value="644.516540527344">
                <text:p>644.516540527344</text:p>
              </table:table-cell>
              <table:table-cell office:value-type="float" office:value="0.009847437">
                <text:p>0.009847437</text:p>
              </table:table-cell>
            </table:table-row>
            <table:table-row>
              <table:table-cell office:value-type="string">
                <text:p>2814</text:p>
              </table:table-cell>
              <table:table-cell office:value-type="float" office:value="644.636169433594">
                <text:p>644.636169433594</text:p>
              </table:table-cell>
              <table:table-cell office:value-type="float" office:value="0.007316547">
                <text:p>0.007316547</text:p>
              </table:table-cell>
            </table:table-row>
            <table:table-row>
              <table:table-cell office:value-type="string">
                <text:p>2815</text:p>
              </table:table-cell>
              <table:table-cell office:value-type="float" office:value="644.755737304688">
                <text:p>644.755737304688</text:p>
              </table:table-cell>
              <table:table-cell office:value-type="float" office:value="0.008500637">
                <text:p>0.008500637</text:p>
              </table:table-cell>
            </table:table-row>
            <table:table-row>
              <table:table-cell office:value-type="string">
                <text:p>2816</text:p>
              </table:table-cell>
              <table:table-cell office:value-type="float" office:value="644.875366210938">
                <text:p>644.875366210938</text:p>
              </table:table-cell>
              <table:table-cell office:value-type="float" office:value="0.01835435">
                <text:p>0.01835435</text:p>
              </table:table-cell>
            </table:table-row>
            <table:table-row>
              <table:table-cell office:value-type="string">
                <text:p>2817</text:p>
              </table:table-cell>
              <table:table-cell office:value-type="float" office:value="644.994995117188">
                <text:p>644.994995117188</text:p>
              </table:table-cell>
              <table:table-cell office:value-type="float" office:value="0.0184627">
                <text:p>0.0184627</text:p>
              </table:table-cell>
            </table:table-row>
            <table:table-row>
              <table:table-cell office:value-type="string">
                <text:p>2818</text:p>
              </table:table-cell>
              <table:table-cell office:value-type="float" office:value="645.114562988281">
                <text:p>645.114562988281</text:p>
              </table:table-cell>
              <table:table-cell office:value-type="float" office:value="0.02138804">
                <text:p>0.02138804</text:p>
              </table:table-cell>
            </table:table-row>
            <table:table-row>
              <table:table-cell office:value-type="string">
                <text:p>2819</text:p>
              </table:table-cell>
              <table:table-cell office:value-type="float" office:value="645.234191894531">
                <text:p>645.234191894531</text:p>
              </table:table-cell>
              <table:table-cell office:value-type="float" office:value="0.01984472">
                <text:p>0.01984472</text:p>
              </table:table-cell>
            </table:table-row>
            <table:table-row>
              <table:table-cell office:value-type="string">
                <text:p>2820</text:p>
              </table:table-cell>
              <table:table-cell office:value-type="float" office:value="645.353820800781">
                <text:p>645.353820800781</text:p>
              </table:table-cell>
              <table:table-cell office:value-type="float" office:value="0.01208567">
                <text:p>0.01208567</text:p>
              </table:table-cell>
            </table:table-row>
            <table:table-row>
              <table:table-cell office:value-type="string">
                <text:p>2821</text:p>
              </table:table-cell>
              <table:table-cell office:value-type="float" office:value="645.473449707031">
                <text:p>645.473449707031</text:p>
              </table:table-cell>
              <table:table-cell office:value-type="float" office:value="0.007194391">
                <text:p>0.007194391</text:p>
              </table:table-cell>
            </table:table-row>
            <table:table-row>
              <table:table-cell office:value-type="string">
                <text:p>2822</text:p>
              </table:table-cell>
              <table:table-cell office:value-type="float" office:value="645.593078613281">
                <text:p>645.593078613281</text:p>
              </table:table-cell>
              <table:table-cell office:value-type="float" office:value="0.01201029">
                <text:p>0.01201029</text:p>
              </table:table-cell>
            </table:table-row>
            <table:table-row>
              <table:table-cell office:value-type="string">
                <text:p>2823</text:p>
              </table:table-cell>
              <table:table-cell office:value-type="float" office:value="645.712707519531">
                <text:p>645.712707519531</text:p>
              </table:table-cell>
              <table:table-cell office:value-type="float" office:value="0.00879756">
                <text:p>0.00879756</text:p>
              </table:table-cell>
            </table:table-row>
            <table:table-row>
              <table:table-cell office:value-type="string">
                <text:p>2824</text:p>
              </table:table-cell>
              <table:table-cell office:value-type="float" office:value="645.832336425781">
                <text:p>645.832336425781</text:p>
              </table:table-cell>
              <table:table-cell office:value-type="float" office:value="0.00753851">
                <text:p>0.00753851</text:p>
              </table:table-cell>
            </table:table-row>
            <table:table-row>
              <table:table-cell office:value-type="string">
                <text:p>2825</text:p>
              </table:table-cell>
              <table:table-cell office:value-type="float" office:value="645.951965332031">
                <text:p>645.951965332031</text:p>
              </table:table-cell>
              <table:table-cell office:value-type="float" office:value="0.01101021">
                <text:p>0.01101021</text:p>
              </table:table-cell>
            </table:table-row>
            <table:table-row>
              <table:table-cell office:value-type="string">
                <text:p>2826</text:p>
              </table:table-cell>
              <table:table-cell office:value-type="float" office:value="646.071533203125">
                <text:p>646.071533203125</text:p>
              </table:table-cell>
              <table:table-cell office:value-type="float" office:value="0.00878159">
                <text:p>0.00878159</text:p>
              </table:table-cell>
            </table:table-row>
            <table:table-row>
              <table:table-cell office:value-type="string">
                <text:p>2827</text:p>
              </table:table-cell>
              <table:table-cell office:value-type="float" office:value="646.191162109375">
                <text:p>646.191162109375</text:p>
              </table:table-cell>
              <table:table-cell office:value-type="float" office:value="0.004537057">
                <text:p>0.004537057</text:p>
              </table:table-cell>
            </table:table-row>
            <table:table-row>
              <table:table-cell office:value-type="string">
                <text:p>2828</text:p>
              </table:table-cell>
              <table:table-cell office:value-type="float" office:value="646.310852050781">
                <text:p>646.310852050781</text:p>
              </table:table-cell>
              <table:table-cell office:value-type="float" office:value="0.01842096">
                <text:p>0.01842096</text:p>
              </table:table-cell>
            </table:table-row>
            <table:table-row>
              <table:table-cell office:value-type="string">
                <text:p>2829</text:p>
              </table:table-cell>
              <table:table-cell office:value-type="float" office:value="646.430480957031">
                <text:p>646.430480957031</text:p>
              </table:table-cell>
              <table:table-cell office:value-type="float" office:value="0.01314149">
                <text:p>0.01314149</text:p>
              </table:table-cell>
            </table:table-row>
            <table:table-row>
              <table:table-cell office:value-type="string">
                <text:p>2830</text:p>
              </table:table-cell>
              <table:table-cell office:value-type="float" office:value="646.550109863281">
                <text:p>646.550109863281</text:p>
              </table:table-cell>
              <table:table-cell office:value-type="float" office:value="0.02140882">
                <text:p>0.02140882</text:p>
              </table:table-cell>
            </table:table-row>
            <table:table-row>
              <table:table-cell office:value-type="string">
                <text:p>2831</text:p>
              </table:table-cell>
              <table:table-cell office:value-type="float" office:value="646.669738769531">
                <text:p>646.669738769531</text:p>
              </table:table-cell>
              <table:table-cell office:value-type="float" office:value="0.008594112">
                <text:p>0.008594112</text:p>
              </table:table-cell>
            </table:table-row>
            <table:table-row>
              <table:table-cell office:value-type="string">
                <text:p>2832</text:p>
              </table:table-cell>
              <table:table-cell office:value-type="float" office:value="646.789367675781">
                <text:p>646.789367675781</text:p>
              </table:table-cell>
              <table:table-cell office:value-type="float" office:value="0.01573137">
                <text:p>0.01573137</text:p>
              </table:table-cell>
            </table:table-row>
            <table:table-row>
              <table:table-cell office:value-type="string">
                <text:p>2833</text:p>
              </table:table-cell>
              <table:table-cell office:value-type="float" office:value="646.908996582031">
                <text:p>646.908996582031</text:p>
              </table:table-cell>
              <table:table-cell office:value-type="float" office:value="0.03355594">
                <text:p>0.03355594</text:p>
              </table:table-cell>
            </table:table-row>
            <table:table-row>
              <table:table-cell office:value-type="string">
                <text:p>2834</text:p>
              </table:table-cell>
              <table:table-cell office:value-type="float" office:value="647.028625488281">
                <text:p>647.028625488281</text:p>
              </table:table-cell>
              <table:table-cell office:value-type="float" office:value="0.01516171">
                <text:p>0.01516171</text:p>
              </table:table-cell>
            </table:table-row>
            <table:table-row>
              <table:table-cell office:value-type="string">
                <text:p>2835</text:p>
              </table:table-cell>
              <table:table-cell office:value-type="float" office:value="647.148254394531">
                <text:p>647.148254394531</text:p>
              </table:table-cell>
              <table:table-cell office:value-type="float" office:value="0.009415761">
                <text:p>0.009415761</text:p>
              </table:table-cell>
            </table:table-row>
            <table:table-row>
              <table:table-cell office:value-type="string">
                <text:p>2836</text:p>
              </table:table-cell>
              <table:table-cell office:value-type="float" office:value="647.267944335938">
                <text:p>647.267944335938</text:p>
              </table:table-cell>
              <table:table-cell office:value-type="float" office:value="0.008882134">
                <text:p>0.008882134</text:p>
              </table:table-cell>
            </table:table-row>
            <table:table-row>
              <table:table-cell office:value-type="string">
                <text:p>2837</text:p>
              </table:table-cell>
              <table:table-cell office:value-type="float" office:value="647.387573242188">
                <text:p>647.387573242188</text:p>
              </table:table-cell>
              <table:table-cell office:value-type="float" office:value="0.01556019">
                <text:p>0.01556019</text:p>
              </table:table-cell>
            </table:table-row>
            <table:table-row>
              <table:table-cell office:value-type="string">
                <text:p>2838</text:p>
              </table:table-cell>
              <table:table-cell office:value-type="float" office:value="647.507202148438">
                <text:p>647.507202148438</text:p>
              </table:table-cell>
              <table:table-cell office:value-type="float" office:value="0.008721806">
                <text:p>0.008721806</text:p>
              </table:table-cell>
            </table:table-row>
            <table:table-row>
              <table:table-cell office:value-type="string">
                <text:p>2839</text:p>
              </table:table-cell>
              <table:table-cell office:value-type="float" office:value="647.626831054688">
                <text:p>647.626831054688</text:p>
              </table:table-cell>
              <table:table-cell office:value-type="float" office:value="0.01334448">
                <text:p>0.01334448</text:p>
              </table:table-cell>
            </table:table-row>
            <table:table-row>
              <table:table-cell office:value-type="string">
                <text:p>2840</text:p>
              </table:table-cell>
              <table:table-cell office:value-type="float" office:value="647.746520996094">
                <text:p>647.746520996094</text:p>
              </table:table-cell>
              <table:table-cell office:value-type="float" office:value="0.03405957">
                <text:p>0.03405957</text:p>
              </table:table-cell>
            </table:table-row>
            <table:table-row>
              <table:table-cell office:value-type="string">
                <text:p>2841</text:p>
              </table:table-cell>
              <table:table-cell office:value-type="float" office:value="647.866149902344">
                <text:p>647.866149902344</text:p>
              </table:table-cell>
              <table:table-cell office:value-type="float" office:value="0.00541277">
                <text:p>0.00541277</text:p>
              </table:table-cell>
            </table:table-row>
            <table:table-row>
              <table:table-cell office:value-type="string">
                <text:p>2842</text:p>
              </table:table-cell>
              <table:table-cell office:value-type="float" office:value="647.985778808594">
                <text:p>647.985778808594</text:p>
              </table:table-cell>
              <table:table-cell office:value-type="float" office:value="0.03162937">
                <text:p>0.03162937</text:p>
              </table:table-cell>
            </table:table-row>
            <table:table-row>
              <table:table-cell office:value-type="string">
                <text:p>2843</text:p>
              </table:table-cell>
              <table:table-cell office:value-type="float" office:value="648.10546875">
                <text:p>648.10546875</text:p>
              </table:table-cell>
              <table:table-cell office:value-type="float" office:value="0.003589959">
                <text:p>0.003589959</text:p>
              </table:table-cell>
            </table:table-row>
            <table:table-row>
              <table:table-cell office:value-type="string">
                <text:p>2844</text:p>
              </table:table-cell>
              <table:table-cell office:value-type="float" office:value="648.22509765625">
                <text:p>648.22509765625</text:p>
              </table:table-cell>
              <table:table-cell office:value-type="float" office:value="0.02866096">
                <text:p>0.02866096</text:p>
              </table:table-cell>
            </table:table-row>
            <table:table-row>
              <table:table-cell office:value-type="string">
                <text:p>2845</text:p>
              </table:table-cell>
              <table:table-cell office:value-type="float" office:value="648.344787597656">
                <text:p>648.344787597656</text:p>
              </table:table-cell>
              <table:table-cell office:value-type="float" office:value="0.01823479">
                <text:p>0.01823479</text:p>
              </table:table-cell>
            </table:table-row>
            <table:table-row>
              <table:table-cell office:value-type="string">
                <text:p>2846</text:p>
              </table:table-cell>
              <table:table-cell office:value-type="float" office:value="648.464416503906">
                <text:p>648.464416503906</text:p>
              </table:table-cell>
              <table:table-cell office:value-type="float" office:value="0.009603359">
                <text:p>0.009603359</text:p>
              </table:table-cell>
            </table:table-row>
            <table:table-row>
              <table:table-cell office:value-type="string">
                <text:p>2847</text:p>
              </table:table-cell>
              <table:table-cell office:value-type="float" office:value="648.584106445313">
                <text:p>648.584106445313</text:p>
              </table:table-cell>
              <table:table-cell office:value-type="float" office:value="0.01276145">
                <text:p>0.01276145</text:p>
              </table:table-cell>
            </table:table-row>
            <table:table-row>
              <table:table-cell office:value-type="string">
                <text:p>2848</text:p>
              </table:table-cell>
              <table:table-cell office:value-type="float" office:value="648.703735351563">
                <text:p>648.703735351563</text:p>
              </table:table-cell>
              <table:table-cell office:value-type="float" office:value="0.01046107">
                <text:p>0.01046107</text:p>
              </table:table-cell>
            </table:table-row>
            <table:table-row>
              <table:table-cell office:value-type="string">
                <text:p>2849</text:p>
              </table:table-cell>
              <table:table-cell office:value-type="float" office:value="648.823425292969">
                <text:p>648.823425292969</text:p>
              </table:table-cell>
              <table:table-cell office:value-type="float" office:value="0.001263538">
                <text:p>0.001263538</text:p>
              </table:table-cell>
            </table:table-row>
            <table:table-row>
              <table:table-cell office:value-type="string">
                <text:p>2850</text:p>
              </table:table-cell>
              <table:table-cell office:value-type="float" office:value="648.943054199219">
                <text:p>648.943054199219</text:p>
              </table:table-cell>
              <table:table-cell office:value-type="float" office:value="0.006272221">
                <text:p>0.006272221</text:p>
              </table:table-cell>
            </table:table-row>
            <table:table-row>
              <table:table-cell office:value-type="string">
                <text:p>2851</text:p>
              </table:table-cell>
              <table:table-cell office:value-type="float" office:value="649.062744140625">
                <text:p>649.062744140625</text:p>
              </table:table-cell>
              <table:table-cell office:value-type="float" office:value="0.009462691">
                <text:p>0.009462691</text:p>
              </table:table-cell>
            </table:table-row>
            <table:table-row>
              <table:table-cell office:value-type="string">
                <text:p>2852</text:p>
              </table:table-cell>
              <table:table-cell office:value-type="float" office:value="649.182434082031">
                <text:p>649.182434082031</text:p>
              </table:table-cell>
              <table:table-cell office:value-type="float" office:value="0.01108488">
                <text:p>0.01108488</text:p>
              </table:table-cell>
            </table:table-row>
            <table:table-row>
              <table:table-cell office:value-type="string">
                <text:p>2853</text:p>
              </table:table-cell>
              <table:table-cell office:value-type="float" office:value="649.302062988281">
                <text:p>649.302062988281</text:p>
              </table:table-cell>
              <table:table-cell office:value-type="float" office:value="0.01530596">
                <text:p>0.01530596</text:p>
              </table:table-cell>
            </table:table-row>
            <table:table-row>
              <table:table-cell office:value-type="string">
                <text:p>2854</text:p>
              </table:table-cell>
              <table:table-cell office:value-type="float" office:value="649.421752929688">
                <text:p>649.421752929688</text:p>
              </table:table-cell>
              <table:table-cell office:value-type="float" office:value="0.003553063">
                <text:p>0.003553063</text:p>
              </table:table-cell>
            </table:table-row>
            <table:table-row>
              <table:table-cell office:value-type="string">
                <text:p>2855</text:p>
              </table:table-cell>
              <table:table-cell office:value-type="float" office:value="649.541442871094">
                <text:p>649.541442871094</text:p>
              </table:table-cell>
              <table:table-cell office:value-type="float" office:value="0.008208418">
                <text:p>0.008208418</text:p>
              </table:table-cell>
            </table:table-row>
            <table:table-row>
              <table:table-cell office:value-type="string">
                <text:p>2856</text:p>
              </table:table-cell>
              <table:table-cell office:value-type="float" office:value="649.661071777344">
                <text:p>649.661071777344</text:p>
              </table:table-cell>
              <table:table-cell office:value-type="float" office:value="0.02646182">
                <text:p>0.02646182</text:p>
              </table:table-cell>
            </table:table-row>
            <table:table-row>
              <table:table-cell office:value-type="string">
                <text:p>2857</text:p>
              </table:table-cell>
              <table:table-cell office:value-type="float" office:value="649.78076171875">
                <text:p>649.78076171875</text:p>
              </table:table-cell>
              <table:table-cell office:value-type="float" office:value="0.0133843">
                <text:p>0.0133843</text:p>
              </table:table-cell>
            </table:table-row>
            <table:table-row>
              <table:table-cell office:value-type="string">
                <text:p>2858</text:p>
              </table:table-cell>
              <table:table-cell office:value-type="float" office:value="649.900451660156">
                <text:p>649.900451660156</text:p>
              </table:table-cell>
              <table:table-cell office:value-type="float" office:value="0.01414921">
                <text:p>0.01414921</text:p>
              </table:table-cell>
            </table:table-row>
            <table:table-row>
              <table:table-cell office:value-type="string">
                <text:p>2859</text:p>
              </table:table-cell>
              <table:table-cell office:value-type="float" office:value="650.020141601563">
                <text:p>650.020141601563</text:p>
              </table:table-cell>
              <table:table-cell office:value-type="float" office:value="0.005551107">
                <text:p>0.005551107</text:p>
              </table:table-cell>
            </table:table-row>
            <table:table-row>
              <table:table-cell office:value-type="string">
                <text:p>2860</text:p>
              </table:table-cell>
              <table:table-cell office:value-type="float" office:value="650.139770507813">
                <text:p>650.139770507813</text:p>
              </table:table-cell>
              <table:table-cell office:value-type="float" office:value="0.002202006">
                <text:p>0.002202006</text:p>
              </table:table-cell>
            </table:table-row>
            <table:table-row>
              <table:table-cell office:value-type="string">
                <text:p>2861</text:p>
              </table:table-cell>
              <table:table-cell office:value-type="float" office:value="650.259460449219">
                <text:p>650.259460449219</text:p>
              </table:table-cell>
              <table:table-cell office:value-type="float" office:value="0.004069135">
                <text:p>0.004069135</text:p>
              </table:table-cell>
            </table:table-row>
            <table:table-row>
              <table:table-cell office:value-type="string">
                <text:p>2862</text:p>
              </table:table-cell>
              <table:table-cell office:value-type="float" office:value="650.379150390625">
                <text:p>650.379150390625</text:p>
              </table:table-cell>
              <table:table-cell office:value-type="float" office:value="0.008802599">
                <text:p>0.008802599</text:p>
              </table:table-cell>
            </table:table-row>
            <table:table-row>
              <table:table-cell office:value-type="string">
                <text:p>2863</text:p>
              </table:table-cell>
              <table:table-cell office:value-type="float" office:value="650.498840332031">
                <text:p>650.498840332031</text:p>
              </table:table-cell>
              <table:table-cell office:value-type="float" office:value="0.005725478">
                <text:p>0.005725478</text:p>
              </table:table-cell>
            </table:table-row>
            <table:table-row>
              <table:table-cell office:value-type="string">
                <text:p>2864</text:p>
              </table:table-cell>
              <table:table-cell office:value-type="float" office:value="650.618530273438">
                <text:p>650.618530273438</text:p>
              </table:table-cell>
              <table:table-cell office:value-type="float" office:value="0.01271717">
                <text:p>0.01271717</text:p>
              </table:table-cell>
            </table:table-row>
            <table:table-row>
              <table:table-cell office:value-type="string">
                <text:p>2865</text:p>
              </table:table-cell>
              <table:table-cell office:value-type="float" office:value="650.738220214844">
                <text:p>650.738220214844</text:p>
              </table:table-cell>
              <table:table-cell office:value-type="float" office:value="0.006778624">
                <text:p>0.006778624</text:p>
              </table:table-cell>
            </table:table-row>
            <table:table-row>
              <table:table-cell office:value-type="string">
                <text:p>2866</text:p>
              </table:table-cell>
              <table:table-cell office:value-type="float" office:value="650.85791015625">
                <text:p>650.85791015625</text:p>
              </table:table-cell>
              <table:table-cell office:value-type="float" office:value="0.01481309">
                <text:p>0.01481309</text:p>
              </table:table-cell>
            </table:table-row>
            <table:table-row>
              <table:table-cell office:value-type="string">
                <text:p>2867</text:p>
              </table:table-cell>
              <table:table-cell office:value-type="float" office:value="650.977600097656">
                <text:p>650.977600097656</text:p>
              </table:table-cell>
              <table:table-cell office:value-type="float" office:value="0.01617921">
                <text:p>0.01617921</text:p>
              </table:table-cell>
            </table:table-row>
            <table:table-row>
              <table:table-cell office:value-type="string">
                <text:p>2868</text:p>
              </table:table-cell>
              <table:table-cell office:value-type="float" office:value="651.097290039063">
                <text:p>651.097290039063</text:p>
              </table:table-cell>
              <table:table-cell office:value-type="float" office:value="0.009922319">
                <text:p>0.009922319</text:p>
              </table:table-cell>
            </table:table-row>
            <table:table-row>
              <table:table-cell office:value-type="string">
                <text:p>2869</text:p>
              </table:table-cell>
              <table:table-cell office:value-type="float" office:value="651.216979980469">
                <text:p>651.216979980469</text:p>
              </table:table-cell>
              <table:table-cell office:value-type="float" office:value="0.01866562">
                <text:p>0.01866562</text:p>
              </table:table-cell>
            </table:table-row>
            <table:table-row>
              <table:table-cell office:value-type="string">
                <text:p>2870</text:p>
              </table:table-cell>
              <table:table-cell office:value-type="float" office:value="651.336669921875">
                <text:p>651.336669921875</text:p>
              </table:table-cell>
              <table:table-cell office:value-type="float" office:value="0.009365151">
                <text:p>0.009365151</text:p>
              </table:table-cell>
            </table:table-row>
            <table:table-row>
              <table:table-cell office:value-type="string">
                <text:p>2871</text:p>
              </table:table-cell>
              <table:table-cell office:value-type="float" office:value="651.456359863281">
                <text:p>651.456359863281</text:p>
              </table:table-cell>
              <table:table-cell office:value-type="float" office:value="0.008939601">
                <text:p>0.008939601</text:p>
              </table:table-cell>
            </table:table-row>
            <table:table-row>
              <table:table-cell office:value-type="string">
                <text:p>2872</text:p>
              </table:table-cell>
              <table:table-cell office:value-type="float" office:value="651.576049804688">
                <text:p>651.576049804688</text:p>
              </table:table-cell>
              <table:table-cell office:value-type="float" office:value="0.00678005">
                <text:p>0.00678005</text:p>
              </table:table-cell>
            </table:table-row>
            <table:table-row>
              <table:table-cell office:value-type="string">
                <text:p>2873</text:p>
              </table:table-cell>
              <table:table-cell office:value-type="float" office:value="651.695739746094">
                <text:p>651.695739746094</text:p>
              </table:table-cell>
              <table:table-cell office:value-type="float" office:value="0.01501196">
                <text:p>0.01501196</text:p>
              </table:table-cell>
            </table:table-row>
            <table:table-row>
              <table:table-cell office:value-type="string">
                <text:p>2874</text:p>
              </table:table-cell>
              <table:table-cell office:value-type="float" office:value="651.8154296875">
                <text:p>651.8154296875</text:p>
              </table:table-cell>
              <table:table-cell office:value-type="float" office:value="0.008051045">
                <text:p>0.008051045</text:p>
              </table:table-cell>
            </table:table-row>
            <table:table-row>
              <table:table-cell office:value-type="string">
                <text:p>2875</text:p>
              </table:table-cell>
              <table:table-cell office:value-type="float" office:value="651.935180664063">
                <text:p>651.935180664063</text:p>
              </table:table-cell>
              <table:table-cell office:value-type="float" office:value="0.003506976">
                <text:p>0.003506976</text:p>
              </table:table-cell>
            </table:table-row>
            <table:table-row>
              <table:table-cell office:value-type="string">
                <text:p>2876</text:p>
              </table:table-cell>
              <table:table-cell office:value-type="float" office:value="652.054870605469">
                <text:p>652.054870605469</text:p>
              </table:table-cell>
              <table:table-cell office:value-type="float" office:value="0.01139641">
                <text:p>0.01139641</text:p>
              </table:table-cell>
            </table:table-row>
            <table:table-row>
              <table:table-cell office:value-type="string">
                <text:p>2877</text:p>
              </table:table-cell>
              <table:table-cell office:value-type="float" office:value="652.174560546875">
                <text:p>652.174560546875</text:p>
              </table:table-cell>
              <table:table-cell office:value-type="float" office:value="0.005320783">
                <text:p>0.005320783</text:p>
              </table:table-cell>
            </table:table-row>
            <table:table-row>
              <table:table-cell office:value-type="string">
                <text:p>2878</text:p>
              </table:table-cell>
              <table:table-cell office:value-type="float" office:value="652.294250488281">
                <text:p>652.294250488281</text:p>
              </table:table-cell>
              <table:table-cell office:value-type="float" office:value="0.006459804">
                <text:p>0.006459804</text:p>
              </table:table-cell>
            </table:table-row>
            <table:table-row>
              <table:table-cell office:value-type="string">
                <text:p>2879</text:p>
              </table:table-cell>
              <table:table-cell office:value-type="float" office:value="652.414001464844">
                <text:p>652.414001464844</text:p>
              </table:table-cell>
              <table:table-cell office:value-type="float" office:value="0.01148876">
                <text:p>0.01148876</text:p>
              </table:table-cell>
            </table:table-row>
            <table:table-row>
              <table:table-cell office:value-type="string">
                <text:p>2880</text:p>
              </table:table-cell>
              <table:table-cell office:value-type="float" office:value="652.53369140625">
                <text:p>652.53369140625</text:p>
              </table:table-cell>
              <table:table-cell office:value-type="float" office:value="0.002280146">
                <text:p>0.002280146</text:p>
              </table:table-cell>
            </table:table-row>
            <table:table-row>
              <table:table-cell office:value-type="string">
                <text:p>2881</text:p>
              </table:table-cell>
              <table:table-cell office:value-type="float" office:value="652.653381347656">
                <text:p>652.653381347656</text:p>
              </table:table-cell>
              <table:table-cell office:value-type="float" office:value="0.008255884">
                <text:p>0.008255884</text:p>
              </table:table-cell>
            </table:table-row>
            <table:table-row>
              <table:table-cell office:value-type="string">
                <text:p>2882</text:p>
              </table:table-cell>
              <table:table-cell office:value-type="float" office:value="652.773071289063">
                <text:p>652.773071289063</text:p>
              </table:table-cell>
              <table:table-cell office:value-type="float" office:value="0.001364072">
                <text:p>0.001364072</text:p>
              </table:table-cell>
            </table:table-row>
            <table:table-row>
              <table:table-cell office:value-type="string">
                <text:p>2883</text:p>
              </table:table-cell>
              <table:table-cell office:value-type="float" office:value="652.892822265625">
                <text:p>652.892822265625</text:p>
              </table:table-cell>
              <table:table-cell office:value-type="float" office:value="0.01270351">
                <text:p>0.01270351</text:p>
              </table:table-cell>
            </table:table-row>
            <table:table-row>
              <table:table-cell office:value-type="string">
                <text:p>2884</text:p>
              </table:table-cell>
              <table:table-cell office:value-type="float" office:value="653.012512207031">
                <text:p>653.012512207031</text:p>
              </table:table-cell>
              <table:table-cell office:value-type="float" office:value="0.004026807">
                <text:p>0.004026807</text:p>
              </table:table-cell>
            </table:table-row>
            <table:table-row>
              <table:table-cell office:value-type="string">
                <text:p>2885</text:p>
              </table:table-cell>
              <table:table-cell office:value-type="float" office:value="653.132263183594">
                <text:p>653.132263183594</text:p>
              </table:table-cell>
              <table:table-cell office:value-type="float" office:value="0.01067777">
                <text:p>0.01067777</text:p>
              </table:table-cell>
            </table:table-row>
            <table:table-row>
              <table:table-cell office:value-type="string">
                <text:p>2886</text:p>
              </table:table-cell>
              <table:table-cell office:value-type="float" office:value="653.251953125">
                <text:p>653.251953125</text:p>
              </table:table-cell>
              <table:table-cell office:value-type="float" office:value="0.003373145">
                <text:p>0.003373145</text:p>
              </table:table-cell>
            </table:table-row>
            <table:table-row>
              <table:table-cell office:value-type="string">
                <text:p>2887</text:p>
              </table:table-cell>
              <table:table-cell office:value-type="float" office:value="653.371704101563">
                <text:p>653.371704101563</text:p>
              </table:table-cell>
              <table:table-cell office:value-type="float" office:value="0.01148955">
                <text:p>0.01148955</text:p>
              </table:table-cell>
            </table:table-row>
            <table:table-row>
              <table:table-cell office:value-type="string">
                <text:p>2888</text:p>
              </table:table-cell>
              <table:table-cell office:value-type="float" office:value="653.491394042969">
                <text:p>653.491394042969</text:p>
              </table:table-cell>
              <table:table-cell office:value-type="float" office:value="0.02459685">
                <text:p>0.02459685</text:p>
              </table:table-cell>
            </table:table-row>
            <table:table-row>
              <table:table-cell office:value-type="string">
                <text:p>2889</text:p>
              </table:table-cell>
              <table:table-cell office:value-type="float" office:value="653.611145019531">
                <text:p>653.611145019531</text:p>
              </table:table-cell>
              <table:table-cell office:value-type="float" office:value="0.01243724">
                <text:p>0.01243724</text:p>
              </table:table-cell>
            </table:table-row>
            <table:table-row>
              <table:table-cell office:value-type="string">
                <text:p>2890</text:p>
              </table:table-cell>
              <table:table-cell office:value-type="float" office:value="653.730834960938">
                <text:p>653.730834960938</text:p>
              </table:table-cell>
              <table:table-cell office:value-type="float" office:value="0.0277903">
                <text:p>0.0277903</text:p>
              </table:table-cell>
            </table:table-row>
            <table:table-row>
              <table:table-cell office:value-type="string">
                <text:p>2891</text:p>
              </table:table-cell>
              <table:table-cell office:value-type="float" office:value="653.8505859375">
                <text:p>653.8505859375</text:p>
              </table:table-cell>
              <table:table-cell office:value-type="float" office:value="0.01122942">
                <text:p>0.01122942</text:p>
              </table:table-cell>
            </table:table-row>
            <table:table-row>
              <table:table-cell office:value-type="string">
                <text:p>2892</text:p>
              </table:table-cell>
              <table:table-cell office:value-type="float" office:value="653.970275878906">
                <text:p>653.970275878906</text:p>
              </table:table-cell>
              <table:table-cell office:value-type="float" office:value="0.02277788">
                <text:p>0.02277788</text:p>
              </table:table-cell>
            </table:table-row>
            <table:table-row>
              <table:table-cell office:value-type="string">
                <text:p>2893</text:p>
              </table:table-cell>
              <table:table-cell office:value-type="float" office:value="654.090026855469">
                <text:p>654.090026855469</text:p>
              </table:table-cell>
              <table:table-cell office:value-type="float" office:value="0.001930629">
                <text:p>0.001930629</text:p>
              </table:table-cell>
            </table:table-row>
            <table:table-row>
              <table:table-cell office:value-type="string">
                <text:p>2894</text:p>
              </table:table-cell>
              <table:table-cell office:value-type="float" office:value="654.209716796875">
                <text:p>654.209716796875</text:p>
              </table:table-cell>
              <table:table-cell office:value-type="float" office:value="0.002900729">
                <text:p>0.002900729</text:p>
              </table:table-cell>
            </table:table-row>
            <table:table-row>
              <table:table-cell office:value-type="string">
                <text:p>2895</text:p>
              </table:table-cell>
              <table:table-cell office:value-type="float" office:value="654.329467773438">
                <text:p>654.329467773438</text:p>
              </table:table-cell>
              <table:table-cell office:value-type="float" office:value="-0.002912702">
                <text:p>-0.002912702</text:p>
              </table:table-cell>
            </table:table-row>
            <table:table-row>
              <table:table-cell office:value-type="string">
                <text:p>2896</text:p>
              </table:table-cell>
              <table:table-cell office:value-type="float" office:value="654.44921875">
                <text:p>654.44921875</text:p>
              </table:table-cell>
              <table:table-cell office:value-type="float" office:value="0.01555886">
                <text:p>0.01555886</text:p>
              </table:table-cell>
            </table:table-row>
            <table:table-row>
              <table:table-cell office:value-type="string">
                <text:p>2897</text:p>
              </table:table-cell>
              <table:table-cell office:value-type="float" office:value="654.568969726563">
                <text:p>654.568969726563</text:p>
              </table:table-cell>
              <table:table-cell office:value-type="float" office:value="0.003877038">
                <text:p>0.003877038</text:p>
              </table:table-cell>
            </table:table-row>
            <table:table-row>
              <table:table-cell office:value-type="string">
                <text:p>2898</text:p>
              </table:table-cell>
              <table:table-cell office:value-type="float" office:value="654.688659667969">
                <text:p>654.688659667969</text:p>
              </table:table-cell>
              <table:table-cell office:value-type="float" office:value="0.01157518">
                <text:p>0.01157518</text:p>
              </table:table-cell>
            </table:table-row>
            <table:table-row>
              <table:table-cell office:value-type="string">
                <text:p>2899</text:p>
              </table:table-cell>
              <table:table-cell office:value-type="float" office:value="654.808410644531">
                <text:p>654.808410644531</text:p>
              </table:table-cell>
              <table:table-cell office:value-type="float" office:value="0.006623632">
                <text:p>0.006623632</text:p>
              </table:table-cell>
            </table:table-row>
            <table:table-row>
              <table:table-cell office:value-type="string">
                <text:p>2900</text:p>
              </table:table-cell>
              <table:table-cell office:value-type="float" office:value="654.928161621094">
                <text:p>654.928161621094</text:p>
              </table:table-cell>
              <table:table-cell office:value-type="float" office:value="0.006500551">
                <text:p>0.006500551</text:p>
              </table:table-cell>
            </table:table-row>
            <table:table-row>
              <table:table-cell office:value-type="string">
                <text:p>2901</text:p>
              </table:table-cell>
              <table:table-cell office:value-type="float" office:value="655.047912597656">
                <text:p>655.047912597656</text:p>
              </table:table-cell>
              <table:table-cell office:value-type="float" office:value="0.02221763">
                <text:p>0.02221763</text:p>
              </table:table-cell>
            </table:table-row>
            <table:table-row>
              <table:table-cell office:value-type="string">
                <text:p>2902</text:p>
              </table:table-cell>
              <table:table-cell office:value-type="float" office:value="655.167602539063">
                <text:p>655.167602539063</text:p>
              </table:table-cell>
              <table:table-cell office:value-type="float" office:value="0.005590382">
                <text:p>0.005590382</text:p>
              </table:table-cell>
            </table:table-row>
            <table:table-row>
              <table:table-cell office:value-type="string">
                <text:p>2903</text:p>
              </table:table-cell>
              <table:table-cell office:value-type="float" office:value="655.287353515625">
                <text:p>655.287353515625</text:p>
              </table:table-cell>
              <table:table-cell office:value-type="float" office:value="0.01445286">
                <text:p>0.01445286</text:p>
              </table:table-cell>
            </table:table-row>
            <table:table-row>
              <table:table-cell office:value-type="string">
                <text:p>2904</text:p>
              </table:table-cell>
              <table:table-cell office:value-type="float" office:value="655.407104492188">
                <text:p>655.407104492188</text:p>
              </table:table-cell>
              <table:table-cell office:value-type="float" office:value="-0.0007637039">
                <text:p>-0.0007637039</text:p>
              </table:table-cell>
            </table:table-row>
            <table:table-row>
              <table:table-cell office:value-type="string">
                <text:p>2905</text:p>
              </table:table-cell>
              <table:table-cell office:value-type="float" office:value="655.52685546875">
                <text:p>655.52685546875</text:p>
              </table:table-cell>
              <table:table-cell office:value-type="float" office:value="0.007283968">
                <text:p>0.007283968</text:p>
              </table:table-cell>
            </table:table-row>
            <table:table-row>
              <table:table-cell office:value-type="string">
                <text:p>2906</text:p>
              </table:table-cell>
              <table:table-cell office:value-type="float" office:value="655.646606445313">
                <text:p>655.646606445313</text:p>
              </table:table-cell>
              <table:table-cell office:value-type="float" office:value="-0.001927682">
                <text:p>-0.001927682</text:p>
              </table:table-cell>
            </table:table-row>
            <table:table-row>
              <table:table-cell office:value-type="string">
                <text:p>2907</text:p>
              </table:table-cell>
              <table:table-cell office:value-type="float" office:value="655.766357421875">
                <text:p>655.766357421875</text:p>
              </table:table-cell>
              <table:table-cell office:value-type="float" office:value="0.007243987">
                <text:p>0.007243987</text:p>
              </table:table-cell>
            </table:table-row>
            <table:table-row>
              <table:table-cell office:value-type="string">
                <text:p>2908</text:p>
              </table:table-cell>
              <table:table-cell office:value-type="float" office:value="655.886108398438">
                <text:p>655.8861083984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9</text:p>
              </table:table-cell>
              <table:table-cell office:value-type="float" office:value="656.005859375">
                <text:p>656.005859375</text:p>
              </table:table-cell>
              <table:table-cell office:value-type="float" office:value="-0.002180574">
                <text:p>-0.002180574</text:p>
              </table:table-cell>
            </table:table-row>
            <table:table-row>
              <table:table-cell office:value-type="string">
                <text:p>2910</text:p>
              </table:table-cell>
              <table:table-cell office:value-type="float" office:value="656.125610351563">
                <text:p>656.125610351563</text:p>
              </table:table-cell>
              <table:table-cell office:value-type="float" office:value="0.009262347">
                <text:p>0.009262347</text:p>
              </table:table-cell>
            </table:table-row>
            <table:table-row>
              <table:table-cell office:value-type="string">
                <text:p>2911</text:p>
              </table:table-cell>
              <table:table-cell office:value-type="float" office:value="656.245361328125">
                <text:p>656.245361328125</text:p>
              </table:table-cell>
              <table:table-cell office:value-type="float" office:value="0.004636849">
                <text:p>0.004636849</text:p>
              </table:table-cell>
            </table:table-row>
            <table:table-row>
              <table:table-cell office:value-type="string">
                <text:p>2912</text:p>
              </table:table-cell>
              <table:table-cell office:value-type="float" office:value="656.365112304688">
                <text:p>656.365112304688</text:p>
              </table:table-cell>
              <table:table-cell office:value-type="float" office:value="0.02176062">
                <text:p>0.02176062</text:p>
              </table:table-cell>
            </table:table-row>
            <table:table-row>
              <table:table-cell office:value-type="string">
                <text:p>2913</text:p>
              </table:table-cell>
              <table:table-cell office:value-type="float" office:value="656.48486328125">
                <text:p>656.48486328125</text:p>
              </table:table-cell>
              <table:table-cell office:value-type="float" office:value="0.005302597">
                <text:p>0.005302597</text:p>
              </table:table-cell>
            </table:table-row>
            <table:table-row>
              <table:table-cell office:value-type="string">
                <text:p>2914</text:p>
              </table:table-cell>
              <table:table-cell office:value-type="float" office:value="656.604614257813">
                <text:p>656.604614257813</text:p>
              </table:table-cell>
              <table:table-cell office:value-type="float" office:value="0.008691884">
                <text:p>0.008691884</text:p>
              </table:table-cell>
            </table:table-row>
            <table:table-row>
              <table:table-cell office:value-type="string">
                <text:p>2915</text:p>
              </table:table-cell>
              <table:table-cell office:value-type="float" office:value="656.724365234375">
                <text:p>656.724365234375</text:p>
              </table:table-cell>
              <table:table-cell office:value-type="float" office:value="0.02294194">
                <text:p>0.02294194</text:p>
              </table:table-cell>
            </table:table-row>
            <table:table-row>
              <table:table-cell office:value-type="string">
                <text:p>2916</text:p>
              </table:table-cell>
              <table:table-cell office:value-type="float" office:value="656.844116210938">
                <text:p>656.844116210938</text:p>
              </table:table-cell>
              <table:table-cell office:value-type="float" office:value="0.007512545">
                <text:p>0.007512545</text:p>
              </table:table-cell>
            </table:table-row>
            <table:table-row>
              <table:table-cell office:value-type="string">
                <text:p>2917</text:p>
              </table:table-cell>
              <table:table-cell office:value-type="float" office:value="656.9638671875">
                <text:p>656.9638671875</text:p>
              </table:table-cell>
              <table:table-cell office:value-type="float" office:value="0.005017269">
                <text:p>0.005017269</text:p>
              </table:table-cell>
            </table:table-row>
            <table:table-row>
              <table:table-cell office:value-type="string">
                <text:p>2918</text:p>
              </table:table-cell>
              <table:table-cell office:value-type="float" office:value="657.083679199219">
                <text:p>657.083679199219</text:p>
              </table:table-cell>
              <table:table-cell office:value-type="float" office:value="0.009760964">
                <text:p>0.009760964</text:p>
              </table:table-cell>
            </table:table-row>
            <table:table-row>
              <table:table-cell office:value-type="string">
                <text:p>2919</text:p>
              </table:table-cell>
              <table:table-cell office:value-type="float" office:value="657.203430175781">
                <text:p>657.203430175781</text:p>
              </table:table-cell>
              <table:table-cell office:value-type="float" office:value="0.002764681">
                <text:p>0.002764681</text:p>
              </table:table-cell>
            </table:table-row>
            <table:table-row>
              <table:table-cell office:value-type="string">
                <text:p>2920</text:p>
              </table:table-cell>
              <table:table-cell office:value-type="float" office:value="657.323181152344">
                <text:p>657.323181152344</text:p>
              </table:table-cell>
              <table:table-cell office:value-type="float" office:value="0.01972405">
                <text:p>0.01972405</text:p>
              </table:table-cell>
            </table:table-row>
            <table:table-row>
              <table:table-cell office:value-type="string">
                <text:p>2921</text:p>
              </table:table-cell>
              <table:table-cell office:value-type="float" office:value="657.442932128906">
                <text:p>657.442932128906</text:p>
              </table:table-cell>
              <table:table-cell office:value-type="float" office:value="0.01413029">
                <text:p>0.01413029</text:p>
              </table:table-cell>
            </table:table-row>
            <table:table-row>
              <table:table-cell office:value-type="string">
                <text:p>2922</text:p>
              </table:table-cell>
              <table:table-cell office:value-type="float" office:value="657.562744140625">
                <text:p>657.562744140625</text:p>
              </table:table-cell>
              <table:table-cell office:value-type="float" office:value="0.01079757">
                <text:p>0.01079757</text:p>
              </table:table-cell>
            </table:table-row>
            <table:table-row>
              <table:table-cell office:value-type="string">
                <text:p>2923</text:p>
              </table:table-cell>
              <table:table-cell office:value-type="float" office:value="657.682495117188">
                <text:p>657.682495117188</text:p>
              </table:table-cell>
              <table:table-cell office:value-type="float" office:value="0.01931846">
                <text:p>0.01931846</text:p>
              </table:table-cell>
            </table:table-row>
            <table:table-row>
              <table:table-cell office:value-type="string">
                <text:p>2924</text:p>
              </table:table-cell>
              <table:table-cell office:value-type="float" office:value="657.80224609375">
                <text:p>657.80224609375</text:p>
              </table:table-cell>
              <table:table-cell office:value-type="float" office:value="0.01375982">
                <text:p>0.01375982</text:p>
              </table:table-cell>
            </table:table-row>
            <table:table-row>
              <table:table-cell office:value-type="string">
                <text:p>2925</text:p>
              </table:table-cell>
              <table:table-cell office:value-type="float" office:value="657.921997070313">
                <text:p>657.921997070313</text:p>
              </table:table-cell>
              <table:table-cell office:value-type="float" office:value="0.001573172">
                <text:p>0.001573172</text:p>
              </table:table-cell>
            </table:table-row>
            <table:table-row>
              <table:table-cell office:value-type="string">
                <text:p>2926</text:p>
              </table:table-cell>
              <table:table-cell office:value-type="float" office:value="658.041809082031">
                <text:p>658.041809082031</text:p>
              </table:table-cell>
              <table:table-cell office:value-type="float" office:value="0.002737466">
                <text:p>0.002737466</text:p>
              </table:table-cell>
            </table:table-row>
            <table:table-row>
              <table:table-cell office:value-type="string">
                <text:p>2927</text:p>
              </table:table-cell>
              <table:table-cell office:value-type="float" office:value="658.161560058594">
                <text:p>658.161560058594</text:p>
              </table:table-cell>
              <table:table-cell office:value-type="float" office:value="-0.001485215">
                <text:p>-0.001485215</text:p>
              </table:table-cell>
            </table:table-row>
            <table:table-row>
              <table:table-cell office:value-type="string">
                <text:p>2928</text:p>
              </table:table-cell>
              <table:table-cell office:value-type="float" office:value="658.281372070313">
                <text:p>658.281372070313</text:p>
              </table:table-cell>
              <table:table-cell office:value-type="float" office:value="0.01888507">
                <text:p>0.01888507</text:p>
              </table:table-cell>
            </table:table-row>
            <table:table-row>
              <table:table-cell office:value-type="string">
                <text:p>2929</text:p>
              </table:table-cell>
              <table:table-cell office:value-type="float" office:value="658.401123046875">
                <text:p>658.401123046875</text:p>
              </table:table-cell>
              <table:table-cell office:value-type="float" office:value="0.0331987">
                <text:p>0.0331987</text:p>
              </table:table-cell>
            </table:table-row>
            <table:table-row>
              <table:table-cell office:value-type="string">
                <text:p>2930</text:p>
              </table:table-cell>
              <table:table-cell office:value-type="float" office:value="658.520935058594">
                <text:p>658.520935058594</text:p>
              </table:table-cell>
              <table:table-cell office:value-type="float" office:value="0.00294624">
                <text:p>0.00294624</text:p>
              </table:table-cell>
            </table:table-row>
            <table:table-row>
              <table:table-cell office:value-type="string">
                <text:p>2931</text:p>
              </table:table-cell>
              <table:table-cell office:value-type="float" office:value="658.640686035156">
                <text:p>658.640686035156</text:p>
              </table:table-cell>
              <table:table-cell office:value-type="float" office:value="0.0008641123">
                <text:p>0.0008641123</text:p>
              </table:table-cell>
            </table:table-row>
            <table:table-row>
              <table:table-cell office:value-type="string">
                <text:p>2932</text:p>
              </table:table-cell>
              <table:table-cell office:value-type="float" office:value="658.760437011719">
                <text:p>658.760437011719</text:p>
              </table:table-cell>
              <table:table-cell office:value-type="float" office:value="0.005442338">
                <text:p>0.005442338</text:p>
              </table:table-cell>
            </table:table-row>
            <table:table-row>
              <table:table-cell office:value-type="string">
                <text:p>2933</text:p>
              </table:table-cell>
              <table:table-cell office:value-type="float" office:value="658.880249023438">
                <text:p>658.880249023438</text:p>
              </table:table-cell>
              <table:table-cell office:value-type="float" office:value="0.0008445584">
                <text:p>0.0008445584</text:p>
              </table:table-cell>
            </table:table-row>
            <table:table-row>
              <table:table-cell office:value-type="string">
                <text:p>2934</text:p>
              </table:table-cell>
              <table:table-cell office:value-type="float" office:value="659.000061035156">
                <text:p>659.000061035156</text:p>
              </table:table-cell>
              <table:table-cell office:value-type="float" office:value="0.002348008">
                <text:p>0.002348008</text:p>
              </table:table-cell>
            </table:table-row>
            <table:table-row>
              <table:table-cell office:value-type="string">
                <text:p>2935</text:p>
              </table:table-cell>
              <table:table-cell office:value-type="float" office:value="659.119812011719">
                <text:p>659.119812011719</text:p>
              </table:table-cell>
              <table:table-cell office:value-type="float" office:value="-0.0003270197">
                <text:p>-0.0003270197</text:p>
              </table:table-cell>
            </table:table-row>
            <table:table-row>
              <table:table-cell office:value-type="string">
                <text:p>2936</text:p>
              </table:table-cell>
              <table:table-cell office:value-type="float" office:value="659.239624023438">
                <text:p>659.239624023438</text:p>
              </table:table-cell>
              <table:table-cell office:value-type="float" office:value="0.0109247">
                <text:p>0.0109247</text:p>
              </table:table-cell>
            </table:table-row>
            <table:table-row>
              <table:table-cell office:value-type="string">
                <text:p>2937</text:p>
              </table:table-cell>
              <table:table-cell office:value-type="float" office:value="659.359375">
                <text:p>659.359375</text:p>
              </table:table-cell>
              <table:table-cell office:value-type="float" office:value="0.00879136">
                <text:p>0.00879136</text:p>
              </table:table-cell>
            </table:table-row>
            <table:table-row>
              <table:table-cell office:value-type="string">
                <text:p>2938</text:p>
              </table:table-cell>
              <table:table-cell office:value-type="float" office:value="659.479187011719">
                <text:p>659.479187011719</text:p>
              </table:table-cell>
              <table:table-cell office:value-type="float" office:value="0.006017691">
                <text:p>0.006017691</text:p>
              </table:table-cell>
            </table:table-row>
            <table:table-row>
              <table:table-cell office:value-type="string">
                <text:p>2939</text:p>
              </table:table-cell>
              <table:table-cell office:value-type="float" office:value="659.598999023438">
                <text:p>659.598999023438</text:p>
              </table:table-cell>
              <table:table-cell office:value-type="float" office:value="0.006885707">
                <text:p>0.006885707</text:p>
              </table:table-cell>
            </table:table-row>
            <table:table-row>
              <table:table-cell office:value-type="string">
                <text:p>2940</text:p>
              </table:table-cell>
              <table:table-cell office:value-type="float" office:value="659.71875">
                <text:p>659.71875</text:p>
              </table:table-cell>
              <table:table-cell office:value-type="float" office:value="0.008565065">
                <text:p>0.008565065</text:p>
              </table:table-cell>
            </table:table-row>
            <table:table-row>
              <table:table-cell office:value-type="string">
                <text:p>2941</text:p>
              </table:table-cell>
              <table:table-cell office:value-type="float" office:value="659.838562011719">
                <text:p>659.838562011719</text:p>
              </table:table-cell>
              <table:table-cell office:value-type="float" office:value="-0.0003689989">
                <text:p>-0.0003689989</text:p>
              </table:table-cell>
            </table:table-row>
            <table:table-row>
              <table:table-cell office:value-type="string">
                <text:p>2942</text:p>
              </table:table-cell>
              <table:table-cell office:value-type="float" office:value="659.958374023438">
                <text:p>659.958374023438</text:p>
              </table:table-cell>
              <table:table-cell office:value-type="float" office:value="0.002938776">
                <text:p>0.002938776</text:p>
              </table:table-cell>
            </table:table-row>
            <table:table-row>
              <table:table-cell office:value-type="string">
                <text:p>2943</text:p>
              </table:table-cell>
              <table:table-cell office:value-type="float" office:value="660.078125">
                <text:p>660.078125</text:p>
              </table:table-cell>
              <table:table-cell office:value-type="float" office:value="-0.002402501">
                <text:p>-0.002402501</text:p>
              </table:table-cell>
            </table:table-row>
            <table:table-row>
              <table:table-cell office:value-type="string">
                <text:p>2944</text:p>
              </table:table-cell>
              <table:table-cell office:value-type="float" office:value="660.197937011719">
                <text:p>660.197937011719</text:p>
              </table:table-cell>
              <table:table-cell office:value-type="float" office:value="0.01121699">
                <text:p>0.01121699</text:p>
              </table:table-cell>
            </table:table-row>
            <table:table-row>
              <table:table-cell office:value-type="string">
                <text:p>2945</text:p>
              </table:table-cell>
              <table:table-cell office:value-type="float" office:value="660.317749023438">
                <text:p>660.317749023438</text:p>
              </table:table-cell>
              <table:table-cell office:value-type="float" office:value="0.008309595">
                <text:p>0.008309595</text:p>
              </table:table-cell>
            </table:table-row>
            <table:table-row>
              <table:table-cell office:value-type="string">
                <text:p>2946</text:p>
              </table:table-cell>
              <table:table-cell office:value-type="float" office:value="660.437561035156">
                <text:p>660.437561035156</text:p>
              </table:table-cell>
              <table:table-cell office:value-type="float" office:value="0.01897284">
                <text:p>0.01897284</text:p>
              </table:table-cell>
            </table:table-row>
            <table:table-row>
              <table:table-cell office:value-type="string">
                <text:p>2947</text:p>
              </table:table-cell>
              <table:table-cell office:value-type="float" office:value="660.557373046875">
                <text:p>660.557373046875</text:p>
              </table:table-cell>
              <table:table-cell office:value-type="float" office:value="-0.004400309">
                <text:p>-0.004400309</text:p>
              </table:table-cell>
            </table:table-row>
            <table:table-row>
              <table:table-cell office:value-type="string">
                <text:p>2948</text:p>
              </table:table-cell>
              <table:table-cell office:value-type="float" office:value="660.677124023438">
                <text:p>660.6771240234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49</text:p>
              </table:table-cell>
              <table:table-cell office:value-type="float" office:value="660.796936035156">
                <text:p>660.796936035156</text:p>
              </table:table-cell>
              <table:table-cell office:value-type="float" office:value="0.005507776">
                <text:p>0.005507776</text:p>
              </table:table-cell>
            </table:table-row>
            <table:table-row>
              <table:table-cell office:value-type="string">
                <text:p>2950</text:p>
              </table:table-cell>
              <table:table-cell office:value-type="float" office:value="660.916748046875">
                <text:p>660.916748046875</text:p>
              </table:table-cell>
              <table:table-cell office:value-type="float" office:value="-0.002814697">
                <text:p>-0.002814697</text:p>
              </table:table-cell>
            </table:table-row>
            <table:table-row>
              <table:table-cell office:value-type="string">
                <text:p>2951</text:p>
              </table:table-cell>
              <table:table-cell office:value-type="float" office:value="661.036560058594">
                <text:p>661.036560058594</text:p>
              </table:table-cell>
              <table:table-cell office:value-type="float" office:value="0.009099719">
                <text:p>0.009099719</text:p>
              </table:table-cell>
            </table:table-row>
            <table:table-row>
              <table:table-cell office:value-type="string">
                <text:p>2952</text:p>
              </table:table-cell>
              <table:table-cell office:value-type="float" office:value="661.156372070313">
                <text:p>661.156372070313</text:p>
              </table:table-cell>
              <table:table-cell office:value-type="float" office:value="0.0102937">
                <text:p>0.0102937</text:p>
              </table:table-cell>
            </table:table-row>
            <table:table-row>
              <table:table-cell office:value-type="string">
                <text:p>2953</text:p>
              </table:table-cell>
              <table:table-cell office:value-type="float" office:value="661.276184082031">
                <text:p>661.276184082031</text:p>
              </table:table-cell>
              <table:table-cell office:value-type="float" office:value="0.004507679">
                <text:p>0.004507679</text:p>
              </table:table-cell>
            </table:table-row>
            <table:table-row>
              <table:table-cell office:value-type="string">
                <text:p>2954</text:p>
              </table:table-cell>
              <table:table-cell office:value-type="float" office:value="661.39599609375">
                <text:p>661.39599609375</text:p>
              </table:table-cell>
              <table:table-cell office:value-type="float" office:value="0.005944868">
                <text:p>0.005944868</text:p>
              </table:table-cell>
            </table:table-row>
            <table:table-row>
              <table:table-cell office:value-type="string">
                <text:p>2955</text:p>
              </table:table-cell>
              <table:table-cell office:value-type="float" office:value="661.515808105469">
                <text:p>661.515808105469</text:p>
              </table:table-cell>
              <table:table-cell office:value-type="float" office:value="0.01488553">
                <text:p>0.01488553</text:p>
              </table:table-cell>
            </table:table-row>
            <table:table-row>
              <table:table-cell office:value-type="string">
                <text:p>2956</text:p>
              </table:table-cell>
              <table:table-cell office:value-type="float" office:value="661.635620117188">
                <text:p>661.635620117188</text:p>
              </table:table-cell>
              <table:table-cell office:value-type="float" office:value="0.001485756">
                <text:p>0.001485756</text:p>
              </table:table-cell>
            </table:table-row>
            <table:table-row>
              <table:table-cell office:value-type="string">
                <text:p>2957</text:p>
              </table:table-cell>
              <table:table-cell office:value-type="float" office:value="661.755432128906">
                <text:p>661.755432128906</text:p>
              </table:table-cell>
              <table:table-cell office:value-type="float" office:value="0.00884927">
                <text:p>0.00884927</text:p>
              </table:table-cell>
            </table:table-row>
            <table:table-row>
              <table:table-cell office:value-type="string">
                <text:p>2958</text:p>
              </table:table-cell>
              <table:table-cell office:value-type="float" office:value="661.875244140625">
                <text:p>661.875244140625</text:p>
              </table:table-cell>
              <table:table-cell office:value-type="float" office:value="0.01327405">
                <text:p>0.01327405</text:p>
              </table:table-cell>
            </table:table-row>
            <table:table-row>
              <table:table-cell office:value-type="string">
                <text:p>2959</text:p>
              </table:table-cell>
              <table:table-cell office:value-type="float" office:value="661.995056152344">
                <text:p>661.995056152344</text:p>
              </table:table-cell>
              <table:table-cell office:value-type="float" office:value="0.006662859">
                <text:p>0.006662859</text:p>
              </table:table-cell>
            </table:table-row>
            <table:table-row>
              <table:table-cell office:value-type="string">
                <text:p>2960</text:p>
              </table:table-cell>
              <table:table-cell office:value-type="float" office:value="662.114868164063">
                <text:p>662.114868164063</text:p>
              </table:table-cell>
              <table:table-cell office:value-type="float" office:value="0.001731413">
                <text:p>0.001731413</text:p>
              </table:table-cell>
            </table:table-row>
            <table:table-row>
              <table:table-cell office:value-type="string">
                <text:p>2961</text:p>
              </table:table-cell>
              <table:table-cell office:value-type="float" office:value="662.234680175781">
                <text:p>662.234680175781</text:p>
              </table:table-cell>
              <table:table-cell office:value-type="float" office:value="0.0003505957">
                <text:p>0.0003505957</text:p>
              </table:table-cell>
            </table:table-row>
            <table:table-row>
              <table:table-cell office:value-type="string">
                <text:p>2962</text:p>
              </table:table-cell>
              <table:table-cell office:value-type="float" office:value="662.354553222656">
                <text:p>662.354553222656</text:p>
              </table:table-cell>
              <table:table-cell office:value-type="float" office:value="-0.0001779783">
                <text:p>-0.0001779783</text:p>
              </table:table-cell>
            </table:table-row>
            <table:table-row>
              <table:table-cell office:value-type="string">
                <text:p>2963</text:p>
              </table:table-cell>
              <table:table-cell office:value-type="float" office:value="662.474365234375">
                <text:p>662.474365234375</text:p>
              </table:table-cell>
              <table:table-cell office:value-type="float" office:value="0.00405843">
                <text:p>0.00405843</text:p>
              </table:table-cell>
            </table:table-row>
            <table:table-row>
              <table:table-cell office:value-type="string">
                <text:p>2964</text:p>
              </table:table-cell>
              <table:table-cell office:value-type="float" office:value="662.594177246094">
                <text:p>662.594177246094</text:p>
              </table:table-cell>
              <table:table-cell office:value-type="float" office:value="0.007401334">
                <text:p>0.007401334</text:p>
              </table:table-cell>
            </table:table-row>
            <table:table-row>
              <table:table-cell office:value-type="string">
                <text:p>2965</text:p>
              </table:table-cell>
              <table:table-cell office:value-type="float" office:value="662.713989257813">
                <text:p>662.713989257813</text:p>
              </table:table-cell>
              <table:table-cell office:value-type="float" office:value="0.01135593">
                <text:p>0.01135593</text:p>
              </table:table-cell>
            </table:table-row>
            <table:table-row>
              <table:table-cell office:value-type="string">
                <text:p>2966</text:p>
              </table:table-cell>
              <table:table-cell office:value-type="float" office:value="662.833801269531">
                <text:p>662.833801269531</text:p>
              </table:table-cell>
              <table:table-cell office:value-type="float" office:value="-0.003412382">
                <text:p>-0.003412382</text:p>
              </table:table-cell>
            </table:table-row>
            <table:table-row>
              <table:table-cell office:value-type="string">
                <text:p>2967</text:p>
              </table:table-cell>
              <table:table-cell office:value-type="float" office:value="662.953674316406">
                <text:p>662.953674316406</text:p>
              </table:table-cell>
              <table:table-cell office:value-type="float" office:value="0.001518658">
                <text:p>0.001518658</text:p>
              </table:table-cell>
            </table:table-row>
            <table:table-row>
              <table:table-cell office:value-type="string">
                <text:p>2968</text:p>
              </table:table-cell>
              <table:table-cell office:value-type="float" office:value="663.073486328125">
                <text:p>663.073486328125</text:p>
              </table:table-cell>
              <table:table-cell office:value-type="float" office:value="0.00379568">
                <text:p>0.00379568</text:p>
              </table:table-cell>
            </table:table-row>
            <table:table-row>
              <table:table-cell office:value-type="string">
                <text:p>2969</text:p>
              </table:table-cell>
              <table:table-cell office:value-type="float" office:value="663.193298339844">
                <text:p>663.193298339844</text:p>
              </table:table-cell>
              <table:table-cell office:value-type="float" office:value="0.00432698">
                <text:p>0.00432698</text:p>
              </table:table-cell>
            </table:table-row>
            <table:table-row>
              <table:table-cell office:value-type="string">
                <text:p>2970</text:p>
              </table:table-cell>
              <table:table-cell office:value-type="float" office:value="663.313110351563">
                <text:p>663.313110351563</text:p>
              </table:table-cell>
              <table:table-cell office:value-type="float" office:value="0.006271384">
                <text:p>0.006271384</text:p>
              </table:table-cell>
            </table:table-row>
            <table:table-row>
              <table:table-cell office:value-type="string">
                <text:p>2971</text:p>
              </table:table-cell>
              <table:table-cell office:value-type="float" office:value="663.432983398438">
                <text:p>663.432983398438</text:p>
              </table:table-cell>
              <table:table-cell office:value-type="float" office:value="0.004797389">
                <text:p>0.004797389</text:p>
              </table:table-cell>
            </table:table-row>
            <table:table-row>
              <table:table-cell office:value-type="string">
                <text:p>2972</text:p>
              </table:table-cell>
              <table:table-cell office:value-type="float" office:value="663.552795410156">
                <text:p>663.552795410156</text:p>
              </table:table-cell>
              <table:table-cell office:value-type="float" office:value="0.007038312">
                <text:p>0.007038312</text:p>
              </table:table-cell>
            </table:table-row>
            <table:table-row>
              <table:table-cell office:value-type="string">
                <text:p>2973</text:p>
              </table:table-cell>
              <table:table-cell office:value-type="float" office:value="663.672668457031">
                <text:p>663.672668457031</text:p>
              </table:table-cell>
              <table:table-cell office:value-type="float" office:value="0.003881505">
                <text:p>0.003881505</text:p>
              </table:table-cell>
            </table:table-row>
            <table:table-row>
              <table:table-cell office:value-type="string">
                <text:p>2974</text:p>
              </table:table-cell>
              <table:table-cell office:value-type="float" office:value="663.79248046875">
                <text:p>663.79248046875</text:p>
              </table:table-cell>
              <table:table-cell office:value-type="float" office:value="0.006159374">
                <text:p>0.006159374</text:p>
              </table:table-cell>
            </table:table-row>
            <table:table-row>
              <table:table-cell office:value-type="string">
                <text:p>2975</text:p>
              </table:table-cell>
              <table:table-cell office:value-type="float" office:value="663.912292480469">
                <text:p>663.912292480469</text:p>
              </table:table-cell>
              <table:table-cell office:value-type="float" office:value="0.004100549">
                <text:p>0.004100549</text:p>
              </table:table-cell>
            </table:table-row>
            <table:table-row>
              <table:table-cell office:value-type="string">
                <text:p>2976</text:p>
              </table:table-cell>
              <table:table-cell office:value-type="float" office:value="664.032165527344">
                <text:p>664.032165527344</text:p>
              </table:table-cell>
              <table:table-cell office:value-type="float" office:value="0.008053749">
                <text:p>0.008053749</text:p>
              </table:table-cell>
            </table:table-row>
            <table:table-row>
              <table:table-cell office:value-type="string">
                <text:p>2977</text:p>
              </table:table-cell>
              <table:table-cell office:value-type="float" office:value="664.151977539063">
                <text:p>664.151977539063</text:p>
              </table:table-cell>
              <table:table-cell office:value-type="float" office:value="0.003904164">
                <text:p>0.003904164</text:p>
              </table:table-cell>
            </table:table-row>
            <table:table-row>
              <table:table-cell office:value-type="string">
                <text:p>2978</text:p>
              </table:table-cell>
              <table:table-cell office:value-type="float" office:value="664.271850585938">
                <text:p>664.271850585938</text:p>
              </table:table-cell>
              <table:table-cell office:value-type="float" office:value="-0.002318447">
                <text:p>-0.002318447</text:p>
              </table:table-cell>
            </table:table-row>
            <table:table-row>
              <table:table-cell office:value-type="string">
                <text:p>2979</text:p>
              </table:table-cell>
              <table:table-cell office:value-type="float" office:value="664.391662597656">
                <text:p>664.391662597656</text:p>
              </table:table-cell>
              <table:table-cell office:value-type="float" office:value="0.003418324">
                <text:p>0.003418324</text:p>
              </table:table-cell>
            </table:table-row>
            <table:table-row>
              <table:table-cell office:value-type="string">
                <text:p>2980</text:p>
              </table:table-cell>
              <table:table-cell office:value-type="float" office:value="664.511535644531">
                <text:p>664.511535644531</text:p>
              </table:table-cell>
              <table:table-cell office:value-type="float" office:value="0.007280321">
                <text:p>0.007280321</text:p>
              </table:table-cell>
            </table:table-row>
            <table:table-row>
              <table:table-cell office:value-type="string">
                <text:p>2981</text:p>
              </table:table-cell>
              <table:table-cell office:value-type="float" office:value="664.63134765625">
                <text:p>664.63134765625</text:p>
              </table:table-cell>
              <table:table-cell office:value-type="float" office:value="0.002766202">
                <text:p>0.002766202</text:p>
              </table:table-cell>
            </table:table-row>
            <table:table-row>
              <table:table-cell office:value-type="string">
                <text:p>2982</text:p>
              </table:table-cell>
              <table:table-cell office:value-type="float" office:value="664.751220703125">
                <text:p>664.751220703125</text:p>
              </table:table-cell>
              <table:table-cell office:value-type="float" office:value="-0.002767056">
                <text:p>-0.002767056</text:p>
              </table:table-cell>
            </table:table-row>
            <table:table-row>
              <table:table-cell office:value-type="string">
                <text:p>2983</text:p>
              </table:table-cell>
              <table:table-cell office:value-type="float" office:value="664.87109375">
                <text:p>664.87109375</text:p>
              </table:table-cell>
              <table:table-cell office:value-type="float" office:value="0.009448473">
                <text:p>0.009448473</text:p>
              </table:table-cell>
            </table:table-row>
            <table:table-row>
              <table:table-cell office:value-type="string">
                <text:p>2984</text:p>
              </table:table-cell>
              <table:table-cell office:value-type="float" office:value="664.990905761719">
                <text:p>664.990905761719</text:p>
              </table:table-cell>
              <table:table-cell office:value-type="float" office:value="0.009698477">
                <text:p>0.009698477</text:p>
              </table:table-cell>
            </table:table-row>
            <table:table-row>
              <table:table-cell office:value-type="string">
                <text:p>2985</text:p>
              </table:table-cell>
              <table:table-cell office:value-type="float" office:value="665.110778808594">
                <text:p>665.110778808594</text:p>
              </table:table-cell>
              <table:table-cell office:value-type="float" office:value="0.003933507">
                <text:p>0.003933507</text:p>
              </table:table-cell>
            </table:table-row>
            <table:table-row>
              <table:table-cell office:value-type="string">
                <text:p>2986</text:p>
              </table:table-cell>
              <table:table-cell office:value-type="float" office:value="665.230590820313">
                <text:p>665.230590820313</text:p>
              </table:table-cell>
              <table:table-cell office:value-type="float" office:value="0.01048914">
                <text:p>0.01048914</text:p>
              </table:table-cell>
            </table:table-row>
            <table:table-row>
              <table:table-cell office:value-type="string">
                <text:p>2987</text:p>
              </table:table-cell>
              <table:table-cell office:value-type="float" office:value="665.350463867188">
                <text:p>665.350463867188</text:p>
              </table:table-cell>
              <table:table-cell office:value-type="float" office:value="-0.002500416">
                <text:p>-0.002500416</text:p>
              </table:table-cell>
            </table:table-row>
            <table:table-row>
              <table:table-cell office:value-type="string">
                <text:p>2988</text:p>
              </table:table-cell>
              <table:table-cell office:value-type="float" office:value="665.470336914063">
                <text:p>665.470336914063</text:p>
              </table:table-cell>
              <table:table-cell office:value-type="float" office:value="0.01547288">
                <text:p>0.01547288</text:p>
              </table:table-cell>
            </table:table-row>
            <table:table-row>
              <table:table-cell office:value-type="string">
                <text:p>2989</text:p>
              </table:table-cell>
              <table:table-cell office:value-type="float" office:value="665.590148925781">
                <text:p>665.590148925781</text:p>
              </table:table-cell>
              <table:table-cell office:value-type="float" office:value="0.01187826">
                <text:p>0.01187826</text:p>
              </table:table-cell>
            </table:table-row>
            <table:table-row>
              <table:table-cell office:value-type="string">
                <text:p>2990</text:p>
              </table:table-cell>
              <table:table-cell office:value-type="float" office:value="665.710021972656">
                <text:p>665.710021972656</text:p>
              </table:table-cell>
              <table:table-cell office:value-type="float" office:value="0.004128171">
                <text:p>0.004128171</text:p>
              </table:table-cell>
            </table:table-row>
            <table:table-row>
              <table:table-cell office:value-type="string">
                <text:p>2991</text:p>
              </table:table-cell>
              <table:table-cell office:value-type="float" office:value="665.829895019531">
                <text:p>665.829895019531</text:p>
              </table:table-cell>
              <table:table-cell office:value-type="float" office:value="-0.0006930178">
                <text:p>-0.0006930178</text:p>
              </table:table-cell>
            </table:table-row>
            <table:table-row>
              <table:table-cell office:value-type="string">
                <text:p>2992</text:p>
              </table:table-cell>
              <table:table-cell office:value-type="float" office:value="665.949768066406">
                <text:p>665.949768066406</text:p>
              </table:table-cell>
              <table:table-cell office:value-type="float" office:value="0.01731898">
                <text:p>0.01731898</text:p>
              </table:table-cell>
            </table:table-row>
            <table:table-row>
              <table:table-cell office:value-type="string">
                <text:p>2993</text:p>
              </table:table-cell>
              <table:table-cell office:value-type="float" office:value="666.069580078125">
                <text:p>666.069580078125</text:p>
              </table:table-cell>
              <table:table-cell office:value-type="float" office:value="-0.0009561866">
                <text:p>-0.0009561866</text:p>
              </table:table-cell>
            </table:table-row>
            <table:table-row>
              <table:table-cell office:value-type="string">
                <text:p>2994</text:p>
              </table:table-cell>
              <table:table-cell office:value-type="float" office:value="666.189453125">
                <text:p>666.189453125</text:p>
              </table:table-cell>
              <table:table-cell office:value-type="float" office:value="0.01923173">
                <text:p>0.01923173</text:p>
              </table:table-cell>
            </table:table-row>
            <table:table-row>
              <table:table-cell office:value-type="string">
                <text:p>2995</text:p>
              </table:table-cell>
              <table:table-cell office:value-type="float" office:value="666.309326171875">
                <text:p>666.309326171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96</text:p>
              </table:table-cell>
              <table:table-cell office:value-type="float" office:value="666.42919921875">
                <text:p>666.42919921875</text:p>
              </table:table-cell>
              <table:table-cell office:value-type="float" office:value="0.01178315">
                <text:p>0.01178315</text:p>
              </table:table-cell>
            </table:table-row>
            <table:table-row>
              <table:table-cell office:value-type="string">
                <text:p>2997</text:p>
              </table:table-cell>
              <table:table-cell office:value-type="float" office:value="666.549072265625">
                <text:p>666.549072265625</text:p>
              </table:table-cell>
              <table:table-cell office:value-type="float" office:value="0.01057345">
                <text:p>0.01057345</text:p>
              </table:table-cell>
            </table:table-row>
            <table:table-row>
              <table:table-cell office:value-type="string">
                <text:p>2998</text:p>
              </table:table-cell>
              <table:table-cell office:value-type="float" office:value="666.6689453125">
                <text:p>666.6689453125</text:p>
              </table:table-cell>
              <table:table-cell office:value-type="float" office:value="0.004644519">
                <text:p>0.004644519</text:p>
              </table:table-cell>
            </table:table-row>
            <table:table-row>
              <table:table-cell office:value-type="string">
                <text:p>2999</text:p>
              </table:table-cell>
              <table:table-cell office:value-type="float" office:value="666.788818359375">
                <text:p>666.788818359375</text:p>
              </table:table-cell>
              <table:table-cell office:value-type="float" office:value="0.003745771">
                <text:p>0.003745771</text:p>
              </table:table-cell>
            </table:table-row>
            <table:table-row>
              <table:table-cell office:value-type="string">
                <text:p>3000</text:p>
              </table:table-cell>
              <table:table-cell office:value-type="float" office:value="666.90869140625">
                <text:p>666.90869140625</text:p>
              </table:table-cell>
              <table:table-cell office:value-type="float" office:value="0.0003631292">
                <text:p>0.0003631292</text:p>
              </table:table-cell>
            </table:table-row>
            <table:table-row>
              <table:table-cell office:value-type="string">
                <text:p>3001</text:p>
              </table:table-cell>
              <table:table-cell office:value-type="float" office:value="667.028564453125">
                <text:p>667.028564453125</text:p>
              </table:table-cell>
              <table:table-cell office:value-type="float" office:value="0.00601881">
                <text:p>0.00601881</text:p>
              </table:table-cell>
            </table:table-row>
            <table:table-row>
              <table:table-cell office:value-type="string">
                <text:p>3002</text:p>
              </table:table-cell>
              <table:table-cell office:value-type="float" office:value="667.1484375">
                <text:p>667.1484375</text:p>
              </table:table-cell>
              <table:table-cell office:value-type="float" office:value="0.006115448">
                <text:p>0.006115448</text:p>
              </table:table-cell>
            </table:table-row>
            <table:table-row>
              <table:table-cell office:value-type="string">
                <text:p>3003</text:p>
              </table:table-cell>
              <table:table-cell office:value-type="float" office:value="667.268310546875">
                <text:p>667.268310546875</text:p>
              </table:table-cell>
              <table:table-cell office:value-type="float" office:value="0.005152446">
                <text:p>0.005152446</text:p>
              </table:table-cell>
            </table:table-row>
            <table:table-row>
              <table:table-cell office:value-type="string">
                <text:p>3004</text:p>
              </table:table-cell>
              <table:table-cell office:value-type="float" office:value="667.38818359375">
                <text:p>667.38818359375</text:p>
              </table:table-cell>
              <table:table-cell office:value-type="float" office:value="0.01290313">
                <text:p>0.01290313</text:p>
              </table:table-cell>
            </table:table-row>
            <table:table-row>
              <table:table-cell office:value-type="string">
                <text:p>3005</text:p>
              </table:table-cell>
              <table:table-cell office:value-type="float" office:value="667.508056640625">
                <text:p>667.508056640625</text:p>
              </table:table-cell>
              <table:table-cell office:value-type="float" office:value="0.0005083215">
                <text:p>0.0005083215</text:p>
              </table:table-cell>
            </table:table-row>
            <table:table-row>
              <table:table-cell office:value-type="string">
                <text:p>3006</text:p>
              </table:table-cell>
              <table:table-cell office:value-type="float" office:value="667.6279296875">
                <text:p>667.6279296875</text:p>
              </table:table-cell>
              <table:table-cell office:value-type="float" office:value="-0.001155584">
                <text:p>-0.001155584</text:p>
              </table:table-cell>
            </table:table-row>
            <table:table-row>
              <table:table-cell office:value-type="string">
                <text:p>3007</text:p>
              </table:table-cell>
              <table:table-cell office:value-type="float" office:value="667.747802734375">
                <text:p>667.747802734375</text:p>
              </table:table-cell>
              <table:table-cell office:value-type="float" office:value="-0.00137882">
                <text:p>-0.00137882</text:p>
              </table:table-cell>
            </table:table-row>
            <table:table-row>
              <table:table-cell office:value-type="string">
                <text:p>3008</text:p>
              </table:table-cell>
              <table:table-cell office:value-type="float" office:value="667.86767578125">
                <text:p>667.86767578125</text:p>
              </table:table-cell>
              <table:table-cell office:value-type="float" office:value="-0.007111214">
                <text:p>-0.007111214</text:p>
              </table:table-cell>
            </table:table-row>
            <table:table-row>
              <table:table-cell office:value-type="string">
                <text:p>3009</text:p>
              </table:table-cell>
              <table:table-cell office:value-type="float" office:value="667.987548828125">
                <text:p>667.987548828125</text:p>
              </table:table-cell>
              <table:table-cell office:value-type="float" office:value="0.009502877">
                <text:p>0.009502877</text:p>
              </table:table-cell>
            </table:table-row>
            <table:table-row>
              <table:table-cell office:value-type="string">
                <text:p>3010</text:p>
              </table:table-cell>
              <table:table-cell office:value-type="float" office:value="668.107421875">
                <text:p>668.107421875</text:p>
              </table:table-cell>
              <table:table-cell office:value-type="float" office:value="-0.006595147">
                <text:p>-0.006595147</text:p>
              </table:table-cell>
            </table:table-row>
            <table:table-row>
              <table:table-cell office:value-type="string">
                <text:p>3011</text:p>
              </table:table-cell>
              <table:table-cell office:value-type="float" office:value="668.227294921875">
                <text:p>668.227294921875</text:p>
              </table:table-cell>
              <table:table-cell office:value-type="float" office:value="0.003914833">
                <text:p>0.003914833</text:p>
              </table:table-cell>
            </table:table-row>
            <table:table-row>
              <table:table-cell office:value-type="string">
                <text:p>3012</text:p>
              </table:table-cell>
              <table:table-cell office:value-type="float" office:value="668.34716796875">
                <text:p>668.34716796875</text:p>
              </table:table-cell>
              <table:table-cell office:value-type="float" office:value="0.008331811">
                <text:p>0.008331811</text:p>
              </table:table-cell>
            </table:table-row>
            <table:table-row>
              <table:table-cell office:value-type="string">
                <text:p>3013</text:p>
              </table:table-cell>
              <table:table-cell office:value-type="float" office:value="668.467102050781">
                <text:p>668.467102050781</text:p>
              </table:table-cell>
              <table:table-cell office:value-type="float" office:value="0.003866931">
                <text:p>0.003866931</text:p>
              </table:table-cell>
            </table:table-row>
            <table:table-row>
              <table:table-cell office:value-type="string">
                <text:p>3014</text:p>
              </table:table-cell>
              <table:table-cell office:value-type="float" office:value="668.586975097656">
                <text:p>668.586975097656</text:p>
              </table:table-cell>
              <table:table-cell office:value-type="float" office:value="0.001344367">
                <text:p>0.001344367</text:p>
              </table:table-cell>
            </table:table-row>
            <table:table-row>
              <table:table-cell office:value-type="string">
                <text:p>3015</text:p>
              </table:table-cell>
              <table:table-cell office:value-type="float" office:value="668.706848144531">
                <text:p>668.706848144531</text:p>
              </table:table-cell>
              <table:table-cell office:value-type="float" office:value="0.001030214">
                <text:p>0.001030214</text:p>
              </table:table-cell>
            </table:table-row>
            <table:table-row>
              <table:table-cell office:value-type="string">
                <text:p>3016</text:p>
              </table:table-cell>
              <table:table-cell office:value-type="float" office:value="668.826721191406">
                <text:p>668.826721191406</text:p>
              </table:table-cell>
              <table:table-cell office:value-type="float" office:value="0.001125649">
                <text:p>0.001125649</text:p>
              </table:table-cell>
            </table:table-row>
            <table:table-row>
              <table:table-cell office:value-type="string">
                <text:p>3017</text:p>
              </table:table-cell>
              <table:table-cell office:value-type="float" office:value="668.946594238281">
                <text:p>668.946594238281</text:p>
              </table:table-cell>
              <table:table-cell office:value-type="float" office:value="0.01033949">
                <text:p>0.01033949</text:p>
              </table:table-cell>
            </table:table-row>
            <table:table-row>
              <table:table-cell office:value-type="string">
                <text:p>3018</text:p>
              </table:table-cell>
              <table:table-cell office:value-type="float" office:value="669.066528320313">
                <text:p>669.066528320313</text:p>
              </table:table-cell>
              <table:table-cell office:value-type="float" office:value="0.005738116">
                <text:p>0.005738116</text:p>
              </table:table-cell>
            </table:table-row>
            <table:table-row>
              <table:table-cell office:value-type="string">
                <text:p>3019</text:p>
              </table:table-cell>
              <table:table-cell office:value-type="float" office:value="669.186401367188">
                <text:p>669.186401367188</text:p>
              </table:table-cell>
              <table:table-cell office:value-type="float" office:value="-0.002516721">
                <text:p>-0.002516721</text:p>
              </table:table-cell>
            </table:table-row>
            <table:table-row>
              <table:table-cell office:value-type="string">
                <text:p>3020</text:p>
              </table:table-cell>
              <table:table-cell office:value-type="float" office:value="669.306274414063">
                <text:p>669.306274414063</text:p>
              </table:table-cell>
              <table:table-cell office:value-type="float" office:value="0.01434975">
                <text:p>0.01434975</text:p>
              </table:table-cell>
            </table:table-row>
            <table:table-row>
              <table:table-cell office:value-type="string">
                <text:p>3021</text:p>
              </table:table-cell>
              <table:table-cell office:value-type="float" office:value="669.426208496094">
                <text:p>669.426208496094</text:p>
              </table:table-cell>
              <table:table-cell office:value-type="float" office:value="0.007299925">
                <text:p>0.007299925</text:p>
              </table:table-cell>
            </table:table-row>
            <table:table-row>
              <table:table-cell office:value-type="string">
                <text:p>3022</text:p>
              </table:table-cell>
              <table:table-cell office:value-type="float" office:value="669.546081542969">
                <text:p>669.546081542969</text:p>
              </table:table-cell>
              <table:table-cell office:value-type="float" office:value="-0.0007621516">
                <text:p>-0.0007621516</text:p>
              </table:table-cell>
            </table:table-row>
            <table:table-row>
              <table:table-cell office:value-type="string">
                <text:p>3023</text:p>
              </table:table-cell>
              <table:table-cell office:value-type="float" office:value="669.665954589844">
                <text:p>669.665954589844</text:p>
              </table:table-cell>
              <table:table-cell office:value-type="float" office:value="-0.001571867">
                <text:p>-0.001571867</text:p>
              </table:table-cell>
            </table:table-row>
            <table:table-row>
              <table:table-cell office:value-type="string">
                <text:p>3024</text:p>
              </table:table-cell>
              <table:table-cell office:value-type="float" office:value="669.785888671875">
                <text:p>669.785888671875</text:p>
              </table:table-cell>
              <table:table-cell office:value-type="float" office:value="0.004017912">
                <text:p>0.004017912</text:p>
              </table:table-cell>
            </table:table-row>
            <table:table-row>
              <table:table-cell office:value-type="string">
                <text:p>3025</text:p>
              </table:table-cell>
              <table:table-cell office:value-type="float" office:value="669.90576171875">
                <text:p>669.90576171875</text:p>
              </table:table-cell>
              <table:table-cell office:value-type="float" office:value="0.003650361">
                <text:p>0.003650361</text:p>
              </table:table-cell>
            </table:table-row>
            <table:table-row>
              <table:table-cell office:value-type="string">
                <text:p>3026</text:p>
              </table:table-cell>
              <table:table-cell office:value-type="float" office:value="670.025695800781">
                <text:p>670.025695800781</text:p>
              </table:table-cell>
              <table:table-cell office:value-type="float" office:value="-0.002914492">
                <text:p>-0.002914492</text:p>
              </table:table-cell>
            </table:table-row>
            <table:table-row>
              <table:table-cell office:value-type="string">
                <text:p>3027</text:p>
              </table:table-cell>
              <table:table-cell office:value-type="float" office:value="670.145568847656">
                <text:p>670.145568847656</text:p>
              </table:table-cell>
              <table:table-cell office:value-type="float" office:value="0.0151808">
                <text:p>0.0151808</text:p>
              </table:table-cell>
            </table:table-row>
            <table:table-row>
              <table:table-cell office:value-type="string">
                <text:p>3028</text:p>
              </table:table-cell>
              <table:table-cell office:value-type="float" office:value="670.265502929688">
                <text:p>670.265502929688</text:p>
              </table:table-cell>
              <table:table-cell office:value-type="float" office:value="0.007059491">
                <text:p>0.007059491</text:p>
              </table:table-cell>
            </table:table-row>
            <table:table-row>
              <table:table-cell office:value-type="string">
                <text:p>3029</text:p>
              </table:table-cell>
              <table:table-cell office:value-type="float" office:value="670.385375976563">
                <text:p>670.385375976563</text:p>
              </table:table-cell>
              <table:table-cell office:value-type="float" office:value="0.0143137">
                <text:p>0.0143137</text:p>
              </table:table-cell>
            </table:table-row>
            <table:table-row>
              <table:table-cell office:value-type="string">
                <text:p>3030</text:p>
              </table:table-cell>
              <table:table-cell office:value-type="float" office:value="670.505310058594">
                <text:p>670.505310058594</text:p>
              </table:table-cell>
              <table:table-cell office:value-type="float" office:value="0.005986982">
                <text:p>0.005986982</text:p>
              </table:table-cell>
            </table:table-row>
            <table:table-row>
              <table:table-cell office:value-type="string">
                <text:p>3031</text:p>
              </table:table-cell>
              <table:table-cell office:value-type="float" office:value="670.625183105469">
                <text:p>670.625183105469</text:p>
              </table:table-cell>
              <table:table-cell office:value-type="float" office:value="0.009090474">
                <text:p>0.009090474</text:p>
              </table:table-cell>
            </table:table-row>
            <table:table-row>
              <table:table-cell office:value-type="string">
                <text:p>3032</text:p>
              </table:table-cell>
              <table:table-cell office:value-type="float" office:value="670.7451171875">
                <text:p>670.7451171875</text:p>
              </table:table-cell>
              <table:table-cell office:value-type="float" office:value="0.003038526">
                <text:p>0.003038526</text:p>
              </table:table-cell>
            </table:table-row>
            <table:table-row>
              <table:table-cell office:value-type="string">
                <text:p>3033</text:p>
              </table:table-cell>
              <table:table-cell office:value-type="float" office:value="670.864990234375">
                <text:p>670.864990234375</text:p>
              </table:table-cell>
              <table:table-cell office:value-type="float" office:value="0.01102928">
                <text:p>0.01102928</text:p>
              </table:table-cell>
            </table:table-row>
            <table:table-row>
              <table:table-cell office:value-type="string">
                <text:p>3034</text:p>
              </table:table-cell>
              <table:table-cell office:value-type="float" office:value="670.984924316406">
                <text:p>670.984924316406</text:p>
              </table:table-cell>
              <table:table-cell office:value-type="float" office:value="0.009195708">
                <text:p>0.009195708</text:p>
              </table:table-cell>
            </table:table-row>
            <table:table-row>
              <table:table-cell office:value-type="string">
                <text:p>3035</text:p>
              </table:table-cell>
              <table:table-cell office:value-type="float" office:value="671.104858398438">
                <text:p>671.104858398438</text:p>
              </table:table-cell>
              <table:table-cell office:value-type="float" office:value="-0.002542047">
                <text:p>-0.002542047</text:p>
              </table:table-cell>
            </table:table-row>
            <table:table-row>
              <table:table-cell office:value-type="string">
                <text:p>3036</text:p>
              </table:table-cell>
              <table:table-cell office:value-type="float" office:value="671.224731445313">
                <text:p>671.224731445313</text:p>
              </table:table-cell>
              <table:table-cell office:value-type="float" office:value="0.004648893">
                <text:p>0.004648893</text:p>
              </table:table-cell>
            </table:table-row>
            <table:table-row>
              <table:table-cell office:value-type="string">
                <text:p>3037</text:p>
              </table:table-cell>
              <table:table-cell office:value-type="float" office:value="671.344665527344">
                <text:p>671.344665527344</text:p>
              </table:table-cell>
              <table:table-cell office:value-type="float" office:value="0.00965042">
                <text:p>0.00965042</text:p>
              </table:table-cell>
            </table:table-row>
            <table:table-row>
              <table:table-cell office:value-type="string">
                <text:p>3038</text:p>
              </table:table-cell>
              <table:table-cell office:value-type="float" office:value="671.464599609375">
                <text:p>671.464599609375</text:p>
              </table:table-cell>
              <table:table-cell office:value-type="float" office:value="-0.003981163">
                <text:p>-0.003981163</text:p>
              </table:table-cell>
            </table:table-row>
            <table:table-row>
              <table:table-cell office:value-type="string">
                <text:p>3039</text:p>
              </table:table-cell>
              <table:table-cell office:value-type="float" office:value="671.58447265625">
                <text:p>671.58447265625</text:p>
              </table:table-cell>
              <table:table-cell office:value-type="float" office:value="-0.0007956034">
                <text:p>-0.0007956034</text:p>
              </table:table-cell>
            </table:table-row>
            <table:table-row>
              <table:table-cell office:value-type="string">
                <text:p>3040</text:p>
              </table:table-cell>
              <table:table-cell office:value-type="float" office:value="671.704406738281">
                <text:p>671.704406738281</text:p>
              </table:table-cell>
              <table:table-cell office:value-type="float" office:value="0.01073016">
                <text:p>0.01073016</text:p>
              </table:table-cell>
            </table:table-row>
            <table:table-row>
              <table:table-cell office:value-type="string">
                <text:p>3041</text:p>
              </table:table-cell>
              <table:table-cell office:value-type="float" office:value="671.824340820313">
                <text:p>671.824340820313</text:p>
              </table:table-cell>
              <table:table-cell office:value-type="float" office:value="0.002769263">
                <text:p>0.002769263</text:p>
              </table:table-cell>
            </table:table-row>
            <table:table-row>
              <table:table-cell office:value-type="string">
                <text:p>3042</text:p>
              </table:table-cell>
              <table:table-cell office:value-type="float" office:value="671.944213867188">
                <text:p>671.944213867188</text:p>
              </table:table-cell>
              <table:table-cell office:value-type="float" office:value="0.00234445">
                <text:p>0.00234445</text:p>
              </table:table-cell>
            </table:table-row>
            <table:table-row>
              <table:table-cell office:value-type="string">
                <text:p>3043</text:p>
              </table:table-cell>
              <table:table-cell office:value-type="float" office:value="672.064147949219">
                <text:p>672.0641479492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44</text:p>
              </table:table-cell>
              <table:table-cell office:value-type="float" office:value="672.18408203125">
                <text:p>672.18408203125</text:p>
              </table:table-cell>
              <table:table-cell office:value-type="float" office:value="0.002200599">
                <text:p>0.002200599</text:p>
              </table:table-cell>
            </table:table-row>
            <table:table-row>
              <table:table-cell office:value-type="string">
                <text:p>3045</text:p>
              </table:table-cell>
              <table:table-cell office:value-type="float" office:value="672.304016113281">
                <text:p>672.304016113281</text:p>
              </table:table-cell>
              <table:table-cell office:value-type="float" office:value="-0.002252783">
                <text:p>-0.002252783</text:p>
              </table:table-cell>
            </table:table-row>
            <table:table-row>
              <table:table-cell office:value-type="string">
                <text:p>3046</text:p>
              </table:table-cell>
              <table:table-cell office:value-type="float" office:value="672.423950195313">
                <text:p>672.423950195313</text:p>
              </table:table-cell>
              <table:table-cell office:value-type="float" office:value="-0.005682367">
                <text:p>-0.005682367</text:p>
              </table:table-cell>
            </table:table-row>
            <table:table-row>
              <table:table-cell office:value-type="string">
                <text:p>3047</text:p>
              </table:table-cell>
              <table:table-cell office:value-type="float" office:value="672.543823242188">
                <text:p>672.543823242188</text:p>
              </table:table-cell>
              <table:table-cell office:value-type="float" office:value="-0.002742401">
                <text:p>-0.002742401</text:p>
              </table:table-cell>
            </table:table-row>
            <table:table-row>
              <table:table-cell office:value-type="string">
                <text:p>3048</text:p>
              </table:table-cell>
              <table:table-cell office:value-type="float" office:value="672.663757324219">
                <text:p>672.663757324219</text:p>
              </table:table-cell>
              <table:table-cell office:value-type="float" office:value="0.006372362">
                <text:p>0.006372362</text:p>
              </table:table-cell>
            </table:table-row>
            <table:table-row>
              <table:table-cell office:value-type="string">
                <text:p>3049</text:p>
              </table:table-cell>
              <table:table-cell office:value-type="float" office:value="672.78369140625">
                <text:p>672.78369140625</text:p>
              </table:table-cell>
              <table:table-cell office:value-type="float" office:value="0.003976265">
                <text:p>0.003976265</text:p>
              </table:table-cell>
            </table:table-row>
            <table:table-row>
              <table:table-cell office:value-type="string">
                <text:p>3050</text:p>
              </table:table-cell>
              <table:table-cell office:value-type="float" office:value="672.903625488281">
                <text:p>672.903625488281</text:p>
              </table:table-cell>
              <table:table-cell office:value-type="float" office:value="0.01501166">
                <text:p>0.01501166</text:p>
              </table:table-cell>
            </table:table-row>
            <table:table-row>
              <table:table-cell office:value-type="string">
                <text:p>3051</text:p>
              </table:table-cell>
              <table:table-cell office:value-type="float" office:value="673.023559570313">
                <text:p>673.023559570313</text:p>
              </table:table-cell>
              <table:table-cell office:value-type="float" office:value="0.01144064">
                <text:p>0.01144064</text:p>
              </table:table-cell>
            </table:table-row>
            <table:table-row>
              <table:table-cell office:value-type="string">
                <text:p>3052</text:p>
              </table:table-cell>
              <table:table-cell office:value-type="float" office:value="673.143493652344">
                <text:p>673.143493652344</text:p>
              </table:table-cell>
              <table:table-cell office:value-type="float" office:value="0.004739627">
                <text:p>0.004739627</text:p>
              </table:table-cell>
            </table:table-row>
            <table:table-row>
              <table:table-cell office:value-type="string">
                <text:p>3053</text:p>
              </table:table-cell>
              <table:table-cell office:value-type="float" office:value="673.263427734375">
                <text:p>673.263427734375</text:p>
              </table:table-cell>
              <table:table-cell office:value-type="float" office:value="-0.006972679">
                <text:p>-0.006972679</text:p>
              </table:table-cell>
            </table:table-row>
            <table:table-row>
              <table:table-cell office:value-type="string">
                <text:p>3054</text:p>
              </table:table-cell>
              <table:table-cell office:value-type="float" office:value="673.383361816406">
                <text:p>673.383361816406</text:p>
              </table:table-cell>
              <table:table-cell office:value-type="float" office:value="0.01961195">
                <text:p>0.01961195</text:p>
              </table:table-cell>
            </table:table-row>
            <table:table-row>
              <table:table-cell office:value-type="string">
                <text:p>3055</text:p>
              </table:table-cell>
              <table:table-cell office:value-type="float" office:value="673.503295898438">
                <text:p>673.503295898438</text:p>
              </table:table-cell>
              <table:table-cell office:value-type="float" office:value="-0.006641528">
                <text:p>-0.006641528</text:p>
              </table:table-cell>
            </table:table-row>
            <table:table-row>
              <table:table-cell office:value-type="string">
                <text:p>3056</text:p>
              </table:table-cell>
              <table:table-cell office:value-type="float" office:value="673.623229980469">
                <text:p>673.6232299804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57</text:p>
              </table:table-cell>
              <table:table-cell office:value-type="float" office:value="673.7431640625">
                <text:p>673.7431640625</text:p>
              </table:table-cell>
              <table:table-cell office:value-type="float" office:value="0.00023119">
                <text:p>0.00023119</text:p>
              </table:table-cell>
            </table:table-row>
            <table:table-row>
              <table:table-cell office:value-type="string">
                <text:p>3058</text:p>
              </table:table-cell>
              <table:table-cell office:value-type="float" office:value="673.863098144531">
                <text:p>673.863098144531</text:p>
              </table:table-cell>
              <table:table-cell office:value-type="float" office:value="0.005794134">
                <text:p>0.005794134</text:p>
              </table:table-cell>
            </table:table-row>
            <table:table-row>
              <table:table-cell office:value-type="string">
                <text:p>3059</text:p>
              </table:table-cell>
              <table:table-cell office:value-type="float" office:value="673.983032226563">
                <text:p>673.983032226563</text:p>
              </table:table-cell>
              <table:table-cell office:value-type="float" office:value="0.0009500713">
                <text:p>0.0009500713</text:p>
              </table:table-cell>
            </table:table-row>
            <table:table-row>
              <table:table-cell office:value-type="string">
                <text:p>3060</text:p>
              </table:table-cell>
              <table:table-cell office:value-type="float" office:value="674.102966308594">
                <text:p>674.102966308594</text:p>
              </table:table-cell>
              <table:table-cell office:value-type="float" office:value="0.008563614">
                <text:p>0.008563614</text:p>
              </table:table-cell>
            </table:table-row>
            <table:table-row>
              <table:table-cell office:value-type="string">
                <text:p>3061</text:p>
              </table:table-cell>
              <table:table-cell office:value-type="float" office:value="674.222900390625">
                <text:p>674.222900390625</text:p>
              </table:table-cell>
              <table:table-cell office:value-type="float" office:value="-0.004534661">
                <text:p>-0.004534661</text:p>
              </table:table-cell>
            </table:table-row>
            <table:table-row>
              <table:table-cell office:value-type="string">
                <text:p>3062</text:p>
              </table:table-cell>
              <table:table-cell office:value-type="float" office:value="674.342834472656">
                <text:p>674.342834472656</text:p>
              </table:table-cell>
              <table:table-cell office:value-type="float" office:value="-0.006279507">
                <text:p>-0.006279507</text:p>
              </table:table-cell>
            </table:table-row>
            <table:table-row>
              <table:table-cell office:value-type="string">
                <text:p>3063</text:p>
              </table:table-cell>
              <table:table-cell office:value-type="float" office:value="674.462768554688">
                <text:p>674.462768554688</text:p>
              </table:table-cell>
              <table:table-cell office:value-type="float" office:value="0.004535147">
                <text:p>0.004535147</text:p>
              </table:table-cell>
            </table:table-row>
            <table:table-row>
              <table:table-cell office:value-type="string">
                <text:p>3064</text:p>
              </table:table-cell>
              <table:table-cell office:value-type="float" office:value="674.582702636719">
                <text:p>674.582702636719</text:p>
              </table:table-cell>
              <table:table-cell office:value-type="float" office:value="0.005396221">
                <text:p>0.005396221</text:p>
              </table:table-cell>
            </table:table-row>
            <table:table-row>
              <table:table-cell office:value-type="string">
                <text:p>3065</text:p>
              </table:table-cell>
              <table:table-cell office:value-type="float" office:value="674.702697753906">
                <text:p>674.702697753906</text:p>
              </table:table-cell>
              <table:table-cell office:value-type="float" office:value="0.008249104">
                <text:p>0.008249104</text:p>
              </table:table-cell>
            </table:table-row>
            <table:table-row>
              <table:table-cell office:value-type="string">
                <text:p>3066</text:p>
              </table:table-cell>
              <table:table-cell office:value-type="float" office:value="674.822631835938">
                <text:p>674.822631835938</text:p>
              </table:table-cell>
              <table:table-cell office:value-type="float" office:value="-0.001145029">
                <text:p>-0.001145029</text:p>
              </table:table-cell>
            </table:table-row>
            <table:table-row>
              <table:table-cell office:value-type="string">
                <text:p>3067</text:p>
              </table:table-cell>
              <table:table-cell office:value-type="float" office:value="674.942565917969">
                <text:p>674.942565917969</text:p>
              </table:table-cell>
              <table:table-cell office:value-type="float" office:value="0.01261828">
                <text:p>0.01261828</text:p>
              </table:table-cell>
            </table:table-row>
            <table:table-row>
              <table:table-cell office:value-type="string">
                <text:p>3068</text:p>
              </table:table-cell>
              <table:table-cell office:value-type="float" office:value="675.0625">
                <text:p>675.0625</text:p>
              </table:table-cell>
              <table:table-cell office:value-type="float" office:value="-0.00303611">
                <text:p>-0.00303611</text:p>
              </table:table-cell>
            </table:table-row>
            <table:table-row>
              <table:table-cell office:value-type="string">
                <text:p>3069</text:p>
              </table:table-cell>
              <table:table-cell office:value-type="float" office:value="675.182495117188">
                <text:p>675.182495117188</text:p>
              </table:table-cell>
              <table:table-cell office:value-type="float" office:value="-0.001560983">
                <text:p>-0.001560983</text:p>
              </table:table-cell>
            </table:table-row>
            <table:table-row>
              <table:table-cell office:value-type="string">
                <text:p>3070</text:p>
              </table:table-cell>
              <table:table-cell office:value-type="float" office:value="675.302429199219">
                <text:p>675.302429199219</text:p>
              </table:table-cell>
              <table:table-cell office:value-type="float" office:value="0.005706828">
                <text:p>0.005706828</text:p>
              </table:table-cell>
            </table:table-row>
            <table:table-row>
              <table:table-cell office:value-type="string">
                <text:p>3071</text:p>
              </table:table-cell>
              <table:table-cell office:value-type="float" office:value="675.42236328125">
                <text:p>675.42236328125</text:p>
              </table:table-cell>
              <table:table-cell office:value-type="float" office:value="0.01260708">
                <text:p>0.01260708</text:p>
              </table:table-cell>
            </table:table-row>
            <table:table-row>
              <table:table-cell office:value-type="string">
                <text:p>3072</text:p>
              </table:table-cell>
              <table:table-cell office:value-type="float" office:value="675.542297363281">
                <text:p>675.542297363281</text:p>
              </table:table-cell>
              <table:table-cell office:value-type="float" office:value="0.01215482">
                <text:p>0.01215482</text:p>
              </table:table-cell>
            </table:table-row>
            <table:table-row>
              <table:table-cell office:value-type="string">
                <text:p>3073</text:p>
              </table:table-cell>
              <table:table-cell office:value-type="float" office:value="675.662292480469">
                <text:p>675.662292480469</text:p>
              </table:table-cell>
              <table:table-cell office:value-type="float" office:value="0.006956536">
                <text:p>0.006956536</text:p>
              </table:table-cell>
            </table:table-row>
            <table:table-row>
              <table:table-cell office:value-type="string">
                <text:p>3074</text:p>
              </table:table-cell>
              <table:table-cell office:value-type="float" office:value="675.7822265625">
                <text:p>675.7822265625</text:p>
              </table:table-cell>
              <table:table-cell office:value-type="float" office:value="0.008863514">
                <text:p>0.008863514</text:p>
              </table:table-cell>
            </table:table-row>
            <table:table-row>
              <table:table-cell office:value-type="string">
                <text:p>3075</text:p>
              </table:table-cell>
              <table:table-cell office:value-type="float" office:value="675.902160644531">
                <text:p>675.902160644531</text:p>
              </table:table-cell>
              <table:table-cell office:value-type="float" office:value="-0.004688901">
                <text:p>-0.004688901</text:p>
              </table:table-cell>
            </table:table-row>
            <table:table-row>
              <table:table-cell office:value-type="string">
                <text:p>3076</text:p>
              </table:table-cell>
              <table:table-cell office:value-type="float" office:value="676.022155761719">
                <text:p>676.022155761719</text:p>
              </table:table-cell>
              <table:table-cell office:value-type="float" office:value="0.009879598">
                <text:p>0.009879598</text:p>
              </table:table-cell>
            </table:table-row>
            <table:table-row>
              <table:table-cell office:value-type="string">
                <text:p>3077</text:p>
              </table:table-cell>
              <table:table-cell office:value-type="float" office:value="676.14208984375">
                <text:p>676.14208984375</text:p>
              </table:table-cell>
              <table:table-cell office:value-type="float" office:value="0.002196962">
                <text:p>0.002196962</text:p>
              </table:table-cell>
            </table:table-row>
            <table:table-row>
              <table:table-cell office:value-type="string">
                <text:p>3078</text:p>
              </table:table-cell>
              <table:table-cell office:value-type="float" office:value="676.262023925781">
                <text:p>676.262023925781</text:p>
              </table:table-cell>
              <table:table-cell office:value-type="float" office:value="-0.004279924">
                <text:p>-0.004279924</text:p>
              </table:table-cell>
            </table:table-row>
            <table:table-row>
              <table:table-cell office:value-type="string">
                <text:p>3079</text:p>
              </table:table-cell>
              <table:table-cell office:value-type="float" office:value="676.382019042969">
                <text:p>676.382019042969</text:p>
              </table:table-cell>
              <table:table-cell office:value-type="float" office:value="0.01020849">
                <text:p>0.01020849</text:p>
              </table:table-cell>
            </table:table-row>
            <table:table-row>
              <table:table-cell office:value-type="string">
                <text:p>3080</text:p>
              </table:table-cell>
              <table:table-cell office:value-type="float" office:value="676.501953125">
                <text:p>676.501953125</text:p>
              </table:table-cell>
              <table:table-cell office:value-type="float" office:value="0.002898449">
                <text:p>0.002898449</text:p>
              </table:table-cell>
            </table:table-row>
            <table:table-row>
              <table:table-cell office:value-type="string">
                <text:p>3081</text:p>
              </table:table-cell>
              <table:table-cell office:value-type="float" office:value="676.621948242188">
                <text:p>676.621948242188</text:p>
              </table:table-cell>
              <table:table-cell office:value-type="float" office:value="-0.004419505">
                <text:p>-0.004419505</text:p>
              </table:table-cell>
            </table:table-row>
            <table:table-row>
              <table:table-cell office:value-type="string">
                <text:p>3082</text:p>
              </table:table-cell>
              <table:table-cell office:value-type="float" office:value="676.741882324219">
                <text:p>676.741882324219</text:p>
              </table:table-cell>
              <table:table-cell office:value-type="float" office:value="-0.008172921">
                <text:p>-0.008172921</text:p>
              </table:table-cell>
            </table:table-row>
            <table:table-row>
              <table:table-cell office:value-type="string">
                <text:p>3083</text:p>
              </table:table-cell>
              <table:table-cell office:value-type="float" office:value="676.861877441406">
                <text:p>676.861877441406</text:p>
              </table:table-cell>
              <table:table-cell office:value-type="float" office:value="0.001046263">
                <text:p>0.001046263</text:p>
              </table:table-cell>
            </table:table-row>
            <table:table-row>
              <table:table-cell office:value-type="string">
                <text:p>3084</text:p>
              </table:table-cell>
              <table:table-cell office:value-type="float" office:value="676.981811523438">
                <text:p>676.981811523438</text:p>
              </table:table-cell>
              <table:table-cell office:value-type="float" office:value="0.004055373">
                <text:p>0.004055373</text:p>
              </table:table-cell>
            </table:table-row>
            <table:table-row>
              <table:table-cell office:value-type="string">
                <text:p>3085</text:p>
              </table:table-cell>
              <table:table-cell office:value-type="float" office:value="677.101806640625">
                <text:p>677.101806640625</text:p>
              </table:table-cell>
              <table:table-cell office:value-type="float" office:value="0.002512383">
                <text:p>0.002512383</text:p>
              </table:table-cell>
            </table:table-row>
            <table:table-row>
              <table:table-cell office:value-type="string">
                <text:p>3086</text:p>
              </table:table-cell>
              <table:table-cell office:value-type="float" office:value="677.221740722656">
                <text:p>677.221740722656</text:p>
              </table:table-cell>
              <table:table-cell office:value-type="float" office:value="-0.002649581">
                <text:p>-0.002649581</text:p>
              </table:table-cell>
            </table:table-row>
            <table:table-row>
              <table:table-cell office:value-type="string">
                <text:p>3087</text:p>
              </table:table-cell>
              <table:table-cell office:value-type="float" office:value="677.341735839844">
                <text:p>677.341735839844</text:p>
              </table:table-cell>
              <table:table-cell office:value-type="float" office:value="0.00947703">
                <text:p>0.00947703</text:p>
              </table:table-cell>
            </table:table-row>
            <table:table-row>
              <table:table-cell office:value-type="string">
                <text:p>3088</text:p>
              </table:table-cell>
              <table:table-cell office:value-type="float" office:value="677.461669921875">
                <text:p>677.461669921875</text:p>
              </table:table-cell>
              <table:table-cell office:value-type="float" office:value="-0.0007174698">
                <text:p>-0.0007174698</text:p>
              </table:table-cell>
            </table:table-row>
            <table:table-row>
              <table:table-cell office:value-type="string">
                <text:p>3089</text:p>
              </table:table-cell>
              <table:table-cell office:value-type="float" office:value="677.581665039063">
                <text:p>677.581665039063</text:p>
              </table:table-cell>
              <table:table-cell office:value-type="float" office:value="0.004651621">
                <text:p>0.004651621</text:p>
              </table:table-cell>
            </table:table-row>
            <table:table-row>
              <table:table-cell office:value-type="string">
                <text:p>3090</text:p>
              </table:table-cell>
              <table:table-cell office:value-type="float" office:value="677.70166015625">
                <text:p>677.70166015625</text:p>
              </table:table-cell>
              <table:table-cell office:value-type="float" office:value="-0.001582968">
                <text:p>-0.001582968</text:p>
              </table:table-cell>
            </table:table-row>
            <table:table-row>
              <table:table-cell office:value-type="string">
                <text:p>3091</text:p>
              </table:table-cell>
              <table:table-cell office:value-type="float" office:value="677.821594238281">
                <text:p>677.821594238281</text:p>
              </table:table-cell>
              <table:table-cell office:value-type="float" office:value="0.006040333">
                <text:p>0.006040333</text:p>
              </table:table-cell>
            </table:table-row>
            <table:table-row>
              <table:table-cell office:value-type="string">
                <text:p>3092</text:p>
              </table:table-cell>
              <table:table-cell office:value-type="float" office:value="677.941589355469">
                <text:p>677.941589355469</text:p>
              </table:table-cell>
              <table:table-cell office:value-type="float" office:value="0.002328324">
                <text:p>0.002328324</text:p>
              </table:table-cell>
            </table:table-row>
            <table:table-row>
              <table:table-cell office:value-type="string">
                <text:p>3093</text:p>
              </table:table-cell>
              <table:table-cell office:value-type="float" office:value="678.061584472656">
                <text:p>678.061584472656</text:p>
              </table:table-cell>
              <table:table-cell office:value-type="float" office:value="-0.0003970255">
                <text:p>-0.0003970255</text:p>
              </table:table-cell>
            </table:table-row>
            <table:table-row>
              <table:table-cell office:value-type="string">
                <text:p>3094</text:p>
              </table:table-cell>
              <table:table-cell office:value-type="float" office:value="678.181518554688">
                <text:p>678.181518554688</text:p>
              </table:table-cell>
              <table:table-cell office:value-type="float" office:value="-0.001510191">
                <text:p>-0.001510191</text:p>
              </table:table-cell>
            </table:table-row>
            <table:table-row>
              <table:table-cell office:value-type="string">
                <text:p>3095</text:p>
              </table:table-cell>
              <table:table-cell office:value-type="float" office:value="678.301513671875">
                <text:p>678.301513671875</text:p>
              </table:table-cell>
              <table:table-cell office:value-type="float" office:value="0.00379384">
                <text:p>0.00379384</text:p>
              </table:table-cell>
            </table:table-row>
            <table:table-row>
              <table:table-cell office:value-type="string">
                <text:p>3096</text:p>
              </table:table-cell>
              <table:table-cell office:value-type="float" office:value="678.421508789063">
                <text:p>678.421508789063</text:p>
              </table:table-cell>
              <table:table-cell office:value-type="float" office:value="-0.002404731">
                <text:p>-0.002404731</text:p>
              </table:table-cell>
            </table:table-row>
            <table:table-row>
              <table:table-cell office:value-type="string">
                <text:p>3097</text:p>
              </table:table-cell>
              <table:table-cell office:value-type="float" office:value="678.541442871094">
                <text:p>678.541442871094</text:p>
              </table:table-cell>
              <table:table-cell office:value-type="float" office:value="0.0154198">
                <text:p>0.0154198</text:p>
              </table:table-cell>
            </table:table-row>
            <table:table-row>
              <table:table-cell office:value-type="string">
                <text:p>3098</text:p>
              </table:table-cell>
              <table:table-cell office:value-type="float" office:value="678.661437988281">
                <text:p>678.6614379882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99</text:p>
              </table:table-cell>
              <table:table-cell office:value-type="float" office:value="678.781433105469">
                <text:p>678.781433105469</text:p>
              </table:table-cell>
              <table:table-cell office:value-type="float" office:value="0.0045058">
                <text:p>0.0045058</text:p>
              </table:table-cell>
            </table:table-row>
            <table:table-row>
              <table:table-cell office:value-type="string">
                <text:p>3100</text:p>
              </table:table-cell>
              <table:table-cell office:value-type="float" office:value="678.901428222656">
                <text:p>678.901428222656</text:p>
              </table:table-cell>
              <table:table-cell office:value-type="float" office:value="0.006749366">
                <text:p>0.006749366</text:p>
              </table:table-cell>
            </table:table-row>
            <table:table-row>
              <table:table-cell office:value-type="string">
                <text:p>3101</text:p>
              </table:table-cell>
              <table:table-cell office:value-type="float" office:value="679.021362304688">
                <text:p>679.021362304688</text:p>
              </table:table-cell>
              <table:table-cell office:value-type="float" office:value="0.004954498">
                <text:p>0.004954498</text:p>
              </table:table-cell>
            </table:table-row>
            <table:table-row>
              <table:table-cell office:value-type="string">
                <text:p>3102</text:p>
              </table:table-cell>
              <table:table-cell office:value-type="float" office:value="679.141357421875">
                <text:p>679.141357421875</text:p>
              </table:table-cell>
              <table:table-cell office:value-type="float" office:value="0.001509238">
                <text:p>0.001509238</text:p>
              </table:table-cell>
            </table:table-row>
            <table:table-row>
              <table:table-cell office:value-type="string">
                <text:p>3103</text:p>
              </table:table-cell>
              <table:table-cell office:value-type="float" office:value="679.261352539063">
                <text:p>679.261352539063</text:p>
              </table:table-cell>
              <table:table-cell office:value-type="float" office:value="0.007918522">
                <text:p>0.007918522</text:p>
              </table:table-cell>
            </table:table-row>
            <table:table-row>
              <table:table-cell office:value-type="string">
                <text:p>3104</text:p>
              </table:table-cell>
              <table:table-cell office:value-type="float" office:value="679.38134765625">
                <text:p>679.38134765625</text:p>
              </table:table-cell>
              <table:table-cell office:value-type="float" office:value="0.00879342">
                <text:p>0.00879342</text:p>
              </table:table-cell>
            </table:table-row>
            <table:table-row>
              <table:table-cell office:value-type="string">
                <text:p>3105</text:p>
              </table:table-cell>
              <table:table-cell office:value-type="float" office:value="679.501342773438">
                <text:p>679.501342773438</text:p>
              </table:table-cell>
              <table:table-cell office:value-type="float" office:value="-0.002778969">
                <text:p>-0.002778969</text:p>
              </table:table-cell>
            </table:table-row>
            <table:table-row>
              <table:table-cell office:value-type="string">
                <text:p>3106</text:p>
              </table:table-cell>
              <table:table-cell office:value-type="float" office:value="679.621337890625">
                <text:p>679.621337890625</text:p>
              </table:table-cell>
              <table:table-cell office:value-type="float" office:value="0.005817332">
                <text:p>0.005817332</text:p>
              </table:table-cell>
            </table:table-row>
            <table:table-row>
              <table:table-cell office:value-type="string">
                <text:p>3107</text:p>
              </table:table-cell>
              <table:table-cell office:value-type="float" office:value="679.741333007813">
                <text:p>679.741333007813</text:p>
              </table:table-cell>
              <table:table-cell office:value-type="float" office:value="0.003003959">
                <text:p>0.003003959</text:p>
              </table:table-cell>
            </table:table-row>
            <table:table-row>
              <table:table-cell office:value-type="string">
                <text:p>3108</text:p>
              </table:table-cell>
              <table:table-cell office:value-type="float" office:value="679.861267089844">
                <text:p>679.861267089844</text:p>
              </table:table-cell>
              <table:table-cell office:value-type="float" office:value="0.004635262">
                <text:p>0.004635262</text:p>
              </table:table-cell>
            </table:table-row>
            <table:table-row>
              <table:table-cell office:value-type="string">
                <text:p>3109</text:p>
              </table:table-cell>
              <table:table-cell office:value-type="float" office:value="679.981262207031">
                <text:p>679.981262207031</text:p>
              </table:table-cell>
              <table:table-cell office:value-type="float" office:value="0.0002036656">
                <text:p>0.0002036656</text:p>
              </table:table-cell>
            </table:table-row>
            <table:table-row>
              <table:table-cell office:value-type="string">
                <text:p>3110</text:p>
              </table:table-cell>
              <table:table-cell office:value-type="float" office:value="680.101257324219">
                <text:p>680.101257324219</text:p>
              </table:table-cell>
              <table:table-cell office:value-type="float" office:value="-0.003559782">
                <text:p>-0.003559782</text:p>
              </table:table-cell>
            </table:table-row>
            <table:table-row>
              <table:table-cell office:value-type="string">
                <text:p>3111</text:p>
              </table:table-cell>
              <table:table-cell office:value-type="float" office:value="680.221252441406">
                <text:p>680.221252441406</text:p>
              </table:table-cell>
              <table:table-cell office:value-type="float" office:value="0.01017107">
                <text:p>0.01017107</text:p>
              </table:table-cell>
            </table:table-row>
            <table:table-row>
              <table:table-cell office:value-type="string">
                <text:p>3112</text:p>
              </table:table-cell>
              <table:table-cell office:value-type="float" office:value="680.341247558594">
                <text:p>680.341247558594</text:p>
              </table:table-cell>
              <table:table-cell office:value-type="float" office:value="-0.00205051">
                <text:p>-0.00205051</text:p>
              </table:table-cell>
            </table:table-row>
            <table:table-row>
              <table:table-cell office:value-type="string">
                <text:p>3113</text:p>
              </table:table-cell>
              <table:table-cell office:value-type="float" office:value="680.461242675781">
                <text:p>680.461242675781</text:p>
              </table:table-cell>
              <table:table-cell office:value-type="float" office:value="-0.001699138">
                <text:p>-0.001699138</text:p>
              </table:table-cell>
            </table:table-row>
            <table:table-row>
              <table:table-cell office:value-type="string">
                <text:p>3114</text:p>
              </table:table-cell>
              <table:table-cell office:value-type="float" office:value="680.581237792969">
                <text:p>680.581237792969</text:p>
              </table:table-cell>
              <table:table-cell office:value-type="float" office:value="0.00163497">
                <text:p>0.00163497</text:p>
              </table:table-cell>
            </table:table-row>
            <table:table-row>
              <table:table-cell office:value-type="string">
                <text:p>3115</text:p>
              </table:table-cell>
              <table:table-cell office:value-type="float" office:value="680.701232910156">
                <text:p>680.701232910156</text:p>
              </table:table-cell>
              <table:table-cell office:value-type="float" office:value="0.004946897">
                <text:p>0.004946897</text:p>
              </table:table-cell>
            </table:table-row>
            <table:table-row>
              <table:table-cell office:value-type="string">
                <text:p>3116</text:p>
              </table:table-cell>
              <table:table-cell office:value-type="float" office:value="680.821228027344">
                <text:p>680.821228027344</text:p>
              </table:table-cell>
              <table:table-cell office:value-type="float" office:value="0.004985277">
                <text:p>0.004985277</text:p>
              </table:table-cell>
            </table:table-row>
            <table:table-row>
              <table:table-cell office:value-type="string">
                <text:p>3117</text:p>
              </table:table-cell>
              <table:table-cell office:value-type="float" office:value="680.941223144531">
                <text:p>680.941223144531</text:p>
              </table:table-cell>
              <table:table-cell office:value-type="float" office:value="0.0008899443">
                <text:p>0.0008899443</text:p>
              </table:table-cell>
            </table:table-row>
            <table:table-row>
              <table:table-cell office:value-type="string">
                <text:p>3118</text:p>
              </table:table-cell>
              <table:table-cell office:value-type="float" office:value="681.061218261719">
                <text:p>681.061218261719</text:p>
              </table:table-cell>
              <table:table-cell office:value-type="float" office:value="-0.0003022234">
                <text:p>-0.0003022234</text:p>
              </table:table-cell>
            </table:table-row>
            <table:table-row>
              <table:table-cell office:value-type="string">
                <text:p>3119</text:p>
              </table:table-cell>
              <table:table-cell office:value-type="float" office:value="681.181274414063">
                <text:p>681.1812744140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20</text:p>
              </table:table-cell>
              <table:table-cell office:value-type="float" office:value="681.30126953125">
                <text:p>681.30126953125</text:p>
              </table:table-cell>
              <table:table-cell office:value-type="float" office:value="0.004155833">
                <text:p>0.004155833</text:p>
              </table:table-cell>
            </table:table-row>
            <table:table-row>
              <table:table-cell office:value-type="string">
                <text:p>3121</text:p>
              </table:table-cell>
              <table:table-cell office:value-type="float" office:value="681.421264648438">
                <text:p>681.421264648438</text:p>
              </table:table-cell>
              <table:table-cell office:value-type="float" office:value="0.00594867">
                <text:p>0.00594867</text:p>
              </table:table-cell>
            </table:table-row>
            <table:table-row>
              <table:table-cell office:value-type="string">
                <text:p>3122</text:p>
              </table:table-cell>
              <table:table-cell office:value-type="float" office:value="681.541259765625">
                <text:p>681.541259765625</text:p>
              </table:table-cell>
              <table:table-cell office:value-type="float" office:value="-0.008061353">
                <text:p>-0.008061353</text:p>
              </table:table-cell>
            </table:table-row>
            <table:table-row>
              <table:table-cell office:value-type="string">
                <text:p>3123</text:p>
              </table:table-cell>
              <table:table-cell office:value-type="float" office:value="681.661254882813">
                <text:p>681.661254882813</text:p>
              </table:table-cell>
              <table:table-cell office:value-type="float" office:value="0.00378444">
                <text:p>0.00378444</text:p>
              </table:table-cell>
            </table:table-row>
            <table:table-row>
              <table:table-cell office:value-type="string">
                <text:p>3124</text:p>
              </table:table-cell>
              <table:table-cell office:value-type="float" office:value="681.78125">
                <text:p>681.78125</text:p>
              </table:table-cell>
              <table:table-cell office:value-type="float" office:value="-0.004433668">
                <text:p>-0.004433668</text:p>
              </table:table-cell>
            </table:table-row>
            <table:table-row>
              <table:table-cell office:value-type="string">
                <text:p>3125</text:p>
              </table:table-cell>
              <table:table-cell office:value-type="float" office:value="681.901245117188">
                <text:p>681.901245117188</text:p>
              </table:table-cell>
              <table:table-cell office:value-type="float" office:value="0.004273194">
                <text:p>0.004273194</text:p>
              </table:table-cell>
            </table:table-row>
            <table:table-row>
              <table:table-cell office:value-type="string">
                <text:p>3126</text:p>
              </table:table-cell>
              <table:table-cell office:value-type="float" office:value="682.021301269531">
                <text:p>682.021301269531</text:p>
              </table:table-cell>
              <table:table-cell office:value-type="float" office:value="-0.001628016">
                <text:p>-0.001628016</text:p>
              </table:table-cell>
            </table:table-row>
            <table:table-row>
              <table:table-cell office:value-type="string">
                <text:p>3127</text:p>
              </table:table-cell>
              <table:table-cell office:value-type="float" office:value="682.141296386719">
                <text:p>682.141296386719</text:p>
              </table:table-cell>
              <table:table-cell office:value-type="float" office:value="-0.002745304">
                <text:p>-0.002745304</text:p>
              </table:table-cell>
            </table:table-row>
            <table:table-row>
              <table:table-cell office:value-type="string">
                <text:p>3128</text:p>
              </table:table-cell>
              <table:table-cell office:value-type="float" office:value="682.261291503906">
                <text:p>682.261291503906</text:p>
              </table:table-cell>
              <table:table-cell office:value-type="float" office:value="-0.002263146">
                <text:p>-0.002263146</text:p>
              </table:table-cell>
            </table:table-row>
            <table:table-row>
              <table:table-cell office:value-type="string">
                <text:p>3129</text:p>
              </table:table-cell>
              <table:table-cell office:value-type="float" office:value="682.381286621094">
                <text:p>682.381286621094</text:p>
              </table:table-cell>
              <table:table-cell office:value-type="float" office:value="0.000715784">
                <text:p>0.000715784</text:p>
              </table:table-cell>
            </table:table-row>
            <table:table-row>
              <table:table-cell office:value-type="string">
                <text:p>3130</text:p>
              </table:table-cell>
              <table:table-cell office:value-type="float" office:value="682.501342773438">
                <text:p>682.501342773438</text:p>
              </table:table-cell>
              <table:table-cell office:value-type="float" office:value="0.004833795">
                <text:p>0.004833795</text:p>
              </table:table-cell>
            </table:table-row>
            <table:table-row>
              <table:table-cell office:value-type="string">
                <text:p>3131</text:p>
              </table:table-cell>
              <table:table-cell office:value-type="float" office:value="682.621337890625">
                <text:p>682.621337890625</text:p>
              </table:table-cell>
              <table:table-cell office:value-type="float" office:value="0.0001134677">
                <text:p>0.0001134677</text:p>
              </table:table-cell>
            </table:table-row>
            <table:table-row>
              <table:table-cell office:value-type="string">
                <text:p>3132</text:p>
              </table:table-cell>
              <table:table-cell office:value-type="float" office:value="682.741333007813">
                <text:p>682.741333007813</text:p>
              </table:table-cell>
              <table:table-cell office:value-type="float" office:value="-0.001347513">
                <text:p>-0.001347513</text:p>
              </table:table-cell>
            </table:table-row>
            <table:table-row>
              <table:table-cell office:value-type="string">
                <text:p>3133</text:p>
              </table:table-cell>
              <table:table-cell office:value-type="float" office:value="682.861389160156">
                <text:p>682.861389160156</text:p>
              </table:table-cell>
              <table:table-cell office:value-type="float" office:value="0.001604414">
                <text:p>0.001604414</text:p>
              </table:table-cell>
            </table:table-row>
            <table:table-row>
              <table:table-cell office:value-type="string">
                <text:p>3134</text:p>
              </table:table-cell>
              <table:table-cell office:value-type="float" office:value="682.981384277344">
                <text:p>682.981384277344</text:p>
              </table:table-cell>
              <table:table-cell office:value-type="float" office:value="0.00268558">
                <text:p>0.00268558</text:p>
              </table:table-cell>
            </table:table-row>
            <table:table-row>
              <table:table-cell office:value-type="string">
                <text:p>3135</text:p>
              </table:table-cell>
              <table:table-cell office:value-type="float" office:value="683.101379394531">
                <text:p>683.101379394531</text:p>
              </table:table-cell>
              <table:table-cell office:value-type="float" office:value="-0.00478486">
                <text:p>-0.00478486</text:p>
              </table:table-cell>
            </table:table-row>
            <table:table-row>
              <table:table-cell office:value-type="string">
                <text:p>3136</text:p>
              </table:table-cell>
              <table:table-cell office:value-type="float" office:value="683.221435546875">
                <text:p>683.221435546875</text:p>
              </table:table-cell>
              <table:table-cell office:value-type="float" office:value="0.001316709">
                <text:p>0.001316709</text:p>
              </table:table-cell>
            </table:table-row>
            <table:table-row>
              <table:table-cell office:value-type="string">
                <text:p>3137</text:p>
              </table:table-cell>
              <table:table-cell office:value-type="float" office:value="683.341430664063">
                <text:p>683.341430664063</text:p>
              </table:table-cell>
              <table:table-cell office:value-type="float" office:value="-0.00650036">
                <text:p>-0.00650036</text:p>
              </table:table-cell>
            </table:table-row>
            <table:table-row>
              <table:table-cell office:value-type="string">
                <text:p>3138</text:p>
              </table:table-cell>
              <table:table-cell office:value-type="float" office:value="683.46142578125">
                <text:p>683.46142578125</text:p>
              </table:table-cell>
              <table:table-cell office:value-type="float" office:value="-0.005794793">
                <text:p>-0.005794793</text:p>
              </table:table-cell>
            </table:table-row>
            <table:table-row>
              <table:table-cell office:value-type="string">
                <text:p>3139</text:p>
              </table:table-cell>
              <table:table-cell office:value-type="float" office:value="683.581481933594">
                <text:p>683.581481933594</text:p>
              </table:table-cell>
              <table:table-cell office:value-type="float" office:value="-0.002582148">
                <text:p>-0.002582148</text:p>
              </table:table-cell>
            </table:table-row>
            <table:table-row>
              <table:table-cell office:value-type="string">
                <text:p>3140</text:p>
              </table:table-cell>
              <table:table-cell office:value-type="float" office:value="683.701477050781">
                <text:p>683.701477050781</text:p>
              </table:table-cell>
              <table:table-cell office:value-type="float" office:value="-0.000703382">
                <text:p>-0.000703382</text:p>
              </table:table-cell>
            </table:table-row>
            <table:table-row>
              <table:table-cell office:value-type="string">
                <text:p>3141</text:p>
              </table:table-cell>
              <table:table-cell office:value-type="float" office:value="683.821533203125">
                <text:p>683.821533203125</text:p>
              </table:table-cell>
              <table:table-cell office:value-type="float" office:value="-0.003560994">
                <text:p>-0.003560994</text:p>
              </table:table-cell>
            </table:table-row>
            <table:table-row>
              <table:table-cell office:value-type="string">
                <text:p>3142</text:p>
              </table:table-cell>
              <table:table-cell office:value-type="float" office:value="683.941528320313">
                <text:p>683.941528320313</text:p>
              </table:table-cell>
              <table:table-cell office:value-type="float" office:value="-0.004197573">
                <text:p>-0.004197573</text:p>
              </table:table-cell>
            </table:table-row>
            <table:table-row>
              <table:table-cell office:value-type="string">
                <text:p>3143</text:p>
              </table:table-cell>
              <table:table-cell office:value-type="float" office:value="684.061584472656">
                <text:p>684.061584472656</text:p>
              </table:table-cell>
              <table:table-cell office:value-type="float" office:value="0.005127713">
                <text:p>0.005127713</text:p>
              </table:table-cell>
            </table:table-row>
            <table:table-row>
              <table:table-cell office:value-type="string">
                <text:p>3144</text:p>
              </table:table-cell>
              <table:table-cell office:value-type="float" office:value="684.181579589844">
                <text:p>684.181579589844</text:p>
              </table:table-cell>
              <table:table-cell office:value-type="float" office:value="-0.008847977">
                <text:p>-0.008847977</text:p>
              </table:table-cell>
            </table:table-row>
            <table:table-row>
              <table:table-cell office:value-type="string">
                <text:p>3145</text:p>
              </table:table-cell>
              <table:table-cell office:value-type="float" office:value="684.301635742188">
                <text:p>684.301635742188</text:p>
              </table:table-cell>
              <table:table-cell office:value-type="float" office:value="-0.003655374">
                <text:p>-0.003655374</text:p>
              </table:table-cell>
            </table:table-row>
            <table:table-row>
              <table:table-cell office:value-type="string">
                <text:p>3146</text:p>
              </table:table-cell>
              <table:table-cell office:value-type="float" office:value="684.421630859375">
                <text:p>684.421630859375</text:p>
              </table:table-cell>
              <table:table-cell office:value-type="float" office:value="-0.005880857">
                <text:p>-0.005880857</text:p>
              </table:table-cell>
            </table:table-row>
            <table:table-row>
              <table:table-cell office:value-type="string">
                <text:p>3147</text:p>
              </table:table-cell>
              <table:table-cell office:value-type="float" office:value="684.541687011719">
                <text:p>684.541687011719</text:p>
              </table:table-cell>
              <table:table-cell office:value-type="float" office:value="0.006040442">
                <text:p>0.006040442</text:p>
              </table:table-cell>
            </table:table-row>
            <table:table-row>
              <table:table-cell office:value-type="string">
                <text:p>3148</text:p>
              </table:table-cell>
              <table:table-cell office:value-type="float" office:value="684.661682128906">
                <text:p>684.661682128906</text:p>
              </table:table-cell>
              <table:table-cell office:value-type="float" office:value="-0.003267033">
                <text:p>-0.003267033</text:p>
              </table:table-cell>
            </table:table-row>
            <table:table-row>
              <table:table-cell office:value-type="string">
                <text:p>3149</text:p>
              </table:table-cell>
              <table:table-cell office:value-type="float" office:value="684.78173828125">
                <text:p>684.78173828125</text:p>
              </table:table-cell>
              <table:table-cell office:value-type="float" office:value="0.008025996">
                <text:p>0.008025996</text:p>
              </table:table-cell>
            </table:table-row>
            <table:table-row>
              <table:table-cell office:value-type="string">
                <text:p>3150</text:p>
              </table:table-cell>
              <table:table-cell office:value-type="float" office:value="684.901733398438">
                <text:p>684.901733398438</text:p>
              </table:table-cell>
              <table:table-cell office:value-type="float" office:value="0.009317241">
                <text:p>0.009317241</text:p>
              </table:table-cell>
            </table:table-row>
            <table:table-row>
              <table:table-cell office:value-type="string">
                <text:p>3151</text:p>
              </table:table-cell>
              <table:table-cell office:value-type="float" office:value="685.021789550781">
                <text:p>685.021789550781</text:p>
              </table:table-cell>
              <table:table-cell office:value-type="float" office:value="-0.002490516">
                <text:p>-0.002490516</text:p>
              </table:table-cell>
            </table:table-row>
            <table:table-row>
              <table:table-cell office:value-type="string">
                <text:p>3152</text:p>
              </table:table-cell>
              <table:table-cell office:value-type="float" office:value="685.141784667969">
                <text:p>685.141784667969</text:p>
              </table:table-cell>
              <table:table-cell office:value-type="float" office:value="0.002223937">
                <text:p>0.002223937</text:p>
              </table:table-cell>
            </table:table-row>
            <table:table-row>
              <table:table-cell office:value-type="string">
                <text:p>3153</text:p>
              </table:table-cell>
              <table:table-cell office:value-type="float" office:value="685.261840820313">
                <text:p>685.261840820313</text:p>
              </table:table-cell>
              <table:table-cell office:value-type="float" office:value="0.01065745">
                <text:p>0.01065745</text:p>
              </table:table-cell>
            </table:table-row>
            <table:table-row>
              <table:table-cell office:value-type="string">
                <text:p>3154</text:p>
              </table:table-cell>
              <table:table-cell office:value-type="float" office:value="685.381896972656">
                <text:p>685.381896972656</text:p>
              </table:table-cell>
              <table:table-cell office:value-type="float" office:value="0.00343798">
                <text:p>0.00343798</text:p>
              </table:table-cell>
            </table:table-row>
            <table:table-row>
              <table:table-cell office:value-type="string">
                <text:p>3155</text:p>
              </table:table-cell>
              <table:table-cell office:value-type="float" office:value="685.501892089844">
                <text:p>685.501892089844</text:p>
              </table:table-cell>
              <table:table-cell office:value-type="float" office:value="-0.00208197">
                <text:p>-0.00208197</text:p>
              </table:table-cell>
            </table:table-row>
            <table:table-row>
              <table:table-cell office:value-type="string">
                <text:p>3156</text:p>
              </table:table-cell>
              <table:table-cell office:value-type="float" office:value="685.621948242188">
                <text:p>685.621948242188</text:p>
              </table:table-cell>
              <table:table-cell office:value-type="float" office:value="0.01194208">
                <text:p>0.01194208</text:p>
              </table:table-cell>
            </table:table-row>
            <table:table-row>
              <table:table-cell office:value-type="string">
                <text:p>3157</text:p>
              </table:table-cell>
              <table:table-cell office:value-type="float" office:value="685.742004394531">
                <text:p>685.742004394531</text:p>
              </table:table-cell>
              <table:table-cell office:value-type="float" office:value="0.0005923983">
                <text:p>0.0005923983</text:p>
              </table:table-cell>
            </table:table-row>
            <table:table-row>
              <table:table-cell office:value-type="string">
                <text:p>3158</text:p>
              </table:table-cell>
              <table:table-cell office:value-type="float" office:value="685.861999511719">
                <text:p>685.861999511719</text:p>
              </table:table-cell>
              <table:table-cell office:value-type="float" office:value="0.001695004">
                <text:p>0.001695004</text:p>
              </table:table-cell>
            </table:table-row>
            <table:table-row>
              <table:table-cell office:value-type="string">
                <text:p>3159</text:p>
              </table:table-cell>
              <table:table-cell office:value-type="float" office:value="685.982055664063">
                <text:p>685.982055664063</text:p>
              </table:table-cell>
              <table:table-cell office:value-type="float" office:value="-0.002337741">
                <text:p>-0.002337741</text:p>
              </table:table-cell>
            </table:table-row>
            <table:table-row>
              <table:table-cell office:value-type="string">
                <text:p>3160</text:p>
              </table:table-cell>
              <table:table-cell office:value-type="float" office:value="686.102111816406">
                <text:p>686.102111816406</text:p>
              </table:table-cell>
              <table:table-cell office:value-type="float" office:value="0.003194155">
                <text:p>0.003194155</text:p>
              </table:table-cell>
            </table:table-row>
            <table:table-row>
              <table:table-cell office:value-type="string">
                <text:p>3161</text:p>
              </table:table-cell>
              <table:table-cell office:value-type="float" office:value="686.22216796875">
                <text:p>686.22216796875</text:p>
              </table:table-cell>
              <table:table-cell office:value-type="float" office:value="-0.00601769">
                <text:p>-0.00601769</text:p>
              </table:table-cell>
            </table:table-row>
            <table:table-row>
              <table:table-cell office:value-type="string">
                <text:p>3162</text:p>
              </table:table-cell>
              <table:table-cell office:value-type="float" office:value="686.342163085938">
                <text:p>686.342163085938</text:p>
              </table:table-cell>
              <table:table-cell office:value-type="float" office:value="-0.005338161">
                <text:p>-0.005338161</text:p>
              </table:table-cell>
            </table:table-row>
            <table:table-row>
              <table:table-cell office:value-type="string">
                <text:p>3163</text:p>
              </table:table-cell>
              <table:table-cell office:value-type="float" office:value="686.462219238281">
                <text:p>686.462219238281</text:p>
              </table:table-cell>
              <table:table-cell office:value-type="float" office:value="0.002460359">
                <text:p>0.002460359</text:p>
              </table:table-cell>
            </table:table-row>
            <table:table-row>
              <table:table-cell office:value-type="string">
                <text:p>3164</text:p>
              </table:table-cell>
              <table:table-cell office:value-type="float" office:value="686.582275390625">
                <text:p>686.582275390625</text:p>
              </table:table-cell>
              <table:table-cell office:value-type="float" office:value="0.000611349">
                <text:p>0.000611349</text:p>
              </table:table-cell>
            </table:table-row>
            <table:table-row>
              <table:table-cell office:value-type="string">
                <text:p>3165</text:p>
              </table:table-cell>
              <table:table-cell office:value-type="float" office:value="686.702331542969">
                <text:p>686.702331542969</text:p>
              </table:table-cell>
              <table:table-cell office:value-type="float" office:value="0.003505973">
                <text:p>0.003505973</text:p>
              </table:table-cell>
            </table:table-row>
            <table:table-row>
              <table:table-cell office:value-type="string">
                <text:p>3166</text:p>
              </table:table-cell>
              <table:table-cell office:value-type="float" office:value="686.822387695313">
                <text:p>686.822387695313</text:p>
              </table:table-cell>
              <table:table-cell office:value-type="float" office:value="-0.000753834">
                <text:p>-0.000753834</text:p>
              </table:table-cell>
            </table:table-row>
            <table:table-row>
              <table:table-cell office:value-type="string">
                <text:p>3167</text:p>
              </table:table-cell>
              <table:table-cell office:value-type="float" office:value="686.9423828125">
                <text:p>686.9423828125</text:p>
              </table:table-cell>
              <table:table-cell office:value-type="float" office:value="0.008899356">
                <text:p>0.008899356</text:p>
              </table:table-cell>
            </table:table-row>
            <table:table-row>
              <table:table-cell office:value-type="string">
                <text:p>3168</text:p>
              </table:table-cell>
              <table:table-cell office:value-type="float" office:value="687.062438964844">
                <text:p>687.062438964844</text:p>
              </table:table-cell>
              <table:table-cell office:value-type="float" office:value="0.003281465">
                <text:p>0.003281465</text:p>
              </table:table-cell>
            </table:table-row>
            <table:table-row>
              <table:table-cell office:value-type="string">
                <text:p>3169</text:p>
              </table:table-cell>
              <table:table-cell office:value-type="float" office:value="687.182495117188">
                <text:p>687.182495117188</text:p>
              </table:table-cell>
              <table:table-cell office:value-type="float" office:value="-0.006933053">
                <text:p>-0.006933053</text:p>
              </table:table-cell>
            </table:table-row>
            <table:table-row>
              <table:table-cell office:value-type="string">
                <text:p>3170</text:p>
              </table:table-cell>
              <table:table-cell office:value-type="float" office:value="687.302551269531">
                <text:p>687.302551269531</text:p>
              </table:table-cell>
              <table:table-cell office:value-type="float" office:value="0.003065407">
                <text:p>0.003065407</text:p>
              </table:table-cell>
            </table:table-row>
            <table:table-row>
              <table:table-cell office:value-type="string">
                <text:p>3171</text:p>
              </table:table-cell>
              <table:table-cell office:value-type="float" office:value="687.422607421875">
                <text:p>687.422607421875</text:p>
              </table:table-cell>
              <table:table-cell office:value-type="float" office:value="-0.00451622">
                <text:p>-0.00451622</text:p>
              </table:table-cell>
            </table:table-row>
            <table:table-row>
              <table:table-cell office:value-type="string">
                <text:p>3172</text:p>
              </table:table-cell>
              <table:table-cell office:value-type="float" office:value="687.542663574219">
                <text:p>687.542663574219</text:p>
              </table:table-cell>
              <table:table-cell office:value-type="float" office:value="-0.006575387">
                <text:p>-0.006575387</text:p>
              </table:table-cell>
            </table:table-row>
            <table:table-row>
              <table:table-cell office:value-type="string">
                <text:p>3173</text:p>
              </table:table-cell>
              <table:table-cell office:value-type="float" office:value="687.662719726563">
                <text:p>687.662719726563</text:p>
              </table:table-cell>
              <table:table-cell office:value-type="float" office:value="0.01079255">
                <text:p>0.01079255</text:p>
              </table:table-cell>
            </table:table-row>
            <table:table-row>
              <table:table-cell office:value-type="string">
                <text:p>3174</text:p>
              </table:table-cell>
              <table:table-cell office:value-type="float" office:value="687.782775878906">
                <text:p>687.782775878906</text:p>
              </table:table-cell>
              <table:table-cell office:value-type="float" office:value="0.0005300021">
                <text:p>0.0005300021</text:p>
              </table:table-cell>
            </table:table-row>
            <table:table-row>
              <table:table-cell office:value-type="string">
                <text:p>3175</text:p>
              </table:table-cell>
              <table:table-cell office:value-type="float" office:value="687.90283203125">
                <text:p>687.90283203125</text:p>
              </table:table-cell>
              <table:table-cell office:value-type="float" office:value="0.007149386">
                <text:p>0.007149386</text:p>
              </table:table-cell>
            </table:table-row>
            <table:table-row>
              <table:table-cell office:value-type="string">
                <text:p>3176</text:p>
              </table:table-cell>
              <table:table-cell office:value-type="float" office:value="688.022888183594">
                <text:p>688.022888183594</text:p>
              </table:table-cell>
              <table:table-cell office:value-type="float" office:value="0.009125958">
                <text:p>0.009125958</text:p>
              </table:table-cell>
            </table:table-row>
            <table:table-row>
              <table:table-cell office:value-type="string">
                <text:p>3177</text:p>
              </table:table-cell>
              <table:table-cell office:value-type="float" office:value="688.142944335938">
                <text:p>688.142944335938</text:p>
              </table:table-cell>
              <table:table-cell office:value-type="float" office:value="0.004840758">
                <text:p>0.004840758</text:p>
              </table:table-cell>
            </table:table-row>
            <table:table-row>
              <table:table-cell office:value-type="string">
                <text:p>3178</text:p>
              </table:table-cell>
              <table:table-cell office:value-type="float" office:value="688.263000488281">
                <text:p>688.263000488281</text:p>
              </table:table-cell>
              <table:table-cell office:value-type="float" office:value="-0.003067049">
                <text:p>-0.003067049</text:p>
              </table:table-cell>
            </table:table-row>
            <table:table-row>
              <table:table-cell office:value-type="string">
                <text:p>3179</text:p>
              </table:table-cell>
              <table:table-cell office:value-type="float" office:value="688.383056640625">
                <text:p>688.383056640625</text:p>
              </table:table-cell>
              <table:table-cell office:value-type="float" office:value="-0.001335628">
                <text:p>-0.001335628</text:p>
              </table:table-cell>
            </table:table-row>
            <table:table-row>
              <table:table-cell office:value-type="string">
                <text:p>3180</text:p>
              </table:table-cell>
              <table:table-cell office:value-type="float" office:value="688.503112792969">
                <text:p>688.503112792969</text:p>
              </table:table-cell>
              <table:table-cell office:value-type="float" office:value="-0.00373065">
                <text:p>-0.00373065</text:p>
              </table:table-cell>
            </table:table-row>
            <table:table-row>
              <table:table-cell office:value-type="string">
                <text:p>3181</text:p>
              </table:table-cell>
              <table:table-cell office:value-type="float" office:value="688.623168945313">
                <text:p>688.623168945313</text:p>
              </table:table-cell>
              <table:table-cell office:value-type="float" office:value="-0.004461955">
                <text:p>-0.004461955</text:p>
              </table:table-cell>
            </table:table-row>
            <table:table-row>
              <table:table-cell office:value-type="string">
                <text:p>3182</text:p>
              </table:table-cell>
              <table:table-cell office:value-type="float" office:value="688.743225097656">
                <text:p>688.743225097656</text:p>
              </table:table-cell>
              <table:table-cell office:value-type="float" office:value="-0.002859153">
                <text:p>-0.002859153</text:p>
              </table:table-cell>
            </table:table-row>
            <table:table-row>
              <table:table-cell office:value-type="string">
                <text:p>3183</text:p>
              </table:table-cell>
              <table:table-cell office:value-type="float" office:value="688.86328125">
                <text:p>688.86328125</text:p>
              </table:table-cell>
              <table:table-cell office:value-type="float" office:value="-0.001897443">
                <text:p>-0.001897443</text:p>
              </table:table-cell>
            </table:table-row>
            <table:table-row>
              <table:table-cell office:value-type="string">
                <text:p>3184</text:p>
              </table:table-cell>
              <table:table-cell office:value-type="float" office:value="688.983337402344">
                <text:p>688.983337402344</text:p>
              </table:table-cell>
              <table:table-cell office:value-type="float" office:value="-0.002523322">
                <text:p>-0.002523322</text:p>
              </table:table-cell>
            </table:table-row>
            <table:table-row>
              <table:table-cell office:value-type="string">
                <text:p>3185</text:p>
              </table:table-cell>
              <table:table-cell office:value-type="float" office:value="689.103393554688">
                <text:p>689.103393554688</text:p>
              </table:table-cell>
              <table:table-cell office:value-type="float" office:value="0.001680458">
                <text:p>0.001680458</text:p>
              </table:table-cell>
            </table:table-row>
            <table:table-row>
              <table:table-cell office:value-type="string">
                <text:p>3186</text:p>
              </table:table-cell>
              <table:table-cell office:value-type="float" office:value="689.223449707031">
                <text:p>689.223449707031</text:p>
              </table:table-cell>
              <table:table-cell office:value-type="float" office:value="0.0003855186">
                <text:p>0.0003855186</text:p>
              </table:table-cell>
            </table:table-row>
            <table:table-row>
              <table:table-cell office:value-type="string">
                <text:p>3187</text:p>
              </table:table-cell>
              <table:table-cell office:value-type="float" office:value="689.343505859375">
                <text:p>689.343505859375</text:p>
              </table:table-cell>
              <table:table-cell office:value-type="float" office:value="0.01591511">
                <text:p>0.01591511</text:p>
              </table:table-cell>
            </table:table-row>
            <table:table-row>
              <table:table-cell office:value-type="string">
                <text:p>3188</text:p>
              </table:table-cell>
              <table:table-cell office:value-type="float" office:value="689.463562011719">
                <text:p>689.463562011719</text:p>
              </table:table-cell>
              <table:table-cell office:value-type="float" office:value="0.004158763">
                <text:p>0.004158763</text:p>
              </table:table-cell>
            </table:table-row>
            <table:table-row>
              <table:table-cell office:value-type="string">
                <text:p>3189</text:p>
              </table:table-cell>
              <table:table-cell office:value-type="float" office:value="689.583679199219">
                <text:p>689.583679199219</text:p>
              </table:table-cell>
              <table:table-cell office:value-type="float" office:value="0.005851747">
                <text:p>0.005851747</text:p>
              </table:table-cell>
            </table:table-row>
            <table:table-row>
              <table:table-cell office:value-type="string">
                <text:p>3190</text:p>
              </table:table-cell>
              <table:table-cell office:value-type="float" office:value="689.703735351563">
                <text:p>689.703735351563</text:p>
              </table:table-cell>
              <table:table-cell office:value-type="float" office:value="0.005096139">
                <text:p>0.005096139</text:p>
              </table:table-cell>
            </table:table-row>
            <table:table-row>
              <table:table-cell office:value-type="string">
                <text:p>3191</text:p>
              </table:table-cell>
              <table:table-cell office:value-type="float" office:value="689.823791503906">
                <text:p>689.823791503906</text:p>
              </table:table-cell>
              <table:table-cell office:value-type="float" office:value="-0.002144831">
                <text:p>-0.002144831</text:p>
              </table:table-cell>
            </table:table-row>
            <table:table-row>
              <table:table-cell office:value-type="string">
                <text:p>3192</text:p>
              </table:table-cell>
              <table:table-cell office:value-type="float" office:value="689.94384765625">
                <text:p>689.94384765625</text:p>
              </table:table-cell>
              <table:table-cell office:value-type="float" office:value="-0.002756779">
                <text:p>-0.002756779</text:p>
              </table:table-cell>
            </table:table-row>
            <table:table-row>
              <table:table-cell office:value-type="string">
                <text:p>3193</text:p>
              </table:table-cell>
              <table:table-cell office:value-type="float" office:value="690.063903808594">
                <text:p>690.063903808594</text:p>
              </table:table-cell>
              <table:table-cell office:value-type="float" office:value="0.004776738">
                <text:p>0.004776738</text:p>
              </table:table-cell>
            </table:table-row>
            <table:table-row>
              <table:table-cell office:value-type="string">
                <text:p>3194</text:p>
              </table:table-cell>
              <table:table-cell office:value-type="float" office:value="690.184020996094">
                <text:p>690.184020996094</text:p>
              </table:table-cell>
              <table:table-cell office:value-type="float" office:value="0.00199559">
                <text:p>0.00199559</text:p>
              </table:table-cell>
            </table:table-row>
            <table:table-row>
              <table:table-cell office:value-type="string">
                <text:p>3195</text:p>
              </table:table-cell>
              <table:table-cell office:value-type="float" office:value="690.304077148438">
                <text:p>690.304077148438</text:p>
              </table:table-cell>
              <table:table-cell office:value-type="float" office:value="0.000758764">
                <text:p>0.000758764</text:p>
              </table:table-cell>
            </table:table-row>
            <table:table-row>
              <table:table-cell office:value-type="string">
                <text:p>3196</text:p>
              </table:table-cell>
              <table:table-cell office:value-type="float" office:value="690.424133300781">
                <text:p>690.424133300781</text:p>
              </table:table-cell>
              <table:table-cell office:value-type="float" office:value="0.003452528">
                <text:p>0.003452528</text:p>
              </table:table-cell>
            </table:table-row>
            <table:table-row>
              <table:table-cell office:value-type="string">
                <text:p>3197</text:p>
              </table:table-cell>
              <table:table-cell office:value-type="float" office:value="690.544189453125">
                <text:p>690.544189453125</text:p>
              </table:table-cell>
              <table:table-cell office:value-type="float" office:value="0.02048681">
                <text:p>0.02048681</text:p>
              </table:table-cell>
            </table:table-row>
            <table:table-row>
              <table:table-cell office:value-type="string">
                <text:p>3198</text:p>
              </table:table-cell>
              <table:table-cell office:value-type="float" office:value="690.664306640625">
                <text:p>690.664306640625</text:p>
              </table:table-cell>
              <table:table-cell office:value-type="float" office:value="-0.005264486">
                <text:p>-0.005264486</text:p>
              </table:table-cell>
            </table:table-row>
            <table:table-row>
              <table:table-cell office:value-type="string">
                <text:p>3199</text:p>
              </table:table-cell>
              <table:table-cell office:value-type="float" office:value="690.784362792969">
                <text:p>690.784362792969</text:p>
              </table:table-cell>
              <table:table-cell office:value-type="float" office:value="0.001006853">
                <text:p>0.001006853</text:p>
              </table:table-cell>
            </table:table-row>
            <table:table-row>
              <table:table-cell office:value-type="string">
                <text:p>3200</text:p>
              </table:table-cell>
              <table:table-cell office:value-type="float" office:value="690.904418945313">
                <text:p>690.904418945313</text:p>
              </table:table-cell>
              <table:table-cell office:value-type="float" office:value="0.03639975">
                <text:p>0.03639975</text:p>
              </table:table-cell>
            </table:table-row>
            <table:table-row>
              <table:table-cell office:value-type="string">
                <text:p>3201</text:p>
              </table:table-cell>
              <table:table-cell office:value-type="float" office:value="691.024475097656">
                <text:p>691.024475097656</text:p>
              </table:table-cell>
              <table:table-cell office:value-type="float" office:value="0.003417463">
                <text:p>0.003417463</text:p>
              </table:table-cell>
            </table:table-row>
            <table:table-row>
              <table:table-cell office:value-type="string">
                <text:p>3202</text:p>
              </table:table-cell>
              <table:table-cell office:value-type="float" office:value="691.144592285156">
                <text:p>691.144592285156</text:p>
              </table:table-cell>
              <table:table-cell office:value-type="float" office:value="0.003534222">
                <text:p>0.003534222</text:p>
              </table:table-cell>
            </table:table-row>
            <table:table-row>
              <table:table-cell office:value-type="string">
                <text:p>3203</text:p>
              </table:table-cell>
              <table:table-cell office:value-type="float" office:value="691.2646484375">
                <text:p>691.2646484375</text:p>
              </table:table-cell>
              <table:table-cell office:value-type="float" office:value="-0.0009823567">
                <text:p>-0.0009823567</text:p>
              </table:table-cell>
            </table:table-row>
            <table:table-row>
              <table:table-cell office:value-type="string">
                <text:p>3204</text:p>
              </table:table-cell>
              <table:table-cell office:value-type="float" office:value="691.384765625">
                <text:p>691.384765625</text:p>
              </table:table-cell>
              <table:table-cell office:value-type="float" office:value="0.01260238">
                <text:p>0.01260238</text:p>
              </table:table-cell>
            </table:table-row>
            <table:table-row>
              <table:table-cell office:value-type="string">
                <text:p>3205</text:p>
              </table:table-cell>
              <table:table-cell office:value-type="float" office:value="691.504821777344">
                <text:p>691.504821777344</text:p>
              </table:table-cell>
              <table:table-cell office:value-type="float" office:value="0.003129168">
                <text:p>0.003129168</text:p>
              </table:table-cell>
            </table:table-row>
            <table:table-row>
              <table:table-cell office:value-type="string">
                <text:p>3206</text:p>
              </table:table-cell>
              <table:table-cell office:value-type="float" office:value="691.624877929688">
                <text:p>691.624877929688</text:p>
              </table:table-cell>
              <table:table-cell office:value-type="float" office:value="-0.007807147">
                <text:p>-0.007807147</text:p>
              </table:table-cell>
            </table:table-row>
            <table:table-row>
              <table:table-cell office:value-type="string">
                <text:p>3207</text:p>
              </table:table-cell>
              <table:table-cell office:value-type="float" office:value="691.744995117188">
                <text:p>691.744995117188</text:p>
              </table:table-cell>
              <table:table-cell office:value-type="float" office:value="0.009944392">
                <text:p>0.009944392</text:p>
              </table:table-cell>
            </table:table-row>
            <table:table-row>
              <table:table-cell office:value-type="string">
                <text:p>3208</text:p>
              </table:table-cell>
              <table:table-cell office:value-type="float" office:value="691.865051269531">
                <text:p>691.865051269531</text:p>
              </table:table-cell>
              <table:table-cell office:value-type="float" office:value="-0.00498485">
                <text:p>-0.00498485</text:p>
              </table:table-cell>
            </table:table-row>
            <table:table-row>
              <table:table-cell office:value-type="string">
                <text:p>3209</text:p>
              </table:table-cell>
              <table:table-cell office:value-type="float" office:value="691.985168457031">
                <text:p>691.985168457031</text:p>
              </table:table-cell>
              <table:table-cell office:value-type="float" office:value="-0.00310885">
                <text:p>-0.00310885</text:p>
              </table:table-cell>
            </table:table-row>
            <table:table-row>
              <table:table-cell office:value-type="string">
                <text:p>3210</text:p>
              </table:table-cell>
              <table:table-cell office:value-type="float" office:value="692.105224609375">
                <text:p>692.105224609375</text:p>
              </table:table-cell>
              <table:table-cell office:value-type="float" office:value="0.00865744">
                <text:p>0.00865744</text:p>
              </table:table-cell>
            </table:table-row>
            <table:table-row>
              <table:table-cell office:value-type="string">
                <text:p>3211</text:p>
              </table:table-cell>
              <table:table-cell office:value-type="float" office:value="692.225280761719">
                <text:p>692.225280761719</text:p>
              </table:table-cell>
              <table:table-cell office:value-type="float" office:value="0.004062576">
                <text:p>0.004062576</text:p>
              </table:table-cell>
            </table:table-row>
            <table:table-row>
              <table:table-cell office:value-type="string">
                <text:p>3212</text:p>
              </table:table-cell>
              <table:table-cell office:value-type="float" office:value="692.345397949219">
                <text:p>692.345397949219</text:p>
              </table:table-cell>
              <table:table-cell office:value-type="float" office:value="0.01236575">
                <text:p>0.01236575</text:p>
              </table:table-cell>
            </table:table-row>
            <table:table-row>
              <table:table-cell office:value-type="string">
                <text:p>3213</text:p>
              </table:table-cell>
              <table:table-cell office:value-type="float" office:value="692.465454101563">
                <text:p>692.465454101563</text:p>
              </table:table-cell>
              <table:table-cell office:value-type="float" office:value="0.004821416">
                <text:p>0.004821416</text:p>
              </table:table-cell>
            </table:table-row>
            <table:table-row>
              <table:table-cell office:value-type="string">
                <text:p>3214</text:p>
              </table:table-cell>
              <table:table-cell office:value-type="float" office:value="692.585571289063">
                <text:p>692.585571289063</text:p>
              </table:table-cell>
              <table:table-cell office:value-type="float" office:value="0.006445215">
                <text:p>0.006445215</text:p>
              </table:table-cell>
            </table:table-row>
            <table:table-row>
              <table:table-cell office:value-type="string">
                <text:p>3215</text:p>
              </table:table-cell>
              <table:table-cell office:value-type="float" office:value="692.705627441406">
                <text:p>692.705627441406</text:p>
              </table:table-cell>
              <table:table-cell office:value-type="float" office:value="0.0006153981">
                <text:p>0.0006153981</text:p>
              </table:table-cell>
            </table:table-row>
            <table:table-row>
              <table:table-cell office:value-type="string">
                <text:p>3216</text:p>
              </table:table-cell>
              <table:table-cell office:value-type="float" office:value="692.825744628906">
                <text:p>692.825744628906</text:p>
              </table:table-cell>
              <table:table-cell office:value-type="float" office:value="0.001802208">
                <text:p>0.001802208</text:p>
              </table:table-cell>
            </table:table-row>
            <table:table-row>
              <table:table-cell office:value-type="string">
                <text:p>3217</text:p>
              </table:table-cell>
              <table:table-cell office:value-type="float" office:value="692.94580078125">
                <text:p>692.94580078125</text:p>
              </table:table-cell>
              <table:table-cell office:value-type="float" office:value="0.0004302939">
                <text:p>0.0004302939</text:p>
              </table:table-cell>
            </table:table-row>
            <table:table-row>
              <table:table-cell office:value-type="string">
                <text:p>3218</text:p>
              </table:table-cell>
              <table:table-cell office:value-type="float" office:value="693.06591796875">
                <text:p>693.06591796875</text:p>
              </table:table-cell>
              <table:table-cell office:value-type="float" office:value="0.0006763716">
                <text:p>0.0006763716</text:p>
              </table:table-cell>
            </table:table-row>
            <table:table-row>
              <table:table-cell office:value-type="string">
                <text:p>3219</text:p>
              </table:table-cell>
              <table:table-cell office:value-type="float" office:value="693.18603515625">
                <text:p>693.18603515625</text:p>
              </table:table-cell>
              <table:table-cell office:value-type="float" office:value="-0.007167641">
                <text:p>-0.007167641</text:p>
              </table:table-cell>
            </table:table-row>
            <table:table-row>
              <table:table-cell office:value-type="string">
                <text:p>3220</text:p>
              </table:table-cell>
              <table:table-cell office:value-type="float" office:value="693.306091308594">
                <text:p>693.306091308594</text:p>
              </table:table-cell>
              <table:table-cell office:value-type="float" office:value="-0.003852262">
                <text:p>-0.003852262</text:p>
              </table:table-cell>
            </table:table-row>
            <table:table-row>
              <table:table-cell office:value-type="string">
                <text:p>3221</text:p>
              </table:table-cell>
              <table:table-cell office:value-type="float" office:value="693.426208496094">
                <text:p>693.426208496094</text:p>
              </table:table-cell>
              <table:table-cell office:value-type="float" office:value="-0.009627986">
                <text:p>-0.009627986</text:p>
              </table:table-cell>
            </table:table-row>
            <table:table-row>
              <table:table-cell office:value-type="string">
                <text:p>3222</text:p>
              </table:table-cell>
              <table:table-cell office:value-type="float" office:value="693.546264648438">
                <text:p>693.5462646484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23</text:p>
              </table:table-cell>
              <table:table-cell office:value-type="float" office:value="693.666381835938">
                <text:p>693.666381835938</text:p>
              </table:table-cell>
              <table:table-cell office:value-type="float" office:value="-0.003484337">
                <text:p>-0.003484337</text:p>
              </table:table-cell>
            </table:table-row>
            <table:table-row>
              <table:table-cell office:value-type="string">
                <text:p>3224</text:p>
              </table:table-cell>
              <table:table-cell office:value-type="float" office:value="693.786499023438">
                <text:p>693.786499023438</text:p>
              </table:table-cell>
              <table:table-cell office:value-type="float" office:value="0.01162337">
                <text:p>0.01162337</text:p>
              </table:table-cell>
            </table:table-row>
            <table:table-row>
              <table:table-cell office:value-type="string">
                <text:p>3225</text:p>
              </table:table-cell>
              <table:table-cell office:value-type="float" office:value="693.906555175781">
                <text:p>693.906555175781</text:p>
              </table:table-cell>
              <table:table-cell office:value-type="float" office:value="-0.005419781">
                <text:p>-0.005419781</text:p>
              </table:table-cell>
            </table:table-row>
            <table:table-row>
              <table:table-cell office:value-type="string">
                <text:p>3226</text:p>
              </table:table-cell>
              <table:table-cell office:value-type="float" office:value="694.026672363281">
                <text:p>694.026672363281</text:p>
              </table:table-cell>
              <table:table-cell office:value-type="float" office:value="-0.000441752">
                <text:p>-0.000441752</text:p>
              </table:table-cell>
            </table:table-row>
            <table:table-row>
              <table:table-cell office:value-type="string">
                <text:p>3227</text:p>
              </table:table-cell>
              <table:table-cell office:value-type="float" office:value="694.146728515625">
                <text:p>694.146728515625</text:p>
              </table:table-cell>
              <table:table-cell office:value-type="float" office:value="-0.0003623539">
                <text:p>-0.0003623539</text:p>
              </table:table-cell>
            </table:table-row>
            <table:table-row>
              <table:table-cell office:value-type="string">
                <text:p>3228</text:p>
              </table:table-cell>
              <table:table-cell office:value-type="float" office:value="694.266845703125">
                <text:p>694.266845703125</text:p>
              </table:table-cell>
              <table:table-cell office:value-type="float" office:value="-0.0003997482">
                <text:p>-0.0003997482</text:p>
              </table:table-cell>
            </table:table-row>
            <table:table-row>
              <table:table-cell office:value-type="string">
                <text:p>3229</text:p>
              </table:table-cell>
              <table:table-cell office:value-type="float" office:value="694.386962890625">
                <text:p>694.386962890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30</text:p>
              </table:table-cell>
              <table:table-cell office:value-type="float" office:value="694.507080078125">
                <text:p>694.507080078125</text:p>
              </table:table-cell>
              <table:table-cell office:value-type="float" office:value="0.008664372">
                <text:p>0.008664372</text:p>
              </table:table-cell>
            </table:table-row>
            <table:table-row>
              <table:table-cell office:value-type="string">
                <text:p>3231</text:p>
              </table:table-cell>
              <table:table-cell office:value-type="float" office:value="694.627136230469">
                <text:p>694.627136230469</text:p>
              </table:table-cell>
              <table:table-cell office:value-type="float" office:value="-0.0002151744">
                <text:p>-0.0002151744</text:p>
              </table:table-cell>
            </table:table-row>
            <table:table-row>
              <table:table-cell office:value-type="string">
                <text:p>3232</text:p>
              </table:table-cell>
              <table:table-cell office:value-type="float" office:value="694.747253417969">
                <text:p>694.747253417969</text:p>
              </table:table-cell>
              <table:table-cell office:value-type="float" office:value="-0.002571444">
                <text:p>-0.002571444</text:p>
              </table:table-cell>
            </table:table-row>
            <table:table-row>
              <table:table-cell office:value-type="string">
                <text:p>3233</text:p>
              </table:table-cell>
              <table:table-cell office:value-type="float" office:value="694.867370605469">
                <text:p>694.867370605469</text:p>
              </table:table-cell>
              <table:table-cell office:value-type="float" office:value="-0.007715923">
                <text:p>-0.007715923</text:p>
              </table:table-cell>
            </table:table-row>
            <table:table-row>
              <table:table-cell office:value-type="string">
                <text:p>3234</text:p>
              </table:table-cell>
              <table:table-cell office:value-type="float" office:value="694.987426757813">
                <text:p>694.987426757813</text:p>
              </table:table-cell>
              <table:table-cell office:value-type="float" office:value="-0.0007190168">
                <text:p>-0.0007190168</text:p>
              </table:table-cell>
            </table:table-row>
            <table:table-row>
              <table:table-cell office:value-type="string">
                <text:p>3235</text:p>
              </table:table-cell>
              <table:table-cell office:value-type="float" office:value="695.107543945313">
                <text:p>695.107543945313</text:p>
              </table:table-cell>
              <table:table-cell office:value-type="float" office:value="0.002922368">
                <text:p>0.002922368</text:p>
              </table:table-cell>
            </table:table-row>
            <table:table-row>
              <table:table-cell office:value-type="string">
                <text:p>3236</text:p>
              </table:table-cell>
              <table:table-cell office:value-type="float" office:value="695.227661132813">
                <text:p>695.227661132813</text:p>
              </table:table-cell>
              <table:table-cell office:value-type="float" office:value="0.00301789">
                <text:p>0.00301789</text:p>
              </table:table-cell>
            </table:table-row>
            <table:table-row>
              <table:table-cell office:value-type="string">
                <text:p>3237</text:p>
              </table:table-cell>
              <table:table-cell office:value-type="float" office:value="695.347778320313">
                <text:p>695.347778320313</text:p>
              </table:table-cell>
              <table:table-cell office:value-type="float" office:value="-0.005335401">
                <text:p>-0.005335401</text:p>
              </table:table-cell>
            </table:table-row>
            <table:table-row>
              <table:table-cell office:value-type="string">
                <text:p>3238</text:p>
              </table:table-cell>
              <table:table-cell office:value-type="float" office:value="695.467895507813">
                <text:p>695.467895507813</text:p>
              </table:table-cell>
              <table:table-cell office:value-type="float" office:value="-0.007294464">
                <text:p>-0.007294464</text:p>
              </table:table-cell>
            </table:table-row>
            <table:table-row>
              <table:table-cell office:value-type="string">
                <text:p>3239</text:p>
              </table:table-cell>
              <table:table-cell office:value-type="float" office:value="695.587951660156">
                <text:p>695.587951660156</text:p>
              </table:table-cell>
              <table:table-cell office:value-type="float" office:value="0.009758742">
                <text:p>0.009758742</text:p>
              </table:table-cell>
            </table:table-row>
            <table:table-row>
              <table:table-cell office:value-type="string">
                <text:p>3240</text:p>
              </table:table-cell>
              <table:table-cell office:value-type="float" office:value="695.708068847656">
                <text:p>695.708068847656</text:p>
              </table:table-cell>
              <table:table-cell office:value-type="float" office:value="0.00279092">
                <text:p>0.00279092</text:p>
              </table:table-cell>
            </table:table-row>
            <table:table-row>
              <table:table-cell office:value-type="string">
                <text:p>3241</text:p>
              </table:table-cell>
              <table:table-cell office:value-type="float" office:value="695.828186035156">
                <text:p>695.828186035156</text:p>
              </table:table-cell>
              <table:table-cell office:value-type="float" office:value="-0.002078582">
                <text:p>-0.002078582</text:p>
              </table:table-cell>
            </table:table-row>
            <table:table-row>
              <table:table-cell office:value-type="string">
                <text:p>3242</text:p>
              </table:table-cell>
              <table:table-cell office:value-type="float" office:value="695.948303222656">
                <text:p>695.948303222656</text:p>
              </table:table-cell>
              <table:table-cell office:value-type="float" office:value="-0.0008787105">
                <text:p>-0.0008787105</text:p>
              </table:table-cell>
            </table:table-row>
            <table:table-row>
              <table:table-cell office:value-type="string">
                <text:p>3243</text:p>
              </table:table-cell>
              <table:table-cell office:value-type="float" office:value="696.068420410156">
                <text:p>696.068420410156</text:p>
              </table:table-cell>
              <table:table-cell office:value-type="float" office:value="-0.005684642">
                <text:p>-0.005684642</text:p>
              </table:table-cell>
            </table:table-row>
            <table:table-row>
              <table:table-cell office:value-type="string">
                <text:p>3244</text:p>
              </table:table-cell>
              <table:table-cell office:value-type="float" office:value="696.188537597656">
                <text:p>696.188537597656</text:p>
              </table:table-cell>
              <table:table-cell office:value-type="float" office:value="0.02322341">
                <text:p>0.02322341</text:p>
              </table:table-cell>
            </table:table-row>
            <table:table-row>
              <table:table-cell office:value-type="string">
                <text:p>3245</text:p>
              </table:table-cell>
              <table:table-cell office:value-type="float" office:value="696.308654785156">
                <text:p>696.308654785156</text:p>
              </table:table-cell>
              <table:table-cell office:value-type="float" office:value="-0.006671898">
                <text:p>-0.006671898</text:p>
              </table:table-cell>
            </table:table-row>
            <table:table-row>
              <table:table-cell office:value-type="string">
                <text:p>3246</text:p>
              </table:table-cell>
              <table:table-cell office:value-type="float" office:value="696.428771972656">
                <text:p>696.428771972656</text:p>
              </table:table-cell>
              <table:table-cell office:value-type="float" office:value="0.01288478">
                <text:p>0.01288478</text:p>
              </table:table-cell>
            </table:table-row>
            <table:table-row>
              <table:table-cell office:value-type="string">
                <text:p>3247</text:p>
              </table:table-cell>
              <table:table-cell office:value-type="float" office:value="696.548828125">
                <text:p>696.548828125</text:p>
              </table:table-cell>
              <table:table-cell office:value-type="float" office:value="-0.005529307">
                <text:p>-0.005529307</text:p>
              </table:table-cell>
            </table:table-row>
            <table:table-row>
              <table:table-cell office:value-type="string">
                <text:p>3248</text:p>
              </table:table-cell>
              <table:table-cell office:value-type="float" office:value="696.6689453125">
                <text:p>696.6689453125</text:p>
              </table:table-cell>
              <table:table-cell office:value-type="float" office:value="-0.004155164">
                <text:p>-0.004155164</text:p>
              </table:table-cell>
            </table:table-row>
            <table:table-row>
              <table:table-cell office:value-type="string">
                <text:p>3249</text:p>
              </table:table-cell>
              <table:table-cell office:value-type="float" office:value="696.7890625">
                <text:p>696.7890625</text:p>
              </table:table-cell>
              <table:table-cell office:value-type="float" office:value="-0.007317858">
                <text:p>-0.007317858</text:p>
              </table:table-cell>
            </table:table-row>
            <table:table-row>
              <table:table-cell office:value-type="string">
                <text:p>3250</text:p>
              </table:table-cell>
              <table:table-cell office:value-type="float" office:value="696.9091796875">
                <text:p>696.9091796875</text:p>
              </table:table-cell>
              <table:table-cell office:value-type="float" office:value="-0.005904271">
                <text:p>-0.005904271</text:p>
              </table:table-cell>
            </table:table-row>
            <table:table-row>
              <table:table-cell office:value-type="string">
                <text:p>3251</text:p>
              </table:table-cell>
              <table:table-cell office:value-type="float" office:value="697.029296875">
                <text:p>697.029296875</text:p>
              </table:table-cell>
              <table:table-cell office:value-type="float" office:value="-0.009926587">
                <text:p>-0.009926587</text:p>
              </table:table-cell>
            </table:table-row>
            <table:table-row>
              <table:table-cell office:value-type="string">
                <text:p>3252</text:p>
              </table:table-cell>
              <table:table-cell office:value-type="float" office:value="697.1494140625">
                <text:p>697.1494140625</text:p>
              </table:table-cell>
              <table:table-cell office:value-type="float" office:value="0.007922808">
                <text:p>0.007922808</text:p>
              </table:table-cell>
            </table:table-row>
            <table:table-row>
              <table:table-cell office:value-type="string">
                <text:p>3253</text:p>
              </table:table-cell>
              <table:table-cell office:value-type="float" office:value="697.26953125">
                <text:p>697.26953125</text:p>
              </table:table-cell>
              <table:table-cell office:value-type="float" office:value="0.004448511">
                <text:p>0.004448511</text:p>
              </table:table-cell>
            </table:table-row>
            <table:table-row>
              <table:table-cell office:value-type="string">
                <text:p>3254</text:p>
              </table:table-cell>
              <table:table-cell office:value-type="float" office:value="697.3896484375">
                <text:p>697.3896484375</text:p>
              </table:table-cell>
              <table:table-cell office:value-type="float" office:value="-0.005747221">
                <text:p>-0.005747221</text:p>
              </table:table-cell>
            </table:table-row>
            <table:table-row>
              <table:table-cell office:value-type="string">
                <text:p>3255</text:p>
              </table:table-cell>
              <table:table-cell office:value-type="float" office:value="697.509765625">
                <text:p>697.509765625</text:p>
              </table:table-cell>
              <table:table-cell office:value-type="float" office:value="0.001487683">
                <text:p>0.001487683</text:p>
              </table:table-cell>
            </table:table-row>
            <table:table-row>
              <table:table-cell office:value-type="string">
                <text:p>3256</text:p>
              </table:table-cell>
              <table:table-cell office:value-type="float" office:value="697.6298828125">
                <text:p>697.6298828125</text:p>
              </table:table-cell>
              <table:table-cell office:value-type="float" office:value="-0.004928245">
                <text:p>-0.004928245</text:p>
              </table:table-cell>
            </table:table-row>
            <table:table-row>
              <table:table-cell office:value-type="string">
                <text:p>3257</text:p>
              </table:table-cell>
              <table:table-cell office:value-type="float" office:value="697.75">
                <text:p>697.75</text:p>
              </table:table-cell>
              <table:table-cell office:value-type="float" office:value="0.02341817">
                <text:p>0.02341817</text:p>
              </table:table-cell>
            </table:table-row>
            <table:table-row>
              <table:table-cell office:value-type="string">
                <text:p>3258</text:p>
              </table:table-cell>
              <table:table-cell office:value-type="float" office:value="697.8701171875">
                <text:p>697.8701171875</text:p>
              </table:table-cell>
              <table:table-cell office:value-type="float" office:value="0.006174988">
                <text:p>0.006174988</text:p>
              </table:table-cell>
            </table:table-row>
            <table:table-row>
              <table:table-cell office:value-type="string">
                <text:p>3259</text:p>
              </table:table-cell>
              <table:table-cell office:value-type="float" office:value="697.990234375">
                <text:p>697.990234375</text:p>
              </table:table-cell>
              <table:table-cell office:value-type="float" office:value="0.01311363">
                <text:p>0.01311363</text:p>
              </table:table-cell>
            </table:table-row>
            <table:table-row>
              <table:table-cell office:value-type="string">
                <text:p>3260</text:p>
              </table:table-cell>
              <table:table-cell office:value-type="float" office:value="698.1103515625">
                <text:p>698.1103515625</text:p>
              </table:table-cell>
              <table:table-cell office:value-type="float" office:value="0.003759778">
                <text:p>0.003759778</text:p>
              </table:table-cell>
            </table:table-row>
            <table:table-row>
              <table:table-cell office:value-type="string">
                <text:p>3261</text:p>
              </table:table-cell>
              <table:table-cell office:value-type="float" office:value="698.23046875">
                <text:p>698.23046875</text:p>
              </table:table-cell>
              <table:table-cell office:value-type="float" office:value="-0.006895541">
                <text:p>-0.006895541</text:p>
              </table:table-cell>
            </table:table-row>
            <table:table-row>
              <table:table-cell office:value-type="string">
                <text:p>3262</text:p>
              </table:table-cell>
              <table:table-cell office:value-type="float" office:value="698.350646972656">
                <text:p>698.350646972656</text:p>
              </table:table-cell>
              <table:table-cell office:value-type="float" office:value="-0.00312993">
                <text:p>-0.00312993</text:p>
              </table:table-cell>
            </table:table-row>
            <table:table-row>
              <table:table-cell office:value-type="string">
                <text:p>3263</text:p>
              </table:table-cell>
              <table:table-cell office:value-type="float" office:value="698.470764160156">
                <text:p>698.470764160156</text:p>
              </table:table-cell>
              <table:table-cell office:value-type="float" office:value="0.004145362">
                <text:p>0.004145362</text:p>
              </table:table-cell>
            </table:table-row>
            <table:table-row>
              <table:table-cell office:value-type="string">
                <text:p>3264</text:p>
              </table:table-cell>
              <table:table-cell office:value-type="float" office:value="698.590881347656">
                <text:p>698.590881347656</text:p>
              </table:table-cell>
              <table:table-cell office:value-type="float" office:value="0.002849575">
                <text:p>0.002849575</text:p>
              </table:table-cell>
            </table:table-row>
            <table:table-row>
              <table:table-cell office:value-type="string">
                <text:p>3265</text:p>
              </table:table-cell>
              <table:table-cell office:value-type="float" office:value="698.710998535156">
                <text:p>698.710998535156</text:p>
              </table:table-cell>
              <table:table-cell office:value-type="float" office:value="0.02284955">
                <text:p>0.02284955</text:p>
              </table:table-cell>
            </table:table-row>
            <table:table-row>
              <table:table-cell office:value-type="string">
                <text:p>3266</text:p>
              </table:table-cell>
              <table:table-cell office:value-type="float" office:value="698.831115722656">
                <text:p>698.831115722656</text:p>
              </table:table-cell>
              <table:table-cell office:value-type="float" office:value="-0.0006546343">
                <text:p>-0.0006546343</text:p>
              </table:table-cell>
            </table:table-row>
            <table:table-row>
              <table:table-cell office:value-type="string">
                <text:p>3267</text:p>
              </table:table-cell>
              <table:table-cell office:value-type="float" office:value="698.951232910156">
                <text:p>698.951232910156</text:p>
              </table:table-cell>
              <table:table-cell office:value-type="float" office:value="0.00102145">
                <text:p>0.00102145</text:p>
              </table:table-cell>
            </table:table-row>
            <table:table-row>
              <table:table-cell office:value-type="string">
                <text:p>3268</text:p>
              </table:table-cell>
              <table:table-cell office:value-type="float" office:value="699.071350097656">
                <text:p>699.071350097656</text:p>
              </table:table-cell>
              <table:table-cell office:value-type="float" office:value="0.005108735">
                <text:p>0.005108735</text:p>
              </table:table-cell>
            </table:table-row>
            <table:table-row>
              <table:table-cell office:value-type="string">
                <text:p>3269</text:p>
              </table:table-cell>
              <table:table-cell office:value-type="float" office:value="699.191528320313">
                <text:p>699.191528320313</text:p>
              </table:table-cell>
              <table:table-cell office:value-type="float" office:value="0.0002873113">
                <text:p>0.0002873113</text:p>
              </table:table-cell>
            </table:table-row>
            <table:table-row>
              <table:table-cell office:value-type="string">
                <text:p>3270</text:p>
              </table:table-cell>
              <table:table-cell office:value-type="float" office:value="699.311645507813">
                <text:p>699.311645507813</text:p>
              </table:table-cell>
              <table:table-cell office:value-type="float" office:value="0.002749223">
                <text:p>0.002749223</text:p>
              </table:table-cell>
            </table:table-row>
            <table:table-row>
              <table:table-cell office:value-type="string">
                <text:p>3271</text:p>
              </table:table-cell>
              <table:table-cell office:value-type="float" office:value="699.431762695313">
                <text:p>699.431762695313</text:p>
              </table:table-cell>
              <table:table-cell office:value-type="float" office:value="0.004306627">
                <text:p>0.004306627</text:p>
              </table:table-cell>
            </table:table-row>
            <table:table-row>
              <table:table-cell office:value-type="string">
                <text:p>3272</text:p>
              </table:table-cell>
              <table:table-cell office:value-type="float" office:value="699.551879882813">
                <text:p>699.551879882813</text:p>
              </table:table-cell>
              <table:table-cell office:value-type="float" office:value="0.009117719">
                <text:p>0.009117719</text:p>
              </table:table-cell>
            </table:table-row>
            <table:table-row>
              <table:table-cell office:value-type="string">
                <text:p>3273</text:p>
              </table:table-cell>
              <table:table-cell office:value-type="float" office:value="699.671997070313">
                <text:p>699.671997070313</text:p>
              </table:table-cell>
              <table:table-cell office:value-type="float" office:value="-0.0005532946">
                <text:p>-0.0005532946</text:p>
              </table:table-cell>
            </table:table-row>
            <table:table-row>
              <table:table-cell office:value-type="string">
                <text:p>3274</text:p>
              </table:table-cell>
              <table:table-cell office:value-type="float" office:value="699.792175292969">
                <text:p>699.792175292969</text:p>
              </table:table-cell>
              <table:table-cell office:value-type="float" office:value="-0.002378831">
                <text:p>-0.002378831</text:p>
              </table:table-cell>
            </table:table-row>
            <table:table-row>
              <table:table-cell office:value-type="string">
                <text:p>3275</text:p>
              </table:table-cell>
              <table:table-cell office:value-type="float" office:value="699.912292480469">
                <text:p>699.912292480469</text:p>
              </table:table-cell>
              <table:table-cell office:value-type="float" office:value="0.02292999">
                <text:p>0.02292999</text:p>
              </table:table-cell>
            </table:table-row>
            <table:table-row>
              <table:table-cell office:value-type="string">
                <text:p>3276</text:p>
              </table:table-cell>
              <table:table-cell office:value-type="float" office:value="700.032409667969">
                <text:p>700.032409667969</text:p>
              </table:table-cell>
              <table:table-cell office:value-type="float" office:value="0.009698197">
                <text:p>0.009698197</text:p>
              </table:table-cell>
            </table:table-row>
            <table:table-row>
              <table:table-cell office:value-type="string">
                <text:p>3277</text:p>
              </table:table-cell>
              <table:table-cell office:value-type="float" office:value="700.152526855469">
                <text:p>700.152526855469</text:p>
              </table:table-cell>
              <table:table-cell office:value-type="float" office:value="0.001652365">
                <text:p>0.001652365</text:p>
              </table:table-cell>
            </table:table-row>
            <table:table-row>
              <table:table-cell office:value-type="string">
                <text:p>3278</text:p>
              </table:table-cell>
              <table:table-cell office:value-type="float" office:value="700.272705078125">
                <text:p>700.272705078125</text:p>
              </table:table-cell>
              <table:table-cell office:value-type="float" office:value="-0.000834994">
                <text:p>-0.000834994</text:p>
              </table:table-cell>
            </table:table-row>
            <table:table-row>
              <table:table-cell office:value-type="string">
                <text:p>3279</text:p>
              </table:table-cell>
              <table:table-cell office:value-type="float" office:value="700.392822265625">
                <text:p>700.392822265625</text:p>
              </table:table-cell>
              <table:table-cell office:value-type="float" office:value="0.003135733">
                <text:p>0.003135733</text:p>
              </table:table-cell>
            </table:table-row>
            <table:table-row>
              <table:table-cell office:value-type="string">
                <text:p>3280</text:p>
              </table:table-cell>
              <table:table-cell office:value-type="float" office:value="700.512939453125">
                <text:p>700.512939453125</text:p>
              </table:table-cell>
              <table:table-cell office:value-type="float" office:value="0.0104529">
                <text:p>0.0104529</text:p>
              </table:table-cell>
            </table:table-row>
            <table:table-row>
              <table:table-cell office:value-type="string">
                <text:p>3281</text:p>
              </table:table-cell>
              <table:table-cell office:value-type="float" office:value="700.633117675781">
                <text:p>700.633117675781</text:p>
              </table:table-cell>
              <table:table-cell office:value-type="float" office:value="0.001965175">
                <text:p>0.001965175</text:p>
              </table:table-cell>
            </table:table-row>
            <table:table-row>
              <table:table-cell office:value-type="string">
                <text:p>3282</text:p>
              </table:table-cell>
              <table:table-cell office:value-type="float" office:value="700.753234863281">
                <text:p>700.753234863281</text:p>
              </table:table-cell>
              <table:table-cell office:value-type="float" office:value="0.001986771">
                <text:p>0.001986771</text:p>
              </table:table-cell>
            </table:table-row>
            <table:table-row>
              <table:table-cell office:value-type="string">
                <text:p>3283</text:p>
              </table:table-cell>
              <table:table-cell office:value-type="float" office:value="700.873352050781">
                <text:p>700.873352050781</text:p>
              </table:table-cell>
              <table:table-cell office:value-type="float" office:value="-0.004780861">
                <text:p>-0.004780861</text:p>
              </table:table-cell>
            </table:table-row>
            <table:table-row>
              <table:table-cell office:value-type="string">
                <text:p>3284</text:p>
              </table:table-cell>
              <table:table-cell office:value-type="float" office:value="700.993530273438">
                <text:p>700.993530273438</text:p>
              </table:table-cell>
              <table:table-cell office:value-type="float" office:value="-0.002490119">
                <text:p>-0.002490119</text:p>
              </table:table-cell>
            </table:table-row>
            <table:table-row>
              <table:table-cell office:value-type="string">
                <text:p>3285</text:p>
              </table:table-cell>
              <table:table-cell office:value-type="float" office:value="701.113647460938">
                <text:p>701.113647460938</text:p>
              </table:table-cell>
              <table:table-cell office:value-type="float" office:value="0.0034421">
                <text:p>0.0034421</text:p>
              </table:table-cell>
            </table:table-row>
            <table:table-row>
              <table:table-cell office:value-type="string">
                <text:p>3286</text:p>
              </table:table-cell>
              <table:table-cell office:value-type="float" office:value="701.233764648438">
                <text:p>701.233764648438</text:p>
              </table:table-cell>
              <table:table-cell office:value-type="float" office:value="-0.002897219">
                <text:p>-0.002897219</text:p>
              </table:table-cell>
            </table:table-row>
            <table:table-row>
              <table:table-cell office:value-type="string">
                <text:p>3287</text:p>
              </table:table-cell>
              <table:table-cell office:value-type="float" office:value="701.353942871094">
                <text:p>701.353942871094</text:p>
              </table:table-cell>
              <table:table-cell office:value-type="float" office:value="0.01437277">
                <text:p>0.01437277</text:p>
              </table:table-cell>
            </table:table-row>
            <table:table-row>
              <table:table-cell office:value-type="string">
                <text:p>3288</text:p>
              </table:table-cell>
              <table:table-cell office:value-type="float" office:value="701.474060058594">
                <text:p>701.474060058594</text:p>
              </table:table-cell>
              <table:table-cell office:value-type="float" office:value="0.006968318">
                <text:p>0.006968318</text:p>
              </table:table-cell>
            </table:table-row>
            <table:table-row>
              <table:table-cell office:value-type="string">
                <text:p>3289</text:p>
              </table:table-cell>
              <table:table-cell office:value-type="float" office:value="701.594177246094">
                <text:p>701.594177246094</text:p>
              </table:table-cell>
              <table:table-cell office:value-type="float" office:value="-0.003146744">
                <text:p>-0.003146744</text:p>
              </table:table-cell>
            </table:table-row>
            <table:table-row>
              <table:table-cell office:value-type="string">
                <text:p>3290</text:p>
              </table:table-cell>
              <table:table-cell office:value-type="float" office:value="701.71435546875">
                <text:p>701.71435546875</text:p>
              </table:table-cell>
              <table:table-cell office:value-type="float" office:value="0.00610029">
                <text:p>0.00610029</text:p>
              </table:table-cell>
            </table:table-row>
            <table:table-row>
              <table:table-cell office:value-type="string">
                <text:p>3291</text:p>
              </table:table-cell>
              <table:table-cell office:value-type="float" office:value="701.83447265625">
                <text:p>701.83447265625</text:p>
              </table:table-cell>
              <table:table-cell office:value-type="float" office:value="-0.008286441">
                <text:p>-0.008286441</text:p>
              </table:table-cell>
            </table:table-row>
            <table:table-row>
              <table:table-cell office:value-type="string">
                <text:p>3292</text:p>
              </table:table-cell>
              <table:table-cell office:value-type="float" office:value="701.954650878906">
                <text:p>701.954650878906</text:p>
              </table:table-cell>
              <table:table-cell office:value-type="float" office:value="-0.004617907">
                <text:p>-0.004617907</text:p>
              </table:table-cell>
            </table:table-row>
            <table:table-row>
              <table:table-cell office:value-type="string">
                <text:p>3293</text:p>
              </table:table-cell>
              <table:table-cell office:value-type="float" office:value="702.074768066406">
                <text:p>702.074768066406</text:p>
              </table:table-cell>
              <table:table-cell office:value-type="float" office:value="0.006051569">
                <text:p>0.006051569</text:p>
              </table:table-cell>
            </table:table-row>
            <table:table-row>
              <table:table-cell office:value-type="string">
                <text:p>3294</text:p>
              </table:table-cell>
              <table:table-cell office:value-type="float" office:value="702.194946289063">
                <text:p>702.194946289063</text:p>
              </table:table-cell>
              <table:table-cell office:value-type="float" office:value="0.01009587">
                <text:p>0.01009587</text:p>
              </table:table-cell>
            </table:table-row>
            <table:table-row>
              <table:table-cell office:value-type="string">
                <text:p>3295</text:p>
              </table:table-cell>
              <table:table-cell office:value-type="float" office:value="702.315063476563">
                <text:p>702.315063476563</text:p>
              </table:table-cell>
              <table:table-cell office:value-type="float" office:value="-0.003382937">
                <text:p>-0.003382937</text:p>
              </table:table-cell>
            </table:table-row>
            <table:table-row>
              <table:table-cell office:value-type="string">
                <text:p>3296</text:p>
              </table:table-cell>
              <table:table-cell office:value-type="float" office:value="702.435241699219">
                <text:p>702.435241699219</text:p>
              </table:table-cell>
              <table:table-cell office:value-type="float" office:value="-0.003203401">
                <text:p>-0.003203401</text:p>
              </table:table-cell>
            </table:table-row>
            <table:table-row>
              <table:table-cell office:value-type="string">
                <text:p>3297</text:p>
              </table:table-cell>
              <table:table-cell office:value-type="float" office:value="702.555358886719">
                <text:p>702.555358886719</text:p>
              </table:table-cell>
              <table:table-cell office:value-type="float" office:value="0.008627772">
                <text:p>0.008627772</text:p>
              </table:table-cell>
            </table:table-row>
            <table:table-row>
              <table:table-cell office:value-type="string">
                <text:p>3298</text:p>
              </table:table-cell>
              <table:table-cell office:value-type="float" office:value="702.675537109375">
                <text:p>702.675537109375</text:p>
              </table:table-cell>
              <table:table-cell office:value-type="float" office:value="0.0160468">
                <text:p>0.0160468</text:p>
              </table:table-cell>
            </table:table-row>
            <table:table-row>
              <table:table-cell office:value-type="string">
                <text:p>3299</text:p>
              </table:table-cell>
              <table:table-cell office:value-type="float" office:value="702.795654296875">
                <text:p>702.795654296875</text:p>
              </table:table-cell>
              <table:table-cell office:value-type="float" office:value="-0.0005245743">
                <text:p>-0.0005245743</text:p>
              </table:table-cell>
            </table:table-row>
            <table:table-row>
              <table:table-cell office:value-type="string">
                <text:p>3300</text:p>
              </table:table-cell>
              <table:table-cell office:value-type="float" office:value="702.915832519531">
                <text:p>702.915832519531</text:p>
              </table:table-cell>
              <table:table-cell office:value-type="float" office:value="0.001783655">
                <text:p>0.001783655</text:p>
              </table:table-cell>
            </table:table-row>
            <table:table-row>
              <table:table-cell office:value-type="string">
                <text:p>3301</text:p>
              </table:table-cell>
              <table:table-cell office:value-type="float" office:value="703.035949707031">
                <text:p>703.035949707031</text:p>
              </table:table-cell>
              <table:table-cell office:value-type="float" office:value="-0.002167393">
                <text:p>-0.002167393</text:p>
              </table:table-cell>
            </table:table-row>
            <table:table-row>
              <table:table-cell office:value-type="string">
                <text:p>3302</text:p>
              </table:table-cell>
              <table:table-cell office:value-type="float" office:value="703.156127929688">
                <text:p>703.156127929688</text:p>
              </table:table-cell>
              <table:table-cell office:value-type="float" office:value="-0.0007580562">
                <text:p>-0.0007580562</text:p>
              </table:table-cell>
            </table:table-row>
            <table:table-row>
              <table:table-cell office:value-type="string">
                <text:p>3303</text:p>
              </table:table-cell>
              <table:table-cell office:value-type="float" office:value="703.276245117188">
                <text:p>703.276245117188</text:p>
              </table:table-cell>
              <table:table-cell office:value-type="float" office:value="-0.000913398">
                <text:p>-0.000913398</text:p>
              </table:table-cell>
            </table:table-row>
            <table:table-row>
              <table:table-cell office:value-type="string">
                <text:p>3304</text:p>
              </table:table-cell>
              <table:table-cell office:value-type="float" office:value="703.396423339844">
                <text:p>703.396423339844</text:p>
              </table:table-cell>
              <table:table-cell office:value-type="float" office:value="-0.00369806">
                <text:p>-0.00369806</text:p>
              </table:table-cell>
            </table:table-row>
            <table:table-row>
              <table:table-cell office:value-type="string">
                <text:p>3305</text:p>
              </table:table-cell>
              <table:table-cell office:value-type="float" office:value="703.516540527344">
                <text:p>703.516540527344</text:p>
              </table:table-cell>
              <table:table-cell office:value-type="float" office:value="0.0001463142">
                <text:p>0.0001463142</text:p>
              </table:table-cell>
            </table:table-row>
            <table:table-row>
              <table:table-cell office:value-type="string">
                <text:p>3306</text:p>
              </table:table-cell>
              <table:table-cell office:value-type="float" office:value="703.63671875">
                <text:p>703.63671875</text:p>
              </table:table-cell>
              <table:table-cell office:value-type="float" office:value="0.01134187">
                <text:p>0.01134187</text:p>
              </table:table-cell>
            </table:table-row>
            <table:table-row>
              <table:table-cell office:value-type="string">
                <text:p>3307</text:p>
              </table:table-cell>
              <table:table-cell office:value-type="float" office:value="703.756896972656">
                <text:p>703.756896972656</text:p>
              </table:table-cell>
              <table:table-cell office:value-type="float" office:value="-0.008274177">
                <text:p>-0.008274177</text:p>
              </table:table-cell>
            </table:table-row>
            <table:table-row>
              <table:table-cell office:value-type="string">
                <text:p>3308</text:p>
              </table:table-cell>
              <table:table-cell office:value-type="float" office:value="703.877014160156">
                <text:p>703.877014160156</text:p>
              </table:table-cell>
              <table:table-cell office:value-type="float" office:value="0.006738579">
                <text:p>0.006738579</text:p>
              </table:table-cell>
            </table:table-row>
            <table:table-row>
              <table:table-cell office:value-type="string">
                <text:p>3309</text:p>
              </table:table-cell>
              <table:table-cell office:value-type="float" office:value="703.997192382813">
                <text:p>703.997192382813</text:p>
              </table:table-cell>
              <table:table-cell office:value-type="float" office:value="-0.004377778">
                <text:p>-0.004377778</text:p>
              </table:table-cell>
            </table:table-row>
            <table:table-row>
              <table:table-cell office:value-type="string">
                <text:p>3310</text:p>
              </table:table-cell>
              <table:table-cell office:value-type="float" office:value="704.117309570313">
                <text:p>704.117309570313</text:p>
              </table:table-cell>
              <table:table-cell office:value-type="float" office:value="-0.001817425">
                <text:p>-0.001817425</text:p>
              </table:table-cell>
            </table:table-row>
            <table:table-row>
              <table:table-cell office:value-type="string">
                <text:p>3311</text:p>
              </table:table-cell>
              <table:table-cell office:value-type="float" office:value="704.237487792969">
                <text:p>704.237487792969</text:p>
              </table:table-cell>
              <table:table-cell office:value-type="float" office:value="-0.004099404">
                <text:p>-0.004099404</text:p>
              </table:table-cell>
            </table:table-row>
            <table:table-row>
              <table:table-cell office:value-type="string">
                <text:p>3312</text:p>
              </table:table-cell>
              <table:table-cell office:value-type="float" office:value="704.357666015625">
                <text:p>704.357666015625</text:p>
              </table:table-cell>
              <table:table-cell office:value-type="float" office:value="-0.004062967">
                <text:p>-0.004062967</text:p>
              </table:table-cell>
            </table:table-row>
            <table:table-row>
              <table:table-cell office:value-type="string">
                <text:p>3313</text:p>
              </table:table-cell>
              <table:table-cell office:value-type="float" office:value="704.477783203125">
                <text:p>704.477783203125</text:p>
              </table:table-cell>
              <table:table-cell office:value-type="float" office:value="0.01030926">
                <text:p>0.01030926</text:p>
              </table:table-cell>
            </table:table-row>
            <table:table-row>
              <table:table-cell office:value-type="string">
                <text:p>3314</text:p>
              </table:table-cell>
              <table:table-cell office:value-type="float" office:value="704.597961425781">
                <text:p>704.597961425781</text:p>
              </table:table-cell>
              <table:table-cell office:value-type="float" office:value="-0.003001351">
                <text:p>-0.003001351</text:p>
              </table:table-cell>
            </table:table-row>
            <table:table-row>
              <table:table-cell office:value-type="string">
                <text:p>3315</text:p>
              </table:table-cell>
              <table:table-cell office:value-type="float" office:value="704.718139648438">
                <text:p>704.718139648438</text:p>
              </table:table-cell>
              <table:table-cell office:value-type="float" office:value="-0.005081459">
                <text:p>-0.005081459</text:p>
              </table:table-cell>
            </table:table-row>
            <table:table-row>
              <table:table-cell office:value-type="string">
                <text:p>3316</text:p>
              </table:table-cell>
              <table:table-cell office:value-type="float" office:value="704.838256835938">
                <text:p>704.838256835938</text:p>
              </table:table-cell>
              <table:table-cell office:value-type="float" office:value="-0.007656829">
                <text:p>-0.007656829</text:p>
              </table:table-cell>
            </table:table-row>
            <table:table-row>
              <table:table-cell office:value-type="string">
                <text:p>3317</text:p>
              </table:table-cell>
              <table:table-cell office:value-type="float" office:value="704.958435058594">
                <text:p>704.958435058594</text:p>
              </table:table-cell>
              <table:table-cell office:value-type="float" office:value="-0.007214858">
                <text:p>-0.007214858</text:p>
              </table:table-cell>
            </table:table-row>
            <table:table-row>
              <table:table-cell office:value-type="string">
                <text:p>3318</text:p>
              </table:table-cell>
              <table:table-cell office:value-type="float" office:value="705.07861328125">
                <text:p>705.07861328125</text:p>
              </table:table-cell>
              <table:table-cell office:value-type="float" office:value="0.002819249">
                <text:p>0.002819249</text:p>
              </table:table-cell>
            </table:table-row>
            <table:table-row>
              <table:table-cell office:value-type="string">
                <text:p>3319</text:p>
              </table:table-cell>
              <table:table-cell office:value-type="float" office:value="705.19873046875">
                <text:p>705.19873046875</text:p>
              </table:table-cell>
              <table:table-cell office:value-type="float" office:value="0.001700117">
                <text:p>0.001700117</text:p>
              </table:table-cell>
            </table:table-row>
            <table:table-row>
              <table:table-cell office:value-type="string">
                <text:p>3320</text:p>
              </table:table-cell>
              <table:table-cell office:value-type="float" office:value="705.318908691406">
                <text:p>705.318908691406</text:p>
              </table:table-cell>
              <table:table-cell office:value-type="float" office:value="-0.002899622">
                <text:p>-0.002899622</text:p>
              </table:table-cell>
            </table:table-row>
            <table:table-row>
              <table:table-cell office:value-type="string">
                <text:p>3321</text:p>
              </table:table-cell>
              <table:table-cell office:value-type="float" office:value="705.439086914063">
                <text:p>705.439086914063</text:p>
              </table:table-cell>
              <table:table-cell office:value-type="float" office:value="0.01090263">
                <text:p>0.01090263</text:p>
              </table:table-cell>
            </table:table-row>
            <table:table-row>
              <table:table-cell office:value-type="string">
                <text:p>3322</text:p>
              </table:table-cell>
              <table:table-cell office:value-type="float" office:value="705.559265136719">
                <text:p>705.559265136719</text:p>
              </table:table-cell>
              <table:table-cell office:value-type="float" office:value="-0.0002487874">
                <text:p>-0.0002487874</text:p>
              </table:table-cell>
            </table:table-row>
            <table:table-row>
              <table:table-cell office:value-type="string">
                <text:p>3323</text:p>
              </table:table-cell>
              <table:table-cell office:value-type="float" office:value="705.679382324219">
                <text:p>705.679382324219</text:p>
              </table:table-cell>
              <table:table-cell office:value-type="float" office:value="0.002249723">
                <text:p>0.002249723</text:p>
              </table:table-cell>
            </table:table-row>
            <table:table-row>
              <table:table-cell office:value-type="string">
                <text:p>3324</text:p>
              </table:table-cell>
              <table:table-cell office:value-type="float" office:value="705.799560546875">
                <text:p>705.799560546875</text:p>
              </table:table-cell>
              <table:table-cell office:value-type="float" office:value="0.01169786">
                <text:p>0.01169786</text:p>
              </table:table-cell>
            </table:table-row>
            <table:table-row>
              <table:table-cell office:value-type="string">
                <text:p>3325</text:p>
              </table:table-cell>
              <table:table-cell office:value-type="float" office:value="705.919738769531">
                <text:p>705.919738769531</text:p>
              </table:table-cell>
              <table:table-cell office:value-type="float" office:value="-0.001791916">
                <text:p>-0.001791916</text:p>
              </table:table-cell>
            </table:table-row>
            <table:table-row>
              <table:table-cell office:value-type="string">
                <text:p>3326</text:p>
              </table:table-cell>
              <table:table-cell office:value-type="float" office:value="706.039916992188">
                <text:p>706.039916992188</text:p>
              </table:table-cell>
              <table:table-cell office:value-type="float" office:value="-0.001250667">
                <text:p>-0.001250667</text:p>
              </table:table-cell>
            </table:table-row>
            <table:table-row>
              <table:table-cell office:value-type="string">
                <text:p>3327</text:p>
              </table:table-cell>
              <table:table-cell office:value-type="float" office:value="706.160034179688">
                <text:p>706.160034179688</text:p>
              </table:table-cell>
              <table:table-cell office:value-type="float" office:value="0.01785824">
                <text:p>0.01785824</text:p>
              </table:table-cell>
            </table:table-row>
            <table:table-row>
              <table:table-cell office:value-type="string">
                <text:p>3328</text:p>
              </table:table-cell>
              <table:table-cell office:value-type="float" office:value="706.280212402344">
                <text:p>706.280212402344</text:p>
              </table:table-cell>
              <table:table-cell office:value-type="float" office:value="-0.001063641">
                <text:p>-0.001063641</text:p>
              </table:table-cell>
            </table:table-row>
            <table:table-row>
              <table:table-cell office:value-type="string">
                <text:p>3329</text:p>
              </table:table-cell>
              <table:table-cell office:value-type="float" office:value="706.400390625">
                <text:p>706.400390625</text:p>
              </table:table-cell>
              <table:table-cell office:value-type="float" office:value="0.003320461">
                <text:p>0.003320461</text:p>
              </table:table-cell>
            </table:table-row>
            <table:table-row>
              <table:table-cell office:value-type="string">
                <text:p>3330</text:p>
              </table:table-cell>
              <table:table-cell office:value-type="float" office:value="706.520568847656">
                <text:p>706.520568847656</text:p>
              </table:table-cell>
              <table:table-cell office:value-type="float" office:value="0.004077821">
                <text:p>0.004077821</text:p>
              </table:table-cell>
            </table:table-row>
            <table:table-row>
              <table:table-cell office:value-type="string">
                <text:p>3331</text:p>
              </table:table-cell>
              <table:table-cell office:value-type="float" office:value="706.640747070313">
                <text:p>706.640747070313</text:p>
              </table:table-cell>
              <table:table-cell office:value-type="float" office:value="-0.003439496">
                <text:p>-0.003439496</text:p>
              </table:table-cell>
            </table:table-row>
            <table:table-row>
              <table:table-cell office:value-type="string">
                <text:p>3332</text:p>
              </table:table-cell>
              <table:table-cell office:value-type="float" office:value="706.760925292969">
                <text:p>706.760925292969</text:p>
              </table:table-cell>
              <table:table-cell office:value-type="float" office:value="0.008606535">
                <text:p>0.008606535</text:p>
              </table:table-cell>
            </table:table-row>
            <table:table-row>
              <table:table-cell office:value-type="string">
                <text:p>3333</text:p>
              </table:table-cell>
              <table:table-cell office:value-type="float" office:value="706.881042480469">
                <text:p>706.881042480469</text:p>
              </table:table-cell>
              <table:table-cell office:value-type="float" office:value="0.001091984">
                <text:p>0.001091984</text:p>
              </table:table-cell>
            </table:table-row>
            <table:table-row>
              <table:table-cell office:value-type="string">
                <text:p>3334</text:p>
              </table:table-cell>
              <table:table-cell office:value-type="float" office:value="707.001220703125">
                <text:p>707.001220703125</text:p>
              </table:table-cell>
              <table:table-cell office:value-type="float" office:value="-0.007413562">
                <text:p>-0.007413562</text:p>
              </table:table-cell>
            </table:table-row>
            <table:table-row>
              <table:table-cell office:value-type="string">
                <text:p>3335</text:p>
              </table:table-cell>
              <table:table-cell office:value-type="float" office:value="707.121398925781">
                <text:p>707.121398925781</text:p>
              </table:table-cell>
              <table:table-cell office:value-type="float" office:value="-0.007969207">
                <text:p>-0.007969207</text:p>
              </table:table-cell>
            </table:table-row>
            <table:table-row>
              <table:table-cell office:value-type="string">
                <text:p>3336</text:p>
              </table:table-cell>
              <table:table-cell office:value-type="float" office:value="707.241577148438">
                <text:p>707.241577148438</text:p>
              </table:table-cell>
              <table:table-cell office:value-type="float" office:value="0.002839049">
                <text:p>0.002839049</text:p>
              </table:table-cell>
            </table:table-row>
            <table:table-row>
              <table:table-cell office:value-type="string">
                <text:p>3337</text:p>
              </table:table-cell>
              <table:table-cell office:value-type="float" office:value="707.361755371094">
                <text:p>707.361755371094</text:p>
              </table:table-cell>
              <table:table-cell office:value-type="float" office:value="0.00453481">
                <text:p>0.00453481</text:p>
              </table:table-cell>
            </table:table-row>
            <table:table-row>
              <table:table-cell office:value-type="string">
                <text:p>3338</text:p>
              </table:table-cell>
              <table:table-cell office:value-type="float" office:value="707.48193359375">
                <text:p>707.48193359375</text:p>
              </table:table-cell>
              <table:table-cell office:value-type="float" office:value="0.004855369">
                <text:p>0.004855369</text:p>
              </table:table-cell>
            </table:table-row>
            <table:table-row>
              <table:table-cell office:value-type="string">
                <text:p>3339</text:p>
              </table:table-cell>
              <table:table-cell office:value-type="float" office:value="707.602111816406">
                <text:p>707.602111816406</text:p>
              </table:table-cell>
              <table:table-cell office:value-type="float" office:value="-0.005679691">
                <text:p>-0.005679691</text:p>
              </table:table-cell>
            </table:table-row>
            <table:table-row>
              <table:table-cell office:value-type="string">
                <text:p>3340</text:p>
              </table:table-cell>
              <table:table-cell office:value-type="float" office:value="707.722290039063">
                <text:p>707.722290039063</text:p>
              </table:table-cell>
              <table:table-cell office:value-type="float" office:value="0.002114321">
                <text:p>0.002114321</text:p>
              </table:table-cell>
            </table:table-row>
            <table:table-row>
              <table:table-cell office:value-type="string">
                <text:p>3341</text:p>
              </table:table-cell>
              <table:table-cell office:value-type="float" office:value="707.842468261719">
                <text:p>707.842468261719</text:p>
              </table:table-cell>
              <table:table-cell office:value-type="float" office:value="0.004356852">
                <text:p>0.004356852</text:p>
              </table:table-cell>
            </table:table-row>
            <table:table-row>
              <table:table-cell office:value-type="string">
                <text:p>3342</text:p>
              </table:table-cell>
              <table:table-cell office:value-type="float" office:value="707.962646484375">
                <text:p>707.962646484375</text:p>
              </table:table-cell>
              <table:table-cell office:value-type="float" office:value="0.008154686">
                <text:p>0.008154686</text:p>
              </table:table-cell>
            </table:table-row>
            <table:table-row>
              <table:table-cell office:value-type="string">
                <text:p>3343</text:p>
              </table:table-cell>
              <table:table-cell office:value-type="float" office:value="708.082763671875">
                <text:p>708.082763671875</text:p>
              </table:table-cell>
              <table:table-cell office:value-type="float" office:value="-0.001947136">
                <text:p>-0.001947136</text:p>
              </table:table-cell>
            </table:table-row>
            <table:table-row>
              <table:table-cell office:value-type="string">
                <text:p>3344</text:p>
              </table:table-cell>
              <table:table-cell office:value-type="float" office:value="708.202941894531">
                <text:p>708.202941894531</text:p>
              </table:table-cell>
              <table:table-cell office:value-type="float" office:value="0.00226494">
                <text:p>0.00226494</text:p>
              </table:table-cell>
            </table:table-row>
            <table:table-row>
              <table:table-cell office:value-type="string">
                <text:p>3345</text:p>
              </table:table-cell>
              <table:table-cell office:value-type="float" office:value="708.323120117188">
                <text:p>708.323120117188</text:p>
              </table:table-cell>
              <table:table-cell office:value-type="float" office:value="0.003961134">
                <text:p>0.003961134</text:p>
              </table:table-cell>
            </table:table-row>
            <table:table-row>
              <table:table-cell office:value-type="string">
                <text:p>3346</text:p>
              </table:table-cell>
              <table:table-cell office:value-type="float" office:value="708.443298339844">
                <text:p>708.443298339844</text:p>
              </table:table-cell>
              <table:table-cell office:value-type="float" office:value="-0.003433915">
                <text:p>-0.003433915</text:p>
              </table:table-cell>
            </table:table-row>
            <table:table-row>
              <table:table-cell office:value-type="string">
                <text:p>3347</text:p>
              </table:table-cell>
              <table:table-cell office:value-type="float" office:value="708.5634765625">
                <text:p>708.5634765625</text:p>
              </table:table-cell>
              <table:table-cell office:value-type="float" office:value="-0.002640396">
                <text:p>-0.002640396</text:p>
              </table:table-cell>
            </table:table-row>
            <table:table-row>
              <table:table-cell office:value-type="string">
                <text:p>3348</text:p>
              </table:table-cell>
              <table:table-cell office:value-type="float" office:value="708.683654785156">
                <text:p>708.683654785156</text:p>
              </table:table-cell>
              <table:table-cell office:value-type="float" office:value="-0.003058407">
                <text:p>-0.003058407</text:p>
              </table:table-cell>
            </table:table-row>
            <table:table-row>
              <table:table-cell office:value-type="string">
                <text:p>3349</text:p>
              </table:table-cell>
              <table:table-cell office:value-type="float" office:value="708.803833007813">
                <text:p>708.803833007813</text:p>
              </table:table-cell>
              <table:table-cell office:value-type="float" office:value="0.01133624">
                <text:p>0.01133624</text:p>
              </table:table-cell>
            </table:table-row>
            <table:table-row>
              <table:table-cell office:value-type="string">
                <text:p>3350</text:p>
              </table:table-cell>
              <table:table-cell office:value-type="float" office:value="708.924011230469">
                <text:p>708.924011230469</text:p>
              </table:table-cell>
              <table:table-cell office:value-type="float" office:value="-0.008098125">
                <text:p>-0.008098125</text:p>
              </table:table-cell>
            </table:table-row>
            <table:table-row>
              <table:table-cell office:value-type="string">
                <text:p>3351</text:p>
              </table:table-cell>
              <table:table-cell office:value-type="float" office:value="709.044189453125">
                <text:p>709.044189453125</text:p>
              </table:table-cell>
              <table:table-cell office:value-type="float" office:value="-0.0003844616">
                <text:p>-0.0003844616</text:p>
              </table:table-cell>
            </table:table-row>
            <table:table-row>
              <table:table-cell office:value-type="string">
                <text:p>3352</text:p>
              </table:table-cell>
              <table:table-cell office:value-type="float" office:value="709.164367675781">
                <text:p>709.164367675781</text:p>
              </table:table-cell>
              <table:table-cell office:value-type="float" office:value="0.002762773">
                <text:p>0.002762773</text:p>
              </table:table-cell>
            </table:table-row>
            <table:table-row>
              <table:table-cell office:value-type="string">
                <text:p>3353</text:p>
              </table:table-cell>
              <table:table-cell office:value-type="float" office:value="709.284545898438">
                <text:p>709.284545898438</text:p>
              </table:table-cell>
              <table:table-cell office:value-type="float" office:value="0.0022752">
                <text:p>0.0022752</text:p>
              </table:table-cell>
            </table:table-row>
            <table:table-row>
              <table:table-cell office:value-type="string">
                <text:p>3354</text:p>
              </table:table-cell>
              <table:table-cell office:value-type="float" office:value="709.404724121094">
                <text:p>709.404724121094</text:p>
              </table:table-cell>
              <table:table-cell office:value-type="float" office:value="0.002241939">
                <text:p>0.002241939</text:p>
              </table:table-cell>
            </table:table-row>
            <table:table-row>
              <table:table-cell office:value-type="string">
                <text:p>3355</text:p>
              </table:table-cell>
              <table:table-cell office:value-type="float" office:value="709.52490234375">
                <text:p>709.52490234375</text:p>
              </table:table-cell>
              <table:table-cell office:value-type="float" office:value="-0.004372701">
                <text:p>-0.004372701</text:p>
              </table:table-cell>
            </table:table-row>
            <table:table-row>
              <table:table-cell office:value-type="string">
                <text:p>3356</text:p>
              </table:table-cell>
              <table:table-cell office:value-type="float" office:value="709.645141601563">
                <text:p>709.645141601563</text:p>
              </table:table-cell>
              <table:table-cell office:value-type="float" office:value="-0.005320447">
                <text:p>-0.005320447</text:p>
              </table:table-cell>
            </table:table-row>
            <table:table-row>
              <table:table-cell office:value-type="string">
                <text:p>3357</text:p>
              </table:table-cell>
              <table:table-cell office:value-type="float" office:value="709.765319824219">
                <text:p>709.765319824219</text:p>
              </table:table-cell>
              <table:table-cell office:value-type="float" office:value="0.003162876">
                <text:p>0.003162876</text:p>
              </table:table-cell>
            </table:table-row>
            <table:table-row>
              <table:table-cell office:value-type="string">
                <text:p>3358</text:p>
              </table:table-cell>
              <table:table-cell office:value-type="float" office:value="709.885498046875">
                <text:p>709.885498046875</text:p>
              </table:table-cell>
              <table:table-cell office:value-type="float" office:value="-0.001300561">
                <text:p>-0.001300561</text:p>
              </table:table-cell>
            </table:table-row>
            <table:table-row>
              <table:table-cell office:value-type="string">
                <text:p>3359</text:p>
              </table:table-cell>
              <table:table-cell office:value-type="float" office:value="710.005676269531">
                <text:p>710.005676269531</text:p>
              </table:table-cell>
              <table:table-cell office:value-type="float" office:value="-0.001845141">
                <text:p>-0.001845141</text:p>
              </table:table-cell>
            </table:table-row>
            <table:table-row>
              <table:table-cell office:value-type="string">
                <text:p>3360</text:p>
              </table:table-cell>
              <table:table-cell office:value-type="float" office:value="710.125854492188">
                <text:p>710.125854492188</text:p>
              </table:table-cell>
              <table:table-cell office:value-type="float" office:value="0.005399942">
                <text:p>0.005399942</text:p>
              </table:table-cell>
            </table:table-row>
            <table:table-row>
              <table:table-cell office:value-type="string">
                <text:p>3361</text:p>
              </table:table-cell>
              <table:table-cell office:value-type="float" office:value="710.246032714844">
                <text:p>710.246032714844</text:p>
              </table:table-cell>
              <table:table-cell office:value-type="float" office:value="0.002298365">
                <text:p>0.002298365</text:p>
              </table:table-cell>
            </table:table-row>
            <table:table-row>
              <table:table-cell office:value-type="string">
                <text:p>3362</text:p>
              </table:table-cell>
              <table:table-cell office:value-type="float" office:value="710.3662109375">
                <text:p>710.3662109375</text:p>
              </table:table-cell>
              <table:table-cell office:value-type="float" office:value="-0.006657101">
                <text:p>-0.006657101</text:p>
              </table:table-cell>
            </table:table-row>
            <table:table-row>
              <table:table-cell office:value-type="string">
                <text:p>3363</text:p>
              </table:table-cell>
              <table:table-cell office:value-type="float" office:value="710.486389160156">
                <text:p>710.486389160156</text:p>
              </table:table-cell>
              <table:table-cell office:value-type="float" office:value="0.008566272">
                <text:p>0.008566272</text:p>
              </table:table-cell>
            </table:table-row>
            <table:table-row>
              <table:table-cell office:value-type="string">
                <text:p>3364</text:p>
              </table:table-cell>
              <table:table-cell office:value-type="float" office:value="710.606567382813">
                <text:p>710.606567382813</text:p>
              </table:table-cell>
              <table:table-cell office:value-type="float" office:value="-0.001341311">
                <text:p>-0.001341311</text:p>
              </table:table-cell>
            </table:table-row>
            <table:table-row>
              <table:table-cell office:value-type="string">
                <text:p>3365</text:p>
              </table:table-cell>
              <table:table-cell office:value-type="float" office:value="710.726745605469">
                <text:p>710.726745605469</text:p>
              </table:table-cell>
              <table:table-cell office:value-type="float" office:value="-0.005737657">
                <text:p>-0.005737657</text:p>
              </table:table-cell>
            </table:table-row>
            <table:table-row>
              <table:table-cell office:value-type="string">
                <text:p>3366</text:p>
              </table:table-cell>
              <table:table-cell office:value-type="float" office:value="710.846984863281">
                <text:p>710.846984863281</text:p>
              </table:table-cell>
              <table:table-cell office:value-type="float" office:value="0.00210641">
                <text:p>0.00210641</text:p>
              </table:table-cell>
            </table:table-row>
            <table:table-row>
              <table:table-cell office:value-type="string">
                <text:p>3367</text:p>
              </table:table-cell>
              <table:table-cell office:value-type="float" office:value="710.967163085938">
                <text:p>710.967163085938</text:p>
              </table:table-cell>
              <table:table-cell office:value-type="float" office:value="-0.0005381737">
                <text:p>-0.0005381737</text:p>
              </table:table-cell>
            </table:table-row>
            <table:table-row>
              <table:table-cell office:value-type="string">
                <text:p>3368</text:p>
              </table:table-cell>
              <table:table-cell office:value-type="float" office:value="711.087341308594">
                <text:p>711.087341308594</text:p>
              </table:table-cell>
              <table:table-cell office:value-type="float" office:value="0.0007577126">
                <text:p>0.0007577126</text:p>
              </table:table-cell>
            </table:table-row>
            <table:table-row>
              <table:table-cell office:value-type="string">
                <text:p>3369</text:p>
              </table:table-cell>
              <table:table-cell office:value-type="float" office:value="711.20751953125">
                <text:p>711.20751953125</text:p>
              </table:table-cell>
              <table:table-cell office:value-type="float" office:value="-0.008266308">
                <text:p>-0.008266308</text:p>
              </table:table-cell>
            </table:table-row>
            <table:table-row>
              <table:table-cell office:value-type="string">
                <text:p>3370</text:p>
              </table:table-cell>
              <table:table-cell office:value-type="float" office:value="711.327697753906">
                <text:p>711.327697753906</text:p>
              </table:table-cell>
              <table:table-cell office:value-type="float" office:value="-0.005930777">
                <text:p>-0.005930777</text:p>
              </table:table-cell>
            </table:table-row>
            <table:table-row>
              <table:table-cell office:value-type="string">
                <text:p>3371</text:p>
              </table:table-cell>
              <table:table-cell office:value-type="float" office:value="711.447875976563">
                <text:p>711.447875976563</text:p>
              </table:table-cell>
              <table:table-cell office:value-type="float" office:value="0.002874481">
                <text:p>0.002874481</text:p>
              </table:table-cell>
            </table:table-row>
            <table:table-row>
              <table:table-cell office:value-type="string">
                <text:p>3372</text:p>
              </table:table-cell>
              <table:table-cell office:value-type="float" office:value="711.568115234375">
                <text:p>711.568115234375</text:p>
              </table:table-cell>
              <table:table-cell office:value-type="float" office:value="-0.002382708">
                <text:p>-0.002382708</text:p>
              </table:table-cell>
            </table:table-row>
            <table:table-row>
              <table:table-cell office:value-type="string">
                <text:p>3373</text:p>
              </table:table-cell>
              <table:table-cell office:value-type="float" office:value="711.688293457031">
                <text:p>711.688293457031</text:p>
              </table:table-cell>
              <table:table-cell office:value-type="float" office:value="0.01291781">
                <text:p>0.01291781</text:p>
              </table:table-cell>
            </table:table-row>
            <table:table-row>
              <table:table-cell office:value-type="string">
                <text:p>3374</text:p>
              </table:table-cell>
              <table:table-cell office:value-type="float" office:value="711.808471679688">
                <text:p>711.808471679688</text:p>
              </table:table-cell>
              <table:table-cell office:value-type="float" office:value="-0.006950131">
                <text:p>-0.006950131</text:p>
              </table:table-cell>
            </table:table-row>
            <table:table-row>
              <table:table-cell office:value-type="string">
                <text:p>3375</text:p>
              </table:table-cell>
              <table:table-cell office:value-type="float" office:value="711.928649902344">
                <text:p>711.928649902344</text:p>
              </table:table-cell>
              <table:table-cell office:value-type="float" office:value="-0.003405792">
                <text:p>-0.003405792</text:p>
              </table:table-cell>
            </table:table-row>
            <table:table-row>
              <table:table-cell office:value-type="string">
                <text:p>3376</text:p>
              </table:table-cell>
              <table:table-cell office:value-type="float" office:value="712.048889160156">
                <text:p>712.048889160156</text:p>
              </table:table-cell>
              <table:table-cell office:value-type="float" office:value="-0.0004433275">
                <text:p>-0.0004433275</text:p>
              </table:table-cell>
            </table:table-row>
            <table:table-row>
              <table:table-cell office:value-type="string">
                <text:p>3377</text:p>
              </table:table-cell>
              <table:table-cell office:value-type="float" office:value="712.169067382813">
                <text:p>712.169067382813</text:p>
              </table:table-cell>
              <table:table-cell office:value-type="float" office:value="0.007537205">
                <text:p>0.007537205</text:p>
              </table:table-cell>
            </table:table-row>
            <table:table-row>
              <table:table-cell office:value-type="string">
                <text:p>3378</text:p>
              </table:table-cell>
              <table:table-cell office:value-type="float" office:value="712.289245605469">
                <text:p>712.289245605469</text:p>
              </table:table-cell>
              <table:table-cell office:value-type="float" office:value="0.004624633">
                <text:p>0.004624633</text:p>
              </table:table-cell>
            </table:table-row>
            <table:table-row>
              <table:table-cell office:value-type="string">
                <text:p>3379</text:p>
              </table:table-cell>
              <table:table-cell office:value-type="float" office:value="712.409423828125">
                <text:p>712.409423828125</text:p>
              </table:table-cell>
              <table:table-cell office:value-type="float" office:value="-0.005430746">
                <text:p>-0.005430746</text:p>
              </table:table-cell>
            </table:table-row>
            <table:table-row>
              <table:table-cell office:value-type="string">
                <text:p>3380</text:p>
              </table:table-cell>
              <table:table-cell office:value-type="float" office:value="712.529663085938">
                <text:p>712.529663085938</text:p>
              </table:table-cell>
              <table:table-cell office:value-type="float" office:value="0.006832753">
                <text:p>0.006832753</text:p>
              </table:table-cell>
            </table:table-row>
            <table:table-row>
              <table:table-cell office:value-type="string">
                <text:p>3381</text:p>
              </table:table-cell>
              <table:table-cell office:value-type="float" office:value="712.649841308594">
                <text:p>712.649841308594</text:p>
              </table:table-cell>
              <table:table-cell office:value-type="float" office:value="-0.004500734">
                <text:p>-0.004500734</text:p>
              </table:table-cell>
            </table:table-row>
            <table:table-row>
              <table:table-cell office:value-type="string">
                <text:p>3382</text:p>
              </table:table-cell>
              <table:table-cell office:value-type="float" office:value="712.77001953125">
                <text:p>712.77001953125</text:p>
              </table:table-cell>
              <table:table-cell office:value-type="float" office:value="-0.01001948">
                <text:p>-0.01001948</text:p>
              </table:table-cell>
            </table:table-row>
            <table:table-row>
              <table:table-cell office:value-type="string">
                <text:p>3383</text:p>
              </table:table-cell>
              <table:table-cell office:value-type="float" office:value="712.890197753906">
                <text:p>712.890197753906</text:p>
              </table:table-cell>
              <table:table-cell office:value-type="float" office:value="-0.003832438">
                <text:p>-0.003832438</text:p>
              </table:table-cell>
            </table:table-row>
            <table:table-row>
              <table:table-cell office:value-type="string">
                <text:p>3384</text:p>
              </table:table-cell>
              <table:table-cell office:value-type="float" office:value="713.010437011719">
                <text:p>713.010437011719</text:p>
              </table:table-cell>
              <table:table-cell office:value-type="float" office:value="0.01541056">
                <text:p>0.01541056</text:p>
              </table:table-cell>
            </table:table-row>
            <table:table-row>
              <table:table-cell office:value-type="string">
                <text:p>3385</text:p>
              </table:table-cell>
              <table:table-cell office:value-type="float" office:value="713.130615234375">
                <text:p>713.130615234375</text:p>
              </table:table-cell>
              <table:table-cell office:value-type="float" office:value="0.01551844">
                <text:p>0.01551844</text:p>
              </table:table-cell>
            </table:table-row>
            <table:table-row>
              <table:table-cell office:value-type="string">
                <text:p>3386</text:p>
              </table:table-cell>
              <table:table-cell office:value-type="float" office:value="713.250793457031">
                <text:p>713.250793457031</text:p>
              </table:table-cell>
              <table:table-cell office:value-type="float" office:value="0.01455694">
                <text:p>0.01455694</text:p>
              </table:table-cell>
            </table:table-row>
            <table:table-row>
              <table:table-cell office:value-type="string">
                <text:p>3387</text:p>
              </table:table-cell>
              <table:table-cell office:value-type="float" office:value="713.371032714844">
                <text:p>713.371032714844</text:p>
              </table:table-cell>
              <table:table-cell office:value-type="float" office:value="-0.00787468">
                <text:p>-0.00787468</text:p>
              </table:table-cell>
            </table:table-row>
            <table:table-row>
              <table:table-cell office:value-type="string">
                <text:p>3388</text:p>
              </table:table-cell>
              <table:table-cell office:value-type="float" office:value="713.4912109375">
                <text:p>713.4912109375</text:p>
              </table:table-cell>
              <table:table-cell office:value-type="float" office:value="-0.0004913063">
                <text:p>-0.0004913063</text:p>
              </table:table-cell>
            </table:table-row>
            <table:table-row>
              <table:table-cell office:value-type="string">
                <text:p>3389</text:p>
              </table:table-cell>
              <table:table-cell office:value-type="float" office:value="713.611389160156">
                <text:p>713.611389160156</text:p>
              </table:table-cell>
              <table:table-cell office:value-type="float" office:value="0.004416187">
                <text:p>0.004416187</text:p>
              </table:table-cell>
            </table:table-row>
            <table:table-row>
              <table:table-cell office:value-type="string">
                <text:p>3390</text:p>
              </table:table-cell>
              <table:table-cell office:value-type="float" office:value="713.731628417969">
                <text:p>713.731628417969</text:p>
              </table:table-cell>
              <table:table-cell office:value-type="float" office:value="0.004763456">
                <text:p>0.004763456</text:p>
              </table:table-cell>
            </table:table-row>
            <table:table-row>
              <table:table-cell office:value-type="string">
                <text:p>3391</text:p>
              </table:table-cell>
              <table:table-cell office:value-type="float" office:value="713.851806640625">
                <text:p>713.851806640625</text:p>
              </table:table-cell>
              <table:table-cell office:value-type="float" office:value="-0.005812995">
                <text:p>-0.005812995</text:p>
              </table:table-cell>
            </table:table-row>
            <table:table-row>
              <table:table-cell office:value-type="string">
                <text:p>3392</text:p>
              </table:table-cell>
              <table:table-cell office:value-type="float" office:value="713.971984863281">
                <text:p>713.971984863281</text:p>
              </table:table-cell>
              <table:table-cell office:value-type="float" office:value="-0.002107219">
                <text:p>-0.002107219</text:p>
              </table:table-cell>
            </table:table-row>
            <table:table-row>
              <table:table-cell office:value-type="string">
                <text:p>3393</text:p>
              </table:table-cell>
              <table:table-cell office:value-type="float" office:value="714.092224121094">
                <text:p>714.092224121094</text:p>
              </table:table-cell>
              <table:table-cell office:value-type="float" office:value="-0.009214915">
                <text:p>-0.009214915</text:p>
              </table:table-cell>
            </table:table-row>
            <table:table-row>
              <table:table-cell office:value-type="string">
                <text:p>3394</text:p>
              </table:table-cell>
              <table:table-cell office:value-type="float" office:value="714.21240234375">
                <text:p>714.21240234375</text:p>
              </table:table-cell>
              <table:table-cell office:value-type="float" office:value="0.009284977">
                <text:p>0.009284977</text:p>
              </table:table-cell>
            </table:table-row>
            <table:table-row>
              <table:table-cell office:value-type="string">
                <text:p>3395</text:p>
              </table:table-cell>
              <table:table-cell office:value-type="float" office:value="714.332580566406">
                <text:p>714.332580566406</text:p>
              </table:table-cell>
              <table:table-cell office:value-type="float" office:value="0.004031877">
                <text:p>0.004031877</text:p>
              </table:table-cell>
            </table:table-row>
            <table:table-row>
              <table:table-cell office:value-type="string">
                <text:p>3396</text:p>
              </table:table-cell>
              <table:table-cell office:value-type="float" office:value="714.452819824219">
                <text:p>714.452819824219</text:p>
              </table:table-cell>
              <table:table-cell office:value-type="float" office:value="0.0007670776">
                <text:p>0.0007670776</text:p>
              </table:table-cell>
            </table:table-row>
            <table:table-row>
              <table:table-cell office:value-type="string">
                <text:p>3397</text:p>
              </table:table-cell>
              <table:table-cell office:value-type="float" office:value="714.572998046875">
                <text:p>714.572998046875</text:p>
              </table:table-cell>
              <table:table-cell office:value-type="float" office:value="0.004331596">
                <text:p>0.004331596</text:p>
              </table:table-cell>
            </table:table-row>
            <table:table-row>
              <table:table-cell office:value-type="string">
                <text:p>3398</text:p>
              </table:table-cell>
              <table:table-cell office:value-type="float" office:value="714.693237304688">
                <text:p>714.693237304688</text:p>
              </table:table-cell>
              <table:table-cell office:value-type="float" office:value="0.01322642">
                <text:p>0.01322642</text:p>
              </table:table-cell>
            </table:table-row>
            <table:table-row>
              <table:table-cell office:value-type="string">
                <text:p>3399</text:p>
              </table:table-cell>
              <table:table-cell office:value-type="float" office:value="714.813415527344">
                <text:p>714.813415527344</text:p>
              </table:table-cell>
              <table:table-cell office:value-type="float" office:value="-0.002395277">
                <text:p>-0.002395277</text:p>
              </table:table-cell>
            </table:table-row>
            <table:table-row>
              <table:table-cell office:value-type="string">
                <text:p>3400</text:p>
              </table:table-cell>
              <table:table-cell office:value-type="float" office:value="714.93359375">
                <text:p>714.93359375</text:p>
              </table:table-cell>
              <table:table-cell office:value-type="float" office:value="0.00347229">
                <text:p>0.00347229</text:p>
              </table:table-cell>
            </table:table-row>
            <table:table-row>
              <table:table-cell office:value-type="string">
                <text:p>3401</text:p>
              </table:table-cell>
              <table:table-cell office:value-type="float" office:value="715.053833007813">
                <text:p>715.053833007813</text:p>
              </table:table-cell>
              <table:table-cell office:value-type="float" office:value="0.00264078">
                <text:p>0.00264078</text:p>
              </table:table-cell>
            </table:table-row>
            <table:table-row>
              <table:table-cell office:value-type="string">
                <text:p>3402</text:p>
              </table:table-cell>
              <table:table-cell office:value-type="float" office:value="715.174011230469">
                <text:p>715.174011230469</text:p>
              </table:table-cell>
              <table:table-cell office:value-type="float" office:value="0.003342304">
                <text:p>0.003342304</text:p>
              </table:table-cell>
            </table:table-row>
            <table:table-row>
              <table:table-cell office:value-type="string">
                <text:p>3403</text:p>
              </table:table-cell>
              <table:table-cell office:value-type="float" office:value="715.294250488281">
                <text:p>715.294250488281</text:p>
              </table:table-cell>
              <table:table-cell office:value-type="float" office:value="-0.007834637">
                <text:p>-0.007834637</text:p>
              </table:table-cell>
            </table:table-row>
            <table:table-row>
              <table:table-cell office:value-type="string">
                <text:p>3404</text:p>
              </table:table-cell>
              <table:table-cell office:value-type="float" office:value="715.414428710938">
                <text:p>715.414428710938</text:p>
              </table:table-cell>
              <table:table-cell office:value-type="float" office:value="-0.003313234">
                <text:p>-0.003313234</text:p>
              </table:table-cell>
            </table:table-row>
            <table:table-row>
              <table:table-cell office:value-type="string">
                <text:p>3405</text:p>
              </table:table-cell>
              <table:table-cell office:value-type="float" office:value="715.53466796875">
                <text:p>715.53466796875</text:p>
              </table:table-cell>
              <table:table-cell office:value-type="float" office:value="0.001064964">
                <text:p>0.001064964</text:p>
              </table:table-cell>
            </table:table-row>
            <table:table-row>
              <table:table-cell office:value-type="string">
                <text:p>3406</text:p>
              </table:table-cell>
              <table:table-cell office:value-type="float" office:value="715.654846191406">
                <text:p>715.654846191406</text:p>
              </table:table-cell>
              <table:table-cell office:value-type="float" office:value="-0.005864693">
                <text:p>-0.005864693</text:p>
              </table:table-cell>
            </table:table-row>
            <table:table-row>
              <table:table-cell office:value-type="string">
                <text:p>3407</text:p>
              </table:table-cell>
              <table:table-cell office:value-type="float" office:value="715.775024414063">
                <text:p>715.775024414063</text:p>
              </table:table-cell>
              <table:table-cell office:value-type="float" office:value="0.001994503">
                <text:p>0.001994503</text:p>
              </table:table-cell>
            </table:table-row>
            <table:table-row>
              <table:table-cell office:value-type="string">
                <text:p>3408</text:p>
              </table:table-cell>
              <table:table-cell office:value-type="float" office:value="715.895263671875">
                <text:p>715.895263671875</text:p>
              </table:table-cell>
              <table:table-cell office:value-type="float" office:value="-0.001221175">
                <text:p>-0.001221175</text:p>
              </table:table-cell>
            </table:table-row>
            <table:table-row>
              <table:table-cell office:value-type="string">
                <text:p>3409</text:p>
              </table:table-cell>
              <table:table-cell office:value-type="float" office:value="716.015441894531">
                <text:p>716.015441894531</text:p>
              </table:table-cell>
              <table:table-cell office:value-type="float" office:value="-0.0048779">
                <text:p>-0.0048779</text:p>
              </table:table-cell>
            </table:table-row>
            <table:table-row>
              <table:table-cell office:value-type="string">
                <text:p>3410</text:p>
              </table:table-cell>
              <table:table-cell office:value-type="float" office:value="716.135681152344">
                <text:p>716.135681152344</text:p>
              </table:table-cell>
              <table:table-cell office:value-type="float" office:value="0.0005220451">
                <text:p>0.0005220451</text:p>
              </table:table-cell>
            </table:table-row>
            <table:table-row>
              <table:table-cell office:value-type="string">
                <text:p>3411</text:p>
              </table:table-cell>
              <table:table-cell office:value-type="float" office:value="716.255859375">
                <text:p>716.255859375</text:p>
              </table:table-cell>
              <table:table-cell office:value-type="float" office:value="-0.006943037">
                <text:p>-0.006943037</text:p>
              </table:table-cell>
            </table:table-row>
            <table:table-row>
              <table:table-cell office:value-type="string">
                <text:p>3412</text:p>
              </table:table-cell>
              <table:table-cell office:value-type="float" office:value="716.376098632813">
                <text:p>716.376098632813</text:p>
              </table:table-cell>
              <table:table-cell office:value-type="float" office:value="-0.009286469">
                <text:p>-0.009286469</text:p>
              </table:table-cell>
            </table:table-row>
            <table:table-row>
              <table:table-cell office:value-type="string">
                <text:p>3413</text:p>
              </table:table-cell>
              <table:table-cell office:value-type="float" office:value="716.496276855469">
                <text:p>716.496276855469</text:p>
              </table:table-cell>
              <table:table-cell office:value-type="float" office:value="0.006079987">
                <text:p>0.006079987</text:p>
              </table:table-cell>
            </table:table-row>
            <table:table-row>
              <table:table-cell office:value-type="string">
                <text:p>3414</text:p>
              </table:table-cell>
              <table:table-cell office:value-type="float" office:value="716.616516113281">
                <text:p>716.616516113281</text:p>
              </table:table-cell>
              <table:table-cell office:value-type="float" office:value="0.001437404">
                <text:p>0.001437404</text:p>
              </table:table-cell>
            </table:table-row>
            <table:table-row>
              <table:table-cell office:value-type="string">
                <text:p>3415</text:p>
              </table:table-cell>
              <table:table-cell office:value-type="float" office:value="716.736694335938">
                <text:p>716.736694335938</text:p>
              </table:table-cell>
              <table:table-cell office:value-type="float" office:value="0.001009258">
                <text:p>0.001009258</text:p>
              </table:table-cell>
            </table:table-row>
            <table:table-row>
              <table:table-cell office:value-type="string">
                <text:p>3416</text:p>
              </table:table-cell>
              <table:table-cell office:value-type="float" office:value="716.85693359375">
                <text:p>716.85693359375</text:p>
              </table:table-cell>
              <table:table-cell office:value-type="float" office:value="-0.0001180013">
                <text:p>-0.0001180013</text:p>
              </table:table-cell>
            </table:table-row>
            <table:table-row>
              <table:table-cell office:value-type="string">
                <text:p>3417</text:p>
              </table:table-cell>
              <table:table-cell office:value-type="float" office:value="716.977172851563">
                <text:p>716.977172851563</text:p>
              </table:table-cell>
              <table:table-cell office:value-type="float" office:value="0.00117246">
                <text:p>0.00117246</text:p>
              </table:table-cell>
            </table:table-row>
            <table:table-row>
              <table:table-cell office:value-type="string">
                <text:p>3418</text:p>
              </table:table-cell>
              <table:table-cell office:value-type="float" office:value="717.097351074219">
                <text:p>717.097351074219</text:p>
              </table:table-cell>
              <table:table-cell office:value-type="float" office:value="0.005047176">
                <text:p>0.005047176</text:p>
              </table:table-cell>
            </table:table-row>
            <table:table-row>
              <table:table-cell office:value-type="string">
                <text:p>3419</text:p>
              </table:table-cell>
              <table:table-cell office:value-type="float" office:value="717.217590332031">
                <text:p>717.217590332031</text:p>
              </table:table-cell>
              <table:table-cell office:value-type="float" office:value="-0.005762232">
                <text:p>-0.005762232</text:p>
              </table:table-cell>
            </table:table-row>
            <table:table-row>
              <table:table-cell office:value-type="string">
                <text:p>3420</text:p>
              </table:table-cell>
              <table:table-cell office:value-type="float" office:value="717.337768554688">
                <text:p>717.337768554688</text:p>
              </table:table-cell>
              <table:table-cell office:value-type="float" office:value="-0.008719893">
                <text:p>-0.008719893</text:p>
              </table:table-cell>
            </table:table-row>
            <table:table-row>
              <table:table-cell office:value-type="string">
                <text:p>3421</text:p>
              </table:table-cell>
              <table:table-cell office:value-type="float" office:value="717.4580078125">
                <text:p>717.4580078125</text:p>
              </table:table-cell>
              <table:table-cell office:value-type="float" office:value="0.0006852187">
                <text:p>0.0006852187</text:p>
              </table:table-cell>
            </table:table-row>
            <table:table-row>
              <table:table-cell office:value-type="string">
                <text:p>3422</text:p>
              </table:table-cell>
              <table:table-cell office:value-type="float" office:value="717.578186035156">
                <text:p>717.578186035156</text:p>
              </table:table-cell>
              <table:table-cell office:value-type="float" office:value="-0.0009713885">
                <text:p>-0.0009713885</text:p>
              </table:table-cell>
            </table:table-row>
            <table:table-row>
              <table:table-cell office:value-type="string">
                <text:p>3423</text:p>
              </table:table-cell>
              <table:table-cell office:value-type="float" office:value="717.698425292969">
                <text:p>717.698425292969</text:p>
              </table:table-cell>
              <table:table-cell office:value-type="float" office:value="0.001045854">
                <text:p>0.001045854</text:p>
              </table:table-cell>
            </table:table-row>
            <table:table-row>
              <table:table-cell office:value-type="string">
                <text:p>3424</text:p>
              </table:table-cell>
              <table:table-cell office:value-type="float" office:value="717.818603515625">
                <text:p>717.818603515625</text:p>
              </table:table-cell>
              <table:table-cell office:value-type="float" office:value="0.0004692967">
                <text:p>0.0004692967</text:p>
              </table:table-cell>
            </table:table-row>
            <table:table-row>
              <table:table-cell office:value-type="string">
                <text:p>3425</text:p>
              </table:table-cell>
              <table:table-cell office:value-type="float" office:value="717.938842773438">
                <text:p>717.938842773438</text:p>
              </table:table-cell>
              <table:table-cell office:value-type="float" office:value="-0.00153959">
                <text:p>-0.00153959</text:p>
              </table:table-cell>
            </table:table-row>
            <table:table-row>
              <table:table-cell office:value-type="string">
                <text:p>3426</text:p>
              </table:table-cell>
              <table:table-cell office:value-type="float" office:value="718.05908203125">
                <text:p>718.05908203125</text:p>
              </table:table-cell>
              <table:table-cell office:value-type="float" office:value="0.0009511203">
                <text:p>0.0009511203</text:p>
              </table:table-cell>
            </table:table-row>
            <table:table-row>
              <table:table-cell office:value-type="string">
                <text:p>3427</text:p>
              </table:table-cell>
              <table:table-cell office:value-type="float" office:value="718.179260253906">
                <text:p>718.179260253906</text:p>
              </table:table-cell>
              <table:table-cell office:value-type="float" office:value="-0.004571853">
                <text:p>-0.004571853</text:p>
              </table:table-cell>
            </table:table-row>
            <table:table-row>
              <table:table-cell office:value-type="string">
                <text:p>3428</text:p>
              </table:table-cell>
              <table:table-cell office:value-type="float" office:value="718.299499511719">
                <text:p>718.299499511719</text:p>
              </table:table-cell>
              <table:table-cell office:value-type="float" office:value="0.005627657">
                <text:p>0.005627657</text:p>
              </table:table-cell>
            </table:table-row>
            <table:table-row>
              <table:table-cell office:value-type="string">
                <text:p>3429</text:p>
              </table:table-cell>
              <table:table-cell office:value-type="float" office:value="718.419677734375">
                <text:p>718.419677734375</text:p>
              </table:table-cell>
              <table:table-cell office:value-type="float" office:value="-0.0004368861">
                <text:p>-0.0004368861</text:p>
              </table:table-cell>
            </table:table-row>
            <table:table-row>
              <table:table-cell office:value-type="string">
                <text:p>3430</text:p>
              </table:table-cell>
              <table:table-cell office:value-type="float" office:value="718.539916992188">
                <text:p>718.539916992188</text:p>
              </table:table-cell>
              <table:table-cell office:value-type="float" office:value="-0.005191264">
                <text:p>-0.005191264</text:p>
              </table:table-cell>
            </table:table-row>
            <table:table-row>
              <table:table-cell office:value-type="string">
                <text:p>3431</text:p>
              </table:table-cell>
              <table:table-cell office:value-type="float" office:value="718.66015625">
                <text:p>718.66015625</text:p>
              </table:table-cell>
              <table:table-cell office:value-type="float" office:value="0.001319241">
                <text:p>0.001319241</text:p>
              </table:table-cell>
            </table:table-row>
            <table:table-row>
              <table:table-cell office:value-type="string">
                <text:p>3432</text:p>
              </table:table-cell>
              <table:table-cell office:value-type="float" office:value="718.780334472656">
                <text:p>718.780334472656</text:p>
              </table:table-cell>
              <table:table-cell office:value-type="float" office:value="-0.001464682">
                <text:p>-0.001464682</text:p>
              </table:table-cell>
            </table:table-row>
            <table:table-row>
              <table:table-cell office:value-type="string">
                <text:p>3433</text:p>
              </table:table-cell>
              <table:table-cell office:value-type="float" office:value="718.900573730469">
                <text:p>718.900573730469</text:p>
              </table:table-cell>
              <table:table-cell office:value-type="float" office:value="0.001868289">
                <text:p>0.001868289</text:p>
              </table:table-cell>
            </table:table-row>
            <table:table-row>
              <table:table-cell office:value-type="string">
                <text:p>3434</text:p>
              </table:table-cell>
              <table:table-cell office:value-type="float" office:value="719.020812988281">
                <text:p>719.020812988281</text:p>
              </table:table-cell>
              <table:table-cell office:value-type="float" office:value="0.004194565">
                <text:p>0.004194565</text:p>
              </table:table-cell>
            </table:table-row>
            <table:table-row>
              <table:table-cell office:value-type="string">
                <text:p>3435</text:p>
              </table:table-cell>
              <table:table-cell office:value-type="float" office:value="719.140991210938">
                <text:p>719.140991210938</text:p>
              </table:table-cell>
              <table:table-cell office:value-type="float" office:value="0.007280202">
                <text:p>0.007280202</text:p>
              </table:table-cell>
            </table:table-row>
            <table:table-row>
              <table:table-cell office:value-type="string">
                <text:p>3436</text:p>
              </table:table-cell>
              <table:table-cell office:value-type="float" office:value="719.26123046875">
                <text:p>719.26123046875</text:p>
              </table:table-cell>
              <table:table-cell office:value-type="float" office:value="-0.0004583912">
                <text:p>-0.0004583912</text:p>
              </table:table-cell>
            </table:table-row>
            <table:table-row>
              <table:table-cell office:value-type="string">
                <text:p>3437</text:p>
              </table:table-cell>
              <table:table-cell office:value-type="float" office:value="719.381469726563">
                <text:p>719.381469726563</text:p>
              </table:table-cell>
              <table:table-cell office:value-type="float" office:value="-0.003346604">
                <text:p>-0.003346604</text:p>
              </table:table-cell>
            </table:table-row>
            <table:table-row>
              <table:table-cell office:value-type="string">
                <text:p>3438</text:p>
              </table:table-cell>
              <table:table-cell office:value-type="float" office:value="719.501647949219">
                <text:p>719.501647949219</text:p>
              </table:table-cell>
              <table:table-cell office:value-type="float" office:value="0.008070744">
                <text:p>0.008070744</text:p>
              </table:table-cell>
            </table:table-row>
            <table:table-row>
              <table:table-cell office:value-type="string">
                <text:p>3439</text:p>
              </table:table-cell>
              <table:table-cell office:value-type="float" office:value="719.621887207031">
                <text:p>719.621887207031</text:p>
              </table:table-cell>
              <table:table-cell office:value-type="float" office:value="-0.003424563">
                <text:p>-0.003424563</text:p>
              </table:table-cell>
            </table:table-row>
            <table:table-row>
              <table:table-cell office:value-type="string">
                <text:p>3440</text:p>
              </table:table-cell>
              <table:table-cell office:value-type="float" office:value="719.742126464844">
                <text:p>719.742126464844</text:p>
              </table:table-cell>
              <table:table-cell office:value-type="float" office:value="-0.008376519">
                <text:p>-0.008376519</text:p>
              </table:table-cell>
            </table:table-row>
            <table:table-row>
              <table:table-cell office:value-type="string">
                <text:p>3441</text:p>
              </table:table-cell>
              <table:table-cell office:value-type="float" office:value="719.8623046875">
                <text:p>719.8623046875</text:p>
              </table:table-cell>
              <table:table-cell office:value-type="float" office:value="-0.008064253">
                <text:p>-0.008064253</text:p>
              </table:table-cell>
            </table:table-row>
            <table:table-row>
              <table:table-cell office:value-type="string">
                <text:p>3442</text:p>
              </table:table-cell>
              <table:table-cell office:value-type="float" office:value="719.982543945313">
                <text:p>719.982543945313</text:p>
              </table:table-cell>
              <table:table-cell office:value-type="float" office:value="0.004461408">
                <text:p>0.004461408</text:p>
              </table:table-cell>
            </table:table-row>
            <table:table-row>
              <table:table-cell office:value-type="string">
                <text:p>3443</text:p>
              </table:table-cell>
              <table:table-cell office:value-type="float" office:value="720.102783203125">
                <text:p>720.102783203125</text:p>
              </table:table-cell>
              <table:table-cell office:value-type="float" office:value="-0.005204618">
                <text:p>-0.005204618</text:p>
              </table:table-cell>
            </table:table-row>
            <table:table-row>
              <table:table-cell office:value-type="string">
                <text:p>3444</text:p>
              </table:table-cell>
              <table:table-cell office:value-type="float" office:value="720.222961425781">
                <text:p>720.222961425781</text:p>
              </table:table-cell>
              <table:table-cell office:value-type="float" office:value="0.008672654">
                <text:p>0.008672654</text:p>
              </table:table-cell>
            </table:table-row>
            <table:table-row>
              <table:table-cell office:value-type="string">
                <text:p>3445</text:p>
              </table:table-cell>
              <table:table-cell office:value-type="float" office:value="720.343200683594">
                <text:p>720.343200683594</text:p>
              </table:table-cell>
              <table:table-cell office:value-type="float" office:value="-0.008514166">
                <text:p>-0.008514166</text:p>
              </table:table-cell>
            </table:table-row>
            <table:table-row>
              <table:table-cell office:value-type="string">
                <text:p>3446</text:p>
              </table:table-cell>
              <table:table-cell office:value-type="float" office:value="720.463439941406">
                <text:p>720.463439941406</text:p>
              </table:table-cell>
              <table:table-cell office:value-type="float" office:value="0.001198151">
                <text:p>0.001198151</text:p>
              </table:table-cell>
            </table:table-row>
            <table:table-row>
              <table:table-cell office:value-type="string">
                <text:p>3447</text:p>
              </table:table-cell>
              <table:table-cell office:value-type="float" office:value="720.583679199219">
                <text:p>720.583679199219</text:p>
              </table:table-cell>
              <table:table-cell office:value-type="float" office:value="0.02099409">
                <text:p>0.02099409</text:p>
              </table:table-cell>
            </table:table-row>
            <table:table-row>
              <table:table-cell office:value-type="string">
                <text:p>3448</text:p>
              </table:table-cell>
              <table:table-cell office:value-type="float" office:value="720.703857421875">
                <text:p>720.703857421875</text:p>
              </table:table-cell>
              <table:table-cell office:value-type="float" office:value="0.0009540316">
                <text:p>0.0009540316</text:p>
              </table:table-cell>
            </table:table-row>
            <table:table-row>
              <table:table-cell office:value-type="string">
                <text:p>3449</text:p>
              </table:table-cell>
              <table:table-cell office:value-type="float" office:value="720.824096679688">
                <text:p>720.824096679688</text:p>
              </table:table-cell>
              <table:table-cell office:value-type="float" office:value="0.001383136">
                <text:p>0.001383136</text:p>
              </table:table-cell>
            </table:table-row>
            <table:table-row>
              <table:table-cell office:value-type="string">
                <text:p>3450</text:p>
              </table:table-cell>
              <table:table-cell office:value-type="float" office:value="720.9443359375">
                <text:p>720.9443359375</text:p>
              </table:table-cell>
              <table:table-cell office:value-type="float" office:value="0.005601403">
                <text:p>0.005601403</text:p>
              </table:table-cell>
            </table:table-row>
            <table:table-row>
              <table:table-cell office:value-type="string">
                <text:p>3451</text:p>
              </table:table-cell>
              <table:table-cell office:value-type="float" office:value="721.064575195313">
                <text:p>721.064575195313</text:p>
              </table:table-cell>
              <table:table-cell office:value-type="float" office:value="0.004691109">
                <text:p>0.004691109</text:p>
              </table:table-cell>
            </table:table-row>
            <table:table-row>
              <table:table-cell office:value-type="string">
                <text:p>3452</text:p>
              </table:table-cell>
              <table:table-cell office:value-type="float" office:value="721.184753417969">
                <text:p>721.184753417969</text:p>
              </table:table-cell>
              <table:table-cell office:value-type="float" office:value="-0.002846084">
                <text:p>-0.002846084</text:p>
              </table:table-cell>
            </table:table-row>
            <table:table-row>
              <table:table-cell office:value-type="string">
                <text:p>3453</text:p>
              </table:table-cell>
              <table:table-cell office:value-type="float" office:value="721.304992675781">
                <text:p>721.304992675781</text:p>
              </table:table-cell>
              <table:table-cell office:value-type="float" office:value="0.001046667">
                <text:p>0.001046667</text:p>
              </table:table-cell>
            </table:table-row>
            <table:table-row>
              <table:table-cell office:value-type="string">
                <text:p>3454</text:p>
              </table:table-cell>
              <table:table-cell office:value-type="float" office:value="721.425231933594">
                <text:p>721.425231933594</text:p>
              </table:table-cell>
              <table:table-cell office:value-type="float" office:value="0.00094276">
                <text:p>0.00094276</text:p>
              </table:table-cell>
            </table:table-row>
            <table:table-row>
              <table:table-cell office:value-type="string">
                <text:p>3455</text:p>
              </table:table-cell>
              <table:table-cell office:value-type="float" office:value="721.545471191406">
                <text:p>721.545471191406</text:p>
              </table:table-cell>
              <table:table-cell office:value-type="float" office:value="0.01733431">
                <text:p>0.01733431</text:p>
              </table:table-cell>
            </table:table-row>
            <table:table-row>
              <table:table-cell office:value-type="string">
                <text:p>3456</text:p>
              </table:table-cell>
              <table:table-cell office:value-type="float" office:value="721.665649414063">
                <text:p>721.665649414063</text:p>
              </table:table-cell>
              <table:table-cell office:value-type="float" office:value="-0.008396394">
                <text:p>-0.008396394</text:p>
              </table:table-cell>
            </table:table-row>
            <table:table-row>
              <table:table-cell office:value-type="string">
                <text:p>3457</text:p>
              </table:table-cell>
              <table:table-cell office:value-type="float" office:value="721.785888671875">
                <text:p>721.785888671875</text:p>
              </table:table-cell>
              <table:table-cell office:value-type="float" office:value="0.01515106">
                <text:p>0.01515106</text:p>
              </table:table-cell>
            </table:table-row>
            <table:table-row>
              <table:table-cell office:value-type="string">
                <text:p>3458</text:p>
              </table:table-cell>
              <table:table-cell office:value-type="float" office:value="721.906127929688">
                <text:p>721.906127929688</text:p>
              </table:table-cell>
              <table:table-cell office:value-type="float" office:value="-0.001758672">
                <text:p>-0.001758672</text:p>
              </table:table-cell>
            </table:table-row>
            <table:table-row>
              <table:table-cell office:value-type="string">
                <text:p>3459</text:p>
              </table:table-cell>
              <table:table-cell office:value-type="float" office:value="722.0263671875">
                <text:p>722.0263671875</text:p>
              </table:table-cell>
              <table:table-cell office:value-type="float" office:value="-0.006347612">
                <text:p>-0.006347612</text:p>
              </table:table-cell>
            </table:table-row>
            <table:table-row>
              <table:table-cell office:value-type="string">
                <text:p>3460</text:p>
              </table:table-cell>
              <table:table-cell office:value-type="float" office:value="722.146606445313">
                <text:p>722.146606445313</text:p>
              </table:table-cell>
              <table:table-cell office:value-type="float" office:value="0.01374444">
                <text:p>0.01374444</text:p>
              </table:table-cell>
            </table:table-row>
            <table:table-row>
              <table:table-cell office:value-type="string">
                <text:p>3461</text:p>
              </table:table-cell>
              <table:table-cell office:value-type="float" office:value="722.266784667969">
                <text:p>722.266784667969</text:p>
              </table:table-cell>
              <table:table-cell office:value-type="float" office:value="-0.002716166">
                <text:p>-0.002716166</text:p>
              </table:table-cell>
            </table:table-row>
            <table:table-row>
              <table:table-cell office:value-type="string">
                <text:p>3462</text:p>
              </table:table-cell>
              <table:table-cell office:value-type="float" office:value="722.387023925781">
                <text:p>722.387023925781</text:p>
              </table:table-cell>
              <table:table-cell office:value-type="float" office:value="-0.006713513">
                <text:p>-0.006713513</text:p>
              </table:table-cell>
            </table:table-row>
            <table:table-row>
              <table:table-cell office:value-type="string">
                <text:p>3463</text:p>
              </table:table-cell>
              <table:table-cell office:value-type="float" office:value="722.507263183594">
                <text:p>722.507263183594</text:p>
              </table:table-cell>
              <table:table-cell office:value-type="float" office:value="-0.008400442">
                <text:p>-0.008400442</text:p>
              </table:table-cell>
            </table:table-row>
            <table:table-row>
              <table:table-cell office:value-type="string">
                <text:p>3464</text:p>
              </table:table-cell>
              <table:table-cell office:value-type="float" office:value="722.627502441406">
                <text:p>722.627502441406</text:p>
              </table:table-cell>
              <table:table-cell office:value-type="float" office:value="-0.004379559">
                <text:p>-0.004379559</text:p>
              </table:table-cell>
            </table:table-row>
            <table:table-row>
              <table:table-cell office:value-type="string">
                <text:p>3465</text:p>
              </table:table-cell>
              <table:table-cell office:value-type="float" office:value="722.747741699219">
                <text:p>722.747741699219</text:p>
              </table:table-cell>
              <table:table-cell office:value-type="float" office:value="0.002719858">
                <text:p>0.002719858</text:p>
              </table:table-cell>
            </table:table-row>
            <table:table-row>
              <table:table-cell office:value-type="string">
                <text:p>3466</text:p>
              </table:table-cell>
              <table:table-cell office:value-type="float" office:value="722.867980957031">
                <text:p>722.867980957031</text:p>
              </table:table-cell>
              <table:table-cell office:value-type="float" office:value="-0.006753061">
                <text:p>-0.006753061</text:p>
              </table:table-cell>
            </table:table-row>
            <table:table-row>
              <table:table-cell office:value-type="string">
                <text:p>3467</text:p>
              </table:table-cell>
              <table:table-cell office:value-type="float" office:value="722.988159179688">
                <text:p>722.988159179688</text:p>
              </table:table-cell>
              <table:table-cell office:value-type="float" office:value="0.001335823">
                <text:p>0.001335823</text:p>
              </table:table-cell>
            </table:table-row>
            <table:table-row>
              <table:table-cell office:value-type="string">
                <text:p>3468</text:p>
              </table:table-cell>
              <table:table-cell office:value-type="float" office:value="723.1083984375">
                <text:p>723.1083984375</text:p>
              </table:table-cell>
              <table:table-cell office:value-type="float" office:value="0.00460119">
                <text:p>0.00460119</text:p>
              </table:table-cell>
            </table:table-row>
            <table:table-row>
              <table:table-cell office:value-type="string">
                <text:p>3469</text:p>
              </table:table-cell>
              <table:table-cell office:value-type="float" office:value="723.228637695313">
                <text:p>723.228637695313</text:p>
              </table:table-cell>
              <table:table-cell office:value-type="float" office:value="0.01502969">
                <text:p>0.01502969</text:p>
              </table:table-cell>
            </table:table-row>
            <table:table-row>
              <table:table-cell office:value-type="string">
                <text:p>3470</text:p>
              </table:table-cell>
              <table:table-cell office:value-type="float" office:value="723.348876953125">
                <text:p>723.348876953125</text:p>
              </table:table-cell>
              <table:table-cell office:value-type="float" office:value="0.001970056">
                <text:p>0.001970056</text:p>
              </table:table-cell>
            </table:table-row>
            <table:table-row>
              <table:table-cell office:value-type="string">
                <text:p>3471</text:p>
              </table:table-cell>
              <table:table-cell office:value-type="float" office:value="723.469116210938">
                <text:p>723.469116210938</text:p>
              </table:table-cell>
              <table:table-cell office:value-type="float" office:value="-0.004483329">
                <text:p>-0.004483329</text:p>
              </table:table-cell>
            </table:table-row>
            <table:table-row>
              <table:table-cell office:value-type="string">
                <text:p>3472</text:p>
              </table:table-cell>
              <table:table-cell office:value-type="float" office:value="723.58935546875">
                <text:p>723.58935546875</text:p>
              </table:table-cell>
              <table:table-cell office:value-type="float" office:value="0.00197138">
                <text:p>0.00197138</text:p>
              </table:table-cell>
            </table:table-row>
            <table:table-row>
              <table:table-cell office:value-type="string">
                <text:p>3473</text:p>
              </table:table-cell>
              <table:table-cell office:value-type="float" office:value="723.709594726563">
                <text:p>723.709594726563</text:p>
              </table:table-cell>
              <table:table-cell office:value-type="float" office:value="-0.005013044">
                <text:p>-0.005013044</text:p>
              </table:table-cell>
            </table:table-row>
            <table:table-row>
              <table:table-cell office:value-type="string">
                <text:p>3474</text:p>
              </table:table-cell>
              <table:table-cell office:value-type="float" office:value="723.829772949219">
                <text:p>723.829772949219</text:p>
              </table:table-cell>
              <table:table-cell office:value-type="float" office:value="-0.005013217">
                <text:p>-0.005013217</text:p>
              </table:table-cell>
            </table:table-row>
            <table:table-row>
              <table:table-cell office:value-type="string">
                <text:p>3475</text:p>
              </table:table-cell>
              <table:table-cell office:value-type="float" office:value="723.950012207031">
                <text:p>723.950012207031</text:p>
              </table:table-cell>
              <table:table-cell office:value-type="float" office:value="0.003191313">
                <text:p>0.003191313</text:p>
              </table:table-cell>
            </table:table-row>
            <table:table-row>
              <table:table-cell office:value-type="string">
                <text:p>3476</text:p>
              </table:table-cell>
              <table:table-cell office:value-type="float" office:value="724.070251464844">
                <text:p>724.070251464844</text:p>
              </table:table-cell>
              <table:table-cell office:value-type="float" office:value="-0.0001735524">
                <text:p>-0.0001735524</text:p>
              </table:table-cell>
            </table:table-row>
            <table:table-row>
              <table:table-cell office:value-type="string">
                <text:p>3477</text:p>
              </table:table-cell>
              <table:table-cell office:value-type="float" office:value="724.190490722656">
                <text:p>724.190490722656</text:p>
              </table:table-cell>
              <table:table-cell office:value-type="float" office:value="-0.01188548">
                <text:p>-0.01188548</text:p>
              </table:table-cell>
            </table:table-row>
            <table:table-row>
              <table:table-cell office:value-type="string">
                <text:p>3478</text:p>
              </table:table-cell>
              <table:table-cell office:value-type="float" office:value="724.310729980469">
                <text:p>724.310729980469</text:p>
              </table:table-cell>
              <table:table-cell office:value-type="float" office:value="-0.007114904">
                <text:p>-0.007114904</text:p>
              </table:table-cell>
            </table:table-row>
            <table:table-row>
              <table:table-cell office:value-type="string">
                <text:p>3479</text:p>
              </table:table-cell>
              <table:table-cell office:value-type="float" office:value="724.430969238281">
                <text:p>724.430969238281</text:p>
              </table:table-cell>
              <table:table-cell office:value-type="float" office:value="-0.008086678">
                <text:p>-0.008086678</text:p>
              </table:table-cell>
            </table:table-row>
            <table:table-row>
              <table:table-cell office:value-type="string">
                <text:p>3480</text:p>
              </table:table-cell>
              <table:table-cell office:value-type="float" office:value="724.551208496094">
                <text:p>724.551208496094</text:p>
              </table:table-cell>
              <table:table-cell office:value-type="float" office:value="-0.009855859">
                <text:p>-0.009855859</text:p>
              </table:table-cell>
            </table:table-row>
            <table:table-row>
              <table:table-cell office:value-type="string">
                <text:p>3481</text:p>
              </table:table-cell>
              <table:table-cell office:value-type="float" office:value="724.671447753906">
                <text:p>724.671447753906</text:p>
              </table:table-cell>
              <table:table-cell office:value-type="float" office:value="0.005849948">
                <text:p>0.005849948</text:p>
              </table:table-cell>
            </table:table-row>
            <table:table-row>
              <table:table-cell office:value-type="string">
                <text:p>3482</text:p>
              </table:table-cell>
              <table:table-cell office:value-type="float" office:value="724.791687011719">
                <text:p>724.791687011719</text:p>
              </table:table-cell>
              <table:table-cell office:value-type="float" office:value="-0.007944665">
                <text:p>-0.007944665</text:p>
              </table:table-cell>
            </table:table-row>
            <table:table-row>
              <table:table-cell office:value-type="string">
                <text:p>3483</text:p>
              </table:table-cell>
              <table:table-cell office:value-type="float" office:value="724.911865234375">
                <text:p>724.911865234375</text:p>
              </table:table-cell>
              <table:table-cell office:value-type="float" office:value="-0.007735487">
                <text:p>-0.007735487</text:p>
              </table:table-cell>
            </table:table-row>
            <table:table-row>
              <table:table-cell office:value-type="string">
                <text:p>3484</text:p>
              </table:table-cell>
              <table:table-cell office:value-type="float" office:value="725.032104492188">
                <text:p>725.032104492188</text:p>
              </table:table-cell>
              <table:table-cell office:value-type="float" office:value="0.004000041">
                <text:p>0.004000041</text:p>
              </table:table-cell>
            </table:table-row>
            <table:table-row>
              <table:table-cell office:value-type="string">
                <text:p>3485</text:p>
              </table:table-cell>
              <table:table-cell office:value-type="float" office:value="725.15234375">
                <text:p>725.15234375</text:p>
              </table:table-cell>
              <table:table-cell office:value-type="float" office:value="-0.005902996">
                <text:p>-0.005902996</text:p>
              </table:table-cell>
            </table:table-row>
            <table:table-row>
              <table:table-cell office:value-type="string">
                <text:p>3486</text:p>
              </table:table-cell>
              <table:table-cell office:value-type="float" office:value="725.272583007813">
                <text:p>725.272583007813</text:p>
              </table:table-cell>
              <table:table-cell office:value-type="float" office:value="-0.007473409">
                <text:p>-0.007473409</text:p>
              </table:table-cell>
            </table:table-row>
            <table:table-row>
              <table:table-cell office:value-type="string">
                <text:p>3487</text:p>
              </table:table-cell>
              <table:table-cell office:value-type="float" office:value="725.392822265625">
                <text:p>725.392822265625</text:p>
              </table:table-cell>
              <table:table-cell office:value-type="float" office:value="0.02284088">
                <text:p>0.02284088</text:p>
              </table:table-cell>
            </table:table-row>
            <table:table-row>
              <table:table-cell office:value-type="string">
                <text:p>3488</text:p>
              </table:table-cell>
              <table:table-cell office:value-type="float" office:value="725.513061523438">
                <text:p>725.513061523438</text:p>
              </table:table-cell>
              <table:table-cell office:value-type="float" office:value="-0.000778455">
                <text:p>-0.000778455</text:p>
              </table:table-cell>
            </table:table-row>
            <table:table-row>
              <table:table-cell office:value-type="string">
                <text:p>3489</text:p>
              </table:table-cell>
              <table:table-cell office:value-type="float" office:value="725.63330078125">
                <text:p>725.63330078125</text:p>
              </table:table-cell>
              <table:table-cell office:value-type="float" office:value="-0.0008043367">
                <text:p>-0.0008043367</text:p>
              </table:table-cell>
            </table:table-row>
            <table:table-row>
              <table:table-cell office:value-type="string">
                <text:p>3490</text:p>
              </table:table-cell>
              <table:table-cell office:value-type="float" office:value="725.753540039063">
                <text:p>725.753540039063</text:p>
              </table:table-cell>
              <table:table-cell office:value-type="float" office:value="-0.006569275">
                <text:p>-0.006569275</text:p>
              </table:table-cell>
            </table:table-row>
            <table:table-row>
              <table:table-cell office:value-type="string">
                <text:p>3491</text:p>
              </table:table-cell>
              <table:table-cell office:value-type="float" office:value="725.873779296875">
                <text:p>725.873779296875</text:p>
              </table:table-cell>
              <table:table-cell office:value-type="float" office:value="0.001271431">
                <text:p>0.001271431</text:p>
              </table:table-cell>
            </table:table-row>
            <table:table-row>
              <table:table-cell office:value-type="string">
                <text:p>3492</text:p>
              </table:table-cell>
              <table:table-cell office:value-type="float" office:value="725.994018554688">
                <text:p>725.994018554688</text:p>
              </table:table-cell>
              <table:table-cell office:value-type="float" office:value="-0.001776692">
                <text:p>-0.001776692</text:p>
              </table:table-cell>
            </table:table-row>
            <table:table-row>
              <table:table-cell office:value-type="string">
                <text:p>3493</text:p>
              </table:table-cell>
              <table:table-cell office:value-type="float" office:value="726.1142578125">
                <text:p>726.1142578125</text:p>
              </table:table-cell>
              <table:table-cell office:value-type="float" office:value="0.001003736">
                <text:p>0.001003736</text:p>
              </table:table-cell>
            </table:table-row>
            <table:table-row>
              <table:table-cell office:value-type="string">
                <text:p>3494</text:p>
              </table:table-cell>
              <table:table-cell office:value-type="float" office:value="726.234497070313">
                <text:p>726.234497070313</text:p>
              </table:table-cell>
              <table:table-cell office:value-type="float" office:value="-0.003428824">
                <text:p>-0.003428824</text:p>
              </table:table-cell>
            </table:table-row>
            <table:table-row>
              <table:table-cell office:value-type="string">
                <text:p>3495</text:p>
              </table:table-cell>
              <table:table-cell office:value-type="float" office:value="726.354736328125">
                <text:p>726.354736328125</text:p>
              </table:table-cell>
              <table:table-cell office:value-type="float" office:value="0.00766238">
                <text:p>0.00766238</text:p>
              </table:table-cell>
            </table:table-row>
            <table:table-row>
              <table:table-cell office:value-type="string">
                <text:p>3496</text:p>
              </table:table-cell>
              <table:table-cell office:value-type="float" office:value="726.474975585938">
                <text:p>726.474975585938</text:p>
              </table:table-cell>
              <table:table-cell office:value-type="float" office:value="-0.0004592312">
                <text:p>-0.0004592312</text:p>
              </table:table-cell>
            </table:table-row>
            <table:table-row>
              <table:table-cell office:value-type="string">
                <text:p>3497</text:p>
              </table:table-cell>
              <table:table-cell office:value-type="float" office:value="726.59521484375">
                <text:p>726.59521484375</text:p>
              </table:table-cell>
              <table:table-cell office:value-type="float" office:value="0.0007895475">
                <text:p>0.0007895475</text:p>
              </table:table-cell>
            </table:table-row>
            <table:table-row>
              <table:table-cell office:value-type="string">
                <text:p>3498</text:p>
              </table:table-cell>
              <table:table-cell office:value-type="float" office:value="726.715454101563">
                <text:p>726.715454101563</text:p>
              </table:table-cell>
              <table:table-cell office:value-type="float" office:value="-0.004035849">
                <text:p>-0.004035849</text:p>
              </table:table-cell>
            </table:table-row>
            <table:table-row>
              <table:table-cell office:value-type="string">
                <text:p>3499</text:p>
              </table:table-cell>
              <table:table-cell office:value-type="float" office:value="726.835693359375">
                <text:p>726.835693359375</text:p>
              </table:table-cell>
              <table:table-cell office:value-type="float" office:value="-0.004343844">
                <text:p>-0.004343844</text:p>
              </table:table-cell>
            </table:table-row>
            <table:table-row>
              <table:table-cell office:value-type="string">
                <text:p>3500</text:p>
              </table:table-cell>
              <table:table-cell office:value-type="float" office:value="726.955932617188">
                <text:p>726.955932617188</text:p>
              </table:table-cell>
              <table:table-cell office:value-type="float" office:value="-0.009761786">
                <text:p>-0.009761786</text:p>
              </table:table-cell>
            </table:table-row>
            <table:table-row>
              <table:table-cell office:value-type="string">
                <text:p>3501</text:p>
              </table:table-cell>
              <table:table-cell office:value-type="float" office:value="727.076171875">
                <text:p>727.076171875</text:p>
              </table:table-cell>
              <table:table-cell office:value-type="float" office:value="0.006006376">
                <text:p>0.006006376</text:p>
              </table:table-cell>
            </table:table-row>
            <table:table-row>
              <table:table-cell office:value-type="string">
                <text:p>3502</text:p>
              </table:table-cell>
              <table:table-cell office:value-type="float" office:value="727.196411132813">
                <text:p>727.196411132813</text:p>
              </table:table-cell>
              <table:table-cell office:value-type="float" office:value="-0.001092501">
                <text:p>-0.001092501</text:p>
              </table:table-cell>
            </table:table-row>
            <table:table-row>
              <table:table-cell office:value-type="string">
                <text:p>3503</text:p>
              </table:table-cell>
              <table:table-cell office:value-type="float" office:value="727.316650390625">
                <text:p>727.316650390625</text:p>
              </table:table-cell>
              <table:table-cell office:value-type="float" office:value="0.01202672">
                <text:p>0.01202672</text:p>
              </table:table-cell>
            </table:table-row>
            <table:table-row>
              <table:table-cell office:value-type="string">
                <text:p>3504</text:p>
              </table:table-cell>
              <table:table-cell office:value-type="float" office:value="727.436889648438">
                <text:p>727.436889648438</text:p>
              </table:table-cell>
              <table:table-cell office:value-type="float" office:value="-0.0008133307">
                <text:p>-0.0008133307</text:p>
              </table:table-cell>
            </table:table-row>
            <table:table-row>
              <table:table-cell office:value-type="string">
                <text:p>3505</text:p>
              </table:table-cell>
              <table:table-cell office:value-type="float" office:value="727.55712890625">
                <text:p>727.55712890625</text:p>
              </table:table-cell>
              <table:table-cell office:value-type="float" office:value="0.0005633875">
                <text:p>0.0005633875</text:p>
              </table:table-cell>
            </table:table-row>
            <table:table-row>
              <table:table-cell office:value-type="string">
                <text:p>3506</text:p>
              </table:table-cell>
              <table:table-cell office:value-type="float" office:value="727.677368164063">
                <text:p>727.677368164063</text:p>
              </table:table-cell>
              <table:table-cell office:value-type="float" office:value="-0.001262657">
                <text:p>-0.001262657</text:p>
              </table:table-cell>
            </table:table-row>
            <table:table-row>
              <table:table-cell office:value-type="string">
                <text:p>3507</text:p>
              </table:table-cell>
              <table:table-cell office:value-type="float" office:value="727.797607421875">
                <text:p>727.797607421875</text:p>
              </table:table-cell>
              <table:table-cell office:value-type="float" office:value="-0.007570581">
                <text:p>-0.007570581</text:p>
              </table:table-cell>
            </table:table-row>
            <table:table-row>
              <table:table-cell office:value-type="string">
                <text:p>3508</text:p>
              </table:table-cell>
              <table:table-cell office:value-type="float" office:value="727.917846679688">
                <text:p>727.917846679688</text:p>
              </table:table-cell>
              <table:table-cell office:value-type="float" office:value="-0.0104638">
                <text:p>-0.0104638</text:p>
              </table:table-cell>
            </table:table-row>
            <table:table-row>
              <table:table-cell office:value-type="string">
                <text:p>3509</text:p>
              </table:table-cell>
              <table:table-cell office:value-type="float" office:value="728.0380859375">
                <text:p>728.0380859375</text:p>
              </table:table-cell>
              <table:table-cell office:value-type="float" office:value="0.002682857">
                <text:p>0.002682857</text:p>
              </table:table-cell>
            </table:table-row>
            <table:table-row>
              <table:table-cell office:value-type="string">
                <text:p>3510</text:p>
              </table:table-cell>
              <table:table-cell office:value-type="float" office:value="728.158325195313">
                <text:p>728.158325195313</text:p>
              </table:table-cell>
              <table:table-cell office:value-type="float" office:value="-0.009369816">
                <text:p>-0.009369816</text:p>
              </table:table-cell>
            </table:table-row>
            <table:table-row>
              <table:table-cell office:value-type="string">
                <text:p>3511</text:p>
              </table:table-cell>
              <table:table-cell office:value-type="float" office:value="728.278564453125">
                <text:p>728.278564453125</text:p>
              </table:table-cell>
              <table:table-cell office:value-type="float" office:value="-0.004431478">
                <text:p>-0.004431478</text:p>
              </table:table-cell>
            </table:table-row>
            <table:table-row>
              <table:table-cell office:value-type="string">
                <text:p>3512</text:p>
              </table:table-cell>
              <table:table-cell office:value-type="float" office:value="728.398803710938">
                <text:p>728.398803710938</text:p>
              </table:table-cell>
              <table:table-cell office:value-type="float" office:value="-0.008335817">
                <text:p>-0.008335817</text:p>
              </table:table-cell>
            </table:table-row>
            <table:table-row>
              <table:table-cell office:value-type="string">
                <text:p>3513</text:p>
              </table:table-cell>
              <table:table-cell office:value-type="float" office:value="728.51904296875">
                <text:p>728.51904296875</text:p>
              </table:table-cell>
              <table:table-cell office:value-type="float" office:value="0.004324475">
                <text:p>0.004324475</text:p>
              </table:table-cell>
            </table:table-row>
            <table:table-row>
              <table:table-cell office:value-type="string">
                <text:p>3514</text:p>
              </table:table-cell>
              <table:table-cell office:value-type="float" office:value="728.639282226563">
                <text:p>728.639282226563</text:p>
              </table:table-cell>
              <table:table-cell office:value-type="float" office:value="-0.009104784">
                <text:p>-0.009104784</text:p>
              </table:table-cell>
            </table:table-row>
            <table:table-row>
              <table:table-cell office:value-type="string">
                <text:p>3515</text:p>
              </table:table-cell>
              <table:table-cell office:value-type="float" office:value="728.759521484375">
                <text:p>728.759521484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16</text:p>
              </table:table-cell>
              <table:table-cell office:value-type="float" office:value="728.879760742188">
                <text:p>728.879760742188</text:p>
              </table:table-cell>
              <table:table-cell office:value-type="float" office:value="0.003297847">
                <text:p>0.003297847</text:p>
              </table:table-cell>
            </table:table-row>
            <table:table-row>
              <table:table-cell office:value-type="string">
                <text:p>3517</text:p>
              </table:table-cell>
              <table:table-cell office:value-type="float" office:value="729">
                <text:p>729</text:p>
              </table:table-cell>
              <table:table-cell office:value-type="float" office:value="-0.006133133">
                <text:p>-0.006133133</text:p>
              </table:table-cell>
            </table:table-row>
            <table:table-row>
              <table:table-cell office:value-type="string">
                <text:p>3518</text:p>
              </table:table-cell>
              <table:table-cell office:value-type="float" office:value="729.120239257813">
                <text:p>729.1202392578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19</text:p>
              </table:table-cell>
              <table:table-cell office:value-type="float" office:value="729.240478515625">
                <text:p>729.240478515625</text:p>
              </table:table-cell>
              <table:table-cell office:value-type="float" office:value="0.007784419">
                <text:p>0.007784419</text:p>
              </table:table-cell>
            </table:table-row>
            <table:table-row>
              <table:table-cell office:value-type="string">
                <text:p>3520</text:p>
              </table:table-cell>
              <table:table-cell office:value-type="float" office:value="729.360778808594">
                <text:p>729.360778808594</text:p>
              </table:table-cell>
              <table:table-cell office:value-type="float" office:value="0.002817189">
                <text:p>0.002817189</text:p>
              </table:table-cell>
            </table:table-row>
            <table:table-row>
              <table:table-cell office:value-type="string">
                <text:p>3521</text:p>
              </table:table-cell>
              <table:table-cell office:value-type="float" office:value="729.481018066406">
                <text:p>729.481018066406</text:p>
              </table:table-cell>
              <table:table-cell office:value-type="float" office:value="0.000135907">
                <text:p>0.000135907</text:p>
              </table:table-cell>
            </table:table-row>
            <table:table-row>
              <table:table-cell office:value-type="string">
                <text:p>3522</text:p>
              </table:table-cell>
              <table:table-cell office:value-type="float" office:value="729.601257324219">
                <text:p>729.601257324219</text:p>
              </table:table-cell>
              <table:table-cell office:value-type="float" office:value="0.005308925">
                <text:p>0.005308925</text:p>
              </table:table-cell>
            </table:table-row>
            <table:table-row>
              <table:table-cell office:value-type="string">
                <text:p>3523</text:p>
              </table:table-cell>
              <table:table-cell office:value-type="float" office:value="729.721496582031">
                <text:p>729.721496582031</text:p>
              </table:table-cell>
              <table:table-cell office:value-type="float" office:value="0.02118913">
                <text:p>0.02118913</text:p>
              </table:table-cell>
            </table:table-row>
            <table:table-row>
              <table:table-cell office:value-type="string">
                <text:p>3524</text:p>
              </table:table-cell>
              <table:table-cell office:value-type="float" office:value="729.841735839844">
                <text:p>729.841735839844</text:p>
              </table:table-cell>
              <table:table-cell office:value-type="float" office:value="-0.005855647">
                <text:p>-0.005855647</text:p>
              </table:table-cell>
            </table:table-row>
            <table:table-row>
              <table:table-cell office:value-type="string">
                <text:p>3525</text:p>
              </table:table-cell>
              <table:table-cell office:value-type="float" office:value="729.961975097656">
                <text:p>729.961975097656</text:p>
              </table:table-cell>
              <table:table-cell office:value-type="float" office:value="-0.006660544">
                <text:p>-0.006660544</text:p>
              </table:table-cell>
            </table:table-row>
            <table:table-row>
              <table:table-cell office:value-type="string">
                <text:p>3526</text:p>
              </table:table-cell>
              <table:table-cell office:value-type="float" office:value="730.082214355469">
                <text:p>730.082214355469</text:p>
              </table:table-cell>
              <table:table-cell office:value-type="float" office:value="0.008282153">
                <text:p>0.008282153</text:p>
              </table:table-cell>
            </table:table-row>
            <table:table-row>
              <table:table-cell office:value-type="string">
                <text:p>3527</text:p>
              </table:table-cell>
              <table:table-cell office:value-type="float" office:value="730.202453613281">
                <text:p>730.202453613281</text:p>
              </table:table-cell>
              <table:table-cell office:value-type="float" office:value="0.004463824">
                <text:p>0.004463824</text:p>
              </table:table-cell>
            </table:table-row>
            <table:table-row>
              <table:table-cell office:value-type="string">
                <text:p>3528</text:p>
              </table:table-cell>
              <table:table-cell office:value-type="float" office:value="730.322692871094">
                <text:p>730.322692871094</text:p>
              </table:table-cell>
              <table:table-cell office:value-type="float" office:value="-0.002067608">
                <text:p>-0.002067608</text:p>
              </table:table-cell>
            </table:table-row>
            <table:table-row>
              <table:table-cell office:value-type="string">
                <text:p>3529</text:p>
              </table:table-cell>
              <table:table-cell office:value-type="float" office:value="730.442932128906">
                <text:p>730.442932128906</text:p>
              </table:table-cell>
              <table:table-cell office:value-type="float" office:value="0.002771492">
                <text:p>0.002771492</text:p>
              </table:table-cell>
            </table:table-row>
            <table:table-row>
              <table:table-cell office:value-type="string">
                <text:p>3530</text:p>
              </table:table-cell>
              <table:table-cell office:value-type="float" office:value="730.563171386719">
                <text:p>730.563171386719</text:p>
              </table:table-cell>
              <table:table-cell office:value-type="float" office:value="0.005455011">
                <text:p>0.005455011</text:p>
              </table:table-cell>
            </table:table-row>
            <table:table-row>
              <table:table-cell office:value-type="string">
                <text:p>3531</text:p>
              </table:table-cell>
              <table:table-cell office:value-type="float" office:value="730.683471679688">
                <text:p>730.683471679688</text:p>
              </table:table-cell>
              <table:table-cell office:value-type="float" office:value="-0.001614089">
                <text:p>-0.001614089</text:p>
              </table:table-cell>
            </table:table-row>
            <table:table-row>
              <table:table-cell office:value-type="string">
                <text:p>3532</text:p>
              </table:table-cell>
              <table:table-cell office:value-type="float" office:value="730.8037109375">
                <text:p>730.8037109375</text:p>
              </table:table-cell>
              <table:table-cell office:value-type="float" office:value="0.01142221">
                <text:p>0.01142221</text:p>
              </table:table-cell>
            </table:table-row>
            <table:table-row>
              <table:table-cell office:value-type="string">
                <text:p>3533</text:p>
              </table:table-cell>
              <table:table-cell office:value-type="float" office:value="730.923950195313">
                <text:p>730.923950195313</text:p>
              </table:table-cell>
              <table:table-cell office:value-type="float" office:value="0.00595021">
                <text:p>0.00595021</text:p>
              </table:table-cell>
            </table:table-row>
            <table:table-row>
              <table:table-cell office:value-type="string">
                <text:p>3534</text:p>
              </table:table-cell>
              <table:table-cell office:value-type="float" office:value="731.044189453125">
                <text:p>731.044189453125</text:p>
              </table:table-cell>
              <table:table-cell office:value-type="float" office:value="0.01213364">
                <text:p>0.01213364</text:p>
              </table:table-cell>
            </table:table-row>
            <table:table-row>
              <table:table-cell office:value-type="string">
                <text:p>3535</text:p>
              </table:table-cell>
              <table:table-cell office:value-type="float" office:value="731.164428710938">
                <text:p>731.164428710938</text:p>
              </table:table-cell>
              <table:table-cell office:value-type="float" office:value="-0.00489608">
                <text:p>-0.00489608</text:p>
              </table:table-cell>
            </table:table-row>
            <table:table-row>
              <table:table-cell office:value-type="string">
                <text:p>3536</text:p>
              </table:table-cell>
              <table:table-cell office:value-type="float" office:value="731.28466796875">
                <text:p>731.28466796875</text:p>
              </table:table-cell>
              <table:table-cell office:value-type="float" office:value="0.0006254372">
                <text:p>0.0006254372</text:p>
              </table:table-cell>
            </table:table-row>
            <table:table-row>
              <table:table-cell office:value-type="string">
                <text:p>3537</text:p>
              </table:table-cell>
              <table:table-cell office:value-type="float" office:value="731.404907226563">
                <text:p>731.404907226563</text:p>
              </table:table-cell>
              <table:table-cell office:value-type="float" office:value="-0.006607329">
                <text:p>-0.006607329</text:p>
              </table:table-cell>
            </table:table-row>
            <table:table-row>
              <table:table-cell office:value-type="string">
                <text:p>3538</text:p>
              </table:table-cell>
              <table:table-cell office:value-type="float" office:value="731.525146484375">
                <text:p>731.525146484375</text:p>
              </table:table-cell>
              <table:table-cell office:value-type="float" office:value="-0.002526157">
                <text:p>-0.002526157</text:p>
              </table:table-cell>
            </table:table-row>
            <table:table-row>
              <table:table-cell office:value-type="string">
                <text:p>3539</text:p>
              </table:table-cell>
              <table:table-cell office:value-type="float" office:value="731.645446777344">
                <text:p>731.645446777344</text:p>
              </table:table-cell>
              <table:table-cell office:value-type="float" office:value="0.007415151">
                <text:p>0.007415151</text:p>
              </table:table-cell>
            </table:table-row>
            <table:table-row>
              <table:table-cell office:value-type="string">
                <text:p>3540</text:p>
              </table:table-cell>
              <table:table-cell office:value-type="float" office:value="731.765686035156">
                <text:p>731.765686035156</text:p>
              </table:table-cell>
              <table:table-cell office:value-type="float" office:value="0.007642058">
                <text:p>0.007642058</text:p>
              </table:table-cell>
            </table:table-row>
            <table:table-row>
              <table:table-cell office:value-type="string">
                <text:p>3541</text:p>
              </table:table-cell>
              <table:table-cell office:value-type="float" office:value="731.885925292969">
                <text:p>731.885925292969</text:p>
              </table:table-cell>
              <table:table-cell office:value-type="float" office:value="0.004899257">
                <text:p>0.004899257</text:p>
              </table:table-cell>
            </table:table-row>
            <table:table-row>
              <table:table-cell office:value-type="string">
                <text:p>3542</text:p>
              </table:table-cell>
              <table:table-cell office:value-type="float" office:value="732.006164550781">
                <text:p>732.006164550781</text:p>
              </table:table-cell>
              <table:table-cell office:value-type="float" office:value="-0.002898239">
                <text:p>-0.002898239</text:p>
              </table:table-cell>
            </table:table-row>
            <table:table-row>
              <table:table-cell office:value-type="string">
                <text:p>3543</text:p>
              </table:table-cell>
              <table:table-cell office:value-type="float" office:value="732.126403808594">
                <text:p>732.126403808594</text:p>
              </table:table-cell>
              <table:table-cell office:value-type="float" office:value="0.01612643">
                <text:p>0.01612643</text:p>
              </table:table-cell>
            </table:table-row>
            <table:table-row>
              <table:table-cell office:value-type="string">
                <text:p>3544</text:p>
              </table:table-cell>
              <table:table-cell office:value-type="float" office:value="732.246643066406">
                <text:p>732.246643066406</text:p>
              </table:table-cell>
              <table:table-cell office:value-type="float" office:value="-0.004573049">
                <text:p>-0.004573049</text:p>
              </table:table-cell>
            </table:table-row>
            <table:table-row>
              <table:table-cell office:value-type="string">
                <text:p>3545</text:p>
              </table:table-cell>
              <table:table-cell office:value-type="float" office:value="732.366882324219">
                <text:p>732.366882324219</text:p>
              </table:table-cell>
              <table:table-cell office:value-type="float" office:value="-0.004819736">
                <text:p>-0.004819736</text:p>
              </table:table-cell>
            </table:table-row>
            <table:table-row>
              <table:table-cell office:value-type="string">
                <text:p>3546</text:p>
              </table:table-cell>
              <table:table-cell office:value-type="float" office:value="732.487182617188">
                <text:p>732.487182617188</text:p>
              </table:table-cell>
              <table:table-cell office:value-type="float" office:value="-0.005981402">
                <text:p>-0.005981402</text:p>
              </table:table-cell>
            </table:table-row>
            <table:table-row>
              <table:table-cell office:value-type="string">
                <text:p>3547</text:p>
              </table:table-cell>
              <table:table-cell office:value-type="float" office:value="732.607421875">
                <text:p>732.607421875</text:p>
              </table:table-cell>
              <table:table-cell office:value-type="float" office:value="-0.002446438">
                <text:p>-0.002446438</text:p>
              </table:table-cell>
            </table:table-row>
            <table:table-row>
              <table:table-cell office:value-type="string">
                <text:p>3548</text:p>
              </table:table-cell>
              <table:table-cell office:value-type="float" office:value="732.727661132813">
                <text:p>732.727661132813</text:p>
              </table:table-cell>
              <table:table-cell office:value-type="float" office:value="0.003437385">
                <text:p>0.003437385</text:p>
              </table:table-cell>
            </table:table-row>
            <table:table-row>
              <table:table-cell office:value-type="string">
                <text:p>3549</text:p>
              </table:table-cell>
              <table:table-cell office:value-type="float" office:value="732.847900390625">
                <text:p>732.847900390625</text:p>
              </table:table-cell>
              <table:table-cell office:value-type="float" office:value="-0.003117522">
                <text:p>-0.003117522</text:p>
              </table:table-cell>
            </table:table-row>
            <table:table-row>
              <table:table-cell office:value-type="string">
                <text:p>3550</text:p>
              </table:table-cell>
              <table:table-cell office:value-type="float" office:value="732.968139648438">
                <text:p>732.968139648438</text:p>
              </table:table-cell>
              <table:table-cell office:value-type="float" office:value="-0.002798424">
                <text:p>-0.002798424</text:p>
              </table:table-cell>
            </table:table-row>
            <table:table-row>
              <table:table-cell office:value-type="string">
                <text:p>3551</text:p>
              </table:table-cell>
              <table:table-cell office:value-type="float" office:value="733.08837890625">
                <text:p>733.08837890625</text:p>
              </table:table-cell>
              <table:table-cell office:value-type="float" office:value="-0.005454395">
                <text:p>-0.005454395</text:p>
              </table:table-cell>
            </table:table-row>
            <table:table-row>
              <table:table-cell office:value-type="string">
                <text:p>3552</text:p>
              </table:table-cell>
              <table:table-cell office:value-type="float" office:value="733.208679199219">
                <text:p>733.208679199219</text:p>
              </table:table-cell>
              <table:table-cell office:value-type="float" office:value="-0.007402246">
                <text:p>-0.007402246</text:p>
              </table:table-cell>
            </table:table-row>
            <table:table-row>
              <table:table-cell office:value-type="string">
                <text:p>3553</text:p>
              </table:table-cell>
              <table:table-cell office:value-type="float" office:value="733.328918457031">
                <text:p>733.328918457031</text:p>
              </table:table-cell>
              <table:table-cell office:value-type="float" office:value="-0.003575177">
                <text:p>-0.003575177</text:p>
              </table:table-cell>
            </table:table-row>
            <table:table-row>
              <table:table-cell office:value-type="string">
                <text:p>3554</text:p>
              </table:table-cell>
              <table:table-cell office:value-type="float" office:value="733.449157714844">
                <text:p>733.449157714844</text:p>
              </table:table-cell>
              <table:table-cell office:value-type="float" office:value="-0.0007696258">
                <text:p>-0.0007696258</text:p>
              </table:table-cell>
            </table:table-row>
            <table:table-row>
              <table:table-cell office:value-type="string">
                <text:p>3555</text:p>
              </table:table-cell>
              <table:table-cell office:value-type="float" office:value="733.569396972656">
                <text:p>733.569396972656</text:p>
              </table:table-cell>
              <table:table-cell office:value-type="float" office:value="0.002106322">
                <text:p>0.002106322</text:p>
              </table:table-cell>
            </table:table-row>
            <table:table-row>
              <table:table-cell office:value-type="string">
                <text:p>3556</text:p>
              </table:table-cell>
              <table:table-cell office:value-type="float" office:value="733.689636230469">
                <text:p>733.689636230469</text:p>
              </table:table-cell>
              <table:table-cell office:value-type="float" office:value="-0.002036323">
                <text:p>-0.002036323</text:p>
              </table:table-cell>
            </table:table-row>
            <table:table-row>
              <table:table-cell office:value-type="string">
                <text:p>3557</text:p>
              </table:table-cell>
              <table:table-cell office:value-type="float" office:value="733.809936523438">
                <text:p>733.8099365234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58</text:p>
              </table:table-cell>
              <table:table-cell office:value-type="float" office:value="733.93017578125">
                <text:p>733.93017578125</text:p>
              </table:table-cell>
              <table:table-cell office:value-type="float" office:value="0.006829578">
                <text:p>0.006829578</text:p>
              </table:table-cell>
            </table:table-row>
            <table:table-row>
              <table:table-cell office:value-type="string">
                <text:p>3559</text:p>
              </table:table-cell>
              <table:table-cell office:value-type="float" office:value="734.050415039063">
                <text:p>734.050415039063</text:p>
              </table:table-cell>
              <table:table-cell office:value-type="float" office:value="0.001263805">
                <text:p>0.001263805</text:p>
              </table:table-cell>
            </table:table-row>
            <table:table-row>
              <table:table-cell office:value-type="string">
                <text:p>3560</text:p>
              </table:table-cell>
              <table:table-cell office:value-type="float" office:value="734.170654296875">
                <text:p>734.170654296875</text:p>
              </table:table-cell>
              <table:table-cell office:value-type="float" office:value="0.006777517">
                <text:p>0.006777517</text:p>
              </table:table-cell>
            </table:table-row>
            <table:table-row>
              <table:table-cell office:value-type="string">
                <text:p>3561</text:p>
              </table:table-cell>
              <table:table-cell office:value-type="float" office:value="734.290893554688">
                <text:p>734.290893554688</text:p>
              </table:table-cell>
              <table:table-cell office:value-type="float" office:value="-0.007313723">
                <text:p>-0.007313723</text:p>
              </table:table-cell>
            </table:table-row>
            <table:table-row>
              <table:table-cell office:value-type="string">
                <text:p>3562</text:p>
              </table:table-cell>
              <table:table-cell office:value-type="float" office:value="734.4111328125">
                <text:p>734.4111328125</text:p>
              </table:table-cell>
              <table:table-cell office:value-type="float" office:value="-0.007842532">
                <text:p>-0.007842532</text:p>
              </table:table-cell>
            </table:table-row>
            <table:table-row>
              <table:table-cell office:value-type="string">
                <text:p>3563</text:p>
              </table:table-cell>
              <table:table-cell office:value-type="float" office:value="734.531433105469">
                <text:p>734.531433105469</text:p>
              </table:table-cell>
              <table:table-cell office:value-type="float" office:value="-0.002254732">
                <text:p>-0.002254732</text:p>
              </table:table-cell>
            </table:table-row>
            <table:table-row>
              <table:table-cell office:value-type="string">
                <text:p>3564</text:p>
              </table:table-cell>
              <table:table-cell office:value-type="float" office:value="734.651672363281">
                <text:p>734.651672363281</text:p>
              </table:table-cell>
              <table:table-cell office:value-type="float" office:value="0.006489584">
                <text:p>0.006489584</text:p>
              </table:table-cell>
            </table:table-row>
            <table:table-row>
              <table:table-cell office:value-type="string">
                <text:p>3565</text:p>
              </table:table-cell>
              <table:table-cell office:value-type="float" office:value="734.771911621094">
                <text:p>734.771911621094</text:p>
              </table:table-cell>
              <table:table-cell office:value-type="float" office:value="-0.0002049722">
                <text:p>-0.0002049722</text:p>
              </table:table-cell>
            </table:table-row>
            <table:table-row>
              <table:table-cell office:value-type="string">
                <text:p>3566</text:p>
              </table:table-cell>
              <table:table-cell office:value-type="float" office:value="734.892150878906">
                <text:p>734.892150878906</text:p>
              </table:table-cell>
              <table:table-cell office:value-type="float" office:value="-0.006652401">
                <text:p>-0.006652401</text:p>
              </table:table-cell>
            </table:table-row>
            <table:table-row>
              <table:table-cell office:value-type="string">
                <text:p>3567</text:p>
              </table:table-cell>
              <table:table-cell office:value-type="float" office:value="735.012451171875">
                <text:p>735.012451171875</text:p>
              </table:table-cell>
              <table:table-cell office:value-type="float" office:value="-0.006172734">
                <text:p>-0.006172734</text:p>
              </table:table-cell>
            </table:table-row>
            <table:table-row>
              <table:table-cell office:value-type="string">
                <text:p>3568</text:p>
              </table:table-cell>
              <table:table-cell office:value-type="float" office:value="735.132690429688">
                <text:p>735.1326904296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69</text:p>
              </table:table-cell>
              <table:table-cell office:value-type="float" office:value="735.2529296875">
                <text:p>735.2529296875</text:p>
              </table:table-cell>
              <table:table-cell office:value-type="float" office:value="0.01654438">
                <text:p>0.01654438</text:p>
              </table:table-cell>
            </table:table-row>
            <table:table-row>
              <table:table-cell office:value-type="string">
                <text:p>3570</text:p>
              </table:table-cell>
              <table:table-cell office:value-type="float" office:value="735.373168945313">
                <text:p>735.373168945313</text:p>
              </table:table-cell>
              <table:table-cell office:value-type="float" office:value="0.003865267">
                <text:p>0.003865267</text:p>
              </table:table-cell>
            </table:table-row>
            <table:table-row>
              <table:table-cell office:value-type="string">
                <text:p>3571</text:p>
              </table:table-cell>
              <table:table-cell office:value-type="float" office:value="735.493408203125">
                <text:p>735.493408203125</text:p>
              </table:table-cell>
              <table:table-cell office:value-type="float" office:value="-0.00102458">
                <text:p>-0.00102458</text:p>
              </table:table-cell>
            </table:table-row>
            <table:table-row>
              <table:table-cell office:value-type="string">
                <text:p>3572</text:p>
              </table:table-cell>
              <table:table-cell office:value-type="float" office:value="735.613708496094">
                <text:p>735.613708496094</text:p>
              </table:table-cell>
              <table:table-cell office:value-type="float" office:value="0.00224182">
                <text:p>0.00224182</text:p>
              </table:table-cell>
            </table:table-row>
            <table:table-row>
              <table:table-cell office:value-type="string">
                <text:p>3573</text:p>
              </table:table-cell>
              <table:table-cell office:value-type="float" office:value="735.733947753906">
                <text:p>735.733947753906</text:p>
              </table:table-cell>
              <table:table-cell office:value-type="float" office:value="0.005059972">
                <text:p>0.005059972</text:p>
              </table:table-cell>
            </table:table-row>
            <table:table-row>
              <table:table-cell office:value-type="string">
                <text:p>3574</text:p>
              </table:table-cell>
              <table:table-cell office:value-type="float" office:value="735.854187011719">
                <text:p>735.854187011719</text:p>
              </table:table-cell>
              <table:table-cell office:value-type="float" office:value="0.007961347">
                <text:p>0.007961347</text:p>
              </table:table-cell>
            </table:table-row>
            <table:table-row>
              <table:table-cell office:value-type="string">
                <text:p>3575</text:p>
              </table:table-cell>
              <table:table-cell office:value-type="float" office:value="735.974426269531">
                <text:p>735.974426269531</text:p>
              </table:table-cell>
              <table:table-cell office:value-type="float" office:value="0.002794058">
                <text:p>0.002794058</text:p>
              </table:table-cell>
            </table:table-row>
            <table:table-row>
              <table:table-cell office:value-type="string">
                <text:p>3576</text:p>
              </table:table-cell>
              <table:table-cell office:value-type="float" office:value="736.094665527344">
                <text:p>736.094665527344</text:p>
              </table:table-cell>
              <table:table-cell office:value-type="float" office:value="0.002777906">
                <text:p>0.002777906</text:p>
              </table:table-cell>
            </table:table-row>
            <table:table-row>
              <table:table-cell office:value-type="string">
                <text:p>3577</text:p>
              </table:table-cell>
              <table:table-cell office:value-type="float" office:value="736.214965820313">
                <text:p>736.214965820313</text:p>
              </table:table-cell>
              <table:table-cell office:value-type="float" office:value="-0.004512061">
                <text:p>-0.004512061</text:p>
              </table:table-cell>
            </table:table-row>
            <table:table-row>
              <table:table-cell office:value-type="string">
                <text:p>3578</text:p>
              </table:table-cell>
              <table:table-cell office:value-type="float" office:value="736.335205078125">
                <text:p>736.335205078125</text:p>
              </table:table-cell>
              <table:table-cell office:value-type="float" office:value="0.0005544168">
                <text:p>0.0005544168</text:p>
              </table:table-cell>
            </table:table-row>
            <table:table-row>
              <table:table-cell office:value-type="string">
                <text:p>3579</text:p>
              </table:table-cell>
              <table:table-cell office:value-type="float" office:value="736.455444335938">
                <text:p>736.455444335938</text:p>
              </table:table-cell>
              <table:table-cell office:value-type="float" office:value="0.004827369">
                <text:p>0.004827369</text:p>
              </table:table-cell>
            </table:table-row>
            <table:table-row>
              <table:table-cell office:value-type="string">
                <text:p>3580</text:p>
              </table:table-cell>
              <table:table-cell office:value-type="float" office:value="736.57568359375">
                <text:p>736.57568359375</text:p>
              </table:table-cell>
              <table:table-cell office:value-type="float" office:value="0.00270424">
                <text:p>0.00270424</text:p>
              </table:table-cell>
            </table:table-row>
            <table:table-row>
              <table:table-cell office:value-type="string">
                <text:p>3581</text:p>
              </table:table-cell>
              <table:table-cell office:value-type="float" office:value="736.695983886719">
                <text:p>736.695983886719</text:p>
              </table:table-cell>
              <table:table-cell office:value-type="float" office:value="0.01129091">
                <text:p>0.01129091</text:p>
              </table:table-cell>
            </table:table-row>
            <table:table-row>
              <table:table-cell office:value-type="string">
                <text:p>3582</text:p>
              </table:table-cell>
              <table:table-cell office:value-type="float" office:value="736.816223144531">
                <text:p>736.816223144531</text:p>
              </table:table-cell>
              <table:table-cell office:value-type="float" office:value="0.006560386">
                <text:p>0.006560386</text:p>
              </table:table-cell>
            </table:table-row>
            <table:table-row>
              <table:table-cell office:value-type="string">
                <text:p>3583</text:p>
              </table:table-cell>
              <table:table-cell office:value-type="float" office:value="736.936462402344">
                <text:p>736.936462402344</text:p>
              </table:table-cell>
              <table:table-cell office:value-type="float" office:value="0.01050243">
                <text:p>0.01050243</text:p>
              </table:table-cell>
            </table:table-row>
            <table:table-row>
              <table:table-cell office:value-type="string">
                <text:p>3584</text:p>
              </table:table-cell>
              <table:table-cell office:value-type="float" office:value="737.056701660156">
                <text:p>737.056701660156</text:p>
              </table:table-cell>
              <table:table-cell office:value-type="float" office:value="-0.001088252">
                <text:p>-0.001088252</text:p>
              </table:table-cell>
            </table:table-row>
            <table:table-row>
              <table:table-cell office:value-type="string">
                <text:p>3585</text:p>
              </table:table-cell>
              <table:table-cell office:value-type="float" office:value="737.177001953125">
                <text:p>737.177001953125</text:p>
              </table:table-cell>
              <table:table-cell office:value-type="float" office:value="0.004452866">
                <text:p>0.004452866</text:p>
              </table:table-cell>
            </table:table-row>
            <table:table-row>
              <table:table-cell office:value-type="string">
                <text:p>3586</text:p>
              </table:table-cell>
              <table:table-cell office:value-type="float" office:value="737.297241210938">
                <text:p>737.297241210938</text:p>
              </table:table-cell>
              <table:table-cell office:value-type="float" office:value="0.005189405">
                <text:p>0.005189405</text:p>
              </table:table-cell>
            </table:table-row>
            <table:table-row>
              <table:table-cell office:value-type="string">
                <text:p>3587</text:p>
              </table:table-cell>
              <table:table-cell office:value-type="float" office:value="737.41748046875">
                <text:p>737.41748046875</text:p>
              </table:table-cell>
              <table:table-cell office:value-type="float" office:value="0.003112115">
                <text:p>0.003112115</text:p>
              </table:table-cell>
            </table:table-row>
            <table:table-row>
              <table:table-cell office:value-type="string">
                <text:p>3588</text:p>
              </table:table-cell>
              <table:table-cell office:value-type="float" office:value="737.537719726563">
                <text:p>737.537719726563</text:p>
              </table:table-cell>
              <table:table-cell office:value-type="float" office:value="0.002928647">
                <text:p>0.002928647</text:p>
              </table:table-cell>
            </table:table-row>
            <table:table-row>
              <table:table-cell office:value-type="string">
                <text:p>3589</text:p>
              </table:table-cell>
              <table:table-cell office:value-type="float" office:value="737.658020019531">
                <text:p>737.658020019531</text:p>
              </table:table-cell>
              <table:table-cell office:value-type="float" office:value="-0.008219481">
                <text:p>-0.008219481</text:p>
              </table:table-cell>
            </table:table-row>
            <table:table-row>
              <table:table-cell office:value-type="string">
                <text:p>3590</text:p>
              </table:table-cell>
              <table:table-cell office:value-type="float" office:value="737.778259277344">
                <text:p>737.778259277344</text:p>
              </table:table-cell>
              <table:table-cell office:value-type="float" office:value="0.004846072">
                <text:p>0.004846072</text:p>
              </table:table-cell>
            </table:table-row>
            <table:table-row>
              <table:table-cell office:value-type="string">
                <text:p>3591</text:p>
              </table:table-cell>
              <table:table-cell office:value-type="float" office:value="737.898498535156">
                <text:p>737.898498535156</text:p>
              </table:table-cell>
              <table:table-cell office:value-type="float" office:value="0.00246843">
                <text:p>0.00246843</text:p>
              </table:table-cell>
            </table:table-row>
            <table:table-row>
              <table:table-cell office:value-type="string">
                <text:p>3592</text:p>
              </table:table-cell>
              <table:table-cell office:value-type="float" office:value="738.018737792969">
                <text:p>738.018737792969</text:p>
              </table:table-cell>
              <table:table-cell office:value-type="float" office:value="0.004509348">
                <text:p>0.004509348</text:p>
              </table:table-cell>
            </table:table-row>
            <table:table-row>
              <table:table-cell office:value-type="string">
                <text:p>3593</text:p>
              </table:table-cell>
              <table:table-cell office:value-type="float" office:value="738.139038085938">
                <text:p>738.139038085938</text:p>
              </table:table-cell>
              <table:table-cell office:value-type="float" office:value="0.004272419">
                <text:p>0.004272419</text:p>
              </table:table-cell>
            </table:table-row>
            <table:table-row>
              <table:table-cell office:value-type="string">
                <text:p>3594</text:p>
              </table:table-cell>
              <table:table-cell office:value-type="float" office:value="738.25927734375">
                <text:p>738.25927734375</text:p>
              </table:table-cell>
              <table:table-cell office:value-type="float" office:value="-0.00201429">
                <text:p>-0.00201429</text:p>
              </table:table-cell>
            </table:table-row>
            <table:table-row>
              <table:table-cell office:value-type="string">
                <text:p>3595</text:p>
              </table:table-cell>
              <table:table-cell office:value-type="float" office:value="738.379516601563">
                <text:p>738.379516601563</text:p>
              </table:table-cell>
              <table:table-cell office:value-type="float" office:value="0.01393956">
                <text:p>0.01393956</text:p>
              </table:table-cell>
            </table:table-row>
            <table:table-row>
              <table:table-cell office:value-type="string">
                <text:p>3596</text:p>
              </table:table-cell>
              <table:table-cell office:value-type="float" office:value="738.499755859375">
                <text:p>738.499755859375</text:p>
              </table:table-cell>
              <table:table-cell office:value-type="float" office:value="0.004463307">
                <text:p>0.004463307</text:p>
              </table:table-cell>
            </table:table-row>
            <table:table-row>
              <table:table-cell office:value-type="string">
                <text:p>3597</text:p>
              </table:table-cell>
              <table:table-cell office:value-type="float" office:value="738.620056152344">
                <text:p>738.620056152344</text:p>
              </table:table-cell>
              <table:table-cell office:value-type="float" office:value="-0.004559968">
                <text:p>-0.004559968</text:p>
              </table:table-cell>
            </table:table-row>
            <table:table-row>
              <table:table-cell office:value-type="string">
                <text:p>3598</text:p>
              </table:table-cell>
              <table:table-cell office:value-type="float" office:value="738.740295410156">
                <text:p>738.740295410156</text:p>
              </table:table-cell>
              <table:table-cell office:value-type="float" office:value="-0.0008570961">
                <text:p>-0.0008570961</text:p>
              </table:table-cell>
            </table:table-row>
            <table:table-row>
              <table:table-cell office:value-type="string">
                <text:p>3599</text:p>
              </table:table-cell>
              <table:table-cell office:value-type="float" office:value="738.860534667969">
                <text:p>738.860534667969</text:p>
              </table:table-cell>
              <table:table-cell office:value-type="float" office:value="-0.004728673">
                <text:p>-0.004728673</text:p>
              </table:table-cell>
            </table:table-row>
            <table:table-row>
              <table:table-cell office:value-type="string">
                <text:p>3600</text:p>
              </table:table-cell>
              <table:table-cell office:value-type="float" office:value="738.980773925781">
                <text:p>738.980773925781</text:p>
              </table:table-cell>
              <table:table-cell office:value-type="float" office:value="0.01167291">
                <text:p>0.01167291</text:p>
              </table:table-cell>
            </table:table-row>
            <table:table-row>
              <table:table-cell office:value-type="string">
                <text:p>3601</text:p>
              </table:table-cell>
              <table:table-cell office:value-type="float" office:value="739.10107421875">
                <text:p>739.10107421875</text:p>
              </table:table-cell>
              <table:table-cell office:value-type="float" office:value="-0.003598294">
                <text:p>-0.003598294</text:p>
              </table:table-cell>
            </table:table-row>
            <table:table-row>
              <table:table-cell office:value-type="string">
                <text:p>3602</text:p>
              </table:table-cell>
              <table:table-cell office:value-type="float" office:value="739.221313476563">
                <text:p>739.221313476563</text:p>
              </table:table-cell>
              <table:table-cell office:value-type="float" office:value="0.006974582">
                <text:p>0.006974582</text:p>
              </table:table-cell>
            </table:table-row>
            <table:table-row>
              <table:table-cell office:value-type="string">
                <text:p>3603</text:p>
              </table:table-cell>
              <table:table-cell office:value-type="float" office:value="739.341552734375">
                <text:p>739.341552734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04</text:p>
              </table:table-cell>
              <table:table-cell office:value-type="float" office:value="739.461791992188">
                <text:p>739.461791992188</text:p>
              </table:table-cell>
              <table:table-cell office:value-type="float" office:value="0.0001195212">
                <text:p>0.0001195212</text:p>
              </table:table-cell>
            </table:table-row>
            <table:table-row>
              <table:table-cell office:value-type="string">
                <text:p>3605</text:p>
              </table:table-cell>
              <table:table-cell office:value-type="float" office:value="739.582092285156">
                <text:p>739.582092285156</text:p>
              </table:table-cell>
              <table:table-cell office:value-type="float" office:value="-0.004632917">
                <text:p>-0.004632917</text:p>
              </table:table-cell>
            </table:table-row>
            <table:table-row>
              <table:table-cell office:value-type="string">
                <text:p>3606</text:p>
              </table:table-cell>
              <table:table-cell office:value-type="float" office:value="739.702331542969">
                <text:p>739.702331542969</text:p>
              </table:table-cell>
              <table:table-cell office:value-type="float" office:value="-0.009244405">
                <text:p>-0.009244405</text:p>
              </table:table-cell>
            </table:table-row>
            <table:table-row>
              <table:table-cell office:value-type="string">
                <text:p>3607</text:p>
              </table:table-cell>
              <table:table-cell office:value-type="float" office:value="739.822570800781">
                <text:p>739.822570800781</text:p>
              </table:table-cell>
              <table:table-cell office:value-type="float" office:value="-0.003175896">
                <text:p>-0.003175896</text:p>
              </table:table-cell>
            </table:table-row>
            <table:table-row>
              <table:table-cell office:value-type="string">
                <text:p>3608</text:p>
              </table:table-cell>
              <table:table-cell office:value-type="float" office:value="739.942810058594">
                <text:p>739.942810058594</text:p>
              </table:table-cell>
              <table:table-cell office:value-type="float" office:value="-0.01003124">
                <text:p>-0.01003124</text:p>
              </table:table-cell>
            </table:table-row>
            <table:table-row>
              <table:table-cell office:value-type="string">
                <text:p>3609</text:p>
              </table:table-cell>
              <table:table-cell office:value-type="float" office:value="740.063110351563">
                <text:p>740.063110351563</text:p>
              </table:table-cell>
              <table:table-cell office:value-type="float" office:value="-0.004512441">
                <text:p>-0.004512441</text:p>
              </table:table-cell>
            </table:table-row>
            <table:table-row>
              <table:table-cell office:value-type="string">
                <text:p>3610</text:p>
              </table:table-cell>
              <table:table-cell office:value-type="float" office:value="740.183349609375">
                <text:p>740.183349609375</text:p>
              </table:table-cell>
              <table:table-cell office:value-type="float" office:value="-0.002788797">
                <text:p>-0.002788797</text:p>
              </table:table-cell>
            </table:table-row>
            <table:table-row>
              <table:table-cell office:value-type="string">
                <text:p>3611</text:p>
              </table:table-cell>
              <table:table-cell office:value-type="float" office:value="740.303588867188">
                <text:p>740.303588867188</text:p>
              </table:table-cell>
              <table:table-cell office:value-type="float" office:value="-0.0008104361">
                <text:p>-0.0008104361</text:p>
              </table:table-cell>
            </table:table-row>
            <table:table-row>
              <table:table-cell office:value-type="string">
                <text:p>3612</text:p>
              </table:table-cell>
              <table:table-cell office:value-type="float" office:value="740.423889160156">
                <text:p>740.423889160156</text:p>
              </table:table-cell>
              <table:table-cell office:value-type="float" office:value="0.009043">
                <text:p>0.009043</text:p>
              </table:table-cell>
            </table:table-row>
            <table:table-row>
              <table:table-cell office:value-type="string">
                <text:p>3613</text:p>
              </table:table-cell>
              <table:table-cell office:value-type="float" office:value="740.544128417969">
                <text:p>740.544128417969</text:p>
              </table:table-cell>
              <table:table-cell office:value-type="float" office:value="0.01281781">
                <text:p>0.01281781</text:p>
              </table:table-cell>
            </table:table-row>
            <table:table-row>
              <table:table-cell office:value-type="string">
                <text:p>3614</text:p>
              </table:table-cell>
              <table:table-cell office:value-type="float" office:value="740.664367675781">
                <text:p>740.664367675781</text:p>
              </table:table-cell>
              <table:table-cell office:value-type="float" office:value="-0.006709137">
                <text:p>-0.006709137</text:p>
              </table:table-cell>
            </table:table-row>
            <table:table-row>
              <table:table-cell office:value-type="string">
                <text:p>3615</text:p>
              </table:table-cell>
              <table:table-cell office:value-type="float" office:value="740.784606933594">
                <text:p>740.784606933594</text:p>
              </table:table-cell>
              <table:table-cell office:value-type="float" office:value="0.008542291">
                <text:p>0.008542291</text:p>
              </table:table-cell>
            </table:table-row>
            <table:table-row>
              <table:table-cell office:value-type="string">
                <text:p>3616</text:p>
              </table:table-cell>
              <table:table-cell office:value-type="float" office:value="740.904907226563">
                <text:p>740.904907226563</text:p>
              </table:table-cell>
              <table:table-cell office:value-type="float" office:value="0.002022861">
                <text:p>0.002022861</text:p>
              </table:table-cell>
            </table:table-row>
            <table:table-row>
              <table:table-cell office:value-type="string">
                <text:p>3617</text:p>
              </table:table-cell>
              <table:table-cell office:value-type="float" office:value="741.025146484375">
                <text:p>741.025146484375</text:p>
              </table:table-cell>
              <table:table-cell office:value-type="float" office:value="-0.005929402">
                <text:p>-0.005929402</text:p>
              </table:table-cell>
            </table:table-row>
            <table:table-row>
              <table:table-cell office:value-type="string">
                <text:p>3618</text:p>
              </table:table-cell>
              <table:table-cell office:value-type="float" office:value="741.145385742188">
                <text:p>741.145385742188</text:p>
              </table:table-cell>
              <table:table-cell office:value-type="float" office:value="-0.00443158">
                <text:p>-0.00443158</text:p>
              </table:table-cell>
            </table:table-row>
            <table:table-row>
              <table:table-cell office:value-type="string">
                <text:p>3619</text:p>
              </table:table-cell>
              <table:table-cell office:value-type="float" office:value="741.265625">
                <text:p>741.265625</text:p>
              </table:table-cell>
              <table:table-cell office:value-type="float" office:value="0.02115045">
                <text:p>0.02115045</text:p>
              </table:table-cell>
            </table:table-row>
            <table:table-row>
              <table:table-cell office:value-type="string">
                <text:p>3620</text:p>
              </table:table-cell>
              <table:table-cell office:value-type="float" office:value="741.385925292969">
                <text:p>741.385925292969</text:p>
              </table:table-cell>
              <table:table-cell office:value-type="float" office:value="-0.005302818">
                <text:p>-0.005302818</text:p>
              </table:table-cell>
            </table:table-row>
            <table:table-row>
              <table:table-cell office:value-type="string">
                <text:p>3621</text:p>
              </table:table-cell>
              <table:table-cell office:value-type="float" office:value="741.506164550781">
                <text:p>741.506164550781</text:p>
              </table:table-cell>
              <table:table-cell office:value-type="float" office:value="-0.0004888167">
                <text:p>-0.0004888167</text:p>
              </table:table-cell>
            </table:table-row>
            <table:table-row>
              <table:table-cell office:value-type="string">
                <text:p>3622</text:p>
              </table:table-cell>
              <table:table-cell office:value-type="float" office:value="741.626403808594">
                <text:p>741.626403808594</text:p>
              </table:table-cell>
              <table:table-cell office:value-type="float" office:value="0.00772407">
                <text:p>0.00772407</text:p>
              </table:table-cell>
            </table:table-row>
            <table:table-row>
              <table:table-cell office:value-type="string">
                <text:p>3623</text:p>
              </table:table-cell>
              <table:table-cell office:value-type="float" office:value="741.746704101563">
                <text:p>741.746704101563</text:p>
              </table:table-cell>
              <table:table-cell office:value-type="float" office:value="-0.0005913894">
                <text:p>-0.0005913894</text:p>
              </table:table-cell>
            </table:table-row>
            <table:table-row>
              <table:table-cell office:value-type="string">
                <text:p>3624</text:p>
              </table:table-cell>
              <table:table-cell office:value-type="float" office:value="741.866943359375">
                <text:p>741.866943359375</text:p>
              </table:table-cell>
              <table:table-cell office:value-type="float" office:value="0.0170593">
                <text:p>0.0170593</text:p>
              </table:table-cell>
            </table:table-row>
            <table:table-row>
              <table:table-cell office:value-type="string">
                <text:p>3625</text:p>
              </table:table-cell>
              <table:table-cell office:value-type="float" office:value="741.987182617188">
                <text:p>741.987182617188</text:p>
              </table:table-cell>
              <table:table-cell office:value-type="float" office:value="-0.002890004">
                <text:p>-0.002890004</text:p>
              </table:table-cell>
            </table:table-row>
            <table:table-row>
              <table:table-cell office:value-type="string">
                <text:p>3626</text:p>
              </table:table-cell>
              <table:table-cell office:value-type="float" office:value="742.107421875">
                <text:p>742.107421875</text:p>
              </table:table-cell>
              <table:table-cell office:value-type="float" office:value="0.0057363">
                <text:p>0.0057363</text:p>
              </table:table-cell>
            </table:table-row>
            <table:table-row>
              <table:table-cell office:value-type="string">
                <text:p>3627</text:p>
              </table:table-cell>
              <table:table-cell office:value-type="float" office:value="742.227722167969">
                <text:p>742.227722167969</text:p>
              </table:table-cell>
              <table:table-cell office:value-type="float" office:value="0.006445434">
                <text:p>0.006445434</text:p>
              </table:table-cell>
            </table:table-row>
            <table:table-row>
              <table:table-cell office:value-type="string">
                <text:p>3628</text:p>
              </table:table-cell>
              <table:table-cell office:value-type="float" office:value="742.347961425781">
                <text:p>742.347961425781</text:p>
              </table:table-cell>
              <table:table-cell office:value-type="float" office:value="0.002233427">
                <text:p>0.002233427</text:p>
              </table:table-cell>
            </table:table-row>
            <table:table-row>
              <table:table-cell office:value-type="string">
                <text:p>3629</text:p>
              </table:table-cell>
              <table:table-cell office:value-type="float" office:value="742.468200683594">
                <text:p>742.468200683594</text:p>
              </table:table-cell>
              <table:table-cell office:value-type="float" office:value="-0.004742227">
                <text:p>-0.004742227</text:p>
              </table:table-cell>
            </table:table-row>
            <table:table-row>
              <table:table-cell office:value-type="string">
                <text:p>3630</text:p>
              </table:table-cell>
              <table:table-cell office:value-type="float" office:value="742.588439941406">
                <text:p>742.588439941406</text:p>
              </table:table-cell>
              <table:table-cell office:value-type="float" office:value="0.0002690025">
                <text:p>0.0002690025</text:p>
              </table:table-cell>
            </table:table-row>
            <table:table-row>
              <table:table-cell office:value-type="string">
                <text:p>3631</text:p>
              </table:table-cell>
              <table:table-cell office:value-type="float" office:value="742.708740234375">
                <text:p>742.708740234375</text:p>
              </table:table-cell>
              <table:table-cell office:value-type="float" office:value="-0.002327554">
                <text:p>-0.002327554</text:p>
              </table:table-cell>
            </table:table-row>
            <table:table-row>
              <table:table-cell office:value-type="string">
                <text:p>3632</text:p>
              </table:table-cell>
              <table:table-cell office:value-type="float" office:value="742.828979492188">
                <text:p>742.828979492188</text:p>
              </table:table-cell>
              <table:table-cell office:value-type="float" office:value="-0.002363154">
                <text:p>-0.002363154</text:p>
              </table:table-cell>
            </table:table-row>
            <table:table-row>
              <table:table-cell office:value-type="string">
                <text:p>3633</text:p>
              </table:table-cell>
              <table:table-cell office:value-type="float" office:value="742.94921875">
                <text:p>742.94921875</text:p>
              </table:table-cell>
              <table:table-cell office:value-type="float" office:value="0.004480058">
                <text:p>0.004480058</text:p>
              </table:table-cell>
            </table:table-row>
            <table:table-row>
              <table:table-cell office:value-type="string">
                <text:p>3634</text:p>
              </table:table-cell>
              <table:table-cell office:value-type="float" office:value="743.069519042969">
                <text:p>743.069519042969</text:p>
              </table:table-cell>
              <table:table-cell office:value-type="float" office:value="0.01098586">
                <text:p>0.01098586</text:p>
              </table:table-cell>
            </table:table-row>
            <table:table-row>
              <table:table-cell office:value-type="string">
                <text:p>3635</text:p>
              </table:table-cell>
              <table:table-cell office:value-type="float" office:value="743.189758300781">
                <text:p>743.189758300781</text:p>
              </table:table-cell>
              <table:table-cell office:value-type="float" office:value="0.001043033">
                <text:p>0.001043033</text:p>
              </table:table-cell>
            </table:table-row>
            <table:table-row>
              <table:table-cell office:value-type="string">
                <text:p>3636</text:p>
              </table:table-cell>
              <table:table-cell office:value-type="float" office:value="743.309997558594">
                <text:p>743.309997558594</text:p>
              </table:table-cell>
              <table:table-cell office:value-type="float" office:value="-0.009361899">
                <text:p>-0.009361899</text:p>
              </table:table-cell>
            </table:table-row>
            <table:table-row>
              <table:table-cell office:value-type="string">
                <text:p>3637</text:p>
              </table:table-cell>
              <table:table-cell office:value-type="float" office:value="743.430236816406">
                <text:p>743.430236816406</text:p>
              </table:table-cell>
              <table:table-cell office:value-type="float" office:value="0.003119204">
                <text:p>0.003119204</text:p>
              </table:table-cell>
            </table:table-row>
            <table:table-row>
              <table:table-cell office:value-type="string">
                <text:p>3638</text:p>
              </table:table-cell>
              <table:table-cell office:value-type="float" office:value="743.550537109375">
                <text:p>743.550537109375</text:p>
              </table:table-cell>
              <table:table-cell office:value-type="float" office:value="-0.008157416">
                <text:p>-0.008157416</text:p>
              </table:table-cell>
            </table:table-row>
            <table:table-row>
              <table:table-cell office:value-type="string">
                <text:p>3639</text:p>
              </table:table-cell>
              <table:table-cell office:value-type="float" office:value="743.670776367188">
                <text:p>743.670776367188</text:p>
              </table:table-cell>
              <table:table-cell office:value-type="float" office:value="-0.006272774">
                <text:p>-0.006272774</text:p>
              </table:table-cell>
            </table:table-row>
            <table:table-row>
              <table:table-cell office:value-type="string">
                <text:p>3640</text:p>
              </table:table-cell>
              <table:table-cell office:value-type="float" office:value="743.791015625">
                <text:p>743.791015625</text:p>
              </table:table-cell>
              <table:table-cell office:value-type="float" office:value="-0.006665548">
                <text:p>-0.006665548</text:p>
              </table:table-cell>
            </table:table-row>
            <table:table-row>
              <table:table-cell office:value-type="string">
                <text:p>3641</text:p>
              </table:table-cell>
              <table:table-cell office:value-type="float" office:value="743.911254882813">
                <text:p>743.911254882813</text:p>
              </table:table-cell>
              <table:table-cell office:value-type="float" office:value="0.02837793">
                <text:p>0.02837793</text:p>
              </table:table-cell>
            </table:table-row>
            <table:table-row>
              <table:table-cell office:value-type="string">
                <text:p>3642</text:p>
              </table:table-cell>
              <table:table-cell office:value-type="float" office:value="744.031555175781">
                <text:p>744.031555175781</text:p>
              </table:table-cell>
              <table:table-cell office:value-type="float" office:value="-0.007157257">
                <text:p>-0.007157257</text:p>
              </table:table-cell>
            </table:table-row>
            <table:table-row>
              <table:table-cell office:value-type="string">
                <text:p>3643</text:p>
              </table:table-cell>
              <table:table-cell office:value-type="float" office:value="744.151794433594">
                <text:p>744.151794433594</text:p>
              </table:table-cell>
              <table:table-cell office:value-type="float" office:value="-0.05616599">
                <text:p>-0.05616599</text:p>
              </table:table-cell>
            </table:table-row>
            <table:table-row>
              <table:table-cell office:value-type="string">
                <text:p>3644</text:p>
              </table:table-cell>
              <table:table-cell office:value-type="float" office:value="744.272033691406">
                <text:p>744.272033691406</text:p>
              </table:table-cell>
              <table:table-cell office:value-type="float" office:value="-0.05737171">
                <text:p>-0.05737171</text:p>
              </table:table-cell>
            </table:table-row>
            <table:table-row>
              <table:table-cell office:value-type="string">
                <text:p>3645</text:p>
              </table:table-cell>
              <table:table-cell office:value-type="float" office:value="744.392333984375">
                <text:p>744.392333984375</text:p>
              </table:table-cell>
              <table:table-cell office:value-type="float" office:value="-0.05955383">
                <text:p>-0.05955383</text:p>
              </table:table-cell>
            </table:table-row>
            <table:table-row>
              <table:table-cell office:value-type="string">
                <text:p>3646</text:p>
              </table:table-cell>
              <table:table-cell office:value-type="float" office:value="744.512573242188">
                <text:p>744.512573242188</text:p>
              </table:table-cell>
              <table:table-cell office:value-type="float" office:value="-0.05903655">
                <text:p>-0.05903655</text:p>
              </table:table-cell>
            </table:table-row>
            <table:table-row>
              <table:table-cell office:value-type="string">
                <text:p>3647</text:p>
              </table:table-cell>
              <table:table-cell office:value-type="float" office:value="744.6328125">
                <text:p>744.6328125</text:p>
              </table:table-cell>
              <table:table-cell office:value-type="float" office:value="-0.06006065">
                <text:p>-0.06006065</text:p>
              </table:table-cell>
            </table:table-row>
            <table:table-row>
              <table:table-cell office:value-type="string">
                <text:p>3648</text:p>
              </table:table-cell>
              <table:table-cell office:value-type="float" office:value="744.753051757813">
                <text:p>744.753051757813</text:p>
              </table:table-cell>
              <table:table-cell office:value-type="float" office:value="-0.0597744">
                <text:p>-0.059774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0$Win32 OpenOffice.org_project/4110m2$Build-980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